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888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0.866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0.84cm"/>
    </style:style>
    <style:style style:name="co12" style:family="table-column">
      <style:table-column-properties fo:break-before="auto" style:column-width="3.803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1.706cm"/>
    </style:style>
    <style:style style:name="co18" style:family="table-column">
      <style:table-column-properties fo:break-before="auto" style:column-width="2.824cm"/>
    </style:style>
    <style:style style:name="co19" style:family="table-column">
      <style:table-column-properties fo:break-before="auto" style:column-width="6.237cm"/>
    </style:style>
    <style:style style:name="co20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873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2.125cm"/>
    </style:style>
    <style:style style:name="co24" style:family="table-column">
      <style:table-column-properties fo:break-before="auto" style:column-width="2.154cm"/>
    </style:style>
    <style:style style:name="co25" style:family="table-column">
      <style:table-column-properties fo:break-before="auto" style:column-width="2.069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4.083cm"/>
    </style:style>
    <style:style style:name="co28" style:family="table-column">
      <style:table-column-properties fo:break-before="auto" style:column-width="4.279cm"/>
    </style:style>
    <style:style style:name="co29" style:family="table-column">
      <style:table-column-properties fo:break-before="auto" style:column-width="1.538cm"/>
    </style:style>
    <style:style style:name="co30" style:family="table-column">
      <style:table-column-properties fo:break-before="auto" style:column-width="1.51cm"/>
    </style:style>
    <style:style style:name="co31" style:family="table-column">
      <style:table-column-properties fo:break-before="auto" style:column-width="2.21cm"/>
    </style:style>
    <style:style style:name="co32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2.909cm"/>
    </style:style>
    <style:style style:name="co34" style:family="table-column">
      <style:table-column-properties fo:break-before="auto" style:column-width="1.566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677cm"/>
    </style:style>
    <style:style style:name="co37" style:family="table-column">
      <style:table-column-properties fo:break-before="auto" style:column-width="2.489cm"/>
    </style:style>
    <style:style style:name="co38" style:family="table-column">
      <style:table-column-properties fo:break-before="auto" style:column-width="7.105cm"/>
    </style:style>
    <style:style style:name="co39" style:family="table-column">
      <style:table-column-properties fo:break-before="auto" style:column-width="3.385cm"/>
    </style:style>
    <style:style style:name="co40" style:family="table-column">
      <style:table-column-properties fo:break-before="auto" style:column-width="2.406cm"/>
    </style:style>
    <style:style style:name="co41" style:family="table-column">
      <style:table-column-properties fo:break-before="auto" style:column-width="2.35cm"/>
    </style:style>
    <style:style style:name="co42" style:family="table-column">
      <style:table-column-properties fo:break-before="auto" style:column-width="2.852cm"/>
    </style:style>
    <style:style style:name="co43" style:family="table-column">
      <style:table-column-properties fo:break-before="auto" style:column-width="2.769cm"/>
    </style:style>
    <style:style style:name="co44" style:family="table-column">
      <style:table-column-properties fo:break-before="auto" style:column-width="1.203cm"/>
    </style:style>
    <style:style style:name="co45" style:family="table-column">
      <style:table-column-properties fo:break-before="auto" style:column-width="4.307cm"/>
    </style:style>
    <style:style style:name="co46" style:family="table-column">
      <style:table-column-properties fo:break-before="auto" style:column-width="2.432cm"/>
    </style:style>
    <style:style style:name="co47" style:family="table-column">
      <style:table-column-properties fo:break-before="auto" style:column-width="2.321cm"/>
    </style:style>
    <style:style style:name="co48" style:family="table-column">
      <style:table-column-properties fo:break-before="auto" style:column-width="2.798cm"/>
    </style:style>
    <style:style style:name="co49" style:family="table-column">
      <style:table-column-properties fo:break-before="auto" style:column-width="2.265cm"/>
    </style:style>
    <style:style style:name="co50" style:family="table-column">
      <style:table-column-properties fo:break-before="auto" style:column-width="3.664cm"/>
    </style:style>
    <style:style style:name="co51" style:family="table-column">
      <style:table-column-properties fo:break-before="auto" style:column-width="3.328cm"/>
    </style:style>
    <style:style style:name="co52" style:family="table-column">
      <style:table-column-properties fo:break-before="auto" style:column-width="2.574cm"/>
    </style:style>
    <style:style style:name="co53" style:family="table-column">
      <style:table-column-properties fo:break-before="auto" style:column-width="7.384cm"/>
    </style:style>
    <style:style style:name="co54" style:family="table-column">
      <style:table-column-properties fo:break-before="auto" style:column-width="3.524cm"/>
    </style:style>
    <style:style style:name="co55" style:family="table-column">
      <style:table-column-properties fo:break-before="auto" style:column-width="2.461cm"/>
    </style:style>
    <style:style style:name="co56" style:family="table-column">
      <style:table-column-properties fo:break-before="auto" style:column-width="3.859cm"/>
    </style:style>
    <style:style style:name="co57" style:family="table-column">
      <style:table-column-properties fo:break-before="auto" style:column-width="3.133cm"/>
    </style:style>
    <style:style style:name="co58" style:family="table-column">
      <style:table-column-properties fo:break-before="auto" style:column-width="5.286cm"/>
    </style:style>
    <style:style style:name="co59" style:family="table-column">
      <style:table-column-properties fo:break-before="auto" style:column-width="2.965cm"/>
    </style:style>
    <style:style style:name="co60" style:family="table-column">
      <style:table-column-properties fo:break-before="auto" style:column-width="3.161cm"/>
    </style:style>
    <style:style style:name="co61" style:family="table-column">
      <style:table-column-properties fo:break-before="auto" style:column-width="2.993cm"/>
    </style:style>
    <style:style style:name="co62" style:family="table-column">
      <style:table-column-properties fo:break-before="auto" style:column-width="1.09cm"/>
    </style:style>
    <style:style style:name="co63" style:family="table-column">
      <style:table-column-properties fo:break-before="auto" style:column-width="5.957cm"/>
    </style:style>
    <style:style style:name="co64" style:family="table-column">
      <style:table-column-properties fo:break-before="auto" style:column-width="2.88cm"/>
    </style:style>
    <style:style style:name="co65" style:family="table-column">
      <style:table-column-properties fo:break-before="auto" style:column-width="2.685cm"/>
    </style:style>
    <style:style style:name="co66" style:family="table-column">
      <style:table-column-properties fo:break-before="auto" style:column-width="2.713cm"/>
    </style:style>
    <style:style style:name="co67" style:family="table-column">
      <style:table-column-properties fo:break-before="auto" style:column-width="4.699cm"/>
    </style:style>
    <style:style style:name="co68" style:family="table-column">
      <style:table-column-properties fo:break-before="auto" style:column-width="1.819cm"/>
    </style:style>
    <style:style style:name="co69" style:family="table-column">
      <style:table-column-properties fo:break-before="auto" style:column-width="1.649cm"/>
    </style:style>
    <style:style style:name="co70" style:family="table-column">
      <style:table-column-properties fo:break-before="auto" style:column-width="6.126cm"/>
    </style:style>
    <style:style style:name="co71" style:family="table-column">
      <style:table-column-properties fo:break-before="auto" style:column-width="1.901cm"/>
    </style:style>
    <style:style style:name="co72" style:family="table-column">
      <style:table-column-properties fo:break-before="auto" style:column-width="6.992cm"/>
    </style:style>
    <style:style style:name="co73" style:family="table-column">
      <style:table-column-properties fo:break-before="auto" style:column-width="0.699cm"/>
    </style:style>
    <style:style style:name="co74" style:family="table-column">
      <style:table-column-properties fo:break-before="auto" style:column-width="0.644cm"/>
    </style:style>
    <style:style style:name="co75" style:family="table-column">
      <style:table-column-properties fo:break-before="auto" style:column-width="4.56cm"/>
    </style:style>
    <style:style style:name="co76" style:family="table-column">
      <style:table-column-properties fo:break-before="auto" style:column-width="1.453cm"/>
    </style:style>
    <style:style style:name="co77" style:family="table-column">
      <style:table-column-properties fo:break-before="auto" style:column-width="4.447cm"/>
    </style:style>
    <style:style style:name="co78" style:family="table-column">
      <style:table-column-properties fo:break-before="auto" style:column-width="3.999cm"/>
    </style:style>
    <style:style style:name="co79" style:family="table-column">
      <style:table-column-properties fo:break-before="auto" style:column-width="4.112cm"/>
    </style:style>
    <style:style style:name="co80" style:family="table-column">
      <style:table-column-properties fo:break-before="auto" style:column-width="0.979cm"/>
    </style:style>
    <style:style style:name="co81" style:family="table-column">
      <style:table-column-properties fo:break-before="auto" style:column-width="5.343cm"/>
    </style:style>
    <style:style style:name="co82" style:family="table-column">
      <style:table-column-properties fo:break-before="auto" style:column-width="2.545cm"/>
    </style:style>
    <style:style style:name="co83" style:family="table-column">
      <style:table-column-properties fo:break-before="auto" style:column-width="2.5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42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132cm" fo:break-before="auto" style:use-optimal-row-height="fals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0.106cm" fo:break-before="auto" style:use-optimal-row-height="false"/>
    </style:style>
    <style:style style:name="ro20" style:family="table-row">
      <style:table-row-properties style:row-height="0.953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37cm" fo:break-before="auto" style:use-optimal-row-height="false"/>
    </style:style>
    <style:style style:name="ro26" style:family="table-row">
      <style:table-row-properties style:row-height="0.926cm" fo:break-before="auto" style:use-optimal-row-height="false"/>
    </style:style>
    <style:style style:name="ro27" style:family="table-row">
      <style:table-row-properties style:row-height="0.9cm" fo:break-before="auto" style:use-optimal-row-height="false"/>
    </style:style>
    <style:style style:name="ro28" style:family="table-row">
      <style:table-row-properties style:row-height="0.695cm" fo:break-before="auto" style:use-optimal-row-height="true"/>
    </style:style>
    <style:style style:name="ro29" style:family="table-row">
      <style:table-row-properties style:row-height="0.582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1.958cm" fo:break-before="auto" style:use-optimal-row-height="false"/>
    </style:style>
    <style:style style:name="ro32" style:family="table-row">
      <style:table-row-properties style:row-height="1.614cm" fo:break-before="auto" style:use-optimal-row-height="fals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841cm" fo:break-before="auto" style:use-optimal-row-height="true"/>
    </style:style>
    <style:style style:name="ro35" style:family="table-row">
      <style:table-row-properties style:row-height="2.895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Resumen">
      <style:table-properties table:display="false" style:writing-mode="lr-tb"/>
    </style:style>
    <style:style style:name="ta3" style:family="table" style:master-page-name="PageStyle_5f_Presupuesto_5f_Ventas">
      <style:table-properties table:display="true" style:writing-mode="lr-tb"/>
    </style:style>
    <style:style style:name="ta4" style:family="table" style:master-page-name="PageStyle_5f_Inversion_5f_Inicial">
      <style:table-properties table:display="true" style:writing-mode="lr-tb"/>
    </style:style>
    <style:style style:name="ta5" style:family="table" style:master-page-name="PageStyle_5f_Deprecion_5f_VR">
      <style:table-properties table:display="true" style:writing-mode="lr-tb"/>
    </style:style>
    <style:style style:name="ta6" style:family="table" style:master-page-name="PageStyle_5f_Capital_5f_Trabajo">
      <style:table-properties table:display="true" style:writing-mode="lr-tb"/>
    </style:style>
    <style:style style:name="ta7" style:family="table" style:master-page-name="PageStyle_5f_Costos_5f_Ventas">
      <style:table-properties table:display="true" style:writing-mode="lr-tb"/>
    </style:style>
    <style:style style:name="ta8" style:family="table" style:master-page-name="PageStyle_5f_Sueldos">
      <style:table-properties table:display="true" style:writing-mode="lr-tb"/>
    </style:style>
    <style:style style:name="ta9" style:family="table" style:master-page-name="PageStyle_5f_Gastos_5f_Operativos">
      <style:table-properties table:display="true" style:writing-mode="lr-tb"/>
    </style:style>
    <style:style style:name="ta10" style:family="table" style:master-page-name="PageStyle_5f_Costos_5f_Unitario">
      <style:table-properties table:display="true" style:writing-mode="lr-tb"/>
    </style:style>
    <style:style style:name="ta11" style:family="table" style:master-page-name="PageStyle_5f_Punto_5f_Equilibrio">
      <style:table-properties table:display="true" style:writing-mode="lr-tb"/>
    </style:style>
    <style:style style:name="ta12" style:family="table" style:master-page-name="PageStyle_5f_Flujo_5f_Deuda">
      <style:table-properties table:display="true" style:writing-mode="lr-tb"/>
    </style:style>
    <style:style style:name="ta13" style:family="table" style:master-page-name="PageStyle_5f_Estado_5f_Resultados">
      <style:table-properties table:display="true" style:writing-mode="lr-tb"/>
    </style:style>
    <style:style style:name="ta14" style:family="table" style:master-page-name="PageStyle_5f_Ku">
      <style:table-properties table:display="true" style:writing-mode="lr-tb"/>
    </style:style>
    <style:style style:name="ta15" style:family="table" style:master-page-name="PageStyle_5f_Ke_5f_Kwacc">
      <style:table-properties table:display="true" style:writing-mode="lr-tb"/>
    </style:style>
    <style:style style:name="ta16" style:family="table" style:master-page-name="PageStyle_5f_IGV">
      <style:table-properties table:display="true" style:writing-mode="lr-tb"/>
    </style:style>
    <style:style style:name="ta17" style:family="table" style:master-page-name="PageStyle_5f_Flujo_5f_Caja">
      <style:table-properties table:display="true" style:writing-mode="lr-tb"/>
    </style:style>
    <style:style style:name="ta18" style:family="table" style:master-page-name="PageStyle_5f_Rentabilidad">
      <style:table-properties table:display="true" style:writing-mode="lr-tb"/>
    </style:style>
    <style:style style:name="ta19" style:family="table" style:master-page-name="PageStyle_5f_Sensibilidad">
      <style:table-properties table:display="true" style:writing-mode="lr-tb"/>
    </style:style>
    <style:style style:name="ta20" style:family="table" style:master-page-name="PageStyle_5f_Resumen_20_del_20_escenario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12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4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6" style:family="table-cell" style:parent-style-name="Default" style:data-style-name="N14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30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31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8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39" style:family="table-cell" style:parent-style-name="Default">
      <style:table-cell-properties style:diagonal-bl-tr="none" style:diagonal-tl-br="none" fo:border="0.74pt solid #000000" style:rotation-align="none"/>
    </style:style>
    <style:style style:name="ce40" style:family="table-cell" style:parent-style-name="Default" style:data-style-name="N141">
      <style:table-cell-properties style:diagonal-bl-tr="none" style:diagonal-tl-br="none" fo:border="0.74pt solid #000000" style:rotation-align="none"/>
    </style:style>
    <style:style style:name="ce41" style:family="table-cell" style:parent-style-name="Excel_20_Built-in_20_Comma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.291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1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.291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1" loext:color-type="theme"/>
      </style:text-properties>
    </style:style>
    <style:style style:name="ce47" style:family="table-cell" style:parent-style-name="Default">
      <style:table-cell-properties style:cell-protect="protected" style:print-content="true"/>
    </style:style>
    <style:style style:name="ce48" style:family="table-cell" style:parent-style-name="Default" style:data-style-name="N141">
      <style:table-cell-properties style:cell-protect="protected" style:print-content="true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 style:data-style-name="N14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4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4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b9cde5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.291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8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 style:data-style-name="N14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14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4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141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4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41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Excel_20_Built-in_20_Comma" style:data-style-name="N14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Excel_20_Built-in_20_Comma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4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4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4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4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 style:data-style-name="N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d7e4bd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Normal_20_2" style:data-style-name="N3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Normal_20_2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Normal_20_2" style:data-style-name="N14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Normal_20_2" style:data-style-name="N141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Normal_20_2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Normal_20_2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Moneda_20_2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Normal_20_2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Normal_20_2" style:data-style-name="N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Normal_20_2" style:data-style-name="N14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Normal_20_2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Normal_20_2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Normal_20_2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Normal_20_2">
      <style:table-cell-properties fo:background-color="#d8d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Normal_20_2">
      <style:table-cell-properties fo:background-color="#d8d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Normal_20_2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Normal_20_2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20_2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Normal_20_2">
      <style:table-cell-properties fo:border-bottom="1.76pt solid #000000" fo:background-color="#d8d8d8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ce219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ce221" style:family="table-cell" style:parent-style-name="Normal_20_2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Normal_20_2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20_2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Normal_20_2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Currency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Currency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Normal_20_2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Normal_20_2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Normal_20_2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Normal_20_2" style:data-style-name="N4">
      <style:table-cell-properties fo:border-bottom="1.76pt solid #000000" fo:background-color="#d8d8d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Normal_20_2" style:data-style-name="N4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Normal_20_2" style:data-style-name="N3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Normal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Normal_20_2" style:data-style-name="N4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Normal_20_2" style:data-style-name="N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Normal_20_2" style:data-style-name="N3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Normal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Normal_20_2" style:data-style-name="N4">
      <style:table-cell-properties fo:border-bottom="1.76pt solid #000000" fo:background-color="#d8d8d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53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Currency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Normal_20_2" style:data-style-name="N3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Normal_20_2" style:data-style-name="N136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Normal_20_2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Normal_20_2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20_2" style:data-style-name="N3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Normal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Normal_20_2" style:data-style-name="N4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Normal_20_2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Normal_20_2">
      <style:table-cell-properties fo:border-bottom="none" fo:background-color="#d8d8d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4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Normal_20_2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Normal_20_2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Normal_20_2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Normal_20_2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Excel_20_Built-in_20_Currency" style:data-style-name="N13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Normal_20_2" style:data-style-name="N136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Normal_20_2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Normal_20_2" style:data-style-name="N1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Normal_20_2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Normal_20_2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Normal_20_2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Normal_20_2" style:data-style-name="N4">
      <style:table-cell-properties fo:border-bottom="1.76pt solid #000000" fo:background-color="#d8d8d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92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94" style:family="table-cell" style:parent-style-name="Normal_20_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Normal_20_3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00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Normal_20_3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Normal_20_3" style:data-style-name="N3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Normal_20_3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Normal_20_3" style:data-style-name="N3">
      <style:table-cell-properties fo:border-bottom="1.76pt solid #000000" fo:background-color="#b9cde5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09" style:family="table-cell" style:parent-style-name="Normal_20_3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Normal_20_3">
      <style:table-cell-properties fo:border-bottom="none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Normal_20_3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19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Normal_20_3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Normal_20_3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Normal_20_3" style:data-style-name="N4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Normal_20_3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Normal_20_3" style:data-style-name="N4">
      <style:table-cell-properties fo:border-bottom="1.76pt solid #000000" fo:background-color="#b9cde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Normal_20_3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30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Normal_20_3">
      <style:table-cell-properties fo:border-bottom="1.76pt solid #000000" fo:background-color="#b9cd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Normal_20_3" style:data-style-name="N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35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Normal_20_3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Normal_20_3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Normal_20_3" style:data-style-name="N3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Normal_20_3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Normal_20_3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Normal_20_3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Normal_20_3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Normal_20_3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Normal_20_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7" style:family="table-cell" style:parent-style-name="Normal_20_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Normal_20_3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Normal_20_3" style:data-style-name="N137">
      <style:table-cell-properties fo:border-bottom="1.76pt solid #000000" fo:background-color="#b9cde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51" style:family="table-cell" style:parent-style-name="Normal_20_3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Normal_20_3" style:data-style-name="N1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Normal_20_3" style:data-style-name="N1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55" style:family="table-cell" style:parent-style-name="Normal_20_3" style:data-style-name="N13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Normal_20_3" style:data-style-name="N13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Normal_20_3" style:data-style-name="N137">
      <style:table-cell-properties fo:background-color="#b9cd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58" style:family="table-cell" style:parent-style-name="Normal_20_3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Normal_20_3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Normal_20_3" style:data-style-name="N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63" style:family="table-cell" style:parent-style-name="Normal_20_3" style:data-style-name="N4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Normal_20_3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Normal_20_3" style:data-style-name="N4">
      <style:table-cell-properties fo:border-bottom="1.76pt solid #000000" fo:background-color="#b9cde5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67" style:family="table-cell" style:parent-style-name="Normal_20_3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Normal_20_2">
      <style:table-cell-properties fo:background-color="#99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Normal_20_2">
      <style:table-cell-properties fo:border-bottom="0.74pt solid #000000" fo:background-color="#d8d8d8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2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Normal_20_2">
      <style:table-cell-properties fo:border-bottom="0.74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Normal_20_2">
      <style:table-cell-properties fo:border-bottom="0.74pt solid #000000" fo:background-color="#d8d8d8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6" style:family="table-cell" style:parent-style-name="Normal_20_2">
      <style:table-cell-properties fo:border-bottom="1.76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Normal_20_2">
      <style:table-cell-properties fo:border-bottom="1.76pt solid #000000" fo:background-color="#d8d8d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8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Normal_20_2" style:data-style-name="N141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3" style:family="table-cell" style:parent-style-name="Normal_20_2" style:data-style-name="N14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Normal_20_2" style:data-style-name="N14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Normal_20_2" style:data-style-name="N141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Normal_20_2" style:data-style-name="N141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7" style:family="table-cell" style:parent-style-name="Normal_20_2" style:data-style-name="N2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8" style:family="table-cell" style:parent-style-name="Normal_20_2" style:data-style-name="N141">
      <style:table-cell-properties fo:border-bottom="1.76pt solid #000000" fo:background-color="#f2f2f2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Normal_20_2" style:data-style-name="N2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0" style:family="table-cell" style:parent-style-name="Excel_20_Built-in_20_Currency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Currency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Currency" style:data-style-name="N13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ce394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Normal_20_2">
      <style:table-cell-properties fo:background-color="#fbd4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97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39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Normal_20_2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Normal_20_2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0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0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06" style:family="table-cell" style:parent-style-name="Normal_20_2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0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Normal_20_2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18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20" style:family="table-cell" style:parent-style-name="Normal_20_2" style:data-style-name="N135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Normal_20_2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Normal_20_2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Normal_20_2" style:data-style-name="N13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Normal_20_2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28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Normal_20_2">
      <style:table-cell-properties fo:border-bottom="1.76pt solid #000000" fo:background-color="#c0c0c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Normal_20_2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Normal_20_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35" style:family="table-cell" style:parent-style-name="Normal_20_2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Normal_20_2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Normal_20_2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Normal_20_2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Normal_20_2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Normal_20_2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Normal_20_2" style:data-style-name="N2">
      <style:table-cell-properties fo:border-bottom="1.76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Normal_20_2" style:data-style-name="N13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Normal_20_2" style:data-style-name="N13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Normal_20_2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Normal_20_2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Normal_20_2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Normal_20_2" style:data-style-name="N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1" style:family="table-cell" style:parent-style-name="Normal_20_2" style:data-style-name="N2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Normal_20_2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Normal_20_2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4" style:family="table-cell" style:parent-style-name="Normal_20_2" style:data-style-name="N13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Normal_20_2" style:data-style-name="N139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Normal_20_2" style:data-style-name="N13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Normal_20_2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Normal_20_2" style:data-style-name="N1">
      <style:table-cell-properties fo:border-bottom="1.76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Normal_20_2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Normal_20_2" style:data-style-name="N13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Normal_20_2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5" style:family="table-cell" style:parent-style-name="Normal_20_2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Normal_20_2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Normal_20_2" style:data-style-name="N13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Normal_20_2" style:data-style-name="N138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Normal_20_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70" style:family="table-cell" style:parent-style-name="Normal_20_2" style:data-style-name="N1">
      <style:table-cell-properties fo:border-bottom="1.76pt solid #000000" fo:background-color="#bfbfb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473" style:family="table-cell" style:parent-style-name="Normal_20_4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4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5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7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479" style:family="table-cell" style:parent-style-name="Normal_20_4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0" style:family="table-cell" style:parent-style-name="Normal_20_4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Normal_20_4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2" style:family="table-cell" style:parent-style-name="Normal_20_4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Normal_20_4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Porcentaje_20_2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Porcentaje_20_2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Porcentaje_20_2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Normal_20_4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Normal_20_2">
      <style:table-cell-properties fo:background-color="#b9cd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Normal_20_2">
      <style:table-cell-properties fo:border-bottom="none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Normal_20_2">
      <style:table-cell-properties fo:border-bottom="1.76pt solid #000000" fo:background-color="#b9cde5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Normal_20_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6" style:family="table-cell" style:parent-style-name="Normal_20_2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7" style:family="table-cell" style:parent-style-name="Normal_20_2" style:data-style-name="N14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Normal_20_2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Normal_20_2" style:data-style-name="N14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00" style:family="table-cell" style:parent-style-name="Normal_20_2" style:data-style-name="N14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Normal_20_2" style:data-style-name="N145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Normal_20_2" style:data-style-name="N145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Normal_20_2" style:data-style-name="N145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Normal_20_2">
      <style:table-cell-properties fo:border-bottom="1.76pt solid #000000" fo:background-color="#b9cde5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Normal_20_2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06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Normal_20_2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Normal_20_6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0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11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Normal_20_6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Normal_20_6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16" style:family="table-cell" style:parent-style-name="Normal_20_4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7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9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20" style:family="table-cell" style:parent-style-name="Normal_20_4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22" style:family="table-cell" style:parent-style-name="Normal_20_4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Normal_20_4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Normal_20_4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Normal_20_4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Normal_20_4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28" style:family="table-cell" style:parent-style-name="Normal_20_4" style:data-style-name="N11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Normal_20_4" style:data-style-name="N2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Normal_20_4" style:data-style-name="N1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Normal_20_4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Porcentaje_20_2" style:data-style-name="N1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5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6" style:family="table-cell" style:parent-style-name="Normal_20_5">
      <style:table-cell-properties fo:border-bottom="none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7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Normal_20_5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1" style:family="table-cell" style:parent-style-name="Normal_20_5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2" style:family="table-cell" style:parent-style-name="Normal_20_5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3" style:family="table-cell" style:parent-style-name="Normal_20_5" style:data-style-name="N136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Normal_20_5" style:data-style-name="N13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Normal_20_5" style:data-style-name="N13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Normal_20_5" style:data-style-name="N136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Normal_20_5" style:data-style-name="N136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Normal_20_5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9" style:family="table-cell" style:parent-style-name="Normal_20_5" style:data-style-name="N136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Normal_20_5" style:data-style-name="N136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Normal_20_5" style:data-style-name="N136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Normal_20_5" style:data-style-name="N136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4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5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6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Normal_20_5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8" style:family="table-cell" style:parent-style-name="Normal_20_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9" style:family="table-cell" style:parent-style-name="Excel_20_Built-in_20_Comma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0" style:family="table-cell" style:parent-style-name="Normal_20_5" style:data-style-name="N146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1" style:family="table-cell" style:parent-style-name="Excel_20_Built-in_20_Comma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2" style:family="table-cell" style:parent-style-name="Excel_20_Built-in_20_Comma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3" style:family="table-cell" style:parent-style-name="Excel_20_Built-in_20_Comma" style:data-style-name="N148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4" style:family="table-cell" style:parent-style-name="Normal_20_5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5" style:family="table-cell" style:parent-style-name="Normal_20_5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68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569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570" style:family="table-cell" style:parent-style-name="Normal_20_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71" style:family="table-cell" style:parent-style-name="Normal_20_6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2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Normal_20_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74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5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76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77" style:family="table-cell" style:parent-style-name="Normal_20_6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Normal_20_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581" style:family="table-cell" style:parent-style-name="Normal_20_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82" style:family="table-cell" style:parent-style-name="Normal_20_6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Normal_20_6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4" style:family="table-cell" style:parent-style-name="Normal_20_6" style:data-style-name="N13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Normal_20_6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Normal_20_6" style:data-style-name="N14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Normal_20_6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89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0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91" style:family="table-cell" style:parent-style-name="Normal_20_6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2" style:family="table-cell" style:parent-style-name="Normal_20_6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Normal_20_6" style:data-style-name="N13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94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Normal_20_6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97" style:family="table-cell" style:parent-style-name="Normal_20_6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98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599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0" style:family="table-cell" style:parent-style-name="Normal_20_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02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3" style:family="table-cell" style:parent-style-name="Normal_20_6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Normal_20_6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6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07" style:family="table-cell" style:parent-style-name="Normal_20_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08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09" style:family="table-cell" style:parent-style-name="Normal_20_6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0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1" style:family="table-cell" style:parent-style-name="Normal_20_6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612" style:family="table-cell" style:parent-style-name="Normal_20_6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13" style:family="table-cell" style:parent-style-name="Normal_20_6" style:data-style-name="N14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Normal_20_6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6" style:family="table-cell" style:parent-style-name="Normal_20_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20_6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Normal_20_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9" style:family="table-cell" style:parent-style-name="Normal_20_5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1" style:family="table-cell" style:parent-style-name="Normal_20_5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2" style:family="table-cell" style:parent-style-name="Normal_20_5" style:data-style-name="N14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3" style:family="table-cell" style:parent-style-name="Normal_20_5">
      <style:table-cell-properties fo:background-color="#e6e0ec" style:diagonal-bl-tr="none" style:diagonal-tl-br="none" fo:border="none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4" style:family="table-cell" style:parent-style-name="Normal_20_5">
      <style:table-cell-properties fo:border-bottom="1.76pt solid #000000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5" style:family="table-cell" style:parent-style-name="Normal_20_5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6" style:family="table-cell" style:parent-style-name="Normal_20_5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7" style:family="table-cell" style:parent-style-name="Normal_20_5" style:data-style-name="N142">
      <style:table-cell-properties fo:border-bottom="0.74pt solid #000000" fo:background-color="#fcd5b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8" style:family="table-cell" style:parent-style-name="Normal_20_5" style:data-style-name="N14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9" style:family="table-cell" style:parent-style-name="Normal_20_5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0" style:family="table-cell" style:parent-style-name="Normal_20_5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1" style:family="table-cell" style:parent-style-name="Normal_20_5" style:data-style-name="N142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2" style:family="table-cell" style:parent-style-name="Normal_20_5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3" style:family="table-cell" style:parent-style-name="Normal_20_5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4" style:family="table-cell" style:parent-style-name="Normal_20_5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5" style:family="table-cell" style:parent-style-name="Normal_20_5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6" style:family="table-cell" style:parent-style-name="Normal_20_5" style:data-style-name="N141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7" style:family="table-cell" style:parent-style-name="Normal_20_5" style:data-style-name="N14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8" style:family="table-cell" style:parent-style-name="Normal_20_5" style:data-style-name="N14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Porcentaje_20_3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0" style:family="table-cell" style:parent-style-name="Porcentaje_20_3" style:data-style-name="N1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1" style:family="table-cell" style:parent-style-name="Porcentaje_20_3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2" style:family="table-cell" style:parent-style-name="Porcentaje_20_3" style:data-style-name="N11">
      <style:table-cell-properties fo:background-color="#fcd5b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3" style:family="table-cell" style:parent-style-name="Porcentaje_20_3" style:data-style-name="N1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4" style:family="table-cell" style:parent-style-name="Porcentaje_20_3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5" style:family="table-cell" style:parent-style-name="Porcentaje_20_3" style:data-style-name="N13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6" style:family="table-cell" style:parent-style-name="Normal_20_5" style:data-style-name="N14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7" style:family="table-cell" style:parent-style-name="Normal_20_5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8" style:family="table-cell" style:parent-style-name="Porcentaje_20_3" style:data-style-name="N1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9" style:family="table-cell" style:parent-style-name="Porcentaje_20_3" style:data-style-name="N1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0" style:family="table-cell" style:parent-style-name="Porcentaje_20_3" style:data-style-name="N11">
      <style:table-cell-properties fo:border-bottom="0.74pt solid #000000" fo:background-color="#fcd5b5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1" style:family="table-cell" style:parent-style-name="Porcentaje_20_3" style:data-style-name="N1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2" style:family="table-cell" style:parent-style-name="Normal_20_5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3" style:family="table-cell" style:parent-style-name="Normal_20_5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5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6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3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4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67" style:family="table-cell" style:parent-style-name="Default" style:data-style-name="N14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68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69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1" style:family="table-cell" style:parent-style-name="Default" style:data-style-name="N141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7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Times New Roman" style:font-name-complex="Times New Roman" style:text-position="sub 58%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 table:number-rows-repeated="11">
          <table:table-cell table:number-columns-repeated="16384"/>
        </table:table-row>
        <table:table-row table:style-name="ro1" table:number-rows-repeated="2">
          <table:table-cell table:number-columns-repeated="7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10"/>
          <table:covered-table-cell table:style-name="ce21"/>
          <table:table-cell table:style-name="ce29"/>
          <table:table-cell table:style-name="ce32" office:value-type="string" calcext:value-type="string">
            <text:p>Inflacion USA</text:p>
          </table:table-cell>
          <table:table-cell table:style-name="ce37" office:value-type="percentage" office:value="0.02" calcext:value-type="percentage">
            <text:p>2 %</text:p>
          </table:table-cell>
          <table:table-cell table:style-name="ce43"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table:style-name="ce11" table:number-columns-repeated="2"/>
          <table:table-cell table:style-name="ce22"/>
          <table:table-cell table:style-name="ce29"/>
          <table:table-cell table:style-name="ce32" office:value-type="string" calcext:value-type="string">
            <text:p>Inflacion Peru</text:p>
          </table:table-cell>
          <table:table-cell table:style-name="ce38" office:value-type="percentage" office:value="0.029" calcext:value-type="percentage">
            <text:p>2.9%</text:p>
          </table:table-cell>
          <table:table-cell table:style-name="ce43"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2"/>
          <table:covered-table-cell table:style-name="ce23"/>
          <table:table-cell table:style-name="ce29"/>
          <table:table-cell table:style-name="ce32" office:value-type="string" calcext:value-type="string">
            <text:p>Horizonte Evaluación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3"/>
          <table:covered-table-cell table:style-name="ce24"/>
          <table:table-cell table:style-name="ce29"/>
          <table:table-cell table:style-name="ce32" office:value-type="string" calcext:value-type="string">
            <text:p>TEA</text:p>
          </table:table-cell>
          <table:table-cell table:style-name="ce37" office:value-type="percentage" office:value="0.22" calcext:value-type="percentage">
            <text:p>22 %</text:p>
          </table:table-cell>
          <table:table-cell table:style-name="ce44"/>
          <table:table-cell table:number-columns-repeated="16375"/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12"/>
          <table:covered-table-cell table:style-name="ce23"/>
          <table:table-cell table:style-name="ce29"/>
          <table:table-cell table:style-name="ce32" office:value-type="string" calcext:value-type="string">
            <text:p>Impuesto</text:p>
          </table:table-cell>
          <table:table-cell table:style-name="ce38" office:value-type="percentage" office:value="0.015" calcext:value-type="percentage">
            <text:p>1.5%</text:p>
          </table:table-cell>
          <table:table-cell table:style-name="ce43" office:value-type="string" calcext:value-type="string">
            <text:p>Régimen Especial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5"/>
          <table:table-cell table:style-name="ce29"/>
          <table:table-cell table:style-name="ce33" office:value-type="string" calcext:value-type="string">
            <text:p>SIS</text:p>
          </table:table-cell>
          <table:table-cell table:style-name="ce40" office:value-type="float" office:value="15" calcext:value-type="float">
            <text:p>S/15.00</text:p>
          </table:table-cell>
          <table:table-cell table:style-name="ce43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ANE</text:p>
          </table:table-cell>
          <table:table-cell table:style-name="ce15" table:formula="of:=[$Rentabilidad.D13]" office:value-type="float" office:value="23390.7675266157" calcext:value-type="float">
            <text:p>S/23,390.77</text:p>
          </table:table-cell>
          <table:table-cell table:style-name="ce18" office:value-type="string" calcext:value-type="string">
            <text:p>VANF</text:p>
          </table:table-cell>
          <table:table-cell table:style-name="ce26" table:formula="of:=[$Rentabilidad.D26]" office:value-type="float" office:value="17646.4249001387" calcext:value-type="float">
            <text:p>S/17,646.42</text:p>
          </table:table-cell>
          <table:table-cell table:style-name="ce30"/>
          <table:table-cell table:style-name="ce32" office:value-type="string" calcext:value-type="string">
            <text:p>Precio venta ovillo</text:p>
          </table:table-cell>
          <table:table-cell table:style-name="ce40" office:value-type="float" office:value="6" calcext:value-type="float">
            <text:p>S/6.00</text:p>
          </table:table-cell>
          <table:table-cell table:style-name="ce43"/>
          <table:table-cell table:number-columns-repeated="16375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7"/>
          <table:table-cell table:style-name="ce29"/>
          <table:table-cell table:style-name="ce34" office:value-type="string" calcext:value-type="string">
            <text:p>Precio compra ovillo</text:p>
          </table:table-cell>
          <table:table-cell table:style-name="ce40" office:value-type="float" office:value="4" calcext:value-type="float">
            <text:p>S/4.00</text:p>
          </table:table-cell>
          <table:table-cell table:style-name="ce45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TIRE</text:p>
          </table:table-cell>
          <table:table-cell table:style-name="ce17" table:formula="of:=[$Rentabilidad.D15]" office:value-type="percentage" office:value="0.442900906809114" calcext:value-type="percentage">
            <text:p>44.29 %</text:p>
          </table:table-cell>
          <table:table-cell table:style-name="ce20" office:value-type="string" calcext:value-type="string">
            <text:p>TIRF</text:p>
          </table:table-cell>
          <table:table-cell table:style-name="ce28" table:formula="of:=[$Rentabilidad.D28]" office:value-type="percentage" office:value="0.566966535509241" calcext:value-type="percentage">
            <text:p>56.70 %</text:p>
          </table:table-cell>
          <table:table-cell table:style-name="ce31"/>
          <table:table-cell table:style-name="ce16"/>
          <table:table-cell table:style-name="ce41"/>
          <table:table-cell table:style-name="ce43"/>
          <table:table-cell table:number-columns-repeated="16375"/>
        </table:table-row>
        <table:table-row table:style-name="ro1">
          <table:table-cell table:number-columns-repeated="6"/>
          <table:table-cell table:style-name="ce35" office:value-type="string" calcext:value-type="string">
            <text:p>(*) Variable tentativa para hacer pruebas</text:p>
          </table:table-cell>
          <table:table-cell table:style-name="ce42"/>
          <table:table-cell table:style-name="ce46"/>
          <table:table-cell table:number-columns-repeated="16375"/>
        </table:table-row>
        <table:table-row table:style-name="ro1">
          <table:table-cell table:number-columns-repeated="6"/>
          <table:table-cell table:style-name="ce36" table:number-columns-repeated="3"/>
          <table:table-cell table:number-columns-repeated="16375"/>
        </table:table-row>
        <table:table-row table:style-name="ro1" table:number-rows-repeated="3">
          <table:table-cell table:number-columns-repeated="7"/>
          <table:table-cell table:style-name="ce36" table:number-columns-repeated="2"/>
          <table:table-cell table:number-columns-repeated="1637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Cantidad_porcentual_de_ovillos_vendidos" table:base-cell-address="$Resumen.$A$1" table:cell-range-address="$Resumen.$H$22"/>
          <table:named-range table:name="Precio_compra_ovillo" table:base-cell-address="$Resumen.$A$1" table:cell-range-address="$Resumen.$H$21"/>
          <table:named-range table:name="Precio_venta_ovillo" table:base-cell-address="$Resumen.$A$1" table:cell-range-address="$Resumen.$H$20"/>
          <table:named-range table:name="TIRE" table:base-cell-address="$Resumen.$A$1" table:cell-range-address="$Resumen.$C$22"/>
          <table:named-range table:name="TIRF" table:base-cell-address="$Resumen.$A$1" table:cell-range-address="$Resumen.$E$22"/>
          <table:named-range table:name="VANE" table:base-cell-address="$Resumen.$A$1" table:cell-range-address="$Resumen.$C$20"/>
          <table:named-range table:name="VANF" table:base-cell-address="$Resumen.$A$1" table:cell-range-address="$Resumen.$E$20"/>
        </table:named-expressions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20:OPTIMISTA.H21" table:comment="Creado por Admin el 20/02/2021&#10;Modificado por Admin el 20/02/2021&#10;Modificado por Admin el 25/02/2021&#10;Modificado por Admin el 28/02/2021"/>
        <table:table-column table:style-name="co1" table:number-columns-repeated="2" table:default-cell-style-name="ce47"/>
        <table:table-column table:style-name="co2" table:default-cell-style-name="ce47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" table:number-columns-repeated="16372" table:default-cell-style-name="ce47"/>
        <table:table-row table:style-name="ro2" table:number-rows-repeated="19">
          <table:table-cell table:number-columns-repeated="16384"/>
        </table:table-row>
        <table:table-row table:style-name="ro2">
          <table:table-cell table:number-columns-repeated="7"/>
          <table:table-cell table:style-name="ce48" office:value-type="float" office:value="6.2" calcext:value-type="float">
            <text:p>S/6.20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8" office:value-type="float" office:value="3.8" calcext:value-type="float">
            <text:p>S/3.8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Cantidad_porcentual_de_ovillos_vendidos" table:base-cell-address="$OPTIMISTA.$A$1" table:cell-range-address="$OPTIMISTA.$H$22"/>
          <table:named-range table:name="Precio_compra_ovillo" table:base-cell-address="$OPTIMISTA.$A$1" table:cell-range-address="$OPTIMISTA.$H$21"/>
          <table:named-range table:name="Precio_venta_ovillo" table:base-cell-address="$OPTIMISTA.$A$1" table:cell-range-address="$OPTIMISTA.$H$20"/>
          <table:named-range table:name="TIRE" table:base-cell-address="$OPTIMISTA.$A$1" table:cell-range-address="$OPTIMISTA.$C$22"/>
          <table:named-range table:name="TIRF" table:base-cell-address="$OPTIMISTA.$A$1" table:cell-range-address="$OPTIMISTA.$E$22"/>
          <table:named-range table:name="VANE" table:base-cell-address="$OPTIMISTA.$A$1" table:cell-range-address="$OPTIMISTA.$C$20"/>
          <table:named-range table:name="VANF" table:base-cell-address="$OPTIMISTA.$A$1" table:cell-range-address="$OPTIMISTA.$E$20"/>
        </table:named-expressions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false" table:scenario-ranges="PESIMISTA.H20:PESIMISTA.H21" table:comment="Creado por Admin el 20/02/2021&#10;Modificado por Admin el 20/02/2021&#10;Modificado por Admin el 25/02/2021&#10;Modificado por Admin el 28/02/2021"/>
        <table:table-column table:style-name="co1" table:number-columns-repeated="2" table:default-cell-style-name="ce47"/>
        <table:table-column table:style-name="co2" table:default-cell-style-name="ce47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" table:number-columns-repeated="16372" table:default-cell-style-name="ce47"/>
        <table:table-row table:style-name="ro2" table:number-rows-repeated="19">
          <table:table-cell table:number-columns-repeated="16384"/>
        </table:table-row>
        <table:table-row table:style-name="ro2">
          <table:table-cell table:number-columns-repeated="7"/>
          <table:table-cell table:style-name="ce48" office:value-type="float" office:value="5.8" calcext:value-type="float">
            <text:p>S/5.80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8" office:value-type="float" office:value="4.2" calcext:value-type="float">
            <text:p>S/4.2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Cantidad_porcentual_de_ovillos_vendidos" table:base-cell-address="$PESIMISTA.$A$1" table:cell-range-address="$PESIMISTA.$H$22"/>
          <table:named-range table:name="Precio_compra_ovillo" table:base-cell-address="$PESIMISTA.$A$1" table:cell-range-address="$PESIMISTA.$H$21"/>
          <table:named-range table:name="Precio_venta_ovillo" table:base-cell-address="$PESIMISTA.$A$1" table:cell-range-address="$PESIMISTA.$H$20"/>
          <table:named-range table:name="TIRE" table:base-cell-address="$PESIMISTA.$A$1" table:cell-range-address="$PESIMISTA.$C$22"/>
          <table:named-range table:name="TIRF" table:base-cell-address="$PESIMISTA.$A$1" table:cell-range-address="$PESIMISTA.$E$22"/>
          <table:named-range table:name="VANE" table:base-cell-address="$PESIMISTA.$A$1" table:cell-range-address="$PESIMISTA.$C$20"/>
          <table:named-range table:name="VANF" table:base-cell-address="$PESIMISTA.$A$1" table:cell-range-address="$PESIMISTA.$E$20"/>
        </table:named-expressions>
      </table:table>
      <table:table table:name="Presupuesto_Ventas" table:style-name="ta3"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number-columns-repeated="2" table:default-cell-style-name="ce49"/>
        <table:table-column table:style-name="co14" table:default-cell-style-name="ce49"/>
        <table:table-column table:style-name="co13" table:number-columns-repeated="10" table:default-cell-style-name="ce49"/>
        <table:table-column table:style-name="co15" table:default-cell-style-name="ce49"/>
        <table:table-column table:style-name="co11" table:default-cell-style-name="ce49"/>
        <table:table-column table:style-name="co16" table:default-cell-style-name="ce49"/>
        <table:table-column table:style-name="co17" table:number-columns-repeated="13" table:default-cell-style-name="ce49"/>
        <table:table-column table:style-name="co18" table:number-columns-repeated="16352" table:default-cell-style-name="ce49"/>
        <table:table-row table:style-name="ro4">
          <table:table-cell table:number-columns-repeated="3"/>
          <table:table-cell table:style-name="ce66" table:number-columns-repeated="13"/>
          <table:table-cell table:number-columns-repeated="16368"/>
        </table:table-row>
        <table:table-row table:style-name="ro4">
          <table:table-cell/>
          <table:table-cell table:style-name="ce50"/>
          <table:table-cell table:style-name="ce54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67"/>
          <table:table-cell table:number-columns-repeated="16"/>
          <table:table-cell table:style-name="ce54"/>
          <table:table-cell table:number-columns-repeated="16351"/>
        </table:table-row>
        <table:table-row table:style-name="ro5">
          <table:table-cell/>
          <table:table-cell table:style-name="ce50"/>
          <table:table-cell table:style-name="ce59"/>
          <table:table-cell table:style-name="ce68" table:number-columns-repeated="13"/>
          <table:table-cell table:number-columns-repeated="16"/>
          <table:table-cell table:style-name="ce59"/>
          <table:table-cell table:number-columns-repeated="16351"/>
        </table:table-row>
        <table:table-row table:style-name="ro4">
          <table:table-cell/>
          <table:table-cell table:style-name="ce50"/>
          <table:table-cell table:style-name="ce55" office:value-type="string" calcext:value-type="string" table:number-columns-spanned="14" table:number-rows-spanned="1">
            <text:p>PROYECCIÓN DE VENTAS EN UNIDADES</text:p>
          </table:table-cell>
          <table:covered-table-cell table:number-columns-repeated="13" table:style-name="ce63"/>
          <table:table-cell table:number-columns-repeated="16"/>
          <table:table-cell table:style-name="ce54"/>
          <table:table-cell table:number-columns-repeated="16351"/>
        </table:table-row>
        <table:table-row table:style-name="ro6">
          <table:table-cell table:number-columns-repeated="2"/>
          <table:table-cell table:style-name="ce59"/>
          <table:table-cell table:style-name="ce68" table:number-columns-repeated="13"/>
          <table:table-cell table:number-columns-repeated="16"/>
          <table:table-cell table:style-name="ce59"/>
          <table:table-cell table:number-columns-repeated="16351"/>
        </table:table-row>
        <table:table-row table:style-name="ro7">
          <table:table-cell/>
          <table:table-cell table:style-name="ce51" office:value-type="string" calcext:value-type="string">
            <text:p>Año</text:p>
          </table:table-cell>
          <table:table-cell table:style-name="ce60" office:value-type="string" calcext:value-type="string">
            <text:p>Productos</text:p>
          </table:table-cell>
          <table:table-cell table:style-name="ce51" office:value-type="string" calcext:value-type="string">
            <text:p>Mes 1</text:p>
          </table:table-cell>
          <table:table-cell table:style-name="ce51" office:value-type="string" calcext:value-type="string">
            <text:p>Mes 2</text:p>
          </table:table-cell>
          <table:table-cell table:style-name="ce51" office:value-type="string" calcext:value-type="string">
            <text:p>Mes 3</text:p>
          </table:table-cell>
          <table:table-cell table:style-name="ce51" office:value-type="string" calcext:value-type="string">
            <text:p>Mes 4</text:p>
          </table:table-cell>
          <table:table-cell table:style-name="ce51" office:value-type="string" calcext:value-type="string">
            <text:p>Mes 5</text:p>
          </table:table-cell>
          <table:table-cell table:style-name="ce51" office:value-type="string" calcext:value-type="string">
            <text:p>Mes 6</text:p>
          </table:table-cell>
          <table:table-cell table:style-name="ce51" office:value-type="string" calcext:value-type="string">
            <text:p>Mes 7</text:p>
          </table:table-cell>
          <table:table-cell table:style-name="ce51" office:value-type="string" calcext:value-type="string">
            <text:p>Mes 8</text:p>
          </table:table-cell>
          <table:table-cell table:style-name="ce51" office:value-type="string" calcext:value-type="string">
            <text:p>Mes 9</text:p>
          </table:table-cell>
          <table:table-cell table:style-name="ce51" office:value-type="string" calcext:value-type="string">
            <text:p>Mes 10</text:p>
          </table:table-cell>
          <table:table-cell table:style-name="ce51" office:value-type="string" calcext:value-type="string">
            <text:p>Mes 11</text:p>
          </table:table-cell>
          <table:table-cell table:style-name="ce51" office:value-type="string" calcext:value-type="string">
            <text:p>Mes 12</text:p>
          </table:table-cell>
          <table:table-cell table:style-name="ce51" office:value-type="string" calcext:value-type="string">
            <text:p>TOTAL</text:p>
          </table:table-cell>
          <table:table-cell table:style-name="ce79"/>
          <table:table-cell table:number-columns-repeated="16367"/>
        </table:table-row>
        <table:table-row table:style-name="ro8">
          <table:table-cell/>
          <table:table-cell table:style-name="ce52" office:value-type="float" office:value="1" calcext:value-type="float">
            <text:p>1</text:p>
          </table:table-cell>
          <table:table-cell table:style-name="ce61" office:value-type="string" calcext:value-type="string">
            <text:p>Ovillo de fibra sintética</text:p>
          </table:table-cell>
          <table:table-cell table:style-name="ce69" table:formula="of:=[.D29]+[.D29]*[$Resumen.$H$22]" office:value-type="float" office:value="3500" calcext:value-type="float">
            <text:p>3,500</text:p>
          </table:table-cell>
          <table:table-cell table:style-name="ce69" table:formula="of:=[.E29]+[.E29]*[$Resumen.$H$22]" office:value-type="float" office:value="3500" calcext:value-type="float">
            <text:p>3,500</text:p>
          </table:table-cell>
          <table:table-cell table:style-name="ce69" table:formula="of:=[.F29]+[.F29]*[$Resumen.$H$22]" office:value-type="float" office:value="3500" calcext:value-type="float">
            <text:p>3,500</text:p>
          </table:table-cell>
          <table:table-cell table:style-name="ce69" table:formula="of:=[.G29]+[.G29]*[$Resumen.$H$22]" office:value-type="float" office:value="4000" calcext:value-type="float">
            <text:p>4,000</text:p>
          </table:table-cell>
          <table:table-cell table:style-name="ce69" table:formula="of:=[.H29]+[.H29]*[$Resumen.$H$22]" office:value-type="float" office:value="4000" calcext:value-type="float">
            <text:p>4,000</text:p>
          </table:table-cell>
          <table:table-cell table:style-name="ce69" table:formula="of:=[.I29]+[.I29]*[$Resumen.$H$22]" office:value-type="float" office:value="4000" calcext:value-type="float">
            <text:p>4,000</text:p>
          </table:table-cell>
          <table:table-cell table:style-name="ce69" table:formula="of:=[.J29]+[.J29]*[$Resumen.$H$22]" office:value-type="float" office:value="4500" calcext:value-type="float">
            <text:p>4,500</text:p>
          </table:table-cell>
          <table:table-cell table:style-name="ce69" table:formula="of:=[.K29]+[.K29]*[$Resumen.$H$22]" office:value-type="float" office:value="4500" calcext:value-type="float">
            <text:p>4,500</text:p>
          </table:table-cell>
          <table:table-cell table:style-name="ce69" table:formula="of:=[.L29]+[.L29]*[$Resumen.$H$22]" office:value-type="float" office:value="4500" calcext:value-type="float">
            <text:p>4,500</text:p>
          </table:table-cell>
          <table:table-cell table:style-name="ce69" table:formula="of:=[.M29]+[.M29]*[$Resumen.$H$22]" office:value-type="float" office:value="4500" calcext:value-type="float">
            <text:p>4,500</text:p>
          </table:table-cell>
          <table:table-cell table:style-name="ce69" table:formula="of:=[.N29]+[.N29]*[$Resumen.$H$22]" office:value-type="float" office:value="3500" calcext:value-type="float">
            <text:p>3,500</text:p>
          </table:table-cell>
          <table:table-cell table:style-name="ce69" table:formula="of:=[.O29]+[.O29]*[$Resumen.$H$22]" office:value-type="float" office:value="3500" calcext:value-type="float">
            <text:p>3,500</text:p>
          </table:table-cell>
          <table:table-cell table:style-name="ce76" table:formula="of:=SUM([.D7:.O7])" office:value-type="float" office:value="47500" calcext:value-type="float">
            <text:p>47,500</text:p>
          </table:table-cell>
          <table:table-cell table:style-name="ce79"/>
          <table:table-cell table:number-columns-repeated="16367"/>
        </table:table-row>
        <table:table-row table:style-name="ro9">
          <table:table-cell/>
          <table:table-cell table:style-name="ce52" office:value-type="float" office:value="2" calcext:value-type="float">
            <text:p>2</text:p>
          </table:table-cell>
          <table:table-cell table:style-name="ce61" office:value-type="string" calcext:value-type="string">
            <text:p>Ovillos de fibra sintética</text:p>
          </table:table-cell>
          <table:table-cell table:style-name="ce69" table:formula="of:=[.D30]+[.D30]*[$Resumen.$H$22]" office:value-type="float" office:value="3675" calcext:value-type="float">
            <text:p>3,675</text:p>
          </table:table-cell>
          <table:table-cell table:style-name="ce69" table:formula="of:=[.E30]+[.E30]*[$Resumen.$H$22]" office:value-type="float" office:value="3675" calcext:value-type="float">
            <text:p>3,675</text:p>
          </table:table-cell>
          <table:table-cell table:style-name="ce69" table:formula="of:=[.F30]+[.F30]*[$Resumen.$H$22]" office:value-type="float" office:value="3675" calcext:value-type="float">
            <text:p>3,675</text:p>
          </table:table-cell>
          <table:table-cell table:style-name="ce69" table:formula="of:=[.G30]+[.G30]*[$Resumen.$H$22]" office:value-type="float" office:value="4200" calcext:value-type="float">
            <text:p>4,200</text:p>
          </table:table-cell>
          <table:table-cell table:style-name="ce69" table:formula="of:=[.H30]+[.H30]*[$Resumen.$H$22]" office:value-type="float" office:value="4200" calcext:value-type="float">
            <text:p>4,200</text:p>
          </table:table-cell>
          <table:table-cell table:style-name="ce69" table:formula="of:=[.I30]+[.I30]*[$Resumen.$H$22]" office:value-type="float" office:value="4200" calcext:value-type="float">
            <text:p>4,200</text:p>
          </table:table-cell>
          <table:table-cell table:style-name="ce69" table:formula="of:=[.J30]+[.J30]*[$Resumen.$H$22]" office:value-type="float" office:value="4725" calcext:value-type="float">
            <text:p>4,725</text:p>
          </table:table-cell>
          <table:table-cell table:style-name="ce69" table:formula="of:=[.K30]+[.K30]*[$Resumen.$H$22]" office:value-type="float" office:value="4725" calcext:value-type="float">
            <text:p>4,725</text:p>
          </table:table-cell>
          <table:table-cell table:style-name="ce69" table:formula="of:=[.L30]+[.L30]*[$Resumen.$H$22]" office:value-type="float" office:value="4725" calcext:value-type="float">
            <text:p>4,725</text:p>
          </table:table-cell>
          <table:table-cell table:style-name="ce69" table:formula="of:=[.M30]+[.M30]*[$Resumen.$H$22]" office:value-type="float" office:value="4725" calcext:value-type="float">
            <text:p>4,725</text:p>
          </table:table-cell>
          <table:table-cell table:style-name="ce69" table:formula="of:=[.N30]+[.N30]*[$Resumen.$H$22]" office:value-type="float" office:value="3675" calcext:value-type="float">
            <text:p>3,675</text:p>
          </table:table-cell>
          <table:table-cell table:style-name="ce69" table:formula="of:=[.O30]+[.O30]*[$Resumen.$H$22]" office:value-type="float" office:value="3675" calcext:value-type="float">
            <text:p>3,675</text:p>
          </table:table-cell>
          <table:table-cell table:style-name="ce76" table:formula="of:=SUM([.D8:.O8])" office:value-type="float" office:value="49875" calcext:value-type="float">
            <text:p>49,875</text:p>
          </table:table-cell>
          <table:table-cell table:number-columns-repeated="16368"/>
        </table:table-row>
        <table:table-row table:style-name="ro10">
          <table:table-cell/>
          <table:table-cell table:style-name="ce52" office:value-type="float" office:value="3" calcext:value-type="float">
            <text:p>3</text:p>
          </table:table-cell>
          <table:table-cell table:style-name="ce61" office:value-type="string" calcext:value-type="string">
            <text:p>Ovillo de fibra sintética</text:p>
          </table:table-cell>
          <table:table-cell table:style-name="ce69" table:formula="of:=[.D31]+[.D31]*[$Resumen.$H$22]" office:value-type="float" office:value="3858.75" calcext:value-type="float">
            <text:p>3,859</text:p>
          </table:table-cell>
          <table:table-cell table:style-name="ce69" table:formula="of:=[.E31]+[.E31]*[$Resumen.$H$22]" office:value-type="float" office:value="3858.75" calcext:value-type="float">
            <text:p>3,859</text:p>
          </table:table-cell>
          <table:table-cell table:style-name="ce69" table:formula="of:=[.F31]+[.F31]*[$Resumen.$H$22]" office:value-type="float" office:value="3858.75" calcext:value-type="float">
            <text:p>3,859</text:p>
          </table:table-cell>
          <table:table-cell table:style-name="ce69" table:formula="of:=[.G31]+[.G31]*[$Resumen.$H$22]" office:value-type="float" office:value="4410" calcext:value-type="float">
            <text:p>4,410</text:p>
          </table:table-cell>
          <table:table-cell table:style-name="ce69" table:formula="of:=[.H31]+[.H31]*[$Resumen.$H$22]" office:value-type="float" office:value="4410" calcext:value-type="float">
            <text:p>4,410</text:p>
          </table:table-cell>
          <table:table-cell table:style-name="ce69" table:formula="of:=[.I31]+[.I31]*[$Resumen.$H$22]" office:value-type="float" office:value="4410" calcext:value-type="float">
            <text:p>4,410</text:p>
          </table:table-cell>
          <table:table-cell table:style-name="ce69" table:formula="of:=[.J31]+[.J31]*[$Resumen.$H$22]" office:value-type="float" office:value="4961.25" calcext:value-type="float">
            <text:p>4,961</text:p>
          </table:table-cell>
          <table:table-cell table:style-name="ce69" table:formula="of:=[.K31]+[.K31]*[$Resumen.$H$22]" office:value-type="float" office:value="4961.25" calcext:value-type="float">
            <text:p>4,961</text:p>
          </table:table-cell>
          <table:table-cell table:style-name="ce69" table:formula="of:=[.L31]+[.L31]*[$Resumen.$H$22]" office:value-type="float" office:value="4961.25" calcext:value-type="float">
            <text:p>4,961</text:p>
          </table:table-cell>
          <table:table-cell table:style-name="ce69" table:formula="of:=[.M31]+[.M31]*[$Resumen.$H$22]" office:value-type="float" office:value="4961.25" calcext:value-type="float">
            <text:p>4,961</text:p>
          </table:table-cell>
          <table:table-cell table:style-name="ce69" table:formula="of:=[.N31]+[.N31]*[$Resumen.$H$22]" office:value-type="float" office:value="3858.75" calcext:value-type="float">
            <text:p>3,859</text:p>
          </table:table-cell>
          <table:table-cell table:style-name="ce69" table:formula="of:=[.O31]+[.O31]*[$Resumen.$H$22]" office:value-type="float" office:value="3858.75" calcext:value-type="float">
            <text:p>3,859</text:p>
          </table:table-cell>
          <table:table-cell table:style-name="ce76" table:formula="of:=SUM([.D9:.O9])" office:value-type="float" office:value="52368.75" calcext:value-type="float">
            <text:p>52,369</text:p>
          </table:table-cell>
          <table:table-cell table:number-columns-repeated="16368"/>
        </table:table-row>
        <table:table-row table:style-name="ro10">
          <table:table-cell/>
          <table:table-cell table:style-name="ce53" office:value-type="float" office:value="4" calcext:value-type="float">
            <text:p>4</text:p>
          </table:table-cell>
          <table:table-cell table:style-name="ce61" office:value-type="string" calcext:value-type="string">
            <text:p>Ovillo de fibra sintética</text:p>
          </table:table-cell>
          <table:table-cell table:style-name="ce69" table:formula="of:=[.D32]+[.D32]*[$Resumen.$H$22]" office:value-type="float" office:value="4051.6875" calcext:value-type="float">
            <text:p>4,052</text:p>
          </table:table-cell>
          <table:table-cell table:style-name="ce69" table:formula="of:=[.E32]+[.E32]*[$Resumen.$H$22]" office:value-type="float" office:value="4051.6875" calcext:value-type="float">
            <text:p>4,052</text:p>
          </table:table-cell>
          <table:table-cell table:style-name="ce69" table:formula="of:=[.F32]+[.F32]*[$Resumen.$H$22]" office:value-type="float" office:value="4051.6875" calcext:value-type="float">
            <text:p>4,052</text:p>
          </table:table-cell>
          <table:table-cell table:style-name="ce69" table:formula="of:=[.G32]+[.G32]*[$Resumen.$H$22]" office:value-type="float" office:value="4630.5" calcext:value-type="float">
            <text:p>4,631</text:p>
          </table:table-cell>
          <table:table-cell table:style-name="ce69" table:formula="of:=[.H32]+[.H32]*[$Resumen.$H$22]" office:value-type="float" office:value="4630.5" calcext:value-type="float">
            <text:p>4,631</text:p>
          </table:table-cell>
          <table:table-cell table:style-name="ce69" table:formula="of:=[.I32]+[.I32]*[$Resumen.$H$22]" office:value-type="float" office:value="4630.5" calcext:value-type="float">
            <text:p>4,631</text:p>
          </table:table-cell>
          <table:table-cell table:style-name="ce69" table:formula="of:=[.J32]+[.J32]*[$Resumen.$H$22]" office:value-type="float" office:value="5209.3125" calcext:value-type="float">
            <text:p>5,209</text:p>
          </table:table-cell>
          <table:table-cell table:style-name="ce69" table:formula="of:=[.K32]+[.K32]*[$Resumen.$H$22]" office:value-type="float" office:value="5209.3125" calcext:value-type="float">
            <text:p>5,209</text:p>
          </table:table-cell>
          <table:table-cell table:style-name="ce69" table:formula="of:=[.L32]+[.L32]*[$Resumen.$H$22]" office:value-type="float" office:value="5209.3125" calcext:value-type="float">
            <text:p>5,209</text:p>
          </table:table-cell>
          <table:table-cell table:style-name="ce69" table:formula="of:=[.M32]+[.M32]*[$Resumen.$H$22]" office:value-type="float" office:value="5209.3125" calcext:value-type="float">
            <text:p>5,209</text:p>
          </table:table-cell>
          <table:table-cell table:style-name="ce69" table:formula="of:=[.N32]+[.N32]*[$Resumen.$H$22]" office:value-type="float" office:value="4051.6875" calcext:value-type="float">
            <text:p>4,052</text:p>
          </table:table-cell>
          <table:table-cell table:style-name="ce69" table:formula="of:=[.O32]+[.O32]*[$Resumen.$H$22]" office:value-type="float" office:value="4051.6875" calcext:value-type="float">
            <text:p>4,052</text:p>
          </table:table-cell>
          <table:table-cell table:style-name="ce76" table:formula="of:=SUM([.D10:.O10])" office:value-type="float" office:value="54987.1875" calcext:value-type="float">
            <text:p>54,987</text:p>
          </table:table-cell>
          <table:table-cell table:number-columns-repeated="16368"/>
        </table:table-row>
        <table:table-row table:style-name="ro10">
          <table:table-cell/>
          <table:table-cell table:style-name="ce53" office:value-type="float" office:value="5" calcext:value-type="float">
            <text:p>5</text:p>
          </table:table-cell>
          <table:table-cell table:style-name="ce61" office:value-type="string" calcext:value-type="string">
            <text:p>Ovillo de fibra sintética</text:p>
          </table:table-cell>
          <table:table-cell table:style-name="ce69" table:formula="of:=[.D33]+[.D33]*[$Resumen.$H$22]" office:value-type="float" office:value="4254.271875" calcext:value-type="float">
            <text:p>4,254</text:p>
          </table:table-cell>
          <table:table-cell table:style-name="ce69" table:formula="of:=[.E33]+[.E33]*[$Resumen.$H$22]" office:value-type="float" office:value="4254.271875" calcext:value-type="float">
            <text:p>4,254</text:p>
          </table:table-cell>
          <table:table-cell table:style-name="ce69" table:formula="of:=[.F33]+[.F33]*[$Resumen.$H$22]" office:value-type="float" office:value="4254.271875" calcext:value-type="float">
            <text:p>4,254</text:p>
          </table:table-cell>
          <table:table-cell table:style-name="ce69" table:formula="of:=[.G33]+[.G33]*[$Resumen.$H$22]" office:value-type="float" office:value="4862.025" calcext:value-type="float">
            <text:p>4,862</text:p>
          </table:table-cell>
          <table:table-cell table:style-name="ce69" table:formula="of:=[.H33]+[.H33]*[$Resumen.$H$22]" office:value-type="float" office:value="4862.025" calcext:value-type="float">
            <text:p>4,862</text:p>
          </table:table-cell>
          <table:table-cell table:style-name="ce69" table:formula="of:=[.I33]+[.I33]*[$Resumen.$H$22]" office:value-type="float" office:value="4862.025" calcext:value-type="float">
            <text:p>4,862</text:p>
          </table:table-cell>
          <table:table-cell table:style-name="ce69" table:formula="of:=[.J33]+[.J33]*[$Resumen.$H$22]" office:value-type="float" office:value="5469.778125" calcext:value-type="float">
            <text:p>5,470</text:p>
          </table:table-cell>
          <table:table-cell table:style-name="ce69" table:formula="of:=[.K33]+[.K33]*[$Resumen.$H$22]" office:value-type="float" office:value="5469.778125" calcext:value-type="float">
            <text:p>5,470</text:p>
          </table:table-cell>
          <table:table-cell table:style-name="ce69" table:formula="of:=[.L33]+[.L33]*[$Resumen.$H$22]" office:value-type="float" office:value="5469.778125" calcext:value-type="float">
            <text:p>5,470</text:p>
          </table:table-cell>
          <table:table-cell table:style-name="ce69" table:formula="of:=[.M33]+[.M33]*[$Resumen.$H$22]" office:value-type="float" office:value="5469.778125" calcext:value-type="float">
            <text:p>5,470</text:p>
          </table:table-cell>
          <table:table-cell table:style-name="ce69" table:formula="of:=[.N33]+[.N33]*[$Resumen.$H$22]" office:value-type="float" office:value="4254.271875" calcext:value-type="float">
            <text:p>4,254</text:p>
          </table:table-cell>
          <table:table-cell table:style-name="ce69" table:formula="of:=[.O33]+[.O33]*[$Resumen.$H$22]" office:value-type="float" office:value="4254.271875" calcext:value-type="float">
            <text:p>4,254</text:p>
          </table:table-cell>
          <table:table-cell table:style-name="ce76" table:formula="of:=SUM([.D11:.O11])" office:value-type="float" office:value="57736.546875" calcext:value-type="float">
            <text:p>57,737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style-name="ce62"/>
          <table:table-cell table:style-name="ce70" table:number-columns-repeated="13"/>
          <table:table-cell table:number-columns-repeated="3"/>
          <table:table-cell table:style-name="ce66" table:number-columns-repeated="13"/>
          <table:table-cell table:number-columns-repeated="16352"/>
        </table:table-row>
        <table:table-row table:style-name="ro4">
          <table:table-cell table:number-columns-repeated="3"/>
          <table:table-cell table:style-name="ce71" table:number-columns-repeated="12"/>
          <table:table-cell table:number-columns-repeated="16369"/>
        </table:table-row>
        <table:table-row table:style-name="ro4">
          <table:table-cell/>
          <table:table-cell table:style-name="ce54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54"/>
          <table:table-cell table:number-columns-repeated="16368"/>
        </table:table-row>
        <table:table-row table:style-name="ro4">
          <table:table-cell table:number-columns-repeated="2"/>
          <table:table-cell table:style-name="ce59"/>
          <table:table-cell table:style-name="ce68" table:number-columns-repeated="13"/>
          <table:table-cell table:number-columns-repeated="16368"/>
        </table:table-row>
        <table:table-row table:style-name="ro4">
          <table:table-cell/>
          <table:table-cell table:style-name="ce55" office:value-type="string" calcext:value-type="string" table:number-columns-spanned="14" table:number-rows-spanned="1">
            <text:p>PROYECCIÓN DE VENTAS EN NUEVOS SOLES</text:p>
          </table:table-cell>
          <table:covered-table-cell table:number-columns-repeated="13" table:style-name="ce63"/>
          <table:table-cell table:style-name="ce77"/>
          <table:table-cell table:number-columns-repeated="16368"/>
        </table:table-row>
        <table:table-row table:style-name="ro4">
          <table:table-cell table:number-columns-repeated="2"/>
          <table:table-cell table:style-name="ce59"/>
          <table:table-cell table:style-name="ce68" table:number-columns-repeated="13"/>
          <table:table-cell table:number-columns-repeated="16368"/>
        </table:table-row>
        <table:table-row table:style-name="ro4">
          <table:table-cell/>
          <table:table-cell table:style-name="ce51" office:value-type="string" calcext:value-type="string">
            <text:p>Año</text:p>
          </table:table-cell>
          <table:table-cell table:style-name="ce51" office:value-type="string" calcext:value-type="string">
            <text:p>Valor Unitario</text:p>
          </table:table-cell>
          <table:table-cell table:style-name="ce51" office:value-type="string" calcext:value-type="string">
            <text:p>Mes 1</text:p>
          </table:table-cell>
          <table:table-cell table:style-name="ce51" office:value-type="string" calcext:value-type="string">
            <text:p>Mes 2</text:p>
          </table:table-cell>
          <table:table-cell table:style-name="ce51" office:value-type="string" calcext:value-type="string">
            <text:p>Mes 3</text:p>
          </table:table-cell>
          <table:table-cell table:style-name="ce51" office:value-type="string" calcext:value-type="string">
            <text:p>Mes 4</text:p>
          </table:table-cell>
          <table:table-cell table:style-name="ce51" office:value-type="string" calcext:value-type="string">
            <text:p>Mes 5</text:p>
          </table:table-cell>
          <table:table-cell table:style-name="ce51" office:value-type="string" calcext:value-type="string">
            <text:p>Mes 6</text:p>
          </table:table-cell>
          <table:table-cell table:style-name="ce51" office:value-type="string" calcext:value-type="string">
            <text:p>Mes 7</text:p>
          </table:table-cell>
          <table:table-cell table:style-name="ce51" office:value-type="string" calcext:value-type="string">
            <text:p>Mes 8</text:p>
          </table:table-cell>
          <table:table-cell table:style-name="ce51" office:value-type="string" calcext:value-type="string">
            <text:p>Mes 9</text:p>
          </table:table-cell>
          <table:table-cell table:style-name="ce51" office:value-type="string" calcext:value-type="string">
            <text:p>Mes 10</text:p>
          </table:table-cell>
          <table:table-cell table:style-name="ce51" office:value-type="string" calcext:value-type="string">
            <text:p>Mes 11</text:p>
          </table:table-cell>
          <table:table-cell table:style-name="ce51" office:value-type="string" calcext:value-type="string">
            <text:p>Mes 12</text:p>
          </table:table-cell>
          <table:table-cell table:style-name="ce51" office:value-type="string" calcext:value-type="string">
            <text:p>TOTAL</text:p>
          </table:table-cell>
          <table:table-cell table:number-columns-repeated="16368"/>
        </table:table-row>
        <table:table-row table:style-name="ro11">
          <table:table-cell/>
          <table:table-cell table:style-name="ce56" office:value-type="float" office:value="1" calcext:value-type="float">
            <text:p>1</text:p>
          </table:table-cell>
          <table:table-cell table:style-name="ce64" table:formula="of:=[$Resumen.$H$20]" office:value-type="float" office:value="6" calcext:value-type="float">
            <text:p>6.0</text:p>
          </table:table-cell>
          <table:table-cell table:style-name="ce72" table:formula="of:=[.$C19]*[.D7]" office:value-type="float" office:value="21000" calcext:value-type="float">
            <text:p>S/21,000.00</text:p>
          </table:table-cell>
          <table:table-cell table:style-name="ce72" table:formula="of:=[.$C19]*[.E7]" office:value-type="float" office:value="21000" calcext:value-type="float">
            <text:p>S/21,000.00</text:p>
          </table:table-cell>
          <table:table-cell table:style-name="ce72" table:formula="of:=[.$C19]*[.F7]" office:value-type="float" office:value="21000" calcext:value-type="float">
            <text:p>S/21,000.00</text:p>
          </table:table-cell>
          <table:table-cell table:style-name="ce72" table:formula="of:=[.$C19]*[.G7]" office:value-type="float" office:value="24000" calcext:value-type="float">
            <text:p>S/24,000.00</text:p>
          </table:table-cell>
          <table:table-cell table:style-name="ce72" table:formula="of:=[.$C19]*[.H7]" office:value-type="float" office:value="24000" calcext:value-type="float">
            <text:p>S/24,000.00</text:p>
          </table:table-cell>
          <table:table-cell table:style-name="ce72" table:formula="of:=[.$C19]*[.I7]" office:value-type="float" office:value="24000" calcext:value-type="float">
            <text:p>S/24,000.00</text:p>
          </table:table-cell>
          <table:table-cell table:style-name="ce72" table:formula="of:=[.$C19]*[.J7]" office:value-type="float" office:value="27000" calcext:value-type="float">
            <text:p>S/27,000.00</text:p>
          </table:table-cell>
          <table:table-cell table:style-name="ce72" table:formula="of:=[.$C19]*[.K7]" office:value-type="float" office:value="27000" calcext:value-type="float">
            <text:p>S/27,000.00</text:p>
          </table:table-cell>
          <table:table-cell table:style-name="ce72" table:formula="of:=[.$C19]*[.L7]" office:value-type="float" office:value="27000" calcext:value-type="float">
            <text:p>S/27,000.00</text:p>
          </table:table-cell>
          <table:table-cell table:style-name="ce72" table:formula="of:=[.$C19]*[.M7]" office:value-type="float" office:value="27000" calcext:value-type="float">
            <text:p>S/27,000.00</text:p>
          </table:table-cell>
          <table:table-cell table:style-name="ce72" table:formula="of:=[.$C19]*[.N7]" office:value-type="float" office:value="21000" calcext:value-type="float">
            <text:p>S/21,000.00</text:p>
          </table:table-cell>
          <table:table-cell table:style-name="ce72" table:formula="of:=[.$C19]*[.O7]" office:value-type="float" office:value="21000" calcext:value-type="float">
            <text:p>S/21,000.00</text:p>
          </table:table-cell>
          <table:table-cell table:style-name="ce72" table:formula="of:=SUM([.B19:.O19])" office:value-type="float" office:value="285007" calcext:value-type="float">
            <text:p>S/285,007.00</text:p>
          </table:table-cell>
          <table:table-cell table:number-columns-repeated="16368"/>
        </table:table-row>
        <table:table-row table:style-name="ro11">
          <table:table-cell/>
          <table:table-cell table:style-name="ce56" office:value-type="float" office:value="2" calcext:value-type="float">
            <text:p>2</text:p>
          </table:table-cell>
          <table:table-cell table:style-name="ce64" table:formula="of:=[$Resumen.$H$20]" office:value-type="float" office:value="6" calcext:value-type="float">
            <text:p>6.0</text:p>
          </table:table-cell>
          <table:table-cell table:style-name="ce72" table:formula="of:=[.$C20]*[.D8]" office:value-type="float" office:value="22050" calcext:value-type="float">
            <text:p>S/22,050.00</text:p>
          </table:table-cell>
          <table:table-cell table:style-name="ce72" table:formula="of:=[.$C20]*[.E8]" office:value-type="float" office:value="22050" calcext:value-type="float">
            <text:p>S/22,050.00</text:p>
          </table:table-cell>
          <table:table-cell table:style-name="ce72" table:formula="of:=[.$C20]*[.F8]" office:value-type="float" office:value="22050" calcext:value-type="float">
            <text:p>S/22,050.00</text:p>
          </table:table-cell>
          <table:table-cell table:style-name="ce72" table:formula="of:=[.$C20]*[.G8]" office:value-type="float" office:value="25200" calcext:value-type="float">
            <text:p>S/25,200.00</text:p>
          </table:table-cell>
          <table:table-cell table:style-name="ce72" table:formula="of:=[.$C20]*[.H8]" office:value-type="float" office:value="25200" calcext:value-type="float">
            <text:p>S/25,200.00</text:p>
          </table:table-cell>
          <table:table-cell table:style-name="ce72" table:formula="of:=[.$C20]*[.I8]" office:value-type="float" office:value="25200" calcext:value-type="float">
            <text:p>S/25,200.00</text:p>
          </table:table-cell>
          <table:table-cell table:style-name="ce72" table:formula="of:=[.$C20]*[.J8]" office:value-type="float" office:value="28350" calcext:value-type="float">
            <text:p>S/28,350.00</text:p>
          </table:table-cell>
          <table:table-cell table:style-name="ce72" table:formula="of:=[.$C20]*[.K8]" office:value-type="float" office:value="28350" calcext:value-type="float">
            <text:p>S/28,350.00</text:p>
          </table:table-cell>
          <table:table-cell table:style-name="ce72" table:formula="of:=[.$C20]*[.L8]" office:value-type="float" office:value="28350" calcext:value-type="float">
            <text:p>S/28,350.00</text:p>
          </table:table-cell>
          <table:table-cell table:style-name="ce72" table:formula="of:=[.$C20]*[.M8]" office:value-type="float" office:value="28350" calcext:value-type="float">
            <text:p>S/28,350.00</text:p>
          </table:table-cell>
          <table:table-cell table:style-name="ce72" table:formula="of:=[.$C20]*[.N8]" office:value-type="float" office:value="22050" calcext:value-type="float">
            <text:p>S/22,050.00</text:p>
          </table:table-cell>
          <table:table-cell table:style-name="ce72" table:formula="of:=[.$C20]*[.O8]" office:value-type="float" office:value="22050" calcext:value-type="float">
            <text:p>S/22,050.00</text:p>
          </table:table-cell>
          <table:table-cell table:style-name="ce72" table:formula="of:=SUM([.B20:.O20])" office:value-type="float" office:value="299258" calcext:value-type="float">
            <text:p>S/299,258.00</text:p>
          </table:table-cell>
          <table:table-cell table:number-columns-repeated="16368"/>
        </table:table-row>
        <table:table-row table:style-name="ro11">
          <table:table-cell/>
          <table:table-cell table:style-name="ce56" office:value-type="float" office:value="3" calcext:value-type="float">
            <text:p>3</text:p>
          </table:table-cell>
          <table:table-cell table:style-name="ce64" table:formula="of:=[$Resumen.$H$20]" office:value-type="float" office:value="6" calcext:value-type="float">
            <text:p>6.0</text:p>
          </table:table-cell>
          <table:table-cell table:style-name="ce72" table:formula="of:=[.$C21]*[.D9]" office:value-type="float" office:value="23152.5" calcext:value-type="float">
            <text:p>S/23,152.50</text:p>
          </table:table-cell>
          <table:table-cell table:style-name="ce72" table:formula="of:=[.$C21]*[.E9]" office:value-type="float" office:value="23152.5" calcext:value-type="float">
            <text:p>S/23,152.50</text:p>
          </table:table-cell>
          <table:table-cell table:style-name="ce72" table:formula="of:=[.$C21]*[.F9]" office:value-type="float" office:value="23152.5" calcext:value-type="float">
            <text:p>S/23,152.50</text:p>
          </table:table-cell>
          <table:table-cell table:style-name="ce72" table:formula="of:=[.$C21]*[.G9]" office:value-type="float" office:value="26460" calcext:value-type="float">
            <text:p>S/26,460.00</text:p>
          </table:table-cell>
          <table:table-cell table:style-name="ce72" table:formula="of:=[.$C21]*[.H9]" office:value-type="float" office:value="26460" calcext:value-type="float">
            <text:p>S/26,460.00</text:p>
          </table:table-cell>
          <table:table-cell table:style-name="ce72" table:formula="of:=[.$C21]*[.I9]" office:value-type="float" office:value="26460" calcext:value-type="float">
            <text:p>S/26,460.00</text:p>
          </table:table-cell>
          <table:table-cell table:style-name="ce72" table:formula="of:=[.$C21]*[.J9]" office:value-type="float" office:value="29767.5" calcext:value-type="float">
            <text:p>S/29,767.50</text:p>
          </table:table-cell>
          <table:table-cell table:style-name="ce72" table:formula="of:=[.$C21]*[.K9]" office:value-type="float" office:value="29767.5" calcext:value-type="float">
            <text:p>S/29,767.50</text:p>
          </table:table-cell>
          <table:table-cell table:style-name="ce72" table:formula="of:=[.$C21]*[.L9]" office:value-type="float" office:value="29767.5" calcext:value-type="float">
            <text:p>S/29,767.50</text:p>
          </table:table-cell>
          <table:table-cell table:style-name="ce72" table:formula="of:=[.$C21]*[.M9]" office:value-type="float" office:value="29767.5" calcext:value-type="float">
            <text:p>S/29,767.50</text:p>
          </table:table-cell>
          <table:table-cell table:style-name="ce72" table:formula="of:=[.$C21]*[.N9]" office:value-type="float" office:value="23152.5" calcext:value-type="float">
            <text:p>S/23,152.50</text:p>
          </table:table-cell>
          <table:table-cell table:style-name="ce72" table:formula="of:=[.$C21]*[.O9]" office:value-type="float" office:value="23152.5" calcext:value-type="float">
            <text:p>S/23,152.50</text:p>
          </table:table-cell>
          <table:table-cell table:style-name="ce72" table:formula="of:=SUM([.B21:.O21])" office:value-type="float" office:value="314221.5" calcext:value-type="float">
            <text:p>S/314,221.50</text:p>
          </table:table-cell>
          <table:table-cell table:number-columns-repeated="16368"/>
        </table:table-row>
        <table:table-row table:style-name="ro11">
          <table:table-cell/>
          <table:table-cell table:style-name="ce56" office:value-type="float" office:value="4" calcext:value-type="float">
            <text:p>4</text:p>
          </table:table-cell>
          <table:table-cell table:style-name="ce64" table:formula="of:=[$Resumen.$H$20]" office:value-type="float" office:value="6" calcext:value-type="float">
            <text:p>6.0</text:p>
          </table:table-cell>
          <table:table-cell table:style-name="ce72" table:formula="of:=[.$C22]*[.D10]" office:value-type="float" office:value="24310.125" calcext:value-type="float">
            <text:p>S/24,310.13</text:p>
          </table:table-cell>
          <table:table-cell table:style-name="ce72" table:formula="of:=[.$C22]*[.E10]" office:value-type="float" office:value="24310.125" calcext:value-type="float">
            <text:p>S/24,310.13</text:p>
          </table:table-cell>
          <table:table-cell table:style-name="ce72" table:formula="of:=[.$C22]*[.F10]" office:value-type="float" office:value="24310.125" calcext:value-type="float">
            <text:p>S/24,310.13</text:p>
          </table:table-cell>
          <table:table-cell table:style-name="ce72" table:formula="of:=[.$C22]*[.G10]" office:value-type="float" office:value="27783" calcext:value-type="float">
            <text:p>S/27,783.00</text:p>
          </table:table-cell>
          <table:table-cell table:style-name="ce72" table:formula="of:=[.$C22]*[.H10]" office:value-type="float" office:value="27783" calcext:value-type="float">
            <text:p>S/27,783.00</text:p>
          </table:table-cell>
          <table:table-cell table:style-name="ce72" table:formula="of:=[.$C22]*[.I10]" office:value-type="float" office:value="27783" calcext:value-type="float">
            <text:p>S/27,783.00</text:p>
          </table:table-cell>
          <table:table-cell table:style-name="ce72" table:formula="of:=[.$C22]*[.J10]" office:value-type="float" office:value="31255.875" calcext:value-type="float">
            <text:p>S/31,255.88</text:p>
          </table:table-cell>
          <table:table-cell table:style-name="ce72" table:formula="of:=[.$C22]*[.K10]" office:value-type="float" office:value="31255.875" calcext:value-type="float">
            <text:p>S/31,255.88</text:p>
          </table:table-cell>
          <table:table-cell table:style-name="ce72" table:formula="of:=[.$C22]*[.L10]" office:value-type="float" office:value="31255.875" calcext:value-type="float">
            <text:p>S/31,255.88</text:p>
          </table:table-cell>
          <table:table-cell table:style-name="ce72" table:formula="of:=[.$C22]*[.M10]" office:value-type="float" office:value="31255.875" calcext:value-type="float">
            <text:p>S/31,255.88</text:p>
          </table:table-cell>
          <table:table-cell table:style-name="ce72" table:formula="of:=[.$C22]*[.N10]" office:value-type="float" office:value="24310.125" calcext:value-type="float">
            <text:p>S/24,310.13</text:p>
          </table:table-cell>
          <table:table-cell table:style-name="ce72" table:formula="of:=[.$C22]*[.O10]" office:value-type="float" office:value="24310.125" calcext:value-type="float">
            <text:p>S/24,310.13</text:p>
          </table:table-cell>
          <table:table-cell table:style-name="ce72" table:formula="of:=SUM([.B22:.O22])" office:value-type="float" office:value="329933.125" calcext:value-type="float">
            <text:p>S/329,933.13</text:p>
          </table:table-cell>
          <table:table-cell table:number-columns-repeated="16368"/>
        </table:table-row>
        <table:table-row table:style-name="ro11">
          <table:table-cell/>
          <table:table-cell table:style-name="ce56" office:value-type="float" office:value="5" calcext:value-type="float">
            <text:p>5</text:p>
          </table:table-cell>
          <table:table-cell table:style-name="ce64" table:formula="of:=[$Resumen.$H$20]" office:value-type="float" office:value="6" calcext:value-type="float">
            <text:p>6.0</text:p>
          </table:table-cell>
          <table:table-cell table:style-name="ce72" table:formula="of:=[.$C23]*[.D11]" office:value-type="float" office:value="25525.63125" calcext:value-type="float">
            <text:p>S/25,525.63</text:p>
          </table:table-cell>
          <table:table-cell table:style-name="ce72" table:formula="of:=[.$C23]*[.E11]" office:value-type="float" office:value="25525.63125" calcext:value-type="float">
            <text:p>S/25,525.63</text:p>
          </table:table-cell>
          <table:table-cell table:style-name="ce72" table:formula="of:=[.$C23]*[.F11]" office:value-type="float" office:value="25525.63125" calcext:value-type="float">
            <text:p>S/25,525.63</text:p>
          </table:table-cell>
          <table:table-cell table:style-name="ce72" table:formula="of:=[.$C23]*[.G11]" office:value-type="float" office:value="29172.15" calcext:value-type="float">
            <text:p>S/29,172.15</text:p>
          </table:table-cell>
          <table:table-cell table:style-name="ce72" table:formula="of:=[.$C23]*[.H11]" office:value-type="float" office:value="29172.15" calcext:value-type="float">
            <text:p>S/29,172.15</text:p>
          </table:table-cell>
          <table:table-cell table:style-name="ce72" table:formula="of:=[.$C23]*[.I11]" office:value-type="float" office:value="29172.15" calcext:value-type="float">
            <text:p>S/29,172.15</text:p>
          </table:table-cell>
          <table:table-cell table:style-name="ce72" table:formula="of:=[.$C23]*[.J11]" office:value-type="float" office:value="32818.66875" calcext:value-type="float">
            <text:p>S/32,818.67</text:p>
          </table:table-cell>
          <table:table-cell table:style-name="ce72" table:formula="of:=[.$C23]*[.K11]" office:value-type="float" office:value="32818.66875" calcext:value-type="float">
            <text:p>S/32,818.67</text:p>
          </table:table-cell>
          <table:table-cell table:style-name="ce72" table:formula="of:=[.$C23]*[.L11]" office:value-type="float" office:value="32818.66875" calcext:value-type="float">
            <text:p>S/32,818.67</text:p>
          </table:table-cell>
          <table:table-cell table:style-name="ce72" table:formula="of:=[.$C23]*[.M11]" office:value-type="float" office:value="32818.66875" calcext:value-type="float">
            <text:p>S/32,818.67</text:p>
          </table:table-cell>
          <table:table-cell table:style-name="ce72" table:formula="of:=[.$C23]*[.N11]" office:value-type="float" office:value="25525.63125" calcext:value-type="float">
            <text:p>S/25,525.63</text:p>
          </table:table-cell>
          <table:table-cell table:style-name="ce72" table:formula="of:=[.$C23]*[.O11]" office:value-type="float" office:value="25525.63125" calcext:value-type="float">
            <text:p>S/25,525.63</text:p>
          </table:table-cell>
          <table:table-cell table:style-name="ce72" table:formula="of:=SUM([.B23:.O23])" office:value-type="float" office:value="346430.28125" calcext:value-type="float">
            <text:p>S/346,430.28</text:p>
          </table:table-cell>
          <table:table-cell table:number-columns-repeated="16368"/>
        </table:table-row>
        <table:table-row table:style-name="ro11">
          <table:table-cell/>
          <table:table-cell table:style-name="ce57"/>
          <table:table-cell table:style-name="ce65"/>
          <table:table-cell table:style-name="ce73" table:number-columns-repeated="13"/>
          <table:table-cell table:number-columns-repeated="16368"/>
        </table:table-row>
        <table:table-row table:style-name="ro4">
          <table:table-cell table:number-columns-repeated="3"/>
          <table:table-cell table:style-name="ce66" table:number-columns-repeated="13"/>
          <table:table-cell table:number-columns-repeated="16368"/>
        </table:table-row>
        <table:table-row table:style-name="ro12">
          <table:table-cell/>
          <table:table-cell table:style-name="ce58" table:number-columns-repeated="2"/>
          <table:table-cell table:style-name="ce74" table:number-columns-repeated="13"/>
          <table:table-cell table:number-columns-repeated="16368"/>
        </table:table-row>
        <table:table-row table:style-name="ro4">
          <table:table-cell table:number-columns-repeated="3"/>
          <table:table-cell table:style-name="ce66" table:number-columns-repeated="13"/>
          <table:table-cell table:number-columns-repeated="16368"/>
        </table:table-row>
        <table:table-row table:style-name="ro4">
          <table:table-cell table:number-columns-repeated="3"/>
          <table:table-cell table:style-name="ce75" office:value-type="string" calcext:value-type="string" table:number-columns-spanned="12" table:number-rows-spanned="1">
            <text:p>CANTIDADES REFERENCIALES</text:p>
          </table:table-cell>
          <table:covered-table-cell table:number-columns-repeated="10" table:style-name="ce75"/>
          <table:covered-table-cell table:style-name="ce54"/>
          <table:table-cell table:style-name="ce68"/>
          <table:table-cell table:number-columns-repeated="16368"/>
        </table:table-row>
        <table:table-row table:style-name="ro4">
          <table:table-cell table:number-columns-repeated="3"/>
          <table:table-cell table:number-columns-repeated="3" table:style-name="ce69" office:value-type="float" office:value="3500" calcext:value-type="float">
            <text:p>3,500</text:p>
          </table:table-cell>
          <table:table-cell table:number-columns-repeated="3" table:style-name="ce69" office:value-type="float" office:value="4000" calcext:value-type="float">
            <text:p>4,000</text:p>
          </table:table-cell>
          <table:table-cell table:number-columns-repeated="4" table:style-name="ce69" office:value-type="float" office:value="4500" calcext:value-type="float">
            <text:p>4,500</text:p>
          </table:table-cell>
          <table:table-cell table:number-columns-repeated="2" table:style-name="ce69" office:value-type="float" office:value="3500" calcext:value-type="float">
            <text:p>3,500</text:p>
          </table:table-cell>
          <table:table-cell table:style-name="ce78" table:formula="of:=SUM([.D29:.O29])" office:value-type="float" office:value="47500" calcext:value-type="float">
            <text:p>47,500</text:p>
          </table:table-cell>
          <table:table-cell table:number-columns-repeated="16368"/>
        </table:table-row>
        <table:table-row table:style-name="ro4">
          <table:table-cell table:number-columns-repeated="3"/>
          <table:table-cell table:number-columns-repeated="3" table:style-name="ce69" office:value-type="float" office:value="3675" calcext:value-type="float">
            <text:p>3,675</text:p>
          </table:table-cell>
          <table:table-cell table:number-columns-repeated="3" table:style-name="ce69" office:value-type="float" office:value="4200" calcext:value-type="float">
            <text:p>4,200</text:p>
          </table:table-cell>
          <table:table-cell table:number-columns-repeated="4" table:style-name="ce69" office:value-type="float" office:value="4725" calcext:value-type="float">
            <text:p>4,725</text:p>
          </table:table-cell>
          <table:table-cell table:number-columns-repeated="2" table:style-name="ce69" office:value-type="float" office:value="3675" calcext:value-type="float">
            <text:p>3,675</text:p>
          </table:table-cell>
          <table:table-cell table:style-name="ce78" table:formula="of:=SUM([.D30:.O30])" office:value-type="float" office:value="49875" calcext:value-type="float">
            <text:p>49,875</text:p>
          </table:table-cell>
          <table:table-cell table:number-columns-repeated="16368"/>
        </table:table-row>
        <table:table-row table:style-name="ro4">
          <table:table-cell table:number-columns-repeated="3"/>
          <table:table-cell table:number-columns-repeated="3" table:style-name="ce69" office:value-type="float" office:value="3858.75" calcext:value-type="float">
            <text:p>3,859</text:p>
          </table:table-cell>
          <table:table-cell table:number-columns-repeated="3" table:style-name="ce69" office:value-type="float" office:value="4410" calcext:value-type="float">
            <text:p>4,410</text:p>
          </table:table-cell>
          <table:table-cell table:number-columns-repeated="4" table:style-name="ce69" office:value-type="float" office:value="4961.25" calcext:value-type="float">
            <text:p>4,961</text:p>
          </table:table-cell>
          <table:table-cell table:number-columns-repeated="2" table:style-name="ce69" office:value-type="float" office:value="3858.75" calcext:value-type="float">
            <text:p>3,859</text:p>
          </table:table-cell>
          <table:table-cell table:style-name="ce78" table:formula="of:=SUM([.D31:.O31])" office:value-type="float" office:value="52368.75" calcext:value-type="float">
            <text:p>52,369</text:p>
          </table:table-cell>
          <table:table-cell table:number-columns-repeated="16368"/>
        </table:table-row>
        <table:table-row table:style-name="ro4">
          <table:table-cell table:number-columns-repeated="3"/>
          <table:table-cell table:number-columns-repeated="3" table:style-name="ce69" office:value-type="float" office:value="4051.6875" calcext:value-type="float">
            <text:p>4,052</text:p>
          </table:table-cell>
          <table:table-cell table:number-columns-repeated="3" table:style-name="ce69" office:value-type="float" office:value="4630.5" calcext:value-type="float">
            <text:p>4,631</text:p>
          </table:table-cell>
          <table:table-cell table:number-columns-repeated="4" table:style-name="ce69" office:value-type="float" office:value="5209.3125" calcext:value-type="float">
            <text:p>5,209</text:p>
          </table:table-cell>
          <table:table-cell table:number-columns-repeated="2" table:style-name="ce69" office:value-type="float" office:value="4051.6875" calcext:value-type="float">
            <text:p>4,052</text:p>
          </table:table-cell>
          <table:table-cell table:style-name="ce78" table:formula="of:=SUM([.D32:.O32])" office:value-type="float" office:value="54987.1875" calcext:value-type="float">
            <text:p>54,987</text:p>
          </table:table-cell>
          <table:table-cell table:number-columns-repeated="16368"/>
        </table:table-row>
        <table:table-row table:style-name="ro4">
          <table:table-cell table:number-columns-repeated="3"/>
          <table:table-cell table:number-columns-repeated="3" table:style-name="ce69" office:value-type="float" office:value="4254.271875" calcext:value-type="float">
            <text:p>4,254</text:p>
          </table:table-cell>
          <table:table-cell table:number-columns-repeated="3" table:style-name="ce69" office:value-type="float" office:value="4862.025" calcext:value-type="float">
            <text:p>4,862</text:p>
          </table:table-cell>
          <table:table-cell table:number-columns-repeated="4" table:style-name="ce69" office:value-type="float" office:value="5469.778125" calcext:value-type="float">
            <text:p>5,470</text:p>
          </table:table-cell>
          <table:table-cell table:number-columns-repeated="2" table:style-name="ce69" office:value-type="float" office:value="4254.271875" calcext:value-type="float">
            <text:p>4,254</text:p>
          </table:table-cell>
          <table:table-cell table:style-name="ce78" table:formula="of:=SUM([.D33:.O33])" office:value-type="float" office:value="57736.546875" calcext:value-type="float">
            <text:p>57,737</text:p>
          </table:table-cell>
          <table:table-cell table:number-columns-repeated="16368"/>
        </table:table-row>
        <table:table-row table:style-name="ro4">
          <table:table-cell table:number-columns-repeated="3"/>
          <table:table-cell table:style-name="ce66" table:number-columns-repeated="13"/>
          <table:table-cell table:number-columns-repeated="16368"/>
        </table:table-row>
        <table:table-row table:style-name="ro4">
          <table:table-cell table:number-columns-repeated="3"/>
          <table:table-cell table:style-name="ce75" office:value-type="string" calcext:value-type="string" table:number-columns-spanned="12" table:number-rows-spanned="1">
            <text:p>INCREMENTO</text:p>
          </table:table-cell>
          <table:covered-table-cell table:number-columns-repeated="11" table:style-name="ce75"/>
          <table:table-cell table:style-name="ce66"/>
          <table:table-cell table:number-columns-repeated="16368"/>
        </table:table-row>
        <table:table-row table:style-name="ro4">
          <table:table-cell table:number-columns-repeated="3"/>
          <table:table-cell table:style-name="ce69" table:formula="of:=[.D29]*[$Resumen.$H$22]" office:value-type="float" office:value="0" calcext:value-type="float">
            <text:p>0</text:p>
          </table:table-cell>
          <table:table-cell table:style-name="ce69" table:formula="of:=[.E29]*[$Resumen.$H$22]" office:value-type="float" office:value="0" calcext:value-type="float">
            <text:p>0</text:p>
          </table:table-cell>
          <table:table-cell table:style-name="ce69" table:formula="of:=[.F29]*[$Resumen.$H$22]" office:value-type="float" office:value="0" calcext:value-type="float">
            <text:p>0</text:p>
          </table:table-cell>
          <table:table-cell table:style-name="ce69" table:formula="of:=[.G29]*[$Resumen.$H$22]" office:value-type="float" office:value="0" calcext:value-type="float">
            <text:p>0</text:p>
          </table:table-cell>
          <table:table-cell table:style-name="ce69" table:formula="of:=[.H29]*[$Resumen.$H$22]" office:value-type="float" office:value="0" calcext:value-type="float">
            <text:p>0</text:p>
          </table:table-cell>
          <table:table-cell table:style-name="ce69" table:formula="of:=[.I29]*[$Resumen.$H$22]" office:value-type="float" office:value="0" calcext:value-type="float">
            <text:p>0</text:p>
          </table:table-cell>
          <table:table-cell table:style-name="ce69" table:formula="of:=[.J29]*[$Resumen.$H$22]" office:value-type="float" office:value="0" calcext:value-type="float">
            <text:p>0</text:p>
          </table:table-cell>
          <table:table-cell table:style-name="ce69" table:formula="of:=[.K29]*[$Resumen.$H$22]" office:value-type="float" office:value="0" calcext:value-type="float">
            <text:p>0</text:p>
          </table:table-cell>
          <table:table-cell table:style-name="ce69" table:formula="of:=[.L29]*[$Resumen.$H$22]" office:value-type="float" office:value="0" calcext:value-type="float">
            <text:p>0</text:p>
          </table:table-cell>
          <table:table-cell table:style-name="ce69" table:formula="of:=[.M29]*[$Resumen.$H$22]" office:value-type="float" office:value="0" calcext:value-type="float">
            <text:p>0</text:p>
          </table:table-cell>
          <table:table-cell table:style-name="ce69" table:formula="of:=[.N29]*[$Resumen.$H$22]" office:value-type="float" office:value="0" calcext:value-type="float">
            <text:p>0</text:p>
          </table:table-cell>
          <table:table-cell table:style-name="ce69" table:formula="of:=[.O29]*[$Resumen.$H$22]" office:value-type="float" office:value="0" calcext:value-type="float">
            <text:p>0</text:p>
          </table:table-cell>
          <table:table-cell table:style-name="ce66"/>
          <table:table-cell table:number-columns-repeated="16368"/>
        </table:table-row>
        <table:table-row table:style-name="ro4">
          <table:table-cell table:number-columns-repeated="3"/>
          <table:table-cell table:style-name="ce69" table:formula="of:=[.D30]*[$Resumen.$H$22]" office:value-type="float" office:value="0" calcext:value-type="float">
            <text:p>0</text:p>
          </table:table-cell>
          <table:table-cell table:style-name="ce69" table:formula="of:=[.E30]*[$Resumen.$H$22]" office:value-type="float" office:value="0" calcext:value-type="float">
            <text:p>0</text:p>
          </table:table-cell>
          <table:table-cell table:style-name="ce69" table:formula="of:=[.F30]*[$Resumen.$H$22]" office:value-type="float" office:value="0" calcext:value-type="float">
            <text:p>0</text:p>
          </table:table-cell>
          <table:table-cell table:style-name="ce69" table:formula="of:=[.G30]*[$Resumen.$H$22]" office:value-type="float" office:value="0" calcext:value-type="float">
            <text:p>0</text:p>
          </table:table-cell>
          <table:table-cell table:style-name="ce69" table:formula="of:=[.H30]*[$Resumen.$H$22]" office:value-type="float" office:value="0" calcext:value-type="float">
            <text:p>0</text:p>
          </table:table-cell>
          <table:table-cell table:style-name="ce69" table:formula="of:=[.I30]*[$Resumen.$H$22]" office:value-type="float" office:value="0" calcext:value-type="float">
            <text:p>0</text:p>
          </table:table-cell>
          <table:table-cell table:style-name="ce69" table:formula="of:=[.J30]*[$Resumen.$H$22]" office:value-type="float" office:value="0" calcext:value-type="float">
            <text:p>0</text:p>
          </table:table-cell>
          <table:table-cell table:style-name="ce69" table:formula="of:=[.K30]*[$Resumen.$H$22]" office:value-type="float" office:value="0" calcext:value-type="float">
            <text:p>0</text:p>
          </table:table-cell>
          <table:table-cell table:style-name="ce69" table:formula="of:=[.L30]*[$Resumen.$H$22]" office:value-type="float" office:value="0" calcext:value-type="float">
            <text:p>0</text:p>
          </table:table-cell>
          <table:table-cell table:style-name="ce69" table:formula="of:=[.M30]*[$Resumen.$H$22]" office:value-type="float" office:value="0" calcext:value-type="float">
            <text:p>0</text:p>
          </table:table-cell>
          <table:table-cell table:style-name="ce69" table:formula="of:=[.N30]*[$Resumen.$H$22]" office:value-type="float" office:value="0" calcext:value-type="float">
            <text:p>0</text:p>
          </table:table-cell>
          <table:table-cell table:style-name="ce69" table:formula="of:=[.O30]*[$Resumen.$H$22]" office:value-type="float" office:value="0" calcext:value-type="float">
            <text:p>0</text:p>
          </table:table-cell>
          <table:table-cell table:style-name="ce66"/>
          <table:table-cell table:number-columns-repeated="16368"/>
        </table:table-row>
        <table:table-row table:style-name="ro4">
          <table:table-cell table:number-columns-repeated="3"/>
          <table:table-cell table:style-name="ce69" table:formula="of:=[.D31]*[$Resumen.$H$22]" office:value-type="float" office:value="0" calcext:value-type="float">
            <text:p>0</text:p>
          </table:table-cell>
          <table:table-cell table:style-name="ce69" table:formula="of:=[.E31]*[$Resumen.$H$22]" office:value-type="float" office:value="0" calcext:value-type="float">
            <text:p>0</text:p>
          </table:table-cell>
          <table:table-cell table:style-name="ce69" table:formula="of:=[.F31]*[$Resumen.$H$22]" office:value-type="float" office:value="0" calcext:value-type="float">
            <text:p>0</text:p>
          </table:table-cell>
          <table:table-cell table:style-name="ce69" table:formula="of:=[.G31]*[$Resumen.$H$22]" office:value-type="float" office:value="0" calcext:value-type="float">
            <text:p>0</text:p>
          </table:table-cell>
          <table:table-cell table:style-name="ce69" table:formula="of:=[.H31]*[$Resumen.$H$22]" office:value-type="float" office:value="0" calcext:value-type="float">
            <text:p>0</text:p>
          </table:table-cell>
          <table:table-cell table:style-name="ce69" table:formula="of:=[.I31]*[$Resumen.$H$22]" office:value-type="float" office:value="0" calcext:value-type="float">
            <text:p>0</text:p>
          </table:table-cell>
          <table:table-cell table:style-name="ce69" table:formula="of:=[.J31]*[$Resumen.$H$22]" office:value-type="float" office:value="0" calcext:value-type="float">
            <text:p>0</text:p>
          </table:table-cell>
          <table:table-cell table:style-name="ce69" table:formula="of:=[.K31]*[$Resumen.$H$22]" office:value-type="float" office:value="0" calcext:value-type="float">
            <text:p>0</text:p>
          </table:table-cell>
          <table:table-cell table:style-name="ce69" table:formula="of:=[.L31]*[$Resumen.$H$22]" office:value-type="float" office:value="0" calcext:value-type="float">
            <text:p>0</text:p>
          </table:table-cell>
          <table:table-cell table:style-name="ce69" table:formula="of:=[.M31]*[$Resumen.$H$22]" office:value-type="float" office:value="0" calcext:value-type="float">
            <text:p>0</text:p>
          </table:table-cell>
          <table:table-cell table:style-name="ce69" table:formula="of:=[.N31]*[$Resumen.$H$22]" office:value-type="float" office:value="0" calcext:value-type="float">
            <text:p>0</text:p>
          </table:table-cell>
          <table:table-cell table:style-name="ce69" table:formula="of:=[.O31]*[$Resumen.$H$22]" office:value-type="float" office:value="0" calcext:value-type="float">
            <text:p>0</text:p>
          </table:table-cell>
          <table:table-cell table:style-name="ce66"/>
          <table:table-cell table:number-columns-repeated="16368"/>
        </table:table-row>
        <table:table-row table:style-name="ro4">
          <table:table-cell table:number-columns-repeated="3"/>
          <table:table-cell table:style-name="ce69" table:formula="of:=[.D32]*[$Resumen.$H$22]" office:value-type="float" office:value="0" calcext:value-type="float">
            <text:p>0</text:p>
          </table:table-cell>
          <table:table-cell table:style-name="ce69" table:formula="of:=[.E32]*[$Resumen.$H$22]" office:value-type="float" office:value="0" calcext:value-type="float">
            <text:p>0</text:p>
          </table:table-cell>
          <table:table-cell table:style-name="ce69" table:formula="of:=[.F32]*[$Resumen.$H$22]" office:value-type="float" office:value="0" calcext:value-type="float">
            <text:p>0</text:p>
          </table:table-cell>
          <table:table-cell table:style-name="ce69" table:formula="of:=[.G32]*[$Resumen.$H$22]" office:value-type="float" office:value="0" calcext:value-type="float">
            <text:p>0</text:p>
          </table:table-cell>
          <table:table-cell table:style-name="ce69" table:formula="of:=[.H32]*[$Resumen.$H$22]" office:value-type="float" office:value="0" calcext:value-type="float">
            <text:p>0</text:p>
          </table:table-cell>
          <table:table-cell table:style-name="ce69" table:formula="of:=[.I32]*[$Resumen.$H$22]" office:value-type="float" office:value="0" calcext:value-type="float">
            <text:p>0</text:p>
          </table:table-cell>
          <table:table-cell table:style-name="ce69" table:formula="of:=[.J32]*[$Resumen.$H$22]" office:value-type="float" office:value="0" calcext:value-type="float">
            <text:p>0</text:p>
          </table:table-cell>
          <table:table-cell table:style-name="ce69" table:formula="of:=[.K32]*[$Resumen.$H$22]" office:value-type="float" office:value="0" calcext:value-type="float">
            <text:p>0</text:p>
          </table:table-cell>
          <table:table-cell table:style-name="ce69" table:formula="of:=[.L32]*[$Resumen.$H$22]" office:value-type="float" office:value="0" calcext:value-type="float">
            <text:p>0</text:p>
          </table:table-cell>
          <table:table-cell table:style-name="ce69" table:formula="of:=[.M32]*[$Resumen.$H$22]" office:value-type="float" office:value="0" calcext:value-type="float">
            <text:p>0</text:p>
          </table:table-cell>
          <table:table-cell table:style-name="ce69" table:formula="of:=[.N32]*[$Resumen.$H$22]" office:value-type="float" office:value="0" calcext:value-type="float">
            <text:p>0</text:p>
          </table:table-cell>
          <table:table-cell table:style-name="ce69" table:formula="of:=[.O32]*[$Resumen.$H$22]" office:value-type="float" office:value="0" calcext:value-type="float">
            <text:p>0</text:p>
          </table:table-cell>
          <table:table-cell table:style-name="ce66"/>
          <table:table-cell table:number-columns-repeated="16368"/>
        </table:table-row>
        <table:table-row table:style-name="ro4">
          <table:table-cell table:number-columns-repeated="3"/>
          <table:table-cell table:style-name="ce69" table:formula="of:=[.D33]*[$Resumen.$H$22]" office:value-type="float" office:value="0" calcext:value-type="float">
            <text:p>0</text:p>
          </table:table-cell>
          <table:table-cell table:style-name="ce69" table:formula="of:=[.E33]*[$Resumen.$H$22]" office:value-type="float" office:value="0" calcext:value-type="float">
            <text:p>0</text:p>
          </table:table-cell>
          <table:table-cell table:style-name="ce69" table:formula="of:=[.F33]*[$Resumen.$H$22]" office:value-type="float" office:value="0" calcext:value-type="float">
            <text:p>0</text:p>
          </table:table-cell>
          <table:table-cell table:style-name="ce69" table:formula="of:=[.G33]*[$Resumen.$H$22]" office:value-type="float" office:value="0" calcext:value-type="float">
            <text:p>0</text:p>
          </table:table-cell>
          <table:table-cell table:style-name="ce69" table:formula="of:=[.H33]*[$Resumen.$H$22]" office:value-type="float" office:value="0" calcext:value-type="float">
            <text:p>0</text:p>
          </table:table-cell>
          <table:table-cell table:style-name="ce69" table:formula="of:=[.I33]*[$Resumen.$H$22]" office:value-type="float" office:value="0" calcext:value-type="float">
            <text:p>0</text:p>
          </table:table-cell>
          <table:table-cell table:style-name="ce69" table:formula="of:=[.J33]*[$Resumen.$H$22]" office:value-type="float" office:value="0" calcext:value-type="float">
            <text:p>0</text:p>
          </table:table-cell>
          <table:table-cell table:style-name="ce69" table:formula="of:=[.K33]*[$Resumen.$H$22]" office:value-type="float" office:value="0" calcext:value-type="float">
            <text:p>0</text:p>
          </table:table-cell>
          <table:table-cell table:style-name="ce69" table:formula="of:=[.L33]*[$Resumen.$H$22]" office:value-type="float" office:value="0" calcext:value-type="float">
            <text:p>0</text:p>
          </table:table-cell>
          <table:table-cell table:style-name="ce69" table:formula="of:=[.M33]*[$Resumen.$H$22]" office:value-type="float" office:value="0" calcext:value-type="float">
            <text:p>0</text:p>
          </table:table-cell>
          <table:table-cell table:style-name="ce69" table:formula="of:=[.N33]*[$Resumen.$H$22]" office:value-type="float" office:value="0" calcext:value-type="float">
            <text:p>0</text:p>
          </table:table-cell>
          <table:table-cell table:style-name="ce69" table:formula="of:=[.O33]*[$Resumen.$H$22]" office:value-type="float" office:value="0" calcext:value-type="float">
            <text:p>0</text:p>
          </table:table-cell>
          <table:table-cell table:style-name="ce66"/>
          <table:table-cell table:number-columns-repeated="16368"/>
        </table:table-row>
        <table:table-row table:style-name="ro4" table:number-rows-repeated="941">
          <table:table-cell table:number-columns-repeated="3"/>
          <table:table-cell table:style-name="ce66" table:number-columns-repeated="13"/>
          <table:table-cell table:number-columns-repeated="16368"/>
        </table:table-row>
        <table:table-row table:style-name="ro8" table:number-rows-repeated="104759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Inversion_Inicial" table:style-name="ta4">
        <office:forms form:automatic-focus="false" form:apply-design-mode="false"/>
        <table:table-column table:style-name="co11" table:default-cell-style-name="ce81"/>
        <table:table-column table:style-name="co19" table:default-cell-style-name="ce81"/>
        <table:table-column table:style-name="co20" table:default-cell-style-name="ce81"/>
        <table:table-column table:style-name="co21" table:default-cell-style-name="ce111"/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1"/>
        <table:table-column table:style-name="co26" table:number-columns-repeated="7" table:default-cell-style-name="ce81"/>
        <table:table-column table:style-name="co18" table:number-columns-repeated="16367" table:default-cell-style-name="ce81"/>
        <table:table-row table:style-name="ro4">
          <table:table-cell table:style-name="ce80" table:number-columns-repeated="3"/>
          <table:table-cell table:style-name="ce103"/>
          <table:table-cell table:style-name="ce80" table:number-columns-repeated="13"/>
          <table:table-cell table:number-columns-repeated="16367"/>
        </table:table-row>
        <table:table-row table:style-name="ro4">
          <table:table-cell table:style-name="ce80"/>
          <table:table-cell table:style-name="ce82" office:value-type="string" calcext:value-type="string" table:number-columns-spanned="7" table:number-rows-spanned="1">
            <text:p>CUADRO N°03</text:p>
          </table:table-cell>
          <table:covered-table-cell table:number-columns-repeated="6" table:style-name="ce96"/>
          <table:table-cell table:style-name="ce80" table:number-columns-repeated="9"/>
          <table:table-cell table:number-columns-repeated="16367"/>
        </table:table-row>
        <table:table-row table:style-name="ro13">
          <table:table-cell table:style-name="ce59"/>
          <table:table-cell table:style-name="ce54"/>
          <table:table-cell table:style-name="ce67" table:number-columns-repeated="6"/>
          <table:table-cell table:style-name="ce59" table:number-columns-repeated="9"/>
        </table:table-row>
        <table:table-row table:style-name="ro4">
          <table:table-cell table:style-name="ce80"/>
          <table:table-cell table:style-name="ce83" office:value-type="string" calcext:value-type="string" table:number-columns-spanned="7" table:number-rows-spanned="1">
            <text:p>PRESUPUESTO DE INVERSIÓN Y FINANCIAMIENTO</text:p>
          </table:table-cell>
          <table:covered-table-cell table:number-columns-repeated="6" table:style-name="ce97"/>
          <table:table-cell table:style-name="ce80" table:number-columns-repeated="9"/>
          <table:table-cell table:number-columns-repeated="16367"/>
        </table:table-row>
        <table:table-row table:style-name="ro14">
          <table:table-cell table:style-name="ce80" table:number-columns-repeated="3"/>
          <table:table-cell table:style-name="ce103"/>
          <table:table-cell table:style-name="ce80" table:number-columns-repeated="13"/>
          <table:table-cell table:number-columns-repeated="16367"/>
        </table:table-row>
        <table:table-row table:style-name="ro14">
          <table:table-cell table:style-name="ce80"/>
          <table:table-cell table:style-name="ce84" office:value-type="string" calcext:value-type="string" table:number-columns-spanned="1" table:number-rows-spanned="2">
            <text:p>RUBRO</text:p>
          </table:table-cell>
          <table:table-cell table:style-name="ce84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85"/>
          <table:table-cell table:style-name="ce84" office:value-type="string" calcext:value-type="string" table:number-columns-spanned="2" table:number-rows-spanned="1">
            <text:p>FINANCIAMIENTO</text:p>
          </table:table-cell>
          <table:covered-table-cell table:style-name="ce85"/>
          <table:table-cell table:style-name="ce80" table:number-columns-repeated="9"/>
          <table:table-cell table:number-columns-repeated="16367"/>
        </table:table-row>
        <table:table-row table:style-name="ro7">
          <table:table-cell table:style-name="ce80"/>
          <table:covered-table-cell table:style-name="ce85"/>
          <table:table-cell table:style-name="ce98" office:value-type="string" calcext:value-type="string">
            <text:p>Unidad de Medida</text:p>
          </table:table-cell>
          <table:table-cell table:style-name="ce98" office:value-type="string" calcext:value-type="string">
            <text:p>Unidad Requerida</text:p>
          </table:table-cell>
          <table:table-cell table:style-name="ce98" office:value-type="string" calcext:value-type="string">
            <text:p>Valor Unitario</text:p>
          </table:table-cell>
          <table:table-cell table:style-name="ce84" office:value-type="string" calcext:value-type="string">
            <text:p>Total</text:p>
          </table:table-cell>
          <table:table-cell table:style-name="ce98" office:value-type="string" calcext:value-type="string">
            <text:p>Capital Propio</text:p>
          </table:table-cell>
          <table:table-cell table:style-name="ce98" office:value-type="string" calcext:value-type="string">
            <text:p>Préstamo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6" office:value-type="string" calcext:value-type="string">
            <text:p>ACTIVO FIJO</text:p>
          </table:table-cell>
          <table:table-cell table:style-name="ce99" table:number-columns-repeated="3"/>
          <table:table-cell table:style-name="ce91" table:number-columns-repeated="3"/>
          <table:table-cell table:style-name="ce80"/>
          <table:table-cell table:style-name="ce122" office:value-type="string" calcext:value-type="string">
            <text:p>INVERSION</text:p>
          </table:table-cell>
          <table:table-cell table:style-name="ce122" office:value-type="string" calcext:value-type="string">
            <text:p>S/</text:p>
          </table:table-cell>
          <table:table-cell table:style-name="ce122" office:value-type="string" calcext:value-type="string">
            <text:p>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7" office:value-type="string" calcext:value-type="string">
            <text:p>A. TANGIBLES</text:p>
          </table:table-cell>
          <table:table-cell table:style-name="ce87"/>
          <table:table-cell table:style-name="ce104"/>
          <table:table-cell table:style-name="ce112"/>
          <table:table-cell table:style-name="ce116" table:formula="of:=SUM([.F10:.F13])+[.F14]+[.F18]+[.F22]" office:value-type="float" office:value="11772" calcext:value-type="float">
            <text:p>S/11,772.00</text:p>
          </table:table-cell>
          <table:table-cell table:style-name="ce116" table:number-columns-repeated="2"/>
          <table:table-cell table:style-name="ce80"/>
          <table:table-cell table:style-name="ce91" office:value-type="string" calcext:value-type="string">
            <text:p>ACTIVO</text:p>
          </table:table-cell>
          <table:table-cell table:style-name="ce123" table:formula="of:=[.F30]" office:value-type="float" office:value="13442" calcext:value-type="float">
            <text:p>13,442.00</text:p>
          </table:table-cell>
          <table:table-cell table:style-name="ce126" table:formula="of:=[.K9]/[.K11]" office:value-type="percentage" office:value="0.487594312246082" calcext:value-type="percentage">
            <text:p>49 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Terreno</text:p>
          </table:table-cell>
          <table:table-cell table:style-name="ce88"/>
          <table:table-cell table:style-name="ce105"/>
          <table:table-cell table:style-name="ce113"/>
          <table:table-cell table:style-name="ce116" table:number-columns-repeated="3"/>
          <table:table-cell table:style-name="ce80"/>
          <table:table-cell table:style-name="ce91" office:value-type="string" calcext:value-type="string">
            <text:p>CAPITAL DE TRABAJO</text:p>
          </table:table-cell>
          <table:table-cell table:style-name="ce123" table:formula="of:=[.F39]" office:value-type="float" office:value="14126" calcext:value-type="float">
            <text:p>14,126.00</text:p>
          </table:table-cell>
          <table:table-cell table:style-name="ce126" table:formula="of:=[.K10]/[.K11]" office:value-type="percentage" office:value="0.512405687753918" calcext:value-type="percentage">
            <text:p>51 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Construccion y edificaciones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3" office:value-type="float" office:value="3000" calcext:value-type="float">
            <text:p>S/3,000.00</text:p>
          </table:table-cell>
          <table:table-cell table:style-name="ce114" table:formula="of:=[.E11]" office:value-type="float" office:value="3000" calcext:value-type="float">
            <text:p>S/3,000.00</text:p>
          </table:table-cell>
          <table:table-cell table:style-name="ce114"/>
          <table:table-cell table:style-name="ce113"/>
          <table:table-cell table:style-name="ce80"/>
          <table:table-cell table:style-name="ce92" office:value-type="string" calcext:value-type="string">
            <text:p>TOTAL</text:p>
          </table:table-cell>
          <table:table-cell table:style-name="ce124" table:formula="of:=SUM([.K9:.K10])" office:value-type="float" office:value="27568" calcext:value-type="float">
            <text:p>27,568.00</text:p>
          </table:table-cell>
          <table:table-cell table:style-name="ce92"/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Maquinarias y equipos </text:p>
          </table:table-cell>
          <table:table-cell table:style-name="ce88"/>
          <table:table-cell table:style-name="ce105"/>
          <table:table-cell table:style-name="ce113"/>
          <table:table-cell table:style-name="ce118"/>
          <table:table-cell table:style-name="ce114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Herramientas y utensilios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45" calcext:value-type="float">
            <text:p>S/45.00</text:p>
          </table:table-cell>
          <table:table-cell table:style-name="ce114" table:formula="of:=[.E13]*[.D13]" office:value-type="float" office:value="45" calcext:value-type="float">
            <text:p>S/45.00</text:p>
          </table:table-cell>
          <table:table-cell table:style-name="ce114" table:number-columns-repeated="2"/>
          <table:table-cell table:style-name="ce80"/>
          <table:table-cell table:style-name="ce122" office:value-type="string" calcext:value-type="string">
            <text:p>FINANCIMIENTO</text:p>
          </table:table-cell>
          <table:table-cell table:style-name="ce122" office:value-type="string" calcext:value-type="string">
            <text:p>S/</text:p>
          </table:table-cell>
          <table:table-cell table:style-name="ce122" office:value-type="string" calcext:value-type="string">
            <text:p>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Muebles y <text:s/>enseres</text:p>
          </table:table-cell>
          <table:table-cell table:style-name="ce88"/>
          <table:table-cell table:style-name="ce105"/>
          <table:table-cell table:style-name="ce114"/>
          <table:table-cell table:style-name="ce116" table:formula="of:=SUM([.F15:.F17])" office:value-type="float" office:value="4227" calcext:value-type="float">
            <text:p>S/4,227.00</text:p>
          </table:table-cell>
          <table:table-cell table:style-name="ce116"/>
          <table:table-cell table:style-name="ce114"/>
          <table:table-cell table:style-name="ce80"/>
          <table:table-cell table:style-name="ce91" office:value-type="string" calcext:value-type="string">
            <text:p>PATRIMONIO</text:p>
          </table:table-cell>
          <table:table-cell table:style-name="ce123" table:formula="of:=[.G40]" office:value-type="float" office:value="19501" calcext:value-type="float">
            <text:p>19,501.00</text:p>
          </table:table-cell>
          <table:table-cell table:style-name="ce126" table:formula="of:=[.K14]/[.K16]" office:value-type="percentage" office:value="0.707378119558909" calcext:value-type="percentage">
            <text:p>71 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Estantes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20" calcext:value-type="float">
            <text:p>20</text:p>
          </table:table-cell>
          <table:table-cell table:style-name="ce114" office:value-type="float" office:value="200" calcext:value-type="float">
            <text:p>S/200.00</text:p>
          </table:table-cell>
          <table:table-cell table:style-name="ce114" table:formula="of:=[.E15]*[.D15]" office:value-type="float" office:value="4000" calcext:value-type="float">
            <text:p>S/4,000.00</text:p>
          </table:table-cell>
          <table:table-cell table:style-name="ce114" table:number-columns-repeated="2"/>
          <table:table-cell table:style-name="ce80"/>
          <table:table-cell table:style-name="ce91" office:value-type="string" calcext:value-type="string">
            <text:p>DEUDA</text:p>
          </table:table-cell>
          <table:table-cell table:style-name="ce123" table:formula="of:=[.H40]" office:value-type="float" office:value="8067" calcext:value-type="float">
            <text:p>8,067.00</text:p>
          </table:table-cell>
          <table:table-cell table:style-name="ce126" table:formula="of:=[.K15]/[.K16]" office:value-type="percentage" office:value="0.292621880441091" calcext:value-type="percentage">
            <text:p>29 %</text:p>
          </table:table-cell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Escritorio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200" calcext:value-type="float">
            <text:p>S/200.00</text:p>
          </table:table-cell>
          <table:table-cell table:style-name="ce114" table:formula="of:=[.E16]*[.D16]" office:value-type="float" office:value="200" calcext:value-type="float">
            <text:p>S/200.00</text:p>
          </table:table-cell>
          <table:table-cell table:style-name="ce114" table:number-columns-repeated="2"/>
          <table:table-cell table:style-name="ce80"/>
          <table:table-cell table:style-name="ce122" office:value-type="string" calcext:value-type="string">
            <text:p>TOTAL</text:p>
          </table:table-cell>
          <table:table-cell table:style-name="ce125" table:formula="of:=SUM([.K14:.K15])" office:value-type="float" office:value="27568" calcext:value-type="float">
            <text:p>27,568.00</text:p>
          </table:table-cell>
          <table:table-cell table:style-name="ce122"/>
          <table:table-cell table:style-name="ce80" table:number-columns-repeated="5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Silla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27" calcext:value-type="float">
            <text:p>S/27.00</text:p>
          </table:table-cell>
          <table:table-cell table:style-name="ce114" table:formula="of:=[.E17]*[.D17]" office:value-type="float" office:value="27" calcext:value-type="float">
            <text:p>S/27.00</text:p>
          </table:table-cell>
          <table:table-cell table:style-name="ce114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Equipo informático</text:p>
          </table:table-cell>
          <table:table-cell table:style-name="ce88"/>
          <table:table-cell table:style-name="ce105"/>
          <table:table-cell table:style-name="ce114"/>
          <table:table-cell table:style-name="ce116" table:formula="of:=SUM([.F19:.F21])" office:value-type="float" office:value="4500" calcext:value-type="float">
            <text:p>S/4,500.00</text:p>
          </table:table-cell>
          <table:table-cell table:style-name="ce116"/>
          <table:table-cell table:style-name="ce114"/>
          <table:table-cell table:style-name="ce80"/>
          <table:table-cell/>
          <table:table-cell table:style-name="ce80" table:number-columns-repeated="7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Computadora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2500" calcext:value-type="float">
            <text:p>S/2,500.00</text:p>
          </table:table-cell>
          <table:table-cell table:style-name="ce114" table:formula="of:=[.E19]*[.D19]" office:value-type="float" office:value="2500" calcext:value-type="float">
            <text:p>S/2,500.00</text:p>
          </table:table-cell>
          <table:table-cell table:style-name="ce114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Ticketera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1500" calcext:value-type="float">
            <text:p>S/1,500.00</text:p>
          </table:table-cell>
          <table:table-cell table:style-name="ce114" table:formula="of:=[.E20]*[.D20]" office:value-type="float" office:value="1500" calcext:value-type="float">
            <text:p>S/1,500.00</text:p>
          </table:table-cell>
          <table:table-cell table:style-name="ce114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Accesorios</text:p>
          </table:table-cell>
          <table:table-cell table:style-name="ce88" office:value-type="string" calcext:value-type="string">
            <text:p>Unidad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500" calcext:value-type="float">
            <text:p>S/500.00</text:p>
          </table:table-cell>
          <table:table-cell table:style-name="ce114" table:formula="of:=[.E21]*[.D21]" office:value-type="float" office:value="500" calcext:value-type="float">
            <text:p>S/500.00</text:p>
          </table:table-cell>
          <table:table-cell table:style-name="ce114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0" office:value-type="string" calcext:value-type="string">
            <text:p>Vehículos</text:p>
          </table:table-cell>
          <table:table-cell table:style-name="ce100"/>
          <table:table-cell table:style-name="ce106"/>
          <table:table-cell table:style-name="ce114" table:number-columns-repeated="3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7" office:value-type="string" calcext:value-type="string">
            <text:p>B. INTANGIBLES</text:p>
          </table:table-cell>
          <table:table-cell table:style-name="ce87"/>
          <table:table-cell table:style-name="ce104"/>
          <table:table-cell table:style-name="ce114"/>
          <table:table-cell table:style-name="ce116" table:formula="of:=SUM([.F24:.F29])" office:value-type="float" office:value="1670" calcext:value-type="float">
            <text:p>S/1,670.00</text:p>
          </table:table-cell>
          <table:table-cell table:style-name="ce116" table:number-columns-repeated="2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1" office:value-type="string" calcext:value-type="string">
            <text:p>Constitución y formalizacion</text:p>
          </table:table-cell>
          <table:table-cell table:style-name="ce91"/>
          <table:table-cell table:style-name="ce107"/>
          <table:table-cell table:style-name="ce114"/>
          <table:table-cell table:style-name="ce119" office:value-type="float" office:value="1020" calcext:value-type="float">
            <text:p>S/1,020.00</text:p>
          </table:table-cell>
          <table:table-cell table:style-name="ce114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1" office:value-type="string" calcext:value-type="string">
            <text:p>Licencias</text:p>
          </table:table-cell>
          <table:table-cell table:style-name="ce91"/>
          <table:table-cell table:style-name="ce107"/>
          <table:table-cell table:style-name="ce114"/>
          <table:table-cell table:style-name="ce119" office:value-type="float" office:value="150" calcext:value-type="float">
            <text:p>S/150.00</text:p>
          </table:table-cell>
          <table:table-cell table:style-name="ce114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1" office:value-type="string" calcext:value-type="string">
            <text:p>Certificaciones</text:p>
          </table:table-cell>
          <table:table-cell table:style-name="ce91"/>
          <table:table-cell table:style-name="ce107"/>
          <table:table-cell table:style-name="ce114"/>
          <table:table-cell table:style-name="ce119"/>
          <table:table-cell table:style-name="ce114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1" office:value-type="string" calcext:value-type="string">
            <text:p>Capacitaciones</text:p>
          </table:table-cell>
          <table:table-cell table:style-name="ce91"/>
          <table:table-cell table:style-name="ce107"/>
          <table:table-cell table:style-name="ce114" table:number-columns-repeated="3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Promoción</text:p>
          </table:table-cell>
          <table:table-cell table:style-name="ce88"/>
          <table:table-cell table:style-name="ce105"/>
          <table:table-cell table:style-name="ce114"/>
          <table:table-cell table:style-name="ce114" office:value-type="float" office:value="500" calcext:value-type="float">
            <text:p>S/500.00</text:p>
          </table:table-cell>
          <table:table-cell table:style-name="ce114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15">
          <table:table-cell table:style-name="ce80"/>
          <table:table-cell table:style-name="ce91" office:value-type="string" calcext:value-type="string">
            <text:p>Implementación y puesta en marcha</text:p>
          </table:table-cell>
          <table:table-cell table:style-name="ce100"/>
          <table:table-cell table:style-name="ce106"/>
          <table:table-cell table:style-name="ce114" table:number-columns-repeated="4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2" office:value-type="string" calcext:value-type="string">
            <text:p>TOTAL DE ACTIVO FIJO</text:p>
          </table:table-cell>
          <table:table-cell table:style-name="ce101" table:number-columns-repeated="2"/>
          <table:table-cell table:style-name="ce115"/>
          <table:table-cell table:style-name="ce117" table:formula="of:=[.F23]+[.F9]" office:value-type="float" office:value="13442" calcext:value-type="float">
            <text:p>S/13,442.00</text:p>
          </table:table-cell>
          <table:table-cell table:style-name="ce117" table:formula="of:=[.F30]" office:value-type="float" office:value="13442" calcext:value-type="float">
            <text:p>S/13,442.00</text:p>
          </table:table-cell>
          <table:table-cell table:style-name="ce117" office:value-type="float" office:value="0" calcext:value-type="float">
            <text:p>S/0.00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7" office:value-type="string" calcext:value-type="string">
            <text:p>CAPITAL DE TRABAJO</text:p>
          </table:table-cell>
          <table:table-cell table:style-name="ce87"/>
          <table:table-cell table:style-name="ce104"/>
          <table:table-cell table:style-name="ce114"/>
          <table:table-cell table:style-name="ce116" table:number-columns-repeated="2"/>
          <table:table-cell table:style-name="ce112" table:formula="of:=SUM([.H32:.H38])" office:value-type="float" office:value="8067" calcext:value-type="float">
            <text:p>S/8,067.00</text:p>
          </table:table-cell>
          <table:table-cell table:style-name="ce80" table:number-columns-repeated="9"/>
          <table:table-cell table:number-columns-repeated="16367"/>
        </table:table-row>
        <table:table-row table:style-name="ro16">
          <table:table-cell table:style-name="ce80"/>
          <table:table-cell table:style-name="ce91" office:value-type="string" calcext:value-type="string">
            <text:p>Materia prima</text:p>
          </table:table-cell>
          <table:table-cell table:style-name="ce102" office:value-type="string" calcext:value-type="string">
            <text:p>Ovillos</text:p>
          </table:table-cell>
          <table:table-cell table:style-name="ce108" table:formula="of:=[$Presupuesto_Ventas.$D$7]" office:value-type="float" office:value="3500" calcext:value-type="float">
            <text:p>3500</text:p>
          </table:table-cell>
          <table:table-cell table:style-name="ce114" table:formula="of:=[$Resumen.$H$21]" office:value-type="float" office:value="4" calcext:value-type="float">
            <text:p>S/4.00</text:p>
          </table:table-cell>
          <table:table-cell table:style-name="ce114" table:formula="of:=[.E32]*[.D32]" office:value-type="float" office:value="14000" calcext:value-type="float">
            <text:p>S/14,000.00</text:p>
          </table:table-cell>
          <table:table-cell table:style-name="ce114" table:formula="of:=[.F32]-[.H32]" office:value-type="float" office:value="5933" calcext:value-type="float">
            <text:p>S/5,933.00</text:p>
          </table:table-cell>
          <table:table-cell table:style-name="ce114" office:value-type="float" office:value="8067" calcext:value-type="float">
            <text:p>S/8,067.00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1" office:value-type="string" calcext:value-type="string">
            <text:p>Mano de obra</text:p>
          </table:table-cell>
          <table:table-cell table:style-name="ce91"/>
          <table:table-cell table:style-name="ce107"/>
          <table:table-cell table:style-name="ce114" table:number-columns-repeated="3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7" office:value-type="string" calcext:value-type="string">
            <text:p>Costos Indirectos de Producción</text:p>
          </table:table-cell>
          <table:table-cell table:style-name="ce87"/>
          <table:table-cell table:style-name="ce104"/>
          <table:table-cell table:style-name="ce116" table:number-columns-repeated="4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Flete</text:p>
          </table:table-cell>
          <table:table-cell table:style-name="ce91" office:value-type="string" calcext:value-type="string">
            <text:p>Paquete de ovillos</text:p>
          </table:table-cell>
          <table:table-cell table:style-name="ce109" table:formula="of:=[$Presupuesto_Ventas.$D$7]" office:value-type="float" office:value="3500" calcext:value-type="float">
            <text:p>3500</text:p>
          </table:table-cell>
          <table:table-cell table:style-name="ce114" office:value-type="float" office:value="0.028" calcext:value-type="float">
            <text:p>S/0.03</text:p>
          </table:table-cell>
          <table:table-cell table:style-name="ce114" table:formula="of:=[.E35]*[.D35]" office:value-type="float" office:value="98" calcext:value-type="float">
            <text:p>S/98.00</text:p>
          </table:table-cell>
          <table:table-cell table:style-name="ce114" table:formula="of:=[.F35]" office:value-type="float" office:value="98" calcext:value-type="float">
            <text:p>S/98.00</text:p>
          </table:table-cell>
          <table:table-cell table:style-name="ce113" table:formula="of:=[.F35]-[.G35]" office:value-type="float" office:value="0" calcext:value-type="float">
            <text:p>S/0.00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9" office:value-type="string" calcext:value-type="string">
            <text:p>Bolsas de despacho</text:p>
          </table:table-cell>
          <table:table-cell table:style-name="ce88" office:value-type="string" calcext:value-type="string">
            <text:p>Paquete x 50</text:p>
          </table:table-cell>
          <table:table-cell table:style-name="ce105" office:value-type="float" office:value="14" calcext:value-type="float">
            <text:p>14</text:p>
          </table:table-cell>
          <table:table-cell table:style-name="ce114" office:value-type="float" office:value="2" calcext:value-type="float">
            <text:p>S/2.00</text:p>
          </table:table-cell>
          <table:table-cell table:style-name="ce114" table:formula="of:=[.E36]*[.D36]" office:value-type="float" office:value="28" calcext:value-type="float">
            <text:p>S/28.00</text:p>
          </table:table-cell>
          <table:table-cell table:style-name="ce114" table:formula="of:=[.F36]" office:value-type="float" office:value="28" calcext:value-type="float">
            <text:p>S/28.00</text:p>
          </table:table-cell>
          <table:table-cell table:style-name="ce113" table:formula="of:=[.F36]-[.G36]" office:value-type="float" office:value="0" calcext:value-type="float">
            <text:p>S/0.00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Gastos de Administración</text:p>
          </table:table-cell>
          <table:table-cell table:style-name="ce88"/>
          <table:table-cell table:style-name="ce105"/>
          <table:table-cell table:style-name="ce114" table:number-columns-repeated="3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88" office:value-type="string" calcext:value-type="string">
            <text:p>Gastos de Ventas</text:p>
          </table:table-cell>
          <table:table-cell table:style-name="ce91"/>
          <table:table-cell table:style-name="ce107"/>
          <table:table-cell table:style-name="ce114" table:number-columns-repeated="3"/>
          <table:table-cell table:style-name="ce113"/>
          <table:table-cell table:style-name="ce80" table:number-columns-repeated="9"/>
          <table:table-cell table:number-columns-repeated="16367"/>
        </table:table-row>
        <table:table-row table:style-name="ro14">
          <table:table-cell table:style-name="ce80"/>
          <table:table-cell table:style-name="ce86" office:value-type="string" calcext:value-type="string">
            <text:p>TOTAL DE CAPITAL DE TRABAJO</text:p>
          </table:table-cell>
          <table:table-cell table:style-name="ce99" table:number-columns-repeated="2"/>
          <table:table-cell table:style-name="ce114"/>
          <table:table-cell table:style-name="ce116" table:formula="of:=[.F32]+[.F35]+[.F36]" office:value-type="float" office:value="14126" calcext:value-type="float">
            <text:p>S/14,126.00</text:p>
          </table:table-cell>
          <table:table-cell table:style-name="ce116" table:formula="of:=[.G32]+[.G35]+[.G36]" office:value-type="float" office:value="6059" calcext:value-type="float">
            <text:p>S/6,059.00</text:p>
          </table:table-cell>
          <table:table-cell table:style-name="ce116" table:formula="of:=[.H32]+[.H35]+[.H36]" office:value-type="float" office:value="8067" calcext:value-type="float">
            <text:p>S/8,067.00</text:p>
          </table:table-cell>
          <table:table-cell table:style-name="ce80" table:number-columns-repeated="9"/>
          <table:table-cell table:number-columns-repeated="16367"/>
        </table:table-row>
        <table:table-row table:style-name="ro4">
          <table:table-cell table:style-name="ce80"/>
          <table:table-cell table:style-name="ce93" office:value-type="string" calcext:value-type="string">
            <text:p>TOTAL DE INVERSIÓN</text:p>
          </table:table-cell>
          <table:table-cell table:style-name="ce93"/>
          <table:table-cell table:style-name="ce92"/>
          <table:table-cell table:style-name="ce117"/>
          <table:table-cell table:style-name="ce117" table:formula="of:=[.F39]+[.F30]" office:value-type="float" office:value="27568" calcext:value-type="float">
            <text:p>S/27,568.00</text:p>
          </table:table-cell>
          <table:table-cell table:style-name="ce117" table:formula="of:=[.G30]+[.G39]" office:value-type="float" office:value="19501" calcext:value-type="float">
            <text:p>S/19,501.00</text:p>
          </table:table-cell>
          <table:table-cell table:style-name="ce117" table:formula="of:=[.H30]+[.H39]" office:value-type="float" office:value="8067" calcext:value-type="float">
            <text:p>S/8,067.00</text:p>
          </table:table-cell>
          <table:table-cell table:style-name="ce80"/>
          <table:table-cell table:style-name="ce80" table:formula="of:=[.G40]/[.F40]" office:value-type="float" office:value="0.707378119558909" calcext:value-type="float">
            <text:p>0.707378119558909</text:p>
          </table:table-cell>
          <table:table-cell table:style-name="ce80" table:number-columns-repeated="7"/>
          <table:table-cell table:number-columns-repeated="16367"/>
        </table:table-row>
        <table:table-row table:style-name="ro4">
          <table:table-cell table:style-name="ce80"/>
          <table:table-cell table:style-name="ce94" table:number-columns-spanned="7" table:number-rows-spanned="1"/>
          <table:covered-table-cell table:number-columns-repeated="6" table:style-name="ce94"/>
          <table:table-cell table:style-name="ce80"/>
          <table:table-cell table:style-name="ce80" table:formula="of:=[.H40]/[.F40]" office:value-type="float" office:value="0.292621880441091" calcext:value-type="float">
            <text:p>0.292621880441091</text:p>
          </table:table-cell>
          <table:table-cell table:style-name="ce80" table:number-columns-repeated="7"/>
          <table:table-cell table:number-columns-repeated="16367"/>
        </table:table-row>
        <table:table-row table:style-name="ro14">
          <table:table-cell table:style-name="ce80"/>
          <table:table-cell table:style-name="ce95" table:number-columns-repeated="2"/>
          <table:table-cell table:style-name="ce110"/>
          <table:table-cell table:style-name="ce95"/>
          <table:table-cell table:style-name="ce120"/>
          <table:table-cell table:style-name="ce121" table:number-columns-repeated="2"/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 table:number-columns-repeated="7"/>
          <table:table-cell table:number-columns-repeated="16367"/>
        </table:table-row>
        <table:table-row table:style-name="ro4">
          <table:table-cell table:style-name="ce80" table:number-columns-repeated="3"/>
          <table:table-cell table:style-name="ce103"/>
          <table:table-cell table:style-name="ce80" table:number-columns-repeated="3"/>
          <table:table-cell table:style-name="ce80" office:value-type="float" office:value="0" calcext:value-type="float">
            <text:p>0</text:p>
          </table:table-cell>
          <table:table-cell table:style-name="ce80" table:number-columns-repeated="9"/>
          <table:table-cell table:number-columns-repeated="16367"/>
        </table:table-row>
        <table:table-row table:style-name="ro4" table:number-rows-repeated="966">
          <table:table-cell table:style-name="ce80" table:number-columns-repeated="3"/>
          <table:table-cell table:style-name="ce103"/>
          <table:table-cell table:style-name="ce80" table:number-columns-repeated="13"/>
          <table:table-cell table:number-columns-repeated="16367"/>
        </table:table-row>
        <table:table-row table:style-name="ro8" table:number-rows-repeated="104756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eprecion_VR" table:style-name="ta5">
        <table:table-column table:style-name="co26" table:default-cell-style-name="ce1"/>
        <table:table-column table:style-name="co28" table:default-cell-style-name="ce49"/>
        <table:table-column table:style-name="co29" table:default-cell-style-name="ce134"/>
        <table:table-column table:style-name="co30" table:default-cell-style-name="ce134"/>
        <table:table-column table:style-name="co31" table:number-columns-repeated="3" table:default-cell-style-name="ce134"/>
        <table:table-column table:style-name="co21" table:default-cell-style-name="ce134"/>
        <table:table-column table:style-name="co26" table:number-columns-repeated="18" table:default-cell-style-name="ce1"/>
        <table:table-column table:style-name="co18" table:number-columns-repeated="16358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54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67"/>
          <table:table-cell table:number-columns-repeated="16376"/>
        </table:table-row>
        <table:table-row table:style-name="ro17">
          <table:table-cell/>
          <table:table-cell table:style-name="ce54"/>
          <table:table-cell table:style-name="ce67" table:number-columns-repeated="6"/>
          <table:table-cell table:number-columns-repeated="16376"/>
        </table:table-row>
        <table:table-row table:style-name="ro18">
          <table:table-cell/>
          <table:table-cell table:style-name="ce128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63"/>
          <table:table-cell table:number-columns-repeated="16376"/>
        </table:table-row>
        <table:table-row table:style-name="ro19">
          <table:table-cell/>
          <table:table-cell table:style-name="ce129"/>
          <table:table-cell table:style-name="ce135" table:number-columns-repeated="6"/>
          <table:table-cell table:number-columns-repeated="16376"/>
        </table:table-row>
        <table:table-row table:style-name="ro20">
          <table:table-cell table:style-name="ce127"/>
          <table:table-cell table:style-name="ce130" office:value-type="string" calcext:value-type="string">
            <text:p>ACTIVO FIJO</text:p>
          </table:table-cell>
          <table:table-cell table:style-name="ce136" office:value-type="string" calcext:value-type="string">
            <text:p>Valor de compra</text:p>
          </table:table-cell>
          <table:table-cell table:style-name="ce136" office:value-type="string" calcext:value-type="string">
            <text:p>Vida útil (años)</text:p>
          </table:table-cell>
          <table:table-cell table:style-name="ce136" office:value-type="string" calcext:value-type="string">
            <text:p>Tasa de Depreciación</text:p>
          </table:table-cell>
          <table:table-cell table:style-name="ce136" office:value-type="string" calcext:value-type="string">
            <text:p>Depreciación Anual</text:p>
          </table:table-cell>
          <table:table-cell table:style-name="ce136" office:value-type="string" calcext:value-type="string">
            <text:p>Depreciación Acumulada</text:p>
          </table:table-cell>
          <table:table-cell table:style-name="ce136" office:value-type="string" calcext:value-type="string">
            <text:p>Valor de Recupero</text:p>
          </table:table-cell>
          <table:table-cell table:style-name="ce127" table:number-columns-repeated="18"/>
          <table:table-cell table:number-columns-repeated="16358"/>
        </table:table-row>
        <table:table-row table:style-name="ro4">
          <table:table-cell/>
          <table:table-cell table:style-name="ce131" office:value-type="string" calcext:value-type="string">
            <text:p>Infraestructura</text:p>
          </table:table-cell>
          <table:table-cell table:style-name="ce137"/>
          <table:table-cell table:style-name="ce138" table:number-columns-repeated="3"/>
          <table:table-cell table:style-name="ce137"/>
          <table:table-cell table:style-name="ce138"/>
          <table:table-cell table:number-columns-repeated="16376"/>
        </table:table-row>
        <table:table-row table:style-name="ro14">
          <table:table-cell/>
          <table:table-cell table:style-name="ce131" office:value-type="string" calcext:value-type="string">
            <text:p>Maquinaria y equipos</text:p>
          </table:table-cell>
          <table:table-cell table:style-name="ce137"/>
          <table:table-cell table:style-name="ce138" table:number-columns-repeated="3"/>
          <table:table-cell table:style-name="ce137"/>
          <table:table-cell table:style-name="ce138"/>
          <table:table-cell table:number-columns-repeated="16376"/>
        </table:table-row>
        <table:table-row table:style-name="ro14">
          <table:table-cell/>
          <table:table-cell table:style-name="ce131" office:value-type="string" calcext:value-type="string">
            <text:p>Herramientas y utensilios</text:p>
          </table:table-cell>
          <table:table-cell table:style-name="ce137" table:formula="of:=[$Inversion_Inicial.F13]" office:value-type="float" office:value="45" calcext:value-type="float">
            <text:p>45.00</text:p>
          </table:table-cell>
          <table:table-cell table:style-name="ce138" office:value-type="float" office:value="5" calcext:value-type="float">
            <text:p>5.00</text:p>
          </table:table-cell>
          <table:table-cell table:style-name="ce138" table:formula="of:=1/[.D9]" office:value-type="float" office:value="0.2" calcext:value-type="float">
            <text:p>0.20</text:p>
          </table:table-cell>
          <table:table-cell table:style-name="ce138" table:formula="of:=[.E9]*[.C9]" office:value-type="float" office:value="9" calcext:value-type="float">
            <text:p>9.00</text:p>
          </table:table-cell>
          <table:table-cell table:style-name="ce137" table:formula="of:=[.F9]*5" office:value-type="float" office:value="45" calcext:value-type="float">
            <text:p>45.00</text:p>
          </table:table-cell>
          <table:table-cell table:style-name="ce138" table:formula="of:=[.C9]-[.G9]" office:value-type="float" office:value="0" calcext:value-type="float">
            <text:p>0.00</text:p>
          </table:table-cell>
          <table:table-cell table:number-columns-repeated="16376"/>
        </table:table-row>
        <table:table-row table:style-name="ro14">
          <table:table-cell/>
          <table:table-cell table:style-name="ce131" office:value-type="string" calcext:value-type="string">
            <text:p>Equipos informáticos</text:p>
          </table:table-cell>
          <table:table-cell table:style-name="ce137" table:formula="of:=[$Inversion_Inicial.F18]" office:value-type="float" office:value="4500" calcext:value-type="float">
            <text:p>4,500.00</text:p>
          </table:table-cell>
          <table:table-cell table:style-name="ce138" office:value-type="float" office:value="3" calcext:value-type="float">
            <text:p>3.00</text:p>
          </table:table-cell>
          <table:table-cell table:style-name="ce138" table:formula="of:=1/[.D10]" office:value-type="float" office:value="0.333333333333333" calcext:value-type="float">
            <text:p>0.33</text:p>
          </table:table-cell>
          <table:table-cell table:style-name="ce138" table:formula="of:=[.E10]*[.C10]" office:value-type="float" office:value="1500" calcext:value-type="float">
            <text:p>1,500.00</text:p>
          </table:table-cell>
          <table:table-cell table:style-name="ce137" table:formula="of:=[.F10]*2" office:value-type="float" office:value="3000" calcext:value-type="float">
            <text:p>3,000.00</text:p>
          </table:table-cell>
          <table:table-cell table:style-name="ce138" table:formula="of:=[.C10]-[.G10]" office:value-type="float" office:value="1500" calcext:value-type="float">
            <text:p>1,500.00</text:p>
          </table:table-cell>
          <table:table-cell table:number-columns-repeated="16376"/>
        </table:table-row>
        <table:table-row table:style-name="ro4">
          <table:table-cell/>
          <table:table-cell table:style-name="ce131" office:value-type="string" calcext:value-type="string">
            <text:p>Muebles y enseres</text:p>
          </table:table-cell>
          <table:table-cell table:style-name="ce138" table:formula="of:=[$Inversion_Inicial.F14]" office:value-type="float" office:value="4227" calcext:value-type="float">
            <text:p>4,227.00</text:p>
          </table:table-cell>
          <table:table-cell table:style-name="ce138" office:value-type="float" office:value="5" calcext:value-type="float">
            <text:p>5.00</text:p>
          </table:table-cell>
          <table:table-cell table:style-name="ce138" table:formula="of:=1/[.D11]" office:value-type="float" office:value="0.2" calcext:value-type="float">
            <text:p>0.20</text:p>
          </table:table-cell>
          <table:table-cell table:style-name="ce138" table:formula="of:=[.E11]*[.C11]" office:value-type="float" office:value="845.4" calcext:value-type="float">
            <text:p>845.40</text:p>
          </table:table-cell>
          <table:table-cell table:style-name="ce137" table:formula="of:=[.F11]*5" office:value-type="float" office:value="4227" calcext:value-type="float">
            <text:p>4,227.00</text:p>
          </table:table-cell>
          <table:table-cell table:style-name="ce138" table:formula="of:=[.C11]-[.G11]" office:value-type="float" office:value="0" calcext:value-type="float">
            <text:p>0.00</text:p>
          </table:table-cell>
          <table:table-cell table:number-columns-repeated="16376"/>
        </table:table-row>
        <table:table-row table:style-name="ro14">
          <table:table-cell/>
          <table:table-cell table:style-name="ce131" office:value-type="string" calcext:value-type="string">
            <text:p>Vehículos</text:p>
          </table:table-cell>
          <table:table-cell table:style-name="ce138" table:number-columns-repeated="4"/>
          <table:table-cell table:style-name="ce137"/>
          <table:table-cell table:style-name="ce138"/>
          <table:table-cell table:number-columns-repeated="16376"/>
        </table:table-row>
        <table:table-row table:style-name="ro14">
          <table:table-cell/>
          <table:table-cell table:style-name="ce132" office:value-type="string" calcext:value-type="string">
            <text:p>Total</text:p>
          </table:table-cell>
          <table:table-cell table:style-name="ce139" table:number-columns-repeated="3"/>
          <table:table-cell table:style-name="ce139" table:formula="of:=SUM([.F9:.F12])" office:value-type="float" office:value="2354.4" calcext:value-type="float">
            <text:p>2,354.40</text:p>
          </table:table-cell>
          <table:table-cell table:style-name="ce139"/>
          <table:table-cell table:style-name="ce139" table:formula="of:=SUM([.H9:.H12])" office:value-type="float" office:value="1500" calcext:value-type="float">
            <text:p>1,500.00</text:p>
          </table:table-cell>
          <table:table-cell table:number-columns-repeated="16376"/>
        </table:table-row>
        <table:table-row table:style-name="ro4">
          <table:table-cell/>
          <table:table-cell table:style-name="ce133"/>
          <table:table-cell table:number-columns-repeated="16382"/>
        </table:table-row>
        <table:table-row table:style-name="ro4" table:number-rows-repeated="988">
          <table:table-cell table:number-columns-repeated="16384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apital_Trabajo" table:style-name="ta6">
        <table:table-column table:style-name="co32" table:default-cell-style-name="ce49"/>
        <table:table-column table:style-name="co33" table:default-cell-style-name="ce49"/>
        <table:table-column table:style-name="co15" table:default-cell-style-name="ce49"/>
        <table:table-column table:style-name="co34" table:default-cell-style-name="ce49"/>
        <table:table-column table:style-name="co21" table:default-cell-style-name="ce49"/>
        <table:table-column table:style-name="co34" table:number-columns-repeated="45" table:default-cell-style-name="ce49"/>
        <table:table-column table:style-name="co35" table:default-cell-style-name="ce49"/>
        <table:table-column table:style-name="co34" table:number-columns-repeated="11" table:default-cell-style-name="ce49"/>
        <table:table-column table:style-name="co36" table:default-cell-style-name="ce49"/>
        <table:table-column table:style-name="co18" table:number-columns-repeated="16321" table:default-cell-style-name="ce49"/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54" office:value-type="string" calcext:value-type="string" table:number-columns-spanned="14" table:number-rows-spanned="1">
            <text:p>CUADRO N° 05</text:p>
          </table:table-cell>
          <table:covered-table-cell table:number-columns-repeated="13" table:style-name="ce67"/>
          <table:table-cell table:number-columns-repeated="16369"/>
        </table:table-row>
        <table:table-row table:style-name="ro12">
          <table:table-cell/>
          <table:table-cell table:style-name="ce59" table:number-columns-repeated="14"/>
          <table:table-cell table:number-columns-repeated="16369"/>
        </table:table-row>
        <table:table-row table:style-name="ro4">
          <table:table-cell/>
          <table:table-cell table:style-name="ce55" office:value-type="string" calcext:value-type="string" table:number-columns-spanned="14" table:number-rows-spanned="1">
            <text:p>VARIACION DE CAPITAL DE TRABAJO AÑO 1</text:p>
          </table:table-cell>
          <table:covered-table-cell table:number-columns-repeated="13" table:style-name="ce63"/>
          <table:table-cell table:style-name="ce55" office:value-type="string" calcext:value-type="string" table:number-columns-spanned="12" table:number-rows-spanned="1">
            <text:p>VARIACION DE CAPITAL DE TRABAJO AÑO 2</text:p>
          </table:table-cell>
          <table:covered-table-cell table:number-columns-repeated="11" table:style-name="ce55"/>
          <table:table-cell table:style-name="ce55" office:value-type="string" calcext:value-type="string" table:number-columns-spanned="12" table:number-rows-spanned="1">
            <text:p>VARIACION DE CAPITAL DE TRABAJO AÑO 3</text:p>
          </table:table-cell>
          <table:covered-table-cell table:number-columns-repeated="11" table:style-name="ce55"/>
          <table:table-cell table:style-name="ce55" office:value-type="string" calcext:value-type="string" table:number-columns-spanned="12" table:number-rows-spanned="1">
            <text:p>VARIACION DE CAPITAL DE TRABAJO AÑO 4</text:p>
          </table:table-cell>
          <table:covered-table-cell table:number-columns-repeated="11" table:style-name="ce55"/>
          <table:table-cell table:style-name="ce55" office:value-type="string" calcext:value-type="string" table:number-columns-spanned="12" table:number-rows-spanned="1">
            <text:p>VARIACION DE CAPITAL DE TRABAJO AÑO 5</text:p>
          </table:table-cell>
          <table:covered-table-cell table:number-columns-repeated="11" table:style-name="ce55"/>
          <table:table-cell table:number-columns-repeated="16321"/>
        </table:table-row>
        <table:table-row table:style-name="ro12">
          <table:table-cell table:style-name="ce140"/>
          <table:table-cell table:style-name="ce59" table:number-columns-repeated="14"/>
          <table:table-cell table:number-columns-repeated="16369"/>
        </table:table-row>
        <table:table-row table:style-name="ro4">
          <table:table-cell table:style-name="ce140"/>
          <table:table-cell table:style-name="ce141" office:value-type="string" calcext:value-type="string" table:number-columns-spanned="1" table:number-rows-spanned="2">
            <text:p>RUBRO</text:p>
          </table:table-cell>
          <table:table-cell table:style-name="ce141" office:value-type="float" office:value="0" calcext:value-type="float" table:number-columns-spanned="1" table:number-rows-spanned="2">
            <text:p>0</text:p>
          </table:table-cell>
          <table:table-cell table:style-name="ce141" office:value-type="string" calcext:value-type="string" table:number-columns-spanned="12" table:number-rows-spanned="1">
            <text:p>MES</text:p>
          </table:table-cell>
          <table:covered-table-cell table:number-columns-repeated="11" table:style-name="ce142"/>
          <table:table-cell table:style-name="ce159" office:value-type="string" calcext:value-type="string" table:number-columns-spanned="12" table:number-rows-spanned="1">
            <text:p>MES</text:p>
          </table:table-cell>
          <table:covered-table-cell table:number-columns-repeated="11" table:style-name="ce162"/>
          <table:table-cell table:style-name="ce163" office:value-type="string" calcext:value-type="string" table:number-columns-spanned="12" table:number-rows-spanned="1">
            <text:p>MES</text:p>
          </table:table-cell>
          <table:covered-table-cell table:number-columns-repeated="11" table:style-name="ce165"/>
          <table:table-cell table:style-name="ce159" office:value-type="string" calcext:value-type="string" table:number-columns-spanned="12" table:number-rows-spanned="1">
            <text:p>MES</text:p>
          </table:table-cell>
          <table:covered-table-cell table:number-columns-repeated="11" table:style-name="ce162"/>
          <table:table-cell table:style-name="ce163" office:value-type="string" calcext:value-type="string" table:number-columns-spanned="12" table:number-rows-spanned="1">
            <text:p>MES</text:p>
          </table:table-cell>
          <table:covered-table-cell table:number-columns-repeated="11" table:style-name="ce165"/>
          <table:table-cell table:number-columns-repeated="16321"/>
        </table:table-row>
        <table:table-row table:style-name="ro4">
          <table:table-cell table:style-name="ce140"/>
          <table:covered-table-cell table:number-columns-repeated="2" table:style-name="ce142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9" calcext:value-type="float">
            <text:p>9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12" calcext:value-type="float">
            <text:p>1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9" calcext:value-type="float">
            <text:p>9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12" calcext:value-type="float">
            <text:p>12</text:p>
          </table:table-cell>
          <table:table-cell table:number-columns-repeated="16321"/>
        </table:table-row>
        <table:table-row table:style-name="ro16">
          <table:table-cell table:style-name="ce140"/>
          <table:table-cell table:style-name="ce143" office:value-type="string" calcext:value-type="string">
            <text:p>Unidades</text:p>
          </table:table-cell>
          <table:table-cell table:style-name="ce147"/>
          <table:table-cell table:style-name="ce152" table:formula="of:=[$Presupuesto_Ventas.D7]" office:value-type="float" office:value="3500" calcext:value-type="float">
            <text:p>3,500.00</text:p>
          </table:table-cell>
          <table:table-cell table:style-name="ce152" table:formula="of:=[$Presupuesto_Ventas.E7]" office:value-type="float" office:value="3500" calcext:value-type="float">
            <text:p>3,500.00</text:p>
          </table:table-cell>
          <table:table-cell table:style-name="ce152" table:formula="of:=[$Presupuesto_Ventas.F7]" office:value-type="float" office:value="3500" calcext:value-type="float">
            <text:p>3,500.00</text:p>
          </table:table-cell>
          <table:table-cell table:style-name="ce152" table:formula="of:=[$Presupuesto_Ventas.G7]" office:value-type="float" office:value="4000" calcext:value-type="float">
            <text:p>4,000.00</text:p>
          </table:table-cell>
          <table:table-cell table:style-name="ce152" table:formula="of:=[$Presupuesto_Ventas.H7]" office:value-type="float" office:value="4000" calcext:value-type="float">
            <text:p>4,000.00</text:p>
          </table:table-cell>
          <table:table-cell table:style-name="ce152" table:formula="of:=[$Presupuesto_Ventas.I7]" office:value-type="float" office:value="4000" calcext:value-type="float">
            <text:p>4,000.00</text:p>
          </table:table-cell>
          <table:table-cell table:style-name="ce152" table:formula="of:=[$Presupuesto_Ventas.J7]" office:value-type="float" office:value="4500" calcext:value-type="float">
            <text:p>4,500.00</text:p>
          </table:table-cell>
          <table:table-cell table:style-name="ce152" table:formula="of:=[$Presupuesto_Ventas.K7]" office:value-type="float" office:value="4500" calcext:value-type="float">
            <text:p>4,500.00</text:p>
          </table:table-cell>
          <table:table-cell table:style-name="ce152" table:formula="of:=[$Presupuesto_Ventas.L7]" office:value-type="float" office:value="4500" calcext:value-type="float">
            <text:p>4,500.00</text:p>
          </table:table-cell>
          <table:table-cell table:style-name="ce152" table:formula="of:=[$Presupuesto_Ventas.M7]" office:value-type="float" office:value="4500" calcext:value-type="float">
            <text:p>4,500.00</text:p>
          </table:table-cell>
          <table:table-cell table:style-name="ce152" table:formula="of:=[$Presupuesto_Ventas.N7]" office:value-type="float" office:value="3500" calcext:value-type="float">
            <text:p>3,500.00</text:p>
          </table:table-cell>
          <table:table-cell table:style-name="ce152" table:formula="of:=[$Presupuesto_Ventas.O7]" office:value-type="float" office:value="3500" calcext:value-type="float">
            <text:p>3,500.00</text:p>
          </table:table-cell>
          <table:table-cell table:style-name="ce152" table:formula="of:=[$Presupuesto_Ventas.D8]" office:value-type="float" office:value="3675" calcext:value-type="float">
            <text:p>3,675.00</text:p>
          </table:table-cell>
          <table:table-cell table:style-name="ce152" table:formula="of:=[$Presupuesto_Ventas.E8]" office:value-type="float" office:value="3675" calcext:value-type="float">
            <text:p>3,675.00</text:p>
          </table:table-cell>
          <table:table-cell table:style-name="ce152" table:formula="of:=[$Presupuesto_Ventas.F8]" office:value-type="float" office:value="3675" calcext:value-type="float">
            <text:p>3,675.00</text:p>
          </table:table-cell>
          <table:table-cell table:style-name="ce152" table:formula="of:=[$Presupuesto_Ventas.G8]" office:value-type="float" office:value="4200" calcext:value-type="float">
            <text:p>4,200.00</text:p>
          </table:table-cell>
          <table:table-cell table:style-name="ce152" table:formula="of:=[$Presupuesto_Ventas.H8]" office:value-type="float" office:value="4200" calcext:value-type="float">
            <text:p>4,200.00</text:p>
          </table:table-cell>
          <table:table-cell table:style-name="ce152" table:formula="of:=[$Presupuesto_Ventas.I8]" office:value-type="float" office:value="4200" calcext:value-type="float">
            <text:p>4,200.00</text:p>
          </table:table-cell>
          <table:table-cell table:style-name="ce152" table:formula="of:=[$Presupuesto_Ventas.J8]" office:value-type="float" office:value="4725" calcext:value-type="float">
            <text:p>4,725.00</text:p>
          </table:table-cell>
          <table:table-cell table:style-name="ce152" table:formula="of:=[$Presupuesto_Ventas.K8]" office:value-type="float" office:value="4725" calcext:value-type="float">
            <text:p>4,725.00</text:p>
          </table:table-cell>
          <table:table-cell table:style-name="ce152" table:formula="of:=[$Presupuesto_Ventas.L8]" office:value-type="float" office:value="4725" calcext:value-type="float">
            <text:p>4,725.00</text:p>
          </table:table-cell>
          <table:table-cell table:style-name="ce152" table:formula="of:=[$Presupuesto_Ventas.M8]" office:value-type="float" office:value="4725" calcext:value-type="float">
            <text:p>4,725.00</text:p>
          </table:table-cell>
          <table:table-cell table:style-name="ce152" table:formula="of:=[$Presupuesto_Ventas.N8]" office:value-type="float" office:value="3675" calcext:value-type="float">
            <text:p>3,675.00</text:p>
          </table:table-cell>
          <table:table-cell table:style-name="ce152" table:formula="of:=[$Presupuesto_Ventas.O8]" office:value-type="float" office:value="3675" calcext:value-type="float">
            <text:p>3,675.00</text:p>
          </table:table-cell>
          <table:table-cell table:style-name="ce152" table:formula="of:=[$Presupuesto_Ventas.D9]" office:value-type="float" office:value="3858.75" calcext:value-type="float">
            <text:p>3,858.75</text:p>
          </table:table-cell>
          <table:table-cell table:style-name="ce152" table:formula="of:=[$Presupuesto_Ventas.E9]" office:value-type="float" office:value="3858.75" calcext:value-type="float">
            <text:p>3,858.75</text:p>
          </table:table-cell>
          <table:table-cell table:style-name="ce152" table:formula="of:=[$Presupuesto_Ventas.F9]" office:value-type="float" office:value="3858.75" calcext:value-type="float">
            <text:p>3,858.75</text:p>
          </table:table-cell>
          <table:table-cell table:style-name="ce152" table:formula="of:=[$Presupuesto_Ventas.G9]" office:value-type="float" office:value="4410" calcext:value-type="float">
            <text:p>4,410.00</text:p>
          </table:table-cell>
          <table:table-cell table:style-name="ce152" table:formula="of:=[$Presupuesto_Ventas.H9]" office:value-type="float" office:value="4410" calcext:value-type="float">
            <text:p>4,410.00</text:p>
          </table:table-cell>
          <table:table-cell table:style-name="ce152" table:formula="of:=[$Presupuesto_Ventas.I9]" office:value-type="float" office:value="4410" calcext:value-type="float">
            <text:p>4,410.00</text:p>
          </table:table-cell>
          <table:table-cell table:style-name="ce152" table:formula="of:=[$Presupuesto_Ventas.J9]" office:value-type="float" office:value="4961.25" calcext:value-type="float">
            <text:p>4,961.25</text:p>
          </table:table-cell>
          <table:table-cell table:style-name="ce152" table:formula="of:=[$Presupuesto_Ventas.K9]" office:value-type="float" office:value="4961.25" calcext:value-type="float">
            <text:p>4,961.25</text:p>
          </table:table-cell>
          <table:table-cell table:style-name="ce152" table:formula="of:=[$Presupuesto_Ventas.L9]" office:value-type="float" office:value="4961.25" calcext:value-type="float">
            <text:p>4,961.25</text:p>
          </table:table-cell>
          <table:table-cell table:style-name="ce152" table:formula="of:=[$Presupuesto_Ventas.M9]" office:value-type="float" office:value="4961.25" calcext:value-type="float">
            <text:p>4,961.25</text:p>
          </table:table-cell>
          <table:table-cell table:style-name="ce152" table:formula="of:=[$Presupuesto_Ventas.N9]" office:value-type="float" office:value="3858.75" calcext:value-type="float">
            <text:p>3,858.75</text:p>
          </table:table-cell>
          <table:table-cell table:style-name="ce152" table:formula="of:=[$Presupuesto_Ventas.O9]" office:value-type="float" office:value="3858.75" calcext:value-type="float">
            <text:p>3,858.75</text:p>
          </table:table-cell>
          <table:table-cell table:style-name="ce152" table:formula="of:=[$Presupuesto_Ventas.D10]" office:value-type="float" office:value="4051.6875" calcext:value-type="float">
            <text:p>4,051.69</text:p>
          </table:table-cell>
          <table:table-cell table:style-name="ce152" table:formula="of:=[$Presupuesto_Ventas.E10]" office:value-type="float" office:value="4051.6875" calcext:value-type="float">
            <text:p>4,051.69</text:p>
          </table:table-cell>
          <table:table-cell table:style-name="ce152" table:formula="of:=[$Presupuesto_Ventas.F10]" office:value-type="float" office:value="4051.6875" calcext:value-type="float">
            <text:p>4,051.69</text:p>
          </table:table-cell>
          <table:table-cell table:style-name="ce152" table:formula="of:=[$Presupuesto_Ventas.G10]" office:value-type="float" office:value="4630.5" calcext:value-type="float">
            <text:p>4,630.50</text:p>
          </table:table-cell>
          <table:table-cell table:style-name="ce152" table:formula="of:=[$Presupuesto_Ventas.H10]" office:value-type="float" office:value="4630.5" calcext:value-type="float">
            <text:p>4,630.50</text:p>
          </table:table-cell>
          <table:table-cell table:style-name="ce152" table:formula="of:=[$Presupuesto_Ventas.I10]" office:value-type="float" office:value="4630.5" calcext:value-type="float">
            <text:p>4,630.50</text:p>
          </table:table-cell>
          <table:table-cell table:style-name="ce152" table:formula="of:=[$Presupuesto_Ventas.J10]" office:value-type="float" office:value="5209.3125" calcext:value-type="float">
            <text:p>5,209.31</text:p>
          </table:table-cell>
          <table:table-cell table:style-name="ce152" table:formula="of:=[$Presupuesto_Ventas.K10]" office:value-type="float" office:value="5209.3125" calcext:value-type="float">
            <text:p>5,209.31</text:p>
          </table:table-cell>
          <table:table-cell table:style-name="ce152" table:formula="of:=[$Presupuesto_Ventas.L10]" office:value-type="float" office:value="5209.3125" calcext:value-type="float">
            <text:p>5,209.31</text:p>
          </table:table-cell>
          <table:table-cell table:style-name="ce152" table:formula="of:=[$Presupuesto_Ventas.M10]" office:value-type="float" office:value="5209.3125" calcext:value-type="float">
            <text:p>5,209.31</text:p>
          </table:table-cell>
          <table:table-cell table:style-name="ce152" table:formula="of:=[$Presupuesto_Ventas.N10]" office:value-type="float" office:value="4051.6875" calcext:value-type="float">
            <text:p>4,051.69</text:p>
          </table:table-cell>
          <table:table-cell table:style-name="ce152" table:formula="of:=[$Presupuesto_Ventas.O10]" office:value-type="float" office:value="4051.6875" calcext:value-type="float">
            <text:p>4,051.69</text:p>
          </table:table-cell>
          <table:table-cell table:style-name="ce152" table:formula="of:=[$Presupuesto_Ventas.D11]" office:value-type="float" office:value="4254.271875" calcext:value-type="float">
            <text:p>4,254.27</text:p>
          </table:table-cell>
          <table:table-cell table:style-name="ce152" table:formula="of:=[$Presupuesto_Ventas.E11]" office:value-type="float" office:value="4254.271875" calcext:value-type="float">
            <text:p>4,254.27</text:p>
          </table:table-cell>
          <table:table-cell table:style-name="ce152" table:formula="of:=[$Presupuesto_Ventas.F11]" office:value-type="float" office:value="4254.271875" calcext:value-type="float">
            <text:p>4,254.27</text:p>
          </table:table-cell>
          <table:table-cell table:style-name="ce152" table:formula="of:=[$Presupuesto_Ventas.G11]" office:value-type="float" office:value="4862.025" calcext:value-type="float">
            <text:p>4,862.03</text:p>
          </table:table-cell>
          <table:table-cell table:style-name="ce152" table:formula="of:=[$Presupuesto_Ventas.H11]" office:value-type="float" office:value="4862.025" calcext:value-type="float">
            <text:p>4,862.03</text:p>
          </table:table-cell>
          <table:table-cell table:style-name="ce152" table:formula="of:=[$Presupuesto_Ventas.I11]" office:value-type="float" office:value="4862.025" calcext:value-type="float">
            <text:p>4,862.03</text:p>
          </table:table-cell>
          <table:table-cell table:style-name="ce152" table:formula="of:=[$Presupuesto_Ventas.J11]" office:value-type="float" office:value="5469.778125" calcext:value-type="float">
            <text:p>5,469.78</text:p>
          </table:table-cell>
          <table:table-cell table:style-name="ce152" table:formula="of:=[$Presupuesto_Ventas.K11]" office:value-type="float" office:value="5469.778125" calcext:value-type="float">
            <text:p>5,469.78</text:p>
          </table:table-cell>
          <table:table-cell table:style-name="ce152" table:formula="of:=[$Presupuesto_Ventas.L11]" office:value-type="float" office:value="5469.778125" calcext:value-type="float">
            <text:p>5,469.78</text:p>
          </table:table-cell>
          <table:table-cell table:style-name="ce152" table:formula="of:=[$Presupuesto_Ventas.M11]" office:value-type="float" office:value="5469.778125" calcext:value-type="float">
            <text:p>5,469.78</text:p>
          </table:table-cell>
          <table:table-cell table:style-name="ce152" table:formula="of:=[$Presupuesto_Ventas.N11]" office:value-type="float" office:value="4254.271875" calcext:value-type="float">
            <text:p>4,254.27</text:p>
          </table:table-cell>
          <table:table-cell table:style-name="ce152" table:formula="of:=[$Presupuesto_Ventas.O11]" office:value-type="float" office:value="4254.271875" calcext:value-type="float">
            <text:p>4,254.27</text:p>
          </table:table-cell>
          <table:table-cell table:number-columns-repeated="16321"/>
        </table:table-row>
        <table:table-row table:style-name="ro16">
          <table:table-cell table:style-name="ce140"/>
          <table:table-cell table:style-name="ce143" office:value-type="string" calcext:value-type="string">
            <text:p>CV Unitario</text:p>
          </table:table-cell>
          <table:table-cell table:style-name="ce147"/>
          <table:table-cell table:style-name="ce153" table:formula="of:=[$Costos_Unitario.$C$21]" office:value-type="float" office:value="4.17885714285714" calcext:value-type="float">
            <text:p>4.18</text:p>
          </table:table-cell>
          <table:table-cell table:style-name="ce153" table:formula="of:=[.D10]" office:value-type="float" office:value="4.17885714285714" calcext:value-type="float">
            <text:p>4.18</text:p>
          </table:table-cell>
          <table:table-cell table:style-name="ce153" table:formula="of:=[.E10]" office:value-type="float" office:value="4.17885714285714" calcext:value-type="float">
            <text:p>4.18</text:p>
          </table:table-cell>
          <table:table-cell table:style-name="ce153" table:formula="of:=[.F10]" office:value-type="float" office:value="4.17885714285714" calcext:value-type="float">
            <text:p>4.18</text:p>
          </table:table-cell>
          <table:table-cell table:style-name="ce153" table:formula="of:=[.G10]" office:value-type="float" office:value="4.17885714285714" calcext:value-type="float">
            <text:p>4.18</text:p>
          </table:table-cell>
          <table:table-cell table:style-name="ce153" table:formula="of:=[.H10]" office:value-type="float" office:value="4.17885714285714" calcext:value-type="float">
            <text:p>4.18</text:p>
          </table:table-cell>
          <table:table-cell table:style-name="ce153" table:formula="of:=[.I10]" office:value-type="float" office:value="4.17885714285714" calcext:value-type="float">
            <text:p>4.18</text:p>
          </table:table-cell>
          <table:table-cell table:style-name="ce153" table:formula="of:=[.J10]" office:value-type="float" office:value="4.17885714285714" calcext:value-type="float">
            <text:p>4.18</text:p>
          </table:table-cell>
          <table:table-cell table:style-name="ce153" table:formula="of:=[.K10]" office:value-type="float" office:value="4.17885714285714" calcext:value-type="float">
            <text:p>4.18</text:p>
          </table:table-cell>
          <table:table-cell table:style-name="ce153" table:formula="of:=[.L10]" office:value-type="float" office:value="4.17885714285714" calcext:value-type="float">
            <text:p>4.18</text:p>
          </table:table-cell>
          <table:table-cell table:style-name="ce153" table:formula="of:=[.M10]" office:value-type="float" office:value="4.17885714285714" calcext:value-type="float">
            <text:p>4.18</text:p>
          </table:table-cell>
          <table:table-cell table:style-name="ce153" table:formula="of:=[.N10]" office:value-type="float" office:value="4.17885714285714" calcext:value-type="float">
            <text:p>4.18</text:p>
          </table:table-cell>
          <table:table-cell table:style-name="ce153" table:formula="of:=[.O10]" office:value-type="float" office:value="4.17885714285714" calcext:value-type="float">
            <text:p>4.18</text:p>
          </table:table-cell>
          <table:table-cell table:style-name="ce153" table:formula="of:=[.P10]" office:value-type="float" office:value="4.17885714285714" calcext:value-type="float">
            <text:p>4.18</text:p>
          </table:table-cell>
          <table:table-cell table:style-name="ce153" table:formula="of:=[.Q10]" office:value-type="float" office:value="4.17885714285714" calcext:value-type="float">
            <text:p>4.18</text:p>
          </table:table-cell>
          <table:table-cell table:style-name="ce153" table:formula="of:=[.R10]" office:value-type="float" office:value="4.17885714285714" calcext:value-type="float">
            <text:p>4.18</text:p>
          </table:table-cell>
          <table:table-cell table:style-name="ce153" table:formula="of:=[.S10]" office:value-type="float" office:value="4.17885714285714" calcext:value-type="float">
            <text:p>4.18</text:p>
          </table:table-cell>
          <table:table-cell table:style-name="ce153" table:formula="of:=[.T10]" office:value-type="float" office:value="4.17885714285714" calcext:value-type="float">
            <text:p>4.18</text:p>
          </table:table-cell>
          <table:table-cell table:style-name="ce153" table:formula="of:=[.U10]" office:value-type="float" office:value="4.17885714285714" calcext:value-type="float">
            <text:p>4.18</text:p>
          </table:table-cell>
          <table:table-cell table:style-name="ce153" table:formula="of:=[.V10]" office:value-type="float" office:value="4.17885714285714" calcext:value-type="float">
            <text:p>4.18</text:p>
          </table:table-cell>
          <table:table-cell table:style-name="ce153" table:formula="of:=[.W10]" office:value-type="float" office:value="4.17885714285714" calcext:value-type="float">
            <text:p>4.18</text:p>
          </table:table-cell>
          <table:table-cell table:style-name="ce153" table:formula="of:=[.X10]" office:value-type="float" office:value="4.17885714285714" calcext:value-type="float">
            <text:p>4.18</text:p>
          </table:table-cell>
          <table:table-cell table:style-name="ce153" table:formula="of:=[.Y10]" office:value-type="float" office:value="4.17885714285714" calcext:value-type="float">
            <text:p>4.18</text:p>
          </table:table-cell>
          <table:table-cell table:style-name="ce153" table:formula="of:=[.Z10]" office:value-type="float" office:value="4.17885714285714" calcext:value-type="float">
            <text:p>4.18</text:p>
          </table:table-cell>
          <table:table-cell table:style-name="ce153" table:formula="of:=[.AA10]" office:value-type="float" office:value="4.17885714285714" calcext:value-type="float">
            <text:p>4.18</text:p>
          </table:table-cell>
          <table:table-cell table:style-name="ce153" table:formula="of:=[.AB10]" office:value-type="float" office:value="4.17885714285714" calcext:value-type="float">
            <text:p>4.18</text:p>
          </table:table-cell>
          <table:table-cell table:style-name="ce153" table:formula="of:=[.AC10]" office:value-type="float" office:value="4.17885714285714" calcext:value-type="float">
            <text:p>4.18</text:p>
          </table:table-cell>
          <table:table-cell table:style-name="ce153" table:formula="of:=[.AD10]" office:value-type="float" office:value="4.17885714285714" calcext:value-type="float">
            <text:p>4.18</text:p>
          </table:table-cell>
          <table:table-cell table:style-name="ce153" table:formula="of:=[.AE10]" office:value-type="float" office:value="4.17885714285714" calcext:value-type="float">
            <text:p>4.18</text:p>
          </table:table-cell>
          <table:table-cell table:style-name="ce153" table:formula="of:=[.AF10]" office:value-type="float" office:value="4.17885714285714" calcext:value-type="float">
            <text:p>4.18</text:p>
          </table:table-cell>
          <table:table-cell table:style-name="ce153" table:formula="of:=[.AG10]" office:value-type="float" office:value="4.17885714285714" calcext:value-type="float">
            <text:p>4.18</text:p>
          </table:table-cell>
          <table:table-cell table:style-name="ce153" table:formula="of:=[.AH10]" office:value-type="float" office:value="4.17885714285714" calcext:value-type="float">
            <text:p>4.18</text:p>
          </table:table-cell>
          <table:table-cell table:style-name="ce153" table:formula="of:=[.AI10]" office:value-type="float" office:value="4.17885714285714" calcext:value-type="float">
            <text:p>4.18</text:p>
          </table:table-cell>
          <table:table-cell table:style-name="ce153" table:formula="of:=[.AJ10]" office:value-type="float" office:value="4.17885714285714" calcext:value-type="float">
            <text:p>4.18</text:p>
          </table:table-cell>
          <table:table-cell table:style-name="ce153" table:formula="of:=[.AK10]" office:value-type="float" office:value="4.17885714285714" calcext:value-type="float">
            <text:p>4.18</text:p>
          </table:table-cell>
          <table:table-cell table:style-name="ce153" table:formula="of:=[.AL10]" office:value-type="float" office:value="4.17885714285714" calcext:value-type="float">
            <text:p>4.18</text:p>
          </table:table-cell>
          <table:table-cell table:style-name="ce153" table:formula="of:=[.AM10]" office:value-type="float" office:value="4.17885714285714" calcext:value-type="float">
            <text:p>4.18</text:p>
          </table:table-cell>
          <table:table-cell table:style-name="ce153" table:formula="of:=[.AN10]" office:value-type="float" office:value="4.17885714285714" calcext:value-type="float">
            <text:p>4.18</text:p>
          </table:table-cell>
          <table:table-cell table:style-name="ce153" table:formula="of:=[.AO10]" office:value-type="float" office:value="4.17885714285714" calcext:value-type="float">
            <text:p>4.18</text:p>
          </table:table-cell>
          <table:table-cell table:style-name="ce153" table:formula="of:=[.AP10]" office:value-type="float" office:value="4.17885714285714" calcext:value-type="float">
            <text:p>4.18</text:p>
          </table:table-cell>
          <table:table-cell table:style-name="ce153" table:formula="of:=[.AQ10]" office:value-type="float" office:value="4.17885714285714" calcext:value-type="float">
            <text:p>4.18</text:p>
          </table:table-cell>
          <table:table-cell table:style-name="ce153" table:formula="of:=[.AR10]" office:value-type="float" office:value="4.17885714285714" calcext:value-type="float">
            <text:p>4.18</text:p>
          </table:table-cell>
          <table:table-cell table:style-name="ce153" table:formula="of:=[.AS10]" office:value-type="float" office:value="4.17885714285714" calcext:value-type="float">
            <text:p>4.18</text:p>
          </table:table-cell>
          <table:table-cell table:style-name="ce153" table:formula="of:=[.AT10]" office:value-type="float" office:value="4.17885714285714" calcext:value-type="float">
            <text:p>4.18</text:p>
          </table:table-cell>
          <table:table-cell table:style-name="ce153" table:formula="of:=[.AU10]" office:value-type="float" office:value="4.17885714285714" calcext:value-type="float">
            <text:p>4.18</text:p>
          </table:table-cell>
          <table:table-cell table:style-name="ce153" table:formula="of:=[.AV10]" office:value-type="float" office:value="4.17885714285714" calcext:value-type="float">
            <text:p>4.18</text:p>
          </table:table-cell>
          <table:table-cell table:style-name="ce153" table:formula="of:=[.AW10]" office:value-type="float" office:value="4.17885714285714" calcext:value-type="float">
            <text:p>4.18</text:p>
          </table:table-cell>
          <table:table-cell table:style-name="ce153" table:formula="of:=[.AX10]" office:value-type="float" office:value="4.17885714285714" calcext:value-type="float">
            <text:p>4.18</text:p>
          </table:table-cell>
          <table:table-cell table:style-name="ce153" table:formula="of:=[.AY10]" office:value-type="float" office:value="4.17885714285714" calcext:value-type="float">
            <text:p>4.18</text:p>
          </table:table-cell>
          <table:table-cell table:style-name="ce153" table:formula="of:=[.AZ10]" office:value-type="float" office:value="4.17885714285714" calcext:value-type="float">
            <text:p>4.18</text:p>
          </table:table-cell>
          <table:table-cell table:style-name="ce153" table:formula="of:=[.BA10]" office:value-type="float" office:value="4.17885714285714" calcext:value-type="float">
            <text:p>4.18</text:p>
          </table:table-cell>
          <table:table-cell table:style-name="ce153" table:formula="of:=[.BB10]" office:value-type="float" office:value="4.17885714285714" calcext:value-type="float">
            <text:p>4.18</text:p>
          </table:table-cell>
          <table:table-cell table:style-name="ce153" table:formula="of:=[.BC10]" office:value-type="float" office:value="4.17885714285714" calcext:value-type="float">
            <text:p>4.18</text:p>
          </table:table-cell>
          <table:table-cell table:style-name="ce153" table:formula="of:=[.BD10]" office:value-type="float" office:value="4.17885714285714" calcext:value-type="float">
            <text:p>4.18</text:p>
          </table:table-cell>
          <table:table-cell table:style-name="ce153" table:formula="of:=[.BE10]" office:value-type="float" office:value="4.17885714285714" calcext:value-type="float">
            <text:p>4.18</text:p>
          </table:table-cell>
          <table:table-cell table:style-name="ce153" table:formula="of:=[.BF10]" office:value-type="float" office:value="4.17885714285714" calcext:value-type="float">
            <text:p>4.18</text:p>
          </table:table-cell>
          <table:table-cell table:style-name="ce153" table:formula="of:=[.BG10]" office:value-type="float" office:value="4.17885714285714" calcext:value-type="float">
            <text:p>4.18</text:p>
          </table:table-cell>
          <table:table-cell table:style-name="ce153" table:formula="of:=[.BH10]" office:value-type="float" office:value="4.17885714285714" calcext:value-type="float">
            <text:p>4.18</text:p>
          </table:table-cell>
          <table:table-cell table:style-name="ce153" table:formula="of:=[.BI10]" office:value-type="float" office:value="4.17885714285714" calcext:value-type="float">
            <text:p>4.18</text:p>
          </table:table-cell>
          <table:table-cell table:style-name="ce153" table:formula="of:=[.BJ10]" office:value-type="float" office:value="4.17885714285714" calcext:value-type="float">
            <text:p>4.18</text:p>
          </table:table-cell>
          <table:table-cell table:number-columns-repeated="16321"/>
        </table:table-row>
        <table:table-row table:style-name="ro16">
          <table:table-cell table:style-name="ce140"/>
          <table:table-cell table:style-name="ce143" office:value-type="string" calcext:value-type="string">
            <text:p>CF Operativo</text:p>
          </table:table-cell>
          <table:table-cell table:style-name="ce147"/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style-name="ce152" table:formula="of:=[$Gastos_Operativos.$H$21]" office:value-type="float" office:value="6290" calcext:value-type="float">
            <text:p>6,290.00</text:p>
          </table:table-cell>
          <table:table-cell table:number-columns-repeated="16321"/>
        </table:table-row>
        <table:table-row table:style-name="ro16">
          <table:table-cell table:style-name="ce140"/>
          <table:table-cell table:style-name="ce143" office:value-type="string" calcext:value-type="string">
            <text:p>Capital de Trabajo</text:p>
          </table:table-cell>
          <table:table-cell table:style-name="ce147"/>
          <table:table-cell table:style-name="ce153" table:formula="of:=[.D10]*[.D9]" office:value-type="float" office:value="14626" calcext:value-type="float">
            <text:p>14,626.00</text:p>
          </table:table-cell>
          <table:table-cell table:style-name="ce153" table:formula="of:=[.E10]*[.E9]" office:value-type="float" office:value="14626" calcext:value-type="float">
            <text:p>14,626.00</text:p>
          </table:table-cell>
          <table:table-cell table:style-name="ce153" table:formula="of:=[.F10]*[.F9]" office:value-type="float" office:value="14626" calcext:value-type="float">
            <text:p>14,626.00</text:p>
          </table:table-cell>
          <table:table-cell table:style-name="ce153" table:formula="of:=[.G10]*[.G9]" office:value-type="float" office:value="16715.4285714286" calcext:value-type="float">
            <text:p>16,715.43</text:p>
          </table:table-cell>
          <table:table-cell table:style-name="ce153" table:formula="of:=[.H10]*[.H9]" office:value-type="float" office:value="16715.4285714286" calcext:value-type="float">
            <text:p>16,715.43</text:p>
          </table:table-cell>
          <table:table-cell table:style-name="ce153" table:formula="of:=[.I10]*[.I9]" office:value-type="float" office:value="16715.4285714286" calcext:value-type="float">
            <text:p>16,715.43</text:p>
          </table:table-cell>
          <table:table-cell table:style-name="ce153" table:formula="of:=[.J10]*[.J9]" office:value-type="float" office:value="18804.8571428571" calcext:value-type="float">
            <text:p>18,804.86</text:p>
          </table:table-cell>
          <table:table-cell table:style-name="ce153" table:formula="of:=[.K10]*[.K9]" office:value-type="float" office:value="18804.8571428571" calcext:value-type="float">
            <text:p>18,804.86</text:p>
          </table:table-cell>
          <table:table-cell table:style-name="ce153" table:formula="of:=[.L10]*[.L9]" office:value-type="float" office:value="18804.8571428571" calcext:value-type="float">
            <text:p>18,804.86</text:p>
          </table:table-cell>
          <table:table-cell table:style-name="ce153" table:formula="of:=[.M10]*[.M9]" office:value-type="float" office:value="18804.8571428571" calcext:value-type="float">
            <text:p>18,804.86</text:p>
          </table:table-cell>
          <table:table-cell table:style-name="ce153" table:formula="of:=[.N10]*[.N9]" office:value-type="float" office:value="14626" calcext:value-type="float">
            <text:p>14,626.00</text:p>
          </table:table-cell>
          <table:table-cell table:style-name="ce153" table:formula="of:=[.O10]*[.O9]" office:value-type="float" office:value="14626" calcext:value-type="float">
            <text:p>14,626.00</text:p>
          </table:table-cell>
          <table:table-cell table:style-name="ce153" table:formula="of:=[.P10]*[.P9]" office:value-type="float" office:value="15357.3" calcext:value-type="float">
            <text:p>15,357.30</text:p>
          </table:table-cell>
          <table:table-cell table:style-name="ce153" table:formula="of:=[.Q10]*[.Q9]" office:value-type="float" office:value="15357.3" calcext:value-type="float">
            <text:p>15,357.30</text:p>
          </table:table-cell>
          <table:table-cell table:style-name="ce153" table:formula="of:=[.R10]*[.R9]" office:value-type="float" office:value="15357.3" calcext:value-type="float">
            <text:p>15,357.30</text:p>
          </table:table-cell>
          <table:table-cell table:style-name="ce153" table:formula="of:=[.S10]*[.S9]" office:value-type="float" office:value="17551.2" calcext:value-type="float">
            <text:p>17,551.20</text:p>
          </table:table-cell>
          <table:table-cell table:style-name="ce153" table:formula="of:=[.T10]*[.T9]" office:value-type="float" office:value="17551.2" calcext:value-type="float">
            <text:p>17,551.20</text:p>
          </table:table-cell>
          <table:table-cell table:style-name="ce153" table:formula="of:=[.U10]*[.U9]" office:value-type="float" office:value="17551.2" calcext:value-type="float">
            <text:p>17,551.20</text:p>
          </table:table-cell>
          <table:table-cell table:style-name="ce153" table:formula="of:=[.V10]*[.V9]" office:value-type="float" office:value="19745.1" calcext:value-type="float">
            <text:p>19,745.10</text:p>
          </table:table-cell>
          <table:table-cell table:style-name="ce153" table:formula="of:=[.W10]*[.W9]" office:value-type="float" office:value="19745.1" calcext:value-type="float">
            <text:p>19,745.10</text:p>
          </table:table-cell>
          <table:table-cell table:style-name="ce153" table:formula="of:=[.X10]*[.X9]" office:value-type="float" office:value="19745.1" calcext:value-type="float">
            <text:p>19,745.10</text:p>
          </table:table-cell>
          <table:table-cell table:style-name="ce153" table:formula="of:=[.Y10]*[.Y9]" office:value-type="float" office:value="19745.1" calcext:value-type="float">
            <text:p>19,745.10</text:p>
          </table:table-cell>
          <table:table-cell table:style-name="ce153" table:formula="of:=[.Z10]*[.Z9]" office:value-type="float" office:value="15357.3" calcext:value-type="float">
            <text:p>15,357.30</text:p>
          </table:table-cell>
          <table:table-cell table:style-name="ce153" table:formula="of:=[.AA10]*[.AA9]" office:value-type="float" office:value="15357.3" calcext:value-type="float">
            <text:p>15,357.30</text:p>
          </table:table-cell>
          <table:table-cell table:style-name="ce153" table:formula="of:=[.AB10]*[.AB9]" office:value-type="float" office:value="16125.165" calcext:value-type="float">
            <text:p>16,125.17</text:p>
          </table:table-cell>
          <table:table-cell table:style-name="ce153" table:formula="of:=[.AC10]*[.AC9]" office:value-type="float" office:value="16125.165" calcext:value-type="float">
            <text:p>16,125.17</text:p>
          </table:table-cell>
          <table:table-cell table:style-name="ce153" table:formula="of:=[.AD10]*[.AD9]" office:value-type="float" office:value="16125.165" calcext:value-type="float">
            <text:p>16,125.17</text:p>
          </table:table-cell>
          <table:table-cell table:style-name="ce153" table:formula="of:=[.AE10]*[.AE9]" office:value-type="float" office:value="18428.76" calcext:value-type="float">
            <text:p>18,428.76</text:p>
          </table:table-cell>
          <table:table-cell table:style-name="ce153" table:formula="of:=[.AF10]*[.AF9]" office:value-type="float" office:value="18428.76" calcext:value-type="float">
            <text:p>18,428.76</text:p>
          </table:table-cell>
          <table:table-cell table:style-name="ce153" table:formula="of:=[.AG10]*[.AG9]" office:value-type="float" office:value="18428.76" calcext:value-type="float">
            <text:p>18,428.76</text:p>
          </table:table-cell>
          <table:table-cell table:style-name="ce153" table:formula="of:=[.AH10]*[.AH9]" office:value-type="float" office:value="20732.355" calcext:value-type="float">
            <text:p>20,732.36</text:p>
          </table:table-cell>
          <table:table-cell table:style-name="ce153" table:formula="of:=[.AI10]*[.AI9]" office:value-type="float" office:value="20732.355" calcext:value-type="float">
            <text:p>20,732.36</text:p>
          </table:table-cell>
          <table:table-cell table:style-name="ce153" table:formula="of:=[.AJ10]*[.AJ9]" office:value-type="float" office:value="20732.355" calcext:value-type="float">
            <text:p>20,732.36</text:p>
          </table:table-cell>
          <table:table-cell table:style-name="ce153" table:formula="of:=[.AK10]*[.AK9]" office:value-type="float" office:value="20732.355" calcext:value-type="float">
            <text:p>20,732.36</text:p>
          </table:table-cell>
          <table:table-cell table:style-name="ce153" table:formula="of:=[.AL10]*[.AL9]" office:value-type="float" office:value="16125.165" calcext:value-type="float">
            <text:p>16,125.17</text:p>
          </table:table-cell>
          <table:table-cell table:style-name="ce153" table:formula="of:=[.AM10]*[.AM9]" office:value-type="float" office:value="16125.165" calcext:value-type="float">
            <text:p>16,125.17</text:p>
          </table:table-cell>
          <table:table-cell table:style-name="ce153" table:formula="of:=[.AN10]*[.AN9]" office:value-type="float" office:value="16931.42325" calcext:value-type="float">
            <text:p>16,931.42</text:p>
          </table:table-cell>
          <table:table-cell table:style-name="ce153" table:formula="of:=[.AO10]*[.AO9]" office:value-type="float" office:value="16931.42325" calcext:value-type="float">
            <text:p>16,931.42</text:p>
          </table:table-cell>
          <table:table-cell table:style-name="ce153" table:formula="of:=[.AP10]*[.AP9]" office:value-type="float" office:value="16931.42325" calcext:value-type="float">
            <text:p>16,931.42</text:p>
          </table:table-cell>
          <table:table-cell table:style-name="ce153" table:formula="of:=[.AQ10]*[.AQ9]" office:value-type="float" office:value="19350.198" calcext:value-type="float">
            <text:p>19,350.20</text:p>
          </table:table-cell>
          <table:table-cell table:style-name="ce153" table:formula="of:=[.AR10]*[.AR9]" office:value-type="float" office:value="19350.198" calcext:value-type="float">
            <text:p>19,350.20</text:p>
          </table:table-cell>
          <table:table-cell table:style-name="ce153" table:formula="of:=[.AS10]*[.AS9]" office:value-type="float" office:value="19350.198" calcext:value-type="float">
            <text:p>19,350.20</text:p>
          </table:table-cell>
          <table:table-cell table:style-name="ce153" table:formula="of:=[.AT10]*[.AT9]" office:value-type="float" office:value="21768.97275" calcext:value-type="float">
            <text:p>21,768.97</text:p>
          </table:table-cell>
          <table:table-cell table:style-name="ce153" table:formula="of:=[.AU10]*[.AU9]" office:value-type="float" office:value="21768.97275" calcext:value-type="float">
            <text:p>21,768.97</text:p>
          </table:table-cell>
          <table:table-cell table:style-name="ce153" table:formula="of:=[.AV10]*[.AV9]" office:value-type="float" office:value="21768.97275" calcext:value-type="float">
            <text:p>21,768.97</text:p>
          </table:table-cell>
          <table:table-cell table:style-name="ce153" table:formula="of:=[.AW10]*[.AW9]" office:value-type="float" office:value="21768.97275" calcext:value-type="float">
            <text:p>21,768.97</text:p>
          </table:table-cell>
          <table:table-cell table:style-name="ce153" table:formula="of:=[.AX10]*[.AX9]" office:value-type="float" office:value="16931.42325" calcext:value-type="float">
            <text:p>16,931.42</text:p>
          </table:table-cell>
          <table:table-cell table:style-name="ce153" table:formula="of:=[.AY10]*[.AY9]" office:value-type="float" office:value="16931.42325" calcext:value-type="float">
            <text:p>16,931.42</text:p>
          </table:table-cell>
          <table:table-cell table:style-name="ce153" table:formula="of:=[.AZ10]*[.AZ9]" office:value-type="float" office:value="17777.9944125" calcext:value-type="float">
            <text:p>17,777.99</text:p>
          </table:table-cell>
          <table:table-cell table:style-name="ce153" table:formula="of:=[.BA10]*[.BA9]" office:value-type="float" office:value="17777.9944125" calcext:value-type="float">
            <text:p>17,777.99</text:p>
          </table:table-cell>
          <table:table-cell table:style-name="ce153" table:formula="of:=[.BB10]*[.BB9]" office:value-type="float" office:value="17777.9944125" calcext:value-type="float">
            <text:p>17,777.99</text:p>
          </table:table-cell>
          <table:table-cell table:style-name="ce153" table:formula="of:=[.BC10]*[.BC9]" office:value-type="float" office:value="20317.7079" calcext:value-type="float">
            <text:p>20,317.71</text:p>
          </table:table-cell>
          <table:table-cell table:style-name="ce153" table:formula="of:=[.BD10]*[.BD9]" office:value-type="float" office:value="20317.7079" calcext:value-type="float">
            <text:p>20,317.71</text:p>
          </table:table-cell>
          <table:table-cell table:style-name="ce153" table:formula="of:=[.BE10]*[.BE9]" office:value-type="float" office:value="20317.7079" calcext:value-type="float">
            <text:p>20,317.71</text:p>
          </table:table-cell>
          <table:table-cell table:style-name="ce153" table:formula="of:=[.BF10]*[.BF9]" office:value-type="float" office:value="22857.4213875" calcext:value-type="float">
            <text:p>22,857.42</text:p>
          </table:table-cell>
          <table:table-cell table:style-name="ce153" table:formula="of:=[.BG10]*[.BG9]" office:value-type="float" office:value="22857.4213875" calcext:value-type="float">
            <text:p>22,857.42</text:p>
          </table:table-cell>
          <table:table-cell table:style-name="ce153" table:formula="of:=[.BH10]*[.BH9]" office:value-type="float" office:value="22857.4213875" calcext:value-type="float">
            <text:p>22,857.42</text:p>
          </table:table-cell>
          <table:table-cell table:style-name="ce153" table:formula="of:=[.BI10]*[.BI9]" office:value-type="float" office:value="22857.4213875" calcext:value-type="float">
            <text:p>22,857.42</text:p>
          </table:table-cell>
          <table:table-cell table:style-name="ce153" table:formula="of:=[.BJ10]*[.BJ9]" office:value-type="float" office:value="17777.9944125" calcext:value-type="float">
            <text:p>17,777.99</text:p>
          </table:table-cell>
          <table:table-cell table:style-name="ce153" table:formula="of:=[.BK10]*[.BK9]" office:value-type="float" office:value="17777.9944125" calcext:value-type="float">
            <text:p>17,777.99</text:p>
          </table:table-cell>
          <table:table-cell table:number-columns-repeated="16321"/>
        </table:table-row>
        <table:table-row table:style-name="ro16">
          <table:table-cell table:style-name="ce140"/>
          <table:table-cell table:style-name="ce143" office:value-type="string" calcext:value-type="string">
            <text:p>Variacion KW</text:p>
          </table:table-cell>
          <table:table-cell table:style-name="ce147" table:formula="of:=[.D12]" office:value-type="float" office:value="14626" calcext:value-type="float">
            <text:p>14,626.00</text:p>
          </table:table-cell>
          <table:table-cell table:style-name="ce153" table:formula="of:=[.E12]-[.C13]" office:value-type="float" office:value="0" calcext:value-type="float">
            <text:p>0.00</text:p>
          </table:table-cell>
          <table:table-cell table:style-name="ce153" table:formula="of:=[.F12]-[.D14]" office:value-type="float" office:value="0" calcext:value-type="float">
            <text:p>0.00</text:p>
          </table:table-cell>
          <table:table-cell table:style-name="ce153" table:formula="of:=[.G12]-[.E14]" office:value-type="float" office:value="2089.42857142857" calcext:value-type="float">
            <text:p>2,089.43</text:p>
          </table:table-cell>
          <table:table-cell table:style-name="ce153" table:formula="of:=[.H12]-[.F14]" office:value-type="float" office:value="0" calcext:value-type="float">
            <text:p>0.00</text:p>
          </table:table-cell>
          <table:table-cell table:style-name="ce153" table:formula="of:=[.I12]-[.G14]" office:value-type="float" office:value="0" calcext:value-type="float">
            <text:p>0.00</text:p>
          </table:table-cell>
          <table:table-cell table:style-name="ce153" table:formula="of:=[.J12]-[.H14]" office:value-type="float" office:value="2089.42857142857" calcext:value-type="float">
            <text:p>2,089.43</text:p>
          </table:table-cell>
          <table:table-cell table:style-name="ce153" table:formula="of:=[.K12]-[.I14]" office:value-type="float" office:value="0" calcext:value-type="float">
            <text:p>0.00</text:p>
          </table:table-cell>
          <table:table-cell table:style-name="ce153" table:formula="of:=[.L12]-[.J14]" office:value-type="float" office:value="0" calcext:value-type="float">
            <text:p>0.00</text:p>
          </table:table-cell>
          <table:table-cell table:style-name="ce153" table:formula="of:=[.M12]-[.K14]" office:value-type="float" office:value="0" calcext:value-type="float">
            <text:p>0.00</text:p>
          </table:table-cell>
          <table:table-cell table:style-name="ce153" table:formula="of:=[.N12]-[.L14]" office:value-type="float" office:value="-4178.85714285714" calcext:value-type="float">
            <text:p>-4,178.86</text:p>
          </table:table-cell>
          <table:table-cell table:style-name="ce153" table:formula="of:=[.O12]-[.M14]" office:value-type="float" office:value="0" calcext:value-type="float">
            <text:p>0.00</text:p>
          </table:table-cell>
          <table:table-cell table:style-name="ce158" table:formula="of:=[.P12]-[.N14]" office:value-type="float" office:value="731.299999999998" calcext:value-type="float">
            <text:p>731.30</text:p>
          </table:table-cell>
          <table:table-cell table:style-name="ce153" table:formula="of:=[.Q12]-[.O14]" office:value-type="float" office:value="0" calcext:value-type="float">
            <text:p>0.00</text:p>
          </table:table-cell>
          <table:table-cell table:style-name="ce153" table:formula="of:=[.R12]-[.P14]" office:value-type="float" office:value="0" calcext:value-type="float">
            <text:p>0.00</text:p>
          </table:table-cell>
          <table:table-cell table:style-name="ce153" table:formula="of:=[.S12]-[.Q14]" office:value-type="float" office:value="2193.9" calcext:value-type="float">
            <text:p>2,193.90</text:p>
          </table:table-cell>
          <table:table-cell table:style-name="ce153" table:formula="of:=[.T12]-[.R14]" office:value-type="float" office:value="0" calcext:value-type="float">
            <text:p>0.00</text:p>
          </table:table-cell>
          <table:table-cell table:style-name="ce153" table:formula="of:=[.U12]-[.S14]" office:value-type="float" office:value="0" calcext:value-type="float">
            <text:p>0.00</text:p>
          </table:table-cell>
          <table:table-cell table:style-name="ce153" table:formula="of:=[.V12]-[.T14]" office:value-type="float" office:value="2193.9" calcext:value-type="float">
            <text:p>2,193.90</text:p>
          </table:table-cell>
          <table:table-cell table:style-name="ce153" table:formula="of:=[.W12]-[.U14]" office:value-type="float" office:value="0" calcext:value-type="float">
            <text:p>0.00</text:p>
          </table:table-cell>
          <table:table-cell table:style-name="ce153" table:formula="of:=[.X12]-[.V14]" office:value-type="float" office:value="0" calcext:value-type="float">
            <text:p>0.00</text:p>
          </table:table-cell>
          <table:table-cell table:style-name="ce153" table:formula="of:=[.Y12]-[.W14]" office:value-type="float" office:value="0" calcext:value-type="float">
            <text:p>0.00</text:p>
          </table:table-cell>
          <table:table-cell table:style-name="ce153" table:formula="of:=[.Z12]-[.X14]" office:value-type="float" office:value="-4387.8" calcext:value-type="float">
            <text:p>-4,387.80</text:p>
          </table:table-cell>
          <table:table-cell table:style-name="ce153" table:formula="of:=[.AA12]-[.Y14]" office:value-type="float" office:value="0" calcext:value-type="float">
            <text:p>0.00</text:p>
          </table:table-cell>
          <table:table-cell table:style-name="ce158" table:formula="of:=[.AB12]-[.Z14]" office:value-type="float" office:value="767.865" calcext:value-type="float">
            <text:p>767.87</text:p>
          </table:table-cell>
          <table:table-cell table:style-name="ce153" table:formula="of:=[.AC12]-[.AA14]" office:value-type="float" office:value="0" calcext:value-type="float">
            <text:p>0.00</text:p>
          </table:table-cell>
          <table:table-cell table:style-name="ce153" table:formula="of:=[.AD12]-[.AB14]" office:value-type="float" office:value="0" calcext:value-type="float">
            <text:p>0.00</text:p>
          </table:table-cell>
          <table:table-cell table:style-name="ce153" table:formula="of:=[.AE12]-[.AC14]" office:value-type="float" office:value="2303.595" calcext:value-type="float">
            <text:p>2,303.60</text:p>
          </table:table-cell>
          <table:table-cell table:style-name="ce153" table:formula="of:=[.AF12]-[.AD14]" office:value-type="float" office:value="0" calcext:value-type="float">
            <text:p>0.00</text:p>
          </table:table-cell>
          <table:table-cell table:style-name="ce153" table:formula="of:=[.AG12]-[.AE14]" office:value-type="float" office:value="0" calcext:value-type="float">
            <text:p>0.00</text:p>
          </table:table-cell>
          <table:table-cell table:style-name="ce153" table:formula="of:=[.AH12]-[.AF14]" office:value-type="float" office:value="2303.595" calcext:value-type="float">
            <text:p>2,303.60</text:p>
          </table:table-cell>
          <table:table-cell table:style-name="ce153" table:formula="of:=[.AI12]-[.AG14]" office:value-type="float" office:value="0" calcext:value-type="float">
            <text:p>0.00</text:p>
          </table:table-cell>
          <table:table-cell table:style-name="ce153" table:formula="of:=[.AJ12]-[.AH14]" office:value-type="float" office:value="0" calcext:value-type="float">
            <text:p>0.00</text:p>
          </table:table-cell>
          <table:table-cell table:style-name="ce153" table:formula="of:=[.AK12]-[.AI14]" office:value-type="float" office:value="0" calcext:value-type="float">
            <text:p>0.00</text:p>
          </table:table-cell>
          <table:table-cell table:style-name="ce153" table:formula="of:=[.AL12]-[.AJ14]" office:value-type="float" office:value="-4607.19" calcext:value-type="float">
            <text:p>-4,607.19</text:p>
          </table:table-cell>
          <table:table-cell table:style-name="ce153" table:formula="of:=[.AM12]-[.AK14]" office:value-type="float" office:value="0" calcext:value-type="float">
            <text:p>0.00</text:p>
          </table:table-cell>
          <table:table-cell table:style-name="ce158" table:formula="of:=[.AN12]-[.AL14]" office:value-type="float" office:value="806.258250000003" calcext:value-type="float">
            <text:p>806.26</text:p>
          </table:table-cell>
          <table:table-cell table:style-name="ce153" table:formula="of:=[.AO12]-[.AM14]" office:value-type="float" office:value="0" calcext:value-type="float">
            <text:p>0.00</text:p>
          </table:table-cell>
          <table:table-cell table:style-name="ce153" table:formula="of:=[.AP12]-[.AN14]" office:value-type="float" office:value="0" calcext:value-type="float">
            <text:p>0.00</text:p>
          </table:table-cell>
          <table:table-cell table:style-name="ce153" table:formula="of:=[.AQ12]-[.AO14]" office:value-type="float" office:value="2418.77475" calcext:value-type="float">
            <text:p>2,418.77</text:p>
          </table:table-cell>
          <table:table-cell table:style-name="ce153" table:formula="of:=[.AR12]-[.AP14]" office:value-type="float" office:value="0" calcext:value-type="float">
            <text:p>0.00</text:p>
          </table:table-cell>
          <table:table-cell table:style-name="ce153" table:formula="of:=[.AS12]-[.AQ14]" office:value-type="float" office:value="0" calcext:value-type="float">
            <text:p>0.00</text:p>
          </table:table-cell>
          <table:table-cell table:style-name="ce153" table:formula="of:=[.AT12]-[.AR14]" office:value-type="float" office:value="2418.77475" calcext:value-type="float">
            <text:p>2,418.77</text:p>
          </table:table-cell>
          <table:table-cell table:style-name="ce153" table:formula="of:=[.AU12]-[.AS14]" office:value-type="float" office:value="0" calcext:value-type="float">
            <text:p>0.00</text:p>
          </table:table-cell>
          <table:table-cell table:style-name="ce153" table:formula="of:=[.AV12]-[.AT14]" office:value-type="float" office:value="0" calcext:value-type="float">
            <text:p>0.00</text:p>
          </table:table-cell>
          <table:table-cell table:style-name="ce153" table:formula="of:=[.AW12]-[.AU14]" office:value-type="float" office:value="0" calcext:value-type="float">
            <text:p>0.00</text:p>
          </table:table-cell>
          <table:table-cell table:style-name="ce153" table:formula="of:=[.AX12]-[.AV14]" office:value-type="float" office:value="-4837.5495" calcext:value-type="float">
            <text:p>-4,837.55</text:p>
          </table:table-cell>
          <table:table-cell table:style-name="ce153" table:formula="of:=[.AY12]-[.AW14]" office:value-type="float" office:value="0" calcext:value-type="float">
            <text:p>0.00</text:p>
          </table:table-cell>
          <table:table-cell table:style-name="ce158" table:formula="of:=[.AZ12]-[.AX14]" office:value-type="float" office:value="846.5711625" calcext:value-type="float">
            <text:p>846.57</text:p>
          </table:table-cell>
          <table:table-cell table:style-name="ce153" table:formula="of:=[.BA12]-[.AY14]" office:value-type="float" office:value="0" calcext:value-type="float">
            <text:p>0.00</text:p>
          </table:table-cell>
          <table:table-cell table:style-name="ce153" table:formula="of:=[.BB12]-[.AZ14]" office:value-type="float" office:value="0" calcext:value-type="float">
            <text:p>0.00</text:p>
          </table:table-cell>
          <table:table-cell table:style-name="ce153" table:formula="of:=[.BC12]-[.BA14]" office:value-type="float" office:value="2539.7134875" calcext:value-type="float">
            <text:p>2,539.71</text:p>
          </table:table-cell>
          <table:table-cell table:style-name="ce153" table:formula="of:=[.BD12]-[.BB14]" office:value-type="float" office:value="0" calcext:value-type="float">
            <text:p>0.00</text:p>
          </table:table-cell>
          <table:table-cell table:style-name="ce153" table:formula="of:=[.BE12]-[.BC14]" office:value-type="float" office:value="0" calcext:value-type="float">
            <text:p>0.00</text:p>
          </table:table-cell>
          <table:table-cell table:style-name="ce153" table:formula="of:=[.BF12]-[.BD14]" office:value-type="float" office:value="2539.7134875" calcext:value-type="float">
            <text:p>2,539.71</text:p>
          </table:table-cell>
          <table:table-cell table:style-name="ce153" table:formula="of:=[.BG12]-[.BE14]" office:value-type="float" office:value="0" calcext:value-type="float">
            <text:p>0.00</text:p>
          </table:table-cell>
          <table:table-cell table:style-name="ce153" table:formula="of:=[.BH12]-[.BF14]" office:value-type="float" office:value="0" calcext:value-type="float">
            <text:p>0.00</text:p>
          </table:table-cell>
          <table:table-cell table:style-name="ce153" table:formula="of:=[.BI12]-[.BG14]" office:value-type="float" office:value="0" calcext:value-type="float">
            <text:p>0.00</text:p>
          </table:table-cell>
          <table:table-cell table:style-name="ce153" table:formula="of:=[.BJ12]-[.BH14]" office:value-type="float" office:value="-5079.426975" calcext:value-type="float">
            <text:p>-5,079.43</text:p>
          </table:table-cell>
          <table:table-cell table:style-name="ce153" table:formula="of:=[.BK12]-[.BI14]" office:value-type="float" office:value="0" calcext:value-type="float">
            <text:p>0.00</text:p>
          </table:table-cell>
          <table:table-cell table:style-name="ce153"/>
          <table:table-cell table:number-columns-repeated="16321"/>
        </table:table-row>
        <table:table-row table:style-name="ro21">
          <table:table-cell table:style-name="ce140"/>
          <table:table-cell table:style-name="ce144" office:value-type="string" calcext:value-type="string">
            <text:p>TOTAL</text:p>
          </table:table-cell>
          <table:table-cell table:style-name="ce148"/>
          <table:table-cell table:style-name="ce154" table:formula="of:=SUM([.D12:.D13])" office:value-type="float" office:value="14626" calcext:value-type="float">
            <text:p>14,626.00</text:p>
          </table:table-cell>
          <table:table-cell table:style-name="ce154" table:formula="of:=SUM([.E12:.E13])" office:value-type="float" office:value="14626" calcext:value-type="float">
            <text:p>14,626.00</text:p>
          </table:table-cell>
          <table:table-cell table:style-name="ce154" table:formula="of:=SUM([.F12:.F13])" office:value-type="float" office:value="16715.4285714286" calcext:value-type="float">
            <text:p>16,715.43</text:p>
          </table:table-cell>
          <table:table-cell table:style-name="ce154" table:formula="of:=SUM([.G12:.G13])" office:value-type="float" office:value="16715.4285714286" calcext:value-type="float">
            <text:p>16,715.43</text:p>
          </table:table-cell>
          <table:table-cell table:style-name="ce154" table:formula="of:=SUM([.H12:.H13])" office:value-type="float" office:value="16715.4285714286" calcext:value-type="float">
            <text:p>16,715.43</text:p>
          </table:table-cell>
          <table:table-cell table:style-name="ce154" table:formula="of:=SUM([.I12:.I13])" office:value-type="float" office:value="18804.8571428571" calcext:value-type="float">
            <text:p>18,804.86</text:p>
          </table:table-cell>
          <table:table-cell table:style-name="ce154" table:formula="of:=SUM([.J12:.J13])" office:value-type="float" office:value="18804.8571428571" calcext:value-type="float">
            <text:p>18,804.86</text:p>
          </table:table-cell>
          <table:table-cell table:style-name="ce154" table:formula="of:=SUM([.K12:.K13])" office:value-type="float" office:value="18804.8571428571" calcext:value-type="float">
            <text:p>18,804.86</text:p>
          </table:table-cell>
          <table:table-cell table:style-name="ce154" table:formula="of:=SUM([.L12:.L13])" office:value-type="float" office:value="18804.8571428571" calcext:value-type="float">
            <text:p>18,804.86</text:p>
          </table:table-cell>
          <table:table-cell table:style-name="ce154" table:formula="of:=SUM([.M12:.M13])" office:value-type="float" office:value="14626" calcext:value-type="float">
            <text:p>14,626.00</text:p>
          </table:table-cell>
          <table:table-cell table:style-name="ce154" table:formula="of:=SUM([.N12:.N13])" office:value-type="float" office:value="14626" calcext:value-type="float">
            <text:p>14,626.00</text:p>
          </table:table-cell>
          <table:table-cell table:style-name="ce154" table:formula="of:=SUM([.O12:.O13])" office:value-type="float" office:value="15357.3" calcext:value-type="float">
            <text:p>15,357.30</text:p>
          </table:table-cell>
          <table:table-cell table:style-name="ce161" table:formula="of:=SUM([.P12:.P13])" office:value-type="float" office:value="15357.3" calcext:value-type="float">
            <text:p>15,357.30</text:p>
          </table:table-cell>
          <table:table-cell table:style-name="ce161" table:formula="of:=SUM([.Q12:.Q13])" office:value-type="float" office:value="15357.3" calcext:value-type="float">
            <text:p>15,357.30</text:p>
          </table:table-cell>
          <table:table-cell table:style-name="ce161" table:formula="of:=SUM([.R12:.R13])" office:value-type="float" office:value="17551.2" calcext:value-type="float">
            <text:p>17,551.20</text:p>
          </table:table-cell>
          <table:table-cell table:style-name="ce161" table:formula="of:=SUM([.S12:.S13])" office:value-type="float" office:value="17551.2" calcext:value-type="float">
            <text:p>17,551.20</text:p>
          </table:table-cell>
          <table:table-cell table:style-name="ce161" table:formula="of:=SUM([.T12:.T13])" office:value-type="float" office:value="17551.2" calcext:value-type="float">
            <text:p>17,551.20</text:p>
          </table:table-cell>
          <table:table-cell table:style-name="ce161" table:formula="of:=SUM([.U12:.U13])" office:value-type="float" office:value="19745.1" calcext:value-type="float">
            <text:p>19,745.10</text:p>
          </table:table-cell>
          <table:table-cell table:style-name="ce161" table:formula="of:=SUM([.V12:.V13])" office:value-type="float" office:value="19745.1" calcext:value-type="float">
            <text:p>19,745.10</text:p>
          </table:table-cell>
          <table:table-cell table:style-name="ce161" table:formula="of:=SUM([.W12:.W13])" office:value-type="float" office:value="19745.1" calcext:value-type="float">
            <text:p>19,745.10</text:p>
          </table:table-cell>
          <table:table-cell table:style-name="ce161" table:formula="of:=SUM([.X12:.X13])" office:value-type="float" office:value="19745.1" calcext:value-type="float">
            <text:p>19,745.10</text:p>
          </table:table-cell>
          <table:table-cell table:style-name="ce161" table:formula="of:=SUM([.Y12:.Y13])" office:value-type="float" office:value="15357.3" calcext:value-type="float">
            <text:p>15,357.30</text:p>
          </table:table-cell>
          <table:table-cell table:style-name="ce161" table:formula="of:=SUM([.Z12:.Z13])" office:value-type="float" office:value="15357.3" calcext:value-type="float">
            <text:p>15,357.30</text:p>
          </table:table-cell>
          <table:table-cell table:style-name="ce161" table:formula="of:=SUM([.AA12:.AA13])" office:value-type="float" office:value="16125.165" calcext:value-type="float">
            <text:p>16,125.17</text:p>
          </table:table-cell>
          <table:table-cell table:style-name="ce154" table:formula="of:=SUM([.AB12:.AB13])" office:value-type="float" office:value="16125.165" calcext:value-type="float">
            <text:p>16,125.17</text:p>
          </table:table-cell>
          <table:table-cell table:style-name="ce154" table:formula="of:=SUM([.AC12:.AC13])" office:value-type="float" office:value="16125.165" calcext:value-type="float">
            <text:p>16,125.17</text:p>
          </table:table-cell>
          <table:table-cell table:style-name="ce154" table:formula="of:=SUM([.AD12:.AD13])" office:value-type="float" office:value="18428.76" calcext:value-type="float">
            <text:p>18,428.76</text:p>
          </table:table-cell>
          <table:table-cell table:style-name="ce154" table:formula="of:=SUM([.AE12:.AE13])" office:value-type="float" office:value="18428.76" calcext:value-type="float">
            <text:p>18,428.76</text:p>
          </table:table-cell>
          <table:table-cell table:style-name="ce154" table:formula="of:=SUM([.AF12:.AF13])" office:value-type="float" office:value="18428.76" calcext:value-type="float">
            <text:p>18,428.76</text:p>
          </table:table-cell>
          <table:table-cell table:style-name="ce154" table:formula="of:=SUM([.AG12:.AG13])" office:value-type="float" office:value="20732.355" calcext:value-type="float">
            <text:p>20,732.36</text:p>
          </table:table-cell>
          <table:table-cell table:style-name="ce154" table:formula="of:=SUM([.AH12:.AH13])" office:value-type="float" office:value="20732.355" calcext:value-type="float">
            <text:p>20,732.36</text:p>
          </table:table-cell>
          <table:table-cell table:style-name="ce154" table:formula="of:=SUM([.AI12:.AI13])" office:value-type="float" office:value="20732.355" calcext:value-type="float">
            <text:p>20,732.36</text:p>
          </table:table-cell>
          <table:table-cell table:style-name="ce154" table:formula="of:=SUM([.AJ12:.AJ13])" office:value-type="float" office:value="20732.355" calcext:value-type="float">
            <text:p>20,732.36</text:p>
          </table:table-cell>
          <table:table-cell table:style-name="ce154" table:formula="of:=SUM([.AK12:.AK13])" office:value-type="float" office:value="16125.165" calcext:value-type="float">
            <text:p>16,125.17</text:p>
          </table:table-cell>
          <table:table-cell table:style-name="ce154" table:formula="of:=SUM([.AL12:.AL13])" office:value-type="float" office:value="16125.165" calcext:value-type="float">
            <text:p>16,125.17</text:p>
          </table:table-cell>
          <table:table-cell table:style-name="ce154" table:formula="of:=SUM([.AM12:.AM13])" office:value-type="float" office:value="16931.42325" calcext:value-type="float">
            <text:p>16,931.42</text:p>
          </table:table-cell>
          <table:table-cell table:style-name="ce161" table:formula="of:=SUM([.AN12:.AN13])" office:value-type="float" office:value="16931.42325" calcext:value-type="float">
            <text:p>16,931.42</text:p>
          </table:table-cell>
          <table:table-cell table:style-name="ce161" table:formula="of:=SUM([.AO12:.AO13])" office:value-type="float" office:value="16931.42325" calcext:value-type="float">
            <text:p>16,931.42</text:p>
          </table:table-cell>
          <table:table-cell table:style-name="ce161" table:formula="of:=SUM([.AP12:.AP13])" office:value-type="float" office:value="19350.198" calcext:value-type="float">
            <text:p>19,350.20</text:p>
          </table:table-cell>
          <table:table-cell table:style-name="ce161" table:formula="of:=SUM([.AQ12:.AQ13])" office:value-type="float" office:value="19350.198" calcext:value-type="float">
            <text:p>19,350.20</text:p>
          </table:table-cell>
          <table:table-cell table:style-name="ce161" table:formula="of:=SUM([.AR12:.AR13])" office:value-type="float" office:value="19350.198" calcext:value-type="float">
            <text:p>19,350.20</text:p>
          </table:table-cell>
          <table:table-cell table:style-name="ce161" table:formula="of:=SUM([.AS12:.AS13])" office:value-type="float" office:value="21768.97275" calcext:value-type="float">
            <text:p>21,768.97</text:p>
          </table:table-cell>
          <table:table-cell table:style-name="ce161" table:formula="of:=SUM([.AT12:.AT13])" office:value-type="float" office:value="21768.97275" calcext:value-type="float">
            <text:p>21,768.97</text:p>
          </table:table-cell>
          <table:table-cell table:style-name="ce161" table:formula="of:=SUM([.AU12:.AU13])" office:value-type="float" office:value="21768.97275" calcext:value-type="float">
            <text:p>21,768.97</text:p>
          </table:table-cell>
          <table:table-cell table:style-name="ce161" table:formula="of:=SUM([.AV12:.AV13])" office:value-type="float" office:value="21768.97275" calcext:value-type="float">
            <text:p>21,768.97</text:p>
          </table:table-cell>
          <table:table-cell table:style-name="ce161" table:formula="of:=SUM([.AW12:.AW13])" office:value-type="float" office:value="16931.42325" calcext:value-type="float">
            <text:p>16,931.42</text:p>
          </table:table-cell>
          <table:table-cell table:style-name="ce161" table:formula="of:=SUM([.AX12:.AX13])" office:value-type="float" office:value="16931.42325" calcext:value-type="float">
            <text:p>16,931.42</text:p>
          </table:table-cell>
          <table:table-cell table:style-name="ce161" table:formula="of:=SUM([.AY12:.AY13])" office:value-type="float" office:value="17777.9944125" calcext:value-type="float">
            <text:p>17,777.99</text:p>
          </table:table-cell>
          <table:table-cell table:style-name="ce154" table:formula="of:=SUM([.AZ12:.AZ13])" office:value-type="float" office:value="17777.9944125" calcext:value-type="float">
            <text:p>17,777.99</text:p>
          </table:table-cell>
          <table:table-cell table:style-name="ce154" table:formula="of:=SUM([.BA12:.BA13])" office:value-type="float" office:value="17777.9944125" calcext:value-type="float">
            <text:p>17,777.99</text:p>
          </table:table-cell>
          <table:table-cell table:style-name="ce154" table:formula="of:=SUM([.BB12:.BB13])" office:value-type="float" office:value="20317.7079" calcext:value-type="float">
            <text:p>20,317.71</text:p>
          </table:table-cell>
          <table:table-cell table:style-name="ce154" table:formula="of:=SUM([.BC12:.BC13])" office:value-type="float" office:value="20317.7079" calcext:value-type="float">
            <text:p>20,317.71</text:p>
          </table:table-cell>
          <table:table-cell table:style-name="ce154" table:formula="of:=SUM([.BD12:.BD13])" office:value-type="float" office:value="20317.7079" calcext:value-type="float">
            <text:p>20,317.71</text:p>
          </table:table-cell>
          <table:table-cell table:style-name="ce154" table:formula="of:=SUM([.BE12:.BE13])" office:value-type="float" office:value="22857.4213875" calcext:value-type="float">
            <text:p>22,857.42</text:p>
          </table:table-cell>
          <table:table-cell table:style-name="ce154" table:formula="of:=SUM([.BF12:.BF13])" office:value-type="float" office:value="22857.4213875" calcext:value-type="float">
            <text:p>22,857.42</text:p>
          </table:table-cell>
          <table:table-cell table:style-name="ce154" table:formula="of:=SUM([.BG12:.BG13])" office:value-type="float" office:value="22857.4213875" calcext:value-type="float">
            <text:p>22,857.42</text:p>
          </table:table-cell>
          <table:table-cell table:style-name="ce154" table:formula="of:=SUM([.BH12:.BH13])" office:value-type="float" office:value="22857.4213875" calcext:value-type="float">
            <text:p>22,857.42</text:p>
          </table:table-cell>
          <table:table-cell table:style-name="ce154" table:formula="of:=SUM([.BI12:.BI13])" office:value-type="float" office:value="17777.9944125" calcext:value-type="float">
            <text:p>17,777.99</text:p>
          </table:table-cell>
          <table:table-cell table:style-name="ce154" table:formula="of:=SUM([.BJ12:.BJ13])" office:value-type="float" office:value="17777.9944125" calcext:value-type="float">
            <text:p>17,777.99</text:p>
          </table:table-cell>
          <table:table-cell table:style-name="ce154" table:formula="of:=SUM([.BK12:.BK13])" office:value-type="float" office:value="17777.9944125" calcext:value-type="float">
            <text:p>17,777.99</text:p>
          </table:table-cell>
          <table:table-cell table:number-columns-repeated="16321"/>
        </table:table-row>
        <table:table-row table:style-name="ro4">
          <table:table-cell table:style-name="ce140"/>
          <table:table-cell table:number-columns-repeated="16383"/>
        </table:table-row>
        <table:table-row table:style-name="ro4">
          <table:table-cell table:style-name="ce140"/>
          <table:table-cell/>
          <table:table-cell table:style-name="ce134"/>
          <table:table-cell table:style-name="ce155"/>
          <table:table-cell table:style-name="ce134" table:number-columns-repeated="5"/>
          <table:table-cell table:style-name="ce134" table:formula="of:=[.F13]+[.I13]" office:value-type="float" office:value="4178.85714285714" calcext:value-type="float">
            <text:p>4,178.86</text:p>
          </table:table-cell>
          <table:table-cell table:style-name="ce134" table:number-columns-repeated="4"/>
          <table:table-cell table:style-name="ce134" table:formula="of:=SUM([.D13:.O13])" office:value-type="float" office:value="731.299999999998" calcext:value-type="float">
            <text:p>731.30</text:p>
          </table:table-cell>
          <table:table-cell table:number-columns-repeated="16369"/>
        </table:table-row>
        <table:table-row table:style-name="ro4">
          <table:table-cell/>
          <table:table-cell table:style-name="ce145" office:value-type="string" calcext:value-type="string">
            <text:p>año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/>
          <table:table-cell table:style-name="ce146" office:value-type="string" calcext:value-type="string">
            <text:p>variacion kw</text:p>
          </table:table-cell>
          <table:table-cell table:style-name="ce150" table:formula="of:=SUM([.C13:.N13])" office:value-type="float" office:value="14626" calcext:value-type="float">
            <text:p>14,626.00</text:p>
          </table:table-cell>
          <table:table-cell table:style-name="ce150" table:formula="of:=SUM([.O13:.Z13])" office:value-type="float" office:value="731.299999999998" calcext:value-type="float">
            <text:p>731.30</text:p>
          </table:table-cell>
          <table:table-cell table:style-name="ce150" table:formula="of:=SUM([.AA13:.AL13])" office:value-type="float" office:value="767.865" calcext:value-type="float">
            <text:p>767.87</text:p>
          </table:table-cell>
          <table:table-cell table:style-name="ce150" table:formula="of:=SUM([.AM13:.AX13])" office:value-type="float" office:value="806.258250000003" calcext:value-type="float">
            <text:p>806.26</text:p>
          </table:table-cell>
          <table:table-cell table:style-name="ce150" table:formula="of:=SUM([.AY13:.BJ13])" office:value-type="float" office:value="846.5711625" calcext:value-type="float">
            <text:p>846.57</text:p>
          </table:table-cell>
          <table:table-cell table:style-name="ce157" table:formula="of:=SUM([.AZ13:.BK1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8"/>
          <table:table-cell table:style-name="ce134"/>
          <table:table-cell table:number-columns-repeated="16375"/>
        </table:table-row>
        <table:table-row table:style-name="ro4" table:number-rows-repeated="935">
          <table:table-cell table:number-columns-repeated="16384"/>
        </table:table-row>
        <table:table-row table:style-name="ro8" table:number-rows-repeated="104762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ostos_Ventas" table:style-name="ta7">
        <table:table-column table:style-name="co22" table:default-cell-style-name="ce167"/>
        <table:table-column table:style-name="co37" table:default-cell-style-name="ce167"/>
        <table:table-column table:style-name="co38" table:default-cell-style-name="ce167"/>
        <table:table-column table:style-name="co39" table:default-cell-style-name="ce167"/>
        <table:table-column table:style-name="co40" table:default-cell-style-name="ce167"/>
        <table:table-column table:style-name="co41" table:number-columns-repeated="2" table:default-cell-style-name="ce167"/>
        <table:table-column table:style-name="co13" table:default-cell-style-name="ce167"/>
        <table:table-column table:style-name="co35" table:default-cell-style-name="ce167"/>
        <table:table-column table:style-name="co42" table:default-cell-style-name="ce167"/>
        <table:table-column table:style-name="co26" table:default-cell-style-name="ce167"/>
        <table:table-column table:style-name="co43" table:default-cell-style-name="ce167"/>
        <table:table-column table:style-name="co26" table:number-columns-repeated="14" table:default-cell-style-name="ce167"/>
        <table:table-column table:style-name="co18" table:number-columns-repeated="16358" table:default-cell-style-name="ce167"/>
        <table:table-row table:style-name="ro4">
          <table:table-cell table:style-name="ce166" table:number-columns-repeated="26"/>
          <table:table-cell table:number-columns-repeated="16358"/>
        </table:table-row>
        <table:table-row table:style-name="ro8">
          <table:table-cell table:style-name="ce166" table:number-columns-repeated="2"/>
          <table:table-cell table:style-name="ce168" table:number-columns-spanned="6" table:number-rows-spanned="1"/>
          <table:covered-table-cell table:number-columns-repeated="5" table:style-name="ce180"/>
          <table:table-cell table:style-name="ce166" table:number-columns-repeated="18"/>
          <table:table-cell table:number-columns-repeated="16358"/>
        </table:table-row>
        <table:table-row table:style-name="ro8">
          <table:table-cell table:style-name="ce166" table:number-columns-repeated="2"/>
          <table:table-cell table:style-name="ce168" office:value-type="string" calcext:value-type="string" table:number-columns-spanned="6" table:number-rows-spanned="1">
            <text:p>COSTOS DE PRODUCCIÓN O DE VENTAS (3500 unidades)</text:p>
          </table:table-cell>
          <table:covered-table-cell table:number-columns-repeated="5" table:style-name="ce180"/>
          <table:table-cell table:style-name="ce166" table:number-columns-repeated="18"/>
          <table:table-cell table:number-columns-repeated="16358"/>
        </table:table-row>
        <table:table-row table:style-name="ro14">
          <table:table-cell table:style-name="ce166" table:number-columns-repeated="2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69" office:value-type="string" calcext:value-type="string" table:number-columns-spanned="1" table:number-rows-spanned="2">
            <text:p>RUBRO</text:p>
          </table:table-cell>
          <table:table-cell table:style-name="ce181" office:value-type="string" calcext:value-type="string" table:number-columns-spanned="1" table:number-rows-spanned="2">
            <text:p>COSTO UNITARIO</text:p>
          </table:table-cell>
          <table:table-cell table:style-name="ce181" office:value-type="string" calcext:value-type="string" table:number-columns-spanned="1" table:number-rows-spanned="2">
            <text:p>UNIDADES REQUERIDAS</text:p>
          </table:table-cell>
          <table:table-cell table:style-name="ce191" office:value-type="string" calcext:value-type="string" table:number-columns-spanned="2" table:number-rows-spanned="1">
            <text:p>COSTO </text:p>
          </table:table-cell>
          <table:covered-table-cell table:style-name="ce193"/>
          <table:table-cell table:style-name="ce194" office:value-type="string" calcext:value-type="string" table:number-columns-spanned="1" table:number-rows-spanned="2">
            <text:p>TOTAL</text:p>
          </table:table-cell>
          <table:table-cell table:style-name="ce166" table:number-columns-repeated="18"/>
          <table:table-cell table:number-columns-repeated="16358"/>
        </table:table-row>
        <table:table-row table:style-name="ro14">
          <table:table-cell table:style-name="ce166" table:number-columns-repeated="2"/>
          <table:covered-table-cell table:style-name="ce170"/>
          <table:covered-table-cell table:number-columns-repeated="2" table:style-name="ce182"/>
          <table:table-cell table:style-name="ce192" office:value-type="string" calcext:value-type="string">
            <text:p>FIJO</text:p>
          </table:table-cell>
          <table:table-cell table:style-name="ce192" office:value-type="string" calcext:value-type="string">
            <text:p>VARIABLE</text:p>
          </table:table-cell>
          <table:covered-table-cell table:style-name="ce195"/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1" office:value-type="string" calcext:value-type="string">
            <text:p>COSTOS DE VENTAS</text:p>
          </table:table-cell>
          <table:table-cell table:style-name="ce183" table:number-columns-repeated="4"/>
          <table:table-cell table:style-name="ce196"/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2" office:value-type="string" calcext:value-type="string">
            <text:p><text:s/>Materia Prima Directa</text:p>
          </table:table-cell>
          <table:table-cell table:style-name="ce184" table:number-columns-repeated="4"/>
          <table:table-cell table:style-name="ce197" table:formula="of:=[.F8]+[.G8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Fibra acrilica</text:p>
          </table:table-cell>
          <table:table-cell table:style-name="ce184" table:formula="of:=[$Inversion_Inicial.E32]" office:value-type="float" office:value="4" calcext:value-type="float">
            <text:p>4.00</text:p>
          </table:table-cell>
          <table:table-cell table:style-name="ce189" table:formula="of:=[$Presupuesto_Ventas.$D$7]" office:value-type="float" office:value="3500" calcext:value-type="float">
            <text:p>3,500</text:p>
          </table:table-cell>
          <table:table-cell table:style-name="ce184"/>
          <table:table-cell table:style-name="ce184" table:formula="of:=[.D9]*[.E9]" office:value-type="float" office:value="14000" calcext:value-type="float">
            <text:p>14,000.00</text:p>
          </table:table-cell>
          <table:table-cell table:style-name="ce197" table:formula="of:=[.F9]+[.G9]" office:value-type="float" office:value="14000" calcext:value-type="float">
            <text:p><text:s/>S/14,000.00 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/>
          <table:table-cell table:style-name="ce184"/>
          <table:table-cell table:style-name="ce189"/>
          <table:table-cell table:style-name="ce184" table:number-columns-repeated="2"/>
          <table:table-cell table:style-name="ce197" table:formula="of:=[.F10]+[.G10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/>
          <table:table-cell table:style-name="ce184"/>
          <table:table-cell table:style-name="ce189"/>
          <table:table-cell table:style-name="ce184" table:number-columns-repeated="2"/>
          <table:table-cell table:style-name="ce197" table:formula="of:=[.F11]+[.G11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/>
          <table:table-cell table:style-name="ce184"/>
          <table:table-cell table:style-name="ce189"/>
          <table:table-cell table:style-name="ce184" table:number-columns-repeated="2"/>
          <table:table-cell table:style-name="ce197" table:formula="of:=[.F12]+[.G12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2" office:value-type="string" calcext:value-type="string">
            <text:p><text:s/>Mano de Obra Directa</text:p>
          </table:table-cell>
          <table:table-cell table:style-name="ce184"/>
          <table:table-cell table:style-name="ce189"/>
          <table:table-cell table:style-name="ce184" table:number-columns-repeated="2"/>
          <table:table-cell table:style-name="ce197" table:formula="of:=[.F13]+[.G13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Empleados(*)</text:p>
          </table:table-cell>
          <table:table-cell table:style-name="ce184"/>
          <table:table-cell table:style-name="ce189"/>
          <table:table-cell table:style-name="ce184" table:number-columns-repeated="2"/>
          <table:table-cell table:style-name="ce197" table:formula="of:=[.F14]+[.G14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/>
          <table:table-cell table:style-name="ce184"/>
          <table:table-cell table:style-name="ce189"/>
          <table:table-cell table:style-name="ce184" table:number-columns-repeated="2"/>
          <table:table-cell table:style-name="ce197" table:formula="of:=[.F15]+[.G15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2" office:value-type="string" calcext:value-type="string">
            <text:p>Costos Indirectos de Fabricacion</text:p>
          </table:table-cell>
          <table:table-cell table:style-name="ce184"/>
          <table:table-cell table:style-name="ce189"/>
          <table:table-cell table:style-name="ce184" table:number-columns-repeated="2"/>
          <table:table-cell table:style-name="ce197" table:formula="of:=[.F16]+[.G16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Flete</text:p>
          </table:table-cell>
          <table:table-cell table:style-name="ce184" table:formula="of:=[$Inversion_Inicial.E35]" office:value-type="float" office:value="0.028" calcext:value-type="float">
            <text:p>0.03</text:p>
          </table:table-cell>
          <table:table-cell table:style-name="ce189" table:formula="of:=[$Inversion_Inicial.D32]" office:value-type="float" office:value="3500" calcext:value-type="float">
            <text:p>3,500</text:p>
          </table:table-cell>
          <table:table-cell table:style-name="ce184" table:formula="of:=[.D17]*[.E17]" office:value-type="float" office:value="98" calcext:value-type="float">
            <text:p>98.00</text:p>
          </table:table-cell>
          <table:table-cell table:style-name="ce184"/>
          <table:table-cell table:style-name="ce197" table:formula="of:=[.F17]+[.G17]" office:value-type="float" office:value="98" calcext:value-type="float">
            <text:p><text:s/>S/98.00 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Bolsas de despacho</text:p>
          </table:table-cell>
          <table:table-cell table:style-name="ce184" table:formula="of:=[$Inversion_Inicial.E36]" office:value-type="float" office:value="2" calcext:value-type="float">
            <text:p>2.00</text:p>
          </table:table-cell>
          <table:table-cell table:style-name="ce189" table:formula="of:=[$Inversion_Inicial.D36]" office:value-type="float" office:value="14" calcext:value-type="float">
            <text:p>14</text:p>
          </table:table-cell>
          <table:table-cell table:style-name="ce184" table:formula="of:=[.D18]*[.E18]" office:value-type="float" office:value="28" calcext:value-type="float">
            <text:p>28.00</text:p>
          </table:table-cell>
          <table:table-cell table:style-name="ce184"/>
          <table:table-cell table:style-name="ce197" table:formula="of:=[.F18]+[.G18]" office:value-type="float" office:value="28" calcext:value-type="float">
            <text:p><text:s/>S/28.00 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/>
          <table:table-cell table:style-name="ce184"/>
          <table:table-cell table:style-name="ce189"/>
          <table:table-cell table:style-name="ce184" table:number-columns-repeated="2"/>
          <table:table-cell table:style-name="ce197" table:formula="of:=[.F19]+[.G19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2" office:value-type="string" calcext:value-type="string">
            <text:p>Depreciaciones</text:p>
          </table:table-cell>
          <table:table-cell table:style-name="ce184" office:value-type="float" office:value="0" calcext:value-type="float">
            <text:p>0.00</text:p>
          </table:table-cell>
          <table:table-cell table:style-name="ce189" office:value-type="float" office:value="0" calcext:value-type="float">
            <text:p>0</text:p>
          </table:table-cell>
          <table:table-cell table:style-name="ce184" table:number-columns-repeated="2"/>
          <table:table-cell table:style-name="ce197" table:formula="of:=[.F20]+[.G20]" office:value-type="float" office:value="0" calcext:value-type="float">
            <text:p><text:s/>S/- <text:s text:c="2"/></text:p>
          </table:table-cell>
          <table:table-cell table:style-name="ce166" table:number-columns-repeated="18"/>
          <table:table-cell table:number-columns-repeated="16358"/>
        </table:table-row>
        <table:table-row table:style-name="ro14">
          <table:table-cell table:style-name="ce166" table:number-columns-repeated="2"/>
          <table:table-cell table:style-name="ce174" office:value-type="string" calcext:value-type="string">
            <text:p>TOTAL COSTOS DE PRODUCCION</text:p>
          </table:table-cell>
          <table:table-cell table:style-name="ce185" table:number-columns-repeated="2"/>
          <table:table-cell table:style-name="ce185" table:formula="of:=SUM([.F8:.F20])" office:value-type="float" office:value="126" calcext:value-type="float">
            <text:p>126.00</text:p>
          </table:table-cell>
          <table:table-cell table:style-name="ce185" table:formula="of:=SUM([.G8:.G20])" office:value-type="float" office:value="14000" calcext:value-type="float">
            <text:p>14,000.00</text:p>
          </table:table-cell>
          <table:table-cell table:style-name="ce197" table:formula="of:=[.F21]+[.G21]" office:value-type="float" office:value="14126" calcext:value-type="float">
            <text:p><text:s/>S/14,126.00 </text:p>
          </table:table-cell>
          <table:table-cell table:style-name="ce166"/>
          <table:table-cell table:style-name="ce204"/>
          <table:table-cell table:style-name="ce166"/>
          <table:table-cell table:style-name="ce204"/>
          <table:table-cell table:style-name="ce166" table:number-columns-repeated="14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5" office:value-type="string" calcext:value-type="string" table:number-columns-spanned="2" table:number-rows-spanned="1">
            <text:p>*Se ha considerado a los empleados en gastos administrativos</text:p>
          </table:table-cell>
          <table:covered-table-cell table:style-name="ce180"/>
          <table:table-cell table:style-name="ce190" table:number-columns-repeated="3"/>
          <table:table-cell table:style-name="ce166" table:number-columns-repeated="19"/>
          <table:table-cell table:number-columns-repeated="16358"/>
        </table:table-row>
        <table:table-row table:style-name="ro4">
          <table:table-cell table:style-name="ce166" table:number-columns-repeated="26"/>
          <table:table-cell table:number-columns-repeated="16358"/>
        </table:table-row>
        <table:table-row table:style-name="ro8">
          <table:table-cell table:style-name="ce166" table:number-columns-repeated="2"/>
          <table:table-cell table:style-name="ce168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180"/>
          <table:table-cell table:style-name="ce166" table:number-columns-repeated="18"/>
          <table:table-cell table:number-columns-repeated="16358"/>
        </table:table-row>
        <table:table-row table:style-name="ro22">
          <table:table-cell table:style-name="ce166" table:number-columns-repeated="2"/>
          <table:table-cell table:style-name="ce176" table:number-columns-repeated="5"/>
          <table:table-cell table:style-name="ce166" table:number-columns-repeated="19"/>
          <table:table-cell table:number-columns-repeated="16358"/>
        </table:table-row>
        <table:table-row table:style-name="ro14">
          <table:table-cell table:style-name="ce166" table:number-columns-repeated="2"/>
          <table:table-cell table:style-name="ce177" office:value-type="string" calcext:value-type="string">
            <text:p>DESCRIPCION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201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1" office:value-type="string" calcext:value-type="string">
            <text:p>A. COSTOS DE PRODUCCION</text:p>
          </table:table-cell>
          <table:table-cell table:style-name="ce183" table:number-columns-repeated="4"/>
          <table:table-cell table:style-name="ce199"/>
          <table:table-cell table:style-name="ce202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8" office:value-type="string" calcext:value-type="string">
            <text:p><text:s/>Materia prima <text:s/>e insumos</text:p>
          </table:table-cell>
          <table:table-cell table:style-name="ce187" table:formula="of:=[$Resumen.$H$21]*[$Presupuesto_Ventas.$P7]" office:value-type="float" office:value="190000" calcext:value-type="float">
            <text:p>S/190,000.00</text:p>
          </table:table-cell>
          <table:table-cell table:style-name="ce187" table:formula="of:=[$Resumen.$H$21]*[$Presupuesto_Ventas.$P8]" office:value-type="float" office:value="199500" calcext:value-type="float">
            <text:p>S/199,500.00</text:p>
          </table:table-cell>
          <table:table-cell table:style-name="ce187" table:formula="of:=[$Resumen.$H$21]*[$Presupuesto_Ventas.$P9]" office:value-type="float" office:value="209475" calcext:value-type="float">
            <text:p>S/209,475.00</text:p>
          </table:table-cell>
          <table:table-cell table:style-name="ce187" table:formula="of:=[$Resumen.$H$21]*[$Presupuesto_Ventas.$P10]" office:value-type="float" office:value="219948.75" calcext:value-type="float">
            <text:p>S/219,948.75</text:p>
          </table:table-cell>
          <table:table-cell table:style-name="ce187" table:formula="of:=[$Resumen.$H$21]*[$Presupuesto_Ventas.$P11]" office:value-type="float" office:value="230946.1875" calcext:value-type="float">
            <text:p>S/230,946.19</text:p>
          </table:table-cell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<text:s/>Mano de Obra</text:p>
          </table:table-cell>
          <table:table-cell table:number-columns-repeated="4" table:style-name="ce187" office:value-type="float" office:value="0" calcext:value-type="float">
            <text:p>S/0.00</text:p>
          </table:table-cell>
          <table:table-cell table:style-name="ce200" office:value-type="float" office:value="0" calcext:value-type="float">
            <text:p>S/0.00</text:p>
          </table:table-cell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Costos Indirectos de Fabricacion</text:p>
          </table:table-cell>
          <table:table-cell table:style-name="ce187" table:formula="of:=([.$D$17]*[$Presupuesto_Ventas.$P7])+(([.$F$18]/[.$E$17])*[$Presupuesto_Ventas.$P7])" office:value-type="float" office:value="1710" calcext:value-type="float">
            <text:p>S/1,710.00</text:p>
          </table:table-cell>
          <table:table-cell table:style-name="ce187" table:formula="of:=([.$D$17]*[$Presupuesto_Ventas.$P8])+(([.$F$18]/[.$E$17])*[$Presupuesto_Ventas.$P8])" office:value-type="float" office:value="1795.5" calcext:value-type="float">
            <text:p>S/1,795.50</text:p>
          </table:table-cell>
          <table:table-cell table:style-name="ce187" table:formula="of:=([.$D$17]*[$Presupuesto_Ventas.$P9])+(([.$F$18]/[.$E$17])*[$Presupuesto_Ventas.$P9])" office:value-type="float" office:value="1885.275" calcext:value-type="float">
            <text:p>S/1,885.28</text:p>
          </table:table-cell>
          <table:table-cell table:style-name="ce187" table:formula="of:=([.$D$17]*[$Presupuesto_Ventas.$P10])+(([.$F$18]/[.$E$17])*[$Presupuesto_Ventas.$P10])" office:value-type="float" office:value="1979.53875" calcext:value-type="float">
            <text:p>S/1,979.54</text:p>
          </table:table-cell>
          <table:table-cell table:style-name="ce187" table:formula="of:=([.$D$17]*[$Presupuesto_Ventas.$P11])+(([.$F$18]/[.$E$17])*[$Presupuesto_Ventas.$P11])" office:value-type="float" office:value="2078.5156875" calcext:value-type="float">
            <text:p>S/2,078.52</text:p>
          </table:table-cell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3" office:value-type="string" calcext:value-type="string">
            <text:p>Depreciaciones</text:p>
          </table:table-cell>
          <table:table-cell table:number-columns-repeated="4" table:style-name="ce187" office:value-type="float" office:value="0" calcext:value-type="float">
            <text:p>S/0.00</text:p>
          </table:table-cell>
          <table:table-cell table:style-name="ce200" office:value-type="float" office:value="0" calcext:value-type="float">
            <text:p>S/0.00</text:p>
          </table:table-cell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14">
          <table:table-cell table:style-name="ce166" table:number-columns-repeated="2"/>
          <table:table-cell table:style-name="ce174" office:value-type="string" calcext:value-type="string">
            <text:p>TOTAL COSTOS DE PRODUCCION</text:p>
          </table:table-cell>
          <table:table-cell table:style-name="ce188" table:formula="of:=SUM([.D28:.D31])" office:value-type="float" office:value="191710" calcext:value-type="float">
            <text:p>S/191,710.00</text:p>
          </table:table-cell>
          <table:table-cell table:style-name="ce188" table:formula="of:=SUM([.E28:.E31])" office:value-type="float" office:value="201295.5" calcext:value-type="float">
            <text:p>S/201,295.50</text:p>
          </table:table-cell>
          <table:table-cell table:style-name="ce188" table:formula="of:=SUM([.F28:.F31])" office:value-type="float" office:value="211360.275" calcext:value-type="float">
            <text:p>S/211,360.28</text:p>
          </table:table-cell>
          <table:table-cell table:style-name="ce188" table:formula="of:=SUM([.G28:.G31])" office:value-type="float" office:value="221928.28875" calcext:value-type="float">
            <text:p>S/221,928.29</text:p>
          </table:table-cell>
          <table:table-cell table:style-name="ce188" table:formula="of:=SUM([.H28:.H31])" office:value-type="float" office:value="233024.7031875" calcext:value-type="float">
            <text:p>S/233,024.70</text:p>
          </table:table-cell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"/>
          <table:table-cell table:style-name="ce179" table:number-columns-spanned="2" table:number-rows-spanned="1"/>
          <table:covered-table-cell table:style-name="ce180"/>
          <table:table-cell table:style-name="ce190" table:number-columns-repeated="4"/>
          <table:table-cell table:style-name="ce203" table:number-columns-repeated="2"/>
          <table:table-cell table:style-name="ce166" table:number-columns-repeated="16"/>
          <table:table-cell table:number-columns-repeated="16358"/>
        </table:table-row>
        <table:table-row table:style-name="ro4">
          <table:table-cell table:style-name="ce166" table:number-columns-repeated="26"/>
          <table:table-cell table:number-columns-repeated="16358"/>
        </table:table-row>
        <table:table-row table:style-name="ro4" table:number-rows-repeated="966">
          <table:table-cell table:style-name="ce166" table:number-columns-repeated="26"/>
          <table:table-cell table:number-columns-repeated="16358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ueldos" table:style-name="ta8">
        <table:table-column table:style-name="co44" table:default-cell-style-name="ce167"/>
        <table:table-column table:style-name="co45" table:default-cell-style-name="ce167"/>
        <table:table-column table:style-name="co43" table:default-cell-style-name="ce167"/>
        <table:table-column table:style-name="co16" table:default-cell-style-name="ce167"/>
        <table:table-column table:style-name="co46" table:default-cell-style-name="ce167"/>
        <table:table-column table:style-name="co16" table:default-cell-style-name="ce167"/>
        <table:table-column table:style-name="co37" table:default-cell-style-name="ce167"/>
        <table:table-column table:style-name="co47" table:default-cell-style-name="ce167"/>
        <table:table-column table:style-name="co48" table:default-cell-style-name="ce167"/>
        <table:table-column table:style-name="co49" table:number-columns-repeated="2" table:default-cell-style-name="ce167"/>
        <table:table-column table:style-name="co26" table:number-columns-repeated="15" table:default-cell-style-name="ce167"/>
        <table:table-column table:style-name="co18" table:number-columns-repeated="16358" table:default-cell-style-name="ce167"/>
        <table:table-row table:style-name="ro4">
          <table:table-cell table:style-name="ce166" table:number-columns-repeated="5"/>
          <table:table-cell table:style-name="ce254"/>
          <table:table-cell table:style-name="ce166" table:number-columns-repeated="20"/>
          <table:table-cell table:number-columns-repeated="16358"/>
        </table:table-row>
        <table:table-row table:style-name="ro8">
          <table:table-cell table:style-name="ce166"/>
          <table:table-cell table:style-name="ce205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1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table:number-columns-repeated="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1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1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table:number-columns-repeated="8"/>
          <table:table-cell table:style-name="ce166" table:number-columns-repeated="17"/>
          <table:table-cell table:number-columns-repeated="16358"/>
        </table:table-row>
        <table:table-row table:style-name="ro14">
          <table:table-cell table:style-name="ce166"/>
          <table:table-cell table:style-name="ce207" office:value-type="string" calcext:value-type="string">
            <text:p>Cargo</text:p>
          </table:table-cell>
          <table:table-cell table:style-name="ce207" office:value-type="string" calcext:value-type="string">
            <text:p>Básico mes</text:p>
          </table:table-cell>
          <table:table-cell table:style-name="ce207" office:value-type="string" calcext:value-type="string">
            <text:p>Anual</text:p>
          </table:table-cell>
          <table:table-cell table:style-name="ce207" office:value-type="string" calcext:value-type="string">
            <text:p>Beneficios(*)</text:p>
          </table:table-cell>
          <table:table-cell table:style-name="ce207" office:value-type="string" calcext:value-type="string">
            <text:p>N° Trab.</text:p>
          </table:table-cell>
          <table:table-cell table:style-name="ce207" office:value-type="string" calcext:value-type="string">
            <text:p>Sub Total</text:p>
          </table:table-cell>
          <table:table-cell table:style-name="ce207" office:value-type="string" calcext:value-type="string">
            <text:p>SIS (**)</text:p>
          </table:table-cell>
          <table:table-cell table:style-name="ce279" office:value-type="string" calcext:value-type="string">
            <text:p>TOTAL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8" office:value-type="string" calcext:value-type="string">
            <text:p>Area de producción</text:p>
          </table:table-cell>
          <table:table-cell table:style-name="ce225"/>
          <table:table-cell table:style-name="ce227" table:number-columns-repeated="5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9" office:value-type="string" calcext:value-type="string">
            <text:p>Jefe de Producción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45"/>
          <table:table-cell table:style-name="ce226" office:value-type="float" office:value="0" calcext:value-type="float">
            <text:p><text:s/>S/- <text:s text:c="2"/></text:p>
          </table:table-cell>
          <table:table-cell table:style-name="ce226" table:number-columns-repeated="3"/>
          <table:table-cell table:style-name="ce281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Obreros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45"/>
          <table:table-cell table:style-name="ce226" office:value-type="float" office:value="0" calcext:value-type="float">
            <text:p><text:s/>S/- <text:s text:c="2"/></text:p>
          </table:table-cell>
          <table:table-cell table:style-name="ce226" table:number-columns-repeated="3"/>
          <table:table-cell table:style-name="ce281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uardían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45"/>
          <table:table-cell table:style-name="ce226" office:value-type="float" office:value="0" calcext:value-type="float">
            <text:p><text:s/>S/- <text:s text:c="2"/></text:p>
          </table:table-cell>
          <table:table-cell table:style-name="ce226" table:number-columns-repeated="3"/>
          <table:table-cell table:style-name="ce281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Administración</text:p>
          </table:table-cell>
          <table:table-cell table:style-name="ce226"/>
          <table:table-cell table:style-name="ce245"/>
          <table:table-cell table:style-name="ce226" table:number-columns-repeated="4"/>
          <table:table-cell table:style-name="ce281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erente</text:p>
          </table:table-cell>
          <table:table-cell table:style-name="ce226" office:value-type="float" office:value="1500" calcext:value-type="float">
            <text:p><text:s/>S/1,500.00 </text:p>
          </table:table-cell>
          <table:table-cell table:style-name="ce245" office:value-type="float" office:value="12" calcext:value-type="float">
            <text:p>12.00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55" office:value-type="float" office:value="1" calcext:value-type="float">
            <text:p>1</text:p>
          </table:table-cell>
          <table:table-cell table:style-name="ce226" table:formula="of:=[.C12]*[.D12]" office:value-type="float" office:value="18000" calcext:value-type="float">
            <text:p><text:s/>S/18,000.00 </text:p>
          </table:table-cell>
          <table:table-cell table:style-name="ce226" table:formula="of:=15*12" office:value-type="float" office:value="180" calcext:value-type="float">
            <text:p><text:s/>S/180.00 </text:p>
          </table:table-cell>
          <table:table-cell table:style-name="ce281" table:formula="of:=[.G12]+[.H12]" office:value-type="float" office:value="18180" calcext:value-type="float">
            <text:p><text:s/>S/18,180.00 </text:p>
          </table:table-cell>
          <table:table-cell table:style-name="ce166" table:number-columns-repeated="5"/>
          <table:table-cell table:style-name="ce166" table:formula="of:=8*100" office:value-type="float" office:value="800" calcext:value-type="float">
            <text:p>800</text:p>
          </table:table-cell>
          <table:table-cell table:style-name="ce166" table:number-columns-repeated="11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Secretaria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45"/>
          <table:table-cell table:style-name="ce226" office:value-type="float" office:value="0" calcext:value-type="float">
            <text:p><text:s/>S/- <text:s text:c="2"/></text:p>
          </table:table-cell>
          <table:table-cell table:style-name="ce255"/>
          <table:table-cell table:style-name="ce226" table:number-columns-repeated="2"/>
          <table:table-cell table:style-name="ce281" table:formula="of:=[.G13]+[.H13]" office:value-type="float" office:value="0" calcext:value-type="float">
            <text:p><text:s/>S/- <text:s text:c="2"/>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Ventas</text:p>
          </table:table-cell>
          <table:table-cell table:style-name="ce226"/>
          <table:table-cell table:style-name="ce245"/>
          <table:table-cell table:style-name="ce226"/>
          <table:table-cell table:style-name="ce255"/>
          <table:table-cell table:style-name="ce226" table:number-columns-repeated="2"/>
          <table:table-cell table:style-name="ce281" table:formula="of:=[.G14]+[.H14]" office:value-type="float" office:value="0" calcext:value-type="float">
            <text:p><text:s/>S/- <text:s text:c="2"/>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Jefe de Ventas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45"/>
          <table:table-cell table:style-name="ce226" office:value-type="float" office:value="0" calcext:value-type="float">
            <text:p><text:s/>S/- <text:s text:c="2"/></text:p>
          </table:table-cell>
          <table:table-cell table:style-name="ce255"/>
          <table:table-cell table:style-name="ce226" table:number-columns-repeated="2"/>
          <table:table-cell table:style-name="ce281" table:formula="of:=[.G15]+[.H15]" office:value-type="float" office:value="0" calcext:value-type="float">
            <text:p><text:s/>S/- <text:s text:c="2"/>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Vendedor</text:p>
          </table:table-cell>
          <table:table-cell table:style-name="ce226" office:value-type="float" office:value="930" calcext:value-type="float">
            <text:p><text:s/>S/930.00 </text:p>
          </table:table-cell>
          <table:table-cell table:style-name="ce245" office:value-type="float" office:value="12" calcext:value-type="float">
            <text:p>12.00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55" office:value-type="float" office:value="1" calcext:value-type="float">
            <text:p>1</text:p>
          </table:table-cell>
          <table:table-cell table:style-name="ce226" table:formula="of:=[.C16]*[.D16]" office:value-type="float" office:value="11160" calcext:value-type="float">
            <text:p><text:s/>S/11,160.00 </text:p>
          </table:table-cell>
          <table:table-cell table:style-name="ce226" table:formula="of:=[$Resumen.H19]*[.D16]*[.F16]" office:value-type="float" office:value="180" calcext:value-type="float">
            <text:p><text:s/>S/180.00 </text:p>
          </table:table-cell>
          <table:table-cell table:style-name="ce281" table:formula="of:=[.G16]+[.H16]" office:value-type="float" office:value="11340" calcext:value-type="float">
            <text:p><text:s/>S/11,340.00 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Maestro taller</text:p>
          </table:table-cell>
          <table:table-cell table:style-name="ce226" office:value-type="float" office:value="350" calcext:value-type="float">
            <text:p><text:s/>S/350.00 </text:p>
          </table:table-cell>
          <table:table-cell table:style-name="ce245" office:value-type="float" office:value="12" calcext:value-type="float">
            <text:p>12.00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55" office:value-type="float" office:value="1" calcext:value-type="float">
            <text:p>1</text:p>
          </table:table-cell>
          <table:table-cell table:style-name="ce226" table:formula="of:=[.F17]*[.D17]*[.C17]" office:value-type="float" office:value="4200" calcext:value-type="float">
            <text:p><text:s/>S/4,200.00 </text:p>
          </table:table-cell>
          <table:table-cell table:style-name="ce226" office:value-type="float" office:value="0" calcext:value-type="float">
            <text:p><text:s/>S/- <text:s text:c="2"/></text:p>
          </table:table-cell>
          <table:table-cell table:style-name="ce281" table:formula="of:=[.G17]" office:value-type="float" office:value="4200" calcext:value-type="float">
            <text:p><text:s/>S/4,200.00 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2" office:value-type="string" calcext:value-type="string">
            <text:p>TOTAL</text:p>
          </table:table-cell>
          <table:table-cell table:style-name="ce212" table:number-columns-repeated="4"/>
          <table:table-cell table:style-name="ce261" table:formula="of:=SUM([.G12:.G16])" office:value-type="currency" office:currency="PEN" office:value="29160" calcext:value-type="currency">
            <text:p><text:s/>S/ 29,160.00 </text:p>
          </table:table-cell>
          <table:table-cell table:style-name="ce272"/>
          <table:table-cell table:style-name="ce282" table:formula="of:=SUM([.I12:.I17])" office:value-type="currency" office:currency="PEN" office:value="33720" calcext:value-type="currency">
            <text:p><text:s/>S/ 33,720.00 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office:value-type="string" calcext:value-type="string">
            <text:p>(*) No tiene gratificaciones ni tampoco CTS</text:p>
          </table:table-cell>
          <table:table-cell table:style-name="ce206" table:number-columns-repeated="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office:value-type="string" calcext:value-type="string">
            <text:p>(**) Aporte patronal 15 soles mensuales por trabajador</text:p>
          </table:table-cell>
          <table:table-cell table:style-name="ce206" table:number-columns-repeated="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table:number-columns-repeated="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1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1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table:number-columns-repeated="8"/>
          <table:table-cell table:style-name="ce166" table:number-columns-repeated="17"/>
          <table:table-cell table:number-columns-repeated="16358"/>
        </table:table-row>
        <table:table-row table:style-name="ro14">
          <table:table-cell table:style-name="ce166"/>
          <table:table-cell table:style-name="ce213" office:value-type="string" calcext:value-type="string">
            <text:p>Cargo</text:p>
          </table:table-cell>
          <table:table-cell table:style-name="ce213" office:value-type="string" calcext:value-type="string">
            <text:p>Básico mes</text:p>
          </table:table-cell>
          <table:table-cell table:style-name="ce213" office:value-type="string" calcext:value-type="string">
            <text:p>Anual</text:p>
          </table:table-cell>
          <table:table-cell table:style-name="ce213" office:value-type="string" calcext:value-type="string">
            <text:p>Beneficion(*)</text:p>
          </table:table-cell>
          <table:table-cell table:style-name="ce213" office:value-type="string" calcext:value-type="string">
            <text:p>N° Trab.</text:p>
          </table:table-cell>
          <table:table-cell table:style-name="ce213" office:value-type="string" calcext:value-type="string">
            <text:p>Sub Total</text:p>
          </table:table-cell>
          <table:table-cell table:style-name="ce213" office:value-type="string" calcext:value-type="string">
            <text:p>Essalud (***)</text:p>
          </table:table-cell>
          <table:table-cell table:style-name="ce283" office:value-type="string" calcext:value-type="string">
            <text:p>TOTAL</text:p>
          </table:table-cell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8" office:value-type="string" calcext:value-type="string">
            <text:p>Area de producción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9" office:value-type="string" calcext:value-type="string">
            <text:p>Jefe de Producción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Obreros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uardían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Administración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erente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Secretaria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Ventas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Jefe de Ventas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Vendedor</text:p>
          </table:table-cell>
          <table:table-cell table:style-name="ce227" table:number-columns-repeated="6"/>
          <table:table-cell table:style-name="ce280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4" office:value-type="string" calcext:value-type="string">
            <text:p>TOTAL</text:p>
          </table:table-cell>
          <table:table-cell table:style-name="ce214" table:number-columns-repeated="6"/>
          <table:table-cell table:style-name="ce284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office:value-type="string" calcext:value-type="string">
            <text:p>(*) Gratificación Medio sueldo en julio y diciembre + Medio sueldo CTS (1.5 sueldo)</text:p>
          </table:table-cell>
          <table:table-cell table:style-name="ce206" table:number-columns-repeated="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6" office:value-type="string" calcext:value-type="string">
            <text:p>(***) Aporte patronal 9%</text:p>
          </table:table-cell>
          <table:table-cell table:style-name="ce206" table:number-columns-repeated="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1" office:value-type="string" calcext:value-type="string" table:number-columns-spanned="8" table:number-rows-spanned="1">
            <text:p>REGIMEN GENERAL</text:p>
          </table:table-cell>
          <table:covered-table-cell table:number-columns-repeated="7" table:style-name="ce180"/>
          <table:table-cell table:style-name="ce166" table:number-columns-repeated="17"/>
          <table:table-cell table:number-columns-repeated="16358"/>
        </table:table-row>
        <table:table-row table:style-name="ro9">
          <table:table-cell table:style-name="ce166" table:number-columns-repeated="2"/>
          <table:table-cell table:style-name="ce228"/>
          <table:table-cell table:style-name="ce246"/>
          <table:table-cell table:style-name="ce228"/>
          <table:table-cell table:style-name="ce256"/>
          <table:table-cell table:style-name="ce228"/>
          <table:table-cell table:style-name="ce166" table:number-columns-repeated="19"/>
          <table:table-cell table:number-columns-repeated="16358"/>
        </table:table-row>
        <table:table-row table:style-name="ro4">
          <table:table-cell table:style-name="ce166"/>
          <table:table-cell table:style-name="ce215" office:value-type="string" calcext:value-type="string" table:number-columns-spanned="1" table:number-rows-spanned="2">
            <text:p>CARGO</text:p>
          </table:table-cell>
          <table:table-cell table:style-name="ce229" office:value-type="string" calcext:value-type="string" table:number-columns-spanned="4" table:number-rows-spanned="1">
            <text:p>Remuneraciones</text:p>
          </table:table-cell>
          <table:covered-table-cell table:number-columns-repeated="2" table:style-name="ce247"/>
          <table:covered-table-cell table:style-name="ce257"/>
          <table:table-cell table:style-name="ce262" office:value-type="string" calcext:value-type="string" table:number-columns-spanned="1" table:number-rows-spanned="2">
            <text:p>Sub Total</text:p>
          </table:table-cell>
          <table:table-cell table:style-name="ce273" office:value-type="string" calcext:value-type="string" table:number-columns-spanned="1" table:number-rows-spanned="2">
            <text:p>Essalud (**)</text:p>
          </table:table-cell>
          <table:table-cell table:style-name="ce285" office:value-type="string" calcext:value-type="string" table:number-columns-spanned="1" table:number-rows-spanned="2">
            <text:p>Total</text:p>
          </table:table-cell>
          <table:table-cell table:style-name="ce166" table:number-columns-repeated="17"/>
          <table:table-cell table:number-columns-repeated="16358"/>
        </table:table-row>
        <table:table-row table:style-name="ro14">
          <table:table-cell table:style-name="ce166"/>
          <table:covered-table-cell table:style-name="ce216"/>
          <table:table-cell table:style-name="ce230" office:value-type="string" calcext:value-type="string">
            <text:p>Mensual</text:p>
          </table:table-cell>
          <table:table-cell table:style-name="ce230" office:value-type="string" calcext:value-type="string">
            <text:p>Anual</text:p>
          </table:table-cell>
          <table:table-cell table:style-name="ce230" office:value-type="string" calcext:value-type="string">
            <text:p>Beneficios (*)</text:p>
          </table:table-cell>
          <table:table-cell table:style-name="ce230" office:value-type="string" calcext:value-type="string">
            <text:p>N° Trab.</text:p>
          </table:table-cell>
          <table:covered-table-cell table:number-columns-repeated="2" table:style-name="ce263"/>
          <table:covered-table-cell table:style-name="ce286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08" office:value-type="string" calcext:value-type="string">
            <text:p>Area de producción</text:p>
          </table:table-cell>
          <table:table-cell table:style-name="ce231" table:number-columns-repeated="4"/>
          <table:table-cell table:style-name="ce264"/>
          <table:table-cell table:style-name="ce274"/>
          <table:table-cell table:style-name="ce28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Jefe de Producción</text:p>
          </table:table-cell>
          <table:table-cell table:style-name="ce232" table:number-columns-repeated="4"/>
          <table:table-cell table:style-name="ce265"/>
          <table:table-cell table:style-name="ce275"/>
          <table:table-cell table:style-name="ce28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Obreros</text:p>
          </table:table-cell>
          <table:table-cell table:style-name="ce232" table:number-columns-repeated="4"/>
          <table:table-cell table:style-name="ce265"/>
          <table:table-cell table:style-name="ce275"/>
          <table:table-cell table:style-name="ce28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uardían</text:p>
          </table:table-cell>
          <table:table-cell table:style-name="ce232" table:number-columns-repeated="4"/>
          <table:table-cell table:style-name="ce265"/>
          <table:table-cell table:style-name="ce275"/>
          <table:table-cell table:style-name="ce28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Administración</text:p>
          </table:table-cell>
          <table:table-cell table:style-name="ce232" table:number-columns-repeated="4"/>
          <table:table-cell table:style-name="ce265"/>
          <table:table-cell table:style-name="ce275"/>
          <table:table-cell table:style-name="ce288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Gerente</text:p>
          </table:table-cell>
          <table:table-cell table:style-name="ce233" table:number-columns-repeated="3"/>
          <table:table-cell table:style-name="ce258"/>
          <table:table-cell table:style-name="ce233" table:number-columns-repeated="2"/>
          <table:table-cell table:style-name="ce289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Secretaria</text:p>
          </table:table-cell>
          <table:table-cell table:style-name="ce233" table:number-columns-repeated="3"/>
          <table:table-cell table:style-name="ce259"/>
          <table:table-cell table:style-name="ce233" table:number-columns-repeated="2"/>
          <table:table-cell table:style-name="ce289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rea de Ventas</text:p>
          </table:table-cell>
          <table:table-cell table:style-name="ce233" table:number-columns-repeated="6"/>
          <table:table-cell table:style-name="ce289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0" office:value-type="string" calcext:value-type="string">
            <text:p>Jefe de Ventas</text:p>
          </table:table-cell>
          <table:table-cell table:style-name="ce233" table:number-columns-repeated="3"/>
          <table:table-cell table:style-name="ce259"/>
          <table:table-cell table:style-name="ce233" table:number-columns-repeated="2"/>
          <table:table-cell table:style-name="ce289"/>
          <table:table-cell table:style-name="ce166" table:number-columns-repeated="17"/>
          <table:table-cell table:number-columns-repeated="16358"/>
        </table:table-row>
        <table:table-row table:style-name="ro14">
          <table:table-cell table:style-name="ce166"/>
          <table:table-cell table:style-name="ce217" office:value-type="string" calcext:value-type="string">
            <text:p>Vendedor</text:p>
          </table:table-cell>
          <table:table-cell table:style-name="ce234" table:number-columns-repeated="6"/>
          <table:table-cell table:style-name="ce290"/>
          <table:table-cell table:style-name="ce166" table:number-columns-repeated="17"/>
          <table:table-cell table:number-columns-repeated="16358"/>
        </table:table-row>
        <table:table-row table:style-name="ro14">
          <table:table-cell table:style-name="ce166"/>
          <table:table-cell table:style-name="ce218" office:value-type="string" calcext:value-type="string">
            <text:p>Total Mano de Obra</text:p>
          </table:table-cell>
          <table:table-cell table:style-name="ce235" table:number-columns-repeated="3"/>
          <table:table-cell table:style-name="ce260"/>
          <table:table-cell table:style-name="ce235" table:number-columns-repeated="2"/>
          <table:table-cell table:style-name="ce291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219" office:value-type="string" calcext:value-type="string">
            <text:p>(*) dos gratificaciones + CTS (3 sueldos)</text:p>
          </table:table-cell>
          <table:table-cell table:style-name="ce236" table:number-columns-repeated="7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/>
          <table:table-cell table:style-name="ce166" office:value-type="string" calcext:value-type="string">
            <text:p>(**) 9% aporte patronal</text:p>
          </table:table-cell>
          <table:table-cell table:style-name="ce237" table:number-columns-repeated="2"/>
          <table:table-cell table:style-name="ce253" table:number-columns-repeated="7"/>
          <table:table-cell table:style-name="ce166" table:number-columns-repeated="15"/>
          <table:table-cell table:number-columns-repeated="16358"/>
        </table:table-row>
        <table:table-row table:style-name="ro9">
          <table:table-cell table:style-name="ce166"/>
          <table:table-cell table:style-name="ce220"/>
          <table:table-cell table:style-name="ce238" table:number-columns-spanned="9" table:number-rows-spanned="1"/>
          <table:covered-table-cell table:number-columns-repeated="8" table:style-name="ce180"/>
          <table:table-cell table:style-name="ce166" table:number-columns-repeated="15"/>
          <table:table-cell table:number-columns-repeated="16358"/>
        </table:table-row>
        <table:table-row table:style-name="ro10">
          <table:table-cell table:style-name="ce166"/>
          <table:table-cell table:style-name="ce168" office:value-type="string" calcext:value-type="string" table:number-columns-spanned="6" table:number-rows-spanned="1">
            <text:p>PRESUPUESTO DE REMUNERACIONES <text:s/>PROYECTADO</text:p>
          </table:table-cell>
          <table:covered-table-cell table:number-columns-repeated="5" table:style-name="ce180"/>
          <table:table-cell table:style-name="ce238" table:number-columns-repeated="4"/>
          <table:table-cell table:style-name="ce166" table:number-columns-repeated="15"/>
          <table:table-cell table:number-columns-repeated="16358"/>
        </table:table-row>
        <table:table-row table:style-name="ro14">
          <table:table-cell table:style-name="ce166"/>
          <table:table-cell table:style-name="ce220"/>
          <table:table-cell table:style-name="ce236" table:number-columns-repeated="6"/>
          <table:table-cell table:style-name="ce202"/>
          <table:table-cell table:style-name="ce206" table:number-columns-repeated="2"/>
          <table:table-cell table:style-name="ce166" table:number-columns-repeated="15"/>
          <table:table-cell table:number-columns-repeated="16358"/>
        </table:table-row>
        <table:table-row table:style-name="ro4">
          <table:table-cell table:style-name="ce166"/>
          <table:table-cell table:style-name="ce221" office:value-type="string" calcext:value-type="string" table:number-columns-spanned="1" table:number-rows-spanned="2">
            <text:p>AREAS</text:p>
          </table:table-cell>
          <table:table-cell table:style-name="ce239" office:value-type="string" calcext:value-type="string" table:number-columns-spanned="5" table:number-rows-spanned="1">
            <text:p>PERIODOS</text:p>
          </table:table-cell>
          <table:covered-table-cell table:number-columns-repeated="3" table:style-name="ce247"/>
          <table:covered-table-cell table:style-name="ce266"/>
          <table:table-cell table:style-name="ce276"/>
          <table:table-cell table:style-name="ce292" table:number-columns-repeated="3"/>
          <table:table-cell table:style-name="ce166" table:number-columns-repeated="15"/>
          <table:table-cell table:number-columns-repeated="16358"/>
        </table:table-row>
        <table:table-row table:style-name="ro14">
          <table:table-cell table:style-name="ce166"/>
          <table:covered-table-cell table:style-name="ce222"/>
          <table:table-cell table:style-name="ce240" office:value-type="float" office:value="1" calcext:value-type="float">
            <text:p>1</text:p>
          </table:table-cell>
          <table:table-cell table:style-name="ce248" table:formula="of:=[.C59]+1" office:value-type="float" office:value="2" calcext:value-type="float">
            <text:p>2</text:p>
          </table:table-cell>
          <table:table-cell table:style-name="ce248" table:formula="of:=[.D59]+1" office:value-type="float" office:value="3" calcext:value-type="float">
            <text:p>3</text:p>
          </table:table-cell>
          <table:table-cell table:style-name="ce248" table:formula="of:=[.E59]+1" office:value-type="float" office:value="4" calcext:value-type="float">
            <text:p>4</text:p>
          </table:table-cell>
          <table:table-cell table:style-name="ce267" table:formula="of:=[.F59]+1" office:value-type="float" office:value="5" calcext:value-type="float">
            <text:p>5</text:p>
          </table:table-cell>
          <table:table-cell table:style-name="ce277"/>
          <table:table-cell table:style-name="ce293" table:number-columns-repeated="3"/>
          <table:table-cell table:style-name="ce166" table:number-columns-repeated="15"/>
          <table:table-cell table:number-columns-repeated="16358"/>
        </table:table-row>
        <table:table-row table:style-name="ro4">
          <table:table-cell table:style-name="ce166"/>
          <table:table-cell table:style-name="ce208" office:value-type="string" calcext:value-type="string">
            <text:p>PRODUCCION</text:p>
          </table:table-cell>
          <table:table-cell table:style-name="ce241"/>
          <table:table-cell table:style-name="ce249" table:number-columns-repeated="3"/>
          <table:table-cell table:style-name="ce268"/>
          <table:table-cell table:style-name="ce278"/>
          <table:table-cell table:style-name="ce237" table:number-columns-repeated="3"/>
          <table:table-cell table:style-name="ce166" table:number-columns-repeated="15"/>
          <table:table-cell table:number-columns-repeated="16358"/>
        </table:table-row>
        <table:table-row table:style-name="ro4">
          <table:table-cell table:style-name="ce166"/>
          <table:table-cell table:style-name="ce211" office:value-type="string" calcext:value-type="string">
            <text:p>ADMINISTRACION</text:p>
          </table:table-cell>
          <table:table-cell table:style-name="ce242"/>
          <table:table-cell table:style-name="ce250" table:number-columns-repeated="3"/>
          <table:table-cell table:style-name="ce269"/>
          <table:table-cell table:style-name="ce278"/>
          <table:table-cell table:style-name="ce237" table:number-columns-repeated="3"/>
          <table:table-cell table:style-name="ce166" table:number-columns-repeated="15"/>
          <table:table-cell table:number-columns-repeated="16358"/>
        </table:table-row>
        <table:table-row table:style-name="ro14">
          <table:table-cell table:style-name="ce166"/>
          <table:table-cell table:style-name="ce223" office:value-type="string" calcext:value-type="string">
            <text:p>VENTAS</text:p>
          </table:table-cell>
          <table:table-cell table:style-name="ce243"/>
          <table:table-cell table:style-name="ce251" table:number-columns-repeated="3"/>
          <table:table-cell table:style-name="ce270"/>
          <table:table-cell table:style-name="ce278"/>
          <table:table-cell table:style-name="ce237" table:number-columns-repeated="3"/>
          <table:table-cell table:style-name="ce166" table:number-columns-repeated="15"/>
          <table:table-cell table:number-columns-repeated="16358"/>
        </table:table-row>
        <table:table-row table:style-name="ro14">
          <table:table-cell table:style-name="ce166"/>
          <table:table-cell table:style-name="ce224" office:value-type="string" calcext:value-type="string">
            <text:p>TOTAL</text:p>
          </table:table-cell>
          <table:table-cell table:style-name="ce244"/>
          <table:table-cell table:style-name="ce252"/>
          <table:table-cell table:style-name="ce244" table:number-columns-repeated="2"/>
          <table:table-cell table:style-name="ce271"/>
          <table:table-cell table:style-name="ce276"/>
          <table:table-cell table:style-name="ce253" table:number-columns-repeated="3"/>
          <table:table-cell table:style-name="ce166" table:number-columns-repeated="15"/>
          <table:table-cell table:number-columns-repeated="16358"/>
        </table:table-row>
        <table:table-row table:style-name="ro4">
          <table:table-cell table:style-name="ce166"/>
          <table:table-cell table:style-name="ce220"/>
          <table:table-cell table:style-name="ce219"/>
          <table:table-cell table:style-name="ce236" table:number-columns-repeated="6"/>
          <table:table-cell table:style-name="ce166" table:number-columns-repeated="17"/>
          <table:table-cell table:number-columns-repeated="16358"/>
        </table:table-row>
        <table:table-row table:style-name="ro4">
          <table:table-cell table:style-name="ce166" table:number-columns-repeated="5"/>
          <table:table-cell table:style-name="ce254"/>
          <table:table-cell table:style-name="ce166" table:number-columns-repeated="20"/>
          <table:table-cell table:number-columns-repeated="16358"/>
        </table:table-row>
        <table:table-row table:style-name="ro4" table:number-rows-repeated="936">
          <table:table-cell table:style-name="ce166" table:number-columns-repeated="5"/>
          <table:table-cell table:style-name="ce254"/>
          <table:table-cell table:style-name="ce166" table:number-columns-repeated="20"/>
          <table:table-cell table:number-columns-repeated="16358"/>
        </table:table-row>
        <table:table-row table:style-name="ro8" table:number-rows-repeated="104757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Gastos_Operativos" table:style-name="ta9">
        <table:table-column table:style-name="co22" table:default-cell-style-name="ce295"/>
        <table:table-column table:style-name="co37" table:default-cell-style-name="ce295"/>
        <table:table-column table:style-name="co38" table:default-cell-style-name="ce295"/>
        <table:table-column table:style-name="co50" table:default-cell-style-name="ce295"/>
        <table:table-column table:style-name="co51" table:default-cell-style-name="ce295"/>
        <table:table-column table:style-name="co35" table:default-cell-style-name="ce295"/>
        <table:table-column table:style-name="co52" table:default-cell-style-name="ce295"/>
        <table:table-column table:style-name="co31" table:default-cell-style-name="ce295"/>
        <table:table-column table:style-name="co26" table:number-columns-repeated="18" table:default-cell-style-name="ce295"/>
        <table:table-column table:style-name="co18" table:number-columns-repeated="16358" table:default-cell-style-name="ce295"/>
        <table:table-row table:style-name="ro4">
          <table:table-cell table:style-name="ce294" table:number-columns-repeated="26"/>
          <table:table-cell table:number-columns-repeated="16358"/>
        </table:table-row>
        <table:table-row table:style-name="ro8">
          <table:table-cell table:style-name="ce294" table:number-columns-repeated="2"/>
          <table:table-cell table:style-name="ce296" table:number-columns-spanned="6" table:number-rows-spanned="1"/>
          <table:covered-table-cell table:number-columns-repeated="5" table:style-name="ce317"/>
          <table:table-cell table:style-name="ce294" table:number-columns-repeated="18"/>
          <table:table-cell table:number-columns-repeated="16358"/>
        </table:table-row>
        <table:table-row table:style-name="ro8">
          <table:table-cell table:style-name="ce294" table:number-columns-repeated="2"/>
          <table:table-cell table:style-name="ce296" office:value-type="string" calcext:value-type="string" table:number-columns-spanned="6" table:number-rows-spanned="1">
            <text:p>GASTOS OPERATIVOS PRIMER MES</text:p>
          </table:table-cell>
          <table:covered-table-cell table:number-columns-repeated="5" table:style-name="ce317"/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6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297" office:value-type="string" calcext:value-type="string" table:number-columns-spanned="1" table:number-rows-spanned="2">
            <text:p>RUBRO</text:p>
          </table:table-cell>
          <table:table-cell table:style-name="ce318" office:value-type="string" calcext:value-type="string" table:number-columns-spanned="1" table:number-rows-spanned="2">
            <text:p>COSTO UNITARIO</text:p>
          </table:table-cell>
          <table:table-cell table:style-name="ce334" office:value-type="string" calcext:value-type="string" table:number-columns-spanned="1" table:number-rows-spanned="2">
            <text:p>UNIDADES REQUERIDAS</text:p>
          </table:table-cell>
          <table:table-cell table:style-name="ce343" office:value-type="string" calcext:value-type="string" table:number-columns-spanned="2" table:number-rows-spanned="1">
            <text:p>COSTO </text:p>
          </table:table-cell>
          <table:covered-table-cell table:style-name="ce349"/>
          <table:table-cell table:style-name="ce358" office:value-type="string" calcext:value-type="string" table:number-columns-spanned="1" table:number-rows-spanned="2">
            <text:p>TOTAL</text:p>
          </table:table-cell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covered-table-cell table:style-name="ce298"/>
          <table:covered-table-cell table:style-name="ce319"/>
          <table:covered-table-cell table:style-name="ce335"/>
          <table:table-cell table:style-name="ce344" office:value-type="string" calcext:value-type="string">
            <text:p>FIJO</text:p>
          </table:table-cell>
          <table:table-cell table:style-name="ce344" office:value-type="string" calcext:value-type="string">
            <text:p>VARIABLE</text:p>
          </table:table-cell>
          <table:covered-table-cell table:style-name="ce352"/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299" office:value-type="string" calcext:value-type="string">
            <text:p>GASTOS DE ADMINISTRACION</text:p>
          </table:table-cell>
          <table:table-cell table:style-name="ce320" table:number-columns-repeated="4"/>
          <table:table-cell table:style-name="ce359"/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0" office:value-type="string" calcext:value-type="string">
            <text:p>Sueldos del personal</text:p>
          </table:table-cell>
          <table:table-cell table:style-name="ce321" table:formula="of:=[$Sueldos.C12]+[$Sueldos.H12]/12" office:value-type="float" office:value="1515" calcext:value-type="float">
            <text:p>1,515.00</text:p>
          </table:table-cell>
          <table:table-cell table:style-name="ce336" office:value-type="float" office:value="1" calcext:value-type="float">
            <text:p>1</text:p>
          </table:table-cell>
          <table:table-cell table:style-name="ce321" table:formula="of:=[.D8]*[.E8]" office:value-type="float" office:value="1515" calcext:value-type="float">
            <text:p>1,515.00</text:p>
          </table:table-cell>
          <table:table-cell table:style-name="ce321"/>
          <table:table-cell table:style-name="ce360" table:formula="of:=[.F8]+[.G8]" office:value-type="float" office:value="1515" calcext:value-type="float">
            <text:p>1,515.00</text:p>
          </table:table-cell>
          <table:table-cell table:style-name="ce294"/>
          <table:table-cell table:style-name="ce367"/>
          <table:table-cell table:style-name="ce294" table:number-columns-repeated="16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1" office:value-type="string" calcext:value-type="string">
            <text:p>Servicios: Agua, luz, telefono e internet</text:p>
          </table:table-cell>
          <table:table-cell table:style-name="ce322" office:value-type="float" office:value="180" calcext:value-type="float">
            <text:p>180.00</text:p>
          </table:table-cell>
          <table:table-cell table:style-name="ce337" office:value-type="float" office:value="1" calcext:value-type="float">
            <text:p>1</text:p>
          </table:table-cell>
          <table:table-cell table:style-name="ce324" table:formula="of:=[.D9]*[.E9]" office:value-type="float" office:value="180" calcext:value-type="float">
            <text:p>180.00</text:p>
          </table:table-cell>
          <table:table-cell table:style-name="ce322"/>
          <table:table-cell table:style-name="ce361" table:formula="of:=[.F9]+[.G9]" office:value-type="float" office:value="180" calcext:value-type="float">
            <text:p>180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1" office:value-type="string" calcext:value-type="string">
            <text:p>Mantenimiento y reparaciones.</text:p>
          </table:table-cell>
          <table:table-cell table:style-name="ce322"/>
          <table:table-cell table:style-name="ce337"/>
          <table:table-cell table:style-name="ce322" table:number-columns-repeated="2"/>
          <table:table-cell table:style-name="ce361" table:formula="of:=[.F10]+[.G10]" office:value-type="float" office:value="0" calcext:value-type="float">
            <text:p>0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1" office:value-type="string" calcext:value-type="string">
            <text:p>Utiles de oficina</text:p>
          </table:table-cell>
          <table:table-cell table:style-name="ce322" office:value-type="float" office:value="50" calcext:value-type="float">
            <text:p>50.00</text:p>
          </table:table-cell>
          <table:table-cell table:style-name="ce337" office:value-type="float" office:value="1" calcext:value-type="float">
            <text:p>1</text:p>
          </table:table-cell>
          <table:table-cell table:style-name="ce322"/>
          <table:table-cell table:style-name="ce322" table:formula="of:=[.E11]*[.D11]" office:value-type="float" office:value="50" calcext:value-type="float">
            <text:p>50.00</text:p>
          </table:table-cell>
          <table:table-cell table:style-name="ce361" table:formula="of:=[.F11]+[.G11]" office:value-type="float" office:value="50" calcext:value-type="float">
            <text:p>50.00</text:p>
          </table:table-cell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02" office:value-type="string" calcext:value-type="string">
            <text:p>Amortizacion de Intangibles</text:p>
          </table:table-cell>
          <table:table-cell table:style-name="ce323" office:value-type="float" office:value="0" calcext:value-type="float">
            <text:p>0.00</text:p>
          </table:table-cell>
          <table:table-cell table:style-name="ce338" office:value-type="float" office:value="1" calcext:value-type="float">
            <text:p>1</text:p>
          </table:table-cell>
          <table:table-cell table:style-name="ce324" table:formula="of:=[.D12]*[.E12]" office:value-type="float" office:value="0" calcext:value-type="float">
            <text:p>0.00</text:p>
          </table:table-cell>
          <table:table-cell table:style-name="ce323"/>
          <table:table-cell table:style-name="ce361" table:formula="of:=[.F12]+[.G12]" office:value-type="float" office:value="0" calcext:value-type="float">
            <text:p>0.00</text:p>
          </table:table-cell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03" office:value-type="string" calcext:value-type="string">
            <text:p>TOTAL GASTOS DE ADMINISTRACION</text:p>
          </table:table-cell>
          <table:table-cell table:style-name="ce320"/>
          <table:table-cell table:style-name="ce339"/>
          <table:table-cell table:style-name="ce345" table:formula="of:=SUM([.F8:.F12])" office:value-type="float" office:value="1695" calcext:value-type="float">
            <text:p>1,695.00</text:p>
          </table:table-cell>
          <table:table-cell table:style-name="ce345" table:formula="of:=SUM([.G8:.G12])" office:value-type="float" office:value="50" calcext:value-type="float">
            <text:p>50.00</text:p>
          </table:table-cell>
          <table:table-cell table:style-name="ce362" table:formula="of:=SUM([.H8:.H12])" office:value-type="float" office:value="1745" calcext:value-type="float">
            <text:p>1,745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4" office:value-type="string" calcext:value-type="string">
            <text:p>GASTOS DE VENTAS</text:p>
          </table:table-cell>
          <table:table-cell table:style-name="ce324"/>
          <table:table-cell table:style-name="ce340"/>
          <table:table-cell table:style-name="ce324" table:number-columns-repeated="2"/>
          <table:table-cell table:style-name="ce361"/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5" office:value-type="string" calcext:value-type="string">
            <text:p>Sueldos del personal</text:p>
          </table:table-cell>
          <table:table-cell table:style-name="ce325" table:formula="of:=[$Sueldos.C16]+[$Sueldos.C17]+([$Sueldos.H16]/12)+[$Sueldos.H17]" office:value-type="float" office:value="1295" calcext:value-type="float">
            <text:p>1,295.00</text:p>
          </table:table-cell>
          <table:table-cell table:style-name="ce341" office:value-type="float" office:value="1" calcext:value-type="float">
            <text:p>1</text:p>
          </table:table-cell>
          <table:table-cell table:style-name="ce321" table:formula="of:=[.D15]*[.E15]" office:value-type="float" office:value="1295" calcext:value-type="float">
            <text:p>1,295.00</text:p>
          </table:table-cell>
          <table:table-cell table:style-name="ce325"/>
          <table:table-cell table:style-name="ce363" table:formula="of:=[.G15]+[.F15]" office:value-type="float" office:value="1295" calcext:value-type="float">
            <text:p>1,295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6" office:value-type="string" calcext:value-type="string">
            <text:p>Comisión de ventas</text:p>
          </table:table-cell>
          <table:table-cell table:style-name="ce322"/>
          <table:table-cell table:style-name="ce337"/>
          <table:table-cell table:style-name="ce322" table:number-columns-repeated="2"/>
          <table:table-cell table:style-name="ce364" table:formula="of:=[.G16]+[.F16]" office:value-type="float" office:value="0" calcext:value-type="float">
            <text:p>0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5" office:value-type="string" calcext:value-type="string">
            <text:p>Alquiler de local para venta</text:p>
          </table:table-cell>
          <table:table-cell table:style-name="ce325" table:formula="of:=3000+[$Inversion_Inicial.E11]/60" office:value-type="float" office:value="3050" calcext:value-type="float">
            <text:p>3,050.00</text:p>
          </table:table-cell>
          <table:table-cell table:style-name="ce341" office:value-type="float" office:value="1" calcext:value-type="float">
            <text:p>1</text:p>
          </table:table-cell>
          <table:table-cell table:style-name="ce321" table:formula="of:=[.D17]*[.E17]" office:value-type="float" office:value="3050" calcext:value-type="float">
            <text:p>3,050.00</text:p>
          </table:table-cell>
          <table:table-cell table:style-name="ce325"/>
          <table:table-cell table:style-name="ce365" table:formula="of:=[.G17]+[.F17]" office:value-type="float" office:value="3050" calcext:value-type="float">
            <text:p>3,050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6" office:value-type="string" calcext:value-type="string">
            <text:p>Costos de delivery</text:p>
          </table:table-cell>
          <table:table-cell table:style-name="ce322"/>
          <table:table-cell table:style-name="ce337"/>
          <table:table-cell table:style-name="ce322" table:number-columns-repeated="2"/>
          <table:table-cell table:style-name="ce364"/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07" office:value-type="string" calcext:value-type="string">
            <text:p>Promoción</text:p>
          </table:table-cell>
          <table:table-cell table:style-name="ce323" table:formula="of:=[.G38]/12" office:value-type="float" office:value="200" calcext:value-type="float">
            <text:p>200.00</text:p>
          </table:table-cell>
          <table:table-cell table:style-name="ce338" office:value-type="float" office:value="1" calcext:value-type="float">
            <text:p>1</text:p>
          </table:table-cell>
          <table:table-cell table:style-name="ce323"/>
          <table:table-cell table:style-name="ce323" table:formula="of:=[.E19]*[.D19]" office:value-type="float" office:value="200" calcext:value-type="float">
            <text:p>200.00</text:p>
          </table:table-cell>
          <table:table-cell table:style-name="ce364" table:formula="of:=[.G19]+[.F19]" office:value-type="float" office:value="200" calcext:value-type="float">
            <text:p>200.00</text:p>
          </table:table-cell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03" office:value-type="string" calcext:value-type="string">
            <text:p>TOTAL GASTOS DE VENTAS</text:p>
          </table:table-cell>
          <table:table-cell table:style-name="ce320" table:number-columns-repeated="2"/>
          <table:table-cell table:style-name="ce345" table:formula="of:=SUM([.F14:.F19])" office:value-type="float" office:value="4345" calcext:value-type="float">
            <text:p>4,345.00</text:p>
          </table:table-cell>
          <table:table-cell table:style-name="ce345" table:formula="of:=SUM([.G14:.G19])" office:value-type="float" office:value="200" calcext:value-type="float">
            <text:p>200.00</text:p>
          </table:table-cell>
          <table:table-cell table:style-name="ce362" table:formula="of:=SUM([.H15:.H19])" office:value-type="float" office:value="4545" calcext:value-type="float">
            <text:p>4,545.00</text:p>
          </table:table-cell>
          <table:table-cell table:style-name="ce294" table:number-columns-repeated="18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08" office:value-type="string" calcext:value-type="string">
            <text:p>TOTAL GASTOS OPERATIVOS</text:p>
          </table:table-cell>
          <table:table-cell table:style-name="ce326" table:number-columns-repeated="2"/>
          <table:table-cell table:style-name="ce326" table:formula="of:=SUM([.F8:.F20])" office:value-type="float" office:value="12080" calcext:value-type="float">
            <text:p>12,080.00</text:p>
          </table:table-cell>
          <table:table-cell table:style-name="ce326" table:formula="of:=SUM([.G8:.G20])" office:value-type="float" office:value="500" calcext:value-type="float">
            <text:p>500.00</text:p>
          </table:table-cell>
          <table:table-cell table:style-name="ce366" table:formula="of:=[.H13]+[.H20]" office:value-type="float" office:value="6290" calcext:value-type="float">
            <text:p>6,290.00</text:p>
          </table:table-cell>
          <table:table-cell table:style-name="ce294" table:number-columns-repeated="18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09" table:number-columns-spanned="2" table:number-rows-spanned="1"/>
          <table:covered-table-cell table:style-name="ce317"/>
          <table:table-cell table:style-name="ce342" table:number-columns-repeated="3"/>
          <table:table-cell table:style-name="ce294" table:number-columns-repeated="19"/>
          <table:table-cell table:number-columns-repeated="16358"/>
        </table:table-row>
        <table:table-row table:style-name="ro8">
          <table:table-cell table:style-name="ce294" table:number-columns-repeated="2"/>
          <table:table-cell table:style-name="ce296" office:value-type="string" calcext:value-type="string" table:number-columns-spanned="5" table:number-rows-spanned="1">
            <text:p>PRESUPUESTO ANUAL DE PROMOCION</text:p>
          </table:table-cell>
          <table:covered-table-cell table:number-columns-repeated="4" table:style-name="ce317"/>
          <table:table-cell table:style-name="ce294" table:number-columns-repeated="19"/>
          <table:table-cell table:number-columns-repeated="16358"/>
        </table:table-row>
        <table:table-row table:style-name="ro14">
          <table:table-cell table:style-name="ce294" table:number-columns-repeated="26"/>
          <table:table-cell table:number-columns-repeated="16358"/>
        </table:table-row>
        <table:table-row table:style-name="ro22">
          <table:table-cell table:style-name="ce294" table:number-columns-repeated="2"/>
          <table:table-cell table:style-name="ce297" office:value-type="string" calcext:value-type="string" table:number-columns-spanned="1" table:number-rows-spanned="3">
            <text:p>RUBROS</text:p>
          </table:table-cell>
          <table:table-cell table:style-name="ce318" office:value-type="string" calcext:value-type="string" table:number-columns-spanned="1" table:number-rows-spanned="3">
            <text:p>Unidad Medida</text:p>
          </table:table-cell>
          <table:table-cell table:style-name="ce318" office:value-type="string" calcext:value-type="string" table:number-columns-spanned="1" table:number-rows-spanned="3">
            <text:p>Cantidad</text:p>
          </table:table-cell>
          <table:table-cell table:style-name="ce334" office:value-type="string" calcext:value-type="string" table:number-columns-spanned="1" table:number-rows-spanned="3">
            <text:p>N° veces</text:p>
          </table:table-cell>
          <table:table-cell table:style-name="ce350" office:value-type="string" calcext:value-type="string" table:number-columns-spanned="1" table:number-rows-spanned="3">
            <text:p>COSTO</text:p>
            <text:p> ANUAL</text:p>
            <text:p> </text:p>
          </table:table-cell>
          <table:table-cell table:style-name="ce294" table:number-columns-repeated="19"/>
          <table:table-cell table:number-columns-repeated="16358"/>
        </table:table-row>
        <table:table-row table:style-name="ro4">
          <table:table-cell table:style-name="ce294" table:number-columns-repeated="2"/>
          <table:covered-table-cell table:style-name="ce310"/>
          <table:covered-table-cell table:number-columns-repeated="3" table:style-name="ce327"/>
          <table:covered-table-cell table:style-name="ce351"/>
          <table:table-cell table:style-name="ce294" table:number-columns-repeated="19"/>
          <table:table-cell table:number-columns-repeated="16358"/>
        </table:table-row>
        <table:table-row table:style-name="ro12">
          <table:table-cell table:style-name="ce294" table:number-columns-repeated="2"/>
          <table:covered-table-cell table:style-name="ce298"/>
          <table:covered-table-cell table:number-columns-repeated="3" table:style-name="ce319"/>
          <table:covered-table-cell table:style-name="ce352"/>
          <table:table-cell table:style-name="ce294" table:number-columns-repeated="19"/>
          <table:table-cell table:number-columns-repeated="16358"/>
        </table:table-row>
        <table:table-row table:style-name="ro23">
          <table:table-cell table:style-name="ce294" table:number-columns-repeated="2"/>
          <table:table-cell table:style-name="ce311" office:value-type="string" calcext:value-type="string">
            <text:p>. Spots en radio</text:p>
          </table:table-cell>
          <table:table-cell table:style-name="ce328" table:number-columns-repeated="2"/>
          <table:table-cell table:style-name="ce346"/>
          <table:table-cell table:style-name="ce353"/>
          <table:table-cell table:style-name="ce294" table:number-columns-repeated="19"/>
          <table:table-cell table:number-columns-repeated="16358"/>
        </table:table-row>
        <table:table-row table:style-name="ro9">
          <table:table-cell table:style-name="ce294" table:number-columns-repeated="2"/>
          <table:table-cell table:style-name="ce312" office:value-type="string" calcext:value-type="string">
            <text:p>. Spots en television</text:p>
          </table:table-cell>
          <table:table-cell table:style-name="ce329" table:number-columns-repeated="2"/>
          <table:table-cell table:style-name="ce347"/>
          <table:table-cell table:style-name="ce354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2" office:value-type="string" calcext:value-type="string">
            <text:p>• Gigantografias</text:p>
          </table:table-cell>
          <table:table-cell table:style-name="ce330" table:number-columns-repeated="3"/>
          <table:table-cell table:style-name="ce355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2" office:value-type="string" calcext:value-type="string">
            <text:p>• Mandiles</text:p>
          </table:table-cell>
          <table:table-cell table:style-name="ce330" office:value-type="string" calcext:value-type="string">
            <text:p>Unidades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2" calcext:value-type="float">
            <text:p>2</text:p>
          </table:table-cell>
          <table:table-cell table:style-name="ce355" table:formula="of:=[.F31]*[.E31]*10" office:value-type="currency" office:currency="S/." office:value="600" calcext:value-type="currency">
            <text:p>S/. 600.00</text:p>
          </table:table-cell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2" office:value-type="string" calcext:value-type="string">
            <text:p>• Polos</text:p>
          </table:table-cell>
          <table:table-cell table:style-name="ce330" table:number-columns-repeated="3"/>
          <table:table-cell table:style-name="ce355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2" office:value-type="string" calcext:value-type="string">
            <text:p>• Bolsas</text:p>
          </table:table-cell>
          <table:table-cell table:style-name="ce330" table:number-columns-repeated="3"/>
          <table:table-cell table:style-name="ce355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2" office:value-type="string" calcext:value-type="string">
            <text:p>. Redes sociales</text:p>
          </table:table-cell>
          <table:table-cell table:style-name="ce330" table:number-columns-repeated="3"/>
          <table:table-cell table:style-name="ce355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3" office:value-type="string" calcext:value-type="string">
            <text:p>• Tarjetas personales</text:p>
          </table:table-cell>
          <table:table-cell table:style-name="ce330" table:number-columns-repeated="3"/>
          <table:table-cell table:style-name="ce355"/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3" office:value-type="string" calcext:value-type="string">
            <text:p>• Mantenimiento de la pagina Web.</text:p>
          </table:table-cell>
          <table:table-cell table:style-name="ce330" office:value-type="string" calcext:value-type="string">
            <text:p>Servicio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12" calcext:value-type="float">
            <text:p>12</text:p>
          </table:table-cell>
          <table:table-cell table:style-name="ce355" table:formula="of:=[.F36]*150" office:value-type="currency" office:currency="S/." office:value="1800" calcext:value-type="currency">
            <text:p>S/. 1,800.00</text:p>
          </table:table-cell>
          <table:table-cell table:style-name="ce294" table:number-columns-repeated="19"/>
          <table:table-cell table:number-columns-repeated="16358"/>
        </table:table-row>
        <table:table-row table:style-name="ro24">
          <table:table-cell table:style-name="ce294" table:number-columns-repeated="2"/>
          <table:table-cell table:style-name="ce314" office:value-type="string" calcext:value-type="string">
            <text:p>• tripticos</text:p>
          </table:table-cell>
          <table:table-cell table:style-name="ce331" table:number-columns-repeated="3"/>
          <table:table-cell table:style-name="ce356"/>
          <table:table-cell table:style-name="ce294" table:number-columns-repeated="19"/>
          <table:table-cell table:number-columns-repeated="16358"/>
        </table:table-row>
        <table:table-row table:style-name="ro14">
          <table:table-cell table:style-name="ce294" table:number-columns-repeated="2"/>
          <table:table-cell table:style-name="ce315" office:value-type="string" calcext:value-type="string">
            <text:p>TOTAL</text:p>
          </table:table-cell>
          <table:table-cell table:style-name="ce332" table:number-columns-repeated="2"/>
          <table:table-cell table:style-name="ce348"/>
          <table:table-cell table:style-name="ce357" table:formula="of:=SUM([.G28:.G37])" office:value-type="currency" office:currency="S/." office:value="2400" calcext:value-type="currency">
            <text:p>S/. 2,400.00</text:p>
          </table:table-cell>
          <table:table-cell table:style-name="ce294" table:number-columns-repeated="19"/>
          <table:table-cell table:number-columns-repeated="16358"/>
        </table:table-row>
        <table:table-row table:style-name="ro4">
          <table:table-cell table:style-name="ce294" table:number-columns-repeated="2"/>
          <table:table-cell table:style-name="ce316"/>
          <table:table-cell table:style-name="ce333" table:number-columns-repeated="2"/>
          <table:table-cell table:style-name="ce294" table:number-columns-repeated="21"/>
          <table:table-cell table:number-columns-repeated="16358"/>
        </table:table-row>
        <table:table-row table:style-name="ro4" table:number-rows-repeated="961">
          <table:table-cell table:style-name="ce294" table:number-columns-repeated="26"/>
          <table:table-cell table:number-columns-repeated="16358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ostos_Unitario" table:style-name="ta10">
        <table:table-column table:style-name="co22" table:default-cell-style-name="ce368"/>
        <table:table-column table:style-name="co53" table:default-cell-style-name="ce368"/>
        <table:table-column table:style-name="co47" table:default-cell-style-name="ce368"/>
        <table:table-column table:style-name="co26" table:number-columns-repeated="20" table:default-cell-style-name="ce368"/>
        <table:table-column table:style-name="co18" table:number-columns-repeated="16361" table:default-cell-style-name="ce368"/>
        <table:table-row table:style-name="ro23">
          <table:table-cell table:number-columns-repeated="16384"/>
        </table:table-row>
        <table:table-row table:style-name="ro14">
          <table:table-cell/>
          <table:table-cell table:style-name="ce369" office:value-type="string" calcext:value-type="string" table:number-columns-spanned="2" table:number-rows-spanned="1">
            <text:p>COSTO UNITARIO: LOTE DE 3500 UNIDADES/MES</text:p>
          </table:table-cell>
          <table:covered-table-cell table:style-name="ce380"/>
          <table:table-cell table:number-columns-repeated="16381"/>
        </table:table-row>
        <table:table-row table:style-name="ro14">
          <table:table-cell/>
          <table:table-cell table:style-name="ce370"/>
          <table:table-cell table:style-name="ce381"/>
          <table:table-cell table:number-columns-repeated="16381"/>
        </table:table-row>
        <table:table-row table:style-name="ro11">
          <table:table-cell/>
          <table:table-cell table:style-name="ce371" office:value-type="string" calcext:value-type="string">
            <text:p>Costo fijo mes</text:p>
          </table:table-cell>
          <table:table-cell table:style-name="ce382" office:value-type="string" calcext:value-type="string">
            <text:p>soles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Gastos administrativos fijos</text:p>
          </table:table-cell>
          <table:table-cell table:style-name="ce383" table:formula="of:=[$Gastos_Operativos.F13]" office:value-type="float" office:value="1695" calcext:value-type="float">
            <text:p>S/1,695.00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Depreciación activo fijo</text:p>
          </table:table-cell>
          <table:table-cell table:style-name="ce384" table:formula="of:=[$Deprecion_VR.F13]/12" office:value-type="float" office:value="196.2" calcext:value-type="float">
            <text:p>S/196.20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Amortización de intangibles</text:p>
          </table:table-cell>
          <table:table-cell table:style-name="ce385" table:formula="of:=[$Inversion_Inicial.F23]/12" office:value-type="float" office:value="139.166666666667" calcext:value-type="float">
            <text:p>S/139.17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Gastos de ventas variables</text:p>
          </table:table-cell>
          <table:table-cell table:style-name="ce383" table:formula="of:=[$Gastos_Operativos.G20]" office:value-type="float" office:value="200" calcext:value-type="float">
            <text:p>S/200.00</text:p>
          </table:table-cell>
          <table:table-cell table:number-columns-repeated="16381"/>
        </table:table-row>
        <table:table-row table:style-name="ro11">
          <table:table-cell/>
          <table:table-cell table:style-name="ce373" office:value-type="string" calcext:value-type="string">
            <text:p>CIF fijos</text:p>
          </table:table-cell>
          <table:table-cell table:style-name="ce385" table:formula="of:=SUM([$Costos_Ventas.H17:.H19])" office:value-type="float" office:value="126" calcext:value-type="float">
            <text:p>S/126.00</text:p>
          </table:table-cell>
          <table:table-cell table:number-columns-repeated="16381"/>
        </table:table-row>
        <table:table-row table:style-name="ro11">
          <table:table-cell/>
          <table:table-cell table:style-name="ce374" office:value-type="string" calcext:value-type="string">
            <text:p>Total Costo Fijo</text:p>
          </table:table-cell>
          <table:table-cell table:style-name="ce386" table:formula="of:=SUM([.C5:.C9])" office:value-type="float" office:value="2356.36666666667" calcext:value-type="float">
            <text:p>S/2,356.37</text:p>
          </table:table-cell>
          <table:table-cell table:number-columns-repeated="16381"/>
        </table:table-row>
        <table:table-row table:style-name="ro11">
          <table:table-cell/>
          <table:table-cell table:style-name="ce375" office:value-type="string" calcext:value-type="string">
            <text:p>Costo variable mes</text:p>
          </table:table-cell>
          <table:table-cell table:style-name="ce387" office:value-type="string" calcext:value-type="string">
            <text:p>soles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Materia prima directa</text:p>
          </table:table-cell>
          <table:table-cell table:style-name="ce383" table:formula="of:=[$Costos_Ventas.H9]" office:value-type="float" office:value="14000" calcext:value-type="float">
            <text:p>S/14,000.00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Mano de obra directa</text:p>
          </table:table-cell>
          <table:table-cell table:style-name="ce383" table:formula="of:=[$Costos_Ventas.F21]" office:value-type="float" office:value="126" calcext:value-type="float">
            <text:p>S/126.00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CIF variables</text:p>
          </table:table-cell>
          <table:table-cell table:style-name="ce383"/>
          <table:table-cell table:number-columns-repeated="16381"/>
        </table:table-row>
        <table:table-row table:style-name="ro11">
          <table:table-cell/>
          <table:table-cell table:style-name="ce373" office:value-type="string" calcext:value-type="string">
            <text:p>Gastos operativos variables</text:p>
          </table:table-cell>
          <table:table-cell table:style-name="ce385" table:formula="of:=[$Gastos_Operativos.G21]" office:value-type="float" office:value="500" calcext:value-type="float">
            <text:p>S/500.00</text:p>
          </table:table-cell>
          <table:table-cell table:number-columns-repeated="16381"/>
        </table:table-row>
        <table:table-row table:style-name="ro11">
          <table:table-cell/>
          <table:table-cell table:style-name="ce376" office:value-type="string" calcext:value-type="string">
            <text:p>Total Costo Variable</text:p>
          </table:table-cell>
          <table:table-cell table:style-name="ce388" table:formula="of:=SUM([.C12:.C15])" office:value-type="float" office:value="14626" calcext:value-type="float">
            <text:p>S/14,626.00</text:p>
          </table:table-cell>
          <table:table-cell table:number-columns-repeated="16381"/>
        </table:table-row>
        <table:table-row table:style-name="ro25">
          <table:table-cell table:number-columns-repeated="16384"/>
        </table:table-row>
        <table:table-row table:style-name="ro11">
          <table:table-cell/>
          <table:table-cell table:style-name="ce377" office:value-type="string" calcext:value-type="string">
            <text:p>Costos Unitarios</text:p>
          </table:table-cell>
          <table:table-cell table:style-name="ce389" office:value-type="string" calcext:value-type="string">
            <text:p>soles</text:p>
          </table:table-cell>
          <table:table-cell table:number-columns-repeated="16381"/>
        </table:table-row>
        <table:table-row table:style-name="ro11">
          <table:table-cell/>
          <table:table-cell table:style-name="ce378" office:value-type="string" calcext:value-type="string">
            <text:p>Nº de Unidades</text:p>
          </table:table-cell>
          <table:table-cell table:style-name="ce390" table:formula="of:=[$Presupuesto_Ventas.$D$7]" office:value-type="float" office:value="3500" calcext:value-type="float">
            <text:p><text:s/>S/3,500.00 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Costo fijo unitario,CFU</text:p>
          </table:table-cell>
          <table:table-cell table:style-name="ce391" table:formula="of:=[.C10]/[.C19]" office:value-type="float" office:value="0.673247619047619" calcext:value-type="float">
            <text:p><text:s/>S/0.67 </text:p>
          </table:table-cell>
          <table:table-cell table:number-columns-repeated="16381"/>
        </table:table-row>
        <table:table-row table:style-name="ro11">
          <table:table-cell/>
          <table:table-cell table:style-name="ce372" office:value-type="string" calcext:value-type="string">
            <text:p>Costo variable unitario, CVU</text:p>
          </table:table-cell>
          <table:table-cell table:style-name="ce391" table:formula="of:=[.C16]/[.C19]" office:value-type="float" office:value="4.17885714285714" calcext:value-type="float">
            <text:p><text:s/>S/4.18 </text:p>
          </table:table-cell>
          <table:table-cell table:number-columns-repeated="16381"/>
        </table:table-row>
        <table:table-row table:style-name="ro11">
          <table:table-cell/>
          <table:table-cell table:style-name="ce379" office:value-type="string" calcext:value-type="string">
            <text:p>Costo total unitario, CTU</text:p>
          </table:table-cell>
          <table:table-cell table:style-name="ce392" table:formula="of:=SUM([.C20:.C21])" office:value-type="float" office:value="4.85210476190476" calcext:value-type="float">
            <text:p><text:s/>S/4.85 </text:p>
          </table:table-cell>
          <table:table-cell table:number-columns-repeated="16381"/>
        </table:table-row>
        <table:table-row table:style-name="ro4" table:number-rows-repeated="978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Punto_Equilibrio" table:style-name="ta11">
        <table:table-column table:style-name="co2" table:default-cell-style-name="ce394"/>
        <table:table-column table:style-name="co54" table:default-cell-style-name="ce394"/>
        <table:table-column table:style-name="co55" table:default-cell-style-name="ce394"/>
        <table:table-column table:style-name="co42" table:number-columns-repeated="2" table:default-cell-style-name="ce394"/>
        <table:table-column table:style-name="co31" table:default-cell-style-name="ce394"/>
        <table:table-column table:style-name="co26" table:number-columns-repeated="20" table:default-cell-style-name="ce394"/>
        <table:table-column table:style-name="co18" table:number-columns-repeated="16358" table:default-cell-style-name="ce394"/>
        <table:table-row table:style-name="ro4">
          <table:table-cell table:style-name="ce166"/>
          <table:table-cell table:number-columns-repeated="16383"/>
        </table:table-row>
        <table:table-row table:style-name="ro14">
          <table:table-cell table:style-name="ce166"/>
          <table:table-cell table:style-name="ce395"/>
          <table:table-cell table:number-columns-repeated="16382"/>
        </table:table-row>
        <table:table-row table:style-name="ro14">
          <table:table-cell table:style-name="ce166"/>
          <table:table-cell table:style-name="ce396" office:value-type="string" calcext:value-type="string" table:number-columns-spanned="5" table:number-rows-spanned="1">
            <text:p>PUNTO DE EQUILIBRIO PARA UN PRODUCTO</text:p>
          </table:table-cell>
          <table:covered-table-cell table:number-columns-repeated="3" table:style-name="ce418"/>
          <table:covered-table-cell table:style-name="ce460"/>
          <table:table-cell table:number-columns-repeated="16378"/>
        </table:table-row>
        <table:table-row table:style-name="ro14">
          <table:table-cell table:style-name="ce166"/>
          <table:table-cell table:number-columns-repeated="16383"/>
        </table:table-row>
        <table:table-row table:style-name="ro14">
          <table:table-cell table:style-name="ce166"/>
          <table:table-cell table:style-name="ce397" office:value-type="string" calcext:value-type="string">
            <text:p>PRODUCTO</text:p>
          </table:table-cell>
          <table:table-cell table:style-name="ce419" office:value-type="string" calcext:value-type="string">
            <text:p>PRECIO</text:p>
          </table:table-cell>
          <table:table-cell table:style-name="ce438" office:value-type="string" calcext:value-type="string">
            <text:p>CVU</text:p>
          </table:table-cell>
          <table:table-cell table:style-name="ce450" office:value-type="string" calcext:value-type="string">
            <text:p>MgCU</text:p>
          </table:table-cell>
          <table:table-cell table:style-name="ce461"/>
          <table:table-cell table:number-columns-repeated="16378"/>
        </table:table-row>
        <table:table-row table:style-name="ro14">
          <table:table-cell table:style-name="ce166"/>
          <table:table-cell table:style-name="ce398" office:value-type="string" calcext:value-type="string">
            <text:p>A</text:p>
          </table:table-cell>
          <table:table-cell table:style-name="ce420" table:formula="of:=[$Presupuesto_Ventas.$C$19]" office:value-type="float" office:value="6" calcext:value-type="float">
            <text:p>6.0</text:p>
          </table:table-cell>
          <table:table-cell table:style-name="ce439" table:formula="of:=[$Costos_Unitario.C21]" office:value-type="float" office:value="4.17885714285714" calcext:value-type="float">
            <text:p>4.18</text:p>
          </table:table-cell>
          <table:table-cell table:style-name="ce451" table:formula="of:=[.C6]-[.D6]" office:value-type="float" office:value="1.82114285714286" calcext:value-type="float">
            <text:p>1.82</text:p>
          </table:table-cell>
          <table:table-cell table:style-name="ce462"/>
          <table:table-cell table:number-columns-repeated="16378"/>
        </table:table-row>
        <table:table-row table:style-name="ro4">
          <table:table-cell table:style-name="ce166"/>
          <table:table-cell table:style-name="ce399" office:value-type="string" calcext:value-type="string">
            <text:p>CVU = Costo variable Unitario</text:p>
          </table:table-cell>
          <table:table-cell table:style-name="ce206"/>
          <table:table-cell table:style-name="ce440" table:number-columns-repeated="2"/>
          <table:table-cell table:style-name="ce463"/>
          <table:table-cell table:number-columns-repeated="16378"/>
        </table:table-row>
        <table:table-row table:style-name="ro4">
          <table:table-cell table:style-name="ce166"/>
          <table:table-cell table:style-name="ce399" office:value-type="string" calcext:value-type="string">
            <text:p>MgCU = Margen de Contribución Unitario</text:p>
          </table:table-cell>
          <table:table-cell table:style-name="ce206"/>
          <table:table-cell table:style-name="ce440" table:number-columns-repeated="2"/>
          <table:table-cell table:style-name="ce463"/>
          <table:table-cell table:number-columns-repeated="16378"/>
        </table:table-row>
        <table:table-row table:style-name="ro14">
          <table:table-cell table:style-name="ce236"/>
          <table:table-cell table:style-name="ce206" table:number-columns-repeated="5"/>
          <table:table-cell table:number-columns-repeated="16378"/>
        </table:table-row>
        <table:table-row table:style-name="ro14">
          <table:table-cell table:style-name="ce236"/>
          <table:table-cell table:style-name="ce400" office:value-type="string" calcext:value-type="string">
            <text:p><text:s text:c="3"/>PE =</text:p>
          </table:table-cell>
          <table:table-cell table:style-name="ce421" office:value-type="string" calcext:value-type="string">
            <text:p>CF</text:p>
          </table:table-cell>
          <table:table-cell/>
          <table:table-cell table:style-name="ce206" table:number-columns-repeated="2"/>
          <table:table-cell table:number-columns-repeated="16378"/>
        </table:table-row>
        <table:table-row table:style-name="ro14">
          <table:table-cell table:style-name="ce236"/>
          <table:table-cell table:style-name="ce401"/>
          <table:table-cell table:style-name="ce422" office:value-type="string" calcext:value-type="string">
            <text:p>MgCU</text:p>
          </table:table-cell>
          <table:table-cell table:style-name="ce206" table:number-columns-repeated="3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393"/>
          <table:table-cell table:style-name="ce206" office:value-type="string" calcext:value-type="string">
            <text:p>PE =</text:p>
          </table:table-cell>
          <table:table-cell table:style-name="ce423" table:formula="of:=[$Costos_Unitario.C10]/[$Punto_Equilibrio.E6]" office:value-type="float" office:value="1293.89446710595" calcext:value-type="float">
            <text:p>1294</text:p>
          </table:table-cell>
          <table:table-cell table:style-name="ce423" office:value-type="string" calcext:value-type="string">
            <text:p>Unidades/Mes</text:p>
          </table:table-cell>
          <table:table-cell table:style-name="ce452" table:formula="of:=[.C13]*[.C6]" office:value-type="currency" office:currency="PEN" office:value="7763.36680263571" calcext:value-type="currency">
            <text:p><text:s/>S/ 7,763.37 </text:p>
          </table:table-cell>
          <table:table-cell table:style-name="ce206" office:value-type="string" calcext:value-type="string">
            <text:p>Soles/Mes</text:p>
          </table:table-cell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201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180"/>
          <table:table-cell table:number-columns-repeated="16378"/>
        </table:table-row>
        <table:table-row table:style-name="ro14">
          <table:table-cell table:style-name="ce166"/>
          <table:table-cell table:number-columns-repeated="16383"/>
        </table:table-row>
        <table:table-row table:style-name="ro26">
          <table:table-cell table:style-name="ce166"/>
          <table:table-cell table:style-name="ce397" office:value-type="string" calcext:value-type="string">
            <text:p>PRODUCTOS</text:p>
          </table:table-cell>
          <table:table-cell table:style-name="ce424" office:value-type="string" calcext:value-type="string">
            <text:p>UNIDAD</text:p>
            <text:p>DE MEDIDA</text:p>
          </table:table-cell>
          <table:table-cell table:style-name="ce424" office:value-type="string" calcext:value-type="string">
            <text:p>CANTIDAD</text:p>
            <text:p>ANUAL</text:p>
          </table:table-cell>
          <table:table-cell table:style-name="ce424" office:value-type="string" calcext:value-type="string">
            <text:p>CANTIDAD</text:p>
            <text:p>MENSUAL</text:p>
          </table:table-cell>
          <table:table-cell table:style-name="ce464" office:value-type="string" calcext:value-type="string">
            <text:p>CANTIDAD</text:p>
            <text:p>DIARIA</text:p>
          </table:table-cell>
          <table:table-cell table:number-columns-repeated="16378"/>
        </table:table-row>
        <table:table-row table:style-name="ro23">
          <table:table-cell table:style-name="ce166"/>
          <table:table-cell table:style-name="ce402" table:formula="of:=[.B24]" office:value-type="string" office:string-value="A" calcext:value-type="string">
            <text:p>A</text:p>
          </table:table-cell>
          <table:table-cell table:style-name="ce425" office:value-type="string" calcext:value-type="string">
            <text:p>unidad</text:p>
            <text:p/>
          </table:table-cell>
          <table:table-cell table:style-name="ce441" table:formula="of:=[.C13]*12" office:value-type="float" office:value="15526.7336052714" calcext:value-type="float">
            <text:p>15527</text:p>
          </table:table-cell>
          <table:table-cell table:style-name="ce441" table:formula="of:=[.C13]" office:value-type="float" office:value="1293.89446710595" calcext:value-type="float">
            <text:p>1294</text:p>
          </table:table-cell>
          <table:table-cell table:style-name="ce465" table:formula="of:=[.C13]/30" office:value-type="float" office:value="43.1298155701984" calcext:value-type="float">
            <text:p>43</text:p>
          </table:table-cell>
          <table:table-cell table:number-columns-repeated="16378"/>
        </table:table-row>
        <table:table-row table:style-name="ro4">
          <table:table-cell table:style-name="ce166" table:number-columns-repeated="6"/>
          <table:table-cell table:number-columns-repeated="16378"/>
        </table:table-row>
        <table:table-row table:style-name="ro4">
          <table:table-cell table:style-name="ce166"/>
          <table:table-cell table:style-name="ce403"/>
          <table:table-cell table:style-name="ce206" table:number-columns-repeated="4"/>
          <table:table-cell table:number-columns-repeated="16378"/>
        </table:table-row>
        <table:table-row table:style-name="ro4">
          <table:table-cell table:style-name="ce166"/>
          <table:table-cell table:style-name="ce201" office:value-type="string" calcext:value-type="string" table:number-columns-spanned="5" table:number-rows-spanned="1">
            <text:p>PUNTO DE EQUILIBRIO EN SOLES POR PRODUCTO</text:p>
          </table:table-cell>
          <table:covered-table-cell table:number-columns-repeated="4" table:style-name="ce180"/>
          <table:table-cell table:number-columns-repeated="16378"/>
        </table:table-row>
        <table:table-row table:style-name="ro1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26">
          <table:table-cell table:style-name="ce166"/>
          <table:table-cell table:style-name="ce397" office:value-type="string" calcext:value-type="string">
            <text:p>PRODUCTOS</text:p>
          </table:table-cell>
          <table:table-cell table:style-name="ce424" office:value-type="string" calcext:value-type="string">
            <text:p>PRECIO S/.</text:p>
          </table:table-cell>
          <table:table-cell table:style-name="ce424" office:value-type="string" calcext:value-type="string">
            <text:p>TOTAL</text:p>
            <text:p>ANUALS/.</text:p>
          </table:table-cell>
          <table:table-cell table:style-name="ce424" office:value-type="string" calcext:value-type="string">
            <text:p>TOTAL</text:p>
            <text:p>MES S/.</text:p>
          </table:table-cell>
          <table:table-cell table:style-name="ce464" office:value-type="string" calcext:value-type="string">
            <text:p>TOTAL</text:p>
            <text:p>DIARIO S/.</text:p>
          </table:table-cell>
          <table:table-cell table:number-columns-repeated="16378"/>
        </table:table-row>
        <table:table-row table:style-name="ro14">
          <table:table-cell table:style-name="ce166"/>
          <table:table-cell table:style-name="ce404" office:value-type="string" calcext:value-type="string">
            <text:p>A</text:p>
          </table:table-cell>
          <table:table-cell table:style-name="ce426" table:formula="of:=[$Presupuesto_Ventas.$C$19]" office:value-type="float" office:value="6" calcext:value-type="float">
            <text:p>6.0</text:p>
          </table:table-cell>
          <table:table-cell table:style-name="ce442" table:formula="of:=+[.E13]*12" office:value-type="float" office:value="93160.4016316285" calcext:value-type="float">
            <text:p>93160.40</text:p>
          </table:table-cell>
          <table:table-cell table:style-name="ce442" table:formula="of:=[.E13]" office:value-type="float" office:value="7763.36680263571" calcext:value-type="float">
            <text:p>7763.37</text:p>
          </table:table-cell>
          <table:table-cell table:style-name="ce466" table:formula="of:=[.E13]/30" office:value-type="float" office:value="258.77889342119" calcext:value-type="float">
            <text:p>258.78</text:p>
          </table:table-cell>
          <table:table-cell table:number-columns-repeated="16378"/>
        </table:table-row>
        <table:table-row table:style-name="ro4">
          <table:table-cell table:style-name="ce166" table:number-columns-repeated="2"/>
          <table:table-cell table:style-name="ce206" table:number-columns-repeated="4"/>
          <table:table-cell table:number-columns-repeated="16378"/>
        </table:table-row>
        <table:table-row table:style-name="ro14">
          <table:table-cell table:style-name="ce166"/>
          <table:table-cell/>
          <table:table-cell table:style-name="ce206" table:number-columns-repeated="4"/>
          <table:table-cell table:number-columns-repeated="16378"/>
        </table:table-row>
        <table:table-row table:style-name="ro14">
          <table:table-cell table:style-name="ce166"/>
          <table:table-cell table:style-name="ce405" office:value-type="string" calcext:value-type="string" table:number-columns-spanned="5" table:number-rows-spanned="1">
            <text:p>PUNTO DE EQULIBRIO PARA VARIOS PRODUCTOS</text:p>
          </table:table-cell>
          <table:covered-table-cell table:number-columns-repeated="3" table:style-name="ce418"/>
          <table:covered-table-cell table:style-name="ce460"/>
          <table:table-cell table:number-columns-repeated="16378"/>
        </table:table-row>
        <table:table-row table:style-name="ro14">
          <table:table-cell table:style-name="ce166"/>
          <table:table-cell table:number-columns-repeated="16383"/>
        </table:table-row>
        <table:table-row table:style-name="ro26">
          <table:table-cell table:style-name="ce166"/>
          <table:table-cell table:style-name="ce406" office:value-type="string" calcext:value-type="string">
            <text:p>PRODUCTO</text:p>
          </table:table-cell>
          <table:table-cell table:style-name="ce427" office:value-type="string" calcext:value-type="string">
            <text:p>PRECIO</text:p>
          </table:table-cell>
          <table:table-cell table:style-name="ce427" office:value-type="string" calcext:value-type="string">
            <text:p>CVU</text:p>
          </table:table-cell>
          <table:table-cell table:style-name="ce427" office:value-type="string" calcext:value-type="string">
            <text:p>MgCU</text:p>
          </table:table-cell>
          <table:table-cell table:style-name="ce453" office:value-type="string" calcext:value-type="string">
            <text:p>% del Total</text:p>
            <text:p>Ventas</text:p>
          </table:table-cell>
          <table:table-cell table:number-columns-repeated="16378"/>
        </table:table-row>
        <table:table-row table:style-name="ro4">
          <table:table-cell table:style-name="ce166"/>
          <table:table-cell table:style-name="ce407" office:value-type="string" calcext:value-type="string">
            <text:p>A</text:p>
          </table:table-cell>
          <table:table-cell table:style-name="ce428"/>
          <table:table-cell table:style-name="ce431" table:number-columns-repeated="2"/>
          <table:table-cell table:style-name="ce467"/>
          <table:table-cell table:number-columns-repeated="16378"/>
        </table:table-row>
        <table:table-row table:style-name="ro4">
          <table:table-cell table:style-name="ce166"/>
          <table:table-cell table:style-name="ce408" office:value-type="string" calcext:value-type="string">
            <text:p>B</text:p>
          </table:table-cell>
          <table:table-cell table:style-name="ce429"/>
          <table:table-cell table:style-name="ce431" table:number-columns-repeated="2"/>
          <table:table-cell table:style-name="ce467"/>
          <table:table-cell table:number-columns-repeated="16378"/>
        </table:table-row>
        <table:table-row table:style-name="ro14">
          <table:table-cell table:style-name="ce166"/>
          <table:table-cell table:style-name="ce408" office:value-type="string" calcext:value-type="string">
            <text:p>C</text:p>
          </table:table-cell>
          <table:table-cell table:style-name="ce429"/>
          <table:table-cell table:style-name="ce431" table:number-columns-repeated="2"/>
          <table:table-cell table:style-name="ce467"/>
          <table:table-cell table:number-columns-repeated="16378"/>
        </table:table-row>
        <table:table-row table:style-name="ro14">
          <table:table-cell table:style-name="ce166"/>
          <table:table-cell table:style-name="ce409" office:value-type="string" calcext:value-type="string">
            <text:p>TOTAL</text:p>
          </table:table-cell>
          <table:table-cell table:style-name="ce430"/>
          <table:table-cell table:style-name="ce443" table:number-columns-repeated="2"/>
          <table:table-cell table:style-name="ce468"/>
          <table:table-cell table:number-columns-repeated="16378"/>
        </table:table-row>
        <table:table-row table:style-name="ro4">
          <table:table-cell table:style-name="ce166"/>
          <table:table-cell table:style-name="ce399" office:value-type="string" calcext:value-type="string">
            <text:p>CVU = Costo variable Unitario para cada producto</text:p>
          </table:table-cell>
          <table:table-cell table:style-name="ce206"/>
          <table:table-cell table:style-name="ce440" table:number-columns-repeated="2"/>
          <table:table-cell table:style-name="ce463"/>
          <table:table-cell table:number-columns-repeated="16378"/>
        </table:table-row>
        <table:table-row table:style-name="ro4">
          <table:table-cell table:style-name="ce166"/>
          <table:table-cell table:style-name="ce399" office:value-type="string" calcext:value-type="string">
            <text:p>MgCU = Margen de Contribución Unitario (PRECIO - CVU)</text:p>
          </table:table-cell>
          <table:table-cell table:style-name="ce206"/>
          <table:table-cell table:style-name="ce440" table:number-columns-repeated="2"/>
          <table:table-cell table:style-name="ce463"/>
          <table:table-cell table:number-columns-repeated="16378"/>
        </table:table-row>
        <table:table-row table:style-name="ro4">
          <table:table-cell table:style-name="ce166"/>
          <table:table-cell table:style-name="ce206" office:value-type="string" calcext:value-type="string">
            <text:p>Fuente: Elaboración ICADE</text:p>
          </table:table-cell>
          <table:table-cell table:style-name="ce206" table:number-columns-repeated="4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201" office:value-type="string" calcext:value-type="string" table:number-columns-spanned="4" table:number-rows-spanned="1">
            <text:p>MARGEN DE CONTRIBUCIÓN PROMEDIO PONDERADO</text:p>
          </table:table-cell>
          <table:covered-table-cell table:number-columns-repeated="3" table:style-name="ce180"/>
          <table:table-cell table:style-name="ce206"/>
          <table:table-cell table:number-columns-repeated="16378"/>
        </table:table-row>
        <table:table-row table:style-name="ro1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26">
          <table:table-cell table:style-name="ce166"/>
          <table:table-cell table:style-name="ce406" office:value-type="string" calcext:value-type="string">
            <text:p>PRODUCTOS</text:p>
          </table:table-cell>
          <table:table-cell table:style-name="ce427" office:value-type="string" calcext:value-type="string">
            <text:p>MgCU</text:p>
          </table:table-cell>
          <table:table-cell table:style-name="ce427" office:value-type="string" calcext:value-type="string">
            <text:p>PESO</text:p>
          </table:table-cell>
          <table:table-cell table:style-name="ce453" office:value-type="string" calcext:value-type="string">
            <text:p>MgCU (*)</text:p>
            <text:p>ponderado</text:p>
          </table:table-cell>
          <table:table-cell table:number-columns-repeated="16379"/>
        </table:table-row>
        <table:table-row table:style-name="ro4">
          <table:table-cell table:style-name="ce166"/>
          <table:table-cell table:style-name="ce410" office:value-type="string" calcext:value-type="string">
            <text:p>PIMIENTO FRESCO PRIMERA</text:p>
          </table:table-cell>
          <table:table-cell table:style-name="ce431" table:formula="of:=[.E30]" office:value-type="float" office:value="0" calcext:value-type="float">
            <text:p>0.00</text:p>
          </table:table-cell>
          <table:table-cell table:style-name="ce444" table:formula="of:=[.F30]" office:value-type="percentage" office:value="0" calcext:value-type="percentage">
            <text:p>0.0%</text:p>
          </table:table-cell>
          <table:table-cell table:style-name="ce454" table:formula="of:=[.C41]*[.D41]" office:value-type="float" office:value="0" calcext:value-type="float">
            <text:p>0.0000</text:p>
          </table:table-cell>
          <table:table-cell table:number-columns-repeated="16379"/>
        </table:table-row>
        <table:table-row table:style-name="ro4">
          <table:table-cell table:style-name="ce166"/>
          <table:table-cell table:style-name="ce411" office:value-type="string" calcext:value-type="string">
            <text:p>PIMIENTO FRESCO SEGUNDA</text:p>
          </table:table-cell>
          <table:table-cell table:style-name="ce431" table:formula="of:=[.E31]" office:value-type="float" office:value="0" calcext:value-type="float">
            <text:p>0.00</text:p>
          </table:table-cell>
          <table:table-cell table:style-name="ce444" table:formula="of:=[.F31]" office:value-type="percentage" office:value="0" calcext:value-type="percentage">
            <text:p>0.0%</text:p>
          </table:table-cell>
          <table:table-cell table:style-name="ce454" table:formula="of:=[.C42]*[.D42]" office:value-type="float" office:value="0" calcext:value-type="float">
            <text:p>0.0000</text:p>
          </table:table-cell>
          <table:table-cell table:number-columns-repeated="16379"/>
        </table:table-row>
        <table:table-row table:style-name="ro14">
          <table:table-cell table:style-name="ce166"/>
          <table:table-cell table:style-name="ce411" office:value-type="string" calcext:value-type="string">
            <text:p>PIMIENTO FRESCO TERCERA</text:p>
          </table:table-cell>
          <table:table-cell table:style-name="ce432" table:formula="of:=[.E32]" office:value-type="float" office:value="0" calcext:value-type="float">
            <text:p>0.00</text:p>
          </table:table-cell>
          <table:table-cell table:style-name="ce445" table:formula="of:=[.F32]" office:value-type="percentage" office:value="0" calcext:value-type="percentage">
            <text:p>0.0%</text:p>
          </table:table-cell>
          <table:table-cell table:style-name="ce454" table:formula="of:=[.C43]*[.D43]" office:value-type="float" office:value="0" calcext:value-type="float">
            <text:p>0.0000</text:p>
          </table:table-cell>
          <table:table-cell table:number-columns-repeated="16379"/>
        </table:table-row>
        <table:table-row table:style-name="ro14">
          <table:table-cell table:style-name="ce166"/>
          <table:table-cell table:style-name="ce224" office:value-type="string" calcext:value-type="string" table:number-columns-spanned="3" table:number-rows-spanned="1">
            <text:p>MgCU PONDERADO</text:p>
          </table:table-cell>
          <table:covered-table-cell table:style-name="ce418"/>
          <table:covered-table-cell table:style-name="ce437"/>
          <table:table-cell table:style-name="ce455" table:formula="of:=SUM([.E41:.E43])" office:value-type="float" office:value="0" calcext:value-type="float">
            <text:p>0.0000</text:p>
          </table:table-cell>
          <table:table-cell table:number-columns-repeated="16379"/>
        </table:table-row>
        <table:table-row table:style-name="ro4">
          <table:table-cell table:style-name="ce166"/>
          <table:table-cell table:style-name="ce399" office:value-type="string" calcext:value-type="string">
            <text:p>MgCU = Margen de Contribución Unitario</text:p>
          </table:table-cell>
          <table:table-cell table:style-name="ce201" table:number-columns-repeated="2"/>
          <table:table-cell table:style-name="ce456"/>
          <table:table-cell table:style-name="ce166"/>
          <table:table-cell table:number-columns-repeated="16378"/>
        </table:table-row>
        <table:table-row table:style-name="ro4">
          <table:table-cell table:style-name="ce166"/>
          <table:table-cell table:style-name="ce399" office:value-type="string" calcext:value-type="string">
            <text:p>(*) Se obtiene <text:s/>de MgCU* PESO</text:p>
          </table:table-cell>
          <table:table-cell table:style-name="ce201" table:number-columns-repeated="2"/>
          <table:table-cell table:style-name="ce456"/>
          <table:table-cell table:style-name="ce166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403" office:value-type="string" calcext:value-type="string">
            <text:p>PUNTO DE EQUILIBRIO TOTAL COMBINADO</text:p>
          </table:table-cell>
          <table:table-cell table:style-name="ce206" table:number-columns-repeated="4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14">
          <table:table-cell table:style-name="ce166"/>
          <table:table-cell table:style-name="ce412" office:value-type="string" calcext:value-type="string">
            <text:p><text:s text:c="3"/>PE =</text:p>
          </table:table-cell>
          <table:table-cell table:style-name="ce433" office:value-type="string" calcext:value-type="string">
            <text:p>CF</text:p>
          </table:table-cell>
          <table:table-cell table:style-name="ce446"/>
          <table:table-cell table:style-name="ce206" table:number-columns-repeated="2"/>
          <table:table-cell table:number-columns-repeated="16378"/>
        </table:table-row>
        <table:table-row table:style-name="ro4">
          <table:table-cell table:style-name="ce166"/>
          <table:table-cell table:style-name="ce206"/>
          <table:table-cell table:style-name="ce206" office:value-type="string" calcext:value-type="string">
            <text:p>MgCU PONDERADO</text:p>
          </table:table-cell>
          <table:table-cell table:style-name="ce206" table:number-columns-repeated="3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412" office:value-type="string" calcext:value-type="string">
            <text:p>PE =</text:p>
          </table:table-cell>
          <table:table-cell table:style-name="ce423"/>
          <table:table-cell table:style-name="ce206" office:value-type="string" calcext:value-type="string">
            <text:p>Unidades <text:s/>combinadas</text:p>
          </table:table-cell>
          <table:table-cell table:style-name="ce206" table:number-columns-repeated="2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206" office:value-type="string" calcext:value-type="string">
            <text:p>El PE se calcula en función a las veces por el peso en % de C/U</text:p>
          </table:table-cell>
          <table:table-cell table:style-name="ce423"/>
          <table:table-cell table:style-name="ce206" table:number-columns-repeated="3"/>
          <table:table-cell table:number-columns-repeated="16378"/>
        </table:table-row>
        <table:table-row table:style-name="ro4">
          <table:table-cell table:style-name="ce166"/>
          <table:table-cell table:style-name="ce403"/>
          <table:table-cell table:style-name="ce206" table:number-columns-repeated="4"/>
          <table:table-cell table:number-columns-repeated="16378"/>
        </table:table-row>
        <table:table-row table:style-name="ro4">
          <table:table-cell table:style-name="ce166"/>
          <table:table-cell table:style-name="ce413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180"/>
          <table:table-cell table:number-columns-repeated="16378"/>
        </table:table-row>
        <table:table-row table:style-name="ro1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27">
          <table:table-cell table:style-name="ce166"/>
          <table:table-cell table:style-name="ce414" office:value-type="string" calcext:value-type="string">
            <text:p>PRODUCTOS</text:p>
          </table:table-cell>
          <table:table-cell table:style-name="ce434" office:value-type="string" calcext:value-type="string">
            <text:p>UNIDAD</text:p>
            <text:p>DE MEDIDA</text:p>
          </table:table-cell>
          <table:table-cell table:style-name="ce434" office:value-type="string" calcext:value-type="string">
            <text:p>CANTIDAD ANUAL</text:p>
          </table:table-cell>
          <table:table-cell table:style-name="ce434" office:value-type="string" calcext:value-type="string">
            <text:p>CANTIDAD MENSUAL</text:p>
          </table:table-cell>
          <table:table-cell table:style-name="ce469" office:value-type="string" calcext:value-type="string">
            <text:p>CANTIDAD DIARIA</text:p>
          </table:table-cell>
          <table:table-cell table:number-columns-repeated="16378"/>
        </table:table-row>
        <table:table-row table:style-name="ro4">
          <table:table-cell table:style-name="ce166"/>
          <table:table-cell table:style-name="ce415" office:value-type="string" calcext:value-type="string">
            <text:p>A</text:p>
          </table:table-cell>
          <table:table-cell table:style-name="ce435"/>
          <table:table-cell table:style-name="ce447"/>
          <table:table-cell table:style-name="ce457" table:number-columns-repeated="2"/>
          <table:table-cell table:number-columns-repeated="16378"/>
        </table:table-row>
        <table:table-row table:style-name="ro4">
          <table:table-cell table:style-name="ce166"/>
          <table:table-cell table:style-name="ce415" office:value-type="string" calcext:value-type="string">
            <text:p>B</text:p>
          </table:table-cell>
          <table:table-cell table:style-name="ce435"/>
          <table:table-cell table:style-name="ce447"/>
          <table:table-cell table:style-name="ce457" table:number-columns-repeated="2"/>
          <table:table-cell table:number-columns-repeated="16378"/>
        </table:table-row>
        <table:table-row table:style-name="ro14">
          <table:table-cell table:style-name="ce166"/>
          <table:table-cell table:style-name="ce416" office:value-type="string" calcext:value-type="string">
            <text:p>C</text:p>
          </table:table-cell>
          <table:table-cell table:style-name="ce436"/>
          <table:table-cell table:style-name="ce448"/>
          <table:table-cell table:style-name="ce458" table:number-columns-repeated="2"/>
          <table:table-cell table:number-columns-repeated="16378"/>
        </table:table-row>
        <table:table-row table:style-name="ro14">
          <table:table-cell table:style-name="ce166"/>
          <table:table-cell table:style-name="ce417" office:value-type="string" calcext:value-type="string" table:number-columns-spanned="2" table:number-rows-spanned="1">
            <text:p>TOTAL</text:p>
          </table:table-cell>
          <table:covered-table-cell table:style-name="ce437"/>
          <table:table-cell table:style-name="ce449"/>
          <table:table-cell table:style-name="ce459"/>
          <table:table-cell table:style-name="ce470"/>
          <table:table-cell table:number-columns-repeated="16378"/>
        </table:table-row>
        <table:table-row table:style-name="ro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4">
          <table:table-cell table:style-name="ce166"/>
          <table:table-cell table:style-name="ce413" office:value-type="string" calcext:value-type="string" table:number-columns-spanned="5" table:number-rows-spanned="1">
            <text:p>PUNTO DE EQUILIBRIO EN SOLES <text:s/>POR PRODUCTO</text:p>
          </table:table-cell>
          <table:covered-table-cell table:number-columns-repeated="4" table:style-name="ce180"/>
          <table:table-cell table:number-columns-repeated="16378"/>
        </table:table-row>
        <table:table-row table:style-name="ro14">
          <table:table-cell table:style-name="ce166"/>
          <table:table-cell table:style-name="ce206" table:number-columns-repeated="5"/>
          <table:table-cell table:number-columns-repeated="16378"/>
        </table:table-row>
        <table:table-row table:style-name="ro27">
          <table:table-cell table:style-name="ce166"/>
          <table:table-cell table:style-name="ce414" office:value-type="string" calcext:value-type="string">
            <text:p>PRODUCTOS</text:p>
          </table:table-cell>
          <table:table-cell table:style-name="ce434" office:value-type="string" calcext:value-type="string">
            <text:p>PRECIO</text:p>
          </table:table-cell>
          <table:table-cell table:style-name="ce434" office:value-type="string" calcext:value-type="string">
            <text:p>SOLES POR AÑO</text:p>
          </table:table-cell>
          <table:table-cell table:style-name="ce434" office:value-type="string" calcext:value-type="string">
            <text:p>SOLES POR MES</text:p>
          </table:table-cell>
          <table:table-cell table:style-name="ce469" office:value-type="string" calcext:value-type="string">
            <text:p>SOLES POR DIA</text:p>
          </table:table-cell>
          <table:table-cell table:number-columns-repeated="16378"/>
        </table:table-row>
        <table:table-row table:style-name="ro4">
          <table:table-cell table:style-name="ce166"/>
          <table:table-cell table:style-name="ce415" office:value-type="string" calcext:value-type="string">
            <text:p>A</text:p>
          </table:table-cell>
          <table:table-cell table:style-name="ce435"/>
          <table:table-cell table:style-name="ce447"/>
          <table:table-cell table:style-name="ce457" table:number-columns-repeated="2"/>
          <table:table-cell table:number-columns-repeated="16378"/>
        </table:table-row>
        <table:table-row table:style-name="ro4">
          <table:table-cell table:style-name="ce166"/>
          <table:table-cell table:style-name="ce415" office:value-type="string" calcext:value-type="string">
            <text:p>B</text:p>
          </table:table-cell>
          <table:table-cell table:style-name="ce435"/>
          <table:table-cell table:style-name="ce447"/>
          <table:table-cell table:style-name="ce457" table:number-columns-repeated="2"/>
          <table:table-cell table:number-columns-repeated="16378"/>
        </table:table-row>
        <table:table-row table:style-name="ro14">
          <table:table-cell table:style-name="ce166"/>
          <table:table-cell table:style-name="ce416" office:value-type="string" calcext:value-type="string">
            <text:p>C</text:p>
          </table:table-cell>
          <table:table-cell table:style-name="ce436"/>
          <table:table-cell table:style-name="ce448"/>
          <table:table-cell table:style-name="ce458" table:number-columns-repeated="2"/>
          <table:table-cell table:number-columns-repeated="16378"/>
        </table:table-row>
        <table:table-row table:style-name="ro14">
          <table:table-cell table:style-name="ce166"/>
          <table:table-cell table:style-name="ce417" office:value-type="string" calcext:value-type="string" table:number-columns-spanned="2" table:number-rows-spanned="1">
            <text:p>TOTAL</text:p>
          </table:table-cell>
          <table:covered-table-cell table:style-name="ce437"/>
          <table:table-cell table:style-name="ce449"/>
          <table:table-cell table:style-name="ce459"/>
          <table:table-cell table:style-name="ce470"/>
          <table:table-cell table:number-columns-repeated="16378"/>
        </table:table-row>
        <table:table-row table:style-name="ro4" table:number-rows-repeated="929">
          <table:table-cell table:style-name="ce166"/>
          <table:table-cell table:number-columns-repeated="16383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lujo_Deuda" table:style-name="ta12">
        <table:table-column table:style-name="co1" table:number-columns-repeated="2" table:default-cell-style-name="ce471"/>
        <table:table-column table:style-name="co56" table:default-cell-style-name="ce471"/>
        <table:table-column table:style-name="co41" table:default-cell-style-name="ce471"/>
        <table:table-column table:style-name="co1" table:default-cell-style-name="ce471"/>
        <table:table-column table:style-name="co57" table:default-cell-style-name="ce471"/>
        <table:table-column table:style-name="co1" table:number-columns-repeated="16378" table:default-cell-style-name="ce471"/>
        <table:table-row table:style-name="ro16">
          <table:table-cell table:number-columns-repeated="16384"/>
        </table:table-row>
        <table:table-row table:style-name="ro28">
          <table:table-cell/>
          <table:table-cell table:style-name="ce472" office:value-type="string" calcext:value-type="string" table:number-columns-spanned="6" table:number-rows-spanned="1">
            <text:p>Tabla de Amortización de Deuda</text:p>
          </table:table-cell>
          <table:covered-table-cell table:number-columns-repeated="5" table:style-name="ce472"/>
          <table:table-cell table:number-columns-repeated="16377"/>
        </table:table-row>
        <table:table-row table:style-name="ro16">
          <table:table-cell table:number-columns-repeated="2"/>
          <table:table-cell table:style-name="ce478" office:value-type="string" calcext:value-type="string">
            <text:p>Préstamo</text:p>
          </table:table-cell>
          <table:table-cell table:style-name="ce483" table:formula="of:=[$Inversion_Inicial.H40]" office:value-type="float" office:value="8067" calcext:value-type="float">
            <text:p>8,067.00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TEA Nominal</text:p>
          </table:table-cell>
          <table:table-cell table:style-name="ce484" table:formula="of:=[$Resumen.H17]" office:value-type="percentage" office:value="0.22" calcext:value-type="percentage">
            <text:p>22 %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TEM Nominal</text:p>
          </table:table-cell>
          <table:table-cell table:style-name="ce485" table:formula="of:=POWER((1+[.D4]);(1/[.D9]))-1" office:value-type="percentage" office:value="0.0167089638731281" calcext:value-type="percentage">
            <text:p>1.7%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Inflación Anual</text:p>
          </table:table-cell>
          <table:table-cell table:style-name="ce485" office:value-type="percentage" office:value="0.029" calcext:value-type="percentage">
            <text:p>2.9%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Inflación del mes</text:p>
          </table:table-cell>
          <table:table-cell table:style-name="ce486" table:formula="of:=POWER((1+[.D6]);(1/[.D9]))-1" office:value-type="percentage" office:value="0.00238512797392709" calcext:value-type="percentage">
            <text:p>0.24 %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TEM Real</text:p>
          </table:table-cell>
          <table:table-cell table:style-name="ce486" table:formula="of:=((1+[.D5])/(1+[.D7]))-1" office:value-type="percentage" office:value="0.0142897530095574" calcext:value-type="percentage">
            <text:p>1.43 %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78" office:value-type="string" calcext:value-type="string">
            <text:p>Cuota Capital</text:p>
          </table:table-cell>
          <table:table-cell table:style-name="ce487" table:formula="of:=[.D3]/[.D9]" office:value-type="float" office:value="672.25" calcext:value-type="float">
            <text:p>672.25</text:p>
          </table:table-cell>
          <table:table-cell table:number-columns-repeated="16380"/>
        </table:table-row>
        <table:table-row table:style-name="ro16">
          <table:table-cell table:number-columns-repeated="16384"/>
        </table:table-row>
        <table:table-row table:style-name="ro16">
          <table:table-cell/>
          <table:table-cell table:style-name="ce473" office:value-type="string" calcext:value-type="string">
            <text:p>Trimestres</text:p>
          </table:table-cell>
          <table:table-cell table:style-name="ce473" office:value-type="string" calcext:value-type="string">
            <text:p>Saldo Inicial</text:p>
          </table:table-cell>
          <table:table-cell table:style-name="ce473" office:value-type="string" calcext:value-type="string">
            <text:p>Interes</text:p>
          </table:table-cell>
          <table:table-cell table:style-name="ce473" office:value-type="string" calcext:value-type="string">
            <text:p>Cuota</text:p>
          </table:table-cell>
          <table:table-cell table:style-name="ce473" office:value-type="string" calcext:value-type="string">
            <text:p>Amortizacion</text:p>
          </table:table-cell>
          <table:table-cell table:style-name="ce473" office:value-type="string" calcext:value-type="string">
            <text:p>Saldo Final</text:p>
          </table:table-cell>
          <table:table-cell table:number-columns-repeated="16377"/>
        </table:table-row>
        <table:table-row table:style-name="ro16">
          <table:table-cell/>
          <table:table-cell table:style-name="ce474" office:value-type="string" calcext:value-type="string">
            <text:p>Todo Año 1</text:p>
          </table:table-cell>
          <table:table-cell table:style-name="ce479"/>
          <table:table-cell table:style-name="ce479" table:formula="of:=SUM([.D14:.D25])" office:value-type="float" office:value="749.290343932646" calcext:value-type="float">
            <text:p>749.29</text:p>
          </table:table-cell>
          <table:table-cell table:style-name="ce479" table:formula="of:=SUM([.E14:.E25])" office:value-type="float" office:value="8067" calcext:value-type="float">
            <text:p>8,067.00</text:p>
          </table:table-cell>
          <table:table-cell table:style-name="ce479" table:formula="of:=SUM([.F14:.F25])" office:value-type="float" office:value="8816.29034393265" calcext:value-type="float">
            <text:p>8,816.29</text:p>
          </table:table-cell>
          <table:table-cell table:style-name="ce479"/>
          <table:table-cell table:number-columns-repeated="16377"/>
        </table:table-row>
        <table:table-row table:style-name="ro16">
          <table:table-cell/>
          <table:table-cell table:style-name="ce475" office:value-type="float" office:value="1" calcext:value-type="float">
            <text:p>1</text:p>
          </table:table-cell>
          <table:table-cell table:style-name="ce480" table:formula="of:=[.D3]" office:value-type="float" office:value="8067" calcext:value-type="float">
            <text:p>8,067.00</text:p>
          </table:table-cell>
          <table:table-cell table:style-name="ce480" table:formula="of:=[.C14]*[.$D$8]" office:value-type="float" office:value="115.275437528099" calcext:value-type="float">
            <text:p>115.28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4]+[.E14]" office:value-type="float" office:value="787.525437528099" calcext:value-type="float">
            <text:p>787.53</text:p>
          </table:table-cell>
          <table:table-cell table:style-name="ce480" table:formula="of:=[.C14]-[.E14]" office:value-type="float" office:value="7394.75" calcext:value-type="float">
            <text:p>7,394.7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2" calcext:value-type="float">
            <text:p>2</text:p>
          </table:table-cell>
          <table:table-cell table:style-name="ce480" table:formula="of:=[.G14]" office:value-type="float" office:value="7394.75" calcext:value-type="float">
            <text:p>7,394.75</text:p>
          </table:table-cell>
          <table:table-cell table:style-name="ce480" table:formula="of:=[.C15]*[.$D$8]" office:value-type="float" office:value="105.669151067424" calcext:value-type="float">
            <text:p>105.67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5]+[.E15]" office:value-type="float" office:value="777.919151067424" calcext:value-type="float">
            <text:p>777.92</text:p>
          </table:table-cell>
          <table:table-cell table:style-name="ce480" table:formula="of:=[.C15]-[.E15]" office:value-type="float" office:value="6722.5" calcext:value-type="float">
            <text:p>6,722.50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3" calcext:value-type="float">
            <text:p>3</text:p>
          </table:table-cell>
          <table:table-cell table:style-name="ce480" table:formula="of:=[.G15]" office:value-type="float" office:value="6722.5" calcext:value-type="float">
            <text:p>6,722.50</text:p>
          </table:table-cell>
          <table:table-cell table:style-name="ce480" table:formula="of:=[.C16]*[.$D$8]" office:value-type="float" office:value="96.0628646067494" calcext:value-type="float">
            <text:p>96.06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6]+[.E16]" office:value-type="float" office:value="768.312864606749" calcext:value-type="float">
            <text:p>768.31</text:p>
          </table:table-cell>
          <table:table-cell table:style-name="ce480" table:formula="of:=[.C16]-[.E16]" office:value-type="float" office:value="6050.25" calcext:value-type="float">
            <text:p>6,050.2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4" calcext:value-type="float">
            <text:p>4</text:p>
          </table:table-cell>
          <table:table-cell table:style-name="ce480" table:formula="of:=[.G16]" office:value-type="float" office:value="6050.25" calcext:value-type="float">
            <text:p>6,050.25</text:p>
          </table:table-cell>
          <table:table-cell table:style-name="ce480" table:formula="of:=[.C17]*[.$D$8]" office:value-type="float" office:value="86.4565781460745" calcext:value-type="float">
            <text:p>86.46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7]+[.E17]" office:value-type="float" office:value="758.706578146074" calcext:value-type="float">
            <text:p>758.71</text:p>
          </table:table-cell>
          <table:table-cell table:style-name="ce480" table:formula="of:=[.C17]-[.E17]" office:value-type="float" office:value="5378" calcext:value-type="float">
            <text:p>5,378.00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5" calcext:value-type="float">
            <text:p>5</text:p>
          </table:table-cell>
          <table:table-cell table:style-name="ce480" table:formula="of:=[.G17]" office:value-type="float" office:value="5378" calcext:value-type="float">
            <text:p>5,378.00</text:p>
          </table:table-cell>
          <table:table-cell table:style-name="ce480" table:formula="of:=[.C18]*[.$D$8]" office:value-type="float" office:value="76.8502916853995" calcext:value-type="float">
            <text:p>76.85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8]+[.E18]" office:value-type="float" office:value="749.1002916854" calcext:value-type="float">
            <text:p>749.10</text:p>
          </table:table-cell>
          <table:table-cell table:style-name="ce480" table:formula="of:=[.C18]-[.E18]" office:value-type="float" office:value="4705.75" calcext:value-type="float">
            <text:p>4,705.7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6" calcext:value-type="float">
            <text:p>6</text:p>
          </table:table-cell>
          <table:table-cell table:style-name="ce480" table:formula="of:=[.G18]" office:value-type="float" office:value="4705.75" calcext:value-type="float">
            <text:p>4,705.75</text:p>
          </table:table-cell>
          <table:table-cell table:style-name="ce480" table:formula="of:=[.C19]*[.$D$8]" office:value-type="float" office:value="67.2440052247246" calcext:value-type="float">
            <text:p>67.24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19]+[.E19]" office:value-type="float" office:value="739.494005224725" calcext:value-type="float">
            <text:p>739.49</text:p>
          </table:table-cell>
          <table:table-cell table:style-name="ce480" table:formula="of:=[.C19]-[.E19]" office:value-type="float" office:value="4033.5" calcext:value-type="float">
            <text:p>4,033.50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7" calcext:value-type="float">
            <text:p>7</text:p>
          </table:table-cell>
          <table:table-cell table:style-name="ce480" table:formula="of:=[.G19]" office:value-type="float" office:value="4033.5" calcext:value-type="float">
            <text:p>4,033.50</text:p>
          </table:table-cell>
          <table:table-cell table:style-name="ce480" table:formula="of:=[.C20]*[.$D$8]" office:value-type="float" office:value="57.6377187640497" calcext:value-type="float">
            <text:p>57.64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0]+[.E20]" office:value-type="float" office:value="729.88771876405" calcext:value-type="float">
            <text:p>729.89</text:p>
          </table:table-cell>
          <table:table-cell table:style-name="ce480" table:formula="of:=[.C20]-[.E20]" office:value-type="float" office:value="3361.25" calcext:value-type="float">
            <text:p>3,361.2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8" calcext:value-type="float">
            <text:p>8</text:p>
          </table:table-cell>
          <table:table-cell table:style-name="ce480" table:formula="of:=[.G20]" office:value-type="float" office:value="3361.25" calcext:value-type="float">
            <text:p>3,361.25</text:p>
          </table:table-cell>
          <table:table-cell table:style-name="ce480" table:formula="of:=[.C21]*[.$D$8]" office:value-type="float" office:value="48.0314323033747" calcext:value-type="float">
            <text:p>48.03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1]+[.E21]" office:value-type="float" office:value="720.281432303375" calcext:value-type="float">
            <text:p>720.28</text:p>
          </table:table-cell>
          <table:table-cell table:style-name="ce480" table:formula="of:=[.C21]-[.E21]" office:value-type="float" office:value="2689" calcext:value-type="float">
            <text:p>2,689.00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9" calcext:value-type="float">
            <text:p>9</text:p>
          </table:table-cell>
          <table:table-cell table:style-name="ce480" table:formula="of:=[.G21]" office:value-type="float" office:value="2689" calcext:value-type="float">
            <text:p>2,689.00</text:p>
          </table:table-cell>
          <table:table-cell table:style-name="ce480" table:formula="of:=[.C22]*[.$D$8]" office:value-type="float" office:value="38.4251458426998" calcext:value-type="float">
            <text:p>38.43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2]+[.E22]" office:value-type="float" office:value="710.6751458427" calcext:value-type="float">
            <text:p>710.68</text:p>
          </table:table-cell>
          <table:table-cell table:style-name="ce480" table:formula="of:=[.C22]-[.E22]" office:value-type="float" office:value="2016.75" calcext:value-type="float">
            <text:p>2,016.7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10" calcext:value-type="float">
            <text:p>10</text:p>
          </table:table-cell>
          <table:table-cell table:style-name="ce480" table:formula="of:=[.G22]" office:value-type="float" office:value="2016.75" calcext:value-type="float">
            <text:p>2,016.75</text:p>
          </table:table-cell>
          <table:table-cell table:style-name="ce480" table:formula="of:=[.C23]*[.$D$8]" office:value-type="float" office:value="28.8188593820248" calcext:value-type="float">
            <text:p>28.82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3]+[.E23]" office:value-type="float" office:value="701.068859382025" calcext:value-type="float">
            <text:p>701.07</text:p>
          </table:table-cell>
          <table:table-cell table:style-name="ce480" table:formula="of:=[.C23]-[.E23]" office:value-type="float" office:value="1344.5" calcext:value-type="float">
            <text:p>1,344.50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11" calcext:value-type="float">
            <text:p>11</text:p>
          </table:table-cell>
          <table:table-cell table:style-name="ce480" table:formula="of:=[.G23]" office:value-type="float" office:value="1344.5" calcext:value-type="float">
            <text:p>1,344.50</text:p>
          </table:table-cell>
          <table:table-cell table:style-name="ce480" table:formula="of:=[.C24]*[.$D$8]" office:value-type="float" office:value="19.2125729213499" calcext:value-type="float">
            <text:p>19.21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4]+[.E24]" office:value-type="float" office:value="691.46257292135" calcext:value-type="float">
            <text:p>691.46</text:p>
          </table:table-cell>
          <table:table-cell table:style-name="ce480" table:formula="of:=[.C24]-[.E24]" office:value-type="float" office:value="672.25" calcext:value-type="float">
            <text:p>672.25</text:p>
          </table:table-cell>
          <table:table-cell table:number-columns-repeated="16377"/>
        </table:table-row>
        <table:table-row table:style-name="ro16">
          <table:table-cell/>
          <table:table-cell table:style-name="ce475" office:value-type="float" office:value="12" calcext:value-type="float">
            <text:p>12</text:p>
          </table:table-cell>
          <table:table-cell table:style-name="ce480" table:formula="of:=[.G24]" office:value-type="float" office:value="672.25" calcext:value-type="float">
            <text:p>672.25</text:p>
          </table:table-cell>
          <table:table-cell table:style-name="ce480" table:formula="of:=[.C25]*[.$D$8]" office:value-type="float" office:value="9.60628646067494" calcext:value-type="float">
            <text:p>9.61</text:p>
          </table:table-cell>
          <table:table-cell table:style-name="ce480" table:formula="of:=[.$D$10]" office:value-type="float" office:value="672.25" calcext:value-type="float">
            <text:p>672.25</text:p>
          </table:table-cell>
          <table:table-cell table:style-name="ce480" table:formula="of:=[.D25]+[.E25]" office:value-type="float" office:value="681.856286460675" calcext:value-type="float">
            <text:p>681.86</text:p>
          </table:table-cell>
          <table:table-cell table:style-name="ce480" table:formula="of:=[.C25]-[.E25]" office:value-type="float" office:value="0" calcext:value-type="float">
            <text:p>0.00</text:p>
          </table:table-cell>
          <table:table-cell table:number-columns-repeated="16377"/>
        </table:table-row>
        <table:table-row table:style-name="ro16">
          <table:table-cell/>
          <table:table-cell table:style-name="ce476" office:value-type="string" calcext:value-type="string">
            <text:p>TOTAL</text:p>
          </table:table-cell>
          <table:table-cell table:style-name="ce481"/>
          <table:table-cell table:style-name="ce481" table:formula="of:=SUM([.D14:.D25])" office:value-type="float" office:value="749.290343932646" calcext:value-type="float">
            <text:p>749.29</text:p>
          </table:table-cell>
          <table:table-cell table:style-name="ce481" table:formula="of:=SUM([.E14:.E25])" office:value-type="float" office:value="8067" calcext:value-type="float">
            <text:p>8,067.00</text:p>
          </table:table-cell>
          <table:table-cell table:style-name="ce481" table:formula="of:=[.D26]+[.E26]" office:value-type="float" office:value="8816.29034393265" calcext:value-type="float">
            <text:p>8,816.29</text:p>
          </table:table-cell>
          <table:table-cell table:style-name="ce481"/>
          <table:table-cell table:number-columns-repeated="16377"/>
        </table:table-row>
        <table:table-row table:style-name="ro16" table:number-rows-repeated="47">
          <table:table-cell/>
          <table:table-cell table:style-name="ce477"/>
          <table:table-cell table:style-name="ce482" table:number-columns-repeated="5"/>
          <table:table-cell table:number-columns-repeated="16377"/>
        </table:table-row>
        <table:table-row table:style-name="ro16" table:number-rows-repeated="1048502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Estado_Resultados" table:style-name="ta13">
        <table:table-column table:style-name="co26" table:default-cell-style-name="ce488"/>
        <table:table-column table:style-name="co8" table:default-cell-style-name="ce488"/>
        <table:table-column table:style-name="co58" table:default-cell-style-name="ce488"/>
        <table:table-column table:style-name="co33" table:default-cell-style-name="ce488"/>
        <table:table-column table:style-name="co42" table:default-cell-style-name="ce488"/>
        <table:table-column table:style-name="co59" table:default-cell-style-name="ce488"/>
        <table:table-column table:style-name="co48" table:number-columns-repeated="2" table:default-cell-style-name="ce488"/>
        <table:table-column table:style-name="co26" table:default-cell-style-name="ce488"/>
        <table:table-column table:style-name="co60" table:default-cell-style-name="ce488"/>
        <table:table-column table:style-name="co13" table:number-columns-repeated="4" table:default-cell-style-name="ce488"/>
        <table:table-column table:style-name="co26" table:number-columns-repeated="12" table:default-cell-style-name="ce488"/>
        <table:table-column table:style-name="co18" table:number-columns-repeated="16358" table:default-cell-style-name="ce488"/>
        <table:table-row table:style-name="ro14">
          <table:table-cell/>
          <table:table-cell table:style-name="ce403"/>
          <table:table-cell table:style-name="ce201" table:number-columns-spanned="6" table:number-rows-spanned="1"/>
          <table:covered-table-cell table:number-columns-repeated="5"/>
          <table:table-cell table:number-columns-repeated="16376"/>
        </table:table-row>
        <table:table-row table:style-name="ro14">
          <table:table-cell/>
          <table:table-cell table:style-name="ce206"/>
          <table:table-cell table:style-name="ce489" office:value-type="string" calcext:value-type="string" table:number-columns-spanned="6" table:number-rows-spanned="1">
            <text:p>ESTADO DE RESULTADOS</text:p>
          </table:table-cell>
          <table:covered-table-cell table:number-columns-repeated="4" table:style-name="ce493"/>
          <table:covered-table-cell table:style-name="ce504"/>
          <table:table-cell table:number-columns-repeated="16376"/>
        </table:table-row>
        <table:table-row table:style-name="ro4">
          <table:table-cell/>
          <table:table-cell table:style-name="ce206" table:number-columns-repeated="7"/>
          <table:table-cell table:number-columns-repeated="16376"/>
        </table:table-row>
        <table:table-row table:style-name="ro4">
          <table:table-cell/>
          <table:table-cell table:style-name="ce206"/>
          <table:table-cell table:style-name="ce201" office:value-type="string" calcext:value-type="string" table:number-columns-spanned="6" table:number-rows-spanned="1">
            <text:p>REGIMEN ESPECIAL</text:p>
          </table:table-cell>
          <table:covered-table-cell table:number-columns-repeated="5" table:style-name="ce494"/>
          <table:table-cell table:number-columns-repeated="16376"/>
        </table:table-row>
        <table:table-row table:style-name="ro14">
          <table:table-cell table:number-columns-repeated="2"/>
          <table:table-cell table:style-name="ce206" table:number-columns-repeated="6"/>
          <table:table-cell table:number-columns-repeated="16376"/>
        </table:table-row>
        <table:table-row table:style-name="ro14">
          <table:table-cell table:number-columns-repeated="2"/>
          <table:table-cell table:style-name="ce490" office:value-type="string" calcext:value-type="string">
            <text:p>RUBRO</text:p>
          </table:table-cell>
          <table:table-cell table:style-name="ce495" office:value-type="float" office:value="1" calcext:value-type="float">
            <text:p>1</text:p>
          </table:table-cell>
          <table:table-cell table:style-name="ce495" table:formula="of:=1+[.D6]" office:value-type="float" office:value="2" calcext:value-type="float">
            <text:p>2</text:p>
          </table:table-cell>
          <table:table-cell table:style-name="ce495" table:formula="of:=1+[.E6]" office:value-type="float" office:value="3" calcext:value-type="float">
            <text:p>3</text:p>
          </table:table-cell>
          <table:table-cell table:style-name="ce495" table:formula="of:=1+[.F6]" office:value-type="float" office:value="4" calcext:value-type="float">
            <text:p>4</text:p>
          </table:table-cell>
          <table:table-cell table:style-name="ce495" table:formula="of:=1+[.G6]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491" office:value-type="string" calcext:value-type="string">
            <text:p>Ventas con IGV</text:p>
          </table:table-cell>
          <table:table-cell table:style-name="ce496" table:formula="of:=[$Presupuesto_Ventas.P19]" office:value-type="currency" office:currency="PEN" office:value="285007" calcext:value-type="currency">
            <text:p><text:s/>S/ 285,007 </text:p>
          </table:table-cell>
          <table:table-cell table:style-name="ce496" table:formula="of:=[$Presupuesto_Ventas.P20]" office:value-type="currency" office:currency="PEN" office:value="299258" calcext:value-type="currency">
            <text:p><text:s/>S/ 299,258 </text:p>
          </table:table-cell>
          <table:table-cell table:style-name="ce496" table:formula="of:=[$Presupuesto_Ventas.P21]" office:value-type="currency" office:currency="PEN" office:value="314221.5" calcext:value-type="currency">
            <text:p><text:s/>S/ 314,222 </text:p>
          </table:table-cell>
          <table:table-cell table:style-name="ce496" table:formula="of:=[$Presupuesto_Ventas.P22]" office:value-type="currency" office:currency="PEN" office:value="329933.125" calcext:value-type="currency">
            <text:p><text:s/>S/ 329,933 </text:p>
          </table:table-cell>
          <table:table-cell table:style-name="ce505" table:formula="of:=[$Presupuesto_Ventas.P23]" office:value-type="currency" office:currency="PEN" office:value="346430.28125" calcext:value-type="currency">
            <text:p><text:s/>S/ 346,430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0" office:value-type="string" calcext:value-type="string">
            <text:p>Ventas Netas (sin IGV)</text:p>
          </table:table-cell>
          <table:table-cell table:style-name="ce497" table:formula="of:=[.D7]-[.D7]*0.18" office:value-type="currency" office:currency="PEN" office:value="233705.74" calcext:value-type="currency">
            <text:p><text:s/>S/ 233,706 </text:p>
          </table:table-cell>
          <table:table-cell table:style-name="ce497" table:formula="of:=[.E7]-[.E7]*0.18" office:value-type="currency" office:currency="PEN" office:value="245391.56" calcext:value-type="currency">
            <text:p><text:s/>S/ 245,392 </text:p>
          </table:table-cell>
          <table:table-cell table:style-name="ce497" table:formula="of:=[.F7]-[.F7]*0.18" office:value-type="currency" office:currency="PEN" office:value="257661.63" calcext:value-type="currency">
            <text:p><text:s/>S/ 257,662 </text:p>
          </table:table-cell>
          <table:table-cell table:style-name="ce497" table:formula="of:=[.G7]-[.G7]*0.18" office:value-type="currency" office:currency="PEN" office:value="270545.1625" calcext:value-type="currency">
            <text:p><text:s/>S/ 270,545 </text:p>
          </table:table-cell>
          <table:table-cell table:style-name="ce497" table:formula="of:=[.H7]-[.H7]*0.18" office:value-type="currency" office:currency="PEN" office:value="284072.830625" calcext:value-type="currency">
            <text:p><text:s/>S/ 284,073 </text:p>
          </table:table-cell>
          <table:table-cell/>
          <table:table-cell table:style-name="ce507"/>
          <table:table-cell table:number-columns-repeated="16374"/>
        </table:table-row>
        <table:table-row table:style-name="ro4">
          <table:table-cell table:number-columns-repeated="2"/>
          <table:table-cell table:style-name="ce210" office:value-type="string" calcext:value-type="string">
            <text:p>(-) Costo de ventas</text:p>
          </table:table-cell>
          <table:table-cell table:style-name="ce497" table:formula="of:=[$Costos_Ventas.D28]" office:value-type="currency" office:currency="PEN" office:value="190000" calcext:value-type="currency">
            <text:p><text:s/>S/ 190,000 </text:p>
          </table:table-cell>
          <table:table-cell table:style-name="ce497" table:formula="of:=[$Costos_Ventas.E28]" office:value-type="currency" office:currency="PEN" office:value="199500" calcext:value-type="currency">
            <text:p><text:s/>S/ 199,500 </text:p>
          </table:table-cell>
          <table:table-cell table:style-name="ce497" table:formula="of:=[$Costos_Ventas.F28]" office:value-type="currency" office:currency="PEN" office:value="209475" calcext:value-type="currency">
            <text:p><text:s/>S/ 209,475 </text:p>
          </table:table-cell>
          <table:table-cell table:style-name="ce497" table:formula="of:=[$Costos_Ventas.G28]" office:value-type="currency" office:currency="PEN" office:value="219948.75" calcext:value-type="currency">
            <text:p><text:s/>S/ 219,949 </text:p>
          </table:table-cell>
          <table:table-cell table:style-name="ce497" table:formula="of:=[$Costos_Ventas.H28]" office:value-type="currency" office:currency="PEN" office:value="230946.1875" calcext:value-type="currency">
            <text:p><text:s/>S/ 230,946 </text:p>
          </table:table-cell>
          <table:table-cell/>
          <table:table-cell table:style-name="ce507"/>
          <table:table-cell table:number-columns-repeated="16374"/>
        </table:table-row>
        <table:table-row table:style-name="ro4">
          <table:table-cell table:number-columns-repeated="2"/>
          <table:table-cell table:style-name="ce210" office:value-type="string" calcext:value-type="string">
            <text:p>Depreciacion Activo Fijo</text:p>
          </table:table-cell>
          <table:table-cell table:style-name="ce498" table:formula="of:=[$Deprecion_VR.$F$13]" office:value-type="float" office:value="2354.4" calcext:value-type="float">
            <text:p>2354</text:p>
          </table:table-cell>
          <table:table-cell table:style-name="ce498" table:formula="of:=[$Deprecion_VR.$F$13]" office:value-type="float" office:value="2354.4" calcext:value-type="float">
            <text:p>2354</text:p>
          </table:table-cell>
          <table:table-cell table:style-name="ce498" table:formula="of:=[$Deprecion_VR.$F$13]" office:value-type="float" office:value="2354.4" calcext:value-type="float">
            <text:p>2354</text:p>
          </table:table-cell>
          <table:table-cell table:style-name="ce498" table:formula="of:=[$Deprecion_VR.$F$13]" office:value-type="float" office:value="2354.4" calcext:value-type="float">
            <text:p>2354</text:p>
          </table:table-cell>
          <table:table-cell table:style-name="ce498" table:formula="of:=[$Deprecion_VR.$F$13]" office:value-type="float" office:value="2354.4" calcext:value-type="float">
            <text:p>2354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1" office:value-type="string" calcext:value-type="string">
            <text:p>Utilidad Bruta</text:p>
          </table:table-cell>
          <table:table-cell table:style-name="ce499" table:formula="of:=[.D7]-[.D9]-[.D10]" office:value-type="currency" office:currency="PEN" office:value="92652.6" calcext:value-type="currency">
            <text:p><text:s/>S/ 92,653 </text:p>
          </table:table-cell>
          <table:table-cell table:style-name="ce499" table:formula="of:=[.E7]-[.E9]-[.E10]" office:value-type="currency" office:currency="PEN" office:value="97403.6" calcext:value-type="currency">
            <text:p><text:s/>S/ 97,404 </text:p>
          </table:table-cell>
          <table:table-cell table:style-name="ce499" table:formula="of:=[.F7]-[.F9]-[.F10]" office:value-type="currency" office:currency="PEN" office:value="102392.1" calcext:value-type="currency">
            <text:p><text:s/>S/ 102,392 </text:p>
          </table:table-cell>
          <table:table-cell table:style-name="ce499" table:formula="of:=[.G7]-[.G9]-[.G10]" office:value-type="currency" office:currency="PEN" office:value="107629.975" calcext:value-type="currency">
            <text:p><text:s/>S/ 107,630 </text:p>
          </table:table-cell>
          <table:table-cell table:style-name="ce499" table:formula="of:=[.H7]-[.H9]-[.H10]" office:value-type="currency" office:currency="PEN" office:value="113129.69375" calcext:value-type="currency">
            <text:p><text:s/>S/ 113,130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0" office:value-type="string" calcext:value-type="string">
            <text:p>(-) Gastos operativos</text:p>
          </table:table-cell>
          <table:table-cell table:style-name="ce497" table:formula="of:=[$Gastos_Operativos.$H$21]*12" office:value-type="currency" office:currency="PEN" office:value="75480" calcext:value-type="currency">
            <text:p><text:s/>S/ 75,480 </text:p>
          </table:table-cell>
          <table:table-cell table:style-name="ce497" table:formula="of:=[$Gastos_Operativos.$H$21]*12" office:value-type="currency" office:currency="PEN" office:value="75480" calcext:value-type="currency">
            <text:p><text:s/>S/ 75,480 </text:p>
          </table:table-cell>
          <table:table-cell table:style-name="ce497" table:formula="of:=[$Gastos_Operativos.$H$21]*12" office:value-type="currency" office:currency="PEN" office:value="75480" calcext:value-type="currency">
            <text:p><text:s/>S/ 75,480 </text:p>
          </table:table-cell>
          <table:table-cell table:style-name="ce497" table:formula="of:=[$Gastos_Operativos.$H$21]*12" office:value-type="currency" office:currency="PEN" office:value="75480" calcext:value-type="currency">
            <text:p><text:s/>S/ 75,480 </text:p>
          </table:table-cell>
          <table:table-cell table:style-name="ce497" table:formula="of:=[$Gastos_Operativos.$H$21]*12" office:value-type="currency" office:currency="PEN" office:value="75480" calcext:value-type="currency">
            <text:p><text:s/>S/ 75,480 </text:p>
          </table:table-cell>
          <table:table-cell table:number-columns-repeated="2"/>
          <table:table-cell table:style-name="ce403"/>
          <table:table-cell table:number-columns-repeated="16373"/>
        </table:table-row>
        <table:table-row table:style-name="ro4">
          <table:table-cell table:number-columns-repeated="2"/>
          <table:table-cell table:style-name="ce210" office:value-type="string" calcext:value-type="string">
            <text:p>Gastos administrativos</text:p>
          </table:table-cell>
          <table:table-cell table:style-name="ce500" table:formula="of:=[$Gastos_Operativos.$H$13]*12" office:value-type="currency" office:currency="PEN" office:value="20940" calcext:value-type="currency">
            <text:p><text:s/>S/ 20,940 </text:p>
          </table:table-cell>
          <table:table-cell table:style-name="ce500" table:formula="of:=[$Gastos_Operativos.$H$13]*12" office:value-type="currency" office:currency="PEN" office:value="20940" calcext:value-type="currency">
            <text:p><text:s/>S/ 20,940 </text:p>
          </table:table-cell>
          <table:table-cell table:style-name="ce500" table:formula="of:=[$Gastos_Operativos.$H$13]*12" office:value-type="currency" office:currency="PEN" office:value="20940" calcext:value-type="currency">
            <text:p><text:s/>S/ 20,940 </text:p>
          </table:table-cell>
          <table:table-cell table:style-name="ce500" table:formula="of:=[$Gastos_Operativos.$H$13]*12" office:value-type="currency" office:currency="PEN" office:value="20940" calcext:value-type="currency">
            <text:p><text:s/>S/ 20,940 </text:p>
          </table:table-cell>
          <table:table-cell table:style-name="ce500" table:formula="of:=[$Gastos_Operativos.$H$13]*12" office:value-type="currency" office:currency="PEN" office:value="20940" calcext:value-type="currency">
            <text:p><text:s/>S/ 20,940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0" office:value-type="string" calcext:value-type="string">
            <text:p>Gastos de ventas</text:p>
          </table:table-cell>
          <table:table-cell table:style-name="ce497" table:formula="of:=[$Gastos_Operativos.$H$20]*12" office:value-type="currency" office:currency="PEN" office:value="54540" calcext:value-type="currency">
            <text:p><text:s/>S/ 54,540 </text:p>
          </table:table-cell>
          <table:table-cell table:style-name="ce497" table:formula="of:=[$Gastos_Operativos.$H$20]*12" office:value-type="currency" office:currency="PEN" office:value="54540" calcext:value-type="currency">
            <text:p><text:s/>S/ 54,540 </text:p>
          </table:table-cell>
          <table:table-cell table:style-name="ce497" table:formula="of:=[$Gastos_Operativos.$H$20]*12" office:value-type="currency" office:currency="PEN" office:value="54540" calcext:value-type="currency">
            <text:p><text:s/>S/ 54,540 </text:p>
          </table:table-cell>
          <table:table-cell table:style-name="ce497" table:formula="of:=[$Gastos_Operativos.$H$20]*12" office:value-type="currency" office:currency="PEN" office:value="54540" calcext:value-type="currency">
            <text:p><text:s/>S/ 54,540 </text:p>
          </table:table-cell>
          <table:table-cell table:style-name="ce497" table:formula="of:=[$Gastos_Operativos.$H$20]*12" office:value-type="currency" office:currency="PEN" office:value="54540" calcext:value-type="currency">
            <text:p><text:s/>S/ 54,540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0" office:value-type="string" calcext:value-type="string">
            <text:p>Amortizacion de intangibles</text:p>
          </table:table-cell>
          <table:table-cell table:style-name="ce497" table:formula="of:=[$Inversion_Inicial.$F$23]/5" office:value-type="currency" office:currency="PEN" office:value="334" calcext:value-type="currency">
            <text:p><text:s/>S/ 334 </text:p>
          </table:table-cell>
          <table:table-cell table:style-name="ce497" table:formula="of:=[$Inversion_Inicial.$F$23]/5" office:value-type="currency" office:currency="PEN" office:value="334" calcext:value-type="currency">
            <text:p><text:s/>S/ 334 </text:p>
          </table:table-cell>
          <table:table-cell table:style-name="ce497" table:formula="of:=[$Inversion_Inicial.$F$23]/5" office:value-type="currency" office:currency="PEN" office:value="334" calcext:value-type="currency">
            <text:p><text:s/>S/ 334 </text:p>
          </table:table-cell>
          <table:table-cell table:style-name="ce497" table:formula="of:=[$Inversion_Inicial.$F$23]/5" office:value-type="currency" office:currency="PEN" office:value="334" calcext:value-type="currency">
            <text:p><text:s/>S/ 334 </text:p>
          </table:table-cell>
          <table:table-cell table:style-name="ce497" table:formula="of:=[$Inversion_Inicial.$F$23]/5" office:value-type="currency" office:currency="PEN" office:value="334" calcext:value-type="currency">
            <text:p><text:s/>S/ 334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1" office:value-type="string" calcext:value-type="string">
            <text:p>Utilidad Operativa</text:p>
          </table:table-cell>
          <table:table-cell table:style-name="ce499" table:formula="of:=[.D11]-[.D12]-[.D15]" office:value-type="currency" office:currency="PEN" office:value="16838.6" calcext:value-type="currency">
            <text:p><text:s/>S/ 16,839 </text:p>
          </table:table-cell>
          <table:table-cell table:style-name="ce499" table:formula="of:=[.E11]-[.E12]-[.E15]" office:value-type="currency" office:currency="PEN" office:value="21589.6" calcext:value-type="currency">
            <text:p><text:s/>S/ 21,590 </text:p>
          </table:table-cell>
          <table:table-cell table:style-name="ce499" table:formula="of:=[.F11]-[.F12]-[.F15]" office:value-type="currency" office:currency="PEN" office:value="26578.1" calcext:value-type="currency">
            <text:p><text:s/>S/ 26,578 </text:p>
          </table:table-cell>
          <table:table-cell table:style-name="ce499" table:formula="of:=[.G11]-[.G12]-[.G15]" office:value-type="currency" office:currency="PEN" office:value="31815.975" calcext:value-type="currency">
            <text:p><text:s/>S/ 31,816 </text:p>
          </table:table-cell>
          <table:table-cell table:style-name="ce499" table:formula="of:=[.H11]-[.H12]-[.H15]" office:value-type="currency" office:currency="PEN" office:value="37315.69375" calcext:value-type="currency">
            <text:p><text:s/>S/ 37,316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0" office:value-type="string" calcext:value-type="string">
            <text:p>Intereses</text:p>
          </table:table-cell>
          <table:table-cell table:style-name="ce501" table:formula="of:=[$Flujo_Deuda.$D$26]" office:value-type="currency" office:currency="PEN" office:value="749.290343932646" calcext:value-type="currency">
            <text:p><text:s/>S/ 749 </text:p>
          </table:table-cell>
          <table:table-cell table:style-name="ce501" table:formula="of:=[$Flujo_Deuda.$D$26]" office:value-type="currency" office:currency="PEN" office:value="749.290343932646" calcext:value-type="currency">
            <text:p><text:s/>S/ 749 </text:p>
          </table:table-cell>
          <table:table-cell table:style-name="ce501" table:formula="of:=[$Flujo_Deuda.$D$26]" office:value-type="currency" office:currency="PEN" office:value="749.290343932646" calcext:value-type="currency">
            <text:p><text:s/>S/ 749 </text:p>
          </table:table-cell>
          <table:table-cell table:style-name="ce501" table:formula="of:=[$Flujo_Deuda.$D$26]" office:value-type="currency" office:currency="PEN" office:value="749.290343932646" calcext:value-type="currency">
            <text:p><text:s/>S/ 749 </text:p>
          </table:table-cell>
          <table:table-cell table:style-name="ce501" table:formula="of:=[$Flujo_Deuda.$D$26]" office:value-type="currency" office:currency="PEN" office:value="749.290343932646" calcext:value-type="currency">
            <text:p><text:s/>S/ 749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11" office:value-type="string" calcext:value-type="string">
            <text:p>Utilidad antes de impuestos</text:p>
          </table:table-cell>
          <table:table-cell table:style-name="ce499" table:formula="of:=[.D16]-[.D17]" office:value-type="currency" office:currency="PEN" office:value="16089.3096560674" calcext:value-type="currency">
            <text:p><text:s/>S/ 16,089 </text:p>
          </table:table-cell>
          <table:table-cell table:style-name="ce499" table:formula="of:=[.E16]" office:value-type="currency" office:currency="PEN" office:value="21589.6" calcext:value-type="currency">
            <text:p><text:s/>S/ 21,590 </text:p>
          </table:table-cell>
          <table:table-cell table:style-name="ce499" table:formula="of:=[.F16]" office:value-type="currency" office:currency="PEN" office:value="26578.1" calcext:value-type="currency">
            <text:p><text:s/>S/ 26,578 </text:p>
          </table:table-cell>
          <table:table-cell table:style-name="ce499" table:formula="of:=[.G16]" office:value-type="currency" office:currency="PEN" office:value="31815.975" calcext:value-type="currency">
            <text:p><text:s/>S/ 31,816 </text:p>
          </table:table-cell>
          <table:table-cell table:style-name="ce499" table:formula="of:=[.H16]" office:value-type="currency" office:currency="PEN" office:value="37315.69375" calcext:value-type="currency">
            <text:p><text:s/>S/ 37,316 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217" office:value-type="string" calcext:value-type="string">
            <text:p>Impuesto a la renta (*)</text:p>
          </table:table-cell>
          <table:table-cell table:style-name="ce502" table:formula="of:=[.D8]*[$Resumen.$H$18]" office:value-type="currency" office:currency="PEN" office:value="3505.5861" calcext:value-type="currency">
            <text:p><text:s/>S/ 3,506 </text:p>
          </table:table-cell>
          <table:table-cell table:style-name="ce502" table:formula="of:=[.E8]*[$Resumen.$H$18]" office:value-type="currency" office:currency="PEN" office:value="3680.8734" calcext:value-type="currency">
            <text:p><text:s/>S/ 3,681 </text:p>
          </table:table-cell>
          <table:table-cell table:style-name="ce502" table:formula="of:=[.F8]*[$Resumen.$H$18]" office:value-type="currency" office:currency="PEN" office:value="3864.92445" calcext:value-type="currency">
            <text:p><text:s/>S/ 3,865 </text:p>
          </table:table-cell>
          <table:table-cell table:style-name="ce502" table:formula="of:=[.G8]*[$Resumen.$H$18]" office:value-type="currency" office:currency="PEN" office:value="4058.1774375" calcext:value-type="currency">
            <text:p><text:s/>S/ 4,058 </text:p>
          </table:table-cell>
          <table:table-cell table:style-name="ce502" table:formula="of:=[.H8]*[$Resumen.$H$18]" office:value-type="currency" office:currency="PEN" office:value="4261.092459375" calcext:value-type="currency">
            <text:p><text:s/>S/ 4,261 </text:p>
          </table:table-cell>
          <table:table-cell table:style-name="ce506"/>
          <table:table-cell table:number-columns-repeated="16375"/>
        </table:table-row>
        <table:table-row table:style-name="ro14">
          <table:table-cell table:number-columns-repeated="2"/>
          <table:table-cell table:style-name="ce492" office:value-type="string" calcext:value-type="string">
            <text:p>Utilidad Neta</text:p>
          </table:table-cell>
          <table:table-cell table:style-name="ce503" table:formula="of:=[.D18]-[.D19]" office:value-type="currency" office:currency="PEN" office:value="12583.7235560674" calcext:value-type="currency">
            <text:p><text:s/>S/ 12,584 </text:p>
          </table:table-cell>
          <table:table-cell table:style-name="ce503" table:formula="of:=[.E18]-[.E19]" office:value-type="currency" office:currency="PEN" office:value="17908.7266" calcext:value-type="currency">
            <text:p><text:s/>S/ 17,909 </text:p>
          </table:table-cell>
          <table:table-cell table:style-name="ce503" table:formula="of:=[.F18]-[.F19]" office:value-type="currency" office:currency="PEN" office:value="22713.17555" calcext:value-type="currency">
            <text:p><text:s/>S/ 22,713 </text:p>
          </table:table-cell>
          <table:table-cell table:style-name="ce503" table:formula="of:=[.G18]-[.G19]" office:value-type="currency" office:currency="PEN" office:value="27757.7975625" calcext:value-type="currency">
            <text:p><text:s/>S/ 27,758 </text:p>
          </table:table-cell>
          <table:table-cell table:style-name="ce503" table:formula="of:=[.H18]-[.H19]" office:value-type="currency" office:currency="PEN" office:value="33054.601290625" calcext:value-type="currency">
            <text:p><text:s/>S/ 33,055 </text:p>
          </table:table-cell>
          <table:table-cell/>
          <table:table-cell table:style-name="ce507" table:number-columns-repeated="5"/>
          <table:table-cell table:number-columns-repeated="16370"/>
        </table:table-row>
        <table:table-row table:style-name="ro4">
          <table:table-cell table:number-columns-repeated="2"/>
          <table:table-cell table:style-name="ce206" office:value-type="string" calcext:value-type="string">
            <text:p><text:s text:c="5"/>(*) Con RER se aplica1.5% sobre las ventas netas.</text:p>
          </table:table-cell>
          <table:table-cell table:style-name="ce206" table:number-columns-repeated="5"/>
          <table:table-cell table:number-columns-repeated="16376"/>
        </table:table-row>
        <table:table-row table:style-name="ro4" table:number-rows-repeated="953">
          <table:table-cell table:number-columns-repeated="16384"/>
        </table:table-row>
        <table:table-row table:style-name="ro8" table:number-rows-repeated="104760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Ku" table:style-name="ta14">
        <table:table-column table:style-name="co26" table:number-columns-repeated="26" table:default-cell-style-name="ce508"/>
        <table:table-column table:style-name="co18" table:number-columns-repeated="16358" table:default-cell-style-name="ce508"/>
        <table:table-row table:style-name="ro4" table:number-rows-repeated="3">
          <table:table-cell table:number-columns-repeated="16384"/>
        </table:table-row>
        <table:table-row table:style-name="ro22">
          <table:table-cell/>
          <table:table-cell table:style-name="ce509" office:value-type="string" calcext:value-type="string" table:number-columns-spanned="7" table:number-rows-spanned="1">
            <text:p>Kurt = Rf usa+ <text:span text:style-name="T1">b</text:span><text:span text:style-name="T2">u total </text:span><text:span text:style-name="T3">ME</text:span><text:span text:style-name="T4">* (Rm- Rf)</text:span><text:span text:style-name="T3"> </text:span><text:span text:style-name="T4">usa+ Rp </text:span><text:span text:style-name="T3">PERU</text:span><text:span text:style-name="T4"> </text:span></text:p>
          </table:table-cell>
          <table:covered-table-cell table:number-columns-repeated="6" table:style-name="ce509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510" office:value-type="string" calcext:value-type="string">
            <text:p>Donde</text:p>
          </table:table-cell>
          <table:table-cell table:number-columns-repeated="16382"/>
        </table:table-row>
        <table:table-row table:style-name="ro4">
          <table:table-cell/>
          <table:table-cell table:style-name="ce511" office:value-type="string" calcext:value-type="string">
            <text:p>Rf usa =</text:p>
          </table:table-cell>
          <table:table-cell table:style-name="ce513" office:value-type="percentage" office:value="0.0495" calcext:value-type="percentage">
            <text:p>4.95 %</text:p>
          </table:table-cell>
          <table:table-cell table:style-name="ce511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4">
          <table:table-cell/>
          <table:table-cell table:style-name="ce512" office:value-type="string" calcext:value-type="string">
            <text:p>βu total ME =</text:p>
          </table:table-cell>
          <table:table-cell table:style-name="ce514" office:value-type="float" office:value="3.5" calcext:value-type="float">
            <text:p>3.5</text:p>
          </table:table-cell>
          <table:table-cell table:style-name="ce511" office:value-type="string" calcext:value-type="string">
            <text:p>Beta total desapalancado para vestidos</text:p>
          </table:table-cell>
          <table:table-cell table:number-columns-repeated="16380"/>
        </table:table-row>
        <table:table-row table:style-name="ro4">
          <table:table-cell/>
          <table:table-cell table:style-name="ce511" office:value-type="string" calcext:value-type="string">
            <text:p>(Rm-Rf) =</text:p>
          </table:table-cell>
          <table:table-cell table:style-name="ce513" office:value-type="percentage" office:value="0.0464" calcext:value-type="percentage">
            <text:p>4.64 %</text:p>
          </table:table-cell>
          <table:table-cell table:style-name="ce511" office:value-type="string" calcext:value-type="string">
            <text:p>promedio geometrico 2010-2020</text:p>
          </table:table-cell>
          <table:table-cell table:number-columns-repeated="16380"/>
        </table:table-row>
        <table:table-row table:style-name="ro4">
          <table:table-cell/>
          <table:table-cell table:style-name="ce511" office:value-type="string" calcext:value-type="string">
            <text:p>Rp =</text:p>
          </table:table-cell>
          <table:table-cell table:style-name="ce513" office:value-type="percentage" office:value="0.0174" calcext:value-type="percentage">
            <text:p>1.74 %</text:p>
          </table:table-cell>
          <table:table-cell table:style-name="ce511" office:value-type="string" calcext:value-type="string">
            <text:p>Promedio 2020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510" office:value-type="string" calcext:value-type="string">
            <text:p>Kurt =</text:p>
          </table:table-cell>
          <table:table-cell table:style-name="ce515" table:formula="of:=[.C7]+[.C8]*[.C9]+[.C10]" office:value-type="percentage" office:value="0.2293" calcext:value-type="percentage">
            <text:p>22.93 %</text:p>
          </table:table-cell>
          <table:table-cell table:style-name="ce511" office:value-type="string" calcext:value-type="string">
            <text:p>COK desapalancado con Riesgo Total</text:p>
          </table:table-cell>
          <table:table-cell table:number-columns-repeated="16380"/>
        </table:table-row>
        <table:table-row table:style-name="ro4" table:number-rows-repeated="988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Ke_Kwacc" table:style-name="ta15">
        <table:table-column table:style-name="co1" table:default-cell-style-name="ce471"/>
        <table:table-column table:style-name="co60" table:default-cell-style-name="ce471"/>
        <table:table-column table:style-name="co41" table:default-cell-style-name="ce471"/>
        <table:table-column table:style-name="co1" table:number-columns-repeated="4" table:default-cell-style-name="ce471"/>
        <table:table-column table:style-name="co47" table:default-cell-style-name="ce471"/>
        <table:table-column table:style-name="co1" table:number-columns-repeated="2" table:default-cell-style-name="ce471"/>
        <table:table-column table:style-name="co61" table:default-cell-style-name="ce471"/>
        <table:table-column table:style-name="co1" table:number-columns-repeated="16373" table:default-cell-style-name="ce471"/>
        <table:table-row table:style-name="ro16">
          <table:table-cell table:number-columns-repeated="16384"/>
        </table:table-row>
        <table:table-row table:style-name="ro16">
          <table:table-cell/>
          <table:table-cell table:style-name="ce516" office:value-type="string" calcext:value-type="string" table:number-columns-spanned="4" table:number-rows-spanned="1">
            <text:p>COK APALANCADO CON RIESGO TOTAL</text:p>
          </table:table-cell>
          <table:covered-table-cell table:number-columns-repeated="3" table:style-name="ce516"/>
          <table:table-cell table:style-name="ce517"/>
          <table:table-cell table:style-name="ce516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4" table:style-name="ce516"/>
          <table:table-cell table:style-name="ce517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16">
          <table:table-cell/>
          <table:table-cell table:style-name="ce518" office:value-type="string" calcext:value-type="string" table:number-columns-spanned="4" table:number-rows-spanned="1">
            <text:p>Kert= Rfusa+Brl total Peru*(Rm-Rf)usa + Rp peru</text:p>
          </table:table-cell>
          <table:covered-table-cell table:number-columns-repeated="2" table:style-name="ce521"/>
          <table:covered-table-cell table:style-name="ce527"/>
          <table:table-cell table:style-name="ce517"/>
          <table:table-cell table:style-name="ce518" office:value-type="string" calcext:value-type="string" table:number-columns-spanned="5" table:number-rows-spanned="1">
            <text:p>Kwacc= E/V * Kert + D/V * Kd</text:p>
          </table:table-cell>
          <table:covered-table-cell table:number-columns-repeated="3" table:style-name="ce521"/>
          <table:covered-table-cell table:style-name="ce527"/>
          <table:table-cell table:style-name="ce517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16">
          <table:table-cell/>
          <table:table-cell table:style-name="ce519" office:value-type="string" calcext:value-type="string">
            <text:p>Donde:</text:p>
          </table:table-cell>
          <table:table-cell table:style-name="ce517" table:number-columns-repeated="4"/>
          <table:table-cell table:style-name="ce519" office:value-type="string" calcext:value-type="string">
            <text:p>Donde:</text:p>
          </table:table-cell>
          <table:table-cell table:style-name="ce517" table:number-columns-repeated="5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Rf usa</text:p>
          </table:table-cell>
          <table:table-cell table:style-name="ce522" table:formula="of:=[$Ku.C7]" office:value-type="percentage" office:value="0.0495" calcext:value-type="percentage">
            <text:p>4.95 %</text:p>
          </table:table-cell>
          <table:table-cell table:style-name="ce517" table:number-columns-repeated="2"/>
          <table:table-cell table:style-name="ce519"/>
          <table:table-cell table:style-name="ce517" office:value-type="string" calcext:value-type="string">
            <text:p>E/V</text:p>
          </table:table-cell>
          <table:table-cell table:style-name="ce523" table:formula="of:=[$Inversion_Inicial.K14]/[$Inversion_Inicial.K16]" office:value-type="float" office:value="0.707378119558909" calcext:value-type="float">
            <text:p>0.71</text:p>
          </table:table-cell>
          <table:table-cell table:style-name="ce517" table:number-columns-repeated="4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Brl total Peru</text:p>
          </table:table-cell>
          <table:table-cell table:style-name="ce523" table:formula="of:=[.E24]" office:value-type="float" office:value="4.92613109584124" calcext:value-type="float">
            <text:p>4.93</text:p>
          </table:table-cell>
          <table:table-cell table:style-name="ce517" table:number-columns-repeated="2"/>
          <table:table-cell table:style-name="ce519"/>
          <table:table-cell table:style-name="ce517" office:value-type="string" calcext:value-type="string">
            <text:p>Kert</text:p>
          </table:table-cell>
          <table:table-cell table:style-name="ce522" table:formula="of:=[.E13]" office:value-type="percentage" office:value="0.295472482847033" calcext:value-type="percentage">
            <text:p>29.55 %</text:p>
          </table:table-cell>
          <table:table-cell table:style-name="ce517" table:number-columns-repeated="4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(Rm-Rf) usa</text:p>
          </table:table-cell>
          <table:table-cell table:style-name="ce522" table:formula="of:=[$Ku.C9]" office:value-type="percentage" office:value="0.0464" calcext:value-type="percentage">
            <text:p>4.64 %</text:p>
          </table:table-cell>
          <table:table-cell table:style-name="ce517" table:number-columns-repeated="2"/>
          <table:table-cell table:style-name="ce519"/>
          <table:table-cell table:style-name="ce517" office:value-type="string" calcext:value-type="string">
            <text:p>D/V</text:p>
          </table:table-cell>
          <table:table-cell table:style-name="ce523" table:formula="of:=[$Inversion_Inicial.K15]/[$Inversion_Inicial.K16]" office:value-type="float" office:value="0.292621880441091" calcext:value-type="float">
            <text:p>0.29</text:p>
          </table:table-cell>
          <table:table-cell table:style-name="ce531"/>
          <table:table-cell table:style-name="ce517" table:number-columns-repeated="3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Rp</text:p>
          </table:table-cell>
          <table:table-cell table:style-name="ce522" table:formula="of:=[$Ku.C10]" office:value-type="percentage" office:value="0.0174" calcext:value-type="percentage">
            <text:p>1.74 %</text:p>
          </table:table-cell>
          <table:table-cell table:style-name="ce517" table:number-columns-repeated="2"/>
          <table:table-cell table:style-name="ce519"/>
          <table:table-cell table:style-name="ce517" office:value-type="string" calcext:value-type="string">
            <text:p>Kd</text:p>
          </table:table-cell>
          <table:table-cell table:style-name="ce530" table:formula="of:=[$Resumen.H17]" office:value-type="percentage" office:value="0.22" calcext:value-type="percentage">
            <text:p>22 %</text:p>
          </table:table-cell>
          <table:table-cell table:style-name="ce517" table:number-columns-repeated="4"/>
          <table:table-cell table:number-columns-repeated="16372"/>
        </table:table-row>
        <table:table-row table:style-name="ro16">
          <table:table-cell table:number-columns-repeated="3"/>
          <table:table-cell table:style-name="ce517" table:number-columns-repeated="2"/>
          <table:table-cell table:style-name="ce519"/>
          <table:table-cell table:style-name="ce517" office:value-type="string" calcext:value-type="string">
            <text:p>t</text:p>
          </table:table-cell>
          <table:table-cell table:style-name="ce522" table:formula="of:=[.C22]" office:value-type="percentage" office:value="0.015" calcext:value-type="percentage">
            <text:p>1.50 %</text:p>
          </table:table-cell>
          <table:table-cell table:style-name="ce517" table:number-columns-repeated="4"/>
          <table:table-cell table:number-columns-repeated="16372"/>
        </table:table-row>
        <table:table-row table:style-name="ro16">
          <table:table-cell/>
          <table:table-cell table:style-name="ce519"/>
          <table:table-cell table:style-name="ce517" table:number-columns-repeated="3"/>
          <table:table-cell table:style-name="ce519" table:number-columns-repeated="2"/>
          <table:table-cell table:style-name="ce517" table:number-columns-repeated="5"/>
          <table:table-cell table:number-columns-repeated="16372"/>
        </table:table-row>
        <table:table-row table:style-name="ro28">
          <table:table-cell/>
          <table:table-cell table:style-name="ce520" office:value-type="string" calcext:value-type="string">
            <text:p>Kert</text:p>
          </table:table-cell>
          <table:table-cell table:style-name="ce524"/>
          <table:table-cell table:style-name="ce526"/>
          <table:table-cell table:style-name="ce528" table:formula="of:=[.C7]+([.C8]*([.C9]))+[.C10]" office:value-type="percentage" office:value="0.295472482847033" calcext:value-type="percentage">
            <text:p>29.55 %</text:p>
          </table:table-cell>
          <table:table-cell table:style-name="ce519"/>
          <table:table-cell table:style-name="ce520" office:value-type="string" calcext:value-type="string">
            <text:p>Kwacc</text:p>
          </table:table-cell>
          <table:table-cell table:style-name="ce524"/>
          <table:table-cell table:style-name="ce526" table:number-columns-repeated="2"/>
          <table:table-cell table:style-name="ce532" table:formula="of:=([.H7]*[.H8])+(([.H9]*[.H10])*(1-[.H11]))" office:value-type="percentage" office:value="0.272421930789321" calcext:value-type="percentage">
            <text:p>27.24 %</text:p>
          </table:table-cell>
          <table:table-cell table:style-name="ce517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16">
          <table:table-cell/>
          <table:table-cell table:style-name="ce516" office:value-type="string" calcext:value-type="string" table:number-columns-spanned="4" table:number-rows-spanned="1">
            <text:p>BETA REAPALANCADO CON RIESGO TOTAL</text:p>
          </table:table-cell>
          <table:covered-table-cell table:number-columns-repeated="3" table:style-name="ce516"/>
          <table:table-cell table:style-name="ce517" table:number-columns-repeated="7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16">
          <table:table-cell/>
          <table:table-cell table:style-name="ce518" office:value-type="string" calcext:value-type="string" table:number-columns-spanned="4" table:number-rows-spanned="1">
            <text:p>Brl total= Bu total ME*(1+(D/E))*(1-tr)</text:p>
          </table:table-cell>
          <table:covered-table-cell table:number-columns-repeated="2" table:style-name="ce521"/>
          <table:covered-table-cell table:style-name="ce527"/>
          <table:table-cell table:style-name="ce517" table:number-columns-repeated="7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16">
          <table:table-cell/>
          <table:table-cell table:style-name="ce519" office:value-type="string" calcext:value-type="string">
            <text:p>Donde:</text:p>
          </table:table-cell>
          <table:table-cell table:style-name="ce517" table:number-columns-repeated="10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Bu total ME</text:p>
          </table:table-cell>
          <table:table-cell table:style-name="ce517" office:value-type="float" office:value="3.5" calcext:value-type="float">
            <text:p>3.5</text:p>
          </table:table-cell>
          <table:table-cell table:style-name="ce517" table:number-columns-repeated="9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D/E Peru</text:p>
          </table:table-cell>
          <table:table-cell table:style-name="ce525" table:formula="of:=[$Inversion_Inicial.H40]/[$Inversion_Inicial.G40]" office:value-type="float" office:value="0.413671093790062" calcext:value-type="float">
            <text:p>0.41</text:p>
          </table:table-cell>
          <table:table-cell table:style-name="ce517" table:number-columns-repeated="9"/>
          <table:table-cell table:number-columns-repeated="16372"/>
        </table:table-row>
        <table:table-row table:style-name="ro16">
          <table:table-cell/>
          <table:table-cell table:style-name="ce517" office:value-type="string" calcext:value-type="string">
            <text:p>t</text:p>
          </table:table-cell>
          <table:table-cell table:style-name="ce517" table:formula="of:=1.5/100" office:value-type="float" office:value="0.015" calcext:value-type="float">
            <text:p>0.015</text:p>
          </table:table-cell>
          <table:table-cell table:style-name="ce517" table:number-columns-repeated="9"/>
          <table:table-cell table:number-columns-repeated="16372"/>
        </table:table-row>
        <table:table-row table:style-name="ro16">
          <table:table-cell/>
          <table:table-cell table:style-name="ce517" table:number-columns-repeated="11"/>
          <table:table-cell table:number-columns-repeated="16372"/>
        </table:table-row>
        <table:table-row table:style-name="ro28">
          <table:table-cell/>
          <table:table-cell table:style-name="ce520" office:value-type="string" calcext:value-type="string">
            <text:p>Brl total Peru</text:p>
          </table:table-cell>
          <table:table-cell table:style-name="ce524"/>
          <table:table-cell table:style-name="ce526"/>
          <table:table-cell table:style-name="ce529" table:formula="of:=[.C20]*(1+([.C21])*(1-[.C22]))" office:value-type="float" office:value="4.92613109584124" calcext:value-type="float">
            <text:p>4.93</text:p>
          </table:table-cell>
          <table:table-cell table:style-name="ce517" table:number-columns-repeated="7"/>
          <table:table-cell table:number-columns-repeated="16372"/>
        </table:table-row>
        <table:table-row table:style-name="ro29">
          <table:table-cell/>
          <table:table-cell table:style-name="ce517" table:number-columns-repeated="11"/>
          <table:table-cell table:number-columns-repeated="16372"/>
        </table:table-row>
        <table:table-row table:style-name="ro16" table:number-rows-repeated="1048550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IGV" table:style-name="ta16">
        <table:table-column table:style-name="co9" table:default-cell-style-name="ce533"/>
        <table:table-column table:style-name="co62" table:default-cell-style-name="ce533"/>
        <table:table-column table:style-name="co63" table:default-cell-style-name="ce533"/>
        <table:table-column table:style-name="co64" table:default-cell-style-name="ce533"/>
        <table:table-column table:style-name="co65" table:default-cell-style-name="ce533"/>
        <table:table-column table:style-name="co66" table:default-cell-style-name="ce533"/>
        <table:table-column table:style-name="co65" table:number-columns-repeated="2" table:default-cell-style-name="ce533"/>
        <table:table-column table:style-name="co1" table:number-columns-repeated="249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1" table:default-cell-style-name="ce533"/>
        <table:table-column table:style-name="co8" table:default-cell-style-name="ce533"/>
        <table:table-column table:style-name="co67" table:default-cell-style-name="ce533"/>
        <table:table-column table:style-name="co64" table:default-cell-style-name="ce533"/>
        <table:table-column table:style-name="co68" table:default-cell-style-name="ce533"/>
        <table:table-column table:style-name="co69" table:default-cell-style-name="ce533"/>
        <table:table-column table:style-name="co1" table:number-columns-repeated="250" table:default-cell-style-name="ce533"/>
        <table:table-row table:style-name="ro1">
          <table:table-cell/>
          <table:table-cell table:style-name="ce53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35" office:value-type="string" calcext:value-type="string" table:number-columns-spanned="6" table:number-rows-spanned="1">
            <text:p>PAGO DE IGV PROYECTADO</text:p>
          </table:table-cell>
          <table:covered-table-cell table:number-columns-repeated="5" table:style-name="ce53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36" office:value-type="string" calcext:value-type="string">
            <text:p>RUBRO</text:p>
          </table:table-cell>
          <table:table-cell table:style-name="ce542" office:value-type="string" calcext:value-type="string">
            <text:p>Año 1</text:p>
          </table:table-cell>
          <table:table-cell table:style-name="ce542" office:value-type="string" calcext:value-type="string">
            <text:p>Año 2</text:p>
          </table:table-cell>
          <table:table-cell table:style-name="ce542" office:value-type="string" calcext:value-type="string">
            <text:p>Año 3</text:p>
          </table:table-cell>
          <table:table-cell table:style-name="ce542" office:value-type="string" calcext:value-type="string">
            <text:p>Año 4</text:p>
          </table:table-cell>
          <table:table-cell table:style-name="ce548" office:value-type="string" calcext:value-type="string">
            <text:p>Año 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7" office:value-type="string" calcext:value-type="string">
            <text:p>Ingresos sin IGV</text:p>
          </table:table-cell>
          <table:table-cell table:style-name="ce543" table:formula="of:=[.D7]-([.D7]*18/100)" office:value-type="currency" office:currency="PEN" office:value="233705.74" calcext:value-type="currency">
            <text:p><text:s/>S/ 233,705.74 </text:p>
          </table:table-cell>
          <table:table-cell table:style-name="ce543" table:formula="of:=[.E7]-([.E7]*18/100)" office:value-type="currency" office:currency="PEN" office:value="245391.56" calcext:value-type="currency">
            <text:p><text:s/>S/ 245,391.56 </text:p>
          </table:table-cell>
          <table:table-cell table:style-name="ce543" table:formula="of:=[.F7]-([.F7]*18/100)" office:value-type="currency" office:currency="PEN" office:value="257661.63" calcext:value-type="currency">
            <text:p><text:s/>S/ 257,661.63 </text:p>
          </table:table-cell>
          <table:table-cell table:style-name="ce543" table:formula="of:=[.G7]-([.G7]*18/100)" office:value-type="currency" office:currency="PEN" office:value="270545.1625" calcext:value-type="currency">
            <text:p><text:s/>S/ 270,545.16 </text:p>
          </table:table-cell>
          <table:table-cell table:style-name="ce549" table:formula="of:=[.H7]-([.H7]*18/100)" office:value-type="currency" office:currency="PEN" office:value="284072.830625" calcext:value-type="currency">
            <text:p><text:s/>S/ 284,072.83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Ingreso con GV</text:p>
          </table:table-cell>
          <table:table-cell table:style-name="ce544" table:formula="of:=[$Estado_Resultados.D7]" office:value-type="currency" office:currency="PEN" office:value="285007" calcext:value-type="currency">
            <text:p><text:s/>S/ 285,007.00 </text:p>
          </table:table-cell>
          <table:table-cell table:style-name="ce544" table:formula="of:=[$Estado_Resultados.E7]" office:value-type="currency" office:currency="PEN" office:value="299258" calcext:value-type="currency">
            <text:p><text:s/>S/ 299,258.00 </text:p>
          </table:table-cell>
          <table:table-cell table:style-name="ce544" table:formula="of:=[$Estado_Resultados.F7]" office:value-type="currency" office:currency="PEN" office:value="314221.5" calcext:value-type="currency">
            <text:p><text:s/>S/ 314,221.50 </text:p>
          </table:table-cell>
          <table:table-cell table:style-name="ce544" table:formula="of:=[$Estado_Resultados.G7]" office:value-type="currency" office:currency="PEN" office:value="329933.125" calcext:value-type="currency">
            <text:p><text:s/>S/ 329,933.13 </text:p>
          </table:table-cell>
          <table:table-cell table:style-name="ce550" table:formula="of:=[$Estado_Resultados.H7]" office:value-type="currency" office:currency="PEN" office:value="346430.28125" calcext:value-type="currency">
            <text:p><text:s/>S/ 346,430.28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9" office:value-type="string" calcext:value-type="string">
            <text:p>IGV Venta</text:p>
          </table:table-cell>
          <table:table-cell table:style-name="ce545" table:formula="of:=[.D7]-[.D6]" office:value-type="currency" office:currency="PEN" office:value="51301.26" calcext:value-type="currency">
            <text:p><text:s/>S/ 51,301.26 </text:p>
          </table:table-cell>
          <table:table-cell table:style-name="ce545" table:formula="of:=[.E7]-[.E6]" office:value-type="currency" office:currency="PEN" office:value="53866.44" calcext:value-type="currency">
            <text:p><text:s/>S/ 53,866.44 </text:p>
          </table:table-cell>
          <table:table-cell table:style-name="ce545" table:formula="of:=[.F7]-[.F6]" office:value-type="currency" office:currency="PEN" office:value="56559.87" calcext:value-type="currency">
            <text:p><text:s/>S/ 56,559.87 </text:p>
          </table:table-cell>
          <table:table-cell table:style-name="ce545" table:formula="of:=[.G7]-[.G6]" office:value-type="currency" office:currency="PEN" office:value="59387.9625" calcext:value-type="currency">
            <text:p><text:s/>S/ 59,387.96 </text:p>
          </table:table-cell>
          <table:table-cell table:style-name="ce551" table:formula="of:=[.H7]-[.H6]" office:value-type="currency" office:currency="PEN" office:value="62357.450625" calcext:value-type="currency">
            <text:p><text:s/>S/ 62,357.45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Costos de produccion</text:p>
          </table:table-cell>
          <table:table-cell table:style-name="ce544" table:formula="of:=[$Costos_Ventas.D28]" office:value-type="currency" office:currency="PEN" office:value="190000" calcext:value-type="currency">
            <text:p><text:s/>S/ 190,000.00 </text:p>
          </table:table-cell>
          <table:table-cell table:style-name="ce544" table:formula="of:=[$Costos_Ventas.E28]" office:value-type="currency" office:currency="PEN" office:value="199500" calcext:value-type="currency">
            <text:p><text:s/>S/ 199,500.00 </text:p>
          </table:table-cell>
          <table:table-cell table:style-name="ce544" table:formula="of:=[$Costos_Ventas.F28]" office:value-type="currency" office:currency="PEN" office:value="209475" calcext:value-type="currency">
            <text:p><text:s/>S/ 209,475.00 </text:p>
          </table:table-cell>
          <table:table-cell table:style-name="ce544" table:formula="of:=[$Costos_Ventas.G28]" office:value-type="currency" office:currency="PEN" office:value="219948.75" calcext:value-type="currency">
            <text:p><text:s/>S/ 219,948.75 </text:p>
          </table:table-cell>
          <table:table-cell table:style-name="ce550" table:formula="of:=[$Costos_Ventas.H28]" office:value-type="currency" office:currency="PEN" office:value="230946.1875" calcext:value-type="currency">
            <text:p><text:s/>S/ 230,946.19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Depreciación de activo fijo</text:p>
          </table:table-cell>
          <table:table-cell table:style-name="ce544" table:formula="of:=[$Estado_Resultados.D10]" office:value-type="currency" office:currency="PEN" office:value="2354.4" calcext:value-type="currency">
            <text:p><text:s/>S/ 2,354.40 </text:p>
          </table:table-cell>
          <table:table-cell table:style-name="ce544" table:formula="of:=[$Estado_Resultados.E10]" office:value-type="currency" office:currency="PEN" office:value="2354.4" calcext:value-type="currency">
            <text:p><text:s/>S/ 2,354.40 </text:p>
          </table:table-cell>
          <table:table-cell table:style-name="ce544" table:formula="of:=[$Estado_Resultados.F10]" office:value-type="currency" office:currency="PEN" office:value="2354.4" calcext:value-type="currency">
            <text:p><text:s/>S/ 2,354.40 </text:p>
          </table:table-cell>
          <table:table-cell table:style-name="ce544" table:formula="of:=[$Estado_Resultados.G10]" office:value-type="currency" office:currency="PEN" office:value="2354.4" calcext:value-type="currency">
            <text:p><text:s/>S/ 2,354.40 </text:p>
          </table:table-cell>
          <table:table-cell table:style-name="ce550" table:formula="of:=[$Estado_Resultados.H10]" office:value-type="currency" office:currency="PEN" office:value="2354.4" calcext:value-type="currency">
            <text:p><text:s/>S/ 2,354.40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Gastos Administrativos</text:p>
          </table:table-cell>
          <table:table-cell table:style-name="ce544" table:formula="of:=[$Estado_Resultados.D13]-[$Gastos_Operativos.$H$8]*12" office:value-type="currency" office:currency="PEN" office:value="2760" calcext:value-type="currency">
            <text:p><text:s/>S/ 2,760.00 </text:p>
          </table:table-cell>
          <table:table-cell table:style-name="ce544" table:formula="of:=[$Estado_Resultados.E13]-[$Gastos_Operativos.$H$8]*12" office:value-type="currency" office:currency="PEN" office:value="2760" calcext:value-type="currency">
            <text:p><text:s/>S/ 2,760.00 </text:p>
          </table:table-cell>
          <table:table-cell table:style-name="ce544" table:formula="of:=[$Estado_Resultados.F13]-[$Gastos_Operativos.$H$8]*12" office:value-type="currency" office:currency="PEN" office:value="2760" calcext:value-type="currency">
            <text:p><text:s/>S/ 2,760.00 </text:p>
          </table:table-cell>
          <table:table-cell table:style-name="ce544" table:formula="of:=[$Estado_Resultados.G13]-[$Gastos_Operativos.$H$8]*12" office:value-type="currency" office:currency="PEN" office:value="2760" calcext:value-type="currency">
            <text:p><text:s/>S/ 2,760.00 </text:p>
          </table:table-cell>
          <table:table-cell table:style-name="ce550" table:formula="of:=[$Estado_Resultados.H13]-[$Gastos_Operativos.$H$8]*12" office:value-type="currency" office:currency="PEN" office:value="2760" calcext:value-type="currency">
            <text:p><text:s/>S/ 2,760.00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Gastos de Ventas</text:p>
          </table:table-cell>
          <table:table-cell table:style-name="ce544" table:formula="of:=[$Estado_Resultados.D14]-[$Gastos_Operativos.$H$15]*12" office:value-type="currency" office:currency="PEN" office:value="39000" calcext:value-type="currency">
            <text:p><text:s/>S/ 39,000.00 </text:p>
          </table:table-cell>
          <table:table-cell table:style-name="ce544" table:formula="of:=[$Estado_Resultados.E14]-[$Gastos_Operativos.$H$15]*12" office:value-type="currency" office:currency="PEN" office:value="39000" calcext:value-type="currency">
            <text:p><text:s/>S/ 39,000.00 </text:p>
          </table:table-cell>
          <table:table-cell table:style-name="ce544" table:formula="of:=[$Estado_Resultados.F14]-[$Gastos_Operativos.$H$15]*12" office:value-type="currency" office:currency="PEN" office:value="39000" calcext:value-type="currency">
            <text:p><text:s/>S/ 39,000.00 </text:p>
          </table:table-cell>
          <table:table-cell table:style-name="ce544" table:formula="of:=[$Estado_Resultados.G14]-[$Gastos_Operativos.$H$15]*12" office:value-type="currency" office:currency="PEN" office:value="39000" calcext:value-type="currency">
            <text:p><text:s/>S/ 39,000.00 </text:p>
          </table:table-cell>
          <table:table-cell table:style-name="ce550" table:formula="of:=[$Estado_Resultados.H14]-[$Gastos_Operativos.$H$15]*12" office:value-type="currency" office:currency="PEN" office:value="39000" calcext:value-type="currency">
            <text:p><text:s/>S/ 39,000.00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Amortización de intangibles</text:p>
          </table:table-cell>
          <table:table-cell table:style-name="ce544" table:formula="of:=[$Estado_Resultados.D15]" office:value-type="currency" office:currency="PEN" office:value="334" calcext:value-type="currency">
            <text:p><text:s/>S/ 334.00 </text:p>
          </table:table-cell>
          <table:table-cell table:style-name="ce544" table:formula="of:=[$Estado_Resultados.E15]" office:value-type="currency" office:currency="PEN" office:value="334" calcext:value-type="currency">
            <text:p><text:s/>S/ 334.00 </text:p>
          </table:table-cell>
          <table:table-cell table:style-name="ce544" table:formula="of:=[$Estado_Resultados.F15]" office:value-type="currency" office:currency="PEN" office:value="334" calcext:value-type="currency">
            <text:p><text:s/>S/ 334.00 </text:p>
          </table:table-cell>
          <table:table-cell table:style-name="ce544" table:formula="of:=[$Estado_Resultados.G15]" office:value-type="currency" office:currency="PEN" office:value="334" calcext:value-type="currency">
            <text:p><text:s/>S/ 334.00 </text:p>
          </table:table-cell>
          <table:table-cell table:style-name="ce550" table:formula="of:=[$Estado_Resultados.H15]" office:value-type="currency" office:currency="PEN" office:value="334" calcext:value-type="currency">
            <text:p><text:s/>S/ 334.00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Egresos sin IGV</text:p>
          </table:table-cell>
          <table:table-cell table:style-name="ce544" table:formula="of:=SUM([.D9:.D13])" office:value-type="currency" office:currency="PEN" office:value="234448.4" calcext:value-type="currency">
            <text:p><text:s/>S/ 234,448.40 </text:p>
          </table:table-cell>
          <table:table-cell table:style-name="ce544" table:formula="of:=SUM([.E9:.E13])" office:value-type="currency" office:currency="PEN" office:value="243948.4" calcext:value-type="currency">
            <text:p><text:s/>S/ 243,948.40 </text:p>
          </table:table-cell>
          <table:table-cell table:style-name="ce544" table:formula="of:=SUM([.F9:.F13])" office:value-type="currency" office:currency="PEN" office:value="253923.4" calcext:value-type="currency">
            <text:p><text:s/>S/ 253,923.40 </text:p>
          </table:table-cell>
          <table:table-cell table:style-name="ce544" table:formula="of:=SUM([.G9:.G13])" office:value-type="currency" office:currency="PEN" office:value="264397.15" calcext:value-type="currency">
            <text:p><text:s/>S/ 264,397.15 </text:p>
          </table:table-cell>
          <table:table-cell table:style-name="ce550" table:formula="of:=SUM([.H9:.H13])" office:value-type="currency" office:currency="PEN" office:value="275394.5875" calcext:value-type="currency">
            <text:p><text:s/>S/ 275,394.59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38" office:value-type="string" calcext:value-type="string">
            <text:p>Egresos con IGV</text:p>
          </table:table-cell>
          <table:table-cell table:style-name="ce544" table:formula="of:=[.D14]+[.D14]*18/100" office:value-type="currency" office:currency="PEN" office:value="276649.112" calcext:value-type="currency">
            <text:p><text:s/>S/ 276,649.11 </text:p>
          </table:table-cell>
          <table:table-cell table:style-name="ce544" table:formula="of:=[.E14]+[.E14]*18/100" office:value-type="currency" office:currency="PEN" office:value="287859.112" calcext:value-type="currency">
            <text:p><text:s/>S/ 287,859.11 </text:p>
          </table:table-cell>
          <table:table-cell table:style-name="ce544" table:formula="of:=[.F14]+[.F14]*18/100" office:value-type="currency" office:currency="PEN" office:value="299629.612" calcext:value-type="currency">
            <text:p><text:s/>S/ 299,629.61 </text:p>
          </table:table-cell>
          <table:table-cell table:style-name="ce544" table:formula="of:=[.G14]+[.G14]*18/100" office:value-type="currency" office:currency="PEN" office:value="311988.637" calcext:value-type="currency">
            <text:p><text:s/>S/ 311,988.64 </text:p>
          </table:table-cell>
          <table:table-cell table:style-name="ce550" table:formula="of:=[.H14]+[.H14]*18/100" office:value-type="currency" office:currency="PEN" office:value="324965.61325" calcext:value-type="currency">
            <text:p><text:s/>S/ 324,965.61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40" office:value-type="string" calcext:value-type="string">
            <text:p>IGV Compra</text:p>
          </table:table-cell>
          <table:table-cell table:style-name="ce546" table:formula="of:=[.D15]-[.D14]" office:value-type="currency" office:currency="PEN" office:value="42200.712" calcext:value-type="currency">
            <text:p><text:s/>S/ 42,200.71 </text:p>
          </table:table-cell>
          <table:table-cell table:style-name="ce546" table:formula="of:=[.E15]-[.E14]" office:value-type="currency" office:currency="PEN" office:value="43910.712" calcext:value-type="currency">
            <text:p><text:s/>S/ 43,910.71 </text:p>
          </table:table-cell>
          <table:table-cell table:style-name="ce546" table:formula="of:=[.F15]-[.F14]" office:value-type="currency" office:currency="PEN" office:value="45706.212" calcext:value-type="currency">
            <text:p><text:s/>S/ 45,706.21 </text:p>
          </table:table-cell>
          <table:table-cell table:style-name="ce546" table:formula="of:=[.G15]-[.G14]" office:value-type="currency" office:currency="PEN" office:value="47591.487" calcext:value-type="currency">
            <text:p><text:s/>S/ 47,591.49 </text:p>
          </table:table-cell>
          <table:table-cell table:style-name="ce552" table:formula="of:=[.H15]-[.H14]" office:value-type="currency" office:currency="PEN" office:value="49571.02575" calcext:value-type="currency">
            <text:p><text:s/>S/ 49,571.03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41" office:value-type="string" calcext:value-type="string">
            <text:p>Pago IGV (Icon-Econ)</text:p>
          </table:table-cell>
          <table:table-cell table:style-name="ce547" table:formula="of:=[.D8]-[.D16]" office:value-type="currency" office:currency="PEN" office:value="9100.54800000004" calcext:value-type="currency">
            <text:p><text:s/>S/ 9,100.55 </text:p>
          </table:table-cell>
          <table:table-cell table:style-name="ce547" table:formula="of:=[.E8]-[.E16]" office:value-type="currency" office:currency="PEN" office:value="9955.72800000003" calcext:value-type="currency">
            <text:p><text:s/>S/ 9,955.73 </text:p>
          </table:table-cell>
          <table:table-cell table:style-name="ce547" table:formula="of:=[.F8]-[.F16]" office:value-type="currency" office:currency="PEN" office:value="10853.658" calcext:value-type="currency">
            <text:p><text:s/>S/ 10,853.66 </text:p>
          </table:table-cell>
          <table:table-cell table:style-name="ce547" table:formula="of:=[.G8]-[.G16]" office:value-type="currency" office:currency="PEN" office:value="11796.4755" calcext:value-type="currency">
            <text:p><text:s/>S/ 11,796.48 </text:p>
          </table:table-cell>
          <table:table-cell table:style-name="ce547" table:formula="of:=[.H8]-[.H16]" office:value-type="currency" office:currency="PEN" office:value="12786.424875" calcext:value-type="currency">
            <text:p><text:s/>S/ 12,786.42 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ujo_Caja" table:style-name="ta17">
        <table:table-column table:style-name="co1" table:number-columns-repeated="2" table:default-cell-style-name="ce533"/>
        <table:table-column table:style-name="co70" table:default-cell-style-name="ce533"/>
        <table:table-column table:style-name="co17" table:default-cell-style-name="ce533"/>
        <table:table-column table:style-name="co71" table:number-columns-repeated="3" table:default-cell-style-name="ce533"/>
        <table:table-column table:style-name="co16" table:default-cell-style-name="ce533"/>
        <table:table-column table:style-name="co25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9" table:default-cell-style-name="ce533"/>
        <table:table-column table:style-name="co72" table:default-cell-style-name="ce533"/>
        <table:table-column table:style-name="co15" table:default-cell-style-name="ce533"/>
        <table:table-column table:style-name="co21" table:number-columns-repeated="2" table:default-cell-style-name="ce533"/>
        <table:table-column table:style-name="co26" table:number-columns-repeated="2" table:default-cell-style-name="ce533"/>
        <table:table-column table:style-name="co22" table:default-cell-style-name="ce533"/>
        <table:table-column table:style-name="co1" table:number-columns-repeated="247" table:default-cell-style-name="ce533"/>
        <table:table-row table:style-name="ro1" table:number-rows-repeated="2">
          <table:table-cell/>
          <table:table-cell table:style-name="ce534"/>
          <table:table-cell table:number-columns-repeated="16382"/>
        </table:table-row>
        <table:table-row table:style-name="ro1">
          <table:table-cell table:number-columns-repeated="2"/>
          <table:table-cell table:style-name="ce535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6" table:style-name="ce53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30">
          <table:table-cell table:number-columns-repeated="2"/>
          <table:table-cell table:style-name="ce553" office:value-type="string" calcext:value-type="string">
            <text:p>RUBRO</text:p>
          </table:table-cell>
          <table:table-cell table:style-name="ce553" office:value-type="string" calcext:value-type="string">
            <text:p>Año 0</text:p>
          </table:table-cell>
          <table:table-cell table:style-name="ce553" office:value-type="string" calcext:value-type="string">
            <text:p>Año 1</text:p>
          </table:table-cell>
          <table:table-cell table:style-name="ce553" office:value-type="string" calcext:value-type="string">
            <text:p>Año 2</text:p>
          </table:table-cell>
          <table:table-cell table:style-name="ce553" office:value-type="string" calcext:value-type="string">
            <text:p>Año 3</text:p>
          </table:table-cell>
          <table:table-cell table:style-name="ce553" office:value-type="string" calcext:value-type="string">
            <text:p>Año 4</text:p>
          </table:table-cell>
          <table:table-cell table:style-name="ce553" office:value-type="string" calcext:value-type="string">
            <text:p>Año 5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Activo fijo tangible</text:p>
          </table:table-cell>
          <table:table-cell table:style-name="ce559" table:formula="of:=-[$Inversion_Inicial.F9]" office:value-type="float" office:value="-11772" calcext:value-type="float">
            <text:p>-11,772 </text:p>
          </table:table-cell>
          <table:table-cell table:style-name="ce559" table:number-columns-repeated="2"/>
          <table:table-cell table:style-name="ce559" table:formula="of:=-[$Inversion_Inicial.F18]" office:value-type="float" office:value="-4500" calcext:value-type="float">
            <text:p>-4,500 </text:p>
          </table:table-cell>
          <table:table-cell table:style-name="ce559"/>
          <table:table-cell table:style-name="ce560"/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Activo fijo intangible</text:p>
          </table:table-cell>
          <table:table-cell table:style-name="ce559" table:formula="of:=-[$Inversion_Inicial.F23]" office:value-type="float" office:value="-1670" calcext:value-type="float">
            <text:p>-1,670 </text:p>
          </table:table-cell>
          <table:table-cell table:style-name="ce559" table:number-columns-repeated="4"/>
          <table:table-cell table:style-name="ce560"/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Capital de trabajo</text:p>
          </table:table-cell>
          <table:table-cell table:style-name="ce559" table:formula="of:=-[$Capital_Trabajo.C18]" office:value-type="float" office:value="-14626" calcext:value-type="float">
            <text:p>-14,626 </text:p>
          </table:table-cell>
          <table:table-cell table:style-name="ce559" table:formula="of:=-[$Capital_Trabajo.D18]" office:value-type="float" office:value="-731.299999999998" calcext:value-type="float">
            <text:p>-731 </text:p>
          </table:table-cell>
          <table:table-cell table:style-name="ce559" table:formula="of:=-[$Capital_Trabajo.E18]" office:value-type="float" office:value="-767.865" calcext:value-type="float">
            <text:p>-768 </text:p>
          </table:table-cell>
          <table:table-cell table:style-name="ce559" table:formula="of:=-[$Capital_Trabajo.F18]" office:value-type="float" office:value="-806.258250000003" calcext:value-type="float">
            <text:p>-806 </text:p>
          </table:table-cell>
          <table:table-cell table:style-name="ce559" table:formula="of:=-[$Capital_Trabajo.G18]" office:value-type="float" office:value="-846.5711625" calcext:value-type="float">
            <text:p>-847 </text:p>
          </table:table-cell>
          <table:table-cell table:style-name="ce560"/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Recupero de capital de trabajo</text:p>
          </table:table-cell>
          <table:table-cell table:style-name="ce560" table:number-columns-repeated="5"/>
          <table:table-cell table:style-name="ce559" table:formula="of:=-SUM([.D8:.H8])" office:value-type="float" office:value="17777.9944125" calcext:value-type="float">
            <text:p><text:s/>17,778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Recupero de activo fijo tangible</text:p>
          </table:table-cell>
          <table:table-cell table:style-name="ce560" table:number-columns-repeated="5"/>
          <table:table-cell table:style-name="ce559" table:formula="of:=[$Deprecion_VR.H13]" office:value-type="float" office:value="1500" calcext:value-type="float">
            <text:p><text:s/>1,500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5" office:value-type="string" calcext:value-type="string">
            <text:p>Flujo de Inversión y Liquidación</text:p>
          </table:table-cell>
          <table:table-cell table:style-name="ce561" table:formula="of:=SUM([.D6:.D10])" office:value-type="float" office:value="-28068" calcext:value-type="float">
            <text:p>-28,068 </text:p>
          </table:table-cell>
          <table:table-cell table:style-name="ce561" table:formula="of:=SUM([.E6:.E10])" office:value-type="float" office:value="-731.299999999998" calcext:value-type="float">
            <text:p>-731 </text:p>
          </table:table-cell>
          <table:table-cell table:style-name="ce561" table:formula="of:=SUM([.F6:.F10])" office:value-type="float" office:value="-767.865" calcext:value-type="float">
            <text:p>-768 </text:p>
          </table:table-cell>
          <table:table-cell table:style-name="ce561" table:formula="of:=SUM([.G6:.G10])" office:value-type="float" office:value="-5306.25825" calcext:value-type="float">
            <text:p>-5,306 </text:p>
          </table:table-cell>
          <table:table-cell table:style-name="ce561" table:formula="of:=SUM([.H6:.H10])" office:value-type="float" office:value="-846.5711625" calcext:value-type="float">
            <text:p>-847 </text:p>
          </table:table-cell>
          <table:table-cell table:style-name="ce561" table:formula="of:=SUM([.I6:.I10])" office:value-type="float" office:value="19277.9944125" calcext:value-type="float">
            <text:p><text:s/>19,278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Ingresos por ventas</text:p>
          </table:table-cell>
          <table:table-cell table:style-name="ce559"/>
          <table:table-cell table:style-name="ce559" table:formula="of:=[$Estado_Resultados.D7]" office:value-type="float" office:value="285007" calcext:value-type="float">
            <text:p><text:s/>285,007 </text:p>
          </table:table-cell>
          <table:table-cell table:style-name="ce559" table:formula="of:=[$Estado_Resultados.E7]" office:value-type="float" office:value="299258" calcext:value-type="float">
            <text:p><text:s/>299,258 </text:p>
          </table:table-cell>
          <table:table-cell table:style-name="ce559" table:formula="of:=[$Estado_Resultados.F7]" office:value-type="float" office:value="314221.5" calcext:value-type="float">
            <text:p><text:s/>314,222 </text:p>
          </table:table-cell>
          <table:table-cell table:style-name="ce559" table:formula="of:=[$Estado_Resultados.G7]" office:value-type="float" office:value="329933.125" calcext:value-type="float">
            <text:p><text:s/>329,933 </text:p>
          </table:table-cell>
          <table:table-cell table:style-name="ce559" table:formula="of:=[$Estado_Resultados.H7]" office:value-type="float" office:value="346430.28125" calcext:value-type="float">
            <text:p><text:s/>346,430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Costos de produccion (*)</text:p>
          </table:table-cell>
          <table:table-cell table:style-name="ce559"/>
          <table:table-cell table:style-name="ce559" table:formula="of:=-[$Estado_Resultados.D9]+[$Deprecion_VR.$F$13]" office:value-type="float" office:value="-187645.6" calcext:value-type="float">
            <text:p>-187,646 </text:p>
          </table:table-cell>
          <table:table-cell table:style-name="ce559" table:formula="of:=-[$Estado_Resultados.E9]+[$Deprecion_VR.$F$13]" office:value-type="float" office:value="-197145.6" calcext:value-type="float">
            <text:p>-197,146 </text:p>
          </table:table-cell>
          <table:table-cell table:style-name="ce559" table:formula="of:=-[$Estado_Resultados.F9]+[$Deprecion_VR.$F$13]" office:value-type="float" office:value="-207120.6" calcext:value-type="float">
            <text:p>-207,121 </text:p>
          </table:table-cell>
          <table:table-cell table:style-name="ce559" table:formula="of:=-[$Estado_Resultados.G9]+[$Deprecion_VR.$F$13]" office:value-type="float" office:value="-217594.35" calcext:value-type="float">
            <text:p>-217,594 </text:p>
          </table:table-cell>
          <table:table-cell table:style-name="ce559" table:formula="of:=-[$Estado_Resultados.H9]+[$Deprecion_VR.$F$13]" office:value-type="float" office:value="-228591.7875" calcext:value-type="float">
            <text:p>-228,592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Gastos operativos (*)</text:p>
          </table:table-cell>
          <table:table-cell table:style-name="ce559"/>
          <table:table-cell table:style-name="ce559" table:formula="of:=-[$Estado_Resultados.D12]+[$Estado_Resultados.$D$15]" office:value-type="float" office:value="-75146" calcext:value-type="float">
            <text:p>-75,146 </text:p>
          </table:table-cell>
          <table:table-cell table:style-name="ce559" table:formula="of:=-[$Estado_Resultados.E12]+[$Estado_Resultados.$D$15]" office:value-type="float" office:value="-75146" calcext:value-type="float">
            <text:p>-75,146 </text:p>
          </table:table-cell>
          <table:table-cell table:style-name="ce559" table:formula="of:=-[$Estado_Resultados.F12]+[$Estado_Resultados.$D$15]" office:value-type="float" office:value="-75146" calcext:value-type="float">
            <text:p>-75,146 </text:p>
          </table:table-cell>
          <table:table-cell table:style-name="ce559" table:formula="of:=-[$Estado_Resultados.G12]+[$Estado_Resultados.$D$15]" office:value-type="float" office:value="-75146" calcext:value-type="float">
            <text:p>-75,146 </text:p>
          </table:table-cell>
          <table:table-cell table:style-name="ce559" table:formula="of:=-[$Estado_Resultados.H12]+[$Estado_Resultados.$D$15]" office:value-type="float" office:value="-75146" calcext:value-type="float">
            <text:p>-75,146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6" office:value-type="string" calcext:value-type="string">
            <text:p>Pago de IGV</text:p>
          </table:table-cell>
          <table:table-cell table:style-name="ce559"/>
          <table:table-cell table:style-name="ce559" table:formula="of:=-[$IGV.D17]" office:value-type="float" office:value="-9100.54800000004" calcext:value-type="float">
            <text:p>-9,101 </text:p>
          </table:table-cell>
          <table:table-cell table:style-name="ce559" table:formula="of:=-[$IGV.E17]" office:value-type="float" office:value="-9955.72800000003" calcext:value-type="float">
            <text:p>-9,956 </text:p>
          </table:table-cell>
          <table:table-cell table:style-name="ce559" table:formula="of:=-[$IGV.F17]" office:value-type="float" office:value="-10853.658" calcext:value-type="float">
            <text:p>-10,854 </text:p>
          </table:table-cell>
          <table:table-cell table:style-name="ce559" table:formula="of:=-[$IGV.G17]" office:value-type="float" office:value="-11796.4755" calcext:value-type="float">
            <text:p>-11,796 </text:p>
          </table:table-cell>
          <table:table-cell table:style-name="ce559" table:formula="of:=-[$IGV.H17]" office:value-type="float" office:value="-12786.424875" calcext:value-type="float">
            <text:p>-12,786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Impuestos (**)</text:p>
          </table:table-cell>
          <table:table-cell table:style-name="ce559"/>
          <table:table-cell table:style-name="ce559" table:formula="of:=-[$Estado_Resultados.D19]" office:value-type="float" office:value="-3505.5861" calcext:value-type="float">
            <text:p>-3,506 </text:p>
          </table:table-cell>
          <table:table-cell table:style-name="ce559" table:formula="of:=-[$Estado_Resultados.E19]" office:value-type="float" office:value="-3680.8734" calcext:value-type="float">
            <text:p>-3,681 </text:p>
          </table:table-cell>
          <table:table-cell table:style-name="ce559" table:formula="of:=-[$Estado_Resultados.F19]" office:value-type="float" office:value="-3864.92445" calcext:value-type="float">
            <text:p>-3,865 </text:p>
          </table:table-cell>
          <table:table-cell table:style-name="ce559" table:formula="of:=-[$Estado_Resultados.G19]" office:value-type="float" office:value="-4058.1774375" calcext:value-type="float">
            <text:p>-4,058 </text:p>
          </table:table-cell>
          <table:table-cell table:style-name="ce559" table:formula="of:=-[$Estado_Resultados.H19]" office:value-type="float" office:value="-4261.092459375" calcext:value-type="float">
            <text:p>-4,261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Flujo Operativo</text:p>
          </table:table-cell>
          <table:table-cell table:style-name="ce562" table:formula="of:=SUM([.D12:.D16])" office:value-type="float" office:value="0" calcext:value-type="float">
            <text:p><text:s/>- <text:s text:c="2"/></text:p>
          </table:table-cell>
          <table:table-cell table:style-name="ce559" table:formula="of:=SUM([.E12:.E16])" office:value-type="float" office:value="9609.26589999996" calcext:value-type="float">
            <text:p><text:s/>9,609 </text:p>
          </table:table-cell>
          <table:table-cell table:style-name="ce559" table:formula="of:=SUM([.F12:.F16])" office:value-type="float" office:value="13329.7986" calcext:value-type="float">
            <text:p><text:s/>13,330 </text:p>
          </table:table-cell>
          <table:table-cell table:style-name="ce559" table:formula="of:=SUM([.G12:.G16])" office:value-type="float" office:value="17236.31755" calcext:value-type="float">
            <text:p><text:s/>17,236 </text:p>
          </table:table-cell>
          <table:table-cell table:style-name="ce559" table:formula="of:=SUM([.H12:.H16])" office:value-type="float" office:value="21338.1220625" calcext:value-type="float">
            <text:p><text:s/>21,338 </text:p>
          </table:table-cell>
          <table:table-cell table:style-name="ce559" table:formula="of:=SUM([.I12:.I16])" office:value-type="float" office:value="25644.976415625" calcext:value-type="float">
            <text:p><text:s/>25,645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7" office:value-type="string" calcext:value-type="string">
            <text:p>Flujo de Caja Económico, FCE</text:p>
          </table:table-cell>
          <table:table-cell table:style-name="ce563" table:formula="of:=[.D11]+[.D17]" office:value-type="float" office:value="-28068" calcext:value-type="float">
            <text:p>-28,068 </text:p>
          </table:table-cell>
          <table:table-cell table:style-name="ce563" table:formula="of:=[.E11]+[.E17]" office:value-type="float" office:value="8877.96589999996" calcext:value-type="float">
            <text:p><text:s/>8,878 </text:p>
          </table:table-cell>
          <table:table-cell table:style-name="ce563" table:formula="of:=[.F11]+[.F17]" office:value-type="float" office:value="12561.9336" calcext:value-type="float">
            <text:p><text:s/>12,562 </text:p>
          </table:table-cell>
          <table:table-cell table:style-name="ce563" table:formula="of:=[.G11]+[.G17]" office:value-type="float" office:value="11930.0593" calcext:value-type="float">
            <text:p><text:s/>11,930 </text:p>
          </table:table-cell>
          <table:table-cell table:style-name="ce563" table:formula="of:=[.H11]+[.H17]" office:value-type="float" office:value="20491.5509" calcext:value-type="float">
            <text:p><text:s/>20,492 </text:p>
          </table:table-cell>
          <table:table-cell table:style-name="ce563" table:formula="of:=[.I11]+[.I17]" office:value-type="float" office:value="44922.970828125" calcext:value-type="float">
            <text:p><text:s/>44,923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Prestamo</text:p>
          </table:table-cell>
          <table:table-cell table:style-name="ce559" table:formula="of:=[$Flujo_Deuda.$D$3]" office:value-type="float" office:value="8067" calcext:value-type="float">
            <text:p><text:s/>8,067 </text:p>
          </table:table-cell>
          <table:table-cell table:style-name="ce559" table:formula="of:=[$Flujo_Deuda.$D$3]" office:value-type="float" office:value="8067" calcext:value-type="float">
            <text:p><text:s/>8,067 </text:p>
          </table:table-cell>
          <table:table-cell table:style-name="ce559" table:formula="of:=[$Flujo_Deuda.$D$3]" office:value-type="float" office:value="8067" calcext:value-type="float">
            <text:p><text:s/>8,067 </text:p>
          </table:table-cell>
          <table:table-cell table:style-name="ce559" table:formula="of:=[$Flujo_Deuda.$D$3]" office:value-type="float" office:value="8067" calcext:value-type="float">
            <text:p><text:s/>8,067 </text:p>
          </table:table-cell>
          <table:table-cell table:style-name="ce559" table:formula="of:=[$Flujo_Deuda.$D$3]" office:value-type="float" office:value="8067" calcext:value-type="float">
            <text:p><text:s/>8,067 </text:p>
          </table:table-cell>
          <table:table-cell table:style-name="ce559"/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Cuota de capital </text:p>
          </table:table-cell>
          <table:table-cell table:style-name="ce559"/>
          <table:table-cell table:style-name="ce559" table:formula="of:=-[$Flujo_Deuda.$E$13]" office:value-type="float" office:value="-8067" calcext:value-type="float">
            <text:p>-8,067 </text:p>
          </table:table-cell>
          <table:table-cell table:style-name="ce559" table:formula="of:=-[$Flujo_Deuda.$E$13]" office:value-type="float" office:value="-8067" calcext:value-type="float">
            <text:p>-8,067 </text:p>
          </table:table-cell>
          <table:table-cell table:style-name="ce559" table:formula="of:=-[$Flujo_Deuda.$E$13]" office:value-type="float" office:value="-8067" calcext:value-type="float">
            <text:p>-8,067 </text:p>
          </table:table-cell>
          <table:table-cell table:style-name="ce559" table:formula="of:=-[$Flujo_Deuda.$E$13]" office:value-type="float" office:value="-8067" calcext:value-type="float">
            <text:p>-8,067 </text:p>
          </table:table-cell>
          <table:table-cell table:style-name="ce559" table:formula="of:=-[$Flujo_Deuda.$E$13]" office:value-type="float" office:value="-8067" calcext:value-type="float">
            <text:p>-8,067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Intereses</text:p>
          </table:table-cell>
          <table:table-cell table:style-name="ce559"/>
          <table:table-cell table:style-name="ce559" table:formula="of:=-[$Flujo_Deuda.$D$13]" office:value-type="float" office:value="-749.290343932646" calcext:value-type="float">
            <text:p>-749 </text:p>
          </table:table-cell>
          <table:table-cell table:style-name="ce559" table:formula="of:=-[$Flujo_Deuda.$D$13]" office:value-type="float" office:value="-749.290343932646" calcext:value-type="float">
            <text:p>-749 </text:p>
          </table:table-cell>
          <table:table-cell table:style-name="ce559" table:formula="of:=-[$Flujo_Deuda.$D$13]" office:value-type="float" office:value="-749.290343932646" calcext:value-type="float">
            <text:p>-749 </text:p>
          </table:table-cell>
          <table:table-cell table:style-name="ce559" table:formula="of:=-[$Flujo_Deuda.$D$13]" office:value-type="float" office:value="-749.290343932646" calcext:value-type="float">
            <text:p>-749 </text:p>
          </table:table-cell>
          <table:table-cell table:style-name="ce559" table:formula="of:=-[$Flujo_Deuda.$D$13]" office:value-type="float" office:value="-749.290343932646" calcext:value-type="float">
            <text:p>-749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4" office:value-type="string" calcext:value-type="string">
            <text:p>Total Flujo de Deuda</text:p>
          </table:table-cell>
          <table:table-cell table:style-name="ce559" table:formula="of:=SUM([.D19:.D21])" office:value-type="float" office:value="8067" calcext:value-type="float">
            <text:p><text:s/>8,067 </text:p>
          </table:table-cell>
          <table:table-cell table:style-name="ce559" table:formula="of:=SUM([.E19:.E21])" office:value-type="float" office:value="-749.290343932646" calcext:value-type="float">
            <text:p>-749 </text:p>
          </table:table-cell>
          <table:table-cell table:style-name="ce559" table:formula="of:=SUM([.F19:.F21])" office:value-type="float" office:value="-749.290343932646" calcext:value-type="float">
            <text:p>-749 </text:p>
          </table:table-cell>
          <table:table-cell table:style-name="ce559" table:formula="of:=SUM([.G19:.G21])" office:value-type="float" office:value="-749.290343932646" calcext:value-type="float">
            <text:p>-749 </text:p>
          </table:table-cell>
          <table:table-cell table:style-name="ce559" table:formula="of:=SUM([.H19:.H21])" office:value-type="float" office:value="-749.290343932646" calcext:value-type="float">
            <text:p>-749 </text:p>
          </table:table-cell>
          <table:table-cell table:style-name="ce559" table:formula="of:=SUM([.I19:.I21])" office:value-type="float" office:value="-8816.29034393265" calcext:value-type="float">
            <text:p>-8,816 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557" office:value-type="string" calcext:value-type="string">
            <text:p>Flujo de Caja Financiero, FCF</text:p>
          </table:table-cell>
          <table:table-cell table:style-name="ce563" table:formula="of:=[.D18]+[.D22]" office:value-type="float" office:value="-20001" calcext:value-type="float">
            <text:p>-20,001 </text:p>
          </table:table-cell>
          <table:table-cell table:style-name="ce563" table:formula="of:=[.E18]+[.E22]" office:value-type="float" office:value="8128.67555606731" calcext:value-type="float">
            <text:p><text:s/>8,129 </text:p>
          </table:table-cell>
          <table:table-cell table:style-name="ce563" table:formula="of:=[.F18]+[.F22]" office:value-type="float" office:value="11812.6432560673" calcext:value-type="float">
            <text:p><text:s/>11,813 </text:p>
          </table:table-cell>
          <table:table-cell table:style-name="ce563" table:formula="of:=[.G18]+[.G22]" office:value-type="float" office:value="11180.7689560673" calcext:value-type="float">
            <text:p><text:s/>11,181 </text:p>
          </table:table-cell>
          <table:table-cell table:style-name="ce563" table:formula="of:=[.H18]+[.H22]" office:value-type="float" office:value="19742.2605560673" calcext:value-type="float">
            <text:p><text:s/>19,742 </text:p>
          </table:table-cell>
          <table:table-cell table:style-name="ce563" table:formula="of:=[.I18]+[.I22]" office:value-type="float" office:value="36106.6804841924" calcext:value-type="float">
            <text:p><text:s/>36,107 </text:p>
          </table:table-cell>
          <table:table-cell/>
          <table:table-cell table:style-name="ce565" table:number-columns-repeated="5"/>
          <table:table-cell table:number-columns-repeated="16369"/>
        </table:table-row>
        <table:table-row table:style-name="ro30">
          <table:table-cell table:number-columns-repeated="2"/>
          <table:table-cell table:style-name="ce558" office:value-type="string" calcext:value-type="string">
            <text:p>(*) Régimen laboral de la Microempresa</text:p>
          </table:table-cell>
          <table:table-cell table:style-name="ce564" table:number-columns-repeated="6"/>
          <table:table-cell table:number-columns-repeated="16375"/>
        </table:table-row>
        <table:table-row table:style-name="ro30">
          <table:table-cell table:number-columns-repeated="2"/>
          <table:table-cell table:style-name="ce558" office:value-type="string" calcext:value-type="string">
            <text:p>(**) Régimen tributario Especial</text:p>
          </table:table-cell>
          <table:table-cell table:style-name="ce564" table:number-columns-repeated="6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ntabilidad" table:style-name="ta18">
        <table:table-column table:style-name="co73" table:default-cell-style-name="ce508"/>
        <table:table-column table:style-name="co74" table:default-cell-style-name="ce508"/>
        <table:table-column table:style-name="co75" table:default-cell-style-name="ce508"/>
        <table:table-column table:style-name="co71" table:default-cell-style-name="ce508"/>
        <table:table-column table:style-name="co76" table:default-cell-style-name="ce508"/>
        <table:table-column table:style-name="co26" table:default-cell-style-name="ce508"/>
        <table:table-column table:style-name="co77" table:default-cell-style-name="ce508"/>
        <table:table-column table:style-name="co25" table:default-cell-style-name="ce508"/>
        <table:table-column table:style-name="co29" table:default-cell-style-name="ce508"/>
        <table:table-column table:style-name="co26" table:number-columns-repeated="8" table:default-cell-style-name="ce508"/>
        <table:table-column table:style-name="co18" table:number-columns-repeated="16367" table:default-cell-style-name="ce508"/>
        <table:table-row table:style-name="ro8" table:number-rows-repeated="3">
          <table:table-cell table:number-columns-repeated="16384"/>
        </table:table-row>
        <table:table-row table:style-name="ro31">
          <table:table-cell table:style-name="ce566"/>
          <table:table-cell table:style-name="ce567"/>
          <table:table-cell table:style-name="ce568" office:value-type="string" calcext:value-type="string" table:number-columns-spanned="3" table:number-rows-spanned="1">
            <text:p>EVALUACIÓN ECONÓMICA</text:p>
          </table:table-cell>
          <table:covered-table-cell table:style-name="ce580"/>
          <table:covered-table-cell table:style-name="ce598"/>
          <table:table-cell table:style-name="ce566"/>
          <table:table-cell table:style-name="ce606" office:value-type="string" calcext:value-type="string" table:number-columns-spanned="3" table:number-rows-spanned="1">
            <text:p>EVALUACIÓN FINANCIERA <text:s text:c="41"/>EN EMPRESA DIVERSIFICADA</text:p>
          </table:table-cell>
          <table:covered-table-cell table:style-name="ce608"/>
          <table:covered-table-cell table:style-name="ce612"/>
          <table:table-cell table:style-name="ce566" table:number-columns-repeated="2"/>
          <table:table-cell table:style-name="ce615" table:number-columns-repeated="4"/>
          <table:table-cell table:style-name="ce566" table:number-columns-repeated="16369"/>
        </table:table-row>
        <table:table-row table:style-name="ro21">
          <table:table-cell/>
          <table:table-cell table:style-name="ce510"/>
          <table:table-cell table:style-name="ce569" table:number-columns-repeated="3"/>
          <table:table-cell/>
          <table:table-cell table:style-name="ce607" table:number-columns-repeated="3"/>
          <table:table-cell table:number-columns-repeated="2"/>
          <table:table-cell table:style-name="ce616" table:number-columns-repeated="4"/>
          <table:table-cell table:number-columns-repeated="16369"/>
        </table:table-row>
        <table:table-row table:style-name="ro22">
          <table:table-cell/>
          <table:table-cell table:style-name="ce510"/>
          <table:table-cell table:style-name="ce570" office:value-type="string" calcext:value-type="string">
            <text:p>Tasa/criterio</text:p>
          </table:table-cell>
          <table:table-cell table:style-name="ce581" office:value-type="string" calcext:value-type="string">
            <text:p>Valor</text:p>
          </table:table-cell>
          <table:table-cell table:style-name="ce570"/>
          <table:table-cell table:style-name="ce599"/>
          <table:table-cell table:style-name="ce570" office:value-type="string" calcext:value-type="string">
            <text:p>Tasa/criterio</text:p>
          </table:table-cell>
          <table:table-cell table:style-name="ce581" office:value-type="string" calcext:value-type="string">
            <text:p>Valor</text:p>
          </table:table-cell>
          <table:table-cell table:style-name="ce570"/>
          <table:table-cell table:number-columns-repeated="2"/>
          <table:table-cell table:style-name="ce616" table:number-columns-repeated="4"/>
          <table:table-cell table:number-columns-repeated="16369"/>
        </table:table-row>
        <table:table-row table:style-name="ro16">
          <table:table-cell/>
          <table:table-cell table:style-name="ce510"/>
          <table:table-cell table:style-name="ce571" office:value-type="string" calcext:value-type="string">
            <text:p>Ku nominal en dolares</text:p>
          </table:table-cell>
          <table:table-cell table:style-name="ce582" table:formula="of:=[$Ku.C12]" office:value-type="percentage" office:value="0.2293" calcext:value-type="percentage">
            <text:p>22.93 %</text:p>
          </table:table-cell>
          <table:table-cell table:style-name="ce599" table:number-columns-repeated="2"/>
          <table:table-cell table:style-name="ce571" office:value-type="string" calcext:value-type="string">
            <text:p>Kers nominal en dolares</text:p>
          </table:table-cell>
          <table:table-cell table:style-name="ce609" office:value-type="percentage" office:value="0.1131" calcext:value-type="percentage">
            <text:p>11.31 %</text:p>
          </table:table-cell>
          <table:table-cell table:style-name="ce599"/>
          <table:table-cell table:number-columns-repeated="16375"/>
        </table:table-row>
        <table:table-row table:style-name="ro16">
          <table:table-cell table:number-columns-repeated="2"/>
          <table:table-cell table:style-name="ce572" office:value-type="string" calcext:value-type="string">
            <text:p>Ku nominal en soles</text:p>
          </table:table-cell>
          <table:table-cell table:style-name="ce583" table:formula="of:=[.D7]*((1+[.D9])/(1+[.D10]))" office:value-type="percentage" office:value="0.231323235294118" calcext:value-type="percentage">
            <text:p>23.13 %</text:p>
          </table:table-cell>
          <table:table-cell table:style-name="ce572"/>
          <table:table-cell table:style-name="ce599"/>
          <table:table-cell table:style-name="ce572" office:value-type="string" calcext:value-type="string">
            <text:p>Kers nominal en soles</text:p>
          </table:table-cell>
          <table:table-cell table:style-name="ce582" table:formula="of:=[.H7]*(1+[.H9])/(1+[.H10])" office:value-type="percentage" office:value="0.114097941176471" calcext:value-type="percentage">
            <text:p>11.41 %</text:p>
          </table:table-cell>
          <table:table-cell table:style-name="ce572"/>
          <table:table-cell table:number-columns-repeated="4"/>
          <table:table-cell table:style-name="ce617"/>
          <table:table-cell table:number-columns-repeated="16370"/>
        </table:table-row>
        <table:table-row table:style-name="ro16">
          <table:table-cell table:number-columns-repeated="2"/>
          <table:table-cell table:style-name="ce572" office:value-type="string" calcext:value-type="string">
            <text:p>Inflacion en Perú</text:p>
          </table:table-cell>
          <table:table-cell table:style-name="ce584" table:formula="of:=[$Resumen.H15]" office:value-type="percentage" office:value="0.029" calcext:value-type="percentage">
            <text:p>2.9%</text:p>
          </table:table-cell>
          <table:table-cell table:style-name="ce572"/>
          <table:table-cell table:style-name="ce599"/>
          <table:table-cell table:style-name="ce572" office:value-type="string" calcext:value-type="string">
            <text:p>Inflacion en Perú</text:p>
          </table:table-cell>
          <table:table-cell table:style-name="ce584" table:formula="of:=[.D9]" office:value-type="percentage" office:value="0.029" calcext:value-type="percentage">
            <text:p>2.9%</text:p>
          </table:table-cell>
          <table:table-cell table:style-name="ce572"/>
          <table:table-cell table:number-columns-repeated="16375"/>
        </table:table-row>
        <table:table-row table:style-name="ro16">
          <table:table-cell table:number-columns-repeated="2"/>
          <table:table-cell table:style-name="ce572" office:value-type="string" calcext:value-type="string">
            <text:p>Inflacion USA</text:p>
          </table:table-cell>
          <table:table-cell table:style-name="ce584" table:formula="of:=[$Resumen.H14]" office:value-type="percentage" office:value="0.02" calcext:value-type="percentage">
            <text:p>2.0%</text:p>
          </table:table-cell>
          <table:table-cell table:style-name="ce572"/>
          <table:table-cell table:style-name="ce599"/>
          <table:table-cell table:style-name="ce572" office:value-type="string" calcext:value-type="string">
            <text:p>Inflacion USA</text:p>
          </table:table-cell>
          <table:table-cell table:style-name="ce584" table:formula="of:=[.D10]" office:value-type="percentage" office:value="0.02" calcext:value-type="percentage">
            <text:p>2.0%</text:p>
          </table:table-cell>
          <table:table-cell table:style-name="ce572"/>
          <table:table-cell table:number-columns-repeated="3"/>
          <table:table-cell table:style-name="ce617" table:number-columns-repeated="3"/>
          <table:table-cell table:number-columns-repeated="16369"/>
        </table:table-row>
        <table:table-row table:style-name="ro16">
          <table:table-cell table:number-columns-repeated="2"/>
          <table:table-cell table:style-name="ce572" office:value-type="string" calcext:value-type="string">
            <text:p>COK <text:s/>real</text:p>
          </table:table-cell>
          <table:table-cell table:style-name="ce584" table:formula="of:=((1+[.D8])/(1+[.D9]))-1" office:value-type="percentage" office:value="0.196621219916538" calcext:value-type="percentage">
            <text:p>19.7%</text:p>
          </table:table-cell>
          <table:table-cell table:style-name="ce572"/>
          <table:table-cell table:style-name="ce599"/>
          <table:table-cell table:style-name="ce572" office:value-type="string" calcext:value-type="string">
            <text:p>Kers <text:s/>real</text:p>
          </table:table-cell>
          <table:table-cell table:style-name="ce610" table:formula="of:=((1+[.H8])/(1+[.H9]))-1" office:value-type="percentage" office:value="0.0826996512890872" calcext:value-type="percentage">
            <text:p>8 %</text:p>
          </table:table-cell>
          <table:table-cell table:style-name="ce572"/>
          <table:table-cell table:number-columns-repeated="16375"/>
        </table:table-row>
        <table:table-row table:style-name="ro5">
          <table:table-cell table:number-columns-repeated="2"/>
          <table:table-cell table:style-name="ce572"/>
          <table:table-cell table:style-name="ce585"/>
          <table:table-cell table:style-name="ce572"/>
          <table:table-cell table:style-name="ce599"/>
          <table:table-cell table:style-name="ce572"/>
          <table:table-cell table:style-name="ce587"/>
          <table:table-cell table:style-name="ce572"/>
          <table:table-cell table:number-columns-repeated="4"/>
          <table:table-cell table:style-name="ce617" table:number-columns-repeated="2"/>
          <table:table-cell table:number-columns-repeated="16369"/>
        </table:table-row>
        <table:table-row table:style-name="ro16">
          <table:table-cell table:number-columns-repeated="2"/>
          <table:table-cell table:style-name="ce573" office:value-type="string" calcext:value-type="string">
            <text:p>VANE =</text:p>
          </table:table-cell>
          <table:table-cell table:style-name="ce586" table:formula="of:=NPV([.D11];[$Flujo_Caja.E18:.I18])+[$Flujo_Caja.D18]" office:value-type="float" office:value="23390.7675266157" calcext:value-type="float">
            <text:p><text:s/>23,391 </text:p>
          </table:table-cell>
          <table:table-cell table:style-name="ce600" office:value-type="string" calcext:value-type="string">
            <text:p>soles</text:p>
          </table:table-cell>
          <table:table-cell table:style-name="ce599"/>
          <table:table-cell table:style-name="ce573" office:value-type="string" calcext:value-type="string">
            <text:p><text:s/>VANF=</text:p>
          </table:table-cell>
          <table:table-cell table:style-name="ce611" table:formula="of:=NPV([.H11];[$Flujo_Caja.E23:.I23])+[$Flujo_Caja.D23]" office:value-type="float" office:value="45028.9278569308" calcext:value-type="float">
            <text:p><text:s/>45,029 </text:p>
          </table:table-cell>
          <table:table-cell table:style-name="ce613" office:value-type="string" office:string-value="soles" calcext:value-type="string">
            <text:p><text:s/>soles </text:p>
          </table:table-cell>
          <table:table-cell table:number-columns-repeated="16375"/>
        </table:table-row>
        <table:table-row table:style-name="ro16">
          <table:table-cell table:number-columns-repeated="2"/>
          <table:table-cell table:style-name="ce572"/>
          <table:table-cell table:style-name="ce587"/>
          <table:table-cell table:style-name="ce572"/>
          <table:table-cell table:style-name="ce599"/>
          <table:table-cell table:style-name="ce572"/>
          <table:table-cell table:style-name="ce587"/>
          <table:table-cell table:style-name="ce572"/>
          <table:table-cell table:number-columns-repeated="16375"/>
        </table:table-row>
        <table:table-row table:style-name="ro16">
          <table:table-cell table:number-columns-repeated="2"/>
          <table:table-cell table:style-name="ce573" office:value-type="string" calcext:value-type="string">
            <text:p>TIRE =</text:p>
          </table:table-cell>
          <table:table-cell table:style-name="ce588" table:formula="of:=IRR([$Flujo_Caja.D18:.I18])" office:value-type="percentage" office:value="0.442900906809114" calcext:value-type="percentage">
            <text:p>44.3%</text:p>
          </table:table-cell>
          <table:table-cell table:style-name="ce600" office:value-type="string" calcext:value-type="string">
            <text:p>anual</text:p>
          </table:table-cell>
          <table:table-cell table:style-name="ce599"/>
          <table:table-cell table:style-name="ce573" office:value-type="string" calcext:value-type="string">
            <text:p>TIRF <text:s/>=</text:p>
          </table:table-cell>
          <table:table-cell table:style-name="ce588" table:formula="of:=IRR([$Flujo_Caja.D23:.I23])" office:value-type="percentage" office:value="0.566966535509241" calcext:value-type="percentage">
            <text:p>56.7%</text:p>
          </table:table-cell>
          <table:table-cell table:style-name="ce614" office:value-type="string" calcext:value-type="string">
            <text:p>anual</text:p>
          </table:table-cell>
          <table:table-cell table:number-columns-repeated="16375"/>
        </table:table-row>
        <table:table-row table:style-name="ro16">
          <table:table-cell table:number-columns-repeated="2"/>
          <table:table-cell table:style-name="ce574"/>
          <table:table-cell table:style-name="ce589"/>
          <table:table-cell table:style-name="ce574"/>
          <table:table-cell table:number-columns-repeated="9"/>
          <table:table-cell table:style-name="ce616"/>
          <table:table-cell table:number-columns-repeated="16369"/>
        </table:table-row>
        <table:table-row table:style-name="ro32">
          <table:table-cell/>
          <table:table-cell table:style-name="ce510"/>
          <table:table-cell table:style-name="ce575" office:value-type="string" calcext:value-type="string" table:number-columns-spanned="3" table:number-rows-spanned="1">
            <text:p>EVALUACIÓN FINANCIERA CON MÉTODO WACCC</text:p>
          </table:table-cell>
          <table:covered-table-cell table:style-name="ce590"/>
          <table:covered-table-cell table:style-name="ce601"/>
          <table:table-cell/>
          <table:table-cell table:style-name="ce606" office:value-type="string" calcext:value-type="string" table:number-columns-spanned="3" table:number-rows-spanned="1">
            <text:p>EVALUACIÓN FINANCIERA <text:s text:c="35"/>EN EMPRESA NO DIVERSIFICADA</text:p>
          </table:table-cell>
          <table:covered-table-cell table:style-name="ce608"/>
          <table:covered-table-cell table:style-name="ce612"/>
          <table:table-cell table:number-columns-repeated="16375"/>
        </table:table-row>
        <table:table-row table:style-name="ro33">
          <table:table-cell/>
          <table:table-cell table:style-name="ce510"/>
          <table:table-cell table:style-name="ce576" table:number-columns-repeated="3"/>
          <table:table-cell/>
          <table:table-cell table:style-name="ce607" table:number-columns-repeated="3"/>
          <table:table-cell table:number-columns-repeated="16375"/>
        </table:table-row>
        <table:table-row table:style-name="ro24">
          <table:table-cell/>
          <table:table-cell table:style-name="ce510"/>
          <table:table-cell table:style-name="ce570" office:value-type="string" calcext:value-type="string">
            <text:p>Tasa/criterio</text:p>
          </table:table-cell>
          <table:table-cell table:style-name="ce581" office:value-type="string" calcext:value-type="string">
            <text:p>Valor</text:p>
          </table:table-cell>
          <table:table-cell table:style-name="ce570"/>
          <table:table-cell table:style-name="ce605"/>
          <table:table-cell table:style-name="ce570" office:value-type="string" calcext:value-type="string">
            <text:p>Tasa/criterio</text:p>
          </table:table-cell>
          <table:table-cell table:style-name="ce581" office:value-type="string" calcext:value-type="string">
            <text:p>Valor</text:p>
          </table:table-cell>
          <table:table-cell table:style-name="ce570"/>
          <table:table-cell table:number-columns-repeated="16375"/>
        </table:table-row>
        <table:table-row table:style-name="ro24">
          <table:table-cell table:number-columns-repeated="2"/>
          <table:table-cell table:style-name="ce577" office:value-type="string" calcext:value-type="string">
            <text:p>Wacc nominal en dolares</text:p>
          </table:table-cell>
          <table:table-cell table:style-name="ce591" table:formula="of:=[$Ke_Kwacc.K13]" office:value-type="percentage" office:value="0.272421930789321" calcext:value-type="percentage">
            <text:p>27.24 %</text:p>
          </table:table-cell>
          <table:table-cell table:style-name="ce602"/>
          <table:table-cell table:style-name="ce605"/>
          <table:table-cell table:style-name="ce577" office:value-type="string" calcext:value-type="string">
            <text:p>Kert nominal en dolares</text:p>
          </table:table-cell>
          <table:table-cell table:style-name="ce591" table:formula="of:=[$Ke_Kwacc.E13]" office:value-type="percentage" office:value="0.295472482847033" calcext:value-type="percentage">
            <text:p>29.55 %</text:p>
          </table:table-cell>
          <table:table-cell table:style-name="ce602"/>
          <table:table-cell table:number-columns-repeated="16375"/>
        </table:table-row>
        <table:table-row table:style-name="ro16">
          <table:table-cell table:number-columns-repeated="2"/>
          <table:table-cell table:style-name="ce578" office:value-type="string" calcext:value-type="string">
            <text:p>wacc nominal en soles</text:p>
          </table:table-cell>
          <table:table-cell table:style-name="ce592" table:formula="of:=[.D20]*(1+[.D22])/(1+[.D23])" office:value-type="percentage" office:value="0.27482565370805" calcext:value-type="percentage">
            <text:p>27.48 %</text:p>
          </table:table-cell>
          <table:table-cell table:style-name="ce578"/>
          <table:table-cell table:style-name="ce605"/>
          <table:table-cell table:style-name="ce578" office:value-type="string" calcext:value-type="string">
            <text:p>Kert nominal en soles</text:p>
          </table:table-cell>
          <table:table-cell table:style-name="ce592" table:formula="of:=[.H20]*(1+[.H22])/(1+[.H23])" office:value-type="percentage" office:value="0.298079592989801" calcext:value-type="percentage">
            <text:p>29.81 %</text:p>
          </table:table-cell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8" office:value-type="string" calcext:value-type="string">
            <text:p>Inflacion en Perú</text:p>
          </table:table-cell>
          <table:table-cell table:style-name="ce593" table:formula="of:=[.D9]" office:value-type="percentage" office:value="0.029" calcext:value-type="percentage">
            <text:p>2.9%</text:p>
          </table:table-cell>
          <table:table-cell table:style-name="ce578"/>
          <table:table-cell table:style-name="ce605"/>
          <table:table-cell table:style-name="ce578" office:value-type="string" calcext:value-type="string">
            <text:p>Inflacion en Perú</text:p>
          </table:table-cell>
          <table:table-cell table:style-name="ce593" table:formula="of:=[.D9]" office:value-type="percentage" office:value="0.029" calcext:value-type="percentage">
            <text:p>2.9%</text:p>
          </table:table-cell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8" office:value-type="string" calcext:value-type="string">
            <text:p>Inflacion USA</text:p>
          </table:table-cell>
          <table:table-cell table:style-name="ce593" table:formula="of:=[.D10]" office:value-type="percentage" office:value="0.02" calcext:value-type="percentage">
            <text:p>2.0%</text:p>
          </table:table-cell>
          <table:table-cell table:style-name="ce578"/>
          <table:table-cell table:style-name="ce605"/>
          <table:table-cell table:style-name="ce578" office:value-type="string" calcext:value-type="string">
            <text:p>Inflacion USA</text:p>
          </table:table-cell>
          <table:table-cell table:style-name="ce593" table:formula="of:=[.D10]" office:value-type="percentage" office:value="0.02" calcext:value-type="percentage">
            <text:p>2.0%</text:p>
          </table:table-cell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8" office:value-type="string" calcext:value-type="string">
            <text:p>Wacc <text:s/>real</text:p>
          </table:table-cell>
          <table:table-cell table:style-name="ce594" table:formula="of:=((1+[.D21])/(1+[.D22]))-1" office:value-type="percentage" office:value="0.238897622651167" calcext:value-type="percentage">
            <text:p>24 %</text:p>
          </table:table-cell>
          <table:table-cell table:style-name="ce578"/>
          <table:table-cell table:style-name="ce605"/>
          <table:table-cell table:style-name="ce578" office:value-type="string" calcext:value-type="string">
            <text:p>Kert <text:s/>real</text:p>
          </table:table-cell>
          <table:table-cell table:style-name="ce594" table:formula="of:=((1+[.H21])/(1+[.H22]))-1" office:value-type="percentage" office:value="0.261496203099904" calcext:value-type="percentage">
            <text:p>26 %</text:p>
          </table:table-cell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8"/>
          <table:table-cell table:style-name="ce595"/>
          <table:table-cell table:style-name="ce578"/>
          <table:table-cell table:style-name="ce605"/>
          <table:table-cell table:style-name="ce578"/>
          <table:table-cell table:style-name="ce595"/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9" office:value-type="string" calcext:value-type="string">
            <text:p><text:s/>VANF=</text:p>
          </table:table-cell>
          <table:table-cell table:style-name="ce596" table:formula="of:=NPV([.D24];[$Flujo_Caja.E18:.I18])+[$Flujo_Caja.D18]" office:value-type="float" office:value="17646.4249001387" calcext:value-type="float">
            <text:p><text:s/>17,646 </text:p>
          </table:table-cell>
          <table:table-cell table:style-name="ce603" office:value-type="string" office:string-value="soles" calcext:value-type="string">
            <text:p><text:s/>soles </text:p>
          </table:table-cell>
          <table:table-cell table:style-name="ce605"/>
          <table:table-cell table:style-name="ce579" office:value-type="string" calcext:value-type="string">
            <text:p><text:s/>VANF=</text:p>
          </table:table-cell>
          <table:table-cell table:style-name="ce596" table:formula="of:=NPV([.H24];[$Flujo_Caja.E23:.I23])+[$Flujo_Caja.D23]" office:value-type="float" office:value="18532.803926641" calcext:value-type="float">
            <text:p><text:s/>18,533 </text:p>
          </table:table-cell>
          <table:table-cell table:style-name="ce603" office:value-type="string" office:string-value="soles" calcext:value-type="string">
            <text:p><text:s/>soles </text:p>
          </table:table-cell>
          <table:table-cell table:number-columns-repeated="16375"/>
        </table:table-row>
        <table:table-row table:style-name="ro16">
          <table:table-cell table:number-columns-repeated="2"/>
          <table:table-cell table:style-name="ce578"/>
          <table:table-cell table:style-name="ce595"/>
          <table:table-cell table:style-name="ce578"/>
          <table:table-cell table:style-name="ce605"/>
          <table:table-cell table:style-name="ce578"/>
          <table:table-cell table:style-name="ce595"/>
          <table:table-cell table:style-name="ce578"/>
          <table:table-cell table:number-columns-repeated="16375"/>
        </table:table-row>
        <table:table-row table:style-name="ro16">
          <table:table-cell table:number-columns-repeated="2"/>
          <table:table-cell table:style-name="ce579" office:value-type="string" calcext:value-type="string">
            <text:p>TIRF <text:s/>=</text:p>
          </table:table-cell>
          <table:table-cell table:style-name="ce597" table:formula="of:=IRR([$Flujo_Caja.D23:.I23])" office:value-type="percentage" office:value="0.566966535509241" calcext:value-type="percentage">
            <text:p>56.7%</text:p>
          </table:table-cell>
          <table:table-cell table:style-name="ce604" office:value-type="string" calcext:value-type="string">
            <text:p>soles</text:p>
          </table:table-cell>
          <table:table-cell table:style-name="ce605"/>
          <table:table-cell table:style-name="ce579" office:value-type="string" calcext:value-type="string">
            <text:p>TIRF <text:s/>=</text:p>
          </table:table-cell>
          <table:table-cell table:style-name="ce597" table:formula="of:=IRR([$Flujo_Caja.D23:.I23])" office:value-type="percentage" office:value="0.566966535509241" calcext:value-type="percentage">
            <text:p>56.7%</text:p>
          </table:table-cell>
          <table:table-cell table:style-name="ce604" office:value-type="string" calcext:value-type="string">
            <text:p>anual</text:p>
          </table:table-cell>
          <table:table-cell table:number-columns-repeated="16375"/>
        </table:table-row>
        <table:table-row table:style-name="ro4" table:number-rows-repeated="979">
          <table:table-cell table:number-columns-repeated="16384"/>
        </table:table-row>
        <table:table-row table:style-name="ro8" table:number-rows-repeated="104756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ensibilidad" table:style-name="ta19">
        <table:table-column table:style-name="co1" table:default-cell-style-name="ce618"/>
        <table:table-column table:style-name="co61" table:default-cell-style-name="ce618"/>
        <table:table-column table:style-name="co1" table:number-columns-repeated="6" table:default-cell-style-name="ce618"/>
        <table:table-column table:style-name="co78" table:default-cell-style-name="ce618"/>
        <table:table-column table:style-name="co79" table:default-cell-style-name="ce618"/>
        <table:table-column table:style-name="co1" table:number-columns-repeated="16374" table:default-cell-style-name="ce618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21" office:value-type="string" calcext:value-type="string">
            <text:p>Variable</text:p>
          </table:table-cell>
          <table:table-cell table:style-name="ce632" office:value-type="string" calcext:value-type="string">
            <text:p>VANE</text:p>
          </table:table-cell>
          <table:table-cell table:style-name="ce632" office:value-type="string" calcext:value-type="string">
            <text:p>TIRE</text:p>
          </table:table-cell>
          <table:table-cell table:style-name="ce632" office:value-type="string" calcext:value-type="string">
            <text:p>VANF</text:p>
          </table:table-cell>
          <table:table-cell table:style-name="ce632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/>
          <table:table-cell table:style-name="ce622"/>
          <table:table-cell table:style-name="ce633" table:formula="of:=[$Resumen.C20]" office:value-type="float" office:value="23390.7675266157" calcext:value-type="float">
            <text:p>23,391</text:p>
          </table:table-cell>
          <table:table-cell table:style-name="ce639" table:formula="of:=[$Resumen.C22]" office:value-type="percentage" office:value="0.442900906809114" calcext:value-type="percentage">
            <text:p>44.29 %</text:p>
          </table:table-cell>
          <table:table-cell table:style-name="ce646" table:formula="of:=[$Resumen.E20]" office:value-type="float" office:value="17646.4249001387" calcext:value-type="float">
            <text:p>17,646.4</text:p>
          </table:table-cell>
          <table:table-cell table:style-name="ce639" table:formula="of:=[$Resumen.E22]" office:value-type="percentage" office:value="0.566966535509241" calcext:value-type="percentage">
            <text:p>56.70 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23" table:formula="of:=&quot;1. Sensibilidad de &quot;&amp;[$Resumen.G20]" office:value-type="string" office:string-value="1. Sensibilidad de Precio venta ovillo" calcext:value-type="string">
            <text:p>1. Sensibilidad de Precio venta ovillo</text:p>
          </table:table-cell>
          <table:table-cell table:style-name="ce623" table:number-columns-repeated="4"/>
          <table:table-cell table:number-columns-repeated="16378"/>
        </table:table-row>
        <table:table-row table:style-name="ro34">
          <table:table-cell/>
          <table:table-cell table:style-name="ce624" table:formula="of:=[$Resumen.G20]" office:value-type="string" office:string-value="Precio venta ovillo" calcext:value-type="string">
            <text:p>Precio venta ovillo</text:p>
          </table:table-cell>
          <table:table-cell table:style-name="ce634" office:value-type="string" calcext:value-type="string">
            <text:p>VANE</text:p>
          </table:table-cell>
          <table:table-cell table:style-name="ce634" office:value-type="string" calcext:value-type="string">
            <text:p>TIRE</text:p>
          </table:table-cell>
          <table:table-cell table:style-name="ce634" office:value-type="string" calcext:value-type="string">
            <text:p>VANF</text:p>
          </table:table-cell>
          <table:table-cell table:style-name="ce647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 table:style-name="ce619"/>
          <table:table-cell table:style-name="ce625" office:value-type="float" office:value="6.3" calcext:value-type="float">
            <text:p>S/. 6.30</text:p>
          </table:table-cell>
          <table:table-cell table:style-name="ce635" office:value-type="float" office:value="71454.1126861108" calcext:value-type="float">
            <text:p>71,454</text:p>
          </table:table-cell>
          <table:table-cell table:style-name="ce640" office:value-type="percentage" office:value="0.960144380282033" calcext:value-type="percentage">
            <text:p>96 %</text:p>
          </table:table-cell>
          <table:table-cell table:style-name="ce635" office:value-type="float" office:value="57761.6340339825" calcext:value-type="float">
            <text:p>57,762</text:p>
          </table:table-cell>
          <table:table-cell table:style-name="ce648" office:value-type="percentage" office:value="1.18975182876027" calcext:value-type="percentage">
            <text:p>119 %</text:p>
          </table:table-cell>
          <table:table-cell table:number-columns-repeated="2"/>
          <table:table-cell table:style-name="ce653" table:formula="of:=[.D8]-[.D11]" office:value-type="percentage" office:value="0.400326610485348" calcext:value-type="percentage">
            <text:p>40.032661048534800%</text:p>
          </table:table-cell>
          <table:table-cell table:number-columns-repeated="16375"/>
        </table:table-row>
        <table:table-row table:style-name="ro1">
          <table:table-cell/>
          <table:table-cell table:style-name="ce626" office:value-type="float" office:value="6.2" calcext:value-type="float">
            <text:p>S/. 6.20</text:p>
          </table:table-cell>
          <table:table-cell table:style-name="ce633" office:value-type="float" office:value="58940.8865079888" calcext:value-type="float">
            <text:p>58,941</text:p>
          </table:table-cell>
          <table:table-cell table:style-name="ce641" office:value-type="percentage" office:value="0.826495433783506" calcext:value-type="percentage">
            <text:p>83 %</text:p>
          </table:table-cell>
          <table:table-cell table:style-name="ce633" office:value-type="float" office:value="46793.2654528756" calcext:value-type="float">
            <text:p>46,793</text:p>
          </table:table-cell>
          <table:table-cell table:style-name="ce649" office:value-type="percentage" office:value="1.00250672390304" calcext:value-type="percentage">
            <text:p>100 %</text:p>
          </table:table-cell>
          <table:table-cell table:number-columns-repeated="16378"/>
        </table:table-row>
        <table:table-row table:style-name="ro1">
          <table:table-cell/>
          <table:table-cell table:style-name="ce626" office:value-type="float" office:value="6.1" calcext:value-type="float">
            <text:p>S/. 6.10</text:p>
          </table:table-cell>
          <table:table-cell table:style-name="ce633" office:value-type="float" office:value="46427.6603298665" calcext:value-type="float">
            <text:p>46,428</text:p>
          </table:table-cell>
          <table:table-cell table:style-name="ce639" office:value-type="percentage" office:value="0.693098030067668" calcext:value-type="percentage">
            <text:p>69.31 %</text:p>
          </table:table-cell>
          <table:table-cell table:style-name="ce646" office:value-type="float" office:value="35824.8968717686" calcext:value-type="float">
            <text:p>35,824.9</text:p>
          </table:table-cell>
          <table:table-cell table:style-name="ce639" office:value-type="percentage" office:value="0.821489121108439" calcext:value-type="percentage">
            <text:p>82.15 %</text:p>
          </table:table-cell>
          <table:table-cell table:number-columns-repeated="16378"/>
        </table:table-row>
        <table:table-row table:style-name="ro1">
          <table:table-cell/>
          <table:table-cell table:style-name="ce627" office:value-type="float" office:value="6" calcext:value-type="float">
            <text:p>S/. 6.00</text:p>
          </table:table-cell>
          <table:table-cell table:style-name="ce636" office:value-type="float" office:value="33914.4341517444" calcext:value-type="float">
            <text:p>S/33,914.43</text:p>
          </table:table-cell>
          <table:table-cell table:style-name="ce642" office:value-type="percentage" office:value="0.559817769796686" calcext:value-type="percentage">
            <text:p>55.98 %</text:p>
          </table:table-cell>
          <table:table-cell table:style-name="ce636" office:value-type="float" office:value="24856.5282906616" calcext:value-type="float">
            <text:p>S/24,856.53</text:p>
          </table:table-cell>
          <table:table-cell table:style-name="ce650" office:value-type="percentage" office:value="0.64714658876133" calcext:value-type="percentage">
            <text:p>64.71 %</text:p>
          </table:table-cell>
          <table:table-cell table:style-name="ce652"/>
          <table:table-cell table:number-columns-repeated="16377"/>
        </table:table-row>
        <table:table-row table:style-name="ro1">
          <table:table-cell/>
          <table:table-cell table:style-name="ce626" office:value-type="float" office:value="5.95" calcext:value-type="float">
            <text:p>S/. 5.95</text:p>
          </table:table-cell>
          <table:table-cell table:style-name="ce633" office:value-type="float" office:value="27657.8210626834" calcext:value-type="float">
            <text:p>27,658</text:p>
          </table:table-cell>
          <table:table-cell table:style-name="ce641" office:value-type="percentage" office:value="0.493151257551213" calcext:value-type="percentage">
            <text:p>49 %</text:p>
          </table:table-cell>
          <table:table-cell table:style-name="ce633" office:value-type="float" office:value="19372.3440001082" calcext:value-type="float">
            <text:p>19,372</text:p>
          </table:table-cell>
          <table:table-cell table:style-name="ce649" office:value-type="percentage" office:value="0.56255142893071" calcext:value-type="percentage">
            <text:p>56 %</text:p>
          </table:table-cell>
          <table:table-cell table:number-columns-repeated="2"/>
          <table:table-cell table:formula="of:=[.B14]/[.B11]" office:value-type="float" office:value="0.955" calcext:value-type="float">
            <text:p>0.955</text:p>
          </table:table-cell>
          <table:table-cell table:number-columns-repeated="16375"/>
        </table:table-row>
        <table:table-row table:style-name="ro1">
          <table:table-cell/>
          <table:table-cell table:style-name="ce626" office:value-type="float" office:value="5.85" calcext:value-type="float">
            <text:p>S/. 5.85</text:p>
          </table:table-cell>
          <table:table-cell table:style-name="ce633" office:value-type="float" office:value="15144.5948845611" calcext:value-type="float">
            <text:p>15,145</text:p>
          </table:table-cell>
          <table:table-cell table:style-name="ce641" office:value-type="percentage" office:value="0.359538947795859" calcext:value-type="percentage">
            <text:p>36 %</text:p>
          </table:table-cell>
          <table:table-cell table:style-name="ce633" office:value-type="float" office:value="8403.97541900112" calcext:value-type="float">
            <text:p>8,404</text:p>
          </table:table-cell>
          <table:table-cell table:style-name="ce649" office:value-type="percentage" office:value="0.398459811453382" calcext:value-type="percentage">
            <text:p>40 %</text:p>
          </table:table-cell>
          <table:table-cell table:number-columns-repeated="2"/>
          <table:table-cell table:style-name="ce654" table:formula="of:=1-[.I12]" office:value-type="percentage" office:value="0.0449999999999999" calcext:value-type="percentage">
            <text:p>4.50 %</text:p>
          </table:table-cell>
          <table:table-cell table:number-columns-repeated="16375"/>
        </table:table-row>
        <table:table-row table:style-name="ro1">
          <table:table-cell/>
          <table:table-cell table:style-name="ce628" office:value-type="float" office:value="5.73" calcext:value-type="float">
            <text:p>S/. 5.73</text:p>
          </table:table-cell>
          <table:table-cell table:style-name="ce637" office:value-type="float" office:value="0.000000000152795109897852" calcext:value-type="float">
            <text:p>S/0.00</text:p>
          </table:table-cell>
          <table:table-cell table:style-name="ce643" office:value-type="percentage" office:value="0.19662121991654" calcext:value-type="percentage">
            <text:p>19.66 %</text:p>
          </table:table-cell>
          <table:table-cell table:style-name="ce637" office:value-type="float" office:value="-4870.89840976713" calcext:value-type="float">
            <text:p>-S/4,870.90</text:p>
          </table:table-cell>
          <table:table-cell table:style-name="ce651" office:value-type="percentage" office:value="0.20829033965111" calcext:value-type="percentage">
            <text:p>20.83 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29" table:formula="of:=&quot;2. Sensibilidad de &quot;&amp;[$Resumen.G21]" office:value-type="string" office:string-value="2. Sensibilidad de Precio compra ovillo" calcext:value-type="string" table:number-columns-spanned="5" table:number-rows-spanned="1">
            <text:p>2. Sensibilidad de Precio compra ovillo</text:p>
          </table:table-cell>
          <table:covered-table-cell table:number-columns-repeated="4" table:style-name="ce629"/>
          <table:table-cell table:number-columns-repeated="16378"/>
        </table:table-row>
        <table:table-row table:style-name="ro34">
          <table:table-cell/>
          <table:table-cell table:style-name="ce624" table:formula="of:=[$Resumen.G21]" office:value-type="string" office:string-value="Precio compra ovillo" calcext:value-type="string">
            <text:p>Precio compra ovillo</text:p>
          </table:table-cell>
          <table:table-cell table:style-name="ce634" office:value-type="string" calcext:value-type="string">
            <text:p>VANE</text:p>
          </table:table-cell>
          <table:table-cell table:style-name="ce634" office:value-type="string" calcext:value-type="string">
            <text:p>TIRE</text:p>
          </table:table-cell>
          <table:table-cell table:style-name="ce634" office:value-type="string" calcext:value-type="string">
            <text:p>VANF</text:p>
          </table:table-cell>
          <table:table-cell table:style-name="ce647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/>
          <table:table-cell table:style-name="ce630" office:value-type="float" office:value="4.27" calcext:value-type="float">
            <text:p>S/. 4.27</text:p>
          </table:table-cell>
          <table:table-cell table:style-name="ce638" office:value-type="float" office:value="0" calcext:value-type="float">
            <text:p>S/0.00</text:p>
          </table:table-cell>
          <table:table-cell table:style-name="ce644" office:value-type="percentage" office:value="0.196621219916538" calcext:value-type="percentage">
            <text:p>19.66 %</text:p>
          </table:table-cell>
          <table:table-cell table:style-name="ce638" office:value-type="float" office:value="-5170.43288276746" calcext:value-type="float">
            <text:p>-S/5,170.43</text:p>
          </table:table-cell>
          <table:table-cell table:style-name="ce644" office:value-type="percentage" office:value="0.207868948819822" calcext:value-type="percentage">
            <text:p>20.79 %</text:p>
          </table:table-cell>
          <table:table-cell table:number-columns-repeated="16378"/>
        </table:table-row>
        <table:table-row table:style-name="ro1">
          <table:table-cell/>
          <table:table-cell table:style-name="ce622" office:value-type="float" office:value="4.2" calcext:value-type="float">
            <text:p>S/. 4.20</text:p>
          </table:table-cell>
          <table:table-cell table:style-name="ce633" office:value-type="float" office:value="8438.06540185939" calcext:value-type="float">
            <text:p>8,438</text:p>
          </table:table-cell>
          <table:table-cell table:style-name="ce645" office:value-type="percentage" office:value="0.285439684635302" calcext:value-type="percentage">
            <text:p>28.5%</text:p>
          </table:table-cell>
          <table:table-cell table:style-name="ce633" office:value-type="float" office:value="2277.91595676418" calcext:value-type="float">
            <text:p>2,278</text:p>
          </table:table-cell>
          <table:table-cell table:style-name="ce645" office:value-type="percentage" office:value="0.309921759540691" calcext:value-type="percentage">
            <text:p>31.0%</text:p>
          </table:table-cell>
          <table:table-cell table:number-columns-repeated="16378"/>
        </table:table-row>
        <table:table-row table:style-name="ro1">
          <table:table-cell/>
          <table:table-cell table:style-name="ce622" office:value-type="float" office:value="4.1" calcext:value-type="float">
            <text:p>S/. 4.10</text:p>
          </table:table-cell>
          <table:table-cell table:style-name="ce633" office:value-type="float" office:value="21176.2497768019" calcext:value-type="float">
            <text:p>21,176</text:p>
          </table:table-cell>
          <table:table-cell table:style-name="ce641" office:value-type="percentage" office:value="0.421262176842883" calcext:value-type="percentage">
            <text:p>42 %</text:p>
          </table:table-cell>
          <table:table-cell table:style-name="ce633" office:value-type="float" office:value="13549.853157872" calcext:value-type="float">
            <text:p>13,550</text:p>
          </table:table-cell>
          <table:table-cell table:style-name="ce641" office:value-type="percentage" office:value="0.472581119612476" calcext:value-type="percentage">
            <text:p>47 %</text:p>
          </table:table-cell>
          <table:table-cell table:number-columns-repeated="16378"/>
        </table:table-row>
        <table:table-row table:style-name="ro1">
          <table:table-cell table:style-name="ce620"/>
          <table:table-cell table:style-name="ce631" office:value-type="float" office:value="4" calcext:value-type="float">
            <text:p>S/. 4.00</text:p>
          </table:table-cell>
          <table:table-cell table:style-name="ce636" office:value-type="float" office:value="33914.4341517444" calcext:value-type="float">
            <text:p>S/33,914.43</text:p>
          </table:table-cell>
          <table:table-cell table:style-name="ce642" office:value-type="percentage" office:value="0.559817769796686" calcext:value-type="percentage">
            <text:p>55.98 %</text:p>
          </table:table-cell>
          <table:table-cell table:style-name="ce636" office:value-type="float" office:value="24856.5282906616" calcext:value-type="float">
            <text:p>S/24,856.53</text:p>
          </table:table-cell>
          <table:table-cell table:style-name="ce650" office:value-type="percentage" office:value="0.64714658876133" calcext:value-type="percentage">
            <text:p>64.71 %</text:p>
          </table:table-cell>
          <table:table-cell table:number-columns-repeated="2"/>
          <table:table-cell table:formula="of:=[.B18]/[.B21]" office:value-type="float" office:value="1.0675" calcext:value-type="float">
            <text:p>1.0675</text:p>
          </table:table-cell>
          <table:table-cell table:style-name="ce653" table:formula="of:=[.D18]-[.D21]" office:value-type="percentage" office:value="-0.363196549880148" calcext:value-type="percentage">
            <text:p>-36.319654988014800%</text:p>
          </table:table-cell>
          <table:table-cell table:number-columns-repeated="16374"/>
        </table:table-row>
        <table:table-row table:style-name="ro1">
          <table:table-cell/>
          <table:table-cell table:style-name="ce622" office:value-type="float" office:value="3.9" calcext:value-type="float">
            <text:p>S/. 3.90</text:p>
          </table:table-cell>
          <table:table-cell table:style-name="ce633" office:value-type="float" office:value="46652.6185266868" calcext:value-type="float">
            <text:p>46,653</text:p>
          </table:table-cell>
          <table:table-cell table:style-name="ce641" office:value-type="percentage" office:value="0.701657225605614" calcext:value-type="percentage">
            <text:p>70 %</text:p>
          </table:table-cell>
          <table:table-cell table:style-name="ce633" office:value-type="float" office:value="36199.4188016575" calcext:value-type="float">
            <text:p>36,199</text:p>
          </table:table-cell>
          <table:table-cell table:style-name="ce641" office:value-type="percentage" office:value="0.835090792088286" calcext:value-type="percentage">
            <text:p>84 %</text:p>
          </table:table-cell>
          <table:table-cell table:number-columns-repeated="2"/>
          <table:table-cell table:style-name="ce654" table:formula="of:=1-[.I21]" office:value-type="percentage" office:value="-0.0674999999999999" calcext:value-type="percentage">
            <text:p>-6.75 %</text:p>
          </table:table-cell>
          <table:table-cell table:number-columns-repeated="16375"/>
        </table:table-row>
        <table:table-row table:style-name="ro1">
          <table:table-cell/>
          <table:table-cell table:style-name="ce622" office:value-type="float" office:value="3.85" calcext:value-type="float">
            <text:p>S/. 3.85</text:p>
          </table:table-cell>
          <table:table-cell table:style-name="ce633" office:value-type="float" office:value="53021.7107141581" calcext:value-type="float">
            <text:p>53,022</text:p>
          </table:table-cell>
          <table:table-cell table:style-name="ce641" office:value-type="percentage" office:value="0.773943105099975" calcext:value-type="percentage">
            <text:p>77 %</text:p>
          </table:table-cell>
          <table:table-cell table:style-name="ce633" office:value-type="float" office:value="41884.9295746028" calcext:value-type="float">
            <text:p>41,885</text:p>
          </table:table-cell>
          <table:table-cell table:style-name="ce641" office:value-type="percentage" office:value="0.934461516123329" calcext:value-type="percentage">
            <text:p>93 %</text:p>
          </table:table-cell>
          <table:table-cell table:number-columns-repeated="16378"/>
        </table:table-row>
        <table:table-row table:style-name="ro1">
          <table:table-cell/>
          <table:table-cell table:style-name="ce622" table:formula="of:=[.B21]-([.B18]-[.B21])" office:value-type="float" office:value="3.73" calcext:value-type="float">
            <text:p>S/. 3.73</text:p>
          </table:table-cell>
          <table:table-cell table:style-name="ce633" office:value-type="float" office:value="68307.5319640891" calcext:value-type="float">
            <text:p>68,308</text:p>
          </table:table-cell>
          <table:table-cell table:style-name="ce641" office:value-type="percentage" office:value="0.951459241009632" calcext:value-type="percentage">
            <text:p>95 %</text:p>
          </table:table-cell>
          <table:table-cell table:style-name="ce633" office:value-type="float" office:value="55569.914093767" calcext:value-type="float">
            <text:p>55,570</text:p>
          </table:table-cell>
          <table:table-cell table:style-name="ce641" office:value-type="percentage" office:value="1.18854948515997" calcext:value-type="percentage">
            <text:p>119 %</text:p>
          </table:table-cell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en del escenario 1" table:style-name="ta20">
        <table:table-column table:style-name="co1" table:default-cell-style-name="Default"/>
        <table:table-column table:style-name="co80" table:default-cell-style-name="ce657"/>
        <table:table-column table:style-name="co81" table:default-cell-style-name="ce661"/>
        <table:table-column-group>
          <table:table-column table:style-name="co31" table:default-cell-style-name="ce667"/>
          <table:table-column table:style-name="co82" table:default-cell-style-name="ce666"/>
          <table:table-column table:style-name="co83" table:default-cell-style-name="ce666"/>
        </table:table-column-group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30">
          <table:table-cell/>
          <table:table-cell table:style-name="ce655" office:value-type="string" calcext:value-type="string">
            <text:p>Resumen del escenario</text:p>
          </table:table-cell>
          <table:table-cell table:style-name="ce655"/>
          <table:table-cell table:style-name="ce663" table:number-columns-repeated="3"/>
          <table:table-cell table:number-columns-repeated="16378"/>
        </table:table-row>
        <table:table-row table:style-name="ro30">
          <table:table-cell/>
          <table:table-cell table:style-name="ce656" table:number-columns-repeated="2"/>
          <table:table-cell table:style-name="ce664" office:value-type="string" calcext:value-type="string">
            <text:p>PROBABLE</text:p>
          </table:table-cell>
          <table:table-cell table:style-name="ce664" office:value-type="string" calcext:value-type="string">
            <text:p>OPTIMISTA</text:p>
          </table:table-cell>
          <table:table-cell table:style-name="ce664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35" table:visibility="collapse">
            <table:table-cell table:number-columns-repeated="2"/>
            <table:table-cell table:style-name="ce657"/>
            <table:table-cell table:style-name="ce665"/>
            <table:table-cell table:style-name="ce670" office:value-type="string" calcext:value-type="string">
              <text:p>Creado por Admin el 20/02/2021</text:p>
              <text:p>Modificado por Admin el 20/02/2021</text:p>
              <text:p>Modificado por Admin el 25/02/2021</text:p>
            </table:table-cell>
            <table:table-cell table:style-name="ce670" office:value-type="string" calcext:value-type="string">
              <text:p>Creado por Admin el 20/02/2021</text:p>
              <text:p>Modificado por Admin el 20/02/2021</text:p>
              <text:p>Modificado por Admin el 25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658" office:value-type="string" calcext:value-type="string">
            <text:p>VARIABLES</text:p>
          </table:table-cell>
          <table:table-cell table:style-name="ce660"/>
          <table:table-cell table:style-name="ce666"/>
          <table:table-cell table:number-columns-repeated="16380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recio de venta de ovillo</text:p>
            </table:table-cell>
            <table:table-cell office:value-type="float" office:value="6" calcext:value-type="float">
              <text:p>S/6.00</text:p>
            </table:table-cell>
            <table:table-cell table:style-name="ce671" office:value-type="float" office:value="6.2" calcext:value-type="float">
              <text:p>S/6.20</text:p>
            </table:table-cell>
            <table:table-cell table:style-name="ce671" office:value-type="float" office:value="5.8" calcext:value-type="float">
              <text:p>S/5.80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Precio de compra de ovillo</text:p>
            </table:table-cell>
            <table:table-cell office:value-type="float" office:value="4" calcext:value-type="float">
              <text:p>S/4.00</text:p>
            </table:table-cell>
            <table:table-cell table:style-name="ce671" office:value-type="float" office:value="3.8" calcext:value-type="float">
              <text:p>S/3.80</text:p>
            </table:table-cell>
            <table:table-cell table:style-name="ce671" office:value-type="float" office:value="4.2" calcext:value-type="float">
              <text:p>S/4.20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658" office:value-type="string" calcext:value-type="string">
            <text:p>INDICADORES</text:p>
          </table:table-cell>
          <table:table-cell table:style-name="ce660"/>
          <table:table-cell table:style-name="ce666"/>
          <table:table-cell table:number-columns-repeated="16380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VANE</text:p>
            </table:table-cell>
            <table:table-cell office:value-type="float" office:value="33914.4341517444" calcext:value-type="float">
              <text:p>S/33,914.43</text:p>
            </table:table-cell>
            <table:table-cell table:style-name="ce667" office:value-type="float" office:value="84417.2552578737" calcext:value-type="float">
              <text:p>S/84,417.26</text:p>
            </table:table-cell>
            <table:table-cell table:style-name="ce667" office:value-type="float" office:value="-16588.3869543849" calcext:value-type="float">
              <text:p>-S/16,588.39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TIRE</text:p>
            </table:table-cell>
            <table:table-cell table:style-name="ce668" office:value-type="percentage" office:value="0.559817769796686" calcext:value-type="percentage">
              <text:p>55.98 %</text:p>
            </table:table-cell>
            <table:table-cell table:style-name="ce668" office:value-type="percentage" office:value="1.12165605362399" calcext:value-type="percentage">
              <text:p>112.17 %</text:p>
            </table:table-cell>
            <table:table-cell table:style-name="ce668" office:value-type="percentage" office:value="0.0192349199826201" calcext:value-type="percentage">
              <text:p>1.92 %</text:p>
            </table:table-cell>
            <table:table-cell/>
            <table:table-cell table:style-name="ce672" table:formula="of:=[.E10]-[.D10]" office:value-type="percentage" office:value="0.561838283827304" calcext:value-type="percentage">
              <text:p>56.18 %</text:p>
            </table:table-cell>
            <table:table-cell table:style-name="ce672" table:formula="of:=[.D10]-[.F10]" office:value-type="percentage" office:value="0.540582849814066" calcext:value-type="percentage">
              <text:p>54.06 %</text:p>
            </table:table-cell>
            <table:table-cell table:number-columns-repeated="16375"/>
          </table:table-row>
          <table:table-row table:style-name="ro1">
            <table:table-cell table:number-columns-repeated="2"/>
            <table:table-cell office:value-type="string" calcext:value-type="string">
              <text:p>VANF</text:p>
            </table:table-cell>
            <table:table-cell office:value-type="float" office:value="24856.5282906616" calcext:value-type="float">
              <text:p>S/24,856.53</text:p>
            </table:table-cell>
            <table:table-cell table:style-name="ce667" office:value-type="float" office:value="69586.9879951654" calcext:value-type="float">
              <text:p>S/69,586.99</text:p>
            </table:table-cell>
            <table:table-cell table:style-name="ce667" office:value-type="float" office:value="-19592.4742395579" calcext:value-type="float">
              <text:p>-S/19,592.47</text:p>
            </table:table-cell>
            <table:table-cell table:number-columns-repeated="16378"/>
          </table:table-row>
          <table:table-row table:style-name="ro1">
            <table:table-cell/>
            <table:table-cell table:style-name="ce659"/>
            <table:table-cell table:style-name="ce662" office:value-type="string" calcext:value-type="string">
              <text:p>TIRF</text:p>
            </table:table-cell>
            <table:table-cell table:style-name="ce669" office:value-type="percentage" office:value="0.64714658876133" calcext:value-type="percentage">
              <text:p>64.71 %</text:p>
            </table:table-cell>
            <table:table-cell table:style-name="ce669" office:value-type="percentage" office:value="1.4341199838584" calcext:value-type="percentage">
              <text:p>143.41 %</text:p>
            </table:table-cell>
            <table:table-cell table:style-name="ce669" office:value-type="percentage" office:value="0.013175591452762" calcext:value-type="percentage">
              <text:p>1.32 %</text:p>
            </table:table-cell>
            <table:table-cell table:number-columns-repeated="16378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S/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currency-style style:name="N136P0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6P1" style:volatile="true">
      <number:text>-</number:text>
      <number:currency-symbol number:language="es" number:country="PE">S/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6P2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">
      <number:currency-symbol number:language="es" number:country="PE">S/.</number:currency-symbol>
      <number:text> </number:text>
      <number:number number:decimal-places="2" number:min-decimal-places="2" number:min-integer-digits="1" number:grouping="true"/>
    </number:currency-style>
    <number:percentage-style style:name="N138">
      <number:number number:decimal-places="1" number:min-decimal-places="1" number:min-integer-digits="1"/>
      <number:text>%</number:text>
    </number:percentage-style>
    <number:number-style style:name="N139">
      <number:number number:decimal-places="4" number:min-decimal-places="4" number:min-integer-digits="1"/>
    </number:number-style>
    <number:number-style style:name="N14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text>S/</number:text>
      <number:number number:decimal-places="2" number:min-decimal-places="2" number:min-integer-digits="1" number:grouping="true"/>
    </number:number-style>
    <number:number-style style:name="N142">
      <number:text>S/. </number:text>
      <number:number number:decimal-places="2" number:min-decimal-places="2" number:min-integer-digits="1" number:grouping="true"/>
    </number:number-style>
    <number:number-style style:name="N143">
      <number:number number:decimal-places="1" number:min-decimal-places="1" number:min-integer-digits="1" number:grouping="true"/>
    </number:number-style>
    <number:percentage-style style:name="N144">
      <number:number number:decimal-places="15" number:min-decimal-places="15" number:min-integer-digits="1"/>
      <number:text>%</number:text>
    </number:percentage-style>
    <number:currency-style style:name="N145P0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45P1" style:volatile="true">
      <number:text>-</number:text>
      <number:currency-symbol number:language="es" number:country="PE">S/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45P2" style:volatile="true">
      <number:text loext:blank-width-char="-"> </number:text>
      <number:currency-symbol number:language="es" number:country="PE">S/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text>S/</number:text>
      <number:number number:decimal-places="0" number:min-decimal-places="0" number:min-integer-digits="1" number:grouping="true"/>
    </number:number-style>
    <number:number-style style:name="N147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47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4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7">
      <number:text loext:blank-width-char=" "> </number:text>
      <number:text-content/>
      <number:text loext:blank-width-char=" 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neda_20_2" style:display-name="Moneda 2" style:family="table-cell" style:parent-style-name="Default" style:data-style-name="N133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Porcentaje_20_3" style:display-name="Porcentaje 3" style:family="table-cell" style:parent-style-name="Default" style:data-style-name="N10"/>
    <style:style style:name="Excel_20_Built-in_20_Comma" style:display-name="Excel Built-in Comma" style:family="table-cell" style:parent-style-name="Default" style:data-style-name="N134"/>
    <style:style style:name="Excel_20_Built-in_20_Currency" style:display-name="Excel Built-in Currency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ital_5f_Trabajo" style:display-name="PageStyle_Capital_Trabaj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Ventas" style:display-name="PageStyle_Costos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on_5f_VR" style:display-name="PageStyle_Deprecion_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_5f_Inicial" style:display-name="PageStyle_Inversion_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" style:display-name="PageStyle_Costos_Unit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5f_Resultados" style:display-name="PageStyle_Estado_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5f_Kwacc" style:display-name="PageStyle_Ke_Kwac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5f_Equilibrio" style:display-name="PageStyle_Punto_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GV" style:display-name="PageStyle_IG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Caja" style:display-name="PageStyle_Flujo_Caj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1" style:display-name="PageStyle_Resumen del escenario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E. Edison Achalma Mendoza</dc:creator>
    <meta:print-date>2021-03-26T16:42:02</meta:print-date>
    <meta:creation-date>2021-02-14T13:04:30</meta:creation-date>
    <dc:date>2022-05-25T02:29:57</dc:date>
    <meta:generator>LibreOffice/24.2.4.2$Linux_X86_64 LibreOffice_project/420$Build-2</meta:generator>
    <meta:document-statistic meta:table-count="21" meta:cell-count="2049" meta:object-count="0"/>
    <meta:user-defined meta:name="AppVersion">16.0300</meta:user-defined>
  </office:meta>
</office:document-meta>
</file>