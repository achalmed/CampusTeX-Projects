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06900000015AE0B812F.png" manifest:media-type="image/png"/>
  <manifest:file-entry manifest:full-path="Pictures/10000B9800000AD50000023187A6850A.emf" manifest:media-type="image/x-emf"/>
  <manifest:file-entry manifest:full-path="Pictures/100000010000035C000003545744B5DB.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Narrow" svg:font-family="'Arial Narrow'"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38cm"/>
    </style:style>
    <style:style style:name="co2" style:family="table-column">
      <style:table-column-properties fo:break-before="auto" style:column-width="3.239cm"/>
    </style:style>
    <style:style style:name="co3" style:family="table-column">
      <style:table-column-properties fo:break-before="auto" style:column-width="4.805cm"/>
    </style:style>
    <style:style style:name="co4" style:family="table-column">
      <style:table-column-properties fo:break-before="auto" style:column-width="3.193cm"/>
    </style:style>
    <style:style style:name="co5" style:family="table-column">
      <style:table-column-properties fo:break-before="auto" style:column-width="2.716cm"/>
    </style:style>
    <style:style style:name="co6" style:family="table-column">
      <style:table-column-properties fo:break-before="auto" style:column-width="1.192cm"/>
    </style:style>
    <style:style style:name="co7" style:family="table-column">
      <style:table-column-properties fo:break-before="auto" style:column-width="2.432cm"/>
    </style:style>
    <style:style style:name="co8" style:family="table-column">
      <style:table-column-properties fo:break-before="auto" style:column-width="2.171cm"/>
    </style:style>
    <style:style style:name="co9" style:family="table-column">
      <style:table-column-properties fo:break-before="auto" style:column-width="2.321cm"/>
    </style:style>
    <style:style style:name="co10" style:family="table-column">
      <style:table-column-properties fo:break-before="auto" style:column-width="2.672cm"/>
    </style:style>
    <style:style style:name="co11" style:family="table-column">
      <style:table-column-properties fo:break-before="auto" style:column-width="2.477cm"/>
    </style:style>
    <style:style style:name="co12" style:family="table-column">
      <style:table-column-properties fo:break-before="auto" style:column-width="2.237cm"/>
    </style:style>
    <style:style style:name="co13" style:family="table-column">
      <style:table-column-properties fo:break-before="auto" style:column-width="1.367cm"/>
    </style:style>
    <style:style style:name="co14" style:family="table-column">
      <style:table-column-properties fo:break-before="auto" style:column-width="2.609cm"/>
    </style:style>
    <style:style style:name="co15" style:family="table-column">
      <style:table-column-properties fo:break-before="auto" style:column-width="2.759cm"/>
    </style:style>
    <style:style style:name="co16" style:family="table-column">
      <style:table-column-properties fo:break-before="auto" style:column-width="3.3cm"/>
    </style:style>
    <style:style style:name="co17" style:family="table-column">
      <style:table-column-properties fo:break-before="auto" style:column-width="3.588cm"/>
    </style:style>
    <style:style style:name="co18" style:family="table-column">
      <style:table-column-properties fo:break-before="auto" style:column-width="3.607cm"/>
    </style:style>
    <style:style style:name="co19" style:family="table-column">
      <style:table-column-properties fo:break-before="auto" style:column-width="2.041cm"/>
    </style:style>
    <style:style style:name="co20" style:family="table-column">
      <style:table-column-properties fo:break-before="auto" style:column-width="2.455cm"/>
    </style:style>
    <style:style style:name="co21" style:family="table-column">
      <style:table-column-properties fo:break-before="auto" style:column-width="2.26cm"/>
    </style:style>
    <style:style style:name="co22" style:family="table-column">
      <style:table-column-properties fo:break-before="auto" style:column-width="1.042cm"/>
    </style:style>
    <style:style style:name="co23" style:family="table-column">
      <style:table-column-properties fo:break-before="auto" style:column-width="0.801cm"/>
    </style:style>
    <style:style style:name="co24" style:family="table-column">
      <style:table-column-properties fo:break-before="auto" style:column-width="0.997cm"/>
    </style:style>
    <style:style style:name="co25" style:family="table-column">
      <style:table-column-properties fo:break-before="auto" style:column-width="1.302cm"/>
    </style:style>
    <style:style style:name="co26" style:family="table-column">
      <style:table-column-properties fo:break-before="auto" style:column-width="1.868cm"/>
    </style:style>
    <style:style style:name="co27" style:family="table-column">
      <style:table-column-properties fo:break-before="auto" style:column-width="1.737cm"/>
    </style:style>
    <style:style style:name="co28" style:family="table-column">
      <style:table-column-properties fo:break-before="auto" style:column-width="1.649cm"/>
    </style:style>
    <style:style style:name="co29" style:family="table-column">
      <style:table-column-properties fo:break-before="auto" style:column-width="1.889cm"/>
    </style:style>
    <style:style style:name="co30" style:family="table-column">
      <style:table-column-properties fo:break-before="auto" style:column-width="1.693cm"/>
    </style:style>
    <style:style style:name="co31" style:family="table-column">
      <style:table-column-properties fo:break-before="auto" style:column-width="1.78cm"/>
    </style:style>
    <style:style style:name="co32" style:family="table-column">
      <style:table-column-properties fo:break-before="auto" style:column-width="0.975cm"/>
    </style:style>
    <style:style style:name="co33" style:family="table-column">
      <style:table-column-properties fo:break-before="auto" style:column-width="4.609cm"/>
    </style:style>
    <style:style style:name="co34" style:family="table-column">
      <style:table-column-properties fo:break-before="auto" style:column-width="3.325cm"/>
    </style:style>
    <style:style style:name="co35" style:family="table-column">
      <style:table-column-properties fo:break-before="auto" style:column-width="4.325cm"/>
    </style:style>
    <style:style style:name="co36" style:family="table-column">
      <style:table-column-properties fo:break-before="auto" style:column-width="2.214cm"/>
    </style:style>
    <style:style style:name="co37" style:family="table-column">
      <style:table-column-properties fo:break-before="auto" style:column-width="2.281cm"/>
    </style:style>
    <style:style style:name="co38" style:family="table-column">
      <style:table-column-properties fo:break-before="auto" style:column-width="1.085cm"/>
    </style:style>
    <style:style style:name="co39" style:family="table-column">
      <style:table-column-properties fo:break-before="auto" style:column-width="2.628cm"/>
    </style:style>
    <style:style style:name="co40" style:family="table-column">
      <style:table-column-properties fo:break-before="auto" style:column-width="3.15cm"/>
    </style:style>
    <style:style style:name="co41" style:family="table-column">
      <style:table-column-properties fo:break-before="auto" style:column-width="3.979cm"/>
    </style:style>
    <style:style style:name="co42" style:family="table-column">
      <style:table-column-properties fo:break-before="auto" style:column-width="2.847cm"/>
    </style:style>
    <style:style style:name="co43" style:family="table-column">
      <style:table-column-properties fo:break-before="page" style:column-width="3.717cm"/>
    </style:style>
    <style:style style:name="co44" style:family="table-column">
      <style:table-column-properties fo:break-before="auto" style:column-width="3.104cm"/>
    </style:style>
    <style:style style:name="co45" style:family="table-column">
      <style:table-column-properties fo:break-before="auto" style:column-width="1.235cm"/>
    </style:style>
    <style:style style:name="co46" style:family="table-column">
      <style:table-column-properties fo:break-before="auto" style:column-width="3.521cm"/>
    </style:style>
    <style:style style:name="co47" style:family="table-column">
      <style:table-column-properties fo:break-before="auto" style:column-width="8.782cm"/>
    </style:style>
    <style:style style:name="co48" style:family="table-column">
      <style:table-column-properties fo:break-before="auto" style:column-width="1.976cm"/>
    </style:style>
    <style:style style:name="co49" style:family="table-column">
      <style:table-column-properties fo:break-before="auto" style:column-width="2.367cm"/>
    </style:style>
    <style:style style:name="co50" style:family="table-column">
      <style:table-column-properties fo:break-before="auto" style:column-width="2.542cm"/>
    </style:style>
    <style:style style:name="co51" style:family="table-column">
      <style:table-column-properties fo:break-before="auto" style:column-width="7.437cm"/>
    </style:style>
    <style:style style:name="co52" style:family="table-column">
      <style:table-column-properties fo:break-before="auto" style:column-width="1.498cm"/>
    </style:style>
    <style:style style:name="co53" style:family="table-column">
      <style:table-column-properties fo:break-before="auto" style:column-width="2.651cm"/>
    </style:style>
    <style:style style:name="co54" style:family="table-column">
      <style:table-column-properties fo:break-before="auto" style:column-width="4.695cm"/>
    </style:style>
    <style:style style:name="co55" style:family="table-column">
      <style:table-column-properties fo:break-before="auto" style:column-width="3.999cm"/>
    </style:style>
    <style:style style:name="co56" style:family="table-column">
      <style:table-column-properties fo:break-before="auto" style:column-width="1.954cm"/>
    </style:style>
    <style:style style:name="co57" style:family="table-column">
      <style:table-column-properties fo:break-before="auto" style:column-width="7.108cm"/>
    </style:style>
    <style:style style:name="co58" style:family="table-column">
      <style:table-column-properties fo:break-before="auto" style:column-width="2.125cm"/>
    </style:style>
    <style:style style:name="co59" style:family="table-column">
      <style:table-column-properties fo:break-before="auto" style:column-width="6.824cm"/>
    </style:style>
    <style:style style:name="co60" style:family="table-column">
      <style:table-column-properties fo:break-before="auto" style:column-width="1.759cm"/>
    </style:style>
    <style:style style:name="co61" style:family="table-column">
      <style:table-column-properties fo:break-before="auto" style:column-width="2.15cm"/>
    </style:style>
    <style:style style:name="co62" style:family="table-column">
      <style:table-column-properties fo:break-before="auto" style:column-width="11.224cm"/>
    </style:style>
    <style:style style:name="co63" style:family="table-column">
      <style:table-column-properties fo:break-before="auto" style:column-width="2.521cm"/>
    </style:style>
    <style:style style:name="co64" style:family="table-column">
      <style:table-column-properties fo:break-before="auto" style:column-width="3.5cm"/>
    </style:style>
    <style:style style:name="co65" style:family="table-column">
      <style:table-column-properties fo:break-before="auto" style:column-width="7.415cm"/>
    </style:style>
    <style:style style:name="co66" style:family="table-column">
      <style:table-column-properties fo:break-before="auto" style:column-width="0.519cm"/>
    </style:style>
    <style:style style:name="co67" style:family="table-column">
      <style:table-column-properties fo:break-before="auto" style:column-width="9.525cm"/>
    </style:style>
    <style:style style:name="co68" style:family="table-column">
      <style:table-column-properties fo:break-before="auto" style:column-width="1.171cm"/>
    </style:style>
    <style:style style:name="co69" style:family="table-column">
      <style:table-column-properties fo:break-before="auto" style:column-width="1.563cm"/>
    </style:style>
    <style:style style:name="co70" style:family="table-column">
      <style:table-column-properties fo:break-before="auto" style:column-width="1.93cm"/>
    </style:style>
    <style:style style:name="co71" style:family="table-column">
      <style:table-column-properties fo:break-before="auto" style:column-width="2.021cm"/>
    </style:style>
    <style:style style:name="co72" style:family="table-column">
      <style:table-column-properties fo:break-before="auto" style:column-width="3.043cm"/>
    </style:style>
    <style:style style:name="co73" style:family="table-column">
      <style:table-column-properties fo:break-before="auto" style:column-width="6.371cm"/>
    </style:style>
    <style:style style:name="co74" style:family="table-column">
      <style:table-column-properties fo:break-before="auto" style:column-width="6.152cm"/>
    </style:style>
    <style:style style:name="co75" style:family="table-column">
      <style:table-column-properties fo:break-before="auto" style:column-width="2.064cm"/>
    </style:style>
    <style:style style:name="co76" style:family="table-column">
      <style:table-column-properties fo:break-before="auto" style:column-width="1.259cm"/>
    </style:style>
    <style:style style:name="co77" style:family="table-column">
      <style:table-column-properties fo:break-before="auto" style:column-width="1.431cm"/>
    </style:style>
    <style:style style:name="co78" style:family="table-column">
      <style:table-column-properties fo:break-before="auto" style:column-width="1.672cm"/>
    </style:style>
    <style:style style:name="co79" style:family="table-column">
      <style:table-column-properties fo:break-before="auto" style:column-width="1.476cm"/>
    </style:style>
    <style:style style:name="co80" style:family="table-column">
      <style:table-column-properties fo:break-before="auto" style:column-width="1.626cm"/>
    </style:style>
    <style:style style:name="co81" style:family="table-column">
      <style:table-column-properties fo:break-before="auto" style:column-width="1.584cm"/>
    </style:style>
    <style:style style:name="co82" style:family="table-column">
      <style:table-column-properties fo:break-before="auto" style:column-width="7.241cm"/>
    </style:style>
    <style:style style:name="co83" style:family="table-column">
      <style:table-column-properties fo:break-before="auto" style:column-width="3.02cm"/>
    </style:style>
    <style:style style:name="co84" style:family="table-column">
      <style:table-column-properties fo:break-before="auto" style:column-width="2.824cm"/>
    </style:style>
    <style:style style:name="co85" style:family="table-column">
      <style:table-column-properties fo:break-before="auto" style:column-width="4.217cm"/>
    </style:style>
    <style:style style:name="co86" style:family="table-column">
      <style:table-column-properties fo:break-before="auto" style:column-width="7.546cm"/>
    </style:style>
    <style:style style:name="co87" style:family="table-column">
      <style:table-column-properties fo:break-before="auto" style:column-width="2.805cm"/>
    </style:style>
    <style:style style:name="co88" style:family="table-column">
      <style:table-column-properties fo:break-before="auto" style:column-width="2.409cm"/>
    </style:style>
    <style:style style:name="co89" style:family="table-column">
      <style:table-column-properties fo:break-before="auto" style:column-width="2.738cm"/>
    </style:style>
    <style:style style:name="co90" style:family="table-column">
      <style:table-column-properties fo:break-before="auto" style:column-width="6.041cm"/>
    </style:style>
    <style:style style:name="co91" style:family="table-column">
      <style:table-column-properties fo:break-before="auto" style:column-width="8.678cm"/>
    </style:style>
    <style:style style:name="co92" style:family="table-column">
      <style:table-column-properties fo:break-before="auto" style:column-width="2.563cm"/>
    </style:style>
    <style:style style:name="co93" style:family="table-column">
      <style:table-column-properties fo:break-before="auto" style:column-width="2.163cm"/>
    </style:style>
    <style:style style:name="co94" style:family="table-column">
      <style:table-column-properties fo:break-before="auto" style:column-width="8.437cm"/>
    </style:style>
    <style:style style:name="co95" style:family="table-column">
      <style:table-column-properties fo:break-before="auto" style:column-width="5.98cm"/>
    </style:style>
    <style:style style:name="co96" style:family="table-column">
      <style:table-column-properties fo:break-before="auto" style:column-width="0.78cm"/>
    </style:style>
    <style:style style:name="co97" style:family="table-column">
      <style:table-column-properties fo:break-before="page" style:column-width="2.15cm"/>
    </style:style>
    <style:style style:name="co98" style:family="table-column">
      <style:table-column-properties fo:break-before="auto" style:column-width="7.308cm"/>
    </style:style>
    <style:style style:name="co99" style:family="table-column">
      <style:table-column-properties fo:break-before="auto" style:column-width="3.129cm"/>
    </style:style>
    <style:style style:name="co100" style:family="table-column">
      <style:table-column-properties fo:break-before="auto" style:column-width="6.392cm"/>
    </style:style>
    <style:style style:name="co101" style:family="table-column">
      <style:table-column-properties fo:break-before="auto" style:column-width="6.13cm"/>
    </style:style>
    <style:style style:name="co102" style:family="table-column">
      <style:table-column-properties fo:break-before="auto" style:column-width="2.933cm"/>
    </style:style>
    <style:style style:name="co103" style:family="table-column">
      <style:table-column-properties fo:break-before="auto" style:column-width="3cm"/>
    </style:style>
    <style:style style:name="co104" style:family="table-column">
      <style:table-column-properties fo:break-before="auto" style:column-width="4.196cm"/>
    </style:style>
    <style:style style:name="co105" style:family="table-column">
      <style:table-column-properties fo:break-before="auto" style:column-width="2.955cm"/>
    </style:style>
    <style:style style:name="co106" style:family="table-column">
      <style:table-column-properties fo:break-before="auto" style:column-width="3.542cm"/>
    </style:style>
    <style:style style:name="co107" style:family="table-column">
      <style:table-column-properties fo:break-before="auto" style:column-width="6.325cm"/>
    </style:style>
    <style:style style:name="co108" style:family="table-column">
      <style:table-column-properties fo:break-before="auto" style:column-width="2.868cm"/>
    </style:style>
    <style:style style:name="co109" style:family="table-column">
      <style:table-column-properties fo:break-before="auto" style:column-width="6.525cm"/>
    </style:style>
    <style:style style:name="co110" style:family="table-column">
      <style:table-column-properties fo:break-before="auto" style:column-width="1.845cm"/>
    </style:style>
    <style:style style:name="co111" style:family="table-column">
      <style:table-column-properties fo:break-before="auto" style:column-width="1.773cm"/>
    </style:style>
    <style:style style:name="ro1" style:family="table-row">
      <style:table-row-properties style:row-height="0.517cm" fo:break-before="auto" style:use-optimal-row-height="true"/>
    </style:style>
    <style:style style:name="ro2" style:family="table-row">
      <style:table-row-properties style:row-height="0.517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223cm" fo:break-before="auto" style:use-optimal-row-height="false"/>
    </style:style>
    <style:style style:name="ro6" style:family="table-row">
      <style:table-row-properties style:row-height="0.452cm" fo:break-before="auto" style:use-optimal-row-height="false"/>
    </style:style>
    <style:style style:name="ro7" style:family="table-row">
      <style:table-row-properties style:row-height="1.111cm" fo:break-before="auto" style:use-optimal-row-height="false"/>
    </style:style>
    <style:style style:name="ro8" style:family="table-row">
      <style:table-row-properties style:row-height="0.45cm" fo:break-before="auto" style:use-optimal-row-height="false"/>
    </style:style>
    <style:style style:name="ro9" style:family="table-row">
      <style:table-row-properties style:row-height="0.487cm" fo:break-before="auto" style:use-optimal-row-height="false"/>
    </style:style>
    <style:style style:name="ro10" style:family="table-row">
      <style:table-row-properties style:row-height="1.138cm" fo:break-before="auto" style:use-optimal-row-height="false"/>
    </style:style>
    <style:style style:name="ro11" style:family="table-row">
      <style:table-row-properties style:row-height="0.788cm" fo:break-before="auto" style:use-optimal-row-height="false"/>
    </style:style>
    <style:style style:name="ro12" style:family="table-row">
      <style:table-row-properties style:row-height="0.529cm" fo:break-before="auto" style:use-optimal-row-height="false"/>
    </style:style>
    <style:style style:name="ro13" style:family="table-row">
      <style:table-row-properties style:row-height="2.17cm" fo:break-before="auto" style:use-optimal-row-height="false"/>
    </style:style>
    <style:style style:name="ro14" style:family="table-row">
      <style:table-row-properties style:row-height="0.614cm" fo:break-before="auto" style:use-optimal-row-height="false"/>
    </style:style>
    <style:style style:name="ro15" style:family="table-row">
      <style:table-row-properties style:row-height="0.487cm" fo:break-before="auto" style:use-optimal-row-height="true"/>
    </style:style>
    <style:style style:name="ro16" style:family="table-row">
      <style:table-row-properties style:row-height="0.873cm" fo:break-before="auto" style:use-optimal-row-height="false"/>
    </style:style>
    <style:style style:name="ro17" style:family="table-row">
      <style:table-row-properties style:row-height="0.503cm" fo:break-before="auto" style:use-optimal-row-height="false"/>
    </style:style>
    <style:style style:name="ro18" style:family="table-row">
      <style:table-row-properties style:row-height="1.461cm" fo:break-before="auto" style:use-optimal-row-height="false"/>
    </style:style>
    <style:style style:name="ro19" style:family="table-row">
      <style:table-row-properties style:row-height="1.157cm" fo:break-before="auto" style:use-optimal-row-height="true"/>
    </style:style>
    <style:style style:name="ro20" style:family="table-row">
      <style:table-row-properties style:row-height="1.395cm" fo:break-before="auto" style:use-optimal-row-height="true"/>
    </style:style>
    <style:style style:name="ro21" style:family="table-row">
      <style:table-row-properties style:row-height="0.466cm" fo:break-before="auto" style:use-optimal-row-height="true"/>
    </style:style>
    <style:style style:name="ro22" style:family="table-row">
      <style:table-row-properties style:row-height="0.402cm" fo:break-before="auto" style:use-optimal-row-height="true"/>
    </style:style>
    <style:style style:name="ro23" style:family="table-row">
      <style:table-row-properties style:row-height="1.005cm" fo:break-before="auto" style:use-optimal-row-height="false"/>
    </style:style>
    <style:style style:name="ro24" style:family="table-row">
      <style:table-row-properties style:row-height="0.423cm" fo:break-before="auto" style:use-optimal-row-height="false"/>
    </style:style>
    <style:style style:name="ro25" style:family="table-row">
      <style:table-row-properties style:row-height="0.947cm" fo:break-before="auto" style:use-optimal-row-height="true"/>
    </style:style>
    <style:style style:name="ro26" style:family="table-row">
      <style:table-row-properties style:row-height="0.926cm" fo:break-before="auto" style:use-optimal-row-height="false"/>
    </style:style>
    <style:style style:name="ro27" style:family="table-row">
      <style:table-row-properties style:row-height="1.905cm" fo:break-before="auto" style:use-optimal-row-height="false"/>
    </style:style>
    <style:style style:name="ro28" style:family="table-row">
      <style:table-row-properties style:row-height="0.788cm" fo:break-before="auto" style:use-optimal-row-height="true"/>
    </style:style>
    <style:style style:name="ro29" style:family="table-row">
      <style:table-row-properties style:row-height="0.466cm" fo:break-before="auto" style:use-optimal-row-height="false"/>
    </style:style>
    <style:style style:name="ro30" style:family="table-row">
      <style:table-row-properties style:row-height="2.487cm" fo:break-before="auto" style:use-optimal-row-height="false"/>
    </style:style>
    <style:style style:name="ro31" style:family="table-row">
      <style:table-row-properties style:row-height="2.249cm" fo:break-before="auto" style:use-optimal-row-height="false"/>
    </style:style>
    <style:style style:name="ro32" style:family="table-row">
      <style:table-row-properties style:row-height="1.826cm" fo:break-before="auto" style:use-optimal-row-height="false"/>
    </style:style>
    <style:style style:name="ro33" style:family="table-row">
      <style:table-row-properties style:row-height="0.423cm" fo:break-before="auto" style:use-optimal-row-height="true"/>
    </style:style>
    <style:style style:name="ro34" style:family="table-row">
      <style:table-row-properties style:row-height="0.476cm" fo:break-before="auto" style:use-optimal-row-height="false"/>
    </style:style>
    <style:style style:name="ro35" style:family="table-row">
      <style:table-row-properties style:row-height="1.236cm" fo:break-before="auto" style:use-optimal-row-height="true"/>
    </style:style>
    <style:style style:name="ro36" style:family="table-row">
      <style:table-row-properties style:row-height="0.931cm" fo:break-before="auto" style:use-optimal-row-height="false"/>
    </style:style>
    <style:style style:name="ro37" style:family="table-row">
      <style:table-row-properties style:row-height="1.429cm" fo:break-before="auto" style:use-optimal-row-height="false"/>
    </style:style>
    <style:style style:name="ro38" style:family="table-row">
      <style:table-row-properties style:row-height="0.053cm" fo:break-before="auto" style:use-optimal-row-height="false"/>
    </style:style>
    <style:style style:name="ro39" style:family="table-row">
      <style:table-row-properties style:row-height="0.265cm" fo:break-before="auto" style:use-optimal-row-height="false"/>
    </style:style>
    <style:style style:name="ro40" style:family="table-row">
      <style:table-row-properties style:row-height="0.661cm" fo:break-before="auto" style:use-optimal-row-height="false"/>
    </style:style>
    <style:style style:name="ro41" style:family="table-row">
      <style:table-row-properties style:row-height="0.741cm" fo:break-before="auto" style:use-optimal-row-height="false"/>
    </style:style>
    <style:style style:name="ro42" style:family="table-row">
      <style:table-row-properties style:row-height="0.9cm" fo:break-before="auto" style:use-optimal-row-height="false"/>
    </style:style>
    <style:style style:name="ro43" style:family="table-row">
      <style:table-row-properties style:row-height="0.404cm" fo:break-before="auto" style:use-optimal-row-height="true"/>
    </style:style>
    <style:style style:name="ro44" style:family="table-row">
      <style:table-row-properties style:row-height="0.446cm" fo:break-before="auto" style:use-optimal-row-height="true"/>
    </style:style>
    <style:style style:name="ro45" style:family="table-row">
      <style:table-row-properties style:row-height="1.296cm" fo:break-before="auto" style:use-optimal-row-height="false"/>
    </style:style>
    <style:style style:name="ro46" style:family="table-row">
      <style:table-row-properties style:row-height="0.635cm" fo:break-before="auto" style:use-optimal-row-height="false"/>
    </style:style>
    <style:style style:name="ro47" style:family="table-row">
      <style:table-row-properties style:row-height="0.609cm" fo:break-before="auto" style:use-optimal-row-height="false"/>
    </style:style>
    <style:style style:name="ro48" style:family="table-row">
      <style:table-row-properties style:row-height="0.582cm" fo:break-before="auto" style:use-optimal-row-height="false"/>
    </style:style>
    <style:style style:name="ro49" style:family="table-row">
      <style:table-row-properties style:row-height="0.556cm" fo:break-before="auto" style:use-optimal-row-height="false"/>
    </style:style>
    <style:style style:name="ro50" style:family="table-row">
      <style:table-row-properties style:row-height="2.434cm" fo:break-before="auto" style:use-optimal-row-height="false"/>
    </style:style>
    <style:style style:name="ta1" style:family="table" style:master-page-name="PageStyle_5f_POBLACION">
      <style:table-properties table:display="true" style:writing-mode="lr-tb" table:tab-color="#666699"/>
    </style:style>
    <style:style style:name="ta2" style:family="table" style:master-page-name="PageStyle_5f_DEMANDA">
      <style:table-properties table:display="true" style:writing-mode="lr-tb" table:tab-color="#666699"/>
    </style:style>
    <style:style style:name="ta3" style:family="table" style:master-page-name="PageStyle_5f_OFERTA">
      <style:table-properties table:display="true" style:writing-mode="lr-tb" table:tab-color="#666699"/>
    </style:style>
    <style:style style:name="ta4" style:family="table" style:master-page-name="PageStyle_5f_BRECHA">
      <style:table-properties table:display="true" style:writing-mode="lr-tb" table:tab-color="#666699"/>
    </style:style>
    <style:style style:name="ta5" style:family="table" style:master-page-name="PageStyle_5f_PLAN_20_DE_20_PRODUCCION">
      <style:table-properties table:display="true" style:writing-mode="lr-tb" table:tab-color="#666699"/>
    </style:style>
    <style:style style:name="ta6" style:family="table" style:master-page-name="PageStyle_5f_TERREN_20_Y_20_OBR_20_CIV">
      <style:table-properties table:display="true" style:writing-mode="lr-tb" table:tab-color="#666699"/>
    </style:style>
    <style:style style:name="ta7" style:family="table" style:master-page-name="PageStyle_5f_MUEB_2c__20_MAQ_2c_EQUIP">
      <style:table-properties table:display="true" style:writing-mode="lr-tb" table:tab-color="#666699"/>
    </style:style>
    <style:style style:name="ta8" style:family="table" style:master-page-name="PageStyle_5f_INVERS_20_FIJ_20_INTANG">
      <style:table-properties table:display="true" style:writing-mode="lr-tb" table:tab-color="#666699"/>
    </style:style>
    <style:style style:name="ta9" style:family="table" style:master-page-name="PageStyle_5f_REMUNERACION">
      <style:table-properties table:display="true" style:writing-mode="lr-tb" table:tab-color="#666699"/>
    </style:style>
    <style:style style:name="ta10" style:family="table" style:master-page-name="PageStyle_5f_CAP_20_TRABAJ">
      <style:table-properties table:display="true" style:writing-mode="lr-tb" table:tab-color="#666699"/>
    </style:style>
    <style:style style:name="ta11" style:family="table" style:master-page-name="PageStyle_5f_INVERSION">
      <style:table-properties table:display="true" style:writing-mode="lr-tb" table:tab-color="#666699"/>
    </style:style>
    <style:style style:name="ta12" style:family="table" style:master-page-name="PageStyle_5f_RESUM_20_INVER">
      <style:table-properties table:display="true" style:writing-mode="lr-tb" table:tab-color="#666699"/>
    </style:style>
    <style:style style:name="ta13" style:family="table" style:master-page-name="PageStyle_5f_CRONOG">
      <style:table-properties table:display="true" style:writing-mode="lr-tb" table:tab-color="#666699"/>
    </style:style>
    <style:style style:name="ta14" style:family="table" style:master-page-name="PageStyle_5f_FINANCIAMIENT">
      <style:table-properties table:display="true" style:writing-mode="lr-tb" table:tab-color="#666699"/>
    </style:style>
    <style:style style:name="ta15" style:family="table" style:master-page-name="PageStyle_5f_COSTO_20_PROD_20_Y_20_OPER">
      <style:table-properties table:display="true" style:writing-mode="lr-tb" table:tab-color="#666699"/>
    </style:style>
    <style:style style:name="ta16" style:family="table" style:master-page-name="PageStyle_5f_DEPRECIAC_20_">
      <style:table-properties table:display="true" style:writing-mode="lr-tb" table:tab-color="#666699"/>
    </style:style>
    <style:style style:name="ta17" style:family="table" style:master-page-name="PageStyle_5f_COSTOS_20_TOTALES">
      <style:table-properties table:display="true" style:writing-mode="lr-tb" table:tab-color="#666699"/>
    </style:style>
    <style:style style:name="ta18" style:family="table" style:master-page-name="PageStyle_5f_INGRESOS">
      <style:table-properties table:display="true" style:writing-mode="lr-tb" table:tab-color="#666699"/>
    </style:style>
    <style:style style:name="ta19" style:family="table" style:master-page-name="PageStyle_5f_ESTADO_20_GyP">
      <style:table-properties table:display="true" style:writing-mode="lr-tb" table:tab-color="#666699"/>
    </style:style>
    <style:style style:name="ta20" style:family="table" style:master-page-name="PageStyle_5f_FLUJO_20_DE_20_CAJA_20_">
      <style:table-properties table:display="true" style:writing-mode="lr-tb" table:tab-color="#666699"/>
    </style:style>
    <style:style style:name="ta21" style:family="table" style:master-page-name="PageStyle_5f_ANALISIS_20_SESIB">
      <style:table-properties table:display="true" style:writing-mode="lr-tb" table:tab-color="#666699"/>
    </style:style>
    <style:style style:name="ta22" style:family="table" style:master-page-name="PageStyle_5f_INDICADORES">
      <style:table-properties table:display="true" style:writing-mode="lr-tb" table:tab-color="#666699"/>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time-style style:name="N60">
      <number:hours number:style="long"/>
      <number:text>:</number:text>
      <number:minutes number:style="long"/>
    </number:time-style>
    <style:style style:name="ce1" style:family="table-cell" style:parent-style-name="Default"/>
    <style:style style:name="ce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c6e2ff"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0">
      <style:table-cell-properties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c6e2ff" style:cell-protect="protected" style:print-content="true" style:diagonal-bl-tr="none" style:diagonal-tl-br="none" style:text-align-source="value-type" style:repeat-content="false" fo:wrap-option="wrap" fo:border="0.74pt solid #c6e2ff"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cell-protect="protected" style:print-content="true" style:diagonal-bl-tr="none" style:diagonal-tl-br="none" style:text-align-source="value-type" style:repeat-content="false" fo:wrap-option="wrap" fo:border="0.74pt solid #c6e2ff"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cc99ff" style:cell-protect="protected" style:print-content="true" style:diagonal-bl-tr="none" style:diagonal-tl-br="none" style:text-align-source="value-type" style:repeat-content="false" fo:wrap-option="wrap" fo:border="0.74pt solid #c6e2ff"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data-style-name="N3">
      <style:table-cell-properties fo:background-color="#ffffff"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cell-protect="protected" style:print-content="true" style:diagonal-bl-tr="none" style:diagonal-tl-br="none" style:text-align-source="value-type" style:repeat-content="false" fo:wrap-option="wrap" fo:border="0.74pt solid #c6e2ff"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0">
      <style:table-cell-properties fo:background-color="#0066cc" style:cell-protect="protected" style:print-content="true" style:diagonal-bl-tr="none" style:diagonal-tl-br="none" style:text-align-source="fix" style:repeat-content="false" fo:wrap-option="wrap" fo:border="0.74pt solid #0066cc"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66cc"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6" style:family="table-cell" style:parent-style-name="Default" style:data-style-name="N135">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3">
      <style:table-cell-properties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3">
      <style:table-cell-properties fo:background-color="#cc99ff"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0">
      <style:table-cell-properties style:cell-protect="protected" style:print-content="true" style:diagonal-bl-tr="none" style:diagonal-tl-br="none" style:text-align-source="value-type" style:repeat-content="false" fo:wrap-option="wrap" fo:border="0.74pt solid #c6e2ff"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cell-protect="protected" style:print-content="true" style:diagonal-bl-tr="none" style:diagonal-tl-br="none" style:text-align-source="fix" style:repeat-content="false" fo:wrap-option="wrap" fo:border="0.74pt solid #0066cc"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3">
      <style:table-cell-properties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Porcentaje_20_2" style:data-style-name="N135">
      <style:table-cell-properties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Porcentaje_20_2" style:data-style-name="N135">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ackground-color="#c6e2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table-cell-properties fo:background-color="#c6e2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ackground-color="#c6e2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3">
      <style:table-cell-properties fo:background-color="#ffffff" style:cell-protect="protected" style:print-content="true" style:diagonal-bl-tr="none" style:diagonal-tl-br="none" style:text-align-source="fix" style:repeat-content="false" fo:wrap-option="wrap" fo:border="0.74pt solid #0066cc"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3">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fo:background-color="#cccc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ackground-color="#cc99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data-style-name="N1">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ackground-color="#cc99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0">
      <style:table-cell-properties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0">
      <style:table-cell-properties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ackground-color="#ccccff"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data-style-name="N0">
      <style:table-cell-properties fo:background-color="#cc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ackground-color="#ffff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
      <style:table-cell-properties fo:background-color="#ffcc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
      <style:table-cell-properties fo:background-color="#80008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3">
      <style:table-cell-properties fo:background-color="#ccccff"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data-style-name="N135">
      <style:table-cell-properties fo:border-bottom="none"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
      <style:table-cell-properties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
      <style:table-cell-properties fo:background-color="#ccccff" style:cell-protect="protected" style:print-content="true" style:diagonal-bl-tr="none" style:diagonal-tl-br="none" style:text-align-source="fix" style:repeat-content="false" fo:wrap-option="wrap" fo:border="0.74pt solid #c6e2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Porcentaje_20_2" style:data-style-name="N135">
      <style:table-cell-properties fo:border-bottom="none"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data-style-name="N137">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data-style-name="N1">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data-style-name="N1">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2">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data-style-name="N136">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1">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3">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Normal_20_4"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 style:family="table-cell" style:parent-style-name="Normal_20_4" style:data-style-name="N0">
      <style:table-cell-properties fo:background-color="#cccc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78" style:family="table-cell" style:parent-style-name="Normal_20_4"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9" style:family="table-cell" style:parent-style-name="Normal_20_4"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0" style:family="table-cell" style:parent-style-name="Normal_20_4" style:data-style-name="N0">
      <style:table-cell-properties style:cell-protect="protected" style:print-content="true"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1" style:family="table-cell" style:parent-style-name="Normal_20_4"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 style:family="table-cell" style:parent-style-name="Normal_20_4"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3" style:family="table-cell" style:parent-style-name="Normal_20_4"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4" style:family="table-cell" style:parent-style-name="Normal_20_4"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 style:family="table-cell" style:parent-style-name="Normal_20_4" style:data-style-name="N1">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6" style:family="table-cell" style:parent-style-name="Normal_20_4" style:data-style-name="N0">
      <style:table-cell-properties fo:background-color="#99cc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Normal_20_4"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Normal_20_4" style:data-style-name="N1">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 style:family="table-cell" style:parent-style-name="Normal_20_4" style:data-style-name="N1">
      <style:table-cell-properties fo:background-color="#ffff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0" style:family="table-cell" style:parent-style-name="Normal_20_4" style:data-style-name="N13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20_4"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20_4" style:data-style-name="N6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20_4" style:data-style-name="N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Normal_20_4"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5" style:family="table-cell" style:parent-style-name="Normal_20_4" style:data-style-name="N1">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6" style:family="table-cell" style:parent-style-name="Normal_20_4"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7" style:family="table-cell" style:parent-style-name="Normal_20_4"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8" style:family="table-cell" style:parent-style-name="Normal_20_4" style:data-style-name="N13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9" style:family="table-cell" style:parent-style-name="Normal_20_4" style:data-style-name="N1">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0" style:family="table-cell" style:parent-style-name="Normal_20_4" style:data-style-name="N1">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1" style:family="table-cell" style:parent-style-name="Normal_20_4" style:data-style-name="N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2" style:family="table-cell" style:parent-style-name="Normal_20_4" style:data-style-name="N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3" style:family="table-cell" style:parent-style-name="Normal_20_4"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4" style:family="table-cell" style:parent-style-name="Normal_20_4" style:data-style-name="N1">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5" style:family="table-cell" style:parent-style-name="Normal_20_4" style:data-style-name="N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6" style:family="table-cell" style:parent-style-name="Normal_20_4"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7" style:family="table-cell" style:parent-style-name="Normal_20_4" style:data-style-name="N1">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8" style:family="table-cell" style:parent-style-name="Normal_20_4" style:data-style-name="N2">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9" style:family="table-cell" style:parent-style-name="Normal_20_4"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0" style:family="table-cell" style:parent-style-name="Normal_20_4"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1" style:family="table-cell" style:parent-style-name="Normal_20_4"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2" style:family="table-cell" style:parent-style-name="Normal_20_4" style:data-style-name="N1">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3" style:family="table-cell" style:parent-style-name="Normal_20_4"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Normal_20_4"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15" style:family="table-cell" style:parent-style-name="Normal_20_4"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6" style:family="table-cell" style:parent-style-name="Normal_20_4"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Normal_20_4"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Normal_20_4"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Normal_20_4"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0" style:family="table-cell" style:parent-style-name="Normal_20_4"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1" style:family="table-cell" style:parent-style-name="Normal_20_4"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2" style:family="table-cell" style:parent-style-name="Normal_20_4"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Normal_20_4"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Normal_20_4" style:data-style-name="N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Normal_20_4" style:data-style-name="N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 style:family="table-cell" style:parent-style-name="Normal_20_4" style:data-style-name="N4">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7" style:family="table-cell" style:parent-style-name="Normal_20_4" style:data-style-name="N4">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Normal_20_4"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 style:family="table-cell" style:parent-style-name="Normal_20_4"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Normal_20_4"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Normal_20_4"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2" style:family="table-cell" style:parent-style-name="Normal_20_4"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3" style:family="table-cell" style:parent-style-name="Normal_20_4" style:data-style-name="N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4" style:family="table-cell" style:parent-style-name="Normal_20_4"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5" style:family="table-cell" style:parent-style-name="Normal_20_4"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style>
    <style:style style:name="ce136" style:family="table-cell" style:parent-style-name="Normal_20_4"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7" style:family="table-cell" style:parent-style-name="Normal_20_4"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Normal_20_4"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Normal_20_4"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Normal_20_4" style:data-style-name="N4">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Porcentaje_20_2" style:data-style-name="N135">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2" style:family="table-cell" style:parent-style-name="Normal_20_4"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3" style:family="table-cell" style:parent-style-name="Normal_20_4"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Normal_20_4" style:data-style-name="N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Normal_20_4"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6" style:family="table-cell" style:parent-style-name="Normal_20_4" style:data-style-name="N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Normal_20_4"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8" style:family="table-cell" style:parent-style-name="Normal_20_4"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Normal_20_4"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Normal_20_4" style:data-style-name="N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Normal_20_4"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Normal_20_4"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Normal_20_4" style:data-style-name="N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Normal_20_4" style:data-style-name="N0">
      <style:table-cell-properties fo:border-bottom="0.74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5" style:family="table-cell" style:parent-style-name="Normal_20_4"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Normal_20_4"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Normal_20_4"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9"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0" style:family="table-cell" style:parent-style-name="Default"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4" style:family="table-cell" style:parent-style-name="Default"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5" style:family="table-cell" style:parent-style-name="Default"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6" style:family="table-cell" style:parent-style-name="Excel_20_Built-in_20_Comma" style:data-style-name="N133">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7" style:family="table-cell" style:parent-style-name="Excel_20_Built-in_20_Comma" style:data-style-name="N3">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9" style:family="table-cell" style:parent-style-name="Excel_20_Built-in_20_Comma" style:data-style-name="N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0" style:family="table-cell" style:parent-style-name="Default"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data-style-name="N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Excel_20_Built-in_20_Comma"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3" style:family="table-cell" style:parent-style-name="Excel_20_Built-in_20_Percent" style:data-style-name="N135">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4" style:family="table-cell" style:parent-style-name="Default" style:data-style-name="N138">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5" style:family="table-cell" style:parent-style-name="Excel_20_Built-in_20_Percent" style:data-style-name="N134">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6" style:family="table-cell" style:parent-style-name="Default" style:data-style-name="N13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 style:family="table-cell" style:parent-style-name="Default" style:data-style-name="N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7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3"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style>
    <style:style style:name="ce186"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88"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0"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92"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Default"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5" style:family="table-cell" style:parent-style-name="Default" style:data-style-name="N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6" style:family="table-cell" style:parent-style-name="Default"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7" style:family="table-cell" style:parent-style-name="Default" style:data-style-name="N2">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9"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data-style-name="N2">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data-style-name="N133">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5" style:family="table-cell" style:parent-style-name="Default" style:data-style-name="N4">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6"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20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8"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09"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1" style:family="table-cell" style:parent-style-name="Default"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2"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3"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4"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6" style:family="table-cell" style:parent-style-name="Default" style:data-style-name="N0">
      <style:table-cell-properties fo:border-bottom="none" fo:background-color="#0066cc"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9" style:family="table-cell" style:parent-style-name="Default" style:data-style-name="N0">
      <style:table-cell-properties fo:background-color="#0066c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20"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2"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5" style:family="table-cell" style:parent-style-name="Default"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6" style:family="table-cell" style:parent-style-name="Default"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27"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28"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9"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0" style:family="table-cell" style:parent-style-name="Millares_20_2" style:data-style-name="N2">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Excel_20_Built-in_20_Comma"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2" style:family="table-cell" style:parent-style-name="Excel_20_Built-in_20_Comma" style:data-style-name="N133">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3" style:family="table-cell" style:parent-style-name="Default" style:data-style-name="N138">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4" style:family="table-cell" style:parent-style-name="Default" style:data-style-name="N13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6"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7" style:family="table-cell" style:parent-style-name="Default" style:data-style-name="N133">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8" style:family="table-cell" style:parent-style-name="Default" style:data-style-name="N0">
      <style:table-cell-properties fo:border-bottom="none" fo:background-color="#0066cc"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9" style:family="table-cell" style:parent-style-name="Excel_20_Built-in_20_Comma" style:data-style-name="N133">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0" style:family="table-cell" style:parent-style-name="Excel_20_Built-in_20_Comma" style:data-style-name="N2">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1" style:family="table-cell" style:parent-style-name="Default" style:data-style-name="N138">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data-style-name="N13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data-style-name="N138">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4"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5"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6"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7" style:family="table-cell" style:parent-style-name="Default" style:data-style-name="N139">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8" style:family="table-cell" style:parent-style-name="Default" style:data-style-name="N138">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9" style:family="table-cell" style:parent-style-name="Default" style:data-style-name="N138">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data-style-name="N4">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1"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52"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3" style:family="table-cell" style:parent-style-name="Default" style:data-style-name="N138">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4" style:family="table-cell" style:parent-style-name="Default" style:data-style-name="N138">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6"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57" style:family="table-cell" style:parent-style-name="Default"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58"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9"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6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1" style:family="table-cell" style:parent-style-name="Default" style:data-style-name="N0">
      <style:table-cell-properties style:cell-protect="protected" style:print-content="true" style:diagonal-bl-tr="none" style:diagonal-tl-br="none" style:text-align-source="fix" style:repeat-content="false" fo:wrap-option="wrap" fo:border="1.76pt solid #ffcc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2"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3"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64"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65" style:family="table-cell" style:parent-style-name="Default" style:data-style-name="N138">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6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68"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69"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7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71"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2"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5"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6" style:family="table-cell" style:parent-style-name="Excel_20_Built-in_20_Comma" style:data-style-name="N133">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7"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8" style:family="table-cell" style:parent-style-name="Default" style:data-style-name="N138">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9" style:family="table-cell" style:parent-style-name="Default"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1" style:family="table-cell" style:parent-style-name="Default" style:data-style-name="N13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8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284" style:family="table-cell" style:parent-style-name="Default" style:data-style-name="N0">
      <style:table-cell-properties style:cell-protect="protected" style:print-content="true" style:diagonal-bl-tr="none" style:diagonal-tl-br="none" style:text-align-source="fix" style:repeat-content="false" fo:wrap-option="wrap" fo:border="1.76pt solid #ffcc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5" style:family="table-cell" style:parent-style-name="Default" style:data-style-name="N0">
      <style:table-cell-properties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86" style:family="table-cell" style:parent-style-name="Default" style:data-style-name="N137">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287" style:family="table-cell" style:parent-style-name="Default" style:data-style-name="N0">
      <style:table-cell-properties fo:border-bottom="none" fo:background-color="#0066cc"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88" style:family="table-cell" style:parent-style-name="Default"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89" style:family="table-cell" style:parent-style-name="Default"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0" style:family="table-cell" style:parent-style-name="Excel_20_Built-in_20_Comma"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1" style:family="table-cell" style:parent-style-name="Excel_20_Built-in_20_Comma"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3" style:family="table-cell" style:parent-style-name="Default" style:data-style-name="N0">
      <style:table-cell-properties fo:border-bottom="none" fo:background-color="#0066cc"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5" style:family="table-cell" style:parent-style-name="Excel_20_Built-in_20_Comma" style:data-style-name="N133">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6" style:family="table-cell" style:parent-style-name="Excel_20_Built-in_20_Comma" style:data-style-name="N133">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9"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00"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2" style:family="table-cell" style:parent-style-name="Default" style:data-style-name="N0">
      <style:table-cell-properties fo:background-color="#00cc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3"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4"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7"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Default" style:data-style-name="N0">
      <style:table-cell-properties fo:background-color="#99cc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0" style:family="table-cell" style:parent-style-name="Default" style:data-style-name="N2">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1" style:family="table-cell" style:parent-style-name="Default" style:data-style-name="N2">
      <style:table-cell-properties fo:background-color="#00cc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2" style:family="table-cell" style:parent-style-name="Excel_20_Built-in_20_Comma"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3" style:family="table-cell" style:parent-style-name="Excel_20_Built-in_20_Comma"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4" style:family="table-cell" style:parent-style-name="Default"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5" style:family="table-cell" style:parent-style-name="Default" style:data-style-name="N2">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6" style:family="table-cell" style:parent-style-name="Excel_20_Built-in_20_Comma"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7" style:family="table-cell" style:parent-style-name="Default"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8" style:family="table-cell" style:parent-style-name="Default" style:data-style-name="N2">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9" style:family="table-cell" style:parent-style-name="Default"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0" style:family="table-cell" style:parent-style-name="Excel_20_Built-in_20_Comma" style:data-style-name="N4">
      <style:table-cell-properties fo:background-color="#99cc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1" style:family="table-cell" style:parent-style-name="Excel_20_Built-in_20_Percent" style:data-style-name="N13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2" style:family="table-cell" style:parent-style-name="Default" style:data-style-name="N2">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3" style:family="table-cell" style:parent-style-name="Excel_20_Built-in_20_Comma"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4" style:family="table-cell" style:parent-style-name="Default"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5" style:family="table-cell" style:parent-style-name="Default"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6" style:family="table-cell" style:parent-style-name="Excel_20_Built-in_20_Comma"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7" style:family="table-cell" style:parent-style-name="Default"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8" style:family="table-cell" style:parent-style-name="Excel_20_Built-in_20_Comma"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9" style:family="table-cell" style:parent-style-name="Default" style:data-style-name="N4">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0" style:family="table-cell" style:parent-style-name="Excel_20_Built-in_20_Percent" style:data-style-name="N135">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1" style:family="table-cell" style:parent-style-name="Default" style:data-style-name="N4">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2" style:family="table-cell" style:parent-style-name="Excel_20_Built-in_20_Comma"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3" style:family="table-cell" style:parent-style-name="Default" style:data-style-name="N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4" style:family="table-cell" style:parent-style-name="Default" style:data-style-name="N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5" style:family="table-cell" style:parent-style-name="Default" style:data-style-name="N4">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6" style:family="table-cell" style:parent-style-name="Default" style:data-style-name="N4">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7" style:family="table-cell" style:parent-style-name="Default" style:data-style-name="N133">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8" style:family="table-cell" style:parent-style-name="Default" style:data-style-name="N14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9" style:family="table-cell" style:parent-style-name="Default" style:data-style-name="N13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1"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3"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4"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7"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9" style:family="table-cell" style:parent-style-name="Default"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4" style:family="table-cell" style:parent-style-name="Excel_20_Built-in_20_Comma" style:data-style-name="N4">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5" style:family="table-cell" style:parent-style-name="Excel_20_Built-in_20_Comma"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6" style:family="table-cell" style:parent-style-name="Default"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7" style:family="table-cell" style:parent-style-name="Default" style:data-style-name="N4">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Excel_20_Built-in_20_Comma"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9" style:family="table-cell" style:parent-style-name="Default"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0" style:family="table-cell" style:parent-style-name="Default"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1" style:family="table-cell" style:parent-style-name="Default" style:data-style-name="N4">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2" style:family="table-cell" style:parent-style-name="Excel_20_Built-in_20_Comma" style:data-style-name="N4">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3" style:family="table-cell" style:parent-style-name="Excel_20_Built-in_20_Percent" style:data-style-name="N135">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4" style:family="table-cell" style:parent-style-name="Default" style:data-style-name="N4">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5" style:family="table-cell" style:parent-style-name="Default" style:data-style-name="N2">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6" style:family="table-cell" style:parent-style-name="Default" style:data-style-name="N2">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7" style:family="table-cell" style:parent-style-name="Default"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8"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9" style:family="table-cell" style:parent-style-name="Excel_20_Built-in_20_Comma" style:data-style-name="N4">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0" style:family="table-cell" style:parent-style-name="Excel_20_Built-in_20_Comma" style:data-style-name="N4">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1" style:family="table-cell" style:parent-style-name="Default" style:data-style-name="N4">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2" style:family="table-cell" style:parent-style-name="Default" style:data-style-name="N4">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3" style:family="table-cell" style:parent-style-name="Excel_20_Built-in_20_Comma" style:data-style-name="N4">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4" style:family="table-cell" style:parent-style-name="Default"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5" style:family="table-cell" style:parent-style-name="Default" style:data-style-name="N4">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6" style:family="table-cell" style:parent-style-name="Excel_20_Built-in_20_Comma" style:data-style-name="N4">
      <style:table-cell-properties fo:border-bottom="0.74pt solid #000000" fo:background-color="#0066cc"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7" style:family="table-cell" style:parent-style-name="Default" style:data-style-name="N4">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8" style:family="table-cell" style:parent-style-name="Default" style:data-style-name="N4">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9" style:family="table-cell" style:parent-style-name="Excel_20_Built-in_20_Percent" style:data-style-name="N135">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0" style:family="table-cell" style:parent-style-name="Default" style:data-style-name="N135">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1" style:family="table-cell" style:parent-style-name="Default" style:data-style-name="N0">
      <style:table-cell-properties fo:border-bottom="0.74pt solid #000000" fo:background-color="#0066cc"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2" style:family="table-cell" style:parent-style-name="Excel_20_Built-in_20_Comma" style:data-style-name="N4">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3" style:family="table-cell" style:parent-style-name="Excel_20_Built-in_20_Percent" style:data-style-name="N135">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5"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6"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8"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9"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3" style:family="table-cell" style:parent-style-name="Default" style:data-style-name="N4">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4" style:family="table-cell" style:parent-style-name="Default" style:data-style-name="N4">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5" style:family="table-cell" style:parent-style-name="Excel_20_Built-in_20_Percent" style:data-style-name="N135">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6" style:family="table-cell" style:parent-style-name="Default" style:data-style-name="N3">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8" style:family="table-cell" style:parent-style-name="Default" style:data-style-name="N0">
      <style:table-cell-properties fo:border-bottom="0.74pt solid #000000" fo:background-color="#0066cc"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1" style:family="table-cell" style:parent-style-name="Default"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2" style:family="table-cell" style:parent-style-name="Default" style:data-style-name="N4">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3" style:family="table-cell" style:parent-style-name="Default"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4"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5" style:family="table-cell" style:parent-style-name="Excel_20_Built-in_20_Percent" style:data-style-name="N135">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6"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7" style:family="table-cell" style:parent-style-name="Excel_20_Built-in_20_Comma" style:data-style-name="N133">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8" style:family="table-cell" style:parent-style-name="Excel_20_Built-in_20_Comma" style:data-style-name="N133">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9"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0"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1"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2" style:family="table-cell" style:parent-style-name="Excel_20_Built-in_20_Percent" style:data-style-name="N134">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3"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4" style:family="table-cell" style:parent-style-name="Default" style:data-style-name="N4">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5" style:family="table-cell" style:parent-style-name="Default" style:data-style-name="N139">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7" style:family="table-cell" style:parent-style-name="Default" style:data-style-name="N0">
      <style:table-cell-properties fo:border-bottom="none" fo:background-color="#0066cc"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19"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1"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Default" style:data-style-name="N0">
      <style:table-cell-properties fo:background-color="#0066c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4"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6"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7"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8"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0" style:family="table-cell" style:parent-style-name="Excel_20_Built-in_20_Comma" style:data-style-name="N133">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1" style:family="table-cell" style:parent-style-name="Excel_20_Built-in_20_Percent" style:data-style-name="N135">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2" style:family="table-cell" style:parent-style-name="Excel_20_Built-in_20_Percent" style:data-style-name="N134">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3" style:family="table-cell" style:parent-style-name="Default" style:data-style-name="N133">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4" style:family="table-cell" style:parent-style-name="Default" style:data-style-name="N138">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5" style:family="table-cell" style:parent-style-name="Default" style:data-style-name="N138">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6" style:family="table-cell" style:parent-style-name="Default" style:data-style-name="N134">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7" style:family="table-cell" style:parent-style-name="Excel_20_Built-in_20_Percent" style:data-style-name="N135">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8" style:family="table-cell" style:parent-style-name="Default" style:data-style-name="N14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9" style:family="table-cell" style:parent-style-name="Default" style:data-style-name="N14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1"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2"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3" style:family="table-cell" style:parent-style-name="Default" style:data-style-name="N13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4" style:family="table-cell" style:parent-style-name="Default" style:data-style-name="N14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5"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6" style:family="table-cell" style:parent-style-name="Default" style:data-style-name="N0">
      <style:table-cell-properties fo:border-bottom="none" fo:background-color="#0066cc"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7" style:family="table-cell" style:parent-style-name="Excel_20_Built-in_20_Comma" style:data-style-name="N14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8" style:family="table-cell" style:parent-style-name="Default" style:data-style-name="N134">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9"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0" style:family="table-cell" style:parent-style-name="Default" style:data-style-name="N13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1"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2" style:family="table-cell" style:parent-style-name="Default" style:data-style-name="N14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3" style:family="table-cell" style:parent-style-name="Default" style:data-style-name="N0">
      <style:table-cell-properties fo:border-bottom="none" fo:background-color="#0066cc"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4" style:family="table-cell" style:parent-style-name="Excel_20_Built-in_20_Comma" style:data-style-name="N133">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5" style:family="table-cell" style:parent-style-name="Excel_20_Built-in_20_Comma" style:data-style-name="N133">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6" style:family="table-cell" style:parent-style-name="Default" style:data-style-name="N1">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7" style:family="table-cell" style:parent-style-name="Default" style:data-style-name="N0">
      <style:table-cell-properties fo:background-color="#0066cc"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8" style:family="table-cell" style:parent-style-name="Excel_20_Built-in_20_Comma" style:data-style-name="N133">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9" style:family="table-cell" style:parent-style-name="Excel_20_Built-in_20_Comma" style:data-style-name="N133">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6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62" style:family="table-cell" style:parent-style-name="Default" style:data-style-name="N13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63" style:family="table-cell" style:parent-style-name="Default" style:data-style-name="N13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4" style:family="table-cell" style:parent-style-name="Excel_20_Built-in_20_Comma" style:data-style-name="N133">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5" style:family="table-cell" style:parent-style-name="Excel_20_Built-in_20_Comma" style:data-style-name="N133">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6" style:family="table-cell" style:parent-style-name="Excel_20_Built-in_20_Percent" style:data-style-name="N134">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7" style:family="table-cell" style:parent-style-name="Default" style:data-style-name="N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8" style:family="table-cell" style:parent-style-name="Default" style:data-style-name="N144">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9" style:family="table-cell" style:parent-style-name="Default" style:data-style-name="N141">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1" style:family="table-cell" style:parent-style-name="Default" style:data-style-name="N144">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2"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5"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6"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7"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8"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5"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7"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8" style:family="table-cell" style:parent-style-name="Default" style:data-style-name="N0">
      <style:table-cell-properties fo:background-color="#0066c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9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1"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49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4"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5" style:family="table-cell" style:parent-style-name="Default" style:data-style-name="N2">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6"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7" style:family="table-cell" style:parent-style-name="Excel_20_Built-in_20_Comma"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8" style:family="table-cell" style:parent-style-name="Excel_20_Built-in_20_Comma"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9" style:family="table-cell" style:parent-style-name="Excel_20_Built-in_20_Comma" style:data-style-name="N2">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1" style:family="table-cell" style:parent-style-name="Default" style:data-style-name="N138">
      <style:table-cell-properties fo:background-color="#0066c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3" style:family="table-cell" style:parent-style-name="Default" style:data-style-name="N1">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4" style:family="table-cell" style:parent-style-name="Default" style:data-style-name="N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6"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7"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8"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9"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0" style:family="table-cell" style:parent-style-name="Default" style:data-style-name="N145">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511" style:family="table-cell" style:parent-style-name="Excel_20_Built-in_20_Comma" style:data-style-name="N133">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2" style:family="table-cell" style:parent-style-name="Default" style:data-style-name="N4">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3" style:family="table-cell" style:parent-style-name="Default"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4" style:family="table-cell" style:parent-style-name="Default"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5" style:family="table-cell" style:parent-style-name="Default"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6" style:family="table-cell" style:parent-style-name="Default"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7"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8"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9" style:family="table-cell" style:parent-style-name="Default"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0"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9933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1" style:family="table-cell" style:parent-style-name="Default"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9933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2"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3" style:family="table-cell" style:parent-style-name="Excel_20_Built-in_20_Comma"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4" style:family="table-cell" style:parent-style-name="Default" style:data-style-name="N138">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525"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6"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8" style:family="table-cell" style:parent-style-name="Excel_20_Built-in_20_Comma"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9" style:family="table-cell" style:parent-style-name="Excel_20_Built-in_20_Comma" style:data-style-name="N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0" style:family="table-cell" style:parent-style-name="Excel_20_Built-in_20_Comma" style:data-style-name="N4">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31" style:family="table-cell" style:parent-style-name="Default" style:data-style-name="N146">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53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582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4" style:family="table-cell" style:parent-style-name="Default" style:data-style-name="N0">
      <style:table-cell-properties fo:background-color="#0066c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5"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536"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537"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8" style:family="table-cell" style:parent-style-name="Excel_20_Built-in_20_Comma" style:data-style-name="N133">
      <style:table-cell-properties fo:background-color="#0066c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9" style:family="table-cell" style:parent-style-name="Default" style:data-style-name="N138">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540"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1"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2" style:family="table-cell" style:parent-style-name="Default" style:data-style-name="N0">
      <style:table-cell-properties fo:background-color="#ffcc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3" style:family="table-cell" style:parent-style-name="Default" style:data-style-name="N0">
      <style:table-cell-properties fo:border-bottom="0.74pt solid #000000" fo:background-color="#0066cc"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4" style:family="table-cell" style:parent-style-name="Excel_20_Built-in_20_Comma" style:data-style-name="N133">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5" style:family="table-cell" style:parent-style-name="Default" style:data-style-name="N138">
      <style:table-cell-properties fo:background-color="#ffcc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546" style:family="table-cell" style:parent-style-name="Default"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547" style:family="table-cell" style:parent-style-name="Default" style:data-style-name="N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54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9" style:family="table-cell" style:parent-style-name="Default" style:data-style-name="N0">
      <style:table-cell-properties fo:border-bottom="0.74pt solid #000000" fo:background-color="#00ccff" style:cell-protect="protected" style:print-content="true"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50" style:family="table-cell" style:parent-style-name="Default" style:data-style-name="N0">
      <style:table-cell-properties fo:border-bottom="0.74pt solid #000000" fo:background-color="#00ccff" style:cell-protect="protected" style:print-content="tru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2"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3" style:family="table-cell" style:parent-style-name="Default" style:data-style-name="N0">
      <style:table-cell-properties fo:border-bottom="1.76pt solid #000000" style:cell-protect="protected" style:print-content="true"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4"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5" style:family="table-cell" style:parent-style-name="Excel_20_Built-in_20_Comma" style:data-style-name="N14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6" style:family="table-cell" style:parent-style-name="Default" style:data-style-name="N133">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7" style:family="table-cell" style:parent-style-name="Default" style:data-style-name="N0">
      <style:table-cell-properties fo:border-bottom="0.74pt solid #000000" fo:background-color="#00cc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58" style:family="table-cell" style:parent-style-name="Default" style:data-style-name="N0">
      <style:table-cell-properties fo:background-color="#00cc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9" style:family="table-cell" style:parent-style-name="Default" style:data-style-name="N2">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0" style:family="table-cell" style:parent-style-name="Default" style:data-style-name="N0">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1" style:family="table-cell" style:parent-style-name="Default" style:data-style-name="N147">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4" style:family="table-cell" style:parent-style-name="Default" style:data-style-name="N0">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5" style:family="table-cell" style:parent-style-name="Default" style:data-style-name="N0">
      <style:table-cell-properties fo:border-bottom="0.74pt solid #000000" fo:background-color="#00ccff" style:cell-protect="protected" style:print-content="true"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6" style:family="table-cell" style:parent-style-name="Default" style:data-style-name="N0">
      <style:table-cell-properties fo:border-bottom="0.74pt solid #000000" fo:background-color="#00cc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9" style:family="table-cell" style:parent-style-name="Default" style:data-style-name="N0">
      <style:table-cell-properties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0" style:family="table-cell" style:parent-style-name="Default" style:data-style-name="N4">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2" style:family="table-cell" style:parent-style-name="Default" style:data-style-name="N13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6"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7"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8"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1"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2"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3" style:family="table-cell" style:parent-style-name="Excel_20_Built-in_20_Comma" style:data-style-name="N13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4" style:family="table-cell" style:parent-style-name="Default" style:data-style-name="N138">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5" style:family="table-cell" style:parent-style-name="Default" style:data-style-name="N147">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6" style:family="table-cell" style:parent-style-name="Default" style:data-style-name="N13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7"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8"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9" style:family="table-cell" style:parent-style-name="Default" style:data-style-name="N14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0" style:family="table-cell" style:parent-style-name="Excel_20_Built-in_20_Comma" style:data-style-name="N133">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1" style:family="table-cell" style:parent-style-name="Excel_20_Built-in_20_Comma" style:data-style-name="N133">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2" style:family="table-cell" style:parent-style-name="Excel_20_Built-in_20_Comma" style:data-style-name="N149">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3"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4"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5"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6" style:family="table-cell" style:parent-style-name="Default" style:data-style-name="N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98"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0" style:family="table-cell" style:parent-style-name="Default" style:data-style-name="N0">
      <style:table-cell-properties fo:background-color="#cc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1"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2"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603"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4"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5"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Comma" style:data-style-name="N133">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7"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8" style:family="table-cell" style:parent-style-name="Excel_20_Built-in_20_Comma" style:data-style-name="N133">
      <style:table-cell-properties fo:background-color="#cc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9"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1" style:family="table-cell" style:parent-style-name="Default" style:data-style-name="N13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612" style:family="table-cell" style:parent-style-name="Excel_20_Built-in_20_Percent" style:data-style-name="N13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3" style:family="table-cell" style:parent-style-name="Default" style:data-style-name="N15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4" style:family="table-cell" style:parent-style-name="Default" style:data-style-name="N135">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5" style:family="table-cell" style:parent-style-name="Default" style:data-style-name="N13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6" style:family="table-cell" style:parent-style-name="Default" style:data-style-name="N13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7" style:family="table-cell" style:parent-style-name="Default" style:data-style-name="N1">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8" style:family="table-cell" style:parent-style-name="Default" style:data-style-name="N1">
      <style:table-cell-properties fo:background-color="#0066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9" style:family="table-cell" style:parent-style-name="Default" style:data-style-name="N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0" style:family="table-cell" style:parent-style-name="Default" style:data-style-name="N15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1" style:family="table-cell" style:parent-style-name="Default" style:data-style-name="N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2" style:family="table-cell" style:parent-style-name="Default" style:data-style-name="N14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3" style:family="table-cell" style:parent-style-name="Default" style:data-style-name="N137">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4" style:family="table-cell" style:parent-style-name="Default" style:data-style-name="N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style>
    <style:style style:name="ce625" style:family="table-cell" style:parent-style-name="Default" style:data-style-name="N14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style>
    <style:style style:name="ce626" style:family="table-cell" style:parent-style-name="Excel_20_Built-in_20_Comma" style:data-style-name="N133">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7" style:family="table-cell" style:parent-style-name="Excel_20_Built-in_20_Comma" style:data-style-name="N133">
      <style:table-cell-properties fo:background-color="#cc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8" style:family="table-cell" style:parent-style-name="Default" style:data-style-name="N15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9" style:family="table-cell" style:parent-style-name="Default" style:data-style-name="N15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0" style:family="table-cell" style:parent-style-name="Default" style:data-style-name="N15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1" style:family="table-cell" style:parent-style-name="Excel_20_Built-in_20_Comma" style:data-style-name="N154">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2" style:family="table-cell" style:parent-style-name="Default" style:data-style-name="N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3" style:family="table-cell" style:parent-style-name="Default" style:data-style-name="N14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4" style:family="table-cell" style:parent-style-name="Excel_20_Built-in_20_Percent" style:data-style-name="N135">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5" style:family="table-cell" style:parent-style-name="Default" style:data-style-name="N134">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6" style:family="table-cell" style:parent-style-name="Default" style:data-style-name="N138">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7" style:family="table-cell" style:parent-style-name="Default"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Default" style:data-style-name="N133">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2" style:family="table-cell" style:parent-style-name="Default" style:data-style-name="N133">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3" style:family="table-cell" style:parent-style-name="Excel_20_Built-in_20_Comma" style:data-style-name="N133">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4" style:family="table-cell" style:parent-style-name="Excel_20_Built-in_20_Comma" style:data-style-name="N148">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5" style:family="table-cell" style:parent-style-name="Excel_20_Built-in_20_Comma" style:data-style-name="N133">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6" style:family="table-cell" style:parent-style-name="Normal_20_4" style:data-style-name="N0">
      <style:table-cell-properties fo:border-bottom="1.76pt solid #000000" style:cell-protect="protected" style:print-content="true"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7" style:family="table-cell" style:parent-style-name="Normal_20_4"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8" style:family="table-cell" style:parent-style-name="Normal_20_4"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9" style:family="table-cell" style:parent-style-name="Normal_20_4"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650" style:family="table-cell" style:parent-style-name="Normal_20_4"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1" style:family="table-cell" style:parent-style-name="Normal_20_4" style:data-style-name="N0">
      <style:table-cell-properties fo:border-bottom="0.74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2" style:family="table-cell" style:parent-style-name="Normal_20_4"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Normal_20_4" style:data-style-name="N135">
      <style:table-cell-properties fo:border-bottom="1.76pt solid #000000"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style>
    <style:style style:name="ce654" style:family="table-cell" style:parent-style-name="Millares_20_2"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Normal_20_4"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656" style:family="table-cell" style:parent-style-name="Millares_20_2" style:data-style-name="N13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Millares_20_2"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8" style:family="table-cell" style:parent-style-name="Millares_20_2" style:data-style-name="N133">
      <style:table-cell-properties fo:background-color="#33ccc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9" style:family="table-cell" style:parent-style-name="Normal_20_4" style:data-style-name="N135">
      <style:table-cell-properties fo:background-color="#33ccc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660" style:family="table-cell" style:parent-style-name="Normal_20_4" style:data-style-name="N134">
      <style:table-cell-properties fo:border-bottom="0.74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1" style:family="table-cell" style:parent-style-name="Normal_20_4" style:data-style-name="N134">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662" style:family="table-cell" style:parent-style-name="Normal_20_4"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63" style:family="table-cell" style:parent-style-name="Normal_20_4" style:data-style-name="N138">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664" style:family="table-cell" style:parent-style-name="Normal_20_4"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5" style:family="table-cell" style:parent-style-name="Normal_20_4"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6" style:family="table-cell" style:parent-style-name="Normal_20_4"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7" style:family="table-cell" style:parent-style-name="Normal_20_4"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8" style:family="table-cell" style:parent-style-name="Porcentaje_20_2" style:data-style-name="N13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9" style:family="table-cell" style:parent-style-name="Normal_20_4" style:data-style-name="N13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670" style:family="table-cell" style:parent-style-name="Normal_20_4" style:data-style-name="N13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1" style:family="table-cell" style:parent-style-name="Normal_20_4"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2" style:family="table-cell" style:parent-style-name="Normal_20_4"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673" style:family="table-cell" style:parent-style-name="Millares_20_2"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4" style:family="table-cell" style:parent-style-name="Normal_20_4" style:data-style-name="N135">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5" style:family="table-cell" style:parent-style-name="Millares_20_2"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6" style:family="table-cell" style:parent-style-name="Normal_20_4" style:data-style-name="N13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677" style:family="table-cell" style:parent-style-name="Normal_20_4"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8" style:family="table-cell" style:parent-style-name="Excel_20_Built-in_20_Percent" style:data-style-name="N13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9" style:family="table-cell" style:parent-style-name="Default" style:data-style-name="N2">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0" style:family="table-cell" style:parent-style-name="Excel_20_Built-in_20_Percent" style:data-style-name="N134">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82" style:family="table-cell" style:parent-style-name="Default" style:data-style-name="N0">
      <style:table-cell-properties fo:background-color="#0066cc"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3" style:family="table-cell" style:parent-style-name="Default" style:data-style-name="N1">
      <style:table-cell-properties fo:background-color="#0066cc"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4" style:family="table-cell" style:parent-style-name="Default" style:data-style-name="N1">
      <style:table-cell-properties fo:background-color="#0066cc"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5" style:family="table-cell" style:parent-style-name="Excel_20_Built-in_20_Comma" style:data-style-name="N13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6" style:family="table-cell" style:parent-style-name="Default" style:data-style-name="N15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7" style:family="table-cell" style:parent-style-name="Default" style:data-style-name="N14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8" style:family="table-cell" style:parent-style-name="Default" style:data-style-name="N137">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9"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0" style:family="table-cell" style:parent-style-name="Excel_20_Built-in_20_Comma" style:data-style-name="N133">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1" style:family="table-cell" style:parent-style-name="Excel_20_Built-in_20_Comma" style:data-style-name="N154">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2" style:family="table-cell" style:parent-style-name="Excel_20_Built-in_20_Percent" style:data-style-name="N13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3" style:family="table-cell" style:parent-style-name="Normal_20_4" style:data-style-name="N13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4" style:family="table-cell" style:parent-style-name="Default" style:data-style-name="N0">
      <style:table-cell-properties fo:background-color="#0066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5"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8"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9" style:family="table-cell" style:parent-style-name="Default" style:data-style-name="N2">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0" style:family="table-cell" style:parent-style-name="Default" style:data-style-name="N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1" style:family="table-cell" style:parent-style-name="Default" style:data-style-name="N2">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2" style:family="table-cell" style:parent-style-name="Excel_20_Built-in_20_Percent" style:data-style-name="N135">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3" style:family="table-cell" style:parent-style-name="Default" style:data-style-name="N1">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4" style:family="table-cell" style:parent-style-name="Default" style:data-style-name="N0">
      <style:table-cell-properties fo:background-color="#8080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5" style:family="table-cell" style:parent-style-name="Default" style:data-style-name="N4">
      <style:table-cell-properties fo:background-color="#8080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start"/>
      <style:text-properties fo:font-size="18pt"/>
    </style:style>
    <style:style style:name="gr2"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ta_extref" style:family="table">
      <style:table-properties table:display="fals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POBLACION" table:style-name="ta1" table:print-ranges="POBLACION.A1:POBLACION.H55">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number-columns-repeated="4" table:default-cell-style-name="ce2"/>
        <table:table-column table:style-name="co6" table:default-cell-style-name="ce2"/>
        <table:table-column table:style-name="co1"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 table:number-columns-repeated="241" table:default-cell-style-name="ce2"/>
        <table:table-column table:style-name="co12" table:number-columns-repeated="16127"/>
        <table:table-row table:style-name="ro1">
          <table:table-cell table:number-columns-repeated="2"/>
          <table:table-cell table:style-name="ce15"/>
          <table:table-cell table:number-columns-repeated="254"/>
        </table:table-row>
        <table:table-row table:style-name="ro1">
          <table:table-cell table:style-name="ce3" table:number-columns-repeated="2"/>
          <table:table-cell table:style-name="ce16" table:formula="of:=+[.G9]" office:value-type="percentage" office:value="0.0245637298337731" calcext:value-type="percentage">
            <text:p>2.46 %</text:p>
          </table:table-cell>
          <table:table-cell table:style-name="ce3" table:number-columns-repeated="3"/>
          <table:table-cell table:style-name="ce3" table:formula="of:=+[.F4]-[.E4]" office:value-type="float" office:value="10" calcext:value-type="float">
            <text:p>10</text:p>
          </table:table-cell>
          <table:table-cell table:style-name="ce3" table:number-columns-repeated="2"/>
          <table:table-cell table:number-columns-repeated="248"/>
        </table:table-row>
        <table:table-row table:style-name="ro1">
          <table:table-cell table:style-name="ce3" table:number-columns-repeated="6"/>
          <table:table-cell table:style-name="ce3" table:formula="of:=+[.F12]-[.E12]" office:value-type="float" office:value="24" calcext:value-type="float">
            <text:p>24</text:p>
          </table:table-cell>
          <table:table-cell table:style-name="ce3" table:number-columns-repeated="2"/>
          <table:table-cell table:number-columns-repeated="2"/>
          <table:table-cell table:style-name="ce32" table:number-columns-spanned="1" table:number-rows-spanned="2"/>
          <table:table-cell table:style-name="ce32" table:number-columns-repeated="4"/>
          <table:table-cell table:number-columns-repeated="241"/>
        </table:table-row>
        <table:table-row table:style-name="ro1">
          <table:table-cell table:style-name="ce3"/>
          <table:table-cell table:style-name="ce4" office:value-type="string" calcext:value-type="string">
            <text:p>Departamento</text:p>
          </table:table-cell>
          <table:table-cell table:style-name="ce4" office:value-type="string" calcext:value-type="string">
            <text:p>Indicador</text:p>
          </table:table-cell>
          <table:table-cell table:style-name="ce4" office:value-type="string" calcext:value-type="string">
            <text:p>Unidad</text:p>
          </table:table-cell>
          <table:table-cell table:style-name="ce4" office:value-type="float" office:value="2007" calcext:value-type="float">
            <text:p>2007</text:p>
          </table:table-cell>
          <table:table-cell table:style-name="ce4" office:value-type="float" office:value="2017" calcext:value-type="float">
            <text:p>2017</text:p>
          </table:table-cell>
          <table:table-cell table:style-name="ce4" office:value-type="string" calcext:value-type="string">
            <text:p>Tasa (%)</text:p>
          </table:table-cell>
          <table:table-cell table:style-name="ce3" table:number-columns-repeated="2"/>
          <table:table-cell table:number-columns-repeated="2"/>
          <table:covered-table-cell table:style-name="ce32"/>
          <table:table-cell table:style-name="ce32" table:number-columns-repeated="4"/>
          <table:table-cell table:number-columns-repeated="241"/>
        </table:table-row>
        <table:table-row table:style-name="ro1">
          <table:table-cell table:style-name="ce3"/>
          <table:table-cell table:style-name="ce5" office:value-type="string" calcext:value-type="string">
            <text:p>Ayacucho</text:p>
          </table:table-cell>
          <table:table-cell table:style-name="ce8" office:value-type="string" calcext:value-type="string">
            <text:p>Población censada</text:p>
          </table:table-cell>
          <table:table-cell table:style-name="ce8" office:value-type="string" calcext:value-type="string">
            <text:p>Personas</text:p>
          </table:table-cell>
          <table:table-cell table:style-name="ce17" table:formula="of:=+[.E7]+[.E6]" office:value-type="float" office:value="612489" calcext:value-type="float">
            <text:p>612,489</text:p>
          </table:table-cell>
          <table:table-cell table:style-name="ce17" table:formula="of:=+[.F7]+[.F6]" office:value-type="float" office:value="616176" calcext:value-type="float">
            <text:p>616,176</text:p>
          </table:table-cell>
          <table:table-cell table:style-name="ce23" table:formula="of:=((([.F5]/[.E5])^(1/[.G2]))-1)" office:value-type="percentage" office:value="0.000600345528959156" calcext:value-type="percentage">
            <text:p>0.06 %</text:p>
          </table:table-cell>
          <table:table-cell table:style-name="ce24"/>
          <table:table-cell table:style-name="ce3"/>
          <table:table-cell table:number-columns-repeated="2"/>
          <table:table-cell table:style-name="ce33" table:number-columns-repeated="3"/>
          <table:table-cell table:style-name="ce36" table:number-columns-repeated="2"/>
          <table:table-cell table:number-columns-repeated="241"/>
        </table:table-row>
        <table:table-row table:style-name="ro1">
          <table:table-cell table:style-name="ce3"/>
          <table:table-cell table:style-name="ce5" office:value-type="string" calcext:value-type="string">
            <text:p>Ayacucho</text:p>
          </table:table-cell>
          <table:table-cell table:style-name="ce8" office:value-type="string" calcext:value-type="string">
            <text:p>Población censada femenina</text:p>
          </table:table-cell>
          <table:table-cell table:style-name="ce8" office:value-type="string" calcext:value-type="string">
            <text:p>Personas</text:p>
          </table:table-cell>
          <table:table-cell table:style-name="ce17" office:value-type="float" office:value="308347" calcext:value-type="float">
            <text:p>308,347</text:p>
          </table:table-cell>
          <table:table-cell table:style-name="ce17" office:value-type="float" office:value="311836" calcext:value-type="float">
            <text:p>311,836</text:p>
          </table:table-cell>
          <table:table-cell table:style-name="ce23" table:formula="of:=((([.F6]/[.E6])^(1/[.G2]))-1)" office:value-type="percentage" office:value="0.00112579687406544" calcext:value-type="percentage">
            <text:p>0.11 %</text:p>
          </table:table-cell>
          <table:table-cell table:style-name="ce3" table:number-columns-repeated="2"/>
          <table:table-cell table:number-columns-repeated="2"/>
          <table:table-cell table:style-name="ce33" table:number-columns-repeated="3"/>
          <table:table-cell table:style-name="ce36" table:number-columns-repeated="2"/>
          <table:table-cell table:number-columns-repeated="241"/>
        </table:table-row>
        <table:table-row table:style-name="ro1">
          <table:table-cell table:style-name="ce3"/>
          <table:table-cell table:style-name="ce5" office:value-type="string" calcext:value-type="string">
            <text:p>Ayacucho</text:p>
          </table:table-cell>
          <table:table-cell table:style-name="ce8" office:value-type="string" calcext:value-type="string">
            <text:p>Población censada masculina</text:p>
          </table:table-cell>
          <table:table-cell table:style-name="ce8" office:value-type="string" calcext:value-type="string">
            <text:p>Personas</text:p>
          </table:table-cell>
          <table:table-cell table:style-name="ce17" office:value-type="float" office:value="304142" calcext:value-type="float">
            <text:p>304,142</text:p>
          </table:table-cell>
          <table:table-cell table:style-name="ce17" office:value-type="float" office:value="304340" calcext:value-type="float">
            <text:p>304,340</text:p>
          </table:table-cell>
          <table:table-cell table:style-name="ce23" table:formula="of:=((([.F7]/[.E7])^(1/[.G2]))-1)" office:value-type="percentage" office:value="0.0000650821059775542" calcext:value-type="percentage">
            <text:p>0.01 %</text:p>
          </table:table-cell>
          <table:table-cell table:style-name="ce3" table:number-columns-repeated="2"/>
          <table:table-cell table:number-columns-repeated="2"/>
          <table:table-cell table:style-name="ce34" table:number-columns-repeated="3"/>
          <table:table-cell table:style-name="ce37" table:number-columns-repeated="2"/>
          <table:table-cell table:number-columns-repeated="241"/>
        </table:table-row>
        <table:table-row table:style-name="ro1">
          <table:table-cell table:style-name="ce3"/>
          <table:table-cell table:style-name="ce4" office:value-type="string" calcext:value-type="string">
            <text:p>Provincia</text:p>
          </table:table-cell>
          <table:table-cell table:style-name="ce4" office:value-type="string" calcext:value-type="string">
            <text:p>Indicador</text:p>
          </table:table-cell>
          <table:table-cell table:style-name="ce4" office:value-type="string" calcext:value-type="string">
            <text:p>Unidad</text:p>
          </table:table-cell>
          <table:table-cell table:style-name="ce4" office:value-type="float" office:value="2007" calcext:value-type="float">
            <text:p>2007</text:p>
          </table:table-cell>
          <table:table-cell table:style-name="ce4" office:value-type="float" office:value="2017" calcext:value-type="float">
            <text:p>2017</text:p>
          </table:table-cell>
          <table:table-cell table:style-name="ce4" office:value-type="string" calcext:value-type="string">
            <text:p>Tasa (%)</text:p>
          </table:table-cell>
          <table:table-cell table:style-name="ce3" table:number-columns-repeated="2"/>
          <table:table-cell table:number-columns-repeated="248"/>
        </table:table-row>
        <table:table-row table:style-name="ro1">
          <table:table-cell/>
          <table:table-cell table:style-name="ce5" office:value-type="string" calcext:value-type="string">
            <text:p>Huamanga</text:p>
          </table:table-cell>
          <table:table-cell table:style-name="ce8" office:value-type="string" calcext:value-type="string">
            <text:p>Población censada</text:p>
          </table:table-cell>
          <table:table-cell table:style-name="ce8" office:value-type="string" calcext:value-type="string">
            <text:p>Personas</text:p>
          </table:table-cell>
          <table:table-cell table:style-name="ce17" table:formula="of:=+[.E10]+[.E11]" office:value-type="float" office:value="221390" calcext:value-type="float">
            <text:p>221,390</text:p>
          </table:table-cell>
          <table:table-cell table:style-name="ce17" table:formula="of:=+[.F10]+[.F11]" office:value-type="float" office:value="282194" calcext:value-type="float">
            <text:p>282,194</text:p>
          </table:table-cell>
          <table:table-cell table:style-name="ce23" table:formula="of:=((([.F9]/[.E9])^(1/[.G2]))-1)" office:value-type="percentage" office:value="0.0245637298337731" calcext:value-type="percentage">
            <text:p>2.46 %</text:p>
          </table:table-cell>
          <table:table-cell table:number-columns-repeated="250"/>
        </table:table-row>
        <table:table-row table:style-name="ro1">
          <table:table-cell/>
          <table:table-cell table:style-name="ce5" office:value-type="string" calcext:value-type="string">
            <text:p>Huamanga</text:p>
          </table:table-cell>
          <table:table-cell table:style-name="ce8" office:value-type="string" calcext:value-type="string">
            <text:p>Población censada femenina</text:p>
          </table:table-cell>
          <table:table-cell table:style-name="ce8" office:value-type="string" calcext:value-type="string">
            <text:p>Personas</text:p>
          </table:table-cell>
          <table:table-cell table:style-name="ce17" office:value-type="float" office:value="113363" calcext:value-type="float">
            <text:p>113,363</text:p>
          </table:table-cell>
          <table:table-cell table:style-name="ce17" office:value-type="float" office:value="144611" calcext:value-type="float">
            <text:p>144,611</text:p>
          </table:table-cell>
          <table:table-cell table:style-name="ce23" table:formula="of:=((([.F10]/[.E10])^(1/[.G2]))-1)" office:value-type="percentage" office:value="0.0246439966672165" calcext:value-type="percentage">
            <text:p>2.46 %</text:p>
          </table:table-cell>
          <table:table-cell table:number-columns-repeated="250"/>
        </table:table-row>
        <table:table-row table:style-name="ro1">
          <table:table-cell/>
          <table:table-cell table:style-name="ce5" office:value-type="string" calcext:value-type="string">
            <text:p>Huamanga</text:p>
          </table:table-cell>
          <table:table-cell table:style-name="ce8" office:value-type="string" calcext:value-type="string">
            <text:p>Población censada masculina</text:p>
          </table:table-cell>
          <table:table-cell table:style-name="ce8" office:value-type="string" calcext:value-type="string">
            <text:p>Personas</text:p>
          </table:table-cell>
          <table:table-cell table:style-name="ce17" office:value-type="float" office:value="108027" calcext:value-type="float">
            <text:p>108,027</text:p>
          </table:table-cell>
          <table:table-cell table:style-name="ce17" office:value-type="float" office:value="137583" calcext:value-type="float">
            <text:p>137,583</text:p>
          </table:table-cell>
          <table:table-cell table:style-name="ce23" table:formula="of:=((([.F11]/[.E11])^(1/[.G2]))-1)" office:value-type="percentage" office:value="0.0244794373139541" calcext:value-type="percentage">
            <text:p>2.45 %</text:p>
          </table:table-cell>
          <table:table-cell table:number-columns-repeated="250"/>
        </table:table-row>
        <table:table-row table:style-name="ro2">
          <table:table-cell/>
          <table:table-cell table:style-name="ce4" office:value-type="string" calcext:value-type="string">
            <text:p>Distrito</text:p>
          </table:table-cell>
          <table:table-cell table:style-name="ce4" office:value-type="string" calcext:value-type="string">
            <text:p>Indicador</text:p>
          </table:table-cell>
          <table:table-cell table:style-name="ce4" office:value-type="string" calcext:value-type="string">
            <text:p>Unidad</text:p>
          </table:table-cell>
          <table:table-cell table:style-name="ce4" office:value-type="float" office:value="1993" calcext:value-type="float">
            <text:p>1993</text:p>
          </table:table-cell>
          <table:table-cell table:style-name="ce4" office:value-type="float" office:value="2017" calcext:value-type="float">
            <text:p>2017</text:p>
          </table:table-cell>
          <table:table-cell table:style-name="ce4" office:value-type="string" calcext:value-type="string">
            <text:p>Tasa (%)</text:p>
          </table:table-cell>
          <table:table-cell table:number-columns-repeated="2"/>
          <table:table-cell table:style-name="ce25"/>
          <table:table-cell table:style-name="ce26" office:value-type="string" calcext:value-type="string" table:number-columns-spanned="2" table:number-rows-spanned="1">
            <text:p>AYACUCHO</text:p>
          </table:table-cell>
          <table:covered-table-cell table:style-name="ce26"/>
          <table:table-cell table:style-name="ce26" office:value-type="string" calcext:value-type="string" table:number-columns-spanned="2" table:number-rows-spanned="1">
            <text:p>HUAMANGA</text:p>
          </table:table-cell>
          <table:covered-table-cell table:style-name="ce26"/>
          <table:table-cell table:style-name="ce26" office:value-type="string" calcext:value-type="string" table:number-columns-spanned="2" table:number-rows-spanned="1">
            <text:p>CARMEN ALTO</text:p>
          </table:table-cell>
          <table:covered-table-cell table:style-name="ce26"/>
          <table:table-cell table:number-columns-repeated="241"/>
        </table:table-row>
        <table:table-row table:style-name="ro1">
          <table:table-cell/>
          <table:table-cell table:style-name="ce5" office:value-type="string" calcext:value-type="string">
            <text:p>Carmen Alto</text:p>
          </table:table-cell>
          <table:table-cell table:style-name="ce8" office:value-type="string" calcext:value-type="string">
            <text:p>Población censada</text:p>
          </table:table-cell>
          <table:table-cell table:style-name="ce8" office:value-type="string" calcext:value-type="string">
            <text:p>Personas</text:p>
          </table:table-cell>
          <table:table-cell table:style-name="ce17" table:formula="of:=+[.E15]+[.E14]" office:value-type="float" office:value="8914" calcext:value-type="float">
            <text:p>8,914</text:p>
          </table:table-cell>
          <table:table-cell table:style-name="ce17" table:formula="of:=+[.F15]+[.F14]" office:value-type="float" office:value="28252" calcext:value-type="float">
            <text:p>28,252</text:p>
          </table:table-cell>
          <table:table-cell table:style-name="ce23" table:formula="of:=((([.F13]/[.E13])^(1/[.G3]))-1)" office:value-type="percentage" office:value="0.0492380307254965" calcext:value-type="percentage">
            <text:p>4.92 %</text:p>
          </table:table-cell>
          <table:table-cell table:number-columns-repeated="2"/>
          <table:table-cell table:style-name="ce26" office:value-type="string" calcext:value-type="string">
            <text:p>AÑO</text:p>
          </table:table-cell>
          <table:table-cell table:style-name="ce29" office:value-type="string" calcext:value-type="string">
            <text:p>Hombres</text:p>
          </table:table-cell>
          <table:table-cell table:style-name="ce29" office:value-type="string" calcext:value-type="string">
            <text:p>Mujeres</text:p>
          </table:table-cell>
          <table:table-cell table:style-name="ce29" office:value-type="string" calcext:value-type="string">
            <text:p>Hombres</text:p>
          </table:table-cell>
          <table:table-cell table:style-name="ce29" office:value-type="string" calcext:value-type="string">
            <text:p>Mujeres</text:p>
          </table:table-cell>
          <table:table-cell table:style-name="ce29" office:value-type="string" calcext:value-type="string">
            <text:p>Hombres</text:p>
          </table:table-cell>
          <table:table-cell table:style-name="ce29" office:value-type="string" calcext:value-type="string">
            <text:p>Mujeres</text:p>
          </table:table-cell>
          <table:table-cell table:number-columns-repeated="241"/>
        </table:table-row>
        <table:table-row table:style-name="ro1">
          <table:table-cell/>
          <table:table-cell table:style-name="ce5" office:value-type="string" calcext:value-type="string">
            <text:p>Carmen Alto</text:p>
          </table:table-cell>
          <table:table-cell table:style-name="ce8" office:value-type="string" calcext:value-type="string">
            <text:p>Población censada femenina</text:p>
          </table:table-cell>
          <table:table-cell table:style-name="ce8" office:value-type="string" calcext:value-type="string">
            <text:p>Personas</text:p>
          </table:table-cell>
          <table:table-cell table:style-name="ce17" office:value-type="float" office:value="4287" calcext:value-type="float">
            <text:p>4,287</text:p>
          </table:table-cell>
          <table:table-cell table:style-name="ce17" office:value-type="float" office:value="14604" calcext:value-type="float">
            <text:p>14,604</text:p>
          </table:table-cell>
          <table:table-cell table:style-name="ce23" table:formula="of:=((([.F14]/[.E14])^(1/[.G3]))-1)" office:value-type="percentage" office:value="0.0523977983710462" calcext:value-type="percentage">
            <text:p>5.24 %</text:p>
          </table:table-cell>
          <table:table-cell table:number-columns-repeated="2"/>
          <table:table-cell table:style-name="ce27" office:value-type="float" office:value="2018" calcext:value-type="float">
            <text:p>2018</text:p>
          </table:table-cell>
          <table:table-cell table:style-name="ce30" table:formula="of:=[.F7]*(1+[.G7])" office:value-type="float" office:value="304359.807088133" calcext:value-type="float">
            <text:p>304,360</text:p>
          </table:table-cell>
          <table:table-cell table:style-name="ce30" table:formula="of:=[.F6]*(1+[.G6])" office:value-type="float" office:value="312187.063994021" calcext:value-type="float">
            <text:p>312,187</text:p>
          </table:table-cell>
          <table:table-cell table:style-name="ce30" table:formula="of:=[.F11]*(1+[.G11])" office:value-type="float" office:value="140950.954423966" calcext:value-type="float">
            <text:p>140,951</text:p>
          </table:table-cell>
          <table:table-cell table:style-name="ce30" table:formula="of:=[.F10]*(1+[.G10])" office:value-type="float" office:value="148174.793002043" calcext:value-type="float">
            <text:p>148,175</text:p>
          </table:table-cell>
          <table:table-cell table:style-name="ce30" table:formula="of:=[.F15]*(1+[.G15])" office:value-type="float" office:value="14277.190146777" calcext:value-type="float">
            <text:p>14,277</text:p>
          </table:table-cell>
          <table:table-cell table:style-name="ce30" table:formula="of:=[.F14]*(1+[.G14])" office:value-type="float" office:value="15369.2174474108" calcext:value-type="float">
            <text:p>15,369</text:p>
          </table:table-cell>
          <table:table-cell table:number-columns-repeated="241"/>
        </table:table-row>
        <table:table-row table:style-name="ro1">
          <table:table-cell/>
          <table:table-cell table:style-name="ce5" office:value-type="string" calcext:value-type="string">
            <text:p>Carmen Alto</text:p>
          </table:table-cell>
          <table:table-cell table:style-name="ce8" office:value-type="string" calcext:value-type="string">
            <text:p>Población censada masculina</text:p>
          </table:table-cell>
          <table:table-cell table:style-name="ce8" office:value-type="string" calcext:value-type="string">
            <text:p>Personas</text:p>
          </table:table-cell>
          <table:table-cell table:style-name="ce17" office:value-type="float" office:value="4627" calcext:value-type="float">
            <text:p>4,627</text:p>
          </table:table-cell>
          <table:table-cell table:style-name="ce17" office:value-type="float" office:value="13648" calcext:value-type="float">
            <text:p>13,648</text:p>
          </table:table-cell>
          <table:table-cell table:style-name="ce23" table:formula="of:=((([.F15]/[.E15])^(1/[.G3]))-1)" office:value-type="percentage" office:value="0.0461012710123849" calcext:value-type="percentage">
            <text:p>4.61 %</text:p>
          </table:table-cell>
          <table:table-cell table:number-columns-repeated="2"/>
          <table:table-cell table:style-name="ce27" office:value-type="float" office:value="2019" calcext:value-type="float">
            <text:p>2019</text:p>
          </table:table-cell>
          <table:table-cell table:style-name="ce31" table:formula="of:=+[.K14]*(1+[.$G$7])" office:value-type="float" office:value="304379.615465353" calcext:value-type="float">
            <text:p>304,380</text:p>
          </table:table-cell>
          <table:table-cell table:style-name="ce31" table:formula="of:=+[.L14]*(1+[.$G$6])" office:value-type="float" office:value="312538.523214789" calcext:value-type="float">
            <text:p>312,539</text:p>
          </table:table-cell>
          <table:table-cell table:style-name="ce31" table:formula="of:=+[.M14]*(1+[.$G$11])" office:value-type="float" office:value="144401.354477129" calcext:value-type="float">
            <text:p>144,401</text:p>
          </table:table-cell>
          <table:table-cell table:style-name="ce31" table:formula="of:=+[.N14]*(1+[.$G$10])" office:value-type="float" office:value="151826.412106951" calcext:value-type="float">
            <text:p>151,826</text:p>
          </table:table-cell>
          <table:table-cell table:style-name="ce31" table:formula="of:=+[.O14]*(1+[.$G$15])" office:value-type="float" office:value="14935.3867590289" calcext:value-type="float">
            <text:p>14,935</text:p>
          </table:table-cell>
          <table:table-cell table:style-name="ce31" table:formula="of:=+[.P14]*(1+[.$G$14])" office:value-type="float" office:value="16174.530604341" calcext:value-type="float">
            <text:p>16,175</text:p>
          </table:table-cell>
          <table:table-cell table:number-columns-repeated="241"/>
        </table:table-row>
        <table:table-row table:style-name="ro2">
          <table:table-cell/>
          <table:table-cell table:style-name="ce6" office:value-type="string" calcext:value-type="string" table:number-columns-spanned="6" table:number-rows-spanned="1">
            <text:p>Fuente: XII Poblacion, VII Vivienda 2017</text:p>
          </table:table-cell>
          <table:covered-table-cell table:number-columns-repeated="5" table:style-name="ce6"/>
          <table:table-cell table:number-columns-repeated="2"/>
          <table:table-cell table:style-name="ce27" office:value-type="float" office:value="2020" calcext:value-type="float">
            <text:p>2020</text:p>
          </table:table-cell>
          <table:table-cell table:style-name="ce31" table:formula="of:=+[.K15]*(1+[.$G$7])" office:value-type="float" office:value="304399.425131745" calcext:value-type="float">
            <text:p>304,399</text:p>
          </table:table-cell>
          <table:table-cell table:style-name="ce31" table:formula="of:=+[.L15]*(1+[.$G$6])" office:value-type="float" office:value="312890.378107249" calcext:value-type="float">
            <text:p>312,890</text:p>
          </table:table-cell>
          <table:table-cell table:style-name="ce31" table:formula="of:=+[.M15]*(1+[.$G$11])" office:value-type="float" office:value="147936.218382102" calcext:value-type="float">
            <text:p>147,936</text:p>
          </table:table-cell>
          <table:table-cell table:style-name="ce31" table:formula="of:=+[.N15]*(1+[.$G$10])" office:value-type="float" office:value="155568.02170091" calcext:value-type="float">
            <text:p>155,568</text:p>
          </table:table-cell>
          <table:table-cell table:style-name="ce31" table:formula="of:=+[.O15]*(1+[.$G$15])" office:value-type="float" office:value="15623.9270716817" calcext:value-type="float">
            <text:p>15,624</text:p>
          </table:table-cell>
          <table:table-cell table:style-name="ce31" table:formula="of:=+[.P15]*(1+[.$G$14])" office:value-type="float" office:value="17022.0403976935" calcext:value-type="float">
            <text:p>17,022</text:p>
          </table:table-cell>
          <table:table-cell table:number-columns-repeated="241"/>
        </table:table-row>
        <table:table-row table:style-name="ro2">
          <table:table-cell/>
          <table:table-cell table:style-name="ce6" office:value-type="string" calcext:value-type="string" table:number-columns-spanned="6" table:number-rows-spanned="1">
            <text:p>Fuente: XI Poblacion, VI Vivienda 2007</text:p>
          </table:table-cell>
          <table:covered-table-cell table:number-columns-repeated="5" table:style-name="ce6"/>
          <table:table-cell table:number-columns-repeated="2"/>
          <table:table-cell table:style-name="ce27" table:number-columns-repeated="2"/>
          <table:table-cell table:style-name="ce35" table:number-columns-repeated="5"/>
          <table:table-cell table:number-columns-repeated="241"/>
        </table:table-row>
        <table:table-row table:style-name="ro1">
          <table:table-cell table:number-columns-repeated="9"/>
          <table:table-cell table:style-name="ce27" table:number-columns-repeated="2"/>
          <table:table-cell table:style-name="ce35" table:number-columns-repeated="5"/>
          <table:table-cell table:number-columns-repeated="241"/>
        </table:table-row>
        <table:table-row table:style-name="ro1">
          <table:table-cell/>
          <table:table-cell table:style-name="ce7" office:value-type="string" calcext:value-type="string">
            <text:p>GÉNERO</text:p>
          </table:table-cell>
          <table:table-cell table:style-name="ce4" office:value-type="string" calcext:value-type="string">
            <text:p>Ayacucho</text:p>
          </table:table-cell>
          <table:table-cell table:style-name="ce4" office:value-type="string" calcext:value-type="string">
            <text:p>Huamanga</text:p>
          </table:table-cell>
          <table:table-cell table:style-name="ce4" office:value-type="string" calcext:value-type="string">
            <text:p>Carmen Alto</text:p>
          </table:table-cell>
          <table:table-cell table:number-columns-repeated="4"/>
          <table:table-cell table:style-name="ce27" table:number-columns-repeated="2"/>
          <table:table-cell table:style-name="ce35" table:number-columns-repeated="5"/>
          <table:table-cell table:number-columns-repeated="241"/>
        </table:table-row>
        <table:table-row table:style-name="ro2">
          <table:table-cell/>
          <table:table-cell table:style-name="ce8" office:value-type="string" calcext:value-type="string">
            <text:p>Hombres</text:p>
          </table:table-cell>
          <table:table-cell table:style-name="ce17" table:formula="of:=+[.K16]" office:value-type="float" office:value="304399.425131745" calcext:value-type="float">
            <text:p>304,399</text:p>
          </table:table-cell>
          <table:table-cell table:style-name="ce17" table:formula="of:=+[.M16]" office:value-type="float" office:value="147936.218382102" calcext:value-type="float">
            <text:p>147,936</text:p>
          </table:table-cell>
          <table:table-cell table:style-name="ce17" table:formula="of:=+[.O16]" office:value-type="float" office:value="15623.9270716817" calcext:value-type="float">
            <text:p>15,624</text:p>
          </table:table-cell>
          <table:table-cell table:number-columns-repeated="4"/>
          <table:table-cell table:style-name="ce28" table:number-columns-spanned="7" table:number-rows-spanned="1"/>
          <table:covered-table-cell table:number-columns-repeated="6" table:style-name="ce28"/>
          <table:table-cell table:number-columns-repeated="241"/>
        </table:table-row>
        <table:table-row table:style-name="ro2">
          <table:table-cell/>
          <table:table-cell table:style-name="ce8" office:value-type="string" calcext:value-type="string">
            <text:p>Mujeres</text:p>
          </table:table-cell>
          <table:table-cell table:style-name="ce17" table:formula="of:=+[.L16]" office:value-type="float" office:value="312890.378107249" calcext:value-type="float">
            <text:p>312,890</text:p>
          </table:table-cell>
          <table:table-cell table:style-name="ce17" table:formula="of:=+[.N16]" office:value-type="float" office:value="155568.02170091" calcext:value-type="float">
            <text:p>155,568</text:p>
          </table:table-cell>
          <table:table-cell table:style-name="ce17" table:formula="of:=+[.P16]" office:value-type="float" office:value="17022.0403976935" calcext:value-type="float">
            <text:p>17,022</text:p>
          </table:table-cell>
          <table:table-cell table:number-columns-repeated="4"/>
          <table:table-cell table:style-name="ce6" table:number-columns-spanned="7" table:number-rows-spanned="1"/>
          <table:covered-table-cell table:number-columns-repeated="6" table:style-name="ce6"/>
          <table:table-cell table:number-columns-repeated="241"/>
        </table:table-row>
        <table:table-row table:style-name="ro2">
          <table:table-cell/>
          <table:table-cell table:style-name="ce9" office:value-type="string" calcext:value-type="string">
            <text:p>Total</text:p>
          </table:table-cell>
          <table:table-cell table:style-name="ce18" table:formula="of:=SUM([.C20:.C21])" office:value-type="float" office:value="617289.803238994" calcext:value-type="float">
            <text:p>617,290</text:p>
          </table:table-cell>
          <table:table-cell table:style-name="ce18" table:formula="of:=SUM([.D20:.D21])" office:value-type="float" office:value="303504.240083012" calcext:value-type="float">
            <text:p>303,504</text:p>
          </table:table-cell>
          <table:table-cell table:style-name="ce18" table:formula="of:=SUM([.E20:.E21])" office:value-type="float" office:value="32645.9674693753" calcext:value-type="float">
            <text:p>32,646</text:p>
          </table:table-cell>
          <table:table-cell table:number-columns-repeated="4"/>
          <table:table-cell table:style-name="ce6" table:number-columns-spanned="7" table:number-rows-spanned="1"/>
          <table:covered-table-cell table:number-columns-repeated="6" table:style-name="ce6"/>
          <table:table-cell table:number-columns-repeated="241"/>
        </table:table-row>
        <table:table-row table:style-name="ro2">
          <table:table-cell table:number-columns-repeated="9"/>
          <table:table-cell table:style-name="ce6" table:number-columns-spanned="7" table:number-rows-spanned="1"/>
          <table:covered-table-cell table:number-columns-repeated="6" table:style-name="ce6"/>
          <table:table-cell table:number-columns-repeated="241"/>
        </table:table-row>
        <table:table-row table:style-name="ro1">
          <table:table-cell/>
          <table:table-cell table:style-name="ce4" office:value-type="string" calcext:value-type="string">
            <text:p>AÑO</text:p>
          </table:table-cell>
          <table:table-cell table:style-name="ce4" office:value-type="string" calcext:value-type="string">
            <text:p>CARMEN ALTO</text:p>
          </table:table-cell>
          <table:table-cell table:style-name="ce4" office:value-type="string" calcext:value-type="string">
            <text:p>FAMILIAS</text:p>
          </table:table-cell>
          <table:table-cell table:style-name="ce15" table:number-columns-repeated="2"/>
          <table:table-cell table:number-columns-repeated="251"/>
        </table:table-row>
        <table:table-row table:style-name="ro1">
          <table:table-cell/>
          <table:table-cell table:style-name="ce10" office:value-type="float" office:value="2018" calcext:value-type="float">
            <text:p>2,018</text:p>
          </table:table-cell>
          <table:table-cell table:style-name="ce10" table:formula="of:=+[.F13]*(1+[.$G$13])" office:value-type="float" office:value="29643.0728440567" calcext:value-type="float">
            <text:p>29,643</text:p>
          </table:table-cell>
          <table:table-cell table:style-name="ce10" table:formula="of:=+[.C25]/5" office:value-type="float" office:value="5928.61456881135" calcext:value-type="float">
            <text:p>5,929</text:p>
          </table:table-cell>
          <table:table-cell table:style-name="ce15" table:number-columns-repeated="2"/>
          <table:table-cell table:number-columns-repeated="251"/>
        </table:table-row>
        <table:table-row table:style-name="ro1">
          <table:table-cell/>
          <table:table-cell table:style-name="ce10" office:value-type="float" office:value="2019" calcext:value-type="float">
            <text:p>2,019</text:p>
          </table:table-cell>
          <table:table-cell table:style-name="ce10" table:formula="of:=+[.C25]*(1+[.$G$13])" office:value-type="float" office:value="31102.6393755505" calcext:value-type="float">
            <text:p>31,103</text:p>
          </table:table-cell>
          <table:table-cell table:style-name="ce10" table:formula="of:=+[.C26]/5" office:value-type="float" office:value="6220.5278751101" calcext:value-type="float">
            <text:p>6,221</text:p>
          </table:table-cell>
          <table:table-cell table:style-name="ce15" table:number-columns-repeated="2"/>
          <table:table-cell table:number-columns-repeated="251"/>
        </table:table-row>
        <table:table-row table:style-name="ro1">
          <table:table-cell/>
          <table:table-cell table:style-name="ce10" office:value-type="float" office:value="2020" calcext:value-type="float">
            <text:p>2,020</text:p>
          </table:table-cell>
          <table:table-cell table:style-name="ce10" table:formula="of:=+[.C26]*(1+[.$G$13])" office:value-type="float" office:value="32634.0720887679" calcext:value-type="float">
            <text:p>32,634</text:p>
          </table:table-cell>
          <table:table-cell table:style-name="ce10" table:formula="of:=+[.C27]/5" office:value-type="float" office:value="6526.81441775358" calcext:value-type="float">
            <text:p>6,527</text:p>
          </table:table-cell>
          <table:table-cell table:style-name="ce15" table:number-columns-repeated="2"/>
          <table:table-cell table:number-columns-repeated="251"/>
        </table:table-row>
        <table:table-row table:style-name="ro1">
          <table:table-cell/>
          <table:table-cell table:style-name="ce10" office:value-type="float" office:value="2021" calcext:value-type="float">
            <text:p>2,021</text:p>
          </table:table-cell>
          <table:table-cell table:style-name="ce10" table:formula="of:=+[.C27]*(1+[.$G$13])" office:value-type="float" office:value="34240.9095329727" calcext:value-type="float">
            <text:p>34,241</text:p>
          </table:table-cell>
          <table:table-cell table:style-name="ce10" table:formula="of:=+[.C28]/5" office:value-type="float" office:value="6848.18190659455" calcext:value-type="float">
            <text:p>6,848</text:p>
          </table:table-cell>
          <table:table-cell table:style-name="ce15" table:number-columns-repeated="2"/>
          <table:table-cell table:number-columns-repeated="251"/>
        </table:table-row>
        <table:table-row table:style-name="ro1">
          <table:table-cell/>
          <table:table-cell table:style-name="ce10" office:value-type="float" office:value="2022" calcext:value-type="float">
            <text:p>2,022</text:p>
          </table:table-cell>
          <table:table-cell table:style-name="ce10" table:formula="of:=+[.C28]*(1+[.$G$13])" office:value-type="float" office:value="35926.8644886262" calcext:value-type="float">
            <text:p>35,927</text:p>
          </table:table-cell>
          <table:table-cell table:style-name="ce10" table:formula="of:=+[.C29]/5" office:value-type="float" office:value="7185.37289772524" calcext:value-type="float">
            <text:p>7,185</text:p>
          </table:table-cell>
          <table:table-cell table:style-name="ce15" table:number-columns-repeated="2"/>
          <table:table-cell table:number-columns-repeated="251"/>
        </table:table-row>
        <table:table-row table:style-name="ro1">
          <table:table-cell/>
          <table:table-cell table:style-name="ce10" office:value-type="float" office:value="2023" calcext:value-type="float">
            <text:p>2,023</text:p>
          </table:table-cell>
          <table:table-cell table:style-name="ce10" table:formula="of:=+[.C29]*(1+[.$G$13])" office:value-type="float" office:value="37695.8325461879" calcext:value-type="float">
            <text:p>37,696</text:p>
          </table:table-cell>
          <table:table-cell table:style-name="ce10" table:formula="of:=+[.C30]/5" office:value-type="float" office:value="7539.16650923758" calcext:value-type="float">
            <text:p>7,539</text:p>
          </table:table-cell>
          <table:table-cell table:style-name="ce15" table:number-columns-repeated="2"/>
          <table:table-cell table:number-columns-repeated="251"/>
        </table:table-row>
        <table:table-row table:style-name="ro1">
          <table:table-cell/>
          <table:table-cell table:style-name="ce10" office:value-type="float" office:value="2024" calcext:value-type="float">
            <text:p>2,024</text:p>
          </table:table-cell>
          <table:table-cell table:style-name="ce10" table:formula="of:=+[.C30]*(1+[.$G$13])" office:value-type="float" office:value="39551.9011073203" calcext:value-type="float">
            <text:p>39,552</text:p>
          </table:table-cell>
          <table:table-cell table:style-name="ce10" table:formula="of:=+[.C31]/5" office:value-type="float" office:value="7910.38022146406" calcext:value-type="float">
            <text:p>7,910</text:p>
          </table:table-cell>
          <table:table-cell table:style-name="ce15" table:number-columns-repeated="2"/>
          <table:table-cell table:number-columns-repeated="251"/>
        </table:table-row>
        <table:table-row table:style-name="ro1">
          <table:table-cell/>
          <table:table-cell table:style-name="ce10" office:value-type="float" office:value="2025" calcext:value-type="float">
            <text:p>2,025</text:p>
          </table:table-cell>
          <table:table-cell table:style-name="ce10" table:formula="of:=+[.C31]*(1+[.$G$13])" office:value-type="float" office:value="41499.3588292943" calcext:value-type="float">
            <text:p>41,499</text:p>
          </table:table-cell>
          <table:table-cell table:style-name="ce10" table:formula="of:=+[.C32]/5" office:value-type="float" office:value="8299.87176585886" calcext:value-type="float">
            <text:p>8,300</text:p>
          </table:table-cell>
          <table:table-cell table:style-name="ce15" table:number-columns-repeated="2"/>
          <table:table-cell table:number-columns-repeated="251"/>
        </table:table-row>
        <table:table-row table:style-name="ro1">
          <table:table-cell table:number-columns-repeated="257"/>
        </table:table-row>
        <table:table-row table:style-name="ro3">
          <table:table-cell/>
          <table:table-cell table:style-name="ce4" office:value-type="string" calcext:value-type="string">
            <text:p>Provincia</text:p>
          </table:table-cell>
          <table:table-cell table:style-name="ce4" office:value-type="string" calcext:value-type="string">
            <text:p>Nombre Del Establecimiento (Recreo)</text:p>
          </table:table-cell>
          <table:table-cell table:style-name="ce7" office:value-type="string" calcext:value-type="string">
            <text:p>Requerimiento (Cuyes/semana)</text:p>
          </table:table-cell>
          <table:table-cell table:number-columns-repeated="253"/>
        </table:table-row>
        <table:table-row table:style-name="ro2">
          <table:table-cell/>
          <table:table-cell table:style-name="ce11" office:value-type="string" calcext:value-type="string" table:number-columns-spanned="1" table:number-rows-spanned="14">
            <text:p>Distritos de Carmen Alto, San Juan, Nazareo, Muyurina, Andrés Avelino Cáceres Dorregaray</text:p>
          </table:table-cell>
          <table:table-cell table:style-name="ce19" office:value-type="string" calcext:value-type="string">
            <text:p>Las Flores</text:p>
          </table:table-cell>
          <table:table-cell table:style-name="ce11" office:value-type="float" office:value="754" calcext:value-type="float">
            <text:p>754</text:p>
          </table:table-cell>
          <table:table-cell table:number-columns-repeated="253"/>
        </table:table-row>
        <table:table-row table:style-name="ro1">
          <table:table-cell/>
          <table:covered-table-cell table:style-name="ce11"/>
          <table:table-cell table:style-name="ce19" office:value-type="string" calcext:value-type="string">
            <text:p>El Kututo</text:p>
          </table:table-cell>
          <table:table-cell table:style-name="ce11" office:value-type="float" office:value="546" calcext:value-type="float">
            <text:p>546</text:p>
          </table:table-cell>
          <table:table-cell table:number-columns-repeated="253"/>
        </table:table-row>
        <table:table-row table:style-name="ro1">
          <table:table-cell/>
          <table:covered-table-cell table:style-name="ce11"/>
          <table:table-cell table:style-name="ce19" office:value-type="string" calcext:value-type="string">
            <text:p>Los Nogales</text:p>
          </table:table-cell>
          <table:table-cell table:style-name="ce11" office:value-type="float" office:value="442" calcext:value-type="float">
            <text:p>442</text:p>
          </table:table-cell>
          <table:table-cell table:number-columns-repeated="253"/>
        </table:table-row>
        <table:table-row table:style-name="ro1">
          <table:table-cell/>
          <table:covered-table-cell table:style-name="ce11"/>
          <table:table-cell table:style-name="ce19" office:value-type="string" calcext:value-type="string">
            <text:p>El Rey Macho Kututo.</text:p>
          </table:table-cell>
          <table:table-cell table:style-name="ce11" office:value-type="float" office:value="572" calcext:value-type="float">
            <text:p>572</text:p>
          </table:table-cell>
          <table:table-cell table:number-columns-repeated="253"/>
        </table:table-row>
        <table:table-row table:style-name="ro1">
          <table:table-cell/>
          <table:covered-table-cell table:style-name="ce11"/>
          <table:table-cell table:style-name="ce19" office:value-type="string" calcext:value-type="string">
            <text:p>La Cruz de Mirador</text:p>
          </table:table-cell>
          <table:table-cell table:style-name="ce11" office:value-type="float" office:value="345" calcext:value-type="float">
            <text:p>345</text:p>
          </table:table-cell>
          <table:table-cell table:number-columns-repeated="253"/>
        </table:table-row>
        <table:table-row table:style-name="ro1">
          <table:table-cell/>
          <table:covered-table-cell table:style-name="ce11"/>
          <table:table-cell table:style-name="ce19" office:value-type="string" calcext:value-type="string">
            <text:p>El Balcón</text:p>
          </table:table-cell>
          <table:table-cell table:style-name="ce11" office:value-type="float" office:value="468" calcext:value-type="float">
            <text:p>468</text:p>
          </table:table-cell>
          <table:table-cell table:number-columns-repeated="253"/>
        </table:table-row>
        <table:table-row table:style-name="ro1">
          <table:table-cell/>
          <table:covered-table-cell table:style-name="ce11"/>
          <table:table-cell table:style-name="ce19" office:value-type="string" calcext:value-type="string">
            <text:p>Las Vegas</text:p>
          </table:table-cell>
          <table:table-cell table:style-name="ce11" office:value-type="float" office:value="384" calcext:value-type="float">
            <text:p>384</text:p>
          </table:table-cell>
          <table:table-cell table:number-columns-repeated="253"/>
        </table:table-row>
        <table:table-row table:style-name="ro1">
          <table:table-cell/>
          <table:covered-table-cell table:style-name="ce11"/>
          <table:table-cell table:style-name="ce19" office:value-type="string" calcext:value-type="string">
            <text:p>Huamanguino</text:p>
          </table:table-cell>
          <table:table-cell table:style-name="ce11" office:value-type="float" office:value="481" calcext:value-type="float">
            <text:p>481</text:p>
          </table:table-cell>
          <table:table-cell table:number-columns-repeated="253"/>
        </table:table-row>
        <table:table-row table:style-name="ro1">
          <table:table-cell/>
          <table:covered-table-cell table:style-name="ce11"/>
          <table:table-cell table:style-name="ce19" office:value-type="string" calcext:value-type="string">
            <text:p>Vip el Saucecito</text:p>
          </table:table-cell>
          <table:table-cell table:style-name="ce11" office:value-type="float" office:value="325" calcext:value-type="float">
            <text:p>325</text:p>
          </table:table-cell>
          <table:table-cell table:number-columns-repeated="253"/>
        </table:table-row>
        <table:table-row table:style-name="ro1">
          <table:table-cell/>
          <table:covered-table-cell table:style-name="ce11"/>
          <table:table-cell table:style-name="ce19" office:value-type="string" calcext:value-type="string">
            <text:p>Juanito</text:p>
          </table:table-cell>
          <table:table-cell table:style-name="ce11" office:value-type="float" office:value="344" calcext:value-type="float">
            <text:p>344</text:p>
          </table:table-cell>
          <table:table-cell table:number-columns-repeated="253"/>
        </table:table-row>
        <table:table-row table:style-name="ro1">
          <table:table-cell/>
          <table:covered-table-cell table:style-name="ce11"/>
          <table:table-cell table:style-name="ce19" office:value-type="string" calcext:value-type="string">
            <text:p>Huarango</text:p>
          </table:table-cell>
          <table:table-cell table:style-name="ce11" office:value-type="float" office:value="234" calcext:value-type="float">
            <text:p>234</text:p>
          </table:table-cell>
          <table:table-cell table:number-columns-repeated="253"/>
        </table:table-row>
        <table:table-row table:style-name="ro1">
          <table:table-cell/>
          <table:covered-table-cell table:style-name="ce11"/>
          <table:table-cell table:style-name="ce19" office:value-type="string" calcext:value-type="string">
            <text:p>Recreos de Muyurina</text:p>
          </table:table-cell>
          <table:table-cell table:style-name="ce11" office:value-type="float" office:value="546" calcext:value-type="float">
            <text:p>546</text:p>
          </table:table-cell>
          <table:table-cell table:number-columns-repeated="253"/>
        </table:table-row>
        <table:table-row table:style-name="ro1">
          <table:table-cell/>
          <table:covered-table-cell table:style-name="ce11"/>
          <table:table-cell table:style-name="ce19" office:value-type="string" calcext:value-type="string">
            <text:p>Establecimientos de Quinua</text:p>
          </table:table-cell>
          <table:table-cell table:style-name="ce11" office:value-type="float" office:value="344" calcext:value-type="float">
            <text:p>344</text:p>
          </table:table-cell>
          <table:table-cell table:number-columns-repeated="253"/>
        </table:table-row>
        <table:table-row table:style-name="ro1">
          <table:table-cell/>
          <table:covered-table-cell table:style-name="ce11"/>
          <table:table-cell table:style-name="ce19" office:value-type="string" calcext:value-type="string">
            <text:p>Otros Recreos</text:p>
          </table:table-cell>
          <table:table-cell table:style-name="ce11" office:value-type="float" office:value="465" calcext:value-type="float">
            <text:p>465</text:p>
          </table:table-cell>
          <table:table-cell table:number-columns-repeated="253"/>
        </table:table-row>
        <table:table-row table:style-name="ro1">
          <table:table-cell/>
          <table:table-cell table:style-name="ce12" office:value-type="string" calcext:value-type="string">
            <text:p>Total</text:p>
          </table:table-cell>
          <table:table-cell table:style-name="ce12" office:value-type="string" calcext:value-type="string">
            <text:p>Demanda <text:s/>(cuyes/año)</text:p>
          </table:table-cell>
          <table:table-cell table:style-name="ce21" table:formula="of:=SUM([.D35:.D48])*4*12" office:value-type="float" office:value="300000" calcext:value-type="float">
            <text:p>300,000</text:p>
          </table:table-cell>
          <table:table-cell table:number-columns-repeated="253"/>
        </table:table-row>
        <table:table-row table:style-name="ro4">
          <table:table-cell/>
          <table:table-cell office:value-type="string" calcext:value-type="string">
            <text:p>Fuente: Elaboración propia en base a encuestas, diciembre 2016.</text:p>
          </table:table-cell>
          <table:table-cell/>
          <table:table-cell table:style-name="ce22"/>
          <table:table-cell table:number-columns-repeated="253"/>
        </table:table-row>
        <table:table-row table:style-name="ro1">
          <table:table-cell table:number-columns-repeated="3"/>
          <table:table-cell table:style-name="ce22"/>
          <table:table-cell table:number-columns-repeated="253"/>
        </table:table-row>
        <table:table-row table:style-name="ro5">
          <table:table-cell/>
          <table:table-cell table:style-name="ce13" office:value-type="string" calcext:value-type="string">
            <text:p>Nombre Del Establecimiento (Recreo)</text:p>
          </table:table-cell>
          <table:table-cell table:style-name="ce13" office:value-type="string" calcext:value-type="string" table:number-columns-spanned="2" table:number-rows-spanned="1">
            <text:p><text:s/>Rango deRequerimiento <text:s/>(Cuyes/Semana)</text:p>
          </table:table-cell>
          <table:covered-table-cell table:style-name="ce13"/>
          <table:table-cell table:style-name="ce13" office:value-type="string" calcext:value-type="string">
            <text:p><text:s/>Requerimiento Promedio <text:s/>(Cuyes/Semana)</text:p>
          </table:table-cell>
          <table:table-cell table:number-columns-repeated="252"/>
        </table:table-row>
        <table:table-row table:style-name="ro3">
          <table:table-cell/>
          <table:table-cell table:style-name="ce14" office:value-type="string" calcext:value-type="string">
            <text:p>Recreo Turístico el Huarango</text:p>
          </table:table-cell>
          <table:table-cell table:style-name="ce20" office:value-type="float" office:value="160" calcext:value-type="float">
            <text:p>160</text:p>
          </table:table-cell>
          <table:table-cell table:style-name="ce20" office:value-type="float" office:value="200" calcext:value-type="float">
            <text:p>200</text:p>
          </table:table-cell>
          <table:table-cell table:style-name="ce20" office:value-type="float" office:value="180" calcext:value-type="float">
            <text:p>180</text:p>
          </table:table-cell>
          <table:table-cell table:number-columns-repeated="252"/>
        </table:table-row>
        <table:table-row table:style-name="ro3">
          <table:table-cell/>
          <table:table-cell table:style-name="ce14" office:value-type="string" calcext:value-type="string">
            <text:p>Demanda total (cuyes/semana)</text:p>
          </table:table-cell>
          <table:table-cell table:style-name="ce20" office:value-type="float" office:value="160" calcext:value-type="float">
            <text:p>160</text:p>
          </table:table-cell>
          <table:table-cell table:style-name="ce20" office:value-type="float" office:value="200" calcext:value-type="float">
            <text:p>200</text:p>
          </table:table-cell>
          <table:table-cell table:style-name="ce20" office:value-type="float" office:value="180" calcext:value-type="float">
            <text:p>180</text:p>
          </table:table-cell>
          <table:table-cell table:number-columns-repeated="252"/>
        </table:table-row>
        <table:table-row table:style-name="ro3">
          <table:table-cell/>
          <table:table-cell table:style-name="ce14" office:value-type="string" calcext:value-type="string">
            <text:p>Demanda total (cuyes/año)</text:p>
          </table:table-cell>
          <table:table-cell table:style-name="ce20" office:value-type="float" office:value="7680" calcext:value-type="float">
            <text:p>7680</text:p>
          </table:table-cell>
          <table:table-cell table:style-name="ce20" office:value-type="float" office:value="9600" calcext:value-type="float">
            <text:p>9600</text:p>
          </table:table-cell>
          <table:table-cell table:style-name="ce20" office:value-type="float" office:value="8640" calcext:value-type="float">
            <text:p>8640</text:p>
          </table:table-cell>
          <table:table-cell table:number-columns-repeated="252"/>
        </table:table-row>
        <table:table-row table:style-name="ro1" table:number-rows-repeated="1048520">
          <table:table-cell table:number-columns-repeated="257"/>
        </table:table-row>
        <table:table-row table:style-name="ro1">
          <table:table-cell table:number-columns-repeated="257"/>
        </table:table-row>
        <table:named-expressions>
          <table:named-range table:name="_xlnm.Print_Area" table:base-cell-address="$POBLACION.$A$1" table:cell-range-address="$POBLACION.$A$1:.$H$55" table:range-usable-as="print-range"/>
        </table:named-expressions>
      </table:table>
      <table:table table:name="DEMANDA" table:style-name="ta2">
        <table:table-column table:style-name="co13" table:default-cell-style-name="ce2"/>
        <table:table-column table:style-name="co13" table:default-cell-style-name="ce38"/>
        <table:table-column table:style-name="co14" table:default-cell-style-name="ce38"/>
        <table:table-column table:style-name="co15" table:default-cell-style-name="ce38"/>
        <table:table-column table:style-name="co16" table:default-cell-style-name="ce38"/>
        <table:table-column table:style-name="co17" table:default-cell-style-name="ce38"/>
        <table:table-column table:style-name="co18" table:default-cell-style-name="ce38"/>
        <table:table-column table:style-name="co14" table:default-cell-style-name="ce38"/>
        <table:table-column table:style-name="co19" table:default-cell-style-name="ce38"/>
        <table:table-column table:style-name="co20" table:default-cell-style-name="ce38"/>
        <table:table-column table:style-name="co14" table:default-cell-style-name="ce38"/>
        <table:table-column table:style-name="co5" table:default-cell-style-name="ce38"/>
        <table:table-column table:style-name="co14" table:default-cell-style-name="ce38"/>
        <table:table-column table:style-name="co10" table:default-cell-style-name="ce38"/>
        <table:table-column table:style-name="co21" table:number-columns-repeated="243" table:default-cell-style-name="ce38"/>
        <table:table-column table:style-name="co21" table:number-columns-repeated="16127"/>
        <table:table-row table:style-name="ro6">
          <table:table-cell/>
          <table:table-cell table:style-name="ce39" table:number-columns-repeated="9"/>
          <table:table-cell table:number-columns-repeated="247"/>
        </table:table-row>
        <table:table-row table:style-name="ro7">
          <table:table-cell/>
          <table:table-cell table:style-name="ce40" office:value-type="string" calcext:value-type="string" table:number-columns-spanned="9" table:number-rows-spanned="1">
            <text:p>PROYECCIÓN DE LA POBLACIÓN DEL DISTRITO DE AYACUCHO, SAN JUAN BAUTISTA, ANDRES A- CACERES, CARMEN ALTO, JESÚS NAZARENO.</text:p>
          </table:table-cell>
          <table:covered-table-cell table:number-columns-repeated="8" table:style-name="ce40"/>
          <table:table-cell table:number-columns-repeated="247"/>
        </table:table-row>
        <table:table-row table:style-name="ro8">
          <table:table-cell/>
          <table:table-cell table:style-name="ce4" office:value-type="string" calcext:value-type="string" table:number-columns-spanned="2" table:number-rows-spanned="2">
            <text:p>DISTRITO</text:p>
          </table:table-cell>
          <table:covered-table-cell table:style-name="ce4"/>
          <table:table-cell table:style-name="ce4" office:value-type="string" calcext:value-type="string" table:number-columns-spanned="3" table:number-rows-spanned="1">
            <text:p>POBLACIÓN</text:p>
          </table:table-cell>
          <table:covered-table-cell table:number-columns-repeated="2" table:style-name="ce4"/>
          <table:table-cell table:style-name="ce4" office:value-type="string" calcext:value-type="string" table:number-columns-spanned="1" table:number-rows-spanned="2">
            <text:p>MIEMBROS POR FAMILIA</text:p>
          </table:table-cell>
          <table:table-cell table:style-name="ce4" office:value-type="string" calcext:value-type="string" table:number-columns-spanned="3" table:number-rows-spanned="1">
            <text:p>NÚMERO DE FAMILIAS</text:p>
          </table:table-cell>
          <table:covered-table-cell table:number-columns-repeated="2" table:style-name="ce4"/>
          <table:table-cell table:number-columns-repeated="247"/>
        </table:table-row>
        <table:table-row table:style-name="ro1">
          <table:table-cell/>
          <table:covered-table-cell table:number-columns-repeated="2" table:style-name="ce4"/>
          <table:table-cell table:style-name="ce4" office:value-type="float" office:value="2017" calcext:value-type="float">
            <text:p>2017</text:p>
          </table:table-cell>
          <table:table-cell table:style-name="ce4" office:value-type="float" office:value="2018" calcext:value-type="float">
            <text:p>2018</text:p>
          </table:table-cell>
          <table:table-cell table:style-name="ce4" office:value-type="float" office:value="2020" calcext:value-type="float">
            <text:p>2020</text:p>
          </table:table-cell>
          <table:covered-table-cell table:style-name="ce4"/>
          <table:table-cell table:style-name="ce4" office:value-type="float" office:value="2017" calcext:value-type="float">
            <text:p>2017</text:p>
          </table:table-cell>
          <table:table-cell table:style-name="ce4" office:value-type="float" office:value="2018" calcext:value-type="float">
            <text:p>2018</text:p>
          </table:table-cell>
          <table:table-cell table:style-name="ce4" office:value-type="float" office:value="2020" calcext:value-type="float">
            <text:p>2020</text:p>
          </table:table-cell>
          <table:table-cell table:number-columns-repeated="247"/>
        </table:table-row>
        <table:table-row table:style-name="ro2">
          <table:table-cell/>
          <table:table-cell table:style-name="ce41" office:value-type="string" calcext:value-type="string" table:number-columns-spanned="2" table:number-rows-spanned="1">
            <text:p>AYACUCHO</text:p>
          </table:table-cell>
          <table:covered-table-cell table:style-name="ce41"/>
          <table:table-cell table:style-name="ce17" office:value-type="float" office:value="99427" calcext:value-type="float">
            <text:p>99,427</text:p>
          </table:table-cell>
          <table:table-cell table:style-name="ce17" table:formula="of:=+[.D5]*(1+[.E11])^([.$E$4]-[.$D$4])" office:value-type="float" office:value="101869.297966183" calcext:value-type="float">
            <text:p>101,869</text:p>
          </table:table-cell>
          <table:table-cell table:style-name="ce17" table:formula="of:=+[.E5]*(1+[.$E$11])^([.$F$4]-[.$E$4])" office:value-type="float" office:value="106935.343366781" calcext:value-type="float">
            <text:p>106,935</text:p>
          </table:table-cell>
          <table:table-cell table:style-name="ce59" office:value-type="float" office:value="4" calcext:value-type="float">
            <text:p>4</text:p>
          </table:table-cell>
          <table:table-cell table:style-name="ce59" table:formula="of:=+[.D5]/[.$G$5]" office:value-type="float" office:value="24856.75" calcext:value-type="float">
            <text:p>24857</text:p>
          </table:table-cell>
          <table:table-cell table:style-name="ce59" table:formula="of:=+[.E5]/[.$G$5]" office:value-type="float" office:value="25467.3244915456" calcext:value-type="float">
            <text:p>25467</text:p>
          </table:table-cell>
          <table:table-cell table:style-name="ce59" table:formula="of:=+[.F5]/[.$G$5]" office:value-type="float" office:value="26733.8358416952" calcext:value-type="float">
            <text:p>26734</text:p>
          </table:table-cell>
          <table:table-cell table:style-name="ce75"/>
          <table:table-cell table:number-columns-repeated="246"/>
        </table:table-row>
        <table:table-row table:style-name="ro2">
          <table:table-cell/>
          <table:table-cell table:style-name="ce41" office:value-type="string" calcext:value-type="string" table:number-columns-spanned="2" table:number-rows-spanned="1">
            <text:p>SAN JUAN BAUTISTA</text:p>
          </table:table-cell>
          <table:covered-table-cell table:style-name="ce41"/>
          <table:table-cell table:style-name="ce17" office:value-type="float" office:value="49034" calcext:value-type="float">
            <text:p>49,034</text:p>
          </table:table-cell>
          <table:table-cell table:style-name="ce17" table:formula="of:=+[.D6]*(1+[.E12])^([.$E$4]-[.$D$4])" office:value-type="float" office:value="49034" calcext:value-type="float">
            <text:p>49,034</text:p>
          </table:table-cell>
          <table:table-cell table:style-name="ce17" table:formula="of:=+[.E6]*(1+[.$E$11])^([.$F$4]-[.$E$4])" office:value-type="float" office:value="51472.5018364944" calcext:value-type="float">
            <text:p>51,473</text:p>
          </table:table-cell>
          <table:table-cell table:style-name="ce59" office:value-type="float" office:value="4" calcext:value-type="float">
            <text:p>4</text:p>
          </table:table-cell>
          <table:table-cell table:style-name="ce59" table:formula="of:=+[.D6]/[.$G$6]" office:value-type="float" office:value="12258.5" calcext:value-type="float">
            <text:p>12259</text:p>
          </table:table-cell>
          <table:table-cell table:style-name="ce59" table:formula="of:=+[.E6]/[.$G$6]" office:value-type="float" office:value="12258.5" calcext:value-type="float">
            <text:p>12259</text:p>
          </table:table-cell>
          <table:table-cell table:style-name="ce59" table:formula="of:=+[.F6]/[.$G$6]" office:value-type="float" office:value="12868.1254591236" calcext:value-type="float">
            <text:p>12868</text:p>
          </table:table-cell>
          <table:table-cell table:style-name="ce44"/>
          <table:table-cell table:number-columns-repeated="246"/>
        </table:table-row>
        <table:table-row table:style-name="ro2">
          <table:table-cell/>
          <table:table-cell table:style-name="ce41" office:value-type="string" calcext:value-type="string" table:number-columns-spanned="2" table:number-rows-spanned="1">
            <text:p>ANDRES A. CACERES</text:p>
          </table:table-cell>
          <table:covered-table-cell table:style-name="ce41"/>
          <table:table-cell table:style-name="ce17" office:value-type="float" office:value="28472" calcext:value-type="float">
            <text:p>28,472</text:p>
          </table:table-cell>
          <table:table-cell table:style-name="ce17" table:formula="of:=+[.D7]*(1+[.E13])^([.$E$4]-[.$D$4])" office:value-type="float" office:value="28472" calcext:value-type="float">
            <text:p>28,472</text:p>
          </table:table-cell>
          <table:table-cell table:style-name="ce17" table:formula="of:=+[.E7]*(1+[.$E$11])^([.$F$4]-[.$E$4])" office:value-type="float" office:value="29887.9363765687" calcext:value-type="float">
            <text:p>29,888</text:p>
          </table:table-cell>
          <table:table-cell table:style-name="ce59" office:value-type="float" office:value="4" calcext:value-type="float">
            <text:p>4</text:p>
          </table:table-cell>
          <table:table-cell table:style-name="ce59" table:formula="of:=+[.D7]/[.$G$6]" office:value-type="float" office:value="7118" calcext:value-type="float">
            <text:p>7118</text:p>
          </table:table-cell>
          <table:table-cell table:style-name="ce59" table:formula="of:=+[.E7]/[.$G$6]" office:value-type="float" office:value="7118" calcext:value-type="float">
            <text:p>7118</text:p>
          </table:table-cell>
          <table:table-cell table:style-name="ce59" table:formula="of:=+[.F7]/[.$G$6]" office:value-type="float" office:value="7471.98409414218" calcext:value-type="float">
            <text:p>7472</text:p>
          </table:table-cell>
          <table:table-cell table:style-name="ce44"/>
          <table:table-cell table:number-columns-repeated="246"/>
        </table:table-row>
        <table:table-row table:style-name="ro9">
          <table:table-cell/>
          <table:table-cell table:style-name="ce41" office:value-type="string" calcext:value-type="string" table:number-columns-spanned="2" table:number-rows-spanned="1">
            <text:p>CARMEN ALTO</text:p>
          </table:table-cell>
          <table:covered-table-cell table:style-name="ce41"/>
          <table:table-cell table:style-name="ce17" office:value-type="float" office:value="28252" calcext:value-type="float">
            <text:p>28,252</text:p>
          </table:table-cell>
          <table:table-cell table:style-name="ce17" table:formula="of:=+[.D8]*(1+[.E13])^([.$E$4]-[.$D$4])" office:value-type="float" office:value="28252" calcext:value-type="float">
            <text:p>28,252</text:p>
          </table:table-cell>
          <table:table-cell table:style-name="ce17" table:formula="of:=+[.E8]*(1+[.$E$11])^([.$F$4]-[.$E$4])" office:value-type="float" office:value="29656.9955925407" calcext:value-type="float">
            <text:p>29,657</text:p>
          </table:table-cell>
          <table:table-cell table:style-name="ce59" office:value-type="float" office:value="4" calcext:value-type="float">
            <text:p>4</text:p>
          </table:table-cell>
          <table:table-cell table:style-name="ce59" table:formula="of:=+[.D8]/[.$G$8]" office:value-type="float" office:value="7063" calcext:value-type="float">
            <text:p>7063</text:p>
          </table:table-cell>
          <table:table-cell table:style-name="ce59" table:formula="of:=+[.E8]/[.$G$8]" office:value-type="float" office:value="7063" calcext:value-type="float">
            <text:p>7063</text:p>
          </table:table-cell>
          <table:table-cell table:style-name="ce59" table:formula="of:=+[.F8]/[.$G$8]" office:value-type="float" office:value="7414.24889813518" calcext:value-type="float">
            <text:p>7414</text:p>
          </table:table-cell>
          <table:table-cell table:style-name="ce44"/>
          <table:table-cell table:number-columns-repeated="246"/>
        </table:table-row>
        <table:table-row table:style-name="ro9">
          <table:table-cell/>
          <table:table-cell table:style-name="ce41" office:value-type="string" calcext:value-type="string" table:number-columns-spanned="2" table:number-rows-spanned="1">
            <text:p>JESUS NAZARENO</text:p>
          </table:table-cell>
          <table:covered-table-cell table:style-name="ce41"/>
          <table:table-cell table:style-name="ce17" office:value-type="float" office:value="18492" calcext:value-type="float">
            <text:p>18,492</text:p>
          </table:table-cell>
          <table:table-cell table:style-name="ce17" table:formula="of:=+[.D9]*(1+[.E14])^([.$E$4]-[.$D$4])" office:value-type="float" office:value="18492" calcext:value-type="float">
            <text:p>18,492</text:p>
          </table:table-cell>
          <table:table-cell table:style-name="ce17" table:formula="of:=+[.E9]*(1+[.$E$11])^([.$F$4]-[.$E$4])" office:value-type="float" office:value="19411.6226283896" calcext:value-type="float">
            <text:p>19,412</text:p>
          </table:table-cell>
          <table:table-cell table:style-name="ce59" office:value-type="float" office:value="4" calcext:value-type="float">
            <text:p>4</text:p>
          </table:table-cell>
          <table:table-cell table:style-name="ce59" table:formula="of:=+[.D9]/[.$G$9]" office:value-type="float" office:value="4623" calcext:value-type="float">
            <text:p>4623</text:p>
          </table:table-cell>
          <table:table-cell table:style-name="ce59" table:formula="of:=+[.E9]/[.$G$9]" office:value-type="float" office:value="4623" calcext:value-type="float">
            <text:p>4623</text:p>
          </table:table-cell>
          <table:table-cell table:style-name="ce59" table:formula="of:=+[.F9]/[.$G$9]" office:value-type="float" office:value="4852.9056570974" calcext:value-type="float">
            <text:p>4853</text:p>
          </table:table-cell>
          <table:table-cell table:style-name="ce44"/>
          <table:table-cell table:number-columns-repeated="246"/>
        </table:table-row>
        <table:table-row table:style-name="ro9">
          <table:table-cell/>
          <table:table-cell table:style-name="ce42" office:value-type="string" calcext:value-type="string" table:number-columns-spanned="2" table:number-rows-spanned="1">
            <text:p>TOTAL</text:p>
          </table:table-cell>
          <table:covered-table-cell table:style-name="ce42"/>
          <table:table-cell table:style-name="ce53" table:formula="of:=SUM([.D5:.D9])" office:value-type="float" office:value="223677" calcext:value-type="float">
            <text:p>223,677</text:p>
          </table:table-cell>
          <table:table-cell table:style-name="ce53" table:formula="of:=SUM([.E5:.E9])" office:value-type="float" office:value="226119.297966183" calcext:value-type="float">
            <text:p>226,119</text:p>
          </table:table-cell>
          <table:table-cell table:style-name="ce53" table:formula="of:=SUM([.F5:.F9])" office:value-type="float" office:value="237364.399800774" calcext:value-type="float">
            <text:p>237,364</text:p>
          </table:table-cell>
          <table:table-cell table:style-name="ce60" table:formula="of:=SUM([.G5:.G9])" office:value-type="float" office:value="20" calcext:value-type="float">
            <text:p>20</text:p>
          </table:table-cell>
          <table:table-cell table:style-name="ce60" table:formula="of:=SUM([.H5:.H9])" office:value-type="float" office:value="55919.25" calcext:value-type="float">
            <text:p>55919</text:p>
          </table:table-cell>
          <table:table-cell table:style-name="ce60" table:formula="of:=SUM([.I5:.I9])" office:value-type="float" office:value="56529.8244915456" calcext:value-type="float">
            <text:p>56530</text:p>
          </table:table-cell>
          <table:table-cell table:style-name="ce60" table:formula="of:=SUM([.J5:.J9])" office:value-type="float" office:value="59341.0999501936" calcext:value-type="float">
            <text:p>59341</text:p>
          </table:table-cell>
          <table:table-cell table:style-name="ce44"/>
          <table:table-cell table:number-columns-repeated="246"/>
        </table:table-row>
        <table:table-row table:style-name="ro2">
          <table:table-cell/>
          <table:table-cell table:style-name="ce43" office:value-type="string" calcext:value-type="string" table:number-columns-spanned="3" table:number-rows-spanned="1">
            <text:p>Tasa de Crecimiento de Poblacion</text:p>
          </table:table-cell>
          <table:covered-table-cell table:number-columns-repeated="2" table:style-name="ce43"/>
          <table:table-cell table:style-name="ce54" table:formula="of:=+['file:///home/achalmaedison/Downloads/PLANES%20GANADORES%20DEL%20PROCOMPITE%202020/GANADORES%20CATEGORIA%20A%20PROCOMPITE%202020/1.%20ASOC.%20PRODUCT.%20AGROPE.%20CASAORCCO%20APAL%20-%20CUY%20A/ANALISIS%20TECNICO%20FINANCIERO.xls'#$POBLACION.G14]" office:value-type="percentage" office:value="0.0245637298337731" calcext:value-type="percentage">
            <text:p>2.46 %</text:p>
          </table:table-cell>
          <table:table-cell table:style-name="ce57"/>
          <table:table-cell table:style-name="ce61"/>
          <table:table-cell table:style-name="ce57" table:number-columns-repeated="2"/>
          <table:table-cell/>
          <table:table-cell table:style-name="ce44"/>
          <table:table-cell table:number-columns-repeated="246"/>
        </table:table-row>
        <table:table-row table:style-name="ro9">
          <table:table-cell/>
          <table:table-cell table:style-name="ce6" table:number-columns-spanned="5" table:number-rows-spanned="1"/>
          <table:covered-table-cell table:number-columns-repeated="4" table:style-name="ce6"/>
          <table:table-cell table:style-name="ce62"/>
          <table:table-cell table:style-name="ce66"/>
          <table:table-cell table:style-name="ce2"/>
          <table:table-cell table:style-name="ce71" table:number-columns-repeated="4"/>
          <table:table-cell table:number-columns-repeated="244"/>
        </table:table-row>
        <table:table-row table:style-name="ro1">
          <table:table-cell/>
          <table:table-cell table:style-name="ce44" table:number-columns-repeated="5"/>
          <table:table-cell table:style-name="ce62"/>
          <table:table-cell table:style-name="ce66"/>
          <table:table-cell table:style-name="ce2"/>
          <table:table-cell table:style-name="ce71" table:number-columns-repeated="4"/>
          <table:table-cell table:number-columns-repeated="244"/>
        </table:table-row>
        <table:table-row table:style-name="ro9">
          <table:table-cell/>
          <table:table-cell table:style-name="ce45" office:value-type="string" calcext:value-type="string" table:number-columns-spanned="7" table:number-rows-spanned="1">
            <text:p>RECREOS Y RESTAURANTES EN LA CIUDAD DE AYACUCHO</text:p>
          </table:table-cell>
          <table:covered-table-cell table:number-columns-repeated="6" table:style-name="ce45"/>
          <table:table-cell table:style-name="ce70"/>
          <table:table-cell table:style-name="ce71"/>
          <table:table-cell/>
          <table:table-cell table:style-name="ce71" table:number-columns-repeated="2"/>
          <table:table-cell table:number-columns-repeated="244"/>
        </table:table-row>
        <table:table-row table:style-name="ro10">
          <table:table-cell/>
          <table:table-cell table:style-name="ce46" office:value-type="string" calcext:value-type="string">
            <text:p>AÑO</text:p>
          </table:table-cell>
          <table:table-cell table:style-name="ce46" office:value-type="string" calcext:value-type="string" table:number-columns-spanned="2" table:number-rows-spanned="1">
            <text:p>DEMANDA TOTAL RECREOS Y RESTAURANTES</text:p>
          </table:table-cell>
          <table:covered-table-cell table:style-name="ce46"/>
          <table:table-cell table:style-name="ce55" office:value-type="string" calcext:value-type="string" table:number-columns-spanned="2" table:number-rows-spanned="1">
            <text:p>DEMANDA POTENCIAL RECREOS Y RESTAURANTES <text:s text:c="3"/>(1)</text:p>
          </table:table-cell>
          <table:covered-table-cell table:style-name="ce55"/>
          <table:table-cell table:style-name="ce55" office:value-type="string" calcext:value-type="string" table:number-columns-spanned="2" table:number-rows-spanned="1">
            <text:p>DEMANDA OBJETIVO RECREOS Y RESTAURANTES <text:s/>(2)</text:p>
          </table:table-cell>
          <table:covered-table-cell table:style-name="ce55"/>
          <table:table-cell table:number-columns-repeated="3"/>
          <table:table-cell table:style-name="ce71" table:number-columns-repeated="2"/>
          <table:table-cell table:number-columns-repeated="244"/>
        </table:table-row>
        <table:table-row table:style-name="ro9">
          <table:table-cell/>
          <table:table-cell table:style-name="ce47" office:value-type="float" office:value="2020" calcext:value-type="float">
            <text:p>2020</text:p>
          </table:table-cell>
          <table:table-cell table:style-name="ce50" office:value-type="float" office:value="77" calcext:value-type="float" table:number-columns-spanned="2" table:number-rows-spanned="1">
            <text:p>77</text:p>
          </table:table-cell>
          <table:covered-table-cell table:style-name="ce50"/>
          <table:table-cell table:style-name="ce56" table:formula="of:=[.C16]*0.6" office:value-type="float" office:value="46.2" calcext:value-type="float" table:number-columns-spanned="2" table:number-rows-spanned="1">
            <text:p>46</text:p>
          </table:table-cell>
          <table:covered-table-cell table:style-name="ce56"/>
          <table:table-cell table:style-name="ce56" table:formula="of:=[.C16]*0.5" office:value-type="float" office:value="38.5" calcext:value-type="float" table:number-columns-spanned="2" table:number-rows-spanned="1">
            <text:p>39</text:p>
          </table:table-cell>
          <table:covered-table-cell table:style-name="ce56"/>
          <table:table-cell table:number-columns-repeated="3"/>
          <table:table-cell table:style-name="ce71" table:number-columns-repeated="2"/>
          <table:table-cell table:number-columns-repeated="244"/>
        </table:table-row>
        <table:table-row table:style-name="ro9">
          <table:table-cell/>
          <table:table-cell table:style-name="ce47" table:formula="of:=+[.B16]+1" office:value-type="float" office:value="2021" calcext:value-type="float">
            <text:p>2021</text:p>
          </table:table-cell>
          <table:table-cell table:style-name="ce35" table:formula="of:=+[.C16]*(1+[.$E$11])" office:value-type="float" office:value="78.8914071972005" calcext:value-type="float" table:number-columns-spanned="2" table:number-rows-spanned="1">
            <text:p>79</text:p>
          </table:table-cell>
          <table:covered-table-cell table:style-name="ce35"/>
          <table:table-cell table:style-name="ce56" table:formula="of:=[.C17]*0.6" office:value-type="float" office:value="47.3348443183203" calcext:value-type="float" table:number-columns-spanned="2" table:number-rows-spanned="1">
            <text:p>47</text:p>
          </table:table-cell>
          <table:covered-table-cell table:style-name="ce56"/>
          <table:table-cell table:style-name="ce56" table:formula="of:=[.C17]*0.5" office:value-type="float" office:value="39.4457035986003" calcext:value-type="float" table:number-columns-spanned="2" table:number-rows-spanned="1">
            <text:p>39</text:p>
          </table:table-cell>
          <table:covered-table-cell table:style-name="ce56"/>
          <table:table-cell table:style-name="ce70"/>
          <table:table-cell table:style-name="ce71"/>
          <table:table-cell/>
          <table:table-cell table:style-name="ce71" table:number-columns-repeated="2"/>
          <table:table-cell table:number-columns-repeated="244"/>
        </table:table-row>
        <table:table-row table:style-name="ro9">
          <table:table-cell/>
          <table:table-cell table:style-name="ce47" table:formula="of:=+[.B17]+1" office:value-type="float" office:value="2022" calcext:value-type="float">
            <text:p>2022</text:p>
          </table:table-cell>
          <table:table-cell table:style-name="ce35" table:formula="of:=+[.C17]*(1+[.$E$11])" office:value-type="float" office:value="80.8292744097987" calcext:value-type="float" table:number-columns-spanned="2" table:number-rows-spanned="1">
            <text:p>81</text:p>
          </table:table-cell>
          <table:covered-table-cell table:style-name="ce35"/>
          <table:table-cell table:style-name="ce56" table:formula="of:=[.C18]*0.6" office:value-type="float" office:value="48.4975646458792" calcext:value-type="float" table:number-columns-spanned="2" table:number-rows-spanned="1">
            <text:p>48</text:p>
          </table:table-cell>
          <table:covered-table-cell table:style-name="ce56"/>
          <table:table-cell table:style-name="ce56" table:formula="of:=[.C18]*0.5" office:value-type="float" office:value="40.4146372048994" calcext:value-type="float" table:number-columns-spanned="2" table:number-rows-spanned="1">
            <text:p>40</text:p>
          </table:table-cell>
          <table:covered-table-cell table:style-name="ce56"/>
          <table:table-cell table:style-name="ce70"/>
          <table:table-cell table:style-name="ce71"/>
          <table:table-cell/>
          <table:table-cell table:style-name="ce71" table:number-columns-repeated="2"/>
          <table:table-cell table:number-columns-repeated="244"/>
        </table:table-row>
        <table:table-row table:style-name="ro9">
          <table:table-cell/>
          <table:table-cell table:style-name="ce47" table:formula="of:=+[.B18]+1" office:value-type="float" office:value="2023" calcext:value-type="float">
            <text:p>2023</text:p>
          </table:table-cell>
          <table:table-cell table:style-name="ce35" table:formula="of:=+[.C18]*(1+[.$E$11])" office:value-type="float" office:value="82.814742869061" calcext:value-type="float" table:number-columns-spanned="2" table:number-rows-spanned="1">
            <text:p>83</text:p>
          </table:table-cell>
          <table:covered-table-cell table:style-name="ce35"/>
          <table:table-cell table:style-name="ce56" table:formula="of:=[.C19]*0.6" office:value-type="float" office:value="49.6888457214366" calcext:value-type="float" table:number-columns-spanned="2" table:number-rows-spanned="1">
            <text:p>50</text:p>
          </table:table-cell>
          <table:covered-table-cell table:style-name="ce56"/>
          <table:table-cell table:style-name="ce56" table:formula="of:=[.C19]*0.5" office:value-type="float" office:value="41.4073714345305" calcext:value-type="float" table:number-columns-spanned="2" table:number-rows-spanned="1">
            <text:p>41</text:p>
          </table:table-cell>
          <table:covered-table-cell table:style-name="ce56"/>
          <table:table-cell table:style-name="ce70"/>
          <table:table-cell table:style-name="ce71"/>
          <table:table-cell/>
          <table:table-cell table:style-name="ce71" table:number-columns-repeated="2"/>
          <table:table-cell table:number-columns-repeated="244"/>
        </table:table-row>
        <table:table-row table:style-name="ro9">
          <table:table-cell/>
          <table:table-cell table:style-name="ce47" table:formula="of:=+[.B19]+1" office:value-type="float" office:value="2024" calcext:value-type="float">
            <text:p>2024</text:p>
          </table:table-cell>
          <table:table-cell table:style-name="ce35" table:formula="of:=+[.C19]*(1+[.$E$11])" office:value-type="float" office:value="84.8489818391499" calcext:value-type="float" table:number-columns-spanned="2" table:number-rows-spanned="1">
            <text:p>85</text:p>
          </table:table-cell>
          <table:covered-table-cell table:style-name="ce35"/>
          <table:table-cell table:style-name="ce56" table:formula="of:=[.C20]*0.6" office:value-type="float" office:value="50.90938910349" calcext:value-type="float" table:number-columns-spanned="2" table:number-rows-spanned="1">
            <text:p>51</text:p>
          </table:table-cell>
          <table:covered-table-cell table:style-name="ce56"/>
          <table:table-cell table:style-name="ce56" table:formula="of:=[.C20]*0.5" office:value-type="float" office:value="42.424490919575" calcext:value-type="float" table:number-columns-spanned="2" table:number-rows-spanned="1">
            <text:p>42</text:p>
          </table:table-cell>
          <table:covered-table-cell table:style-name="ce56"/>
          <table:table-cell table:style-name="ce70"/>
          <table:table-cell table:style-name="ce71"/>
          <table:table-cell/>
          <table:table-cell table:style-name="ce71" table:number-columns-repeated="2"/>
          <table:table-cell table:number-columns-repeated="244"/>
        </table:table-row>
        <table:table-row table:style-name="ro9">
          <table:table-cell/>
          <table:table-cell table:style-name="ce47" table:formula="of:=+[.B20]+1" office:value-type="float" office:value="2025" calcext:value-type="float">
            <text:p>2025</text:p>
          </table:table-cell>
          <table:table-cell table:style-name="ce35" table:formula="of:=+[.C20]*(1+[.$E$11])" office:value-type="float" office:value="86.9331893057176" calcext:value-type="float" table:number-columns-spanned="2" table:number-rows-spanned="1">
            <text:p>87</text:p>
          </table:table-cell>
          <table:covered-table-cell table:style-name="ce35"/>
          <table:table-cell table:style-name="ce56" table:formula="of:=[.C21]*0.6" office:value-type="float" office:value="52.1599135834305" calcext:value-type="float" table:number-columns-spanned="2" table:number-rows-spanned="1">
            <text:p>52</text:p>
          </table:table-cell>
          <table:covered-table-cell table:style-name="ce56"/>
          <table:table-cell table:style-name="ce56" table:formula="of:=[.C21]*0.5" office:value-type="float" office:value="43.4665946528588" calcext:value-type="float" table:number-columns-spanned="2" table:number-rows-spanned="1">
            <text:p>43</text:p>
          </table:table-cell>
          <table:covered-table-cell table:style-name="ce56"/>
          <table:table-cell table:style-name="ce70"/>
          <table:table-cell table:style-name="ce71"/>
          <table:table-cell/>
          <table:table-cell table:style-name="ce71" table:number-columns-repeated="2"/>
          <table:table-cell table:number-columns-repeated="244"/>
        </table:table-row>
        <table:table-row table:style-name="ro11">
          <table:table-cell/>
          <table:table-cell table:style-name="ce6" office:value-type="string" calcext:value-type="string" table:number-columns-spanned="4" table:number-rows-spanned="1">
            <text:p>(*) Proyección de la población con una tasa de crecimiento del 2.46%</text:p>
          </table:table-cell>
          <table:covered-table-cell table:number-columns-repeated="3" table:style-name="ce6"/>
          <table:table-cell/>
          <table:table-cell table:style-name="ce63"/>
          <table:table-cell table:style-name="ce67"/>
          <table:table-cell table:number-columns-repeated="249"/>
        </table:table-row>
        <table:table-row table:style-name="ro2">
          <table:table-cell/>
          <table:table-cell table:style-name="ce6" office:value-type="string" calcext:value-type="string" table:number-columns-spanned="4" table:number-rows-spanned="1">
            <text:p>(1) 60% <text:s/>de <text:s/>recreos y restaurantes con intensión de compra</text:p>
          </table:table-cell>
          <table:covered-table-cell table:number-columns-repeated="3" table:style-name="ce6"/>
          <table:table-cell/>
          <table:table-cell table:style-name="ce64"/>
          <table:table-cell table:style-name="ce67"/>
          <table:table-cell table:style-name="ce6" table:number-columns-spanned="5" table:number-rows-spanned="1"/>
          <table:covered-table-cell table:number-columns-repeated="4" table:style-name="ce6"/>
          <table:table-cell table:number-columns-repeated="244"/>
        </table:table-row>
        <table:table-row table:style-name="ro2">
          <table:table-cell/>
          <table:table-cell table:style-name="ce6" office:value-type="string" calcext:value-type="string" table:number-columns-spanned="4" table:number-rows-spanned="1">
            <text:p>(2) 50% de recreos y restaurantes que compran el cuy</text:p>
          </table:table-cell>
          <table:covered-table-cell table:number-columns-repeated="3" table:style-name="ce6"/>
          <table:table-cell/>
          <table:table-cell table:style-name="ce64"/>
          <table:table-cell table:style-name="ce68"/>
          <table:table-cell table:style-name="ce49" table:number-columns-spanned="5" table:number-rows-spanned="3"/>
          <table:covered-table-cell table:number-columns-repeated="4" table:style-name="ce49"/>
          <table:table-cell table:number-columns-repeated="244"/>
        </table:table-row>
        <table:table-row table:style-name="ro2">
          <table:table-cell/>
          <table:table-cell table:style-name="ce6" office:value-type="string" calcext:value-type="string" table:number-columns-spanned="4" table:number-rows-spanned="1">
            <text:p>(3) consumo promedio de cuyes 88 und por recreo/mes</text:p>
          </table:table-cell>
          <table:covered-table-cell table:number-columns-repeated="3" table:style-name="ce6"/>
          <table:table-cell table:style-name="ce58"/>
          <table:table-cell table:style-name="ce63"/>
          <table:table-cell table:style-name="ce67"/>
          <table:covered-table-cell table:number-columns-repeated="5" table:style-name="ce49"/>
          <table:table-cell table:number-columns-repeated="244"/>
        </table:table-row>
        <table:table-row table:style-name="ro2">
          <table:table-cell/>
          <table:table-cell table:style-name="ce6" office:value-type="string" calcext:value-type="string" table:number-columns-spanned="5" table:number-rows-spanned="1">
            <text:p>77 recreos y restaurantes registrados en el MINCETUR.</text:p>
          </table:table-cell>
          <table:covered-table-cell table:number-columns-repeated="4" table:style-name="ce6"/>
          <table:table-cell table:style-name="ce63"/>
          <table:table-cell table:style-name="ce69"/>
          <table:covered-table-cell table:number-columns-repeated="5" table:style-name="ce49"/>
          <table:table-cell table:number-columns-repeated="244"/>
        </table:table-row>
        <table:table-row table:style-name="ro2">
          <table:table-cell/>
          <table:table-cell table:style-name="ce6" office:value-type="string" calcext:value-type="string" table:number-columns-spanned="4" table:number-rows-spanned="1">
            <text:p>Fuente: Encuesta octubre 2020 elaboración: propia</text:p>
          </table:table-cell>
          <table:covered-table-cell table:number-columns-repeated="3" table:style-name="ce6"/>
          <table:table-cell table:number-columns-repeated="3"/>
          <table:table-cell table:style-name="ce70"/>
          <table:table-cell table:style-name="ce71"/>
          <table:table-cell/>
          <table:table-cell table:style-name="ce71" table:number-columns-repeated="2"/>
          <table:table-cell table:number-columns-repeated="244"/>
        </table:table-row>
        <table:table-row table:style-name="ro1" table:number-rows-repeated="3">
          <table:table-cell table:number-columns-repeated="8"/>
          <table:table-cell table:style-name="ce70"/>
          <table:table-cell table:style-name="ce71"/>
          <table:table-cell/>
          <table:table-cell table:style-name="ce71" table:number-columns-repeated="2"/>
          <table:table-cell table:number-columns-repeated="244"/>
        </table:table-row>
        <table:table-row table:style-name="ro12">
          <table:table-cell/>
          <table:table-cell table:style-name="ce39" office:value-type="string" calcext:value-type="string" table:number-columns-spanned="12" table:number-rows-spanned="1">
            <text:p>DEMANDA TOTAL, POTENCIAL Y OBJETIVO DE FAMILIA EN LA CIUDAD DE AYACUCHO: 2020-2025</text:p>
          </table:table-cell>
          <table:covered-table-cell table:number-columns-repeated="11" table:style-name="ce39"/>
          <table:table-cell table:number-columns-repeated="244"/>
        </table:table-row>
        <table:table-row table:style-name="ro4">
          <table:table-cell/>
          <table:table-cell table:style-name="ce48" office:value-type="string" calcext:value-type="string">
            <text:p>AÑO</text:p>
          </table:table-cell>
          <table:table-cell table:style-name="ce48" office:value-type="string" calcext:value-type="string">
            <text:p>DEMANDA TOTAL DE FAMILIAS <text:s text:c="10"/>(*)</text:p>
          </table:table-cell>
          <table:table-cell table:style-name="ce48" office:value-type="string" calcext:value-type="string">
            <text:p>DEMANDA POTECIAL DE FAMILIAS <text:s text:c="12"/>(1)</text:p>
          </table:table-cell>
          <table:table-cell table:style-name="ce48" office:value-type="string" calcext:value-type="string">
            <text:p>DEMANDA OBJETIVO DE FAMILIAS <text:s text:c="20"/>(2)</text:p>
          </table:table-cell>
          <table:table-cell table:style-name="ce48" office:value-type="string" calcext:value-type="string">
            <text:p>CONSUMO PERCAPITA (Kg) <text:s text:c="31"/>(3)</text:p>
          </table:table-cell>
          <table:table-cell table:style-name="ce48" office:value-type="string" calcext:value-type="string">
            <text:p>PESO PROMEDIO DE COMERCIALIZACIÓN (Kg)</text:p>
          </table:table-cell>
          <table:table-cell table:style-name="ce48" office:value-type="string" calcext:value-type="string">
            <text:p>DEMANDA TOTAL EN <text:s text:c="31"/>(Kg)</text:p>
          </table:table-cell>
          <table:table-cell table:style-name="ce48" office:value-type="string" calcext:value-type="string">
            <text:p>DEMANDA TOTAL EN UNIDADES</text:p>
          </table:table-cell>
          <table:table-cell table:style-name="ce48" office:value-type="string" calcext:value-type="string">
            <text:p>DEMANDA POTENCIAL EN (Kg)</text:p>
          </table:table-cell>
          <table:table-cell table:style-name="ce48" office:value-type="string" calcext:value-type="string">
            <text:p>DEMANDA POTENCIAL EN UNIDADES</text:p>
          </table:table-cell>
          <table:table-cell table:style-name="ce48" office:value-type="string" calcext:value-type="string">
            <text:p>DEMANDA OBJETIVO EN (Kg)</text:p>
          </table:table-cell>
          <table:table-cell table:style-name="ce48" office:value-type="string" calcext:value-type="string">
            <text:p>DEMANDA OBJETIVO EN UNIDADES / AÑO</text:p>
          </table:table-cell>
          <table:table-cell table:number-columns-repeated="244"/>
        </table:table-row>
        <table:table-row table:style-name="ro1">
          <table:table-cell table:style-name="ce38"/>
          <table:table-cell table:style-name="ce27" office:value-type="float" office:value="2020" calcext:value-type="float">
            <text:p>2020</text:p>
          </table:table-cell>
          <table:table-cell table:style-name="ce51" table:formula="of:=+[.J10]" office:value-type="float" office:value="59341.0999501936" calcext:value-type="float">
            <text:p>59341</text:p>
          </table:table-cell>
          <table:table-cell table:style-name="ce35" table:formula="of:=[.C33]*0.65" office:value-type="float" office:value="38571.7149676258" calcext:value-type="float">
            <text:p>38572</text:p>
          </table:table-cell>
          <table:table-cell table:style-name="ce35" table:formula="of:=[.C33]*0.35" office:value-type="float" office:value="20769.3849825677" calcext:value-type="float">
            <text:p>20769</text:p>
          </table:table-cell>
          <table:table-cell table:style-name="ce27" office:value-type="float" office:value="35" calcext:value-type="float">
            <text:p>35</text:p>
          </table:table-cell>
          <table:table-cell table:style-name="ce65" office:value-type="float" office:value="0.9" calcext:value-type="float">
            <text:p>0.900</text:p>
          </table:table-cell>
          <table:table-cell table:style-name="ce31" table:formula="of:=[.C33]*[.F33]" office:value-type="float" office:value="2076938.49825677" calcext:value-type="float">
            <text:p>2,076,938</text:p>
          </table:table-cell>
          <table:table-cell table:style-name="ce31" table:formula="of:=[.H33]/[.G33]" office:value-type="float" office:value="2307709.44250753" calcext:value-type="float">
            <text:p>2,307,709</text:p>
          </table:table-cell>
          <table:table-cell table:style-name="ce31" table:formula="of:=[.D33]*[.F33]" office:value-type="float" office:value="1350010.0238669" calcext:value-type="float">
            <text:p>1,350,010</text:p>
          </table:table-cell>
          <table:table-cell table:style-name="ce31" table:formula="of:=[.J33]/0.9" office:value-type="float" office:value="1500011.13762989" calcext:value-type="float">
            <text:p>1,500,011</text:p>
          </table:table-cell>
          <table:table-cell table:style-name="ce31" table:formula="of:=[.E33]*[.F33]" office:value-type="float" office:value="726928.474389871" calcext:value-type="float">
            <text:p>726,928</text:p>
          </table:table-cell>
          <table:table-cell table:style-name="ce31" table:formula="of:=[.L33]/0.9" office:value-type="float" office:value="807698.304877635" calcext:value-type="float">
            <text:p>807,698</text:p>
          </table:table-cell>
          <table:table-cell table:number-columns-repeated="244"/>
          <table:table-cell table:style-name="ce38" table:number-columns-repeated="16127"/>
        </table:table-row>
        <table:table-row table:style-name="ro1">
          <table:table-cell table:style-name="ce38"/>
          <table:table-cell table:style-name="ce27" table:formula="of:=+[.B33]+1" office:value-type="float" office:value="2021" calcext:value-type="float">
            <text:p>2021</text:p>
          </table:table-cell>
          <table:table-cell table:style-name="ce35" table:formula="of:=+[.C33]*(1+[.$E$11])" office:value-type="float" office:value="60798.7386974091" calcext:value-type="float">
            <text:p>60799</text:p>
          </table:table-cell>
          <table:table-cell table:style-name="ce35" table:formula="of:=[.C34]*0.65" office:value-type="float" office:value="39519.1801533159" calcext:value-type="float">
            <text:p>39519</text:p>
          </table:table-cell>
          <table:table-cell table:style-name="ce35" table:formula="of:=[.C34]*0.35" office:value-type="float" office:value="21279.5585440932" calcext:value-type="float">
            <text:p>21280</text:p>
          </table:table-cell>
          <table:table-cell table:style-name="ce27" office:value-type="float" office:value="35" calcext:value-type="float">
            <text:p>35</text:p>
          </table:table-cell>
          <table:table-cell table:style-name="ce65" office:value-type="float" office:value="0.9" calcext:value-type="float">
            <text:p>0.900</text:p>
          </table:table-cell>
          <table:table-cell table:style-name="ce31" table:formula="of:=[.C34]*[.F34]" office:value-type="float" office:value="2127955.85440932" calcext:value-type="float">
            <text:p>2,127,956</text:p>
          </table:table-cell>
          <table:table-cell table:style-name="ce31" table:formula="of:=[.H34]/[.G34]" office:value-type="float" office:value="2364395.39378813" calcext:value-type="float">
            <text:p>2,364,395</text:p>
          </table:table-cell>
          <table:table-cell table:style-name="ce31" table:formula="of:=[.D34]*[.F34]" office:value-type="float" office:value="1383171.30536606" calcext:value-type="float">
            <text:p>1,383,171</text:p>
          </table:table-cell>
          <table:table-cell table:style-name="ce31" table:formula="of:=[.J34]/0.9" office:value-type="float" office:value="1536857.00596228" calcext:value-type="float">
            <text:p>1,536,857</text:p>
          </table:table-cell>
          <table:table-cell table:style-name="ce31" table:formula="of:=[.E34]*[.F34]" office:value-type="float" office:value="744784.549043261" calcext:value-type="float">
            <text:p>744,785</text:p>
          </table:table-cell>
          <table:table-cell table:style-name="ce31" table:formula="of:=[.L34]/0.9" office:value-type="float" office:value="827538.387825845" calcext:value-type="float">
            <text:p>827,538</text:p>
          </table:table-cell>
          <table:table-cell table:number-columns-repeated="244"/>
          <table:table-cell table:style-name="ce38" table:number-columns-repeated="16127"/>
        </table:table-row>
        <table:table-row table:style-name="ro1">
          <table:table-cell table:style-name="ce38"/>
          <table:table-cell table:style-name="ce27" table:formula="of:=+[.B34]+1" office:value-type="float" office:value="2022" calcext:value-type="float">
            <text:p>2022</text:p>
          </table:table-cell>
          <table:table-cell table:style-name="ce35" table:formula="of:=+[.C34]*(1+[.$E$11])" office:value-type="float" office:value="62292.1824890064" calcext:value-type="float">
            <text:p>62292</text:p>
          </table:table-cell>
          <table:table-cell table:style-name="ce35" table:formula="of:=[.C35]*0.65" office:value-type="float" office:value="40489.9186178541" calcext:value-type="float">
            <text:p>40490</text:p>
          </table:table-cell>
          <table:table-cell table:style-name="ce35" table:formula="of:=[.C35]*0.35" office:value-type="float" office:value="21802.2638711522" calcext:value-type="float">
            <text:p>21802</text:p>
          </table:table-cell>
          <table:table-cell table:style-name="ce27" office:value-type="float" office:value="35" calcext:value-type="float">
            <text:p>35</text:p>
          </table:table-cell>
          <table:table-cell table:style-name="ce65" office:value-type="float" office:value="0.9" calcext:value-type="float">
            <text:p>0.900</text:p>
          </table:table-cell>
          <table:table-cell table:style-name="ce31" table:formula="of:=[.C35]*[.F35]" office:value-type="float" office:value="2180226.38711522" calcext:value-type="float">
            <text:p>2,180,226</text:p>
          </table:table-cell>
          <table:table-cell table:style-name="ce31" table:formula="of:=[.H35]/[.G35]" office:value-type="float" office:value="2422473.76346136" calcext:value-type="float">
            <text:p>2,422,474</text:p>
          </table:table-cell>
          <table:table-cell table:style-name="ce31" table:formula="of:=[.D35]*[.F35]" office:value-type="float" office:value="1417147.1516249" calcext:value-type="float">
            <text:p>1,417,147</text:p>
          </table:table-cell>
          <table:table-cell table:style-name="ce31" table:formula="of:=[.J35]/0.9" office:value-type="float" office:value="1574607.94624988" calcext:value-type="float">
            <text:p>1,574,608</text:p>
          </table:table-cell>
          <table:table-cell table:style-name="ce31" table:formula="of:=[.E35]*[.F35]" office:value-type="float" office:value="763079.235490328" calcext:value-type="float">
            <text:p>763,079</text:p>
          </table:table-cell>
          <table:table-cell table:style-name="ce31" table:formula="of:=[.L35]/0.9" office:value-type="float" office:value="847865.817211476" calcext:value-type="float">
            <text:p>847,866</text:p>
          </table:table-cell>
          <table:table-cell table:number-columns-repeated="244"/>
          <table:table-cell table:style-name="ce38" table:number-columns-repeated="16127"/>
        </table:table-row>
        <table:table-row table:style-name="ro1">
          <table:table-cell table:style-name="ce38"/>
          <table:table-cell table:style-name="ce27" table:formula="of:=+[.B35]+1" office:value-type="float" office:value="2023" calcext:value-type="float">
            <text:p>2023</text:p>
          </table:table-cell>
          <table:table-cell table:style-name="ce35" table:formula="of:=+[.C35]*(1+[.$E$11])" office:value-type="float" office:value="63822.3108304224" calcext:value-type="float">
            <text:p>63822</text:p>
          </table:table-cell>
          <table:table-cell table:style-name="ce35" table:formula="of:=[.C36]*0.65" office:value-type="float" office:value="41484.5020397746" calcext:value-type="float">
            <text:p>41485</text:p>
          </table:table-cell>
          <table:table-cell table:style-name="ce35" table:formula="of:=[.C36]*0.35" office:value-type="float" office:value="22337.8087906478" calcext:value-type="float">
            <text:p>22338</text:p>
          </table:table-cell>
          <table:table-cell table:style-name="ce27" office:value-type="float" office:value="35" calcext:value-type="float">
            <text:p>35</text:p>
          </table:table-cell>
          <table:table-cell table:style-name="ce65" office:value-type="float" office:value="0.9" calcext:value-type="float">
            <text:p>0.900</text:p>
          </table:table-cell>
          <table:table-cell table:style-name="ce31" table:formula="of:=[.C36]*[.F36]" office:value-type="float" office:value="2233780.87906478" calcext:value-type="float">
            <text:p>2,233,781</text:p>
          </table:table-cell>
          <table:table-cell table:style-name="ce31" table:formula="of:=[.H36]/[.G36]" office:value-type="float" office:value="2481978.75451643" calcext:value-type="float">
            <text:p>2,481,979</text:p>
          </table:table-cell>
          <table:table-cell table:style-name="ce31" table:formula="of:=[.D36]*[.F36]" office:value-type="float" office:value="1451957.57139211" calcext:value-type="float">
            <text:p>1,451,958</text:p>
          </table:table-cell>
          <table:table-cell table:style-name="ce31" table:formula="of:=[.J36]/0.9" office:value-type="float" office:value="1613286.19043568" calcext:value-type="float">
            <text:p>1,613,286</text:p>
          </table:table-cell>
          <table:table-cell table:style-name="ce31" table:formula="of:=[.E36]*[.F36]" office:value-type="float" office:value="781823.307672675" calcext:value-type="float">
            <text:p>781,823</text:p>
          </table:table-cell>
          <table:table-cell table:style-name="ce31" table:formula="of:=[.L36]/0.9" office:value-type="float" office:value="868692.564080749" calcext:value-type="float">
            <text:p>868,693</text:p>
          </table:table-cell>
          <table:table-cell table:number-columns-repeated="244"/>
          <table:table-cell table:style-name="ce38" table:number-columns-repeated="16127"/>
        </table:table-row>
        <table:table-row table:style-name="ro1">
          <table:table-cell table:style-name="ce38"/>
          <table:table-cell table:style-name="ce27" table:formula="of:=+[.B36]+1" office:value-type="float" office:value="2024" calcext:value-type="float">
            <text:p>2024</text:p>
          </table:table-cell>
          <table:table-cell table:style-name="ce35" table:formula="of:=+[.C36]*(1+[.$E$11])" office:value-type="float" office:value="65390.024831028" calcext:value-type="float">
            <text:p>65390</text:p>
          </table:table-cell>
          <table:table-cell table:style-name="ce35" table:formula="of:=[.C37]*0.65" office:value-type="float" office:value="42503.5161401682" calcext:value-type="float">
            <text:p>42504</text:p>
          </table:table-cell>
          <table:table-cell table:style-name="ce35" table:formula="of:=[.C37]*0.35" office:value-type="float" office:value="22886.5086908598" calcext:value-type="float">
            <text:p>22887</text:p>
          </table:table-cell>
          <table:table-cell table:style-name="ce27" office:value-type="float" office:value="35" calcext:value-type="float">
            <text:p>35</text:p>
          </table:table-cell>
          <table:table-cell table:style-name="ce65" office:value-type="float" office:value="0.9" calcext:value-type="float">
            <text:p>0.900</text:p>
          </table:table-cell>
          <table:table-cell table:style-name="ce31" table:formula="of:=[.C37]*[.F37]" office:value-type="float" office:value="2288650.86908598" calcext:value-type="float">
            <text:p>2,288,651</text:p>
          </table:table-cell>
          <table:table-cell table:style-name="ce31" table:formula="of:=[.H37]/[.G37]" office:value-type="float" office:value="2542945.41009553" calcext:value-type="float">
            <text:p>2,542,945</text:p>
          </table:table-cell>
          <table:table-cell table:style-name="ce31" table:formula="of:=[.D37]*[.F37]" office:value-type="float" office:value="1487623.06490589" calcext:value-type="float">
            <text:p>1,487,623</text:p>
          </table:table-cell>
          <table:table-cell table:style-name="ce31" table:formula="of:=[.J37]/0.9" office:value-type="float" office:value="1652914.5165621" calcext:value-type="float">
            <text:p>1,652,915</text:p>
          </table:table-cell>
          <table:table-cell table:style-name="ce31" table:formula="of:=[.E37]*[.F37]" office:value-type="float" office:value="801027.804180093" calcext:value-type="float">
            <text:p>801,028</text:p>
          </table:table-cell>
          <table:table-cell table:style-name="ce31" table:formula="of:=[.L37]/0.9" office:value-type="float" office:value="890030.893533437" calcext:value-type="float">
            <text:p>890,031</text:p>
          </table:table-cell>
          <table:table-cell table:number-columns-repeated="244"/>
          <table:table-cell table:style-name="ce38" table:number-columns-repeated="16127"/>
        </table:table-row>
        <table:table-row table:style-name="ro1">
          <table:table-cell table:style-name="ce38"/>
          <table:table-cell table:style-name="ce27" table:formula="of:=+[.B37]+1" office:value-type="float" office:value="2025" calcext:value-type="float">
            <text:p>2025</text:p>
          </table:table-cell>
          <table:table-cell table:style-name="ce35" table:formula="of:=+[.C37]*(1+[.$E$11])" office:value-type="float" office:value="66996.2477348011" calcext:value-type="float">
            <text:p>66996</text:p>
          </table:table-cell>
          <table:table-cell table:style-name="ce35" table:formula="of:=[.C38]*0.65" office:value-type="float" office:value="43547.5610276207" calcext:value-type="float">
            <text:p>43548</text:p>
          </table:table-cell>
          <table:table-cell table:style-name="ce35" table:formula="of:=[.C38]*0.35" office:value-type="float" office:value="23448.6867071804" calcext:value-type="float">
            <text:p>23449</text:p>
          </table:table-cell>
          <table:table-cell table:style-name="ce27" office:value-type="float" office:value="35" calcext:value-type="float">
            <text:p>35</text:p>
          </table:table-cell>
          <table:table-cell table:style-name="ce65" office:value-type="float" office:value="0.9" calcext:value-type="float">
            <text:p>0.900</text:p>
          </table:table-cell>
          <table:table-cell table:style-name="ce31" table:formula="of:=[.C38]*[.F38]" office:value-type="float" office:value="2344868.67071804" calcext:value-type="float">
            <text:p>2,344,869</text:p>
          </table:table-cell>
          <table:table-cell table:style-name="ce31" table:formula="of:=[.H38]/[.G38]" office:value-type="float" office:value="2605409.63413115" calcext:value-type="float">
            <text:p>2,605,410</text:p>
          </table:table-cell>
          <table:table-cell table:style-name="ce31" table:formula="of:=[.D38]*[.F38]" office:value-type="float" office:value="1524164.63596672" calcext:value-type="float">
            <text:p>1,524,165</text:p>
          </table:table-cell>
          <table:table-cell table:style-name="ce31" table:formula="of:=[.J38]/0.9" office:value-type="float" office:value="1693516.26218525" calcext:value-type="float">
            <text:p>1,693,516</text:p>
          </table:table-cell>
          <table:table-cell table:style-name="ce31" table:formula="of:=[.E38]*[.F38]" office:value-type="float" office:value="820704.034751313" calcext:value-type="float">
            <text:p>820,704</text:p>
          </table:table-cell>
          <table:table-cell table:style-name="ce31" table:formula="of:=[.L38]/0.9" office:value-type="float" office:value="911893.371945904" calcext:value-type="float">
            <text:p>911,893</text:p>
          </table:table-cell>
          <table:table-cell table:number-columns-repeated="244"/>
          <table:table-cell table:style-name="ce38" table:number-columns-repeated="16127"/>
        </table:table-row>
        <table:table-row table:style-name="ro2">
          <table:table-cell/>
          <table:table-cell table:style-name="ce28" office:value-type="string" calcext:value-type="string" table:number-columns-spanned="12" table:number-rows-spanned="1">
            <text:p>(*) Proyección de la población con una tasa de crecimiento del 2.54%</text:p>
          </table:table-cell>
          <table:covered-table-cell table:number-columns-repeated="11" table:style-name="ce28"/>
          <table:table-cell table:number-columns-repeated="244"/>
        </table:table-row>
        <table:table-row table:style-name="ro2">
          <table:table-cell/>
          <table:table-cell table:style-name="ce49" office:value-type="string" calcext:value-type="string" table:number-columns-spanned="12" table:number-rows-spanned="1">
            <text:p>(1) 65% del Total de familias con intensión de compra <text:s text:c="2"/></text:p>
          </table:table-cell>
          <table:covered-table-cell table:number-columns-repeated="11" table:style-name="ce49"/>
          <table:table-cell table:number-columns-repeated="244"/>
        </table:table-row>
        <table:table-row table:style-name="ro2">
          <table:table-cell/>
          <table:table-cell table:style-name="ce49" office:value-type="string" calcext:value-type="string" table:number-columns-spanned="12" table:number-rows-spanned="1">
            <text:p>(2) 35% de las familias adquieren <text:s/>cuy para consumo en sus casas seg A Y B</text:p>
          </table:table-cell>
          <table:covered-table-cell table:number-columns-repeated="11" table:style-name="ce49"/>
          <table:table-cell table:number-columns-repeated="244"/>
        </table:table-row>
        <table:table-row table:style-name="ro2">
          <table:table-cell/>
          <table:table-cell table:style-name="ce49" office:value-type="string" calcext:value-type="string" table:number-columns-spanned="12" table:number-rows-spanned="1">
            <text:p>(3) Consumo percapita 35 Kg MINAG, por familia</text:p>
          </table:table-cell>
          <table:covered-table-cell table:number-columns-repeated="11" table:style-name="ce49"/>
          <table:table-cell table:number-columns-repeated="244"/>
        </table:table-row>
        <table:table-row table:style-name="ro2">
          <table:table-cell/>
          <table:table-cell table:style-name="ce49" office:value-type="string" calcext:value-type="string" table:number-columns-spanned="12" table:number-rows-spanned="1">
            <text:p>(*) Para el presente proyecto se considera como ciudad Ayacucho a los Distritos S.J. Bautista, C.Alto, Andres. A Caceres, J .Nazareno y Ayacucho</text:p>
          </table:table-cell>
          <table:covered-table-cell table:number-columns-repeated="11" table:style-name="ce49"/>
          <table:table-cell table:number-columns-repeated="244"/>
        </table:table-row>
        <table:table-row table:style-name="ro2">
          <table:table-cell/>
          <table:table-cell table:style-name="ce49" office:value-type="string" calcext:value-type="string" table:number-columns-spanned="12" table:number-rows-spanned="1">
            <text:p>Fuente: Encuesta octubre 2020 Elaboración Propia</text:p>
          </table:table-cell>
          <table:covered-table-cell table:number-columns-repeated="11" table:style-name="ce49"/>
          <table:table-cell table:number-columns-repeated="244"/>
        </table:table-row>
        <table:table-row table:style-name="ro1">
          <table:table-cell table:number-columns-repeated="257"/>
        </table:table-row>
        <table:table-row table:style-name="ro2">
          <table:table-cell/>
          <table:table-cell table:style-name="ce39" office:value-type="string" calcext:value-type="string" table:number-columns-spanned="12" table:number-rows-spanned="1">
            <text:p>DEMANDA TOTAL, POTENCIAL Y OBJETIVO DE RECREOS Y RESTAURANTES EN LA CIUDAD DE AYACUCHO: 2020-2025</text:p>
          </table:table-cell>
          <table:covered-table-cell table:number-columns-repeated="11" table:style-name="ce39"/>
          <table:table-cell table:number-columns-repeated="244"/>
        </table:table-row>
        <table:table-row table:style-name="ro13">
          <table:table-cell/>
          <table:table-cell table:style-name="ce48" office:value-type="string" calcext:value-type="string">
            <text:p>AÑO</text:p>
          </table:table-cell>
          <table:table-cell table:style-name="ce48" office:value-type="string" calcext:value-type="string">
            <text:p>DEMANDA TOTAL DE RECREOS Y RESTAURANTES (*)</text:p>
          </table:table-cell>
          <table:table-cell table:style-name="ce48" office:value-type="string" calcext:value-type="string">
            <text:p>DEMANDA POTECIAL DE RECREOS Y RESTAURANTES (1)</text:p>
          </table:table-cell>
          <table:table-cell table:style-name="ce48" office:value-type="string" calcext:value-type="string">
            <text:p>DEMANDA OBJETIVO DE RECREOS Y RESTAURANTES <text:s text:c="7"/>(2)</text:p>
          </table:table-cell>
          <table:table-cell table:style-name="ce48" office:value-type="string" calcext:value-type="string">
            <text:p>CONSUMO PROMEDIO/MENSUAL EN UNIDADES <text:s text:c="13"/>(3)</text:p>
          </table:table-cell>
          <table:table-cell table:style-name="ce48" office:value-type="string" calcext:value-type="string">
            <text:p>PESO PROMEDIO DE COMERCIALIZACIÓN (Kg)</text:p>
          </table:table-cell>
          <table:table-cell table:style-name="ce48" office:value-type="string" calcext:value-type="string">
            <text:p>DEMANDA TOTAL EN UNIDADES / MES</text:p>
          </table:table-cell>
          <table:table-cell table:style-name="ce48" office:value-type="string" calcext:value-type="string">
            <text:p>DEMANDA TOTAL EN UNIDADES / AÑO</text:p>
          </table:table-cell>
          <table:table-cell table:style-name="ce48" office:value-type="string" calcext:value-type="string">
            <text:p>DEMANDA POTENCIAL EN UNIDADES / MES</text:p>
          </table:table-cell>
          <table:table-cell table:style-name="ce48" office:value-type="string" calcext:value-type="string">
            <text:p>DEMANDA POTENCIAL EN UNIDADES / AÑO</text:p>
          </table:table-cell>
          <table:table-cell table:style-name="ce48" office:value-type="string" calcext:value-type="string">
            <text:p>DEMANDA OBJETIVO EN UNIDADES / MES</text:p>
          </table:table-cell>
          <table:table-cell table:style-name="ce48" office:value-type="string" calcext:value-type="string">
            <text:p>DEMANDA OBJETIVO EN UNIDADES / AÑO</text:p>
          </table:table-cell>
          <table:table-cell table:number-columns-repeated="244"/>
        </table:table-row>
        <table:table-row table:style-name="ro1">
          <table:table-cell/>
          <table:table-cell table:style-name="ce27" table:formula="of:=+[.B33]" office:value-type="float" office:value="2020" calcext:value-type="float">
            <text:p>2020</text:p>
          </table:table-cell>
          <table:table-cell table:style-name="ce52" table:formula="of:=+[.C16]" office:value-type="float" office:value="77" calcext:value-type="float">
            <text:p>77</text:p>
          </table:table-cell>
          <table:table-cell table:style-name="ce35" table:formula="of:=[.C48]*0.95" office:value-type="float" office:value="73.15" calcext:value-type="float">
            <text:p>73</text:p>
          </table:table-cell>
          <table:table-cell table:style-name="ce35" table:formula="of:=[.C48]*0.8" office:value-type="float" office:value="61.6" calcext:value-type="float">
            <text:p>62</text:p>
          </table:table-cell>
          <table:table-cell table:style-name="ce27" office:value-type="float" office:value="88" calcext:value-type="float">
            <text:p>88</text:p>
          </table:table-cell>
          <table:table-cell table:style-name="ce65" office:value-type="float" office:value="0.9" calcext:value-type="float">
            <text:p>0.900</text:p>
          </table:table-cell>
          <table:table-cell table:style-name="ce31" table:formula="of:=[.C48]*[.F48]" office:value-type="float" office:value="6776" calcext:value-type="float">
            <text:p>6,776</text:p>
          </table:table-cell>
          <table:table-cell table:style-name="ce31" table:formula="of:=[.H48]*12" office:value-type="float" office:value="81312" calcext:value-type="float">
            <text:p>81,312</text:p>
          </table:table-cell>
          <table:table-cell table:style-name="ce31" table:formula="of:=[.D48]*[.F48]" office:value-type="float" office:value="6437.2" calcext:value-type="float">
            <text:p>6,437</text:p>
          </table:table-cell>
          <table:table-cell table:style-name="ce31" table:formula="of:=[.J48]*12" office:value-type="float" office:value="77246.4" calcext:value-type="float">
            <text:p>77,246</text:p>
          </table:table-cell>
          <table:table-cell table:style-name="ce31" table:formula="of:=[.E48]*[.F48]" office:value-type="float" office:value="5420.8" calcext:value-type="float">
            <text:p>5,421</text:p>
          </table:table-cell>
          <table:table-cell table:style-name="ce31" table:formula="of:=[.L48]*12" office:value-type="float" office:value="65049.6" calcext:value-type="float">
            <text:p>65,050</text:p>
          </table:table-cell>
          <table:table-cell table:number-columns-repeated="244"/>
        </table:table-row>
        <table:table-row table:style-name="ro1">
          <table:table-cell table:style-name="ce38"/>
          <table:table-cell table:style-name="ce27" table:formula="of:=+[.B34]" office:value-type="float" office:value="2021" calcext:value-type="float">
            <text:p>2021</text:p>
          </table:table-cell>
          <table:table-cell table:style-name="ce35" table:formula="of:=+[.C48]*(1+[.$E$11])" office:value-type="float" office:value="78.8914071972005" calcext:value-type="float">
            <text:p>79</text:p>
          </table:table-cell>
          <table:table-cell table:style-name="ce35" table:formula="of:=[.C49]*0.95" office:value-type="float" office:value="74.9468368373405" calcext:value-type="float">
            <text:p>75</text:p>
          </table:table-cell>
          <table:table-cell table:style-name="ce35" table:formula="of:=[.C49]*0.8" office:value-type="float" office:value="63.1131257577604" calcext:value-type="float">
            <text:p>63</text:p>
          </table:table-cell>
          <table:table-cell table:style-name="ce27" office:value-type="float" office:value="88" calcext:value-type="float">
            <text:p>88</text:p>
          </table:table-cell>
          <table:table-cell table:style-name="ce65" office:value-type="float" office:value="0.9" calcext:value-type="float">
            <text:p>0.900</text:p>
          </table:table-cell>
          <table:table-cell table:style-name="ce31" table:formula="of:=[.C49]*[.F49]" office:value-type="float" office:value="6942.44383335365" calcext:value-type="float">
            <text:p>6,942</text:p>
          </table:table-cell>
          <table:table-cell table:style-name="ce31" table:formula="of:=[.H49]*12" office:value-type="float" office:value="83309.3260002438" calcext:value-type="float">
            <text:p>83,309</text:p>
          </table:table-cell>
          <table:table-cell table:style-name="ce31" table:formula="of:=[.D49]*[.F49]" office:value-type="float" office:value="6595.32164168596" calcext:value-type="float">
            <text:p>6,595</text:p>
          </table:table-cell>
          <table:table-cell table:style-name="ce31" table:formula="of:=[.J49]*12" office:value-type="float" office:value="79143.8597002316" calcext:value-type="float">
            <text:p>79,144</text:p>
          </table:table-cell>
          <table:table-cell table:style-name="ce31" table:formula="of:=[.E49]*[.F49]" office:value-type="float" office:value="5553.95506668292" calcext:value-type="float">
            <text:p>5,554</text:p>
          </table:table-cell>
          <table:table-cell table:style-name="ce31" table:formula="of:=[.L49]*12" office:value-type="float" office:value="66647.460800195" calcext:value-type="float">
            <text:p>66,647</text:p>
          </table:table-cell>
          <table:table-cell table:number-columns-repeated="244"/>
          <table:table-cell table:style-name="ce38" table:number-columns-repeated="16127"/>
        </table:table-row>
        <table:table-row table:style-name="ro1">
          <table:table-cell table:style-name="ce38"/>
          <table:table-cell table:style-name="ce27" table:formula="of:=+[.B35]" office:value-type="float" office:value="2022" calcext:value-type="float">
            <text:p>2022</text:p>
          </table:table-cell>
          <table:table-cell table:style-name="ce35" table:formula="of:=+[.C49]*(1+[.$E$11])" office:value-type="float" office:value="80.8292744097987" calcext:value-type="float">
            <text:p>81</text:p>
          </table:table-cell>
          <table:table-cell table:style-name="ce35" table:formula="of:=[.C50]*0.95" office:value-type="float" office:value="76.7878106893088" calcext:value-type="float">
            <text:p>77</text:p>
          </table:table-cell>
          <table:table-cell table:style-name="ce35" table:formula="of:=[.C50]*0.8" office:value-type="float" office:value="64.663419527839" calcext:value-type="float">
            <text:p>65</text:p>
          </table:table-cell>
          <table:table-cell table:style-name="ce27" office:value-type="float" office:value="88" calcext:value-type="float">
            <text:p>88</text:p>
          </table:table-cell>
          <table:table-cell table:style-name="ce65" office:value-type="float" office:value="0.9" calcext:value-type="float">
            <text:p>0.900</text:p>
          </table:table-cell>
          <table:table-cell table:style-name="ce31" table:formula="of:=[.C50]*[.F50]" office:value-type="float" office:value="7112.97614806229" calcext:value-type="float">
            <text:p>7,113</text:p>
          </table:table-cell>
          <table:table-cell table:style-name="ce31" table:formula="of:=[.H50]*12" office:value-type="float" office:value="85355.7137767475" calcext:value-type="float">
            <text:p>85,356</text:p>
          </table:table-cell>
          <table:table-cell table:style-name="ce31" table:formula="of:=[.D50]*[.F50]" office:value-type="float" office:value="6757.32734065917" calcext:value-type="float">
            <text:p>6,757</text:p>
          </table:table-cell>
          <table:table-cell table:style-name="ce31" table:formula="of:=[.J50]*12" office:value-type="float" office:value="81087.9280879101" calcext:value-type="float">
            <text:p>81,088</text:p>
          </table:table-cell>
          <table:table-cell table:style-name="ce31" table:formula="of:=[.E50]*[.F50]" office:value-type="float" office:value="5690.38091844983" calcext:value-type="float">
            <text:p>5,690</text:p>
          </table:table-cell>
          <table:table-cell table:style-name="ce31" table:formula="of:=[.L50]*12" office:value-type="float" office:value="68284.571021398" calcext:value-type="float">
            <text:p>68,285</text:p>
          </table:table-cell>
          <table:table-cell table:number-columns-repeated="244"/>
          <table:table-cell table:style-name="ce38" table:number-columns-repeated="16127"/>
        </table:table-row>
        <table:table-row table:style-name="ro1">
          <table:table-cell table:style-name="ce38"/>
          <table:table-cell table:style-name="ce27" table:formula="of:=+[.B36]" office:value-type="float" office:value="2023" calcext:value-type="float">
            <text:p>2023</text:p>
          </table:table-cell>
          <table:table-cell table:style-name="ce35" table:formula="of:=+[.C50]*(1+[.$E$11])" office:value-type="float" office:value="82.814742869061" calcext:value-type="float">
            <text:p>83</text:p>
          </table:table-cell>
          <table:table-cell table:style-name="ce35" table:formula="of:=[.C51]*0.95" office:value-type="float" office:value="78.6740057256079" calcext:value-type="float">
            <text:p>79</text:p>
          </table:table-cell>
          <table:table-cell table:style-name="ce35" table:formula="of:=[.C51]*0.8" office:value-type="float" office:value="66.2517942952488" calcext:value-type="float">
            <text:p>66</text:p>
          </table:table-cell>
          <table:table-cell table:style-name="ce27" office:value-type="float" office:value="88" calcext:value-type="float">
            <text:p>88</text:p>
          </table:table-cell>
          <table:table-cell table:style-name="ce65" office:value-type="float" office:value="0.9" calcext:value-type="float">
            <text:p>0.900</text:p>
          </table:table-cell>
          <table:table-cell table:style-name="ce31" table:formula="of:=[.C51]*[.F51]" office:value-type="float" office:value="7287.69737247736" calcext:value-type="float">
            <text:p>7,288</text:p>
          </table:table-cell>
          <table:table-cell table:style-name="ce31" table:formula="of:=[.H51]*12" office:value-type="float" office:value="87452.3684697284" calcext:value-type="float">
            <text:p>87,452</text:p>
          </table:table-cell>
          <table:table-cell table:style-name="ce31" table:formula="of:=[.D51]*[.F51]" office:value-type="float" office:value="6923.3125038535" calcext:value-type="float">
            <text:p>6,923</text:p>
          </table:table-cell>
          <table:table-cell table:style-name="ce31" table:formula="of:=[.J51]*12" office:value-type="float" office:value="83079.7500462419" calcext:value-type="float">
            <text:p>83,080</text:p>
          </table:table-cell>
          <table:table-cell table:style-name="ce31" table:formula="of:=[.E51]*[.F51]" office:value-type="float" office:value="5830.15789798189" calcext:value-type="float">
            <text:p>5,830</text:p>
          </table:table-cell>
          <table:table-cell table:style-name="ce31" table:formula="of:=[.L51]*12" office:value-type="float" office:value="69961.8947757827" calcext:value-type="float">
            <text:p>69,962</text:p>
          </table:table-cell>
          <table:table-cell table:number-columns-repeated="244"/>
          <table:table-cell table:style-name="ce38" table:number-columns-repeated="16127"/>
        </table:table-row>
        <table:table-row table:style-name="ro1">
          <table:table-cell table:style-name="ce38"/>
          <table:table-cell table:style-name="ce27" table:formula="of:=+[.B37]" office:value-type="float" office:value="2024" calcext:value-type="float">
            <text:p>2024</text:p>
          </table:table-cell>
          <table:table-cell table:style-name="ce35" table:formula="of:=+[.C51]*(1+[.$E$11])" office:value-type="float" office:value="84.8489818391499" calcext:value-type="float">
            <text:p>85</text:p>
          </table:table-cell>
          <table:table-cell table:style-name="ce35" table:formula="of:=[.C52]*0.95" office:value-type="float" office:value="80.6065327471925" calcext:value-type="float">
            <text:p>81</text:p>
          </table:table-cell>
          <table:table-cell table:style-name="ce35" table:formula="of:=[.C52]*0.8" office:value-type="float" office:value="67.87918547132" calcext:value-type="float">
            <text:p>68</text:p>
          </table:table-cell>
          <table:table-cell table:style-name="ce27" office:value-type="float" office:value="88" calcext:value-type="float">
            <text:p>88</text:p>
          </table:table-cell>
          <table:table-cell table:style-name="ce65" office:value-type="float" office:value="0.9" calcext:value-type="float">
            <text:p>0.900</text:p>
          </table:table-cell>
          <table:table-cell table:style-name="ce31" table:formula="of:=[.C52]*[.F52]" office:value-type="float" office:value="7466.7104018452" calcext:value-type="float">
            <text:p>7,467</text:p>
          </table:table-cell>
          <table:table-cell table:style-name="ce31" table:formula="of:=[.H52]*12" office:value-type="float" office:value="89600.5248221423" calcext:value-type="float">
            <text:p>89,601</text:p>
          </table:table-cell>
          <table:table-cell table:style-name="ce31" table:formula="of:=[.D52]*[.F52]" office:value-type="float" office:value="7093.37488175294" calcext:value-type="float">
            <text:p>7,093</text:p>
          </table:table-cell>
          <table:table-cell table:style-name="ce31" table:formula="of:=[.J52]*12" office:value-type="float" office:value="85120.4985810352" calcext:value-type="float">
            <text:p>85,120</text:p>
          </table:table-cell>
          <table:table-cell table:style-name="ce31" table:formula="of:=[.E52]*[.F52]" office:value-type="float" office:value="5973.36832147616" calcext:value-type="float">
            <text:p>5,973</text:p>
          </table:table-cell>
          <table:table-cell table:style-name="ce31" table:formula="of:=[.L52]*12" office:value-type="float" office:value="71680.4198577139" calcext:value-type="float">
            <text:p>71,680</text:p>
          </table:table-cell>
          <table:table-cell table:number-columns-repeated="244"/>
          <table:table-cell table:style-name="ce38" table:number-columns-repeated="16127"/>
        </table:table-row>
        <table:table-row table:style-name="ro1">
          <table:table-cell table:style-name="ce38"/>
          <table:table-cell table:style-name="ce27" table:formula="of:=+[.B38]" office:value-type="float" office:value="2025" calcext:value-type="float">
            <text:p>2025</text:p>
          </table:table-cell>
          <table:table-cell table:style-name="ce35" table:formula="of:=+[.C52]*(1+[.$E$11])" office:value-type="float" office:value="86.9331893057176" calcext:value-type="float">
            <text:p>87</text:p>
          </table:table-cell>
          <table:table-cell table:style-name="ce35" table:formula="of:=[.C53]*0.95" office:value-type="float" office:value="82.5865298404317" calcext:value-type="float">
            <text:p>83</text:p>
          </table:table-cell>
          <table:table-cell table:style-name="ce35" table:formula="of:=[.C53]*0.8" office:value-type="float" office:value="69.546551444574" calcext:value-type="float">
            <text:p>70</text:p>
          </table:table-cell>
          <table:table-cell table:style-name="ce27" office:value-type="float" office:value="88" calcext:value-type="float">
            <text:p>88</text:p>
          </table:table-cell>
          <table:table-cell table:style-name="ce65" office:value-type="float" office:value="0.9" calcext:value-type="float">
            <text:p>0.900</text:p>
          </table:table-cell>
          <table:table-cell table:style-name="ce31" table:formula="of:=[.C53]*[.F53]" office:value-type="float" office:value="7650.12065890314" calcext:value-type="float">
            <text:p>7,650</text:p>
          </table:table-cell>
          <table:table-cell table:style-name="ce31" table:formula="of:=[.H53]*12" office:value-type="float" office:value="91801.4479068377" calcext:value-type="float">
            <text:p>91,801</text:p>
          </table:table-cell>
          <table:table-cell table:style-name="ce31" table:formula="of:=[.D53]*[.F53]" office:value-type="float" office:value="7267.61462595799" calcext:value-type="float">
            <text:p>7,268</text:p>
          </table:table-cell>
          <table:table-cell table:style-name="ce31" table:formula="of:=[.J53]*12" office:value-type="float" office:value="87211.3755114958" calcext:value-type="float">
            <text:p>87,211</text:p>
          </table:table-cell>
          <table:table-cell table:style-name="ce31" table:formula="of:=[.E53]*[.F53]" office:value-type="float" office:value="6120.09652712252" calcext:value-type="float">
            <text:p>6,120</text:p>
          </table:table-cell>
          <table:table-cell table:style-name="ce31" table:formula="of:=[.L53]*12" office:value-type="float" office:value="73441.1583254702" calcext:value-type="float">
            <text:p>73,441</text:p>
          </table:table-cell>
          <table:table-cell table:number-columns-repeated="244"/>
          <table:table-cell table:style-name="ce38" table:number-columns-repeated="16127"/>
        </table:table-row>
        <table:table-row table:style-name="ro2">
          <table:table-cell/>
          <table:table-cell table:style-name="ce28" office:value-type="string" calcext:value-type="string" table:number-columns-spanned="12" table:number-rows-spanned="1">
            <text:p>(*) Proyección de la población con una tasa de crecimiento del 2.54%</text:p>
          </table:table-cell>
          <table:covered-table-cell table:number-columns-repeated="11" table:style-name="ce28"/>
          <table:table-cell table:number-columns-repeated="244"/>
        </table:table-row>
        <table:table-row table:style-name="ro2">
          <table:table-cell/>
          <table:table-cell table:style-name="ce49" office:value-type="string" calcext:value-type="string" table:number-columns-spanned="12" table:number-rows-spanned="1">
            <text:p>(1) 95% <text:s/>de <text:s/>recreos y restaurantes con intensión de compra</text:p>
          </table:table-cell>
          <table:covered-table-cell table:number-columns-repeated="11" table:style-name="ce49"/>
          <table:table-cell table:number-columns-repeated="244"/>
        </table:table-row>
        <table:table-row table:style-name="ro2">
          <table:table-cell/>
          <table:table-cell table:style-name="ce49" office:value-type="string" calcext:value-type="string" table:number-columns-spanned="12" table:number-rows-spanned="1">
            <text:p>(2) 80% de Recreos y Restaurantes que compran el cuy </text:p>
          </table:table-cell>
          <table:covered-table-cell table:number-columns-repeated="11" table:style-name="ce49"/>
          <table:table-cell table:number-columns-repeated="244"/>
        </table:table-row>
        <table:table-row table:style-name="ro2">
          <table:table-cell/>
          <table:table-cell table:style-name="ce49" office:value-type="string" calcext:value-type="string" table:number-columns-spanned="12" table:number-rows-spanned="1">
            <text:p>(3) Consumo promedio de cuyes 88 Unidades por recreo/Mes - Encuesta octubre 2020</text:p>
          </table:table-cell>
          <table:covered-table-cell table:number-columns-repeated="11" table:style-name="ce49"/>
          <table:table-cell/>
          <table:table-cell table:style-name="ce33"/>
          <table:table-cell table:number-columns-repeated="242"/>
        </table:table-row>
        <table:table-row table:style-name="ro2">
          <table:table-cell/>
          <table:table-cell table:style-name="ce49" office:value-type="string" calcext:value-type="string" table:number-columns-spanned="12" table:number-rows-spanned="1">
            <text:p>(*) Para el presente proyecto se considera como ciudad Ayacucho a los Distritos S.J. Bautista, C.Alto, Andres. A Caceres, J .Nazareno y Ayacucho</text:p>
          </table:table-cell>
          <table:covered-table-cell table:number-columns-repeated="11" table:style-name="ce49"/>
          <table:table-cell table:number-columns-repeated="244"/>
        </table:table-row>
        <table:table-row table:style-name="ro2">
          <table:table-cell/>
          <table:table-cell table:style-name="ce49" office:value-type="string" calcext:value-type="string" table:number-columns-spanned="12" table:number-rows-spanned="1">
            <text:p>Fuente: Encuesta octubre 2020 Elaboración Propia</text:p>
          </table:table-cell>
          <table:covered-table-cell table:number-columns-repeated="11" table:style-name="ce49"/>
          <table:table-cell table:number-columns-repeated="244"/>
        </table:table-row>
        <table:table-row table:style-name="ro1" table:number-rows-repeated="2">
          <table:table-cell table:number-columns-repeated="257"/>
        </table:table-row>
        <table:table-row table:style-name="ro4">
          <table:table-cell table:number-columns-repeated="3"/>
          <table:table-cell table:style-name="ce48" office:value-type="string" calcext:value-type="string">
            <text:p>AÑO</text:p>
          </table:table-cell>
          <table:table-cell table:style-name="ce48" office:value-type="string" calcext:value-type="string">
            <text:p>DEMANDA OBJETIVO EN LA CIUDAD DE AYACUCHO EN UNIDAD / AÑO</text:p>
          </table:table-cell>
          <table:table-cell table:style-name="ce48" office:value-type="string" calcext:value-type="string">
            <text:p>DEMANDA OBJETIVO EN RECREOS Y RESTAURANTES EN <text:s/>UNIDADES / AÑO</text:p>
          </table:table-cell>
          <table:table-cell table:style-name="ce48" office:value-type="string" calcext:value-type="string">
            <text:p>DEMANDA OBJETIVO TOTAL UNID / AÑO</text:p>
          </table:table-cell>
          <table:table-cell table:style-name="ce33" table:number-columns-repeated="2"/>
          <table:table-cell table:style-name="ce72" table:number-columns-repeated="4"/>
          <table:table-cell table:style-name="ce74"/>
          <table:table-cell table:number-columns-repeated="243"/>
        </table:table-row>
        <table:table-row table:style-name="ro1">
          <table:table-cell table:number-columns-repeated="3"/>
          <table:table-cell table:style-name="ce27" table:formula="of:=+[.B48]" office:value-type="float" office:value="2020" calcext:value-type="float">
            <text:p>2020</text:p>
          </table:table-cell>
          <table:table-cell table:style-name="ce31" table:formula="of:=+[.M33]" office:value-type="float" office:value="807698.304877635" calcext:value-type="float">
            <text:p>807,698</text:p>
          </table:table-cell>
          <table:table-cell table:style-name="ce31" table:formula="of:=+[.M48]" office:value-type="float" office:value="65049.6" calcext:value-type="float">
            <text:p>65,050</text:p>
          </table:table-cell>
          <table:table-cell table:style-name="ce31" table:formula="of:=[.E63]+[.F63]" office:value-type="float" office:value="872747.904877635" calcext:value-type="float">
            <text:p>872,748</text:p>
          </table:table-cell>
          <table:table-cell table:style-name="ce33" table:number-columns-repeated="2"/>
          <table:table-cell table:style-name="ce73" table:number-columns-repeated="4"/>
          <table:table-cell table:style-name="ce74"/>
          <table:table-cell table:number-columns-repeated="243"/>
        </table:table-row>
        <table:table-row table:style-name="ro1">
          <table:table-cell table:number-columns-repeated="3"/>
          <table:table-cell table:style-name="ce27" table:formula="of:=+[.B49]" office:value-type="float" office:value="2021" calcext:value-type="float">
            <text:p>2021</text:p>
          </table:table-cell>
          <table:table-cell table:style-name="ce31" table:formula="of:=+[.M34]" office:value-type="float" office:value="827538.387825845" calcext:value-type="float">
            <text:p>827,538</text:p>
          </table:table-cell>
          <table:table-cell table:style-name="ce31" table:formula="of:=+[.M49]" office:value-type="float" office:value="66647.460800195" calcext:value-type="float">
            <text:p>66,647</text:p>
          </table:table-cell>
          <table:table-cell table:style-name="ce31" table:formula="of:=[.E64]+[.F64]" office:value-type="float" office:value="894185.84862604" calcext:value-type="float">
            <text:p>894,186</text:p>
          </table:table-cell>
          <table:table-cell table:style-name="ce33" table:number-columns-repeated="2"/>
          <table:table-cell table:style-name="ce73" table:number-columns-repeated="4"/>
          <table:table-cell table:style-name="ce74"/>
          <table:table-cell table:number-columns-repeated="243"/>
        </table:table-row>
        <table:table-row table:style-name="ro1">
          <table:table-cell table:number-columns-repeated="3"/>
          <table:table-cell table:style-name="ce27" table:formula="of:=+[.B50]" office:value-type="float" office:value="2022" calcext:value-type="float">
            <text:p>2022</text:p>
          </table:table-cell>
          <table:table-cell table:style-name="ce31" table:formula="of:=+[.M35]" office:value-type="float" office:value="847865.817211476" calcext:value-type="float">
            <text:p>847,866</text:p>
          </table:table-cell>
          <table:table-cell table:style-name="ce31" table:formula="of:=+[.M50]" office:value-type="float" office:value="68284.571021398" calcext:value-type="float">
            <text:p>68,285</text:p>
          </table:table-cell>
          <table:table-cell table:style-name="ce31" table:formula="of:=[.E65]+[.F65]" office:value-type="float" office:value="916150.388232873" calcext:value-type="float">
            <text:p>916,150</text:p>
          </table:table-cell>
          <table:table-cell table:style-name="ce33" table:number-columns-repeated="2"/>
          <table:table-cell table:style-name="ce73" table:number-columns-repeated="4"/>
          <table:table-cell table:style-name="ce74"/>
          <table:table-cell table:number-columns-repeated="243"/>
        </table:table-row>
        <table:table-row table:style-name="ro1">
          <table:table-cell table:number-columns-repeated="3"/>
          <table:table-cell table:style-name="ce27" table:formula="of:=+[.B51]" office:value-type="float" office:value="2023" calcext:value-type="float">
            <text:p>2023</text:p>
          </table:table-cell>
          <table:table-cell table:style-name="ce31" table:formula="of:=+[.M36]" office:value-type="float" office:value="868692.564080749" calcext:value-type="float">
            <text:p>868,693</text:p>
          </table:table-cell>
          <table:table-cell table:style-name="ce31" table:formula="of:=+[.M51]" office:value-type="float" office:value="69961.8947757827" calcext:value-type="float">
            <text:p>69,962</text:p>
          </table:table-cell>
          <table:table-cell table:style-name="ce31" table:formula="of:=[.E66]+[.F66]" office:value-type="float" office:value="938654.458856532" calcext:value-type="float">
            <text:p>938,654</text:p>
          </table:table-cell>
          <table:table-cell table:style-name="ce33" table:number-columns-repeated="2"/>
          <table:table-cell table:style-name="ce73" table:number-columns-repeated="4"/>
          <table:table-cell table:style-name="ce74"/>
          <table:table-cell table:number-columns-repeated="243"/>
        </table:table-row>
        <table:table-row table:style-name="ro1">
          <table:table-cell table:number-columns-repeated="3"/>
          <table:table-cell table:style-name="ce27" table:formula="of:=+[.B52]" office:value-type="float" office:value="2024" calcext:value-type="float">
            <text:p>2024</text:p>
          </table:table-cell>
          <table:table-cell table:style-name="ce31" table:formula="of:=+[.M37]" office:value-type="float" office:value="890030.893533437" calcext:value-type="float">
            <text:p>890,031</text:p>
          </table:table-cell>
          <table:table-cell table:style-name="ce31" table:formula="of:=+[.M52]" office:value-type="float" office:value="71680.4198577139" calcext:value-type="float">
            <text:p>71,680</text:p>
          </table:table-cell>
          <table:table-cell table:style-name="ce31" table:formula="of:=[.E67]+[.F67]" office:value-type="float" office:value="961711.31339115" calcext:value-type="float">
            <text:p>961,711</text:p>
          </table:table-cell>
          <table:table-cell table:style-name="ce33" table:number-columns-repeated="2"/>
          <table:table-cell table:style-name="ce73" table:number-columns-repeated="4"/>
          <table:table-cell table:style-name="ce74"/>
          <table:table-cell table:number-columns-repeated="243"/>
        </table:table-row>
        <table:table-row table:style-name="ro1">
          <table:table-cell table:number-columns-repeated="3"/>
          <table:table-cell table:style-name="ce27" table:formula="of:=+[.B53]" office:value-type="float" office:value="2025" calcext:value-type="float">
            <text:p>2025</text:p>
          </table:table-cell>
          <table:table-cell table:style-name="ce31" table:formula="of:=+[.M38]" office:value-type="float" office:value="911893.371945904" calcext:value-type="float">
            <text:p>911,893</text:p>
          </table:table-cell>
          <table:table-cell table:style-name="ce31" table:formula="of:=+[.M53]" office:value-type="float" office:value="73441.1583254702" calcext:value-type="float">
            <text:p>73,441</text:p>
          </table:table-cell>
          <table:table-cell table:style-name="ce31" table:formula="of:=[.E68]+[.F68]" office:value-type="float" office:value="985334.530271374" calcext:value-type="float">
            <text:p>985,335</text:p>
          </table:table-cell>
          <table:table-cell table:style-name="ce33" table:number-columns-repeated="2"/>
          <table:table-cell table:style-name="ce73" table:number-columns-repeated="4"/>
          <table:table-cell table:style-name="ce74"/>
          <table:table-cell table:number-columns-repeated="243"/>
        </table:table-row>
        <table:table-row table:style-name="ro4">
          <table:table-cell table:number-columns-repeated="2"/>
          <table:table-cell table:style-name="ce33"/>
          <table:table-cell table:style-name="ce33" office:value-type="string" calcext:value-type="string">
            <text:p>Fuente: Encuesta octubre Elaboración Propia</text:p>
          </table:table-cell>
          <table:table-cell table:style-name="ce33" table:number-columns-repeated="5"/>
          <table:table-cell table:style-name="ce74" table:number-columns-repeated="5"/>
          <table:table-cell table:number-columns-repeated="243"/>
        </table:table-row>
        <table:table-row table:style-name="ro2">
          <table:table-cell/>
          <table:table-cell table:style-name="ce33" table:number-columns-spanned="8" table:number-rows-spanned="1"/>
          <table:covered-table-cell table:number-columns-repeated="7" table:style-name="ce33"/>
          <table:table-cell table:number-columns-repeated="248"/>
        </table:table-row>
        <table:table-row table:style-name="ro1" table:number-rows-repeated="1048505">
          <table:table-cell table:number-columns-repeated="257"/>
        </table:table-row>
        <table:table-row table:style-name="ro1">
          <table:table-cell table:number-columns-repeated="257"/>
        </table:table-row>
      </table:table>
      <table:table table:name="OFERTA" table:style-name="ta3">
        <table:table-column table:style-name="co22" table:default-cell-style-name="ce76"/>
        <table:table-column table:style-name="co23" table:default-cell-style-name="ce76"/>
        <table:table-column table:style-name="co24" table:default-cell-style-name="ce76"/>
        <table:table-column table:style-name="co25" table:default-cell-style-name="ce76"/>
        <table:table-column table:style-name="co26" table:default-cell-style-name="ce76"/>
        <table:table-column table:style-name="co27" table:default-cell-style-name="ce76"/>
        <table:table-column table:style-name="co28" table:default-cell-style-name="ce76"/>
        <table:table-column table:style-name="co29" table:default-cell-style-name="ce76"/>
        <table:table-column table:style-name="co30" table:default-cell-style-name="ce76"/>
        <table:table-column table:style-name="co28" table:default-cell-style-name="ce76"/>
        <table:table-column table:style-name="co31" table:default-cell-style-name="ce76"/>
        <table:table-column table:style-name="co1" table:number-columns-repeated="4" table:default-cell-style-name="ce76"/>
        <table:table-column table:style-name="co32" table:default-cell-style-name="ce76"/>
        <table:table-column table:style-name="co33" table:default-cell-style-name="ce76"/>
        <table:table-column table:style-name="co1" table:number-columns-repeated="7" table:default-cell-style-name="ce76"/>
        <table:table-column table:style-name="co34" table:default-cell-style-name="ce76"/>
        <table:table-column table:style-name="co1" table:default-cell-style-name="ce76"/>
        <table:table-column table:style-name="co35" table:default-cell-style-name="ce76"/>
        <table:table-column table:style-name="co36" table:default-cell-style-name="ce76"/>
        <table:table-column table:style-name="co37" table:default-cell-style-name="ce76"/>
        <table:table-column table:style-name="co1" table:number-columns-repeated="2" table:default-cell-style-name="ce76"/>
        <table:table-column table:style-name="co36" table:default-cell-style-name="ce76"/>
        <table:table-column table:style-name="co7" table:default-cell-style-name="ce76"/>
        <table:table-column table:style-name="co1" table:number-columns-repeated="224" table:default-cell-style-name="ce76"/>
        <table:table-column table:style-name="co12" table:number-columns-repeated="16127"/>
        <table:table-row table:style-name="ro9">
          <table:table-cell table:number-columns-repeated="16"/>
          <table:table-cell table:style-name="ce119" office:value-type="string" calcext:value-type="string" table:number-columns-spanned="9" table:number-rows-spanned="1">
            <text:p>Ayacucho: población de cuyes (unidades) por años, según provincias, 2012 -2019</text:p>
          </table:table-cell>
          <table:covered-table-cell table:number-columns-repeated="8" table:style-name="ce119"/>
          <table:table-cell/>
          <table:table-cell table:style-name="ce119" office:value-type="string" calcext:value-type="string" table:number-columns-spanned="9" table:number-rows-spanned="1">
            <text:p>Provincias Ofertantes al Mercado de Huamanga</text:p>
          </table:table-cell>
          <table:covered-table-cell table:number-columns-repeated="8" table:style-name="ce119"/>
          <table:table-cell table:style-name="ce139" table:number-columns-repeated="5"/>
          <table:table-cell table:number-columns-repeated="217"/>
        </table:table-row>
        <table:table-row table:style-name="ro14">
          <table:table-cell/>
          <table:table-cell table:style-name="ce77" office:value-type="string" calcext:value-type="string" table:number-columns-spanned="13" table:number-rows-spanned="1">
            <text:p>DINAMICA POBLACIONAL CON PROYECTO</text:p>
          </table:table-cell>
          <table:covered-table-cell table:number-columns-repeated="12" table:style-name="ce77"/>
          <table:table-cell table:number-columns-repeated="2"/>
          <table:table-cell table:style-name="ce120" office:value-type="string" calcext:value-type="string" table:number-columns-spanned="1" table:number-rows-spanned="2">
            <text:p>PROVINCIAS</text:p>
          </table:table-cell>
          <table:table-cell table:style-name="ce120" office:value-type="string" calcext:value-type="string" table:number-columns-spanned="8" table:number-rows-spanned="1">
            <text:p>AÑOS</text:p>
          </table:table-cell>
          <table:covered-table-cell table:number-columns-repeated="7" table:style-name="ce120"/>
          <table:table-cell/>
          <table:table-cell table:style-name="ce120" office:value-type="string" calcext:value-type="string" table:number-columns-spanned="1" table:number-rows-spanned="2">
            <text:p>PROVINCIAS</text:p>
          </table:table-cell>
          <table:table-cell table:style-name="ce120" office:value-type="string" calcext:value-type="string" table:number-columns-spanned="8" table:number-rows-spanned="1">
            <text:p>AÑOS</text:p>
          </table:table-cell>
          <table:covered-table-cell table:number-columns-repeated="7" table:style-name="ce120"/>
          <table:table-cell table:style-name="ce139" table:number-columns-repeated="5"/>
          <table:table-cell table:number-columns-repeated="217"/>
        </table:table-row>
        <table:table-row table:style-name="ro15">
          <table:table-cell table:number-columns-repeated="2"/>
          <table:table-cell table:style-name="ce81" table:number-columns-repeated="9"/>
          <table:table-cell table:number-columns-repeated="5"/>
          <table:covered-table-cell table:style-name="ce120"/>
          <table:table-cell table:style-name="ce120" office:value-type="float" office:value="2012" calcext:value-type="float">
            <text:p>2012</text:p>
          </table:table-cell>
          <table:table-cell table:style-name="ce120" office:value-type="float" office:value="2013" calcext:value-type="float">
            <text:p>2013</text:p>
          </table:table-cell>
          <table:table-cell table:style-name="ce120" office:value-type="float" office:value="2014" calcext:value-type="float">
            <text:p>2014</text:p>
          </table:table-cell>
          <table:table-cell table:style-name="ce120" office:value-type="float" office:value="2015" calcext:value-type="float">
            <text:p>2015</text:p>
          </table:table-cell>
          <table:table-cell table:style-name="ce120" office:value-type="float" office:value="2016" calcext:value-type="float">
            <text:p>2016</text:p>
          </table:table-cell>
          <table:table-cell table:style-name="ce120" office:value-type="float" office:value="2017" calcext:value-type="float">
            <text:p>2017</text:p>
          </table:table-cell>
          <table:table-cell table:style-name="ce120" office:value-type="float" office:value="2018" calcext:value-type="float">
            <text:p>2018</text:p>
          </table:table-cell>
          <table:table-cell table:style-name="ce120" office:value-type="float" office:value="2019" calcext:value-type="float">
            <text:p>2019</text:p>
          </table:table-cell>
          <table:table-cell/>
          <table:covered-table-cell table:style-name="ce120"/>
          <table:table-cell table:style-name="ce120" office:value-type="float" office:value="2012" calcext:value-type="float">
            <text:p>2012</text:p>
          </table:table-cell>
          <table:table-cell table:style-name="ce120" office:value-type="float" office:value="2013" calcext:value-type="float">
            <text:p>2013</text:p>
          </table:table-cell>
          <table:table-cell table:style-name="ce120" office:value-type="float" office:value="2014" calcext:value-type="float">
            <text:p>2014</text:p>
          </table:table-cell>
          <table:table-cell table:style-name="ce120" office:value-type="float" office:value="2015" calcext:value-type="float">
            <text:p>2015</text:p>
          </table:table-cell>
          <table:table-cell table:style-name="ce120" office:value-type="float" office:value="2016" calcext:value-type="float">
            <text:p>2016</text:p>
          </table:table-cell>
          <table:table-cell table:style-name="ce120" office:value-type="float" office:value="2017" calcext:value-type="float">
            <text:p>2017</text:p>
          </table:table-cell>
          <table:table-cell table:style-name="ce120" office:value-type="float" office:value="2018" calcext:value-type="float">
            <text:p>2018</text:p>
          </table:table-cell>
          <table:table-cell table:style-name="ce120" office:value-type="float" office:value="2019" calcext:value-type="float">
            <text:p>2019</text:p>
          </table:table-cell>
          <table:table-cell table:style-name="ce139" table:number-columns-repeated="5"/>
          <table:table-cell table:number-columns-repeated="217"/>
        </table:table-row>
        <table:table-row table:style-name="ro8">
          <table:table-cell/>
          <table:table-cell table:style-name="ce78" office:value-type="string" calcext:value-type="string" table:number-columns-spanned="2" table:number-rows-spanned="3">
            <text:p>EDAD TRIMEST.</text:p>
          </table:table-cell>
          <table:covered-table-cell table:style-name="ce78"/>
          <table:table-cell table:style-name="ce78" office:value-type="string" calcext:value-type="string" table:number-columns-spanned="1" table:number-rows-spanned="3">
            <text:p>Total Gasapo</text:p>
          </table:table-cell>
          <table:table-cell table:style-name="ce78" office:value-type="string" calcext:value-type="string" table:number-columns-spanned="1" table:number-rows-spanned="2">
            <text:p>Gasapos Hembra</text:p>
          </table:table-cell>
          <table:table-cell table:style-name="ce78" office:value-type="string" calcext:value-type="string" table:number-columns-spanned="1" table:number-rows-spanned="3">
            <text:p>Remplazo</text:p>
          </table:table-cell>
          <table:table-cell table:style-name="ce78" office:value-type="string" calcext:value-type="string" table:number-columns-spanned="1" table:number-rows-spanned="3">
            <text:p>Reprod. Hembra</text:p>
          </table:table-cell>
          <table:table-cell table:style-name="ce78" office:value-type="string" calcext:value-type="string" table:number-columns-spanned="1" table:number-rows-spanned="2">
            <text:p>Gasapo Macho</text:p>
          </table:table-cell>
          <table:table-cell table:style-name="ce78" office:value-type="string" calcext:value-type="string" table:number-columns-spanned="1" table:number-rows-spanned="3">
            <text:p>Reprod. Macho</text:p>
          </table:table-cell>
          <table:table-cell table:style-name="ce78" office:value-type="string" calcext:value-type="string" table:number-columns-spanned="1" table:number-rows-spanned="3">
            <text:p>Saca</text:p>
          </table:table-cell>
          <table:table-cell table:style-name="ce78" office:value-type="string" calcext:value-type="string" table:number-columns-spanned="1" table:number-rows-spanned="3">
            <text:p>Total Animal Reproduct.</text:p>
          </table:table-cell>
          <table:table-cell table:style-name="ce78" office:value-type="string" calcext:value-type="string" table:number-columns-spanned="1" table:number-rows-spanned="2">
            <text:p>Consumo Forraje Kg</text:p>
          </table:table-cell>
          <table:table-cell table:style-name="ce78" office:value-type="string" calcext:value-type="string" table:number-columns-spanned="1" table:number-rows-spanned="2">
            <text:p>Consumo Concentrado</text:p>
          </table:table-cell>
          <table:table-cell table:style-name="ce78" office:value-type="string" calcext:value-type="string" table:number-columns-spanned="1" table:number-rows-spanned="2">
            <text:p>Carcasa Kg</text:p>
          </table:table-cell>
          <table:table-cell table:number-columns-repeated="2"/>
          <table:table-cell table:style-name="ce121" office:value-type="string" calcext:value-type="string">
            <text:p>DEPARTAMENTAL</text:p>
          </table:table-cell>
          <table:table-cell table:style-name="ce126" table:formula="of:=SUM([.R5:.R15])" office:value-type="float" office:value="449887" calcext:value-type="float">
            <text:p>449,887.00</text:p>
          </table:table-cell>
          <table:table-cell table:style-name="ce126" table:formula="of:=SUM([.S5:.S15])" office:value-type="float" office:value="355140" calcext:value-type="float">
            <text:p>355,140.00</text:p>
          </table:table-cell>
          <table:table-cell table:style-name="ce126" table:formula="of:=SUM([.T5:.T15])" office:value-type="float" office:value="417718" calcext:value-type="float">
            <text:p>417,718.00</text:p>
          </table:table-cell>
          <table:table-cell table:style-name="ce126" table:formula="of:=SUM([.U5:.U15])" office:value-type="float" office:value="430360" calcext:value-type="float">
            <text:p>430,360.00</text:p>
          </table:table-cell>
          <table:table-cell table:style-name="ce126" table:formula="of:=SUM([.V5:.V15])" office:value-type="float" office:value="465817" calcext:value-type="float">
            <text:p>465,817.00</text:p>
          </table:table-cell>
          <table:table-cell table:style-name="ce126" table:formula="of:=SUM([.W5:.W15])" office:value-type="float" office:value="481144" calcext:value-type="float">
            <text:p>481,144.00</text:p>
          </table:table-cell>
          <table:table-cell table:style-name="ce126" table:formula="of:=SUM([.X5:.X15])" office:value-type="float" office:value="499255" calcext:value-type="float">
            <text:p>499,255.00</text:p>
          </table:table-cell>
          <table:table-cell table:style-name="ce126" table:formula="of:=SUM([.Y5:.Y15])" office:value-type="float" office:value="507044" calcext:value-type="float">
            <text:p>507,044.00</text:p>
          </table:table-cell>
          <table:table-cell/>
          <table:table-cell table:style-name="ce122" office:value-type="string" calcext:value-type="string">
            <text:p>HUAMANGA</text:p>
          </table:table-cell>
          <table:table-cell table:style-name="ce127" table:formula="of:=+[.R5]*[.$AB$14]" office:value-type="float" office:value="77976.61" calcext:value-type="float">
            <text:p>77,976.61</text:p>
          </table:table-cell>
          <table:table-cell table:style-name="ce127" table:formula="of:=+[.S5]*[.$AB$14]" office:value-type="float" office:value="71223.68" calcext:value-type="float">
            <text:p>71,223.68</text:p>
          </table:table-cell>
          <table:table-cell table:style-name="ce127" table:formula="of:=+[.T5]*[.$AB$14]" office:value-type="float" office:value="73903.68" calcext:value-type="float">
            <text:p>73,903.68</text:p>
          </table:table-cell>
          <table:table-cell table:style-name="ce127" table:formula="of:=+[.U5]*[.$AB$14]" office:value-type="float" office:value="77399.74" calcext:value-type="float">
            <text:p>77,399.74</text:p>
          </table:table-cell>
          <table:table-cell table:style-name="ce127" table:formula="of:=+[.V5]*[.$AB$14]" office:value-type="float" office:value="92117.63" calcext:value-type="float">
            <text:p>92,117.63</text:p>
          </table:table-cell>
          <table:table-cell table:style-name="ce127" table:formula="of:=+[.W5]*[.$AB$14]" office:value-type="float" office:value="96630.75" calcext:value-type="float">
            <text:p>96,630.75</text:p>
          </table:table-cell>
          <table:table-cell table:style-name="ce127" table:formula="of:=+[.X5]*[.$AB$14]" office:value-type="float" office:value="88620.23" calcext:value-type="float">
            <text:p>88,620.23</text:p>
          </table:table-cell>
          <table:table-cell table:style-name="ce127" table:formula="of:=+[.Y5]*[.$AB$14]" office:value-type="float" office:value="92176.59" calcext:value-type="float">
            <text:p>92,176.59</text:p>
          </table:table-cell>
          <table:table-cell table:style-name="ce139" table:number-columns-repeated="5"/>
          <table:table-cell table:number-columns-repeated="217"/>
        </table:table-row>
        <table:table-row table:style-name="ro15">
          <table:table-cell/>
          <table:covered-table-cell table:number-columns-repeated="13" table:style-name="ce78"/>
          <table:table-cell table:number-columns-repeated="2"/>
          <table:table-cell table:style-name="ce122" office:value-type="string" calcext:value-type="string">
            <text:p>HUAMANGA</text:p>
          </table:table-cell>
          <table:table-cell table:style-name="ce127" office:value-type="float" office:value="116383" calcext:value-type="float">
            <text:p>116,383.00</text:p>
          </table:table-cell>
          <table:table-cell table:style-name="ce127" office:value-type="float" office:value="106304" calcext:value-type="float">
            <text:p>106,304.00</text:p>
          </table:table-cell>
          <table:table-cell table:style-name="ce127" office:value-type="float" office:value="110304" calcext:value-type="float">
            <text:p>110,304.00</text:p>
          </table:table-cell>
          <table:table-cell table:style-name="ce127" office:value-type="float" office:value="115522" calcext:value-type="float">
            <text:p>115,522.00</text:p>
          </table:table-cell>
          <table:table-cell table:style-name="ce127" office:value-type="float" office:value="137489" calcext:value-type="float">
            <text:p>137,489.00</text:p>
          </table:table-cell>
          <table:table-cell table:style-name="ce127" office:value-type="float" office:value="144225" calcext:value-type="float">
            <text:p>144,225.00</text:p>
          </table:table-cell>
          <table:table-cell table:style-name="ce127" office:value-type="float" office:value="132269" calcext:value-type="float">
            <text:p>132,269.00</text:p>
          </table:table-cell>
          <table:table-cell table:style-name="ce127" office:value-type="float" office:value="137577" calcext:value-type="float">
            <text:p>137,577.00</text:p>
          </table:table-cell>
          <table:table-cell/>
          <table:table-cell table:style-name="ce122" office:value-type="string" calcext:value-type="string">
            <text:p>CANGALLO</text:p>
          </table:table-cell>
          <table:table-cell table:style-name="ce127" table:formula="of:=+[.R6]*[.$AB$15]" office:value-type="float" office:value="21592.5" calcext:value-type="float">
            <text:p>21,592.50</text:p>
          </table:table-cell>
          <table:table-cell table:style-name="ce127" table:formula="of:=+[.S6]*[.$AB$15]" office:value-type="float" office:value="8974.5" calcext:value-type="float">
            <text:p>8,974.50</text:p>
          </table:table-cell>
          <table:table-cell table:style-name="ce127" table:formula="of:=+[.T6]*[.$AB$15]" office:value-type="float" office:value="13400.25" calcext:value-type="float">
            <text:p>13,400.25</text:p>
          </table:table-cell>
          <table:table-cell table:style-name="ce127" table:formula="of:=+[.U6]*[.$AB$15]" office:value-type="float" office:value="15840.75" calcext:value-type="float">
            <text:p>15,840.75</text:p>
          </table:table-cell>
          <table:table-cell table:style-name="ce127" table:formula="of:=+[.V6]*[.$AB$15]" office:value-type="float" office:value="19326.75" calcext:value-type="float">
            <text:p>19,326.75</text:p>
          </table:table-cell>
          <table:table-cell table:style-name="ce127" table:formula="of:=+[.W6]*[.$AB$15]" office:value-type="float" office:value="16800.75" calcext:value-type="float">
            <text:p>16,800.75</text:p>
          </table:table-cell>
          <table:table-cell table:style-name="ce127" table:formula="of:=+[.X6]*[.$AB$15]" office:value-type="float" office:value="17064" calcext:value-type="float">
            <text:p>17,064.00</text:p>
          </table:table-cell>
          <table:table-cell table:style-name="ce127" table:formula="of:=+[.Y6]*[.$AB$15]" office:value-type="float" office:value="16994.25" calcext:value-type="float">
            <text:p>16,994.25</text:p>
          </table:table-cell>
          <table:table-cell table:style-name="ce139" table:number-columns-repeated="5"/>
          <table:table-cell table:number-columns-repeated="217"/>
        </table:table-row>
        <table:table-row table:style-name="ro16">
          <table:table-cell/>
          <table:covered-table-cell table:number-columns-repeated="3" table:style-name="ce78"/>
          <table:table-cell table:style-name="ce78" office:value-type="string" calcext:value-type="string">
            <text:p>00/03 Meses</text:p>
          </table:table-cell>
          <table:covered-table-cell table:number-columns-repeated="2" table:style-name="ce78"/>
          <table:table-cell table:style-name="ce78" office:value-type="string" calcext:value-type="string">
            <text:p>00/03 Meses</text:p>
          </table:table-cell>
          <table:covered-table-cell table:number-columns-repeated="3" table:style-name="ce78"/>
          <table:table-cell table:style-name="ce103" office:value-type="string" calcext:value-type="string">
            <text:p>30-40%FV</text:p>
          </table:table-cell>
          <table:table-cell table:style-name="ce103" office:value-type="string" calcext:value-type="string">
            <text:p>8,5% MS</text:p>
          </table:table-cell>
          <table:table-cell table:style-name="ce103" office:value-type="string" calcext:value-type="string">
            <text:p>80% PV</text:p>
          </table:table-cell>
          <table:table-cell table:number-columns-repeated="2"/>
          <table:table-cell table:style-name="ce122" office:value-type="string" calcext:value-type="string">
            <text:p>CANGALLO</text:p>
          </table:table-cell>
          <table:table-cell table:style-name="ce127" office:value-type="float" office:value="28790" calcext:value-type="float">
            <text:p>28,790.00</text:p>
          </table:table-cell>
          <table:table-cell table:style-name="ce127" office:value-type="float" office:value="11966" calcext:value-type="float">
            <text:p>11,966.00</text:p>
          </table:table-cell>
          <table:table-cell table:style-name="ce127" office:value-type="float" office:value="17867" calcext:value-type="float">
            <text:p>17,867.00</text:p>
          </table:table-cell>
          <table:table-cell table:style-name="ce127" office:value-type="float" office:value="21121" calcext:value-type="float">
            <text:p>21,121.00</text:p>
          </table:table-cell>
          <table:table-cell table:style-name="ce127" office:value-type="float" office:value="25769" calcext:value-type="float">
            <text:p>25,769.00</text:p>
          </table:table-cell>
          <table:table-cell table:style-name="ce127" office:value-type="float" office:value="22401" calcext:value-type="float">
            <text:p>22,401.00</text:p>
          </table:table-cell>
          <table:table-cell table:style-name="ce127" office:value-type="float" office:value="22752" calcext:value-type="float">
            <text:p>22,752.00</text:p>
          </table:table-cell>
          <table:table-cell table:style-name="ce127" office:value-type="float" office:value="22659" calcext:value-type="float">
            <text:p>22,659.00</text:p>
          </table:table-cell>
          <table:table-cell/>
          <table:table-cell table:style-name="ce122" office:value-type="string" calcext:value-type="string">
            <text:p>HUANCASANCOS</text:p>
          </table:table-cell>
          <table:table-cell table:style-name="ce127" table:formula="of:=+[.R7]*[.$AB$16]" office:value-type="float" office:value="1454.85" calcext:value-type="float">
            <text:p>1,454.85</text:p>
          </table:table-cell>
          <table:table-cell table:style-name="ce127" table:formula="of:=+[.S7]*[.$AB$16]" office:value-type="float" office:value="1318.5" calcext:value-type="float">
            <text:p>1,318.50</text:p>
          </table:table-cell>
          <table:table-cell table:style-name="ce127" table:formula="of:=+[.T7]*[.$AB$16]" office:value-type="float" office:value="1831.05" calcext:value-type="float">
            <text:p>1,831.05</text:p>
          </table:table-cell>
          <table:table-cell table:style-name="ce127" table:formula="of:=+[.U7]*[.$AB$16]" office:value-type="float" office:value="1815.9" calcext:value-type="float">
            <text:p>1,815.90</text:p>
          </table:table-cell>
          <table:table-cell table:style-name="ce127" table:formula="of:=+[.V7]*[.$AB$16]" office:value-type="float" office:value="2107.5" calcext:value-type="float">
            <text:p>2,107.50</text:p>
          </table:table-cell>
          <table:table-cell table:style-name="ce127" table:formula="of:=+[.W7]*[.$AB$16]" office:value-type="float" office:value="2160" calcext:value-type="float">
            <text:p>2,160.00</text:p>
          </table:table-cell>
          <table:table-cell table:style-name="ce127" table:formula="of:=+[.X7]*[.$AB$16]" office:value-type="float" office:value="2319.3" calcext:value-type="float">
            <text:p>2,319.30</text:p>
          </table:table-cell>
          <table:table-cell table:style-name="ce127" table:formula="of:=+[.Y7]*[.$AB$16]" office:value-type="float" office:value="2152.5" calcext:value-type="float">
            <text:p>2,152.50</text:p>
          </table:table-cell>
          <table:table-cell table:style-name="ce139" table:number-columns-repeated="5"/>
          <table:table-cell table:number-columns-repeated="217"/>
        </table:table-row>
        <table:table-row table:style-name="ro9">
          <table:table-cell/>
          <table:table-cell table:style-name="ce79" table:number-columns-spanned="5" table:number-rows-spanned="1"/>
          <table:covered-table-cell table:number-columns-repeated="4" table:style-name="ce79"/>
          <table:table-cell table:style-name="ce88" office:value-type="float" office:value="294" calcext:value-type="float">
            <text:p>294</text:p>
          </table:table-cell>
          <table:table-cell table:style-name="ce94"/>
          <table:table-cell table:style-name="ce88" office:value-type="float" office:value="42" calcext:value-type="float">
            <text:p>42</text:p>
          </table:table-cell>
          <table:table-cell table:style-name="ce96"/>
          <table:table-cell table:style-name="ce99" table:formula="of:=+[.I7]+[.G7]+[.J7]" office:value-type="float" office:value="336" calcext:value-type="float">
            <text:p>336</text:p>
          </table:table-cell>
          <table:table-cell table:style-name="ce104" table:formula="of:=+[.K7]*0.8*0.35" office:value-type="float" office:value="94.08" calcext:value-type="float">
            <text:p>94</text:p>
          </table:table-cell>
          <table:table-cell table:style-name="ce108" table:formula="of:=+[.K7]*0.8*0.085" office:value-type="float" office:value="22.848" calcext:value-type="float">
            <text:p>22.85</text:p>
          </table:table-cell>
          <table:table-cell table:style-name="ce110"/>
          <table:table-cell table:number-columns-repeated="2"/>
          <table:table-cell table:style-name="ce122" office:value-type="string" calcext:value-type="string">
            <text:p>HUANCASANCOS</text:p>
          </table:table-cell>
          <table:table-cell table:style-name="ce127" office:value-type="float" office:value="9699" calcext:value-type="float">
            <text:p>9,699.00</text:p>
          </table:table-cell>
          <table:table-cell table:style-name="ce127" office:value-type="float" office:value="8790" calcext:value-type="float">
            <text:p>8,790.00</text:p>
          </table:table-cell>
          <table:table-cell table:style-name="ce127" office:value-type="float" office:value="12207" calcext:value-type="float">
            <text:p>12,207.00</text:p>
          </table:table-cell>
          <table:table-cell table:style-name="ce127" office:value-type="float" office:value="12106" calcext:value-type="float">
            <text:p>12,106.00</text:p>
          </table:table-cell>
          <table:table-cell table:style-name="ce127" office:value-type="float" office:value="14050" calcext:value-type="float">
            <text:p>14,050.00</text:p>
          </table:table-cell>
          <table:table-cell table:style-name="ce127" office:value-type="float" office:value="14400" calcext:value-type="float">
            <text:p>14,400.00</text:p>
          </table:table-cell>
          <table:table-cell table:style-name="ce127" office:value-type="float" office:value="15462" calcext:value-type="float">
            <text:p>15,462.00</text:p>
          </table:table-cell>
          <table:table-cell table:style-name="ce127" office:value-type="float" office:value="14350" calcext:value-type="float">
            <text:p>14,350.00</text:p>
          </table:table-cell>
          <table:table-cell/>
          <table:table-cell table:style-name="ce122" office:value-type="string" calcext:value-type="string">
            <text:p>HUANTA</text:p>
          </table:table-cell>
          <table:table-cell table:style-name="ce127" table:formula="of:=+[.R8]*[.$AB$17]" office:value-type="float" office:value="10092.87" calcext:value-type="float">
            <text:p>10,092.87</text:p>
          </table:table-cell>
          <table:table-cell table:style-name="ce127" table:formula="of:=+[.S8]*[.$AB$17]" office:value-type="float" office:value="6461.01" calcext:value-type="float">
            <text:p>6,461.01</text:p>
          </table:table-cell>
          <table:table-cell table:style-name="ce127" table:formula="of:=+[.T8]*[.$AB$17]" office:value-type="float" office:value="10003.86" calcext:value-type="float">
            <text:p>10,003.86</text:p>
          </table:table-cell>
          <table:table-cell table:style-name="ce127" table:formula="of:=+[.U8]*[.$AB$17]" office:value-type="float" office:value="10956.24" calcext:value-type="float">
            <text:p>10,956.24</text:p>
          </table:table-cell>
          <table:table-cell table:style-name="ce127" table:formula="of:=+[.V8]*[.$AB$17]" office:value-type="float" office:value="10609.2" calcext:value-type="float">
            <text:p>10,609.20</text:p>
          </table:table-cell>
          <table:table-cell table:style-name="ce127" table:formula="of:=+[.W8]*[.$AB$17]" office:value-type="float" office:value="11129.76" calcext:value-type="float">
            <text:p>11,129.76</text:p>
          </table:table-cell>
          <table:table-cell table:style-name="ce127" table:formula="of:=+[.X8]*[.$AB$17]" office:value-type="float" office:value="14201.82" calcext:value-type="float">
            <text:p>14,201.82</text:p>
          </table:table-cell>
          <table:table-cell table:style-name="ce127" table:formula="of:=+[.Y8]*[.$AB$17]" office:value-type="float" office:value="14408.28" calcext:value-type="float">
            <text:p>14,408.28</text:p>
          </table:table-cell>
          <table:table-cell table:style-name="ce139" table:number-columns-repeated="5"/>
          <table:table-cell table:number-columns-repeated="217"/>
        </table:table-row>
        <table:table-row table:style-name="ro8">
          <table:table-cell/>
          <table:table-cell table:style-name="ce80" office:value-type="string" calcext:value-type="string" table:number-columns-spanned="1" table:number-rows-spanned="4">
            <text:p>1º AÑO</text:p>
          </table:table-cell>
          <table:table-cell table:style-name="ce82" office:value-type="string" calcext:value-type="string">
            <text:p>I</text:p>
          </table:table-cell>
          <table:table-cell table:style-name="ce85" table:formula="of:=+[.G7]*[.G24]*(100%-[.G25])*[.G28]" office:value-type="float" office:value="429.828" calcext:value-type="float">
            <text:p>430</text:p>
          </table:table-cell>
          <table:table-cell table:style-name="ce85" table:formula="of:=+[.D8]/2" office:value-type="float" office:value="214.914" calcext:value-type="float">
            <text:p>215</text:p>
          </table:table-cell>
          <table:table-cell table:style-name="ce85" table:formula="of:=+[.E8]*(100%-14%)" office:value-type="float" office:value="184.82604" calcext:value-type="float">
            <text:p>185</text:p>
          </table:table-cell>
          <table:table-cell table:style-name="ce85" table:formula="of:=+[.G7]*(100%-[.$G$27])+[.F8]" office:value-type="float" office:value="470.00604" calcext:value-type="float">
            <text:p>470</text:p>
          </table:table-cell>
          <table:table-cell table:style-name="ce85" table:formula="of:=+[.D8]/2" office:value-type="float" office:value="214.914" calcext:value-type="float">
            <text:p>215</text:p>
          </table:table-cell>
          <table:table-cell table:style-name="ce85" table:formula="of:=[.G8]*[.I7]/[.G7]" office:value-type="float" office:value="67.14372" calcext:value-type="float">
            <text:p>67</text:p>
          </table:table-cell>
          <table:table-cell table:style-name="ce85" table:formula="of:=+[.H8]*(100%-[.$G$26])-([.I8]-[.I7])" office:value-type="float" office:value="181.17372" calcext:value-type="float">
            <text:p>181</text:p>
          </table:table-cell>
          <table:table-cell table:style-name="ce100" table:formula="of:=+[.I8]+[.G8]+[.J8]" office:value-type="float" office:value="718.32348" calcext:value-type="float">
            <text:p>718</text:p>
          </table:table-cell>
          <table:table-cell table:style-name="ce105" table:formula="of:=+[.K8]*0.8*0.35" office:value-type="float" office:value="201.1305744" calcext:value-type="float">
            <text:p>201</text:p>
          </table:table-cell>
          <table:table-cell table:style-name="ce109" table:formula="of:=+[.K8]*0.8*0.085" office:value-type="float" office:value="48.84599664" calcext:value-type="float">
            <text:p>48.85</text:p>
          </table:table-cell>
          <table:table-cell table:style-name="ce111" table:formula="of:=+[.J8]*0.8" office:value-type="float" office:value="144.938976" calcext:value-type="float">
            <text:p>144.94</text:p>
          </table:table-cell>
          <table:table-cell table:number-columns-repeated="2"/>
          <table:table-cell table:style-name="ce122" office:value-type="string" calcext:value-type="string">
            <text:p>HUANTA</text:p>
          </table:table-cell>
          <table:table-cell table:style-name="ce127" office:value-type="float" office:value="112143" calcext:value-type="float">
            <text:p>112,143.00</text:p>
          </table:table-cell>
          <table:table-cell table:style-name="ce127" office:value-type="float" office:value="71789" calcext:value-type="float">
            <text:p>71,789.00</text:p>
          </table:table-cell>
          <table:table-cell table:style-name="ce127" office:value-type="float" office:value="111154" calcext:value-type="float">
            <text:p>111,154.00</text:p>
          </table:table-cell>
          <table:table-cell table:style-name="ce127" office:value-type="float" office:value="121736" calcext:value-type="float">
            <text:p>121,736.00</text:p>
          </table:table-cell>
          <table:table-cell table:style-name="ce127" office:value-type="float" office:value="117880" calcext:value-type="float">
            <text:p>117,880.00</text:p>
          </table:table-cell>
          <table:table-cell table:style-name="ce127" office:value-type="float" office:value="123664" calcext:value-type="float">
            <text:p>123,664.00</text:p>
          </table:table-cell>
          <table:table-cell table:style-name="ce127" office:value-type="float" office:value="157798" calcext:value-type="float">
            <text:p>157,798.00</text:p>
          </table:table-cell>
          <table:table-cell table:style-name="ce127" office:value-type="float" office:value="160092" calcext:value-type="float">
            <text:p>160,092.00</text:p>
          </table:table-cell>
          <table:table-cell/>
          <table:table-cell table:style-name="ce122" office:value-type="string" calcext:value-type="string">
            <text:p>LA MAR</text:p>
          </table:table-cell>
          <table:table-cell table:style-name="ce127" table:formula="of:=+[.R9]*[.$AB$18]" office:value-type="float" office:value="5854.6176" calcext:value-type="float">
            <text:p>5,854.62</text:p>
          </table:table-cell>
          <table:table-cell table:style-name="ce127" table:formula="of:=+[.S9]*[.$AB$18]" office:value-type="float" office:value="4274.7744" calcext:value-type="float">
            <text:p>4,274.77</text:p>
          </table:table-cell>
          <table:table-cell table:style-name="ce127" table:formula="of:=+[.T9]*[.$AB$18]" office:value-type="float" office:value="4877.9328" calcext:value-type="float">
            <text:p>4,877.93</text:p>
          </table:table-cell>
          <table:table-cell table:style-name="ce127" table:formula="of:=+[.U9]*[.$AB$18]" office:value-type="float" office:value="4783.584" calcext:value-type="float">
            <text:p>4,783.58</text:p>
          </table:table-cell>
          <table:table-cell table:style-name="ce127" table:formula="of:=+[.V9]*[.$AB$18]" office:value-type="float" office:value="5723.328" calcext:value-type="float">
            <text:p>5,723.33</text:p>
          </table:table-cell>
          <table:table-cell table:style-name="ce127" table:formula="of:=+[.W9]*[.$AB$18]" office:value-type="float" office:value="6167.2416" calcext:value-type="float">
            <text:p>6,167.24</text:p>
          </table:table-cell>
          <table:table-cell table:style-name="ce127" table:formula="of:=+[.X9]*[.$AB$18]" office:value-type="float" office:value="5521.5264" calcext:value-type="float">
            <text:p>5,521.53</text:p>
          </table:table-cell>
          <table:table-cell table:style-name="ce127" table:formula="of:=+[.Y9]*[.$AB$18]" office:value-type="float" office:value="5592.0384" calcext:value-type="float">
            <text:p>5,592.04</text:p>
          </table:table-cell>
          <table:table-cell table:style-name="ce139" table:number-columns-repeated="5"/>
          <table:table-cell table:number-columns-repeated="217"/>
        </table:table-row>
        <table:table-row table:style-name="ro15">
          <table:table-cell/>
          <table:covered-table-cell table:style-name="ce80"/>
          <table:table-cell table:style-name="ce82" office:value-type="string" calcext:value-type="string">
            <text:p>II</text:p>
          </table:table-cell>
          <table:table-cell table:style-name="ce85" table:formula="of:=+[.G8]*85%*(100%-14%)*2" office:value-type="float" office:value="687.14883048" calcext:value-type="float">
            <text:p>687</text:p>
          </table:table-cell>
          <table:table-cell table:style-name="ce85" table:formula="of:=+[.D9]/2" office:value-type="float" office:value="343.57441524" calcext:value-type="float">
            <text:p>344</text:p>
          </table:table-cell>
          <table:table-cell table:style-name="ce85" table:formula="of:=+[.E9]*(100%-14%)" office:value-type="float" office:value="295.4739971064" calcext:value-type="float">
            <text:p>295</text:p>
          </table:table-cell>
          <table:table-cell table:style-name="ce85" table:formula="of:=+[.G8]*(100%-[.$G$27])+[.F9]" office:value-type="float" office:value="751.3798559064" calcext:value-type="float">
            <text:p>751</text:p>
          </table:table-cell>
          <table:table-cell table:style-name="ce85" table:formula="of:=+[.D9]/2" office:value-type="float" office:value="343.57441524" calcext:value-type="float">
            <text:p>344</text:p>
          </table:table-cell>
          <table:table-cell table:style-name="ce85" table:formula="of:=[.G9]*[.I7]/[.G7]" office:value-type="float" office:value="107.3399794152" calcext:value-type="float">
            <text:p>107</text:p>
          </table:table-cell>
          <table:table-cell table:style-name="ce85" table:formula="of:=+[.H9]*(100%-[.$G$26])-([.I9]-[.I8])" office:value-type="float" office:value="289.6351792152" calcext:value-type="float">
            <text:p>290</text:p>
          </table:table-cell>
          <table:table-cell table:style-name="ce100" table:formula="of:=+[.I9]+[.G9]+[.J9]" office:value-type="float" office:value="1148.3550145368" calcext:value-type="float">
            <text:p>1148</text:p>
          </table:table-cell>
          <table:table-cell table:style-name="ce105" table:formula="of:=+[.K9]*0.8*0.35" office:value-type="float" office:value="321.539404070304" calcext:value-type="float">
            <text:p>322</text:p>
          </table:table-cell>
          <table:table-cell table:style-name="ce109" table:formula="of:=+[.K9]*0.8*0.085" office:value-type="float" office:value="78.0881409885024" calcext:value-type="float">
            <text:p>78.09</text:p>
          </table:table-cell>
          <table:table-cell table:style-name="ce111" table:formula="of:=+[.J9]*0.8" office:value-type="float" office:value="231.70814337216" calcext:value-type="float">
            <text:p>231.71</text:p>
          </table:table-cell>
          <table:table-cell table:number-columns-repeated="2"/>
          <table:table-cell table:style-name="ce122" office:value-type="string" calcext:value-type="string">
            <text:p>LA MAR</text:p>
          </table:table-cell>
          <table:table-cell table:style-name="ce127" office:value-type="float" office:value="46912" calcext:value-type="float">
            <text:p>46,912.00</text:p>
          </table:table-cell>
          <table:table-cell table:style-name="ce127" office:value-type="float" office:value="34253" calcext:value-type="float">
            <text:p>34,253.00</text:p>
          </table:table-cell>
          <table:table-cell table:style-name="ce127" office:value-type="float" office:value="39086" calcext:value-type="float">
            <text:p>39,086.00</text:p>
          </table:table-cell>
          <table:table-cell table:style-name="ce127" office:value-type="float" office:value="38330" calcext:value-type="float">
            <text:p>38,330.00</text:p>
          </table:table-cell>
          <table:table-cell table:style-name="ce127" office:value-type="float" office:value="45860" calcext:value-type="float">
            <text:p>45,860.00</text:p>
          </table:table-cell>
          <table:table-cell table:style-name="ce127" office:value-type="float" office:value="49417" calcext:value-type="float">
            <text:p>49,417.00</text:p>
          </table:table-cell>
          <table:table-cell table:style-name="ce127" office:value-type="float" office:value="44243" calcext:value-type="float">
            <text:p>44,243.00</text:p>
          </table:table-cell>
          <table:table-cell table:style-name="ce127" office:value-type="float" office:value="44808" calcext:value-type="float">
            <text:p>44,808.00</text:p>
          </table:table-cell>
          <table:table-cell/>
          <table:table-cell table:style-name="ce122" office:value-type="string" calcext:value-type="string">
            <text:p>VILCASHUAMAN</text:p>
          </table:table-cell>
          <table:table-cell table:style-name="ce127" table:formula="of:=+[.R15]*[.$AB$19]" office:value-type="float" office:value="1726.75" calcext:value-type="float">
            <text:p>1,726.75</text:p>
          </table:table-cell>
          <table:table-cell table:style-name="ce127" table:formula="of:=+[.S15]*[.$AB$19]" office:value-type="float" office:value="2846.625" calcext:value-type="float">
            <text:p>2,846.63</text:p>
          </table:table-cell>
          <table:table-cell table:style-name="ce127" table:formula="of:=+[.T15]*[.$AB$19]" office:value-type="float" office:value="2144.875" calcext:value-type="float">
            <text:p>2,144.88</text:p>
          </table:table-cell>
          <table:table-cell table:style-name="ce127" table:formula="of:=+[.U15]*[.$AB$19]" office:value-type="float" office:value="2291.25" calcext:value-type="float">
            <text:p>2,291.25</text:p>
          </table:table-cell>
          <table:table-cell table:style-name="ce127" table:formula="of:=+[.V15]*[.$AB$19]" office:value-type="float" office:value="2337.75" calcext:value-type="float">
            <text:p>2,337.75</text:p>
          </table:table-cell>
          <table:table-cell table:style-name="ce127" table:formula="of:=+[.W15]*[.$AB$19]" office:value-type="float" office:value="2441.25" calcext:value-type="float">
            <text:p>2,441.25</text:p>
          </table:table-cell>
          <table:table-cell table:style-name="ce127" table:formula="of:=+[.X15]*[.$AB$19]" office:value-type="float" office:value="2355.75" calcext:value-type="float">
            <text:p>2,355.75</text:p>
          </table:table-cell>
          <table:table-cell table:style-name="ce127" table:formula="of:=+[.Y15]*[.$AB$19]" office:value-type="float" office:value="2422.75" calcext:value-type="float">
            <text:p>2,422.75</text:p>
          </table:table-cell>
          <table:table-cell table:style-name="ce139" table:number-columns-repeated="5"/>
          <table:table-cell table:number-columns-repeated="217"/>
        </table:table-row>
        <table:table-row table:style-name="ro15">
          <table:table-cell/>
          <table:covered-table-cell table:style-name="ce80"/>
          <table:table-cell table:style-name="ce82" office:value-type="string" calcext:value-type="string">
            <text:p>III</text:p>
          </table:table-cell>
          <table:table-cell table:style-name="ce85" table:formula="of:=+[.G9]*85%*(100%-14%)*2" office:value-type="float" office:value="1098.51734933516" calcext:value-type="float">
            <text:p>1099</text:p>
          </table:table-cell>
          <table:table-cell table:style-name="ce85" table:formula="of:=+[.D10]/2" office:value-type="float" office:value="549.258674667578" calcext:value-type="float">
            <text:p>549</text:p>
          </table:table-cell>
          <table:table-cell table:style-name="ce85" table:formula="of:=+[.E10]*(100%-14%)" office:value-type="float" office:value="472.362460214117" calcext:value-type="float">
            <text:p>472</text:p>
          </table:table-cell>
          <table:table-cell table:style-name="ce85" table:formula="of:=+[.G9]*(100%-[.$G$27])+[.F10]-((([.G9]*(100%-[.$G$27])+[.F10]))-[.$G$31])" office:value-type="float" office:value="1100" calcext:value-type="float">
            <text:p>1100</text:p>
          </table:table-cell>
          <table:table-cell table:style-name="ce85" table:formula="of:=+[.D10]/2" office:value-type="float" office:value="549.258674667578" calcext:value-type="float">
            <text:p>549</text:p>
          </table:table-cell>
          <table:table-cell table:style-name="ce85" table:formula="of:=[.G10]*[.I7]/[.G7]" office:value-type="float" office:value="157.142857142857" calcext:value-type="float">
            <text:p>157</text:p>
          </table:table-cell>
          <table:table-cell table:style-name="ce85" table:formula="of:=+[.H10]*(100%-[.$G$26])-([.I10]-[.I9])" office:value-type="float" office:value="477.485449953218" calcext:value-type="float">
            <text:p>477</text:p>
          </table:table-cell>
          <table:table-cell table:style-name="ce100" table:formula="of:=+[.I10]+[.G10]+[.J10]" office:value-type="float" office:value="1734.62830709608" calcext:value-type="float">
            <text:p>1735</text:p>
          </table:table-cell>
          <table:table-cell table:style-name="ce105" table:formula="of:=+[.K10]*0.8*0.35" office:value-type="float" office:value="485.695925986901" calcext:value-type="float">
            <text:p>486</text:p>
          </table:table-cell>
          <table:table-cell table:style-name="ce109" table:formula="of:=+[.K10]*0.8*0.085" office:value-type="float" office:value="117.954724882533" calcext:value-type="float">
            <text:p>117.95</text:p>
          </table:table-cell>
          <table:table-cell table:style-name="ce111" table:formula="of:=+[.J10]*0.8" office:value-type="float" office:value="381.988359962575" calcext:value-type="float">
            <text:p>381.99</text:p>
          </table:table-cell>
          <table:table-cell table:number-columns-repeated="2"/>
          <table:table-cell table:style-name="ce122" office:value-type="string" calcext:value-type="string">
            <text:p>LUCANAS</text:p>
          </table:table-cell>
          <table:table-cell table:style-name="ce127" office:value-type="float" office:value="22123" calcext:value-type="float">
            <text:p>22,123.00</text:p>
          </table:table-cell>
          <table:table-cell table:style-name="ce127" office:value-type="float" office:value="21418" calcext:value-type="float">
            <text:p>21,418.00</text:p>
          </table:table-cell>
          <table:table-cell table:style-name="ce127" office:value-type="float" office:value="24203" calcext:value-type="float">
            <text:p>24,203.00</text:p>
          </table:table-cell>
          <table:table-cell table:style-name="ce127" office:value-type="float" office:value="23928" calcext:value-type="float">
            <text:p>23,928.00</text:p>
          </table:table-cell>
          <table:table-cell table:style-name="ce127" office:value-type="float" office:value="25544" calcext:value-type="float">
            <text:p>25,544.00</text:p>
          </table:table-cell>
          <table:table-cell table:style-name="ce127" office:value-type="float" office:value="26630" calcext:value-type="float">
            <text:p>26,630.00</text:p>
          </table:table-cell>
          <table:table-cell table:style-name="ce127" office:value-type="float" office:value="23576" calcext:value-type="float">
            <text:p>23,576.00</text:p>
          </table:table-cell>
          <table:table-cell table:style-name="ce127" office:value-type="float" office:value="22771" calcext:value-type="float">
            <text:p>22,771.00</text:p>
          </table:table-cell>
          <table:table-cell/>
          <table:table-cell table:style-name="ce136" office:value-type="string" calcext:value-type="string">
            <text:p>TOTAL</text:p>
          </table:table-cell>
          <table:table-cell table:style-name="ce126" table:formula="of:=SUM([.AB4:.AB9])" office:value-type="float" office:value="118698.1976" calcext:value-type="float">
            <text:p>118,698.20</text:p>
          </table:table-cell>
          <table:table-cell table:style-name="ce126" table:formula="of:=SUM([.AC4:.AC9])" office:value-type="float" office:value="95099.0894" calcext:value-type="float">
            <text:p>95,099.09</text:p>
          </table:table-cell>
          <table:table-cell table:style-name="ce126" table:formula="of:=SUM([.AD4:.AD9])" office:value-type="float" office:value="106161.6478" calcext:value-type="float">
            <text:p>106,161.65</text:p>
          </table:table-cell>
          <table:table-cell table:style-name="ce126" table:formula="of:=SUM([.AE4:.AE9])" office:value-type="float" office:value="113087.464" calcext:value-type="float">
            <text:p>113,087.46</text:p>
          </table:table-cell>
          <table:table-cell table:style-name="ce126" table:formula="of:=SUM([.AF4:.AF9])" office:value-type="float" office:value="132222.158" calcext:value-type="float">
            <text:p>132,222.16</text:p>
          </table:table-cell>
          <table:table-cell table:style-name="ce126" table:formula="of:=SUM([.AG4:.AG9])" office:value-type="float" office:value="135329.7516" calcext:value-type="float">
            <text:p>135,329.75</text:p>
          </table:table-cell>
          <table:table-cell table:style-name="ce126" table:formula="of:=SUM([.AH4:.AH9])" office:value-type="float" office:value="130082.6264" calcext:value-type="float">
            <text:p>130,082.63</text:p>
          </table:table-cell>
          <table:table-cell table:style-name="ce126" table:formula="of:=SUM([.AI4:.AI9])" office:value-type="float" office:value="133746.4084" calcext:value-type="float">
            <text:p>133,746.41</text:p>
          </table:table-cell>
          <table:table-cell table:style-name="ce139" table:number-columns-repeated="5"/>
          <table:table-cell table:number-columns-repeated="217"/>
        </table:table-row>
        <table:table-row table:style-name="ro15">
          <table:table-cell/>
          <table:covered-table-cell table:style-name="ce80"/>
          <table:table-cell table:style-name="ce82" office:value-type="string" calcext:value-type="string">
            <text:p>IV</text:p>
          </table:table-cell>
          <table:table-cell table:style-name="ce85" table:formula="of:=+[.G10]*85%*(100%-14%)*2" office:value-type="float" office:value="1608.2" calcext:value-type="float">
            <text:p>1608</text:p>
          </table:table-cell>
          <table:table-cell table:style-name="ce85" table:formula="of:=+[.D11]/2" office:value-type="float" office:value="804.1" calcext:value-type="float">
            <text:p>804</text:p>
          </table:table-cell>
          <table:table-cell table:style-name="ce85" table:formula="of:=+[.E11]*(100%-14%)" office:value-type="float" office:value="691.526" calcext:value-type="float">
            <text:p>692</text:p>
          </table:table-cell>
          <table:table-cell table:style-name="ce89" table:formula="of:=+[.G10]*(100%-[.$G$27])+[.F11]-((([.G10]*(100%-[.$G$27])+[.F11]))-[.$G$31])" office:value-type="float" office:value="1100" calcext:value-type="float">
            <text:p>1100</text:p>
          </table:table-cell>
          <table:table-cell table:style-name="ce85" table:formula="of:=+[.D11]/2" office:value-type="float" office:value="804.1" calcext:value-type="float">
            <text:p>804</text:p>
          </table:table-cell>
          <table:table-cell table:style-name="ce89" table:formula="of:=[.G11]*[.I7]/[.G7]" office:value-type="float" office:value="157.142857142857" calcext:value-type="float">
            <text:p>157</text:p>
          </table:table-cell>
          <table:table-cell table:style-name="ce85" table:formula="of:=+[.H11]*(100%-[.$G$26])-([.I11]-[.I10])" office:value-type="float" office:value="771.936" calcext:value-type="float">
            <text:p>772</text:p>
          </table:table-cell>
          <table:table-cell table:style-name="ce100" table:formula="of:=+[.I11]+[.G11]+[.J11]" office:value-type="float" office:value="2029.07885714286" calcext:value-type="float">
            <text:p>2029</text:p>
          </table:table-cell>
          <table:table-cell table:style-name="ce105" table:formula="of:=+[.K11]*0.8*0.35" office:value-type="float" office:value="568.14208" calcext:value-type="float">
            <text:p>568</text:p>
          </table:table-cell>
          <table:table-cell table:style-name="ce109" table:formula="of:=+[.K11]*0.8*0.085" office:value-type="float" office:value="137.977362285714" calcext:value-type="float">
            <text:p>137.98</text:p>
          </table:table-cell>
          <table:table-cell table:style-name="ce111" table:formula="of:=+[.J11]*0.8" office:value-type="float" office:value="617.5488" calcext:value-type="float">
            <text:p>617.55</text:p>
          </table:table-cell>
          <table:table-cell table:style-name="ce112" table:formula="of:=SUM([.J8:.J11])" office:value-type="float" office:value="1720.23034916842" calcext:value-type="float">
            <text:p>1720</text:p>
          </table:table-cell>
          <table:table-cell table:style-name="ce107"/>
          <table:table-cell table:style-name="ce122" office:value-type="string" calcext:value-type="string">
            <text:p>PARINACOCHAS</text:p>
          </table:table-cell>
          <table:table-cell table:style-name="ce127" office:value-type="float" office:value="24717" calcext:value-type="float">
            <text:p>24,717.00</text:p>
          </table:table-cell>
          <table:table-cell table:style-name="ce127" office:value-type="float" office:value="23415" calcext:value-type="float">
            <text:p>23,415.00</text:p>
          </table:table-cell>
          <table:table-cell table:style-name="ce127" office:value-type="float" office:value="24397" calcext:value-type="float">
            <text:p>24,397.00</text:p>
          </table:table-cell>
          <table:table-cell table:style-name="ce127" office:value-type="float" office:value="24067" calcext:value-type="float">
            <text:p>24,067.00</text:p>
          </table:table-cell>
          <table:table-cell table:style-name="ce127" office:value-type="float" office:value="22654" calcext:value-type="float">
            <text:p>22,654.00</text:p>
          </table:table-cell>
          <table:table-cell table:style-name="ce127" office:value-type="float" office:value="22388" calcext:value-type="float">
            <text:p>22,388.00</text:p>
          </table:table-cell>
          <table:table-cell table:style-name="ce127" office:value-type="float" office:value="23015" calcext:value-type="float">
            <text:p>23,015.00</text:p>
          </table:table-cell>
          <table:table-cell table:style-name="ce127" office:value-type="float" office:value="24664" calcext:value-type="float">
            <text:p>24,664.00</text:p>
          </table:table-cell>
          <table:table-cell table:number-columns-repeated="10"/>
          <table:table-cell table:style-name="ce139" table:number-columns-repeated="5"/>
          <table:table-cell table:number-columns-repeated="217"/>
        </table:table-row>
        <table:table-row table:style-name="ro8">
          <table:table-cell/>
          <table:table-cell table:style-name="ce80" office:value-type="string" calcext:value-type="string" table:number-columns-spanned="1" table:number-rows-spanned="4">
            <text:p>2º AÑO</text:p>
          </table:table-cell>
          <table:table-cell table:style-name="ce82" office:value-type="string" calcext:value-type="string">
            <text:p>I</text:p>
          </table:table-cell>
          <table:table-cell table:style-name="ce85" table:formula="of:=+[.G11]*85%*(100%-14%)*2" office:value-type="float" office:value="1608.2" calcext:value-type="float">
            <text:p>1608</text:p>
          </table:table-cell>
          <table:table-cell table:style-name="ce85" table:formula="of:=+[.D12]/2" office:value-type="float" office:value="804.1" calcext:value-type="float">
            <text:p>804</text:p>
          </table:table-cell>
          <table:table-cell table:style-name="ce85" table:formula="of:=+[.E12]*(100%-14%)" office:value-type="float" office:value="691.526" calcext:value-type="float">
            <text:p>692</text:p>
          </table:table-cell>
          <table:table-cell table:style-name="ce85" table:formula="of:=+[.G11]*(100%-[.$G$27])+[.F12]-((([.G11]*(100%-[.$G$27])+[.F12]))-[.$G$31])" office:value-type="float" office:value="1100" calcext:value-type="float">
            <text:p>1100</text:p>
          </table:table-cell>
          <table:table-cell table:style-name="ce85" table:formula="of:=+[.D12]/2" office:value-type="float" office:value="804.1" calcext:value-type="float">
            <text:p>804</text:p>
          </table:table-cell>
          <table:table-cell table:style-name="ce85" table:formula="of:=[.G12]*[.I7]/[.G7]" office:value-type="float" office:value="157.142857142857" calcext:value-type="float">
            <text:p>157</text:p>
          </table:table-cell>
          <table:table-cell table:style-name="ce85" table:formula="of:=+[.H12]*(100%-[.$G$26])-([.I12]-[.I11])+((([.G11]*(100%-[.$G$27])+[.F12])-[.$G$31]))" office:value-type="float" office:value="1430.462" calcext:value-type="float">
            <text:p>1430</text:p>
          </table:table-cell>
          <table:table-cell table:style-name="ce100" table:formula="of:=+[.I12]+[.G12]+[.J12]" office:value-type="float" office:value="2687.60485714286" calcext:value-type="float">
            <text:p>2688</text:p>
          </table:table-cell>
          <table:table-cell table:style-name="ce105" table:formula="of:=+[.K12]*0.8*0.35" office:value-type="float" office:value="752.52936" calcext:value-type="float">
            <text:p>753</text:p>
          </table:table-cell>
          <table:table-cell table:style-name="ce109" table:formula="of:=+[.K12]*0.8*0.085" office:value-type="float" office:value="182.757130285714" calcext:value-type="float">
            <text:p>182.76</text:p>
          </table:table-cell>
          <table:table-cell table:style-name="ce111" table:formula="of:=+[.J12]*0.8" office:value-type="float" office:value="1144.3696" calcext:value-type="float">
            <text:p>1144.37</text:p>
          </table:table-cell>
          <table:table-cell table:style-name="ce113"/>
          <table:table-cell/>
          <table:table-cell table:style-name="ce122" office:value-type="string" calcext:value-type="string">
            <text:p>PAUCAR DEL SARA SARA</text:p>
          </table:table-cell>
          <table:table-cell table:style-name="ce127" office:value-type="float" office:value="45156" calcext:value-type="float">
            <text:p>45,156.00</text:p>
          </table:table-cell>
          <table:table-cell table:style-name="ce127" office:value-type="float" office:value="24055" calcext:value-type="float">
            <text:p>24,055.00</text:p>
          </table:table-cell>
          <table:table-cell table:style-name="ce127" office:value-type="float" office:value="32136" calcext:value-type="float">
            <text:p>32,136.00</text:p>
          </table:table-cell>
          <table:table-cell table:style-name="ce127" office:value-type="float" office:value="30286" calcext:value-type="float">
            <text:p>30,286.00</text:p>
          </table:table-cell>
          <table:table-cell table:style-name="ce127" office:value-type="float" office:value="30465" calcext:value-type="float">
            <text:p>30,465.00</text:p>
          </table:table-cell>
          <table:table-cell table:style-name="ce127" office:value-type="float" office:value="29863" calcext:value-type="float">
            <text:p>29,863.00</text:p>
          </table:table-cell>
          <table:table-cell table:style-name="ce127" office:value-type="float" office:value="30155" calcext:value-type="float">
            <text:p>30,155.00</text:p>
          </table:table-cell>
          <table:table-cell table:style-name="ce127" office:value-type="float" office:value="28452" calcext:value-type="float">
            <text:p>28,452.00</text:p>
          </table:table-cell>
          <table:table-cell/>
          <table:table-cell table:style-name="ce123" office:value-type="string" calcext:value-type="string" table:number-columns-spanned="3" table:number-rows-spanned="1">
            <text:p>Fuente: DIA-DRA Ayacucho 2019</text:p>
          </table:table-cell>
          <table:covered-table-cell table:number-columns-repeated="2" table:style-name="ce123"/>
          <table:table-cell table:style-name="ce140" table:number-columns-repeated="6"/>
          <table:table-cell table:style-name="ce139" table:number-columns-repeated="5"/>
          <table:table-cell table:number-columns-repeated="217"/>
        </table:table-row>
        <table:table-row table:style-name="ro15">
          <table:table-cell/>
          <table:covered-table-cell table:style-name="ce80"/>
          <table:table-cell table:style-name="ce82" office:value-type="string" calcext:value-type="string">
            <text:p>II</text:p>
          </table:table-cell>
          <table:table-cell table:style-name="ce85" table:formula="of:=+[.G12]*85%*(100%-14%)*2" office:value-type="float" office:value="1608.2" calcext:value-type="float">
            <text:p>1608</text:p>
          </table:table-cell>
          <table:table-cell table:style-name="ce85" table:formula="of:=+[.D13]/2" office:value-type="float" office:value="804.1" calcext:value-type="float">
            <text:p>804</text:p>
          </table:table-cell>
          <table:table-cell table:style-name="ce85" table:formula="of:=+[.E13]*(100%-14%)" office:value-type="float" office:value="691.526" calcext:value-type="float">
            <text:p>692</text:p>
          </table:table-cell>
          <table:table-cell table:style-name="ce85" table:formula="of:=+[.G12]*(100%-[.$G$27])+[.F13]-((([.G12]*(100%-[.$G$27])+[.F13]))-[.$G$31])" office:value-type="float" office:value="1100" calcext:value-type="float">
            <text:p>1100</text:p>
          </table:table-cell>
          <table:table-cell table:style-name="ce85" table:formula="of:=+[.D13]/2" office:value-type="float" office:value="804.1" calcext:value-type="float">
            <text:p>804</text:p>
          </table:table-cell>
          <table:table-cell table:style-name="ce85" table:formula="of:=[.G13]*[.I7]/[.G7]" office:value-type="float" office:value="157.142857142857" calcext:value-type="float">
            <text:p>157</text:p>
          </table:table-cell>
          <table:table-cell table:style-name="ce85" table:formula="of:=+[.H13]*(100%-[.$G$26])-([.I13]-[.I12])+((([.G12]*(100%-[.$G$27])+[.F13])-[.$G$31]))" office:value-type="float" office:value="1430.462" calcext:value-type="float">
            <text:p>1430</text:p>
          </table:table-cell>
          <table:table-cell table:style-name="ce100" table:formula="of:=+[.I13]+[.G13]+[.J13]" office:value-type="float" office:value="2687.60485714286" calcext:value-type="float">
            <text:p>2688</text:p>
          </table:table-cell>
          <table:table-cell table:style-name="ce105" table:formula="of:=+[.K13]*0.8*0.35" office:value-type="float" office:value="752.52936" calcext:value-type="float">
            <text:p>753</text:p>
          </table:table-cell>
          <table:table-cell table:style-name="ce109" table:formula="of:=+[.K13]*0.8*0.085" office:value-type="float" office:value="182.757130285714" calcext:value-type="float">
            <text:p>182.76</text:p>
          </table:table-cell>
          <table:table-cell table:style-name="ce111" table:formula="of:=+[.J13]*0.8" office:value-type="float" office:value="1144.3696" calcext:value-type="float">
            <text:p>1144.37</text:p>
          </table:table-cell>
          <table:table-cell table:style-name="ce113"/>
          <table:table-cell/>
          <table:table-cell table:style-name="ce122" office:value-type="string" calcext:value-type="string">
            <text:p>SUCRE</text:p>
          </table:table-cell>
          <table:table-cell table:style-name="ce127" office:value-type="float" office:value="5105" calcext:value-type="float">
            <text:p>5,105.00</text:p>
          </table:table-cell>
          <table:table-cell table:style-name="ce127" office:value-type="float" office:value="6093" calcext:value-type="float">
            <text:p>6,093.00</text:p>
          </table:table-cell>
          <table:table-cell table:style-name="ce127" office:value-type="float" office:value="7164" calcext:value-type="float">
            <text:p>7,164.00</text:p>
          </table:table-cell>
          <table:table-cell table:style-name="ce127" office:value-type="float" office:value="6884" calcext:value-type="float">
            <text:p>6,884.00</text:p>
          </table:table-cell>
          <table:table-cell table:style-name="ce127" office:value-type="float" office:value="5556" calcext:value-type="float">
            <text:p>5,556.00</text:p>
          </table:table-cell>
          <table:table-cell table:style-name="ce127" office:value-type="float" office:value="5912" calcext:value-type="float">
            <text:p>5,912.00</text:p>
          </table:table-cell>
          <table:table-cell table:style-name="ce127" office:value-type="float" office:value="6807" calcext:value-type="float">
            <text:p>6,807.00</text:p>
          </table:table-cell>
          <table:table-cell table:style-name="ce127" office:value-type="float" office:value="7155" calcext:value-type="float">
            <text:p>7,155.00</text:p>
          </table:table-cell>
          <table:table-cell/>
          <table:table-cell table:style-name="ce137"/>
          <table:table-cell table:style-name="ce140" table:number-columns-repeated="8"/>
          <table:table-cell table:style-name="ce139" table:number-columns-repeated="5"/>
          <table:table-cell table:number-columns-repeated="217"/>
        </table:table-row>
        <table:table-row table:style-name="ro15">
          <table:table-cell/>
          <table:covered-table-cell table:style-name="ce80"/>
          <table:table-cell table:style-name="ce82" office:value-type="string" calcext:value-type="string">
            <text:p>III</text:p>
          </table:table-cell>
          <table:table-cell table:style-name="ce85" table:formula="of:=+[.G13]*85%*(100%-14%)*2" office:value-type="float" office:value="1608.2" calcext:value-type="float">
            <text:p>1608</text:p>
          </table:table-cell>
          <table:table-cell table:style-name="ce85" table:formula="of:=+[.D14]/2" office:value-type="float" office:value="804.1" calcext:value-type="float">
            <text:p>804</text:p>
          </table:table-cell>
          <table:table-cell table:style-name="ce85" table:formula="of:=+[.E14]*(100%-14%)" office:value-type="float" office:value="691.526" calcext:value-type="float">
            <text:p>692</text:p>
          </table:table-cell>
          <table:table-cell table:style-name="ce85" table:formula="of:=+[.G13]*(100%-[.$G$27])+[.F14]-((([.G13]*(100%-[.$G$27])+[.F14])-[.$G$31]))" office:value-type="float" office:value="1100" calcext:value-type="float">
            <text:p>1100</text:p>
          </table:table-cell>
          <table:table-cell table:style-name="ce85" table:formula="of:=+[.D14]/2" office:value-type="float" office:value="804.1" calcext:value-type="float">
            <text:p>804</text:p>
          </table:table-cell>
          <table:table-cell table:style-name="ce85" table:formula="of:=[.G14]*[.I7]/[.G7]" office:value-type="float" office:value="157.142857142857" calcext:value-type="float">
            <text:p>157</text:p>
          </table:table-cell>
          <table:table-cell table:style-name="ce85" table:formula="of:=+[.H14]*(100%-[.$G$26])-([.I14]-[.I13])+((([.G13]*(100%-[.$G$27])+[.F14])-[.$G$31]))" office:value-type="float" office:value="1430.462" calcext:value-type="float">
            <text:p>1430</text:p>
          </table:table-cell>
          <table:table-cell table:style-name="ce100" table:formula="of:=+[.I14]+[.G14]+[.J14]" office:value-type="float" office:value="2687.60485714286" calcext:value-type="float">
            <text:p>2688</text:p>
          </table:table-cell>
          <table:table-cell table:style-name="ce105" table:formula="of:=+[.K14]*0.8*0.35" office:value-type="float" office:value="752.52936" calcext:value-type="float">
            <text:p>753</text:p>
          </table:table-cell>
          <table:table-cell table:style-name="ce109" table:formula="of:=+[.K14]*0.8*0.085" office:value-type="float" office:value="182.757130285714" calcext:value-type="float">
            <text:p>182.76</text:p>
          </table:table-cell>
          <table:table-cell table:style-name="ce111" table:formula="of:=+[.J14]*0.8" office:value-type="float" office:value="1144.3696" calcext:value-type="float">
            <text:p>1144.37</text:p>
          </table:table-cell>
          <table:table-cell table:style-name="ce113"/>
          <table:table-cell/>
          <table:table-cell table:style-name="ce122" office:value-type="string" calcext:value-type="string">
            <text:p>VICTOR FAJARDO</text:p>
          </table:table-cell>
          <table:table-cell table:style-name="ce127" office:value-type="float" office:value="25045" calcext:value-type="float">
            <text:p>25,045.00</text:p>
          </table:table-cell>
          <table:table-cell table:style-name="ce127" office:value-type="float" office:value="24284" calcext:value-type="float">
            <text:p>24,284.00</text:p>
          </table:table-cell>
          <table:table-cell table:style-name="ce127" office:value-type="float" office:value="22041" calcext:value-type="float">
            <text:p>22,041.00</text:p>
          </table:table-cell>
          <table:table-cell table:style-name="ce127" office:value-type="float" office:value="18050" calcext:value-type="float">
            <text:p>18,050.00</text:p>
          </table:table-cell>
          <table:table-cell table:style-name="ce127" office:value-type="float" office:value="21848" calcext:value-type="float">
            <text:p>21,848.00</text:p>
          </table:table-cell>
          <table:table-cell table:style-name="ce127" office:value-type="float" office:value="22714" calcext:value-type="float">
            <text:p>22,714.00</text:p>
          </table:table-cell>
          <table:table-cell table:style-name="ce127" office:value-type="float" office:value="24332" calcext:value-type="float">
            <text:p>24,332.00</text:p>
          </table:table-cell>
          <table:table-cell table:style-name="ce127" office:value-type="float" office:value="25134" calcext:value-type="float">
            <text:p>25,134.00</text:p>
          </table:table-cell>
          <table:table-cell/>
          <table:table-cell office:value-type="string" calcext:value-type="string">
            <text:p>Huamanga</text:p>
          </table:table-cell>
          <table:table-cell table:style-name="ce141" office:value-type="percentage" office:value="0.67" calcext:value-type="percentage">
            <text:p>67.00 %</text:p>
          </table:table-cell>
          <table:table-cell table:style-name="ce140" table:number-columns-repeated="7"/>
          <table:table-cell table:style-name="ce139" table:number-columns-repeated="5"/>
          <table:table-cell table:number-columns-repeated="217"/>
        </table:table-row>
        <table:table-row table:style-name="ro15">
          <table:table-cell/>
          <table:covered-table-cell table:style-name="ce80"/>
          <table:table-cell table:style-name="ce82" office:value-type="string" calcext:value-type="string">
            <text:p>IV</text:p>
          </table:table-cell>
          <table:table-cell table:style-name="ce85" table:formula="of:=+[.G14]*85%*(100%-14%)*2" office:value-type="float" office:value="1608.2" calcext:value-type="float">
            <text:p>1608</text:p>
          </table:table-cell>
          <table:table-cell table:style-name="ce85" table:formula="of:=+[.D15]/2" office:value-type="float" office:value="804.1" calcext:value-type="float">
            <text:p>804</text:p>
          </table:table-cell>
          <table:table-cell table:style-name="ce85" table:formula="of:=+[.E15]*(100%-14%)" office:value-type="float" office:value="691.526" calcext:value-type="float">
            <text:p>692</text:p>
          </table:table-cell>
          <table:table-cell table:style-name="ce85" table:formula="of:=+[.G14]*(100%-[.$G$27])+[.F15]-((([.G14]*(100%-[.$G$27])+[.F15])-[.$G$31]))" office:value-type="float" office:value="1100" calcext:value-type="float">
            <text:p>1100</text:p>
          </table:table-cell>
          <table:table-cell table:style-name="ce85" table:formula="of:=+[.D15]/2" office:value-type="float" office:value="804.1" calcext:value-type="float">
            <text:p>804</text:p>
          </table:table-cell>
          <table:table-cell table:style-name="ce85" table:formula="of:=[.G15]*[.I7]/[.G7]" office:value-type="float" office:value="157.142857142857" calcext:value-type="float">
            <text:p>157</text:p>
          </table:table-cell>
          <table:table-cell table:style-name="ce85" table:formula="of:=+[.H15]*(100%-[.$G$26])-([.I15]-[.I14])+((([.G14]*(100%-[.$G$27])+[.F15])-[.$G$31]))" office:value-type="float" office:value="1430.462" calcext:value-type="float">
            <text:p>1430</text:p>
          </table:table-cell>
          <table:table-cell table:style-name="ce100" table:formula="of:=+[.I15]+[.G15]+[.J15]" office:value-type="float" office:value="2687.60485714286" calcext:value-type="float">
            <text:p>2688</text:p>
          </table:table-cell>
          <table:table-cell table:style-name="ce105" table:formula="of:=+[.K15]*0.8*0.35" office:value-type="float" office:value="752.52936" calcext:value-type="float">
            <text:p>753</text:p>
          </table:table-cell>
          <table:table-cell table:style-name="ce109" table:formula="of:=+[.K15]*0.8*0.085" office:value-type="float" office:value="182.757130285714" calcext:value-type="float">
            <text:p>182.76</text:p>
          </table:table-cell>
          <table:table-cell table:style-name="ce111" table:formula="of:=+[.J15]*0.8" office:value-type="float" office:value="1144.3696" calcext:value-type="float">
            <text:p>1144.37</text:p>
          </table:table-cell>
          <table:table-cell table:style-name="ce112" table:formula="of:=SUM([.J12:.J15])" office:value-type="float" office:value="5721.848" calcext:value-type="float">
            <text:p>5722</text:p>
          </table:table-cell>
          <table:table-cell/>
          <table:table-cell table:style-name="ce122" office:value-type="string" calcext:value-type="string">
            <text:p>VILCASHUAMAN</text:p>
          </table:table-cell>
          <table:table-cell table:style-name="ce127" office:value-type="float" office:value="13814" calcext:value-type="float">
            <text:p>13,814.00</text:p>
          </table:table-cell>
          <table:table-cell table:style-name="ce127" office:value-type="float" office:value="22773" calcext:value-type="float">
            <text:p>22,773.00</text:p>
          </table:table-cell>
          <table:table-cell table:style-name="ce127" office:value-type="float" office:value="17159" calcext:value-type="float">
            <text:p>17,159.00</text:p>
          </table:table-cell>
          <table:table-cell table:style-name="ce127" office:value-type="float" office:value="18330" calcext:value-type="float">
            <text:p>18,330.00</text:p>
          </table:table-cell>
          <table:table-cell table:style-name="ce127" office:value-type="float" office:value="18702" calcext:value-type="float">
            <text:p>18,702.00</text:p>
          </table:table-cell>
          <table:table-cell table:style-name="ce127" office:value-type="float" office:value="19530" calcext:value-type="float">
            <text:p>19,530.00</text:p>
          </table:table-cell>
          <table:table-cell table:style-name="ce127" office:value-type="float" office:value="18846" calcext:value-type="float">
            <text:p>18,846.00</text:p>
          </table:table-cell>
          <table:table-cell table:style-name="ce127" office:value-type="float" office:value="19382" calcext:value-type="float">
            <text:p>19,382.00</text:p>
          </table:table-cell>
          <table:table-cell/>
          <table:table-cell office:value-type="string" calcext:value-type="string">
            <text:p>Cangallo</text:p>
          </table:table-cell>
          <table:table-cell table:style-name="ce141" office:value-type="percentage" office:value="0.75" calcext:value-type="percentage">
            <text:p>75.00 %</text:p>
          </table:table-cell>
          <table:table-cell table:number-columns-repeated="7"/>
          <table:table-cell table:style-name="ce139" table:number-columns-repeated="5"/>
          <table:table-cell table:number-columns-repeated="217"/>
        </table:table-row>
        <table:table-row table:style-name="ro9">
          <table:table-cell/>
          <table:table-cell table:style-name="ce80" office:value-type="string" calcext:value-type="string" table:number-columns-spanned="1" table:number-rows-spanned="4">
            <text:p>3º AÑO</text:p>
          </table:table-cell>
          <table:table-cell table:style-name="ce82" office:value-type="string" calcext:value-type="string">
            <text:p>I</text:p>
          </table:table-cell>
          <table:table-cell table:style-name="ce85" table:formula="of:=+[.G15]*85%*(100%-14%)*2" office:value-type="float" office:value="1608.2" calcext:value-type="float">
            <text:p>1608</text:p>
          </table:table-cell>
          <table:table-cell table:style-name="ce85" table:formula="of:=+[.D16]/2" office:value-type="float" office:value="804.1" calcext:value-type="float">
            <text:p>804</text:p>
          </table:table-cell>
          <table:table-cell table:style-name="ce85" table:formula="of:=+[.E16]*(100%-14%)" office:value-type="float" office:value="691.526" calcext:value-type="float">
            <text:p>692</text:p>
          </table:table-cell>
          <table:table-cell table:style-name="ce85" table:formula="of:=+[.G15]*(100%-[.$G$27])+[.F16]-((([.G15]*(100%-[.$G$27])+[.F16])-[.$G$31]))" office:value-type="float" office:value="1100" calcext:value-type="float">
            <text:p>1100</text:p>
          </table:table-cell>
          <table:table-cell table:style-name="ce85" table:formula="of:=+[.D16]/2" office:value-type="float" office:value="804.1" calcext:value-type="float">
            <text:p>804</text:p>
          </table:table-cell>
          <table:table-cell table:style-name="ce85" table:formula="of:=[.G16]*[.I7]/[.G7]" office:value-type="float" office:value="157.142857142857" calcext:value-type="float">
            <text:p>157</text:p>
          </table:table-cell>
          <table:table-cell table:style-name="ce85" table:formula="of:=+[.H16]*(100%-[.$G$26])-([.I16]-[.I15])+((([.G15]*(100%-[.$G$27])+[.F16])-[.$G$31]))" office:value-type="float" office:value="1430.462" calcext:value-type="float">
            <text:p>1430</text:p>
          </table:table-cell>
          <table:table-cell table:style-name="ce100" table:formula="of:=+[.I16]+[.G16]+[.J16]" office:value-type="float" office:value="2687.60485714286" calcext:value-type="float">
            <text:p>2688</text:p>
          </table:table-cell>
          <table:table-cell table:style-name="ce105" table:formula="of:=+[.K16]*0.8*0.35" office:value-type="float" office:value="752.52936" calcext:value-type="float">
            <text:p>753</text:p>
          </table:table-cell>
          <table:table-cell table:style-name="ce109" table:formula="of:=+[.K16]*0.8*0.085" office:value-type="float" office:value="182.757130285714" calcext:value-type="float">
            <text:p>182.76</text:p>
          </table:table-cell>
          <table:table-cell table:style-name="ce111" table:formula="of:=+[.J16]*0.8" office:value-type="float" office:value="1144.3696" calcext:value-type="float">
            <text:p>1144.37</text:p>
          </table:table-cell>
          <table:table-cell table:style-name="ce113"/>
          <table:table-cell/>
          <table:table-cell table:style-name="ce123" office:value-type="string" calcext:value-type="string" table:number-columns-spanned="3" table:number-rows-spanned="1">
            <text:p>Fuente: DIA-DRA Ayacucho 2019</text:p>
          </table:table-cell>
          <table:covered-table-cell table:number-columns-repeated="2" table:style-name="ce123"/>
          <table:table-cell table:style-name="ce123" table:number-columns-spanned="6" table:number-rows-spanned="1"/>
          <table:covered-table-cell table:number-columns-repeated="5" table:style-name="ce123"/>
          <table:table-cell/>
          <table:table-cell office:value-type="string" calcext:value-type="string">
            <text:p>Huancasancos</text:p>
          </table:table-cell>
          <table:table-cell table:style-name="ce141" office:value-type="percentage" office:value="0.15" calcext:value-type="percentage">
            <text:p>15.00 %</text:p>
          </table:table-cell>
          <table:table-cell/>
          <table:table-cell table:style-name="ce123" table:number-columns-spanned="6" table:number-rows-spanned="1"/>
          <table:covered-table-cell table:number-columns-repeated="5" table:style-name="ce123"/>
          <table:table-cell table:style-name="ce139" table:number-columns-repeated="5"/>
          <table:table-cell table:number-columns-repeated="217"/>
        </table:table-row>
        <table:table-row table:style-name="ro17">
          <table:table-cell/>
          <table:covered-table-cell table:style-name="ce80"/>
          <table:table-cell table:style-name="ce82" office:value-type="string" calcext:value-type="string">
            <text:p>II</text:p>
          </table:table-cell>
          <table:table-cell table:style-name="ce85" table:formula="of:=+[.G16]*85%*(100%-14%)*2" office:value-type="float" office:value="1608.2" calcext:value-type="float">
            <text:p>1608</text:p>
          </table:table-cell>
          <table:table-cell table:style-name="ce85" table:formula="of:=+[.D17]/2" office:value-type="float" office:value="804.1" calcext:value-type="float">
            <text:p>804</text:p>
          </table:table-cell>
          <table:table-cell table:style-name="ce85" table:formula="of:=+[.E17]*(100%-14%)" office:value-type="float" office:value="691.526" calcext:value-type="float">
            <text:p>692</text:p>
          </table:table-cell>
          <table:table-cell table:style-name="ce85" table:formula="of:=+[.G16]*(100%-[.$G$27])+[.F17]-((([.G16]*(100%-[.$G$27])+[.F17])-[.$G$31]))" office:value-type="float" office:value="1100" calcext:value-type="float">
            <text:p>1100</text:p>
          </table:table-cell>
          <table:table-cell table:style-name="ce85" table:formula="of:=+[.D17]/2" office:value-type="float" office:value="804.1" calcext:value-type="float">
            <text:p>804</text:p>
          </table:table-cell>
          <table:table-cell table:style-name="ce85" table:formula="of:=[.G17]*[.I7]/[.G7]" office:value-type="float" office:value="157.142857142857" calcext:value-type="float">
            <text:p>157</text:p>
          </table:table-cell>
          <table:table-cell table:style-name="ce85" table:formula="of:=+[.H17]*(100%-[.$G$26])-([.I17]-[.I16])+((([.G16]*(100%-[.$G$27])+[.F17])-[.$G$31]))" office:value-type="float" office:value="1430.462" calcext:value-type="float">
            <text:p>1430</text:p>
          </table:table-cell>
          <table:table-cell table:style-name="ce100" table:formula="of:=+[.I17]+[.G17]+[.J17]" office:value-type="float" office:value="2687.60485714286" calcext:value-type="float">
            <text:p>2688</text:p>
          </table:table-cell>
          <table:table-cell table:style-name="ce105" table:formula="of:=+[.K17]*0.8*0.35" office:value-type="float" office:value="752.52936" calcext:value-type="float">
            <text:p>753</text:p>
          </table:table-cell>
          <table:table-cell table:style-name="ce109" table:formula="of:=+[.K17]*0.8*0.085" office:value-type="float" office:value="182.757130285714" calcext:value-type="float">
            <text:p>182.76</text:p>
          </table:table-cell>
          <table:table-cell table:style-name="ce111" table:formula="of:=+[.J17]*0.8" office:value-type="float" office:value="1144.3696" calcext:value-type="float">
            <text:p>1144.37</text:p>
          </table:table-cell>
          <table:table-cell table:style-name="ce113"/>
          <table:table-cell table:number-columns-repeated="11"/>
          <table:table-cell office:value-type="string" calcext:value-type="string">
            <text:p>Huanta</text:p>
          </table:table-cell>
          <table:table-cell table:style-name="ce141" office:value-type="percentage" office:value="0.09" calcext:value-type="percentage">
            <text:p>9.00 %</text:p>
          </table:table-cell>
          <table:table-cell table:number-columns-repeated="2"/>
          <table:table-cell table:style-name="ce106" table:number-columns-repeated="5"/>
          <table:table-cell table:style-name="ce148"/>
          <table:table-cell table:style-name="ce139" table:number-columns-repeated="4"/>
          <table:table-cell table:number-columns-repeated="217"/>
        </table:table-row>
        <table:table-row table:style-name="ro15">
          <table:table-cell/>
          <table:covered-table-cell table:style-name="ce80"/>
          <table:table-cell table:style-name="ce82" office:value-type="string" calcext:value-type="string">
            <text:p>III</text:p>
          </table:table-cell>
          <table:table-cell table:style-name="ce85" table:formula="of:=+[.G17]*85%*(100%-14%)*2" office:value-type="float" office:value="1608.2" calcext:value-type="float">
            <text:p>1608</text:p>
          </table:table-cell>
          <table:table-cell table:style-name="ce85" table:formula="of:=+[.D18]/2" office:value-type="float" office:value="804.1" calcext:value-type="float">
            <text:p>804</text:p>
          </table:table-cell>
          <table:table-cell table:style-name="ce85" table:formula="of:=+[.E18]*(100%-14%)" office:value-type="float" office:value="691.526" calcext:value-type="float">
            <text:p>692</text:p>
          </table:table-cell>
          <table:table-cell table:style-name="ce85" table:formula="of:=+[.G17]*(100%-[.$G$27])+[.F18]-((([.G17]*(100%-[.$G$27])+[.F18])-[.$G$31]))" office:value-type="float" office:value="1100" calcext:value-type="float">
            <text:p>1100</text:p>
          </table:table-cell>
          <table:table-cell table:style-name="ce85" table:formula="of:=+[.D18]/2" office:value-type="float" office:value="804.1" calcext:value-type="float">
            <text:p>804</text:p>
          </table:table-cell>
          <table:table-cell table:style-name="ce85" table:formula="of:=[.G18]*[.I7]/[.G7]" office:value-type="float" office:value="157.142857142857" calcext:value-type="float">
            <text:p>157</text:p>
          </table:table-cell>
          <table:table-cell table:style-name="ce85" table:formula="of:=+[.H18]*(100%-[.$G$26])-([.I18]-[.I17])+((([.G17]*(100%-[.$G$27])+[.F18])-[.$G$31]))" office:value-type="float" office:value="1430.462" calcext:value-type="float">
            <text:p>1430</text:p>
          </table:table-cell>
          <table:table-cell table:style-name="ce100" table:formula="of:=+[.I18]+[.G18]+[.J18]" office:value-type="float" office:value="2687.60485714286" calcext:value-type="float">
            <text:p>2688</text:p>
          </table:table-cell>
          <table:table-cell table:style-name="ce105" table:formula="of:=+[.K18]*0.8*0.35" office:value-type="float" office:value="752.52936" calcext:value-type="float">
            <text:p>753</text:p>
          </table:table-cell>
          <table:table-cell table:style-name="ce109" table:formula="of:=+[.K18]*0.8*0.085" office:value-type="float" office:value="182.757130285714" calcext:value-type="float">
            <text:p>182.76</text:p>
          </table:table-cell>
          <table:table-cell table:style-name="ce111" table:formula="of:=+[.J18]*0.8" office:value-type="float" office:value="1144.3696" calcext:value-type="float">
            <text:p>1144.37</text:p>
          </table:table-cell>
          <table:table-cell table:style-name="ce113"/>
          <table:table-cell table:number-columns-repeated="11"/>
          <table:table-cell office:value-type="string" calcext:value-type="string">
            <text:p>La Mar</text:p>
          </table:table-cell>
          <table:table-cell table:style-name="ce141" office:value-type="percentage" office:value="0.1248" calcext:value-type="percentage">
            <text:p>12.48 %</text:p>
          </table:table-cell>
          <table:table-cell table:number-columns-repeated="3"/>
          <table:table-cell table:style-name="ce147"/>
          <table:table-cell table:style-name="ce145"/>
          <table:table-cell table:style-name="ce151"/>
          <table:table-cell table:style-name="ce147"/>
          <table:table-cell table:style-name="ce145"/>
          <table:table-cell table:style-name="ce139"/>
          <table:table-cell table:number-columns-repeated="220"/>
        </table:table-row>
        <table:table-row table:style-name="ro15">
          <table:table-cell/>
          <table:covered-table-cell table:style-name="ce80"/>
          <table:table-cell table:style-name="ce82" office:value-type="string" calcext:value-type="string">
            <text:p>IV</text:p>
          </table:table-cell>
          <table:table-cell table:style-name="ce85" table:formula="of:=+[.G18]*85%*(100%-14%)*2" office:value-type="float" office:value="1608.2" calcext:value-type="float">
            <text:p>1608</text:p>
          </table:table-cell>
          <table:table-cell table:style-name="ce85" table:formula="of:=+[.D19]/2" office:value-type="float" office:value="804.1" calcext:value-type="float">
            <text:p>804</text:p>
          </table:table-cell>
          <table:table-cell table:style-name="ce85" table:formula="of:=+[.E19]*(100%-14%)" office:value-type="float" office:value="691.526" calcext:value-type="float">
            <text:p>692</text:p>
          </table:table-cell>
          <table:table-cell table:style-name="ce85" table:formula="of:=+[.G18]*(100%-[.$G$27])+[.F19]-((([.G18]*(100%-[.$G$27])+[.F19])-[.$G$31]))" office:value-type="float" office:value="1100" calcext:value-type="float">
            <text:p>1100</text:p>
          </table:table-cell>
          <table:table-cell table:style-name="ce85" table:formula="of:=+[.D19]/2" office:value-type="float" office:value="804.1" calcext:value-type="float">
            <text:p>804</text:p>
          </table:table-cell>
          <table:table-cell table:style-name="ce85" table:formula="of:=[.G19]*[.I7]/[.G7]" office:value-type="float" office:value="157.142857142857" calcext:value-type="float">
            <text:p>157</text:p>
          </table:table-cell>
          <table:table-cell table:style-name="ce85" table:formula="of:=+[.H19]*(100%-[.$G$26])-([.I19]-[.I18])+((([.G18]*(100%-[.$G$27])+[.F19])-[.$G$31]))" office:value-type="float" office:value="1430.462" calcext:value-type="float">
            <text:p>1430</text:p>
          </table:table-cell>
          <table:table-cell table:style-name="ce100" table:formula="of:=+[.I19]+[.G19]+[.J19]" office:value-type="float" office:value="2687.60485714286" calcext:value-type="float">
            <text:p>2688</text:p>
          </table:table-cell>
          <table:table-cell table:style-name="ce105" table:formula="of:=+[.K19]*0.8*0.35" office:value-type="float" office:value="752.52936" calcext:value-type="float">
            <text:p>753</text:p>
          </table:table-cell>
          <table:table-cell table:style-name="ce109" table:formula="of:=+[.K19]*0.8*0.085" office:value-type="float" office:value="182.757130285714" calcext:value-type="float">
            <text:p>182.76</text:p>
          </table:table-cell>
          <table:table-cell table:style-name="ce111" table:formula="of:=+[.J19]*0.8" office:value-type="float" office:value="1144.3696" calcext:value-type="float">
            <text:p>1144.37</text:p>
          </table:table-cell>
          <table:table-cell table:style-name="ce112" table:formula="of:=SUM([.J16:.J19])" office:value-type="float" office:value="5721.848" calcext:value-type="float">
            <text:p>5722</text:p>
          </table:table-cell>
          <table:table-cell table:number-columns-repeated="11"/>
          <table:table-cell office:value-type="string" calcext:value-type="string">
            <text:p>Vilcashuaman</text:p>
          </table:table-cell>
          <table:table-cell table:style-name="ce141" office:value-type="percentage" office:value="0.125" calcext:value-type="percentage">
            <text:p>12.50 %</text:p>
          </table:table-cell>
          <table:table-cell table:number-columns-repeated="3"/>
          <table:table-cell table:style-name="ce149"/>
          <table:table-cell table:style-name="ce146"/>
          <table:table-cell table:style-name="ce148"/>
          <table:table-cell table:style-name="ce152"/>
          <table:table-cell table:style-name="ce153"/>
          <table:table-cell table:style-name="ce139"/>
          <table:table-cell table:number-columns-repeated="220"/>
        </table:table-row>
        <table:table-row table:style-name="ro15">
          <table:table-cell table:number-columns-repeated="2"/>
          <table:table-cell table:style-name="ce81" table:number-columns-repeated="8"/>
          <table:table-cell/>
          <table:table-cell table:style-name="ce97" table:formula="of:=+[.N19]*0.8*0.35" office:value-type="float" office:value="320.423488" calcext:value-type="float">
            <text:p>320.423488</text:p>
          </table:table-cell>
          <table:table-cell table:style-name="ce97" table:formula="of:=+[.N19]*0.085" office:value-type="float" office:value="97.271416" calcext:value-type="float">
            <text:p>97.271416</text:p>
          </table:table-cell>
          <table:table-cell table:number-columns-repeated="18"/>
          <table:table-cell table:style-name="ce149"/>
          <table:table-cell table:style-name="ce146"/>
          <table:table-cell table:style-name="ce148"/>
          <table:table-cell table:style-name="ce152"/>
          <table:table-cell table:style-name="ce153"/>
          <table:table-cell table:style-name="ce139"/>
          <table:table-cell table:number-columns-repeated="220"/>
        </table:table-row>
        <table:table-row table:style-name="ro15">
          <table:table-cell table:number-columns-repeated="2"/>
          <table:table-cell table:style-name="ce81" table:number-columns-repeated="5"/>
          <table:table-cell table:style-name="ce95" table:formula="of:=+[.G7]+[.I7]" office:value-type="float" office:value="336" calcext:value-type="float">
            <text:p>336</text:p>
          </table:table-cell>
          <table:table-cell table:style-name="ce81" table:number-columns-repeated="3"/>
          <table:table-cell table:style-name="ce106" table:formula="of:=[.L20]/1000" office:value-type="float" office:value="0.320423488" calcext:value-type="float">
            <text:p>0.320423488</text:p>
          </table:table-cell>
          <table:table-cell table:style-name="ce106" table:formula="of:=[.M20]/1000" office:value-type="float" office:value="0.097271416" calcext:value-type="float">
            <text:p>0.097271416</text:p>
          </table:table-cell>
          <table:table-cell office:value-type="string" calcext:value-type="string">
            <text:p>TM</text:p>
          </table:table-cell>
          <table:table-cell table:number-columns-repeated="17"/>
          <table:table-cell table:style-name="ce149"/>
          <table:table-cell table:style-name="ce146"/>
          <table:table-cell table:style-name="ce148"/>
          <table:table-cell table:style-name="ce152"/>
          <table:table-cell table:style-name="ce153"/>
          <table:table-cell table:style-name="ce139"/>
          <table:table-cell table:number-columns-repeated="220"/>
        </table:table-row>
        <table:table-row table:style-name="ro15">
          <table:table-cell table:number-columns-repeated="2"/>
          <table:table-cell table:style-name="ce81" table:number-columns-repeated="9"/>
          <table:table-cell table:style-name="ce106" table:number-columns-repeated="2"/>
          <table:table-cell table:number-columns-repeated="18"/>
          <table:table-cell table:style-name="ce149"/>
          <table:table-cell table:style-name="ce146"/>
          <table:table-cell table:style-name="ce148"/>
          <table:table-cell table:style-name="ce152"/>
          <table:table-cell table:style-name="ce153"/>
          <table:table-cell table:style-name="ce139"/>
          <table:table-cell table:number-columns-repeated="220"/>
        </table:table-row>
        <table:table-row table:style-name="ro9">
          <table:table-cell table:number-columns-repeated="2"/>
          <table:table-cell table:style-name="ce83"/>
          <table:table-cell table:style-name="ce86" office:value-type="string" calcext:value-type="string" table:number-columns-spanned="3" table:number-rows-spanned="1">
            <text:p>INDICE PRODUCTIVO</text:p>
          </table:table-cell>
          <table:covered-table-cell table:number-columns-repeated="2" table:style-name="ce86"/>
          <table:table-cell table:style-name="ce86" office:value-type="string" calcext:value-type="string">
            <text:p>%</text:p>
          </table:table-cell>
          <table:table-cell table:style-name="ce86" office:value-type="string" calcext:value-type="string">
            <text:p>Fn</text:p>
          </table:table-cell>
          <table:table-cell table:style-name="ce86" office:value-type="string" calcext:value-type="string">
            <text:p>Fc</text:p>
          </table:table-cell>
          <table:table-cell table:style-name="ce97"/>
          <table:table-cell table:style-name="ce101"/>
          <table:table-cell table:style-name="ce107"/>
          <table:table-cell table:style-name="ce106"/>
          <table:table-cell table:number-columns-repeated="18"/>
          <table:table-cell table:style-name="ce149"/>
          <table:table-cell table:style-name="ce146"/>
          <table:table-cell table:style-name="ce148"/>
          <table:table-cell table:style-name="ce152"/>
          <table:table-cell table:style-name="ce153"/>
          <table:table-cell table:style-name="ce139"/>
          <table:table-cell table:number-columns-repeated="220"/>
        </table:table-row>
        <table:table-row table:style-name="ro9">
          <table:table-cell table:number-columns-repeated="2"/>
          <table:table-cell table:style-name="ce83"/>
          <table:table-cell table:style-name="ce87" office:value-type="string" calcext:value-type="string" table:number-columns-spanned="3" table:number-rows-spanned="1">
            <text:p>Natalidad</text:p>
          </table:table-cell>
          <table:covered-table-cell table:number-columns-repeated="2" table:style-name="ce87"/>
          <table:table-cell table:style-name="ce90" office:value-type="percentage" office:value="0.85" calcext:value-type="percentage">
            <text:p>85 %</text:p>
          </table:table-cell>
          <table:table-cell table:style-name="ce91" table:formula="of:=+[.G24]/100" office:value-type="float" office:value="0.0085" calcext:value-type="float">
            <text:p>0.0085</text:p>
          </table:table-cell>
          <table:table-cell table:style-name="ce91" table:formula="of:=+[.G24]/100" office:value-type="float" office:value="0.0085" calcext:value-type="float">
            <text:p>0.0085</text:p>
          </table:table-cell>
          <table:table-cell table:style-name="ce98"/>
          <table:table-cell table:style-name="ce97"/>
          <table:table-cell/>
          <table:table-cell table:style-name="ce107"/>
          <table:table-cell table:number-columns-repeated="18"/>
          <table:table-cell table:style-name="ce149"/>
          <table:table-cell table:style-name="ce146"/>
          <table:table-cell table:style-name="ce148"/>
          <table:table-cell table:style-name="ce152"/>
          <table:table-cell table:style-name="ce153"/>
          <table:table-cell table:style-name="ce139"/>
          <table:table-cell table:number-columns-repeated="220"/>
        </table:table-row>
        <table:table-row table:style-name="ro9">
          <table:table-cell table:number-columns-repeated="2"/>
          <table:table-cell table:style-name="ce84"/>
          <table:table-cell table:style-name="ce87" office:value-type="string" calcext:value-type="string" table:number-columns-spanned="3" table:number-rows-spanned="1">
            <text:p>Mortalidad (Nac-Dest)</text:p>
          </table:table-cell>
          <table:covered-table-cell table:number-columns-repeated="2" table:style-name="ce87"/>
          <table:table-cell table:style-name="ce90" office:value-type="percentage" office:value="0.14" calcext:value-type="percentage">
            <text:p>14 %</text:p>
          </table:table-cell>
          <table:table-cell table:style-name="ce91" table:formula="of:=+[.G25]/100" office:value-type="float" office:value="0.0014" calcext:value-type="float">
            <text:p>0.0014</text:p>
          </table:table-cell>
          <table:table-cell table:style-name="ce91" table:formula="of:=1-[.H25]" office:value-type="float" office:value="0.9986" calcext:value-type="float">
            <text:p>0.9986</text:p>
          </table:table-cell>
          <table:table-cell table:style-name="ce97" table:number-columns-repeated="2"/>
          <table:table-cell/>
          <table:table-cell table:formula="of:=+[.G7]/[.I7]" office:value-type="float" office:value="7" calcext:value-type="float">
            <text:p>7</text:p>
          </table:table-cell>
          <table:table-cell table:number-columns-repeated="18"/>
          <table:table-cell table:style-name="ce149"/>
          <table:table-cell table:style-name="ce146"/>
          <table:table-cell table:style-name="ce148"/>
          <table:table-cell table:style-name="ce152"/>
          <table:table-cell table:style-name="ce153"/>
          <table:table-cell table:style-name="ce139"/>
          <table:table-cell table:number-columns-repeated="220"/>
        </table:table-row>
        <table:table-row table:style-name="ro18">
          <table:table-cell table:number-columns-repeated="2"/>
          <table:table-cell table:style-name="ce84"/>
          <table:table-cell table:style-name="ce87" office:value-type="string" calcext:value-type="string" table:number-columns-spanned="3" table:number-rows-spanned="1">
            <text:p>Mortalidad (Dest-3 Meses)</text:p>
          </table:table-cell>
          <table:covered-table-cell table:number-columns-repeated="2" table:style-name="ce87"/>
          <table:table-cell table:style-name="ce90" office:value-type="percentage" office:value="0.04" calcext:value-type="percentage">
            <text:p>4 %</text:p>
          </table:table-cell>
          <table:table-cell table:style-name="ce91" table:formula="of:=+[.G26]/100" office:value-type="float" office:value="0.0004" calcext:value-type="float">
            <text:p>0.0004</text:p>
          </table:table-cell>
          <table:table-cell table:style-name="ce91" table:formula="of:=1-[.H26]" office:value-type="float" office:value="0.9996" calcext:value-type="float">
            <text:p>0.9996</text:p>
          </table:table-cell>
          <table:table-cell table:style-name="ce97" table:number-columns-repeated="2"/>
          <table:table-cell table:number-columns-repeated="16"/>
          <table:table-cell table:style-name="ce120" office:value-type="string" calcext:value-type="string">
            <text:p>años</text:p>
          </table:table-cell>
          <table:table-cell table:style-name="ce142" office:value-type="string" calcext:value-type="string">
            <text:p>Población Total Cuyes</text:p>
          </table:table-cell>
          <table:table-cell table:style-name="ce145">
            <draw:frame draw:z-index="1" draw:name="Chart 2" draw:style-name="gr1" draw:text-style-name="P1" svg:width="11.971cm" svg:height="10.536cm" svg:x="1.564cm" svg:y="0.274cm">
              <draw:object xlink:href="./Object 2" xlink:type="simple" xlink:show="embed" xlink:actuate="onLoad">
                <loext:p/>
              </draw:object>
              <draw:image xlink:href="./ObjectReplacements/Object 2" xlink:type="simple" xlink:show="embed" xlink:actuate="onLoad"/>
            </draw:frame>
          </table:table-cell>
          <table:table-cell table:style-name="ce145"/>
          <table:table-cell table:style-name="ce149"/>
          <table:table-cell table:style-name="ce146"/>
          <table:table-cell table:style-name="ce148"/>
          <table:table-cell table:style-name="ce152"/>
          <table:table-cell table:style-name="ce153"/>
          <table:table-cell table:style-name="ce139"/>
          <table:table-cell table:number-columns-repeated="220"/>
        </table:table-row>
        <table:table-row table:style-name="ro9">
          <table:table-cell table:number-columns-repeated="2"/>
          <table:table-cell table:style-name="ce84"/>
          <table:table-cell table:style-name="ce87" office:value-type="string" calcext:value-type="string" table:number-columns-spanned="3" table:number-rows-spanned="1">
            <text:p>Mortalidad Reproductores</text:p>
          </table:table-cell>
          <table:covered-table-cell table:number-columns-repeated="2" table:style-name="ce87"/>
          <table:table-cell table:style-name="ce90" office:value-type="percentage" office:value="0.03" calcext:value-type="percentage">
            <text:p>3 %</text:p>
          </table:table-cell>
          <table:table-cell table:style-name="ce91" table:formula="of:=+[.G27]/100" office:value-type="float" office:value="0.0003" calcext:value-type="float">
            <text:p>0.0003</text:p>
          </table:table-cell>
          <table:table-cell table:style-name="ce91" table:formula="of:=1-[.H27]" office:value-type="float" office:value="0.9997" calcext:value-type="float">
            <text:p>0.9997</text:p>
          </table:table-cell>
          <table:table-cell table:style-name="ce97" table:number-columns-repeated="2"/>
          <table:table-cell table:number-columns-repeated="16"/>
          <table:table-cell table:style-name="ce138" table:formula="of:=+[.AB3]" office:value-type="float" office:value="2012" calcext:value-type="float">
            <text:p>2012</text:p>
          </table:table-cell>
          <table:table-cell table:style-name="ce143" table:formula="of:=+[.AB10]" office:value-type="float" office:value="118698.1976" calcext:value-type="float">
            <text:p>118,698.20</text:p>
          </table:table-cell>
          <table:table-cell table:style-name="ce146" table:number-columns-repeated="2"/>
          <table:table-cell table:style-name="ce147" table:number-columns-repeated="2"/>
          <table:table-cell table:style-name="ce148" table:number-columns-repeated="3"/>
          <table:table-cell table:style-name="ce139"/>
          <table:table-cell table:number-columns-repeated="220"/>
        </table:table-row>
        <table:table-row table:style-name="ro9">
          <table:table-cell table:number-columns-repeated="2"/>
          <table:table-cell table:style-name="ce83"/>
          <table:table-cell table:style-name="ce87" office:value-type="string" calcext:value-type="string" table:number-columns-spanned="3" table:number-rows-spanned="1">
            <text:p>Numero Crias/Camada</text:p>
          </table:table-cell>
          <table:covered-table-cell table:number-columns-repeated="2" table:style-name="ce87"/>
          <table:table-cell table:style-name="ce91" office:value-type="float" office:value="2" calcext:value-type="float">
            <text:p>2</text:p>
          </table:table-cell>
          <table:table-cell table:style-name="ce91" table:number-columns-repeated="2"/>
          <table:table-cell table:style-name="ce84"/>
          <table:table-cell table:style-name="ce102"/>
          <table:table-cell table:number-columns-repeated="16"/>
          <table:table-cell table:style-name="ce138" table:formula="of:=+[.AC3]" office:value-type="float" office:value="2013" calcext:value-type="float">
            <text:p>2013</text:p>
          </table:table-cell>
          <table:table-cell table:style-name="ce143" table:formula="of:=+[.AC10]" office:value-type="float" office:value="95099.0894" calcext:value-type="float">
            <text:p>95,099.09</text:p>
          </table:table-cell>
          <table:table-cell table:style-name="ce146" table:number-columns-repeated="2"/>
          <table:table-cell table:style-name="ce149"/>
          <table:table-cell table:style-name="ce146"/>
          <table:table-cell table:style-name="ce148" table:number-columns-repeated="3"/>
          <table:table-cell table:style-name="ce139"/>
          <table:table-cell table:number-columns-repeated="220"/>
        </table:table-row>
        <table:table-row table:style-name="ro9">
          <table:table-cell table:number-columns-repeated="2"/>
          <table:table-cell table:style-name="ce83"/>
          <table:table-cell table:style-name="ce87" office:value-type="string" calcext:value-type="string" table:number-columns-spanned="3" table:number-rows-spanned="1">
            <text:p>Consumo Alimento Prom</text:p>
          </table:table-cell>
          <table:covered-table-cell table:number-columns-repeated="2" table:style-name="ce87"/>
          <table:table-cell table:style-name="ce90" office:value-type="percentage" office:value="0.35" calcext:value-type="percentage">
            <text:p>35 %</text:p>
          </table:table-cell>
          <table:table-cell table:style-name="ce91" table:number-columns-repeated="2"/>
          <table:table-cell table:style-name="ce84" table:number-columns-repeated="2"/>
          <table:table-cell table:number-columns-repeated="16"/>
          <table:table-cell table:style-name="ce138" table:formula="of:=+[.AD3]" office:value-type="float" office:value="2014" calcext:value-type="float">
            <text:p>2014</text:p>
          </table:table-cell>
          <table:table-cell table:style-name="ce143" table:formula="of:=+[.AD10]" office:value-type="float" office:value="106161.6478" calcext:value-type="float">
            <text:p>106,161.65</text:p>
          </table:table-cell>
          <table:table-cell table:style-name="ce146" table:number-columns-repeated="2"/>
          <table:table-cell table:style-name="ce149"/>
          <table:table-cell table:style-name="ce146"/>
          <table:table-cell table:style-name="ce148" table:number-columns-repeated="3"/>
          <table:table-cell table:style-name="ce139"/>
          <table:table-cell table:number-columns-repeated="220"/>
        </table:table-row>
        <table:table-row table:style-name="ro9">
          <table:table-cell table:number-columns-repeated="2"/>
          <table:table-cell table:style-name="ce83"/>
          <table:table-cell table:style-name="ce87" office:value-type="string" calcext:value-type="string" table:number-columns-spanned="3" table:number-rows-spanned="1">
            <text:p>Proporcion H:M</text:p>
          </table:table-cell>
          <table:covered-table-cell table:number-columns-repeated="2" table:style-name="ce87"/>
          <table:table-cell table:style-name="ce92" office:value-type="time" office:time-value="PT10H01M00S" calcext:value-type="time">
            <text:p>10:01</text:p>
          </table:table-cell>
          <table:table-cell table:style-name="ce91" table:number-columns-repeated="2"/>
          <table:table-cell table:style-name="ce84" table:number-columns-repeated="2"/>
          <table:table-cell table:number-columns-repeated="16"/>
          <table:table-cell table:style-name="ce138" table:formula="of:=+[.AE3]" office:value-type="float" office:value="2015" calcext:value-type="float">
            <text:p>2015</text:p>
          </table:table-cell>
          <table:table-cell table:style-name="ce143" table:formula="of:=+[.AE10]" office:value-type="float" office:value="113087.464" calcext:value-type="float">
            <text:p>113,087.46</text:p>
          </table:table-cell>
          <table:table-cell table:style-name="ce146" table:number-columns-repeated="2"/>
          <table:table-cell table:style-name="ce149"/>
          <table:table-cell table:style-name="ce146"/>
          <table:table-cell table:style-name="ce148" table:number-columns-repeated="3"/>
          <table:table-cell table:style-name="ce139"/>
          <table:table-cell table:number-columns-repeated="220"/>
        </table:table-row>
        <table:table-row table:style-name="ro9">
          <table:table-cell table:number-columns-repeated="2"/>
          <table:table-cell table:style-name="ce84"/>
          <table:table-cell table:style-name="ce87" office:value-type="string" calcext:value-type="string" table:number-columns-spanned="3" table:number-rows-spanned="1">
            <text:p>Tope Max. Produccion</text:p>
          </table:table-cell>
          <table:covered-table-cell table:number-columns-repeated="2" table:style-name="ce87"/>
          <table:table-cell table:style-name="ce93" office:value-type="float" office:value="1100" calcext:value-type="float">
            <text:p>1100</text:p>
          </table:table-cell>
          <table:table-cell table:style-name="ce91" table:number-columns-repeated="2"/>
          <table:table-cell table:style-name="ce97" table:number-columns-repeated="2"/>
          <table:table-cell table:number-columns-repeated="16"/>
          <table:table-cell table:style-name="ce138" table:formula="of:=+[.AF3]" office:value-type="float" office:value="2016" calcext:value-type="float">
            <text:p>2016</text:p>
          </table:table-cell>
          <table:table-cell table:style-name="ce143" table:formula="of:=+[.AF10]" office:value-type="float" office:value="132222.158" calcext:value-type="float">
            <text:p>132,222.16</text:p>
          </table:table-cell>
          <table:table-cell table:style-name="ce146" table:number-columns-repeated="2"/>
          <table:table-cell table:style-name="ce149"/>
          <table:table-cell table:style-name="ce146"/>
          <table:table-cell table:style-name="ce148" table:number-columns-repeated="3"/>
          <table:table-cell table:style-name="ce139"/>
          <table:table-cell table:number-columns-repeated="220"/>
        </table:table-row>
        <table:table-row table:style-name="ro17">
          <table:table-cell table:number-columns-repeated="27"/>
          <table:table-cell table:style-name="ce138" table:formula="of:=+[.AG3]" office:value-type="float" office:value="2017" calcext:value-type="float">
            <text:p>2017</text:p>
          </table:table-cell>
          <table:table-cell table:style-name="ce143" table:formula="of:=+[.AG10]" office:value-type="float" office:value="135329.7516" calcext:value-type="float">
            <text:p>135,329.75</text:p>
          </table:table-cell>
          <table:table-cell table:style-name="ce146" table:number-columns-repeated="2"/>
          <table:table-cell table:style-name="ce149"/>
          <table:table-cell table:style-name="ce146"/>
          <table:table-cell table:style-name="ce148" table:number-columns-repeated="3"/>
          <table:table-cell table:style-name="ce139"/>
          <table:table-cell table:number-columns-repeated="220"/>
        </table:table-row>
        <table:table-row table:style-name="ro15">
          <table:table-cell table:number-columns-repeated="27"/>
          <table:table-cell table:style-name="ce138" table:formula="of:=+[.AH3]" office:value-type="float" office:value="2018" calcext:value-type="float">
            <text:p>2018</text:p>
          </table:table-cell>
          <table:table-cell table:style-name="ce143" table:formula="of:=+[.AH10]" office:value-type="float" office:value="130082.6264" calcext:value-type="float">
            <text:p>130,082.63</text:p>
          </table:table-cell>
          <table:table-cell table:style-name="ce146" table:number-columns-repeated="2"/>
          <table:table-cell table:style-name="ce149"/>
          <table:table-cell table:style-name="ce146"/>
          <table:table-cell table:style-name="ce148" table:number-columns-repeated="3"/>
          <table:table-cell table:style-name="ce139"/>
          <table:table-cell table:number-columns-repeated="220"/>
        </table:table-row>
        <table:table-row table:style-name="ro15">
          <table:table-cell table:number-columns-repeated="15"/>
          <table:table-cell table:style-name="ce114" table:number-columns-repeated="11"/>
          <table:table-cell/>
          <table:table-cell table:style-name="ce138" table:formula="of:=+[.AI3]" office:value-type="float" office:value="2019" calcext:value-type="float">
            <text:p>2019</text:p>
          </table:table-cell>
          <table:table-cell table:style-name="ce143" table:formula="of:=+[.AI10]" office:value-type="float" office:value="133746.4084" calcext:value-type="float">
            <text:p>133,746.41</text:p>
          </table:table-cell>
          <table:table-cell table:style-name="ce146" table:number-columns-repeated="2"/>
          <table:table-cell table:style-name="ce149"/>
          <table:table-cell table:style-name="ce146"/>
          <table:table-cell table:style-name="ce148" table:number-columns-repeated="3"/>
          <table:table-cell table:style-name="ce139"/>
          <table:table-cell table:number-columns-repeated="220"/>
        </table:table-row>
        <table:table-row table:style-name="ro9">
          <table:table-cell table:number-columns-repeated="15"/>
          <table:table-cell table:style-name="ce115" office:value-type="string" calcext:value-type="string" table:number-columns-spanned="7" table:number-rows-spanned="1">
            <text:p>PRODUCCIÓN DE CUY DE LA ASOCIACION DE PRODUCTORES AGROPECUARIOS "APAL"</text:p>
          </table:table-cell>
          <table:covered-table-cell table:number-columns-repeated="6" table:style-name="ce115"/>
          <table:table-cell table:style-name="ce114"/>
          <table:table-cell table:style-name="ce130" table:number-columns-repeated="2"/>
          <table:table-cell table:style-name="ce134"/>
          <table:table-cell/>
          <table:table-cell table:style-name="ce120" office:value-type="string" calcext:value-type="string">
            <text:p>X</text:p>
          </table:table-cell>
          <table:table-cell table:style-name="ce120" office:value-type="string" calcext:value-type="string">
            <text:p>Y</text:p>
          </table:table-cell>
          <table:table-cell table:style-name="ce147" table:number-columns-repeated="2"/>
          <table:table-cell table:style-name="ce149"/>
          <table:table-cell table:style-name="ce146"/>
          <table:table-cell table:style-name="ce148" table:number-columns-repeated="3"/>
          <table:table-cell table:style-name="ce139"/>
          <table:table-cell table:number-columns-repeated="220"/>
        </table:table-row>
        <table:table-row table:style-name="ro19">
          <table:table-cell table:number-columns-repeated="6"/>
          <table:table-cell office:value-type="float" office:value="8" calcext:value-type="float">
            <text:p>8</text:p>
          </table:table-cell>
          <table:table-cell table:number-columns-repeated="2" office:value-type="float" office:value="13" calcext:value-type="float">
            <text:p>13</text:p>
          </table:table-cell>
          <table:table-cell office:value-type="float" office:value="8" calcext:value-type="float">
            <text:p>8</text:p>
          </table:table-cell>
          <table:table-cell table:formula="of:=SUM([.G36:.J36])" office:value-type="float" office:value="42" calcext:value-type="float">
            <text:p>42</text:p>
          </table:table-cell>
          <table:table-cell table:number-columns-repeated="4"/>
          <table:table-cell table:style-name="ce116" office:value-type="string" calcext:value-type="string">
            <text:p>AÑO</text:p>
          </table:table-cell>
          <table:table-cell table:style-name="ce116" office:value-type="string" calcext:value-type="string">
            <text:p>OFERTA CON PROYECTO CARNE DE CUY UNID/ANUALES</text:p>
          </table:table-cell>
          <table:table-cell table:style-name="ce128"/>
          <table:table-cell table:style-name="ce118" table:number-columns-repeated="4"/>
          <table:table-cell table:style-name="ce114"/>
          <table:table-cell table:style-name="ce131" table:number-columns-repeated="2"/>
          <table:table-cell table:style-name="ce135"/>
          <table:table-cell/>
          <table:table-cell table:style-name="ce138" office:value-type="float" office:value="1" calcext:value-type="float">
            <text:p>1</text:p>
          </table:table-cell>
          <table:table-cell table:style-name="ce143" table:formula="of:=+[.AC27]" office:value-type="float" office:value="118698.1976" calcext:value-type="float">
            <text:p>118,698.20</text:p>
          </table:table-cell>
          <table:table-cell table:style-name="ce146" table:number-columns-repeated="2"/>
          <table:table-cell table:style-name="ce149"/>
          <table:table-cell table:style-name="ce146"/>
          <table:table-cell table:style-name="ce148" table:number-columns-repeated="3"/>
          <table:table-cell table:style-name="ce139"/>
          <table:table-cell table:number-columns-repeated="220"/>
        </table:table-row>
        <table:table-row table:style-name="ro15">
          <table:table-cell table:number-columns-repeated="6"/>
          <table:table-cell office:value-type="float" office:value="10" calcext:value-type="float">
            <text:p>10</text:p>
          </table:table-cell>
          <table:table-cell table:number-columns-repeated="2" office:value-type="float" office:value="15" calcext:value-type="float">
            <text:p>15</text:p>
          </table:table-cell>
          <table:table-cell office:value-type="float" office:value="10" calcext:value-type="float">
            <text:p>10</text:p>
          </table:table-cell>
          <table:table-cell table:formula="of:=SUM([.G37:.J37])" office:value-type="float" office:value="50" calcext:value-type="float">
            <text:p>50</text:p>
          </table:table-cell>
          <table:table-cell table:number-columns-repeated="4"/>
          <table:table-cell table:style-name="ce117" office:value-type="float" office:value="2020" calcext:value-type="float">
            <text:p>2020</text:p>
          </table:table-cell>
          <table:table-cell table:style-name="ce124" office:value-type="float" office:value="0" calcext:value-type="float">
            <text:p>0</text:p>
          </table:table-cell>
          <table:table-cell table:style-name="ce128"/>
          <table:table-cell table:style-name="ce118" table:number-columns-repeated="4"/>
          <table:table-cell table:style-name="ce114"/>
          <table:table-cell table:style-name="ce132"/>
          <table:table-cell table:style-name="ce133"/>
          <table:table-cell table:style-name="ce135"/>
          <table:table-cell/>
          <table:table-cell table:style-name="ce138" office:value-type="float" office:value="2" calcext:value-type="float">
            <text:p>2</text:p>
          </table:table-cell>
          <table:table-cell table:style-name="ce143" table:formula="of:=+[.AC28]" office:value-type="float" office:value="95099.0894" calcext:value-type="float">
            <text:p>95,099.09</text:p>
          </table:table-cell>
          <table:table-cell table:style-name="ce146" table:number-columns-repeated="2"/>
          <table:table-cell table:style-name="ce149"/>
          <table:table-cell table:style-name="ce146"/>
          <table:table-cell table:style-name="ce139" table:number-columns-repeated="4"/>
          <table:table-cell table:number-columns-repeated="220"/>
        </table:table-row>
        <table:table-row table:style-name="ro15">
          <table:table-cell table:number-columns-repeated="15"/>
          <table:table-cell table:style-name="ce117" table:formula="of:=+[.P37]+1" office:value-type="float" office:value="2021" calcext:value-type="float">
            <text:p>2021</text:p>
          </table:table-cell>
          <table:table-cell table:style-name="ce125" table:formula="of:=+[.O11]*2" office:value-type="float" office:value="3440.46069833684" calcext:value-type="float">
            <text:p>3,440</text:p>
          </table:table-cell>
          <table:table-cell table:style-name="ce129"/>
          <table:table-cell table:style-name="ce118" table:number-columns-repeated="4"/>
          <table:table-cell table:style-name="ce114"/>
          <table:table-cell table:style-name="ce132"/>
          <table:table-cell table:style-name="ce133"/>
          <table:table-cell table:style-name="ce135"/>
          <table:table-cell/>
          <table:table-cell table:style-name="ce138" office:value-type="float" office:value="3" calcext:value-type="float">
            <text:p>3</text:p>
          </table:table-cell>
          <table:table-cell table:style-name="ce143" table:formula="of:=+[.AC29]" office:value-type="float" office:value="106161.6478" calcext:value-type="float">
            <text:p>106,161.65</text:p>
          </table:table-cell>
          <table:table-cell table:style-name="ce146" table:number-columns-repeated="2"/>
          <table:table-cell table:style-name="ce149"/>
          <table:table-cell table:style-name="ce146"/>
          <table:table-cell table:style-name="ce139" table:number-columns-repeated="4"/>
          <table:table-cell table:number-columns-repeated="220"/>
        </table:table-row>
        <table:table-row table:style-name="ro15">
          <table:table-cell table:number-columns-repeated="6"/>
          <table:table-cell table:formula="of:=+[.G36]*[.G37]" office:value-type="float" office:value="80" calcext:value-type="float">
            <text:p>80</text:p>
          </table:table-cell>
          <table:table-cell table:formula="of:=+[.H36]*[.H37]" office:value-type="float" office:value="195" calcext:value-type="float">
            <text:p>195</text:p>
          </table:table-cell>
          <table:table-cell table:formula="of:=+[.I36]*[.I37]" office:value-type="float" office:value="195" calcext:value-type="float">
            <text:p>195</text:p>
          </table:table-cell>
          <table:table-cell table:formula="of:=+[.J36]*[.J37]" office:value-type="float" office:value="80" calcext:value-type="float">
            <text:p>80</text:p>
          </table:table-cell>
          <table:table-cell table:formula="of:=SUM([.G39:.J39])" office:value-type="float" office:value="550" calcext:value-type="float">
            <text:p>550</text:p>
          </table:table-cell>
          <table:table-cell table:number-columns-repeated="4"/>
          <table:table-cell table:style-name="ce117" table:formula="of:=+[.P38]+1" office:value-type="float" office:value="2022" calcext:value-type="float">
            <text:p>2022</text:p>
          </table:table-cell>
          <table:table-cell table:style-name="ce125" table:formula="of:=+[.O15]*2" office:value-type="float" office:value="11443.696" calcext:value-type="float">
            <text:p>11,444</text:p>
          </table:table-cell>
          <table:table-cell table:style-name="ce129"/>
          <table:table-cell table:style-name="ce118" table:number-columns-repeated="4"/>
          <table:table-cell table:style-name="ce114"/>
          <table:table-cell table:style-name="ce132"/>
          <table:table-cell table:style-name="ce133"/>
          <table:table-cell table:style-name="ce135"/>
          <table:table-cell/>
          <table:table-cell table:style-name="ce138" office:value-type="float" office:value="4" calcext:value-type="float">
            <text:p>4</text:p>
          </table:table-cell>
          <table:table-cell table:style-name="ce143" table:formula="of:=+[.AC30]" office:value-type="float" office:value="113087.464" calcext:value-type="float">
            <text:p>113,087.46</text:p>
          </table:table-cell>
          <table:table-cell table:style-name="ce146" table:number-columns-repeated="2"/>
          <table:table-cell table:style-name="ce139" table:number-columns-repeated="6"/>
          <table:table-cell table:number-columns-repeated="220"/>
        </table:table-row>
        <table:table-row table:style-name="ro15">
          <table:table-cell table:number-columns-repeated="10"/>
          <table:table-cell table:formula="of:=+[.K39]*2" office:value-type="float" office:value="1100" calcext:value-type="float">
            <text:p>1100</text:p>
          </table:table-cell>
          <table:table-cell table:number-columns-repeated="4"/>
          <table:table-cell table:style-name="ce117" table:formula="of:=+[.P39]+1" office:value-type="float" office:value="2023" calcext:value-type="float">
            <text:p>2023</text:p>
          </table:table-cell>
          <table:table-cell table:style-name="ce125" table:formula="of:=+[.O19]*2" office:value-type="float" office:value="11443.696" calcext:value-type="float">
            <text:p>11,444</text:p>
          </table:table-cell>
          <table:table-cell table:style-name="ce129"/>
          <table:table-cell table:style-name="ce118" table:number-columns-repeated="4"/>
          <table:table-cell table:style-name="ce114"/>
          <table:table-cell table:style-name="ce132"/>
          <table:table-cell table:style-name="ce133"/>
          <table:table-cell table:style-name="ce135"/>
          <table:table-cell/>
          <table:table-cell table:style-name="ce138" office:value-type="float" office:value="5" calcext:value-type="float">
            <text:p>5</text:p>
          </table:table-cell>
          <table:table-cell table:style-name="ce143" table:formula="of:=+[.AC31]" office:value-type="float" office:value="132222.158" calcext:value-type="float">
            <text:p>132,222.16</text:p>
          </table:table-cell>
          <table:table-cell table:style-name="ce146" table:number-columns-repeated="2"/>
          <table:table-cell table:style-name="ce139" table:number-columns-repeated="6"/>
          <table:table-cell table:number-columns-repeated="220"/>
        </table:table-row>
        <table:table-row table:style-name="ro15">
          <table:table-cell table:number-columns-repeated="15"/>
          <table:table-cell table:style-name="ce117" table:formula="of:=+[.P40]+1" office:value-type="float" office:value="2024" calcext:value-type="float">
            <text:p>2024</text:p>
          </table:table-cell>
          <table:table-cell table:style-name="ce125" table:formula="of:=+[.Q40]" office:value-type="float" office:value="11443.696" calcext:value-type="float">
            <text:p>11,444</text:p>
          </table:table-cell>
          <table:table-cell table:style-name="ce129"/>
          <table:table-cell table:style-name="ce118" table:number-columns-repeated="4"/>
          <table:table-cell table:style-name="ce114"/>
          <table:table-cell table:style-name="ce132"/>
          <table:table-cell table:style-name="ce133"/>
          <table:table-cell table:style-name="ce135"/>
          <table:table-cell/>
          <table:table-cell table:style-name="ce138" office:value-type="float" office:value="6" calcext:value-type="float">
            <text:p>6</text:p>
          </table:table-cell>
          <table:table-cell table:style-name="ce143" table:formula="of:=+[.AC32]" office:value-type="float" office:value="135329.7516" calcext:value-type="float">
            <text:p>135,329.75</text:p>
          </table:table-cell>
          <table:table-cell table:style-name="ce146" table:number-columns-repeated="2"/>
          <table:table-cell table:style-name="ce148" table:number-columns-repeated="5"/>
          <table:table-cell table:style-name="ce139"/>
          <table:table-cell table:number-columns-repeated="220"/>
        </table:table-row>
        <table:table-row table:style-name="ro15">
          <table:table-cell table:number-columns-repeated="15"/>
          <table:table-cell table:style-name="ce117" table:formula="of:=+[.P41]+1" office:value-type="float" office:value="2025" calcext:value-type="float">
            <text:p>2025</text:p>
          </table:table-cell>
          <table:table-cell table:style-name="ce125" table:formula="of:=+[.Q41]" office:value-type="float" office:value="11443.696" calcext:value-type="float">
            <text:p>11,444</text:p>
          </table:table-cell>
          <table:table-cell table:style-name="ce129"/>
          <table:table-cell table:style-name="ce118" table:number-columns-repeated="4"/>
          <table:table-cell table:style-name="ce114"/>
          <table:table-cell table:style-name="ce132"/>
          <table:table-cell table:style-name="ce133"/>
          <table:table-cell table:style-name="ce135"/>
          <table:table-cell/>
          <table:table-cell table:style-name="ce138" office:value-type="float" office:value="7" calcext:value-type="float">
            <text:p>7</text:p>
          </table:table-cell>
          <table:table-cell table:style-name="ce143" table:formula="of:=+[.AC33]" office:value-type="float" office:value="130082.6264" calcext:value-type="float">
            <text:p>130,082.63</text:p>
          </table:table-cell>
          <table:table-cell table:style-name="ce146" table:number-columns-repeated="2"/>
          <table:table-cell table:style-name="ce148" table:number-columns-repeated="5"/>
          <table:table-cell table:style-name="ce139"/>
          <table:table-cell table:number-columns-repeated="220"/>
        </table:table-row>
        <table:table-row table:style-name="ro15">
          <table:table-cell table:number-columns-repeated="15"/>
          <table:table-cell table:style-name="ce118" table:number-columns-repeated="7"/>
          <table:table-cell table:style-name="ce114" table:number-columns-repeated="4"/>
          <table:table-cell/>
          <table:table-cell table:style-name="ce138" office:value-type="float" office:value="8" calcext:value-type="float">
            <text:p>8</text:p>
          </table:table-cell>
          <table:table-cell table:style-name="ce143" table:formula="of:=+[.AC34]" office:value-type="float" office:value="133746.4084" calcext:value-type="float">
            <text:p>133,746.41</text:p>
          </table:table-cell>
          <table:table-cell table:style-name="ce146" table:number-columns-repeated="2"/>
          <table:table-cell table:style-name="ce148" table:number-columns-repeated="5"/>
          <table:table-cell table:style-name="ce139"/>
          <table:table-cell table:number-columns-repeated="220"/>
        </table:table-row>
        <table:table-row table:style-name="ro15">
          <table:table-cell table:number-columns-repeated="15"/>
          <table:table-cell table:style-name="ce114" table:number-columns-repeated="11"/>
          <table:table-cell table:number-columns-repeated="3"/>
          <table:table-cell table:style-name="ce148"/>
          <table:table-cell table:style-name="ce147" table:number-columns-repeated="2"/>
          <table:table-cell table:style-name="ce145"/>
          <table:table-cell table:style-name="ce148"/>
          <table:table-cell table:style-name="ce147"/>
          <table:table-cell table:style-name="ce145"/>
          <table:table-cell table:number-columns-repeated="221"/>
        </table:table-row>
        <table:table-row table:style-name="ro15">
          <table:table-cell table:number-columns-repeated="17"/>
          <table:table-cell>
            <draw:frame draw:z-index="0" draw:name="Chart 1" draw:style-name="gr1" draw:text-style-name="P1" svg:width="11.001cm" svg:height="10.774cm" svg:x="0.955cm" svg:y="0.021cm">
              <draw:object draw:notify-on-update-of-ranges="OFERTA.Q36:OFERTA.Q36 OFERTA.Q37:OFERTA.Q42" xlink:href="./Object 1" xlink:type="simple" xlink:show="embed" xlink:actuate="onLoad">
                <loext:p/>
              </draw:object>
              <draw:image xlink:href="./ObjectReplacements/Object 1" xlink:type="simple" xlink:show="embed" xlink:actuate="onLoad"/>
            </draw:frame>
          </table:table-cell>
          <table:table-cell table:number-columns-repeated="11"/>
          <table:table-cell table:style-name="ce148"/>
          <table:table-cell table:style-name="ce149" table:number-columns-repeated="2"/>
          <table:table-cell table:style-name="ce150"/>
          <table:table-cell table:style-name="ce148"/>
          <table:table-cell table:style-name="ce149"/>
          <table:table-cell table:style-name="ce150"/>
          <table:table-cell table:number-columns-repeated="221"/>
        </table:table-row>
        <table:table-row table:style-name="ro15" table:number-rows-repeated="2">
          <table:table-cell table:number-columns-repeated="29"/>
          <table:table-cell table:style-name="ce148"/>
          <table:table-cell table:style-name="ce149" table:number-columns-repeated="2"/>
          <table:table-cell table:style-name="ce150"/>
          <table:table-cell table:style-name="ce148"/>
          <table:table-cell table:style-name="ce149"/>
          <table:table-cell table:style-name="ce150"/>
          <table:table-cell table:number-columns-repeated="221"/>
        </table:table-row>
        <table:table-row table:style-name="ro20">
          <table:table-cell table:number-columns-repeated="26"/>
          <table:table-cell table:style-name="ce120"/>
          <table:table-cell table:style-name="ce120" office:value-type="string" calcext:value-type="string">
            <text:p>Años</text:p>
          </table:table-cell>
          <table:table-cell table:style-name="ce142" office:value-type="string" calcext:value-type="string">
            <text:p>Población Total Cuyes</text:p>
          </table:table-cell>
          <table:table-cell table:style-name="ce148"/>
          <table:table-cell table:style-name="ce149" table:number-columns-repeated="2"/>
          <table:table-cell table:style-name="ce150"/>
          <table:table-cell table:style-name="ce148"/>
          <table:table-cell table:style-name="ce149"/>
          <table:table-cell table:style-name="ce150"/>
          <table:table-cell table:number-columns-repeated="221"/>
        </table:table-row>
        <table:table-row table:style-name="ro15">
          <table:table-cell table:number-columns-repeated="26"/>
          <table:table-cell table:style-name="ce138" office:value-type="float" office:value="9" calcext:value-type="float">
            <text:p>9</text:p>
          </table:table-cell>
          <table:table-cell table:style-name="ce138" table:formula="of:=+[.AB34]+1" office:value-type="float" office:value="2020" calcext:value-type="float">
            <text:p>2020</text:p>
          </table:table-cell>
          <table:table-cell table:style-name="ce144" table:formula="of:=99827+4605.9*[.AA49]" office:value-type="float" office:value="141280.1" calcext:value-type="float">
            <text:p>141,280</text:p>
          </table:table-cell>
          <table:table-cell table:style-name="ce148"/>
          <table:table-cell table:style-name="ce149" table:number-columns-repeated="2"/>
          <table:table-cell table:style-name="ce150"/>
          <table:table-cell table:style-name="ce148"/>
          <table:table-cell table:style-name="ce149"/>
          <table:table-cell table:style-name="ce150"/>
          <table:table-cell table:number-columns-repeated="221"/>
        </table:table-row>
        <table:table-row table:style-name="ro15">
          <table:table-cell table:number-columns-repeated="26"/>
          <table:table-cell table:style-name="ce138" table:formula="of:=+[.AA49]+1" office:value-type="float" office:value="10" calcext:value-type="float">
            <text:p>10</text:p>
          </table:table-cell>
          <table:table-cell table:style-name="ce138" table:formula="of:=+[.AB49]+1" office:value-type="float" office:value="2021" calcext:value-type="float">
            <text:p>2021</text:p>
          </table:table-cell>
          <table:table-cell table:style-name="ce144" table:formula="of:=99827+4605.9*[.AA50]" office:value-type="float" office:value="145886" calcext:value-type="float">
            <text:p>145,886</text:p>
          </table:table-cell>
          <table:table-cell table:style-name="ce148"/>
          <table:table-cell table:style-name="ce149" table:number-columns-repeated="2"/>
          <table:table-cell table:style-name="ce150"/>
          <table:table-cell table:style-name="ce148"/>
          <table:table-cell table:style-name="ce149"/>
          <table:table-cell table:style-name="ce150"/>
          <table:table-cell table:number-columns-repeated="221"/>
        </table:table-row>
        <table:table-row table:style-name="ro15">
          <table:table-cell table:number-columns-repeated="26"/>
          <table:table-cell table:style-name="ce138" table:formula="of:=+[.AA50]+1" office:value-type="float" office:value="11" calcext:value-type="float">
            <text:p>11</text:p>
          </table:table-cell>
          <table:table-cell table:style-name="ce138" table:formula="of:=+[.AB50]+1" office:value-type="float" office:value="2022" calcext:value-type="float">
            <text:p>2022</text:p>
          </table:table-cell>
          <table:table-cell table:style-name="ce144" table:formula="of:=99827+4605.9*[.AA51]" office:value-type="float" office:value="150491.9" calcext:value-type="float">
            <text:p>150,492</text:p>
          </table:table-cell>
          <table:table-cell table:style-name="ce148"/>
          <table:table-cell table:style-name="ce149" table:number-columns-repeated="2"/>
          <table:table-cell table:style-name="ce150"/>
          <table:table-cell table:style-name="ce148"/>
          <table:table-cell table:style-name="ce149"/>
          <table:table-cell table:style-name="ce150"/>
          <table:table-cell table:number-columns-repeated="221"/>
        </table:table-row>
        <table:table-row table:style-name="ro15">
          <table:table-cell table:number-columns-repeated="26"/>
          <table:table-cell table:style-name="ce138" table:formula="of:=+[.AA51]+1" office:value-type="float" office:value="12" calcext:value-type="float">
            <text:p>12</text:p>
          </table:table-cell>
          <table:table-cell table:style-name="ce138" table:formula="of:=+[.AB51]+1" office:value-type="float" office:value="2023" calcext:value-type="float">
            <text:p>2023</text:p>
          </table:table-cell>
          <table:table-cell table:style-name="ce144" table:formula="of:=99827+4605.9*[.AA52]" office:value-type="float" office:value="155097.8" calcext:value-type="float">
            <text:p>155,098</text:p>
          </table:table-cell>
          <table:table-cell table:style-name="ce148"/>
          <table:table-cell table:style-name="ce149" table:number-columns-repeated="2"/>
          <table:table-cell table:style-name="ce150"/>
          <table:table-cell table:style-name="ce148"/>
          <table:table-cell table:style-name="ce149"/>
          <table:table-cell table:style-name="ce150"/>
          <table:table-cell table:number-columns-repeated="221"/>
        </table:table-row>
        <table:table-row table:style-name="ro15">
          <table:table-cell table:number-columns-repeated="26"/>
          <table:table-cell table:style-name="ce138" table:formula="of:=+[.AA52]+1" office:value-type="float" office:value="13" calcext:value-type="float">
            <text:p>13</text:p>
          </table:table-cell>
          <table:table-cell table:style-name="ce138" table:formula="of:=+[.AB52]+1" office:value-type="float" office:value="2024" calcext:value-type="float">
            <text:p>2024</text:p>
          </table:table-cell>
          <table:table-cell table:style-name="ce144" table:formula="of:=99827+4605.9*[.AA53]" office:value-type="float" office:value="159703.7" calcext:value-type="float">
            <text:p>159,704</text:p>
          </table:table-cell>
          <table:table-cell table:style-name="ce148"/>
          <table:table-cell table:style-name="ce149" table:number-columns-repeated="2"/>
          <table:table-cell table:style-name="ce150"/>
          <table:table-cell table:style-name="ce148"/>
          <table:table-cell table:style-name="ce149"/>
          <table:table-cell table:style-name="ce150"/>
          <table:table-cell table:number-columns-repeated="221"/>
        </table:table-row>
        <table:table-row table:style-name="ro15">
          <table:table-cell table:number-columns-repeated="26"/>
          <table:table-cell table:style-name="ce138" table:formula="of:=+[.AA53]+1" office:value-type="float" office:value="14" calcext:value-type="float">
            <text:p>14</text:p>
          </table:table-cell>
          <table:table-cell table:style-name="ce138" table:formula="of:=+[.AB53]+1" office:value-type="float" office:value="2025" calcext:value-type="float">
            <text:p>2025</text:p>
          </table:table-cell>
          <table:table-cell table:style-name="ce144" table:formula="of:=99827+4605.9*[.AA54]" office:value-type="float" office:value="164309.6" calcext:value-type="float">
            <text:p>164,310</text:p>
          </table:table-cell>
          <table:table-cell table:style-name="ce148"/>
          <table:table-cell table:style-name="ce149" table:number-columns-repeated="2"/>
          <table:table-cell table:style-name="ce150"/>
          <table:table-cell table:style-name="ce148"/>
          <table:table-cell table:style-name="ce149"/>
          <table:table-cell table:style-name="ce150"/>
          <table:table-cell table:number-columns-repeated="221"/>
        </table:table-row>
        <table:table-row table:style-name="ro15" table:number-rows-repeated="3">
          <table:table-cell table:number-columns-repeated="29"/>
          <table:table-cell table:style-name="ce148"/>
          <table:table-cell table:style-name="ce149" table:number-columns-repeated="2"/>
          <table:table-cell table:style-name="ce150"/>
          <table:table-cell table:style-name="ce148"/>
          <table:table-cell table:style-name="ce149"/>
          <table:table-cell table:style-name="ce150"/>
          <table:table-cell table:number-columns-repeated="221"/>
        </table:table-row>
        <table:table-row table:style-name="ro15" table:number-rows-repeated="2">
          <table:table-cell table:number-columns-repeated="29"/>
          <table:table-cell table:style-name="ce148"/>
          <table:table-cell table:style-name="ce149" table:number-columns-repeated="2"/>
          <table:table-cell table:style-name="ce150"/>
          <table:table-cell table:style-name="ce148"/>
          <table:table-cell table:style-name="ce149"/>
          <table:table-cell table:style-name="ce150"/>
          <table:table-cell/>
          <table:table-cell table:style-name="ce139"/>
          <table:table-cell table:number-columns-repeated="219"/>
        </table:table-row>
        <table:table-row table:style-name="ro15" table:number-rows-repeated="2">
          <table:table-cell table:number-columns-repeated="29"/>
          <table:table-cell table:style-name="ce139" table:number-columns-repeated="9"/>
          <table:table-cell table:number-columns-repeated="219"/>
        </table:table-row>
        <table:table-row table:style-name="ro15" table:number-rows-repeated="5">
          <table:table-cell table:number-columns-repeated="26"/>
          <table:table-cell table:style-name="ce139" table:number-columns-repeated="12"/>
          <table:table-cell table:number-columns-repeated="219"/>
        </table:table-row>
        <table:table-row table:style-name="ro15" table:number-rows-repeated="10">
          <table:table-cell table:number-columns-repeated="26"/>
          <table:table-cell table:style-name="ce139" table:number-columns-repeated="14"/>
          <table:table-cell table:number-columns-repeated="217"/>
        </table:table-row>
        <table:table-row table:style-name="ro15" table:number-rows-repeated="2">
          <table:table-cell table:number-columns-repeated="26"/>
          <table:table-cell table:style-name="ce139" table:number-columns-repeated="11"/>
          <table:table-cell table:number-columns-repeated="220"/>
        </table:table-row>
        <table:table-row table:style-name="ro21" table:number-rows-repeated="1048497">
          <table:table-cell table:number-columns-repeated="257"/>
        </table:table-row>
        <table:table-row table:style-name="ro21">
          <table:table-cell table:number-columns-repeated="257"/>
        </table:table-row>
      </table:table>
      <table:table table:name="BRECHA" table:style-name="ta4">
        <table:table-column table:style-name="co38" table:default-cell-style-name="ce157"/>
        <table:table-column table:style-name="co10" table:default-cell-style-name="ce157"/>
        <table:table-column table:style-name="co39" table:default-cell-style-name="ce157"/>
        <table:table-column table:style-name="co40" table:default-cell-style-name="ce157"/>
        <table:table-column table:style-name="co1" table:number-columns-repeated="253" table:default-cell-style-name="ce157"/>
        <table:table-column table:style-name="co12" table:number-columns-repeated="16127"/>
        <table:table-row table:style-name="ro7">
          <table:table-cell table:style-name="ce154" office:value-type="string" calcext:value-type="string" table:number-columns-spanned="4" table:number-rows-spanned="1">
            <text:p>DETERMINACION DE LA BRECHA DEMANDA-OFERTA</text:p>
          </table:table-cell>
          <table:covered-table-cell table:number-columns-repeated="3" table:style-name="ce154"/>
          <table:table-cell table:number-columns-repeated="253"/>
        </table:table-row>
        <table:table-row table:style-name="ro15">
          <table:table-cell table:style-name="ce142" office:value-type="string" calcext:value-type="string">
            <text:p>AÑO</text:p>
          </table:table-cell>
          <table:table-cell table:style-name="ce142" office:value-type="string" calcext:value-type="string">
            <text:p>DEMANDA</text:p>
          </table:table-cell>
          <table:table-cell table:style-name="ce142" office:value-type="string" calcext:value-type="string">
            <text:p>OFERTA</text:p>
          </table:table-cell>
          <table:table-cell table:style-name="ce142" office:value-type="string" calcext:value-type="string">
            <text:p>BRECHA</text:p>
          </table:table-cell>
          <table:table-cell table:number-columns-repeated="253"/>
        </table:table-row>
        <table:table-row table:style-name="ro15">
          <table:table-cell table:style-name="ce155" table:formula="of:=+['file:///home/achalmaedison/Downloads/PLANES%20GANADORES%20DEL%20PROCOMPITE%202020/GANADORES%20CATEGORIA%20A%20PROCOMPITE%202020/1.%20ASOC.%20PRODUCT.%20AGROPE.%20CASAORCCO%20APAL%20-%20CUY%20A/ANALISIS%20TECNICO%20FINANCIERO.xls'#$OFERTA.P37]" office:value-type="float" office:value="2020" calcext:value-type="float">
            <text:p>2020</text:p>
          </table:table-cell>
          <table:table-cell table:style-name="ce144" table:formula="of:=+[$DEMANDA.G63]" office:value-type="float" office:value="872747.904877635" calcext:value-type="float">
            <text:p>872,748</text:p>
          </table:table-cell>
          <table:table-cell table:style-name="ce144" table:formula="of:=+[$OFERTA.AC49]" office:value-type="float" office:value="141280.1" calcext:value-type="float">
            <text:p>141,280</text:p>
          </table:table-cell>
          <table:table-cell table:style-name="ce144" table:formula="of:=[.B3]-[.C3]" office:value-type="float" office:value="731467.804877635" calcext:value-type="float">
            <text:p>731,468</text:p>
          </table:table-cell>
          <table:table-cell table:number-columns-repeated="253"/>
        </table:table-row>
        <table:table-row table:style-name="ro15">
          <table:table-cell table:style-name="ce155" table:formula="of:=+['file:///home/achalmaedison/Downloads/PLANES%20GANADORES%20DEL%20PROCOMPITE%202020/GANADORES%20CATEGORIA%20A%20PROCOMPITE%202020/1.%20ASOC.%20PRODUCT.%20AGROPE.%20CASAORCCO%20APAL%20-%20CUY%20A/ANALISIS%20TECNICO%20FINANCIERO.xls'#$OFERTA.P38]" office:value-type="float" office:value="2021" calcext:value-type="float">
            <text:p>2021</text:p>
          </table:table-cell>
          <table:table-cell table:style-name="ce144" table:formula="of:=+[$DEMANDA.G64]" office:value-type="float" office:value="894185.84862604" calcext:value-type="float">
            <text:p>894,186</text:p>
          </table:table-cell>
          <table:table-cell table:style-name="ce144" table:formula="of:=+[$OFERTA.AC50]" office:value-type="float" office:value="145886" calcext:value-type="float">
            <text:p>145,886</text:p>
          </table:table-cell>
          <table:table-cell table:style-name="ce144" table:formula="of:=[.B4]-[.C4]" office:value-type="float" office:value="748299.84862604" calcext:value-type="float">
            <text:p>748,300</text:p>
          </table:table-cell>
          <table:table-cell table:number-columns-repeated="253"/>
        </table:table-row>
        <table:table-row table:style-name="ro15">
          <table:table-cell table:style-name="ce155" table:formula="of:=+['file:///home/achalmaedison/Downloads/PLANES%20GANADORES%20DEL%20PROCOMPITE%202020/GANADORES%20CATEGORIA%20A%20PROCOMPITE%202020/1.%20ASOC.%20PRODUCT.%20AGROPE.%20CASAORCCO%20APAL%20-%20CUY%20A/ANALISIS%20TECNICO%20FINANCIERO.xls'#$OFERTA.P39]" office:value-type="float" office:value="2022" calcext:value-type="float">
            <text:p>2022</text:p>
          </table:table-cell>
          <table:table-cell table:style-name="ce144" table:formula="of:=+[$DEMANDA.G65]" office:value-type="float" office:value="916150.388232873" calcext:value-type="float">
            <text:p>916,150</text:p>
          </table:table-cell>
          <table:table-cell table:style-name="ce144" table:formula="of:=+[$OFERTA.AC51]" office:value-type="float" office:value="150491.9" calcext:value-type="float">
            <text:p>150,492</text:p>
          </table:table-cell>
          <table:table-cell table:style-name="ce144" table:formula="of:=[.B5]-[.C5]" office:value-type="float" office:value="765658.488232873" calcext:value-type="float">
            <text:p>765,658</text:p>
          </table:table-cell>
          <table:table-cell table:number-columns-repeated="253"/>
          <table:table-cell table:style-name="ce157" table:number-columns-repeated="16127"/>
        </table:table-row>
        <table:table-row table:style-name="ro15">
          <table:table-cell table:style-name="ce155" table:formula="of:=+['file:///home/achalmaedison/Downloads/PLANES%20GANADORES%20DEL%20PROCOMPITE%202020/GANADORES%20CATEGORIA%20A%20PROCOMPITE%202020/1.%20ASOC.%20PRODUCT.%20AGROPE.%20CASAORCCO%20APAL%20-%20CUY%20A/ANALISIS%20TECNICO%20FINANCIERO.xls'#$OFERTA.P40]" office:value-type="float" office:value="2023" calcext:value-type="float">
            <text:p>2023</text:p>
          </table:table-cell>
          <table:table-cell table:style-name="ce144" table:formula="of:=+[$DEMANDA.G66]" office:value-type="float" office:value="938654.458856532" calcext:value-type="float">
            <text:p>938,654</text:p>
          </table:table-cell>
          <table:table-cell table:style-name="ce144" table:formula="of:=+[$OFERTA.AC52]" office:value-type="float" office:value="155097.8" calcext:value-type="float">
            <text:p>155,098</text:p>
          </table:table-cell>
          <table:table-cell table:style-name="ce144" table:formula="of:=[.B6]-[.C6]" office:value-type="float" office:value="783556.658856532" calcext:value-type="float">
            <text:p>783,557</text:p>
          </table:table-cell>
          <table:table-cell table:number-columns-repeated="253"/>
        </table:table-row>
        <table:table-row table:style-name="ro15">
          <table:table-cell table:style-name="ce155" table:formula="of:=+['file:///home/achalmaedison/Downloads/PLANES%20GANADORES%20DEL%20PROCOMPITE%202020/GANADORES%20CATEGORIA%20A%20PROCOMPITE%202020/1.%20ASOC.%20PRODUCT.%20AGROPE.%20CASAORCCO%20APAL%20-%20CUY%20A/ANALISIS%20TECNICO%20FINANCIERO.xls'#$OFERTA.P41]" office:value-type="float" office:value="2024" calcext:value-type="float">
            <text:p>2024</text:p>
          </table:table-cell>
          <table:table-cell table:style-name="ce144" table:formula="of:=+[$DEMANDA.G67]" office:value-type="float" office:value="961711.31339115" calcext:value-type="float">
            <text:p>961,711</text:p>
          </table:table-cell>
          <table:table-cell table:style-name="ce144" table:formula="of:=+[$OFERTA.AC53]" office:value-type="float" office:value="159703.7" calcext:value-type="float">
            <text:p>159,704</text:p>
          </table:table-cell>
          <table:table-cell table:style-name="ce144" table:formula="of:=[.B7]-[.C7]" office:value-type="float" office:value="802007.61339115" calcext:value-type="float">
            <text:p>802,008</text:p>
          </table:table-cell>
          <table:table-cell table:number-columns-repeated="253"/>
        </table:table-row>
        <table:table-row table:style-name="ro15">
          <table:table-cell table:style-name="ce155" table:formula="of:=+['file:///home/achalmaedison/Downloads/PLANES%20GANADORES%20DEL%20PROCOMPITE%202020/GANADORES%20CATEGORIA%20A%20PROCOMPITE%202020/1.%20ASOC.%20PRODUCT.%20AGROPE.%20CASAORCCO%20APAL%20-%20CUY%20A/ANALISIS%20TECNICO%20FINANCIERO.xls'#$OFERTA.P42]" office:value-type="float" office:value="2025" calcext:value-type="float">
            <text:p>2025</text:p>
          </table:table-cell>
          <table:table-cell table:style-name="ce144" table:formula="of:=+[$DEMANDA.G68]" office:value-type="float" office:value="985334.530271374" calcext:value-type="float">
            <text:p>985,335</text:p>
          </table:table-cell>
          <table:table-cell table:style-name="ce144" table:formula="of:=+[$OFERTA.AC54]" office:value-type="float" office:value="164309.6" calcext:value-type="float">
            <text:p>164,310</text:p>
          </table:table-cell>
          <table:table-cell table:style-name="ce144" table:formula="of:=[.B8]-[.C8]" office:value-type="float" office:value="821024.930271374" calcext:value-type="float">
            <text:p>821,025</text:p>
          </table:table-cell>
          <table:table-cell table:number-columns-repeated="253"/>
        </table:table-row>
        <table:table-row table:style-name="ro9">
          <table:table-cell table:style-name="ce156" office:value-type="string" calcext:value-type="string" table:number-columns-spanned="4" table:number-rows-spanned="1">
            <text:p>FUENTE:Elaboración Propia</text:p>
          </table:table-cell>
          <table:covered-table-cell table:number-columns-repeated="3" table:style-name="ce156"/>
          <table:table-cell table:number-columns-repeated="253"/>
        </table:table-row>
        <table:table-row table:style-name="ro15" table:number-rows-repeated="1048566">
          <table:table-cell table:number-columns-repeated="257"/>
        </table:table-row>
        <table:table-row table:style-name="ro15">
          <table:table-cell table:number-columns-repeated="257"/>
        </table:table-row>
      </table:table>
      <table:table table:name="PLAN DE PRODUCCION" table:style-name="ta5" table:print-ranges="'PLAN DE PRODUCCION'.A1:'PLAN DE PRODUCCION'.U27">
        <table:table-column table:style-name="co41" table:default-cell-style-name="ce158"/>
        <table:table-column table:style-name="co27" table:default-cell-style-name="ce158"/>
        <table:table-column table:style-name="co42" table:default-cell-style-name="ce158"/>
        <table:table-column table:style-name="co39" table:default-cell-style-name="ce158"/>
        <table:table-column table:style-name="co14" table:default-cell-style-name="ce158"/>
        <table:table-column table:style-name="co43" table:default-cell-style-name="ce158"/>
        <table:table-column table:style-name="co13" table:default-cell-style-name="ce158"/>
        <table:table-column table:style-name="co44" table:default-cell-style-name="ce158"/>
        <table:table-column table:style-name="co45" table:number-columns-repeated="12" table:default-cell-style-name="ce158"/>
        <table:table-column table:style-name="co1" table:number-columns-repeated="237" table:default-cell-style-name="ce158"/>
        <table:table-column table:style-name="co12" table:number-columns-repeated="16127"/>
        <table:table-row table:style-name="ro22">
          <table:table-cell table:number-columns-repeated="257"/>
        </table:table-row>
        <table:table-row table:style-name="ro23">
          <table:table-cell/>
          <table:table-cell table:style-name="ce160" office:value-type="string" calcext:value-type="string">
            <text:p>AÑOS</text:p>
          </table:table-cell>
          <table:table-cell table:style-name="ce164" office:value-type="string" calcext:value-type="string">
            <text:p>PRODUCCION (UND)</text:p>
          </table:table-cell>
          <table:table-cell table:number-columns-repeated="254"/>
        </table:table-row>
        <table:table-row table:style-name="ro22" table:visibility="collapse">
          <table:table-cell/>
          <table:table-cell table:style-name="ce161" table:formula="of:=+#REF!" office:value-type="string" office:string-value="" calcext:value-type="error">
            <text:p>#¡REF!</text:p>
          </table:table-cell>
          <table:table-cell table:style-name="ce166" table:formula="of:=+#REF!" office:value-type="string" office:string-value="" calcext:value-type="error">
            <text:p>#¡REF!</text:p>
          </table:table-cell>
          <table:table-cell table:number-columns-repeated="254"/>
        </table:table-row>
        <table:table-row table:style-name="ro22">
          <table:table-cell/>
          <table:table-cell table:style-name="ce162" table:formula="of:=+[$BRECHA.A4]" office:value-type="float" office:value="2021" calcext:value-type="float">
            <text:p>2021</text:p>
          </table:table-cell>
          <table:table-cell table:style-name="ce167" table:formula="of:=+[$OFERTA.Q38]" office:value-type="float" office:value="3440.46069833684" calcext:value-type="float">
            <text:p>3,440</text:p>
          </table:table-cell>
          <table:table-cell table:formula="of:=+[.C4]/12" office:value-type="float" office:value="286.705058194736" calcext:value-type="float">
            <text:p>286.705058194736</text:p>
          </table:table-cell>
          <table:table-cell table:number-columns-repeated="253"/>
        </table:table-row>
        <table:table-row table:style-name="ro22">
          <table:table-cell/>
          <table:table-cell table:style-name="ce162" table:formula="of:=+[$BRECHA.A5]" office:value-type="float" office:value="2022" calcext:value-type="float">
            <text:p>2022</text:p>
          </table:table-cell>
          <table:table-cell table:style-name="ce167" table:formula="of:=+[$OFERTA.Q39]" office:value-type="float" office:value="11443.696" calcext:value-type="float">
            <text:p>11,444</text:p>
          </table:table-cell>
          <table:table-cell table:number-columns-repeated="254"/>
        </table:table-row>
        <table:table-row table:style-name="ro22">
          <table:table-cell/>
          <table:table-cell table:style-name="ce162" table:formula="of:=+[$BRECHA.A6]" office:value-type="float" office:value="2023" calcext:value-type="float">
            <text:p>2023</text:p>
          </table:table-cell>
          <table:table-cell table:style-name="ce167" table:formula="of:=+[$OFERTA.Q40]" office:value-type="float" office:value="11443.696" calcext:value-type="float">
            <text:p>11,444</text:p>
          </table:table-cell>
          <table:table-cell table:number-columns-repeated="254"/>
        </table:table-row>
        <table:table-row table:style-name="ro22">
          <table:table-cell/>
          <table:table-cell table:style-name="ce162" table:formula="of:=+[$BRECHA.A7]" office:value-type="float" office:value="2024" calcext:value-type="float">
            <text:p>2024</text:p>
          </table:table-cell>
          <table:table-cell table:style-name="ce167" table:formula="of:=+[$OFERTA.Q41]" office:value-type="float" office:value="11443.696" calcext:value-type="float">
            <text:p>11,444</text:p>
          </table:table-cell>
          <table:table-cell table:number-columns-repeated="254"/>
        </table:table-row>
        <table:table-row table:style-name="ro22">
          <table:table-cell/>
          <table:table-cell table:style-name="ce162" table:formula="of:=+[$BRECHA.A8]" office:value-type="float" office:value="2025" calcext:value-type="float">
            <text:p>2025</text:p>
          </table:table-cell>
          <table:table-cell table:style-name="ce167" table:formula="of:=+[$OFERTA.Q42]" office:value-type="float" office:value="11443.696" calcext:value-type="float">
            <text:p>11,444</text:p>
          </table:table-cell>
          <table:table-cell table:number-columns-repeated="2"/>
          <table:table-cell table:style-name="ce174"/>
          <table:table-cell table:number-columns-repeated="251"/>
        </table:table-row>
        <table:table-row table:style-name="ro22">
          <table:table-cell table:number-columns-repeated="5"/>
          <table:table-cell table:style-name="ce174"/>
          <table:table-cell table:number-columns-repeated="251"/>
        </table:table-row>
        <table:table-row table:style-name="ro22">
          <table:table-cell table:number-columns-repeated="257"/>
        </table:table-row>
        <table:table-row table:style-name="ro24">
          <table:table-cell table:style-name="ce159"/>
          <table:table-cell table:style-name="ce163" office:value-type="string" calcext:value-type="string" table:number-columns-spanned="4" table:number-rows-spanned="1">
            <text:p><text:s text:c="3"/>PLAN DE PRODUCCION DEL CUY</text:p>
          </table:table-cell>
          <table:covered-table-cell table:number-columns-repeated="3" table:style-name="ce163"/>
          <table:table-cell/>
          <table:table-cell table:style-name="ce159" table:number-columns-repeated="16378"/>
        </table:table-row>
        <table:table-row table:style-name="ro25">
          <table:table-cell table:style-name="ce159"/>
          <table:table-cell table:style-name="ce164" office:value-type="string" calcext:value-type="string">
            <text:p>AÑOS</text:p>
          </table:table-cell>
          <table:table-cell table:style-name="ce164" office:value-type="string" calcext:value-type="string">
            <text:p>DEMANDA INSATISFECHA </text:p>
          </table:table-cell>
          <table:table-cell table:style-name="ce164" office:value-type="string" calcext:value-type="string">
            <text:p>PRODUCCION</text:p>
          </table:table-cell>
          <table:table-cell table:style-name="ce164" office:value-type="string" calcext:value-type="string">
            <text:p>COBERTURA</text:p>
          </table:table-cell>
          <table:table-cell table:style-name="ce159"/>
          <table:table-cell table:style-name="ce165" office:value-type="string" calcext:value-type="string">
            <text:p>AÑOS</text:p>
          </table:table-cell>
          <table:table-cell table:style-name="ce165" office:value-type="string" calcext:value-type="string">
            <text:p>PRODUCCION (UND.)</text:p>
          </table:table-cell>
          <table:table-cell table:style-name="ce165" office:value-type="string" calcext:value-type="string">
            <text:p>Ene</text:p>
          </table:table-cell>
          <table:table-cell table:style-name="ce165" office:value-type="string" calcext:value-type="string">
            <text:p>Feb</text:p>
          </table:table-cell>
          <table:table-cell table:style-name="ce165" office:value-type="string" calcext:value-type="string">
            <text:p>Mar</text:p>
          </table:table-cell>
          <table:table-cell table:style-name="ce165" office:value-type="string" calcext:value-type="string">
            <text:p>Abr</text:p>
          </table:table-cell>
          <table:table-cell table:style-name="ce165" office:value-type="string" calcext:value-type="string">
            <text:p>May</text:p>
          </table:table-cell>
          <table:table-cell table:style-name="ce165" office:value-type="string" calcext:value-type="string">
            <text:p>Jun</text:p>
          </table:table-cell>
          <table:table-cell table:style-name="ce165" office:value-type="string" calcext:value-type="string">
            <text:p>Jul</text:p>
          </table:table-cell>
          <table:table-cell table:style-name="ce165" office:value-type="string" calcext:value-type="string">
            <text:p>Ago</text:p>
          </table:table-cell>
          <table:table-cell table:style-name="ce165" office:value-type="string" calcext:value-type="string">
            <text:p>Sep</text:p>
          </table:table-cell>
          <table:table-cell table:style-name="ce165" office:value-type="string" calcext:value-type="string">
            <text:p>Oct</text:p>
          </table:table-cell>
          <table:table-cell table:style-name="ce165" office:value-type="string" calcext:value-type="string">
            <text:p>Nov</text:p>
          </table:table-cell>
          <table:table-cell table:style-name="ce165" office:value-type="string" calcext:value-type="string">
            <text:p>Dic</text:p>
          </table:table-cell>
          <table:table-cell table:style-name="ce159" table:number-columns-repeated="16364"/>
        </table:table-row>
        <table:table-row table:style-name="ro22" table:visibility="collapse">
          <table:table-cell/>
          <table:table-cell table:style-name="ce162" table:formula="of:=+[.B3]" office:value-type="string" office:string-value="" calcext:value-type="error">
            <text:p>#¡REF!</text:p>
          </table:table-cell>
          <table:table-cell table:style-name="ce168" table:formula="of:=+#REF!" office:value-type="string" office:string-value="" calcext:value-type="error">
            <text:p>#¡REF!</text:p>
          </table:table-cell>
          <table:table-cell table:style-name="ce170" table:formula="of:=[.C3]" office:value-type="string" office:string-value="" calcext:value-type="error">
            <text:p>#¡REF!</text:p>
          </table:table-cell>
          <table:table-cell table:style-name="ce173" table:formula="of:=[.D13]/[.C13]" office:value-type="string" office:string-value="" calcext:value-type="error">
            <text:p>#¡REF!</text:p>
          </table:table-cell>
          <table:table-cell/>
          <table:table-cell table:style-name="ce162" table:formula="of:=+[.B13]" office:value-type="string" office:string-value="" calcext:value-type="error">
            <text:p>#¡REF!</text:p>
          </table:table-cell>
          <table:table-cell table:style-name="ce168" table:formula="of:=SUM([.I13:.T13])" office:value-type="string" office:string-value="" calcext:value-type="error">
            <text:p>#¡REF!</text:p>
          </table:table-cell>
          <table:table-cell table:style-name="ce176" table:formula="of:=[.C3]/12" office:value-type="string" office:string-value="" calcext:value-type="error">
            <text:p>#¡REF!</text:p>
          </table:table-cell>
          <table:table-cell table:style-name="ce176" table:formula="of:=[.$I$13]" office:value-type="string" office:string-value="" calcext:value-type="error">
            <text:p>#¡REF!</text:p>
          </table:table-cell>
          <table:table-cell table:style-name="ce176" table:formula="of:=[.$I$13]" office:value-type="string" office:string-value="" calcext:value-type="error">
            <text:p>#¡REF!</text:p>
          </table:table-cell>
          <table:table-cell table:style-name="ce176" table:formula="of:=[.$I$13]" office:value-type="string" office:string-value="" calcext:value-type="error">
            <text:p>#¡REF!</text:p>
          </table:table-cell>
          <table:table-cell table:style-name="ce176" table:formula="of:=[.$I$13]" office:value-type="string" office:string-value="" calcext:value-type="error">
            <text:p>#¡REF!</text:p>
          </table:table-cell>
          <table:table-cell table:style-name="ce176" table:formula="of:=[.$I$13]" office:value-type="string" office:string-value="" calcext:value-type="error">
            <text:p>#¡REF!</text:p>
          </table:table-cell>
          <table:table-cell table:style-name="ce176" table:formula="of:=[.$I$13]" office:value-type="string" office:string-value="" calcext:value-type="error">
            <text:p>#¡REF!</text:p>
          </table:table-cell>
          <table:table-cell table:style-name="ce176" table:formula="of:=[.$I$13]" office:value-type="string" office:string-value="" calcext:value-type="error">
            <text:p>#¡REF!</text:p>
          </table:table-cell>
          <table:table-cell table:style-name="ce176" table:formula="of:=[.$I$13]" office:value-type="string" office:string-value="" calcext:value-type="error">
            <text:p>#¡REF!</text:p>
          </table:table-cell>
          <table:table-cell table:style-name="ce176" table:formula="of:=[.$I$13]" office:value-type="string" office:string-value="" calcext:value-type="error">
            <text:p>#¡REF!</text:p>
          </table:table-cell>
          <table:table-cell table:style-name="ce176" table:formula="of:=[.$I$13]" office:value-type="string" office:string-value="" calcext:value-type="error">
            <text:p>#¡REF!</text:p>
          </table:table-cell>
          <table:table-cell table:style-name="ce176" table:formula="of:=[.$I$13]" office:value-type="string" office:string-value="" calcext:value-type="error">
            <text:p>#¡REF!</text:p>
          </table:table-cell>
          <table:table-cell table:number-columns-repeated="237"/>
        </table:table-row>
        <table:table-row table:style-name="ro22">
          <table:table-cell/>
          <table:table-cell table:style-name="ce162" table:formula="of:=+[.B4]" office:value-type="float" office:value="2021" calcext:value-type="float">
            <text:p>2021</text:p>
          </table:table-cell>
          <table:table-cell table:style-name="ce167" table:formula="of:=+[$BRECHA.D4]" office:value-type="float" office:value="748299.84862604" calcext:value-type="float">
            <text:p>748,300</text:p>
          </table:table-cell>
          <table:table-cell table:style-name="ce171" table:formula="of:=[.C4]" office:value-type="float" office:value="3440.46069833684" calcext:value-type="float">
            <text:p>3440</text:p>
          </table:table-cell>
          <table:table-cell table:style-name="ce173" table:formula="of:=[.D14]/[.C14]" office:value-type="percentage" office:value="0.00459770331993772" calcext:value-type="percentage">
            <text:p>0.46 %</text:p>
          </table:table-cell>
          <table:table-cell/>
          <table:table-cell table:style-name="ce162" table:formula="of:=+[.B14]" office:value-type="float" office:value="2021" calcext:value-type="float">
            <text:p>2021</text:p>
          </table:table-cell>
          <table:table-cell table:style-name="ce169" table:formula="of:=SUM([.I14:.T14])" office:value-type="float" office:value="3440.46069833684" calcext:value-type="float">
            <text:p>3,440</text:p>
          </table:table-cell>
          <table:table-cell table:style-name="ce177" table:formula="of:=[.C4]/12" office:value-type="float" office:value="286.705058194736" calcext:value-type="float">
            <text:p>287</text:p>
          </table:table-cell>
          <table:table-cell table:style-name="ce177" table:formula="of:=[.$I$14]" office:value-type="float" office:value="286.705058194736" calcext:value-type="float">
            <text:p>287</text:p>
          </table:table-cell>
          <table:table-cell table:style-name="ce177" table:formula="of:=[.$I$14]" office:value-type="float" office:value="286.705058194736" calcext:value-type="float">
            <text:p>287</text:p>
          </table:table-cell>
          <table:table-cell table:style-name="ce177" table:formula="of:=[.$I$14]" office:value-type="float" office:value="286.705058194736" calcext:value-type="float">
            <text:p>287</text:p>
          </table:table-cell>
          <table:table-cell table:style-name="ce177" table:formula="of:=[.$I$14]" office:value-type="float" office:value="286.705058194736" calcext:value-type="float">
            <text:p>287</text:p>
          </table:table-cell>
          <table:table-cell table:style-name="ce177" table:formula="of:=[.$I$14]" office:value-type="float" office:value="286.705058194736" calcext:value-type="float">
            <text:p>287</text:p>
          </table:table-cell>
          <table:table-cell table:style-name="ce177" table:formula="of:=[.$I$14]" office:value-type="float" office:value="286.705058194736" calcext:value-type="float">
            <text:p>287</text:p>
          </table:table-cell>
          <table:table-cell table:style-name="ce177" table:formula="of:=[.$I$14]" office:value-type="float" office:value="286.705058194736" calcext:value-type="float">
            <text:p>287</text:p>
          </table:table-cell>
          <table:table-cell table:style-name="ce177" table:formula="of:=[.$I$14]" office:value-type="float" office:value="286.705058194736" calcext:value-type="float">
            <text:p>287</text:p>
          </table:table-cell>
          <table:table-cell table:style-name="ce177" table:formula="of:=[.$I$14]" office:value-type="float" office:value="286.705058194736" calcext:value-type="float">
            <text:p>287</text:p>
          </table:table-cell>
          <table:table-cell table:style-name="ce177" table:formula="of:=[.$I$14]" office:value-type="float" office:value="286.705058194736" calcext:value-type="float">
            <text:p>287</text:p>
          </table:table-cell>
          <table:table-cell table:style-name="ce177" table:formula="of:=[.$I$14]" office:value-type="float" office:value="286.705058194736" calcext:value-type="float">
            <text:p>287</text:p>
          </table:table-cell>
          <table:table-cell table:number-columns-repeated="237"/>
        </table:table-row>
        <table:table-row table:style-name="ro22">
          <table:table-cell/>
          <table:table-cell table:style-name="ce162" table:formula="of:=+[.B5]" office:value-type="float" office:value="2022" calcext:value-type="float">
            <text:p>2022</text:p>
          </table:table-cell>
          <table:table-cell table:style-name="ce167" table:formula="of:=+[$BRECHA.D5]" office:value-type="float" office:value="765658.488232873" calcext:value-type="float">
            <text:p>765,658</text:p>
          </table:table-cell>
          <table:table-cell table:style-name="ce171" table:formula="of:=[.C5]" office:value-type="float" office:value="11443.696" calcext:value-type="float">
            <text:p>11444</text:p>
          </table:table-cell>
          <table:table-cell table:style-name="ce173" table:formula="of:=[.D15]/[.C15]" office:value-type="percentage" office:value="0.0149462145014703" calcext:value-type="percentage">
            <text:p>1.49 %</text:p>
          </table:table-cell>
          <table:table-cell/>
          <table:table-cell table:style-name="ce162" table:formula="of:=+[.B15]" office:value-type="float" office:value="2022" calcext:value-type="float">
            <text:p>2022</text:p>
          </table:table-cell>
          <table:table-cell table:style-name="ce169" table:formula="of:=SUM([.I15:.T15])" office:value-type="float" office:value="11443.696" calcext:value-type="float">
            <text:p>11,444</text:p>
          </table:table-cell>
          <table:table-cell table:style-name="ce177" table:formula="of:=[.C5]/12" office:value-type="float" office:value="953.641333333333" calcext:value-type="float">
            <text:p>954</text:p>
          </table:table-cell>
          <table:table-cell table:style-name="ce177" table:formula="of:=[.$I$15]" office:value-type="float" office:value="953.641333333333" calcext:value-type="float">
            <text:p>954</text:p>
          </table:table-cell>
          <table:table-cell table:style-name="ce177" table:formula="of:=[.$I$15]" office:value-type="float" office:value="953.641333333333" calcext:value-type="float">
            <text:p>954</text:p>
          </table:table-cell>
          <table:table-cell table:style-name="ce177" table:formula="of:=[.$I$15]" office:value-type="float" office:value="953.641333333333" calcext:value-type="float">
            <text:p>954</text:p>
          </table:table-cell>
          <table:table-cell table:style-name="ce177" table:formula="of:=[.$I$15]" office:value-type="float" office:value="953.641333333333" calcext:value-type="float">
            <text:p>954</text:p>
          </table:table-cell>
          <table:table-cell table:style-name="ce177" table:formula="of:=[.$I$15]" office:value-type="float" office:value="953.641333333333" calcext:value-type="float">
            <text:p>954</text:p>
          </table:table-cell>
          <table:table-cell table:style-name="ce177" table:formula="of:=[.$I$15]" office:value-type="float" office:value="953.641333333333" calcext:value-type="float">
            <text:p>954</text:p>
          </table:table-cell>
          <table:table-cell table:style-name="ce177" table:formula="of:=[.$I$15]" office:value-type="float" office:value="953.641333333333" calcext:value-type="float">
            <text:p>954</text:p>
          </table:table-cell>
          <table:table-cell table:style-name="ce177" table:formula="of:=[.$I$15]" office:value-type="float" office:value="953.641333333333" calcext:value-type="float">
            <text:p>954</text:p>
          </table:table-cell>
          <table:table-cell table:style-name="ce177" table:formula="of:=[.$I$15]" office:value-type="float" office:value="953.641333333333" calcext:value-type="float">
            <text:p>954</text:p>
          </table:table-cell>
          <table:table-cell table:style-name="ce177" table:formula="of:=[.$I$15]" office:value-type="float" office:value="953.641333333333" calcext:value-type="float">
            <text:p>954</text:p>
          </table:table-cell>
          <table:table-cell table:style-name="ce177" table:formula="of:=[.$I$15]" office:value-type="float" office:value="953.641333333333" calcext:value-type="float">
            <text:p>954</text:p>
          </table:table-cell>
          <table:table-cell table:number-columns-repeated="237"/>
        </table:table-row>
        <table:table-row table:style-name="ro22">
          <table:table-cell/>
          <table:table-cell table:style-name="ce162" table:formula="of:=+[.B6]" office:value-type="float" office:value="2023" calcext:value-type="float">
            <text:p>2023</text:p>
          </table:table-cell>
          <table:table-cell table:style-name="ce167" table:formula="of:=+[$BRECHA.D6]" office:value-type="float" office:value="783556.658856532" calcext:value-type="float">
            <text:p>783,557</text:p>
          </table:table-cell>
          <table:table-cell table:style-name="ce171" table:formula="of:=[.C6]" office:value-type="float" office:value="11443.696" calcext:value-type="float">
            <text:p>11444</text:p>
          </table:table-cell>
          <table:table-cell table:style-name="ce173" table:formula="of:=[.D16]/[.C16]" office:value-type="percentage" office:value="0.0146048098381298" calcext:value-type="percentage">
            <text:p>1.46 %</text:p>
          </table:table-cell>
          <table:table-cell/>
          <table:table-cell table:style-name="ce162" table:formula="of:=+[.B16]" office:value-type="float" office:value="2023" calcext:value-type="float">
            <text:p>2023</text:p>
          </table:table-cell>
          <table:table-cell table:style-name="ce169" table:formula="of:=SUM([.I16:.T16])" office:value-type="float" office:value="11443.696" calcext:value-type="float">
            <text:p>11,444</text:p>
          </table:table-cell>
          <table:table-cell table:style-name="ce177" table:formula="of:=[.C6]/12" office:value-type="float" office:value="953.641333333333" calcext:value-type="float">
            <text:p>954</text:p>
          </table:table-cell>
          <table:table-cell table:style-name="ce177" table:formula="of:=[.$I$16]" office:value-type="float" office:value="953.641333333333" calcext:value-type="float">
            <text:p>954</text:p>
          </table:table-cell>
          <table:table-cell table:style-name="ce177" table:formula="of:=[.$I$16]" office:value-type="float" office:value="953.641333333333" calcext:value-type="float">
            <text:p>954</text:p>
          </table:table-cell>
          <table:table-cell table:style-name="ce177" table:formula="of:=[.$I$16]" office:value-type="float" office:value="953.641333333333" calcext:value-type="float">
            <text:p>954</text:p>
          </table:table-cell>
          <table:table-cell table:style-name="ce177" table:formula="of:=[.$I$16]" office:value-type="float" office:value="953.641333333333" calcext:value-type="float">
            <text:p>954</text:p>
          </table:table-cell>
          <table:table-cell table:style-name="ce177" table:formula="of:=[.$I$16]" office:value-type="float" office:value="953.641333333333" calcext:value-type="float">
            <text:p>954</text:p>
          </table:table-cell>
          <table:table-cell table:style-name="ce177" table:formula="of:=[.$I$16]" office:value-type="float" office:value="953.641333333333" calcext:value-type="float">
            <text:p>954</text:p>
          </table:table-cell>
          <table:table-cell table:style-name="ce177" table:formula="of:=[.$I$16]" office:value-type="float" office:value="953.641333333333" calcext:value-type="float">
            <text:p>954</text:p>
          </table:table-cell>
          <table:table-cell table:style-name="ce177" table:formula="of:=[.$I$16]" office:value-type="float" office:value="953.641333333333" calcext:value-type="float">
            <text:p>954</text:p>
          </table:table-cell>
          <table:table-cell table:style-name="ce177" table:formula="of:=[.$I$16]" office:value-type="float" office:value="953.641333333333" calcext:value-type="float">
            <text:p>954</text:p>
          </table:table-cell>
          <table:table-cell table:style-name="ce177" table:formula="of:=[.$I$16]" office:value-type="float" office:value="953.641333333333" calcext:value-type="float">
            <text:p>954</text:p>
          </table:table-cell>
          <table:table-cell table:style-name="ce177" table:formula="of:=[.$I$16]" office:value-type="float" office:value="953.641333333333" calcext:value-type="float">
            <text:p>954</text:p>
          </table:table-cell>
          <table:table-cell table:number-columns-repeated="237"/>
        </table:table-row>
        <table:table-row table:style-name="ro22">
          <table:table-cell/>
          <table:table-cell table:style-name="ce162" table:formula="of:=+[.B7]" office:value-type="float" office:value="2024" calcext:value-type="float">
            <text:p>2024</text:p>
          </table:table-cell>
          <table:table-cell table:style-name="ce167" table:formula="of:=+[$BRECHA.D7]" office:value-type="float" office:value="802007.61339115" calcext:value-type="float">
            <text:p>802,008</text:p>
          </table:table-cell>
          <table:table-cell table:style-name="ce171" table:formula="of:=[.D16]" office:value-type="float" office:value="11443.696" calcext:value-type="float">
            <text:p>11444</text:p>
          </table:table-cell>
          <table:table-cell table:style-name="ce173" table:formula="of:=[.D17]/[.C17]" office:value-type="percentage" office:value="0.0142688121769971" calcext:value-type="percentage">
            <text:p>1.43 %</text:p>
          </table:table-cell>
          <table:table-cell/>
          <table:table-cell table:style-name="ce162" table:formula="of:=+[.B17]" office:value-type="float" office:value="2024" calcext:value-type="float">
            <text:p>2024</text:p>
          </table:table-cell>
          <table:table-cell table:style-name="ce169" table:formula="of:=SUM([.I17:.T17])" office:value-type="float" office:value="11443.696" calcext:value-type="float">
            <text:p>11,444</text:p>
          </table:table-cell>
          <table:table-cell table:style-name="ce177" table:formula="of:=[.C7]/12" office:value-type="float" office:value="953.641333333333" calcext:value-type="float">
            <text:p>954</text:p>
          </table:table-cell>
          <table:table-cell table:style-name="ce177" table:formula="of:=[.$I$17]" office:value-type="float" office:value="953.641333333333" calcext:value-type="float">
            <text:p>954</text:p>
          </table:table-cell>
          <table:table-cell table:style-name="ce177" table:formula="of:=[.$I$17]" office:value-type="float" office:value="953.641333333333" calcext:value-type="float">
            <text:p>954</text:p>
          </table:table-cell>
          <table:table-cell table:style-name="ce177" table:formula="of:=[.$I$17]" office:value-type="float" office:value="953.641333333333" calcext:value-type="float">
            <text:p>954</text:p>
          </table:table-cell>
          <table:table-cell table:style-name="ce177" table:formula="of:=[.$I$17]" office:value-type="float" office:value="953.641333333333" calcext:value-type="float">
            <text:p>954</text:p>
          </table:table-cell>
          <table:table-cell table:style-name="ce177" table:formula="of:=[.$I$17]" office:value-type="float" office:value="953.641333333333" calcext:value-type="float">
            <text:p>954</text:p>
          </table:table-cell>
          <table:table-cell table:style-name="ce177" table:formula="of:=[.$I$17]" office:value-type="float" office:value="953.641333333333" calcext:value-type="float">
            <text:p>954</text:p>
          </table:table-cell>
          <table:table-cell table:style-name="ce177" table:formula="of:=[.$I$17]" office:value-type="float" office:value="953.641333333333" calcext:value-type="float">
            <text:p>954</text:p>
          </table:table-cell>
          <table:table-cell table:style-name="ce177" table:formula="of:=[.$I$17]" office:value-type="float" office:value="953.641333333333" calcext:value-type="float">
            <text:p>954</text:p>
          </table:table-cell>
          <table:table-cell table:style-name="ce177" table:formula="of:=[.$I$17]" office:value-type="float" office:value="953.641333333333" calcext:value-type="float">
            <text:p>954</text:p>
          </table:table-cell>
          <table:table-cell table:style-name="ce177" table:formula="of:=[.$I$17]" office:value-type="float" office:value="953.641333333333" calcext:value-type="float">
            <text:p>954</text:p>
          </table:table-cell>
          <table:table-cell table:style-name="ce177" table:formula="of:=[.$I$17]" office:value-type="float" office:value="953.641333333333" calcext:value-type="float">
            <text:p>954</text:p>
          </table:table-cell>
          <table:table-cell table:number-columns-repeated="237"/>
        </table:table-row>
        <table:table-row table:style-name="ro22">
          <table:table-cell/>
          <table:table-cell table:style-name="ce162" table:formula="of:=+[.B8]" office:value-type="float" office:value="2025" calcext:value-type="float">
            <text:p>2025</text:p>
          </table:table-cell>
          <table:table-cell table:style-name="ce167" table:formula="of:=+[$BRECHA.D8]" office:value-type="float" office:value="821024.930271374" calcext:value-type="float">
            <text:p>821,025</text:p>
          </table:table-cell>
          <table:table-cell table:style-name="ce171" table:formula="of:=[.D17]" office:value-type="float" office:value="11443.696" calcext:value-type="float">
            <text:p>11444</text:p>
          </table:table-cell>
          <table:table-cell table:style-name="ce173" table:formula="of:=[.D18]/[.C18]" office:value-type="percentage" office:value="0.0139383051330944" calcext:value-type="percentage">
            <text:p>1.39 %</text:p>
          </table:table-cell>
          <table:table-cell table:style-name="ce175"/>
          <table:table-cell table:style-name="ce162" table:formula="of:=+[.B18]" office:value-type="float" office:value="2025" calcext:value-type="float">
            <text:p>2025</text:p>
          </table:table-cell>
          <table:table-cell table:style-name="ce169" table:formula="of:=SUM([.I18:.T18])" office:value-type="float" office:value="11443.696" calcext:value-type="float">
            <text:p>11,444</text:p>
          </table:table-cell>
          <table:table-cell table:style-name="ce177" table:formula="of:=[.C8]/12" office:value-type="float" office:value="953.641333333333" calcext:value-type="float">
            <text:p>954</text:p>
          </table:table-cell>
          <table:table-cell table:style-name="ce177" table:formula="of:=[.$I$18]" office:value-type="float" office:value="953.641333333333" calcext:value-type="float">
            <text:p>954</text:p>
          </table:table-cell>
          <table:table-cell table:style-name="ce177" table:formula="of:=[.$I$18]" office:value-type="float" office:value="953.641333333333" calcext:value-type="float">
            <text:p>954</text:p>
          </table:table-cell>
          <table:table-cell table:style-name="ce177" table:formula="of:=[.$I$18]" office:value-type="float" office:value="953.641333333333" calcext:value-type="float">
            <text:p>954</text:p>
          </table:table-cell>
          <table:table-cell table:style-name="ce177" table:formula="of:=[.$I$18]" office:value-type="float" office:value="953.641333333333" calcext:value-type="float">
            <text:p>954</text:p>
          </table:table-cell>
          <table:table-cell table:style-name="ce177" table:formula="of:=[.$I$18]" office:value-type="float" office:value="953.641333333333" calcext:value-type="float">
            <text:p>954</text:p>
          </table:table-cell>
          <table:table-cell table:style-name="ce177" table:formula="of:=[.$I$18]" office:value-type="float" office:value="953.641333333333" calcext:value-type="float">
            <text:p>954</text:p>
          </table:table-cell>
          <table:table-cell table:style-name="ce177" table:formula="of:=[.$I$18]" office:value-type="float" office:value="953.641333333333" calcext:value-type="float">
            <text:p>954</text:p>
          </table:table-cell>
          <table:table-cell table:style-name="ce177" table:formula="of:=[.$I$18]" office:value-type="float" office:value="953.641333333333" calcext:value-type="float">
            <text:p>954</text:p>
          </table:table-cell>
          <table:table-cell table:style-name="ce177" table:formula="of:=[.$I$18]" office:value-type="float" office:value="953.641333333333" calcext:value-type="float">
            <text:p>954</text:p>
          </table:table-cell>
          <table:table-cell table:style-name="ce177" table:formula="of:=[.$I$18]" office:value-type="float" office:value="953.641333333333" calcext:value-type="float">
            <text:p>954</text:p>
          </table:table-cell>
          <table:table-cell table:style-name="ce177" table:formula="of:=[.$I$18]" office:value-type="float" office:value="953.641333333333" calcext:value-type="float">
            <text:p>954</text:p>
          </table:table-cell>
          <table:table-cell table:number-columns-repeated="237"/>
        </table:table-row>
        <table:table-row table:style-name="ro22">
          <table:table-cell table:number-columns-repeated="257"/>
        </table:table-row>
        <table:table-row table:style-name="ro20">
          <table:table-cell/>
          <table:table-cell table:style-name="ce165" office:value-type="string" calcext:value-type="string">
            <text:p>Años</text:p>
          </table:table-cell>
          <table:table-cell table:style-name="ce165" office:value-type="string" calcext:value-type="string">
            <text:p>Produccion (UND.)</text:p>
          </table:table-cell>
          <table:table-cell table:style-name="ce165" office:value-type="string" calcext:value-type="string">
            <text:p>Precio por Und (S/.)</text:p>
          </table:table-cell>
          <table:table-cell table:style-name="ce165" office:value-type="string" calcext:value-type="string">
            <text:p>Ventas proyectadas (S/.)</text:p>
          </table:table-cell>
          <table:table-cell table:number-columns-repeated="252"/>
        </table:table-row>
        <table:table-row table:style-name="ro22" table:visibility="collapse">
          <table:table-cell/>
          <table:table-cell table:style-name="ce162" table:formula="of:=+[.B13]" office:value-type="string" office:string-value="" calcext:value-type="error">
            <text:p>#¡REF!</text:p>
          </table:table-cell>
          <table:table-cell table:style-name="ce168" table:formula="of:=[.C3]" office:value-type="string" office:string-value="" calcext:value-type="error">
            <text:p>#¡REF!</text:p>
          </table:table-cell>
          <table:table-cell table:style-name="ce168" office:value-type="float" office:value="0" calcext:value-type="float">
            <text:p><text:s/>- <text:s text:c="2"/></text:p>
          </table:table-cell>
          <table:table-cell table:style-name="ce168" table:formula="of:=[.C21]*[.D21]" office:value-type="string" office:string-value="" calcext:value-type="error">
            <text:p>#¡REF!</text:p>
          </table:table-cell>
          <table:table-cell table:number-columns-repeated="252"/>
        </table:table-row>
        <table:table-row table:style-name="ro22">
          <table:table-cell/>
          <table:table-cell table:style-name="ce162" table:formula="of:=+[.B14]" office:value-type="float" office:value="2021" calcext:value-type="float">
            <text:p>2021</text:p>
          </table:table-cell>
          <table:table-cell table:style-name="ce169" table:formula="of:=[.C4]" office:value-type="float" office:value="3440.46069833684" calcext:value-type="float">
            <text:p>3,440</text:p>
          </table:table-cell>
          <table:table-cell table:style-name="ce172" table:formula="of:=[$INGRESOS.B10]" office:value-type="float" office:value="18" calcext:value-type="float">
            <text:p>18.00</text:p>
          </table:table-cell>
          <table:table-cell table:style-name="ce172" table:formula="of:=[.C22]*[.D22]" office:value-type="float" office:value="61928.2925700631" calcext:value-type="float">
            <text:p>61,928.29</text:p>
          </table:table-cell>
          <table:table-cell table:number-columns-repeated="252"/>
        </table:table-row>
        <table:table-row table:style-name="ro22">
          <table:table-cell/>
          <table:table-cell table:style-name="ce162" table:formula="of:=+[.B15]" office:value-type="float" office:value="2022" calcext:value-type="float">
            <text:p>2022</text:p>
          </table:table-cell>
          <table:table-cell table:style-name="ce169" table:formula="of:=[.C5]" office:value-type="float" office:value="11443.696" calcext:value-type="float">
            <text:p>11,444</text:p>
          </table:table-cell>
          <table:table-cell table:style-name="ce172" table:formula="of:=[$INGRESOS.C10]" office:value-type="float" office:value="18" calcext:value-type="float">
            <text:p>18.00</text:p>
          </table:table-cell>
          <table:table-cell table:style-name="ce172" table:formula="of:=[.C23]*[.D23]" office:value-type="float" office:value="205986.528" calcext:value-type="float">
            <text:p>205,986.53</text:p>
          </table:table-cell>
          <table:table-cell table:number-columns-repeated="2"/>
          <table:table-cell table:style-name="ce174"/>
          <table:table-cell table:number-columns-repeated="249"/>
        </table:table-row>
        <table:table-row table:style-name="ro22">
          <table:table-cell/>
          <table:table-cell table:style-name="ce162" table:formula="of:=+[.B16]" office:value-type="float" office:value="2023" calcext:value-type="float">
            <text:p>2023</text:p>
          </table:table-cell>
          <table:table-cell table:style-name="ce169" table:formula="of:=[.C6]" office:value-type="float" office:value="11443.696" calcext:value-type="float">
            <text:p>11,444</text:p>
          </table:table-cell>
          <table:table-cell table:style-name="ce172" table:formula="of:=[$INGRESOS.D10]" office:value-type="float" office:value="18" calcext:value-type="float">
            <text:p>18.00</text:p>
          </table:table-cell>
          <table:table-cell table:style-name="ce172" table:formula="of:=[.C24]*[.D24]" office:value-type="float" office:value="205986.528" calcext:value-type="float">
            <text:p>205,986.53</text:p>
          </table:table-cell>
          <table:table-cell table:number-columns-repeated="252"/>
        </table:table-row>
        <table:table-row table:style-name="ro22">
          <table:table-cell/>
          <table:table-cell table:style-name="ce162" table:formula="of:=+[.B17]" office:value-type="float" office:value="2024" calcext:value-type="float">
            <text:p>2024</text:p>
          </table:table-cell>
          <table:table-cell table:style-name="ce169" table:formula="of:=[.C7]" office:value-type="float" office:value="11443.696" calcext:value-type="float">
            <text:p>11,444</text:p>
          </table:table-cell>
          <table:table-cell table:style-name="ce172" table:formula="of:=[$INGRESOS.E10]" office:value-type="float" office:value="18" calcext:value-type="float">
            <text:p>18.00</text:p>
          </table:table-cell>
          <table:table-cell table:style-name="ce172" table:formula="of:=[.C25]*[.D25]" office:value-type="float" office:value="205986.528" calcext:value-type="float">
            <text:p>205,986.53</text:p>
          </table:table-cell>
          <table:table-cell table:number-columns-repeated="252"/>
        </table:table-row>
        <table:table-row table:style-name="ro22">
          <table:table-cell/>
          <table:table-cell table:style-name="ce162" table:formula="of:=+[.B18]" office:value-type="float" office:value="2025" calcext:value-type="float">
            <text:p>2025</text:p>
          </table:table-cell>
          <table:table-cell table:style-name="ce169" table:formula="of:=[.C8]" office:value-type="float" office:value="11443.696" calcext:value-type="float">
            <text:p>11,444</text:p>
          </table:table-cell>
          <table:table-cell table:style-name="ce172" table:formula="of:=[$INGRESOS.F10]" office:value-type="float" office:value="18" calcext:value-type="float">
            <text:p>18.00</text:p>
          </table:table-cell>
          <table:table-cell table:style-name="ce172" table:formula="of:=[.C26]*[.D26]" office:value-type="float" office:value="205986.528" calcext:value-type="float">
            <text:p>205,986.53</text:p>
          </table:table-cell>
          <table:table-cell table:number-columns-repeated="252"/>
        </table:table-row>
        <table:table-row table:style-name="ro22" table:number-rows-repeated="1048549">
          <table:table-cell table:number-columns-repeated="257"/>
        </table:table-row>
        <table:table-row table:style-name="ro22">
          <table:table-cell table:number-columns-repeated="257"/>
        </table:table-row>
        <table:named-expressions>
          <table:named-range table:name="_xlnm.Print_Area" table:base-cell-address="$POBLACION.$A$1" table:cell-range-address="$'PLAN DE PRODUCCION'.$A$1:.$U$27" table:range-usable-as="print-range"/>
        </table:named-expressions>
      </table:table>
      <table:table table:name="TERREN Y OBR CIV" table:style-name="ta6" table:print-ranges="'TERREN Y OBR CIV'.B2:'TERREN Y OBR CIV'.F36">
        <table:table-column table:style-name="co46" table:default-cell-style-name="ce178"/>
        <table:table-column table:style-name="co47" table:default-cell-style-name="ce178"/>
        <table:table-column table:style-name="co48" table:default-cell-style-name="ce187"/>
        <table:table-column table:style-name="co49" table:default-cell-style-name="ce187"/>
        <table:table-column table:style-name="co19" table:default-cell-style-name="ce187"/>
        <table:table-column table:style-name="co50" table:default-cell-style-name="ce187"/>
        <table:table-column table:style-name="co49" table:default-cell-style-name="ce178"/>
        <table:table-column table:style-name="co1" table:number-columns-repeated="250" table:default-cell-style-name="ce178"/>
        <table:table-column table:style-name="co12" table:number-columns-repeated="16127"/>
        <table:table-row table:style-name="ro21" table:number-rows-repeated="2">
          <table:table-cell/>
          <table:table-cell table:style-name="ce181"/>
          <table:table-cell table:style-name="ce186" table:number-columns-repeated="4"/>
          <table:table-cell table:style-name="ce181"/>
          <table:table-cell table:number-columns-repeated="250"/>
        </table:table-row>
        <table:table-row table:style-name="ro21">
          <table:table-cell/>
          <table:table-cell table:style-name="ce179" office:value-type="string" calcext:value-type="string">
            <text:p><text:s text:c="71"/>TERRENOS Y OBRAS CIVILES </text:p>
          </table:table-cell>
          <table:table-cell/>
          <table:table-cell table:style-name="ce192" table:number-columns-repeated="2"/>
          <table:table-cell table:style-name="ce186"/>
          <table:table-cell table:style-name="ce181"/>
          <table:table-cell table:number-columns-repeated="250"/>
        </table:table-row>
        <table:table-row table:style-name="ro26">
          <table:table-cell table:style-name="ce15"/>
          <table:table-cell table:style-name="ce164" office:value-type="string" calcext:value-type="string">
            <text:p><text:s text:c="19"/>CONCEPTO</text:p>
          </table:table-cell>
          <table:table-cell table:style-name="ce164" office:value-type="string" calcext:value-type="string">
            <text:p>UNIDAD</text:p>
          </table:table-cell>
          <table:table-cell table:style-name="ce164" office:value-type="string" calcext:value-type="string">
            <text:p>CANTIDAD</text:p>
          </table:table-cell>
          <table:table-cell table:style-name="ce164" office:value-type="string" calcext:value-type="string">
            <text:p>COSTO UNITARIO</text:p>
          </table:table-cell>
          <table:table-cell table:style-name="ce164" office:value-type="string" calcext:value-type="string">
            <text:p>COSTO TOTAL</text:p>
          </table:table-cell>
          <table:table-cell table:style-name="ce200"/>
          <table:table-cell table:style-name="ce15" table:number-columns-repeated="16377"/>
        </table:table-row>
        <table:table-row table:style-name="ro21">
          <table:table-cell table:style-name="ce179"/>
          <table:table-cell table:style-name="ce182" office:value-type="string" calcext:value-type="string">
            <text:p>I. TERRENOS</text:p>
          </table:table-cell>
          <table:table-cell table:style-name="ce188" office:value-type="string" calcext:value-type="string">
            <text:p>m2</text:p>
          </table:table-cell>
          <table:table-cell table:style-name="ce193" office:value-type="float" office:value="0" calcext:value-type="float">
            <text:p>0.00</text:p>
          </table:table-cell>
          <table:table-cell table:style-name="ce193" office:value-type="float" office:value="35" calcext:value-type="float">
            <text:p>35.00</text:p>
          </table:table-cell>
          <table:table-cell table:style-name="ce198" table:formula="of:=[.D5]*[.E5]" office:value-type="float" office:value="0" calcext:value-type="float">
            <text:p><text:s/>- <text:s text:c="2"/></text:p>
          </table:table-cell>
          <table:table-cell table:style-name="ce179" table:number-columns-repeated="16378"/>
        </table:table-row>
        <table:table-row table:style-name="ro3">
          <table:table-cell table:style-name="ce179"/>
          <table:table-cell table:style-name="ce182" office:value-type="string" calcext:value-type="string">
            <text:p>II. MEJORAMIENTO DE INFRAESTRUCTURA <text:s/>GALPONES</text:p>
          </table:table-cell>
          <table:table-cell table:style-name="ce189"/>
          <table:table-cell table:style-name="ce194" table:number-columns-repeated="2"/>
          <table:table-cell table:style-name="ce198" table:formula="of:=SUM([.F7:.F26])" office:value-type="float" office:value="55973" calcext:value-type="float">
            <text:p><text:s/>55,973.00 </text:p>
          </table:table-cell>
          <table:table-cell table:style-name="ce179" table:number-columns-repeated="4"/>
          <table:table-cell table:style-name="ce205" office:value-type="float" office:value="149164.47" calcext:value-type="float">
            <text:p>149,164.47</text:p>
          </table:table-cell>
          <table:table-cell table:style-name="ce179" table:number-columns-repeated="16373"/>
        </table:table-row>
        <table:table-row table:style-name="ro21">
          <table:table-cell table:style-name="ce180"/>
          <table:table-cell table:style-name="ce183" office:value-type="string" calcext:value-type="string">
            <text:p>Clavos para madera c/c 3"</text:p>
          </table:table-cell>
          <table:table-cell table:style-name="ce188" office:value-type="string" calcext:value-type="string">
            <text:p>kg</text:p>
          </table:table-cell>
          <table:table-cell table:style-name="ce193" office:value-type="float" office:value="22" calcext:value-type="float">
            <text:p>22.00</text:p>
          </table:table-cell>
          <table:table-cell table:style-name="ce193" office:value-type="float" office:value="5" calcext:value-type="float">
            <text:p>5.00</text:p>
          </table:table-cell>
          <table:table-cell table:style-name="ce199" table:formula="of:=+[.E7]*[.D7]" office:value-type="float" office:value="110" calcext:value-type="float">
            <text:p><text:s/>110.00 </text:p>
          </table:table-cell>
          <table:table-cell table:style-name="ce180" table:number-columns-repeated="16378"/>
        </table:table-row>
        <table:table-row table:style-name="ro21">
          <table:table-cell table:style-name="ce180"/>
          <table:table-cell table:style-name="ce183" office:value-type="string" calcext:value-type="string">
            <text:p>Clavos para madera c/c 4"</text:p>
          </table:table-cell>
          <table:table-cell table:style-name="ce188" office:value-type="string" calcext:value-type="string">
            <text:p>kg</text:p>
          </table:table-cell>
          <table:table-cell table:style-name="ce193" office:value-type="float" office:value="22" calcext:value-type="float">
            <text:p>22.00</text:p>
          </table:table-cell>
          <table:table-cell table:style-name="ce193" office:value-type="float" office:value="5" calcext:value-type="float">
            <text:p>5.00</text:p>
          </table:table-cell>
          <table:table-cell table:style-name="ce199" table:formula="of:=+[.E8]*[.D8]" office:value-type="float" office:value="110" calcext:value-type="float">
            <text:p><text:s/>110.00 </text:p>
          </table:table-cell>
          <table:table-cell table:style-name="ce180" table:number-columns-repeated="16378"/>
        </table:table-row>
        <table:table-row table:style-name="ro21">
          <table:table-cell table:style-name="ce180"/>
          <table:table-cell table:style-name="ce183" office:value-type="string" calcext:value-type="string">
            <text:p>Clavos para calamina</text:p>
          </table:table-cell>
          <table:table-cell table:style-name="ce188" office:value-type="string" calcext:value-type="string">
            <text:p>kg</text:p>
          </table:table-cell>
          <table:table-cell table:style-name="ce193" office:value-type="float" office:value="33" calcext:value-type="float">
            <text:p>33.00</text:p>
          </table:table-cell>
          <table:table-cell table:style-name="ce193" office:value-type="float" office:value="9" calcext:value-type="float">
            <text:p>9.00</text:p>
          </table:table-cell>
          <table:table-cell table:style-name="ce199" table:formula="of:=+[.E9]*[.D9]" office:value-type="float" office:value="297" calcext:value-type="float">
            <text:p><text:s/>297.00 </text:p>
          </table:table-cell>
          <table:table-cell table:style-name="ce180" table:number-columns-repeated="16378"/>
        </table:table-row>
        <table:table-row table:style-name="ro21">
          <table:table-cell/>
          <table:table-cell table:style-name="ce183" office:value-type="string" calcext:value-type="string">
            <text:p>Adobe 0.40x0.25x0.18m</text:p>
          </table:table-cell>
          <table:table-cell table:style-name="ce188" office:value-type="string" calcext:value-type="string">
            <text:p>und</text:p>
          </table:table-cell>
          <table:table-cell table:style-name="ce193" office:value-type="float" office:value="16500" calcext:value-type="float">
            <text:p>16500.00</text:p>
          </table:table-cell>
          <table:table-cell table:style-name="ce193" office:value-type="float" office:value="0.5" calcext:value-type="float">
            <text:p>0.50</text:p>
          </table:table-cell>
          <table:table-cell table:style-name="ce199" table:formula="of:=+[.E10]*[.D10]" office:value-type="float" office:value="8250" calcext:value-type="float">
            <text:p><text:s/>8,250.00 </text:p>
          </table:table-cell>
          <table:table-cell table:style-name="ce181"/>
          <table:table-cell table:number-columns-repeated="4"/>
          <table:table-cell table:style-name="ce181" office:value-type="string" calcext:value-type="string">
            <text:p>Galpon 6x9</text:p>
          </table:table-cell>
          <table:table-cell/>
          <table:table-cell table:style-name="ce181" office:value-type="string" calcext:value-type="string">
            <text:p>8 galpones</text:p>
          </table:table-cell>
          <table:table-cell table:number-columns-repeated="243"/>
        </table:table-row>
        <table:table-row table:style-name="ro21">
          <table:table-cell/>
          <table:table-cell table:style-name="ce183" office:value-type="string" calcext:value-type="string">
            <text:p>Vigas 3"x3"x10'</text:p>
          </table:table-cell>
          <table:table-cell table:style-name="ce188" office:value-type="string" calcext:value-type="string">
            <text:p>und</text:p>
          </table:table-cell>
          <table:table-cell table:style-name="ce193" office:value-type="float" office:value="220" calcext:value-type="float">
            <text:p>220.00</text:p>
          </table:table-cell>
          <table:table-cell table:style-name="ce196" office:value-type="float" office:value="15" calcext:value-type="float">
            <text:p>15.00</text:p>
          </table:table-cell>
          <table:table-cell table:style-name="ce199" table:formula="of:=+[.E11]*[.D11]" office:value-type="float" office:value="3300" calcext:value-type="float">
            <text:p><text:s/>3,300.00 </text:p>
          </table:table-cell>
          <table:table-cell table:style-name="ce181"/>
          <table:table-cell table:number-columns-repeated="2"/>
          <table:table-cell table:style-name="ce180" office:value-type="string" calcext:value-type="string">
            <text:p>Adobe 0.40x0.25x0.18m</text:p>
          </table:table-cell>
          <table:table-cell table:style-name="ce180"/>
          <table:table-cell table:style-name="ce180" office:value-type="float" office:value="1500" calcext:value-type="float">
            <text:p>1500</text:p>
          </table:table-cell>
          <table:table-cell/>
          <table:table-cell table:style-name="ce206" table:formula="of:=+[.L11]*11" office:value-type="float" office:value="16500" calcext:value-type="float">
            <text:p>16500</text:p>
          </table:table-cell>
          <table:table-cell table:number-columns-repeated="243"/>
        </table:table-row>
        <table:table-row table:style-name="ro21">
          <table:table-cell/>
          <table:table-cell table:style-name="ce183" office:value-type="string" calcext:value-type="string">
            <text:p>Listones <text:s/>2"x3"x10'</text:p>
          </table:table-cell>
          <table:table-cell table:style-name="ce188" office:value-type="string" calcext:value-type="string">
            <text:p>und</text:p>
          </table:table-cell>
          <table:table-cell table:style-name="ce193" office:value-type="float" office:value="330" calcext:value-type="float">
            <text:p>330.00</text:p>
          </table:table-cell>
          <table:table-cell table:style-name="ce196" office:value-type="float" office:value="10" calcext:value-type="float">
            <text:p>10.00</text:p>
          </table:table-cell>
          <table:table-cell table:style-name="ce199" table:formula="of:=+[.E12]*[.D12]" office:value-type="float" office:value="3300" calcext:value-type="float">
            <text:p><text:s/>3,300.00 </text:p>
          </table:table-cell>
          <table:table-cell table:style-name="ce181"/>
          <table:table-cell table:number-columns-repeated="2"/>
          <table:table-cell table:style-name="ce180" office:value-type="string" calcext:value-type="string">
            <text:p>Vigas 3"x3"x3.5 m</text:p>
          </table:table-cell>
          <table:table-cell table:style-name="ce180"/>
          <table:table-cell table:style-name="ce180" office:value-type="float" office:value="20" calcext:value-type="float">
            <text:p>20</text:p>
          </table:table-cell>
          <table:table-cell/>
          <table:table-cell table:style-name="ce206" table:formula="of:=+[.L12]*11" office:value-type="float" office:value="220" calcext:value-type="float">
            <text:p>220</text:p>
          </table:table-cell>
          <table:table-cell table:number-columns-repeated="243"/>
        </table:table-row>
        <table:table-row table:style-name="ro21">
          <table:table-cell/>
          <table:table-cell table:style-name="ce183" office:value-type="string" calcext:value-type="string">
            <text:p>Vigas dintel <text:s/>3"x4"x10'</text:p>
          </table:table-cell>
          <table:table-cell table:style-name="ce188" office:value-type="string" calcext:value-type="string">
            <text:p>und</text:p>
          </table:table-cell>
          <table:table-cell table:style-name="ce193" office:value-type="float" office:value="110" calcext:value-type="float">
            <text:p>110.00</text:p>
          </table:table-cell>
          <table:table-cell table:style-name="ce196" office:value-type="float" office:value="18" calcext:value-type="float">
            <text:p>18.00</text:p>
          </table:table-cell>
          <table:table-cell table:style-name="ce199" table:formula="of:=+[.E13]*[.D13]" office:value-type="float" office:value="1980" calcext:value-type="float">
            <text:p><text:s/>1,980.00 </text:p>
          </table:table-cell>
          <table:table-cell table:style-name="ce181"/>
          <table:table-cell table:number-columns-repeated="2"/>
          <table:table-cell table:style-name="ce180" office:value-type="string" calcext:value-type="string">
            <text:p>Listones <text:s/>2"x3"x3.5 m</text:p>
          </table:table-cell>
          <table:table-cell table:style-name="ce180"/>
          <table:table-cell table:style-name="ce180" office:value-type="float" office:value="30" calcext:value-type="float">
            <text:p>30</text:p>
          </table:table-cell>
          <table:table-cell/>
          <table:table-cell table:style-name="ce206" table:formula="of:=+[.L13]*11" office:value-type="float" office:value="330" calcext:value-type="float">
            <text:p>330</text:p>
          </table:table-cell>
          <table:table-cell table:number-columns-repeated="243"/>
        </table:table-row>
        <table:table-row table:style-name="ro21">
          <table:table-cell/>
          <table:table-cell table:style-name="ce183" office:value-type="string" calcext:value-type="string">
            <text:p>Madera eucalipto rollizo 6"x5m</text:p>
          </table:table-cell>
          <table:table-cell table:style-name="ce188" office:value-type="string" calcext:value-type="string">
            <text:p>und</text:p>
          </table:table-cell>
          <table:table-cell table:style-name="ce193" office:value-type="float" office:value="33" calcext:value-type="float">
            <text:p>33.00</text:p>
          </table:table-cell>
          <table:table-cell table:style-name="ce196" office:value-type="float" office:value="50" calcext:value-type="float">
            <text:p>50.00</text:p>
          </table:table-cell>
          <table:table-cell table:style-name="ce199" table:formula="of:=+[.E14]*[.D14]" office:value-type="float" office:value="1650" calcext:value-type="float">
            <text:p><text:s/>1,650.00 </text:p>
          </table:table-cell>
          <table:table-cell table:style-name="ce181"/>
          <table:table-cell table:number-columns-repeated="2"/>
          <table:table-cell table:style-name="ce180" office:value-type="string" calcext:value-type="string">
            <text:p>Madera eucalipto rollizo 6"x3m</text:p>
          </table:table-cell>
          <table:table-cell table:style-name="ce180"/>
          <table:table-cell table:style-name="ce180" office:value-type="float" office:value="1" calcext:value-type="float">
            <text:p>1</text:p>
          </table:table-cell>
          <table:table-cell/>
          <table:table-cell table:style-name="ce206" table:formula="of:=+[.L14]*11" office:value-type="float" office:value="11" calcext:value-type="float">
            <text:p>11</text:p>
          </table:table-cell>
          <table:table-cell table:number-columns-repeated="243"/>
        </table:table-row>
        <table:table-row table:style-name="ro3">
          <table:table-cell/>
          <table:table-cell table:style-name="ce183" office:value-type="string" calcext:value-type="string">
            <text:p>Malla revestido venilo color verde <text:s/>3/4x3/4" calib 1 mm x30 m</text:p>
          </table:table-cell>
          <table:table-cell table:style-name="ce188" office:value-type="string" calcext:value-type="string">
            <text:p>roll</text:p>
          </table:table-cell>
          <table:table-cell table:style-name="ce193" table:formula="of:=11*2" office:value-type="float" office:value="22" calcext:value-type="float">
            <text:p>22.00</text:p>
          </table:table-cell>
          <table:table-cell table:style-name="ce193" office:value-type="float" office:value="185" calcext:value-type="float">
            <text:p>185.00</text:p>
          </table:table-cell>
          <table:table-cell table:style-name="ce199" table:formula="of:=+[.E15]*[.D15]" office:value-type="float" office:value="4070" calcext:value-type="float">
            <text:p><text:s/>4,070.00 </text:p>
          </table:table-cell>
          <table:table-cell table:style-name="ce181"/>
          <table:table-cell table:number-columns-repeated="2"/>
          <table:table-cell table:style-name="ce180" office:value-type="string" calcext:value-type="string">
            <text:p>Madera eucalipto rollizo 6"x9m</text:p>
          </table:table-cell>
          <table:table-cell/>
          <table:table-cell table:style-name="ce180" office:value-type="float" office:value="3" calcext:value-type="float">
            <text:p>3</text:p>
          </table:table-cell>
          <table:table-cell/>
          <table:table-cell table:style-name="ce206" table:formula="of:=+[.L15]*11" office:value-type="float" office:value="33" calcext:value-type="float">
            <text:p>33</text:p>
          </table:table-cell>
          <table:table-cell table:number-columns-repeated="243"/>
        </table:table-row>
        <table:table-row table:style-name="ro21">
          <table:table-cell/>
          <table:table-cell table:style-name="ce183" office:value-type="string" calcext:value-type="string">
            <text:p>Ventana V1 <text:s/>(1.00x0.50)</text:p>
          </table:table-cell>
          <table:table-cell table:style-name="ce188" office:value-type="string" calcext:value-type="string">
            <text:p>und</text:p>
          </table:table-cell>
          <table:table-cell table:style-name="ce193" table:formula="of:=6*11" office:value-type="float" office:value="66" calcext:value-type="float">
            <text:p>66.00</text:p>
          </table:table-cell>
          <table:table-cell table:style-name="ce196" office:value-type="float" office:value="20" calcext:value-type="float">
            <text:p>20.00</text:p>
          </table:table-cell>
          <table:table-cell table:style-name="ce199" table:formula="of:=+[.E16]*[.D16]" office:value-type="float" office:value="1320" calcext:value-type="float">
            <text:p><text:s/>1,320.00 </text:p>
          </table:table-cell>
          <table:table-cell table:style-name="ce181"/>
          <table:table-cell table:number-columns-repeated="2"/>
          <table:table-cell table:style-name="ce180" office:value-type="string" calcext:value-type="string">
            <text:p>Viga Dintel 4"x4" x 2.5 m</text:p>
          </table:table-cell>
          <table:table-cell table:style-name="ce180"/>
          <table:table-cell table:style-name="ce180" office:value-type="float" office:value="10" calcext:value-type="float">
            <text:p>10</text:p>
          </table:table-cell>
          <table:table-cell table:style-name="ce180"/>
          <table:table-cell table:style-name="ce206" table:formula="of:=+[.L16]*11" office:value-type="float" office:value="110" calcext:value-type="float">
            <text:p>110</text:p>
          </table:table-cell>
          <table:table-cell table:number-columns-repeated="243"/>
        </table:table-row>
        <table:table-row table:style-name="ro21">
          <table:table-cell/>
          <table:table-cell table:style-name="ce183" office:value-type="string" calcext:value-type="string">
            <text:p>Alambre N° 16</text:p>
          </table:table-cell>
          <table:table-cell table:style-name="ce188" office:value-type="string" calcext:value-type="string">
            <text:p>und</text:p>
          </table:table-cell>
          <table:table-cell table:style-name="ce193" table:formula="of:=11*5" office:value-type="float" office:value="55" calcext:value-type="float">
            <text:p>55.00</text:p>
          </table:table-cell>
          <table:table-cell table:style-name="ce193" office:value-type="float" office:value="5" calcext:value-type="float">
            <text:p>5.00</text:p>
          </table:table-cell>
          <table:table-cell table:style-name="ce199" table:formula="of:=+[.E17]*[.D17]" office:value-type="float" office:value="275" calcext:value-type="float">
            <text:p><text:s/>275.00 </text:p>
          </table:table-cell>
          <table:table-cell table:style-name="ce181"/>
          <table:table-cell table:number-columns-repeated="2"/>
          <table:table-cell table:style-name="ce180" office:value-type="string" calcext:value-type="string">
            <text:p>calamina</text:p>
          </table:table-cell>
          <table:table-cell table:style-name="ce180"/>
          <table:table-cell table:style-name="ce180" office:value-type="float" office:value="26" calcext:value-type="float">
            <text:p>26</text:p>
          </table:table-cell>
          <table:table-cell table:style-name="ce180"/>
          <table:table-cell table:style-name="ce206" table:formula="of:=+[.L17]*11" office:value-type="float" office:value="286" calcext:value-type="float">
            <text:p>286</text:p>
          </table:table-cell>
          <table:table-cell table:number-columns-repeated="243"/>
        </table:table-row>
        <table:table-row table:style-name="ro21">
          <table:table-cell/>
          <table:table-cell table:style-name="ce183" office:value-type="string" calcext:value-type="string">
            <text:p>Puerta madera y calamina P1 (1.60x2.25)</text:p>
          </table:table-cell>
          <table:table-cell table:style-name="ce188" office:value-type="string" calcext:value-type="string">
            <text:p>und</text:p>
          </table:table-cell>
          <table:table-cell table:style-name="ce193" office:value-type="float" office:value="11" calcext:value-type="float">
            <text:p>11.00</text:p>
          </table:table-cell>
          <table:table-cell table:style-name="ce196" office:value-type="float" office:value="80" calcext:value-type="float">
            <text:p>80.00</text:p>
          </table:table-cell>
          <table:table-cell table:style-name="ce199" table:formula="of:=+[.E18]*[.D18]" office:value-type="float" office:value="880" calcext:value-type="float">
            <text:p><text:s/>880.00 </text:p>
          </table:table-cell>
          <table:table-cell table:style-name="ce181"/>
          <table:table-cell table:number-columns-repeated="2"/>
          <table:table-cell table:style-name="ce180" office:value-type="string" calcext:value-type="string">
            <text:p>calamina trnas</text:p>
          </table:table-cell>
          <table:table-cell table:style-name="ce180"/>
          <table:table-cell table:style-name="ce180" office:value-type="float" office:value="2" calcext:value-type="float">
            <text:p>2</text:p>
          </table:table-cell>
          <table:table-cell table:style-name="ce180"/>
          <table:table-cell table:style-name="ce206" table:formula="of:=+[.L18]*11" office:value-type="float" office:value="22" calcext:value-type="float">
            <text:p>22</text:p>
          </table:table-cell>
          <table:table-cell table:number-columns-repeated="243"/>
        </table:table-row>
        <table:table-row table:style-name="ro21">
          <table:table-cell table:style-name="ce180"/>
          <table:table-cell table:style-name="ce183" office:value-type="string" calcext:value-type="string">
            <text:p>Calamina de 0.22 mm de 3.60X 0.8 m</text:p>
          </table:table-cell>
          <table:table-cell table:style-name="ce188" office:value-type="string" calcext:value-type="string">
            <text:p>pln</text:p>
          </table:table-cell>
          <table:table-cell table:style-name="ce193" table:formula="of:=11*26" office:value-type="float" office:value="286" calcext:value-type="float">
            <text:p>286.00</text:p>
          </table:table-cell>
          <table:table-cell table:style-name="ce193" office:value-type="float" office:value="23" calcext:value-type="float">
            <text:p>23.00</text:p>
          </table:table-cell>
          <table:table-cell table:style-name="ce199" table:formula="of:=+[.E19]*[.D19]" office:value-type="float" office:value="6578" calcext:value-type="float">
            <text:p><text:s/>6,578.00 </text:p>
          </table:table-cell>
          <table:table-cell table:style-name="ce180" table:number-columns-repeated="3"/>
          <table:table-cell table:style-name="ce180" office:value-type="string" calcext:value-type="string">
            <text:p>clavo de calanina</text:p>
          </table:table-cell>
          <table:table-cell table:style-name="ce180"/>
          <table:table-cell table:style-name="ce180" office:value-type="float" office:value="3" calcext:value-type="float">
            <text:p>3</text:p>
          </table:table-cell>
          <table:table-cell table:style-name="ce180"/>
          <table:table-cell table:style-name="ce206" table:formula="of:=+[.L19]*11" office:value-type="float" office:value="33" calcext:value-type="float">
            <text:p>33</text:p>
          </table:table-cell>
          <table:table-cell table:style-name="ce180" table:number-columns-repeated="16370"/>
        </table:table-row>
        <table:table-row table:style-name="ro21">
          <table:table-cell table:style-name="ce180"/>
          <table:table-cell table:style-name="ce183" office:value-type="string" calcext:value-type="string">
            <text:p>Calamina transparente 3.60*0.8 m (Fibra forte)</text:p>
          </table:table-cell>
          <table:table-cell table:style-name="ce188" office:value-type="string" calcext:value-type="string">
            <text:p>pln</text:p>
          </table:table-cell>
          <table:table-cell table:style-name="ce193" table:formula="of:=11*2" office:value-type="float" office:value="22" calcext:value-type="float">
            <text:p>22.00</text:p>
          </table:table-cell>
          <table:table-cell table:style-name="ce193" office:value-type="float" office:value="55" calcext:value-type="float">
            <text:p>55.00</text:p>
          </table:table-cell>
          <table:table-cell table:style-name="ce199" table:formula="of:=+[.E20]*[.D20]" office:value-type="float" office:value="1210" calcext:value-type="float">
            <text:p><text:s/>1,210.00 </text:p>
          </table:table-cell>
          <table:table-cell table:style-name="ce180" table:number-columns-repeated="3"/>
          <table:table-cell table:style-name="ce180" office:value-type="string" calcext:value-type="string">
            <text:p>clavo4</text:p>
          </table:table-cell>
          <table:table-cell table:style-name="ce180"/>
          <table:table-cell table:style-name="ce180" office:value-type="float" office:value="2" calcext:value-type="float">
            <text:p>2</text:p>
          </table:table-cell>
          <table:table-cell/>
          <table:table-cell table:style-name="ce206" table:formula="of:=+[.L20]*11" office:value-type="float" office:value="22" calcext:value-type="float">
            <text:p>22</text:p>
          </table:table-cell>
          <table:table-cell table:style-name="ce180" table:number-columns-repeated="16370"/>
        </table:table-row>
        <table:table-row table:style-name="ro21">
          <table:table-cell table:style-name="ce180"/>
          <table:table-cell table:style-name="ce183" office:value-type="string" calcext:value-type="string">
            <text:p>Tubo PVC diam 1/2" C-10</text:p>
          </table:table-cell>
          <table:table-cell table:style-name="ce188" office:value-type="string" calcext:value-type="string">
            <text:p>und</text:p>
          </table:table-cell>
          <table:table-cell table:style-name="ce193" table:formula="of:=11*5" office:value-type="float" office:value="55" calcext:value-type="float">
            <text:p>55.00</text:p>
          </table:table-cell>
          <table:table-cell table:style-name="ce196" office:value-type="float" office:value="12" calcext:value-type="float">
            <text:p>12.00</text:p>
          </table:table-cell>
          <table:table-cell table:style-name="ce199" table:formula="of:=+[.E21]*[.D21]" office:value-type="float" office:value="660" calcext:value-type="float">
            <text:p><text:s/>660.00 </text:p>
          </table:table-cell>
          <table:table-cell table:style-name="ce180" table:number-columns-repeated="3"/>
          <table:table-cell table:style-name="ce180" office:value-type="string" calcext:value-type="string">
            <text:p>clavo 3</text:p>
          </table:table-cell>
          <table:table-cell table:style-name="ce180"/>
          <table:table-cell table:style-name="ce180" office:value-type="float" office:value="2" calcext:value-type="float">
            <text:p>2</text:p>
          </table:table-cell>
          <table:table-cell/>
          <table:table-cell table:style-name="ce206" table:formula="of:=+[.L21]*11" office:value-type="float" office:value="22" calcext:value-type="float">
            <text:p>22</text:p>
          </table:table-cell>
          <table:table-cell table:style-name="ce180" table:number-columns-repeated="16370"/>
        </table:table-row>
        <table:table-row table:style-name="ro21">
          <table:table-cell table:style-name="ce180"/>
          <table:table-cell table:style-name="ce183" office:value-type="string" calcext:value-type="string">
            <text:p>Cinta teflon</text:p>
          </table:table-cell>
          <table:table-cell table:style-name="ce188" office:value-type="string" calcext:value-type="string">
            <text:p>und</text:p>
          </table:table-cell>
          <table:table-cell table:style-name="ce193" office:value-type="float" office:value="11" calcext:value-type="float">
            <text:p>11.00</text:p>
          </table:table-cell>
          <table:table-cell table:style-name="ce193" office:value-type="float" office:value="1" calcext:value-type="float">
            <text:p>1.00</text:p>
          </table:table-cell>
          <table:table-cell table:style-name="ce199" table:formula="of:=+[.E22]*[.D22]" office:value-type="float" office:value="11" calcext:value-type="float">
            <text:p><text:s/>11.00 </text:p>
          </table:table-cell>
          <table:table-cell table:style-name="ce180" table:number-columns-repeated="3"/>
          <table:table-cell table:style-name="ce180" office:value-type="string" calcext:value-type="string">
            <text:p>alambre n° 16</text:p>
          </table:table-cell>
          <table:table-cell table:style-name="ce180"/>
          <table:table-cell table:style-name="ce180" office:value-type="float" office:value="5" calcext:value-type="float">
            <text:p>5</text:p>
          </table:table-cell>
          <table:table-cell table:style-name="ce179"/>
          <table:table-cell table:style-name="ce206" table:formula="of:=+[.L22]*11" office:value-type="float" office:value="55" calcext:value-type="float">
            <text:p>55</text:p>
          </table:table-cell>
          <table:table-cell table:style-name="ce180" table:number-columns-repeated="16370"/>
        </table:table-row>
        <table:table-row table:style-name="ro21">
          <table:table-cell table:style-name="ce180"/>
          <table:table-cell table:style-name="ce183" office:value-type="string" calcext:value-type="string">
            <text:p>Pagamento PVC 237 ml</text:p>
          </table:table-cell>
          <table:table-cell table:style-name="ce188" office:value-type="string" calcext:value-type="string">
            <text:p>und</text:p>
          </table:table-cell>
          <table:table-cell table:style-name="ce193" office:value-type="float" office:value="11" calcext:value-type="float">
            <text:p>11.00</text:p>
          </table:table-cell>
          <table:table-cell table:style-name="ce193" office:value-type="float" office:value="12" calcext:value-type="float">
            <text:p>12.00</text:p>
          </table:table-cell>
          <table:table-cell table:style-name="ce199" table:formula="of:=+[.E23]*[.D23]" office:value-type="float" office:value="132" calcext:value-type="float">
            <text:p><text:s/>132.00 </text:p>
          </table:table-cell>
          <table:table-cell table:style-name="ce180" table:number-columns-repeated="6"/>
          <table:table-cell table:style-name="ce179"/>
          <table:table-cell table:style-name="ce206" table:formula="of:=+[.L23]*11" office:value-type="float" office:value="0" calcext:value-type="float">
            <text:p>0</text:p>
          </table:table-cell>
          <table:table-cell table:style-name="ce180" table:number-columns-repeated="16370"/>
        </table:table-row>
        <table:table-row table:style-name="ro21">
          <table:table-cell/>
          <table:table-cell table:style-name="ce184" office:value-type="string" calcext:value-type="string">
            <text:p>Bebedero Automatico </text:p>
          </table:table-cell>
          <table:table-cell table:style-name="ce190" office:value-type="string" calcext:value-type="string">
            <text:p>und</text:p>
          </table:table-cell>
          <table:table-cell table:style-name="ce193" table:formula="of:=11*40" office:value-type="float" office:value="440" calcext:value-type="float">
            <text:p>440.00</text:p>
          </table:table-cell>
          <table:table-cell table:style-name="ce197" office:value-type="float" office:value="6" calcext:value-type="float">
            <text:p>6.00</text:p>
          </table:table-cell>
          <table:table-cell table:style-name="ce199" table:formula="of:=+[.E24]*[.D24]" office:value-type="float" office:value="2640" calcext:value-type="float">
            <text:p><text:s/>2,640.00 </text:p>
          </table:table-cell>
          <table:table-cell table:style-name="ce181"/>
          <table:table-cell table:number-columns-repeated="2"/>
          <table:table-cell table:style-name="ce204" office:value-type="string" calcext:value-type="string">
            <text:p>puerta</text:p>
          </table:table-cell>
          <table:table-cell table:style-name="ce204"/>
          <table:table-cell table:style-name="ce204" office:value-type="float" office:value="1" calcext:value-type="float">
            <text:p>1</text:p>
          </table:table-cell>
          <table:table-cell table:style-name="ce204"/>
          <table:table-cell table:style-name="ce206" table:formula="of:=+[.L24]*11" office:value-type="float" office:value="11" calcext:value-type="float">
            <text:p>11</text:p>
          </table:table-cell>
          <table:table-cell table:number-columns-repeated="243"/>
        </table:table-row>
        <table:table-row table:style-name="ro21">
          <table:table-cell/>
          <table:table-cell table:style-name="ce183" office:value-type="string" calcext:value-type="string">
            <text:p>Cuyes existentes del galpon</text:p>
          </table:table-cell>
          <table:table-cell table:style-name="ce188" office:value-type="string" calcext:value-type="string">
            <text:p>und</text:p>
          </table:table-cell>
          <table:table-cell table:style-name="ce193" office:value-type="float" office:value="800" calcext:value-type="float">
            <text:p>800.00</text:p>
          </table:table-cell>
          <table:table-cell table:style-name="ce193" office:value-type="float" office:value="18" calcext:value-type="float">
            <text:p>18.00</text:p>
          </table:table-cell>
          <table:table-cell table:style-name="ce199" table:formula="of:=+[.E25]*[.D25]" office:value-type="float" office:value="14400" calcext:value-type="float">
            <text:p><text:s/>14,400.00 </text:p>
          </table:table-cell>
          <table:table-cell table:style-name="ce201"/>
          <table:table-cell table:number-columns-repeated="2"/>
          <table:table-cell table:style-name="ce180" office:value-type="string" calcext:value-type="string">
            <text:p>ventana</text:p>
          </table:table-cell>
          <table:table-cell table:style-name="ce180"/>
          <table:table-cell table:style-name="ce180" office:value-type="float" office:value="6" calcext:value-type="float">
            <text:p>6</text:p>
          </table:table-cell>
          <table:table-cell table:style-name="ce180"/>
          <table:table-cell table:style-name="ce206" table:formula="of:=+[.L25]*11" office:value-type="float" office:value="66" calcext:value-type="float">
            <text:p>66</text:p>
          </table:table-cell>
          <table:table-cell table:number-columns-repeated="243"/>
        </table:table-row>
        <table:table-row table:style-name="ro21">
          <table:table-cell/>
          <table:table-cell table:style-name="ce183" office:value-type="string" calcext:value-type="string">
            <text:p>Operario</text:p>
          </table:table-cell>
          <table:table-cell table:style-name="ce188" office:value-type="string" calcext:value-type="string">
            <text:p>und</text:p>
          </table:table-cell>
          <table:table-cell table:style-name="ce193" office:value-type="float" office:value="80" calcext:value-type="float">
            <text:p>80.00</text:p>
          </table:table-cell>
          <table:table-cell table:style-name="ce193" office:value-type="float" office:value="60" calcext:value-type="float">
            <text:p>60.00</text:p>
          </table:table-cell>
          <table:table-cell table:style-name="ce199" table:formula="of:=+[.E26]*[.D26]" office:value-type="float" office:value="4800" calcext:value-type="float">
            <text:p><text:s/>4,800.00 </text:p>
          </table:table-cell>
          <table:table-cell table:style-name="ce201"/>
          <table:table-cell table:number-columns-repeated="2"/>
          <table:table-cell table:style-name="ce180" table:number-columns-repeated="4"/>
          <table:table-cell table:style-name="ce206"/>
          <table:table-cell table:number-columns-repeated="243"/>
        </table:table-row>
        <table:table-row table:style-name="ro21">
          <table:table-cell table:style-name="ce179"/>
          <table:table-cell table:style-name="ce182" office:value-type="string" calcext:value-type="string">
            <text:p>III. INSTALACION DE PASTOS</text:p>
          </table:table-cell>
          <table:table-cell table:style-name="ce189" table:number-columns-repeated="3"/>
          <table:table-cell table:style-name="ce198" table:formula="of:=SUM([.F28:.F35])" office:value-type="float" office:value="17555.5" calcext:value-type="float">
            <text:p><text:s/>17,555.50 </text:p>
          </table:table-cell>
          <table:table-cell table:style-name="ce179" table:number-columns-repeated="2"/>
          <table:table-cell table:style-name="ce179">
            <draw:frame draw:z-index="0" draw:name="2 Imagen" draw:style-name="gr2" draw:text-style-name="P1" svg:width="15.383cm" svg:height="15.004cm" svg:x="0.175cm" svg:y="0.169cm">
              <draw:image xlink:href="Pictures/100000010000035C000003545744B5DB.png" xlink:type="simple" xlink:show="embed" xlink:actuate="onLoad" draw:mime-type="image/png">
                <text:p/>
              </draw:image>
            </draw:frame>
          </table:table-cell>
          <table:table-cell table:style-name="ce179" table:number-columns-repeated="3"/>
          <table:table-cell/>
          <table:table-cell table:style-name="ce206"/>
          <table:table-cell table:style-name="ce179" table:number-columns-repeated="16370"/>
        </table:table-row>
        <table:table-row table:style-name="ro21">
          <table:table-cell table:style-name="ce181"/>
          <table:table-cell table:style-name="ce183" office:value-type="string" calcext:value-type="string">
            <text:p>Manguera <text:s/>HDP DIAM 1" <text:s/>X 100 M </text:p>
          </table:table-cell>
          <table:table-cell table:style-name="ce188" office:value-type="string" calcext:value-type="string">
            <text:p>roll</text:p>
          </table:table-cell>
          <table:table-cell table:style-name="ce193" office:value-type="float" office:value="29" calcext:value-type="float">
            <text:p>29.00</text:p>
          </table:table-cell>
          <table:table-cell table:style-name="ce196" office:value-type="float" office:value="120" calcext:value-type="float">
            <text:p>120.00</text:p>
          </table:table-cell>
          <table:table-cell table:style-name="ce199" table:formula="of:=[.D28]*[.E28]" office:value-type="float" office:value="3480" calcext:value-type="float">
            <text:p><text:s/>3,480.00 </text:p>
          </table:table-cell>
          <table:table-cell table:style-name="ce181"/>
          <table:table-cell table:number-columns-repeated="250"/>
        </table:table-row>
        <table:table-row table:style-name="ro21">
          <table:table-cell table:style-name="ce181"/>
          <table:table-cell table:style-name="ce183" office:value-type="string" calcext:value-type="string">
            <text:p>Aspersor circular ibis 1" para Presion 4 bares</text:p>
          </table:table-cell>
          <table:table-cell table:style-name="ce188" office:value-type="string" calcext:value-type="string">
            <text:p>und</text:p>
          </table:table-cell>
          <table:table-cell table:style-name="ce193" office:value-type="float" office:value="29" calcext:value-type="float">
            <text:p>29.00</text:p>
          </table:table-cell>
          <table:table-cell table:style-name="ce196" office:value-type="float" office:value="140" calcext:value-type="float">
            <text:p>140.00</text:p>
          </table:table-cell>
          <table:table-cell table:style-name="ce199" table:formula="of:=[.D29]*[.E29]" office:value-type="float" office:value="4060" calcext:value-type="float">
            <text:p><text:s/>4,060.00 </text:p>
          </table:table-cell>
          <table:table-cell table:style-name="ce181"/>
          <table:table-cell table:number-columns-repeated="250"/>
        </table:table-row>
        <table:table-row table:style-name="ro21">
          <table:table-cell table:style-name="ce181"/>
          <table:table-cell table:style-name="ce183" office:value-type="string" calcext:value-type="string">
            <text:p>Semilla de alfalfa Moapa</text:p>
          </table:table-cell>
          <table:table-cell table:style-name="ce188" office:value-type="string" calcext:value-type="string">
            <text:p>kg</text:p>
          </table:table-cell>
          <table:table-cell table:style-name="ce193" office:value-type="float" office:value="29" calcext:value-type="float">
            <text:p>29.00</text:p>
          </table:table-cell>
          <table:table-cell table:style-name="ce196" office:value-type="float" office:value="42" calcext:value-type="float">
            <text:p>42.00</text:p>
          </table:table-cell>
          <table:table-cell table:style-name="ce199" table:formula="of:=[.D30]*[.E30]" office:value-type="float" office:value="1218" calcext:value-type="float">
            <text:p><text:s/>1,218.00 </text:p>
          </table:table-cell>
          <table:table-cell table:style-name="ce181"/>
          <table:table-cell table:number-columns-repeated="250"/>
        </table:table-row>
        <table:table-row table:style-name="ro21">
          <table:table-cell table:style-name="ce181"/>
          <table:table-cell table:style-name="ce183" office:value-type="string" calcext:value-type="string">
            <text:p>Guano de corral (saco 50 kg)</text:p>
          </table:table-cell>
          <table:table-cell table:style-name="ce188" office:value-type="string" calcext:value-type="string">
            <text:p>sac</text:p>
          </table:table-cell>
          <table:table-cell table:style-name="ce193" office:value-type="float" office:value="200" calcext:value-type="float">
            <text:p>200.00</text:p>
          </table:table-cell>
          <table:table-cell table:style-name="ce193" office:value-type="float" office:value="10" calcext:value-type="float">
            <text:p>10.00</text:p>
          </table:table-cell>
          <table:table-cell table:style-name="ce199" table:formula="of:=[.D31]*[.E31]" office:value-type="float" office:value="2000" calcext:value-type="float">
            <text:p><text:s/>2,000.00 </text:p>
          </table:table-cell>
          <table:table-cell table:style-name="ce181"/>
          <table:table-cell table:number-columns-repeated="250"/>
        </table:table-row>
        <table:table-row table:style-name="ro21">
          <table:table-cell table:style-name="ce181"/>
          <table:table-cell table:style-name="ce183" office:value-type="string" calcext:value-type="string">
            <text:p>Guano de isla</text:p>
          </table:table-cell>
          <table:table-cell table:style-name="ce188" office:value-type="string" calcext:value-type="string">
            <text:p>sac</text:p>
          </table:table-cell>
          <table:table-cell table:style-name="ce193" office:value-type="float" office:value="29" calcext:value-type="float">
            <text:p>29.00</text:p>
          </table:table-cell>
          <table:table-cell table:style-name="ce193" office:value-type="float" office:value="55" calcext:value-type="float">
            <text:p>55.00</text:p>
          </table:table-cell>
          <table:table-cell table:style-name="ce199" table:formula="of:=[.D32]*[.E32]" office:value-type="float" office:value="1595" calcext:value-type="float">
            <text:p><text:s/>1,595.00 </text:p>
          </table:table-cell>
          <table:table-cell table:style-name="ce181"/>
          <table:table-cell table:number-columns-repeated="250"/>
        </table:table-row>
        <table:table-row table:style-name="ro21">
          <table:table-cell table:style-name="ce181"/>
          <table:table-cell table:style-name="ce183" office:value-type="string" calcext:value-type="string">
            <text:p>Inoculante ( sobre de 100 gr)</text:p>
          </table:table-cell>
          <table:table-cell table:style-name="ce188" office:value-type="string" calcext:value-type="string">
            <text:p>sbr</text:p>
          </table:table-cell>
          <table:table-cell table:style-name="ce193" office:value-type="float" office:value="15" calcext:value-type="float">
            <text:p>15.00</text:p>
          </table:table-cell>
          <table:table-cell table:style-name="ce193" office:value-type="float" office:value="23" calcext:value-type="float">
            <text:p>23.00</text:p>
          </table:table-cell>
          <table:table-cell table:style-name="ce199" table:formula="of:=[.D33]*[.E33]" office:value-type="float" office:value="345" calcext:value-type="float">
            <text:p><text:s/>345.00 </text:p>
          </table:table-cell>
          <table:table-cell table:style-name="ce181"/>
          <table:table-cell table:number-columns-repeated="250"/>
        </table:table-row>
        <table:table-row table:style-name="ro21">
          <table:table-cell table:style-name="ce181"/>
          <table:table-cell table:style-name="ce183" office:value-type="string" calcext:value-type="string">
            <text:p>Alimento concentrado (saco 40 kg)</text:p>
          </table:table-cell>
          <table:table-cell table:style-name="ce188" office:value-type="string" calcext:value-type="string">
            <text:p>sac</text:p>
          </table:table-cell>
          <table:table-cell table:style-name="ce193" table:formula="of:=29*2" office:value-type="float" office:value="58" calcext:value-type="float">
            <text:p>58.00</text:p>
          </table:table-cell>
          <table:table-cell table:style-name="ce193" office:value-type="float" office:value="78" calcext:value-type="float">
            <text:p>78.00</text:p>
          </table:table-cell>
          <table:table-cell table:style-name="ce199" table:formula="of:=[.D34]*[.E34]" office:value-type="float" office:value="4524" calcext:value-type="float">
            <text:p><text:s/>4,524.00 </text:p>
          </table:table-cell>
          <table:table-cell table:style-name="ce181"/>
          <table:table-cell table:number-columns-repeated="250"/>
        </table:table-row>
        <table:table-row table:style-name="ro21">
          <table:table-cell table:style-name="ce181"/>
          <table:table-cell table:style-name="ce183" office:value-type="string" calcext:value-type="string">
            <text:p>Semilla de cebada para FVH</text:p>
          </table:table-cell>
          <table:table-cell table:style-name="ce188" office:value-type="string" calcext:value-type="string">
            <text:p>kg</text:p>
          </table:table-cell>
          <table:table-cell table:style-name="ce193" office:value-type="float" office:value="145" calcext:value-type="float">
            <text:p>145.00</text:p>
          </table:table-cell>
          <table:table-cell table:style-name="ce193" office:value-type="float" office:value="2.3" calcext:value-type="float">
            <text:p>2.30</text:p>
          </table:table-cell>
          <table:table-cell table:style-name="ce199" table:formula="of:=[.D35]*[.E35]" office:value-type="float" office:value="333.5" calcext:value-type="float">
            <text:p><text:s/>333.50 </text:p>
          </table:table-cell>
          <table:table-cell table:style-name="ce181"/>
          <table:table-cell/>
          <table:table-cell office:value-type="float" office:value="0" calcext:value-type="float">
            <text:p>0</text:p>
          </table:table-cell>
          <table:table-cell table:number-columns-repeated="248"/>
        </table:table-row>
        <table:table-row table:style-name="ro21">
          <table:table-cell/>
          <table:table-cell table:style-name="ce182" office:value-type="string" calcext:value-type="string">
            <text:p>TOTAL TERRENOS Y OBRAS CIVILES</text:p>
          </table:table-cell>
          <table:table-cell table:style-name="ce188"/>
          <table:table-cell table:style-name="ce195"/>
          <table:table-cell table:style-name="ce188"/>
          <table:table-cell table:style-name="ce198" table:formula="of:=[.F27]+[.F6]+[.F5]" office:value-type="float" office:value="73528.5" calcext:value-type="float">
            <text:p><text:s/>73,528.50 </text:p>
          </table:table-cell>
          <table:table-cell table:style-name="ce202" table:formula="of:=[.F6]+[.F27]" office:value-type="float" office:value="73528.5" calcext:value-type="float">
            <text:p><text:s/>73,528.50 </text:p>
          </table:table-cell>
          <table:table-cell table:style-name="ce203" office:value-type="string" calcext:value-type="string">
            <text:p>sujeto a depreciacion.</text:p>
          </table:table-cell>
          <table:table-cell table:style-name="ce203"/>
          <table:table-cell table:number-columns-repeated="248"/>
        </table:table-row>
        <table:table-row table:style-name="ro21" table:number-rows-repeated="87">
          <table:table-cell/>
          <table:table-cell table:style-name="ce185"/>
          <table:table-cell table:style-name="ce191" table:number-columns-repeated="4"/>
          <table:table-cell table:style-name="ce185"/>
          <table:table-cell table:number-columns-repeated="250"/>
        </table:table-row>
        <table:table-row table:style-name="ro21" table:number-rows-repeated="1048452">
          <table:table-cell table:number-columns-repeated="257"/>
        </table:table-row>
        <table:table-row table:style-name="ro21">
          <table:table-cell table:number-columns-repeated="257"/>
        </table:table-row>
        <table:named-expressions>
          <table:named-range table:name="_xlnm.Print_Area" table:base-cell-address="$POBLACION.$A$1" table:cell-range-address="$'TERREN Y OBR CIV'.$B$2:.$F$36" table:range-usable-as="print-range"/>
        </table:named-expressions>
      </table:table>
      <table:table table:name="MUEB, MAQ,EQUIP" table:style-name="ta7" table:print-ranges="'MUEB, MAQ,EQUIP'.B1:'MUEB, MAQ,EQUIP'.F52">
        <table:table-column table:style-name="co1" table:default-cell-style-name="ce207"/>
        <table:table-column table:style-name="co51" table:default-cell-style-name="ce207"/>
        <table:table-column table:style-name="co52" table:default-cell-style-name="ce207"/>
        <table:table-column table:style-name="co9" table:default-cell-style-name="ce223"/>
        <table:table-column table:style-name="co53" table:default-cell-style-name="ce223"/>
        <table:table-column table:style-name="co20" table:default-cell-style-name="ce207"/>
        <table:table-column table:style-name="co1" table:default-cell-style-name="ce207"/>
        <table:table-column table:style-name="co5" table:number-columns-repeated="2" table:default-cell-style-name="ce207"/>
        <table:table-column table:style-name="co1" table:number-columns-repeated="248" table:default-cell-style-name="ce207"/>
        <table:table-column table:style-name="co12" table:number-columns-repeated="16127"/>
        <table:table-row table:style-name="ro21">
          <table:table-cell table:number-columns-repeated="257"/>
        </table:table-row>
        <table:table-row table:style-name="ro21">
          <table:table-cell/>
          <table:table-cell table:style-name="ce210" office:value-type="string" calcext:value-type="string">
            <text:p><text:s text:c="58"/>MAQUINARIA Y EQUIPO</text:p>
          </table:table-cell>
          <table:table-cell table:style-name="ce210"/>
          <table:table-cell table:number-columns-repeated="254"/>
        </table:table-row>
        <table:table-row table:style-name="ro3">
          <table:table-cell table:style-name="ce208"/>
          <table:table-cell table:style-name="ce211" office:value-type="string" calcext:value-type="string">
            <text:p>DESCRIPCION</text:p>
          </table:table-cell>
          <table:table-cell table:style-name="ce211" office:value-type="string" calcext:value-type="string">
            <text:p>UNIDAD</text:p>
          </table:table-cell>
          <table:table-cell table:style-name="ce211" office:value-type="string" calcext:value-type="string">
            <text:p>CANTIDAD</text:p>
          </table:table-cell>
          <table:table-cell table:style-name="ce211" office:value-type="string" calcext:value-type="string">
            <text:p>VALOR UNITARIO</text:p>
          </table:table-cell>
          <table:table-cell table:style-name="ce211" office:value-type="string" calcext:value-type="string">
            <text:p>TOTAL</text:p>
          </table:table-cell>
          <table:table-cell table:style-name="ce244"/>
          <table:table-cell table:style-name="ce244" office:value-type="string" calcext:value-type="string">
            <text:p>33 POSAS</text:p>
          </table:table-cell>
          <table:table-cell table:style-name="ce244"/>
          <table:table-cell table:style-name="ce208" table:number-columns-repeated="16375"/>
        </table:table-row>
        <table:table-row table:style-name="ro21">
          <table:table-cell/>
          <table:table-cell table:style-name="ce212" office:value-type="string" calcext:value-type="string">
            <text:p>MAQUINARIA</text:p>
          </table:table-cell>
          <table:table-cell table:style-name="ce212"/>
          <table:table-cell table:style-name="ce224" table:number-columns-repeated="2"/>
          <table:table-cell table:style-name="ce235" table:formula="of:=SUM([.F5:.F5])" office:value-type="float" office:value="800" calcext:value-type="float">
            <text:p><text:s/>800.00 </text:p>
          </table:table-cell>
          <table:table-cell table:style-name="ce217" table:number-columns-repeated="3"/>
          <table:table-cell table:number-columns-repeated="248"/>
        </table:table-row>
        <table:table-row table:style-name="ro21">
          <table:table-cell/>
          <table:table-cell table:style-name="ce213" office:value-type="string" calcext:value-type="string">
            <text:p>Herramientas Manuales</text:p>
          </table:table-cell>
          <table:table-cell table:style-name="ce221" office:value-type="string" calcext:value-type="string">
            <text:p>Gbl</text:p>
          </table:table-cell>
          <table:table-cell table:style-name="ce225" office:value-type="float" office:value="1" calcext:value-type="float">
            <text:p>1.00</text:p>
          </table:table-cell>
          <table:table-cell table:style-name="ce231" office:value-type="float" office:value="800" calcext:value-type="float">
            <text:p>800.00</text:p>
          </table:table-cell>
          <table:table-cell table:style-name="ce236" table:formula="of:=[.D5]*[.E5]" office:value-type="float" office:value="800" calcext:value-type="float">
            <text:p><text:s/>800.00 </text:p>
          </table:table-cell>
          <table:table-cell/>
          <table:table-cell table:style-name="ce250"/>
          <table:table-cell table:style-name="ce217"/>
          <table:table-cell table:number-columns-repeated="248"/>
        </table:table-row>
        <table:table-row table:style-name="ro21">
          <table:table-cell/>
          <table:table-cell table:style-name="ce212" office:value-type="string" calcext:value-type="string">
            <text:p>EQUIPOS</text:p>
          </table:table-cell>
          <table:table-cell table:style-name="ce212"/>
          <table:table-cell table:style-name="ce226" table:number-columns-repeated="2"/>
          <table:table-cell table:style-name="ce235" table:formula="of:=SUM([.F7:.F15])" office:value-type="float" office:value="43608" calcext:value-type="float">
            <text:p><text:s/>43,608.00 </text:p>
          </table:table-cell>
          <table:table-cell table:style-name="ce245"/>
          <table:table-cell table:style-name="ce250"/>
          <table:table-cell table:style-name="ce245"/>
          <table:table-cell table:style-name="ce210" table:number-columns-repeated="16375"/>
        </table:table-row>
        <table:table-row table:style-name="ro21">
          <table:table-cell/>
          <table:table-cell table:style-name="ce213" office:value-type="string" calcext:value-type="string">
            <text:p>Jabas Plasticas <text:s/>para manejo <text:s/>35*52*36</text:p>
          </table:table-cell>
          <table:table-cell table:style-name="ce221" office:value-type="string" calcext:value-type="string">
            <text:p>und</text:p>
          </table:table-cell>
          <table:table-cell table:style-name="ce225" table:formula="of:=11*15" office:value-type="float" office:value="165" calcext:value-type="float">
            <text:p>165.00</text:p>
          </table:table-cell>
          <table:table-cell table:style-name="ce231" office:value-type="float" office:value="18" calcext:value-type="float">
            <text:p>18.00</text:p>
          </table:table-cell>
          <table:table-cell table:style-name="ce236" table:formula="of:=[.D7]*[.E7]" office:value-type="float" office:value="2970" calcext:value-type="float">
            <text:p><text:s/>2,970.00 </text:p>
          </table:table-cell>
          <table:table-cell table:style-name="ce245" table:formula="of:=+[.D7]/29" office:value-type="float" office:value="5.68965517241379" calcext:value-type="float">
            <text:p>5.68965517241379</text:p>
          </table:table-cell>
          <table:table-cell table:style-name="ce250"/>
          <table:table-cell table:style-name="ce245"/>
          <table:table-cell table:style-name="ce210" table:number-columns-repeated="16375"/>
        </table:table-row>
        <table:table-row table:style-name="ro3">
          <table:table-cell/>
          <table:table-cell table:style-name="ce213" office:value-type="string" calcext:value-type="string">
            <text:p>Gazaperas galv. para cuyes 38 cm diam 21 cm de altura</text:p>
          </table:table-cell>
          <table:table-cell table:style-name="ce221" office:value-type="string" calcext:value-type="string">
            <text:p>und</text:p>
          </table:table-cell>
          <table:table-cell table:style-name="ce225" table:formula="of:=22*11" office:value-type="float" office:value="242" calcext:value-type="float">
            <text:p>242.00</text:p>
          </table:table-cell>
          <table:table-cell table:style-name="ce231" office:value-type="float" office:value="15" calcext:value-type="float">
            <text:p>15.00</text:p>
          </table:table-cell>
          <table:table-cell table:style-name="ce236" table:formula="of:=[.D8]*[.E8]" office:value-type="float" office:value="3630" calcext:value-type="float">
            <text:p><text:s/>3,630.00 </text:p>
          </table:table-cell>
          <table:table-cell table:style-name="ce245" table:formula="of:=+[.D8]/29" office:value-type="float" office:value="8.3448275862069" calcext:value-type="float">
            <text:p>8.3448275862069</text:p>
          </table:table-cell>
          <table:table-cell table:style-name="ce250"/>
          <table:table-cell table:style-name="ce245"/>
          <table:table-cell table:style-name="ce210" table:number-columns-repeated="16375"/>
        </table:table-row>
        <table:table-row table:style-name="ro21">
          <table:table-cell/>
          <table:table-cell table:style-name="ce213" office:value-type="string" calcext:value-type="string">
            <text:p>Comederos de <text:s/>tipo tolva de aluminio cap.6 kg</text:p>
          </table:table-cell>
          <table:table-cell table:style-name="ce221" office:value-type="string" calcext:value-type="string">
            <text:p>und</text:p>
          </table:table-cell>
          <table:table-cell table:style-name="ce225" table:formula="of:=22*11" office:value-type="float" office:value="242" calcext:value-type="float">
            <text:p>242.00</text:p>
          </table:table-cell>
          <table:table-cell table:style-name="ce231" office:value-type="float" office:value="14" calcext:value-type="float">
            <text:p>14.00</text:p>
          </table:table-cell>
          <table:table-cell table:style-name="ce236" table:formula="of:=[.D9]*[.E9]" office:value-type="float" office:value="3388" calcext:value-type="float">
            <text:p><text:s/>3,388.00 </text:p>
          </table:table-cell>
          <table:table-cell table:style-name="ce245" table:formula="of:=+[.D9]/29" office:value-type="float" office:value="8.3448275862069" calcext:value-type="float">
            <text:p>8.3448275862069</text:p>
          </table:table-cell>
          <table:table-cell table:style-name="ce250"/>
          <table:table-cell table:style-name="ce245"/>
          <table:table-cell table:style-name="ce210" table:number-columns-repeated="16375"/>
        </table:table-row>
        <table:table-row table:style-name="ro21">
          <table:table-cell/>
          <table:table-cell table:style-name="ce213" office:value-type="string" calcext:value-type="string">
            <text:p>Forrajera galvanizada </text:p>
          </table:table-cell>
          <table:table-cell table:style-name="ce221" office:value-type="string" calcext:value-type="string">
            <text:p>und</text:p>
          </table:table-cell>
          <table:table-cell table:style-name="ce225" table:formula="of:=22*11" office:value-type="float" office:value="242" calcext:value-type="float">
            <text:p>242.00</text:p>
          </table:table-cell>
          <table:table-cell table:style-name="ce231" office:value-type="float" office:value="15" calcext:value-type="float">
            <text:p>15.00</text:p>
          </table:table-cell>
          <table:table-cell table:style-name="ce236" table:formula="of:=[.D10]*[.E10]" office:value-type="float" office:value="3630" calcext:value-type="float">
            <text:p><text:s/>3,630.00 </text:p>
          </table:table-cell>
          <table:table-cell table:style-name="ce245" table:formula="of:=+[.D10]/29" office:value-type="float" office:value="8.3448275862069" calcext:value-type="float">
            <text:p>8.3448275862069</text:p>
          </table:table-cell>
          <table:table-cell table:style-name="ce250"/>
          <table:table-cell table:style-name="ce251"/>
          <table:table-cell table:style-name="ce210" table:number-columns-repeated="16375"/>
        </table:table-row>
        <table:table-row table:style-name="ro21">
          <table:table-cell/>
          <table:table-cell table:style-name="ce213" office:value-type="string" calcext:value-type="string">
            <text:p>Jabas de transporte 58*83*13 cm</text:p>
          </table:table-cell>
          <table:table-cell table:style-name="ce221" office:value-type="string" calcext:value-type="string">
            <text:p>und</text:p>
          </table:table-cell>
          <table:table-cell table:style-name="ce225" table:formula="of:=11*5" office:value-type="float" office:value="55" calcext:value-type="float">
            <text:p>55.00</text:p>
          </table:table-cell>
          <table:table-cell table:style-name="ce231" office:value-type="float" office:value="70" calcext:value-type="float">
            <text:p>70.00</text:p>
          </table:table-cell>
          <table:table-cell table:style-name="ce236" table:formula="of:=[.D11]*[.E11]" office:value-type="float" office:value="3850" calcext:value-type="float">
            <text:p><text:s/>3,850.00 </text:p>
          </table:table-cell>
          <table:table-cell table:style-name="ce245" table:formula="of:=+[.D11]/29" office:value-type="float" office:value="1.89655172413793" calcext:value-type="float">
            <text:p>1.89655172413793</text:p>
          </table:table-cell>
          <table:table-cell table:style-name="ce250"/>
          <table:table-cell table:style-name="ce251"/>
          <table:table-cell table:style-name="ce210" table:number-columns-repeated="16375"/>
        </table:table-row>
        <table:table-row table:style-name="ro21">
          <table:table-cell/>
          <table:table-cell table:style-name="ce213" office:value-type="string" calcext:value-type="string">
            <text:p>Termometro ambiental con maximi y minimo </text:p>
          </table:table-cell>
          <table:table-cell table:style-name="ce221" office:value-type="string" calcext:value-type="string">
            <text:p>und</text:p>
          </table:table-cell>
          <table:table-cell table:style-name="ce225" office:value-type="float" office:value="11" calcext:value-type="float">
            <text:p>11.00</text:p>
          </table:table-cell>
          <table:table-cell table:style-name="ce231" office:value-type="float" office:value="60" calcext:value-type="float">
            <text:p>60.00</text:p>
          </table:table-cell>
          <table:table-cell table:style-name="ce236" table:formula="of:=[.D12]*[.E12]" office:value-type="float" office:value="660" calcext:value-type="float">
            <text:p><text:s/>660.00 </text:p>
          </table:table-cell>
          <table:table-cell table:style-name="ce245" table:formula="of:=+[.D12]/29" office:value-type="float" office:value="0.379310344827586" calcext:value-type="float">
            <text:p>0.379310344827586</text:p>
          </table:table-cell>
          <table:table-cell table:style-name="ce250"/>
          <table:table-cell table:style-name="ce251"/>
          <table:table-cell table:style-name="ce210" table:number-columns-repeated="16375"/>
        </table:table-row>
        <table:table-row table:style-name="ro21">
          <table:table-cell/>
          <table:table-cell table:style-name="ce213" office:value-type="string" calcext:value-type="string">
            <text:p>Balanza digital de 20 kg</text:p>
          </table:table-cell>
          <table:table-cell table:style-name="ce221" office:value-type="string" calcext:value-type="string">
            <text:p>und</text:p>
          </table:table-cell>
          <table:table-cell table:style-name="ce225" office:value-type="float" office:value="11" calcext:value-type="float">
            <text:p>11.00</text:p>
          </table:table-cell>
          <table:table-cell table:style-name="ce231" office:value-type="float" office:value="130" calcext:value-type="float">
            <text:p>130.00</text:p>
          </table:table-cell>
          <table:table-cell table:style-name="ce236" table:formula="of:=[.D13]*[.E13]" office:value-type="float" office:value="1430" calcext:value-type="float">
            <text:p><text:s/>1,430.00 </text:p>
          </table:table-cell>
          <table:table-cell table:style-name="ce245" table:formula="of:=+[.D13]/29" office:value-type="float" office:value="0.379310344827586" calcext:value-type="float">
            <text:p>0.379310344827586</text:p>
          </table:table-cell>
          <table:table-cell table:style-name="ce250"/>
          <table:table-cell table:style-name="ce251"/>
          <table:table-cell table:style-name="ce210" table:number-columns-repeated="16375"/>
        </table:table-row>
        <table:table-row table:style-name="ro21">
          <table:table-cell/>
          <table:table-cell table:style-name="ce213" office:value-type="string" calcext:value-type="string">
            <text:p>Bandeja pregerminadora de plastica 50x36x4cm</text:p>
          </table:table-cell>
          <table:table-cell table:style-name="ce221" office:value-type="string" calcext:value-type="string">
            <text:p>und</text:p>
          </table:table-cell>
          <table:table-cell table:style-name="ce225" table:formula="of:=11*15" office:value-type="float" office:value="165" calcext:value-type="float">
            <text:p>165.00</text:p>
          </table:table-cell>
          <table:table-cell table:style-name="ce231" office:value-type="float" office:value="10" calcext:value-type="float">
            <text:p>10.00</text:p>
          </table:table-cell>
          <table:table-cell table:style-name="ce236" table:formula="of:=[.D14]*[.E14]" office:value-type="float" office:value="1650" calcext:value-type="float">
            <text:p><text:s/>1,650.00 </text:p>
          </table:table-cell>
          <table:table-cell table:style-name="ce245" table:formula="of:=+[.D14]/29" office:value-type="float" office:value="5.68965517241379" calcext:value-type="float">
            <text:p>5.68965517241379</text:p>
          </table:table-cell>
          <table:table-cell table:style-name="ce250"/>
          <table:table-cell table:style-name="ce251"/>
          <table:table-cell table:style-name="ce210" table:number-columns-repeated="16375"/>
        </table:table-row>
        <table:table-row table:style-name="ro21">
          <table:table-cell/>
          <table:table-cell table:style-name="ce213" office:value-type="string" calcext:value-type="string">
            <text:p>Motocarga</text:p>
          </table:table-cell>
          <table:table-cell table:style-name="ce221" office:value-type="string" calcext:value-type="string">
            <text:p>und</text:p>
          </table:table-cell>
          <table:table-cell table:style-name="ce225" office:value-type="float" office:value="2" calcext:value-type="float">
            <text:p>2.00</text:p>
          </table:table-cell>
          <table:table-cell table:style-name="ce231" office:value-type="float" office:value="11200" calcext:value-type="float">
            <text:p>11200.00</text:p>
          </table:table-cell>
          <table:table-cell table:style-name="ce236" table:formula="of:=[.D15]*[.E15]" office:value-type="float" office:value="22400" calcext:value-type="float">
            <text:p><text:s/>22,400.00 </text:p>
          </table:table-cell>
          <table:table-cell table:style-name="ce245" table:number-columns-repeated="2"/>
          <table:table-cell table:style-name="ce251" office:value-type="string" office:string-value="BANDEJA DE PLASTICA 50X36X4CM" calcext:value-type="string">
            <text:p><text:s/>BANDEJA DE PLASTICA 50X36X4CM </text:p>
          </table:table-cell>
          <table:table-cell table:style-name="ce210" table:number-columns-repeated="16375"/>
        </table:table-row>
        <table:table-row table:style-name="ro21" table:visibility="collapse">
          <table:table-cell/>
          <table:table-cell table:style-name="ce214" office:value-type="string" calcext:value-type="string">
            <text:p>EQUIPOS DE OFICINA</text:p>
          </table:table-cell>
          <table:table-cell table:style-name="ce214"/>
          <table:table-cell table:style-name="ce225" table:number-columns-repeated="2"/>
          <table:table-cell table:style-name="ce235" table:formula="of:=SUM([.F17:.F19])" office:value-type="float" office:value="0" calcext:value-type="float">
            <text:p><text:s/>- <text:s text:c="2"/></text:p>
          </table:table-cell>
          <table:table-cell table:style-name="ce217" table:number-columns-repeated="2"/>
          <table:table-cell table:style-name="ce252"/>
          <table:table-cell table:number-columns-repeated="248"/>
        </table:table-row>
        <table:table-row table:style-name="ro21" table:visibility="collapse">
          <table:table-cell/>
          <table:table-cell table:style-name="ce215" office:value-type="string" calcext:value-type="string">
            <text:p>Equipos de Computo</text:p>
          </table:table-cell>
          <table:table-cell table:style-name="ce221" office:value-type="string" calcext:value-type="string">
            <text:p>und</text:p>
          </table:table-cell>
          <table:table-cell table:style-name="ce225" office:value-type="float" office:value="0" calcext:value-type="float">
            <text:p>0.00</text:p>
          </table:table-cell>
          <table:table-cell table:style-name="ce231" office:value-type="float" office:value="2500" calcext:value-type="float">
            <text:p>2500.00</text:p>
          </table:table-cell>
          <table:table-cell table:style-name="ce236" table:formula="of:=[.D17]*[.E17]" office:value-type="float" office:value="0" calcext:value-type="float">
            <text:p><text:s/>- <text:s text:c="2"/></text:p>
          </table:table-cell>
          <table:table-cell table:style-name="ce217" table:number-columns-repeated="3"/>
          <table:table-cell table:number-columns-repeated="248"/>
        </table:table-row>
        <table:table-row table:style-name="ro21" table:visibility="collapse">
          <table:table-cell/>
          <table:table-cell table:style-name="ce215" office:value-type="string" calcext:value-type="string">
            <text:p>Impresoras</text:p>
          </table:table-cell>
          <table:table-cell table:style-name="ce221" office:value-type="string" calcext:value-type="string">
            <text:p>und</text:p>
          </table:table-cell>
          <table:table-cell table:style-name="ce225" office:value-type="float" office:value="0" calcext:value-type="float">
            <text:p>0.00</text:p>
          </table:table-cell>
          <table:table-cell table:style-name="ce231" office:value-type="float" office:value="500" calcext:value-type="float">
            <text:p>500.00</text:p>
          </table:table-cell>
          <table:table-cell table:style-name="ce236" table:formula="of:=[.D18]*[.E18]" office:value-type="float" office:value="0" calcext:value-type="float">
            <text:p><text:s/>- <text:s text:c="2"/></text:p>
          </table:table-cell>
          <table:table-cell table:style-name="ce217" table:number-columns-repeated="3"/>
          <table:table-cell table:number-columns-repeated="248"/>
        </table:table-row>
        <table:table-row table:style-name="ro21" table:visibility="collapse">
          <table:table-cell/>
          <table:table-cell table:style-name="ce215" office:value-type="string" calcext:value-type="string">
            <text:p>Fotocopiadora</text:p>
          </table:table-cell>
          <table:table-cell table:style-name="ce221" office:value-type="string" calcext:value-type="string">
            <text:p>und</text:p>
          </table:table-cell>
          <table:table-cell table:style-name="ce225" office:value-type="float" office:value="0" calcext:value-type="float">
            <text:p>0.00</text:p>
          </table:table-cell>
          <table:table-cell table:style-name="ce231" office:value-type="float" office:value="5000" calcext:value-type="float">
            <text:p>5000.00</text:p>
          </table:table-cell>
          <table:table-cell table:style-name="ce236" table:formula="of:=[.D19]*[.E19]" office:value-type="float" office:value="0" calcext:value-type="float">
            <text:p><text:s/>- <text:s text:c="2"/></text:p>
          </table:table-cell>
          <table:table-cell table:style-name="ce217" table:number-columns-repeated="3"/>
          <table:table-cell table:number-columns-repeated="248"/>
        </table:table-row>
        <table:table-row table:style-name="ro21">
          <table:table-cell/>
          <table:table-cell table:style-name="ce214" office:value-type="string" calcext:value-type="string">
            <text:p>TOTAL MAQUINARIA <text:s/>Y EQUIPO</text:p>
          </table:table-cell>
          <table:table-cell table:style-name="ce214"/>
          <table:table-cell table:style-name="ce224" table:number-columns-repeated="2"/>
          <table:table-cell table:style-name="ce235" table:formula="of:=[.F4]+[.F6]+[.F16]" office:value-type="float" office:value="44408" calcext:value-type="float">
            <text:p><text:s/>44,408.00 </text:p>
          </table:table-cell>
          <table:table-cell table:style-name="ce217">
            <draw:frame draw:z-index="0" draw:name="Imagen 1" draw:style-name="gr2" draw:text-style-name="P1" svg:width="2.501cm" svg:height="0.485cm" svg:x="0.413cm" svg:y="0.064cm">
              <draw:image xlink:href="Pictures/10000B9800000AD50000023187A6850A.emf" xlink:type="simple" xlink:show="embed" xlink:actuate="onLoad" draw:mime-type="image/x-emf">
                <text:p/>
              </draw:image>
              <draw:image xlink:href="Pictures/100000010000006900000015AE0B812F.png" xlink:type="simple" xlink:show="embed" xlink:actuate="onLoad" draw:mime-type="image/png"/>
            </draw:frame>
          </table:table-cell>
          <table:table-cell table:style-name="ce217"/>
          <table:table-cell table:style-name="ce253" office:value-type="string" office:string-value="Bandeja de plastica 50x36x4cm" calcext:value-type="string">
            <text:p><text:s/>Bandeja de plastica 50x36x4cm </text:p>
          </table:table-cell>
          <table:table-cell/>
          <table:table-cell table:style-name="ce254"/>
          <table:table-cell table:number-columns-repeated="246"/>
        </table:table-row>
        <table:table-row table:style-name="ro21">
          <table:table-cell table:number-columns-repeated="5"/>
          <table:table-cell office:value-type="float" office:value="48563" calcext:value-type="float">
            <text:p>48563</text:p>
          </table:table-cell>
          <table:table-cell table:style-name="ce217" table:number-columns-repeated="3"/>
          <table:table-cell table:number-columns-repeated="248"/>
        </table:table-row>
        <table:table-row table:style-name="ro21">
          <table:table-cell table:number-columns-repeated="5"/>
          <table:table-cell table:style-name="ce237" table:formula="of:=+[.F21]-[.F20]" office:value-type="float" office:value="4155" calcext:value-type="float">
            <text:p><text:s/>4,155.00 </text:p>
          </table:table-cell>
          <table:table-cell table:style-name="ce217" table:number-columns-repeated="3"/>
          <table:table-cell table:number-columns-repeated="248"/>
        </table:table-row>
        <table:table-row table:style-name="ro21">
          <table:table-cell table:number-columns-repeated="6"/>
          <table:table-cell table:style-name="ce217" table:number-columns-repeated="3"/>
          <table:table-cell table:number-columns-repeated="248"/>
        </table:table-row>
        <table:table-row table:style-name="ro21">
          <table:table-cell table:number-columns-repeated="6"/>
          <table:table-cell table:style-name="ce217" table:number-columns-repeated="2"/>
          <table:table-cell table:style-name="ce253"/>
          <table:table-cell table:style-name="ce254"/>
          <table:table-cell table:number-columns-repeated="247"/>
        </table:table-row>
        <table:table-row table:style-name="ro21">
          <table:table-cell/>
          <table:table-cell office:value-type="string" calcext:value-type="string">
            <text:p><text:s text:c="68"/>VEHICULOS</text:p>
          </table:table-cell>
          <table:table-cell table:number-columns-repeated="4"/>
          <table:table-cell table:style-name="ce217" table:number-columns-repeated="3"/>
          <table:table-cell table:number-columns-repeated="248"/>
        </table:table-row>
        <table:table-row table:style-name="ro3">
          <table:table-cell table:style-name="ce209"/>
          <table:table-cell table:style-name="ce216" office:value-type="string" calcext:value-type="string">
            <text:p>DESCRIPCION</text:p>
          </table:table-cell>
          <table:table-cell table:style-name="ce216"/>
          <table:table-cell table:style-name="ce216" office:value-type="string" calcext:value-type="string">
            <text:p>CANTIDAD</text:p>
          </table:table-cell>
          <table:table-cell table:style-name="ce216" office:value-type="string" calcext:value-type="string">
            <text:p>VALOR UNITARIO</text:p>
          </table:table-cell>
          <table:table-cell table:style-name="ce238" office:value-type="string" calcext:value-type="string">
            <text:p>TOTAL</text:p>
          </table:table-cell>
          <table:table-cell table:style-name="ce246" table:number-columns-repeated="3"/>
          <table:table-cell table:style-name="ce209" table:number-columns-repeated="16375"/>
        </table:table-row>
        <table:table-row table:style-name="ro21">
          <table:table-cell table:style-name="ce209"/>
          <table:table-cell table:style-name="ce213" office:value-type="string" calcext:value-type="string">
            <text:p>Camion pequeño de carga</text:p>
          </table:table-cell>
          <table:table-cell table:style-name="ce221" office:value-type="string" calcext:value-type="string">
            <text:p>und</text:p>
          </table:table-cell>
          <table:table-cell table:style-name="ce221" office:value-type="float" office:value="0" calcext:value-type="float">
            <text:p>0</text:p>
          </table:table-cell>
          <table:table-cell table:style-name="ce232" office:value-type="float" office:value="150000" calcext:value-type="float">
            <text:p><text:s/>150,000.00 </text:p>
          </table:table-cell>
          <table:table-cell table:style-name="ce239" table:formula="of:=[.D27]*[.E27]" office:value-type="float" office:value="0" calcext:value-type="float">
            <text:p><text:s/>- <text:s text:c="2"/></text:p>
          </table:table-cell>
          <table:table-cell table:style-name="ce246" table:number-columns-repeated="3"/>
          <table:table-cell table:style-name="ce209" table:number-columns-repeated="16375"/>
        </table:table-row>
        <table:table-row table:style-name="ro21">
          <table:table-cell table:style-name="ce210"/>
          <table:table-cell table:style-name="ce214" office:value-type="string" calcext:value-type="string">
            <text:p>TOTAL VEHICULOS</text:p>
          </table:table-cell>
          <table:table-cell table:style-name="ce214"/>
          <table:table-cell table:style-name="ce227" table:number-columns-repeated="2"/>
          <table:table-cell table:style-name="ce235" table:formula="of:=SUM([.F27])" office:value-type="float" office:value="0" calcext:value-type="float">
            <text:p><text:s/>- <text:s text:c="2"/></text:p>
          </table:table-cell>
          <table:table-cell table:style-name="ce245" table:number-columns-repeated="3"/>
          <table:table-cell table:style-name="ce210" table:number-columns-repeated="16375"/>
        </table:table-row>
        <table:table-row table:style-name="ro21" table:number-rows-repeated="2">
          <table:table-cell/>
          <table:table-cell table:style-name="ce217" table:number-columns-repeated="2"/>
          <table:table-cell table:style-name="ce228" table:number-columns-repeated="2"/>
          <table:table-cell table:style-name="ce217" table:number-columns-repeated="4"/>
          <table:table-cell table:number-columns-repeated="248"/>
        </table:table-row>
        <table:table-row table:style-name="ro21">
          <table:table-cell/>
          <table:table-cell table:style-name="ce217" table:number-columns-repeated="2"/>
          <table:table-cell/>
          <table:table-cell table:style-name="ce228"/>
          <table:table-cell table:style-name="ce217" table:number-columns-repeated="2"/>
          <table:table-cell table:style-name="ce217" office:value-type="float" office:value="5000" calcext:value-type="float">
            <text:p>5000</text:p>
          </table:table-cell>
          <table:table-cell table:style-name="ce217"/>
          <table:table-cell table:number-columns-repeated="248"/>
        </table:table-row>
        <table:table-row table:style-name="ro21">
          <table:table-cell/>
          <table:table-cell table:style-name="ce217" office:value-type="string" calcext:value-type="string">
            <text:p><text:s text:c="61"/>MUEBLES Y ENSERES</text:p>
          </table:table-cell>
          <table:table-cell table:style-name="ce217"/>
          <table:table-cell table:style-name="ce228" table:number-columns-repeated="2"/>
          <table:table-cell table:style-name="ce217" table:number-columns-repeated="2"/>
          <table:table-cell table:style-name="ce217" table:formula="of:=+[.H31]/50" office:value-type="float" office:value="100" calcext:value-type="float">
            <text:p>100</text:p>
          </table:table-cell>
          <table:table-cell table:style-name="ce217" table:formula="of:=+[.H32]/7" office:value-type="float" office:value="14.2857142857143" calcext:value-type="float">
            <text:p>14.2857142857143</text:p>
          </table:table-cell>
          <table:table-cell table:number-columns-repeated="248"/>
        </table:table-row>
        <table:table-row table:style-name="ro3">
          <table:table-cell table:style-name="ce209"/>
          <table:table-cell table:style-name="ce211" office:value-type="string" calcext:value-type="string">
            <text:p>DESCRIPCION</text:p>
          </table:table-cell>
          <table:table-cell table:style-name="ce211"/>
          <table:table-cell table:style-name="ce211" office:value-type="string" calcext:value-type="string">
            <text:p>CANTIDAD</text:p>
          </table:table-cell>
          <table:table-cell table:style-name="ce211" office:value-type="string" calcext:value-type="string">
            <text:p>VALOR UNITARIO</text:p>
          </table:table-cell>
          <table:table-cell table:style-name="ce211" office:value-type="string" calcext:value-type="string">
            <text:p>TOTAL</text:p>
          </table:table-cell>
          <table:table-cell table:style-name="ce246"/>
          <table:table-cell table:style-name="ce246" office:value-type="float" office:value="85" calcext:value-type="float">
            <text:p>85</text:p>
          </table:table-cell>
          <table:table-cell table:style-name="ce246"/>
          <table:table-cell table:style-name="ce209" table:number-columns-repeated="16375"/>
        </table:table-row>
        <table:table-row table:style-name="ro21">
          <table:table-cell/>
          <table:table-cell table:style-name="ce215" office:value-type="string" calcext:value-type="string">
            <text:p>Reproductor Cuy Hembra</text:p>
          </table:table-cell>
          <table:table-cell table:style-name="ce221" office:value-type="string" calcext:value-type="string">
            <text:p>und</text:p>
          </table:table-cell>
          <table:table-cell table:style-name="ce225" office:value-type="float" office:value="85" calcext:value-type="float">
            <text:p>85.00</text:p>
          </table:table-cell>
          <table:table-cell table:style-name="ce225" office:value-type="float" office:value="50" calcext:value-type="float">
            <text:p>50.00</text:p>
          </table:table-cell>
          <table:table-cell table:style-name="ce240" table:formula="of:=[.D34]*[.E34]" office:value-type="float" office:value="4250" calcext:value-type="float">
            <text:p>4250.00</text:p>
          </table:table-cell>
          <table:table-cell/>
          <table:table-cell office:value-type="float" office:value="15" calcext:value-type="float">
            <text:p>15</text:p>
          </table:table-cell>
          <table:table-cell table:number-columns-repeated="249"/>
        </table:table-row>
        <table:table-row table:style-name="ro21">
          <table:table-cell/>
          <table:table-cell table:style-name="ce215" office:value-type="string" calcext:value-type="string">
            <text:p>Reproductor Cuy Macho</text:p>
          </table:table-cell>
          <table:table-cell table:style-name="ce221" office:value-type="string" calcext:value-type="string">
            <text:p>und</text:p>
          </table:table-cell>
          <table:table-cell table:style-name="ce225" office:value-type="float" office:value="15" calcext:value-type="float">
            <text:p>15.00</text:p>
          </table:table-cell>
          <table:table-cell table:style-name="ce225" office:value-type="float" office:value="50" calcext:value-type="float">
            <text:p>50.00</text:p>
          </table:table-cell>
          <table:table-cell table:style-name="ce240" table:formula="of:=[.D35]*[.E35]" office:value-type="float" office:value="750" calcext:value-type="float">
            <text:p>750.00</text:p>
          </table:table-cell>
          <table:table-cell table:style-name="ce247"/>
          <table:table-cell table:formula="of:=SUM([.H33:.H34])" office:value-type="float" office:value="100" calcext:value-type="float">
            <text:p>100</text:p>
          </table:table-cell>
          <table:table-cell table:number-columns-repeated="249"/>
        </table:table-row>
        <table:table-row table:style-name="ro21">
          <table:table-cell/>
          <table:table-cell table:style-name="ce215" office:value-type="string" calcext:value-type="string">
            <text:p>Cartel del Proyecto</text:p>
          </table:table-cell>
          <table:table-cell table:style-name="ce221" office:value-type="string" calcext:value-type="string">
            <text:p>und</text:p>
          </table:table-cell>
          <table:table-cell table:style-name="ce225" office:value-type="float" office:value="1" calcext:value-type="float">
            <text:p>1.00</text:p>
          </table:table-cell>
          <table:table-cell table:style-name="ce225" office:value-type="float" office:value="300" calcext:value-type="float">
            <text:p>300.00</text:p>
          </table:table-cell>
          <table:table-cell table:style-name="ce240" table:formula="of:=[.D36]*[.E36]" office:value-type="float" office:value="300" calcext:value-type="float">
            <text:p>300.00</text:p>
          </table:table-cell>
          <table:table-cell table:number-columns-repeated="251"/>
        </table:table-row>
        <table:table-row table:style-name="ro21">
          <table:table-cell/>
          <table:table-cell table:style-name="ce214" office:value-type="string" calcext:value-type="string">
            <text:p>TOTAL MUEBLES Y ENSERES</text:p>
          </table:table-cell>
          <table:table-cell table:style-name="ce214"/>
          <table:table-cell table:style-name="ce224" table:number-columns-repeated="2"/>
          <table:table-cell table:style-name="ce235" table:formula="of:=SUM([.F34:.F36])" office:value-type="float" office:value="5300" calcext:value-type="float">
            <text:p><text:s/>5,300.00 </text:p>
          </table:table-cell>
          <table:table-cell table:style-name="ce217"/>
          <table:table-cell table:number-columns-repeated="250"/>
        </table:table-row>
        <table:table-row table:style-name="ro21">
          <table:table-cell/>
          <table:table-cell table:style-name="ce217" table:number-columns-repeated="2"/>
          <table:table-cell table:style-name="ce228" table:number-columns-repeated="2"/>
          <table:table-cell table:style-name="ce217" table:number-columns-repeated="2"/>
          <table:table-cell table:number-columns-repeated="250"/>
        </table:table-row>
        <table:table-row table:style-name="ro21">
          <table:table-cell/>
          <table:table-cell table:style-name="ce218" office:value-type="string" calcext:value-type="string">
            <text:p>KIT VETERINARIO</text:p>
          </table:table-cell>
          <table:table-cell table:style-name="ce218" table:number-columns-repeated="4"/>
          <table:table-cell table:style-name="ce217"/>
          <table:table-cell table:number-columns-repeated="250"/>
        </table:table-row>
        <table:table-row table:style-name="ro21">
          <table:table-cell/>
          <table:table-cell table:style-name="ce219" office:value-type="string" calcext:value-type="string">
            <text:p>DESCRIPCION</text:p>
          </table:table-cell>
          <table:table-cell table:style-name="ce219" office:value-type="string" calcext:value-type="string">
            <text:p>UND</text:p>
          </table:table-cell>
          <table:table-cell table:style-name="ce229" office:value-type="string" calcext:value-type="string">
            <text:p>CANT</text:p>
          </table:table-cell>
          <table:table-cell table:style-name="ce229" office:value-type="string" calcext:value-type="string">
            <text:p>P.U</text:p>
          </table:table-cell>
          <table:table-cell table:style-name="ce219" office:value-type="string" calcext:value-type="string">
            <text:p>PARCIAL</text:p>
          </table:table-cell>
          <table:table-cell table:style-name="ce217"/>
          <table:table-cell table:number-columns-repeated="250"/>
        </table:table-row>
        <table:table-row table:style-name="ro15">
          <table:table-cell/>
          <table:table-cell table:style-name="ce220" office:value-type="string" calcext:value-type="string">
            <text:p>Botiquín caja de plástico multiuso</text:p>
          </table:table-cell>
          <table:table-cell table:style-name="ce222" office:value-type="string" calcext:value-type="string">
            <text:p>Und</text:p>
          </table:table-cell>
          <table:table-cell table:style-name="ce230" office:value-type="float" office:value="22" calcext:value-type="float">
            <text:p>22.00</text:p>
          </table:table-cell>
          <table:table-cell table:style-name="ce233" office:value-type="float" office:value="15" calcext:value-type="float">
            <text:p><text:s/>15.00 </text:p>
          </table:table-cell>
          <table:table-cell table:style-name="ce241" table:formula="of:=+[.D41]*[.E41]" office:value-type="float" office:value="330" calcext:value-type="float">
            <text:p><text:s/>330.00 </text:p>
          </table:table-cell>
          <table:table-cell table:style-name="ce248" table:formula="of:=29*2" office:value-type="float" office:value="58" calcext:value-type="float">
            <text:p><text:s/>58.00 </text:p>
          </table:table-cell>
          <table:table-cell table:number-columns-repeated="250"/>
        </table:table-row>
        <table:table-row table:style-name="ro27">
          <table:table-cell/>
          <table:table-cell table:style-name="ce220" office:value-type="string" calcext:value-type="string">
            <text:p>Desinfectante Glutaltex X 250 ML (Glutaraldehído y Dimetil benzil cloruro de Amonio) Laboratorio Drogavet</text:p>
          </table:table-cell>
          <table:table-cell table:style-name="ce222" office:value-type="string" calcext:value-type="string">
            <text:p>Und</text:p>
          </table:table-cell>
          <table:table-cell table:style-name="ce230" office:value-type="float" office:value="22" calcext:value-type="float">
            <text:p>22.00</text:p>
          </table:table-cell>
          <table:table-cell table:style-name="ce234" office:value-type="float" office:value="25" calcext:value-type="float">
            <text:p><text:s/>25.00 </text:p>
          </table:table-cell>
          <table:table-cell table:style-name="ce242" table:formula="of:=+[.D42]*[.E42]" office:value-type="float" office:value="550" calcext:value-type="float">
            <text:p><text:s/>550.00 </text:p>
          </table:table-cell>
          <table:table-cell table:style-name="ce249"/>
          <table:table-cell table:number-columns-repeated="250"/>
        </table:table-row>
        <table:table-row table:style-name="ro15">
          <table:table-cell/>
          <table:table-cell table:style-name="ce220" office:value-type="string" calcext:value-type="string">
            <text:p>Ubresan en cojines X 100 gramos (ACARICIDA)</text:p>
          </table:table-cell>
          <table:table-cell table:style-name="ce222" office:value-type="string" calcext:value-type="string">
            <text:p>Und</text:p>
          </table:table-cell>
          <table:table-cell table:style-name="ce230" office:value-type="float" office:value="22" calcext:value-type="float">
            <text:p>22.00</text:p>
          </table:table-cell>
          <table:table-cell table:style-name="ce234" office:value-type="float" office:value="5" calcext:value-type="float">
            <text:p><text:s/>5.00 </text:p>
          </table:table-cell>
          <table:table-cell table:style-name="ce242" table:formula="of:=+[.D43]*[.E43]" office:value-type="float" office:value="110" calcext:value-type="float">
            <text:p><text:s/>110.00 </text:p>
          </table:table-cell>
          <table:table-cell table:style-name="ce249"/>
          <table:table-cell table:number-columns-repeated="250"/>
        </table:table-row>
        <table:table-row table:style-name="ro15">
          <table:table-cell/>
          <table:table-cell table:style-name="ce220" office:value-type="string" calcext:value-type="string">
            <text:p>Floxivet 10% + B12 X <text:s/>20 ml- laboratorio Labet </text:p>
          </table:table-cell>
          <table:table-cell table:style-name="ce222" office:value-type="string" calcext:value-type="string">
            <text:p>Und</text:p>
          </table:table-cell>
          <table:table-cell table:style-name="ce230" office:value-type="float" office:value="22" calcext:value-type="float">
            <text:p>22.00</text:p>
          </table:table-cell>
          <table:table-cell table:style-name="ce234" office:value-type="float" office:value="7" calcext:value-type="float">
            <text:p><text:s/>7.00 </text:p>
          </table:table-cell>
          <table:table-cell table:style-name="ce242" table:formula="of:=+[.D44]*[.E44]" office:value-type="float" office:value="154" calcext:value-type="float">
            <text:p><text:s/>154.00 </text:p>
          </table:table-cell>
          <table:table-cell table:style-name="ce249"/>
          <table:table-cell table:number-columns-repeated="250"/>
        </table:table-row>
        <table:table-row table:style-name="ro15">
          <table:table-cell/>
          <table:table-cell table:style-name="ce220" office:value-type="string" calcext:value-type="string">
            <text:p>Sulfaquinoxalina <text:s/>sulfanox® x 30 ml - <text:s/>labet</text:p>
          </table:table-cell>
          <table:table-cell table:style-name="ce222" office:value-type="string" calcext:value-type="string">
            <text:p>Und</text:p>
          </table:table-cell>
          <table:table-cell table:style-name="ce230" office:value-type="float" office:value="22" calcext:value-type="float">
            <text:p>22.00</text:p>
          </table:table-cell>
          <table:table-cell table:style-name="ce234" office:value-type="float" office:value="7" calcext:value-type="float">
            <text:p><text:s/>7.00 </text:p>
          </table:table-cell>
          <table:table-cell table:style-name="ce242" table:formula="of:=+[.D45]*[.E45]" office:value-type="float" office:value="154" calcext:value-type="float">
            <text:p><text:s/>154.00 </text:p>
          </table:table-cell>
          <table:table-cell table:style-name="ce249"/>
          <table:table-cell table:number-columns-repeated="250"/>
        </table:table-row>
        <table:table-row table:style-name="ro15">
          <table:table-cell/>
          <table:table-cell table:style-name="ce220" office:value-type="string" calcext:value-type="string">
            <text:p>Ivergold 1.5 % X 20 ml - labet</text:p>
          </table:table-cell>
          <table:table-cell table:style-name="ce222" office:value-type="string" calcext:value-type="string">
            <text:p>Und</text:p>
          </table:table-cell>
          <table:table-cell table:style-name="ce230" office:value-type="float" office:value="22" calcext:value-type="float">
            <text:p>22.00</text:p>
          </table:table-cell>
          <table:table-cell table:style-name="ce234" office:value-type="float" office:value="18" calcext:value-type="float">
            <text:p><text:s/>18.00 </text:p>
          </table:table-cell>
          <table:table-cell table:style-name="ce242" table:formula="of:=+[.D46]*[.E46]" office:value-type="float" office:value="396" calcext:value-type="float">
            <text:p><text:s/>396.00 </text:p>
          </table:table-cell>
          <table:table-cell table:style-name="ce249"/>
          <table:table-cell table:number-columns-repeated="250"/>
        </table:table-row>
        <table:table-row table:style-name="ro15">
          <table:table-cell/>
          <table:table-cell table:style-name="ce220" office:value-type="string" calcext:value-type="string">
            <text:p>Algodones CKF X 100 gr</text:p>
          </table:table-cell>
          <table:table-cell table:style-name="ce222" office:value-type="string" calcext:value-type="string">
            <text:p>Und</text:p>
          </table:table-cell>
          <table:table-cell table:style-name="ce230" office:value-type="float" office:value="22" calcext:value-type="float">
            <text:p>22.00</text:p>
          </table:table-cell>
          <table:table-cell table:style-name="ce234" office:value-type="float" office:value="6" calcext:value-type="float">
            <text:p><text:s/>6.00 </text:p>
          </table:table-cell>
          <table:table-cell table:style-name="ce242" table:formula="of:=+[.D47]*[.E47]" office:value-type="float" office:value="132" calcext:value-type="float">
            <text:p><text:s/>132.00 </text:p>
          </table:table-cell>
          <table:table-cell table:style-name="ce249"/>
          <table:table-cell table:number-columns-repeated="250"/>
        </table:table-row>
        <table:table-row table:style-name="ro28">
          <table:table-cell/>
          <table:table-cell table:style-name="ce220" office:value-type="string" calcext:value-type="string">
            <text:p>Tintura de Yodo al 10% - Frasco de 100 ml - uso veterinario</text:p>
          </table:table-cell>
          <table:table-cell table:style-name="ce222" office:value-type="string" calcext:value-type="string">
            <text:p>Und</text:p>
          </table:table-cell>
          <table:table-cell table:style-name="ce230" office:value-type="float" office:value="22" calcext:value-type="float">
            <text:p>22.00</text:p>
          </table:table-cell>
          <table:table-cell table:style-name="ce234" office:value-type="float" office:value="10" calcext:value-type="float">
            <text:p><text:s/>10.00 </text:p>
          </table:table-cell>
          <table:table-cell table:style-name="ce242" table:formula="of:=+[.D48]*[.E48]" office:value-type="float" office:value="220" calcext:value-type="float">
            <text:p><text:s/>220.00 </text:p>
          </table:table-cell>
          <table:table-cell table:style-name="ce249"/>
          <table:table-cell table:number-columns-repeated="250"/>
        </table:table-row>
        <table:table-row table:style-name="ro15">
          <table:table-cell/>
          <table:table-cell table:style-name="ce220" office:value-type="string" calcext:value-type="string">
            <text:p>Malathion <text:s/>x kg </text:p>
          </table:table-cell>
          <table:table-cell table:style-name="ce222" office:value-type="string" calcext:value-type="string">
            <text:p>Und</text:p>
          </table:table-cell>
          <table:table-cell table:style-name="ce230" office:value-type="float" office:value="22" calcext:value-type="float">
            <text:p>22.00</text:p>
          </table:table-cell>
          <table:table-cell table:style-name="ce234" office:value-type="float" office:value="14" calcext:value-type="float">
            <text:p><text:s/>14.00 </text:p>
          </table:table-cell>
          <table:table-cell table:style-name="ce242" table:formula="of:=+[.D49]*[.E49]" office:value-type="float" office:value="308" calcext:value-type="float">
            <text:p><text:s/>308.00 </text:p>
          </table:table-cell>
          <table:table-cell table:style-name="ce249"/>
          <table:table-cell table:number-columns-repeated="250"/>
        </table:table-row>
        <table:table-row table:style-name="ro15">
          <table:table-cell/>
          <table:table-cell table:style-name="ce220" office:value-type="string" calcext:value-type="string">
            <text:p>Tintura ganoderma x 50 ml Montana</text:p>
          </table:table-cell>
          <table:table-cell table:style-name="ce222" office:value-type="string" calcext:value-type="string">
            <text:p>Und</text:p>
          </table:table-cell>
          <table:table-cell table:style-name="ce230" office:value-type="float" office:value="22" calcext:value-type="float">
            <text:p>22.00</text:p>
          </table:table-cell>
          <table:table-cell table:style-name="ce234" office:value-type="float" office:value="17" calcext:value-type="float">
            <text:p><text:s/>17.00 </text:p>
          </table:table-cell>
          <table:table-cell table:style-name="ce242" table:formula="of:=+[.D50]*[.E50]" office:value-type="float" office:value="374" calcext:value-type="float">
            <text:p><text:s/>374.00 </text:p>
          </table:table-cell>
          <table:table-cell table:style-name="ce249"/>
          <table:table-cell table:number-columns-repeated="250"/>
        </table:table-row>
        <table:table-row table:style-name="ro28">
          <table:table-cell/>
          <table:table-cell table:style-name="ce220" office:value-type="string" calcext:value-type="string">
            <text:p>Fipronil <text:s/>mas abamenctina <text:s/>ectopro <text:s text:c="2"/>fy 300 ml montana </text:p>
          </table:table-cell>
          <table:table-cell table:style-name="ce222" office:value-type="string" calcext:value-type="string">
            <text:p>Und</text:p>
          </table:table-cell>
          <table:table-cell table:style-name="ce230" office:value-type="float" office:value="22" calcext:value-type="float">
            <text:p>22.00</text:p>
          </table:table-cell>
          <table:table-cell table:style-name="ce234" office:value-type="float" office:value="10" calcext:value-type="float">
            <text:p><text:s/>10.00 </text:p>
          </table:table-cell>
          <table:table-cell table:style-name="ce242" table:formula="of:=+[.D51]*[.E51]" office:value-type="float" office:value="220" calcext:value-type="float">
            <text:p><text:s/>220.00 </text:p>
          </table:table-cell>
          <table:table-cell table:style-name="ce249"/>
          <table:table-cell table:number-columns-repeated="250"/>
        </table:table-row>
        <table:table-row table:style-name="ro21">
          <table:table-cell table:number-columns-repeated="4"/>
          <table:table-cell table:style-name="ce224" office:value-type="string" calcext:value-type="string">
            <text:p>TOTAL</text:p>
          </table:table-cell>
          <table:table-cell table:style-name="ce243" table:formula="of:=SUM([.F41:.F51])" office:value-type="float" office:value="2948" calcext:value-type="float">
            <text:p><text:s/>2,948.00 </text:p>
          </table:table-cell>
          <table:table-cell table:style-name="ce217"/>
          <table:table-cell table:number-columns-repeated="250"/>
        </table:table-row>
        <table:table-row table:style-name="ro21">
          <table:table-cell table:number-columns-repeated="6"/>
          <table:table-cell table:style-name="ce217"/>
          <table:table-cell table:number-columns-repeated="250"/>
        </table:table-row>
        <table:table-row table:style-name="ro21" table:number-rows-repeated="1048522">
          <table:table-cell table:number-columns-repeated="257"/>
        </table:table-row>
        <table:table-row table:style-name="ro21">
          <table:table-cell table:number-columns-repeated="257"/>
        </table:table-row>
        <table:named-expressions>
          <table:named-range table:name="_xlnm.Print_Area" table:base-cell-address="$POBLACION.$A$1" table:cell-range-address="$'MUEB, MAQ,EQUIP'.$B$1:.$F$52" table:range-usable-as="print-range"/>
        </table:named-expressions>
      </table:table>
      <table:table table:name="INVERS FIJ INTANG" table:style-name="ta8" table:print-ranges="'INVERS FIJ INTANG'.A1:'INVERS FIJ INTANG'.E10">
        <table:table-column table:style-name="co54" table:default-cell-style-name="ce255"/>
        <table:table-column table:style-name="co29" table:default-cell-style-name="ce255"/>
        <table:table-column table:style-name="co11" table:default-cell-style-name="ce255"/>
        <table:table-column table:style-name="co55" table:default-cell-style-name="ce255"/>
        <table:table-column table:style-name="co56" table:default-cell-style-name="ce255"/>
        <table:table-column table:style-name="co1" table:number-columns-repeated="252" table:default-cell-style-name="ce255"/>
        <table:table-column table:style-name="co12" table:number-columns-repeated="16127"/>
        <table:table-row table:style-name="ro21">
          <table:table-cell table:number-columns-repeated="257"/>
        </table:table-row>
        <table:table-row table:style-name="ro29">
          <table:table-cell table:style-name="ce256" office:value-type="string" calcext:value-type="string" table:number-columns-spanned="5" table:number-rows-spanned="1">
            <text:p>INVERSION FIJA INTANGIBLE</text:p>
          </table:table-cell>
          <table:covered-table-cell table:number-columns-repeated="4" table:style-name="ce256"/>
          <table:table-cell table:number-columns-repeated="252"/>
        </table:table-row>
        <table:table-row table:style-name="ro15">
          <table:table-cell table:style-name="ce257" office:value-type="string" calcext:value-type="string">
            <text:p>DESCRIPCION</text:p>
          </table:table-cell>
          <table:table-cell table:style-name="ce257" office:value-type="string" calcext:value-type="string">
            <text:p>UNIDAD</text:p>
          </table:table-cell>
          <table:table-cell table:style-name="ce257" office:value-type="string" calcext:value-type="string">
            <text:p>CANTIDAD</text:p>
          </table:table-cell>
          <table:table-cell table:style-name="ce257" office:value-type="string" calcext:value-type="string">
            <text:p>COSTO UNITARIO</text:p>
          </table:table-cell>
          <table:table-cell table:style-name="ce257" office:value-type="string" calcext:value-type="string">
            <text:p>TOTAL</text:p>
          </table:table-cell>
          <table:table-cell table:style-name="ce264" table:number-columns-repeated="4"/>
          <table:table-cell table:style-name="ce266" table:number-columns-repeated="16375"/>
        </table:table-row>
        <table:table-row table:style-name="ro8">
          <table:table-cell table:style-name="ce258" office:value-type="string" calcext:value-type="string">
            <text:p>Asistencia Tecnica</text:p>
          </table:table-cell>
          <table:table-cell table:style-name="ce258" office:value-type="string" calcext:value-type="string">
            <text:p>mes</text:p>
          </table:table-cell>
          <table:table-cell table:style-name="ce225" office:value-type="float" office:value="5" calcext:value-type="float">
            <text:p>5.00</text:p>
          </table:table-cell>
          <table:table-cell table:style-name="ce225" office:value-type="float" office:value="2500" calcext:value-type="float">
            <text:p>2500.00</text:p>
          </table:table-cell>
          <table:table-cell table:style-name="ce262" table:formula="of:=+[.D4]*[.C4]" office:value-type="float" office:value="12500" calcext:value-type="float">
            <text:p><text:s/>12,500.00 </text:p>
          </table:table-cell>
          <table:table-cell table:number-columns-repeated="2" table:style-name="ce260" office:value-type="float" office:value="0" calcext:value-type="float">
            <text:p>0</text:p>
          </table:table-cell>
          <table:table-cell table:style-name="ce260" table:formula="of:=+[.F4]+[.G4]" office:value-type="float" office:value="0" calcext:value-type="float">
            <text:p>0</text:p>
          </table:table-cell>
          <table:table-cell table:style-name="ce260"/>
          <table:table-cell table:number-columns-repeated="248"/>
        </table:table-row>
        <table:table-row table:style-name="ro8">
          <table:table-cell table:style-name="ce258" office:value-type="string" calcext:value-type="string">
            <text:p>Publicidad y Marketing</text:p>
          </table:table-cell>
          <table:table-cell table:style-name="ce258" office:value-type="string" calcext:value-type="string">
            <text:p>mes</text:p>
          </table:table-cell>
          <table:table-cell table:style-name="ce225" office:value-type="float" office:value="5" calcext:value-type="float">
            <text:p>5.00</text:p>
          </table:table-cell>
          <table:table-cell table:style-name="ce225" office:value-type="float" office:value="180" calcext:value-type="float">
            <text:p>180.00</text:p>
          </table:table-cell>
          <table:table-cell table:style-name="ce262" table:formula="of:=+[.D5]*[.C5]" office:value-type="float" office:value="900" calcext:value-type="float">
            <text:p><text:s/>900.00 </text:p>
          </table:table-cell>
          <table:table-cell table:style-name="ce260" table:number-columns-repeated="4"/>
          <table:table-cell table:number-columns-repeated="248"/>
        </table:table-row>
        <table:table-row table:style-name="ro8">
          <table:table-cell table:style-name="ce258" office:value-type="string" calcext:value-type="string">
            <text:p>Flete Terrestre</text:p>
          </table:table-cell>
          <table:table-cell table:style-name="ce258" office:value-type="string" calcext:value-type="string">
            <text:p>Gbl</text:p>
          </table:table-cell>
          <table:table-cell table:style-name="ce225" office:value-type="float" office:value="1" calcext:value-type="float">
            <text:p>1.00</text:p>
          </table:table-cell>
          <table:table-cell table:style-name="ce225" office:value-type="float" office:value="1000" calcext:value-type="float">
            <text:p>1000.00</text:p>
          </table:table-cell>
          <table:table-cell table:style-name="ce262" table:formula="of:=+[.D6]*[.C6]" office:value-type="float" office:value="1000" calcext:value-type="float">
            <text:p><text:s/>1,000.00 </text:p>
          </table:table-cell>
          <table:table-cell table:style-name="ce260" table:number-columns-repeated="4"/>
          <table:table-cell table:number-columns-repeated="248"/>
        </table:table-row>
        <table:table-row table:style-name="ro29">
          <table:table-cell table:style-name="ce259" office:value-type="string" calcext:value-type="string" table:number-columns-spanned="4" table:number-rows-spanned="1">
            <text:p>TOTAL INVERSION FIJA INTANGIBLE</text:p>
          </table:table-cell>
          <table:covered-table-cell table:number-columns-repeated="3" table:style-name="ce259"/>
          <table:table-cell table:style-name="ce263" table:formula="of:=SUM([.E4:.E6])" office:value-type="float" office:value="14400" calcext:value-type="float">
            <text:p><text:s/>14,400.00 </text:p>
          </table:table-cell>
          <table:table-cell table:style-name="ce260" table:number-columns-repeated="2"/>
          <table:table-cell table:style-name="ce263" table:formula="of:=SUM([.H4:.H4])" office:value-type="float" office:value="0" calcext:value-type="float">
            <text:p><text:s/>- <text:s text:c="2"/></text:p>
          </table:table-cell>
          <table:table-cell table:style-name="ce265" table:formula="of:=+[.E7]-[.H7]" office:value-type="float" office:value="14400" calcext:value-type="float">
            <text:p><text:s/>14,400.00 </text:p>
          </table:table-cell>
          <table:table-cell table:number-columns-repeated="248"/>
        </table:table-row>
        <table:table-row table:style-name="ro21">
          <table:table-cell table:style-name="ce260" table:number-columns-repeated="9"/>
          <table:table-cell table:number-columns-repeated="248"/>
        </table:table-row>
        <table:table-row table:style-name="ro30">
          <table:table-cell table:style-name="ce261" office:value-type="string" calcext:value-type="string" table:number-columns-spanned="5" table:number-rows-spanned="1">
            <text:p>Nota: los componentes de intangibles han sido considerados para fines didacticos, los formuladores de planes de negocios para Procompite deberan considerar todos los componentes que realmente sean necesarios para la implementacion de la propuesta productiva</text:p>
          </table:table-cell>
          <table:covered-table-cell table:number-columns-repeated="4" table:style-name="ce261"/>
          <table:table-cell table:style-name="ce260" table:number-columns-repeated="4"/>
          <table:table-cell table:number-columns-repeated="248"/>
        </table:table-row>
        <table:table-row table:style-name="ro21" table:number-rows-repeated="2">
          <table:table-cell table:style-name="ce260" table:number-columns-repeated="9"/>
          <table:table-cell table:number-columns-repeated="248"/>
        </table:table-row>
        <table:table-row table:style-name="ro21">
          <table:table-cell table:style-name="ce260" table:number-columns-repeated="5"/>
          <table:table-cell table:style-name="ce260" table:formula="of:=900/5" office:value-type="float" office:value="180" calcext:value-type="float">
            <text:p>180</text:p>
          </table:table-cell>
          <table:table-cell table:style-name="ce260" table:number-columns-repeated="3"/>
          <table:table-cell table:number-columns-repeated="248"/>
        </table:table-row>
        <table:table-row table:style-name="ro21" table:number-rows-repeated="7">
          <table:table-cell table:style-name="ce260" table:number-columns-repeated="9"/>
          <table:table-cell table:number-columns-repeated="248"/>
        </table:table-row>
        <table:table-row table:style-name="ro21" table:number-rows-repeated="1048556">
          <table:table-cell table:number-columns-repeated="257"/>
        </table:table-row>
        <table:table-row table:style-name="ro21">
          <table:table-cell table:number-columns-repeated="257"/>
        </table:table-row>
        <table:named-expressions>
          <table:named-range table:name="_xlnm.Print_Area" table:base-cell-address="$POBLACION.$A$1" table:cell-range-address="$'INVERS FIJ INTANG'.$A$1:.$E$10" table:range-usable-as="print-range"/>
        </table:named-expressions>
      </table:table>
      <table:table table:name="REMUNERACION" table:style-name="ta9" table:print-ranges="REMUNERACION.A2:REMUNERACION.F14">
        <table:table-column table:style-name="co57" table:default-cell-style-name="ce255"/>
        <table:table-column table:style-name="co14" table:default-cell-style-name="ce255"/>
        <table:table-column table:style-name="co58" table:number-columns-repeated="2" table:default-cell-style-name="ce255"/>
        <table:table-column table:style-name="co11" table:default-cell-style-name="ce255"/>
        <table:table-column table:style-name="co49" table:default-cell-style-name="ce255"/>
        <table:table-column table:style-name="co1" table:number-columns-repeated="251" table:default-cell-style-name="ce255"/>
        <table:table-column table:style-name="co12" table:number-columns-repeated="16127"/>
        <table:table-row table:style-name="ro21" table:number-rows-repeated="2">
          <table:table-cell table:number-columns-repeated="257"/>
        </table:table-row>
        <table:table-row table:style-name="ro29">
          <table:table-cell table:style-name="ce256" office:value-type="string" calcext:value-type="string" table:number-columns-spanned="6" table:number-rows-spanned="1">
            <text:p>REQUERIMIENTOS Y REMUNERACION <text:s/>DEL PERSONAL</text:p>
          </table:table-cell>
          <table:covered-table-cell table:number-columns-repeated="5" table:style-name="ce256"/>
          <table:table-cell table:number-columns-repeated="251"/>
        </table:table-row>
        <table:table-row table:style-name="ro3">
          <table:table-cell table:style-name="ce211" office:value-type="string" calcext:value-type="string">
            <text:p>PERSONAL</text:p>
          </table:table-cell>
          <table:table-cell table:style-name="ce211" office:value-type="string" calcext:value-type="string">
            <text:p>Indice de participacion</text:p>
          </table:table-cell>
          <table:table-cell table:style-name="ce211" office:value-type="string" calcext:value-type="string">
            <text:p>Cantidad</text:p>
          </table:table-cell>
          <table:table-cell table:style-name="ce211" office:value-type="string" calcext:value-type="string">
            <text:p>Costo Unitario</text:p>
          </table:table-cell>
          <table:table-cell table:style-name="ce211" office:value-type="string" calcext:value-type="string">
            <text:p>Costo mensual (S/.)</text:p>
          </table:table-cell>
          <table:table-cell table:style-name="ce211" office:value-type="string" calcext:value-type="string">
            <text:p>Costo Total Anual <text:s/>(S/.)</text:p>
          </table:table-cell>
          <table:table-cell table:style-name="ce280" table:number-columns-repeated="16378"/>
        </table:table-row>
        <table:table-row table:style-name="ro21">
          <table:table-cell table:style-name="ce267" office:value-type="string" calcext:value-type="string">
            <text:p>MANO DE OBRA DIRECTA</text:p>
          </table:table-cell>
          <table:table-cell table:style-name="ce272" table:number-columns-repeated="4"/>
          <table:table-cell table:style-name="ce276" table:formula="of:=SUM([.F6:.F7])" office:value-type="float" office:value="12720" calcext:value-type="float">
            <text:p><text:s/>12,720.00 </text:p>
          </table:table-cell>
          <table:table-cell table:style-name="ce266" table:number-columns-repeated="16378"/>
        </table:table-row>
        <table:table-row table:style-name="ro21">
          <table:table-cell table:style-name="ce258" office:value-type="string" calcext:value-type="string">
            <text:p>Personal Encargado de alimentación y limpieza</text:p>
          </table:table-cell>
          <table:table-cell table:number-columns-repeated="2" table:style-name="ce273" office:value-type="float" office:value="1" calcext:value-type="float">
            <text:p>1</text:p>
          </table:table-cell>
          <table:table-cell table:style-name="ce273" office:value-type="float" office:value="1000" calcext:value-type="float">
            <text:p>1000</text:p>
          </table:table-cell>
          <table:table-cell table:style-name="ce275" table:formula="of:=[.C6]*[.D6]*[.B6]" office:value-type="float" office:value="1000" calcext:value-type="float">
            <text:p><text:s/>1,000.00 </text:p>
          </table:table-cell>
          <table:table-cell table:style-name="ce275" table:formula="of:=[.E6]*12" office:value-type="float" office:value="12000" calcext:value-type="float">
            <text:p><text:s/>12,000.00 </text:p>
          </table:table-cell>
          <table:table-cell table:number-columns-repeated="251"/>
        </table:table-row>
        <table:table-row table:style-name="ro21">
          <table:table-cell table:style-name="ce258" office:value-type="string" calcext:value-type="string">
            <text:p>Personal de apoyo</text:p>
          </table:table-cell>
          <table:table-cell table:style-name="ce273" office:value-type="float" office:value="0.05" calcext:value-type="float">
            <text:p>0.05</text:p>
          </table:table-cell>
          <table:table-cell table:style-name="ce273" office:value-type="float" office:value="1" calcext:value-type="float">
            <text:p>1</text:p>
          </table:table-cell>
          <table:table-cell table:style-name="ce273" office:value-type="float" office:value="1200" calcext:value-type="float">
            <text:p>1200</text:p>
          </table:table-cell>
          <table:table-cell table:style-name="ce275" table:formula="of:=[.C7]*[.D7]*[.B7]" office:value-type="float" office:value="60" calcext:value-type="float">
            <text:p><text:s/>60.00 </text:p>
          </table:table-cell>
          <table:table-cell table:style-name="ce275" table:formula="of:=[.E7]*12" office:value-type="float" office:value="720" calcext:value-type="float">
            <text:p><text:s/>720.00 </text:p>
          </table:table-cell>
          <table:table-cell table:number-columns-repeated="251"/>
        </table:table-row>
        <table:table-row table:style-name="ro21">
          <table:table-cell table:style-name="ce268" office:value-type="string" calcext:value-type="string">
            <text:p>MANO DE OBRA INDIRECTA</text:p>
          </table:table-cell>
          <table:table-cell table:style-name="ce274" table:number-columns-repeated="3"/>
          <table:table-cell table:style-name="ce275"/>
          <table:table-cell table:style-name="ce277" table:formula="of:=SUM([.F9:.F9])" office:value-type="float" office:value="1800" calcext:value-type="float">
            <text:p><text:s/>1,800.00 </text:p>
          </table:table-cell>
          <table:table-cell table:style-name="ce266" table:number-columns-repeated="16378"/>
        </table:table-row>
        <table:table-row table:style-name="ro21">
          <table:table-cell table:style-name="ce258" office:value-type="string" calcext:value-type="string">
            <text:p>Personal Encargado de Produccion</text:p>
          </table:table-cell>
          <table:table-cell table:style-name="ce273" office:value-type="float" office:value="0.1" calcext:value-type="float">
            <text:p>0.1</text:p>
          </table:table-cell>
          <table:table-cell table:style-name="ce273" office:value-type="float" office:value="1" calcext:value-type="float">
            <text:p>1</text:p>
          </table:table-cell>
          <table:table-cell table:style-name="ce273" office:value-type="float" office:value="1500" calcext:value-type="float">
            <text:p>1500</text:p>
          </table:table-cell>
          <table:table-cell table:style-name="ce275" table:formula="of:=[.C9]*[.D9]*[.B9]" office:value-type="float" office:value="150" calcext:value-type="float">
            <text:p><text:s/>150.00 </text:p>
          </table:table-cell>
          <table:table-cell table:style-name="ce275" table:formula="of:=[.E9]*12" office:value-type="float" office:value="1800" calcext:value-type="float">
            <text:p><text:s/>1,800.00 </text:p>
          </table:table-cell>
          <table:table-cell table:number-columns-repeated="251"/>
        </table:table-row>
        <table:table-row table:style-name="ro21">
          <table:table-cell table:style-name="ce269" office:value-type="string" calcext:value-type="string">
            <text:p>MANO DE OBRA VENTA</text:p>
          </table:table-cell>
          <table:table-cell table:style-name="ce274" table:number-columns-repeated="3"/>
          <table:table-cell table:style-name="ce275"/>
          <table:table-cell table:style-name="ce277" table:formula="of:=[.F11]" office:value-type="float" office:value="720" calcext:value-type="float">
            <text:p><text:s/>720.00 </text:p>
          </table:table-cell>
          <table:table-cell table:number-columns-repeated="251"/>
        </table:table-row>
        <table:table-row table:style-name="ro21">
          <table:table-cell table:style-name="ce270" office:value-type="string" calcext:value-type="string">
            <text:p>Personal Encargado de la Venta</text:p>
          </table:table-cell>
          <table:table-cell table:style-name="ce273" office:value-type="float" office:value="0.05" calcext:value-type="float">
            <text:p>0.05</text:p>
          </table:table-cell>
          <table:table-cell table:style-name="ce273" office:value-type="float" office:value="1" calcext:value-type="float">
            <text:p>1</text:p>
          </table:table-cell>
          <table:table-cell table:style-name="ce273" office:value-type="float" office:value="1200" calcext:value-type="float">
            <text:p>1200</text:p>
          </table:table-cell>
          <table:table-cell table:style-name="ce275" table:formula="of:=[.C11]*[.D11]*[.B11]" office:value-type="float" office:value="60" calcext:value-type="float">
            <text:p><text:s/>60.00 </text:p>
          </table:table-cell>
          <table:table-cell table:style-name="ce275" table:formula="of:=+[.E11]*12" office:value-type="float" office:value="720" calcext:value-type="float">
            <text:p><text:s/>720.00 </text:p>
          </table:table-cell>
          <table:table-cell table:number-columns-repeated="251"/>
        </table:table-row>
        <table:table-row table:style-name="ro21">
          <table:table-cell table:style-name="ce269" office:value-type="string" calcext:value-type="string">
            <text:p>MANO DE OBRA ADMINISTRATIVA</text:p>
          </table:table-cell>
          <table:table-cell table:style-name="ce274" table:number-columns-repeated="3"/>
          <table:table-cell table:style-name="ce275"/>
          <table:table-cell table:style-name="ce277" table:formula="of:=SUM([.F13:.F13])" office:value-type="float" office:value="1080" calcext:value-type="float">
            <text:p><text:s/>1,080.00 </text:p>
          </table:table-cell>
          <table:table-cell table:style-name="ce266" table:number-columns-repeated="2"/>
          <table:table-cell table:style-name="ce281"/>
          <table:table-cell table:style-name="ce266" table:number-columns-repeated="16375"/>
        </table:table-row>
        <table:table-row table:style-name="ro21">
          <table:table-cell table:style-name="ce271" office:value-type="string" calcext:value-type="string">
            <text:p>Junta Directiva Asociación</text:p>
          </table:table-cell>
          <table:table-cell table:style-name="ce273" office:value-type="float" office:value="0.05" calcext:value-type="float">
            <text:p>0.05</text:p>
          </table:table-cell>
          <table:table-cell table:style-name="ce273" office:value-type="float" office:value="1" calcext:value-type="float">
            <text:p>1</text:p>
          </table:table-cell>
          <table:table-cell table:style-name="ce273" office:value-type="float" office:value="1800" calcext:value-type="float">
            <text:p>1800</text:p>
          </table:table-cell>
          <table:table-cell table:style-name="ce275" table:formula="of:=[.C13]*[.D13]*[.B13]" office:value-type="float" office:value="90" calcext:value-type="float">
            <text:p><text:s/>90.00 </text:p>
          </table:table-cell>
          <table:table-cell table:style-name="ce278" table:formula="of:=[.E13]*12" office:value-type="float" office:value="1080" calcext:value-type="float">
            <text:p><text:s/>1,080.00 </text:p>
          </table:table-cell>
          <table:table-cell table:number-columns-repeated="251"/>
        </table:table-row>
        <table:table-row table:style-name="ro21">
          <table:table-cell table:style-name="ce268" office:value-type="string" calcext:value-type="string">
            <text:p>COSTO TOTAL</text:p>
          </table:table-cell>
          <table:table-cell table:style-name="ce274" table:number-columns-repeated="4"/>
          <table:table-cell table:style-name="ce277" table:formula="of:=[.F12]+[.F8]+[.F5]+[.F10]" office:value-type="float" office:value="16320" calcext:value-type="float">
            <text:p><text:s/>16,320.00 </text:p>
          </table:table-cell>
          <table:table-cell table:style-name="ce266" table:number-columns-repeated="16378"/>
        </table:table-row>
        <table:table-row table:style-name="ro21">
          <table:table-cell table:style-name="ce260" table:number-columns-repeated="7"/>
          <table:table-cell table:number-columns-repeated="250"/>
        </table:table-row>
        <table:table-row table:style-name="ro21">
          <table:table-cell table:style-name="ce260" table:number-columns-repeated="5"/>
          <table:table-cell table:style-name="ce260" office:value-type="float" office:value="115.18" calcext:value-type="float">
            <text:p>115.18</text:p>
          </table:table-cell>
          <table:table-cell table:style-name="ce260"/>
          <table:table-cell table:number-columns-repeated="250"/>
        </table:table-row>
        <table:table-row table:style-name="ro21">
          <table:table-cell table:style-name="ce260" table:number-columns-repeated="7"/>
          <table:table-cell table:number-columns-repeated="250"/>
        </table:table-row>
        <table:table-row table:style-name="ro21">
          <table:table-cell table:style-name="ce260" table:number-columns-repeated="5"/>
          <table:table-cell table:style-name="ce279" table:formula="of:=+[.E9]+[.F16]" office:value-type="float" office:value="265.18" calcext:value-type="float">
            <text:p><text:s/>265.18 </text:p>
          </table:table-cell>
          <table:table-cell table:style-name="ce260"/>
          <table:table-cell table:number-columns-repeated="250"/>
        </table:table-row>
        <table:table-row table:style-name="ro21">
          <table:table-cell table:style-name="ce260" table:number-columns-repeated="5"/>
          <table:table-cell table:style-name="ce260" table:formula="of:=+[.F18]/[.D9]" office:value-type="float" office:value="0.176786666666667" calcext:value-type="float">
            <text:p>0.176786666666667</text:p>
          </table:table-cell>
          <table:table-cell table:style-name="ce260"/>
          <table:table-cell table:number-columns-repeated="250"/>
        </table:table-row>
        <table:table-row table:style-name="ro21">
          <table:table-cell table:style-name="ce260" table:number-columns-repeated="7"/>
          <table:table-cell table:number-columns-repeated="250"/>
        </table:table-row>
        <table:table-row table:style-name="ro21" table:number-rows-repeated="1048555">
          <table:table-cell table:number-columns-repeated="257"/>
        </table:table-row>
        <table:table-row table:style-name="ro21">
          <table:table-cell table:number-columns-repeated="257"/>
        </table:table-row>
        <table:named-expressions>
          <table:named-range table:name="_xlnm.Print_Area" table:base-cell-address="$POBLACION.$A$1" table:cell-range-address="$REMUNERACION.$A$2:.$F$14" table:range-usable-as="print-range"/>
        </table:named-expressions>
      </table:table>
      <table:table table:name="CAP TRABAJ" table:style-name="ta10" table:print-ranges="'CAP TRABAJ'.A1:'CAP TRABAJ'.G46">
        <table:table-column table:style-name="co59" table:default-cell-style-name="ce255"/>
        <table:table-column table:style-name="co14" table:default-cell-style-name="ce255"/>
        <table:table-column table:style-name="co56" table:default-cell-style-name="ce255"/>
        <table:table-column table:style-name="co60" table:number-columns-repeated="2" table:default-cell-style-name="ce255"/>
        <table:table-column table:style-name="co56" table:number-columns-repeated="2" table:default-cell-style-name="ce255"/>
        <table:table-column table:style-name="co21" table:default-cell-style-name="ce255"/>
        <table:table-column table:style-name="co36" table:default-cell-style-name="ce255"/>
        <table:table-column table:style-name="co61" table:default-cell-style-name="ce255"/>
        <table:table-column table:style-name="co1" table:number-columns-repeated="247" table:default-cell-style-name="ce255"/>
        <table:table-column table:style-name="co12" table:number-columns-repeated="16127"/>
        <table:table-row table:style-name="ro21">
          <table:table-cell table:number-columns-repeated="257"/>
        </table:table-row>
        <table:table-row table:style-name="ro12">
          <table:table-cell table:style-name="ce160" office:value-type="string" calcext:value-type="string" table:number-columns-spanned="2" table:number-rows-spanned="1">
            <text:p>Ciclo de conversion en efectivo</text:p>
          </table:table-cell>
          <table:covered-table-cell table:style-name="ce160"/>
          <table:table-cell table:number-columns-repeated="255"/>
        </table:table-row>
        <table:table-row table:style-name="ro21">
          <table:table-cell table:style-name="ce282" office:value-type="string" calcext:value-type="string">
            <text:p>Ciclo de produccion</text:p>
          </table:table-cell>
          <table:table-cell table:style-name="ce282" office:value-type="float" office:value="75" calcext:value-type="float">
            <text:p>75</text:p>
          </table:table-cell>
          <table:table-cell table:style-name="ce292" table:number-columns-repeated="16382"/>
        </table:table-row>
        <table:table-row table:style-name="ro21">
          <table:table-cell table:style-name="ce282" office:value-type="string" calcext:value-type="string">
            <text:p>Ciclo de cobranza</text:p>
          </table:table-cell>
          <table:table-cell table:style-name="ce282" office:value-type="float" office:value="15" calcext:value-type="float">
            <text:p>15</text:p>
          </table:table-cell>
          <table:table-cell table:number-columns-repeated="255"/>
        </table:table-row>
        <table:table-row table:style-name="ro21">
          <table:table-cell table:style-name="ce282" office:value-type="string" calcext:value-type="string">
            <text:p>Dias de credito proveedores</text:p>
          </table:table-cell>
          <table:table-cell table:style-name="ce282" office:value-type="float" office:value="60" calcext:value-type="float">
            <text:p>60</text:p>
          </table:table-cell>
          <table:table-cell table:number-columns-repeated="255"/>
        </table:table-row>
        <table:table-row table:style-name="ro21">
          <table:table-cell table:style-name="ce282" office:value-type="string" calcext:value-type="string">
            <text:p>Dias a financiar</text:p>
          </table:table-cell>
          <table:table-cell table:style-name="ce282" table:formula="of:=[.B3]+[.B4]-[.B5]" office:value-type="float" office:value="30" calcext:value-type="float">
            <text:p>30</text:p>
          </table:table-cell>
          <table:table-cell table:number-columns-repeated="255"/>
        </table:table-row>
        <table:table-row table:style-name="ro21">
          <table:table-cell table:style-name="ce282" office:value-type="string" calcext:value-type="string">
            <text:p>Periodo de desfase</text:p>
          </table:table-cell>
          <table:table-cell table:style-name="ce286" table:formula="of:=[.B6]/360" office:value-type="float" office:value="0.0833333333333333" calcext:value-type="float">
            <text:p>0.083</text:p>
          </table:table-cell>
          <table:table-cell table:number-columns-repeated="255"/>
        </table:table-row>
        <table:table-row table:style-name="ro21">
          <table:table-cell table:style-name="ce283" table:number-columns-repeated="2"/>
          <table:table-cell table:number-columns-repeated="255"/>
        </table:table-row>
        <table:table-row table:style-name="ro31">
          <table:table-cell table:style-name="ce284" office:value-type="string" calcext:value-type="string" table:number-columns-spanned="7" table:number-rows-spanned="1">
            <text:p>NOTA: el ciclo productivo es el número de días que va desde el momento en que se compran los insumos hasta que se recibe el pago por la venta del producto que se elaboro con estos insumos, por lo tanto el N° de días a financiar estara determinado por el ciclo de producción + ciclo de cobranza - N° de días de crédito de proveedores, por lo tanto se esta considerando como máximo 360 días.</text:p>
          </table:table-cell>
          <table:covered-table-cell table:number-columns-repeated="6" table:style-name="ce284"/>
          <table:table-cell table:number-columns-repeated="250"/>
        </table:table-row>
        <table:table-row table:style-name="ro21">
          <table:table-cell table:style-name="ce266" table:number-columns-repeated="16384"/>
        </table:table-row>
        <table:table-row table:style-name="ro21">
          <table:table-cell table:number-columns-repeated="257"/>
        </table:table-row>
        <table:table-row table:style-name="ro24">
          <table:table-cell/>
          <table:table-cell table:style-name="ce266" office:value-type="string" calcext:value-type="string">
            <text:p><text:s text:c="11"/>CAPITAL DE TRABAJO</text:p>
          </table:table-cell>
          <table:table-cell/>
          <table:table-cell table:style-name="ce260" table:number-columns-repeated="3"/>
          <table:table-cell table:number-columns-repeated="251"/>
        </table:table-row>
        <table:table-row table:style-name="ro3">
          <table:table-cell table:style-name="ce216" office:value-type="string" calcext:value-type="string">
            <text:p>CONCEPTO</text:p>
          </table:table-cell>
          <table:table-cell table:style-name="ce287" office:value-type="string" calcext:value-type="string">
            <text:p>UNIDAD</text:p>
          </table:table-cell>
          <table:table-cell table:style-name="ce293" office:value-type="string" calcext:value-type="string">
            <text:p>COSTO TOTAL </text:p>
          </table:table-cell>
          <table:table-cell table:style-name="ce294"/>
          <table:table-cell table:style-name="ce298"/>
          <table:table-cell table:style-name="ce260"/>
          <table:table-cell table:number-columns-repeated="251"/>
        </table:table-row>
        <table:table-row table:style-name="ro21">
          <table:table-cell table:style-name="ce268" office:value-type="string" calcext:value-type="string">
            <text:p>I.MATERIA PRIMAS E INSUMOS</text:p>
          </table:table-cell>
          <table:table-cell table:style-name="ce258"/>
          <table:table-cell table:style-name="ce263" table:formula="of:=SUM([.C15:.C16])" office:value-type="float" office:value="2577.8562060844" calcext:value-type="float">
            <text:p><text:s/>2,577.86 </text:p>
          </table:table-cell>
          <table:table-cell table:style-name="ce295"/>
          <table:table-cell table:style-name="ce299"/>
          <table:table-cell table:style-name="ce260"/>
          <table:table-cell table:number-columns-repeated="251"/>
        </table:table-row>
        <table:table-row table:style-name="ro21">
          <table:table-cell table:style-name="ce258" office:value-type="string" calcext:value-type="string">
            <text:p>Cuy</text:p>
          </table:table-cell>
          <table:table-cell table:style-name="ce258" office:value-type="string" calcext:value-type="string">
            <text:p>Und</text:p>
          </table:table-cell>
          <table:table-cell table:style-name="ce262" table:formula="of:=[$'COSTO PROD Y OPER'.G39]*[.B7]" office:value-type="float" office:value="2411.18953941773" calcext:value-type="float">
            <text:p><text:s/>2,411.19 </text:p>
          </table:table-cell>
          <table:table-cell table:style-name="ce296"/>
          <table:table-cell table:style-name="ce300"/>
          <table:table-cell table:style-name="ce260"/>
          <table:table-cell table:number-columns-repeated="251"/>
        </table:table-row>
        <table:table-row table:style-name="ro21">
          <table:table-cell table:style-name="ce258" office:value-type="string" calcext:value-type="string">
            <text:p>Insumos complementarios</text:p>
          </table:table-cell>
          <table:table-cell table:style-name="ce258" office:value-type="string" calcext:value-type="string">
            <text:p>Global</text:p>
          </table:table-cell>
          <table:table-cell table:style-name="ce262" table:formula="of:=[$'COSTO PROD Y OPER'.G40]*[.B7]" office:value-type="float" office:value="166.666666666667" calcext:value-type="float">
            <text:p><text:s/>166.67 </text:p>
          </table:table-cell>
          <table:table-cell table:style-name="ce296"/>
          <table:table-cell table:style-name="ce300"/>
          <table:table-cell table:style-name="ce260"/>
          <table:table-cell table:number-columns-repeated="251"/>
        </table:table-row>
        <table:table-row table:style-name="ro21">
          <table:table-cell table:style-name="ce268" office:value-type="string" calcext:value-type="string">
            <text:p>II.MANO DE OBRA</text:p>
          </table:table-cell>
          <table:table-cell table:style-name="ce268"/>
          <table:table-cell table:style-name="ce263" table:formula="of:=SUM([.C18:.C21])" office:value-type="float" office:value="1360" calcext:value-type="float">
            <text:p><text:s/>1,360.00 </text:p>
          </table:table-cell>
          <table:table-cell table:style-name="ce297"/>
          <table:table-cell table:style-name="ce260" table:number-columns-repeated="2"/>
          <table:table-cell table:number-columns-repeated="251"/>
        </table:table-row>
        <table:table-row table:style-name="ro21">
          <table:table-cell table:style-name="ce258" office:value-type="string" calcext:value-type="string">
            <text:p>Mano de Obra Directa</text:p>
          </table:table-cell>
          <table:table-cell table:style-name="ce258"/>
          <table:table-cell table:style-name="ce262" table:formula="of:=+[$REMUNERACION.F5]*[$'CAP TRABAJ'.B7]" office:value-type="float" office:value="1060" calcext:value-type="float">
            <text:p><text:s/>1,060.00 </text:p>
          </table:table-cell>
          <table:table-cell table:style-name="ce297"/>
          <table:table-cell table:style-name="ce260" table:number-columns-repeated="2"/>
          <table:table-cell table:number-columns-repeated="251"/>
        </table:table-row>
        <table:table-row table:style-name="ro21">
          <table:table-cell table:style-name="ce258" office:value-type="string" calcext:value-type="string">
            <text:p>Mano de Obra Indirecta</text:p>
          </table:table-cell>
          <table:table-cell table:style-name="ce258"/>
          <table:table-cell table:style-name="ce262" table:formula="of:=+[$REMUNERACION.F8]*[$'CAP TRABAJ'.B7]" office:value-type="float" office:value="150" calcext:value-type="float">
            <text:p><text:s/>150.00 </text:p>
          </table:table-cell>
          <table:table-cell table:style-name="ce297"/>
          <table:table-cell table:style-name="ce260" table:number-columns-repeated="2"/>
          <table:table-cell table:number-columns-repeated="251"/>
        </table:table-row>
        <table:table-row table:style-name="ro21">
          <table:table-cell table:style-name="ce258" office:value-type="string" calcext:value-type="string">
            <text:p>Mano de obra Operación</text:p>
          </table:table-cell>
          <table:table-cell table:style-name="ce258"/>
          <table:table-cell table:style-name="ce262" table:formula="of:=+[$REMUNERACION.F10]*[$'CAP TRABAJ'.B7]" office:value-type="float" office:value="60" calcext:value-type="float">
            <text:p><text:s/>60.00 </text:p>
          </table:table-cell>
          <table:table-cell table:style-name="ce297"/>
          <table:table-cell table:style-name="ce260" table:number-columns-repeated="2"/>
          <table:table-cell table:number-columns-repeated="251"/>
        </table:table-row>
        <table:table-row table:style-name="ro21">
          <table:table-cell table:style-name="ce258" office:value-type="string" calcext:value-type="string">
            <text:p>Mano de Obra Administrativa</text:p>
          </table:table-cell>
          <table:table-cell table:style-name="ce258"/>
          <table:table-cell table:style-name="ce262" table:formula="of:=+[$REMUNERACION.F12]*[$'CAP TRABAJ'.B7]" office:value-type="float" office:value="90" calcext:value-type="float">
            <text:p><text:s/>90.00 </text:p>
          </table:table-cell>
          <table:table-cell table:style-name="ce297"/>
          <table:table-cell table:style-name="ce260" table:number-columns-repeated="2"/>
          <table:table-cell table:number-columns-repeated="2"/>
          <table:table-cell table:style-name="ce260" table:number-columns-repeated="2"/>
          <table:table-cell table:number-columns-repeated="247"/>
        </table:table-row>
        <table:table-row table:style-name="ro21">
          <table:table-cell table:style-name="ce268" office:value-type="string" calcext:value-type="string">
            <text:p>III. OTROS BIENES Y SERVICIOS </text:p>
          </table:table-cell>
          <table:table-cell table:style-name="ce258"/>
          <table:table-cell table:style-name="ce263" table:formula="of:=SUM([.C23:.C27])" office:value-type="float" office:value="306.253839152807" calcext:value-type="float">
            <text:p><text:s/>306.25 </text:p>
          </table:table-cell>
          <table:table-cell table:style-name="ce297"/>
          <table:table-cell table:style-name="ce260" table:number-columns-repeated="2"/>
          <table:table-cell table:number-columns-repeated="2"/>
          <table:table-cell table:style-name="ce260" table:number-columns-repeated="2"/>
          <table:table-cell table:number-columns-repeated="247"/>
        </table:table-row>
        <table:table-row table:style-name="ro21">
          <table:table-cell table:style-name="ce258" office:value-type="string" calcext:value-type="string">
            <text:p>Materiales de empaque </text:p>
          </table:table-cell>
          <table:table-cell table:style-name="ce258" office:value-type="string" calcext:value-type="string">
            <text:p>Global</text:p>
          </table:table-cell>
          <table:table-cell table:style-name="ce262" table:formula="of:=[$'COSTO PROD Y OPER'.E18]*[.B7]" office:value-type="float" office:value="28.6705058194736" calcext:value-type="float">
            <text:p><text:s/>28.67 </text:p>
          </table:table-cell>
          <table:table-cell table:style-name="ce297"/>
          <table:table-cell table:style-name="ce260" table:number-columns-repeated="2"/>
          <table:table-cell table:number-columns-repeated="2"/>
          <table:table-cell table:style-name="ce260" table:number-columns-repeated="2"/>
          <table:table-cell table:number-columns-repeated="247"/>
        </table:table-row>
        <table:table-row table:style-name="ro21">
          <table:table-cell table:style-name="ce258" office:value-type="string" calcext:value-type="string">
            <text:p>Otros Servicios</text:p>
          </table:table-cell>
          <table:table-cell table:style-name="ce258" office:value-type="string" calcext:value-type="string">
            <text:p>Global</text:p>
          </table:table-cell>
          <table:table-cell table:style-name="ce262" table:formula="of:=+[$'COSTO PROD Y OPER'.B82]*[$'CAP TRABAJ'.B7]" office:value-type="float" office:value="115.583333333333" calcext:value-type="float">
            <text:p><text:s/>115.58 </text:p>
          </table:table-cell>
          <table:table-cell table:style-name="ce297"/>
          <table:table-cell table:style-name="ce260" table:number-columns-repeated="2"/>
          <table:table-cell table:number-columns-repeated="2"/>
          <table:table-cell table:style-name="ce260" table:number-columns-repeated="2"/>
          <table:table-cell table:number-columns-repeated="247"/>
        </table:table-row>
        <table:table-row table:style-name="ro21">
          <table:table-cell table:style-name="ce258" office:value-type="string" calcext:value-type="string">
            <text:p>Servicios de matenimiento y reparaciones</text:p>
          </table:table-cell>
          <table:table-cell table:style-name="ce258" office:value-type="string" calcext:value-type="string">
            <text:p>Global</text:p>
          </table:table-cell>
          <table:table-cell table:style-name="ce262" table:formula="of:=[$'COSTO PROD Y OPER'.E27]*[.B7]" office:value-type="float" office:value="50" calcext:value-type="float">
            <text:p><text:s/>50.00 </text:p>
          </table:table-cell>
          <table:table-cell table:style-name="ce297"/>
          <table:table-cell table:style-name="ce260" table:number-columns-repeated="2"/>
          <table:table-cell table:number-columns-repeated="2"/>
          <table:table-cell table:style-name="ce260" table:number-columns-repeated="2"/>
          <table:table-cell table:number-columns-repeated="247"/>
        </table:table-row>
        <table:table-row table:style-name="ro21">
          <table:table-cell table:style-name="ce258" office:value-type="string" calcext:value-type="string">
            <text:p>Servicios basicos</text:p>
          </table:table-cell>
          <table:table-cell table:style-name="ce258" office:value-type="string" calcext:value-type="string">
            <text:p>Global</text:p>
          </table:table-cell>
          <table:table-cell table:style-name="ce262" table:formula="of:=+[$'COSTO PROD Y OPER'.E8]*[$'CAP TRABAJ'.B7]" office:value-type="float" office:value="52" calcext:value-type="float">
            <text:p><text:s/>52.00 </text:p>
          </table:table-cell>
          <table:table-cell table:style-name="ce297"/>
          <table:table-cell table:style-name="ce260" table:number-columns-repeated="2"/>
          <table:table-cell table:number-columns-repeated="2"/>
          <table:table-cell table:style-name="ce260" table:number-columns-repeated="2"/>
          <table:table-cell table:number-columns-repeated="247"/>
        </table:table-row>
        <table:table-row table:style-name="ro21">
          <table:table-cell table:style-name="ce258" office:value-type="string" calcext:value-type="string">
            <text:p>Utiles de oficina y limpieza</text:p>
          </table:table-cell>
          <table:table-cell table:style-name="ce258" office:value-type="string" calcext:value-type="string">
            <text:p>Global</text:p>
          </table:table-cell>
          <table:table-cell table:style-name="ce262" office:value-type="float" office:value="60" calcext:value-type="float">
            <text:p><text:s/>60.00 </text:p>
          </table:table-cell>
          <table:table-cell table:style-name="ce297"/>
          <table:table-cell table:style-name="ce260" table:number-columns-repeated="2"/>
          <table:table-cell table:number-columns-repeated="2"/>
          <table:table-cell table:style-name="ce260" table:number-columns-repeated="2"/>
          <table:table-cell table:number-columns-repeated="247"/>
        </table:table-row>
        <table:table-row table:style-name="ro21">
          <table:table-cell table:style-name="ce268" office:value-type="string" calcext:value-type="string">
            <text:p>TOTAL CAPITAL DE TRABAJO</text:p>
          </table:table-cell>
          <table:table-cell table:style-name="ce268"/>
          <table:table-cell table:style-name="ce263" table:formula="of:=[.C14]+[.C17]+[.C22]" office:value-type="float" office:value="4244.11004523721" calcext:value-type="float">
            <text:p><text:s/>4,244.11 </text:p>
          </table:table-cell>
          <table:table-cell table:style-name="ce297"/>
          <table:table-cell table:style-name="ce260" table:number-columns-repeated="2"/>
          <table:table-cell table:number-columns-repeated="2"/>
          <table:table-cell table:style-name="ce260" table:number-columns-repeated="2"/>
          <table:table-cell table:number-columns-repeated="247"/>
        </table:table-row>
        <table:table-row table:style-name="ro21">
          <table:table-cell table:number-columns-repeated="5"/>
          <table:table-cell table:style-name="ce260"/>
          <table:table-cell table:number-columns-repeated="251"/>
        </table:table-row>
        <table:table-row table:style-name="ro29">
          <table:table-cell table:style-name="ce211" office:value-type="string" calcext:value-type="string" table:number-columns-spanned="1" table:number-rows-spanned="2">
            <text:p>CONCEPTO</text:p>
          </table:table-cell>
          <table:table-cell table:style-name="ce229" office:value-type="string" calcext:value-type="string" table:number-columns-spanned="6" table:number-rows-spanned="1">
            <text:p>AÑOS</text:p>
          </table:table-cell>
          <table:covered-table-cell table:number-columns-repeated="5" table:style-name="ce229"/>
          <table:table-cell table:number-columns-repeated="250"/>
        </table:table-row>
        <table:table-row table:style-name="ro21">
          <table:covered-table-cell table:style-name="ce211"/>
          <table:table-cell table:style-name="ce211" office:value-type="float" office:value="0" calcext:value-type="float">
            <text:p>0</text:p>
          </table:table-cell>
          <table:table-cell table:style-name="ce211" office:value-type="float" office:value="1" calcext:value-type="float">
            <text:p>1</text:p>
          </table:table-cell>
          <table:table-cell table:style-name="ce211" office:value-type="float" office:value="2" calcext:value-type="float">
            <text:p>2</text:p>
          </table:table-cell>
          <table:table-cell table:style-name="ce211" office:value-type="float" office:value="3" calcext:value-type="float">
            <text:p>3</text:p>
          </table:table-cell>
          <table:table-cell table:style-name="ce211" office:value-type="float" office:value="4" calcext:value-type="float">
            <text:p>4</text:p>
          </table:table-cell>
          <table:table-cell table:style-name="ce211" office:value-type="float" office:value="5" calcext:value-type="float">
            <text:p>5</text:p>
          </table:table-cell>
          <table:table-cell table:number-columns-repeated="250"/>
        </table:table-row>
        <table:table-row table:style-name="ro21">
          <table:table-cell table:style-name="ce268" office:value-type="string" calcext:value-type="string">
            <text:p>I.MATERIA PRIMAS E INSUMOS</text:p>
          </table:table-cell>
          <table:table-cell table:style-name="ce288" table:formula="of:=SUM([.B33:.B34])" office:value-type="float" office:value="2577.8562060844" calcext:value-type="float">
            <text:p>2577.86</text:p>
          </table:table-cell>
          <table:table-cell table:style-name="ce288" table:formula="of:=SUM([.C33:.C34])" office:value-type="float" office:value="682.237907883547" calcext:value-type="float">
            <text:p>682.24</text:p>
          </table:table-cell>
          <table:table-cell table:style-name="ce288" table:formula="of:=SUM([.D33:.D34])" office:value-type="float" office:value="818.685489460256" calcext:value-type="float">
            <text:p>818.69</text:p>
          </table:table-cell>
          <table:table-cell table:style-name="ce288" table:formula="of:=SUM([.E33:.E34])" office:value-type="float" office:value="982.422587352307" calcext:value-type="float">
            <text:p>982.42</text:p>
          </table:table-cell>
          <table:table-cell table:style-name="ce288" table:formula="of:=SUM([.F33:.F34])" office:value-type="float" office:value="1178.90710482277" calcext:value-type="float">
            <text:p>1178.91</text:p>
          </table:table-cell>
          <table:table-cell table:style-name="ce288" table:formula="of:=SUM([.G33:.G34])" office:value-type="float" office:value="1414.68852578732" calcext:value-type="float">
            <text:p>1414.69</text:p>
          </table:table-cell>
          <table:table-cell table:number-columns-repeated="250"/>
        </table:table-row>
        <table:table-row table:style-name="ro21">
          <table:table-cell table:style-name="ce258" office:value-type="string" calcext:value-type="string">
            <text:p>Cuy</text:p>
          </table:table-cell>
          <table:table-cell table:style-name="ce289" table:formula="of:=[.C15]" office:value-type="float" office:value="2411.18953941773" calcext:value-type="float">
            <text:p>2411.19</text:p>
          </table:table-cell>
          <table:table-cell table:style-name="ce289" table:formula="of:=+[.B33]*0.2" office:value-type="float" office:value="482.237907883547" calcext:value-type="float">
            <text:p>482.24</text:p>
          </table:table-cell>
          <table:table-cell table:style-name="ce289" table:formula="of:=+[.C33]*1.2" office:value-type="float" office:value="578.685489460256" calcext:value-type="float">
            <text:p>578.69</text:p>
          </table:table-cell>
          <table:table-cell table:style-name="ce289" table:formula="of:=+[.D33]*1.2" office:value-type="float" office:value="694.422587352307" calcext:value-type="float">
            <text:p>694.42</text:p>
          </table:table-cell>
          <table:table-cell table:style-name="ce289" table:formula="of:=+[.E33]*1.2" office:value-type="float" office:value="833.307104822768" calcext:value-type="float">
            <text:p>833.31</text:p>
          </table:table-cell>
          <table:table-cell table:style-name="ce289" table:formula="of:=+[.F33]*1.2" office:value-type="float" office:value="999.968525787322" calcext:value-type="float">
            <text:p>999.97</text:p>
          </table:table-cell>
          <table:table-cell table:number-columns-repeated="250"/>
        </table:table-row>
        <table:table-row table:style-name="ro21">
          <table:table-cell table:style-name="ce258" office:value-type="string" calcext:value-type="string">
            <text:p>Insumos complementarios</text:p>
          </table:table-cell>
          <table:table-cell table:style-name="ce289" table:formula="of:=[.C16]" office:value-type="float" office:value="166.666666666667" calcext:value-type="float">
            <text:p>166.67</text:p>
          </table:table-cell>
          <table:table-cell table:style-name="ce289" table:formula="of:=[.B34]*1.2" office:value-type="float" office:value="200" calcext:value-type="float">
            <text:p>200.00</text:p>
          </table:table-cell>
          <table:table-cell table:style-name="ce289" table:formula="of:=[.C34]*1.2" office:value-type="float" office:value="240" calcext:value-type="float">
            <text:p>240.00</text:p>
          </table:table-cell>
          <table:table-cell table:style-name="ce289" table:formula="of:=[.D34]*1.2" office:value-type="float" office:value="288" calcext:value-type="float">
            <text:p>288.00</text:p>
          </table:table-cell>
          <table:table-cell table:style-name="ce289" table:formula="of:=[.E34]*1.2" office:value-type="float" office:value="345.6" calcext:value-type="float">
            <text:p>345.60</text:p>
          </table:table-cell>
          <table:table-cell table:style-name="ce289" table:formula="of:=[.F34]*1.2" office:value-type="float" office:value="414.72" calcext:value-type="float">
            <text:p>414.72</text:p>
          </table:table-cell>
          <table:table-cell table:number-columns-repeated="250"/>
        </table:table-row>
        <table:table-row table:style-name="ro21">
          <table:table-cell table:style-name="ce268" office:value-type="string" calcext:value-type="string">
            <text:p>II. MANO DE OBRA</text:p>
          </table:table-cell>
          <table:table-cell table:style-name="ce290" table:formula="of:=SUM([.B36:.B39])" office:value-type="float" office:value="1360" calcext:value-type="float">
            <text:p>1360.00</text:p>
          </table:table-cell>
          <table:table-cell table:style-name="ce290" table:number-columns-repeated="5"/>
          <table:table-cell table:number-columns-repeated="250"/>
        </table:table-row>
        <table:table-row table:style-name="ro21">
          <table:table-cell table:style-name="ce258" office:value-type="string" calcext:value-type="string">
            <text:p>Mano de Obra Directa</text:p>
          </table:table-cell>
          <table:table-cell table:style-name="ce291" table:formula="of:=[.C18]" office:value-type="float" office:value="1060" calcext:value-type="float">
            <text:p>1060.00</text:p>
          </table:table-cell>
          <table:table-cell table:style-name="ce291" table:number-columns-repeated="4"/>
          <table:table-cell table:style-name="ce289"/>
          <table:table-cell table:number-columns-repeated="250"/>
        </table:table-row>
        <table:table-row table:style-name="ro21">
          <table:table-cell table:style-name="ce258" office:value-type="string" calcext:value-type="string">
            <text:p>Mano de Obra Indirecta</text:p>
          </table:table-cell>
          <table:table-cell table:style-name="ce291" table:formula="of:=[.C19]" office:value-type="float" office:value="150" calcext:value-type="float">
            <text:p>150.00</text:p>
          </table:table-cell>
          <table:table-cell table:style-name="ce291" table:number-columns-repeated="4"/>
          <table:table-cell table:style-name="ce289"/>
          <table:table-cell table:number-columns-repeated="250"/>
        </table:table-row>
        <table:table-row table:style-name="ro21">
          <table:table-cell table:style-name="ce258" office:value-type="string" calcext:value-type="string">
            <text:p>Mano de obra Operación</text:p>
          </table:table-cell>
          <table:table-cell table:style-name="ce291" table:formula="of:=[.C20]" office:value-type="float" office:value="60" calcext:value-type="float">
            <text:p>60.00</text:p>
          </table:table-cell>
          <table:table-cell table:style-name="ce291" table:number-columns-repeated="4"/>
          <table:table-cell table:style-name="ce289"/>
          <table:table-cell table:number-columns-repeated="250"/>
        </table:table-row>
        <table:table-row table:style-name="ro21">
          <table:table-cell table:style-name="ce258" office:value-type="string" calcext:value-type="string">
            <text:p>Mano de Obra Administrativa</text:p>
          </table:table-cell>
          <table:table-cell table:style-name="ce291" table:formula="of:=[.C21]" office:value-type="float" office:value="90" calcext:value-type="float">
            <text:p>90.00</text:p>
          </table:table-cell>
          <table:table-cell table:style-name="ce291" table:number-columns-repeated="4"/>
          <table:table-cell table:style-name="ce289"/>
          <table:table-cell table:number-columns-repeated="250"/>
        </table:table-row>
        <table:table-row table:style-name="ro21">
          <table:table-cell table:style-name="ce268" office:value-type="string" calcext:value-type="string">
            <text:p>III. OTROS BIENES Y SERVICIOS </text:p>
          </table:table-cell>
          <table:table-cell table:style-name="ce290" table:formula="of:=SUM([.B41:.B45])" office:value-type="float" office:value="306.253839152807" calcext:value-type="float">
            <text:p>306.25</text:p>
          </table:table-cell>
          <table:table-cell table:style-name="ce290" table:formula="of:=SUM([.C41:.C45])" office:value-type="float" office:value="173.104606983368" calcext:value-type="float">
            <text:p>173.10</text:p>
          </table:table-cell>
          <table:table-cell table:style-name="ce290" table:formula="of:=SUM([.D41:.D45])" office:value-type="float" office:value="207.725528380042" calcext:value-type="float">
            <text:p>207.73</text:p>
          </table:table-cell>
          <table:table-cell table:style-name="ce290" table:formula="of:=SUM([.E41:.E45])" office:value-type="float" office:value="249.27063405605" calcext:value-type="float">
            <text:p>249.27</text:p>
          </table:table-cell>
          <table:table-cell table:style-name="ce290" table:formula="of:=SUM([.F41:.F45])" office:value-type="float" office:value="299.124760867261" calcext:value-type="float">
            <text:p>299.12</text:p>
          </table:table-cell>
          <table:table-cell table:style-name="ce290" table:formula="of:=SUM([.G41:.G45])" office:value-type="float" office:value="358.949713040713" calcext:value-type="float">
            <text:p>358.95</text:p>
          </table:table-cell>
          <table:table-cell table:number-columns-repeated="250"/>
        </table:table-row>
        <table:table-row table:style-name="ro21">
          <table:table-cell table:style-name="ce258" office:value-type="string" calcext:value-type="string">
            <text:p>Materiales de empaque </text:p>
          </table:table-cell>
          <table:table-cell table:style-name="ce289" table:formula="of:=[.C23]" office:value-type="float" office:value="28.6705058194736" calcext:value-type="float">
            <text:p>28.67</text:p>
          </table:table-cell>
          <table:table-cell table:style-name="ce289" table:formula="of:=[.B41]*1.2" office:value-type="float" office:value="34.4046069833684" calcext:value-type="float">
            <text:p>34.40</text:p>
          </table:table-cell>
          <table:table-cell table:style-name="ce289" table:formula="of:=[.C41]*1.2" office:value-type="float" office:value="41.285528380042" calcext:value-type="float">
            <text:p>41.29</text:p>
          </table:table-cell>
          <table:table-cell table:style-name="ce289" table:formula="of:=[.D41]*1.2" office:value-type="float" office:value="49.5426340560504" calcext:value-type="float">
            <text:p>49.54</text:p>
          </table:table-cell>
          <table:table-cell table:style-name="ce289" table:formula="of:=[.E41]*1.2" office:value-type="float" office:value="59.4511608672605" calcext:value-type="float">
            <text:p>59.45</text:p>
          </table:table-cell>
          <table:table-cell table:style-name="ce289" table:formula="of:=[.F41]*1.2" office:value-type="float" office:value="71.3413930407126" calcext:value-type="float">
            <text:p>71.34</text:p>
          </table:table-cell>
          <table:table-cell table:number-columns-repeated="250"/>
        </table:table-row>
        <table:table-row table:style-name="ro21">
          <table:table-cell table:style-name="ce258" office:value-type="string" calcext:value-type="string">
            <text:p>Flete terrestre</text:p>
          </table:table-cell>
          <table:table-cell table:style-name="ce289" table:formula="of:=[.C24]" office:value-type="float" office:value="115.583333333333" calcext:value-type="float">
            <text:p>115.58</text:p>
          </table:table-cell>
          <table:table-cell table:style-name="ce289" table:formula="of:=[.B42]*1.2" office:value-type="float" office:value="138.7" calcext:value-type="float">
            <text:p>138.70</text:p>
          </table:table-cell>
          <table:table-cell table:style-name="ce289" table:formula="of:=[.C42]*1.2" office:value-type="float" office:value="166.44" calcext:value-type="float">
            <text:p>166.44</text:p>
          </table:table-cell>
          <table:table-cell table:style-name="ce289" table:formula="of:=[.D42]*1.2" office:value-type="float" office:value="199.728" calcext:value-type="float">
            <text:p>199.73</text:p>
          </table:table-cell>
          <table:table-cell table:style-name="ce289" table:formula="of:=[.E42]*1.2" office:value-type="float" office:value="239.6736" calcext:value-type="float">
            <text:p>239.67</text:p>
          </table:table-cell>
          <table:table-cell table:style-name="ce289" table:formula="of:=[.F42]*1.2" office:value-type="float" office:value="287.60832" calcext:value-type="float">
            <text:p>287.61</text:p>
          </table:table-cell>
          <table:table-cell table:number-columns-repeated="250"/>
        </table:table-row>
        <table:table-row table:style-name="ro21">
          <table:table-cell table:style-name="ce258" office:value-type="string" calcext:value-type="string">
            <text:p>Servicios de matenimiento y reparaciones</text:p>
          </table:table-cell>
          <table:table-cell table:style-name="ce289" table:formula="of:=[.C25]" office:value-type="float" office:value="50" calcext:value-type="float">
            <text:p>50.00</text:p>
          </table:table-cell>
          <table:table-cell table:style-name="ce289" table:number-columns-repeated="5"/>
          <table:table-cell table:number-columns-repeated="250"/>
        </table:table-row>
        <table:table-row table:style-name="ro21">
          <table:table-cell table:style-name="ce258" office:value-type="string" calcext:value-type="string">
            <text:p>Servicios basicos</text:p>
          </table:table-cell>
          <table:table-cell table:style-name="ce289" table:formula="of:=[.C26]" office:value-type="float" office:value="52" calcext:value-type="float">
            <text:p>52.00</text:p>
          </table:table-cell>
          <table:table-cell table:style-name="ce289" table:number-columns-repeated="5"/>
          <table:table-cell table:number-columns-repeated="250"/>
        </table:table-row>
        <table:table-row table:style-name="ro21">
          <table:table-cell table:style-name="ce258" office:value-type="string" calcext:value-type="string">
            <text:p>Utiles de oficina y limpieza</text:p>
          </table:table-cell>
          <table:table-cell table:style-name="ce289" table:formula="of:=[.C27]" office:value-type="float" office:value="60" calcext:value-type="float">
            <text:p>60.00</text:p>
          </table:table-cell>
          <table:table-cell table:style-name="ce289" table:number-columns-repeated="5"/>
          <table:table-cell table:number-columns-repeated="250"/>
        </table:table-row>
        <table:table-row table:style-name="ro21">
          <table:table-cell table:style-name="ce268" office:value-type="string" calcext:value-type="string">
            <text:p>TOTAL CAPITAL DE TRABAJO</text:p>
          </table:table-cell>
          <table:table-cell table:style-name="ce288" table:formula="of:=[.B32]+[.B35]+[.B40]" office:value-type="float" office:value="4244.11004523721" calcext:value-type="float">
            <text:p>4244.11</text:p>
          </table:table-cell>
          <table:table-cell table:style-name="ce288" table:formula="of:=[.C32]+[.C35]+[.C40]" office:value-type="float" office:value="855.342514866915" calcext:value-type="float">
            <text:p>855.34</text:p>
          </table:table-cell>
          <table:table-cell table:style-name="ce288" table:formula="of:=[.D32]+[.D35]+[.D40]" office:value-type="float" office:value="1026.4110178403" calcext:value-type="float">
            <text:p>1026.41</text:p>
          </table:table-cell>
          <table:table-cell table:style-name="ce288" table:formula="of:=[.E32]+[.E35]+[.E40]" office:value-type="float" office:value="1231.69322140836" calcext:value-type="float">
            <text:p>1231.69</text:p>
          </table:table-cell>
          <table:table-cell table:style-name="ce288" table:formula="of:=[.F32]+[.F35]+[.F40]" office:value-type="float" office:value="1478.03186569003" calcext:value-type="float">
            <text:p>1478.03</text:p>
          </table:table-cell>
          <table:table-cell table:style-name="ce288" table:formula="of:=[.G32]+[.G35]+[.G40]" office:value-type="float" office:value="1773.63823882803" calcext:value-type="float">
            <text:p>1773.64</text:p>
          </table:table-cell>
          <table:table-cell table:number-columns-repeated="250"/>
        </table:table-row>
        <table:table-row table:style-name="ro21">
          <table:table-cell table:style-name="ce260" table:number-columns-repeated="6"/>
          <table:table-cell table:number-columns-repeated="251"/>
        </table:table-row>
        <table:table-row table:style-name="ro9">
          <table:table-cell table:style-name="ce285" office:value-type="string" calcext:value-type="string" table:number-columns-spanned="7" table:number-rows-spanned="1">
            <text:p>SE ESTA CONSIDERANDO UN INCREMENTO EN EL 20 % DE LA PRODUCCION DURANTE LOS 05 <text:s/>PRIMEROS AÑOS</text:p>
          </table:table-cell>
          <table:covered-table-cell table:number-columns-repeated="6" table:style-name="ce285"/>
          <table:table-cell table:number-columns-repeated="250"/>
        </table:table-row>
        <table:table-row table:style-name="ro32">
          <table:table-cell table:number-columns-repeated="257"/>
        </table:table-row>
        <table:table-row table:style-name="ro21" table:number-rows-repeated="6">
          <table:table-cell table:style-name="ce260" table:number-columns-repeated="6"/>
          <table:table-cell table:number-columns-repeated="251"/>
        </table:table-row>
        <table:table-row table:style-name="ro21" table:number-rows-repeated="1048520">
          <table:table-cell table:number-columns-repeated="257"/>
        </table:table-row>
        <table:table-row table:style-name="ro21">
          <table:table-cell table:number-columns-repeated="257"/>
        </table:table-row>
        <table:named-expressions>
          <table:named-range table:name="_xlnm.Print_Area" table:base-cell-address="$POBLACION.$A$1" table:cell-range-address="$'CAP TRABAJ'.$A$1:.$G$46" table:range-usable-as="print-range"/>
        </table:named-expressions>
      </table:table>
      <table:table table:name="INVERSION" table:style-name="ta11" table:print-ranges="INVERSION.E4:INVERSION.F16">
        <table:table-column table:style-name="co62" table:default-cell-style-name="ce255"/>
        <table:table-column table:style-name="co63" table:number-columns-repeated="2" table:default-cell-style-name="ce310"/>
        <table:table-column table:style-name="co64" table:default-cell-style-name="ce310"/>
        <table:table-column table:style-name="co65" table:default-cell-style-name="ce255"/>
        <table:table-column table:style-name="co15" table:default-cell-style-name="ce255"/>
        <table:table-column table:style-name="co66" table:default-cell-style-name="ce255"/>
        <table:table-column table:style-name="co67" table:default-cell-style-name="ce207"/>
        <table:table-column table:style-name="co68" table:default-cell-style-name="ce207"/>
        <table:table-column table:style-name="co69" table:default-cell-style-name="ce207"/>
        <table:table-column table:style-name="co70" table:default-cell-style-name="ce207"/>
        <table:table-column table:style-name="co71" table:default-cell-style-name="ce207"/>
        <table:table-column table:style-name="co56" table:default-cell-style-name="ce223"/>
        <table:table-column table:style-name="co72" table:default-cell-style-name="ce207"/>
        <table:table-column table:style-name="co27" table:default-cell-style-name="ce255"/>
        <table:table-column table:style-name="co72" table:default-cell-style-name="ce255"/>
        <table:table-column table:style-name="co1" table:number-columns-repeated="241" table:default-cell-style-name="ce255"/>
        <table:table-column table:style-name="co12" table:number-columns-repeated="16127"/>
        <table:table-row table:style-name="ro29">
          <table:table-cell table:number-columns-repeated="7"/>
          <table:table-cell table:style-name="ce341" table:formula="of:=+[.A4]" office:value-type="string" office:string-value="CONCEPTO" calcext:value-type="string" table:number-columns-spanned="1" table:number-rows-spanned="5">
            <text:p>CONCEPTO</text:p>
          </table:table-cell>
          <table:table-cell table:style-name="ce349" office:value-type="string" calcext:value-type="string" table:number-columns-spanned="1" table:number-rows-spanned="5">
            <text:p>UND. MED.</text:p>
          </table:table-cell>
          <table:table-cell table:style-name="ce349" office:value-type="string" calcext:value-type="string" table:number-columns-spanned="1" table:number-rows-spanned="5">
            <text:p>CANT.</text:p>
          </table:table-cell>
          <table:table-cell table:style-name="ce341" office:value-type="string" calcext:value-type="string" table:number-columns-spanned="5" table:number-rows-spanned="1">
            <text:p>PRESUPUESTO TECNICO</text:p>
          </table:table-cell>
          <table:covered-table-cell table:number-columns-repeated="4" table:style-name="ce341"/>
          <table:table-cell table:number-columns-repeated="242"/>
        </table:table-row>
        <table:table-row table:style-name="ro29">
          <table:table-cell table:number-columns-repeated="7"/>
          <table:covered-table-cell table:style-name="ce341"/>
          <table:covered-table-cell table:number-columns-repeated="2" table:style-name="ce349"/>
          <table:table-cell table:style-name="ce341" office:value-type="string" calcext:value-type="string" table:number-columns-spanned="5" table:number-rows-spanned="1">
            <text:p>(Considerado en la Propuesta Productiva)</text:p>
          </table:table-cell>
          <table:covered-table-cell table:number-columns-repeated="4" table:style-name="ce341"/>
          <table:table-cell table:number-columns-repeated="242"/>
        </table:table-row>
        <table:table-row table:style-name="ro29">
          <table:table-cell table:style-name="ce301" office:value-type="string" calcext:value-type="string" table:number-columns-spanned="4" table:number-rows-spanned="1">
            <text:p>CUADRO DE PRESUPUESTO</text:p>
          </table:table-cell>
          <table:covered-table-cell table:number-columns-repeated="3" table:style-name="ce301"/>
          <table:table-cell table:number-columns-repeated="3"/>
          <table:covered-table-cell table:style-name="ce341"/>
          <table:covered-table-cell table:number-columns-repeated="2" table:style-name="ce349"/>
          <table:table-cell table:style-name="ce341" table:formula="of:=+[.B4]" office:value-type="string" office:string-value=" TOTAL" calcext:value-type="string" table:number-columns-spanned="1" table:number-rows-spanned="3">
            <text:p><text:s/>TOTAL</text:p>
          </table:table-cell>
          <table:table-cell table:style-name="ce366" office:value-type="string" calcext:value-type="string" table:number-columns-spanned="1" table:number-rows-spanned="3">
            <text:p>Monto financiado por el GR</text:p>
          </table:table-cell>
          <table:table-cell table:style-name="ce368" office:value-type="string" calcext:value-type="string" table:number-columns-spanned="3" table:number-rows-spanned="1">
            <text:p>Monto financiado por los AEO</text:p>
          </table:table-cell>
          <table:covered-table-cell table:number-columns-repeated="2" table:style-name="ce368"/>
          <table:table-cell table:number-columns-repeated="242"/>
        </table:table-row>
        <table:table-row table:style-name="ro8">
          <table:table-cell table:style-name="ce302" office:value-type="string" calcext:value-type="string" table:number-columns-spanned="1" table:number-rows-spanned="2">
            <text:p>CONCEPTO</text:p>
          </table:table-cell>
          <table:table-cell table:style-name="ce311" office:value-type="string" calcext:value-type="string" table:number-columns-spanned="1" table:number-rows-spanned="2">
            <text:p><text:s/>TOTAL</text:p>
          </table:table-cell>
          <table:table-cell table:style-name="ce311" office:value-type="string" calcext:value-type="string" table:number-columns-spanned="2" table:number-rows-spanned="1">
            <text:p>FINANCIAMIENTO</text:p>
          </table:table-cell>
          <table:covered-table-cell table:style-name="ce311"/>
          <table:table-cell table:style-name="ce266" office:value-type="string" calcext:value-type="string">
            <text:p><text:s text:c="31"/>ESTRUCTURA DE LA INVERSIÒN</text:p>
          </table:table-cell>
          <table:table-cell table:number-columns-repeated="2"/>
          <table:covered-table-cell table:style-name="ce341"/>
          <table:covered-table-cell table:number-columns-repeated="2" table:style-name="ce349"/>
          <table:covered-table-cell table:style-name="ce341"/>
          <table:covered-table-cell table:style-name="ce366"/>
          <table:table-cell table:style-name="ce341" office:value-type="string" calcext:value-type="string">
            <text:p>En efectivo</text:p>
          </table:table-cell>
          <table:table-cell table:style-name="ce341" office:value-type="string" calcext:value-type="string">
            <text:p>En Valorizaciones</text:p>
          </table:table-cell>
          <table:table-cell table:style-name="ce341" office:value-type="string" calcext:value-type="string">
            <text:p>En Total</text:p>
          </table:table-cell>
          <table:table-cell table:number-columns-repeated="242"/>
        </table:table-row>
        <table:table-row table:style-name="ro21">
          <table:covered-table-cell table:style-name="ce302"/>
          <table:covered-table-cell table:style-name="ce311"/>
          <table:table-cell table:style-name="ce311" office:value-type="string" calcext:value-type="string">
            <text:p>AEO</text:p>
          </table:table-cell>
          <table:table-cell table:style-name="ce311" office:value-type="string" calcext:value-type="string">
            <text:p>PROCOMPITE</text:p>
          </table:table-cell>
          <table:table-cell table:style-name="ce229" office:value-type="string" calcext:value-type="string">
            <text:p>CONCEPTO</text:p>
          </table:table-cell>
          <table:table-cell table:style-name="ce229" office:value-type="string" calcext:value-type="string">
            <text:p><text:s/>TOTAL</text:p>
          </table:table-cell>
          <table:table-cell/>
          <table:covered-table-cell table:style-name="ce341"/>
          <table:covered-table-cell table:number-columns-repeated="2" table:style-name="ce349"/>
          <table:covered-table-cell table:style-name="ce341"/>
          <table:covered-table-cell table:style-name="ce366"/>
          <table:table-cell table:number-columns-repeated="3" table:style-name="ce368" office:value-type="string" calcext:value-type="string">
            <text:p>(s/)</text:p>
          </table:table-cell>
          <table:table-cell table:number-columns-repeated="242"/>
        </table:table-row>
        <table:table-row table:style-name="ro21">
          <table:table-cell table:style-name="ce303" office:value-type="string" calcext:value-type="string">
            <text:p>I. INVERSION FIJA</text:p>
          </table:table-cell>
          <table:table-cell table:style-name="ce312" table:formula="of:=[.B7]+[.B61]" office:value-type="float" office:value="140584.5" calcext:value-type="float">
            <text:p>140584.50</text:p>
          </table:table-cell>
          <table:table-cell table:style-name="ce323" table:formula="of:=[.C7]+[.C61]" office:value-type="float" office:value="31633.5" calcext:value-type="float">
            <text:p>31,633.50</text:p>
          </table:table-cell>
          <table:table-cell table:style-name="ce323" table:formula="of:=[.D7]+[.D61]" office:value-type="float" office:value="108951" calcext:value-type="float">
            <text:p>108,951.00</text:p>
          </table:table-cell>
          <table:table-cell table:style-name="ce268" office:value-type="string" calcext:value-type="string">
            <text:p>I.INVERSION FIJA </text:p>
          </table:table-cell>
          <table:table-cell table:style-name="ce263" table:formula="of:=[.F7]+[.F12]" office:value-type="float" office:value="140584.5" calcext:value-type="float">
            <text:p><text:s/>140,584.50 </text:p>
          </table:table-cell>
          <table:table-cell/>
          <table:table-cell table:style-name="ce342" table:formula="of:=+[.A6]" office:value-type="string" office:string-value="I. INVERSION FIJA" calcext:value-type="string">
            <text:p>I. INVERSION FIJA</text:p>
          </table:table-cell>
          <table:table-cell table:style-name="ce342" table:number-columns-repeated="2"/>
          <table:table-cell table:style-name="ce354" table:formula="of:=[.K7]+[.K61]" office:value-type="float" office:value="140584.5" calcext:value-type="float">
            <text:p>140,584.50</text:p>
          </table:table-cell>
          <table:table-cell table:style-name="ce354" table:formula="of:=[.L7]+[.L61]" office:value-type="float" office:value="108951" calcext:value-type="float">
            <text:p>108,951.00</text:p>
          </table:table-cell>
          <table:table-cell table:style-name="ce369" table:formula="of:=[.M7]+[.M61]" office:value-type="float" office:value="5000" calcext:value-type="float">
            <text:p>5,000.00</text:p>
          </table:table-cell>
          <table:table-cell table:style-name="ce369" table:formula="of:=[.N7]+[.N61]" office:value-type="float" office:value="26633.5" calcext:value-type="float">
            <text:p>26,633.50</text:p>
          </table:table-cell>
          <table:table-cell table:style-name="ce369" table:formula="of:=[.O7]+[.O61]" office:value-type="float" office:value="31633.5" calcext:value-type="float">
            <text:p>31,633.50</text:p>
          </table:table-cell>
          <table:table-cell table:number-columns-repeated="242"/>
        </table:table-row>
        <table:table-row table:style-name="ro21">
          <table:table-cell table:style-name="ce304" office:value-type="string" calcext:value-type="string">
            <text:p>I. 1 INVERSION FIJA TANGIBLE</text:p>
          </table:table-cell>
          <table:table-cell table:style-name="ce313" table:formula="of:=[.B8]+[.B41]+[.B55]+[.B57]" office:value-type="float" office:value="126184.5" calcext:value-type="float">
            <text:p>126184.50</text:p>
          </table:table-cell>
          <table:table-cell table:style-name="ce323" table:formula="of:=[.C8]+[.C41]+[.C55]+[.C57]" office:value-type="float" office:value="31633.5" calcext:value-type="float">
            <text:p>31,633.50</text:p>
          </table:table-cell>
          <table:table-cell table:style-name="ce323" table:formula="of:=[.D8]+[.D41]+[.D55]+[.D57]" office:value-type="float" office:value="94551" calcext:value-type="float">
            <text:p>94,551.00</text:p>
          </table:table-cell>
          <table:table-cell table:style-name="ce268" office:value-type="string" calcext:value-type="string">
            <text:p><text:s text:c="2"/>I.1. INVERSION FIJA TANGIBLE</text:p>
          </table:table-cell>
          <table:table-cell table:style-name="ce263" table:formula="of:=SUM([.F8:.F11])" office:value-type="float" office:value="126184.5" calcext:value-type="float">
            <text:p><text:s/>126,184.50 </text:p>
          </table:table-cell>
          <table:table-cell/>
          <table:table-cell table:style-name="ce342" table:formula="of:=+[.A7]" office:value-type="string" office:string-value="I. 1 INVERSION FIJA TANGIBLE" calcext:value-type="string">
            <text:p>I. 1 INVERSION FIJA TANGIBLE</text:p>
          </table:table-cell>
          <table:table-cell table:style-name="ce342" table:number-columns-repeated="2"/>
          <table:table-cell table:style-name="ce355" table:formula="of:=[.K8]+[.K41]+[.K55]+[.K57]" office:value-type="float" office:value="126184.5" calcext:value-type="float">
            <text:p>126,184.50</text:p>
          </table:table-cell>
          <table:table-cell table:style-name="ce355" table:formula="of:=[.L8]+[.L41]+[.L55]+[.L57]" office:value-type="float" office:value="94551" calcext:value-type="float">
            <text:p>94,551.00</text:p>
          </table:table-cell>
          <table:table-cell table:style-name="ce370" table:formula="of:=[.M8]+[.M41]+[.M55]+[.M57]" office:value-type="float" office:value="5000" calcext:value-type="float">
            <text:p>5,000.00</text:p>
          </table:table-cell>
          <table:table-cell table:style-name="ce370" table:formula="of:=[.N8]+[.N41]+[.N55]+[.N57]" office:value-type="float" office:value="26633.5" calcext:value-type="float">
            <text:p>26,633.50</text:p>
          </table:table-cell>
          <table:table-cell table:style-name="ce370" table:formula="of:=[.O8]+[.O41]+[.O55]+[.O57]" office:value-type="float" office:value="31633.5" calcext:value-type="float">
            <text:p>31,633.50</text:p>
          </table:table-cell>
          <table:table-cell table:number-columns-repeated="242"/>
        </table:table-row>
        <table:table-row table:style-name="ro21">
          <table:table-cell table:style-name="ce304" office:value-type="string" calcext:value-type="string">
            <text:p>I.1.1 TERRENOS Y OBRAS CIVILES</text:p>
          </table:table-cell>
          <table:table-cell table:style-name="ce313" table:formula="of:=[.B9]+[.B11]+[.B32]" office:value-type="float" office:value="73528.5" calcext:value-type="float">
            <text:p>73528.50</text:p>
          </table:table-cell>
          <table:table-cell table:style-name="ce323" table:formula="of:=[.C9]+[.C11]+[.C32]" office:value-type="float" office:value="26633.5" calcext:value-type="float">
            <text:p>26,633.50</text:p>
          </table:table-cell>
          <table:table-cell table:style-name="ce323" table:formula="of:=[.D9]+[.D11]+[.D32]" office:value-type="float" office:value="46895" calcext:value-type="float">
            <text:p>46,895.00</text:p>
          </table:table-cell>
          <table:table-cell table:style-name="ce258" office:value-type="string" calcext:value-type="string">
            <text:p><text:s text:c="5"/>I.1.1. TERRENOS Y OBRAS CIVILES</text:p>
          </table:table-cell>
          <table:table-cell table:style-name="ce262" table:formula="of:=+[.B8]" office:value-type="float" office:value="73528.5" calcext:value-type="float">
            <text:p><text:s/>73,528.50 </text:p>
          </table:table-cell>
          <table:table-cell table:style-name="ce340"/>
          <table:table-cell table:style-name="ce342" table:formula="of:=+[.A8]" office:value-type="string" office:string-value="I.1.1 TERRENOS Y OBRAS CIVILES" calcext:value-type="string">
            <text:p>I.1.1 TERRENOS Y OBRAS CIVILES</text:p>
          </table:table-cell>
          <table:table-cell table:style-name="ce342" table:number-columns-repeated="2"/>
          <table:table-cell table:style-name="ce355" table:formula="of:=[.K9]+[.K11]+[.K32]" office:value-type="float" office:value="73528.5" calcext:value-type="float">
            <text:p>73,528.50</text:p>
          </table:table-cell>
          <table:table-cell table:style-name="ce355" table:formula="of:=[.L9]+[.L11]+[.L32]" office:value-type="float" office:value="46895" calcext:value-type="float">
            <text:p>46,895.00</text:p>
          </table:table-cell>
          <table:table-cell table:style-name="ce370" table:formula="of:=[.M9]+[.M11]+[.M32]" office:value-type="float" office:value="0" calcext:value-type="float">
            <text:p>0.00</text:p>
          </table:table-cell>
          <table:table-cell table:style-name="ce370" table:formula="of:=[.N9]+[.N11]+[.N32]" office:value-type="float" office:value="26633.5" calcext:value-type="float">
            <text:p>26,633.50</text:p>
          </table:table-cell>
          <table:table-cell table:style-name="ce370" table:formula="of:=[.O9]+[.O11]+[.O32]" office:value-type="float" office:value="26633.5" calcext:value-type="float">
            <text:p>26,633.50</text:p>
          </table:table-cell>
          <table:table-cell table:style-name="ce340" table:number-columns-repeated="16369"/>
        </table:table-row>
        <table:table-row table:style-name="ro21">
          <table:table-cell table:style-name="ce305" table:formula="of:=+[$'TERREN Y OBR CIV'.B5]" office:value-type="string" office:string-value="I. TERRENOS" calcext:value-type="string">
            <text:p>I. TERRENOS</text:p>
          </table:table-cell>
          <table:table-cell table:style-name="ce314" table:formula="of:=[.B10]" office:value-type="float" office:value="0" calcext:value-type="float">
            <text:p>0.00</text:p>
          </table:table-cell>
          <table:table-cell table:style-name="ce324" table:formula="of:=[.C10]" office:value-type="float" office:value="0" calcext:value-type="float">
            <text:p>0.00</text:p>
          </table:table-cell>
          <table:table-cell table:style-name="ce324" table:formula="of:=[.D10]" office:value-type="float" office:value="0" calcext:value-type="float">
            <text:p>0.00</text:p>
          </table:table-cell>
          <table:table-cell table:style-name="ce258" office:value-type="string" calcext:value-type="string">
            <text:p><text:s text:c="5"/>I.1.2. MAQUINARIA Y EQUIPO</text:p>
          </table:table-cell>
          <table:table-cell table:style-name="ce262" table:formula="of:=+[.B41]" office:value-type="float" office:value="47356" calcext:value-type="float">
            <text:p><text:s/>47,356.00 </text:p>
          </table:table-cell>
          <table:table-cell/>
          <table:table-cell table:style-name="ce343" table:formula="of:=+[$'TERREN Y OBR CIV'.B5]" office:value-type="string" office:string-value="I. TERRENOS" calcext:value-type="string">
            <text:p>I. TERRENOS</text:p>
          </table:table-cell>
          <table:table-cell table:style-name="ce343" table:number-columns-repeated="2"/>
          <table:table-cell table:style-name="ce356" table:formula="of:=[.K10]" office:value-type="float" office:value="0" calcext:value-type="float">
            <text:p>0.00</text:p>
          </table:table-cell>
          <table:table-cell table:style-name="ce356" table:formula="of:=[.L10]" office:value-type="float" office:value="0" calcext:value-type="float">
            <text:p>0.00</text:p>
          </table:table-cell>
          <table:table-cell table:style-name="ce371" table:formula="of:=[.K10]" office:value-type="float" office:value="0" calcext:value-type="float">
            <text:p>0.00</text:p>
          </table:table-cell>
          <table:table-cell table:style-name="ce371" table:formula="of:=[.L10]" office:value-type="float" office:value="0" calcext:value-type="float">
            <text:p>0.00</text:p>
          </table:table-cell>
          <table:table-cell table:style-name="ce371" table:formula="of:=[.M10]" office:value-type="float" office:value="0" calcext:value-type="float">
            <text:p>0.00</text:p>
          </table:table-cell>
          <table:table-cell table:number-columns-repeated="242"/>
        </table:table-row>
        <table:table-row table:style-name="ro21">
          <table:table-cell table:style-name="ce306" office:value-type="string" calcext:value-type="string">
            <text:p>Terrenos</text:p>
          </table:table-cell>
          <table:table-cell table:style-name="ce315" table:formula="of:=+[$'TERREN Y OBR CIV'.F5]" office:value-type="float" office:value="0" calcext:value-type="float">
            <text:p>0.00</text:p>
          </table:table-cell>
          <table:table-cell table:style-name="ce325" table:formula="of:=[.B10]" office:value-type="float" office:value="0" calcext:value-type="float">
            <text:p>0.00</text:p>
          </table:table-cell>
          <table:table-cell table:style-name="ce325"/>
          <table:table-cell table:style-name="ce258" office:value-type="string" calcext:value-type="string">
            <text:p><text:s text:c="5"/>I.1.3. VEHICULOS</text:p>
          </table:table-cell>
          <table:table-cell table:style-name="ce262" table:formula="of:=[$'MUEB, MAQ,EQUIP'.F28]" office:value-type="float" office:value="0" calcext:value-type="float">
            <text:p><text:s/>- <text:s text:c="2"/></text:p>
          </table:table-cell>
          <table:table-cell/>
          <table:table-cell table:style-name="ce344" table:formula="of:=+[.A10]" office:value-type="string" office:string-value="Terrenos" calcext:value-type="string">
            <text:p>Terrenos</text:p>
          </table:table-cell>
          <table:table-cell table:style-name="ce344" table:number-columns-repeated="2"/>
          <table:table-cell table:style-name="ce357" table:formula="of:=+[.B10]" office:value-type="float" office:value="0" calcext:value-type="float">
            <text:p>0.00</text:p>
          </table:table-cell>
          <table:table-cell table:style-name="ce360"/>
          <table:table-cell table:style-name="ce372" table:formula="of:=[.K10]" office:value-type="float" office:value="0" calcext:value-type="float">
            <text:p>0.00</text:p>
          </table:table-cell>
          <table:table-cell table:style-name="ce377"/>
          <table:table-cell table:style-name="ce378"/>
          <table:table-cell table:number-columns-repeated="242"/>
        </table:table-row>
        <table:table-row table:style-name="ro21">
          <table:table-cell table:style-name="ce305" table:formula="of:=+[$'TERREN Y OBR CIV'.B6]" office:value-type="string" office:string-value="II. MEJORAMIENTO DE INFRAESTRUCTURA  GALPONES" calcext:value-type="string">
            <text:p>II. MEJORAMIENTO DE INFRAESTRUCTURA <text:s/>GALPONES</text:p>
          </table:table-cell>
          <table:table-cell table:style-name="ce316" table:formula="of:=SUM([.B12:.B31])" office:value-type="float" office:value="55973" calcext:value-type="float">
            <text:p>55973.00</text:p>
          </table:table-cell>
          <table:table-cell table:style-name="ce326" table:formula="of:=SUM([.C12:.C30])" office:value-type="float" office:value="24300" calcext:value-type="float">
            <text:p>24,300.00</text:p>
          </table:table-cell>
          <table:table-cell table:style-name="ce326" table:formula="of:=SUM([.D12:.D31])" office:value-type="float" office:value="31673" calcext:value-type="float">
            <text:p>31,673.00</text:p>
          </table:table-cell>
          <table:table-cell table:style-name="ce258" office:value-type="string" calcext:value-type="string">
            <text:p><text:s text:c="5"/>I.1.4. MUEBLES Y ENSERES</text:p>
          </table:table-cell>
          <table:table-cell table:style-name="ce262" table:formula="of:=+[.B57]" office:value-type="float" office:value="5300" calcext:value-type="float">
            <text:p><text:s/>5,300.00 </text:p>
          </table:table-cell>
          <table:table-cell/>
          <table:table-cell table:style-name="ce343" table:formula="of:=+[$'TERREN Y OBR CIV'.B6]" office:value-type="string" office:string-value="II. MEJORAMIENTO DE INFRAESTRUCTURA  GALPONES" calcext:value-type="string">
            <text:p>II. MEJORAMIENTO DE INFRAESTRUCTURA <text:s/>GALPONES</text:p>
          </table:table-cell>
          <table:table-cell table:style-name="ce343" table:number-columns-repeated="2"/>
          <table:table-cell table:style-name="ce358" table:formula="of:=SUM([.K12:.K31])" office:value-type="float" office:value="55973" calcext:value-type="float">
            <text:p>55,973.00</text:p>
          </table:table-cell>
          <table:table-cell table:style-name="ce358" table:formula="of:=SUM([.L12:.L31])" office:value-type="float" office:value="31673" calcext:value-type="float">
            <text:p>31,673.00</text:p>
          </table:table-cell>
          <table:table-cell table:style-name="ce373" table:formula="of:=SUM([.M12:.M30])" office:value-type="float" office:value="0" calcext:value-type="float">
            <text:p>0.00</text:p>
          </table:table-cell>
          <table:table-cell table:style-name="ce373" table:formula="of:=SUM([.N12:.N30])" office:value-type="float" office:value="24300" calcext:value-type="float">
            <text:p>24,300.00</text:p>
          </table:table-cell>
          <table:table-cell table:style-name="ce373" table:formula="of:=SUM([.O12:.O30])" office:value-type="float" office:value="24300" calcext:value-type="float">
            <text:p>24,300.00</text:p>
          </table:table-cell>
          <table:table-cell table:number-columns-repeated="242"/>
        </table:table-row>
        <table:table-row table:style-name="ro21">
          <table:table-cell table:style-name="ce306" table:formula="of:=+[$'TERREN Y OBR CIV'.B7]" office:value-type="string" office:string-value="Clavos para madera c/c 3&quot;" calcext:value-type="string">
            <text:p>Clavos para madera c/c 3"</text:p>
          </table:table-cell>
          <table:table-cell table:style-name="ce315" table:formula="of:=+[$'TERREN Y OBR CIV'.F7]" office:value-type="float" office:value="110" calcext:value-type="float">
            <text:p>110.00</text:p>
          </table:table-cell>
          <table:table-cell table:style-name="ce325"/>
          <table:table-cell table:style-name="ce325" table:formula="of:=+[.B12]" office:value-type="float" office:value="110" calcext:value-type="float">
            <text:p>110.00</text:p>
          </table:table-cell>
          <table:table-cell table:style-name="ce268" office:value-type="string" calcext:value-type="string">
            <text:p><text:s text:c="2"/>I.2. INVERSION FIJA INTANGIBLE</text:p>
          </table:table-cell>
          <table:table-cell table:style-name="ce263" table:formula="of:=+[.B61]" office:value-type="float" office:value="14400" calcext:value-type="float">
            <text:p><text:s/>14,400.00 </text:p>
          </table:table-cell>
          <table:table-cell/>
          <table:table-cell table:style-name="ce344" table:formula="of:=+[$'TERREN Y OBR CIV'.B7]" office:value-type="string" office:string-value="Clavos para madera c/c 3&quot;" calcext:value-type="string">
            <text:p>Clavos para madera c/c 3"</text:p>
          </table:table-cell>
          <table:table-cell table:style-name="ce350" table:formula="of:=+[$'TERREN Y OBR CIV'.C7]" office:value-type="string" office:string-value="kg" calcext:value-type="string">
            <text:p>kg</text:p>
          </table:table-cell>
          <table:table-cell table:style-name="ce350" table:formula="of:=+[$'TERREN Y OBR CIV'.D7]" office:value-type="float" office:value="22" calcext:value-type="float">
            <text:p>22</text:p>
          </table:table-cell>
          <table:table-cell table:style-name="ce357" table:formula="of:=+[.B12]" office:value-type="float" office:value="110" calcext:value-type="float">
            <text:p>110.00</text:p>
          </table:table-cell>
          <table:table-cell table:style-name="ce360" table:formula="of:=+[.K12]" office:value-type="float" office:value="110" calcext:value-type="float">
            <text:p>110.00</text:p>
          </table:table-cell>
          <table:table-cell table:style-name="ce374"/>
          <table:table-cell table:style-name="ce372"/>
          <table:table-cell table:style-name="ce372" table:formula="of:=IF(SUM([.M12:.N12])&gt;0;SUM([.M12:.N12]);&quot;&quot;)">
            <text:p/>
          </table:table-cell>
          <table:table-cell table:number-columns-repeated="242"/>
        </table:table-row>
        <table:table-row table:style-name="ro21">
          <table:table-cell table:style-name="ce306" table:formula="of:=+[$'TERREN Y OBR CIV'.B8]" office:value-type="string" office:string-value="Clavos para madera c/c 4&quot;" calcext:value-type="string">
            <text:p>Clavos para madera c/c 4"</text:p>
          </table:table-cell>
          <table:table-cell table:style-name="ce315" table:formula="of:=+[$'TERREN Y OBR CIV'.F8]" office:value-type="float" office:value="110" calcext:value-type="float">
            <text:p>110.00</text:p>
          </table:table-cell>
          <table:table-cell table:style-name="ce325"/>
          <table:table-cell table:style-name="ce325" table:formula="of:=+[.B13]" office:value-type="float" office:value="110" calcext:value-type="float">
            <text:p>110.00</text:p>
          </table:table-cell>
          <table:table-cell table:style-name="ce268" office:value-type="string" calcext:value-type="string">
            <text:p>II. CAPITAL DE TRABAJO</text:p>
          </table:table-cell>
          <table:table-cell table:style-name="ce263" table:formula="of:=[$'CAP TRABAJ'.C28]" office:value-type="float" office:value="4244.11004523721" calcext:value-type="float">
            <text:p><text:s/>4,244.11 </text:p>
          </table:table-cell>
          <table:table-cell/>
          <table:table-cell table:style-name="ce344" table:formula="of:=+[$'TERREN Y OBR CIV'.B8]" office:value-type="string" office:string-value="Clavos para madera c/c 4&quot;" calcext:value-type="string">
            <text:p>Clavos para madera c/c 4"</text:p>
          </table:table-cell>
          <table:table-cell table:style-name="ce350" table:formula="of:=+[$'TERREN Y OBR CIV'.C8]" office:value-type="string" office:string-value="kg" calcext:value-type="string">
            <text:p>kg</text:p>
          </table:table-cell>
          <table:table-cell table:style-name="ce350" table:formula="of:=+[$'TERREN Y OBR CIV'.D8]" office:value-type="float" office:value="22" calcext:value-type="float">
            <text:p>22</text:p>
          </table:table-cell>
          <table:table-cell table:style-name="ce357" table:formula="of:=+[.B13]" office:value-type="float" office:value="110" calcext:value-type="float">
            <text:p>110.00</text:p>
          </table:table-cell>
          <table:table-cell table:style-name="ce360" table:formula="of:=+[.K13]" office:value-type="float" office:value="110" calcext:value-type="float">
            <text:p>110.00</text:p>
          </table:table-cell>
          <table:table-cell table:style-name="ce374"/>
          <table:table-cell table:style-name="ce372"/>
          <table:table-cell table:style-name="ce372" table:formula="of:=IF(SUM([.M13:.N13])&gt;0;SUM([.M13:.N13]);&quot;&quot;)">
            <text:p/>
          </table:table-cell>
          <table:table-cell table:number-columns-repeated="242"/>
        </table:table-row>
        <table:table-row table:style-name="ro21">
          <table:table-cell table:style-name="ce306" table:formula="of:=+[$'TERREN Y OBR CIV'.B9]" office:value-type="string" office:string-value="Clavos para calamina" calcext:value-type="string">
            <text:p>Clavos para calamina</text:p>
          </table:table-cell>
          <table:table-cell table:style-name="ce315" table:formula="of:=+[$'TERREN Y OBR CIV'.F9]" office:value-type="float" office:value="297" calcext:value-type="float">
            <text:p>297.00</text:p>
          </table:table-cell>
          <table:table-cell table:style-name="ce325"/>
          <table:table-cell table:style-name="ce325" table:formula="of:=+[.B14]" office:value-type="float" office:value="297" calcext:value-type="float">
            <text:p>297.00</text:p>
          </table:table-cell>
          <table:table-cell table:style-name="ce268" office:value-type="string" calcext:value-type="string">
            <text:p>III. GASTOS GENERALES ( 6.0 % )IF</text:p>
          </table:table-cell>
          <table:table-cell table:style-name="ce263" table:formula="of:=+[.B66]" office:value-type="float" office:value="8435.07" calcext:value-type="float">
            <text:p><text:s/>8,435.07 </text:p>
          </table:table-cell>
          <table:table-cell/>
          <table:table-cell table:style-name="ce344" table:formula="of:=+[$'TERREN Y OBR CIV'.B9]" office:value-type="string" office:string-value="Clavos para calamina" calcext:value-type="string">
            <text:p>Clavos para calamina</text:p>
          </table:table-cell>
          <table:table-cell table:style-name="ce350" table:formula="of:=+[$'TERREN Y OBR CIV'.C9]" office:value-type="string" office:string-value="kg" calcext:value-type="string">
            <text:p>kg</text:p>
          </table:table-cell>
          <table:table-cell table:style-name="ce350" table:formula="of:=+[$'TERREN Y OBR CIV'.D9]" office:value-type="float" office:value="33" calcext:value-type="float">
            <text:p>33</text:p>
          </table:table-cell>
          <table:table-cell table:style-name="ce357" table:formula="of:=+[.B14]" office:value-type="float" office:value="297" calcext:value-type="float">
            <text:p>297.00</text:p>
          </table:table-cell>
          <table:table-cell table:style-name="ce360" table:formula="of:=+[.K14]" office:value-type="float" office:value="297" calcext:value-type="float">
            <text:p>297.00</text:p>
          </table:table-cell>
          <table:table-cell table:style-name="ce374"/>
          <table:table-cell table:style-name="ce372"/>
          <table:table-cell table:style-name="ce372" table:formula="of:=IF(SUM([.M14:.N14])&gt;0;SUM([.M14:.N14]);&quot;&quot;)">
            <text:p/>
          </table:table-cell>
          <table:table-cell table:number-columns-repeated="242"/>
        </table:table-row>
        <table:table-row table:style-name="ro21">
          <table:table-cell table:style-name="ce306" table:formula="of:=+[$'TERREN Y OBR CIV'.B10]" office:value-type="string" office:string-value="Adobe 0.40x0.25x0.18m" calcext:value-type="string">
            <text:p>Adobe 0.40x0.25x0.18m</text:p>
          </table:table-cell>
          <table:table-cell table:style-name="ce315" table:formula="of:=+[$'TERREN Y OBR CIV'.F10]" office:value-type="float" office:value="8250" calcext:value-type="float">
            <text:p>8250.00</text:p>
          </table:table-cell>
          <table:table-cell table:style-name="ce325" table:formula="of:=+[.B15]" office:value-type="float" office:value="8250" calcext:value-type="float">
            <text:p>8,250.00</text:p>
          </table:table-cell>
          <table:table-cell table:style-name="ce325"/>
          <table:table-cell table:style-name="ce268" office:value-type="string" calcext:value-type="string">
            <text:p>IV. GASTOS DE SUPERVISION (3.%) IF</text:p>
          </table:table-cell>
          <table:table-cell table:style-name="ce263" table:formula="of:=+[.B67]" office:value-type="float" office:value="4217.535" calcext:value-type="float">
            <text:p><text:s/>4,217.54 </text:p>
          </table:table-cell>
          <table:table-cell/>
          <table:table-cell table:style-name="ce344" table:formula="of:=+[$'TERREN Y OBR CIV'.B10]" office:value-type="string" office:string-value="Adobe 0.40x0.25x0.18m" calcext:value-type="string">
            <text:p>Adobe 0.40x0.25x0.18m</text:p>
          </table:table-cell>
          <table:table-cell table:style-name="ce350" table:formula="of:=+[$'TERREN Y OBR CIV'.C10]" office:value-type="string" office:string-value="und" calcext:value-type="string">
            <text:p>und</text:p>
          </table:table-cell>
          <table:table-cell table:style-name="ce350" table:formula="of:=+[$'TERREN Y OBR CIV'.D10]" office:value-type="float" office:value="16500" calcext:value-type="float">
            <text:p>16500</text:p>
          </table:table-cell>
          <table:table-cell table:style-name="ce357" table:formula="of:=+[.B15]" office:value-type="float" office:value="8250" calcext:value-type="float">
            <text:p>8,250.00</text:p>
          </table:table-cell>
          <table:table-cell table:style-name="ce360"/>
          <table:table-cell table:style-name="ce374"/>
          <table:table-cell table:style-name="ce372" table:formula="of:=+[.K15]" office:value-type="float" office:value="8250" calcext:value-type="float">
            <text:p>8,250.00</text:p>
          </table:table-cell>
          <table:table-cell table:style-name="ce372" table:formula="of:=IF(SUM([.M15:.N15])&gt;0;SUM([.M15:.N15]);&quot;&quot;)" office:value-type="float" office:value="8250" calcext:value-type="float">
            <text:p>8,250.00</text:p>
          </table:table-cell>
          <table:table-cell table:number-columns-repeated="242"/>
        </table:table-row>
        <table:table-row table:style-name="ro21">
          <table:table-cell table:style-name="ce306" table:formula="of:=+[$'TERREN Y OBR CIV'.B11]" office:value-type="string" office:string-value="Vigas 3&quot;x3&quot;x10'" calcext:value-type="string">
            <text:p>Vigas 3"x3"x10'</text:p>
          </table:table-cell>
          <table:table-cell table:style-name="ce315" table:formula="of:=+[$'TERREN Y OBR CIV'.F11]" office:value-type="float" office:value="3300" calcext:value-type="float">
            <text:p>3300.00</text:p>
          </table:table-cell>
          <table:table-cell table:style-name="ce325"/>
          <table:table-cell table:style-name="ce325" table:formula="of:=+[.B16]" office:value-type="float" office:value="3300" calcext:value-type="float">
            <text:p>3,300.00</text:p>
          </table:table-cell>
          <table:table-cell table:style-name="ce268" office:value-type="string" calcext:value-type="string">
            <text:p>TOTAL INVERSIÒN</text:p>
          </table:table-cell>
          <table:table-cell table:style-name="ce263" table:formula="of:=[.F14]+[.F13]+[.F6]+[.F15]" office:value-type="float" office:value="157481.215045237" calcext:value-type="float">
            <text:p><text:s/>157,481.22 </text:p>
          </table:table-cell>
          <table:table-cell/>
          <table:table-cell table:style-name="ce344" table:formula="of:=+[$'TERREN Y OBR CIV'.B11]" office:value-type="string" office:string-value="Vigas 3&quot;x3&quot;x10'" calcext:value-type="string">
            <text:p>Vigas 3"x3"x10'</text:p>
          </table:table-cell>
          <table:table-cell table:style-name="ce350" table:formula="of:=+[$'TERREN Y OBR CIV'.C11]" office:value-type="string" office:string-value="und" calcext:value-type="string">
            <text:p>und</text:p>
          </table:table-cell>
          <table:table-cell table:style-name="ce350" table:formula="of:=+[$'TERREN Y OBR CIV'.D11]" office:value-type="float" office:value="220" calcext:value-type="float">
            <text:p>220</text:p>
          </table:table-cell>
          <table:table-cell table:style-name="ce357" table:formula="of:=+[.B16]" office:value-type="float" office:value="3300" calcext:value-type="float">
            <text:p>3,300.00</text:p>
          </table:table-cell>
          <table:table-cell table:style-name="ce360" table:formula="of:=+[.K16]" office:value-type="float" office:value="3300" calcext:value-type="float">
            <text:p>3,300.00</text:p>
          </table:table-cell>
          <table:table-cell table:style-name="ce374"/>
          <table:table-cell table:style-name="ce372"/>
          <table:table-cell table:style-name="ce372" table:formula="of:=IF(SUM([.M16:.N16])&gt;0;SUM([.M16:.N16]);&quot;&quot;)">
            <text:p/>
          </table:table-cell>
          <table:table-cell table:number-columns-repeated="242"/>
        </table:table-row>
        <table:table-row table:style-name="ro21">
          <table:table-cell table:style-name="ce306" table:formula="of:=+[$'TERREN Y OBR CIV'.B12]" office:value-type="string" office:string-value="Listones  2&quot;x3&quot;x10'" calcext:value-type="string">
            <text:p>Listones <text:s/>2"x3"x10'</text:p>
          </table:table-cell>
          <table:table-cell table:style-name="ce315" table:formula="of:=+[$'TERREN Y OBR CIV'.F12]" office:value-type="float" office:value="3300" calcext:value-type="float">
            <text:p>3300.00</text:p>
          </table:table-cell>
          <table:table-cell table:style-name="ce325"/>
          <table:table-cell table:style-name="ce325" table:formula="of:=+[.B17]" office:value-type="float" office:value="3300" calcext:value-type="float">
            <text:p>3,300.00</text:p>
          </table:table-cell>
          <table:table-cell/>
          <table:table-cell table:style-name="ce336" table:formula="of:=+[.B68]" office:value-type="float" office:value="157481.215045237" calcext:value-type="float">
            <text:p>157,481.22</text:p>
          </table:table-cell>
          <table:table-cell/>
          <table:table-cell table:style-name="ce344" table:formula="of:=+[$'TERREN Y OBR CIV'.B12]" office:value-type="string" office:string-value="Listones  2&quot;x3&quot;x10'" calcext:value-type="string">
            <text:p>Listones <text:s/>2"x3"x10'</text:p>
          </table:table-cell>
          <table:table-cell table:style-name="ce350" table:formula="of:=+[$'TERREN Y OBR CIV'.C12]" office:value-type="string" office:string-value="und" calcext:value-type="string">
            <text:p>und</text:p>
          </table:table-cell>
          <table:table-cell table:style-name="ce350" table:formula="of:=+[$'TERREN Y OBR CIV'.D12]" office:value-type="float" office:value="330" calcext:value-type="float">
            <text:p>330</text:p>
          </table:table-cell>
          <table:table-cell table:style-name="ce357" table:formula="of:=+[.B17]" office:value-type="float" office:value="3300" calcext:value-type="float">
            <text:p>3,300.00</text:p>
          </table:table-cell>
          <table:table-cell table:style-name="ce360" table:formula="of:=[.K17]" office:value-type="float" office:value="3300" calcext:value-type="float">
            <text:p>3,300.00</text:p>
          </table:table-cell>
          <table:table-cell table:style-name="ce374"/>
          <table:table-cell table:style-name="ce372"/>
          <table:table-cell table:style-name="ce372" table:formula="of:=IF(SUM([.M17:.N17])&gt;0;SUM([.M17:.N17]);&quot;&quot;)">
            <text:p/>
          </table:table-cell>
          <table:table-cell table:number-columns-repeated="242"/>
        </table:table-row>
        <table:table-row table:style-name="ro21">
          <table:table-cell table:style-name="ce306" table:formula="of:=+[$'TERREN Y OBR CIV'.B13]" office:value-type="string" office:string-value="Vigas dintel  3&quot;x4&quot;x10'" calcext:value-type="string">
            <text:p>Vigas dintel <text:s/>3"x4"x10'</text:p>
          </table:table-cell>
          <table:table-cell table:style-name="ce315" table:formula="of:=+[$'TERREN Y OBR CIV'.F13]" office:value-type="float" office:value="1980" calcext:value-type="float">
            <text:p>1980.00</text:p>
          </table:table-cell>
          <table:table-cell table:style-name="ce325"/>
          <table:table-cell table:style-name="ce325" table:formula="of:=+[.B18]" office:value-type="float" office:value="1980" calcext:value-type="float">
            <text:p>1,980.00</text:p>
          </table:table-cell>
          <table:table-cell/>
          <table:table-cell table:style-name="ce337" table:formula="of:=+[.F17]-[.F16]" office:value-type="float" office:value="0" calcext:value-type="float">
            <text:p><text:s/>- <text:s text:c="2"/></text:p>
          </table:table-cell>
          <table:table-cell/>
          <table:table-cell table:style-name="ce344" table:formula="of:=+[$'TERREN Y OBR CIV'.B13]" office:value-type="string" office:string-value="Vigas dintel  3&quot;x4&quot;x10'" calcext:value-type="string">
            <text:p>Vigas dintel <text:s/>3"x4"x10'</text:p>
          </table:table-cell>
          <table:table-cell table:style-name="ce350" table:formula="of:=+[$'TERREN Y OBR CIV'.C13]" office:value-type="string" office:string-value="und" calcext:value-type="string">
            <text:p>und</text:p>
          </table:table-cell>
          <table:table-cell table:style-name="ce350" table:formula="of:=+[$'TERREN Y OBR CIV'.D13]" office:value-type="float" office:value="110" calcext:value-type="float">
            <text:p>110</text:p>
          </table:table-cell>
          <table:table-cell table:style-name="ce357" table:formula="of:=+[.B18]" office:value-type="float" office:value="1980" calcext:value-type="float">
            <text:p>1,980.00</text:p>
          </table:table-cell>
          <table:table-cell table:style-name="ce360" table:formula="of:=+[.K18]" office:value-type="float" office:value="1980" calcext:value-type="float">
            <text:p>1,980.00</text:p>
          </table:table-cell>
          <table:table-cell table:style-name="ce374"/>
          <table:table-cell table:style-name="ce372"/>
          <table:table-cell table:style-name="ce372" table:formula="of:=IF(SUM([.M18:.N18])&gt;0;SUM([.M18:.N18]);&quot;&quot;)">
            <text:p/>
          </table:table-cell>
          <table:table-cell table:number-columns-repeated="242"/>
        </table:table-row>
        <table:table-row table:style-name="ro21">
          <table:table-cell table:style-name="ce306" table:formula="of:=+[$'TERREN Y OBR CIV'.B14]" office:value-type="string" office:string-value="Madera eucalipto rollizo 6&quot;x5m" calcext:value-type="string">
            <text:p>Madera eucalipto rollizo 6"x5m</text:p>
          </table:table-cell>
          <table:table-cell table:style-name="ce315" table:formula="of:=+[$'TERREN Y OBR CIV'.F14]" office:value-type="float" office:value="1650" calcext:value-type="float">
            <text:p>1650.00</text:p>
          </table:table-cell>
          <table:table-cell table:style-name="ce325" table:formula="of:=+[.B19]" office:value-type="float" office:value="1650" calcext:value-type="float">
            <text:p>1,650.00</text:p>
          </table:table-cell>
          <table:table-cell table:style-name="ce325"/>
          <table:table-cell table:style-name="ce333"/>
          <table:table-cell table:number-columns-repeated="2"/>
          <table:table-cell table:style-name="ce344" table:formula="of:=+[$'TERREN Y OBR CIV'.B14]" office:value-type="string" office:string-value="Madera eucalipto rollizo 6&quot;x5m" calcext:value-type="string">
            <text:p>Madera eucalipto rollizo 6"x5m</text:p>
          </table:table-cell>
          <table:table-cell table:style-name="ce350" table:formula="of:=+[$'TERREN Y OBR CIV'.C14]" office:value-type="string" office:string-value="und" calcext:value-type="string">
            <text:p>und</text:p>
          </table:table-cell>
          <table:table-cell table:style-name="ce350" table:formula="of:=+[$'TERREN Y OBR CIV'.D14]" office:value-type="float" office:value="33" calcext:value-type="float">
            <text:p>33</text:p>
          </table:table-cell>
          <table:table-cell table:style-name="ce357" table:formula="of:=+[.B19]" office:value-type="float" office:value="1650" calcext:value-type="float">
            <text:p>1,650.00</text:p>
          </table:table-cell>
          <table:table-cell table:style-name="ce360"/>
          <table:table-cell table:style-name="ce374"/>
          <table:table-cell table:style-name="ce372" table:formula="of:=+[.K19]" office:value-type="float" office:value="1650" calcext:value-type="float">
            <text:p>1,650.00</text:p>
          </table:table-cell>
          <table:table-cell table:style-name="ce372" table:formula="of:=IF(SUM([.M19:.N19])&gt;0;SUM([.M19:.N19]);&quot;&quot;)" office:value-type="float" office:value="1650" calcext:value-type="float">
            <text:p>1,650.00</text:p>
          </table:table-cell>
          <table:table-cell table:number-columns-repeated="242"/>
        </table:table-row>
        <table:table-row table:style-name="ro21">
          <table:table-cell table:style-name="ce306" table:formula="of:=+[$'TERREN Y OBR CIV'.B15]" office:value-type="string" office:string-value="Malla revestido venilo color verde  3/4x3/4&quot; calib 1 mm x30 m" calcext:value-type="string">
            <text:p>Malla revestido venilo color verde <text:s/>3/4x3/4" calib 1 mm x30 m</text:p>
          </table:table-cell>
          <table:table-cell table:style-name="ce315" table:formula="of:=+[$'TERREN Y OBR CIV'.F15]" office:value-type="float" office:value="4070" calcext:value-type="float">
            <text:p>4070.00</text:p>
          </table:table-cell>
          <table:table-cell table:style-name="ce325"/>
          <table:table-cell table:style-name="ce325" table:formula="of:=+[.B20]" office:value-type="float" office:value="4070" calcext:value-type="float">
            <text:p>4,070.00</text:p>
          </table:table-cell>
          <table:table-cell table:style-name="ce333"/>
          <table:table-cell table:style-name="ce338"/>
          <table:table-cell/>
          <table:table-cell table:style-name="ce344" table:formula="of:=+[$'TERREN Y OBR CIV'.B15]" office:value-type="string" office:string-value="Malla revestido venilo color verde  3/4x3/4&quot; calib 1 mm x30 m" calcext:value-type="string">
            <text:p>Malla revestido venilo color verde <text:s/>3/4x3/4" calib 1 mm x30 m</text:p>
          </table:table-cell>
          <table:table-cell table:style-name="ce350" table:formula="of:=+[$'TERREN Y OBR CIV'.C15]" office:value-type="string" office:string-value="roll" calcext:value-type="string">
            <text:p>roll</text:p>
          </table:table-cell>
          <table:table-cell table:style-name="ce350" table:formula="of:=+[$'TERREN Y OBR CIV'.D15]" office:value-type="float" office:value="22" calcext:value-type="float">
            <text:p>22</text:p>
          </table:table-cell>
          <table:table-cell table:style-name="ce357" table:formula="of:=+[.B20]" office:value-type="float" office:value="4070" calcext:value-type="float">
            <text:p>4,070.00</text:p>
          </table:table-cell>
          <table:table-cell table:style-name="ce360" table:formula="of:=[.K20]" office:value-type="float" office:value="4070" calcext:value-type="float">
            <text:p>4,070.00</text:p>
          </table:table-cell>
          <table:table-cell table:style-name="ce374"/>
          <table:table-cell table:style-name="ce372"/>
          <table:table-cell table:style-name="ce372" table:formula="of:=IF(SUM([.M20:.N20])&gt;0;SUM([.M20:.N20]);&quot;&quot;)">
            <text:p/>
          </table:table-cell>
          <table:table-cell table:number-columns-repeated="242"/>
        </table:table-row>
        <table:table-row table:style-name="ro21">
          <table:table-cell table:style-name="ce306" table:formula="of:=+[$'TERREN Y OBR CIV'.B16]" office:value-type="string" office:string-value="Ventana V1  (1.00x0.50)" calcext:value-type="string">
            <text:p>Ventana V1 <text:s/>(1.00x0.50)</text:p>
          </table:table-cell>
          <table:table-cell table:style-name="ce315" table:formula="of:=+[$'TERREN Y OBR CIV'.F16]" office:value-type="float" office:value="1320" calcext:value-type="float">
            <text:p>1320.00</text:p>
          </table:table-cell>
          <table:table-cell table:style-name="ce325"/>
          <table:table-cell table:style-name="ce325" table:formula="of:=+[.B21]" office:value-type="float" office:value="1320" calcext:value-type="float">
            <text:p>1,320.00</text:p>
          </table:table-cell>
          <table:table-cell table:style-name="ce333"/>
          <table:table-cell table:number-columns-repeated="2"/>
          <table:table-cell table:style-name="ce344" table:formula="of:=+[$'TERREN Y OBR CIV'.B16]" office:value-type="string" office:string-value="Ventana V1  (1.00x0.50)" calcext:value-type="string">
            <text:p>Ventana V1 <text:s/>(1.00x0.50)</text:p>
          </table:table-cell>
          <table:table-cell table:style-name="ce350" table:formula="of:=+[$'TERREN Y OBR CIV'.C16]" office:value-type="string" office:string-value="und" calcext:value-type="string">
            <text:p>und</text:p>
          </table:table-cell>
          <table:table-cell table:style-name="ce350" table:formula="of:=+[$'TERREN Y OBR CIV'.D16]" office:value-type="float" office:value="66" calcext:value-type="float">
            <text:p>66</text:p>
          </table:table-cell>
          <table:table-cell table:style-name="ce357" table:formula="of:=+[.B21]" office:value-type="float" office:value="1320" calcext:value-type="float">
            <text:p>1,320.00</text:p>
          </table:table-cell>
          <table:table-cell table:style-name="ce360" table:formula="of:=+[.K21]" office:value-type="float" office:value="1320" calcext:value-type="float">
            <text:p>1,320.00</text:p>
          </table:table-cell>
          <table:table-cell table:style-name="ce374"/>
          <table:table-cell table:style-name="ce372"/>
          <table:table-cell table:style-name="ce372" table:formula="of:=IF(SUM([.M21:.N21])&gt;0;SUM([.M21:.N21]);&quot;&quot;)">
            <text:p/>
          </table:table-cell>
          <table:table-cell table:number-columns-repeated="242"/>
        </table:table-row>
        <table:table-row table:style-name="ro21">
          <table:table-cell table:style-name="ce306" table:formula="of:=+[$'TERREN Y OBR CIV'.B17]" office:value-type="string" office:string-value="Alambre N° 16" calcext:value-type="string">
            <text:p>Alambre N° 16</text:p>
          </table:table-cell>
          <table:table-cell table:style-name="ce315" table:formula="of:=+[$'TERREN Y OBR CIV'.F17]" office:value-type="float" office:value="275" calcext:value-type="float">
            <text:p>275.00</text:p>
          </table:table-cell>
          <table:table-cell table:style-name="ce325"/>
          <table:table-cell table:style-name="ce325" table:formula="of:=+[.B22]" office:value-type="float" office:value="275" calcext:value-type="float">
            <text:p>275.00</text:p>
          </table:table-cell>
          <table:table-cell table:number-columns-repeated="3"/>
          <table:table-cell table:style-name="ce344" table:formula="of:=+[$'TERREN Y OBR CIV'.B17]" office:value-type="string" office:string-value="Alambre N° 16" calcext:value-type="string">
            <text:p>Alambre N° 16</text:p>
          </table:table-cell>
          <table:table-cell table:style-name="ce350" table:formula="of:=+[$'TERREN Y OBR CIV'.C17]" office:value-type="string" office:string-value="und" calcext:value-type="string">
            <text:p>und</text:p>
          </table:table-cell>
          <table:table-cell table:style-name="ce350" table:formula="of:=+[$'TERREN Y OBR CIV'.D17]" office:value-type="float" office:value="55" calcext:value-type="float">
            <text:p>55</text:p>
          </table:table-cell>
          <table:table-cell table:style-name="ce357" table:formula="of:=+[.B22]" office:value-type="float" office:value="275" calcext:value-type="float">
            <text:p>275.00</text:p>
          </table:table-cell>
          <table:table-cell table:style-name="ce360" table:formula="of:=+[.K22]" office:value-type="float" office:value="275" calcext:value-type="float">
            <text:p>275.00</text:p>
          </table:table-cell>
          <table:table-cell table:style-name="ce374"/>
          <table:table-cell table:style-name="ce372"/>
          <table:table-cell table:style-name="ce372" table:formula="of:=IF(SUM([.M22:.N22])&gt;0;SUM([.M22:.N22]);&quot;&quot;)">
            <text:p/>
          </table:table-cell>
          <table:table-cell table:number-columns-repeated="242"/>
        </table:table-row>
        <table:table-row table:style-name="ro21">
          <table:table-cell table:style-name="ce306" table:formula="of:=+[$'TERREN Y OBR CIV'.B18]" office:value-type="string" office:string-value="Puerta madera y calamina P1 (1.60x2.25)" calcext:value-type="string">
            <text:p>Puerta madera y calamina P1 (1.60x2.25)</text:p>
          </table:table-cell>
          <table:table-cell table:style-name="ce315" table:formula="of:=+[$'TERREN Y OBR CIV'.F18]" office:value-type="float" office:value="880" calcext:value-type="float">
            <text:p>880.00</text:p>
          </table:table-cell>
          <table:table-cell table:style-name="ce325"/>
          <table:table-cell table:style-name="ce325" table:formula="of:=+[.B23]" office:value-type="float" office:value="880" calcext:value-type="float">
            <text:p>880.00</text:p>
          </table:table-cell>
          <table:table-cell table:number-columns-repeated="3"/>
          <table:table-cell table:style-name="ce344" table:formula="of:=+[$'TERREN Y OBR CIV'.B18]" office:value-type="string" office:string-value="Puerta madera y calamina P1 (1.60x2.25)" calcext:value-type="string">
            <text:p>Puerta madera y calamina P1 (1.60x2.25)</text:p>
          </table:table-cell>
          <table:table-cell table:style-name="ce350" table:formula="of:=+[$'TERREN Y OBR CIV'.C18]" office:value-type="string" office:string-value="und" calcext:value-type="string">
            <text:p>und</text:p>
          </table:table-cell>
          <table:table-cell table:style-name="ce350" table:formula="of:=+[$'TERREN Y OBR CIV'.D18]" office:value-type="float" office:value="11" calcext:value-type="float">
            <text:p>11</text:p>
          </table:table-cell>
          <table:table-cell table:style-name="ce357" table:formula="of:=+[.B23]" office:value-type="float" office:value="880" calcext:value-type="float">
            <text:p>880.00</text:p>
          </table:table-cell>
          <table:table-cell table:style-name="ce360" table:formula="of:=+[.K23]" office:value-type="float" office:value="880" calcext:value-type="float">
            <text:p>880.00</text:p>
          </table:table-cell>
          <table:table-cell table:style-name="ce374"/>
          <table:table-cell table:style-name="ce372"/>
          <table:table-cell table:style-name="ce372" table:formula="of:=IF(SUM([.M23:.N23])&gt;0;SUM([.M23:.N23]);&quot;&quot;)">
            <text:p/>
          </table:table-cell>
          <table:table-cell office:value-type="float" office:value="595.959932144191" calcext:value-type="float">
            <text:p>595.959932144191</text:p>
          </table:table-cell>
          <table:table-cell table:number-columns-repeated="241"/>
        </table:table-row>
        <table:table-row table:style-name="ro21">
          <table:table-cell table:style-name="ce306" table:formula="of:=+[$'TERREN Y OBR CIV'.B19]" office:value-type="string" office:string-value="Calamina de 0.22 mm de 3.60X 0.8 m" calcext:value-type="string">
            <text:p>Calamina de 0.22 mm de 3.60X 0.8 m</text:p>
          </table:table-cell>
          <table:table-cell table:style-name="ce315" table:formula="of:=+[$'TERREN Y OBR CIV'.F19]" office:value-type="float" office:value="6578" calcext:value-type="float">
            <text:p>6578.00</text:p>
          </table:table-cell>
          <table:table-cell table:style-name="ce325"/>
          <table:table-cell table:style-name="ce325" table:formula="of:=+[.B24]" office:value-type="float" office:value="6578" calcext:value-type="float">
            <text:p>6,578.00</text:p>
          </table:table-cell>
          <table:table-cell table:number-columns-repeated="3"/>
          <table:table-cell table:style-name="ce344" table:formula="of:=+[$'TERREN Y OBR CIV'.B19]" office:value-type="string" office:string-value="Calamina de 0.22 mm de 3.60X 0.8 m" calcext:value-type="string">
            <text:p>Calamina de 0.22 mm de 3.60X 0.8 m</text:p>
          </table:table-cell>
          <table:table-cell table:style-name="ce350" table:formula="of:=+[$'TERREN Y OBR CIV'.C19]" office:value-type="string" office:string-value="pln" calcext:value-type="string">
            <text:p>pln</text:p>
          </table:table-cell>
          <table:table-cell table:style-name="ce350" table:formula="of:=+[$'TERREN Y OBR CIV'.D19]" office:value-type="float" office:value="286" calcext:value-type="float">
            <text:p>286</text:p>
          </table:table-cell>
          <table:table-cell table:style-name="ce357" table:formula="of:=+[.B24]" office:value-type="float" office:value="6578" calcext:value-type="float">
            <text:p>6,578.00</text:p>
          </table:table-cell>
          <table:table-cell table:style-name="ce360" table:formula="of:=+[.K24]" office:value-type="float" office:value="6578" calcext:value-type="float">
            <text:p>6,578.00</text:p>
          </table:table-cell>
          <table:table-cell table:style-name="ce374"/>
          <table:table-cell table:style-name="ce372"/>
          <table:table-cell table:style-name="ce372" table:formula="of:=IF(SUM([.M24:.N24])&gt;0;SUM([.M24:.N24]);&quot;&quot;)">
            <text:p/>
          </table:table-cell>
          <table:table-cell table:number-columns-repeated="242"/>
        </table:table-row>
        <table:table-row table:style-name="ro21">
          <table:table-cell table:style-name="ce306" table:formula="of:=+[$'TERREN Y OBR CIV'.B20]" office:value-type="string" office:string-value="Calamina transparente 3.60*0.8 m (Fibra forte)" calcext:value-type="string">
            <text:p>Calamina transparente 3.60*0.8 m (Fibra forte)</text:p>
          </table:table-cell>
          <table:table-cell table:style-name="ce315" table:formula="of:=+[$'TERREN Y OBR CIV'.F20]" office:value-type="float" office:value="1210" calcext:value-type="float">
            <text:p>1210.00</text:p>
          </table:table-cell>
          <table:table-cell table:style-name="ce325"/>
          <table:table-cell table:style-name="ce325" table:formula="of:=+[.B25]" office:value-type="float" office:value="1210" calcext:value-type="float">
            <text:p>1,210.00</text:p>
          </table:table-cell>
          <table:table-cell table:number-columns-repeated="3"/>
          <table:table-cell table:style-name="ce344" table:formula="of:=+[$'TERREN Y OBR CIV'.B20]" office:value-type="string" office:string-value="Calamina transparente 3.60*0.8 m (Fibra forte)" calcext:value-type="string">
            <text:p>Calamina transparente 3.60*0.8 m (Fibra forte)</text:p>
          </table:table-cell>
          <table:table-cell table:style-name="ce350" table:formula="of:=+[$'TERREN Y OBR CIV'.C20]" office:value-type="string" office:string-value="pln" calcext:value-type="string">
            <text:p>pln</text:p>
          </table:table-cell>
          <table:table-cell table:style-name="ce350" table:formula="of:=+[$'TERREN Y OBR CIV'.D20]" office:value-type="float" office:value="22" calcext:value-type="float">
            <text:p>22</text:p>
          </table:table-cell>
          <table:table-cell table:style-name="ce357" table:formula="of:=+[.B25]" office:value-type="float" office:value="1210" calcext:value-type="float">
            <text:p>1,210.00</text:p>
          </table:table-cell>
          <table:table-cell table:style-name="ce360" table:formula="of:=+[.K25]" office:value-type="float" office:value="1210" calcext:value-type="float">
            <text:p>1,210.00</text:p>
          </table:table-cell>
          <table:table-cell table:style-name="ce374"/>
          <table:table-cell table:style-name="ce372"/>
          <table:table-cell table:style-name="ce372" table:formula="of:=IF(SUM([.M25:.N25])&gt;0;SUM([.M25:.N25]);&quot;&quot;)">
            <text:p/>
          </table:table-cell>
          <table:table-cell table:style-name="ce336" table:formula="of:=+[.N23]-[.P23]" office:value-type="float" office:value="-595.959932144191" calcext:value-type="float">
            <text:p>-595.96</text:p>
          </table:table-cell>
          <table:table-cell table:number-columns-repeated="241"/>
        </table:table-row>
        <table:table-row table:style-name="ro21">
          <table:table-cell table:style-name="ce306" table:formula="of:=+[$'TERREN Y OBR CIV'.B21]" office:value-type="string" office:string-value="Tubo PVC diam 1/2&quot; C-10" calcext:value-type="string">
            <text:p>Tubo PVC diam 1/2" C-10</text:p>
          </table:table-cell>
          <table:table-cell table:style-name="ce315" table:formula="of:=+[$'TERREN Y OBR CIV'.F21]" office:value-type="float" office:value="660" calcext:value-type="float">
            <text:p>660.00</text:p>
          </table:table-cell>
          <table:table-cell table:style-name="ce325"/>
          <table:table-cell table:style-name="ce325" table:formula="of:=+[.B26]" office:value-type="float" office:value="660" calcext:value-type="float">
            <text:p>660.00</text:p>
          </table:table-cell>
          <table:table-cell table:number-columns-repeated="3"/>
          <table:table-cell table:style-name="ce344" table:formula="of:=+[$'TERREN Y OBR CIV'.B21]" office:value-type="string" office:string-value="Tubo PVC diam 1/2&quot; C-10" calcext:value-type="string">
            <text:p>Tubo PVC diam 1/2" C-10</text:p>
          </table:table-cell>
          <table:table-cell table:style-name="ce350" table:formula="of:=+[$'TERREN Y OBR CIV'.C21]" office:value-type="string" office:string-value="und" calcext:value-type="string">
            <text:p>und</text:p>
          </table:table-cell>
          <table:table-cell table:style-name="ce350" table:formula="of:=+[$'TERREN Y OBR CIV'.D21]" office:value-type="float" office:value="55" calcext:value-type="float">
            <text:p>55</text:p>
          </table:table-cell>
          <table:table-cell table:style-name="ce357" table:formula="of:=+[.B26]" office:value-type="float" office:value="660" calcext:value-type="float">
            <text:p>660.00</text:p>
          </table:table-cell>
          <table:table-cell table:style-name="ce360" table:formula="of:=+[.K26]" office:value-type="float" office:value="660" calcext:value-type="float">
            <text:p>660.00</text:p>
          </table:table-cell>
          <table:table-cell table:style-name="ce374"/>
          <table:table-cell table:style-name="ce372"/>
          <table:table-cell table:style-name="ce372" table:formula="of:=IF(SUM([.M26:.N26])&gt;0;SUM([.M26:.N26]);&quot;&quot;)">
            <text:p/>
          </table:table-cell>
          <table:table-cell table:number-columns-repeated="242"/>
        </table:table-row>
        <table:table-row table:style-name="ro21">
          <table:table-cell table:style-name="ce306" table:formula="of:=+[$'TERREN Y OBR CIV'.B22]" office:value-type="string" office:string-value="Cinta teflon" calcext:value-type="string">
            <text:p>Cinta teflon</text:p>
          </table:table-cell>
          <table:table-cell table:style-name="ce315" table:formula="of:=+[$'TERREN Y OBR CIV'.F22]" office:value-type="float" office:value="11" calcext:value-type="float">
            <text:p>11.00</text:p>
          </table:table-cell>
          <table:table-cell table:style-name="ce325"/>
          <table:table-cell table:style-name="ce325" table:formula="of:=+[.B27]" office:value-type="float" office:value="11" calcext:value-type="float">
            <text:p>11.00</text:p>
          </table:table-cell>
          <table:table-cell table:number-columns-repeated="3"/>
          <table:table-cell table:style-name="ce344" table:formula="of:=+[$'TERREN Y OBR CIV'.B22]" office:value-type="string" office:string-value="Cinta teflon" calcext:value-type="string">
            <text:p>Cinta teflon</text:p>
          </table:table-cell>
          <table:table-cell table:style-name="ce350" table:formula="of:=+[$'TERREN Y OBR CIV'.C22]" office:value-type="string" office:string-value="und" calcext:value-type="string">
            <text:p>und</text:p>
          </table:table-cell>
          <table:table-cell table:style-name="ce350" table:formula="of:=+[$'TERREN Y OBR CIV'.D22]" office:value-type="float" office:value="11" calcext:value-type="float">
            <text:p>11</text:p>
          </table:table-cell>
          <table:table-cell table:style-name="ce357" table:formula="of:=+[.B27]" office:value-type="float" office:value="11" calcext:value-type="float">
            <text:p>11.00</text:p>
          </table:table-cell>
          <table:table-cell table:style-name="ce360" table:formula="of:=+[.K27]" office:value-type="float" office:value="11" calcext:value-type="float">
            <text:p>11.00</text:p>
          </table:table-cell>
          <table:table-cell table:style-name="ce374"/>
          <table:table-cell table:style-name="ce372"/>
          <table:table-cell table:style-name="ce372" table:formula="of:=IF(SUM([.M27:.N27])&gt;0;SUM([.M27:.N27]);&quot;&quot;)">
            <text:p/>
          </table:table-cell>
          <table:table-cell table:number-columns-repeated="242"/>
        </table:table-row>
        <table:table-row table:style-name="ro21">
          <table:table-cell table:style-name="ce306" table:formula="of:=+[$'TERREN Y OBR CIV'.B23]" office:value-type="string" office:string-value="Pagamento PVC 237 ml" calcext:value-type="string">
            <text:p>Pagamento PVC 237 ml</text:p>
          </table:table-cell>
          <table:table-cell table:style-name="ce315" table:formula="of:=+[$'TERREN Y OBR CIV'.F23]" office:value-type="float" office:value="132" calcext:value-type="float">
            <text:p>132.00</text:p>
          </table:table-cell>
          <table:table-cell table:style-name="ce325"/>
          <table:table-cell table:style-name="ce325" table:formula="of:=+[.B28]" office:value-type="float" office:value="132" calcext:value-type="float">
            <text:p>132.00</text:p>
          </table:table-cell>
          <table:table-cell table:number-columns-repeated="3"/>
          <table:table-cell table:style-name="ce344" table:formula="of:=+[$'TERREN Y OBR CIV'.B23]" office:value-type="string" office:string-value="Pagamento PVC 237 ml" calcext:value-type="string">
            <text:p>Pagamento PVC 237 ml</text:p>
          </table:table-cell>
          <table:table-cell table:style-name="ce350" table:formula="of:=+[$'TERREN Y OBR CIV'.C23]" office:value-type="string" office:string-value="und" calcext:value-type="string">
            <text:p>und</text:p>
          </table:table-cell>
          <table:table-cell table:style-name="ce350" table:formula="of:=+[$'TERREN Y OBR CIV'.D23]" office:value-type="float" office:value="11" calcext:value-type="float">
            <text:p>11</text:p>
          </table:table-cell>
          <table:table-cell table:style-name="ce357" table:formula="of:=+[.B28]" office:value-type="float" office:value="132" calcext:value-type="float">
            <text:p>132.00</text:p>
          </table:table-cell>
          <table:table-cell table:style-name="ce360" table:formula="of:=+[.K28]" office:value-type="float" office:value="132" calcext:value-type="float">
            <text:p>132.00</text:p>
          </table:table-cell>
          <table:table-cell table:style-name="ce374"/>
          <table:table-cell table:style-name="ce372"/>
          <table:table-cell table:style-name="ce372" table:formula="of:=IF(SUM([.M28:.N28])&gt;0;SUM([.M28:.N28]);&quot;&quot;)">
            <text:p/>
          </table:table-cell>
          <table:table-cell table:number-columns-repeated="242"/>
        </table:table-row>
        <table:table-row table:style-name="ro21">
          <table:table-cell table:style-name="ce306" table:formula="of:=+[$'TERREN Y OBR CIV'.B24]" office:value-type="string" office:string-value="Bebedero Automatico " calcext:value-type="string">
            <text:p>Bebedero Automatico </text:p>
          </table:table-cell>
          <table:table-cell table:style-name="ce315" table:formula="of:=+[$'TERREN Y OBR CIV'.F24]" office:value-type="float" office:value="2640" calcext:value-type="float">
            <text:p>2640.00</text:p>
          </table:table-cell>
          <table:table-cell table:style-name="ce325"/>
          <table:table-cell table:style-name="ce325" table:formula="of:=+[.B29]" office:value-type="float" office:value="2640" calcext:value-type="float">
            <text:p>2,640.00</text:p>
          </table:table-cell>
          <table:table-cell table:number-columns-repeated="3"/>
          <table:table-cell table:style-name="ce344" table:formula="of:=+[$'TERREN Y OBR CIV'.B24]" office:value-type="string" office:string-value="Bebedero Automatico " calcext:value-type="string">
            <text:p>Bebedero Automatico </text:p>
          </table:table-cell>
          <table:table-cell table:style-name="ce350" table:formula="of:=+[$'TERREN Y OBR CIV'.C24]" office:value-type="string" office:string-value="und" calcext:value-type="string">
            <text:p>und</text:p>
          </table:table-cell>
          <table:table-cell table:style-name="ce350" table:formula="of:=+[$'TERREN Y OBR CIV'.D24]" office:value-type="float" office:value="440" calcext:value-type="float">
            <text:p>440</text:p>
          </table:table-cell>
          <table:table-cell table:style-name="ce357" table:formula="of:=+[.B29]" office:value-type="float" office:value="2640" calcext:value-type="float">
            <text:p>2,640.00</text:p>
          </table:table-cell>
          <table:table-cell table:style-name="ce360" table:formula="of:=+[.K29]" office:value-type="float" office:value="2640" calcext:value-type="float">
            <text:p>2,640.00</text:p>
          </table:table-cell>
          <table:table-cell table:style-name="ce374"/>
          <table:table-cell table:style-name="ce372"/>
          <table:table-cell table:style-name="ce372" table:formula="of:=IF(SUM([.M29:.N29])&gt;0;SUM([.M29:.N29]);&quot;&quot;)">
            <text:p/>
          </table:table-cell>
          <table:table-cell table:number-columns-repeated="242"/>
        </table:table-row>
        <table:table-row table:style-name="ro21">
          <table:table-cell table:style-name="ce306" table:formula="of:=+[$'TERREN Y OBR CIV'.B25]" office:value-type="string" office:string-value="Cuyes existentes del galpon" calcext:value-type="string">
            <text:p>Cuyes existentes del galpon</text:p>
          </table:table-cell>
          <table:table-cell table:style-name="ce315" table:formula="of:=+[$'TERREN Y OBR CIV'.F25]" office:value-type="float" office:value="14400" calcext:value-type="float">
            <text:p>14400.00</text:p>
          </table:table-cell>
          <table:table-cell table:style-name="ce325" table:formula="of:=+[.B30]" office:value-type="float" office:value="14400" calcext:value-type="float">
            <text:p>14,400.00</text:p>
          </table:table-cell>
          <table:table-cell table:style-name="ce325"/>
          <table:table-cell table:number-columns-repeated="3"/>
          <table:table-cell table:style-name="ce344" table:formula="of:=+[$'TERREN Y OBR CIV'.B25]" office:value-type="string" office:string-value="Cuyes existentes del galpon" calcext:value-type="string">
            <text:p>Cuyes existentes del galpon</text:p>
          </table:table-cell>
          <table:table-cell table:style-name="ce350" table:formula="of:=+[$'TERREN Y OBR CIV'.C25]" office:value-type="string" office:string-value="und" calcext:value-type="string">
            <text:p>und</text:p>
          </table:table-cell>
          <table:table-cell table:style-name="ce350" table:formula="of:=+[$'TERREN Y OBR CIV'.D25]" office:value-type="float" office:value="800" calcext:value-type="float">
            <text:p>800</text:p>
          </table:table-cell>
          <table:table-cell table:style-name="ce357" table:formula="of:=+[.B30]" office:value-type="float" office:value="14400" calcext:value-type="float">
            <text:p>14,400.00</text:p>
          </table:table-cell>
          <table:table-cell table:style-name="ce360"/>
          <table:table-cell table:style-name="ce374"/>
          <table:table-cell table:style-name="ce372" table:formula="of:=+[.K30]" office:value-type="float" office:value="14400" calcext:value-type="float">
            <text:p>14,400.00</text:p>
          </table:table-cell>
          <table:table-cell table:style-name="ce372" table:formula="of:=IF(SUM([.M30:.N30])&gt;0;SUM([.M30:.N30]);&quot;&quot;)" office:value-type="float" office:value="14400" calcext:value-type="float">
            <text:p>14,400.00</text:p>
          </table:table-cell>
          <table:table-cell table:number-columns-repeated="242"/>
        </table:table-row>
        <table:table-row table:style-name="ro21">
          <table:table-cell table:style-name="ce306" table:formula="of:=+[$'TERREN Y OBR CIV'.B26]" office:value-type="string" office:string-value="Operario" calcext:value-type="string">
            <text:p>Operario</text:p>
          </table:table-cell>
          <table:table-cell table:style-name="ce315" table:formula="of:=+[$'TERREN Y OBR CIV'.F26]" office:value-type="float" office:value="4800" calcext:value-type="float">
            <text:p>4800.00</text:p>
          </table:table-cell>
          <table:table-cell table:style-name="ce325"/>
          <table:table-cell table:style-name="ce325" table:formula="of:=+[.B31]" office:value-type="float" office:value="4800" calcext:value-type="float">
            <text:p>4,800.00</text:p>
          </table:table-cell>
          <table:table-cell table:number-columns-repeated="3"/>
          <table:table-cell table:style-name="ce344" table:formula="of:=+[$'TERREN Y OBR CIV'.B26]" office:value-type="string" office:string-value="Operario" calcext:value-type="string">
            <text:p>Operario</text:p>
          </table:table-cell>
          <table:table-cell table:style-name="ce350" table:formula="of:=+[$'TERREN Y OBR CIV'.C26]" office:value-type="string" office:string-value="und" calcext:value-type="string">
            <text:p>und</text:p>
          </table:table-cell>
          <table:table-cell table:style-name="ce350" table:formula="of:=+[$'TERREN Y OBR CIV'.D26]" office:value-type="float" office:value="80" calcext:value-type="float">
            <text:p>80</text:p>
          </table:table-cell>
          <table:table-cell table:style-name="ce357" table:formula="of:=+[.B31]" office:value-type="float" office:value="4800" calcext:value-type="float">
            <text:p>4,800.00</text:p>
          </table:table-cell>
          <table:table-cell table:style-name="ce360" table:formula="of:=+[.K31]" office:value-type="float" office:value="4800" calcext:value-type="float">
            <text:p>4,800.00</text:p>
          </table:table-cell>
          <table:table-cell table:style-name="ce375"/>
          <table:table-cell table:style-name="ce372" table:number-columns-repeated="2"/>
          <table:table-cell table:number-columns-repeated="242"/>
        </table:table-row>
        <table:table-row table:style-name="ro21">
          <table:table-cell table:style-name="ce305" table:formula="of:=+[$'TERREN Y OBR CIV'.B27]" office:value-type="string" office:string-value="III. INSTALACION DE PASTOS" calcext:value-type="string">
            <text:p>III. INSTALACION DE PASTOS</text:p>
          </table:table-cell>
          <table:table-cell table:style-name="ce316" table:formula="of:=SUM([.B33:.B40])" office:value-type="float" office:value="17555.5" calcext:value-type="float">
            <text:p>17555.50</text:p>
          </table:table-cell>
          <table:table-cell table:style-name="ce326" table:formula="of:=SUM([.C33:.C40])" office:value-type="float" office:value="2333.5" calcext:value-type="float">
            <text:p>2,333.50</text:p>
          </table:table-cell>
          <table:table-cell table:style-name="ce326" table:formula="of:=SUM([.D33:.D40])" office:value-type="float" office:value="15222" calcext:value-type="float">
            <text:p>15,222.00</text:p>
          </table:table-cell>
          <table:table-cell table:style-name="ce266" table:number-columns-repeated="3"/>
          <table:table-cell table:style-name="ce343" table:formula="of:=+[.A32]" office:value-type="string" office:string-value="III. INSTALACION DE PASTOS" calcext:value-type="string">
            <text:p>III. INSTALACION DE PASTOS</text:p>
          </table:table-cell>
          <table:table-cell table:style-name="ce343" table:number-columns-repeated="2"/>
          <table:table-cell table:style-name="ce358" table:formula="of:=SUM([.K33:.K40])" office:value-type="float" office:value="17555.5" calcext:value-type="float">
            <text:p>17,555.50</text:p>
          </table:table-cell>
          <table:table-cell table:style-name="ce358" table:formula="of:=SUM([.L33:.L40])" office:value-type="float" office:value="15222" calcext:value-type="float">
            <text:p>15,222.00</text:p>
          </table:table-cell>
          <table:table-cell table:style-name="ce373" table:formula="of:=SUM([.M33:.M40])" office:value-type="float" office:value="0" calcext:value-type="float">
            <text:p>0.00</text:p>
          </table:table-cell>
          <table:table-cell table:style-name="ce373" table:formula="of:=SUM([.N33:.N40])" office:value-type="float" office:value="2333.5" calcext:value-type="float">
            <text:p>2,333.50</text:p>
          </table:table-cell>
          <table:table-cell table:style-name="ce373" table:formula="of:=SUM([.O33:.O40])" office:value-type="float" office:value="2333.5" calcext:value-type="float">
            <text:p>2,333.50</text:p>
          </table:table-cell>
          <table:table-cell table:style-name="ce266" table:number-columns-repeated="16369"/>
        </table:table-row>
        <table:table-row table:style-name="ro21">
          <table:table-cell table:style-name="ce306" table:formula="of:=+[$'TERREN Y OBR CIV'.B28]" office:value-type="string" office:string-value="Manguera  HDP DIAM 1&quot;  X 100 M " calcext:value-type="string">
            <text:p>Manguera <text:s/>HDP DIAM 1" <text:s/>X 100 M </text:p>
          </table:table-cell>
          <table:table-cell table:style-name="ce315" table:formula="of:=+[$'TERREN Y OBR CIV'.F28]" office:value-type="float" office:value="3480" calcext:value-type="float">
            <text:p>3480.00</text:p>
          </table:table-cell>
          <table:table-cell table:style-name="ce325"/>
          <table:table-cell table:style-name="ce325" table:formula="of:=+[.B33]" office:value-type="float" office:value="3480" calcext:value-type="float">
            <text:p>3,480.00</text:p>
          </table:table-cell>
          <table:table-cell table:number-columns-repeated="3"/>
          <table:table-cell table:style-name="ce344" table:formula="of:=+[$'TERREN Y OBR CIV'.B28]" office:value-type="string" office:string-value="Manguera  HDP DIAM 1&quot;  X 100 M " calcext:value-type="string">
            <text:p>Manguera <text:s/>HDP DIAM 1" <text:s/>X 100 M </text:p>
          </table:table-cell>
          <table:table-cell table:style-name="ce351" table:formula="of:=+[$'TERREN Y OBR CIV'.C28]" office:value-type="string" office:string-value="roll" calcext:value-type="string">
            <text:p>roll</text:p>
          </table:table-cell>
          <table:table-cell table:style-name="ce351" table:formula="of:=+[$'TERREN Y OBR CIV'.D28]" office:value-type="float" office:value="29" calcext:value-type="float">
            <text:p>29</text:p>
          </table:table-cell>
          <table:table-cell table:style-name="ce357" table:formula="of:=+[.B33]" office:value-type="float" office:value="3480" calcext:value-type="float">
            <text:p>3,480.00</text:p>
          </table:table-cell>
          <table:table-cell table:style-name="ce360" table:formula="of:=+[.K33]" office:value-type="float" office:value="3480" calcext:value-type="float">
            <text:p>3,480.00</text:p>
          </table:table-cell>
          <table:table-cell table:style-name="ce374"/>
          <table:table-cell table:style-name="ce377"/>
          <table:table-cell table:style-name="ce372" table:formula="of:=IF(SUM([.M33:.N33])&gt;0;SUM([.M33:.N33]);&quot;&quot;)">
            <text:p/>
          </table:table-cell>
          <table:table-cell table:number-columns-repeated="242"/>
        </table:table-row>
        <table:table-row table:style-name="ro21">
          <table:table-cell table:style-name="ce306" table:formula="of:=+[$'TERREN Y OBR CIV'.B29]" office:value-type="string" office:string-value="Aspersor circular ibis 1&quot; para Presion 4 bares" calcext:value-type="string">
            <text:p>Aspersor circular ibis 1" para Presion 4 bares</text:p>
          </table:table-cell>
          <table:table-cell table:style-name="ce315" table:formula="of:=+[$'TERREN Y OBR CIV'.F29]" office:value-type="float" office:value="4060" calcext:value-type="float">
            <text:p>4060.00</text:p>
          </table:table-cell>
          <table:table-cell table:style-name="ce325"/>
          <table:table-cell table:style-name="ce325" table:formula="of:=+[.B34]" office:value-type="float" office:value="4060" calcext:value-type="float">
            <text:p>4,060.00</text:p>
          </table:table-cell>
          <table:table-cell table:number-columns-repeated="3"/>
          <table:table-cell table:style-name="ce344" table:formula="of:=+[$'TERREN Y OBR CIV'.B29]" office:value-type="string" office:string-value="Aspersor circular ibis 1&quot; para Presion 4 bares" calcext:value-type="string">
            <text:p>Aspersor circular ibis 1" para Presion 4 bares</text:p>
          </table:table-cell>
          <table:table-cell table:style-name="ce351" table:formula="of:=+[$'TERREN Y OBR CIV'.C29]" office:value-type="string" office:string-value="und" calcext:value-type="string">
            <text:p>und</text:p>
          </table:table-cell>
          <table:table-cell table:style-name="ce351" table:formula="of:=+[$'TERREN Y OBR CIV'.D29]" office:value-type="float" office:value="29" calcext:value-type="float">
            <text:p>29</text:p>
          </table:table-cell>
          <table:table-cell table:style-name="ce357" table:formula="of:=+[.B34]" office:value-type="float" office:value="4060" calcext:value-type="float">
            <text:p>4,060.00</text:p>
          </table:table-cell>
          <table:table-cell table:style-name="ce360" table:formula="of:=+[.K34]" office:value-type="float" office:value="4060" calcext:value-type="float">
            <text:p>4,060.00</text:p>
          </table:table-cell>
          <table:table-cell table:style-name="ce374"/>
          <table:table-cell table:style-name="ce377"/>
          <table:table-cell table:style-name="ce372" table:formula="of:=IF(SUM([.M34:.N34])&gt;0;SUM([.M34:.N34]);&quot;&quot;)">
            <text:p/>
          </table:table-cell>
          <table:table-cell table:number-columns-repeated="242"/>
        </table:table-row>
        <table:table-row table:style-name="ro21">
          <table:table-cell table:style-name="ce306" table:formula="of:=+[$'TERREN Y OBR CIV'.B30]" office:value-type="string" office:string-value="Semilla de alfalfa Moapa" calcext:value-type="string">
            <text:p>Semilla de alfalfa Moapa</text:p>
          </table:table-cell>
          <table:table-cell table:style-name="ce315" table:formula="of:=+[$'TERREN Y OBR CIV'.F30]" office:value-type="float" office:value="1218" calcext:value-type="float">
            <text:p>1218.00</text:p>
          </table:table-cell>
          <table:table-cell table:style-name="ce325"/>
          <table:table-cell table:style-name="ce325" table:formula="of:=+[.B35]" office:value-type="float" office:value="1218" calcext:value-type="float">
            <text:p>1,218.00</text:p>
          </table:table-cell>
          <table:table-cell table:number-columns-repeated="3"/>
          <table:table-cell table:style-name="ce344" table:formula="of:=+[$'TERREN Y OBR CIV'.B30]" office:value-type="string" office:string-value="Semilla de alfalfa Moapa" calcext:value-type="string">
            <text:p>Semilla de alfalfa Moapa</text:p>
          </table:table-cell>
          <table:table-cell table:style-name="ce351" table:formula="of:=+[$'TERREN Y OBR CIV'.C30]" office:value-type="string" office:string-value="kg" calcext:value-type="string">
            <text:p>kg</text:p>
          </table:table-cell>
          <table:table-cell table:style-name="ce351" table:formula="of:=+[$'TERREN Y OBR CIV'.D30]" office:value-type="float" office:value="29" calcext:value-type="float">
            <text:p>29</text:p>
          </table:table-cell>
          <table:table-cell table:style-name="ce357" table:formula="of:=+[.B35]" office:value-type="float" office:value="1218" calcext:value-type="float">
            <text:p>1,218.00</text:p>
          </table:table-cell>
          <table:table-cell table:style-name="ce360" table:formula="of:=+[.K35]" office:value-type="float" office:value="1218" calcext:value-type="float">
            <text:p>1,218.00</text:p>
          </table:table-cell>
          <table:table-cell table:style-name="ce374"/>
          <table:table-cell table:style-name="ce377"/>
          <table:table-cell table:style-name="ce372" table:formula="of:=IF(SUM([.M35:.N35])&gt;0;SUM([.M35:.N35]);&quot;&quot;)">
            <text:p/>
          </table:table-cell>
          <table:table-cell table:number-columns-repeated="242"/>
        </table:table-row>
        <table:table-row table:style-name="ro21">
          <table:table-cell table:style-name="ce306" table:formula="of:=+[$'TERREN Y OBR CIV'.B31]" office:value-type="string" office:string-value="Guano de corral (saco 50 kg)" calcext:value-type="string">
            <text:p>Guano de corral (saco 50 kg)</text:p>
          </table:table-cell>
          <table:table-cell table:style-name="ce315" table:formula="of:=+[$'TERREN Y OBR CIV'.F31]" office:value-type="float" office:value="2000" calcext:value-type="float">
            <text:p>2000.00</text:p>
          </table:table-cell>
          <table:table-cell table:style-name="ce325" table:formula="of:=+[.B36]" office:value-type="float" office:value="2000" calcext:value-type="float">
            <text:p>2,000.00</text:p>
          </table:table-cell>
          <table:table-cell table:style-name="ce325"/>
          <table:table-cell table:number-columns-repeated="3"/>
          <table:table-cell table:style-name="ce344" table:formula="of:=+[$'TERREN Y OBR CIV'.B31]" office:value-type="string" office:string-value="Guano de corral (saco 50 kg)" calcext:value-type="string">
            <text:p>Guano de corral (saco 50 kg)</text:p>
          </table:table-cell>
          <table:table-cell table:style-name="ce351" table:formula="of:=+[$'TERREN Y OBR CIV'.C31]" office:value-type="string" office:string-value="sac" calcext:value-type="string">
            <text:p>sac</text:p>
          </table:table-cell>
          <table:table-cell table:style-name="ce351" table:formula="of:=+[$'TERREN Y OBR CIV'.D31]" office:value-type="float" office:value="200" calcext:value-type="float">
            <text:p>200</text:p>
          </table:table-cell>
          <table:table-cell table:style-name="ce357" table:formula="of:=+[.B36]" office:value-type="float" office:value="2000" calcext:value-type="float">
            <text:p>2,000.00</text:p>
          </table:table-cell>
          <table:table-cell table:style-name="ce360"/>
          <table:table-cell table:style-name="ce374"/>
          <table:table-cell table:style-name="ce377" table:formula="of:=+[.K36]" office:value-type="float" office:value="2000" calcext:value-type="float">
            <text:p>2,000.00</text:p>
          </table:table-cell>
          <table:table-cell table:style-name="ce372" table:formula="of:=IF(SUM([.M36:.N36])&gt;0;SUM([.M36:.N36]);&quot;&quot;)" office:value-type="float" office:value="2000" calcext:value-type="float">
            <text:p>2,000.00</text:p>
          </table:table-cell>
          <table:table-cell table:number-columns-repeated="242"/>
        </table:table-row>
        <table:table-row table:style-name="ro21">
          <table:table-cell table:style-name="ce306" table:formula="of:=+[$'TERREN Y OBR CIV'.B32]" office:value-type="string" office:string-value="Guano de isla" calcext:value-type="string">
            <text:p>Guano de isla</text:p>
          </table:table-cell>
          <table:table-cell table:style-name="ce315" table:formula="of:=+[$'TERREN Y OBR CIV'.F32]" office:value-type="float" office:value="1595" calcext:value-type="float">
            <text:p>1595.00</text:p>
          </table:table-cell>
          <table:table-cell table:style-name="ce325"/>
          <table:table-cell table:style-name="ce325" table:formula="of:=+[.B37]" office:value-type="float" office:value="1595" calcext:value-type="float">
            <text:p>1,595.00</text:p>
          </table:table-cell>
          <table:table-cell table:number-columns-repeated="3"/>
          <table:table-cell table:style-name="ce344" table:formula="of:=+[$'TERREN Y OBR CIV'.B32]" office:value-type="string" office:string-value="Guano de isla" calcext:value-type="string">
            <text:p>Guano de isla</text:p>
          </table:table-cell>
          <table:table-cell table:style-name="ce351" table:formula="of:=+[$'TERREN Y OBR CIV'.C32]" office:value-type="string" office:string-value="sac" calcext:value-type="string">
            <text:p>sac</text:p>
          </table:table-cell>
          <table:table-cell table:style-name="ce351" table:formula="of:=+[$'TERREN Y OBR CIV'.D32]" office:value-type="float" office:value="29" calcext:value-type="float">
            <text:p>29</text:p>
          </table:table-cell>
          <table:table-cell table:style-name="ce357" table:formula="of:=+[.B37]" office:value-type="float" office:value="1595" calcext:value-type="float">
            <text:p>1,595.00</text:p>
          </table:table-cell>
          <table:table-cell table:style-name="ce360" table:formula="of:=+[.K37]" office:value-type="float" office:value="1595" calcext:value-type="float">
            <text:p>1,595.00</text:p>
          </table:table-cell>
          <table:table-cell table:style-name="ce374"/>
          <table:table-cell table:style-name="ce377"/>
          <table:table-cell table:style-name="ce372" table:formula="of:=IF(SUM([.M37:.N37])&gt;0;SUM([.M37:.N37]);&quot;&quot;)">
            <text:p/>
          </table:table-cell>
          <table:table-cell table:number-columns-repeated="242"/>
        </table:table-row>
        <table:table-row table:style-name="ro21">
          <table:table-cell table:style-name="ce306" table:formula="of:=+[$'TERREN Y OBR CIV'.B33]" office:value-type="string" office:string-value="Inoculante ( sobre de 100 gr)" calcext:value-type="string">
            <text:p>Inoculante ( sobre de 100 gr)</text:p>
          </table:table-cell>
          <table:table-cell table:style-name="ce315" table:formula="of:=+[$'TERREN Y OBR CIV'.F33]" office:value-type="float" office:value="345" calcext:value-type="float">
            <text:p>345.00</text:p>
          </table:table-cell>
          <table:table-cell table:style-name="ce325"/>
          <table:table-cell table:style-name="ce325" table:formula="of:=+[.B38]" office:value-type="float" office:value="345" calcext:value-type="float">
            <text:p>345.00</text:p>
          </table:table-cell>
          <table:table-cell table:number-columns-repeated="3"/>
          <table:table-cell table:style-name="ce344" table:formula="of:=+[$'TERREN Y OBR CIV'.B33]" office:value-type="string" office:string-value="Inoculante ( sobre de 100 gr)" calcext:value-type="string">
            <text:p>Inoculante ( sobre de 100 gr)</text:p>
          </table:table-cell>
          <table:table-cell table:style-name="ce351" table:formula="of:=+[$'TERREN Y OBR CIV'.C33]" office:value-type="string" office:string-value="sbr" calcext:value-type="string">
            <text:p>sbr</text:p>
          </table:table-cell>
          <table:table-cell table:style-name="ce351" table:formula="of:=+[$'TERREN Y OBR CIV'.D33]" office:value-type="float" office:value="15" calcext:value-type="float">
            <text:p>15</text:p>
          </table:table-cell>
          <table:table-cell table:style-name="ce357" table:formula="of:=+[.B38]" office:value-type="float" office:value="345" calcext:value-type="float">
            <text:p>345.00</text:p>
          </table:table-cell>
          <table:table-cell table:style-name="ce360" table:formula="of:=+[.K38]" office:value-type="float" office:value="345" calcext:value-type="float">
            <text:p>345.00</text:p>
          </table:table-cell>
          <table:table-cell table:style-name="ce374"/>
          <table:table-cell table:style-name="ce377"/>
          <table:table-cell table:style-name="ce372" table:formula="of:=IF(SUM([.M38:.N38])&gt;0;SUM([.M38:.N38]);&quot;&quot;)">
            <text:p/>
          </table:table-cell>
          <table:table-cell table:number-columns-repeated="242"/>
        </table:table-row>
        <table:table-row table:style-name="ro21">
          <table:table-cell table:style-name="ce306" table:formula="of:=+[$'TERREN Y OBR CIV'.B34]" office:value-type="string" office:string-value="Alimento concentrado (saco 40 kg)" calcext:value-type="string">
            <text:p>Alimento concentrado (saco 40 kg)</text:p>
          </table:table-cell>
          <table:table-cell table:style-name="ce315" table:formula="of:=+[$'TERREN Y OBR CIV'.F34]" office:value-type="float" office:value="4524" calcext:value-type="float">
            <text:p>4524.00</text:p>
          </table:table-cell>
          <table:table-cell table:style-name="ce325"/>
          <table:table-cell table:style-name="ce325" table:formula="of:=+[.B39]" office:value-type="float" office:value="4524" calcext:value-type="float">
            <text:p>4,524.00</text:p>
          </table:table-cell>
          <table:table-cell table:number-columns-repeated="3"/>
          <table:table-cell table:style-name="ce344" table:formula="of:=+[$'TERREN Y OBR CIV'.B34]" office:value-type="string" office:string-value="Alimento concentrado (saco 40 kg)" calcext:value-type="string">
            <text:p>Alimento concentrado (saco 40 kg)</text:p>
          </table:table-cell>
          <table:table-cell table:style-name="ce351" table:formula="of:=+[$'TERREN Y OBR CIV'.C34]" office:value-type="string" office:string-value="sac" calcext:value-type="string">
            <text:p>sac</text:p>
          </table:table-cell>
          <table:table-cell table:style-name="ce351" table:formula="of:=+[$'TERREN Y OBR CIV'.D34]" office:value-type="float" office:value="58" calcext:value-type="float">
            <text:p>58</text:p>
          </table:table-cell>
          <table:table-cell table:style-name="ce357" table:formula="of:=+[.B39]" office:value-type="float" office:value="4524" calcext:value-type="float">
            <text:p>4,524.00</text:p>
          </table:table-cell>
          <table:table-cell table:style-name="ce360" table:formula="of:=+[.K39]" office:value-type="float" office:value="4524" calcext:value-type="float">
            <text:p>4,524.00</text:p>
          </table:table-cell>
          <table:table-cell table:style-name="ce374"/>
          <table:table-cell table:style-name="ce377"/>
          <table:table-cell table:style-name="ce372" table:formula="of:=IF(SUM([.M39:.N39])&gt;0;SUM([.M39:.N39]);&quot;&quot;)">
            <text:p/>
          </table:table-cell>
          <table:table-cell table:number-columns-repeated="242"/>
        </table:table-row>
        <table:table-row table:style-name="ro21">
          <table:table-cell table:style-name="ce306" table:formula="of:=+[$'TERREN Y OBR CIV'.B35]" office:value-type="string" office:string-value="Semilla de cebada para FVH" calcext:value-type="string">
            <text:p>Semilla de cebada para FVH</text:p>
          </table:table-cell>
          <table:table-cell table:style-name="ce315" table:formula="of:=+[$'TERREN Y OBR CIV'.F35]" office:value-type="float" office:value="333.5" calcext:value-type="float">
            <text:p>333.50</text:p>
          </table:table-cell>
          <table:table-cell table:style-name="ce325" table:formula="of:=+[.B40]" office:value-type="float" office:value="333.5" calcext:value-type="float">
            <text:p>333.50</text:p>
          </table:table-cell>
          <table:table-cell table:style-name="ce325"/>
          <table:table-cell table:number-columns-repeated="3"/>
          <table:table-cell table:style-name="ce344" table:formula="of:=+[$'TERREN Y OBR CIV'.B35]" office:value-type="string" office:string-value="Semilla de cebada para FVH" calcext:value-type="string">
            <text:p>Semilla de cebada para FVH</text:p>
          </table:table-cell>
          <table:table-cell table:style-name="ce351" table:formula="of:=+[$'TERREN Y OBR CIV'.C35]" office:value-type="string" office:string-value="kg" calcext:value-type="string">
            <text:p>kg</text:p>
          </table:table-cell>
          <table:table-cell table:style-name="ce351" table:formula="of:=+[$'TERREN Y OBR CIV'.D35]" office:value-type="float" office:value="145" calcext:value-type="float">
            <text:p>145</text:p>
          </table:table-cell>
          <table:table-cell table:style-name="ce357" table:formula="of:=+[.B40]" office:value-type="float" office:value="333.5" calcext:value-type="float">
            <text:p>333.50</text:p>
          </table:table-cell>
          <table:table-cell table:style-name="ce360"/>
          <table:table-cell table:style-name="ce374"/>
          <table:table-cell table:style-name="ce377" table:formula="of:=+[.K40]" office:value-type="float" office:value="333.5" calcext:value-type="float">
            <text:p>333.50</text:p>
          </table:table-cell>
          <table:table-cell table:style-name="ce372" table:formula="of:=IF(SUM([.M40:.N40])&gt;0;SUM([.M40:.N40]);&quot;&quot;)" office:value-type="float" office:value="333.5" calcext:value-type="float">
            <text:p>333.50</text:p>
          </table:table-cell>
          <table:table-cell table:number-columns-repeated="242"/>
        </table:table-row>
        <table:table-row table:style-name="ro21">
          <table:table-cell table:style-name="ce304" office:value-type="string" calcext:value-type="string">
            <text:p>I.1.2.MAQUINARIA Y EQUIPOS </text:p>
          </table:table-cell>
          <table:table-cell table:style-name="ce313" table:formula="of:=[.B42]+[.B44]" office:value-type="float" office:value="47356" calcext:value-type="float">
            <text:p>47356.00</text:p>
          </table:table-cell>
          <table:table-cell table:style-name="ce323" table:formula="of:=[.C42]" office:value-type="float" office:value="0" calcext:value-type="float">
            <text:p>0.00</text:p>
          </table:table-cell>
          <table:table-cell table:style-name="ce323" table:formula="of:=[.D42]+[.D44]" office:value-type="float" office:value="47356" calcext:value-type="float">
            <text:p>47,356.00</text:p>
          </table:table-cell>
          <table:table-cell table:style-name="ce260"/>
          <table:table-cell table:number-columns-repeated="2"/>
          <table:table-cell table:style-name="ce342" table:formula="of:=+[.A41]" office:value-type="string" office:string-value="I.1.2.MAQUINARIA Y EQUIPOS " calcext:value-type="string">
            <text:p>I.1.2.MAQUINARIA Y EQUIPOS </text:p>
          </table:table-cell>
          <table:table-cell table:style-name="ce342" table:number-columns-repeated="2"/>
          <table:table-cell table:style-name="ce355" table:formula="of:=[.K42]+[.K44]" office:value-type="float" office:value="47356" calcext:value-type="float">
            <text:p>47,356.00</text:p>
          </table:table-cell>
          <table:table-cell table:style-name="ce355" table:formula="of:=[.L42]+[.L44]" office:value-type="float" office:value="47356" calcext:value-type="float">
            <text:p>47,356.00</text:p>
          </table:table-cell>
          <table:table-cell table:style-name="ce355" table:formula="of:=[.M42]+[.M44]" office:value-type="float" office:value="0" calcext:value-type="float">
            <text:p>0.00</text:p>
          </table:table-cell>
          <table:table-cell table:style-name="ce355" table:formula="of:=[.N42]+[.N44]" office:value-type="float" office:value="0" calcext:value-type="float">
            <text:p>0.00</text:p>
          </table:table-cell>
          <table:table-cell table:style-name="ce355" table:formula="of:=[.O42]+[.O44]" office:value-type="float" office:value="0" calcext:value-type="float">
            <text:p>0.00</text:p>
          </table:table-cell>
          <table:table-cell table:number-columns-repeated="242"/>
        </table:table-row>
        <table:table-row table:style-name="ro21">
          <table:table-cell table:style-name="ce305" office:value-type="string" calcext:value-type="string">
            <text:p>Maquinaria y equipo</text:p>
          </table:table-cell>
          <table:table-cell table:style-name="ce316" table:formula="of:=SUM([.B43:.B43])" office:value-type="float" office:value="800" calcext:value-type="float">
            <text:p>800.00</text:p>
          </table:table-cell>
          <table:table-cell table:style-name="ce323" table:formula="of:=SUM([.C43:.C48])" office:value-type="float" office:value="0" calcext:value-type="float">
            <text:p>0.00</text:p>
          </table:table-cell>
          <table:table-cell table:style-name="ce326" table:formula="of:=SUM([.D43:.D43])" office:value-type="float" office:value="800" calcext:value-type="float">
            <text:p>800.00</text:p>
          </table:table-cell>
          <table:table-cell table:style-name="ce260"/>
          <table:table-cell table:style-name="ce339"/>
          <table:table-cell/>
          <table:table-cell table:style-name="ce343" table:formula="of:=+[.A42]" office:value-type="string" office:string-value="Maquinaria y equipo" calcext:value-type="string">
            <text:p>Maquinaria y equipo</text:p>
          </table:table-cell>
          <table:table-cell table:style-name="ce343" table:number-columns-repeated="2"/>
          <table:table-cell table:style-name="ce358" table:formula="of:=SUM([.K43:.K43])" office:value-type="float" office:value="800" calcext:value-type="float">
            <text:p>800.00</text:p>
          </table:table-cell>
          <table:table-cell table:style-name="ce358" table:formula="of:=SUM([.L43:.L43])" office:value-type="float" office:value="800" calcext:value-type="float">
            <text:p>800.00</text:p>
          </table:table-cell>
          <table:table-cell table:style-name="ce358" table:formula="of:=SUM([.M43:.M43])" office:value-type="float" office:value="0" calcext:value-type="float">
            <text:p>0.00</text:p>
          </table:table-cell>
          <table:table-cell table:style-name="ce358" table:formula="of:=SUM([.N43:.N43])" office:value-type="float" office:value="0" calcext:value-type="float">
            <text:p>0.00</text:p>
          </table:table-cell>
          <table:table-cell table:style-name="ce358" table:formula="of:=SUM([.O43:.O43])" office:value-type="float" office:value="0" calcext:value-type="float">
            <text:p>0.00</text:p>
          </table:table-cell>
          <table:table-cell table:number-columns-repeated="242"/>
        </table:table-row>
        <table:table-row table:style-name="ro21">
          <table:table-cell table:style-name="ce306" table:formula="of:=+[$'MUEB, MAQ,EQUIP'.B5]" office:value-type="string" office:string-value="Herramientas Manuales" calcext:value-type="string">
            <text:p>Herramientas Manuales</text:p>
          </table:table-cell>
          <table:table-cell table:style-name="ce317" table:formula="of:=+[$'MUEB, MAQ,EQUIP'.F5]" office:value-type="float" office:value="800" calcext:value-type="float">
            <text:p>800.00</text:p>
          </table:table-cell>
          <table:table-cell table:style-name="ce325"/>
          <table:table-cell table:style-name="ce325" table:formula="of:=[.B43]" office:value-type="float" office:value="800" calcext:value-type="float">
            <text:p>800.00</text:p>
          </table:table-cell>
          <table:table-cell table:style-name="ce260"/>
          <table:table-cell table:number-columns-repeated="2"/>
          <table:table-cell table:style-name="ce344" table:formula="of:=+[$'MUEB, MAQ,EQUIP'.B5]" office:value-type="string" office:string-value="Herramientas Manuales" calcext:value-type="string">
            <text:p>Herramientas Manuales</text:p>
          </table:table-cell>
          <table:table-cell table:style-name="ce351" table:formula="of:=+[$'MUEB, MAQ,EQUIP'.C5]" office:value-type="string" office:string-value="Gbl" calcext:value-type="string">
            <text:p>Gbl</text:p>
          </table:table-cell>
          <table:table-cell table:style-name="ce351" table:formula="of:=+[$'MUEB, MAQ,EQUIP'.D5]" office:value-type="float" office:value="1" calcext:value-type="float">
            <text:p>1</text:p>
          </table:table-cell>
          <table:table-cell table:style-name="ce359" table:formula="of:=+[.B43]" office:value-type="float" office:value="800" calcext:value-type="float">
            <text:p>800.00</text:p>
          </table:table-cell>
          <table:table-cell table:style-name="ce360" table:formula="of:=[.K43]" office:value-type="float" office:value="800" calcext:value-type="float">
            <text:p>800.00</text:p>
          </table:table-cell>
          <table:table-cell table:style-name="ce374"/>
          <table:table-cell table:style-name="ce377"/>
          <table:table-cell table:style-name="ce372" table:formula="of:=IF(SUM([.M43:.N43])&gt;0;SUM([.M43:.N43]);&quot;&quot;)">
            <text:p/>
          </table:table-cell>
          <table:table-cell table:number-columns-repeated="242"/>
        </table:table-row>
        <table:table-row table:style-name="ro21">
          <table:table-cell table:style-name="ce305" table:formula="of:=+[$'MUEB, MAQ,EQUIP'.B6]" office:value-type="string" office:string-value="EQUIPOS" calcext:value-type="string">
            <text:p>EQUIPOS</text:p>
          </table:table-cell>
          <table:table-cell table:style-name="ce316" table:formula="of:=SUM([.B45:.B54])" office:value-type="float" office:value="46556" calcext:value-type="float">
            <text:p>46556.00</text:p>
          </table:table-cell>
          <table:table-cell table:style-name="ce327"/>
          <table:table-cell table:style-name="ce326" table:formula="of:=SUM([.D45:.D54])" office:value-type="float" office:value="46556" calcext:value-type="float">
            <text:p>46,556.00</text:p>
          </table:table-cell>
          <table:table-cell table:style-name="ce264"/>
          <table:table-cell table:style-name="ce266" table:number-columns-repeated="2"/>
          <table:table-cell table:style-name="ce343" table:formula="of:=+[.A44]" office:value-type="string" office:string-value="EQUIPOS" calcext:value-type="string">
            <text:p>EQUIPOS</text:p>
          </table:table-cell>
          <table:table-cell table:style-name="ce343" table:number-columns-repeated="2"/>
          <table:table-cell table:style-name="ce358" table:formula="of:=SUM([.K45:.K54])" office:value-type="float" office:value="46556" calcext:value-type="float">
            <text:p>46,556.00</text:p>
          </table:table-cell>
          <table:table-cell table:style-name="ce358" table:formula="of:=SUM([.L45:.L54])" office:value-type="float" office:value="46556" calcext:value-type="float">
            <text:p>46,556.00</text:p>
          </table:table-cell>
          <table:table-cell table:style-name="ce358" table:formula="of:=SUM([.M45:.M52])" office:value-type="float" office:value="0" calcext:value-type="float">
            <text:p>0.00</text:p>
          </table:table-cell>
          <table:table-cell table:style-name="ce358" table:formula="of:=SUM([.N45:.N52])" office:value-type="float" office:value="0" calcext:value-type="float">
            <text:p>0.00</text:p>
          </table:table-cell>
          <table:table-cell table:style-name="ce358" table:formula="of:=SUM([.O45:.O52])" office:value-type="float" office:value="0" calcext:value-type="float">
            <text:p>0.00</text:p>
          </table:table-cell>
          <table:table-cell table:style-name="ce266" table:number-columns-repeated="16369"/>
        </table:table-row>
        <table:table-row table:style-name="ro21">
          <table:table-cell table:style-name="ce306" table:formula="of:=+[$'MUEB, MAQ,EQUIP'.B7]" office:value-type="string" office:string-value="Jabas Plasticas  para manejo  35*52*36" calcext:value-type="string">
            <text:p>Jabas Plasticas <text:s/>para manejo <text:s/>35*52*36</text:p>
          </table:table-cell>
          <table:table-cell table:style-name="ce317" table:formula="of:=+[$'MUEB, MAQ,EQUIP'.F7]" office:value-type="float" office:value="2970" calcext:value-type="float">
            <text:p>2970.00</text:p>
          </table:table-cell>
          <table:table-cell table:style-name="ce325"/>
          <table:table-cell table:style-name="ce325" table:formula="of:=[.B45]" office:value-type="float" office:value="2970" calcext:value-type="float">
            <text:p>2,970.00</text:p>
          </table:table-cell>
          <table:table-cell table:style-name="ce260"/>
          <table:table-cell table:number-columns-repeated="2"/>
          <table:table-cell table:style-name="ce344" table:formula="of:=+[$'MUEB, MAQ,EQUIP'.B7]" office:value-type="string" office:string-value="Jabas Plasticas  para manejo  35*52*36" calcext:value-type="string">
            <text:p>Jabas Plasticas <text:s/>para manejo <text:s/>35*52*36</text:p>
          </table:table-cell>
          <table:table-cell table:style-name="ce351" table:formula="of:=+[$'MUEB, MAQ,EQUIP'.C7]" office:value-type="string" office:string-value="und" calcext:value-type="string">
            <text:p>und</text:p>
          </table:table-cell>
          <table:table-cell table:style-name="ce351" table:formula="of:=+[$'MUEB, MAQ,EQUIP'.D7]" office:value-type="float" office:value="165" calcext:value-type="float">
            <text:p>165</text:p>
          </table:table-cell>
          <table:table-cell table:style-name="ce359" table:formula="of:=+[.B45]" office:value-type="float" office:value="2970" calcext:value-type="float">
            <text:p>2,970.00</text:p>
          </table:table-cell>
          <table:table-cell table:style-name="ce360" table:formula="of:=[.K45]" office:value-type="float" office:value="2970" calcext:value-type="float">
            <text:p>2,970.00</text:p>
          </table:table-cell>
          <table:table-cell table:style-name="ce374"/>
          <table:table-cell table:style-name="ce377"/>
          <table:table-cell table:style-name="ce372" table:formula="of:=IF(SUM([.M45:.N45])&gt;0;SUM([.M45:.N45]);&quot;&quot;)">
            <text:p/>
          </table:table-cell>
          <table:table-cell table:number-columns-repeated="242"/>
        </table:table-row>
        <table:table-row table:style-name="ro21">
          <table:table-cell table:style-name="ce306" table:formula="of:=+[$'MUEB, MAQ,EQUIP'.B8]" office:value-type="string" office:string-value="Gazaperas galv. para cuyes 38 cm diam 21 cm de altura" calcext:value-type="string">
            <text:p>Gazaperas galv. para cuyes 38 cm diam 21 cm de altura</text:p>
          </table:table-cell>
          <table:table-cell table:style-name="ce317" table:formula="of:=+[$'MUEB, MAQ,EQUIP'.F8]" office:value-type="float" office:value="3630" calcext:value-type="float">
            <text:p>3630.00</text:p>
          </table:table-cell>
          <table:table-cell table:style-name="ce325"/>
          <table:table-cell table:style-name="ce325" table:formula="of:=[.B46]" office:value-type="float" office:value="3630" calcext:value-type="float">
            <text:p>3,630.00</text:p>
          </table:table-cell>
          <table:table-cell table:style-name="ce260"/>
          <table:table-cell table:number-columns-repeated="2"/>
          <table:table-cell table:style-name="ce344" table:formula="of:=+[$'MUEB, MAQ,EQUIP'.B8]" office:value-type="string" office:string-value="Gazaperas galv. para cuyes 38 cm diam 21 cm de altura" calcext:value-type="string">
            <text:p>Gazaperas galv. para cuyes 38 cm diam 21 cm de altura</text:p>
          </table:table-cell>
          <table:table-cell table:style-name="ce351" table:formula="of:=+[$'MUEB, MAQ,EQUIP'.C8]" office:value-type="string" office:string-value="und" calcext:value-type="string">
            <text:p>und</text:p>
          </table:table-cell>
          <table:table-cell table:style-name="ce351" table:formula="of:=+[$'MUEB, MAQ,EQUIP'.D8]" office:value-type="float" office:value="242" calcext:value-type="float">
            <text:p>242</text:p>
          </table:table-cell>
          <table:table-cell table:style-name="ce359" table:formula="of:=+[.B46]" office:value-type="float" office:value="3630" calcext:value-type="float">
            <text:p>3,630.00</text:p>
          </table:table-cell>
          <table:table-cell table:style-name="ce360" table:formula="of:=[.K46]" office:value-type="float" office:value="3630" calcext:value-type="float">
            <text:p>3,630.00</text:p>
          </table:table-cell>
          <table:table-cell table:style-name="ce374"/>
          <table:table-cell table:style-name="ce377"/>
          <table:table-cell table:style-name="ce372" table:formula="of:=IF(SUM([.M46:.N46])&gt;0;SUM([.M46:.N46]);&quot;&quot;)">
            <text:p/>
          </table:table-cell>
          <table:table-cell table:number-columns-repeated="242"/>
        </table:table-row>
        <table:table-row table:style-name="ro21">
          <table:table-cell table:style-name="ce306" table:formula="of:=+[$'MUEB, MAQ,EQUIP'.B9]" office:value-type="string" office:string-value="Comederos de  tipo tolva de aluminio cap.6 kg" calcext:value-type="string">
            <text:p>Comederos de <text:s/>tipo tolva de aluminio cap.6 kg</text:p>
          </table:table-cell>
          <table:table-cell table:style-name="ce317" table:formula="of:=+[$'MUEB, MAQ,EQUIP'.F9]" office:value-type="float" office:value="3388" calcext:value-type="float">
            <text:p>3388.00</text:p>
          </table:table-cell>
          <table:table-cell table:style-name="ce325"/>
          <table:table-cell table:style-name="ce325" table:formula="of:=[.B47]" office:value-type="float" office:value="3388" calcext:value-type="float">
            <text:p>3,388.00</text:p>
          </table:table-cell>
          <table:table-cell table:style-name="ce260"/>
          <table:table-cell table:number-columns-repeated="2"/>
          <table:table-cell table:style-name="ce344" table:formula="of:=+[$'MUEB, MAQ,EQUIP'.B9]" office:value-type="string" office:string-value="Comederos de  tipo tolva de aluminio cap.6 kg" calcext:value-type="string">
            <text:p>Comederos de <text:s/>tipo tolva de aluminio cap.6 kg</text:p>
          </table:table-cell>
          <table:table-cell table:style-name="ce351" table:formula="of:=+[$'MUEB, MAQ,EQUIP'.C9]" office:value-type="string" office:string-value="und" calcext:value-type="string">
            <text:p>und</text:p>
          </table:table-cell>
          <table:table-cell table:style-name="ce351" table:formula="of:=+[$'MUEB, MAQ,EQUIP'.D9]" office:value-type="float" office:value="242" calcext:value-type="float">
            <text:p>242</text:p>
          </table:table-cell>
          <table:table-cell table:style-name="ce359" table:formula="of:=+[.B47]" office:value-type="float" office:value="3388" calcext:value-type="float">
            <text:p>3,388.00</text:p>
          </table:table-cell>
          <table:table-cell table:style-name="ce360" table:formula="of:=[.K47]" office:value-type="float" office:value="3388" calcext:value-type="float">
            <text:p>3,388.00</text:p>
          </table:table-cell>
          <table:table-cell table:style-name="ce374"/>
          <table:table-cell table:style-name="ce377"/>
          <table:table-cell table:style-name="ce372" table:formula="of:=IF(SUM([.M47:.N47])&gt;0;SUM([.M47:.N47]);&quot;&quot;)">
            <text:p/>
          </table:table-cell>
          <table:table-cell table:number-columns-repeated="242"/>
        </table:table-row>
        <table:table-row table:style-name="ro21">
          <table:table-cell table:style-name="ce306" table:formula="of:=+[$'MUEB, MAQ,EQUIP'.B10]" office:value-type="string" office:string-value="Forrajera galvanizada " calcext:value-type="string">
            <text:p>Forrajera galvanizada </text:p>
          </table:table-cell>
          <table:table-cell table:style-name="ce317" table:formula="of:=+[$'MUEB, MAQ,EQUIP'.F10]" office:value-type="float" office:value="3630" calcext:value-type="float">
            <text:p>3630.00</text:p>
          </table:table-cell>
          <table:table-cell table:style-name="ce325"/>
          <table:table-cell table:style-name="ce325" table:formula="of:=[.B48]" office:value-type="float" office:value="3630" calcext:value-type="float">
            <text:p>3,630.00</text:p>
          </table:table-cell>
          <table:table-cell table:style-name="ce260"/>
          <table:table-cell table:number-columns-repeated="2"/>
          <table:table-cell table:style-name="ce344" table:formula="of:=+[$'MUEB, MAQ,EQUIP'.B10]" office:value-type="string" office:string-value="Forrajera galvanizada " calcext:value-type="string">
            <text:p>Forrajera galvanizada </text:p>
          </table:table-cell>
          <table:table-cell table:style-name="ce351" table:formula="of:=+[$'MUEB, MAQ,EQUIP'.C10]" office:value-type="string" office:string-value="und" calcext:value-type="string">
            <text:p>und</text:p>
          </table:table-cell>
          <table:table-cell table:style-name="ce351" table:formula="of:=+[$'MUEB, MAQ,EQUIP'.D10]" office:value-type="float" office:value="242" calcext:value-type="float">
            <text:p>242</text:p>
          </table:table-cell>
          <table:table-cell table:style-name="ce359" table:formula="of:=+[.B48]" office:value-type="float" office:value="3630" calcext:value-type="float">
            <text:p>3,630.00</text:p>
          </table:table-cell>
          <table:table-cell table:style-name="ce360" table:formula="of:=[.K48]" office:value-type="float" office:value="3630" calcext:value-type="float">
            <text:p>3,630.00</text:p>
          </table:table-cell>
          <table:table-cell table:style-name="ce374"/>
          <table:table-cell table:style-name="ce377"/>
          <table:table-cell table:style-name="ce372" table:formula="of:=IF(SUM([.M48:.N48])&gt;0;SUM([.M48:.N48]);&quot;&quot;)">
            <text:p/>
          </table:table-cell>
          <table:table-cell table:number-columns-repeated="242"/>
        </table:table-row>
        <table:table-row table:style-name="ro21">
          <table:table-cell table:style-name="ce306" table:formula="of:=+[$'MUEB, MAQ,EQUIP'.B11]" office:value-type="string" office:string-value="Jabas de transporte 58*83*13 cm" calcext:value-type="string">
            <text:p>Jabas de transporte 58*83*13 cm</text:p>
          </table:table-cell>
          <table:table-cell table:style-name="ce317" table:formula="of:=+[$'MUEB, MAQ,EQUIP'.F11]" office:value-type="float" office:value="3850" calcext:value-type="float">
            <text:p>3850.00</text:p>
          </table:table-cell>
          <table:table-cell table:style-name="ce325"/>
          <table:table-cell table:style-name="ce325" table:formula="of:=[.B49]" office:value-type="float" office:value="3850" calcext:value-type="float">
            <text:p>3,850.00</text:p>
          </table:table-cell>
          <table:table-cell table:style-name="ce260"/>
          <table:table-cell table:number-columns-repeated="2"/>
          <table:table-cell table:style-name="ce344" table:formula="of:=+[$'MUEB, MAQ,EQUIP'.B11]" office:value-type="string" office:string-value="Jabas de transporte 58*83*13 cm" calcext:value-type="string">
            <text:p>Jabas de transporte 58*83*13 cm</text:p>
          </table:table-cell>
          <table:table-cell table:style-name="ce351" table:formula="of:=+[$'MUEB, MAQ,EQUIP'.C11]" office:value-type="string" office:string-value="und" calcext:value-type="string">
            <text:p>und</text:p>
          </table:table-cell>
          <table:table-cell table:style-name="ce351" table:formula="of:=+[$'MUEB, MAQ,EQUIP'.D11]" office:value-type="float" office:value="55" calcext:value-type="float">
            <text:p>55</text:p>
          </table:table-cell>
          <table:table-cell table:style-name="ce359" table:formula="of:=+[.B49]" office:value-type="float" office:value="3850" calcext:value-type="float">
            <text:p>3,850.00</text:p>
          </table:table-cell>
          <table:table-cell table:style-name="ce360" table:formula="of:=[.K49]" office:value-type="float" office:value="3850" calcext:value-type="float">
            <text:p>3,850.00</text:p>
          </table:table-cell>
          <table:table-cell table:style-name="ce374"/>
          <table:table-cell table:style-name="ce377"/>
          <table:table-cell table:style-name="ce372" table:formula="of:=IF(SUM([.M49:.N49])&gt;0;SUM([.M49:.N49]);&quot;&quot;)">
            <text:p/>
          </table:table-cell>
          <table:table-cell table:number-columns-repeated="242"/>
        </table:table-row>
        <table:table-row table:style-name="ro21">
          <table:table-cell table:style-name="ce306" table:formula="of:=+[$'MUEB, MAQ,EQUIP'.B12]" office:value-type="string" office:string-value="Termometro ambiental con maximi y minimo " calcext:value-type="string">
            <text:p>Termometro ambiental con maximi y minimo </text:p>
          </table:table-cell>
          <table:table-cell table:style-name="ce317" table:formula="of:=+[$'MUEB, MAQ,EQUIP'.F12]" office:value-type="float" office:value="660" calcext:value-type="float">
            <text:p>660.00</text:p>
          </table:table-cell>
          <table:table-cell table:style-name="ce325"/>
          <table:table-cell table:style-name="ce325" table:formula="of:=[.B50]" office:value-type="float" office:value="660" calcext:value-type="float">
            <text:p>660.00</text:p>
          </table:table-cell>
          <table:table-cell table:style-name="ce260"/>
          <table:table-cell table:number-columns-repeated="2"/>
          <table:table-cell table:style-name="ce344" table:formula="of:=+[$'MUEB, MAQ,EQUIP'.B12]" office:value-type="string" office:string-value="Termometro ambiental con maximi y minimo " calcext:value-type="string">
            <text:p>Termometro ambiental con maximi y minimo </text:p>
          </table:table-cell>
          <table:table-cell table:style-name="ce351" table:formula="of:=+[$'MUEB, MAQ,EQUIP'.C12]" office:value-type="string" office:string-value="und" calcext:value-type="string">
            <text:p>und</text:p>
          </table:table-cell>
          <table:table-cell table:style-name="ce351" table:formula="of:=+[$'MUEB, MAQ,EQUIP'.D12]" office:value-type="float" office:value="11" calcext:value-type="float">
            <text:p>11</text:p>
          </table:table-cell>
          <table:table-cell table:style-name="ce359" table:formula="of:=+[.B50]" office:value-type="float" office:value="660" calcext:value-type="float">
            <text:p>660.00</text:p>
          </table:table-cell>
          <table:table-cell table:style-name="ce360" table:formula="of:=[.K50]" office:value-type="float" office:value="660" calcext:value-type="float">
            <text:p>660.00</text:p>
          </table:table-cell>
          <table:table-cell table:style-name="ce374"/>
          <table:table-cell table:style-name="ce377"/>
          <table:table-cell table:style-name="ce372" table:formula="of:=IF(SUM([.M50:.N50])&gt;0;SUM([.M50:.N50]);&quot;&quot;)">
            <text:p/>
          </table:table-cell>
          <table:table-cell table:number-columns-repeated="242"/>
        </table:table-row>
        <table:table-row table:style-name="ro21">
          <table:table-cell table:style-name="ce306" table:formula="of:=+[$'MUEB, MAQ,EQUIP'.B13]" office:value-type="string" office:string-value="Balanza digital de 20 kg" calcext:value-type="string">
            <text:p>Balanza digital de 20 kg</text:p>
          </table:table-cell>
          <table:table-cell table:style-name="ce317" table:formula="of:=+[$'MUEB, MAQ,EQUIP'.F13]" office:value-type="float" office:value="1430" calcext:value-type="float">
            <text:p>1430.00</text:p>
          </table:table-cell>
          <table:table-cell table:style-name="ce325"/>
          <table:table-cell table:style-name="ce325" table:formula="of:=[.B51]" office:value-type="float" office:value="1430" calcext:value-type="float">
            <text:p>1,430.00</text:p>
          </table:table-cell>
          <table:table-cell table:style-name="ce260"/>
          <table:table-cell table:number-columns-repeated="2"/>
          <table:table-cell table:style-name="ce344" table:formula="of:=+[$'MUEB, MAQ,EQUIP'.B13]" office:value-type="string" office:string-value="Balanza digital de 20 kg" calcext:value-type="string">
            <text:p>Balanza digital de 20 kg</text:p>
          </table:table-cell>
          <table:table-cell table:style-name="ce351" table:formula="of:=+[$'MUEB, MAQ,EQUIP'.C13]" office:value-type="string" office:string-value="und" calcext:value-type="string">
            <text:p>und</text:p>
          </table:table-cell>
          <table:table-cell table:style-name="ce351" table:formula="of:=+[$'MUEB, MAQ,EQUIP'.D13]" office:value-type="float" office:value="11" calcext:value-type="float">
            <text:p>11</text:p>
          </table:table-cell>
          <table:table-cell table:style-name="ce359" table:formula="of:=+[.B51]" office:value-type="float" office:value="1430" calcext:value-type="float">
            <text:p>1,430.00</text:p>
          </table:table-cell>
          <table:table-cell table:style-name="ce360" table:formula="of:=[.K51]" office:value-type="float" office:value="1430" calcext:value-type="float">
            <text:p>1,430.00</text:p>
          </table:table-cell>
          <table:table-cell table:style-name="ce374"/>
          <table:table-cell table:style-name="ce377"/>
          <table:table-cell table:style-name="ce372" table:formula="of:=IF(SUM([.M51:.N51])&gt;0;SUM([.M51:.N51]);&quot;&quot;)">
            <text:p/>
          </table:table-cell>
          <table:table-cell table:number-columns-repeated="242"/>
        </table:table-row>
        <table:table-row table:style-name="ro21">
          <table:table-cell table:style-name="ce306" table:formula="of:=+[$'MUEB, MAQ,EQUIP'.B14]" office:value-type="string" office:string-value="Bandeja pregerminadora de plastica 50x36x4cm" calcext:value-type="string">
            <text:p>Bandeja pregerminadora de plastica 50x36x4cm</text:p>
          </table:table-cell>
          <table:table-cell table:style-name="ce317" table:formula="of:=+[$'MUEB, MAQ,EQUIP'.F14]" office:value-type="float" office:value="1650" calcext:value-type="float">
            <text:p>1650.00</text:p>
          </table:table-cell>
          <table:table-cell table:style-name="ce325"/>
          <table:table-cell table:style-name="ce325" table:formula="of:=[.B52]" office:value-type="float" office:value="1650" calcext:value-type="float">
            <text:p>1,650.00</text:p>
          </table:table-cell>
          <table:table-cell table:style-name="ce260"/>
          <table:table-cell table:number-columns-repeated="2"/>
          <table:table-cell table:style-name="ce344" table:formula="of:=+[$'MUEB, MAQ,EQUIP'.B14]" office:value-type="string" office:string-value="Bandeja pregerminadora de plastica 50x36x4cm" calcext:value-type="string">
            <text:p>Bandeja pregerminadora de plastica 50x36x4cm</text:p>
          </table:table-cell>
          <table:table-cell table:style-name="ce351" table:formula="of:=+[$'MUEB, MAQ,EQUIP'.C14]" office:value-type="string" office:string-value="und" calcext:value-type="string">
            <text:p>und</text:p>
          </table:table-cell>
          <table:table-cell table:style-name="ce351" table:formula="of:=+[$'MUEB, MAQ,EQUIP'.D14]" office:value-type="float" office:value="165" calcext:value-type="float">
            <text:p>165</text:p>
          </table:table-cell>
          <table:table-cell table:style-name="ce359" table:formula="of:=+[.B52]" office:value-type="float" office:value="1650" calcext:value-type="float">
            <text:p>1,650.00</text:p>
          </table:table-cell>
          <table:table-cell table:style-name="ce360" table:formula="of:=[.K52]" office:value-type="float" office:value="1650" calcext:value-type="float">
            <text:p>1,650.00</text:p>
          </table:table-cell>
          <table:table-cell table:style-name="ce374"/>
          <table:table-cell table:style-name="ce377"/>
          <table:table-cell table:style-name="ce372" table:formula="of:=IF(SUM([.M52:.N52])&gt;0;SUM([.M52:.N52]);&quot;&quot;)">
            <text:p/>
          </table:table-cell>
          <table:table-cell table:number-columns-repeated="242"/>
        </table:table-row>
        <table:table-row table:style-name="ro21">
          <table:table-cell table:style-name="ce306" table:formula="of:=+[$'MUEB, MAQ,EQUIP'.B15]" office:value-type="string" office:string-value="Motocarga" calcext:value-type="string">
            <text:p>Motocarga</text:p>
          </table:table-cell>
          <table:table-cell table:style-name="ce317" table:formula="of:=+[$'MUEB, MAQ,EQUIP'.F15]" office:value-type="float" office:value="22400" calcext:value-type="float">
            <text:p>22400.00</text:p>
          </table:table-cell>
          <table:table-cell table:style-name="ce325"/>
          <table:table-cell table:style-name="ce325" table:formula="of:=[.B53]" office:value-type="float" office:value="22400" calcext:value-type="float">
            <text:p>22,400.00</text:p>
          </table:table-cell>
          <table:table-cell table:style-name="ce260"/>
          <table:table-cell table:number-columns-repeated="2"/>
          <table:table-cell table:style-name="ce344" table:formula="of:=+[.A53]" office:value-type="string" office:string-value="Motocarga" calcext:value-type="string">
            <text:p>Motocarga</text:p>
          </table:table-cell>
          <table:table-cell table:style-name="ce351" office:value-type="string" calcext:value-type="string">
            <text:p>und</text:p>
          </table:table-cell>
          <table:table-cell table:style-name="ce351" office:value-type="float" office:value="1" calcext:value-type="float">
            <text:p>1</text:p>
          </table:table-cell>
          <table:table-cell table:style-name="ce359" table:formula="of:=+[.B53]" office:value-type="float" office:value="22400" calcext:value-type="float">
            <text:p>22,400.00</text:p>
          </table:table-cell>
          <table:table-cell table:style-name="ce360" table:formula="of:=[.K53]" office:value-type="float" office:value="22400" calcext:value-type="float">
            <text:p>22,400.00</text:p>
          </table:table-cell>
          <table:table-cell table:style-name="ce374"/>
          <table:table-cell table:style-name="ce377"/>
          <table:table-cell table:style-name="ce372"/>
          <table:table-cell table:number-columns-repeated="242"/>
        </table:table-row>
        <table:table-row table:style-name="ro21">
          <table:table-cell table:style-name="ce306" office:value-type="string" calcext:value-type="string">
            <text:p>Kit Veterinario</text:p>
          </table:table-cell>
          <table:table-cell table:style-name="ce317" table:formula="of:=+[$'MUEB, MAQ,EQUIP'.F52]" office:value-type="float" office:value="2948" calcext:value-type="float">
            <text:p>2948.00</text:p>
          </table:table-cell>
          <table:table-cell table:style-name="ce325"/>
          <table:table-cell table:style-name="ce325" table:formula="of:=[.B54]" office:value-type="float" office:value="2948" calcext:value-type="float">
            <text:p>2,948.00</text:p>
          </table:table-cell>
          <table:table-cell table:style-name="ce260"/>
          <table:table-cell table:number-columns-repeated="2"/>
          <table:table-cell table:style-name="ce344" table:formula="of:=+[.A54]" office:value-type="string" office:string-value="Kit Veterinario" calcext:value-type="string">
            <text:p>Kit Veterinario</text:p>
          </table:table-cell>
          <table:table-cell table:style-name="ce351" office:value-type="string" calcext:value-type="string">
            <text:p>und</text:p>
          </table:table-cell>
          <table:table-cell table:style-name="ce351" office:value-type="float" office:value="29" calcext:value-type="float">
            <text:p>29</text:p>
          </table:table-cell>
          <table:table-cell table:style-name="ce359" table:formula="of:=+[.B54]" office:value-type="float" office:value="2948" calcext:value-type="float">
            <text:p>2,948.00</text:p>
          </table:table-cell>
          <table:table-cell table:style-name="ce360" table:formula="of:=[.K54]" office:value-type="float" office:value="2948" calcext:value-type="float">
            <text:p>2,948.00</text:p>
          </table:table-cell>
          <table:table-cell table:style-name="ce374"/>
          <table:table-cell table:style-name="ce377"/>
          <table:table-cell table:style-name="ce372"/>
          <table:table-cell table:number-columns-repeated="242"/>
        </table:table-row>
        <table:table-row table:style-name="ro21">
          <table:table-cell table:style-name="ce304" office:value-type="string" calcext:value-type="string">
            <text:p>I.1.3. <text:s/>VEHICULOS</text:p>
          </table:table-cell>
          <table:table-cell table:style-name="ce313" table:formula="of:=SUM([.B56:.B56])" office:value-type="float" office:value="0" calcext:value-type="float">
            <text:p>0.00</text:p>
          </table:table-cell>
          <table:table-cell table:style-name="ce323" table:formula="of:=SUM([.C56:.C56])" office:value-type="float" office:value="0" calcext:value-type="float">
            <text:p>0.00</text:p>
          </table:table-cell>
          <table:table-cell table:style-name="ce323" table:formula="of:=SUM([.D56:.D56])" office:value-type="float" office:value="0" calcext:value-type="float">
            <text:p>0.00</text:p>
          </table:table-cell>
          <table:table-cell table:style-name="ce260"/>
          <table:table-cell table:number-columns-repeated="2"/>
          <table:table-cell table:style-name="ce342" table:formula="of:=+[.A55]" office:value-type="string" office:string-value="I.1.3.  VEHICULOS" calcext:value-type="string">
            <text:p>I.1.3. <text:s/>VEHICULOS</text:p>
          </table:table-cell>
          <table:table-cell table:style-name="ce342" table:number-columns-repeated="2"/>
          <table:table-cell table:style-name="ce355" table:formula="of:=SUM([.K56:.K56])" office:value-type="float" office:value="0" calcext:value-type="float">
            <text:p>0.00</text:p>
          </table:table-cell>
          <table:table-cell table:style-name="ce355" table:formula="of:=SUM([.L56:.L56])" office:value-type="float" office:value="0" calcext:value-type="float">
            <text:p>0.00</text:p>
          </table:table-cell>
          <table:table-cell table:style-name="ce355" table:formula="of:=SUM([.M56:.M56])" office:value-type="float" office:value="0" calcext:value-type="float">
            <text:p>0.00</text:p>
          </table:table-cell>
          <table:table-cell table:style-name="ce355" table:formula="of:=SUM([.N56:.N56])" office:value-type="float" office:value="0" calcext:value-type="float">
            <text:p>0.00</text:p>
          </table:table-cell>
          <table:table-cell table:style-name="ce355" table:formula="of:=SUM([.O56:.O56])" office:value-type="float" office:value="0" calcext:value-type="float">
            <text:p>0.00</text:p>
          </table:table-cell>
          <table:table-cell table:number-columns-repeated="242"/>
        </table:table-row>
        <table:table-row table:style-name="ro21">
          <table:table-cell table:style-name="ce307" table:formula="of:=+[$'MUEB, MAQ,EQUIP'.B27]" office:value-type="string" office:string-value="Camion pequeño de carga" calcext:value-type="string">
            <text:p>Camion pequeño de carga</text:p>
          </table:table-cell>
          <table:table-cell table:style-name="ce193" table:formula="of:=+[$'MUEB, MAQ,EQUIP'.F27]" office:value-type="float" office:value="0" calcext:value-type="float">
            <text:p>0.00</text:p>
          </table:table-cell>
          <table:table-cell table:style-name="ce325" table:number-columns-repeated="2"/>
          <table:table-cell table:style-name="ce260"/>
          <table:table-cell table:number-columns-repeated="2"/>
          <table:table-cell table:style-name="ce345" table:formula="of:=+[$'MUEB, MAQ,EQUIP'.B27]" office:value-type="string" office:string-value="Camion pequeño de carga" calcext:value-type="string">
            <text:p>Camion pequeño de carga</text:p>
          </table:table-cell>
          <table:table-cell table:style-name="ce352" table:formula="of:=+[$'MUEB, MAQ,EQUIP'.C27]" office:value-type="string" office:string-value="und" calcext:value-type="string">
            <text:p>und</text:p>
          </table:table-cell>
          <table:table-cell table:style-name="ce352" table:formula="of:=+[$'MUEB, MAQ,EQUIP'.D27]" office:value-type="float" office:value="0" calcext:value-type="float">
            <text:p>0</text:p>
          </table:table-cell>
          <table:table-cell table:style-name="ce360" table:formula="of:=+[.B56]" office:value-type="float" office:value="0" calcext:value-type="float">
            <text:p>0.00</text:p>
          </table:table-cell>
          <table:table-cell table:style-name="ce360"/>
          <table:table-cell table:style-name="ce374"/>
          <table:table-cell table:style-name="ce377"/>
          <table:table-cell table:style-name="ce372" table:formula="of:=IF(SUM([.M56:.N56])&gt;0;SUM([.M56:.N56]);&quot;&quot;)">
            <text:p/>
          </table:table-cell>
          <table:table-cell table:number-columns-repeated="242"/>
        </table:table-row>
        <table:table-row table:style-name="ro21">
          <table:table-cell table:style-name="ce304" office:value-type="string" calcext:value-type="string">
            <text:p>I.1.4. MUEBLES Y ENSERES</text:p>
          </table:table-cell>
          <table:table-cell table:style-name="ce313" table:formula="of:=SUM([.B58:.B60])" office:value-type="float" office:value="5300" calcext:value-type="float">
            <text:p>5300.00</text:p>
          </table:table-cell>
          <table:table-cell table:style-name="ce323" table:formula="of:=SUM([.C58:.C60])" office:value-type="float" office:value="5000" calcext:value-type="float">
            <text:p>5,000.00</text:p>
          </table:table-cell>
          <table:table-cell table:style-name="ce323" table:formula="of:=SUM([.D58:.D60])" office:value-type="float" office:value="300" calcext:value-type="float">
            <text:p>300.00</text:p>
          </table:table-cell>
          <table:table-cell table:style-name="ce260"/>
          <table:table-cell table:number-columns-repeated="2"/>
          <table:table-cell table:style-name="ce342" table:formula="of:=+[.A57]" office:value-type="string" office:string-value="I.1.4. MUEBLES Y ENSERES" calcext:value-type="string">
            <text:p>I.1.4. MUEBLES Y ENSERES</text:p>
          </table:table-cell>
          <table:table-cell table:style-name="ce342" table:number-columns-repeated="2"/>
          <table:table-cell table:style-name="ce355" table:formula="of:=SUM([.K58:.K60])" office:value-type="float" office:value="5300" calcext:value-type="float">
            <text:p>5,300.00</text:p>
          </table:table-cell>
          <table:table-cell table:style-name="ce355" table:formula="of:=SUM([.L58:.L60])" office:value-type="float" office:value="300" calcext:value-type="float">
            <text:p>300.00</text:p>
          </table:table-cell>
          <table:table-cell table:style-name="ce355" table:formula="of:=SUM([.M58:.M60])" office:value-type="float" office:value="5000" calcext:value-type="float">
            <text:p>5,000.00</text:p>
          </table:table-cell>
          <table:table-cell table:style-name="ce355" table:formula="of:=SUM([.N58:.N60])" office:value-type="float" office:value="0" calcext:value-type="float">
            <text:p>0.00</text:p>
          </table:table-cell>
          <table:table-cell table:style-name="ce355" table:formula="of:=SUM([.O58:.O60])" office:value-type="float" office:value="5000" calcext:value-type="float">
            <text:p>5,000.00</text:p>
          </table:table-cell>
          <table:table-cell table:number-columns-repeated="242"/>
        </table:table-row>
        <table:table-row table:style-name="ro21">
          <table:table-cell table:style-name="ce308" table:formula="of:=+[$'MUEB, MAQ,EQUIP'.B34]" office:value-type="string" office:string-value="Reproductor Cuy Hembra" calcext:value-type="string">
            <text:p>Reproductor Cuy Hembra</text:p>
          </table:table-cell>
          <table:table-cell table:style-name="ce318" table:formula="of:=+[$'MUEB, MAQ,EQUIP'.F34]" office:value-type="float" office:value="4250" calcext:value-type="float">
            <text:p>4250.00</text:p>
          </table:table-cell>
          <table:table-cell table:style-name="ce325" table:formula="of:=+[.B58]" office:value-type="float" office:value="4250" calcext:value-type="float">
            <text:p>4,250.00</text:p>
          </table:table-cell>
          <table:table-cell table:style-name="ce325"/>
          <table:table-cell table:style-name="ce260"/>
          <table:table-cell table:number-columns-repeated="2"/>
          <table:table-cell table:style-name="ce346" table:formula="of:=+[$'MUEB, MAQ,EQUIP'.B34]" office:value-type="string" office:string-value="Reproductor Cuy Hembra" calcext:value-type="string">
            <text:p>Reproductor Cuy Hembra</text:p>
          </table:table-cell>
          <table:table-cell table:style-name="ce353" table:formula="of:=+[$'MUEB, MAQ,EQUIP'.C34]" office:value-type="string" office:string-value="und" calcext:value-type="string">
            <text:p>und</text:p>
          </table:table-cell>
          <table:table-cell table:style-name="ce353" table:formula="of:=+[$'MUEB, MAQ,EQUIP'.D34]" office:value-type="float" office:value="85" calcext:value-type="float">
            <text:p>85</text:p>
          </table:table-cell>
          <table:table-cell table:style-name="ce361" table:formula="of:=+[.B58]" office:value-type="float" office:value="4250" calcext:value-type="float">
            <text:p>4,250.00</text:p>
          </table:table-cell>
          <table:table-cell table:style-name="ce360"/>
          <table:table-cell table:style-name="ce374" table:formula="of:=+[.K58]" office:value-type="float" office:value="4250" calcext:value-type="float">
            <text:p>4,250.00</text:p>
          </table:table-cell>
          <table:table-cell table:style-name="ce377"/>
          <table:table-cell table:style-name="ce372" table:formula="of:=IF(SUM([.M58:.N58])&gt;0;SUM([.M58:.N58]);&quot;&quot;)" office:value-type="float" office:value="4250" calcext:value-type="float">
            <text:p>4,250.00</text:p>
          </table:table-cell>
          <table:table-cell table:number-columns-repeated="242"/>
        </table:table-row>
        <table:table-row table:style-name="ro21">
          <table:table-cell table:style-name="ce308" table:formula="of:=+[$'MUEB, MAQ,EQUIP'.B35]" office:value-type="string" office:string-value="Reproductor Cuy Macho" calcext:value-type="string">
            <text:p>Reproductor Cuy Macho</text:p>
          </table:table-cell>
          <table:table-cell table:style-name="ce318" table:formula="of:=+[$'MUEB, MAQ,EQUIP'.F35]" office:value-type="float" office:value="750" calcext:value-type="float">
            <text:p>750.00</text:p>
          </table:table-cell>
          <table:table-cell table:style-name="ce325" table:formula="of:=+[.B59]" office:value-type="float" office:value="750" calcext:value-type="float">
            <text:p>750.00</text:p>
          </table:table-cell>
          <table:table-cell table:style-name="ce325"/>
          <table:table-cell table:style-name="ce260"/>
          <table:table-cell table:number-columns-repeated="2"/>
          <table:table-cell table:style-name="ce346" table:formula="of:=+[$'MUEB, MAQ,EQUIP'.B35]" office:value-type="string" office:string-value="Reproductor Cuy Macho" calcext:value-type="string">
            <text:p>Reproductor Cuy Macho</text:p>
          </table:table-cell>
          <table:table-cell table:style-name="ce353" table:formula="of:=+[$'MUEB, MAQ,EQUIP'.C35]" office:value-type="string" office:string-value="und" calcext:value-type="string">
            <text:p>und</text:p>
          </table:table-cell>
          <table:table-cell table:style-name="ce353" table:formula="of:=+[$'MUEB, MAQ,EQUIP'.D35]" office:value-type="float" office:value="15" calcext:value-type="float">
            <text:p>15</text:p>
          </table:table-cell>
          <table:table-cell table:style-name="ce361" table:formula="of:=+[.B59]" office:value-type="float" office:value="750" calcext:value-type="float">
            <text:p>750.00</text:p>
          </table:table-cell>
          <table:table-cell table:style-name="ce360"/>
          <table:table-cell table:style-name="ce374" table:formula="of:=+[.K59]" office:value-type="float" office:value="750" calcext:value-type="float">
            <text:p>750.00</text:p>
          </table:table-cell>
          <table:table-cell table:style-name="ce377"/>
          <table:table-cell table:style-name="ce372" table:formula="of:=IF(SUM([.M59:.N59])&gt;0;SUM([.M59:.N59]);&quot;&quot;)" office:value-type="float" office:value="750" calcext:value-type="float">
            <text:p>750.00</text:p>
          </table:table-cell>
          <table:table-cell table:number-columns-repeated="242"/>
        </table:table-row>
        <table:table-row table:style-name="ro21">
          <table:table-cell table:style-name="ce308" table:formula="of:=+[$'MUEB, MAQ,EQUIP'.B36]" office:value-type="string" office:string-value="Cartel del Proyecto" calcext:value-type="string">
            <text:p>Cartel del Proyecto</text:p>
          </table:table-cell>
          <table:table-cell table:style-name="ce318" table:formula="of:=+[$'MUEB, MAQ,EQUIP'.F36]" office:value-type="float" office:value="300" calcext:value-type="float">
            <text:p>300.00</text:p>
          </table:table-cell>
          <table:table-cell table:style-name="ce325"/>
          <table:table-cell table:style-name="ce325" table:formula="of:=+[.B60]" office:value-type="float" office:value="300" calcext:value-type="float">
            <text:p>300.00</text:p>
          </table:table-cell>
          <table:table-cell table:style-name="ce260"/>
          <table:table-cell table:number-columns-repeated="2"/>
          <table:table-cell table:style-name="ce346" table:formula="of:=+[$'MUEB, MAQ,EQUIP'.B36]" office:value-type="string" office:string-value="Cartel del Proyecto" calcext:value-type="string">
            <text:p>Cartel del Proyecto</text:p>
          </table:table-cell>
          <table:table-cell table:style-name="ce353" table:formula="of:=+[$'MUEB, MAQ,EQUIP'.C36]" office:value-type="string" office:string-value="und" calcext:value-type="string">
            <text:p>und</text:p>
          </table:table-cell>
          <table:table-cell table:style-name="ce353" table:formula="of:=+[$'MUEB, MAQ,EQUIP'.D36]" office:value-type="float" office:value="1" calcext:value-type="float">
            <text:p>1</text:p>
          </table:table-cell>
          <table:table-cell table:style-name="ce361" table:formula="of:=+[.B60]" office:value-type="float" office:value="300" calcext:value-type="float">
            <text:p>300.00</text:p>
          </table:table-cell>
          <table:table-cell table:style-name="ce360" table:formula="of:=+[.K60]" office:value-type="float" office:value="300" calcext:value-type="float">
            <text:p>300.00</text:p>
          </table:table-cell>
          <table:table-cell table:style-name="ce374"/>
          <table:table-cell table:style-name="ce377"/>
          <table:table-cell table:style-name="ce372" table:formula="of:=IF(SUM([.M60:.N60])&gt;0;SUM([.M60:.N60]);&quot;&quot;)">
            <text:p/>
          </table:table-cell>
          <table:table-cell table:number-columns-repeated="242"/>
        </table:table-row>
        <table:table-row table:style-name="ro21">
          <table:table-cell table:style-name="ce304" office:value-type="string" calcext:value-type="string">
            <text:p>I.2. INVERSION FIJA INTANGIBLE</text:p>
          </table:table-cell>
          <table:table-cell table:style-name="ce313" table:formula="of:=SUM([.B62:.B64])" office:value-type="float" office:value="14400" calcext:value-type="float">
            <text:p>14400.00</text:p>
          </table:table-cell>
          <table:table-cell table:style-name="ce323" table:formula="of:=SUM([.C62:.C62])" office:value-type="float" office:value="0" calcext:value-type="float">
            <text:p>0.00</text:p>
          </table:table-cell>
          <table:table-cell table:style-name="ce323" table:formula="of:=SUM([.D62:.D64])" office:value-type="float" office:value="14400" calcext:value-type="float">
            <text:p>14,400.00</text:p>
          </table:table-cell>
          <table:table-cell table:style-name="ce334"/>
          <table:table-cell table:number-columns-repeated="2"/>
          <table:table-cell table:style-name="ce342" table:formula="of:=+[.A61]" office:value-type="string" office:string-value="I.2. INVERSION FIJA INTANGIBLE" calcext:value-type="string">
            <text:p>I.2. INVERSION FIJA INTANGIBLE</text:p>
          </table:table-cell>
          <table:table-cell table:style-name="ce342" table:number-columns-repeated="2"/>
          <table:table-cell table:style-name="ce355" table:formula="of:=SUM([.K62:.K64])" office:value-type="float" office:value="14400" calcext:value-type="float">
            <text:p>14,400.00</text:p>
          </table:table-cell>
          <table:table-cell table:style-name="ce355" table:formula="of:=SUM([.L62:.L64])" office:value-type="float" office:value="14400" calcext:value-type="float">
            <text:p>14,400.00</text:p>
          </table:table-cell>
          <table:table-cell table:style-name="ce370" table:formula="of:=SUM([.M62:.M62])" office:value-type="float" office:value="0" calcext:value-type="float">
            <text:p>0.00</text:p>
          </table:table-cell>
          <table:table-cell table:style-name="ce370" table:formula="of:=SUM([.N62:.N62])" office:value-type="float" office:value="0" calcext:value-type="float">
            <text:p>0.00</text:p>
          </table:table-cell>
          <table:table-cell table:style-name="ce370" table:formula="of:=SUM([.O62:.O62])" office:value-type="float" office:value="0" calcext:value-type="float">
            <text:p>0.00</text:p>
          </table:table-cell>
          <table:table-cell table:number-columns-repeated="242"/>
        </table:table-row>
        <table:table-row table:style-name="ro21">
          <table:table-cell table:style-name="ce307" table:formula="of:=+[$'INVERS FIJ INTANG'.A4]" office:value-type="string" office:string-value="Asistencia Tecnica" calcext:value-type="string">
            <text:p>Asistencia Tecnica</text:p>
          </table:table-cell>
          <table:table-cell table:style-name="ce319" table:formula="of:=+[$'INVERS FIJ INTANG'.E4]" office:value-type="float" office:value="12500" calcext:value-type="float">
            <text:p>12500.00</text:p>
          </table:table-cell>
          <table:table-cell table:style-name="ce325"/>
          <table:table-cell table:style-name="ce332" table:formula="of:=[.B62]" office:value-type="float" office:value="12500" calcext:value-type="float">
            <text:p>12,500.00</text:p>
          </table:table-cell>
          <table:table-cell table:style-name="ce260"/>
          <table:table-cell table:number-columns-repeated="2"/>
          <table:table-cell table:style-name="ce347" table:formula="of:=+[$'INVERS FIJ INTANG'.A4]" office:value-type="string" office:string-value="Asistencia Tecnica" calcext:value-type="string">
            <text:p>Asistencia Tecnica</text:p>
          </table:table-cell>
          <table:table-cell table:style-name="ce352" table:formula="of:=+[$'INVERS FIJ INTANG'.B4]" office:value-type="string" office:string-value="mes" calcext:value-type="string">
            <text:p>mes</text:p>
          </table:table-cell>
          <table:table-cell table:style-name="ce352" table:formula="of:=+[$'INVERS FIJ INTANG'.C4]" office:value-type="float" office:value="5" calcext:value-type="float">
            <text:p>5</text:p>
          </table:table-cell>
          <table:table-cell table:style-name="ce360" table:formula="of:=+[.B62]" office:value-type="float" office:value="12500" calcext:value-type="float">
            <text:p>12,500.00</text:p>
          </table:table-cell>
          <table:table-cell table:style-name="ce172" table:formula="of:=[.K62]" office:value-type="float" office:value="12500" calcext:value-type="float">
            <text:p>12,500.00</text:p>
          </table:table-cell>
          <table:table-cell table:style-name="ce374"/>
          <table:table-cell table:style-name="ce377"/>
          <table:table-cell table:style-name="ce372" table:formula="of:=IF(SUM([.M62:.N62])&gt;0;SUM([.M62:.N62]);&quot;&quot;)">
            <text:p/>
          </table:table-cell>
          <table:table-cell table:number-columns-repeated="242"/>
        </table:table-row>
        <table:table-row table:style-name="ro21">
          <table:table-cell table:style-name="ce307" table:formula="of:=+[$'INVERS FIJ INTANG'.A5]" office:value-type="string" office:string-value="Publicidad y Marketing" calcext:value-type="string">
            <text:p>Publicidad y Marketing</text:p>
          </table:table-cell>
          <table:table-cell table:style-name="ce319" table:formula="of:=+[$'INVERS FIJ INTANG'.E5]" office:value-type="float" office:value="900" calcext:value-type="float">
            <text:p>900.00</text:p>
          </table:table-cell>
          <table:table-cell table:style-name="ce325"/>
          <table:table-cell table:style-name="ce332" table:formula="of:=[.B63]" office:value-type="float" office:value="900" calcext:value-type="float">
            <text:p>900.00</text:p>
          </table:table-cell>
          <table:table-cell table:style-name="ce260"/>
          <table:table-cell table:number-columns-repeated="2"/>
          <table:table-cell table:style-name="ce347" table:formula="of:=+[$'INVERS FIJ INTANG'.A5]" office:value-type="string" office:string-value="Publicidad y Marketing" calcext:value-type="string">
            <text:p>Publicidad y Marketing</text:p>
          </table:table-cell>
          <table:table-cell table:style-name="ce352" table:formula="of:=+[$'INVERS FIJ INTANG'.B5]" office:value-type="string" office:string-value="mes" calcext:value-type="string">
            <text:p>mes</text:p>
          </table:table-cell>
          <table:table-cell table:style-name="ce352" table:formula="of:=+[$'INVERS FIJ INTANG'.C5]" office:value-type="float" office:value="5" calcext:value-type="float">
            <text:p>5</text:p>
          </table:table-cell>
          <table:table-cell table:style-name="ce360" table:formula="of:=+[.B63]" office:value-type="float" office:value="900" calcext:value-type="float">
            <text:p>900.00</text:p>
          </table:table-cell>
          <table:table-cell table:style-name="ce172" table:formula="of:=[.K63]" office:value-type="float" office:value="900" calcext:value-type="float">
            <text:p>900.00</text:p>
          </table:table-cell>
          <table:table-cell table:style-name="ce374"/>
          <table:table-cell table:style-name="ce377"/>
          <table:table-cell table:style-name="ce372"/>
          <table:table-cell table:number-columns-repeated="242"/>
        </table:table-row>
        <table:table-row table:style-name="ro21">
          <table:table-cell table:style-name="ce307" table:formula="of:=+[$'INVERS FIJ INTANG'.A6]" office:value-type="string" office:string-value="Flete Terrestre" calcext:value-type="string">
            <text:p>Flete Terrestre</text:p>
          </table:table-cell>
          <table:table-cell table:style-name="ce319" table:formula="of:=+[$'INVERS FIJ INTANG'.E6]" office:value-type="float" office:value="1000" calcext:value-type="float">
            <text:p>1000.00</text:p>
          </table:table-cell>
          <table:table-cell table:style-name="ce325"/>
          <table:table-cell table:style-name="ce332" table:formula="of:=[.B64]" office:value-type="float" office:value="1000" calcext:value-type="float">
            <text:p>1,000.00</text:p>
          </table:table-cell>
          <table:table-cell table:style-name="ce260"/>
          <table:table-cell table:number-columns-repeated="2"/>
          <table:table-cell table:style-name="ce347" table:formula="of:=+[$'INVERS FIJ INTANG'.A6]" office:value-type="string" office:string-value="Flete Terrestre" calcext:value-type="string">
            <text:p>Flete Terrestre</text:p>
          </table:table-cell>
          <table:table-cell table:style-name="ce352" table:formula="of:=+[$'INVERS FIJ INTANG'.B6]" office:value-type="string" office:string-value="Gbl" calcext:value-type="string">
            <text:p>Gbl</text:p>
          </table:table-cell>
          <table:table-cell table:style-name="ce352" table:formula="of:=+[$'INVERS FIJ INTANG'.C6]" office:value-type="float" office:value="1" calcext:value-type="float">
            <text:p>1</text:p>
          </table:table-cell>
          <table:table-cell table:style-name="ce360" table:formula="of:=+[.B64]" office:value-type="float" office:value="1000" calcext:value-type="float">
            <text:p>1,000.00</text:p>
          </table:table-cell>
          <table:table-cell table:style-name="ce172" table:formula="of:=[.K64]" office:value-type="float" office:value="1000" calcext:value-type="float">
            <text:p>1,000.00</text:p>
          </table:table-cell>
          <table:table-cell table:style-name="ce374"/>
          <table:table-cell table:style-name="ce377"/>
          <table:table-cell table:style-name="ce372"/>
          <table:table-cell table:number-columns-repeated="242"/>
        </table:table-row>
        <table:table-row table:style-name="ro21">
          <table:table-cell table:style-name="ce303" office:value-type="string" calcext:value-type="string">
            <text:p>II. CAPITAL DE TRABAJO</text:p>
          </table:table-cell>
          <table:table-cell table:style-name="ce312" table:formula="of:=+[$'CAP TRABAJ'.C28]" office:value-type="float" office:value="4244.11004523721" calcext:value-type="float">
            <text:p>4244.11</text:p>
          </table:table-cell>
          <table:table-cell table:style-name="ce328" table:formula="of:=+[.B65]" office:value-type="float" office:value="4244.11004523721" calcext:value-type="float">
            <text:p>4,244.11</text:p>
          </table:table-cell>
          <table:table-cell table:style-name="ce323"/>
          <table:table-cell table:style-name="ce334"/>
          <table:table-cell table:number-columns-repeated="2"/>
          <table:table-cell table:style-name="ce342" table:formula="of:=+[.A65]" office:value-type="string" office:string-value="II. CAPITAL DE TRABAJO" calcext:value-type="string">
            <text:p>II. CAPITAL DE TRABAJO</text:p>
          </table:table-cell>
          <table:table-cell table:style-name="ce342" table:number-columns-repeated="2"/>
          <table:table-cell table:style-name="ce355" table:formula="of:=+[.B65]" office:value-type="float" office:value="4244.11004523721" calcext:value-type="float">
            <text:p>4,244.11</text:p>
          </table:table-cell>
          <table:table-cell table:style-name="ce355" table:number-columns-repeated="2"/>
          <table:table-cell table:style-name="ce355" table:formula="of:=+[.K65]" office:value-type="float" office:value="4244.11004523721" calcext:value-type="float">
            <text:p>4,244.11</text:p>
          </table:table-cell>
          <table:table-cell table:style-name="ce372" table:formula="of:=IF(SUM([.M65:.N65])&gt;0;SUM([.M65:.N65]);&quot;&quot;)" office:value-type="float" office:value="4244.11004523721" calcext:value-type="float">
            <text:p>4,244.11</text:p>
          </table:table-cell>
          <table:table-cell table:number-columns-repeated="242"/>
        </table:table-row>
        <table:table-row table:style-name="ro21">
          <table:table-cell table:style-name="ce303" office:value-type="string" calcext:value-type="string">
            <text:p>III. GASTOS GENERALES (6.00 %)</text:p>
          </table:table-cell>
          <table:table-cell table:style-name="ce312" table:formula="of:=0.06*[.B6]" office:value-type="float" office:value="8435.07" calcext:value-type="float">
            <text:p>8435.07</text:p>
          </table:table-cell>
          <table:table-cell table:style-name="ce325"/>
          <table:table-cell table:style-name="ce327" table:formula="of:=[.B66]" office:value-type="float" office:value="8435.07" calcext:value-type="float">
            <text:p>8,435.07</text:p>
          </table:table-cell>
          <table:table-cell table:style-name="ce260"/>
          <table:table-cell table:number-columns-repeated="2"/>
          <table:table-cell table:style-name="ce342" table:formula="of:=+[.A66]" office:value-type="string" office:string-value="III. GASTOS GENERALES (6.00 %)" calcext:value-type="string">
            <text:p>III. GASTOS GENERALES (6.00 %)</text:p>
          </table:table-cell>
          <table:table-cell table:style-name="ce342" table:number-columns-repeated="2"/>
          <table:table-cell table:style-name="ce355" table:formula="of:=0.06*[.K6]" office:value-type="float" office:value="8435.07" calcext:value-type="float">
            <text:p>8,435.07</text:p>
          </table:table-cell>
          <table:table-cell table:style-name="ce367" table:formula="of:=[.K66]" office:value-type="float" office:value="8435.07" calcext:value-type="float">
            <text:p>8,435.07</text:p>
          </table:table-cell>
          <table:table-cell table:style-name="ce374"/>
          <table:table-cell table:style-name="ce377"/>
          <table:table-cell table:style-name="ce367"/>
          <table:table-cell table:number-columns-repeated="242"/>
        </table:table-row>
        <table:table-row table:style-name="ro21">
          <table:table-cell table:style-name="ce303" office:value-type="string" calcext:value-type="string">
            <text:p>IV. <text:s/>GASTOS DE SUPERVISION (3.0%)</text:p>
          </table:table-cell>
          <table:table-cell table:style-name="ce312" table:formula="of:=0.03*[.B6]" office:value-type="float" office:value="4217.535" calcext:value-type="float">
            <text:p>4217.54</text:p>
          </table:table-cell>
          <table:table-cell table:style-name="ce329"/>
          <table:table-cell table:style-name="ce327" table:formula="of:=[.B67]" office:value-type="float" office:value="4217.535" calcext:value-type="float">
            <text:p>4,217.54</text:p>
          </table:table-cell>
          <table:table-cell table:style-name="ce260"/>
          <table:table-cell table:number-columns-repeated="2"/>
          <table:table-cell table:style-name="ce342" table:formula="of:=+[.A67]" office:value-type="string" office:string-value="IV.  GASTOS DE SUPERVISION (3.0%)" calcext:value-type="string">
            <text:p>IV. <text:s/>GASTOS DE SUPERVISION (3.0%)</text:p>
          </table:table-cell>
          <table:table-cell table:style-name="ce342" table:number-columns-repeated="2"/>
          <table:table-cell table:style-name="ce355" table:formula="of:=0.03*[.K6]" office:value-type="float" office:value="4217.535" calcext:value-type="float">
            <text:p>4,217.54</text:p>
          </table:table-cell>
          <table:table-cell table:style-name="ce367" table:formula="of:=[.K67]" office:value-type="float" office:value="4217.535" calcext:value-type="float">
            <text:p>4,217.54</text:p>
          </table:table-cell>
          <table:table-cell table:style-name="ce374"/>
          <table:table-cell table:style-name="ce377"/>
          <table:table-cell table:style-name="ce367"/>
          <table:table-cell table:number-columns-repeated="242"/>
        </table:table-row>
        <table:table-row table:style-name="ro29">
          <table:table-cell table:style-name="ce309" office:value-type="string" calcext:value-type="string">
            <text:p>TOTAL INVERSIÓN</text:p>
          </table:table-cell>
          <table:table-cell table:style-name="ce320" table:formula="of:=[.B7]+[.B61]+[.B65]+[.B66]+[.B67]" office:value-type="float" office:value="157481.215045237" calcext:value-type="float">
            <text:p>157,481.22</text:p>
          </table:table-cell>
          <table:table-cell table:style-name="ce320" table:formula="of:=[.C7]+[.C61]+[.C65]+[.C66]+[.C67]" office:value-type="float" office:value="35877.6100452372" calcext:value-type="float">
            <text:p>35,877.61</text:p>
          </table:table-cell>
          <table:table-cell table:style-name="ce320" table:formula="of:=[.D7]+[.D61]+[.D65]+[.D66]+[.D67]" office:value-type="float" office:value="121603.605" calcext:value-type="float">
            <text:p>121,603.61</text:p>
          </table:table-cell>
          <table:table-cell table:style-name="ce335" table:formula="of:=+[.D68]+[.C68]" office:value-type="float" office:value="157481.215045237" calcext:value-type="float">
            <text:p>157,481.22</text:p>
          </table:table-cell>
          <table:table-cell table:number-columns-repeated="2"/>
          <table:table-cell table:style-name="ce348" table:formula="of:=+[.A68]" office:value-type="string" office:string-value="TOTAL INVERSIÓN" calcext:value-type="string" table:number-columns-spanned="3" table:number-rows-spanned="1">
            <text:p>TOTAL INVERSIÓN</text:p>
          </table:table-cell>
          <table:covered-table-cell table:number-columns-repeated="2" table:style-name="ce348"/>
          <table:table-cell table:style-name="ce362" table:formula="of:=[.K7]+[.K61]+[.K65]+[.K66]+[.K67]" office:value-type="float" office:value="157481.215045237" calcext:value-type="float">
            <text:p>157,481.22</text:p>
          </table:table-cell>
          <table:table-cell table:style-name="ce362" table:formula="of:=[.L7]+[.L61]+[.L65]+[.L66]+[.L67]" office:value-type="float" office:value="121603.605" calcext:value-type="float">
            <text:p>121,603.61</text:p>
          </table:table-cell>
          <table:table-cell table:style-name="ce376" table:formula="of:=[.M7]+[.M61]+[.M65]+[.M66]+[.M67]" office:value-type="float" office:value="5000" calcext:value-type="float">
            <text:p>5,000.00</text:p>
          </table:table-cell>
          <table:table-cell table:style-name="ce376" table:formula="of:=[.N7]+[.N61]+[.N65]+[.N66]+[.N67]" office:value-type="float" office:value="30877.6100452372" calcext:value-type="float">
            <text:p>30,877.61</text:p>
          </table:table-cell>
          <table:table-cell table:style-name="ce376" table:formula="of:=[.O7]+[.O61]+[.O65]+[.O66]+[.O67]" office:value-type="float" office:value="35877.6100452372" calcext:value-type="float">
            <text:p>35,877.61</text:p>
          </table:table-cell>
          <table:table-cell table:style-name="ce333" table:formula="of:=+[.M68]+[.N68]" office:value-type="float" office:value="35877.6100452372" calcext:value-type="float">
            <text:p>35877.61</text:p>
          </table:table-cell>
          <table:table-cell table:number-columns-repeated="241"/>
        </table:table-row>
        <table:table-row table:style-name="ro29">
          <table:table-cell/>
          <table:table-cell table:formula="of:=+[.C68]+[.D68]" office:value-type="float" office:value="157481.215045237" calcext:value-type="float">
            <text:p>157481.22</text:p>
          </table:table-cell>
          <table:table-cell table:number-columns-repeated="2"/>
          <table:table-cell table:style-name="ce334"/>
          <table:table-cell table:number-columns-repeated="2"/>
          <table:table-cell table:style-name="ce274" office:value-type="string" calcext:value-type="string" table:number-columns-spanned="3" table:number-rows-spanned="1">
            <text:p>PORCENTAJE</text:p>
          </table:table-cell>
          <table:covered-table-cell table:number-columns-repeated="2" table:style-name="ce274"/>
          <table:table-cell table:style-name="ce363" table:formula="of:=+[.L69]+[.O69]" office:value-type="percentage" office:value="1" calcext:value-type="percentage">
            <text:p>100.00 %</text:p>
          </table:table-cell>
          <table:table-cell table:style-name="ce363" table:formula="of:=([.L68]/[.K68])" office:value-type="percentage" office:value="0.772178478335139" calcext:value-type="percentage">
            <text:p>77.22 %</text:p>
          </table:table-cell>
          <table:table-cell table:style-name="ce363" table:formula="of:=+[.M68]/[.O68]" office:value-type="percentage" office:value="0.139362683124534" calcext:value-type="percentage">
            <text:p>13.94 %</text:p>
          </table:table-cell>
          <table:table-cell table:style-name="ce363" table:formula="of:=+[.N68]/[.O68]" office:value-type="percentage" office:value="0.860637316875466" calcext:value-type="percentage">
            <text:p>86.06 %</text:p>
          </table:table-cell>
          <table:table-cell table:style-name="ce363" table:formula="of:=([.O68]/[.K68])" office:value-type="percentage" office:value="0.227821521664861" calcext:value-type="percentage">
            <text:p>22.78 %</text:p>
          </table:table-cell>
          <table:table-cell table:style-name="ce379" table:formula="of:=+[.O69]+[.L69]" office:value-type="percentage" office:value="1" calcext:value-type="percentage">
            <text:p>100.00 %</text:p>
          </table:table-cell>
          <table:table-cell table:number-columns-repeated="241"/>
        </table:table-row>
        <table:table-row table:style-name="ro21">
          <table:table-cell/>
          <table:table-cell table:style-name="ce321" table:formula="of:=+[.D70]+[.C70]" office:value-type="percentage" office:value="1" calcext:value-type="percentage">
            <text:p>100 %</text:p>
          </table:table-cell>
          <table:table-cell table:style-name="ce330" table:formula="of:=+[.C68]/[.B68]" office:value-type="percentage" office:value="0.227821521664861" calcext:value-type="percentage">
            <text:p>22.78 %</text:p>
          </table:table-cell>
          <table:table-cell table:style-name="ce330" table:formula="of:=+[.D68]/[.B68]" office:value-type="percentage" office:value="0.772178478335139" calcext:value-type="percentage">
            <text:p>77.22 %</text:p>
          </table:table-cell>
          <table:table-cell table:style-name="ce260"/>
          <table:table-cell table:number-columns-repeated="5"/>
          <table:table-cell table:style-name="ce364" table:formula="of:=+[.L68]+[.O68]" office:value-type="float" office:value="157481.215045237" calcext:value-type="float">
            <text:p>157,481.22</text:p>
          </table:table-cell>
          <table:table-cell table:number-columns-repeated="4"/>
          <table:table-cell table:style-name="ce380" table:formula="of:=+[.N69]+[.M69]" office:value-type="percentage" office:value="1" calcext:value-type="percentage">
            <text:p>100.00 %</text:p>
          </table:table-cell>
          <table:table-cell table:number-columns-repeated="241"/>
        </table:table-row>
        <table:table-row table:style-name="ro21">
          <table:table-cell/>
          <table:table-cell table:style-name="ce322" table:formula="of:=+[.B69]-[.B68]" office:value-type="float" office:value="0" calcext:value-type="float">
            <text:p>0.00</text:p>
          </table:table-cell>
          <table:table-cell table:number-columns-repeated="2"/>
          <table:table-cell table:style-name="ce260"/>
          <table:table-cell table:number-columns-repeated="5"/>
          <table:table-cell table:style-name="ce365" table:formula="of:=+[.F16]-[.K68]" office:value-type="float" office:value="0" calcext:value-type="float">
            <text:p>0.00</text:p>
          </table:table-cell>
          <table:table-cell table:number-columns-repeated="246"/>
        </table:table-row>
        <table:table-row table:style-name="ro21">
          <table:table-cell table:number-columns-repeated="2"/>
          <table:table-cell table:style-name="ce331" table:formula="of:=+[.B68]*0.2" office:value-type="float" office:value="31496.2430090474" calcext:value-type="float">
            <text:p>31,496.24</text:p>
          </table:table-cell>
          <table:table-cell/>
          <table:table-cell table:style-name="ce260"/>
          <table:table-cell table:number-columns-repeated="252"/>
        </table:table-row>
        <table:table-row table:style-name="ro21">
          <table:table-cell table:number-columns-repeated="4"/>
          <table:table-cell table:style-name="ce260"/>
          <table:table-cell table:number-columns-repeated="7"/>
          <table:table-cell table:style-name="ce331"/>
          <table:table-cell table:number-columns-repeated="244"/>
        </table:table-row>
        <table:table-row table:style-name="ro21" table:number-rows-repeated="2">
          <table:table-cell table:number-columns-repeated="4"/>
          <table:table-cell table:style-name="ce260"/>
          <table:table-cell table:number-columns-repeated="252"/>
        </table:table-row>
        <table:table-row table:style-name="ro21" table:number-rows-repeated="1048500">
          <table:table-cell table:number-columns-repeated="257"/>
        </table:table-row>
        <table:table-row table:style-name="ro21">
          <table:table-cell table:number-columns-repeated="257"/>
        </table:table-row>
        <table:named-expressions>
          <table:named-range table:name="_xlnm.Print_Area" table:base-cell-address="$POBLACION.$A$1" table:cell-range-address="$INVERSION.$E$4:.$F$16" table:range-usable-as="print-range"/>
        </table:named-expressions>
      </table:table>
      <table:table table:name="RESUM INVER" table:style-name="ta12" table:print-ranges="'RESUM INVER'.C1:'RESUM INVER'.H17">
        <table:table-column table:style-name="co62" table:default-cell-style-name="ce255"/>
        <table:table-column table:style-name="co66" table:default-cell-style-name="ce255"/>
        <table:table-column table:style-name="co73" table:default-cell-style-name="ce207"/>
        <table:table-column table:style-name="co70" table:default-cell-style-name="ce207"/>
        <table:table-column table:style-name="co71" table:default-cell-style-name="ce207"/>
        <table:table-column table:style-name="co56" table:default-cell-style-name="ce223"/>
        <table:table-column table:style-name="co72" table:default-cell-style-name="ce207"/>
        <table:table-column table:style-name="co27" table:default-cell-style-name="ce255"/>
        <table:table-column table:style-name="co72" table:default-cell-style-name="ce255"/>
        <table:table-column table:style-name="co1" table:number-columns-repeated="248" table:default-cell-style-name="ce255"/>
        <table:table-column table:style-name="co12" table:number-columns-repeated="16127"/>
        <table:table-row table:style-name="ro8">
          <table:table-cell table:number-columns-repeated="2"/>
          <table:table-cell table:style-name="ce341" office:value-type="string" calcext:value-type="string" table:number-columns-spanned="1" table:number-rows-spanned="5">
            <text:p>CONCEPTO</text:p>
          </table:table-cell>
          <table:table-cell table:style-name="ce341" office:value-type="string" calcext:value-type="string" table:number-columns-spanned="5" table:number-rows-spanned="1">
            <text:p>PRESUPUESTO </text:p>
          </table:table-cell>
          <table:covered-table-cell table:number-columns-repeated="4" table:style-name="ce341"/>
          <table:table-cell table:number-columns-repeated="249"/>
        </table:table-row>
        <table:table-row table:style-name="ro29">
          <table:table-cell table:number-columns-repeated="2"/>
          <table:covered-table-cell table:style-name="ce341"/>
          <table:table-cell table:style-name="ce341" office:value-type="string" calcext:value-type="string" table:number-columns-spanned="5" table:number-rows-spanned="1">
            <text:p>(Considerado en la Propuesta Productiva)</text:p>
          </table:table-cell>
          <table:covered-table-cell table:number-columns-repeated="4" table:style-name="ce341"/>
          <table:table-cell table:number-columns-repeated="249"/>
        </table:table-row>
        <table:table-row table:style-name="ro29">
          <table:table-cell table:style-name="ce301" office:value-type="string" calcext:value-type="string">
            <text:p>CUADRO DE PRESUPUESTO</text:p>
          </table:table-cell>
          <table:table-cell/>
          <table:covered-table-cell table:style-name="ce341"/>
          <table:table-cell table:style-name="ce341" office:value-type="string" calcext:value-type="string" table:number-columns-spanned="1" table:number-rows-spanned="3">
            <text:p><text:s/>TOTAL</text:p>
          </table:table-cell>
          <table:table-cell table:style-name="ce366" office:value-type="string" calcext:value-type="string" table:number-columns-spanned="1" table:number-rows-spanned="3">
            <text:p>Monto financiado por el GR</text:p>
          </table:table-cell>
          <table:table-cell table:style-name="ce368" office:value-type="string" calcext:value-type="string" table:number-columns-spanned="3" table:number-rows-spanned="1">
            <text:p>Monto financiado por los AEO</text:p>
          </table:table-cell>
          <table:covered-table-cell table:number-columns-repeated="2" table:style-name="ce368"/>
          <table:table-cell table:number-columns-repeated="249"/>
        </table:table-row>
        <table:table-row table:style-name="ro8">
          <table:table-cell table:style-name="ce302" office:value-type="string" calcext:value-type="string" table:number-columns-spanned="1" table:number-rows-spanned="2">
            <text:p>CONCEPTO</text:p>
          </table:table-cell>
          <table:table-cell/>
          <table:covered-table-cell table:number-columns-repeated="2" table:style-name="ce341"/>
          <table:covered-table-cell table:style-name="ce366"/>
          <table:table-cell table:style-name="ce341" office:value-type="string" calcext:value-type="string">
            <text:p>En efectivo</text:p>
          </table:table-cell>
          <table:table-cell table:style-name="ce341" office:value-type="string" calcext:value-type="string">
            <text:p>En Valorizaciones</text:p>
          </table:table-cell>
          <table:table-cell table:style-name="ce341" office:value-type="string" calcext:value-type="string">
            <text:p>En Total</text:p>
          </table:table-cell>
          <table:table-cell table:number-columns-repeated="249"/>
        </table:table-row>
        <table:table-row table:style-name="ro21">
          <table:covered-table-cell table:style-name="ce302"/>
          <table:table-cell/>
          <table:covered-table-cell table:number-columns-repeated="2" table:style-name="ce341"/>
          <table:covered-table-cell table:style-name="ce366"/>
          <table:table-cell table:number-columns-repeated="3" table:style-name="ce368" office:value-type="string" calcext:value-type="string">
            <text:p>(s/)</text:p>
          </table:table-cell>
          <table:table-cell table:number-columns-repeated="249"/>
        </table:table-row>
        <table:table-row table:style-name="ro21">
          <table:table-cell table:style-name="ce303" office:value-type="string" calcext:value-type="string">
            <text:p>I. INVERSION FIJA</text:p>
          </table:table-cell>
          <table:table-cell/>
          <table:table-cell table:style-name="ce342" office:value-type="string" calcext:value-type="string">
            <text:p>I. INVERSION FIJA</text:p>
          </table:table-cell>
          <table:table-cell table:style-name="ce354" table:formula="of:=+[$INVERSION.K6]" office:value-type="float" office:value="140584.5" calcext:value-type="float">
            <text:p>140,584.50</text:p>
          </table:table-cell>
          <table:table-cell table:style-name="ce354" table:formula="of:=+[$INVERSION.L6]" office:value-type="float" office:value="108951" calcext:value-type="float">
            <text:p>108,951.00</text:p>
          </table:table-cell>
          <table:table-cell table:style-name="ce369" table:formula="of:=+[$INVERSION.M6]" office:value-type="float" office:value="5000" calcext:value-type="float">
            <text:p>5,000.00</text:p>
          </table:table-cell>
          <table:table-cell table:style-name="ce369" table:formula="of:=+[$INVERSION.N6]" office:value-type="float" office:value="26633.5" calcext:value-type="float">
            <text:p>26,633.50</text:p>
          </table:table-cell>
          <table:table-cell table:style-name="ce369" table:formula="of:=+[.G6]+[.F6]" office:value-type="float" office:value="31633.5" calcext:value-type="float">
            <text:p>31,633.50</text:p>
          </table:table-cell>
          <table:table-cell table:number-columns-repeated="249"/>
        </table:table-row>
        <table:table-row table:style-name="ro21">
          <table:table-cell table:style-name="ce304" office:value-type="string" calcext:value-type="string">
            <text:p>I. 1 INVERSION FIJA TANGIBLE</text:p>
          </table:table-cell>
          <table:table-cell/>
          <table:table-cell table:style-name="ce342" office:value-type="string" calcext:value-type="string">
            <text:p>I. 1 INVERSION FIJA TANGIBLE</text:p>
          </table:table-cell>
          <table:table-cell table:style-name="ce354" table:formula="of:=+[$INVERSION.K7]" office:value-type="float" office:value="126184.5" calcext:value-type="float">
            <text:p>126,184.50</text:p>
          </table:table-cell>
          <table:table-cell table:style-name="ce354" table:formula="of:=+[$INVERSION.L7]" office:value-type="float" office:value="94551" calcext:value-type="float">
            <text:p>94,551.00</text:p>
          </table:table-cell>
          <table:table-cell table:style-name="ce369" table:formula="of:=+[$INVERSION.M7]" office:value-type="float" office:value="5000" calcext:value-type="float">
            <text:p>5,000.00</text:p>
          </table:table-cell>
          <table:table-cell table:style-name="ce369" table:formula="of:=+[$INVERSION.N7]" office:value-type="float" office:value="26633.5" calcext:value-type="float">
            <text:p>26,633.50</text:p>
          </table:table-cell>
          <table:table-cell table:style-name="ce369" table:formula="of:=+[.G7]+[.F7]" office:value-type="float" office:value="31633.5" calcext:value-type="float">
            <text:p>31,633.50</text:p>
          </table:table-cell>
          <table:table-cell table:number-columns-repeated="249"/>
        </table:table-row>
        <table:table-row table:style-name="ro21">
          <table:table-cell table:style-name="ce304" office:value-type="string" calcext:value-type="string">
            <text:p>I.1.1 TERRENOS Y OBRAS CIVILES</text:p>
          </table:table-cell>
          <table:table-cell table:style-name="ce340"/>
          <table:table-cell table:style-name="ce345" office:value-type="string" calcext:value-type="string">
            <text:p>I.1.1 TERRENOS Y OBRAS CIVILES</text:p>
          </table:table-cell>
          <table:table-cell table:style-name="ce354" table:formula="of:=+[$INVERSION.K8]" office:value-type="float" office:value="73528.5" calcext:value-type="float">
            <text:p>73,528.50</text:p>
          </table:table-cell>
          <table:table-cell table:style-name="ce354" table:formula="of:=+[$INVERSION.L8]" office:value-type="float" office:value="46895" calcext:value-type="float">
            <text:p>46,895.00</text:p>
          </table:table-cell>
          <table:table-cell table:style-name="ce370" office:value-type="float" office:value="0" calcext:value-type="float">
            <text:p>0.00</text:p>
          </table:table-cell>
          <table:table-cell table:style-name="ce369" table:formula="of:=+[$INVERSION.N8]" office:value-type="float" office:value="26633.5" calcext:value-type="float">
            <text:p>26,633.50</text:p>
          </table:table-cell>
          <table:table-cell table:style-name="ce369" table:formula="of:=+[.G8]+[.F8]" office:value-type="float" office:value="26633.5" calcext:value-type="float">
            <text:p>26,633.50</text:p>
          </table:table-cell>
          <table:table-cell table:style-name="ce340" table:number-columns-repeated="16376"/>
        </table:table-row>
        <table:table-row table:style-name="ro21">
          <table:table-cell table:style-name="ce304" office:value-type="string" calcext:value-type="string">
            <text:p>I.1.2.MAQUINARIA Y EQUIPOS </text:p>
          </table:table-cell>
          <table:table-cell/>
          <table:table-cell table:style-name="ce345" office:value-type="string" calcext:value-type="string">
            <text:p>I.1.2.MAQUINARIA Y EQUIPOS </text:p>
          </table:table-cell>
          <table:table-cell table:style-name="ce355" table:formula="of:=+[$INVERSION.K41]" office:value-type="float" office:value="47356" calcext:value-type="float">
            <text:p>47,356.00</text:p>
          </table:table-cell>
          <table:table-cell table:style-name="ce355" table:formula="of:=+[$INVERSION.L41]" office:value-type="float" office:value="47356" calcext:value-type="float">
            <text:p>47,356.00</text:p>
          </table:table-cell>
          <table:table-cell table:number-columns-repeated="2" table:style-name="ce355" office:value-type="float" office:value="0" calcext:value-type="float">
            <text:p>0.00</text:p>
          </table:table-cell>
          <table:table-cell table:style-name="ce369" table:formula="of:=+[.G9]+[.F9]" office:value-type="float" office:value="0" calcext:value-type="float">
            <text:p>0.00</text:p>
          </table:table-cell>
          <table:table-cell table:number-columns-repeated="249"/>
        </table:table-row>
        <table:table-row table:style-name="ro21">
          <table:table-cell table:style-name="ce304" office:value-type="string" calcext:value-type="string">
            <text:p>I.1.3. <text:s/>VEHICULOS</text:p>
          </table:table-cell>
          <table:table-cell/>
          <table:table-cell table:style-name="ce345" office:value-type="string" calcext:value-type="string">
            <text:p>I.1.3. <text:s/>VEHICULOS</text:p>
          </table:table-cell>
          <table:table-cell table:number-columns-repeated="4" table:style-name="ce355" office:value-type="float" office:value="0" calcext:value-type="float">
            <text:p>0.00</text:p>
          </table:table-cell>
          <table:table-cell table:style-name="ce369" table:formula="of:=+[.G10]+[.F10]" office:value-type="float" office:value="0" calcext:value-type="float">
            <text:p>0.00</text:p>
          </table:table-cell>
          <table:table-cell table:number-columns-repeated="249"/>
        </table:table-row>
        <table:table-row table:style-name="ro21">
          <table:table-cell table:style-name="ce304" office:value-type="string" calcext:value-type="string">
            <text:p>I.1.4. MUEBLES Y ENSERES</text:p>
          </table:table-cell>
          <table:table-cell/>
          <table:table-cell table:style-name="ce345" office:value-type="string" calcext:value-type="string">
            <text:p>I.1.4. MUEBLES Y ENSERES</text:p>
          </table:table-cell>
          <table:table-cell table:style-name="ce355" table:formula="of:=+[$INVERSION.K57]" office:value-type="float" office:value="5300" calcext:value-type="float">
            <text:p>5,300.00</text:p>
          </table:table-cell>
          <table:table-cell table:style-name="ce355" table:formula="of:=+[$INVERSION.L57]" office:value-type="float" office:value="300" calcext:value-type="float">
            <text:p>300.00</text:p>
          </table:table-cell>
          <table:table-cell table:style-name="ce355" table:formula="of:=+[$INVERSION.M57]" office:value-type="float" office:value="5000" calcext:value-type="float">
            <text:p>5,000.00</text:p>
          </table:table-cell>
          <table:table-cell table:style-name="ce355" office:value-type="float" office:value="0" calcext:value-type="float">
            <text:p>0.00</text:p>
          </table:table-cell>
          <table:table-cell table:style-name="ce369" table:formula="of:=+[.G11]+[.F11]" office:value-type="float" office:value="5000" calcext:value-type="float">
            <text:p>5,000.00</text:p>
          </table:table-cell>
          <table:table-cell table:number-columns-repeated="249"/>
        </table:table-row>
        <table:table-row table:style-name="ro21">
          <table:table-cell table:style-name="ce304" office:value-type="string" calcext:value-type="string">
            <text:p>I.2. INVERSION FIJA INTANGIBLE</text:p>
          </table:table-cell>
          <table:table-cell/>
          <table:table-cell table:style-name="ce342" office:value-type="string" calcext:value-type="string">
            <text:p>I.2. INVERSION FIJA INTANGIBLE</text:p>
          </table:table-cell>
          <table:table-cell table:style-name="ce355" office:value-type="float" office:value="13900" calcext:value-type="float">
            <text:p>13,900.00</text:p>
          </table:table-cell>
          <table:table-cell table:style-name="ce355" table:formula="of:=+[$INVERSION.L61]" office:value-type="float" office:value="14400" calcext:value-type="float">
            <text:p>14,400.00</text:p>
          </table:table-cell>
          <table:table-cell table:number-columns-repeated="2" table:style-name="ce370" office:value-type="float" office:value="0" calcext:value-type="float">
            <text:p>0.00</text:p>
          </table:table-cell>
          <table:table-cell table:style-name="ce369" table:formula="of:=+[.G12]+[.F12]" office:value-type="float" office:value="0" calcext:value-type="float">
            <text:p>0.00</text:p>
          </table:table-cell>
          <table:table-cell table:number-columns-repeated="249"/>
        </table:table-row>
        <table:table-row table:style-name="ro21">
          <table:table-cell table:style-name="ce303" office:value-type="string" calcext:value-type="string">
            <text:p>II. CAPITAL DE TRABAJO</text:p>
          </table:table-cell>
          <table:table-cell/>
          <table:table-cell table:style-name="ce342" office:value-type="string" calcext:value-type="string">
            <text:p>II. CAPITAL DE TRABAJO</text:p>
          </table:table-cell>
          <table:table-cell table:style-name="ce355" table:formula="of:=+[$INVERSION.K65]" office:value-type="float" office:value="4244.11004523721" calcext:value-type="float">
            <text:p>4,244.11</text:p>
          </table:table-cell>
          <table:table-cell table:style-name="ce355" table:number-columns-repeated="2"/>
          <table:table-cell table:style-name="ce355" table:formula="of:=+[.D13]" office:value-type="float" office:value="4244.11004523721" calcext:value-type="float">
            <text:p>4,244.11</text:p>
          </table:table-cell>
          <table:table-cell table:style-name="ce369" table:formula="of:=+[.G13]+[.F13]" office:value-type="float" office:value="4244.11004523721" calcext:value-type="float">
            <text:p>4,244.11</text:p>
          </table:table-cell>
          <table:table-cell table:number-columns-repeated="249"/>
        </table:table-row>
        <table:table-row table:style-name="ro21">
          <table:table-cell table:style-name="ce303" office:value-type="string" calcext:value-type="string">
            <text:p>III. GASTOS GENERALES (7.00 %)</text:p>
          </table:table-cell>
          <table:table-cell/>
          <table:table-cell table:style-name="ce342" office:value-type="string" calcext:value-type="string">
            <text:p>III. GASTOS GENERALES (6.00 %)</text:p>
          </table:table-cell>
          <table:table-cell table:style-name="ce355" table:formula="of:=+[$INVERSION.K66]" office:value-type="float" office:value="8435.07" calcext:value-type="float">
            <text:p>8,435.07</text:p>
          </table:table-cell>
          <table:table-cell table:style-name="ce367" table:formula="of:=+[$INVERSION.L66]" office:value-type="float" office:value="8435.07" calcext:value-type="float">
            <text:p>8,435.07</text:p>
          </table:table-cell>
          <table:table-cell table:style-name="ce374"/>
          <table:table-cell table:style-name="ce377"/>
          <table:table-cell table:style-name="ce367"/>
          <table:table-cell table:number-columns-repeated="249"/>
        </table:table-row>
        <table:table-row table:style-name="ro21">
          <table:table-cell table:style-name="ce303" office:value-type="string" calcext:value-type="string">
            <text:p>IV. <text:s/>GASTOS DE SUPERVISION (3.0%)</text:p>
          </table:table-cell>
          <table:table-cell/>
          <table:table-cell table:style-name="ce342" office:value-type="string" calcext:value-type="string">
            <text:p>IV. <text:s/>GASTOS DE SUPERVISION (3.0%)</text:p>
          </table:table-cell>
          <table:table-cell table:style-name="ce355" table:formula="of:=+[$INVERSION.K67]" office:value-type="float" office:value="4217.535" calcext:value-type="float">
            <text:p>4,217.54</text:p>
          </table:table-cell>
          <table:table-cell table:style-name="ce367" table:formula="of:=+[$INVERSION.K67]" office:value-type="float" office:value="4217.535" calcext:value-type="float">
            <text:p>4,217.54</text:p>
          </table:table-cell>
          <table:table-cell table:style-name="ce374"/>
          <table:table-cell table:style-name="ce377"/>
          <table:table-cell table:style-name="ce367"/>
          <table:table-cell table:number-columns-repeated="249"/>
        </table:table-row>
        <table:table-row table:style-name="ro21">
          <table:table-cell table:style-name="ce309" office:value-type="string" calcext:value-type="string">
            <text:p>TOTAL INVERSIÓN</text:p>
          </table:table-cell>
          <table:table-cell/>
          <table:table-cell table:style-name="ce381" office:value-type="string" calcext:value-type="string">
            <text:p>TOTAL INVERSIÓN</text:p>
          </table:table-cell>
          <table:table-cell table:style-name="ce382" table:formula="of:=+[.D6]+[.D13]+[.D14]+[.D15]" office:value-type="float" office:value="157481.215045237" calcext:value-type="float">
            <text:p>157,481.22</text:p>
          </table:table-cell>
          <table:table-cell table:style-name="ce382" table:formula="of:=+[.E6]+[.E13]+[.E14]+[.E15]" office:value-type="float" office:value="121603.605" calcext:value-type="float">
            <text:p>121,603.61</text:p>
          </table:table-cell>
          <table:table-cell table:style-name="ce382" table:formula="of:=+[.F6]+[.F13]+[.F14]+[.F15]" office:value-type="float" office:value="5000" calcext:value-type="float">
            <text:p>5,000.00</text:p>
          </table:table-cell>
          <table:table-cell table:style-name="ce382" table:formula="of:=+[.G6]+[.G13]+[.G14]+[.G15]" office:value-type="float" office:value="30877.6100452372" calcext:value-type="float">
            <text:p>30,877.61</text:p>
          </table:table-cell>
          <table:table-cell table:style-name="ce382" table:formula="of:=+[.H6]+[.H13]+[.H14]+[.H15]" office:value-type="float" office:value="35877.6100452372" calcext:value-type="float">
            <text:p>35,877.61</text:p>
          </table:table-cell>
          <table:table-cell table:style-name="ce333" table:formula="of:=+[.H6]+[.H13]" office:value-type="float" office:value="35877.6100452372" calcext:value-type="float">
            <text:p>35877.61</text:p>
          </table:table-cell>
          <table:table-cell table:number-columns-repeated="248"/>
        </table:table-row>
        <table:table-row table:style-name="ro21">
          <table:table-cell table:number-columns-repeated="2"/>
          <table:table-cell table:style-name="ce274" office:value-type="string" calcext:value-type="string">
            <text:p>PORCENTAJE</text:p>
          </table:table-cell>
          <table:table-cell table:style-name="ce363" office:value-type="percentage" office:value="1" calcext:value-type="percentage">
            <text:p>100.00 %</text:p>
          </table:table-cell>
          <table:table-cell table:style-name="ce363" office:value-type="percentage" office:value="0.793389850235807" calcext:value-type="percentage">
            <text:p>79.34 %</text:p>
          </table:table-cell>
          <table:table-cell table:style-name="ce363" table:formula="of:=+[.F16]/[.H16]" office:value-type="percentage" office:value="0.139362683124534" calcext:value-type="percentage">
            <text:p>13.94 %</text:p>
          </table:table-cell>
          <table:table-cell table:style-name="ce363" table:formula="of:=+[.G16]/[.H16]" office:value-type="percentage" office:value="0.860637316875466" calcext:value-type="percentage">
            <text:p>86.06 %</text:p>
          </table:table-cell>
          <table:table-cell table:style-name="ce363" office:value-type="percentage" office:value="0.206610149764193" calcext:value-type="percentage">
            <text:p>20.66 %</text:p>
          </table:table-cell>
          <table:table-cell table:style-name="ce383"/>
          <table:table-cell table:number-columns-repeated="248"/>
        </table:table-row>
        <table:table-row table:style-name="ro21">
          <table:table-cell table:number-columns-repeated="3"/>
          <table:table-cell table:style-name="ce364" table:formula="of:=+[$INVERSION.K68]" office:value-type="float" office:value="157481.215045237" calcext:value-type="float">
            <text:p>157,481.22</text:p>
          </table:table-cell>
          <table:table-cell table:style-name="ce364" table:formula="of:=+[$INVERSION.L68]" office:value-type="float" office:value="121603.605" calcext:value-type="float">
            <text:p>121,603.61</text:p>
          </table:table-cell>
          <table:table-cell table:style-name="ce331" table:formula="of:=+[$INVERSION.M68]" office:value-type="float" office:value="5000" calcext:value-type="float">
            <text:p>5,000.00</text:p>
          </table:table-cell>
          <table:table-cell table:style-name="ce364" table:formula="of:=+[$INVERSION.N68]" office:value-type="float" office:value="30877.6100452372" calcext:value-type="float">
            <text:p>30,877.61</text:p>
          </table:table-cell>
          <table:table-cell table:style-name="ce336" table:formula="of:=+[$INVERSION.O68]" office:value-type="float" office:value="35877.6100452372" calcext:value-type="float">
            <text:p>35,877.61</text:p>
          </table:table-cell>
          <table:table-cell table:style-name="ce336" table:formula="of:=+[.H16]-35877.61" office:value-type="float" office:value="0.0000452372041763738" calcext:value-type="float">
            <text:p>0.00</text:p>
          </table:table-cell>
          <table:table-cell table:number-columns-repeated="248"/>
        </table:table-row>
        <table:table-row table:style-name="ro21">
          <table:table-cell table:number-columns-repeated="3"/>
          <table:table-cell table:style-name="ce365" table:formula="of:=+[.D18]-[.D16]" office:value-type="float" office:value="0" calcext:value-type="float">
            <text:p>0.00</text:p>
          </table:table-cell>
          <table:table-cell table:style-name="ce365" table:formula="of:=+[.E18]-[.E16]" office:value-type="float" office:value="0" calcext:value-type="float">
            <text:p>0.00</text:p>
          </table:table-cell>
          <table:table-cell table:style-name="ce365" table:formula="of:=+[.F18]-[.F16]" office:value-type="float" office:value="0" calcext:value-type="float">
            <text:p>0.00</text:p>
          </table:table-cell>
          <table:table-cell table:style-name="ce365" table:formula="of:=+[.G18]-[.G16]" office:value-type="float" office:value="0" calcext:value-type="float">
            <text:p>0.00</text:p>
          </table:table-cell>
          <table:table-cell table:style-name="ce365" table:formula="of:=+[.H18]-[.H16]" office:value-type="float" office:value="0" calcext:value-type="float">
            <text:p>0.00</text:p>
          </table:table-cell>
          <table:table-cell table:number-columns-repeated="249"/>
        </table:table-row>
        <table:table-row table:style-name="ro21">
          <table:table-cell table:number-columns-repeated="257"/>
        </table:table-row>
        <table:table-row table:style-name="ro21">
          <table:table-cell table:number-columns-repeated="5"/>
          <table:table-cell table:style-name="ce331"/>
          <table:table-cell table:number-columns-repeated="251"/>
        </table:table-row>
        <table:table-row table:style-name="ro21" table:number-rows-repeated="9">
          <table:table-cell table:number-columns-repeated="257"/>
        </table:table-row>
        <table:table-row table:style-name="ro21">
          <table:table-cell table:number-columns-repeated="3"/>
          <table:table-cell office:value-type="string" calcext:value-type="string">
            <text:p>|</text:p>
          </table:table-cell>
          <table:table-cell table:number-columns-repeated="253"/>
        </table:table-row>
        <table:table-row table:style-name="ro21" table:number-rows-repeated="1048544">
          <table:table-cell table:number-columns-repeated="257"/>
        </table:table-row>
        <table:table-row table:style-name="ro21">
          <table:table-cell table:number-columns-repeated="257"/>
        </table:table-row>
        <table:named-expressions>
          <table:named-range table:name="_xlnm.Print_Area" table:base-cell-address="$POBLACION.$A$1" table:cell-range-address="$'RESUM INVER'.$C$1:.$H$17" table:range-usable-as="print-range"/>
        </table:named-expressions>
      </table:table>
      <table:table table:name="CRONOG" table:style-name="ta13" table:print-ranges="CRONOG.A2:CRONOG.H39">
        <table:table-column table:style-name="co74" table:default-cell-style-name="ce384"/>
        <table:table-column table:style-name="co28" table:number-columns-repeated="5" table:default-cell-style-name="ce384"/>
        <table:table-column table:style-name="co10" table:default-cell-style-name="ce397"/>
        <table:table-column table:style-name="co49" table:default-cell-style-name="ce406"/>
        <table:table-column table:style-name="co75" table:default-cell-style-name="ce384"/>
        <table:table-column table:style-name="co76" table:default-cell-style-name="ce384"/>
        <table:table-column table:style-name="co6" table:default-cell-style-name="ce384"/>
        <table:table-column table:style-name="co77" table:default-cell-style-name="ce384"/>
        <table:table-column table:style-name="co25" table:default-cell-style-name="ce384"/>
        <table:table-column table:style-name="co77" table:default-cell-style-name="ce384"/>
        <table:table-column table:style-name="co28" table:default-cell-style-name="ce384"/>
        <table:table-column table:style-name="co69" table:default-cell-style-name="ce384"/>
        <table:table-column table:style-name="co78" table:number-columns-repeated="2" table:default-cell-style-name="ce384"/>
        <table:table-column table:style-name="co79" table:default-cell-style-name="ce384"/>
        <table:table-column table:style-name="co80" table:default-cell-style-name="ce384"/>
        <table:table-column table:style-name="co30" table:default-cell-style-name="ce384"/>
        <table:table-column table:style-name="co28" table:default-cell-style-name="ce384"/>
        <table:table-column table:style-name="co81" table:default-cell-style-name="ce384"/>
        <table:table-column table:style-name="co78" table:default-cell-style-name="ce384"/>
        <table:table-column table:style-name="co70" table:default-cell-style-name="ce384"/>
        <table:table-column table:style-name="co31" table:default-cell-style-name="ce384"/>
        <table:table-column table:style-name="co29" table:default-cell-style-name="ce384"/>
        <table:table-column table:style-name="co36" table:default-cell-style-name="ce384"/>
        <table:table-column table:style-name="co8" table:default-cell-style-name="ce384"/>
        <table:table-column table:style-name="co68" table:default-cell-style-name="ce384"/>
        <table:table-column table:style-name="co13" table:default-cell-style-name="ce384"/>
        <table:table-column table:style-name="co38" table:default-cell-style-name="ce384"/>
        <table:table-column table:style-name="co1" table:number-columns-repeated="225" table:default-cell-style-name="ce384"/>
        <table:table-column table:style-name="co12" table:number-columns-repeated="16127"/>
        <table:table-row table:style-name="ro33">
          <table:table-cell table:number-columns-repeated="257"/>
        </table:table-row>
        <table:table-row table:style-name="ro24">
          <table:table-cell table:style-name="ce385" office:value-type="string" calcext:value-type="string" table:number-columns-spanned="8" table:number-rows-spanned="1">
            <text:p><text:s text:c="45"/>CRONOGRAMA DE EJECUCION FINANCIERO</text:p>
          </table:table-cell>
          <table:covered-table-cell table:number-columns-repeated="7" table:style-name="ce385"/>
          <table:table-cell table:style-name="ce413"/>
          <table:table-cell table:number-columns-repeated="248"/>
        </table:table-row>
        <table:table-row table:style-name="ro34">
          <table:table-cell table:style-name="ce386" office:value-type="string" calcext:value-type="string" table:number-columns-spanned="1" table:number-rows-spanned="3">
            <text:p>COMPONENTES</text:p>
          </table:table-cell>
          <table:table-cell table:style-name="ce386" office:value-type="string" calcext:value-type="string" table:number-columns-spanned="5" table:number-rows-spanned="1">
            <text:p>EJECUCIÓN</text:p>
          </table:table-cell>
          <table:covered-table-cell table:number-columns-repeated="4" table:style-name="ce386"/>
          <table:table-cell table:style-name="ce398" office:value-type="string" calcext:value-type="string">
            <text:p>OPERACIÓN</text:p>
          </table:table-cell>
          <table:table-cell table:style-name="ce407" office:value-type="string" office:string-value="TOTAL" calcext:value-type="string" table:number-columns-spanned="1" table:number-rows-spanned="3">
            <text:p><text:s/>TOTAL </text:p>
          </table:table-cell>
          <table:table-cell table:style-name="ce413"/>
          <table:table-cell table:number-columns-repeated="248"/>
        </table:table-row>
        <table:table-row table:style-name="ro34">
          <table:covered-table-cell table:style-name="ce386"/>
          <table:table-cell table:style-name="ce386" office:value-type="string" calcext:value-type="string" table:number-columns-spanned="5" table:number-rows-spanned="1">
            <text:p>MESES</text:p>
          </table:table-cell>
          <table:covered-table-cell table:number-columns-repeated="4" table:style-name="ce386"/>
          <table:table-cell table:style-name="ce398" office:value-type="string" calcext:value-type="string">
            <text:p>AÑOS </text:p>
          </table:table-cell>
          <table:covered-table-cell table:style-name="ce407"/>
          <table:table-cell table:style-name="ce413"/>
          <table:table-cell table:number-columns-repeated="248"/>
        </table:table-row>
        <table:table-row table:style-name="ro8">
          <table:covered-table-cell table:style-name="ce386"/>
          <table:table-cell table:style-name="ce386" office:value-type="float" office:value="1" calcext:value-type="float">
            <text:p>1</text:p>
          </table:table-cell>
          <table:table-cell table:style-name="ce386" office:value-type="float" office:value="2" calcext:value-type="float">
            <text:p>2</text:p>
          </table:table-cell>
          <table:table-cell table:style-name="ce386" office:value-type="float" office:value="3" calcext:value-type="float">
            <text:p>3</text:p>
          </table:table-cell>
          <table:table-cell table:style-name="ce386" office:value-type="float" office:value="4" calcext:value-type="float">
            <text:p>4</text:p>
          </table:table-cell>
          <table:table-cell table:style-name="ce386" office:value-type="float" office:value="5" calcext:value-type="float">
            <text:p>5</text:p>
          </table:table-cell>
          <table:table-cell table:style-name="ce386" office:value-type="string" calcext:value-type="string">
            <text:p>1 AL 5</text:p>
          </table:table-cell>
          <table:covered-table-cell table:style-name="ce407"/>
          <table:table-cell table:style-name="ce413"/>
          <table:table-cell table:number-columns-repeated="248"/>
        </table:table-row>
        <table:table-row table:style-name="ro33">
          <table:table-cell table:style-name="ce387" office:value-type="string" calcext:value-type="string">
            <text:p>I.INVERSION FIJA </text:p>
          </table:table-cell>
          <table:table-cell table:style-name="ce387" table:number-columns-repeated="5"/>
          <table:table-cell table:style-name="ce399"/>
          <table:table-cell table:style-name="ce408" table:formula="of:=[.H7]+[.H12]" office:value-type="float" office:value="140584.5" calcext:value-type="float">
            <text:p><text:s/>140,584.50 </text:p>
          </table:table-cell>
          <table:table-cell table:style-name="ce413"/>
          <table:table-cell table:number-columns-repeated="248"/>
        </table:table-row>
        <table:table-row table:style-name="ro33">
          <table:table-cell table:style-name="ce388" office:value-type="string" calcext:value-type="string">
            <text:p><text:s text:c="2"/>I.1. INVERSION FIJA TANGIBLE</text:p>
          </table:table-cell>
          <table:table-cell table:style-name="ce388" table:number-columns-repeated="5"/>
          <table:table-cell table:style-name="ce400"/>
          <table:table-cell table:style-name="ce409" table:formula="of:=SUM([.H8:.H11])" office:value-type="float" office:value="126184.5" calcext:value-type="float">
            <text:p><text:s/>126,184.50 </text:p>
          </table:table-cell>
          <table:table-cell table:number-columns-repeated="249"/>
        </table:table-row>
        <table:table-row table:style-name="ro33">
          <table:table-cell table:style-name="ce388" office:value-type="string" calcext:value-type="string">
            <text:p><text:s text:c="5"/>I.1.1. TERRENOS Y OBRAS CIVILES</text:p>
          </table:table-cell>
          <table:table-cell table:style-name="ce393" table:formula="of:=[$INVERSION.$F$8]/5" office:value-type="float" office:value="14705.7" calcext:value-type="float">
            <text:p>14,705.70</text:p>
          </table:table-cell>
          <table:table-cell table:style-name="ce393" table:formula="of:=+[.B8]" office:value-type="float" office:value="14705.7" calcext:value-type="float">
            <text:p>14,705.70</text:p>
          </table:table-cell>
          <table:table-cell table:style-name="ce393" table:formula="of:=+[.C8]" office:value-type="float" office:value="14705.7" calcext:value-type="float">
            <text:p>14,705.70</text:p>
          </table:table-cell>
          <table:table-cell table:style-name="ce393" table:formula="of:=+[.D8]" office:value-type="float" office:value="14705.7" calcext:value-type="float">
            <text:p>14,705.70</text:p>
          </table:table-cell>
          <table:table-cell table:style-name="ce393" table:formula="of:=+[.E8]" office:value-type="float" office:value="14705.7" calcext:value-type="float">
            <text:p>14,705.70</text:p>
          </table:table-cell>
          <table:table-cell table:style-name="ce401"/>
          <table:table-cell table:style-name="ce409" table:formula="of:=SUM([.B8:.G8])" office:value-type="float" office:value="73528.5" calcext:value-type="float">
            <text:p><text:s/>73,528.50 </text:p>
          </table:table-cell>
          <table:table-cell table:number-columns-repeated="249"/>
        </table:table-row>
        <table:table-row table:style-name="ro33">
          <table:table-cell table:style-name="ce388" office:value-type="string" calcext:value-type="string">
            <text:p><text:s text:c="5"/>I.1.2. MAQUINARIA Y EQUIPO</text:p>
          </table:table-cell>
          <table:table-cell table:style-name="ce393"/>
          <table:table-cell table:style-name="ce393" table:formula="of:=[$INVERSION.$F$9]/3" office:value-type="float" office:value="15785.3333333333" calcext:value-type="float">
            <text:p>15,785.33</text:p>
          </table:table-cell>
          <table:table-cell table:style-name="ce393" table:formula="of:=+[.C9]" office:value-type="float" office:value="15785.3333333333" calcext:value-type="float">
            <text:p>15,785.33</text:p>
          </table:table-cell>
          <table:table-cell table:style-name="ce393" table:formula="of:=+[.D9]" office:value-type="float" office:value="15785.3333333333" calcext:value-type="float">
            <text:p>15,785.33</text:p>
          </table:table-cell>
          <table:table-cell table:style-name="ce393"/>
          <table:table-cell table:style-name="ce401"/>
          <table:table-cell table:style-name="ce409" table:formula="of:=SUM([.B9:.G9])" office:value-type="float" office:value="47356" calcext:value-type="float">
            <text:p><text:s/>47,356.00 </text:p>
          </table:table-cell>
          <table:table-cell table:number-columns-repeated="249"/>
        </table:table-row>
        <table:table-row table:style-name="ro33">
          <table:table-cell table:style-name="ce388" office:value-type="string" calcext:value-type="string">
            <text:p><text:s text:c="5"/>I.1.3. VEHICULOS</text:p>
          </table:table-cell>
          <table:table-cell table:style-name="ce393" table:number-columns-repeated="5"/>
          <table:table-cell table:style-name="ce401"/>
          <table:table-cell table:style-name="ce409" table:formula="of:=SUM([.B10:.G10])" office:value-type="float" office:value="0" calcext:value-type="float">
            <text:p><text:s/>- <text:s text:c="2"/></text:p>
          </table:table-cell>
          <table:table-cell table:number-columns-repeated="249"/>
        </table:table-row>
        <table:table-row table:style-name="ro33">
          <table:table-cell table:style-name="ce388" office:value-type="string" calcext:value-type="string">
            <text:p><text:s text:c="5"/>I.1.4. MUEBLES Y ENSERES</text:p>
          </table:table-cell>
          <table:table-cell table:style-name="ce393" table:number-columns-repeated="4"/>
          <table:table-cell table:style-name="ce393" table:formula="of:=[$INVERSION.F11]" office:value-type="float" office:value="5300" calcext:value-type="float">
            <text:p>5,300.00</text:p>
          </table:table-cell>
          <table:table-cell table:style-name="ce401"/>
          <table:table-cell table:style-name="ce409" table:formula="of:=SUM([.B11:.G11])" office:value-type="float" office:value="5300" calcext:value-type="float">
            <text:p><text:s/>5,300.00 </text:p>
          </table:table-cell>
          <table:table-cell table:number-columns-repeated="249"/>
        </table:table-row>
        <table:table-row table:style-name="ro33">
          <table:table-cell table:style-name="ce388" office:value-type="string" calcext:value-type="string">
            <text:p><text:s text:c="2"/>I.2. INVERSION FIJA INTANGIBLE</text:p>
          </table:table-cell>
          <table:table-cell table:style-name="ce393" table:formula="of:=[$INVERSION.F12]/5" office:value-type="float" office:value="2880" calcext:value-type="float">
            <text:p>2,880.00</text:p>
          </table:table-cell>
          <table:table-cell table:style-name="ce393" table:formula="of:=[.B12]" office:value-type="float" office:value="2880" calcext:value-type="float">
            <text:p>2,880.00</text:p>
          </table:table-cell>
          <table:table-cell table:style-name="ce393" table:formula="of:=[.C12]" office:value-type="float" office:value="2880" calcext:value-type="float">
            <text:p>2,880.00</text:p>
          </table:table-cell>
          <table:table-cell table:style-name="ce393" table:formula="of:=[.D12]" office:value-type="float" office:value="2880" calcext:value-type="float">
            <text:p>2,880.00</text:p>
          </table:table-cell>
          <table:table-cell table:style-name="ce393" table:formula="of:=[.D12]" office:value-type="float" office:value="2880" calcext:value-type="float">
            <text:p>2,880.00</text:p>
          </table:table-cell>
          <table:table-cell table:style-name="ce401"/>
          <table:table-cell table:style-name="ce409" table:formula="of:=SUM([.B12:.G12])" office:value-type="float" office:value="14400" calcext:value-type="float">
            <text:p><text:s/>14,400.00 </text:p>
          </table:table-cell>
          <table:table-cell table:number-columns-repeated="249"/>
        </table:table-row>
        <table:table-row table:style-name="ro33">
          <table:table-cell table:style-name="ce388" office:value-type="string" calcext:value-type="string">
            <text:p>II. CAPITAL DE TRABAJO</text:p>
          </table:table-cell>
          <table:table-cell table:style-name="ce393" table:number-columns-repeated="5"/>
          <table:table-cell table:style-name="ce402" table:formula="of:=[$INVERSION.$F$13]" office:value-type="float" office:value="4244.11004523721" calcext:value-type="float">
            <text:p>4,244.11</text:p>
          </table:table-cell>
          <table:table-cell table:style-name="ce409" table:formula="of:=SUM([.B13:.G13])" office:value-type="float" office:value="4244.11004523721" calcext:value-type="float">
            <text:p><text:s/>4,244.11 </text:p>
          </table:table-cell>
          <table:table-cell table:number-columns-repeated="249"/>
        </table:table-row>
        <table:table-row table:style-name="ro33">
          <table:table-cell table:style-name="ce388" table:formula="of:=[$INVERSION.E14]" office:value-type="string" office:string-value="III. GASTOS GENERALES ( 6.0 % )IF" calcext:value-type="string">
            <text:p>III. GASTOS GENERALES ( 6.0 % )IF</text:p>
          </table:table-cell>
          <table:table-cell table:style-name="ce393" table:formula="of:=[$INVERSION.$F$14]/5" office:value-type="float" office:value="1687.014" calcext:value-type="float">
            <text:p>1,687.01</text:p>
          </table:table-cell>
          <table:table-cell table:style-name="ce393" table:formula="of:=+[.B14]" office:value-type="float" office:value="1687.014" calcext:value-type="float">
            <text:p>1,687.01</text:p>
          </table:table-cell>
          <table:table-cell table:style-name="ce393" table:formula="of:=+[.C14]" office:value-type="float" office:value="1687.014" calcext:value-type="float">
            <text:p>1,687.01</text:p>
          </table:table-cell>
          <table:table-cell table:style-name="ce393" table:formula="of:=+[.D14]" office:value-type="float" office:value="1687.014" calcext:value-type="float">
            <text:p>1,687.01</text:p>
          </table:table-cell>
          <table:table-cell table:style-name="ce393" table:formula="of:=+[.E14]" office:value-type="float" office:value="1687.014" calcext:value-type="float">
            <text:p>1,687.01</text:p>
          </table:table-cell>
          <table:table-cell table:style-name="ce401"/>
          <table:table-cell table:style-name="ce409" table:formula="of:=SUM([.B14:.G14])" office:value-type="float" office:value="8435.07" calcext:value-type="float">
            <text:p><text:s/>8,435.07 </text:p>
          </table:table-cell>
          <table:table-cell table:number-columns-repeated="249"/>
        </table:table-row>
        <table:table-row table:style-name="ro33">
          <table:table-cell table:style-name="ce388" table:formula="of:=[$INVERSION.E15]" office:value-type="string" office:string-value="IV. GASTOS DE SUPERVISION (3.%) IF" calcext:value-type="string">
            <text:p>IV. GASTOS DE SUPERVISION (3.%) IF</text:p>
          </table:table-cell>
          <table:table-cell table:style-name="ce393" table:formula="of:=[$INVERSION.$F$15]/5" office:value-type="float" office:value="843.507" calcext:value-type="float">
            <text:p>843.51</text:p>
          </table:table-cell>
          <table:table-cell table:style-name="ce393" table:formula="of:=+[.B15]" office:value-type="float" office:value="843.507" calcext:value-type="float">
            <text:p>843.51</text:p>
          </table:table-cell>
          <table:table-cell table:style-name="ce393" table:formula="of:=+[.C15]" office:value-type="float" office:value="843.507" calcext:value-type="float">
            <text:p>843.51</text:p>
          </table:table-cell>
          <table:table-cell table:style-name="ce393" table:formula="of:=+[.D15]" office:value-type="float" office:value="843.507" calcext:value-type="float">
            <text:p>843.51</text:p>
          </table:table-cell>
          <table:table-cell table:style-name="ce393" table:formula="of:=+[.E15]" office:value-type="float" office:value="843.507" calcext:value-type="float">
            <text:p>843.51</text:p>
          </table:table-cell>
          <table:table-cell table:style-name="ce401"/>
          <table:table-cell table:style-name="ce409" table:formula="of:=SUM([.B15:.G15])" office:value-type="float" office:value="4217.535" calcext:value-type="float">
            <text:p><text:s/>4,217.54 </text:p>
          </table:table-cell>
          <table:table-cell table:number-columns-repeated="249"/>
        </table:table-row>
        <table:table-row table:style-name="ro33">
          <table:table-cell table:style-name="ce389" office:value-type="string" calcext:value-type="string">
            <text:p>TOTAL INVERSIÒN</text:p>
          </table:table-cell>
          <table:table-cell table:style-name="ce394" table:formula="of:=SUM([.B6:.B15])" office:value-type="float" office:value="20116.221" calcext:value-type="float">
            <text:p>20,116.22</text:p>
          </table:table-cell>
          <table:table-cell table:style-name="ce394" table:formula="of:=SUM([.C6:.C15])" office:value-type="float" office:value="35901.5543333333" calcext:value-type="float">
            <text:p>35,901.55</text:p>
          </table:table-cell>
          <table:table-cell table:style-name="ce394" table:formula="of:=SUM([.D6:.D15])" office:value-type="float" office:value="35901.5543333333" calcext:value-type="float">
            <text:p>35,901.55</text:p>
          </table:table-cell>
          <table:table-cell table:style-name="ce394" table:formula="of:=SUM([.E6:.E15])" office:value-type="float" office:value="35901.5543333333" calcext:value-type="float">
            <text:p>35,901.55</text:p>
          </table:table-cell>
          <table:table-cell table:style-name="ce394" table:formula="of:=SUM([.F6:.F15])" office:value-type="float" office:value="25416.221" calcext:value-type="float">
            <text:p>25,416.22</text:p>
          </table:table-cell>
          <table:table-cell table:style-name="ce403" table:formula="of:=SUM([.G6:.G15])" office:value-type="float" office:value="4244.11004523721" calcext:value-type="float">
            <text:p>4,244.11</text:p>
          </table:table-cell>
          <table:table-cell table:style-name="ce410" table:formula="of:=[.H14]+[.H13]+[.H6]+[.H15]" office:value-type="float" office:value="157481.215045237" calcext:value-type="float">
            <text:p><text:s/>157,481.22 </text:p>
          </table:table-cell>
          <table:table-cell table:style-name="ce414" table:formula="of:=+[$INVERSION.K68]" office:value-type="float" office:value="157481.215045237" calcext:value-type="float">
            <text:p>157,481.22</text:p>
          </table:table-cell>
          <table:table-cell table:number-columns-repeated="248"/>
        </table:table-row>
        <table:table-row table:style-name="ro33">
          <table:table-cell table:style-name="ce390"/>
          <table:table-cell table:number-columns-repeated="7"/>
          <table:table-cell table:style-name="ce415" table:formula="of:=+[.I16]-[.H16]" office:value-type="float" office:value="0" calcext:value-type="float">
            <text:p><text:s/>- <text:s text:c="2"/></text:p>
          </table:table-cell>
          <table:table-cell table:number-columns-repeated="248"/>
        </table:table-row>
        <table:table-row table:style-name="ro33">
          <table:table-cell table:number-columns-repeated="3"/>
          <table:table-cell table:style-name="ce396" table:number-columns-repeated="2"/>
          <table:table-cell table:number-columns-repeated="252"/>
        </table:table-row>
        <table:table-row table:style-name="ro24">
          <table:table-cell table:style-name="ce391" office:value-type="string" calcext:value-type="string" table:number-columns-spanned="2" table:number-rows-spanned="1">
            <text:p>Ejecucion financiera en la implementacion</text:p>
          </table:table-cell>
          <table:covered-table-cell table:style-name="ce391"/>
          <table:table-cell table:number-columns-repeated="5"/>
          <table:table-cell table:formula="of:=[.H16]-[.H13]" office:value-type="float" office:value="153237.105" calcext:value-type="float">
            <text:p><text:s/>153,237.11 </text:p>
          </table:table-cell>
          <table:table-cell table:number-columns-repeated="249"/>
        </table:table-row>
        <table:table-row table:style-name="ro33">
          <table:table-cell office:value-type="string" calcext:value-type="string">
            <text:p>capital de trabajo</text:p>
          </table:table-cell>
          <table:table-cell table:number-columns-repeated="6"/>
          <table:table-cell table:formula="of:=[.H13]" office:value-type="float" office:value="4244.11004523721" calcext:value-type="float">
            <text:p><text:s/>4,244.11 </text:p>
          </table:table-cell>
          <table:table-cell table:number-columns-repeated="249"/>
        </table:table-row>
        <table:table-row table:style-name="ro33">
          <table:table-cell table:style-name="ce390" office:value-type="string" calcext:value-type="string">
            <text:p>TOTAL INVERSION</text:p>
          </table:table-cell>
          <table:table-cell table:style-name="ce390" table:number-columns-repeated="5"/>
          <table:table-cell table:style-name="ce404"/>
          <table:table-cell table:style-name="ce411" table:formula="of:=SUM([.H19:.H20])" office:value-type="float" office:value="157481.215045237" calcext:value-type="float">
            <text:p><text:s/>157,481.22 </text:p>
          </table:table-cell>
          <table:table-cell table:number-columns-repeated="249"/>
        </table:table-row>
        <table:table-row table:style-name="ro33" table:number-rows-repeated="3">
          <table:table-cell table:number-columns-repeated="257"/>
        </table:table-row>
        <table:table-row table:style-name="ro24">
          <table:table-cell table:style-name="ce392" office:value-type="string" calcext:value-type="string" table:number-columns-spanned="8" table:number-rows-spanned="1">
            <text:p><text:s text:c="45"/>CRONOGRAMA DE EJECUCION FISICO</text:p>
          </table:table-cell>
          <table:covered-table-cell table:number-columns-repeated="7" table:style-name="ce392"/>
          <table:table-cell table:number-columns-repeated="249"/>
        </table:table-row>
        <table:table-row table:style-name="ro24">
          <table:table-cell table:style-name="ce386" office:value-type="string" calcext:value-type="string" table:number-columns-spanned="1" table:number-rows-spanned="3">
            <text:p>COMPONENTES</text:p>
          </table:table-cell>
          <table:table-cell table:style-name="ce386" office:value-type="string" calcext:value-type="string" table:number-columns-spanned="5" table:number-rows-spanned="1">
            <text:p>EJECUCIÓN</text:p>
          </table:table-cell>
          <table:covered-table-cell table:number-columns-repeated="4" table:style-name="ce386"/>
          <table:table-cell table:style-name="ce398" office:value-type="string" calcext:value-type="string">
            <text:p>OPERACIÓN</text:p>
          </table:table-cell>
          <table:table-cell table:style-name="ce407" office:value-type="string" office:string-value="TOTAL" calcext:value-type="string" table:number-columns-spanned="1" table:number-rows-spanned="3">
            <text:p><text:s/>TOTAL </text:p>
          </table:table-cell>
          <table:table-cell table:number-columns-repeated="249"/>
        </table:table-row>
        <table:table-row table:style-name="ro24">
          <table:covered-table-cell table:style-name="ce386"/>
          <table:table-cell table:style-name="ce386" office:value-type="string" calcext:value-type="string" table:number-columns-spanned="5" table:number-rows-spanned="1">
            <text:p>MESES</text:p>
          </table:table-cell>
          <table:covered-table-cell table:number-columns-repeated="4" table:style-name="ce386"/>
          <table:table-cell table:style-name="ce398" office:value-type="string" calcext:value-type="string">
            <text:p>AÑOS </text:p>
          </table:table-cell>
          <table:covered-table-cell table:style-name="ce407"/>
          <table:table-cell table:number-columns-repeated="249"/>
        </table:table-row>
        <table:table-row table:style-name="ro33">
          <table:covered-table-cell table:style-name="ce386"/>
          <table:table-cell table:style-name="ce386" office:value-type="float" office:value="1" calcext:value-type="float">
            <text:p>1</text:p>
          </table:table-cell>
          <table:table-cell table:style-name="ce386" office:value-type="float" office:value="2" calcext:value-type="float">
            <text:p>2</text:p>
          </table:table-cell>
          <table:table-cell table:style-name="ce386" office:value-type="float" office:value="3" calcext:value-type="float">
            <text:p>3</text:p>
          </table:table-cell>
          <table:table-cell table:style-name="ce386" office:value-type="float" office:value="4" calcext:value-type="float">
            <text:p>4</text:p>
          </table:table-cell>
          <table:table-cell table:style-name="ce386" office:value-type="float" office:value="5" calcext:value-type="float">
            <text:p>5</text:p>
          </table:table-cell>
          <table:table-cell table:style-name="ce386" office:value-type="string" calcext:value-type="string">
            <text:p>1 AL 5</text:p>
          </table:table-cell>
          <table:covered-table-cell table:style-name="ce407"/>
          <table:table-cell table:number-columns-repeated="249"/>
        </table:table-row>
        <table:table-row table:style-name="ro33">
          <table:table-cell table:style-name="ce387" table:formula="of:=+[.A6]" office:value-type="string" office:string-value="I.INVERSION FIJA " calcext:value-type="string">
            <text:p>I.INVERSION FIJA </text:p>
          </table:table-cell>
          <table:table-cell table:style-name="ce387" table:number-columns-repeated="5"/>
          <table:table-cell table:style-name="ce400"/>
          <table:table-cell table:style-name="ce409"/>
          <table:table-cell table:number-columns-repeated="249"/>
        </table:table-row>
        <table:table-row table:style-name="ro33">
          <table:table-cell table:style-name="ce387" table:formula="of:=+[.A7]" office:value-type="string" office:string-value="  I.1. INVERSION FIJA TANGIBLE" calcext:value-type="string">
            <text:p><text:s text:c="2"/>I.1. INVERSION FIJA TANGIBLE</text:p>
          </table:table-cell>
          <table:table-cell table:style-name="ce388" table:number-columns-repeated="5"/>
          <table:table-cell table:style-name="ce400"/>
          <table:table-cell table:style-name="ce409"/>
          <table:table-cell table:number-columns-repeated="249"/>
        </table:table-row>
        <table:table-row table:style-name="ro33">
          <table:table-cell table:style-name="ce387" table:formula="of:=+[.A8]" office:value-type="string" office:string-value="     I.1.1. TERRENOS Y OBRAS CIVILES" calcext:value-type="string">
            <text:p><text:s text:c="5"/>I.1.1. TERRENOS Y OBRAS CIVILES</text:p>
          </table:table-cell>
          <table:table-cell table:style-name="ce395" table:formula="of:=100%/5" office:value-type="percentage" office:value="0.2" calcext:value-type="percentage">
            <text:p>20.00 %</text:p>
          </table:table-cell>
          <table:table-cell table:style-name="ce395" table:formula="of:=+[.B31]" office:value-type="percentage" office:value="0.2" calcext:value-type="percentage">
            <text:p>20.00 %</text:p>
          </table:table-cell>
          <table:table-cell table:style-name="ce395" table:formula="of:=+[.C31]" office:value-type="percentage" office:value="0.2" calcext:value-type="percentage">
            <text:p>20.00 %</text:p>
          </table:table-cell>
          <table:table-cell table:style-name="ce395" table:formula="of:=+[.D31]" office:value-type="percentage" office:value="0.2" calcext:value-type="percentage">
            <text:p>20.00 %</text:p>
          </table:table-cell>
          <table:table-cell table:style-name="ce395" table:formula="of:=+[.E31]" office:value-type="percentage" office:value="0.2" calcext:value-type="percentage">
            <text:p>20.00 %</text:p>
          </table:table-cell>
          <table:table-cell table:style-name="ce400"/>
          <table:table-cell table:style-name="ce412" table:formula="of:=SUM([.B31:.G31])" office:value-type="percentage" office:value="1" calcext:value-type="percentage">
            <text:p>100 %</text:p>
          </table:table-cell>
          <table:table-cell table:number-columns-repeated="249"/>
        </table:table-row>
        <table:table-row table:style-name="ro33">
          <table:table-cell table:style-name="ce387" table:formula="of:=+[.A9]" office:value-type="string" office:string-value="     I.1.2. MAQUINARIA Y EQUIPO" calcext:value-type="string">
            <text:p><text:s text:c="5"/>I.1.2. MAQUINARIA Y EQUIPO</text:p>
          </table:table-cell>
          <table:table-cell table:style-name="ce395"/>
          <table:table-cell table:style-name="ce395" table:formula="of:=100%/3" office:value-type="percentage" office:value="0.333333333333333" calcext:value-type="percentage">
            <text:p>33.33 %</text:p>
          </table:table-cell>
          <table:table-cell table:style-name="ce395" table:formula="of:=+[.C32]" office:value-type="percentage" office:value="0.333333333333333" calcext:value-type="percentage">
            <text:p>33.33 %</text:p>
          </table:table-cell>
          <table:table-cell table:style-name="ce395" table:formula="of:=+[.D32]" office:value-type="percentage" office:value="0.333333333333333" calcext:value-type="percentage">
            <text:p>33.33 %</text:p>
          </table:table-cell>
          <table:table-cell table:style-name="ce388"/>
          <table:table-cell table:style-name="ce400"/>
          <table:table-cell table:style-name="ce412" table:formula="of:=SUM([.B32:.G32])" office:value-type="percentage" office:value="1" calcext:value-type="percentage">
            <text:p>100 %</text:p>
          </table:table-cell>
          <table:table-cell table:number-columns-repeated="249"/>
        </table:table-row>
        <table:table-row table:style-name="ro33">
          <table:table-cell table:style-name="ce387" table:formula="of:=+[.A10]" office:value-type="string" office:string-value="     I.1.3. VEHICULOS" calcext:value-type="string">
            <text:p><text:s text:c="5"/>I.1.3. VEHICULOS</text:p>
          </table:table-cell>
          <table:table-cell table:style-name="ce388" table:number-columns-repeated="5"/>
          <table:table-cell table:style-name="ce400"/>
          <table:table-cell table:style-name="ce412"/>
          <table:table-cell table:number-columns-repeated="249"/>
        </table:table-row>
        <table:table-row table:style-name="ro33">
          <table:table-cell table:style-name="ce387" table:formula="of:=+[.A11]" office:value-type="string" office:string-value="     I.1.4. MUEBLES Y ENSERES" calcext:value-type="string">
            <text:p><text:s text:c="5"/>I.1.4. MUEBLES Y ENSERES</text:p>
          </table:table-cell>
          <table:table-cell table:style-name="ce388" table:number-columns-repeated="4"/>
          <table:table-cell table:style-name="ce395" table:formula="of:=100%" office:value-type="percentage" office:value="1" calcext:value-type="percentage">
            <text:p>100.00 %</text:p>
          </table:table-cell>
          <table:table-cell table:style-name="ce400"/>
          <table:table-cell table:style-name="ce412" table:formula="of:=SUM([.B34:.G34])" office:value-type="percentage" office:value="1" calcext:value-type="percentage">
            <text:p>100 %</text:p>
          </table:table-cell>
          <table:table-cell table:number-columns-repeated="249"/>
        </table:table-row>
        <table:table-row table:style-name="ro33">
          <table:table-cell table:style-name="ce387" table:formula="of:=+[.A12]" office:value-type="string" office:string-value="  I.2. INVERSION FIJA INTANGIBLE" calcext:value-type="string">
            <text:p><text:s text:c="2"/>I.2. INVERSION FIJA INTANGIBLE</text:p>
          </table:table-cell>
          <table:table-cell table:style-name="ce395" table:formula="of:=100%/5" office:value-type="percentage" office:value="0.2" calcext:value-type="percentage">
            <text:p>20.00 %</text:p>
          </table:table-cell>
          <table:table-cell table:style-name="ce395" table:formula="of:=+[.B35]" office:value-type="percentage" office:value="0.2" calcext:value-type="percentage">
            <text:p>20.00 %</text:p>
          </table:table-cell>
          <table:table-cell table:style-name="ce395" table:formula="of:=+[.C35]" office:value-type="percentage" office:value="0.2" calcext:value-type="percentage">
            <text:p>20.00 %</text:p>
          </table:table-cell>
          <table:table-cell table:style-name="ce395" table:formula="of:=+[.D35]" office:value-type="percentage" office:value="0.2" calcext:value-type="percentage">
            <text:p>20.00 %</text:p>
          </table:table-cell>
          <table:table-cell table:style-name="ce395" table:formula="of:=+[.E35]" office:value-type="percentage" office:value="0.2" calcext:value-type="percentage">
            <text:p>20.00 %</text:p>
          </table:table-cell>
          <table:table-cell table:style-name="ce400"/>
          <table:table-cell table:style-name="ce412" table:formula="of:=SUM([.B35:.G35])" office:value-type="percentage" office:value="1" calcext:value-type="percentage">
            <text:p>100 %</text:p>
          </table:table-cell>
          <table:table-cell table:number-columns-repeated="249"/>
        </table:table-row>
        <table:table-row table:style-name="ro33">
          <table:table-cell table:style-name="ce387" table:formula="of:=+[.A13]" office:value-type="string" office:string-value="II. CAPITAL DE TRABAJO" calcext:value-type="string">
            <text:p>II. CAPITAL DE TRABAJO</text:p>
          </table:table-cell>
          <table:table-cell table:style-name="ce395" table:number-columns-repeated="4"/>
          <table:table-cell table:style-name="ce388"/>
          <table:table-cell table:style-name="ce405" table:formula="of:=100%" office:value-type="percentage" office:value="1" calcext:value-type="percentage">
            <text:p>100.00 %</text:p>
          </table:table-cell>
          <table:table-cell table:style-name="ce412" table:formula="of:=SUM([.B36:.G36])" office:value-type="percentage" office:value="1" calcext:value-type="percentage">
            <text:p>100 %</text:p>
          </table:table-cell>
          <table:table-cell table:number-columns-repeated="249"/>
        </table:table-row>
        <table:table-row table:style-name="ro33">
          <table:table-cell table:style-name="ce387" table:formula="of:=+[.A14]" office:value-type="string" office:string-value="III. GASTOS GENERALES ( 6.0 % )IF" calcext:value-type="string">
            <text:p>III. GASTOS GENERALES ( 6.0 % )IF</text:p>
          </table:table-cell>
          <table:table-cell table:style-name="ce395" table:formula="of:=100%/5" office:value-type="percentage" office:value="0.2" calcext:value-type="percentage">
            <text:p>20.00 %</text:p>
          </table:table-cell>
          <table:table-cell table:style-name="ce395" table:formula="of:=+[.B37]" office:value-type="percentage" office:value="0.2" calcext:value-type="percentage">
            <text:p>20.00 %</text:p>
          </table:table-cell>
          <table:table-cell table:style-name="ce395" table:formula="of:=+[.C37]" office:value-type="percentage" office:value="0.2" calcext:value-type="percentage">
            <text:p>20.00 %</text:p>
          </table:table-cell>
          <table:table-cell table:style-name="ce395" table:formula="of:=+[.D37]" office:value-type="percentage" office:value="0.2" calcext:value-type="percentage">
            <text:p>20.00 %</text:p>
          </table:table-cell>
          <table:table-cell table:style-name="ce395" table:formula="of:=+[.E37]" office:value-type="percentage" office:value="0.2" calcext:value-type="percentage">
            <text:p>20.00 %</text:p>
          </table:table-cell>
          <table:table-cell table:style-name="ce400"/>
          <table:table-cell table:style-name="ce412" table:formula="of:=SUM([.B37:.G37])" office:value-type="percentage" office:value="1" calcext:value-type="percentage">
            <text:p>100 %</text:p>
          </table:table-cell>
          <table:table-cell table:number-columns-repeated="249"/>
        </table:table-row>
        <table:table-row table:style-name="ro33">
          <table:table-cell table:style-name="ce387" table:formula="of:=+[.A15]" office:value-type="string" office:string-value="IV. GASTOS DE SUPERVISION (3.%) IF" calcext:value-type="string">
            <text:p>IV. GASTOS DE SUPERVISION (3.%) IF</text:p>
          </table:table-cell>
          <table:table-cell table:style-name="ce395" table:formula="of:=[.B37]" office:value-type="percentage" office:value="0.2" calcext:value-type="percentage">
            <text:p>20.00 %</text:p>
          </table:table-cell>
          <table:table-cell table:style-name="ce395" table:formula="of:=[.C37]" office:value-type="percentage" office:value="0.2" calcext:value-type="percentage">
            <text:p>20.00 %</text:p>
          </table:table-cell>
          <table:table-cell table:style-name="ce395" table:formula="of:=[.D37]" office:value-type="percentage" office:value="0.2" calcext:value-type="percentage">
            <text:p>20.00 %</text:p>
          </table:table-cell>
          <table:table-cell table:style-name="ce395" table:formula="of:=[.E37]" office:value-type="percentage" office:value="0.2" calcext:value-type="percentage">
            <text:p>20.00 %</text:p>
          </table:table-cell>
          <table:table-cell table:style-name="ce395" table:formula="of:=[.F37]" office:value-type="percentage" office:value="0.2" calcext:value-type="percentage">
            <text:p>20.00 %</text:p>
          </table:table-cell>
          <table:table-cell table:style-name="ce400"/>
          <table:table-cell table:style-name="ce412" table:formula="of:=SUM([.B38:.G38])" office:value-type="percentage" office:value="1" calcext:value-type="percentage">
            <text:p>100 %</text:p>
          </table:table-cell>
          <table:table-cell table:number-columns-repeated="249"/>
        </table:table-row>
        <table:table-row table:style-name="ro33">
          <table:table-cell table:style-name="ce390"/>
          <table:table-cell table:number-columns-repeated="256"/>
        </table:table-row>
        <table:table-row table:style-name="ro33" table:number-rows-repeated="1048536">
          <table:table-cell table:number-columns-repeated="257"/>
        </table:table-row>
        <table:table-row table:style-name="ro33">
          <table:table-cell table:number-columns-repeated="257"/>
        </table:table-row>
        <table:named-expressions>
          <table:named-range table:name="_xlnm.Print_Area" table:base-cell-address="$POBLACION.$A$1" table:cell-range-address="$CRONOG.$A$2:.$H$39" table:range-usable-as="print-range"/>
        </table:named-expressions>
      </table:table>
      <table:table table:name="FINANCIAMIENT" table:style-name="ta14" table:print-ranges="FINANCIAMIENT.A1:FINANCIAMIENT.E55">
        <table:table-column table:style-name="co82" table:default-cell-style-name="ce255"/>
        <table:table-column table:style-name="co83" table:default-cell-style-name="ce255"/>
        <table:table-column table:style-name="co84" table:default-cell-style-name="ce255"/>
        <table:table-column table:style-name="co85" table:default-cell-style-name="ce255"/>
        <table:table-column table:style-name="co42" table:default-cell-style-name="ce255"/>
        <table:table-column table:style-name="co50" table:default-cell-style-name="ce255"/>
        <table:table-column table:style-name="co63" table:default-cell-style-name="ce255"/>
        <table:table-column table:style-name="co1" table:number-columns-repeated="250" table:default-cell-style-name="ce255"/>
        <table:table-column table:style-name="co12" table:number-columns-repeated="16127"/>
        <table:table-row table:style-name="ro21">
          <table:table-cell table:style-name="ce416" office:value-type="string" calcext:value-type="string">
            <text:p><text:s text:c="36"/>ESTRUCTURA DE FINANCIAMIENTO PLAN DE NEGOCIO</text:p>
          </table:table-cell>
          <table:table-cell table:style-name="ce425" table:number-columns-repeated="3"/>
          <table:table-cell table:style-name="ce460" table:number-columns-repeated="252"/>
          <table:table-cell/>
        </table:table-row>
        <table:table-row table:style-name="ro35">
          <table:table-cell table:style-name="ce417" office:value-type="string" calcext:value-type="string">
            <text:p>CONCEPTO</text:p>
          </table:table-cell>
          <table:table-cell table:style-name="ce417" office:value-type="string" calcext:value-type="string">
            <text:p>APORTE DE LOS SOCIOS CON PRESTAMO</text:p>
          </table:table-cell>
          <table:table-cell table:style-name="ce446" office:value-type="string" calcext:value-type="string">
            <text:p>APORTE PROCOMPITE</text:p>
          </table:table-cell>
          <table:table-cell table:style-name="ce453" office:value-type="string" calcext:value-type="string">
            <text:p>TOTAL FINANCIEMIENTO</text:p>
          </table:table-cell>
          <table:table-cell table:style-name="ce461" table:number-columns-repeated="16380"/>
        </table:table-row>
        <table:table-row table:style-name="ro21">
          <table:table-cell table:style-name="ce304" office:value-type="string" calcext:value-type="string">
            <text:p>I.INVERSION FIJA </text:p>
          </table:table-cell>
          <table:table-cell table:style-name="ce426" table:formula="of:=[.B4]+[.B9]" office:value-type="float" office:value="31633.5" calcext:value-type="float">
            <text:p><text:s/>31,633.50 </text:p>
          </table:table-cell>
          <table:table-cell table:style-name="ce426" table:formula="of:=[.C4]+[.C9]" office:value-type="float" office:value="108951" calcext:value-type="float">
            <text:p><text:s/>108,951.00 </text:p>
          </table:table-cell>
          <table:table-cell table:style-name="ce426" table:formula="of:=[.D4]+[.D9]" office:value-type="float" office:value="140584.5" calcext:value-type="float">
            <text:p><text:s/>140,584.50 </text:p>
          </table:table-cell>
          <table:table-cell table:style-name="ce462" table:number-columns-repeated="2"/>
          <table:table-cell table:style-name="ce460" table:number-columns-repeated="250"/>
          <table:table-cell/>
        </table:table-row>
        <table:table-row table:style-name="ro21">
          <table:table-cell table:style-name="ce307" office:value-type="string" calcext:value-type="string">
            <text:p><text:s text:c="2"/>I.1. INVERSION FIJA TANGIBLE</text:p>
          </table:table-cell>
          <table:table-cell table:style-name="ce427" table:formula="of:=SUM([.B5:.B8])" office:value-type="float" office:value="31633.5" calcext:value-type="float">
            <text:p><text:s/>31,633.50 </text:p>
          </table:table-cell>
          <table:table-cell table:style-name="ce427" table:formula="of:=SUM([.C5:.C8])" office:value-type="float" office:value="94551" calcext:value-type="float">
            <text:p><text:s/>94,551.00 </text:p>
          </table:table-cell>
          <table:table-cell table:style-name="ce454" table:formula="of:=SUM([.D5:.D8])" office:value-type="float" office:value="126184.5" calcext:value-type="float">
            <text:p><text:s/>126,184.50 </text:p>
          </table:table-cell>
          <table:table-cell table:style-name="ce462"/>
          <table:table-cell table:style-name="ce460" table:number-columns-repeated="251"/>
          <table:table-cell/>
        </table:table-row>
        <table:table-row table:style-name="ro21">
          <table:table-cell table:style-name="ce307" office:value-type="string" calcext:value-type="string">
            <text:p><text:s text:c="5"/>I.1.1. TERRENOS Y OBRAS CIVILES</text:p>
          </table:table-cell>
          <table:table-cell table:style-name="ce427" table:formula="of:=+[$INVERSION.C8]" office:value-type="float" office:value="26633.5" calcext:value-type="float">
            <text:p><text:s/>26,633.50 </text:p>
          </table:table-cell>
          <table:table-cell table:style-name="ce427" table:formula="of:=+[$INVERSION.D8]" office:value-type="float" office:value="46895" calcext:value-type="float">
            <text:p><text:s/>46,895.00 </text:p>
          </table:table-cell>
          <table:table-cell table:style-name="ce454" table:formula="of:=[.B5]+[.C5]" office:value-type="float" office:value="73528.5" calcext:value-type="float">
            <text:p><text:s/>73,528.50 </text:p>
          </table:table-cell>
          <table:table-cell table:style-name="ce462"/>
          <table:table-cell table:style-name="ce460" table:number-columns-repeated="251"/>
          <table:table-cell/>
        </table:table-row>
        <table:table-row table:style-name="ro21">
          <table:table-cell table:style-name="ce307" office:value-type="string" calcext:value-type="string">
            <text:p><text:s text:c="5"/>I.1.2. MAQUINARIA Y EQUIPOS</text:p>
          </table:table-cell>
          <table:table-cell table:style-name="ce427" table:formula="of:=+[$INVERSION.C41]" office:value-type="float" office:value="0" calcext:value-type="float">
            <text:p><text:s/>- <text:s text:c="2"/></text:p>
          </table:table-cell>
          <table:table-cell table:style-name="ce427" table:formula="of:=+[$INVERSION.D41]" office:value-type="float" office:value="47356" calcext:value-type="float">
            <text:p><text:s/>47,356.00 </text:p>
          </table:table-cell>
          <table:table-cell table:style-name="ce454" table:formula="of:=[.B6]+[.C6]" office:value-type="float" office:value="47356" calcext:value-type="float">
            <text:p><text:s/>47,356.00 </text:p>
          </table:table-cell>
          <table:table-cell table:style-name="ce462"/>
          <table:table-cell table:style-name="ce460" table:number-columns-repeated="251"/>
          <table:table-cell/>
        </table:table-row>
        <table:table-row table:style-name="ro21">
          <table:table-cell table:style-name="ce307" office:value-type="string" calcext:value-type="string">
            <text:p><text:s text:c="5"/>I.1.3. VEHICULOS</text:p>
          </table:table-cell>
          <table:table-cell table:style-name="ce427" table:formula="of:=+[$INVERSION.C55]" office:value-type="float" office:value="0" calcext:value-type="float">
            <text:p><text:s/>- <text:s text:c="2"/></text:p>
          </table:table-cell>
          <table:table-cell table:style-name="ce427" table:formula="of:=+[$INVERSION.D55]" office:value-type="float" office:value="0" calcext:value-type="float">
            <text:p><text:s/>- <text:s text:c="2"/></text:p>
          </table:table-cell>
          <table:table-cell table:style-name="ce454" table:formula="of:=[.B7]+[.C7]" office:value-type="float" office:value="0" calcext:value-type="float">
            <text:p><text:s/>- <text:s text:c="2"/></text:p>
          </table:table-cell>
          <table:table-cell table:style-name="ce462"/>
          <table:table-cell table:style-name="ce460" table:number-columns-repeated="251"/>
          <table:table-cell/>
        </table:table-row>
        <table:table-row table:style-name="ro21">
          <table:table-cell table:style-name="ce307" office:value-type="string" calcext:value-type="string">
            <text:p><text:s text:c="5"/>I.1.4. MUEBLES Y ENSERES</text:p>
          </table:table-cell>
          <table:table-cell table:style-name="ce427" table:formula="of:=+[$INVERSION.C57]" office:value-type="float" office:value="5000" calcext:value-type="float">
            <text:p><text:s/>5,000.00 </text:p>
          </table:table-cell>
          <table:table-cell table:style-name="ce427" table:formula="of:=+[$INVERSION.D57]" office:value-type="float" office:value="300" calcext:value-type="float">
            <text:p><text:s/>300.00 </text:p>
          </table:table-cell>
          <table:table-cell table:style-name="ce454" table:formula="of:=[.B8]+[.C8]" office:value-type="float" office:value="5300" calcext:value-type="float">
            <text:p><text:s/>5,300.00 </text:p>
          </table:table-cell>
          <table:table-cell table:style-name="ce462"/>
          <table:table-cell table:style-name="ce460" table:number-columns-repeated="251"/>
          <table:table-cell/>
        </table:table-row>
        <table:table-row table:style-name="ro21">
          <table:table-cell table:style-name="ce307" office:value-type="string" calcext:value-type="string">
            <text:p><text:s text:c="2"/>I.2. INVERSION FIJA INTANGIBLE</text:p>
          </table:table-cell>
          <table:table-cell table:style-name="ce428" table:formula="of:=+[$INVERSION.C61]" office:value-type="float" office:value="0" calcext:value-type="float">
            <text:p><text:s/>- <text:s text:c="2"/></text:p>
          </table:table-cell>
          <table:table-cell table:style-name="ce428" table:formula="of:=+[$INVERSION.D61]" office:value-type="float" office:value="14400" calcext:value-type="float">
            <text:p><text:s/>14,400.00 </text:p>
          </table:table-cell>
          <table:table-cell table:style-name="ce454" table:formula="of:=[.B9]+[.C9]" office:value-type="float" office:value="14400" calcext:value-type="float">
            <text:p><text:s/>14,400.00 </text:p>
          </table:table-cell>
          <table:table-cell table:style-name="ce462"/>
          <table:table-cell table:style-name="ce460" table:number-columns-repeated="251"/>
          <table:table-cell/>
        </table:table-row>
        <table:table-row table:style-name="ro21">
          <table:table-cell table:style-name="ce304" table:formula="of:=+[$INVERSION.E13]" office:value-type="string" office:string-value="II. CAPITAL DE TRABAJO" calcext:value-type="string">
            <text:p>II. CAPITAL DE TRABAJO</text:p>
          </table:table-cell>
          <table:table-cell table:style-name="ce426" table:formula="of:=+[$INVERSION.C65]" office:value-type="float" office:value="4244.11004523721" calcext:value-type="float">
            <text:p><text:s/>4,244.11 </text:p>
          </table:table-cell>
          <table:table-cell table:style-name="ce426" table:formula="of:=+[$INVERSION.D65]" office:value-type="float" office:value="0" calcext:value-type="float">
            <text:p><text:s/>- <text:s text:c="2"/></text:p>
          </table:table-cell>
          <table:table-cell table:style-name="ce455" table:formula="of:=[.B10]+[.C10]" office:value-type="float" office:value="4244.11004523721" calcext:value-type="float">
            <text:p><text:s/>4,244.11 </text:p>
          </table:table-cell>
          <table:table-cell table:style-name="ce462"/>
          <table:table-cell table:style-name="ce460" table:number-columns-repeated="251"/>
          <table:table-cell/>
        </table:table-row>
        <table:table-row table:style-name="ro21">
          <table:table-cell table:style-name="ce304" table:formula="of:=+[$INVERSION.E14]" office:value-type="string" office:string-value="III. GASTOS GENERALES ( 6.0 % )IF" calcext:value-type="string">
            <text:p>III. GASTOS GENERALES ( 6.0 % )IF</text:p>
          </table:table-cell>
          <table:table-cell table:style-name="ce426" table:formula="of:=+[$INVERSION.C66]" office:value-type="float" office:value="0" calcext:value-type="float">
            <text:p><text:s/>- <text:s text:c="2"/></text:p>
          </table:table-cell>
          <table:table-cell table:style-name="ce426" table:formula="of:=+[$INVERSION.D66]" office:value-type="float" office:value="8435.07" calcext:value-type="float">
            <text:p><text:s/>8,435.07 </text:p>
          </table:table-cell>
          <table:table-cell table:style-name="ce455" table:formula="of:=[.B11]+[.C11]" office:value-type="float" office:value="8435.07" calcext:value-type="float">
            <text:p><text:s/>8,435.07 </text:p>
          </table:table-cell>
          <table:table-cell table:style-name="ce462"/>
          <table:table-cell table:style-name="ce460" table:number-columns-repeated="251"/>
          <table:table-cell/>
        </table:table-row>
        <table:table-row table:style-name="ro21">
          <table:table-cell table:style-name="ce304" table:formula="of:=+[$INVERSION.E15]" office:value-type="string" office:string-value="IV. GASTOS DE SUPERVISION (3.%) IF" calcext:value-type="string">
            <text:p>IV. GASTOS DE SUPERVISION (3.%) IF</text:p>
          </table:table-cell>
          <table:table-cell table:style-name="ce426" table:formula="of:=+[$INVERSION.C67]" office:value-type="float" office:value="0" calcext:value-type="float">
            <text:p><text:s/>- <text:s text:c="2"/></text:p>
          </table:table-cell>
          <table:table-cell table:style-name="ce426" table:formula="of:=+[$INVERSION.D67]" office:value-type="float" office:value="4217.535" calcext:value-type="float">
            <text:p><text:s/>4,217.54 </text:p>
          </table:table-cell>
          <table:table-cell table:style-name="ce455" table:formula="of:=[.B12]+[.C12]" office:value-type="float" office:value="4217.535" calcext:value-type="float">
            <text:p><text:s/>4,217.54 </text:p>
          </table:table-cell>
          <table:table-cell table:style-name="ce462"/>
          <table:table-cell table:style-name="ce460" table:number-columns-repeated="251"/>
          <table:table-cell/>
        </table:table-row>
        <table:table-row table:style-name="ro21">
          <table:table-cell table:style-name="ce304" office:value-type="string" calcext:value-type="string">
            <text:p>TOTAL INVERSIÒN</text:p>
          </table:table-cell>
          <table:table-cell table:style-name="ce426" table:formula="of:=[.B3]+[.B10]+[.B11]+[.B12]" office:value-type="float" office:value="35877.6100452372" calcext:value-type="float">
            <text:p><text:s/>35,877.61 </text:p>
          </table:table-cell>
          <table:table-cell table:style-name="ce426" table:formula="of:=[.C3]+[.C10]+[.C11]+[.C12]" office:value-type="float" office:value="121603.605" calcext:value-type="float">
            <text:p><text:s/>121,603.61 </text:p>
          </table:table-cell>
          <table:table-cell table:style-name="ce455" table:formula="of:=[.D3]+[.D10]+[.D11]+[.D12]" office:value-type="float" office:value="157481.215045237" calcext:value-type="float">
            <text:p><text:s/>157,481.22 </text:p>
          </table:table-cell>
          <table:table-cell table:style-name="ce462"/>
          <table:table-cell table:style-name="ce460"/>
          <table:table-cell table:style-name="ce462"/>
          <table:table-cell table:style-name="ce460" table:number-columns-repeated="249"/>
          <table:table-cell/>
        </table:table-row>
        <table:table-row table:style-name="ro21">
          <table:table-cell table:style-name="ce304" office:value-type="string" calcext:value-type="string">
            <text:p>PORCENTAJE</text:p>
          </table:table-cell>
          <table:table-cell table:style-name="ce426" table:formula="of:=([.B13]*[.$D$14]/[.$D$13])" office:value-type="float" office:value="22.7821521664861" calcext:value-type="float">
            <text:p><text:s/>22.78 </text:p>
          </table:table-cell>
          <table:table-cell table:style-name="ce426" table:formula="of:=([.C13]*[.$D$14]/[.$D$13])" office:value-type="float" office:value="77.2178478335139" calcext:value-type="float">
            <text:p><text:s/>77.22 </text:p>
          </table:table-cell>
          <table:table-cell table:style-name="ce456" office:value-type="float" office:value="100" calcext:value-type="float">
            <text:p>100</text:p>
          </table:table-cell>
          <table:table-cell table:style-name="ce463"/>
          <table:table-cell table:style-name="ce462"/>
          <table:table-cell table:style-name="ce460" table:number-columns-repeated="250"/>
          <table:table-cell/>
        </table:table-row>
        <table:table-row table:style-name="ro21">
          <table:table-cell table:style-name="ce418" office:value-type="string" calcext:value-type="string">
            <text:p>FUENTE: ELABORACION PROPIA</text:p>
          </table:table-cell>
          <table:table-cell table:style-name="ce429" table:number-columns-repeated="3"/>
          <table:table-cell table:style-name="ce283"/>
          <table:table-cell table:style-name="ce460" table:number-columns-repeated="251"/>
          <table:table-cell/>
        </table:table-row>
        <table:table-row table:style-name="ro21">
          <table:table-cell table:style-name="ce266"/>
          <table:table-cell/>
          <table:table-cell table:style-name="ce339"/>
          <table:table-cell table:number-columns-repeated="254"/>
        </table:table-row>
        <table:table-row table:style-name="ro21">
          <table:table-cell table:style-name="ce266" office:value-type="string" calcext:value-type="string">
            <text:p><text:s text:c="36"/>ESTRUCTURA DE INVERSION Y FINANCIAMIENTO PLAN DE NEGOCIO</text:p>
          </table:table-cell>
          <table:table-cell table:number-columns-repeated="256"/>
        </table:table-row>
        <table:table-row table:style-name="ro36">
          <table:table-cell table:style-name="ce211" office:value-type="string" calcext:value-type="string" table:number-columns-spanned="1" table:number-rows-spanned="2">
            <text:p>CONCEPTO</text:p>
          </table:table-cell>
          <table:table-cell table:style-name="ce211" office:value-type="string" calcext:value-type="string" table:number-columns-spanned="2" table:number-rows-spanned="1">
            <text:p>CONTRAPARTIDA</text:p>
          </table:table-cell>
          <table:covered-table-cell table:style-name="ce211"/>
          <table:table-cell table:style-name="ce457" office:value-type="string" calcext:value-type="string">
            <text:p>COFINANCIAMIENTO</text:p>
          </table:table-cell>
          <table:table-cell table:style-name="ce211" office:value-type="string" calcext:value-type="string" table:number-columns-spanned="1" table:number-rows-spanned="2">
            <text:p>TOTAL INVERSION</text:p>
          </table:table-cell>
          <table:table-cell table:style-name="ce280" table:number-columns-repeated="16379"/>
        </table:table-row>
        <table:table-row table:style-name="ro21">
          <table:covered-table-cell table:style-name="ce211"/>
          <table:table-cell table:style-name="ce211" office:value-type="string" calcext:value-type="string">
            <text:p>Aporte del AEO</text:p>
          </table:table-cell>
          <table:table-cell table:style-name="ce211" office:value-type="string" calcext:value-type="string">
            <text:p>Préstamo</text:p>
          </table:table-cell>
          <table:table-cell table:style-name="ce211" office:value-type="string" calcext:value-type="string">
            <text:p>Procompite</text:p>
          </table:table-cell>
          <table:covered-table-cell table:style-name="ce211"/>
          <table:table-cell table:style-name="ce280" table:number-columns-repeated="16379"/>
        </table:table-row>
        <table:table-row table:style-name="ro21">
          <table:table-cell table:style-name="ce268" table:formula="of:=+[.A3]" office:value-type="string" office:string-value="I.INVERSION FIJA " calcext:value-type="string">
            <text:p>I.INVERSION FIJA </text:p>
          </table:table-cell>
          <table:table-cell table:style-name="ce263" table:formula="of:=[.B21]+[.B26]" office:value-type="float" office:value="31633.5" calcext:value-type="float">
            <text:p><text:s/>31,633.50 </text:p>
          </table:table-cell>
          <table:table-cell table:style-name="ce263"/>
          <table:table-cell table:style-name="ce458" table:formula="of:=[.D21]+[.D26]" office:value-type="float" office:value="108951" calcext:value-type="float">
            <text:p><text:s/>108,951.00 </text:p>
          </table:table-cell>
          <table:table-cell table:style-name="ce263" table:formula="of:=[.E21]+[.E26]" office:value-type="float" office:value="140584.5" calcext:value-type="float">
            <text:p><text:s/>140,584.50 </text:p>
          </table:table-cell>
          <table:table-cell table:style-name="ce339"/>
          <table:table-cell table:number-columns-repeated="251"/>
        </table:table-row>
        <table:table-row table:style-name="ro21">
          <table:table-cell table:style-name="ce258" table:formula="of:=+[.A4]" office:value-type="string" office:string-value="  I.1. INVERSION FIJA TANGIBLE" calcext:value-type="string">
            <text:p><text:s text:c="2"/>I.1. INVERSION FIJA TANGIBLE</text:p>
          </table:table-cell>
          <table:table-cell table:style-name="ce263" table:formula="of:=SUM([.B22:.B25])" office:value-type="float" office:value="31633.5" calcext:value-type="float">
            <text:p><text:s/>31,633.50 </text:p>
          </table:table-cell>
          <table:table-cell table:style-name="ce263"/>
          <table:table-cell table:style-name="ce458" table:formula="of:=SUM([.D22:.D25])" office:value-type="float" office:value="94551" calcext:value-type="float">
            <text:p><text:s/>94,551.00 </text:p>
          </table:table-cell>
          <table:table-cell table:style-name="ce464" table:formula="of:=SUM([.E22:.E25])" office:value-type="float" office:value="126184.5" calcext:value-type="float">
            <text:p><text:s/>126,184.50 </text:p>
          </table:table-cell>
          <table:table-cell table:style-name="ce339"/>
          <table:table-cell table:number-columns-repeated="251"/>
        </table:table-row>
        <table:table-row table:style-name="ro21">
          <table:table-cell table:style-name="ce258" table:formula="of:=+[.A5]" office:value-type="string" office:string-value="     I.1.1. TERRENOS Y OBRAS CIVILES" calcext:value-type="string">
            <text:p><text:s text:c="5"/>I.1.1. TERRENOS Y OBRAS CIVILES</text:p>
          </table:table-cell>
          <table:table-cell table:style-name="ce430" table:formula="of:=+[.B5]" office:value-type="float" office:value="26633.5" calcext:value-type="float">
            <text:p><text:s/>26,633.50 </text:p>
          </table:table-cell>
          <table:table-cell table:style-name="ce262"/>
          <table:table-cell table:style-name="ce459" table:formula="of:=+[.C5]" office:value-type="float" office:value="46895" calcext:value-type="float">
            <text:p><text:s/>46,895.00 </text:p>
          </table:table-cell>
          <table:table-cell table:style-name="ce465" table:formula="of:=[.B22]+[.D22]+[.C22]" office:value-type="float" office:value="73528.5" calcext:value-type="float">
            <text:p><text:s/>73,528.50 </text:p>
          </table:table-cell>
          <table:table-cell table:style-name="ce339"/>
          <table:table-cell table:number-columns-repeated="251"/>
        </table:table-row>
        <table:table-row table:style-name="ro21">
          <table:table-cell table:style-name="ce258" table:formula="of:=+[.A6]" office:value-type="string" office:string-value="     I.1.2. MAQUINARIA Y EQUIPOS" calcext:value-type="string">
            <text:p><text:s text:c="5"/>I.1.2. MAQUINARIA Y EQUIPOS</text:p>
          </table:table-cell>
          <table:table-cell table:style-name="ce430" table:formula="of:=+[.B6]" office:value-type="float" office:value="0" calcext:value-type="float">
            <text:p><text:s/>- <text:s text:c="2"/></text:p>
          </table:table-cell>
          <table:table-cell table:style-name="ce262"/>
          <table:table-cell table:style-name="ce459" table:formula="of:=+[.C6]" office:value-type="float" office:value="47356" calcext:value-type="float">
            <text:p><text:s/>47,356.00 </text:p>
          </table:table-cell>
          <table:table-cell table:style-name="ce465" table:formula="of:=[.B23]+[.D23]+[.C23]" office:value-type="float" office:value="47356" calcext:value-type="float">
            <text:p><text:s/>47,356.00 </text:p>
          </table:table-cell>
          <table:table-cell table:style-name="ce339"/>
          <table:table-cell table:number-columns-repeated="251"/>
        </table:table-row>
        <table:table-row table:style-name="ro21">
          <table:table-cell table:style-name="ce258" table:formula="of:=+[.A7]" office:value-type="string" office:string-value="     I.1.3. VEHICULOS" calcext:value-type="string">
            <text:p><text:s text:c="5"/>I.1.3. VEHICULOS</text:p>
          </table:table-cell>
          <table:table-cell table:style-name="ce430" table:formula="of:=+[.B7]" office:value-type="float" office:value="0" calcext:value-type="float">
            <text:p><text:s/>- <text:s text:c="2"/></text:p>
          </table:table-cell>
          <table:table-cell table:style-name="ce262"/>
          <table:table-cell table:style-name="ce459" table:formula="of:=+[.C7]" office:value-type="float" office:value="0" calcext:value-type="float">
            <text:p><text:s/>- <text:s text:c="2"/></text:p>
          </table:table-cell>
          <table:table-cell table:style-name="ce465" table:formula="of:=[.B24]+[.D24]+[.C24]" office:value-type="float" office:value="0" calcext:value-type="float">
            <text:p><text:s/>- <text:s text:c="2"/></text:p>
          </table:table-cell>
          <table:table-cell table:style-name="ce339"/>
          <table:table-cell table:number-columns-repeated="251"/>
        </table:table-row>
        <table:table-row table:style-name="ro21">
          <table:table-cell table:style-name="ce258" table:formula="of:=+[.A8]" office:value-type="string" office:string-value="     I.1.4. MUEBLES Y ENSERES" calcext:value-type="string">
            <text:p><text:s text:c="5"/>I.1.4. MUEBLES Y ENSERES</text:p>
          </table:table-cell>
          <table:table-cell table:style-name="ce430" table:formula="of:=+[.B8]" office:value-type="float" office:value="5000" calcext:value-type="float">
            <text:p><text:s/>5,000.00 </text:p>
          </table:table-cell>
          <table:table-cell table:style-name="ce262"/>
          <table:table-cell table:style-name="ce459" table:formula="of:=+[.C8]" office:value-type="float" office:value="300" calcext:value-type="float">
            <text:p><text:s/>300.00 </text:p>
          </table:table-cell>
          <table:table-cell table:style-name="ce465" table:formula="of:=[.B25]+[.D25]+[.C25]" office:value-type="float" office:value="5300" calcext:value-type="float">
            <text:p><text:s/>5,300.00 </text:p>
          </table:table-cell>
          <table:table-cell table:style-name="ce339"/>
          <table:table-cell table:number-columns-repeated="251"/>
        </table:table-row>
        <table:table-row table:style-name="ro21">
          <table:table-cell table:style-name="ce258" table:formula="of:=+[.A9]" office:value-type="string" office:string-value="  I.2. INVERSION FIJA INTANGIBLE" calcext:value-type="string">
            <text:p><text:s text:c="2"/>I.2. INVERSION FIJA INTANGIBLE</text:p>
          </table:table-cell>
          <table:table-cell table:style-name="ce430" table:formula="of:=+[.B9]" office:value-type="float" office:value="0" calcext:value-type="float">
            <text:p><text:s/>- <text:s text:c="2"/></text:p>
          </table:table-cell>
          <table:table-cell table:style-name="ce262"/>
          <table:table-cell table:style-name="ce459" table:formula="of:=+[.C9]" office:value-type="float" office:value="14400" calcext:value-type="float">
            <text:p><text:s/>14,400.00 </text:p>
          </table:table-cell>
          <table:table-cell table:style-name="ce464" table:formula="of:=[.B26]+[.D26]+[.C26]" office:value-type="float" office:value="14400" calcext:value-type="float">
            <text:p><text:s/>14,400.00 </text:p>
          </table:table-cell>
          <table:table-cell table:style-name="ce339"/>
          <table:table-cell table:number-columns-repeated="251"/>
        </table:table-row>
        <table:table-row table:style-name="ro21">
          <table:table-cell table:style-name="ce268" table:formula="of:=+[.A10]" office:value-type="string" office:string-value="II. CAPITAL DE TRABAJO" calcext:value-type="string">
            <text:p>II. CAPITAL DE TRABAJO</text:p>
          </table:table-cell>
          <table:table-cell table:style-name="ce263" table:formula="of:=+[.B10]-[.C27]" office:value-type="float" office:value="-755.889954762793" calcext:value-type="float">
            <text:p><text:s/>(755.89)</text:p>
          </table:table-cell>
          <table:table-cell table:style-name="ce426" table:formula="of:=+[$INVERSION.M68]" office:value-type="float" office:value="5000" calcext:value-type="float">
            <text:p><text:s/>5,000.00 </text:p>
          </table:table-cell>
          <table:table-cell table:style-name="ce263" table:formula="of:=+[.C10]" office:value-type="float" office:value="0" calcext:value-type="float">
            <text:p><text:s/>- <text:s text:c="2"/></text:p>
          </table:table-cell>
          <table:table-cell table:style-name="ce464" table:formula="of:=[.B27]+[.D27]+[.C27]" office:value-type="float" office:value="4244.11004523721" calcext:value-type="float">
            <text:p><text:s/>4,244.11 </text:p>
          </table:table-cell>
          <table:table-cell table:style-name="ce469"/>
          <table:table-cell table:number-columns-repeated="251"/>
        </table:table-row>
        <table:table-row table:style-name="ro21">
          <table:table-cell table:style-name="ce268" table:formula="of:=+[.A11]" office:value-type="string" office:string-value="III. GASTOS GENERALES ( 6.0 % )IF" calcext:value-type="string">
            <text:p>III. GASTOS GENERALES ( 6.0 % )IF</text:p>
          </table:table-cell>
          <table:table-cell table:style-name="ce430" table:formula="of:=+[.B11]" office:value-type="float" office:value="0" calcext:value-type="float">
            <text:p><text:s/>- <text:s text:c="2"/></text:p>
          </table:table-cell>
          <table:table-cell table:style-name="ce263"/>
          <table:table-cell table:style-name="ce263" table:formula="of:=+[.C11]" office:value-type="float" office:value="8435.07" calcext:value-type="float">
            <text:p><text:s/>8,435.07 </text:p>
          </table:table-cell>
          <table:table-cell table:style-name="ce464" table:formula="of:=[.B28]+[.D28]+[.C28]" office:value-type="float" office:value="8435.07" calcext:value-type="float">
            <text:p><text:s/>8,435.07 </text:p>
          </table:table-cell>
          <table:table-cell table:style-name="ce339"/>
          <table:table-cell table:number-columns-repeated="251"/>
        </table:table-row>
        <table:table-row table:style-name="ro21">
          <table:table-cell table:style-name="ce268" table:formula="of:=+[.A12]" office:value-type="string" office:string-value="IV. GASTOS DE SUPERVISION (3.%) IF" calcext:value-type="string">
            <text:p>IV. GASTOS DE SUPERVISION (3.%) IF</text:p>
          </table:table-cell>
          <table:table-cell table:style-name="ce430" table:formula="of:=+[.B12]" office:value-type="float" office:value="0" calcext:value-type="float">
            <text:p><text:s/>- <text:s text:c="2"/></text:p>
          </table:table-cell>
          <table:table-cell table:style-name="ce263"/>
          <table:table-cell table:style-name="ce263" table:formula="of:=+[.C12]" office:value-type="float" office:value="4217.535" calcext:value-type="float">
            <text:p><text:s/>4,217.54 </text:p>
          </table:table-cell>
          <table:table-cell table:style-name="ce464" table:formula="of:=[.B29]+[.D29]+[.C29]" office:value-type="float" office:value="4217.535" calcext:value-type="float">
            <text:p><text:s/>4,217.54 </text:p>
          </table:table-cell>
          <table:table-cell table:style-name="ce339"/>
          <table:table-cell table:number-columns-repeated="251"/>
        </table:table-row>
        <table:table-row table:style-name="ro21">
          <table:table-cell table:style-name="ce268" table:formula="of:=+[.A13]" office:value-type="string" office:string-value="TOTAL INVERSIÒN" calcext:value-type="string">
            <text:p>TOTAL INVERSIÒN</text:p>
          </table:table-cell>
          <table:table-cell table:style-name="ce426" table:formula="of:=[.B20]+[.B27]+[.B28]+[.B29]" office:value-type="float" office:value="30877.6100452372" calcext:value-type="float">
            <text:p><text:s/>30,877.61 </text:p>
          </table:table-cell>
          <table:table-cell table:style-name="ce426" table:formula="of:=[.C20]+[.C27]+[.C28]+[.C29]" office:value-type="float" office:value="5000" calcext:value-type="float">
            <text:p><text:s/>5,000.00 </text:p>
          </table:table-cell>
          <table:table-cell table:style-name="ce263" table:formula="of:=[.D20]+[.D27]+[.D28]+[.D29]" office:value-type="float" office:value="121603.605" calcext:value-type="float">
            <text:p><text:s/>121,603.61 </text:p>
          </table:table-cell>
          <table:table-cell table:style-name="ce464" table:formula="of:=[.E20]+[.E27]+[.E28]+[.E29]" office:value-type="float" office:value="157481.215045237" calcext:value-type="float">
            <text:p><text:s/>157,481.22 </text:p>
          </table:table-cell>
          <table:table-cell table:style-name="ce339"/>
          <table:table-cell table:number-columns-repeated="251"/>
        </table:table-row>
        <table:table-row table:style-name="ro21">
          <table:table-cell table:style-name="ce268" office:value-type="string" calcext:value-type="string">
            <text:p>PORCENTAJE</text:p>
          </table:table-cell>
          <table:table-cell table:style-name="ce431" table:formula="of:=([.B30]/[.$E$30])" office:value-type="percentage" office:value="0.196071703132132" calcext:value-type="percentage">
            <text:p>19.61 %</text:p>
          </table:table-cell>
          <table:table-cell table:style-name="ce431" table:formula="of:=([.C30]/[.$E$30])" office:value-type="percentage" office:value="0.0317498185327293" calcext:value-type="percentage">
            <text:p>3.17 %</text:p>
          </table:table-cell>
          <table:table-cell table:style-name="ce431" table:formula="of:=([.D30]/[.$E$30])" office:value-type="percentage" office:value="0.772178478335139" calcext:value-type="percentage">
            <text:p>77.22 %</text:p>
          </table:table-cell>
          <table:table-cell table:style-name="ce466" office:value-type="percentage" office:value="1" calcext:value-type="percentage">
            <text:p>100 %</text:p>
          </table:table-cell>
          <table:table-cell table:style-name="ce339"/>
          <table:table-cell table:number-columns-repeated="251"/>
        </table:table-row>
        <table:table-row table:style-name="ro21">
          <table:table-cell table:style-name="ce264"/>
          <table:table-cell table:style-name="ce299" table:number-columns-repeated="3"/>
          <table:table-cell table:style-name="ce467"/>
          <table:table-cell table:style-name="ce339" table:number-columns-repeated="2"/>
          <table:table-cell table:number-columns-repeated="250"/>
        </table:table-row>
        <table:table-row table:style-name="ro21">
          <table:table-cell table:style-name="ce264"/>
          <table:table-cell table:style-name="ce432"/>
          <table:table-cell table:style-name="ce447" table:formula="of:=[.C30]/([.B30]+[.C30])" office:value-type="float" office:value="0.139362683124534" calcext:value-type="float">
            <text:p><text:s/>0.1394 </text:p>
          </table:table-cell>
          <table:table-cell table:style-name="ce299"/>
          <table:table-cell table:style-name="ce467"/>
          <table:table-cell table:style-name="ce339" table:number-columns-repeated="2"/>
          <table:table-cell table:number-columns-repeated="250"/>
        </table:table-row>
        <table:table-row table:style-name="ro21">
          <table:table-cell table:style-name="ce264"/>
          <table:table-cell table:style-name="ce299" table:number-columns-repeated="3"/>
          <table:table-cell table:style-name="ce467"/>
          <table:table-cell table:style-name="ce339" table:number-columns-repeated="2"/>
          <table:table-cell table:number-columns-repeated="250"/>
        </table:table-row>
        <table:table-row table:style-name="ro21">
          <table:table-cell table:style-name="ce419" office:value-type="string" calcext:value-type="string">
            <text:p>PRESTAMO</text:p>
          </table:table-cell>
          <table:table-cell table:style-name="ce433" table:formula="of:=[.C30]" office:value-type="float" office:value="5000" calcext:value-type="float">
            <text:p><text:s/>5,000.00 </text:p>
          </table:table-cell>
          <table:table-cell table:style-name="ce299" table:number-columns-repeated="2"/>
          <table:table-cell table:style-name="ce467"/>
          <table:table-cell table:style-name="ce339" table:number-columns-repeated="2"/>
          <table:table-cell table:number-columns-repeated="250"/>
        </table:table-row>
        <table:table-row table:style-name="ro21">
          <table:table-cell table:style-name="ce420" office:value-type="string" calcext:value-type="string">
            <text:p>APORTE PROCOMPITE+SOCIOS</text:p>
          </table:table-cell>
          <table:table-cell table:style-name="ce434" table:formula="of:=[.B30]+[.D30]" office:value-type="float" office:value="152481.215045237" calcext:value-type="float">
            <text:p><text:s/>152,481.22 </text:p>
          </table:table-cell>
          <table:table-cell table:style-name="ce299" table:number-columns-repeated="2"/>
          <table:table-cell table:style-name="ce467"/>
          <table:table-cell table:style-name="ce339" table:number-columns-repeated="2"/>
          <table:table-cell table:number-columns-repeated="250"/>
        </table:table-row>
        <table:table-row table:style-name="ro21">
          <table:table-cell table:style-name="ce420" office:value-type="string" calcext:value-type="string">
            <text:p>TOTAL</text:p>
          </table:table-cell>
          <table:table-cell table:style-name="ce435" table:formula="of:=[.B35]+[.B36]" office:value-type="float" office:value="157481.215045237" calcext:value-type="float">
            <text:p><text:s/>157,481.22 </text:p>
          </table:table-cell>
          <table:table-cell table:style-name="ce334" table:formula="of:=+[$INVERSION.F16]" office:value-type="float" office:value="157481.215045237" calcext:value-type="float">
            <text:p>157481.22</text:p>
          </table:table-cell>
          <table:table-cell table:style-name="ce260"/>
          <table:table-cell/>
          <table:table-cell table:style-name="ce264"/>
          <table:table-cell table:style-name="ce339"/>
          <table:table-cell table:number-columns-repeated="250"/>
        </table:table-row>
        <table:table-row table:style-name="ro21">
          <table:table-cell table:style-name="ce260" table:number-columns-repeated="4"/>
          <table:table-cell table:style-name="ce265"/>
          <table:table-cell table:style-name="ce260"/>
          <table:table-cell table:number-columns-repeated="251"/>
        </table:table-row>
        <table:table-row table:style-name="ro37">
          <table:table-cell table:style-name="ce421" office:value-type="string" calcext:value-type="string" table:number-columns-spanned="5" table:number-rows-spanned="1">
            <text:p>El aporte del AEO, puede ser valorizado hasta el 90%, en efectivo o ambas opciones, en este caso vamos a considerar para el Caso <text:s/>que el 18.49% es aporte del AEO <text:s/>y el 3.29% de su aporte lo realiza a traves de un credito en una entidad financiera</text:p>
          </table:table-cell>
          <table:covered-table-cell table:number-columns-repeated="4" table:style-name="ce421"/>
          <table:table-cell table:style-name="ce260"/>
          <table:table-cell table:number-columns-repeated="251"/>
        </table:table-row>
        <table:table-row table:style-name="ro21">
          <table:table-cell table:style-name="ce260" office:value-type="string" calcext:value-type="string">
            <text:p>.</text:p>
          </table:table-cell>
          <table:table-cell table:style-name="ce260" table:number-columns-repeated="5"/>
          <table:table-cell table:number-columns-repeated="251"/>
        </table:table-row>
        <table:table-row table:style-name="ro21">
          <table:table-cell table:style-name="ce268" office:value-type="string" calcext:value-type="string">
            <text:p>Monto del Prestamo</text:p>
          </table:table-cell>
          <table:table-cell table:style-name="ce278" table:formula="of:=+[.C30]" office:value-type="float" office:value="5000" calcext:value-type="float">
            <text:p><text:s/>5,000.00 </text:p>
          </table:table-cell>
          <table:table-cell table:style-name="ce265"/>
          <table:table-cell table:style-name="ce260" table:number-columns-repeated="3"/>
          <table:table-cell table:number-columns-repeated="251"/>
        </table:table-row>
        <table:table-row table:style-name="ro21">
          <table:table-cell table:style-name="ce268" office:value-type="string" calcext:value-type="string">
            <text:p>Tasa Efectiva Anual</text:p>
          </table:table-cell>
          <table:table-cell table:style-name="ce436" office:value-type="percentage" office:value="0.15" calcext:value-type="percentage">
            <text:p>15 %</text:p>
          </table:table-cell>
          <table:table-cell table:style-name="ce448"/>
          <table:table-cell table:style-name="ce260" table:number-columns-repeated="3"/>
          <table:table-cell table:number-columns-repeated="251"/>
        </table:table-row>
        <table:table-row table:style-name="ro21">
          <table:table-cell table:style-name="ce268" office:value-type="string" calcext:value-type="string">
            <text:p>Tasa de Interes Mensual</text:p>
          </table:table-cell>
          <table:table-cell table:style-name="ce437" table:formula="of:=(1+[.B42])^(1/12)-1" office:value-type="percentage" office:value="0.0117149169198534" calcext:value-type="percentage">
            <text:p>1.17 %</text:p>
          </table:table-cell>
          <table:table-cell table:style-name="ce260" table:number-columns-repeated="4"/>
          <table:table-cell table:number-columns-repeated="251"/>
        </table:table-row>
        <table:table-row table:style-name="ro21">
          <table:table-cell table:style-name="ce268" office:value-type="string" calcext:value-type="string">
            <text:p>Numero de meses</text:p>
          </table:table-cell>
          <table:table-cell table:style-name="ce258" office:value-type="float" office:value="12" calcext:value-type="float">
            <text:p>12</text:p>
          </table:table-cell>
          <table:table-cell table:style-name="ce260" table:number-columns-repeated="4"/>
          <table:table-cell table:number-columns-repeated="251"/>
        </table:table-row>
        <table:table-row table:style-name="ro21">
          <table:table-cell table:style-name="ce268" office:value-type="string" calcext:value-type="string">
            <text:p>Cuota mensual a pagar</text:p>
          </table:table-cell>
          <table:table-cell table:style-name="ce438" table:formula="of:=PMT([.B43];[.B44];[.B41])" office:value-type="float" office:value="-449.071815261043" calcext:value-type="float">
            <text:p>S/. -449.07</text:p>
          </table:table-cell>
          <table:table-cell table:style-name="ce449" table:formula="of:=[.B41]*[.B43]/(1-(1+[.B43])^-[.B44])" office:value-type="float" office:value="449.071815261043" calcext:value-type="float">
            <text:p><text:s/>449.07 </text:p>
          </table:table-cell>
          <table:table-cell/>
          <table:table-cell table:style-name="ce260" table:number-columns-repeated="2"/>
          <table:table-cell table:number-columns-repeated="251"/>
        </table:table-row>
        <table:table-row table:style-name="ro38">
          <table:table-cell table:style-name="ce260"/>
          <table:table-cell table:style-name="ce439"/>
          <table:table-cell table:style-name="ce449"/>
          <table:table-cell/>
          <table:table-cell table:style-name="ce260" table:number-columns-repeated="2"/>
          <table:table-cell table:number-columns-repeated="251"/>
        </table:table-row>
        <table:table-row table:style-name="ro39">
          <table:table-cell table:style-name="ce260"/>
          <table:table-cell table:style-name="ce439"/>
          <table:table-cell table:style-name="ce449"/>
          <table:table-cell/>
          <table:table-cell table:style-name="ce260" table:number-columns-repeated="2"/>
          <table:table-cell table:number-columns-repeated="251"/>
        </table:table-row>
        <table:table-row table:style-name="ro21">
          <table:table-cell table:style-name="ce422"/>
          <table:table-cell table:style-name="ce440" office:value-type="string" calcext:value-type="string">
            <text:p>CUADRO DE SERVICIO A LA DEUDA</text:p>
          </table:table-cell>
          <table:table-cell table:style-name="ce440"/>
          <table:table-cell table:style-name="ce422"/>
          <table:table-cell table:style-name="ce260" table:number-columns-repeated="2"/>
          <table:table-cell table:number-columns-repeated="251"/>
        </table:table-row>
        <table:table-row table:style-name="ro21">
          <table:table-cell table:style-name="ce423" office:value-type="string" calcext:value-type="string">
            <text:p>PERIODO</text:p>
          </table:table-cell>
          <table:table-cell table:style-name="ce441" office:value-type="string" calcext:value-type="string">
            <text:p>AÑO 1</text:p>
          </table:table-cell>
          <table:table-cell table:style-name="ce441" office:value-type="string" calcext:value-type="string">
            <text:p>AÑO 2</text:p>
          </table:table-cell>
          <table:table-cell table:style-name="ce441" office:value-type="string" calcext:value-type="string">
            <text:p>AÑO 3</text:p>
          </table:table-cell>
          <table:table-cell table:style-name="ce260" table:number-columns-repeated="2"/>
          <table:table-cell table:number-columns-repeated="251"/>
        </table:table-row>
        <table:table-row table:style-name="ro21">
          <table:table-cell table:style-name="ce258" office:value-type="string" calcext:value-type="string">
            <text:p>SALDO INICIAL</text:p>
          </table:table-cell>
          <table:table-cell table:style-name="ce442" table:formula="of:=[.B62]" office:value-type="float" office:value="5000" calcext:value-type="float">
            <text:p><text:s/>5,000.00 </text:p>
          </table:table-cell>
          <table:table-cell table:style-name="ce450" table:number-columns-repeated="2"/>
          <table:table-cell table:style-name="ce260" table:number-columns-repeated="2"/>
          <table:table-cell table:number-columns-repeated="251"/>
        </table:table-row>
        <table:table-row table:style-name="ro21">
          <table:table-cell table:style-name="ce258" office:value-type="string" calcext:value-type="string">
            <text:p>AMORTIZACION</text:p>
          </table:table-cell>
          <table:table-cell table:style-name="ce443" table:formula="of:=[.B53]-[.B52]" office:value-type="float" office:value="5000" calcext:value-type="float">
            <text:p><text:s/>5,000.00 </text:p>
          </table:table-cell>
          <table:table-cell table:style-name="ce450" table:number-columns-repeated="2"/>
          <table:table-cell table:style-name="ce260" table:number-columns-repeated="2"/>
          <table:table-cell table:number-columns-repeated="251"/>
        </table:table-row>
        <table:table-row table:style-name="ro21">
          <table:table-cell table:style-name="ce258" office:value-type="string" calcext:value-type="string">
            <text:p>INTERESES</text:p>
          </table:table-cell>
          <table:table-cell table:style-name="ce442" table:formula="of:=SUM([.D62:.D73])" office:value-type="float" office:value="388.861783132514" calcext:value-type="float">
            <text:p><text:s/>388.86 </text:p>
          </table:table-cell>
          <table:table-cell table:style-name="ce451" table:number-columns-repeated="2"/>
          <table:table-cell table:style-name="ce260" table:number-columns-repeated="2"/>
          <table:table-cell table:number-columns-repeated="251"/>
        </table:table-row>
        <table:table-row table:style-name="ro21">
          <table:table-cell table:style-name="ce258" office:value-type="string" calcext:value-type="string">
            <text:p>CUOTA</text:p>
          </table:table-cell>
          <table:table-cell table:style-name="ce444" table:formula="of:=SUM([.E62:.E73])" office:value-type="float" office:value="5388.86178313251" calcext:value-type="float">
            <text:p>5,388.86 </text:p>
          </table:table-cell>
          <table:table-cell table:style-name="ce452" table:number-columns-repeated="2"/>
          <table:table-cell table:style-name="ce260" table:number-columns-repeated="2"/>
          <table:table-cell table:number-columns-repeated="251"/>
        </table:table-row>
        <table:table-row table:style-name="ro21">
          <table:table-cell table:style-name="ce258" office:value-type="string" calcext:value-type="string">
            <text:p>SALDO FINAL</text:p>
          </table:table-cell>
          <table:table-cell table:style-name="ce443" table:formula="of:=[.B50]-[.B51]" office:value-type="float" office:value="0" calcext:value-type="float">
            <text:p><text:s/>- <text:s text:c="2"/></text:p>
          </table:table-cell>
          <table:table-cell table:style-name="ce450" table:number-columns-repeated="2"/>
          <table:table-cell table:style-name="ce260" table:number-columns-repeated="2"/>
          <table:table-cell table:number-columns-repeated="251"/>
        </table:table-row>
        <table:table-row table:style-name="ro21">
          <table:table-cell table:style-name="ce258" office:value-type="string" calcext:value-type="string">
            <text:p>ESCUDO FISCAL</text:p>
          </table:table-cell>
          <table:table-cell table:style-name="ce443" table:formula="of:=0.3*[.B52]" office:value-type="float" office:value="116.658534939754" calcext:value-type="float">
            <text:p><text:s/>116.66 </text:p>
          </table:table-cell>
          <table:table-cell table:style-name="ce450" table:number-columns-repeated="2"/>
          <table:table-cell table:style-name="ce260" table:number-columns-repeated="2"/>
          <table:table-cell table:number-columns-repeated="251"/>
        </table:table-row>
        <table:table-row table:style-name="ro21">
          <table:table-cell table:style-name="ce260"/>
          <table:table-cell table:style-name="ce439"/>
          <table:table-cell table:style-name="ce449"/>
          <table:table-cell/>
          <table:table-cell table:style-name="ce260" table:number-columns-repeated="2"/>
          <table:table-cell table:number-columns-repeated="251"/>
        </table:table-row>
        <table:table-row table:style-name="ro21" table:number-rows-repeated="2">
          <table:table-cell table:style-name="ce260" table:number-columns-repeated="6"/>
          <table:table-cell table:number-columns-repeated="251"/>
        </table:table-row>
        <table:table-row table:style-name="ro21">
          <table:table-cell table:style-name="ce260"/>
          <table:table-cell table:style-name="ce260" office:value-type="string" calcext:value-type="string">
            <text:p>CUADRO DE SERVICIO A LA DEUDA</text:p>
          </table:table-cell>
          <table:table-cell table:style-name="ce260" table:number-columns-repeated="4"/>
          <table:table-cell table:number-columns-repeated="251"/>
        </table:table-row>
        <table:table-row table:style-name="ro21">
          <table:table-cell table:style-name="ce260" table:number-columns-repeated="6"/>
          <table:table-cell table:number-columns-repeated="251"/>
        </table:table-row>
        <table:table-row table:style-name="ro21">
          <table:table-cell table:style-name="ce424" office:value-type="string" calcext:value-type="string">
            <text:p>Periodos</text:p>
          </table:table-cell>
          <table:table-cell table:style-name="ce445" office:value-type="string" calcext:value-type="string">
            <text:p>Saldo Inicial</text:p>
          </table:table-cell>
          <table:table-cell table:style-name="ce445" office:value-type="string" calcext:value-type="string">
            <text:p>Amortizacion</text:p>
          </table:table-cell>
          <table:table-cell table:style-name="ce445" office:value-type="string" calcext:value-type="string">
            <text:p>Intereses</text:p>
          </table:table-cell>
          <table:table-cell table:style-name="ce445" office:value-type="string" calcext:value-type="string">
            <text:p>Cuota</text:p>
          </table:table-cell>
          <table:table-cell table:style-name="ce292" office:value-type="string" calcext:value-type="string">
            <text:p>Saldo Final</text:p>
          </table:table-cell>
          <table:table-cell table:style-name="ce292" office:value-type="string" calcext:value-type="string">
            <text:p>Escudo Fiscal</text:p>
          </table:table-cell>
          <table:table-cell/>
          <table:table-cell table:style-name="ce280"/>
          <table:table-cell table:number-columns-repeated="248"/>
        </table:table-row>
        <table:table-row table:style-name="ro21">
          <table:table-cell table:style-name="ce424" office:value-type="float" office:value="1" calcext:value-type="float">
            <text:p>1</text:p>
          </table:table-cell>
          <table:table-cell table:style-name="ce300" table:formula="of:=[.B41]" office:value-type="float" office:value="5000" calcext:value-type="float">
            <text:p><text:s/>5,000.00 </text:p>
          </table:table-cell>
          <table:table-cell table:style-name="ce300" table:formula="of:=[.E62]-[.D62]" office:value-type="float" office:value="390.497230661776" calcext:value-type="float">
            <text:p><text:s/>390.50 </text:p>
          </table:table-cell>
          <table:table-cell table:style-name="ce300" table:formula="of:=[.B62]*[.$B$43]" office:value-type="float" office:value="58.5745845992669" calcext:value-type="float">
            <text:p><text:s/>58.57 </text:p>
          </table:table-cell>
          <table:table-cell table:style-name="ce300" table:formula="of:=[.$C$45]" office:value-type="float" office:value="449.071815261043" calcext:value-type="float">
            <text:p><text:s/>449.07 </text:p>
          </table:table-cell>
          <table:table-cell table:style-name="ce300" table:formula="of:=[.B62]-[.C62]" office:value-type="float" office:value="4609.50276933822" calcext:value-type="float">
            <text:p><text:s/>4,609.50 </text:p>
          </table:table-cell>
          <table:table-cell table:style-name="ce339" table:formula="of:=[.D62]*0.3" office:value-type="float" office:value="17.5723753797801" calcext:value-type="float">
            <text:p><text:s/>17.57 </text:p>
          </table:table-cell>
          <table:table-cell table:number-columns-repeated="250"/>
        </table:table-row>
        <table:table-row table:style-name="ro21">
          <table:table-cell table:style-name="ce424" office:value-type="float" office:value="2" calcext:value-type="float">
            <text:p>2</text:p>
          </table:table-cell>
          <table:table-cell table:style-name="ce300" table:formula="of:=[.F62]" office:value-type="float" office:value="4609.50276933822" calcext:value-type="float">
            <text:p><text:s/>4,609.50 </text:p>
          </table:table-cell>
          <table:table-cell table:style-name="ce300" table:formula="of:=[.E63]-[.D63]" office:value-type="float" office:value="395.071873276411" calcext:value-type="float">
            <text:p><text:s/>395.07 </text:p>
          </table:table-cell>
          <table:table-cell table:style-name="ce300" table:formula="of:=[.B63]*[.$B$43]" office:value-type="float" office:value="53.9999419846314" calcext:value-type="float">
            <text:p><text:s/>54.00 </text:p>
          </table:table-cell>
          <table:table-cell table:style-name="ce300" table:formula="of:=[.$C$45]" office:value-type="float" office:value="449.071815261043" calcext:value-type="float">
            <text:p><text:s/>449.07 </text:p>
          </table:table-cell>
          <table:table-cell table:style-name="ce300" table:formula="of:=[.B63]-[.C63]" office:value-type="float" office:value="4214.43089606181" calcext:value-type="float">
            <text:p><text:s/>4,214.43 </text:p>
          </table:table-cell>
          <table:table-cell table:style-name="ce339" table:formula="of:=[.D63]*0.3" office:value-type="float" office:value="16.1999825953894" calcext:value-type="float">
            <text:p><text:s/>16.20 </text:p>
          </table:table-cell>
          <table:table-cell table:number-columns-repeated="250"/>
        </table:table-row>
        <table:table-row table:style-name="ro21">
          <table:table-cell table:style-name="ce424" office:value-type="float" office:value="3" calcext:value-type="float">
            <text:p>3</text:p>
          </table:table-cell>
          <table:table-cell table:style-name="ce300" table:formula="of:=[.F63]" office:value-type="float" office:value="4214.43089606181" calcext:value-type="float">
            <text:p><text:s/>4,214.43 </text:p>
          </table:table-cell>
          <table:table-cell table:style-name="ce300" table:formula="of:=[.E64]-[.D64]" office:value-type="float" office:value="399.700107449215" calcext:value-type="float">
            <text:p><text:s/>399.70 </text:p>
          </table:table-cell>
          <table:table-cell table:style-name="ce300" table:formula="of:=[.B64]*[.$B$43]" office:value-type="float" office:value="49.3717078118274" calcext:value-type="float">
            <text:p><text:s/>49.37 </text:p>
          </table:table-cell>
          <table:table-cell table:style-name="ce300" table:formula="of:=[.$C$45]" office:value-type="float" office:value="449.071815261043" calcext:value-type="float">
            <text:p><text:s/>449.07 </text:p>
          </table:table-cell>
          <table:table-cell table:style-name="ce300" table:formula="of:=[.B64]-[.C64]" office:value-type="float" office:value="3814.7307886126" calcext:value-type="float">
            <text:p><text:s/>3,814.73 </text:p>
          </table:table-cell>
          <table:table-cell table:style-name="ce339" table:formula="of:=[.D64]*0.3" office:value-type="float" office:value="14.8115123435482" calcext:value-type="float">
            <text:p><text:s/>14.81 </text:p>
          </table:table-cell>
          <table:table-cell table:number-columns-repeated="250"/>
        </table:table-row>
        <table:table-row table:style-name="ro21">
          <table:table-cell table:style-name="ce424" office:value-type="float" office:value="4" calcext:value-type="float">
            <text:p>4</text:p>
          </table:table-cell>
          <table:table-cell table:style-name="ce300" table:formula="of:=[.F64]" office:value-type="float" office:value="3814.7307886126" calcext:value-type="float">
            <text:p><text:s/>3,814.73 </text:p>
          </table:table-cell>
          <table:table-cell table:style-name="ce300" table:formula="of:=[.E65]-[.D65]" office:value-type="float" office:value="404.382561000839" calcext:value-type="float">
            <text:p><text:s/>404.38 </text:p>
          </table:table-cell>
          <table:table-cell table:style-name="ce300" table:formula="of:=[.B65]*[.$B$43]" office:value-type="float" office:value="44.6892542602033" calcext:value-type="float">
            <text:p><text:s/>44.69 </text:p>
          </table:table-cell>
          <table:table-cell table:style-name="ce300" table:formula="of:=[.$C$45]" office:value-type="float" office:value="449.071815261043" calcext:value-type="float">
            <text:p><text:s/>449.07 </text:p>
          </table:table-cell>
          <table:table-cell table:style-name="ce300" table:formula="of:=[.B65]-[.C65]" office:value-type="float" office:value="3410.34822761176" calcext:value-type="float">
            <text:p><text:s/>3,410.35 </text:p>
          </table:table-cell>
          <table:table-cell table:style-name="ce339" table:formula="of:=[.D65]*0.3" office:value-type="float" office:value="13.406776278061" calcext:value-type="float">
            <text:p><text:s/>13.41 </text:p>
          </table:table-cell>
          <table:table-cell table:number-columns-repeated="250"/>
        </table:table-row>
        <table:table-row table:style-name="ro21">
          <table:table-cell table:style-name="ce424" office:value-type="float" office:value="5" calcext:value-type="float">
            <text:p>5</text:p>
          </table:table-cell>
          <table:table-cell table:style-name="ce300" table:formula="of:=[.F65]" office:value-type="float" office:value="3410.34822761176" calcext:value-type="float">
            <text:p><text:s/>3,410.35 </text:p>
          </table:table-cell>
          <table:table-cell table:style-name="ce300" table:formula="of:=[.E66]-[.D66]" office:value-type="float" office:value="409.119869106802" calcext:value-type="float">
            <text:p><text:s/>409.12 </text:p>
          </table:table-cell>
          <table:table-cell table:style-name="ce300" table:formula="of:=[.B66]*[.$B$43]" office:value-type="float" office:value="39.951946154241" calcext:value-type="float">
            <text:p><text:s/>39.95 </text:p>
          </table:table-cell>
          <table:table-cell table:style-name="ce300" table:formula="of:=[.$C$45]" office:value-type="float" office:value="449.071815261043" calcext:value-type="float">
            <text:p><text:s/>449.07 </text:p>
          </table:table-cell>
          <table:table-cell table:style-name="ce300" table:formula="of:=[.B66]-[.C66]" office:value-type="float" office:value="3001.22835850496" calcext:value-type="float">
            <text:p><text:s/>3,001.23 </text:p>
          </table:table-cell>
          <table:table-cell table:style-name="ce339" table:formula="of:=[.D66]*0.3" office:value-type="float" office:value="11.9855838462723" calcext:value-type="float">
            <text:p><text:s/>11.99 </text:p>
          </table:table-cell>
          <table:table-cell table:number-columns-repeated="250"/>
        </table:table-row>
        <table:table-row table:style-name="ro21">
          <table:table-cell table:style-name="ce424" office:value-type="float" office:value="6" calcext:value-type="float">
            <text:p>6</text:p>
          </table:table-cell>
          <table:table-cell table:style-name="ce300" table:formula="of:=[.F66]" office:value-type="float" office:value="3001.22835850496" calcext:value-type="float">
            <text:p><text:s/>3,001.23 </text:p>
          </table:table-cell>
          <table:table-cell table:style-name="ce300" table:formula="of:=[.E67]-[.D67]" office:value-type="float" office:value="413.912674383649" calcext:value-type="float">
            <text:p><text:s/>413.91 </text:p>
          </table:table-cell>
          <table:table-cell table:style-name="ce300" table:formula="of:=[.B67]*[.$B$43]" office:value-type="float" office:value="35.1591408773935" calcext:value-type="float">
            <text:p><text:s/>35.16 </text:p>
          </table:table-cell>
          <table:table-cell table:style-name="ce300" table:formula="of:=[.$C$45]" office:value-type="float" office:value="449.071815261043" calcext:value-type="float">
            <text:p><text:s/>449.07 </text:p>
          </table:table-cell>
          <table:table-cell table:style-name="ce300" table:formula="of:=[.B67]-[.C67]" office:value-type="float" office:value="2587.31568412131" calcext:value-type="float">
            <text:p><text:s/>2,587.32 </text:p>
          </table:table-cell>
          <table:table-cell table:style-name="ce339" table:formula="of:=[.D67]*0.3" office:value-type="float" office:value="10.5477422632181" calcext:value-type="float">
            <text:p><text:s/>10.55 </text:p>
          </table:table-cell>
          <table:table-cell table:number-columns-repeated="250"/>
        </table:table-row>
        <table:table-row table:style-name="ro21">
          <table:table-cell table:style-name="ce424" office:value-type="float" office:value="7" calcext:value-type="float">
            <text:p>7</text:p>
          </table:table-cell>
          <table:table-cell table:style-name="ce300" table:formula="of:=[.F67]" office:value-type="float" office:value="2587.31568412131" calcext:value-type="float">
            <text:p><text:s/>2,587.32 </text:p>
          </table:table-cell>
          <table:table-cell table:style-name="ce300" table:formula="of:=[.E68]-[.D68]" office:value-type="float" office:value="418.761626976128" calcext:value-type="float">
            <text:p><text:s/>418.76 </text:p>
          </table:table-cell>
          <table:table-cell table:style-name="ce300" table:formula="of:=[.B68]*[.$B$43]" office:value-type="float" office:value="30.3101882849147" calcext:value-type="float">
            <text:p><text:s/>30.31 </text:p>
          </table:table-cell>
          <table:table-cell table:style-name="ce300" table:formula="of:=[.$C$45]" office:value-type="float" office:value="449.071815261043" calcext:value-type="float">
            <text:p><text:s/>449.07 </text:p>
          </table:table-cell>
          <table:table-cell table:style-name="ce300" table:formula="of:=[.B68]-[.C68]" office:value-type="float" office:value="2168.55405714518" calcext:value-type="float">
            <text:p><text:s/>2,168.55 </text:p>
          </table:table-cell>
          <table:table-cell table:style-name="ce339" table:formula="of:=[.D68]*0.3" office:value-type="float" office:value="9.09305648547442" calcext:value-type="float">
            <text:p><text:s/>9.09 </text:p>
          </table:table-cell>
          <table:table-cell table:number-columns-repeated="250"/>
        </table:table-row>
        <table:table-row table:style-name="ro21">
          <table:table-cell table:style-name="ce424" office:value-type="float" office:value="8" calcext:value-type="float">
            <text:p>8</text:p>
          </table:table-cell>
          <table:table-cell table:style-name="ce300" table:formula="of:=[.F68]" office:value-type="float" office:value="2168.55405714518" calcext:value-type="float">
            <text:p><text:s/>2,168.55 </text:p>
          </table:table-cell>
          <table:table-cell table:style-name="ce300" table:formula="of:=[.E69]-[.D69]" office:value-type="float" office:value="423.667384645376" calcext:value-type="float">
            <text:p><text:s/>423.67 </text:p>
          </table:table-cell>
          <table:table-cell table:style-name="ce300" table:formula="of:=[.B69]*[.$B$43]" office:value-type="float" office:value="25.4044306156668" calcext:value-type="float">
            <text:p><text:s/>25.40 </text:p>
          </table:table-cell>
          <table:table-cell table:style-name="ce300" table:formula="of:=[.$C$45]" office:value-type="float" office:value="449.071815261043" calcext:value-type="float">
            <text:p><text:s/>449.07 </text:p>
          </table:table-cell>
          <table:table-cell table:style-name="ce300" table:formula="of:=[.B69]-[.C69]" office:value-type="float" office:value="1744.8866724998" calcext:value-type="float">
            <text:p><text:s/>1,744.89 </text:p>
          </table:table-cell>
          <table:table-cell table:style-name="ce339" table:formula="of:=[.D69]*0.3" office:value-type="float" office:value="7.62132918470003" calcext:value-type="float">
            <text:p><text:s/>7.62 </text:p>
          </table:table-cell>
          <table:table-cell table:number-columns-repeated="250"/>
        </table:table-row>
        <table:table-row table:style-name="ro21">
          <table:table-cell table:style-name="ce424" office:value-type="float" office:value="9" calcext:value-type="float">
            <text:p>9</text:p>
          </table:table-cell>
          <table:table-cell table:style-name="ce300" table:formula="of:=[.F69]" office:value-type="float" office:value="1744.8866724998" calcext:value-type="float">
            <text:p><text:s/>1,744.89 </text:p>
          </table:table-cell>
          <table:table-cell table:style-name="ce300" table:formula="of:=[.E70]-[.D70]" office:value-type="float" office:value="428.630612858148" calcext:value-type="float">
            <text:p><text:s/>428.63 </text:p>
          </table:table-cell>
          <table:table-cell table:style-name="ce300" table:formula="of:=[.B70]*[.$B$43]" office:value-type="float" office:value="20.4412024028946" calcext:value-type="float">
            <text:p><text:s/>20.44 </text:p>
          </table:table-cell>
          <table:table-cell table:style-name="ce300" table:formula="of:=[.$C$45]" office:value-type="float" office:value="449.071815261043" calcext:value-type="float">
            <text:p><text:s/>449.07 </text:p>
          </table:table-cell>
          <table:table-cell table:style-name="ce300" table:formula="of:=[.B70]-[.C70]" office:value-type="float" office:value="1316.25605964166" calcext:value-type="float">
            <text:p><text:s/>1,316.26 </text:p>
          </table:table-cell>
          <table:table-cell table:style-name="ce339" table:formula="of:=[.D70]*0.3" office:value-type="float" office:value="6.13236072086838" calcext:value-type="float">
            <text:p><text:s/>6.13 </text:p>
          </table:table-cell>
          <table:table-cell table:number-columns-repeated="250"/>
        </table:table-row>
        <table:table-row table:style-name="ro21">
          <table:table-cell table:style-name="ce424" office:value-type="float" office:value="10" calcext:value-type="float">
            <text:p>10</text:p>
          </table:table-cell>
          <table:table-cell table:style-name="ce300" table:formula="of:=[.F70]" office:value-type="float" office:value="1316.25605964166" calcext:value-type="float">
            <text:p><text:s/>1,316.26 </text:p>
          </table:table-cell>
          <table:table-cell table:style-name="ce300" table:formula="of:=[.E71]-[.D71]" office:value-type="float" office:value="433.651984877087" calcext:value-type="float">
            <text:p><text:s/>433.65 </text:p>
          </table:table-cell>
          <table:table-cell table:style-name="ce300" table:formula="of:=[.B71]*[.$B$43]" office:value-type="float" office:value="15.4198303839556" calcext:value-type="float">
            <text:p><text:s/>15.42 </text:p>
          </table:table-cell>
          <table:table-cell table:style-name="ce300" table:formula="of:=[.$C$45]" office:value-type="float" office:value="449.071815261043" calcext:value-type="float">
            <text:p><text:s/>449.07 </text:p>
          </table:table-cell>
          <table:table-cell table:style-name="ce300" table:formula="of:=[.B71]-[.C71]" office:value-type="float" office:value="882.604074764568" calcext:value-type="float">
            <text:p><text:s/>882.60 </text:p>
          </table:table-cell>
          <table:table-cell table:style-name="ce339" table:formula="of:=[.D71]*0.3" office:value-type="float" office:value="4.62594911518667" calcext:value-type="float">
            <text:p><text:s/>4.63 </text:p>
          </table:table-cell>
          <table:table-cell table:number-columns-repeated="250"/>
        </table:table-row>
        <table:table-row table:style-name="ro21">
          <table:table-cell table:style-name="ce424" office:value-type="float" office:value="11" calcext:value-type="float">
            <text:p>11</text:p>
          </table:table-cell>
          <table:table-cell table:style-name="ce300" table:formula="of:=[.F71]" office:value-type="float" office:value="882.604074764568" calcext:value-type="float">
            <text:p><text:s/>882.60 </text:p>
          </table:table-cell>
          <table:table-cell table:style-name="ce300" table:formula="of:=[.E72]-[.D72]" office:value-type="float" office:value="438.732181852052" calcext:value-type="float">
            <text:p><text:s/>438.73 </text:p>
          </table:table-cell>
          <table:table-cell table:style-name="ce300" table:formula="of:=[.B72]*[.$B$43]" office:value-type="float" office:value="10.339633408991" calcext:value-type="float">
            <text:p><text:s/>10.34 </text:p>
          </table:table-cell>
          <table:table-cell table:style-name="ce300" table:formula="of:=[.$C$45]" office:value-type="float" office:value="449.071815261043" calcext:value-type="float">
            <text:p><text:s/>449.07 </text:p>
          </table:table-cell>
          <table:table-cell table:style-name="ce300" table:formula="of:=[.B72]-[.C72]" office:value-type="float" office:value="443.871892912516" calcext:value-type="float">
            <text:p><text:s/>443.87 </text:p>
          </table:table-cell>
          <table:table-cell table:style-name="ce339" table:formula="of:=[.D72]*0.3" office:value-type="float" office:value="3.10189002269729" calcext:value-type="float">
            <text:p><text:s/>3.10 </text:p>
          </table:table-cell>
          <table:table-cell table:number-columns-repeated="250"/>
        </table:table-row>
        <table:table-row table:style-name="ro21">
          <table:table-cell table:style-name="ce424" office:value-type="float" office:value="12" calcext:value-type="float">
            <text:p>12</text:p>
          </table:table-cell>
          <table:table-cell table:style-name="ce300" table:formula="of:=[.F72]" office:value-type="float" office:value="443.871892912516" calcext:value-type="float">
            <text:p><text:s/>443.87 </text:p>
          </table:table-cell>
          <table:table-cell table:style-name="ce300" table:formula="of:=[.E73]-[.D73]" office:value-type="float" office:value="443.871892912515" calcext:value-type="float">
            <text:p><text:s/>443.87 </text:p>
          </table:table-cell>
          <table:table-cell table:style-name="ce300" table:formula="of:=[.B73]*[.$B$43]" office:value-type="float" office:value="5.19992234852818" calcext:value-type="float">
            <text:p><text:s/>5.20 </text:p>
          </table:table-cell>
          <table:table-cell table:style-name="ce300" table:formula="of:=[.$C$45]" office:value-type="float" office:value="449.071815261043" calcext:value-type="float">
            <text:p><text:s/>449.07 </text:p>
          </table:table-cell>
          <table:table-cell table:style-name="ce300" table:formula="of:=[.B73]-[.C73]" office:value-type="float" office:value="0.00000000000159161572810262" calcext:value-type="float">
            <text:p><text:s/>0.00 </text:p>
          </table:table-cell>
          <table:table-cell table:style-name="ce339" table:formula="of:=[.D73]*0.3" office:value-type="float" office:value="1.55997670455846" calcext:value-type="float">
            <text:p><text:s/>1.56 </text:p>
          </table:table-cell>
          <table:table-cell table:number-columns-repeated="250"/>
        </table:table-row>
        <table:table-row table:style-name="ro21">
          <table:table-cell table:style-name="ce424" office:value-type="float" office:value="13" calcext:value-type="float">
            <text:p>13</text:p>
          </table:table-cell>
          <table:table-cell table:style-name="ce300" table:formula="of:=[.F73]" office:value-type="float" office:value="0.00000000000159161572810262" calcext:value-type="float">
            <text:p><text:s/>0.00 </text:p>
          </table:table-cell>
          <table:table-cell table:style-name="ce300" table:formula="of:=[.E74]-[.D74]" office:value-type="float" office:value="449.071815261043" calcext:value-type="float">
            <text:p><text:s/>449.07 </text:p>
          </table:table-cell>
          <table:table-cell table:style-name="ce300" table:formula="of:=[.B74]*[.$B$43]" office:value-type="float" office:value="0.0000000000000186456460230542" calcext:value-type="float">
            <text:p><text:s/>0.00 </text:p>
          </table:table-cell>
          <table:table-cell table:style-name="ce300" table:formula="of:=[.$C$45]" office:value-type="float" office:value="449.071815261043" calcext:value-type="float">
            <text:p><text:s/>449.07 </text:p>
          </table:table-cell>
          <table:table-cell table:style-name="ce300" table:formula="of:=[.B74]-[.C74]" office:value-type="float" office:value="-449.071815261041" calcext:value-type="float">
            <text:p><text:s/>(449.07)</text:p>
          </table:table-cell>
          <table:table-cell table:style-name="ce339" table:formula="of:=[.D74]*0.3" office:value-type="float" office:value="5.59369380691626E-015" calcext:value-type="float">
            <text:p><text:s/>0.00 </text:p>
          </table:table-cell>
          <table:table-cell table:number-columns-repeated="250"/>
        </table:table-row>
        <table:table-row table:style-name="ro21">
          <table:table-cell table:style-name="ce424" office:value-type="float" office:value="14" calcext:value-type="float">
            <text:p>14</text:p>
          </table:table-cell>
          <table:table-cell table:style-name="ce300" table:formula="of:=[.F74]" office:value-type="float" office:value="-449.071815261041" calcext:value-type="float">
            <text:p><text:s/>(449.07)</text:p>
          </table:table-cell>
          <table:table-cell table:style-name="ce300" table:formula="of:=[.E75]-[.D75]" office:value-type="float" office:value="454.332654267874" calcext:value-type="float">
            <text:p><text:s/>454.33 </text:p>
          </table:table-cell>
          <table:table-cell table:style-name="ce300" table:formula="of:=[.B75]*[.$B$43]" office:value-type="float" office:value="-5.26083900683084" calcext:value-type="float">
            <text:p><text:s/>(5.26)</text:p>
          </table:table-cell>
          <table:table-cell table:style-name="ce300" table:formula="of:=[.$C$45]" office:value-type="float" office:value="449.071815261043" calcext:value-type="float">
            <text:p><text:s/>449.07 </text:p>
          </table:table-cell>
          <table:table-cell table:style-name="ce300" table:formula="of:=[.B75]-[.C75]" office:value-type="float" office:value="-903.404469528915" calcext:value-type="float">
            <text:p><text:s/>(903.40)</text:p>
          </table:table-cell>
          <table:table-cell table:style-name="ce339" table:formula="of:=[.D75]*0.3" office:value-type="float" office:value="-1.57825170204925" calcext:value-type="float">
            <text:p><text:s/>-1.58 </text:p>
          </table:table-cell>
          <table:table-cell table:number-columns-repeated="250"/>
        </table:table-row>
        <table:table-row table:style-name="ro21">
          <table:table-cell table:style-name="ce424" office:value-type="float" office:value="15" calcext:value-type="float">
            <text:p>15</text:p>
          </table:table-cell>
          <table:table-cell table:style-name="ce300" table:formula="of:=[.F75]" office:value-type="float" office:value="-903.404469528915" calcext:value-type="float">
            <text:p><text:s/>(903.40)</text:p>
          </table:table-cell>
          <table:table-cell table:style-name="ce300" table:formula="of:=[.E76]-[.D76]" office:value-type="float" office:value="459.655123566598" calcext:value-type="float">
            <text:p><text:s/>459.66 </text:p>
          </table:table-cell>
          <table:table-cell table:style-name="ce300" table:formula="of:=[.B76]*[.$B$43]" office:value-type="float" office:value="-10.5833083055555" calcext:value-type="float">
            <text:p><text:s/>(10.58)</text:p>
          </table:table-cell>
          <table:table-cell table:style-name="ce300" table:formula="of:=[.$C$45]" office:value-type="float" office:value="449.071815261043" calcext:value-type="float">
            <text:p><text:s/>449.07 </text:p>
          </table:table-cell>
          <table:table-cell table:style-name="ce300" table:formula="of:=[.B76]-[.C76]" office:value-type="float" office:value="-1363.05959309551" calcext:value-type="float">
            <text:p><text:s/>(1,363.06)</text:p>
          </table:table-cell>
          <table:table-cell table:style-name="ce339" table:formula="of:=[.D76]*0.3" office:value-type="float" office:value="-3.17499249166664" calcext:value-type="float">
            <text:p><text:s/>-3.17 </text:p>
          </table:table-cell>
          <table:table-cell table:number-columns-repeated="250"/>
        </table:table-row>
        <table:table-row table:style-name="ro21">
          <table:table-cell table:style-name="ce424" office:value-type="float" office:value="16" calcext:value-type="float">
            <text:p>16</text:p>
          </table:table-cell>
          <table:table-cell table:style-name="ce300" table:formula="of:=[.F76]" office:value-type="float" office:value="-1363.05959309551" calcext:value-type="float">
            <text:p><text:s/>(1,363.06)</text:p>
          </table:table-cell>
          <table:table-cell table:style-name="ce300" table:formula="of:=[.E77]-[.D77]" office:value-type="float" office:value="465.039945150966" calcext:value-type="float">
            <text:p><text:s/>465.04 </text:p>
          </table:table-cell>
          <table:table-cell table:style-name="ce300" table:formula="of:=[.B77]*[.$B$43]" office:value-type="float" office:value="-15.9681298899231" calcext:value-type="float">
            <text:p><text:s/>(15.97)</text:p>
          </table:table-cell>
          <table:table-cell table:style-name="ce300" table:formula="of:=[.$C$45]" office:value-type="float" office:value="449.071815261043" calcext:value-type="float">
            <text:p><text:s/>449.07 </text:p>
          </table:table-cell>
          <table:table-cell table:style-name="ce300" table:formula="of:=[.B77]-[.C77]" office:value-type="float" office:value="-1828.09953824648" calcext:value-type="float">
            <text:p><text:s/>(1,828.10)</text:p>
          </table:table-cell>
          <table:table-cell table:style-name="ce339" table:formula="of:=[.D77]*0.3" office:value-type="float" office:value="-4.79043896697693" calcext:value-type="float">
            <text:p><text:s/>-4.79 </text:p>
          </table:table-cell>
          <table:table-cell table:number-columns-repeated="250"/>
        </table:table-row>
        <table:table-row table:style-name="ro21">
          <table:table-cell table:style-name="ce424" office:value-type="float" office:value="17" calcext:value-type="float">
            <text:p>17</text:p>
          </table:table-cell>
          <table:table-cell table:style-name="ce300" table:formula="of:=[.F77]" office:value-type="float" office:value="-1828.09953824648" calcext:value-type="float">
            <text:p><text:s/>(1,828.10)</text:p>
          </table:table-cell>
          <table:table-cell table:style-name="ce300" table:formula="of:=[.E78]-[.D78]" office:value-type="float" office:value="470.487849472823" calcext:value-type="float">
            <text:p><text:s/>470.49 </text:p>
          </table:table-cell>
          <table:table-cell table:style-name="ce300" table:formula="of:=[.B78]*[.$B$43]" office:value-type="float" office:value="-21.4160342117798" calcext:value-type="float">
            <text:p><text:s/>(21.42)</text:p>
          </table:table-cell>
          <table:table-cell table:style-name="ce300" table:formula="of:=[.$C$45]" office:value-type="float" office:value="449.071815261043" calcext:value-type="float">
            <text:p><text:s/>449.07 </text:p>
          </table:table-cell>
          <table:table-cell table:style-name="ce300" table:formula="of:=[.B78]-[.C78]" office:value-type="float" office:value="-2298.5873877193" calcext:value-type="float">
            <text:p><text:s/>(2,298.59)</text:p>
          </table:table-cell>
          <table:table-cell table:style-name="ce339" table:formula="of:=[.D78]*0.3" office:value-type="float" office:value="-6.42481026353395" calcext:value-type="float">
            <text:p><text:s/>-6.42 </text:p>
          </table:table-cell>
          <table:table-cell table:number-columns-repeated="250"/>
        </table:table-row>
        <table:table-row table:style-name="ro21">
          <table:table-cell table:style-name="ce424" office:value-type="float" office:value="18" calcext:value-type="float">
            <text:p>18</text:p>
          </table:table-cell>
          <table:table-cell table:style-name="ce300" table:formula="of:=[.F78]" office:value-type="float" office:value="-2298.5873877193" calcext:value-type="float">
            <text:p><text:s/>(2,298.59)</text:p>
          </table:table-cell>
          <table:table-cell table:style-name="ce300" table:formula="of:=[.E79]-[.D79]" office:value-type="float" office:value="475.999575541197" calcext:value-type="float">
            <text:p><text:s/>476.00 </text:p>
          </table:table-cell>
          <table:table-cell table:style-name="ce300" table:formula="of:=[.B79]*[.$B$43]" office:value-type="float" office:value="-26.9277602801544" calcext:value-type="float">
            <text:p><text:s/>(26.93)</text:p>
          </table:table-cell>
          <table:table-cell table:style-name="ce300" table:formula="of:=[.$C$45]" office:value-type="float" office:value="449.071815261043" calcext:value-type="float">
            <text:p><text:s/>449.07 </text:p>
          </table:table-cell>
          <table:table-cell table:style-name="ce300" table:formula="of:=[.B79]-[.C79]" office:value-type="float" office:value="-2774.5869632605" calcext:value-type="float">
            <text:p><text:s/>(2,774.59)</text:p>
          </table:table-cell>
          <table:table-cell table:style-name="ce339" table:formula="of:=[.D79]*0.3" office:value-type="float" office:value="-8.07832808404633" calcext:value-type="float">
            <text:p><text:s/>-8.08 </text:p>
          </table:table-cell>
          <table:table-cell table:number-columns-repeated="250"/>
        </table:table-row>
        <table:table-row table:style-name="ro21">
          <table:table-cell table:style-name="ce424" office:value-type="float" office:value="19" calcext:value-type="float">
            <text:p>19</text:p>
          </table:table-cell>
          <table:table-cell table:style-name="ce300" table:formula="of:=[.F79]" office:value-type="float" office:value="-2774.5869632605" calcext:value-type="float">
            <text:p><text:s/>(2,774.59)</text:p>
          </table:table-cell>
          <table:table-cell table:style-name="ce300" table:formula="of:=[.E80]-[.D80]" office:value-type="float" office:value="481.575871022548" calcext:value-type="float">
            <text:p><text:s/>481.58 </text:p>
          </table:table-cell>
          <table:table-cell table:style-name="ce300" table:formula="of:=[.B80]*[.$B$43]" office:value-type="float" office:value="-32.504055761505" calcext:value-type="float">
            <text:p><text:s/>(32.50)</text:p>
          </table:table-cell>
          <table:table-cell table:style-name="ce300" table:formula="of:=[.$C$45]" office:value-type="float" office:value="449.071815261043" calcext:value-type="float">
            <text:p><text:s/>449.07 </text:p>
          </table:table-cell>
          <table:table-cell table:style-name="ce300" table:formula="of:=[.B80]-[.C80]" office:value-type="float" office:value="-3256.16283428305" calcext:value-type="float">
            <text:p><text:s/>(3,256.16)</text:p>
          </table:table-cell>
          <table:table-cell table:style-name="ce339" table:formula="of:=[.D80]*0.3" office:value-type="float" office:value="-9.75121672845151" calcext:value-type="float">
            <text:p><text:s/>-9.75 </text:p>
          </table:table-cell>
          <table:table-cell table:number-columns-repeated="250"/>
        </table:table-row>
        <table:table-row table:style-name="ro21">
          <table:table-cell table:style-name="ce424" office:value-type="float" office:value="20" calcext:value-type="float">
            <text:p>20</text:p>
          </table:table-cell>
          <table:table-cell table:style-name="ce300" table:formula="of:=[.F80]" office:value-type="float" office:value="-3256.16283428305" calcext:value-type="float">
            <text:p><text:s/>(3,256.16)</text:p>
          </table:table-cell>
          <table:table-cell table:style-name="ce300" table:formula="of:=[.E81]-[.D81]" office:value-type="float" office:value="487.217492342183" calcext:value-type="float">
            <text:p><text:s/>487.22 </text:p>
          </table:table-cell>
          <table:table-cell table:style-name="ce300" table:formula="of:=[.B81]*[.$B$43]" office:value-type="float" office:value="-38.1456770811402" calcext:value-type="float">
            <text:p><text:s/>(38.15)</text:p>
          </table:table-cell>
          <table:table-cell table:style-name="ce300" table:formula="of:=[.$C$45]" office:value-type="float" office:value="449.071815261043" calcext:value-type="float">
            <text:p><text:s/>449.07 </text:p>
          </table:table-cell>
          <table:table-cell table:style-name="ce300" table:formula="of:=[.B81]-[.C81]" office:value-type="float" office:value="-3743.38032662523" calcext:value-type="float">
            <text:p><text:s/>(3,743.38)</text:p>
          </table:table-cell>
          <table:table-cell table:style-name="ce339" table:formula="of:=[.D81]*0.3" office:value-type="float" office:value="-11.4437031243421" calcext:value-type="float">
            <text:p><text:s/>-11.44 </text:p>
          </table:table-cell>
          <table:table-cell table:number-columns-repeated="250"/>
        </table:table-row>
        <table:table-row table:style-name="ro21">
          <table:table-cell table:style-name="ce424" office:value-type="float" office:value="21" calcext:value-type="float">
            <text:p>21</text:p>
          </table:table-cell>
          <table:table-cell table:style-name="ce300" table:formula="of:=[.F81]" office:value-type="float" office:value="-3743.38032662523" calcext:value-type="float">
            <text:p><text:s/>(3,743.38)</text:p>
          </table:table-cell>
          <table:table-cell table:style-name="ce300" table:formula="of:=[.E82]-[.D82]" office:value-type="float" office:value="492.925204786871" calcext:value-type="float">
            <text:p><text:s/>492.93 </text:p>
          </table:table-cell>
          <table:table-cell table:style-name="ce300" table:formula="of:=[.B82]*[.$B$43]" office:value-type="float" office:value="-43.8533895258282" calcext:value-type="float">
            <text:p><text:s/>(43.85)</text:p>
          </table:table-cell>
          <table:table-cell table:style-name="ce300" table:formula="of:=[.$C$45]" office:value-type="float" office:value="449.071815261043" calcext:value-type="float">
            <text:p><text:s/>449.07 </text:p>
          </table:table-cell>
          <table:table-cell table:style-name="ce300" table:formula="of:=[.B82]-[.C82]" office:value-type="float" office:value="-4236.3055314121" calcext:value-type="float">
            <text:p><text:s/>(4,236.31)</text:p>
          </table:table-cell>
          <table:table-cell table:style-name="ce339" table:formula="of:=[.D82]*0.3" office:value-type="float" office:value="-13.1560168577485" calcext:value-type="float">
            <text:p><text:s/>-13.16 </text:p>
          </table:table-cell>
          <table:table-cell table:number-columns-repeated="250"/>
        </table:table-row>
        <table:table-row table:style-name="ro21">
          <table:table-cell table:style-name="ce424" office:value-type="float" office:value="22" calcext:value-type="float">
            <text:p>22</text:p>
          </table:table-cell>
          <table:table-cell table:style-name="ce300" table:formula="of:=[.F82]" office:value-type="float" office:value="-4236.3055314121" calcext:value-type="float">
            <text:p><text:s/>(4,236.31)</text:p>
          </table:table-cell>
          <table:table-cell table:style-name="ce300" table:formula="of:=[.E83]-[.D83]" office:value-type="float" office:value="498.699782608651" calcext:value-type="float">
            <text:p><text:s/>498.70 </text:p>
          </table:table-cell>
          <table:table-cell table:style-name="ce300" table:formula="of:=[.B83]*[.$B$43]" office:value-type="float" office:value="-49.6279673476081" calcext:value-type="float">
            <text:p><text:s/>(49.63)</text:p>
          </table:table-cell>
          <table:table-cell table:style-name="ce300" table:formula="of:=[.$C$45]" office:value-type="float" office:value="449.071815261043" calcext:value-type="float">
            <text:p><text:s/>449.07 </text:p>
          </table:table-cell>
          <table:table-cell table:style-name="ce300" table:formula="of:=[.B83]-[.C83]" office:value-type="float" office:value="-4735.00531402075" calcext:value-type="float">
            <text:p><text:s/>(4,735.01)</text:p>
          </table:table-cell>
          <table:table-cell table:style-name="ce339" table:formula="of:=[.D83]*0.3" office:value-type="float" office:value="-14.8883902042824" calcext:value-type="float">
            <text:p><text:s/>-14.89 </text:p>
          </table:table-cell>
          <table:table-cell table:number-columns-repeated="250"/>
        </table:table-row>
        <table:table-row table:style-name="ro21">
          <table:table-cell table:style-name="ce424" office:value-type="float" office:value="23" calcext:value-type="float">
            <text:p>23</text:p>
          </table:table-cell>
          <table:table-cell table:style-name="ce300" table:formula="of:=[.F83]" office:value-type="float" office:value="-4735.00531402075" calcext:value-type="float">
            <text:p><text:s/>(4,735.01)</text:p>
          </table:table-cell>
          <table:table-cell table:style-name="ce300" table:formula="of:=[.E84]-[.D84]" office:value-type="float" office:value="504.54200912986" calcext:value-type="float">
            <text:p><text:s/>504.54 </text:p>
          </table:table-cell>
          <table:table-cell table:style-name="ce300" table:formula="of:=[.B84]*[.$B$43]" office:value-type="float" office:value="-55.4701938688174" calcext:value-type="float">
            <text:p><text:s/>(55.47)</text:p>
          </table:table-cell>
          <table:table-cell table:style-name="ce300" table:formula="of:=[.$C$45]" office:value-type="float" office:value="449.071815261043" calcext:value-type="float">
            <text:p><text:s/>449.07 </text:p>
          </table:table-cell>
          <table:table-cell table:style-name="ce300" table:formula="of:=[.B84]-[.C84]" office:value-type="float" office:value="-5239.54732315061" calcext:value-type="float">
            <text:p><text:s/>(5,239.55)</text:p>
          </table:table-cell>
          <table:table-cell table:style-name="ce339" table:formula="of:=[.D84]*0.3" office:value-type="float" office:value="-16.6410581606452" calcext:value-type="float">
            <text:p><text:s/>-16.64 </text:p>
          </table:table-cell>
          <table:table-cell table:number-columns-repeated="250"/>
        </table:table-row>
        <table:table-row table:style-name="ro21">
          <table:table-cell table:style-name="ce424" office:value-type="float" office:value="24" calcext:value-type="float">
            <text:p>24</text:p>
          </table:table-cell>
          <table:table-cell table:style-name="ce300" table:formula="of:=[.F84]" office:value-type="float" office:value="-5239.54732315061" calcext:value-type="float">
            <text:p><text:s/>(5,239.55)</text:p>
          </table:table-cell>
          <table:table-cell table:style-name="ce300" table:formula="of:=[.E85]-[.D85]" office:value-type="float" office:value="510.452676849392" calcext:value-type="float">
            <text:p><text:s/>510.45 </text:p>
          </table:table-cell>
          <table:table-cell table:style-name="ce300" table:formula="of:=[.B85]*[.$B$43]" office:value-type="float" office:value="-61.3808615883496" calcext:value-type="float">
            <text:p><text:s/>(61.38)</text:p>
          </table:table-cell>
          <table:table-cell table:style-name="ce300" table:formula="of:=[.$C$45]" office:value-type="float" office:value="449.071815261043" calcext:value-type="float">
            <text:p><text:s/>449.07 </text:p>
          </table:table-cell>
          <table:table-cell table:style-name="ce300" table:formula="of:=[.B85]-[.C85]" office:value-type="float" office:value="-5750" calcext:value-type="float">
            <text:p><text:s/>(5,750.00)</text:p>
          </table:table-cell>
          <table:table-cell table:style-name="ce339" table:formula="of:=[.D85]*0.3" office:value-type="float" office:value="-18.4142584765049" calcext:value-type="float">
            <text:p><text:s/>-18.41 </text:p>
          </table:table-cell>
          <table:table-cell table:number-columns-repeated="250"/>
        </table:table-row>
        <table:table-row table:style-name="ro21">
          <table:table-cell table:style-name="ce424" office:value-type="float" office:value="25" calcext:value-type="float">
            <text:p>25</text:p>
          </table:table-cell>
          <table:table-cell table:style-name="ce300" table:formula="of:=[.F85]" office:value-type="float" office:value="-5750" calcext:value-type="float">
            <text:p><text:s/>(5,750.00)</text:p>
          </table:table-cell>
          <table:table-cell table:style-name="ce300" table:formula="of:=[.E86]-[.D86]" office:value-type="float" office:value="516.4325875502" calcext:value-type="float">
            <text:p><text:s/>516.43 </text:p>
          </table:table-cell>
          <table:table-cell table:style-name="ce300" table:formula="of:=[.B86]*[.$B$43]" office:value-type="float" office:value="-67.360772289157" calcext:value-type="float">
            <text:p><text:s/>(67.36)</text:p>
          </table:table-cell>
          <table:table-cell table:style-name="ce300" table:formula="of:=[.$C$45]" office:value-type="float" office:value="449.071815261043" calcext:value-type="float">
            <text:p><text:s/>449.07 </text:p>
          </table:table-cell>
          <table:table-cell table:style-name="ce300" table:formula="of:=[.B86]-[.C86]" office:value-type="float" office:value="-6266.4325875502" calcext:value-type="float">
            <text:p><text:s/>(6,266.43)</text:p>
          </table:table-cell>
          <table:table-cell table:style-name="ce339" table:formula="of:=[.D86]*0.3" office:value-type="float" office:value="-20.2082316867471" calcext:value-type="float">
            <text:p><text:s/>-20.21 </text:p>
          </table:table-cell>
          <table:table-cell table:number-columns-repeated="250"/>
        </table:table-row>
        <table:table-row table:style-name="ro21">
          <table:table-cell table:style-name="ce424" office:value-type="float" office:value="26" calcext:value-type="float">
            <text:p>26</text:p>
          </table:table-cell>
          <table:table-cell table:style-name="ce300" table:formula="of:=[.F86]" office:value-type="float" office:value="-6266.4325875502" calcext:value-type="float">
            <text:p><text:s/>(6,266.43)</text:p>
          </table:table-cell>
          <table:table-cell table:style-name="ce300" table:formula="of:=[.E87]-[.D87]" office:value-type="float" office:value="522.482552408055" calcext:value-type="float">
            <text:p><text:s/>522.48 </text:p>
          </table:table-cell>
          <table:table-cell table:style-name="ce300" table:formula="of:=[.B87]*[.$B$43]" office:value-type="float" office:value="-73.4107371470125" calcext:value-type="float">
            <text:p><text:s/>(73.41)</text:p>
          </table:table-cell>
          <table:table-cell table:style-name="ce300" table:formula="of:=[.$C$45]" office:value-type="float" office:value="449.071815261043" calcext:value-type="float">
            <text:p><text:s/>449.07 </text:p>
          </table:table-cell>
          <table:table-cell table:style-name="ce300" table:formula="of:=[.B87]-[.C87]" office:value-type="float" office:value="-6788.91513995826" calcext:value-type="float">
            <text:p><text:s/>(6,788.92)</text:p>
          </table:table-cell>
          <table:table-cell table:style-name="ce339" table:formula="of:=[.D87]*0.3" office:value-type="float" office:value="-22.0232211441037" calcext:value-type="float">
            <text:p><text:s/>-22.02 </text:p>
          </table:table-cell>
          <table:table-cell table:number-columns-repeated="250"/>
        </table:table-row>
        <table:table-row table:style-name="ro21">
          <table:table-cell table:style-name="ce424" office:value-type="float" office:value="27" calcext:value-type="float">
            <text:p>27</text:p>
          </table:table-cell>
          <table:table-cell table:style-name="ce300" table:formula="of:=[.F87]" office:value-type="float" office:value="-6788.91513995826" calcext:value-type="float">
            <text:p><text:s/>(6,788.92)</text:p>
          </table:table-cell>
          <table:table-cell table:style-name="ce300" table:formula="of:=[.E88]-[.D88]" office:value-type="float" office:value="528.603392101589" calcext:value-type="float">
            <text:p><text:s/>528.60 </text:p>
          </table:table-cell>
          <table:table-cell table:style-name="ce300" table:formula="of:=[.B88]*[.$B$43]" office:value-type="float" office:value="-79.5315768405458" calcext:value-type="float">
            <text:p><text:s/>(79.53)</text:p>
          </table:table-cell>
          <table:table-cell table:style-name="ce300" table:formula="of:=[.$C$45]" office:value-type="float" office:value="449.071815261043" calcext:value-type="float">
            <text:p><text:s/>449.07 </text:p>
          </table:table-cell>
          <table:table-cell table:style-name="ce300" table:formula="of:=[.B88]-[.C88]" office:value-type="float" office:value="-7317.51853205985" calcext:value-type="float">
            <text:p><text:s/>(7,317.52)</text:p>
          </table:table-cell>
          <table:table-cell table:style-name="ce339" table:formula="of:=[.D88]*0.3" office:value-type="float" office:value="-23.8594730521637" calcext:value-type="float">
            <text:p><text:s/>-23.86 </text:p>
          </table:table-cell>
          <table:table-cell table:number-columns-repeated="250"/>
        </table:table-row>
        <table:table-row table:style-name="ro21">
          <table:table-cell table:style-name="ce424" office:value-type="float" office:value="28" calcext:value-type="float">
            <text:p>28</text:p>
          </table:table-cell>
          <table:table-cell table:style-name="ce300" table:formula="of:=[.F88]" office:value-type="float" office:value="-7317.51853205985" calcext:value-type="float">
            <text:p><text:s/>(7,317.52)</text:p>
          </table:table-cell>
          <table:table-cell table:style-name="ce300" table:formula="of:=[.E89]-[.D89]" office:value-type="float" office:value="534.795936923611" calcext:value-type="float">
            <text:p><text:s/>534.80 </text:p>
          </table:table-cell>
          <table:table-cell table:style-name="ce300" table:formula="of:=[.B89]*[.$B$43]" office:value-type="float" office:value="-85.7241216625686" calcext:value-type="float">
            <text:p><text:s/>(85.72)</text:p>
          </table:table-cell>
          <table:table-cell table:style-name="ce300" table:formula="of:=[.$C$45]" office:value-type="float" office:value="449.071815261043" calcext:value-type="float">
            <text:p><text:s/>449.07 </text:p>
          </table:table-cell>
          <table:table-cell table:style-name="ce300" table:formula="of:=[.B89]-[.C89]" office:value-type="float" office:value="-7852.31446898346" calcext:value-type="float">
            <text:p><text:s/>(7,852.31)</text:p>
          </table:table-cell>
          <table:table-cell table:style-name="ce339" table:formula="of:=[.D89]*0.3" office:value-type="float" office:value="-25.7172364987706" calcext:value-type="float">
            <text:p><text:s/>-25.72 </text:p>
          </table:table-cell>
          <table:table-cell table:number-columns-repeated="250"/>
        </table:table-row>
        <table:table-row table:style-name="ro21">
          <table:table-cell table:style-name="ce424" office:value-type="float" office:value="29" calcext:value-type="float">
            <text:p>29</text:p>
          </table:table-cell>
          <table:table-cell table:style-name="ce300" table:formula="of:=[.F89]" office:value-type="float" office:value="-7852.31446898346" calcext:value-type="float">
            <text:p><text:s/>(7,852.31)</text:p>
          </table:table-cell>
          <table:table-cell table:style-name="ce300" table:formula="of:=[.E90]-[.D90]" office:value-type="float" office:value="541.061026893747" calcext:value-type="float">
            <text:p><text:s/>541.06 </text:p>
          </table:table-cell>
          <table:table-cell table:style-name="ce300" table:formula="of:=[.B90]*[.$B$43]" office:value-type="float" office:value="-91.9892116327038" calcext:value-type="float">
            <text:p><text:s/>(91.99)</text:p>
          </table:table-cell>
          <table:table-cell table:style-name="ce300" table:formula="of:=[.$C$45]" office:value-type="float" office:value="449.071815261043" calcext:value-type="float">
            <text:p><text:s/>449.07 </text:p>
          </table:table-cell>
          <table:table-cell table:style-name="ce300" table:formula="of:=[.B90]-[.C90]" office:value-type="float" office:value="-8393.37549587721" calcext:value-type="float">
            <text:p><text:s/>(8,393.38)</text:p>
          </table:table-cell>
          <table:table-cell table:style-name="ce339" table:formula="of:=[.D90]*0.3" office:value-type="float" office:value="-27.5967634898112" calcext:value-type="float">
            <text:p><text:s/>-27.60 </text:p>
          </table:table-cell>
          <table:table-cell table:number-columns-repeated="250"/>
        </table:table-row>
        <table:table-row table:style-name="ro21">
          <table:table-cell table:style-name="ce424" office:value-type="float" office:value="30" calcext:value-type="float">
            <text:p>30</text:p>
          </table:table-cell>
          <table:table-cell table:style-name="ce300" table:formula="of:=[.F90]" office:value-type="float" office:value="-8393.37549587721" calcext:value-type="float">
            <text:p><text:s/>(8,393.38)</text:p>
          </table:table-cell>
          <table:table-cell table:style-name="ce300" table:formula="of:=[.E91]-[.D91]" office:value-type="float" office:value="547.399511872377" calcext:value-type="float">
            <text:p><text:s/>547.40 </text:p>
          </table:table-cell>
          <table:table-cell table:style-name="ce300" table:formula="of:=[.B91]*[.$B$43]" office:value-type="float" office:value="-98.3276966113346" calcext:value-type="float">
            <text:p><text:s/>(98.33)</text:p>
          </table:table-cell>
          <table:table-cell table:style-name="ce300" table:formula="of:=[.$C$45]" office:value-type="float" office:value="449.071815261043" calcext:value-type="float">
            <text:p><text:s/>449.07 </text:p>
          </table:table-cell>
          <table:table-cell table:style-name="ce300" table:formula="of:=[.B91]-[.C91]" office:value-type="float" office:value="-8940.77500774958" calcext:value-type="float">
            <text:p><text:s/>(8,940.78)</text:p>
          </table:table-cell>
          <table:table-cell table:style-name="ce339" table:formula="of:=[.D91]*0.3" office:value-type="float" office:value="-29.4983089834004" calcext:value-type="float">
            <text:p><text:s/>-29.50 </text:p>
          </table:table-cell>
          <table:table-cell table:number-columns-repeated="250"/>
        </table:table-row>
        <table:table-row table:style-name="ro21">
          <table:table-cell table:style-name="ce424" office:value-type="float" office:value="31" calcext:value-type="float">
            <text:p>31</text:p>
          </table:table-cell>
          <table:table-cell table:style-name="ce300" table:formula="of:=[.F91]" office:value-type="float" office:value="-8940.77500774958" calcext:value-type="float">
            <text:p><text:s/>(8,940.78)</text:p>
          </table:table-cell>
          <table:table-cell table:style-name="ce300" table:formula="of:=[.E92]-[.D92]" office:value-type="float" office:value="553.812251675931" calcext:value-type="float">
            <text:p><text:s/>553.81 </text:p>
          </table:table-cell>
          <table:table-cell table:style-name="ce300" table:formula="of:=[.B92]*[.$B$43]" office:value-type="float" office:value="-104.740436414888" calcext:value-type="float">
            <text:p><text:s/>(104.74)</text:p>
          </table:table-cell>
          <table:table-cell table:style-name="ce300" table:formula="of:=[.$C$45]" office:value-type="float" office:value="449.071815261043" calcext:value-type="float">
            <text:p><text:s/>449.07 </text:p>
          </table:table-cell>
          <table:table-cell table:style-name="ce300" table:formula="of:=[.B92]-[.C92]" office:value-type="float" office:value="-9494.58725942551" calcext:value-type="float">
            <text:p><text:s/>(9,494.59)</text:p>
          </table:table-cell>
          <table:table-cell table:style-name="ce339" table:formula="of:=[.D92]*0.3" office:value-type="float" office:value="-31.4221309244664" calcext:value-type="float">
            <text:p><text:s/>-31.42 </text:p>
          </table:table-cell>
          <table:table-cell table:number-columns-repeated="250"/>
        </table:table-row>
        <table:table-row table:style-name="ro21">
          <table:table-cell table:style-name="ce424" office:value-type="float" office:value="32" calcext:value-type="float">
            <text:p>32</text:p>
          </table:table-cell>
          <table:table-cell table:style-name="ce300" table:formula="of:=[.F92]" office:value-type="float" office:value="-9494.58725942551" calcext:value-type="float">
            <text:p><text:s/>(9,494.59)</text:p>
          </table:table-cell>
          <table:table-cell table:style-name="ce300" table:formula="of:=[.E93]-[.D93]" office:value-type="float" office:value="560.300116193511" calcext:value-type="float">
            <text:p><text:s/>560.30 </text:p>
          </table:table-cell>
          <table:table-cell table:style-name="ce300" table:formula="of:=[.B93]*[.$B$43]" office:value-type="float" office:value="-111.228300932468" calcext:value-type="float">
            <text:p><text:s/>(111.23)</text:p>
          </table:table-cell>
          <table:table-cell table:style-name="ce300" table:formula="of:=[.$C$45]" office:value-type="float" office:value="449.071815261043" calcext:value-type="float">
            <text:p><text:s/>449.07 </text:p>
          </table:table-cell>
          <table:table-cell table:style-name="ce300" table:formula="of:=[.B93]-[.C93]" office:value-type="float" office:value="-10054.887375619" calcext:value-type="float">
            <text:p><text:s/>(10,054.89)</text:p>
          </table:table-cell>
          <table:table-cell table:style-name="ce339" table:formula="of:=[.D93]*0.3" office:value-type="float" office:value="-33.3684902797405" calcext:value-type="float">
            <text:p><text:s/>-33.37 </text:p>
          </table:table-cell>
          <table:table-cell table:number-columns-repeated="250"/>
        </table:table-row>
        <table:table-row table:style-name="ro21">
          <table:table-cell table:style-name="ce424" office:value-type="float" office:value="33" calcext:value-type="float">
            <text:p>33</text:p>
          </table:table-cell>
          <table:table-cell table:style-name="ce300" table:formula="of:=[.F93]" office:value-type="float" office:value="-10054.887375619" calcext:value-type="float">
            <text:p><text:s/>(10,054.89)</text:p>
          </table:table-cell>
          <table:table-cell table:style-name="ce300" table:formula="of:=[.E94]-[.D94]" office:value-type="float" office:value="566.863985504902" calcext:value-type="float">
            <text:p><text:s/>566.86 </text:p>
          </table:table-cell>
          <table:table-cell table:style-name="ce300" table:formula="of:=[.B94]*[.$B$43]" office:value-type="float" office:value="-117.792170243859" calcext:value-type="float">
            <text:p><text:s/>(117.79)</text:p>
          </table:table-cell>
          <table:table-cell table:style-name="ce300" table:formula="of:=[.$C$45]" office:value-type="float" office:value="449.071815261043" calcext:value-type="float">
            <text:p><text:s/>449.07 </text:p>
          </table:table-cell>
          <table:table-cell table:style-name="ce300" table:formula="of:=[.B94]-[.C94]" office:value-type="float" office:value="-10621.7513611239" calcext:value-type="float">
            <text:p><text:s/>(10,621.75)</text:p>
          </table:table-cell>
          <table:table-cell table:style-name="ce339" table:formula="of:=[.D94]*0.3" office:value-type="float" office:value="-35.3376510731578" calcext:value-type="float">
            <text:p><text:s/>-35.34 </text:p>
          </table:table-cell>
          <table:table-cell table:number-columns-repeated="250"/>
        </table:table-row>
        <table:table-row table:style-name="ro21">
          <table:table-cell table:style-name="ce424" office:value-type="float" office:value="34" calcext:value-type="float">
            <text:p>34</text:p>
          </table:table-cell>
          <table:table-cell table:style-name="ce300" table:formula="of:=[.F94]" office:value-type="float" office:value="-10621.7513611239" calcext:value-type="float">
            <text:p><text:s/>(10,621.75)</text:p>
          </table:table-cell>
          <table:table-cell table:style-name="ce300" table:formula="of:=[.E95]-[.D95]" office:value-type="float" office:value="573.504749999949" calcext:value-type="float">
            <text:p><text:s/>573.50 </text:p>
          </table:table-cell>
          <table:table-cell table:style-name="ce300" table:formula="of:=[.B95]*[.$B$43]" office:value-type="float" office:value="-124.432934738906" calcext:value-type="float">
            <text:p><text:s/>(124.43)</text:p>
          </table:table-cell>
          <table:table-cell table:style-name="ce300" table:formula="of:=[.$C$45]" office:value-type="float" office:value="449.071815261043" calcext:value-type="float">
            <text:p><text:s/>449.07 </text:p>
          </table:table-cell>
          <table:table-cell table:style-name="ce300" table:formula="of:=[.B95]-[.C95]" office:value-type="float" office:value="-11195.2561111239" calcext:value-type="float">
            <text:p><text:s/>(11,195.26)</text:p>
          </table:table-cell>
          <table:table-cell table:style-name="ce339" table:formula="of:=[.D95]*0.3" office:value-type="float" office:value="-37.3298804216719" calcext:value-type="float">
            <text:p><text:s/>-37.33 </text:p>
          </table:table-cell>
          <table:table-cell table:number-columns-repeated="250"/>
        </table:table-row>
        <table:table-row table:style-name="ro21">
          <table:table-cell table:style-name="ce424" office:value-type="float" office:value="35" calcext:value-type="float">
            <text:p>35</text:p>
          </table:table-cell>
          <table:table-cell table:style-name="ce300" table:formula="of:=[.F95]" office:value-type="float" office:value="-11195.2561111239" calcext:value-type="float">
            <text:p><text:s/>(11,195.26)</text:p>
          </table:table-cell>
          <table:table-cell table:style-name="ce300" table:formula="of:=[.E96]-[.D96]" office:value-type="float" office:value="580.22331049934" calcext:value-type="float">
            <text:p><text:s/>580.22 </text:p>
          </table:table-cell>
          <table:table-cell table:style-name="ce300" table:formula="of:=[.B96]*[.$B$43]" office:value-type="float" office:value="-131.151495238297" calcext:value-type="float">
            <text:p><text:s/>(131.15)</text:p>
          </table:table-cell>
          <table:table-cell table:style-name="ce300" table:formula="of:=[.$C$45]" office:value-type="float" office:value="449.071815261043" calcext:value-type="float">
            <text:p><text:s/>449.07 </text:p>
          </table:table-cell>
          <table:table-cell table:style-name="ce300" table:formula="of:=[.B96]-[.C96]" office:value-type="float" office:value="-11775.4794216232" calcext:value-type="float">
            <text:p><text:s/>(11,775.48)</text:p>
          </table:table-cell>
          <table:table-cell table:style-name="ce339" table:formula="of:=[.D96]*0.3" office:value-type="float" office:value="-39.3454485714891" calcext:value-type="float">
            <text:p><text:s/>-39.35 </text:p>
          </table:table-cell>
          <table:table-cell table:number-columns-repeated="250"/>
        </table:table-row>
        <table:table-row table:style-name="ro21">
          <table:table-cell table:style-name="ce424" office:value-type="float" office:value="36" calcext:value-type="float">
            <text:p>36</text:p>
          </table:table-cell>
          <table:table-cell table:style-name="ce300" table:formula="of:=[.F96]" office:value-type="float" office:value="-11775.4794216232" calcext:value-type="float">
            <text:p><text:s/>(11,775.48)</text:p>
          </table:table-cell>
          <table:table-cell table:style-name="ce300" table:formula="of:=[.E97]-[.D97]" office:value-type="float" office:value="587.020578376802" calcext:value-type="float">
            <text:p><text:s/>587.02 </text:p>
          </table:table-cell>
          <table:table-cell table:style-name="ce300" table:formula="of:=[.B97]*[.$B$43]" office:value-type="float" office:value="-137.948763115759" calcext:value-type="float">
            <text:p><text:s/>(137.95)</text:p>
          </table:table-cell>
          <table:table-cell table:style-name="ce300" table:formula="of:=[.$C$45]" office:value-type="float" office:value="449.071815261043" calcext:value-type="float">
            <text:p><text:s/>449.07 </text:p>
          </table:table-cell>
          <table:table-cell table:style-name="ce300" table:formula="of:=[.B97]-[.C97]" office:value-type="float" office:value="-12362.5" calcext:value-type="float">
            <text:p><text:s/>(12,362.50)</text:p>
          </table:table-cell>
          <table:table-cell table:style-name="ce339" table:formula="of:=[.D97]*0.3" office:value-type="float" office:value="-41.3846289347277" calcext:value-type="float">
            <text:p><text:s/>-41.38 </text:p>
          </table:table-cell>
          <table:table-cell table:number-columns-repeated="250"/>
        </table:table-row>
        <table:table-row table:style-name="ro21">
          <table:table-cell table:style-name="ce260"/>
          <table:table-cell table:style-name="ce300" table:number-columns-repeated="5"/>
          <table:table-cell table:number-columns-repeated="251"/>
        </table:table-row>
        <table:table-row table:style-name="ro21">
          <table:table-cell table:style-name="ce260"/>
          <table:table-cell table:style-name="ce300" table:number-columns-repeated="6"/>
          <table:table-cell table:number-columns-repeated="250"/>
        </table:table-row>
        <table:table-row table:style-name="ro21">
          <table:table-cell table:number-columns-repeated="257"/>
        </table:table-row>
        <table:table-row table:style-name="ro21">
          <table:table-cell table:number-columns-repeated="5"/>
          <table:table-cell table:style-name="ce470" table:number-columns-repeated="2"/>
          <table:table-cell table:number-columns-repeated="250"/>
        </table:table-row>
        <table:table-row table:style-name="ro21" table:number-rows-repeated="2">
          <table:table-cell table:number-columns-repeated="5"/>
          <table:table-cell table:style-name="ce265" table:number-columns-repeated="2"/>
          <table:table-cell table:number-columns-repeated="250"/>
        </table:table-row>
        <table:table-row table:style-name="ro21">
          <table:table-cell table:number-columns-repeated="5"/>
          <table:table-cell table:style-name="ce299"/>
          <table:table-cell table:style-name="ce265"/>
          <table:table-cell table:number-columns-repeated="250"/>
        </table:table-row>
        <table:table-row table:style-name="ro21">
          <table:table-cell table:number-columns-repeated="4"/>
          <table:table-cell table:style-name="ce468"/>
          <table:table-cell table:style-name="ce471" table:number-columns-repeated="2"/>
          <table:table-cell table:number-columns-repeated="250"/>
        </table:table-row>
        <table:table-row table:style-name="ro21">
          <table:table-cell table:number-columns-repeated="4"/>
          <table:table-cell table:style-name="ce468"/>
          <table:table-cell table:style-name="ce265" table:number-columns-repeated="2"/>
          <table:table-cell table:number-columns-repeated="250"/>
        </table:table-row>
        <table:table-row table:style-name="ro21">
          <table:table-cell table:number-columns-repeated="5"/>
          <table:table-cell table:style-name="ce265" table:number-columns-repeated="2"/>
          <table:table-cell table:number-columns-repeated="250"/>
        </table:table-row>
        <table:table-row table:style-name="ro21" table:number-rows-repeated="114">
          <table:table-cell table:style-name="ce260"/>
          <table:table-cell table:style-name="ce300" table:number-columns-repeated="6"/>
          <table:table-cell table:number-columns-repeated="250"/>
        </table:table-row>
        <table:table-row table:style-name="ro21" table:number-rows-repeated="79">
          <table:table-cell table:style-name="ce260" table:number-columns-repeated="6"/>
          <table:table-cell table:number-columns-repeated="251"/>
        </table:table-row>
        <table:table-row table:style-name="ro21" table:number-rows-repeated="1048275">
          <table:table-cell table:number-columns-repeated="257"/>
        </table:table-row>
        <table:table-row table:style-name="ro21">
          <table:table-cell table:number-columns-repeated="257"/>
        </table:table-row>
        <table:named-expressions>
          <table:named-range table:name="_xlnm.Print_Area" table:base-cell-address="$POBLACION.$A$1" table:cell-range-address="$FINANCIAMIENT.$A$1:.$E$55" table:range-usable-as="print-range"/>
        </table:named-expressions>
      </table:table>
      <table:table table:name="COSTO PROD Y OPER" table:style-name="ta15" table:print-ranges="'COSTO PROD Y OPER'.A33:'COSTO PROD Y OPER'.N94">
        <table:table-column table:style-name="co86" table:default-cell-style-name="ce178"/>
        <table:table-column table:style-name="co87" table:default-cell-style-name="ce178"/>
        <table:table-column table:style-name="co2" table:default-cell-style-name="ce178"/>
        <table:table-column table:style-name="co50" table:default-cell-style-name="ce178"/>
        <table:table-column table:style-name="co88" table:default-cell-style-name="ce178"/>
        <table:table-column table:style-name="co29" table:default-cell-style-name="ce178"/>
        <table:table-column table:style-name="co89" table:default-cell-style-name="ce178"/>
        <table:table-column table:style-name="co90" table:default-cell-style-name="ce178"/>
        <table:table-column table:style-name="co89" table:default-cell-style-name="ce178"/>
        <table:table-column table:style-name="co61" table:number-columns-repeated="4" table:default-cell-style-name="ce178"/>
        <table:table-column table:style-name="co1" table:number-columns-repeated="244" table:default-cell-style-name="ce178"/>
        <table:table-column table:style-name="co12" table:number-columns-repeated="16127"/>
        <table:table-row table:style-name="ro21">
          <table:table-cell table:number-columns-repeated="257"/>
        </table:table-row>
        <table:table-row table:style-name="ro29">
          <table:table-cell table:style-name="ce472" office:value-type="string" calcext:value-type="string" table:number-columns-spanned="5" table:number-rows-spanned="1">
            <text:p>SERVICIOS BASICOS</text:p>
          </table:table-cell>
          <table:covered-table-cell table:number-columns-repeated="4" table:style-name="ce472"/>
          <table:table-cell table:style-name="ce244" table:number-columns-repeated="2"/>
          <table:table-cell table:number-columns-repeated="250"/>
        </table:table-row>
        <table:table-row table:style-name="ro21">
          <table:table-cell table:style-name="ce212" office:value-type="string" calcext:value-type="string">
            <text:p>Descripcion</text:p>
          </table:table-cell>
          <table:table-cell table:style-name="ce212" office:value-type="string" calcext:value-type="string">
            <text:p>U.Med</text:p>
          </table:table-cell>
          <table:table-cell table:style-name="ce212" office:value-type="string" calcext:value-type="string">
            <text:p>Cantidad</text:p>
          </table:table-cell>
          <table:table-cell table:style-name="ce212" office:value-type="string" calcext:value-type="string">
            <text:p>P.Unit</text:p>
          </table:table-cell>
          <table:table-cell table:style-name="ce212" office:value-type="string" calcext:value-type="string">
            <text:p>Costo total</text:p>
          </table:table-cell>
          <table:table-cell table:style-name="ce246" table:number-columns-repeated="2"/>
          <table:table-cell table:number-columns-repeated="250"/>
        </table:table-row>
        <table:table-row table:style-name="ro21">
          <table:table-cell table:style-name="ce215" office:value-type="string" calcext:value-type="string">
            <text:p>Luz</text:p>
          </table:table-cell>
          <table:table-cell table:style-name="ce215" office:value-type="string" calcext:value-type="string">
            <text:p>mes</text:p>
          </table:table-cell>
          <table:table-cell table:style-name="ce215" office:value-type="float" office:value="12" calcext:value-type="float">
            <text:p>12</text:p>
          </table:table-cell>
          <table:table-cell table:style-name="ce236" office:value-type="float" office:value="0" calcext:value-type="float">
            <text:p><text:s/>- <text:s text:c="2"/></text:p>
          </table:table-cell>
          <table:table-cell table:style-name="ce236" table:formula="of:=[.C4]*[.D4]" office:value-type="float" office:value="0" calcext:value-type="float">
            <text:p><text:s/>- <text:s text:c="2"/></text:p>
          </table:table-cell>
          <table:table-cell table:style-name="ce252" table:number-columns-repeated="2"/>
          <table:table-cell table:number-columns-repeated="250"/>
        </table:table-row>
        <table:table-row table:style-name="ro21">
          <table:table-cell table:style-name="ce215" office:value-type="string" calcext:value-type="string">
            <text:p>Agua</text:p>
          </table:table-cell>
          <table:table-cell table:style-name="ce215" office:value-type="string" calcext:value-type="string">
            <text:p>mes</text:p>
          </table:table-cell>
          <table:table-cell table:style-name="ce215" office:value-type="float" office:value="12" calcext:value-type="float">
            <text:p>12</text:p>
          </table:table-cell>
          <table:table-cell table:style-name="ce236" office:value-type="float" office:value="2" calcext:value-type="float">
            <text:p><text:s/>2.00 </text:p>
          </table:table-cell>
          <table:table-cell table:style-name="ce236" table:formula="of:=[.C5]*[.D5]" office:value-type="float" office:value="24" calcext:value-type="float">
            <text:p><text:s/>24.00 </text:p>
          </table:table-cell>
          <table:table-cell table:style-name="ce252" table:number-columns-repeated="2"/>
          <table:table-cell table:number-columns-repeated="250"/>
        </table:table-row>
        <table:table-row table:style-name="ro21">
          <table:table-cell table:style-name="ce215" office:value-type="string" calcext:value-type="string">
            <text:p>Telefonia</text:p>
          </table:table-cell>
          <table:table-cell table:style-name="ce215" office:value-type="string" calcext:value-type="string">
            <text:p>mes</text:p>
          </table:table-cell>
          <table:table-cell table:style-name="ce215" office:value-type="float" office:value="12" calcext:value-type="float">
            <text:p>12</text:p>
          </table:table-cell>
          <table:table-cell table:style-name="ce236" office:value-type="float" office:value="30" calcext:value-type="float">
            <text:p><text:s/>30.00 </text:p>
          </table:table-cell>
          <table:table-cell table:style-name="ce236" table:formula="of:=[.C6]*[.D6]" office:value-type="float" office:value="360" calcext:value-type="float">
            <text:p><text:s/>360.00 </text:p>
          </table:table-cell>
          <table:table-cell table:style-name="ce252" table:number-columns-repeated="2"/>
          <table:table-cell table:number-columns-repeated="250"/>
        </table:table-row>
        <table:table-row table:style-name="ro21">
          <table:table-cell table:style-name="ce473" office:value-type="string" calcext:value-type="string">
            <text:p>Internet</text:p>
          </table:table-cell>
          <table:table-cell table:style-name="ce215" office:value-type="string" calcext:value-type="string">
            <text:p>mes</text:p>
          </table:table-cell>
          <table:table-cell table:style-name="ce215" office:value-type="float" office:value="12" calcext:value-type="float">
            <text:p>12</text:p>
          </table:table-cell>
          <table:table-cell table:style-name="ce511" office:value-type="float" office:value="20" calcext:value-type="float">
            <text:p><text:s/>20.00 </text:p>
          </table:table-cell>
          <table:table-cell table:style-name="ce236" table:formula="of:=[.C7]*[.D7]" office:value-type="float" office:value="240" calcext:value-type="float">
            <text:p><text:s/>240.00 </text:p>
          </table:table-cell>
          <table:table-cell table:style-name="ce252" table:number-columns-repeated="2"/>
          <table:table-cell table:number-columns-repeated="250"/>
        </table:table-row>
        <table:table-row table:style-name="ro21">
          <table:table-cell table:style-name="ce474" office:value-type="string" calcext:value-type="string">
            <text:p>TOTAL</text:p>
          </table:table-cell>
          <table:table-cell table:style-name="ce492" table:number-columns-repeated="3"/>
          <table:table-cell table:style-name="ce513" table:formula="of:=SUM([.E4:.E7])" office:value-type="float" office:value="624" calcext:value-type="float">
            <text:p><text:s/>624.00 </text:p>
          </table:table-cell>
          <table:table-cell table:style-name="ce516" table:number-columns-repeated="2"/>
          <table:table-cell table:number-columns-repeated="250"/>
        </table:table-row>
        <table:table-row table:style-name="ro21">
          <table:table-cell table:style-name="ce210" table:number-columns-repeated="7"/>
          <table:table-cell table:number-columns-repeated="250"/>
        </table:table-row>
        <table:table-row table:style-name="ro29">
          <table:table-cell table:style-name="ce475" office:value-type="string" calcext:value-type="string" table:number-columns-spanned="5" table:number-rows-spanned="1">
            <text:p>UTILES DE OFICINA Y LIMPIEZA</text:p>
          </table:table-cell>
          <table:covered-table-cell table:number-columns-repeated="4" table:style-name="ce475"/>
          <table:table-cell table:style-name="ce517" table:number-columns-repeated="2"/>
          <table:table-cell table:number-columns-repeated="250"/>
        </table:table-row>
        <table:table-row table:style-name="ro21">
          <table:table-cell table:style-name="ce212" office:value-type="string" calcext:value-type="string">
            <text:p>Descripcion</text:p>
          </table:table-cell>
          <table:table-cell table:style-name="ce212" office:value-type="string" calcext:value-type="string">
            <text:p>U.Med</text:p>
          </table:table-cell>
          <table:table-cell table:style-name="ce212" office:value-type="string" calcext:value-type="string">
            <text:p>Cantidad</text:p>
          </table:table-cell>
          <table:table-cell table:style-name="ce212" office:value-type="string" calcext:value-type="string">
            <text:p>P.Unit</text:p>
          </table:table-cell>
          <table:table-cell table:style-name="ce212" office:value-type="string" calcext:value-type="string">
            <text:p>Costo total</text:p>
          </table:table-cell>
          <table:table-cell table:style-name="ce246" table:number-columns-repeated="2"/>
          <table:table-cell table:number-columns-repeated="250"/>
        </table:table-row>
        <table:table-row table:style-name="ro21">
          <table:table-cell table:style-name="ce215" office:value-type="string" calcext:value-type="string">
            <text:p>Utiles de Oficina</text:p>
          </table:table-cell>
          <table:table-cell table:style-name="ce215" office:value-type="string" calcext:value-type="string">
            <text:p>Glob</text:p>
          </table:table-cell>
          <table:table-cell table:style-name="ce215" office:value-type="float" office:value="1" calcext:value-type="float">
            <text:p>1</text:p>
          </table:table-cell>
          <table:table-cell table:style-name="ce236" office:value-type="float" office:value="10" calcext:value-type="float">
            <text:p><text:s/>10.00 </text:p>
          </table:table-cell>
          <table:table-cell table:style-name="ce236" table:formula="of:=[.D12]*12" office:value-type="float" office:value="120" calcext:value-type="float">
            <text:p><text:s/>120.00 </text:p>
          </table:table-cell>
          <table:table-cell table:style-name="ce518" table:number-columns-repeated="2"/>
          <table:table-cell table:number-columns-repeated="250"/>
        </table:table-row>
        <table:table-row table:style-name="ro21">
          <table:table-cell table:style-name="ce215" office:value-type="string" calcext:value-type="string">
            <text:p>Articulos de Limpieza</text:p>
          </table:table-cell>
          <table:table-cell table:style-name="ce215" office:value-type="string" calcext:value-type="string">
            <text:p>Glob</text:p>
          </table:table-cell>
          <table:table-cell table:style-name="ce215" office:value-type="float" office:value="1" calcext:value-type="float">
            <text:p>1</text:p>
          </table:table-cell>
          <table:table-cell table:style-name="ce236" office:value-type="float" office:value="15" calcext:value-type="float">
            <text:p><text:s/>15.00 </text:p>
          </table:table-cell>
          <table:table-cell table:style-name="ce236" table:formula="of:=[.D13]*12" office:value-type="float" office:value="180" calcext:value-type="float">
            <text:p><text:s/>180.00 </text:p>
          </table:table-cell>
          <table:table-cell table:style-name="ce252" table:number-columns-repeated="2"/>
          <table:table-cell table:number-columns-repeated="250"/>
        </table:table-row>
        <table:table-row table:style-name="ro21">
          <table:table-cell table:style-name="ce474" office:value-type="string" calcext:value-type="string">
            <text:p>TOTAL</text:p>
          </table:table-cell>
          <table:table-cell table:style-name="ce492"/>
          <table:table-cell table:style-name="ce502" table:number-columns-repeated="2"/>
          <table:table-cell table:style-name="ce513" table:formula="of:=SUM([.E12:.E13])" office:value-type="float" office:value="300" calcext:value-type="float">
            <text:p><text:s/>300.00 </text:p>
          </table:table-cell>
          <table:table-cell table:style-name="ce514" table:number-columns-repeated="2"/>
          <table:table-cell table:number-columns-repeated="250"/>
        </table:table-row>
        <table:table-row table:style-name="ro21">
          <table:table-cell table:style-name="ce207" table:number-columns-repeated="7"/>
          <table:table-cell table:number-columns-repeated="250"/>
        </table:table-row>
        <table:table-row table:style-name="ro29">
          <table:table-cell table:style-name="ce475" office:value-type="string" calcext:value-type="string" table:number-columns-spanned="5" table:number-rows-spanned="1">
            <text:p>EMPAQUE Y EMBALAJE</text:p>
          </table:table-cell>
          <table:covered-table-cell table:number-columns-repeated="4" table:style-name="ce475"/>
          <table:table-cell table:style-name="ce517" table:number-columns-repeated="2"/>
          <table:table-cell table:number-columns-repeated="250"/>
        </table:table-row>
        <table:table-row table:style-name="ro21">
          <table:table-cell table:style-name="ce212" office:value-type="string" calcext:value-type="string">
            <text:p>Descripcion</text:p>
          </table:table-cell>
          <table:table-cell table:style-name="ce212" office:value-type="string" calcext:value-type="string">
            <text:p>U.Med</text:p>
          </table:table-cell>
          <table:table-cell table:style-name="ce212" office:value-type="string" calcext:value-type="string">
            <text:p>Cantidad</text:p>
          </table:table-cell>
          <table:table-cell table:style-name="ce212" office:value-type="string" calcext:value-type="string">
            <text:p>P.Unit</text:p>
          </table:table-cell>
          <table:table-cell table:style-name="ce212" office:value-type="string" calcext:value-type="string">
            <text:p>Costo total</text:p>
          </table:table-cell>
          <table:table-cell table:style-name="ce246" table:number-columns-repeated="2"/>
          <table:table-cell table:number-columns-repeated="250"/>
        </table:table-row>
        <table:table-row table:style-name="ro21">
          <table:table-cell table:style-name="ce215" office:value-type="string" calcext:value-type="string">
            <text:p>Empaques de 1 unidad</text:p>
          </table:table-cell>
          <table:table-cell table:style-name="ce215" office:value-type="string" calcext:value-type="string">
            <text:p>unidad</text:p>
          </table:table-cell>
          <table:table-cell table:style-name="ce503" table:formula="of:=[$INGRESOS.B9]" office:value-type="float" office:value="3440.46069833684" calcext:value-type="float">
            <text:p>3440</text:p>
          </table:table-cell>
          <table:table-cell table:style-name="ce236" office:value-type="float" office:value="0.1" calcext:value-type="float">
            <text:p><text:s/>0.10 </text:p>
          </table:table-cell>
          <table:table-cell table:style-name="ce236" table:formula="of:=[.C18]*[.D18]" office:value-type="float" office:value="344.046069833684" calcext:value-type="float">
            <text:p><text:s/>344.05 </text:p>
          </table:table-cell>
          <table:table-cell table:style-name="ce518" table:number-columns-repeated="2"/>
          <table:table-cell table:number-columns-repeated="250"/>
        </table:table-row>
        <table:table-row table:style-name="ro21">
          <table:table-cell table:style-name="ce215" office:value-type="string" calcext:value-type="string">
            <text:p>Embalaje (caja de 12 unidades)</text:p>
          </table:table-cell>
          <table:table-cell table:style-name="ce215" office:value-type="string" calcext:value-type="string">
            <text:p>Caja </text:p>
          </table:table-cell>
          <table:table-cell table:style-name="ce503" office:value-type="float" office:value="0" calcext:value-type="float">
            <text:p>0</text:p>
          </table:table-cell>
          <table:table-cell table:style-name="ce236" office:value-type="float" office:value="0.5" calcext:value-type="float">
            <text:p><text:s/>0.50 </text:p>
          </table:table-cell>
          <table:table-cell table:style-name="ce236" table:formula="of:=[.C19]*[.D19]" office:value-type="float" office:value="0" calcext:value-type="float">
            <text:p><text:s/>- <text:s text:c="2"/></text:p>
          </table:table-cell>
          <table:table-cell table:style-name="ce252" table:number-columns-repeated="2"/>
          <table:table-cell table:number-columns-repeated="250"/>
        </table:table-row>
        <table:table-row table:style-name="ro21">
          <table:table-cell table:style-name="ce474" office:value-type="string" calcext:value-type="string">
            <text:p>TOTAL</text:p>
          </table:table-cell>
          <table:table-cell table:style-name="ce492" table:number-columns-repeated="3"/>
          <table:table-cell table:style-name="ce513" table:formula="of:=SUM([.E18:.E19])" office:value-type="float" office:value="344.046069833684" calcext:value-type="float">
            <text:p><text:s/>344.05 </text:p>
          </table:table-cell>
          <table:table-cell table:style-name="ce514" table:number-columns-repeated="2"/>
          <table:table-cell table:number-columns-repeated="250"/>
        </table:table-row>
        <table:table-row table:style-name="ro21">
          <table:table-cell table:style-name="ce245" table:number-columns-repeated="4"/>
          <table:table-cell table:style-name="ce514" table:number-columns-repeated="3"/>
          <table:table-cell table:number-columns-repeated="250"/>
        </table:table-row>
        <table:table-row table:style-name="ro29">
          <table:table-cell table:style-name="ce227" office:value-type="string" calcext:value-type="string" table:number-columns-spanned="5" table:number-rows-spanned="1">
            <text:p>MANTENIMIENTO Y REPARACIONES</text:p>
          </table:table-cell>
          <table:covered-table-cell table:number-columns-repeated="4" table:style-name="ce227"/>
          <table:table-cell table:style-name="ce517" table:number-columns-repeated="2"/>
          <table:table-cell table:number-columns-repeated="250"/>
        </table:table-row>
        <table:table-row table:style-name="ro21">
          <table:table-cell table:style-name="ce214" office:value-type="string" calcext:value-type="string">
            <text:p>Descripcion</text:p>
          </table:table-cell>
          <table:table-cell table:style-name="ce214" office:value-type="string" calcext:value-type="string">
            <text:p>U.Med</text:p>
          </table:table-cell>
          <table:table-cell table:style-name="ce214" office:value-type="string" calcext:value-type="string">
            <text:p>Cantidad</text:p>
          </table:table-cell>
          <table:table-cell table:style-name="ce214" office:value-type="string" calcext:value-type="string">
            <text:p>P.Unit</text:p>
          </table:table-cell>
          <table:table-cell table:style-name="ce513" office:value-type="string" office:string-value="Costo total" calcext:value-type="string">
            <text:p><text:s/>Costo total </text:p>
          </table:table-cell>
          <table:table-cell table:style-name="ce514" table:number-columns-repeated="2"/>
          <table:table-cell table:number-columns-repeated="250"/>
        </table:table-row>
        <table:table-row table:style-name="ro21">
          <table:table-cell table:style-name="ce215" office:value-type="string" calcext:value-type="string">
            <text:p>Combustible</text:p>
          </table:table-cell>
          <table:table-cell table:style-name="ce215" office:value-type="string" calcext:value-type="string">
            <text:p>Meses</text:p>
          </table:table-cell>
          <table:table-cell table:style-name="ce215" office:value-type="float" office:value="12" calcext:value-type="float">
            <text:p>12</text:p>
          </table:table-cell>
          <table:table-cell table:style-name="ce512" office:value-type="float" office:value="0" calcext:value-type="float">
            <text:p>0.00</text:p>
          </table:table-cell>
          <table:table-cell table:style-name="ce515" table:formula="of:=[.C24]*[.D24]" office:value-type="float" office:value="0" calcext:value-type="float">
            <text:p><text:s/>- <text:s text:c="2"/></text:p>
          </table:table-cell>
          <table:table-cell table:style-name="ce519" table:number-columns-repeated="2"/>
          <table:table-cell table:number-columns-repeated="250"/>
        </table:table-row>
        <table:table-row table:style-name="ro21">
          <table:table-cell table:style-name="ce215" office:value-type="string" calcext:value-type="string">
            <text:p>Mantenimiento de vehiculo, repuestos, etc.</text:p>
          </table:table-cell>
          <table:table-cell table:style-name="ce215" office:value-type="string" calcext:value-type="string">
            <text:p>Meses</text:p>
          </table:table-cell>
          <table:table-cell table:style-name="ce215" office:value-type="float" office:value="12" calcext:value-type="float">
            <text:p>12</text:p>
          </table:table-cell>
          <table:table-cell table:style-name="ce512" office:value-type="float" office:value="0" calcext:value-type="float">
            <text:p>0.00</text:p>
          </table:table-cell>
          <table:table-cell table:style-name="ce515" table:formula="of:=[.C25]*[.D25]" office:value-type="float" office:value="0" calcext:value-type="float">
            <text:p><text:s/>- <text:s text:c="2"/></text:p>
          </table:table-cell>
          <table:table-cell table:style-name="ce519" table:number-columns-repeated="2"/>
          <table:table-cell table:number-columns-repeated="250"/>
        </table:table-row>
        <table:table-row table:style-name="ro21">
          <table:table-cell table:style-name="ce215" office:value-type="string" calcext:value-type="string">
            <text:p>Mantenimiento de Maquinaria y Equipos</text:p>
          </table:table-cell>
          <table:table-cell table:style-name="ce215" office:value-type="string" calcext:value-type="string">
            <text:p>Meses</text:p>
          </table:table-cell>
          <table:table-cell table:style-name="ce215" office:value-type="float" office:value="12" calcext:value-type="float">
            <text:p>12</text:p>
          </table:table-cell>
          <table:table-cell table:style-name="ce512" office:value-type="float" office:value="50" calcext:value-type="float">
            <text:p>50.00</text:p>
          </table:table-cell>
          <table:table-cell table:style-name="ce515" table:formula="of:=[.C26]*[.D26]" office:value-type="float" office:value="600" calcext:value-type="float">
            <text:p><text:s/>600.00 </text:p>
          </table:table-cell>
          <table:table-cell table:style-name="ce519" table:number-columns-repeated="2"/>
          <table:table-cell table:number-columns-repeated="250"/>
        </table:table-row>
        <table:table-row table:style-name="ro21">
          <table:table-cell table:style-name="ce214" office:value-type="string" calcext:value-type="string">
            <text:p>TOTAL</text:p>
          </table:table-cell>
          <table:table-cell table:style-name="ce214" table:number-columns-repeated="3"/>
          <table:table-cell table:style-name="ce513" table:formula="of:=SUM([.E24:.E26])" office:value-type="float" office:value="600" calcext:value-type="float">
            <text:p><text:s/>600.00 </text:p>
          </table:table-cell>
          <table:table-cell table:style-name="ce516" table:number-columns-repeated="2"/>
          <table:table-cell table:number-columns-repeated="250"/>
        </table:table-row>
        <table:table-row table:style-name="ro29">
          <table:table-cell table:style-name="ce475" office:value-type="string" calcext:value-type="string" table:number-columns-spanned="5" table:number-rows-spanned="1">
            <text:p>FLETE TERRESTRE</text:p>
          </table:table-cell>
          <table:covered-table-cell table:number-columns-repeated="4" table:style-name="ce475"/>
          <table:table-cell table:style-name="ce517" table:number-columns-repeated="2"/>
          <table:table-cell table:number-columns-repeated="250"/>
        </table:table-row>
        <table:table-row table:style-name="ro21">
          <table:table-cell table:style-name="ce212" office:value-type="string" calcext:value-type="string">
            <text:p>Descripcion</text:p>
          </table:table-cell>
          <table:table-cell table:style-name="ce212" office:value-type="string" calcext:value-type="string">
            <text:p>U.Med</text:p>
          </table:table-cell>
          <table:table-cell table:style-name="ce212" office:value-type="string" calcext:value-type="string">
            <text:p>Cantidad</text:p>
          </table:table-cell>
          <table:table-cell table:style-name="ce212" office:value-type="string" calcext:value-type="string">
            <text:p>P.Unit</text:p>
          </table:table-cell>
          <table:table-cell table:style-name="ce212" office:value-type="string" calcext:value-type="string">
            <text:p>Costo total</text:p>
          </table:table-cell>
          <table:table-cell table:style-name="ce246" table:number-columns-repeated="2"/>
          <table:table-cell table:number-columns-repeated="250"/>
        </table:table-row>
        <table:table-row table:style-name="ro21">
          <table:table-cell table:style-name="ce215" office:value-type="string" calcext:value-type="string">
            <text:p>Flete Huancasancos - Ayacucho</text:p>
          </table:table-cell>
          <table:table-cell table:style-name="ce215" office:value-type="string" calcext:value-type="string">
            <text:p>Tm</text:p>
          </table:table-cell>
          <table:table-cell table:style-name="ce224" office:value-type="float" office:value="0.0095" calcext:value-type="float">
            <text:p>0.0095</text:p>
          </table:table-cell>
          <table:table-cell table:style-name="ce231" office:value-type="float" office:value="400" calcext:value-type="float">
            <text:p>400.00</text:p>
          </table:table-cell>
          <table:table-cell table:style-name="ce236" table:formula="of:=[.C30]*[.D30]*365" office:value-type="float" office:value="1387" calcext:value-type="float">
            <text:p><text:s/>1,387.00 </text:p>
          </table:table-cell>
          <table:table-cell table:style-name="ce520" table:number-columns-repeated="2"/>
          <table:table-cell table:number-columns-repeated="250"/>
        </table:table-row>
        <table:table-row table:style-name="ro21">
          <table:table-cell table:style-name="ce474" office:value-type="string" calcext:value-type="string">
            <text:p>TOTAL</text:p>
          </table:table-cell>
          <table:table-cell table:style-name="ce492" table:number-columns-repeated="3"/>
          <table:table-cell table:style-name="ce513" table:formula="of:=SUM([.E30:.E30])" office:value-type="float" office:value="1387" calcext:value-type="float">
            <text:p><text:s/>1,387.00 </text:p>
          </table:table-cell>
          <table:table-cell table:style-name="ce521" table:number-columns-repeated="2"/>
          <table:table-cell table:number-columns-repeated="250"/>
        </table:table-row>
        <table:table-row table:style-name="ro21" table:number-rows-repeated="2">
          <table:table-cell table:number-columns-repeated="257"/>
        </table:table-row>
        <table:table-row table:style-name="ro29">
          <table:table-cell table:style-name="ce476" office:value-type="string" calcext:value-type="string" table:number-columns-spanned="5" table:number-rows-spanned="1">
            <text:p>I. COSTOS DE PRODUCCION</text:p>
          </table:table-cell>
          <table:covered-table-cell table:number-columns-repeated="4" table:style-name="ce476"/>
          <table:table-cell table:style-name="ce522" table:number-columns-repeated="2"/>
          <table:table-cell table:style-name="ce203"/>
          <table:table-cell table:number-columns-repeated="249"/>
        </table:table-row>
        <table:table-row table:style-name="ro21">
          <table:table-cell table:style-name="ce179"/>
          <table:table-cell table:number-columns-repeated="4"/>
          <table:table-cell table:style-name="ce203" table:number-columns-repeated="3"/>
          <table:table-cell table:number-columns-repeated="249"/>
        </table:table-row>
        <table:table-row table:style-name="ro21">
          <table:table-cell table:style-name="ce179" office:value-type="string" calcext:value-type="string">
            <text:p>I.1 COSTOS DIRECTOS</text:p>
          </table:table-cell>
          <table:table-cell table:number-columns-repeated="4"/>
          <table:table-cell table:style-name="ce203" table:number-columns-repeated="3"/>
          <table:table-cell table:number-columns-repeated="249"/>
        </table:table-row>
        <table:table-row table:style-name="ro21">
          <table:table-cell table:style-name="ce179" office:value-type="string" calcext:value-type="string">
            <text:p>I.1.1 MATERIALES DIRECTOS</text:p>
          </table:table-cell>
          <table:table-cell table:number-columns-repeated="4"/>
          <table:table-cell table:style-name="ce203" table:number-columns-repeated="3"/>
          <table:table-cell table:number-columns-repeated="249"/>
        </table:table-row>
        <table:table-row table:style-name="ro35">
          <table:table-cell table:style-name="ce477" office:value-type="string" calcext:value-type="string">
            <text:p>CONCEPTO</text:p>
          </table:table-cell>
          <table:table-cell table:style-name="ce493" office:value-type="string" calcext:value-type="string">
            <text:p>UNIDAD</text:p>
          </table:table-cell>
          <table:table-cell table:style-name="ce500" office:value-type="string" calcext:value-type="string">
            <text:p>CANT. AÑO 1</text:p>
          </table:table-cell>
          <table:table-cell table:style-name="ce500" office:value-type="string" calcext:value-type="string">
            <text:p>CANT. AÑO 2</text:p>
          </table:table-cell>
          <table:table-cell table:style-name="ce500" office:value-type="string" calcext:value-type="string">
            <text:p>CANT. AÑO 3, 4, 5</text:p>
          </table:table-cell>
          <table:table-cell table:style-name="ce500" office:value-type="string" calcext:value-type="string">
            <text:p>PRECIO UNITARIO </text:p>
          </table:table-cell>
          <table:table-cell table:style-name="ce500" office:value-type="string" calcext:value-type="string">
            <text:p>COSTO TOTAL AÑO 1</text:p>
          </table:table-cell>
          <table:table-cell table:style-name="ce500" office:value-type="string" calcext:value-type="string">
            <text:p>COSTO TOTAL AÑO 2</text:p>
          </table:table-cell>
          <table:table-cell table:style-name="ce500" office:value-type="string" calcext:value-type="string">
            <text:p>COSTO TOTAL AÑO 3,4,5</text:p>
          </table:table-cell>
          <table:table-cell table:style-name="ce203"/>
          <table:table-cell/>
          <table:table-cell table:style-name="ce158" table:number-columns-repeated="3"/>
          <table:table-cell table:number-columns-repeated="243"/>
        </table:table-row>
        <table:table-row table:style-name="ro21">
          <table:table-cell table:style-name="ce215" office:value-type="string" calcext:value-type="string">
            <text:p>Cuy producida</text:p>
          </table:table-cell>
          <table:table-cell table:style-name="ce215" office:value-type="string" calcext:value-type="string">
            <text:p>Und</text:p>
          </table:table-cell>
          <table:table-cell table:style-name="ce504" table:formula="of:=[$INGRESOS.B9]" office:value-type="float" office:value="3440.46069833684" calcext:value-type="float">
            <text:p>3440</text:p>
          </table:table-cell>
          <table:table-cell table:style-name="ce504" table:formula="of:=[$INGRESOS.C9]" office:value-type="float" office:value="11443.696" calcext:value-type="float">
            <text:p>11444</text:p>
          </table:table-cell>
          <table:table-cell table:style-name="ce504" table:formula="of:=[$INGRESOS.D9]" office:value-type="float" office:value="11443.696" calcext:value-type="float">
            <text:p>11444</text:p>
          </table:table-cell>
          <table:table-cell table:style-name="ce523" table:formula="of:=+[.B43]" office:value-type="float" office:value="8.41" calcext:value-type="float">
            <text:p>8.41</text:p>
          </table:table-cell>
          <table:table-cell table:style-name="ce523" table:formula="of:=[.C39]*[.F39]" office:value-type="float" office:value="28934.2744730128" calcext:value-type="float">
            <text:p>28934.27</text:p>
          </table:table-cell>
          <table:table-cell table:style-name="ce523" table:formula="of:=[.D39]*[.F39]" office:value-type="float" office:value="96241.48336" calcext:value-type="float">
            <text:p>96241.48</text:p>
          </table:table-cell>
          <table:table-cell table:style-name="ce523" table:formula="of:=[.E39]*[.F39]" office:value-type="float" office:value="96241.48336" calcext:value-type="float">
            <text:p>96241.48</text:p>
          </table:table-cell>
          <table:table-cell table:style-name="ce203"/>
          <table:table-cell/>
          <table:table-cell table:style-name="ce158" table:number-columns-repeated="3"/>
          <table:table-cell table:number-columns-repeated="243"/>
        </table:table-row>
        <table:table-row table:style-name="ro21">
          <table:table-cell table:style-name="ce215" office:value-type="string" calcext:value-type="string">
            <text:p>Insumos complementarios</text:p>
          </table:table-cell>
          <table:table-cell table:style-name="ce215" office:value-type="string" calcext:value-type="string">
            <text:p>Gl</text:p>
          </table:table-cell>
          <table:table-cell table:style-name="ce224" office:value-type="float" office:value="1000" calcext:value-type="float">
            <text:p>1000</text:p>
          </table:table-cell>
          <table:table-cell table:style-name="ce224" table:formula="of:=[.C40]*(1+0.2)" office:value-type="float" office:value="1200" calcext:value-type="float">
            <text:p>1200</text:p>
          </table:table-cell>
          <table:table-cell table:style-name="ce224" table:formula="of:=[.C40]*(1+0.2)" office:value-type="float" office:value="1200" calcext:value-type="float">
            <text:p>1200</text:p>
          </table:table-cell>
          <table:table-cell table:style-name="ce225" office:value-type="float" office:value="2" calcext:value-type="float">
            <text:p>2.00</text:p>
          </table:table-cell>
          <table:table-cell table:style-name="ce231" table:formula="of:=[.C40]*[.F40]" office:value-type="float" office:value="2000" calcext:value-type="float">
            <text:p>2000.00</text:p>
          </table:table-cell>
          <table:table-cell table:style-name="ce231" table:formula="of:=[.D40]*[.F40]" office:value-type="float" office:value="2400" calcext:value-type="float">
            <text:p>2400.00</text:p>
          </table:table-cell>
          <table:table-cell table:style-name="ce231" table:formula="of:=[.E40]*[.F40]" office:value-type="float" office:value="2400" calcext:value-type="float">
            <text:p>2400.00</text:p>
          </table:table-cell>
          <table:table-cell table:style-name="ce203"/>
          <table:table-cell/>
          <table:table-cell table:style-name="ce158" table:number-columns-repeated="3"/>
          <table:table-cell table:number-columns-repeated="243"/>
        </table:table-row>
        <table:table-row table:style-name="ro29">
          <table:table-cell table:style-name="ce478" office:value-type="string" calcext:value-type="string" table:number-columns-spanned="6" table:number-rows-spanned="1">
            <text:p>TOTAL <text:s/>COSTOS DIRECTOS</text:p>
          </table:table-cell>
          <table:covered-table-cell table:number-columns-repeated="5" table:style-name="ce478"/>
          <table:table-cell table:style-name="ce523" table:formula="of:=[.G39]+[.G40]" office:value-type="float" office:value="30934.2744730128" calcext:value-type="float">
            <text:p>30934.27</text:p>
          </table:table-cell>
          <table:table-cell table:style-name="ce523" table:formula="of:=[.H39]+[.H40]" office:value-type="float" office:value="98641.48336" calcext:value-type="float">
            <text:p>98641.48</text:p>
          </table:table-cell>
          <table:table-cell table:style-name="ce523" table:formula="of:=[.I39]+[.I40]" office:value-type="float" office:value="98641.48336" calcext:value-type="float">
            <text:p>98641.48</text:p>
          </table:table-cell>
          <table:table-cell table:style-name="ce175"/>
          <table:table-cell table:style-name="ce158" table:number-columns-repeated="2"/>
          <table:table-cell table:number-columns-repeated="245"/>
        </table:table-row>
        <table:table-row table:style-name="ro21">
          <table:table-cell table:style-name="ce479"/>
          <table:table-cell table:style-name="ce494" table:number-columns-repeated="3"/>
          <table:table-cell table:style-name="ce251" table:number-columns-repeated="3"/>
          <table:table-cell table:number-columns-repeated="2"/>
          <table:table-cell table:style-name="ce158" table:number-columns-repeated="3"/>
          <table:table-cell table:number-columns-repeated="245"/>
        </table:table-row>
        <table:table-row table:style-name="ro21">
          <table:table-cell table:style-name="ce480" office:value-type="string" calcext:value-type="string">
            <text:p>Precio de produccion de Cuy por <text:s/>Und. =</text:p>
          </table:table-cell>
          <table:table-cell table:style-name="ce495" table:formula="of:=+[$INGRESOS.D27]" office:value-type="float" office:value="8.41" calcext:value-type="float">
            <text:p>8.41</text:p>
          </table:table-cell>
          <table:table-cell table:style-name="ce217" table:number-columns-repeated="2"/>
          <table:table-cell table:style-name="ce251" table:number-columns-repeated="3"/>
          <table:table-cell table:number-columns-repeated="2"/>
          <table:table-cell table:style-name="ce158" table:number-columns-repeated="3"/>
          <table:table-cell table:number-columns-repeated="245"/>
        </table:table-row>
        <table:table-row table:style-name="ro21">
          <table:table-cell table:number-columns-repeated="4"/>
          <table:table-cell table:style-name="ce181" table:number-columns-repeated="3"/>
          <table:table-cell table:number-columns-repeated="250"/>
        </table:table-row>
        <table:table-row table:style-name="ro21">
          <table:table-cell table:style-name="ce181"/>
          <table:table-cell table:number-columns-repeated="3"/>
          <table:table-cell table:style-name="ce181" table:number-columns-repeated="3"/>
          <table:table-cell table:style-name="ce524"/>
          <table:table-cell table:number-columns-repeated="249"/>
        </table:table-row>
        <table:table-row table:style-name="ro21">
          <table:table-cell table:style-name="ce179" office:value-type="string" calcext:value-type="string">
            <text:p>I.2 COSTOS <text:s/>INDIRECTOS</text:p>
          </table:table-cell>
          <table:table-cell table:number-columns-repeated="3"/>
          <table:table-cell table:style-name="ce181" table:number-columns-repeated="3"/>
          <table:table-cell table:style-name="ce524"/>
          <table:table-cell table:number-columns-repeated="249"/>
        </table:table-row>
        <table:table-row table:style-name="ro21">
          <table:table-cell table:style-name="ce179" office:value-type="string" calcext:value-type="string">
            <text:p>I.2.1 MATERIALES INDIRECTOS</text:p>
          </table:table-cell>
          <table:table-cell table:number-columns-repeated="3"/>
          <table:table-cell table:style-name="ce181" table:number-columns-repeated="3"/>
          <table:table-cell table:style-name="ce524"/>
          <table:table-cell table:number-columns-repeated="249"/>
        </table:table-row>
        <table:table-row table:style-name="ro21">
          <table:table-cell table:style-name="ce181"/>
          <table:table-cell table:number-columns-repeated="3"/>
          <table:table-cell table:style-name="ce181" table:number-columns-repeated="3"/>
          <table:table-cell table:number-columns-repeated="250"/>
        </table:table-row>
        <table:table-row table:style-name="ro3">
          <table:table-cell table:style-name="ce481" office:value-type="string" calcext:value-type="string">
            <text:p>CONCEPTO</text:p>
          </table:table-cell>
          <table:table-cell table:style-name="ce485" office:value-type="string" calcext:value-type="string">
            <text:p>U.Med</text:p>
          </table:table-cell>
          <table:table-cell table:style-name="ce485" office:value-type="string" calcext:value-type="string">
            <text:p>Cant. Año 1</text:p>
          </table:table-cell>
          <table:table-cell table:style-name="ce485" office:value-type="string" calcext:value-type="string">
            <text:p>Cant. Año 2</text:p>
          </table:table-cell>
          <table:table-cell table:style-name="ce485" office:value-type="string" calcext:value-type="string">
            <text:p>Cant. Año 3,4,5</text:p>
          </table:table-cell>
          <table:table-cell table:style-name="ce485" office:value-type="string" calcext:value-type="string">
            <text:p>P.Unit</text:p>
          </table:table-cell>
          <table:table-cell table:number-columns-repeated="3" table:style-name="ce485" office:value-type="string" calcext:value-type="string">
            <text:p>Costo total</text:p>
          </table:table-cell>
          <table:table-cell table:number-columns-repeated="248"/>
        </table:table-row>
        <table:table-row table:style-name="ro21">
          <table:table-cell table:style-name="ce482" office:value-type="string" calcext:value-type="string">
            <text:p>Materiales de empaque </text:p>
          </table:table-cell>
          <table:table-cell table:style-name="ce188" office:value-type="string" calcext:value-type="string">
            <text:p>Global</text:p>
          </table:table-cell>
          <table:table-cell table:style-name="ce497" table:formula="of:=+[.C39]" office:value-type="float" office:value="3440.46069833684" calcext:value-type="float">
            <text:p>3440.46</text:p>
          </table:table-cell>
          <table:table-cell table:style-name="ce497" table:formula="of:=+[.D39]" office:value-type="float" office:value="11443.696" calcext:value-type="float">
            <text:p>11443.70</text:p>
          </table:table-cell>
          <table:table-cell table:style-name="ce497" table:formula="of:=+[.E39]" office:value-type="float" office:value="11443.696" calcext:value-type="float">
            <text:p>11443.70</text:p>
          </table:table-cell>
          <table:table-cell table:style-name="ce497" table:formula="of:=[.D18]" office:value-type="float" office:value="0.1" calcext:value-type="float">
            <text:p>0.10</text:p>
          </table:table-cell>
          <table:table-cell table:style-name="ce497" table:formula="of:=[.C50]*[.F50]" office:value-type="float" office:value="344.046069833684" calcext:value-type="float">
            <text:p>344.05</text:p>
          </table:table-cell>
          <table:table-cell table:style-name="ce497" table:formula="of:=[.D50]*[.F50]" office:value-type="float" office:value="1144.3696" calcext:value-type="float">
            <text:p>1144.37</text:p>
          </table:table-cell>
          <table:table-cell table:style-name="ce497" table:formula="of:=[.E50]*[.F50]" office:value-type="float" office:value="1144.3696" calcext:value-type="float">
            <text:p>1144.37</text:p>
          </table:table-cell>
          <table:table-cell table:number-columns-repeated="248"/>
        </table:table-row>
        <table:table-row table:style-name="ro21">
          <table:table-cell table:style-name="ce483" table:formula="of:=[.A19]" office:value-type="string" office:string-value="Embalaje (caja de 12 unidades)" calcext:value-type="string">
            <text:p>Embalaje (caja de 12 unidades)</text:p>
          </table:table-cell>
          <table:table-cell table:style-name="ce188" table:formula="of:=[.B19]" office:value-type="string" office:string-value="Caja " calcext:value-type="string">
            <text:p>Caja </text:p>
          </table:table-cell>
          <table:table-cell table:style-name="ce193" table:formula="of:=[.C50]/12" office:value-type="float" office:value="286.705058194736" calcext:value-type="float">
            <text:p>286.71</text:p>
          </table:table-cell>
          <table:table-cell table:style-name="ce193" table:formula="of:=[.D50]/12" office:value-type="float" office:value="953.641333333333" calcext:value-type="float">
            <text:p>953.64</text:p>
          </table:table-cell>
          <table:table-cell table:style-name="ce193" table:formula="of:=[.E50]/12" office:value-type="float" office:value="953.641333333333" calcext:value-type="float">
            <text:p>953.64</text:p>
          </table:table-cell>
          <table:table-cell table:style-name="ce193" table:formula="of:=[.D19]" office:value-type="float" office:value="0.5" calcext:value-type="float">
            <text:p>0.50</text:p>
          </table:table-cell>
          <table:table-cell table:style-name="ce497" table:formula="of:=[.C51]*[.F51]" office:value-type="float" office:value="143.352529097368" calcext:value-type="float">
            <text:p>143.35</text:p>
          </table:table-cell>
          <table:table-cell table:style-name="ce497" table:formula="of:=[.D51]*[.F51]" office:value-type="float" office:value="476.820666666667" calcext:value-type="float">
            <text:p>476.82</text:p>
          </table:table-cell>
          <table:table-cell table:style-name="ce497" table:formula="of:=[.E51]*[.F51]" office:value-type="float" office:value="476.820666666667" calcext:value-type="float">
            <text:p>476.82</text:p>
          </table:table-cell>
          <table:table-cell table:number-columns-repeated="248"/>
        </table:table-row>
        <table:table-row table:style-name="ro29">
          <table:table-cell table:style-name="ce484" office:value-type="string" calcext:value-type="string" table:number-columns-spanned="6" table:number-rows-spanned="1">
            <text:p>TOTAL MATERIALES INDIRECTOS</text:p>
          </table:table-cell>
          <table:covered-table-cell table:number-columns-repeated="5" table:style-name="ce484"/>
          <table:table-cell table:style-name="ce313" table:formula="of:=SUM([.G50:.G51])" office:value-type="float" office:value="487.398598931052" calcext:value-type="float">
            <text:p>487.40</text:p>
          </table:table-cell>
          <table:table-cell table:style-name="ce313" table:formula="of:=SUM([.H50:.H51])" office:value-type="float" office:value="1621.19026666667" calcext:value-type="float">
            <text:p>1621.19</text:p>
          </table:table-cell>
          <table:table-cell table:style-name="ce313" table:formula="of:=SUM([.I50:.I51])" office:value-type="float" office:value="1621.19026666667" calcext:value-type="float">
            <text:p>1621.19</text:p>
          </table:table-cell>
          <table:table-cell table:number-columns-repeated="248"/>
        </table:table-row>
        <table:table-row table:style-name="ro21">
          <table:table-cell table:style-name="ce181"/>
          <table:table-cell table:number-columns-repeated="3"/>
          <table:table-cell table:style-name="ce181" table:number-columns-repeated="3"/>
          <table:table-cell table:number-columns-repeated="250"/>
        </table:table-row>
        <table:table-row table:style-name="ro21">
          <table:table-cell table:style-name="ce480" office:value-type="string" calcext:value-type="string">
            <text:p>I.2.2 OTROS COSTOS INDIRECTOS</text:p>
          </table:table-cell>
          <table:table-cell table:style-name="ce179"/>
          <table:table-cell table:style-name="ce181"/>
          <table:table-cell/>
          <table:table-cell table:style-name="ce181" table:number-columns-repeated="3"/>
          <table:table-cell table:number-columns-repeated="250"/>
        </table:table-row>
        <table:table-row table:style-name="ro3">
          <table:table-cell table:style-name="ce485" office:value-type="string" calcext:value-type="string">
            <text:p>CONCEPTO</text:p>
          </table:table-cell>
          <table:table-cell table:style-name="ce485" office:value-type="string" calcext:value-type="string">
            <text:p>CANTIDAD </text:p>
          </table:table-cell>
          <table:table-cell table:style-name="ce505" office:value-type="string" calcext:value-type="string">
            <text:p>COSTO TOTAL ANUAL</text:p>
          </table:table-cell>
          <table:table-cell/>
          <table:table-cell table:style-name="ce181" table:number-columns-repeated="3"/>
          <table:table-cell table:number-columns-repeated="250"/>
        </table:table-row>
        <table:table-row table:style-name="ro21">
          <table:table-cell table:style-name="ce482" office:value-type="string" calcext:value-type="string">
            <text:p>Articulos de Limpieza</text:p>
          </table:table-cell>
          <table:table-cell table:style-name="ce188" office:value-type="string" calcext:value-type="string">
            <text:p>Global</text:p>
          </table:table-cell>
          <table:table-cell table:style-name="ce506" table:formula="of:=[.E13]" office:value-type="float" office:value="180" calcext:value-type="float">
            <text:p><text:s/>180.00 </text:p>
          </table:table-cell>
          <table:table-cell/>
          <table:table-cell table:style-name="ce181" table:number-columns-repeated="3"/>
          <table:table-cell table:number-columns-repeated="250"/>
        </table:table-row>
        <table:table-row table:style-name="ro21">
          <table:table-cell table:style-name="ce482" office:value-type="string" calcext:value-type="string">
            <text:p>Servicios de matenimiento y reparaciones</text:p>
          </table:table-cell>
          <table:table-cell table:style-name="ce188" office:value-type="string" calcext:value-type="string">
            <text:p>Global</text:p>
          </table:table-cell>
          <table:table-cell table:style-name="ce506" table:formula="of:=[.E27]" office:value-type="float" office:value="600" calcext:value-type="float">
            <text:p><text:s/>600.00 </text:p>
          </table:table-cell>
          <table:table-cell/>
          <table:table-cell table:style-name="ce181" table:number-columns-repeated="3"/>
          <table:table-cell table:number-columns-repeated="4"/>
          <table:table-cell table:style-name="ce524"/>
          <table:table-cell table:number-columns-repeated="245"/>
        </table:table-row>
        <table:table-row table:style-name="ro21">
          <table:table-cell table:style-name="ce482" office:value-type="string" calcext:value-type="string">
            <text:p>Servicios basicos</text:p>
          </table:table-cell>
          <table:table-cell table:style-name="ce188" office:value-type="string" calcext:value-type="string">
            <text:p>Global</text:p>
          </table:table-cell>
          <table:table-cell table:style-name="ce507" table:formula="of:=[.E8]" office:value-type="float" office:value="624" calcext:value-type="float">
            <text:p><text:s/>624.00 </text:p>
          </table:table-cell>
          <table:table-cell/>
          <table:table-cell table:style-name="ce181" table:number-columns-repeated="3"/>
          <table:table-cell table:number-columns-repeated="250"/>
        </table:table-row>
        <table:table-row table:style-name="ro21">
          <table:table-cell table:style-name="ce486" office:value-type="string" calcext:value-type="string">
            <text:p>TOTAL OTROS COSTOS INDIRECTOS</text:p>
          </table:table-cell>
          <table:table-cell table:style-name="ce188" office:value-type="string" calcext:value-type="string">
            <text:p>Global</text:p>
          </table:table-cell>
          <table:table-cell table:style-name="ce508" table:formula="of:=SUM([.C56:.C58])" office:value-type="float" office:value="1404" calcext:value-type="float">
            <text:p><text:s/>1,404.00 </text:p>
          </table:table-cell>
          <table:table-cell/>
          <table:table-cell table:style-name="ce181" table:number-columns-repeated="3"/>
          <table:table-cell table:number-columns-repeated="250"/>
        </table:table-row>
        <table:table-row table:style-name="ro29">
          <table:table-cell table:style-name="ce480"/>
          <table:table-cell table:style-name="ce496"/>
          <table:table-cell table:style-name="ce509"/>
          <table:table-cell/>
          <table:table-cell table:style-name="ce181" table:number-columns-repeated="3"/>
          <table:table-cell table:style-name="ce525" office:value-type="string" calcext:value-type="string" table:number-columns-spanned="6" table:number-rows-spanned="1">
            <text:p>COSTOS DE PRODUCCION PROYECTADOS</text:p>
          </table:table-cell>
          <table:covered-table-cell table:number-columns-repeated="5" table:style-name="ce525"/>
          <table:table-cell table:number-columns-repeated="244"/>
        </table:table-row>
        <table:table-row table:style-name="ro29">
          <table:table-cell table:style-name="ce487" office:value-type="string" calcext:value-type="string" table:number-columns-spanned="2" table:number-rows-spanned="1">
            <text:p>I. COSTOS DE PRODUCCION</text:p>
          </table:table-cell>
          <table:covered-table-cell table:style-name="ce487"/>
          <table:table-cell table:style-name="ce509"/>
          <table:table-cell/>
          <table:table-cell table:style-name="ce181" table:number-columns-repeated="3"/>
          <table:table-cell table:style-name="ce229" office:value-type="string" calcext:value-type="string" table:number-columns-spanned="1" table:number-rows-spanned="2">
            <text:p>CONCEPTO</text:p>
          </table:table-cell>
          <table:table-cell table:style-name="ce229" office:value-type="string" calcext:value-type="string" table:number-columns-spanned="5" table:number-rows-spanned="1">
            <text:p>AÑOS</text:p>
          </table:table-cell>
          <table:covered-table-cell table:number-columns-repeated="4" table:style-name="ce229"/>
          <table:table-cell table:number-columns-repeated="244"/>
        </table:table-row>
        <table:table-row table:style-name="ro21">
          <table:table-cell table:style-name="ce164" office:value-type="string" calcext:value-type="string">
            <text:p>CONCEPTO</text:p>
          </table:table-cell>
          <table:table-cell table:style-name="ce164" office:value-type="string" calcext:value-type="string">
            <text:p>COSTO TOTAL</text:p>
          </table:table-cell>
          <table:table-cell table:style-name="ce509"/>
          <table:table-cell/>
          <table:table-cell table:style-name="ce181" table:number-columns-repeated="3"/>
          <table:covered-table-cell table:style-name="ce229"/>
          <table:table-cell table:style-name="ce229" office:value-type="float" office:value="1" calcext:value-type="float">
            <text:p>1</text:p>
          </table:table-cell>
          <table:table-cell table:style-name="ce229" office:value-type="float" office:value="2" calcext:value-type="float">
            <text:p>2</text:p>
          </table:table-cell>
          <table:table-cell table:style-name="ce229" office:value-type="float" office:value="3" calcext:value-type="float">
            <text:p>3</text:p>
          </table:table-cell>
          <table:table-cell table:style-name="ce229" office:value-type="float" office:value="4" calcext:value-type="float">
            <text:p>4</text:p>
          </table:table-cell>
          <table:table-cell table:style-name="ce229" office:value-type="float" office:value="5" calcext:value-type="float">
            <text:p>5</text:p>
          </table:table-cell>
          <table:table-cell table:number-columns-repeated="244"/>
        </table:table-row>
        <table:table-row table:style-name="ro21">
          <table:table-cell table:style-name="ce486" office:value-type="string" calcext:value-type="string">
            <text:p>I.1 COSTOS DIRECTOS</text:p>
          </table:table-cell>
          <table:table-cell table:style-name="ce313" table:formula="of:=SUM([.B64:.B65])" office:value-type="float" office:value="43654.2744730128" calcext:value-type="float">
            <text:p>43654.27</text:p>
          </table:table-cell>
          <table:table-cell table:style-name="ce509"/>
          <table:table-cell/>
          <table:table-cell table:style-name="ce181" table:number-columns-repeated="3"/>
          <table:table-cell table:style-name="ce214" table:formula="of:=[.A63]" office:value-type="string" office:string-value="I.1 COSTOS DIRECTOS" calcext:value-type="string">
            <text:p>I.1 COSTOS DIRECTOS</text:p>
          </table:table-cell>
          <table:table-cell table:style-name="ce528" table:formula="of:=[.I64]+[.I67]" office:value-type="float" office:value="43654.2744730128" calcext:value-type="float">
            <text:p>43,654.27</text:p>
          </table:table-cell>
          <table:table-cell table:style-name="ce528" table:formula="of:=[.J64]+[.J67]" office:value-type="float" office:value="111361.48336" calcext:value-type="float">
            <text:p>111,361.48</text:p>
          </table:table-cell>
          <table:table-cell table:style-name="ce528" table:formula="of:=[.K64]+[.K67]" office:value-type="float" office:value="111361.48336" calcext:value-type="float">
            <text:p>111,361.48</text:p>
          </table:table-cell>
          <table:table-cell table:style-name="ce528" table:formula="of:=[.L64]+[.L67]" office:value-type="float" office:value="111361.48336" calcext:value-type="float">
            <text:p>111,361.48</text:p>
          </table:table-cell>
          <table:table-cell table:style-name="ce528" table:formula="of:=[.M64]+[.M67]" office:value-type="float" office:value="111361.48336" calcext:value-type="float">
            <text:p>111,361.48</text:p>
          </table:table-cell>
          <table:table-cell table:number-columns-repeated="244"/>
        </table:table-row>
        <table:table-row table:style-name="ro21">
          <table:table-cell table:style-name="ce482" office:value-type="string" calcext:value-type="string">
            <text:p>I.1.1 Materiales Directos</text:p>
          </table:table-cell>
          <table:table-cell table:style-name="ce497" table:formula="of:=[.G41]" office:value-type="float" office:value="30934.2744730128" calcext:value-type="float">
            <text:p>30934.27</text:p>
          </table:table-cell>
          <table:table-cell table:style-name="ce497" table:formula="of:=[.H41]" office:value-type="float" office:value="98641.48336" calcext:value-type="float">
            <text:p>98641.48</text:p>
          </table:table-cell>
          <table:table-cell table:style-name="ce497" table:formula="of:=[.I41]" office:value-type="float" office:value="98641.48336" calcext:value-type="float">
            <text:p>98641.48</text:p>
          </table:table-cell>
          <table:table-cell table:style-name="ce181" table:number-columns-repeated="3"/>
          <table:table-cell table:style-name="ce526" table:formula="of:=[.A64]" office:value-type="string" office:string-value="I.1.1 Materiales Directos" calcext:value-type="string">
            <text:p>I.1.1 Materiales Directos</text:p>
          </table:table-cell>
          <table:table-cell table:style-name="ce529" table:formula="of:=SUM([.I65:.I66])" office:value-type="float" office:value="30934.2744730128" calcext:value-type="float">
            <text:p>30,934.27</text:p>
          </table:table-cell>
          <table:table-cell table:style-name="ce529" table:formula="of:=SUM([.J65:.J66])" office:value-type="float" office:value="98641.48336" calcext:value-type="float">
            <text:p>98,641.48</text:p>
          </table:table-cell>
          <table:table-cell table:style-name="ce529" table:formula="of:=SUM([.K65:.K66])" office:value-type="float" office:value="98641.48336" calcext:value-type="float">
            <text:p>98,641.48</text:p>
          </table:table-cell>
          <table:table-cell table:style-name="ce529" table:formula="of:=SUM([.L65:.L66])" office:value-type="float" office:value="98641.48336" calcext:value-type="float">
            <text:p>98,641.48</text:p>
          </table:table-cell>
          <table:table-cell table:style-name="ce529" table:formula="of:=SUM([.M65:.M66])" office:value-type="float" office:value="98641.48336" calcext:value-type="float">
            <text:p>98,641.48</text:p>
          </table:table-cell>
          <table:table-cell table:number-columns-repeated="244"/>
        </table:table-row>
        <table:table-row table:style-name="ro21">
          <table:table-cell table:style-name="ce482" office:value-type="string" calcext:value-type="string">
            <text:p>I.1.2 Mano de Obra Directa</text:p>
          </table:table-cell>
          <table:table-cell table:style-name="ce497" table:formula="of:=[$REMUNERACION.F5]" office:value-type="float" office:value="12720" calcext:value-type="float">
            <text:p>12720.00</text:p>
          </table:table-cell>
          <table:table-cell table:style-name="ce509"/>
          <table:table-cell/>
          <table:table-cell table:style-name="ce181" table:number-columns-repeated="3"/>
          <table:table-cell table:style-name="ce526" office:value-type="string" calcext:value-type="string">
            <text:p>Cuy Producida</text:p>
          </table:table-cell>
          <table:table-cell table:style-name="ce529" table:formula="of:=[.G39]" office:value-type="float" office:value="28934.2744730128" calcext:value-type="float">
            <text:p>28,934.27</text:p>
          </table:table-cell>
          <table:table-cell table:style-name="ce529" table:formula="of:=[.H39]" office:value-type="float" office:value="96241.48336" calcext:value-type="float">
            <text:p>96,241.48</text:p>
          </table:table-cell>
          <table:table-cell table:style-name="ce529" table:formula="of:=[.I39]" office:value-type="float" office:value="96241.48336" calcext:value-type="float">
            <text:p>96,241.48</text:p>
          </table:table-cell>
          <table:table-cell table:style-name="ce529" table:formula="of:=+[.K65]" office:value-type="float" office:value="96241.48336" calcext:value-type="float">
            <text:p>96,241.48</text:p>
          </table:table-cell>
          <table:table-cell table:style-name="ce529" table:formula="of:=+[.L65]" office:value-type="float" office:value="96241.48336" calcext:value-type="float">
            <text:p>96,241.48</text:p>
          </table:table-cell>
          <table:table-cell table:number-columns-repeated="244"/>
        </table:table-row>
        <table:table-row table:style-name="ro21">
          <table:table-cell table:style-name="ce486" office:value-type="string" calcext:value-type="string">
            <text:p>I.2 COSTOS INDIRECTOS</text:p>
          </table:table-cell>
          <table:table-cell table:style-name="ce313" table:formula="of:=[.B67]+[.B68]+[.B69]" office:value-type="float" office:value="3691.39859893105" calcext:value-type="float">
            <text:p>3691.40</text:p>
          </table:table-cell>
          <table:table-cell table:style-name="ce509"/>
          <table:table-cell/>
          <table:table-cell table:style-name="ce181" table:number-columns-repeated="3"/>
          <table:table-cell table:style-name="ce526" office:value-type="string" calcext:value-type="string">
            <text:p>Insumos complementarios</text:p>
          </table:table-cell>
          <table:table-cell table:style-name="ce529" table:formula="of:=[.G40]" office:value-type="float" office:value="2000" calcext:value-type="float">
            <text:p>2,000.00</text:p>
          </table:table-cell>
          <table:table-cell table:style-name="ce529" table:formula="of:=[.H40]" office:value-type="float" office:value="2400" calcext:value-type="float">
            <text:p>2,400.00</text:p>
          </table:table-cell>
          <table:table-cell table:style-name="ce529" table:formula="of:=[.I40]" office:value-type="float" office:value="2400" calcext:value-type="float">
            <text:p>2,400.00</text:p>
          </table:table-cell>
          <table:table-cell table:style-name="ce529" table:formula="of:=+[.K66]" office:value-type="float" office:value="2400" calcext:value-type="float">
            <text:p>2,400.00</text:p>
          </table:table-cell>
          <table:table-cell table:style-name="ce529" table:formula="of:=+[.L66]" office:value-type="float" office:value="2400" calcext:value-type="float">
            <text:p>2,400.00</text:p>
          </table:table-cell>
          <table:table-cell table:number-columns-repeated="244"/>
        </table:table-row>
        <table:table-row table:style-name="ro21">
          <table:table-cell table:style-name="ce482" office:value-type="string" calcext:value-type="string">
            <text:p>I.2.1 Materiales Indirectos</text:p>
          </table:table-cell>
          <table:table-cell table:style-name="ce497" table:formula="of:=[.G52]" office:value-type="float" office:value="487.398598931052" calcext:value-type="float">
            <text:p>487.40</text:p>
          </table:table-cell>
          <table:table-cell table:style-name="ce497" table:formula="of:=[.H52]" office:value-type="float" office:value="1621.19026666667" calcext:value-type="float">
            <text:p>1621.19</text:p>
          </table:table-cell>
          <table:table-cell table:style-name="ce497" table:formula="of:=[.I52]" office:value-type="float" office:value="1621.19026666667" calcext:value-type="float">
            <text:p>1621.19</text:p>
          </table:table-cell>
          <table:table-cell table:style-name="ce181" table:number-columns-repeated="3"/>
          <table:table-cell table:style-name="ce526" table:formula="of:=[.A65]" office:value-type="string" office:string-value="I.1.2 Mano de Obra Directa" calcext:value-type="string">
            <text:p>I.1.2 Mano de Obra Directa</text:p>
          </table:table-cell>
          <table:table-cell table:style-name="ce529" table:formula="of:=[.B65]" office:value-type="float" office:value="12720" calcext:value-type="float">
            <text:p>12,720.00</text:p>
          </table:table-cell>
          <table:table-cell table:style-name="ce529" table:formula="of:=[.I67]" office:value-type="float" office:value="12720" calcext:value-type="float">
            <text:p>12,720.00</text:p>
          </table:table-cell>
          <table:table-cell table:style-name="ce529" table:formula="of:=[.J67]" office:value-type="float" office:value="12720" calcext:value-type="float">
            <text:p>12,720.00</text:p>
          </table:table-cell>
          <table:table-cell table:style-name="ce529" table:formula="of:=[.K67]" office:value-type="float" office:value="12720" calcext:value-type="float">
            <text:p>12,720.00</text:p>
          </table:table-cell>
          <table:table-cell table:style-name="ce529" table:formula="of:=[.L67]" office:value-type="float" office:value="12720" calcext:value-type="float">
            <text:p>12,720.00</text:p>
          </table:table-cell>
          <table:table-cell table:number-columns-repeated="244"/>
        </table:table-row>
        <table:table-row table:style-name="ro21">
          <table:table-cell table:style-name="ce482" office:value-type="string" calcext:value-type="string">
            <text:p>I.2.2 Mano de Obra Indirecta</text:p>
          </table:table-cell>
          <table:table-cell table:style-name="ce498" table:formula="of:=[$REMUNERACION.F8]" office:value-type="float" office:value="1800" calcext:value-type="float">
            <text:p>1800.00</text:p>
          </table:table-cell>
          <table:table-cell table:number-columns-repeated="2"/>
          <table:table-cell table:style-name="ce181" table:number-columns-repeated="3"/>
          <table:table-cell table:style-name="ce214" table:formula="of:=[.A66]" office:value-type="string" office:string-value="I.2 COSTOS INDIRECTOS" calcext:value-type="string">
            <text:p>I.2 COSTOS INDIRECTOS</text:p>
          </table:table-cell>
          <table:table-cell table:style-name="ce529" table:formula="of:=SUM([.I69:.I71])" office:value-type="float" office:value="3691.39859893105" calcext:value-type="float">
            <text:p>3,691.40</text:p>
          </table:table-cell>
          <table:table-cell table:style-name="ce529" table:formula="of:=SUM([.J69:.J71])" office:value-type="float" office:value="4825.19026666667" calcext:value-type="float">
            <text:p>4,825.19</text:p>
          </table:table-cell>
          <table:table-cell table:style-name="ce529" table:formula="of:=SUM([.K69:.K71])" office:value-type="float" office:value="4825.19026666667" calcext:value-type="float">
            <text:p>4,825.19</text:p>
          </table:table-cell>
          <table:table-cell table:style-name="ce529" table:formula="of:=SUM([.L69:.L71])" office:value-type="float" office:value="4825.19026666667" calcext:value-type="float">
            <text:p>4,825.19</text:p>
          </table:table-cell>
          <table:table-cell table:style-name="ce529" table:formula="of:=SUM([.M69:.M71])" office:value-type="float" office:value="4825.19026666667" calcext:value-type="float">
            <text:p>4,825.19</text:p>
          </table:table-cell>
          <table:table-cell table:number-columns-repeated="244"/>
        </table:table-row>
        <table:table-row table:style-name="ro21">
          <table:table-cell table:style-name="ce482" office:value-type="string" calcext:value-type="string">
            <text:p>I.2.3 Otros costos indirectos</text:p>
          </table:table-cell>
          <table:table-cell table:style-name="ce497" table:formula="of:=[.C59]" office:value-type="float" office:value="1404" calcext:value-type="float">
            <text:p>1404.00</text:p>
          </table:table-cell>
          <table:table-cell table:number-columns-repeated="2"/>
          <table:table-cell table:style-name="ce181" table:number-columns-repeated="3"/>
          <table:table-cell table:style-name="ce526" table:formula="of:=[.A67]" office:value-type="string" office:string-value="I.2.1 Materiales Indirectos" calcext:value-type="string">
            <text:p>I.2.1 Materiales Indirectos</text:p>
          </table:table-cell>
          <table:table-cell table:style-name="ce529" table:formula="of:=[.B67]" office:value-type="float" office:value="487.398598931052" calcext:value-type="float">
            <text:p>487.40</text:p>
          </table:table-cell>
          <table:table-cell table:style-name="ce529" table:formula="of:=[.C67]" office:value-type="float" office:value="1621.19026666667" calcext:value-type="float">
            <text:p>1,621.19</text:p>
          </table:table-cell>
          <table:table-cell table:style-name="ce529" table:formula="of:=[.D67]" office:value-type="float" office:value="1621.19026666667" calcext:value-type="float">
            <text:p>1,621.19</text:p>
          </table:table-cell>
          <table:table-cell table:style-name="ce529" table:formula="of:=+[.K69]" office:value-type="float" office:value="1621.19026666667" calcext:value-type="float">
            <text:p>1,621.19</text:p>
          </table:table-cell>
          <table:table-cell table:style-name="ce529" table:formula="of:=[.L69]" office:value-type="float" office:value="1621.19026666667" calcext:value-type="float">
            <text:p>1,621.19</text:p>
          </table:table-cell>
          <table:table-cell table:number-columns-repeated="244"/>
        </table:table-row>
        <table:table-row table:style-name="ro21">
          <table:table-cell table:style-name="ce488" office:value-type="string" calcext:value-type="string">
            <text:p>TOTAL COSTOS DE PRODUCCION</text:p>
          </table:table-cell>
          <table:table-cell table:style-name="ce499" table:formula="of:=[.B63]+[.B66]" office:value-type="float" office:value="47345.6730719438" calcext:value-type="float">
            <text:p>47345.67</text:p>
          </table:table-cell>
          <table:table-cell table:style-name="ce510"/>
          <table:table-cell/>
          <table:table-cell table:style-name="ce181" table:number-columns-repeated="3"/>
          <table:table-cell table:style-name="ce526" table:formula="of:=[.A68]" office:value-type="string" office:string-value="I.2.2 Mano de Obra Indirecta" calcext:value-type="string">
            <text:p>I.2.2 Mano de Obra Indirecta</text:p>
          </table:table-cell>
          <table:table-cell table:style-name="ce529" table:formula="of:=[.B68]" office:value-type="float" office:value="1800" calcext:value-type="float">
            <text:p>1,800.00</text:p>
          </table:table-cell>
          <table:table-cell table:style-name="ce529" table:formula="of:=[.I70]" office:value-type="float" office:value="1800" calcext:value-type="float">
            <text:p>1,800.00</text:p>
          </table:table-cell>
          <table:table-cell table:style-name="ce529" table:formula="of:=[.J70]" office:value-type="float" office:value="1800" calcext:value-type="float">
            <text:p>1,800.00</text:p>
          </table:table-cell>
          <table:table-cell table:style-name="ce529" table:formula="of:=[.K70]" office:value-type="float" office:value="1800" calcext:value-type="float">
            <text:p>1,800.00</text:p>
          </table:table-cell>
          <table:table-cell table:style-name="ce529" table:formula="of:=[.L70]" office:value-type="float" office:value="1800" calcext:value-type="float">
            <text:p>1,800.00</text:p>
          </table:table-cell>
          <table:table-cell table:number-columns-repeated="244"/>
        </table:table-row>
        <table:table-row table:style-name="ro21">
          <table:table-cell table:style-name="ce489"/>
          <table:table-cell table:style-name="ce185"/>
          <table:table-cell table:number-columns-repeated="2"/>
          <table:table-cell table:style-name="ce181" table:number-columns-repeated="3"/>
          <table:table-cell table:style-name="ce526" table:formula="of:=[.A69]" office:value-type="string" office:string-value="I.2.3 Otros costos indirectos" calcext:value-type="string">
            <text:p>I.2.3 Otros costos indirectos</text:p>
          </table:table-cell>
          <table:table-cell table:style-name="ce529" table:formula="of:=[.B69]" office:value-type="float" office:value="1404" calcext:value-type="float">
            <text:p>1,404.00</text:p>
          </table:table-cell>
          <table:table-cell table:style-name="ce529" table:formula="of:=[.I71]" office:value-type="float" office:value="1404" calcext:value-type="float">
            <text:p>1,404.00</text:p>
          </table:table-cell>
          <table:table-cell table:style-name="ce529" table:formula="of:=[.J71]" office:value-type="float" office:value="1404" calcext:value-type="float">
            <text:p>1,404.00</text:p>
          </table:table-cell>
          <table:table-cell table:style-name="ce529" table:formula="of:=[.K71]" office:value-type="float" office:value="1404" calcext:value-type="float">
            <text:p>1,404.00</text:p>
          </table:table-cell>
          <table:table-cell table:style-name="ce529" table:formula="of:=[.L71]" office:value-type="float" office:value="1404" calcext:value-type="float">
            <text:p>1,404.00</text:p>
          </table:table-cell>
          <table:table-cell table:number-columns-repeated="244"/>
        </table:table-row>
        <table:table-row table:style-name="ro21">
          <table:table-cell table:style-name="ce181"/>
          <table:table-cell table:number-columns-repeated="3"/>
          <table:table-cell table:style-name="ce181" table:number-columns-repeated="3"/>
          <table:table-cell table:style-name="ce219" table:formula="of:=[.A70]" office:value-type="string" office:string-value="TOTAL COSTOS DE PRODUCCION" calcext:value-type="string">
            <text:p>TOTAL COSTOS DE PRODUCCION</text:p>
          </table:table-cell>
          <table:table-cell table:style-name="ce530" table:formula="of:=[.I63]+[.I68]" office:value-type="float" office:value="47345.6730719438" calcext:value-type="float">
            <text:p>47,345.67</text:p>
          </table:table-cell>
          <table:table-cell table:style-name="ce530" table:formula="of:=[.J63]+[.J68]" office:value-type="float" office:value="116186.673626667" calcext:value-type="float">
            <text:p>116,186.67</text:p>
          </table:table-cell>
          <table:table-cell table:style-name="ce530" table:formula="of:=[.K63]+[.K68]" office:value-type="float" office:value="116186.673626667" calcext:value-type="float">
            <text:p>116,186.67</text:p>
          </table:table-cell>
          <table:table-cell table:style-name="ce530" table:formula="of:=[.L63]+[.L68]" office:value-type="float" office:value="116186.673626667" calcext:value-type="float">
            <text:p>116,186.67</text:p>
          </table:table-cell>
          <table:table-cell table:style-name="ce530" table:formula="of:=[.M63]+[.M68]" office:value-type="float" office:value="116186.673626667" calcext:value-type="float">
            <text:p>116,186.67</text:p>
          </table:table-cell>
          <table:table-cell table:number-columns-repeated="244"/>
        </table:table-row>
        <table:table-row table:style-name="ro29">
          <table:table-cell table:number-columns-repeated="7"/>
          <table:table-cell table:style-name="ce527" office:value-type="string" calcext:value-type="string" table:number-columns-spanned="6" table:number-rows-spanned="1">
            <text:p>NOTA: SE ESTA CONSIDERANDO UN INCREMENTO DEL 20 % ANUAL DE MATERIAS PRIMAS E INSUMOS</text:p>
          </table:table-cell>
          <table:covered-table-cell table:number-columns-repeated="5" table:style-name="ce527"/>
          <table:table-cell table:number-columns-repeated="244"/>
        </table:table-row>
        <table:table-row table:style-name="ro29">
          <table:table-cell table:style-name="ce476" office:value-type="string" calcext:value-type="string" table:number-columns-spanned="5" table:number-rows-spanned="1">
            <text:p>II. GASTOS DE OPERACIÓN</text:p>
          </table:table-cell>
          <table:covered-table-cell table:number-columns-repeated="4" table:style-name="ce476"/>
          <table:table-cell table:style-name="ce522" table:number-columns-repeated="2"/>
          <table:table-cell table:style-name="ce181"/>
          <table:table-cell table:number-columns-repeated="249"/>
        </table:table-row>
        <table:table-row table:style-name="ro21" table:number-rows-repeated="2">
          <table:table-cell table:number-columns-repeated="257"/>
        </table:table-row>
        <table:table-row table:style-name="ro21">
          <table:table-cell table:style-name="ce490" office:value-type="string" calcext:value-type="string">
            <text:p>II.1 GASTOS DE VENTA</text:p>
          </table:table-cell>
          <table:table-cell/>
          <table:table-cell table:style-name="ce181" table:number-columns-repeated="2"/>
          <table:table-cell table:number-columns-repeated="253"/>
        </table:table-row>
        <table:table-row table:style-name="ro21">
          <table:table-cell table:style-name="ce477" office:value-type="string" calcext:value-type="string">
            <text:p>CONCEPTO</text:p>
          </table:table-cell>
          <table:table-cell table:style-name="ce500" office:value-type="string" calcext:value-type="string">
            <text:p>COSTO TOTAL</text:p>
          </table:table-cell>
          <table:table-cell/>
          <table:table-cell table:style-name="ce244"/>
          <table:table-cell table:number-columns-repeated="253"/>
        </table:table-row>
        <table:table-row table:style-name="ro21">
          <table:table-cell table:style-name="ce214" table:formula="of:=[$REMUNERACION.A10]" office:value-type="string" office:string-value="MANO DE OBRA VENTA" calcext:value-type="string">
            <text:p>MANO DE OBRA VENTA</text:p>
          </table:table-cell>
          <table:table-cell table:style-name="ce235" table:formula="of:=+[.B80]" office:value-type="float" office:value="720" calcext:value-type="float">
            <text:p><text:s/>720.00 </text:p>
          </table:table-cell>
          <table:table-cell/>
          <table:table-cell table:style-name="ce217"/>
          <table:table-cell table:number-columns-repeated="253"/>
        </table:table-row>
        <table:table-row table:style-name="ro21">
          <table:table-cell table:style-name="ce215" office:value-type="string" calcext:value-type="string">
            <text:p>Personal encargado de la venta</text:p>
          </table:table-cell>
          <table:table-cell table:style-name="ce236" table:formula="of:=[$REMUNERACION.F11]" office:value-type="float" office:value="720" calcext:value-type="float">
            <text:p><text:s/>720.00 </text:p>
          </table:table-cell>
          <table:table-cell/>
          <table:table-cell table:style-name="ce217"/>
          <table:table-cell table:number-columns-repeated="253"/>
        </table:table-row>
        <table:table-row table:style-name="ro21">
          <table:table-cell table:style-name="ce214" office:value-type="string" calcext:value-type="string">
            <text:p>OTROS GASTOS DE VENTA</text:p>
          </table:table-cell>
          <table:table-cell table:style-name="ce235" table:formula="of:=[.B83]+[.B82]" office:value-type="float" office:value="1987" calcext:value-type="float">
            <text:p><text:s/>1,987.00 </text:p>
          </table:table-cell>
          <table:table-cell/>
          <table:table-cell table:style-name="ce245"/>
          <table:table-cell table:number-columns-repeated="253"/>
        </table:table-row>
        <table:table-row table:style-name="ro21">
          <table:table-cell table:style-name="ce215" table:formula="of:=[$'CAP TRABAJ'.A24]" office:value-type="string" office:string-value="Otros Servicios" calcext:value-type="string">
            <text:p>Otros Servicios</text:p>
          </table:table-cell>
          <table:table-cell table:style-name="ce236" table:formula="of:=+[.E31]" office:value-type="float" office:value="1387" calcext:value-type="float">
            <text:p><text:s/>1,387.00 </text:p>
          </table:table-cell>
          <table:table-cell/>
          <table:table-cell table:style-name="ce217"/>
          <table:table-cell table:number-columns-repeated="253"/>
        </table:table-row>
        <table:table-row table:style-name="ro21">
          <table:table-cell table:style-name="ce215" office:value-type="string" calcext:value-type="string">
            <text:p>Publicidad y Marketing</text:p>
          </table:table-cell>
          <table:table-cell table:style-name="ce236" table:formula="of:=50*12" office:value-type="float" office:value="600" calcext:value-type="float">
            <text:p><text:s/>600.00 </text:p>
          </table:table-cell>
          <table:table-cell/>
          <table:table-cell table:style-name="ce217"/>
          <table:table-cell table:number-columns-repeated="253"/>
        </table:table-row>
        <table:table-row table:style-name="ro21">
          <table:table-cell table:style-name="ce214" office:value-type="string" calcext:value-type="string">
            <text:p>TOTAL GASTOS DE VENTA</text:p>
          </table:table-cell>
          <table:table-cell table:style-name="ce235" table:formula="of:=[.B79]+[.B81]" office:value-type="float" office:value="2707" calcext:value-type="float">
            <text:p><text:s/>2,707.00 </text:p>
          </table:table-cell>
          <table:table-cell/>
          <table:table-cell table:style-name="ce245"/>
          <table:table-cell table:number-columns-repeated="253"/>
        </table:table-row>
        <table:table-row table:style-name="ro21">
          <table:table-cell table:style-name="ce245" table:number-columns-repeated="3"/>
          <table:table-cell table:style-name="ce251"/>
          <table:table-cell table:number-columns-repeated="253"/>
        </table:table-row>
        <table:table-row table:style-name="ro17">
          <table:table-cell table:style-name="ce245" table:number-columns-repeated="3"/>
          <table:table-cell table:style-name="ce251"/>
          <table:table-cell table:number-columns-repeated="253"/>
        </table:table-row>
        <table:table-row table:style-name="ro40">
          <table:table-cell table:style-name="ce487" office:value-type="string" calcext:value-type="string" table:number-columns-spanned="2" table:number-rows-spanned="1">
            <text:p>II. GASTOS DE OPERACION</text:p>
          </table:table-cell>
          <table:covered-table-cell table:style-name="ce487"/>
          <table:table-cell table:number-columns-repeated="255"/>
        </table:table-row>
        <table:table-row table:style-name="ro21">
          <table:table-cell table:style-name="ce219" office:value-type="string" calcext:value-type="string">
            <text:p>CONCEPTO</text:p>
          </table:table-cell>
          <table:table-cell table:style-name="ce219" office:value-type="string" calcext:value-type="string">
            <text:p>COSTO TOTAL</text:p>
          </table:table-cell>
          <table:table-cell table:number-columns-repeated="5"/>
          <table:table-cell table:style-name="ce524" table:number-columns-repeated="2"/>
          <table:table-cell table:number-columns-repeated="248"/>
        </table:table-row>
        <table:table-row table:style-name="ro21">
          <table:table-cell table:style-name="ce214" office:value-type="string" calcext:value-type="string">
            <text:p>I. GASTOS EN VENTAS</text:p>
          </table:table-cell>
          <table:table-cell table:style-name="ce235" table:formula="of:=[.B90]" office:value-type="float" office:value="2707" calcext:value-type="float">
            <text:p><text:s/>2,707.00 </text:p>
          </table:table-cell>
          <table:table-cell table:number-columns-repeated="255"/>
        </table:table-row>
        <table:table-row table:style-name="ro21">
          <table:table-cell table:style-name="ce215" office:value-type="string" calcext:value-type="string">
            <text:p>Gastos de venta</text:p>
          </table:table-cell>
          <table:table-cell table:style-name="ce236" table:formula="of:=[.B84]" office:value-type="float" office:value="2707" calcext:value-type="float">
            <text:p><text:s/>2,707.00 </text:p>
          </table:table-cell>
          <table:table-cell table:number-columns-repeated="255"/>
        </table:table-row>
        <table:table-row table:style-name="ro21">
          <table:table-cell table:style-name="ce214" office:value-type="string" calcext:value-type="string">
            <text:p>II. GASTOS ADMINISTRATIVOS</text:p>
          </table:table-cell>
          <table:table-cell table:style-name="ce235" table:formula="of:=SUM([.B92:.B93])" office:value-type="float" office:value="1200" calcext:value-type="float">
            <text:p><text:s/>1,200.00 </text:p>
          </table:table-cell>
          <table:table-cell table:number-columns-repeated="5"/>
          <table:table-cell table:style-name="ce524" table:number-columns-repeated="2"/>
          <table:table-cell table:number-columns-repeated="248"/>
        </table:table-row>
        <table:table-row table:style-name="ro21">
          <table:table-cell table:style-name="ce215" office:value-type="string" calcext:value-type="string">
            <text:p>Mano de obra Administrativa</text:p>
          </table:table-cell>
          <table:table-cell table:style-name="ce236" table:formula="of:=[$REMUNERACION.F12]" office:value-type="float" office:value="1080" calcext:value-type="float">
            <text:p><text:s/>1,080.00 </text:p>
          </table:table-cell>
          <table:table-cell table:number-columns-repeated="4"/>
          <table:table-cell table:style-name="ce524" table:formula="of:=+[.I72]+[.B84]+[.B94]" office:value-type="float" office:value="53959.6730719438" calcext:value-type="float">
            <text:p><text:s/>53,959.67 </text:p>
          </table:table-cell>
          <table:table-cell table:number-columns-repeated="250"/>
        </table:table-row>
        <table:table-row table:style-name="ro21">
          <table:table-cell table:style-name="ce215" office:value-type="string" calcext:value-type="string">
            <text:p>Utiles de Oficina </text:p>
          </table:table-cell>
          <table:table-cell table:style-name="ce236" table:formula="of:=[.E12]" office:value-type="float" office:value="120" calcext:value-type="float">
            <text:p><text:s/>120.00 </text:p>
          </table:table-cell>
          <table:table-cell table:number-columns-repeated="255"/>
        </table:table-row>
        <table:table-row table:style-name="ro21">
          <table:table-cell table:style-name="ce219" office:value-type="string" calcext:value-type="string">
            <text:p>TOTAL GASTOS DE OPERACIÓN</text:p>
          </table:table-cell>
          <table:table-cell table:style-name="ce501" table:formula="of:=[.B89]+[.B91]" office:value-type="float" office:value="3907" calcext:value-type="float">
            <text:p><text:s/>3,907.00 </text:p>
          </table:table-cell>
          <table:table-cell table:number-columns-repeated="6"/>
          <table:table-cell table:style-name="ce524"/>
          <table:table-cell table:number-columns-repeated="248"/>
        </table:table-row>
        <table:table-row table:style-name="ro21">
          <table:table-cell table:number-columns-repeated="257"/>
        </table:table-row>
        <table:table-row table:style-name="ro21">
          <table:table-cell/>
          <table:table-cell table:style-name="ce245" table:number-columns-repeated="3"/>
          <table:table-cell table:number-columns-repeated="253"/>
        </table:table-row>
        <table:table-row table:style-name="ro21">
          <table:table-cell/>
          <table:table-cell table:style-name="ce480" table:number-columns-repeated="3"/>
          <table:table-cell table:number-columns-repeated="253"/>
        </table:table-row>
        <table:table-row table:style-name="ro21">
          <table:table-cell/>
          <table:table-cell table:style-name="ce217" table:number-columns-repeated="3"/>
          <table:table-cell table:number-columns-repeated="253"/>
        </table:table-row>
        <table:table-row table:style-name="ro21">
          <table:table-cell/>
          <table:table-cell table:style-name="ce245" table:number-columns-repeated="3"/>
          <table:table-cell table:number-columns-repeated="253"/>
        </table:table-row>
        <table:table-row table:style-name="ro21" table:number-rows-repeated="2">
          <table:table-cell/>
          <table:table-cell table:style-name="ce217" table:number-columns-repeated="2"/>
          <table:table-cell table:style-name="ce252"/>
          <table:table-cell table:number-columns-repeated="253"/>
        </table:table-row>
        <table:table-row table:style-name="ro21">
          <table:table-cell/>
          <table:table-cell table:style-name="ce245" table:number-columns-repeated="3"/>
          <table:table-cell table:number-columns-repeated="253"/>
        </table:table-row>
        <table:table-row table:style-name="ro21">
          <table:table-cell table:style-name="ce185" table:number-columns-repeated="4"/>
          <table:table-cell table:number-columns-repeated="253"/>
        </table:table-row>
        <table:table-row table:style-name="ro24">
          <table:table-cell table:style-name="ce185"/>
          <table:table-cell table:style-name="ce480"/>
          <table:table-cell table:style-name="ce185" table:number-columns-repeated="2"/>
          <table:table-cell table:number-columns-repeated="253"/>
        </table:table-row>
        <table:table-row table:style-name="ro21" table:number-rows-repeated="7">
          <table:table-cell table:number-columns-repeated="257"/>
        </table:table-row>
        <table:table-row table:style-name="ro21">
          <table:table-cell table:style-name="ce491" table:formula="of:=#REF!" office:value-type="string" office:string-value="" calcext:value-type="error">
            <text:p>#¡REF!</text:p>
          </table:table-cell>
          <table:table-cell table:style-name="ce207" table:number-columns-repeated="6"/>
          <table:table-cell/>
          <table:table-cell table:style-name="ce531"/>
          <table:table-cell table:number-columns-repeated="248"/>
        </table:table-row>
        <table:table-row table:style-name="ro21" table:number-rows-repeated="11">
          <table:table-cell table:style-name="ce185"/>
          <table:table-cell table:number-columns-repeated="256"/>
        </table:table-row>
        <table:table-row table:style-name="ro21" table:number-rows-repeated="1048452">
          <table:table-cell table:number-columns-repeated="257"/>
        </table:table-row>
        <table:table-row table:style-name="ro21">
          <table:table-cell table:number-columns-repeated="257"/>
        </table:table-row>
        <table:named-expressions>
          <table:named-range table:name="_xlnm.Print_Area" table:base-cell-address="$POBLACION.$A$1" table:cell-range-address="$'COSTO PROD Y OPER'.$A$33:.$N$94" table:range-usable-as="print-range"/>
        </table:named-expressions>
      </table:table>
      <table:table table:name="DEPRECIAC " table:style-name="ta16" table:print-ranges="'DEPRECIAC '.A4:'DEPRECIAC '.H16">
        <table:table-column table:style-name="co91" table:default-cell-style-name="ce460"/>
        <table:table-column table:style-name="co32" table:default-cell-style-name="ce460"/>
        <table:table-column table:style-name="co71" table:number-columns-repeated="5" table:default-cell-style-name="ce460"/>
        <table:table-column table:style-name="co92" table:default-cell-style-name="ce460"/>
        <table:table-column table:style-name="co93" table:number-columns-repeated="16376" table:default-cell-style-name="Default"/>
        <table:table-row table:style-name="ro21" table:number-rows-repeated="3">
          <table:table-cell table:number-columns-repeated="16384"/>
        </table:table-row>
        <table:table-row table:style-name="ro29">
          <table:table-cell table:style-name="ce532" office:value-type="string" calcext:value-type="string" table:number-columns-spanned="8" table:number-rows-spanned="1">
            <text:p>DEPRECIACION DEL ACTIVO FIJO TANGIBLE <text:s/>Y AMORTIZACION INTANGIBLES</text:p>
          </table:table-cell>
          <table:covered-table-cell table:number-columns-repeated="7" table:style-name="ce532"/>
          <table:table-cell table:number-columns-repeated="16376"/>
        </table:table-row>
        <table:table-row table:style-name="ro41">
          <table:table-cell table:style-name="ce487" office:value-type="string" calcext:value-type="string" table:number-columns-spanned="1" table:number-rows-spanned="2">
            <text:p>CONCEPTO</text:p>
          </table:table-cell>
          <table:table-cell table:style-name="ce487" office:value-type="string" calcext:value-type="string" table:number-columns-spanned="1" table:number-rows-spanned="2">
            <text:p>d</text:p>
          </table:table-cell>
          <table:table-cell table:style-name="ce487" office:value-type="string" calcext:value-type="string" table:number-columns-spanned="5" table:number-rows-spanned="1">
            <text:p>DEPRECIACIÓN (AÑOS)</text:p>
          </table:table-cell>
          <table:covered-table-cell table:number-columns-repeated="4" table:style-name="ce487"/>
          <table:table-cell table:style-name="ce164" office:value-type="string" calcext:value-type="string" table:number-columns-spanned="1" table:number-rows-spanned="2">
            <text:p>VALOR RESIDUAL</text:p>
          </table:table-cell>
          <table:table-cell table:number-columns-repeated="16376"/>
        </table:table-row>
        <table:table-row table:style-name="ro21">
          <table:covered-table-cell table:number-columns-repeated="2" table:style-name="ce487"/>
          <table:table-cell table:style-name="ce487" office:value-type="float" office:value="1" calcext:value-type="float">
            <text:p>1</text:p>
          </table:table-cell>
          <table:table-cell table:style-name="ce487" office:value-type="float" office:value="2" calcext:value-type="float">
            <text:p>2</text:p>
          </table:table-cell>
          <table:table-cell table:style-name="ce487" office:value-type="float" office:value="3" calcext:value-type="float">
            <text:p>3</text:p>
          </table:table-cell>
          <table:table-cell table:style-name="ce487" office:value-type="float" office:value="4" calcext:value-type="float">
            <text:p>4</text:p>
          </table:table-cell>
          <table:table-cell table:style-name="ce487" office:value-type="float" office:value="5" calcext:value-type="float">
            <text:p>5</text:p>
          </table:table-cell>
          <table:covered-table-cell table:style-name="ce164"/>
          <table:table-cell table:number-columns-repeated="16376"/>
        </table:table-row>
        <table:table-row table:style-name="ro21">
          <table:table-cell table:style-name="ce304" office:value-type="string" calcext:value-type="string">
            <text:p>I. ACTIVO NO DEPRECIADO</text:p>
          </table:table-cell>
          <table:table-cell table:style-name="ce535" table:number-columns-repeated="6"/>
          <table:table-cell table:style-name="ce282"/>
          <table:table-cell table:number-columns-repeated="16376"/>
        </table:table-row>
        <table:table-row table:style-name="ro21">
          <table:table-cell table:style-name="ce533" office:value-type="string" calcext:value-type="string">
            <text:p>I.1.1. TERRENOS</text:p>
          </table:table-cell>
          <table:table-cell table:style-name="ce282" office:value-type="float" office:value="0" calcext:value-type="float">
            <text:p>0</text:p>
          </table:table-cell>
          <table:table-cell table:number-columns-repeated="5" table:style-name="ce537" office:value-type="float" office:value="0" calcext:value-type="float">
            <text:p><text:s/>- <text:s text:c="2"/></text:p>
          </table:table-cell>
          <table:table-cell table:style-name="ce537" table:formula="of:=[$'TERREN Y OBR CIV'.F5]" office:value-type="float" office:value="0" calcext:value-type="float">
            <text:p><text:s/>- <text:s text:c="2"/></text:p>
          </table:table-cell>
          <table:table-cell table:number-columns-repeated="16376"/>
        </table:table-row>
        <table:table-row table:style-name="ro21">
          <table:table-cell table:style-name="ce304" office:value-type="string" calcext:value-type="string">
            <text:p>II. DEPRECIACIÓN DEL ACTIVO FIJO TANGIBLE</text:p>
          </table:table-cell>
          <table:table-cell table:style-name="ce282"/>
          <table:table-cell table:style-name="ce426" table:formula="of:=SUM([.C10:.C13])" office:value-type="float" office:value="7577.98728813559" calcext:value-type="float">
            <text:p><text:s/>7,577.99 </text:p>
          </table:table-cell>
          <table:table-cell table:style-name="ce426" table:formula="of:=SUM([.D10:.D13])" office:value-type="float" office:value="7577.98728813559" calcext:value-type="float">
            <text:p><text:s/>7,577.99 </text:p>
          </table:table-cell>
          <table:table-cell table:style-name="ce426" table:formula="of:=SUM([.E10:.E13])" office:value-type="float" office:value="7577.98728813559" calcext:value-type="float">
            <text:p><text:s/>7,577.99 </text:p>
          </table:table-cell>
          <table:table-cell table:style-name="ce426" table:formula="of:=SUM([.F10:.F13])" office:value-type="float" office:value="7577.98728813559" calcext:value-type="float">
            <text:p><text:s/>7,577.99 </text:p>
          </table:table-cell>
          <table:table-cell table:style-name="ce426" table:formula="of:=SUM([.G10:.G13])" office:value-type="float" office:value="7577.98728813559" calcext:value-type="float">
            <text:p><text:s/>7,577.99 </text:p>
          </table:table-cell>
          <table:table-cell table:style-name="ce426" table:formula="of:=SUM([.H10:.H13])" office:value-type="float" office:value="88294.563559322" calcext:value-type="float">
            <text:p><text:s/>88,294.56 </text:p>
          </table:table-cell>
          <table:table-cell table:number-columns-repeated="16376"/>
        </table:table-row>
        <table:table-row table:style-name="ro21">
          <table:table-cell table:style-name="ce282" office:value-type="string" calcext:value-type="string">
            <text:p><text:s text:c="6"/>I.1.2. OBRAS CIVILES</text:p>
          </table:table-cell>
          <table:table-cell table:style-name="ce282" office:value-type="float" office:value="0.05" calcext:value-type="float">
            <text:p>0.05</text:p>
          </table:table-cell>
          <table:table-cell table:style-name="ce537" table:formula="of:=([$'TERREN Y OBR CIV'.G36]/1.18)*[.B10]" office:value-type="float" office:value="3115.61440677966" calcext:value-type="float">
            <text:p><text:s/>3,115.61 </text:p>
          </table:table-cell>
          <table:table-cell table:style-name="ce537" table:formula="of:=[.C10]" office:value-type="float" office:value="3115.61440677966" calcext:value-type="float">
            <text:p><text:s/>3,115.61 </text:p>
          </table:table-cell>
          <table:table-cell table:style-name="ce537" table:formula="of:=[.D10]" office:value-type="float" office:value="3115.61440677966" calcext:value-type="float">
            <text:p><text:s/>3,115.61 </text:p>
          </table:table-cell>
          <table:table-cell table:style-name="ce537" table:formula="of:=[.E10]" office:value-type="float" office:value="3115.61440677966" calcext:value-type="float">
            <text:p><text:s/>3,115.61 </text:p>
          </table:table-cell>
          <table:table-cell table:style-name="ce537" table:formula="of:=[.F10]" office:value-type="float" office:value="3115.61440677966" calcext:value-type="float">
            <text:p><text:s/>3,115.61 </text:p>
          </table:table-cell>
          <table:table-cell table:style-name="ce537" table:formula="of:=(([$'TERREN Y OBR CIV'.G36])-[.G10]*5)" office:value-type="float" office:value="57950.4279661017" calcext:value-type="float">
            <text:p><text:s/>57,950.43 </text:p>
          </table:table-cell>
          <table:table-cell table:number-columns-repeated="16376"/>
        </table:table-row>
        <table:table-row table:style-name="ro21">
          <table:table-cell table:style-name="ce282" office:value-type="string" calcext:value-type="string">
            <text:p><text:s text:c="6"/>I.1.3. MAQUINARIA Y EQUIPO</text:p>
          </table:table-cell>
          <table:table-cell table:style-name="ce282" office:value-type="float" office:value="0.1" calcext:value-type="float">
            <text:p>0.1</text:p>
          </table:table-cell>
          <table:table-cell table:style-name="ce537" table:formula="of:=(([$INVERSION.F9])/1.18)*[.B11]" office:value-type="float" office:value="4013.22033898305" calcext:value-type="float">
            <text:p><text:s/>4,013.22 </text:p>
          </table:table-cell>
          <table:table-cell table:style-name="ce537" table:formula="of:=[.C11]" office:value-type="float" office:value="4013.22033898305" calcext:value-type="float">
            <text:p><text:s/>4,013.22 </text:p>
          </table:table-cell>
          <table:table-cell table:style-name="ce537" table:formula="of:=[.D11]" office:value-type="float" office:value="4013.22033898305" calcext:value-type="float">
            <text:p><text:s/>4,013.22 </text:p>
          </table:table-cell>
          <table:table-cell table:style-name="ce537" table:formula="of:=[.E11]" office:value-type="float" office:value="4013.22033898305" calcext:value-type="float">
            <text:p><text:s/>4,013.22 </text:p>
          </table:table-cell>
          <table:table-cell table:style-name="ce537" table:formula="of:=[.F11]" office:value-type="float" office:value="4013.22033898305" calcext:value-type="float">
            <text:p><text:s/>4,013.22 </text:p>
          </table:table-cell>
          <table:table-cell table:style-name="ce537" table:formula="of:=(([$INVERSION.F9])-[.G11]*5)" office:value-type="float" office:value="27289.8983050847" calcext:value-type="float">
            <text:p><text:s/>27,289.90 </text:p>
          </table:table-cell>
          <table:table-cell table:number-columns-repeated="16376"/>
        </table:table-row>
        <table:table-row table:style-name="ro21" table:visibility="collapse">
          <table:table-cell table:style-name="ce282" office:value-type="string" calcext:value-type="string">
            <text:p><text:s text:c="6"/>I.1.4. VEHICULOS</text:p>
          </table:table-cell>
          <table:table-cell table:style-name="ce282" office:value-type="float" office:value="0.1" calcext:value-type="float">
            <text:p>0.1</text:p>
          </table:table-cell>
          <table:table-cell table:style-name="ce537" table:formula="of:=(([$INVERSION.F10]/1.18))*[.B12]" office:value-type="float" office:value="0" calcext:value-type="float">
            <text:p><text:s/>- <text:s text:c="2"/></text:p>
          </table:table-cell>
          <table:table-cell table:style-name="ce537" table:formula="of:=[.C12]" office:value-type="float" office:value="0" calcext:value-type="float">
            <text:p><text:s/>- <text:s text:c="2"/></text:p>
          </table:table-cell>
          <table:table-cell table:style-name="ce537" table:formula="of:=[.D12]" office:value-type="float" office:value="0" calcext:value-type="float">
            <text:p><text:s/>- <text:s text:c="2"/></text:p>
          </table:table-cell>
          <table:table-cell table:style-name="ce537" table:formula="of:=[.E12]" office:value-type="float" office:value="0" calcext:value-type="float">
            <text:p><text:s/>- <text:s text:c="2"/></text:p>
          </table:table-cell>
          <table:table-cell table:style-name="ce537" table:formula="of:=[.F12]" office:value-type="float" office:value="0" calcext:value-type="float">
            <text:p><text:s/>- <text:s text:c="2"/></text:p>
          </table:table-cell>
          <table:table-cell table:style-name="ce537" table:formula="of:=(([$INVERSION.F10])-[.G12]*5)" office:value-type="float" office:value="0" calcext:value-type="float">
            <text:p><text:s/>- <text:s text:c="2"/></text:p>
          </table:table-cell>
          <table:table-cell table:number-columns-repeated="16376"/>
        </table:table-row>
        <table:table-row table:style-name="ro21">
          <table:table-cell table:style-name="ce282" office:value-type="string" calcext:value-type="string">
            <text:p><text:s text:c="6"/>I.1.5. MUEBLES Y ENSERES</text:p>
          </table:table-cell>
          <table:table-cell table:style-name="ce282" office:value-type="float" office:value="0.1" calcext:value-type="float">
            <text:p>0.1</text:p>
          </table:table-cell>
          <table:table-cell table:style-name="ce537" table:formula="of:=(([$INVERSION.F11])/1.18)*[.B13]" office:value-type="float" office:value="449.152542372881" calcext:value-type="float">
            <text:p><text:s/>449.15 </text:p>
          </table:table-cell>
          <table:table-cell table:style-name="ce537" table:formula="of:=[.C13]" office:value-type="float" office:value="449.152542372881" calcext:value-type="float">
            <text:p><text:s/>449.15 </text:p>
          </table:table-cell>
          <table:table-cell table:style-name="ce537" table:formula="of:=[.D13]" office:value-type="float" office:value="449.152542372881" calcext:value-type="float">
            <text:p><text:s/>449.15 </text:p>
          </table:table-cell>
          <table:table-cell table:style-name="ce537" table:formula="of:=[.E13]" office:value-type="float" office:value="449.152542372881" calcext:value-type="float">
            <text:p><text:s/>449.15 </text:p>
          </table:table-cell>
          <table:table-cell table:style-name="ce537" table:formula="of:=[.F13]" office:value-type="float" office:value="449.152542372881" calcext:value-type="float">
            <text:p><text:s/>449.15 </text:p>
          </table:table-cell>
          <table:table-cell table:style-name="ce537" table:formula="of:=(([$INVERSION.F11])-[.G13]*5)" office:value-type="float" office:value="3054.23728813559" calcext:value-type="float">
            <text:p><text:s/>3,054.24 </text:p>
          </table:table-cell>
          <table:table-cell table:number-columns-repeated="16376"/>
        </table:table-row>
        <table:table-row table:style-name="ro21">
          <table:table-cell table:style-name="ce304" office:value-type="string" calcext:value-type="string">
            <text:p>III. AMORTIZACIÓN INTANGIBLES</text:p>
          </table:table-cell>
          <table:table-cell table:style-name="ce282"/>
          <table:table-cell table:style-name="ce426" table:formula="of:=[.C15]" office:value-type="float" office:value="2880" calcext:value-type="float">
            <text:p><text:s/>2,880.00 </text:p>
          </table:table-cell>
          <table:table-cell table:style-name="ce426" table:formula="of:=[.D15]" office:value-type="float" office:value="2880" calcext:value-type="float">
            <text:p><text:s/>2,880.00 </text:p>
          </table:table-cell>
          <table:table-cell table:style-name="ce426" table:formula="of:=[.E15]" office:value-type="float" office:value="2880" calcext:value-type="float">
            <text:p><text:s/>2,880.00 </text:p>
          </table:table-cell>
          <table:table-cell table:style-name="ce426" table:formula="of:=[.F15]" office:value-type="float" office:value="2880" calcext:value-type="float">
            <text:p><text:s/>2,880.00 </text:p>
          </table:table-cell>
          <table:table-cell table:style-name="ce426" table:formula="of:=[.G15]" office:value-type="float" office:value="2880" calcext:value-type="float">
            <text:p><text:s/>2,880.00 </text:p>
          </table:table-cell>
          <table:table-cell table:style-name="ce426"/>
          <table:table-cell table:number-columns-repeated="16376"/>
        </table:table-row>
        <table:table-row table:style-name="ro21">
          <table:table-cell table:style-name="ce533" office:value-type="string" calcext:value-type="string">
            <text:p>II.1.INVERSIÓN FIJA INTANGIBLE</text:p>
          </table:table-cell>
          <table:table-cell table:style-name="ce536" office:value-type="float" office:value="0.2" calcext:value-type="float">
            <text:p>0.2</text:p>
          </table:table-cell>
          <table:table-cell table:style-name="ce537" table:formula="of:=[$INVERSION.F12]*[.B15]" office:value-type="float" office:value="2880" calcext:value-type="float">
            <text:p><text:s/>2,880.00 </text:p>
          </table:table-cell>
          <table:table-cell table:style-name="ce537" table:formula="of:=[.C15]" office:value-type="float" office:value="2880" calcext:value-type="float">
            <text:p><text:s/>2,880.00 </text:p>
          </table:table-cell>
          <table:table-cell table:style-name="ce537" table:formula="of:=[.D15]" office:value-type="float" office:value="2880" calcext:value-type="float">
            <text:p><text:s/>2,880.00 </text:p>
          </table:table-cell>
          <table:table-cell table:style-name="ce537" table:formula="of:=[.E15]" office:value-type="float" office:value="2880" calcext:value-type="float">
            <text:p><text:s/>2,880.00 </text:p>
          </table:table-cell>
          <table:table-cell table:style-name="ce537" table:formula="of:=[.F15]" office:value-type="float" office:value="2880" calcext:value-type="float">
            <text:p><text:s/>2,880.00 </text:p>
          </table:table-cell>
          <table:table-cell table:style-name="ce537" table:formula="of:=[$INVERSION.F12]-[.G15]*5" office:value-type="float" office:value="0" calcext:value-type="float">
            <text:p><text:s/>- <text:s text:c="2"/></text:p>
          </table:table-cell>
          <table:table-cell table:number-columns-repeated="16376"/>
        </table:table-row>
        <table:table-row table:style-name="ro21">
          <table:table-cell table:style-name="ce534" office:value-type="string" calcext:value-type="string">
            <text:p>TOTAL ( II + III)</text:p>
          </table:table-cell>
          <table:table-cell table:style-name="ce534"/>
          <table:table-cell table:style-name="ce538" table:formula="of:=[.C14]+[.C9]" office:value-type="float" office:value="10457.9872881356" calcext:value-type="float">
            <text:p><text:s/>10,457.99 </text:p>
          </table:table-cell>
          <table:table-cell table:style-name="ce538" table:formula="of:=[.D14]+[.D9]" office:value-type="float" office:value="10457.9872881356" calcext:value-type="float">
            <text:p><text:s/>10,457.99 </text:p>
          </table:table-cell>
          <table:table-cell table:style-name="ce538" table:formula="of:=[.E14]+[.E9]" office:value-type="float" office:value="10457.9872881356" calcext:value-type="float">
            <text:p><text:s/>10,457.99 </text:p>
          </table:table-cell>
          <table:table-cell table:style-name="ce538" table:formula="of:=[.F14]+[.F9]" office:value-type="float" office:value="10457.9872881356" calcext:value-type="float">
            <text:p><text:s/>10,457.99 </text:p>
          </table:table-cell>
          <table:table-cell table:style-name="ce538" table:formula="of:=[.G14]+[.G9]" office:value-type="float" office:value="10457.9872881356" calcext:value-type="float">
            <text:p><text:s/>10,457.99 </text:p>
          </table:table-cell>
          <table:table-cell table:style-name="ce538" table:formula="of:=[.H8]+[.H9]+[.H14]" office:value-type="float" office:value="88294.563559322" calcext:value-type="float">
            <text:p><text:s/>88,294.56 </text:p>
          </table:table-cell>
          <table:table-cell table:number-columns-repeated="16376"/>
        </table:table-row>
        <table:table-row table:style-name="ro21">
          <table:table-cell table:number-columns-repeated="16384"/>
        </table:table-row>
        <table:table-row table:style-name="ro21" table:number-rows-repeated="6">
          <table:table-cell table:style-name="ce283" table:number-columns-repeated="9"/>
          <table:table-cell table:number-columns-repeated="16375"/>
        </table:table-row>
        <table:table-row table:style-name="ro21">
          <table:table-cell table:style-name="ce283" table:number-columns-repeated="6"/>
          <table:table-cell table:style-name="ce539"/>
          <table:table-cell table:style-name="ce283" table:number-columns-repeated="2"/>
          <table:table-cell table:number-columns-repeated="16375"/>
        </table:table-row>
        <table:table-row table:style-name="ro21">
          <table:table-cell table:style-name="ce283" table:number-columns-repeated="9"/>
          <table:table-cell table:number-columns-repeated="16375"/>
        </table:table-row>
        <table:table-row table:style-name="ro21" table:number-rows-repeated="11">
          <table:table-cell table:style-name="ce283" table:number-columns-repeated="9"/>
          <table:table-cell table:number-columns-repeated="16375"/>
        </table:table-row>
        <table:table-row table:style-name="ro21" table:number-rows-repeated="1048539">
          <table:table-cell table:number-columns-repeated="16384"/>
        </table:table-row>
        <table:table-row table:style-name="ro21">
          <table:table-cell table:number-columns-repeated="16384"/>
        </table:table-row>
        <table:named-expressions>
          <table:named-range table:name="_xlnm.Print_Area" table:base-cell-address="$POBLACION.$A$1" table:cell-range-address="$'DEPRECIAC '.$A$4:.$H$16" table:range-usable-as="print-range"/>
        </table:named-expressions>
      </table:table>
      <table:table table:name="COSTOS TOTALES" table:style-name="ta17" table:print-ranges="'COSTOS TOTALES'.A3:'COSTOS TOTALES'.F29">
        <table:table-column table:style-name="co94" table:default-cell-style-name="ce460"/>
        <table:table-column table:style-name="co71" table:default-cell-style-name="ce460"/>
        <table:table-column table:style-name="co36" table:number-columns-repeated="4" table:default-cell-style-name="ce460"/>
        <table:table-column table:style-name="co93" table:number-columns-repeated="16378" table:default-cell-style-name="Default"/>
        <table:table-row table:style-name="ro21" table:number-rows-repeated="2">
          <table:table-cell table:number-columns-repeated="16384"/>
        </table:table-row>
        <table:table-row table:style-name="ro29">
          <table:table-cell table:style-name="ce540" office:value-type="string" calcext:value-type="string" table:number-columns-spanned="6" table:number-rows-spanned="1">
            <text:p>PRESUPUESTO DE EGRESOS (OPERACION)</text:p>
          </table:table-cell>
          <table:covered-table-cell table:number-columns-repeated="5" table:style-name="ce540"/>
          <table:table-cell table:number-columns-repeated="16378"/>
        </table:table-row>
        <table:table-row table:style-name="ro29">
          <table:table-cell table:style-name="ce487" office:value-type="string" calcext:value-type="string" table:number-columns-spanned="1" table:number-rows-spanned="2">
            <text:p>CONCEPTO</text:p>
          </table:table-cell>
          <table:table-cell table:style-name="ce487" office:value-type="string" calcext:value-type="string" table:number-columns-spanned="5" table:number-rows-spanned="1">
            <text:p>AÑOS</text:p>
          </table:table-cell>
          <table:covered-table-cell table:number-columns-repeated="4" table:style-name="ce487"/>
          <table:table-cell table:number-columns-repeated="16378"/>
        </table:table-row>
        <table:table-row table:style-name="ro21">
          <table:covered-table-cell table:style-name="ce487"/>
          <table:table-cell table:style-name="ce543" office:value-type="float" office:value="1" calcext:value-type="float">
            <text:p>1</text:p>
          </table:table-cell>
          <table:table-cell table:style-name="ce543" office:value-type="float" office:value="2" calcext:value-type="float">
            <text:p>2</text:p>
          </table:table-cell>
          <table:table-cell table:style-name="ce543" office:value-type="float" office:value="3" calcext:value-type="float">
            <text:p>3</text:p>
          </table:table-cell>
          <table:table-cell table:style-name="ce543" office:value-type="float" office:value="4" calcext:value-type="float">
            <text:p>4</text:p>
          </table:table-cell>
          <table:table-cell table:style-name="ce543" office:value-type="float" office:value="5" calcext:value-type="float">
            <text:p>5</text:p>
          </table:table-cell>
          <table:table-cell table:number-columns-repeated="16378"/>
        </table:table-row>
        <table:table-row table:style-name="ro21">
          <table:table-cell table:style-name="ce304" office:value-type="string" calcext:value-type="string">
            <text:p>I. COSTOS DE PRODUCCIÒN</text:p>
          </table:table-cell>
          <table:table-cell table:style-name="ce426" table:formula="of:=[.B7]+[.B10]" office:value-type="float" office:value="47345.6730719438" calcext:value-type="float">
            <text:p><text:s/>47,345.67 </text:p>
          </table:table-cell>
          <table:table-cell table:style-name="ce426" table:formula="of:=[.C7]+[.C10]" office:value-type="float" office:value="116186.673626667" calcext:value-type="float">
            <text:p><text:s/>116,186.67 </text:p>
          </table:table-cell>
          <table:table-cell table:style-name="ce426" table:formula="of:=[.D7]+[.D10]" office:value-type="float" office:value="116186.673626667" calcext:value-type="float">
            <text:p><text:s/>116,186.67 </text:p>
          </table:table-cell>
          <table:table-cell table:style-name="ce426" table:formula="of:=[.E7]+[.E10]" office:value-type="float" office:value="116186.673626667" calcext:value-type="float">
            <text:p><text:s/>116,186.67 </text:p>
          </table:table-cell>
          <table:table-cell table:style-name="ce426" table:formula="of:=[.F7]+[.F10]" office:value-type="float" office:value="116186.673626667" calcext:value-type="float">
            <text:p><text:s/>116,186.67 </text:p>
          </table:table-cell>
          <table:table-cell table:number-columns-repeated="16378"/>
        </table:table-row>
        <table:table-row table:style-name="ro21">
          <table:table-cell table:style-name="ce304" office:value-type="string" calcext:value-type="string">
            <text:p>I.1. COSTOS DIRECTOS</text:p>
          </table:table-cell>
          <table:table-cell table:style-name="ce426" table:formula="of:=SUM([.B8:.B9])" office:value-type="float" office:value="43654.2744730128" calcext:value-type="float">
            <text:p><text:s/>43,654.27 </text:p>
          </table:table-cell>
          <table:table-cell table:style-name="ce426" table:formula="of:=[.C8]+[.C9]" office:value-type="float" office:value="111361.48336" calcext:value-type="float">
            <text:p><text:s/>111,361.48 </text:p>
          </table:table-cell>
          <table:table-cell table:style-name="ce426" table:formula="of:=[.D8]+[.D9]" office:value-type="float" office:value="111361.48336" calcext:value-type="float">
            <text:p><text:s/>111,361.48 </text:p>
          </table:table-cell>
          <table:table-cell table:style-name="ce426" table:formula="of:=[.E8]+[.E9]" office:value-type="float" office:value="111361.48336" calcext:value-type="float">
            <text:p><text:s/>111,361.48 </text:p>
          </table:table-cell>
          <table:table-cell table:style-name="ce426" table:formula="of:=[.F8]+[.F9]" office:value-type="float" office:value="111361.48336" calcext:value-type="float">
            <text:p><text:s/>111,361.48 </text:p>
          </table:table-cell>
          <table:table-cell table:number-columns-repeated="16378"/>
        </table:table-row>
        <table:table-row table:style-name="ro21">
          <table:table-cell table:style-name="ce282" office:value-type="string" calcext:value-type="string">
            <text:p>I.1.1. MATERIALES DIRECTOS</text:p>
          </table:table-cell>
          <table:table-cell table:style-name="ce537" table:formula="of:=[$'COSTO PROD Y OPER'.I64]" office:value-type="float" office:value="30934.2744730128" calcext:value-type="float">
            <text:p><text:s/>30,934.27 </text:p>
          </table:table-cell>
          <table:table-cell table:style-name="ce537" table:formula="of:=[$'COSTO PROD Y OPER'.J64]" office:value-type="float" office:value="98641.48336" calcext:value-type="float">
            <text:p><text:s/>98,641.48 </text:p>
          </table:table-cell>
          <table:table-cell table:style-name="ce537" table:formula="of:=[$'COSTO PROD Y OPER'.K64]" office:value-type="float" office:value="98641.48336" calcext:value-type="float">
            <text:p><text:s/>98,641.48 </text:p>
          </table:table-cell>
          <table:table-cell table:style-name="ce537" table:formula="of:=[$'COSTO PROD Y OPER'.L64]" office:value-type="float" office:value="98641.48336" calcext:value-type="float">
            <text:p><text:s/>98,641.48 </text:p>
          </table:table-cell>
          <table:table-cell table:style-name="ce537" table:formula="of:=[$'COSTO PROD Y OPER'.M64]" office:value-type="float" office:value="98641.48336" calcext:value-type="float">
            <text:p><text:s/>98,641.48 </text:p>
          </table:table-cell>
          <table:table-cell table:number-columns-repeated="16378"/>
        </table:table-row>
        <table:table-row table:style-name="ro21">
          <table:table-cell table:style-name="ce282" office:value-type="string" calcext:value-type="string">
            <text:p>I.1.2. MANO DE OBRA DIRECTA.</text:p>
          </table:table-cell>
          <table:table-cell table:style-name="ce537" table:formula="of:=[$'COSTO PROD Y OPER'.I67]" office:value-type="float" office:value="12720" calcext:value-type="float">
            <text:p><text:s/>12,720.00 </text:p>
          </table:table-cell>
          <table:table-cell table:style-name="ce537" table:formula="of:=[$'COSTO PROD Y OPER'.J67]" office:value-type="float" office:value="12720" calcext:value-type="float">
            <text:p><text:s/>12,720.00 </text:p>
          </table:table-cell>
          <table:table-cell table:style-name="ce537" table:formula="of:=[$'COSTO PROD Y OPER'.K67]" office:value-type="float" office:value="12720" calcext:value-type="float">
            <text:p><text:s/>12,720.00 </text:p>
          </table:table-cell>
          <table:table-cell table:style-name="ce537" table:formula="of:=[$'COSTO PROD Y OPER'.L67]" office:value-type="float" office:value="12720" calcext:value-type="float">
            <text:p><text:s/>12,720.00 </text:p>
          </table:table-cell>
          <table:table-cell table:style-name="ce537" table:formula="of:=[$'COSTO PROD Y OPER'.M67]" office:value-type="float" office:value="12720" calcext:value-type="float">
            <text:p><text:s/>12,720.00 </text:p>
          </table:table-cell>
          <table:table-cell table:number-columns-repeated="16378"/>
        </table:table-row>
        <table:table-row table:style-name="ro21">
          <table:table-cell table:style-name="ce304" office:value-type="string" calcext:value-type="string">
            <text:p>I.2. COSTOS INDIRECTOS</text:p>
          </table:table-cell>
          <table:table-cell table:style-name="ce426" table:formula="of:=SUM([.B11:.B13])" office:value-type="float" office:value="3691.39859893105" calcext:value-type="float">
            <text:p><text:s/>3,691.40 </text:p>
          </table:table-cell>
          <table:table-cell table:style-name="ce426" table:formula="of:=SUM([.C11:.C13])" office:value-type="float" office:value="4825.19026666667" calcext:value-type="float">
            <text:p><text:s/>4,825.19 </text:p>
          </table:table-cell>
          <table:table-cell table:style-name="ce426" table:formula="of:=SUM([.D11:.D13])" office:value-type="float" office:value="4825.19026666667" calcext:value-type="float">
            <text:p><text:s/>4,825.19 </text:p>
          </table:table-cell>
          <table:table-cell table:style-name="ce426" table:formula="of:=SUM([.E11:.E13])" office:value-type="float" office:value="4825.19026666667" calcext:value-type="float">
            <text:p><text:s/>4,825.19 </text:p>
          </table:table-cell>
          <table:table-cell table:style-name="ce426" table:formula="of:=SUM([.F11:.F13])" office:value-type="float" office:value="4825.19026666667" calcext:value-type="float">
            <text:p><text:s/>4,825.19 </text:p>
          </table:table-cell>
          <table:table-cell table:number-columns-repeated="16378"/>
        </table:table-row>
        <table:table-row table:style-name="ro21">
          <table:table-cell table:style-name="ce307" office:value-type="string" calcext:value-type="string">
            <text:p>I.2.1. MATERIALES INDIRECTOS.</text:p>
          </table:table-cell>
          <table:table-cell table:style-name="ce427" table:formula="of:=[$'COSTO PROD Y OPER'.I69]" office:value-type="float" office:value="487.398598931052" calcext:value-type="float">
            <text:p><text:s/>487.40 </text:p>
          </table:table-cell>
          <table:table-cell table:style-name="ce427" table:formula="of:=[$'COSTO PROD Y OPER'.J69]" office:value-type="float" office:value="1621.19026666667" calcext:value-type="float">
            <text:p><text:s/>1,621.19 </text:p>
          </table:table-cell>
          <table:table-cell table:style-name="ce427" table:formula="of:=[$'COSTO PROD Y OPER'.K69]" office:value-type="float" office:value="1621.19026666667" calcext:value-type="float">
            <text:p><text:s/>1,621.19 </text:p>
          </table:table-cell>
          <table:table-cell table:style-name="ce427" table:formula="of:=[$'COSTO PROD Y OPER'.L69]" office:value-type="float" office:value="1621.19026666667" calcext:value-type="float">
            <text:p><text:s/>1,621.19 </text:p>
          </table:table-cell>
          <table:table-cell table:style-name="ce427" table:formula="of:=[$'COSTO PROD Y OPER'.M69]" office:value-type="float" office:value="1621.19026666667" calcext:value-type="float">
            <text:p><text:s/>1,621.19 </text:p>
          </table:table-cell>
          <table:table-cell table:number-columns-repeated="16378"/>
        </table:table-row>
        <table:table-row table:style-name="ro21">
          <table:table-cell table:style-name="ce307" office:value-type="string" calcext:value-type="string">
            <text:p>I.2.1. MANO DE OBRA INDIRECTA.</text:p>
          </table:table-cell>
          <table:table-cell table:style-name="ce427" table:formula="of:=[$'COSTO PROD Y OPER'.I70]" office:value-type="float" office:value="1800" calcext:value-type="float">
            <text:p><text:s/>1,800.00 </text:p>
          </table:table-cell>
          <table:table-cell table:style-name="ce427" table:formula="of:=[$'COSTO PROD Y OPER'.J70]" office:value-type="float" office:value="1800" calcext:value-type="float">
            <text:p><text:s/>1,800.00 </text:p>
          </table:table-cell>
          <table:table-cell table:style-name="ce427" table:formula="of:=[$'COSTO PROD Y OPER'.K70]" office:value-type="float" office:value="1800" calcext:value-type="float">
            <text:p><text:s/>1,800.00 </text:p>
          </table:table-cell>
          <table:table-cell table:style-name="ce427" table:formula="of:=[$'COSTO PROD Y OPER'.L70]" office:value-type="float" office:value="1800" calcext:value-type="float">
            <text:p><text:s/>1,800.00 </text:p>
          </table:table-cell>
          <table:table-cell table:style-name="ce427" table:formula="of:=[$'COSTO PROD Y OPER'.M70]" office:value-type="float" office:value="1800" calcext:value-type="float">
            <text:p><text:s/>1,800.00 </text:p>
          </table:table-cell>
          <table:table-cell table:number-columns-repeated="16378"/>
        </table:table-row>
        <table:table-row table:style-name="ro21">
          <table:table-cell table:style-name="ce307" office:value-type="string" calcext:value-type="string">
            <text:p>I.2.2 OTROS COSTOS INDIRECTOS</text:p>
          </table:table-cell>
          <table:table-cell table:style-name="ce427" table:formula="of:=[$'COSTO PROD Y OPER'.I71]" office:value-type="float" office:value="1404" calcext:value-type="float">
            <text:p><text:s/>1,404.00 </text:p>
          </table:table-cell>
          <table:table-cell table:style-name="ce537" table:formula="of:=[.B13]" office:value-type="float" office:value="1404" calcext:value-type="float">
            <text:p><text:s/>1,404.00 </text:p>
          </table:table-cell>
          <table:table-cell table:style-name="ce537" table:formula="of:=[.C13]" office:value-type="float" office:value="1404" calcext:value-type="float">
            <text:p><text:s/>1,404.00 </text:p>
          </table:table-cell>
          <table:table-cell table:style-name="ce537" table:formula="of:=[.D13]" office:value-type="float" office:value="1404" calcext:value-type="float">
            <text:p><text:s/>1,404.00 </text:p>
          </table:table-cell>
          <table:table-cell table:style-name="ce537" table:formula="of:=[.E13]" office:value-type="float" office:value="1404" calcext:value-type="float">
            <text:p><text:s/>1,404.00 </text:p>
          </table:table-cell>
          <table:table-cell table:number-columns-repeated="16378"/>
        </table:table-row>
        <table:table-row table:style-name="ro21">
          <table:table-cell table:style-name="ce304" office:value-type="string" calcext:value-type="string">
            <text:p>II. GASTOS DE OPERACIÒN</text:p>
          </table:table-cell>
          <table:table-cell table:style-name="ce426" table:formula="of:=[.B15]+[.B16]" office:value-type="float" office:value="3907" calcext:value-type="float">
            <text:p><text:s/>3,907.00 </text:p>
          </table:table-cell>
          <table:table-cell table:style-name="ce426" table:formula="of:=[.B14]" office:value-type="float" office:value="3907" calcext:value-type="float">
            <text:p><text:s/>3,907.00 </text:p>
          </table:table-cell>
          <table:table-cell table:style-name="ce426" table:formula="of:=[.C14]" office:value-type="float" office:value="3907" calcext:value-type="float">
            <text:p><text:s/>3,907.00 </text:p>
          </table:table-cell>
          <table:table-cell table:style-name="ce426" table:formula="of:=[.D14]" office:value-type="float" office:value="3907" calcext:value-type="float">
            <text:p><text:s/>3,907.00 </text:p>
          </table:table-cell>
          <table:table-cell table:style-name="ce426" table:formula="of:=[.E14]" office:value-type="float" office:value="3907" calcext:value-type="float">
            <text:p><text:s/>3,907.00 </text:p>
          </table:table-cell>
          <table:table-cell table:number-columns-repeated="16378"/>
        </table:table-row>
        <table:table-row table:style-name="ro21">
          <table:table-cell table:style-name="ce282" office:value-type="string" calcext:value-type="string">
            <text:p>II.1. GASTOS DE VENTA</text:p>
          </table:table-cell>
          <table:table-cell table:style-name="ce537" table:formula="of:=[$'COSTO PROD Y OPER'.B89]" office:value-type="float" office:value="2707" calcext:value-type="float">
            <text:p><text:s/>2,707.00 </text:p>
          </table:table-cell>
          <table:table-cell table:style-name="ce537" table:formula="of:=[.B15]" office:value-type="float" office:value="2707" calcext:value-type="float">
            <text:p><text:s/>2,707.00 </text:p>
          </table:table-cell>
          <table:table-cell table:style-name="ce537" table:formula="of:=[.C15]" office:value-type="float" office:value="2707" calcext:value-type="float">
            <text:p><text:s/>2,707.00 </text:p>
          </table:table-cell>
          <table:table-cell table:style-name="ce537" table:formula="of:=[.D15]" office:value-type="float" office:value="2707" calcext:value-type="float">
            <text:p><text:s/>2,707.00 </text:p>
          </table:table-cell>
          <table:table-cell table:style-name="ce537" table:formula="of:=[.E15]" office:value-type="float" office:value="2707" calcext:value-type="float">
            <text:p><text:s/>2,707.00 </text:p>
          </table:table-cell>
          <table:table-cell table:number-columns-repeated="16378"/>
        </table:table-row>
        <table:table-row table:style-name="ro21">
          <table:table-cell table:style-name="ce541" office:value-type="string" calcext:value-type="string">
            <text:p>II.2. GASTOS ADMINISTRATIVOS</text:p>
          </table:table-cell>
          <table:table-cell table:style-name="ce544" table:formula="of:=[$'COSTO PROD Y OPER'.B91]" office:value-type="float" office:value="1200" calcext:value-type="float">
            <text:p><text:s/>1,200.00 </text:p>
          </table:table-cell>
          <table:table-cell table:style-name="ce537" table:formula="of:=[.B16]" office:value-type="float" office:value="1200" calcext:value-type="float">
            <text:p><text:s/>1,200.00 </text:p>
          </table:table-cell>
          <table:table-cell table:style-name="ce537" table:formula="of:=[.C16]" office:value-type="float" office:value="1200" calcext:value-type="float">
            <text:p><text:s/>1,200.00 </text:p>
          </table:table-cell>
          <table:table-cell table:style-name="ce537" table:formula="of:=[.D16]" office:value-type="float" office:value="1200" calcext:value-type="float">
            <text:p><text:s/>1,200.00 </text:p>
          </table:table-cell>
          <table:table-cell table:style-name="ce537" table:formula="of:=[.E16]" office:value-type="float" office:value="1200" calcext:value-type="float">
            <text:p><text:s/>1,200.00 </text:p>
          </table:table-cell>
          <table:table-cell table:style-name="ce283"/>
          <table:table-cell table:number-columns-repeated="16377"/>
        </table:table-row>
        <table:table-row table:style-name="ro21">
          <table:table-cell table:style-name="ce304" office:value-type="string" calcext:value-type="string">
            <text:p>III. DEPRECIACIÒN Y AMORTIZACION INTANG.</text:p>
          </table:table-cell>
          <table:table-cell table:style-name="ce426" table:formula="of:=[$'DEPRECIAC '.C16]" office:value-type="float" office:value="10457.9872881356" calcext:value-type="float">
            <text:p><text:s/>10,457.99 </text:p>
          </table:table-cell>
          <table:table-cell table:style-name="ce426" table:formula="of:=[$'DEPRECIAC '.D16]" office:value-type="float" office:value="10457.9872881356" calcext:value-type="float">
            <text:p><text:s/>10,457.99 </text:p>
          </table:table-cell>
          <table:table-cell table:style-name="ce426" table:formula="of:=[$'DEPRECIAC '.E16]" office:value-type="float" office:value="10457.9872881356" calcext:value-type="float">
            <text:p><text:s/>10,457.99 </text:p>
          </table:table-cell>
          <table:table-cell table:style-name="ce426" table:formula="of:=[$'DEPRECIAC '.F16]" office:value-type="float" office:value="10457.9872881356" calcext:value-type="float">
            <text:p><text:s/>10,457.99 </text:p>
          </table:table-cell>
          <table:table-cell table:style-name="ce426" table:formula="of:=[$'DEPRECIAC '.G16]" office:value-type="float" office:value="10457.9872881356" calcext:value-type="float">
            <text:p><text:s/>10,457.99 </text:p>
          </table:table-cell>
          <table:table-cell table:style-name="ce283"/>
          <table:table-cell table:number-columns-repeated="16377"/>
        </table:table-row>
        <table:table-row table:style-name="ro21">
          <table:table-cell table:style-name="ce304" office:value-type="string" calcext:value-type="string">
            <text:p>IV. GASTOS FINANCIEROS</text:p>
          </table:table-cell>
          <table:table-cell table:style-name="ce426" table:formula="of:=SUM([.B19:.B19])" office:value-type="float" office:value="5388.86178313251" calcext:value-type="float">
            <text:p><text:s/>5,388.86 </text:p>
          </table:table-cell>
          <table:table-cell table:style-name="ce426" table:formula="of:=SUM([.C19:.C19])" office:value-type="float" office:value="0" calcext:value-type="float">
            <text:p><text:s/>- <text:s text:c="2"/></text:p>
          </table:table-cell>
          <table:table-cell table:style-name="ce426" table:formula="of:=SUM([.D19:.D19])" office:value-type="float" office:value="0" calcext:value-type="float">
            <text:p><text:s/>- <text:s text:c="2"/></text:p>
          </table:table-cell>
          <table:table-cell table:style-name="ce426" table:formula="of:=SUM([.E19:.E19])" office:value-type="float" office:value="0" calcext:value-type="float">
            <text:p><text:s/>- <text:s text:c="2"/></text:p>
          </table:table-cell>
          <table:table-cell table:style-name="ce426" table:formula="of:=SUM([.F19:.F19])" office:value-type="float" office:value="0" calcext:value-type="float">
            <text:p><text:s/>- <text:s text:c="2"/></text:p>
          </table:table-cell>
          <table:table-cell table:style-name="ce283"/>
          <table:table-cell table:number-columns-repeated="16377"/>
        </table:table-row>
        <table:table-row table:style-name="ro21">
          <table:table-cell table:style-name="ce307" office:value-type="string" calcext:value-type="string">
            <text:p>PAGO DE PRESTAMO</text:p>
          </table:table-cell>
          <table:table-cell table:style-name="ce537" table:formula="of:=[$FINANCIAMIENT.B53]" office:value-type="float" office:value="5388.86178313251" calcext:value-type="float">
            <text:p><text:s/>5,388.86 </text:p>
          </table:table-cell>
          <table:table-cell table:style-name="ce537" table:formula="of:=[$FINANCIAMIENT.C53]" office:value-type="float" office:value="0" calcext:value-type="float">
            <text:p><text:s/>- <text:s text:c="2"/></text:p>
          </table:table-cell>
          <table:table-cell table:style-name="ce537" table:formula="of:=[$FINANCIAMIENT.D53]" office:value-type="float" office:value="0" calcext:value-type="float">
            <text:p><text:s/>- <text:s text:c="2"/></text:p>
          </table:table-cell>
          <table:table-cell table:style-name="ce537" table:number-columns-repeated="2"/>
          <table:table-cell table:style-name="ce547"/>
          <table:table-cell table:number-columns-repeated="16377"/>
        </table:table-row>
        <table:table-row table:style-name="ro21">
          <table:table-cell table:style-name="ce304" office:value-type="string" calcext:value-type="string">
            <text:p>TOTAL EGRESOS</text:p>
          </table:table-cell>
          <table:table-cell table:style-name="ce426" table:formula="of:=[.B18]+[.B17]+[.B14]+[.B6]" office:value-type="float" office:value="67099.5221432119" calcext:value-type="float">
            <text:p><text:s/>67,099.52 </text:p>
          </table:table-cell>
          <table:table-cell table:style-name="ce426" table:formula="of:=[.C18]+[.C17]+[.C14]+[.C6]" office:value-type="float" office:value="130551.660914802" calcext:value-type="float">
            <text:p><text:s/>130,551.66 </text:p>
          </table:table-cell>
          <table:table-cell table:style-name="ce426" table:formula="of:=[.D18]+[.D17]+[.D14]+[.D6]" office:value-type="float" office:value="130551.660914802" calcext:value-type="float">
            <text:p><text:s/>130,551.66 </text:p>
          </table:table-cell>
          <table:table-cell table:style-name="ce426" table:formula="of:=[.E18]+[.E17]+[.E14]+[.E6]" office:value-type="float" office:value="130551.660914802" calcext:value-type="float">
            <text:p><text:s/>130,551.66 </text:p>
          </table:table-cell>
          <table:table-cell table:style-name="ce426" table:formula="of:=[.F18]+[.F17]+[.F14]+[.F6]" office:value-type="float" office:value="130551.660914802" calcext:value-type="float">
            <text:p><text:s/>130,551.66 </text:p>
          </table:table-cell>
          <table:table-cell table:style-name="ce283"/>
          <table:table-cell table:number-columns-repeated="16377"/>
        </table:table-row>
        <table:table-row table:style-name="ro21">
          <table:table-cell table:style-name="ce283" table:number-columns-repeated="7"/>
          <table:table-cell table:number-columns-repeated="16377"/>
        </table:table-row>
        <table:table-row table:style-name="ro21">
          <table:table-cell table:style-name="ce542" office:value-type="string" calcext:value-type="string">
            <text:p>costo promedio por und de cuy</text:p>
          </table:table-cell>
          <table:table-cell table:style-name="ce545" table:formula="of:=[.B20]/[$INGRESOS.B13]" office:value-type="float" office:value="19.503063114672" calcext:value-type="float">
            <text:p><text:s/>19.50 </text:p>
          </table:table-cell>
          <table:table-cell table:style-name="ce545" table:formula="of:=[.C20]/[$INGRESOS.C13]" office:value-type="float" office:value="11.4081727542223" calcext:value-type="float">
            <text:p><text:s/>11.41 </text:p>
          </table:table-cell>
          <table:table-cell table:style-name="ce545" table:formula="of:=[.D20]/[$INGRESOS.D13]" office:value-type="float" office:value="11.4081727542223" calcext:value-type="float">
            <text:p><text:s/>11.41 </text:p>
          </table:table-cell>
          <table:table-cell table:style-name="ce545" table:formula="of:=[.E20]/[$INGRESOS.E13]" office:value-type="float" office:value="11.4081727542223" calcext:value-type="float">
            <text:p><text:s/>11.41 </text:p>
          </table:table-cell>
          <table:table-cell table:style-name="ce545" table:formula="of:=[.F20]/[$INGRESOS.F13]" office:value-type="float" office:value="11.4081727542223" calcext:value-type="float">
            <text:p><text:s/>11.41 </text:p>
          </table:table-cell>
          <table:table-cell table:style-name="ce283"/>
          <table:table-cell table:number-columns-repeated="16377"/>
        </table:table-row>
        <table:table-row table:style-name="ro21" table:number-rows-repeated="2">
          <table:table-cell table:style-name="ce283"/>
          <table:table-cell table:style-name="ce539"/>
          <table:table-cell table:style-name="ce283" table:number-columns-repeated="5"/>
          <table:table-cell table:number-columns-repeated="16377"/>
        </table:table-row>
        <table:table-row table:style-name="ro29">
          <table:table-cell table:style-name="ce487" office:value-type="string" calcext:value-type="string" table:number-columns-spanned="1" table:number-rows-spanned="2">
            <text:p>CONCEPTO</text:p>
          </table:table-cell>
          <table:table-cell table:style-name="ce487" office:value-type="string" calcext:value-type="string" table:number-columns-spanned="5" table:number-rows-spanned="1">
            <text:p>AÑOS</text:p>
          </table:table-cell>
          <table:covered-table-cell table:number-columns-repeated="4" table:style-name="ce487"/>
          <table:table-cell table:style-name="ce283"/>
          <table:table-cell table:number-columns-repeated="16377"/>
        </table:table-row>
        <table:table-row table:style-name="ro21">
          <table:covered-table-cell table:style-name="ce487"/>
          <table:table-cell table:style-name="ce543" office:value-type="float" office:value="1" calcext:value-type="float">
            <text:p>1</text:p>
          </table:table-cell>
          <table:table-cell table:style-name="ce543" office:value-type="float" office:value="2" calcext:value-type="float">
            <text:p>2</text:p>
          </table:table-cell>
          <table:table-cell table:style-name="ce543" office:value-type="float" office:value="3" calcext:value-type="float">
            <text:p>3</text:p>
          </table:table-cell>
          <table:table-cell table:style-name="ce543" office:value-type="float" office:value="4" calcext:value-type="float">
            <text:p>4</text:p>
          </table:table-cell>
          <table:table-cell table:style-name="ce543" office:value-type="float" office:value="5" calcext:value-type="float">
            <text:p>5</text:p>
          </table:table-cell>
          <table:table-cell table:style-name="ce283"/>
          <table:table-cell table:number-columns-repeated="16377"/>
        </table:table-row>
        <table:table-row table:style-name="ro21">
          <table:table-cell table:style-name="ce307" office:value-type="string" calcext:value-type="string">
            <text:p>Costos Totales</text:p>
          </table:table-cell>
          <table:table-cell table:style-name="ce427" table:formula="of:=[.B20]" office:value-type="float" office:value="67099.5221432119" calcext:value-type="float">
            <text:p><text:s/>67,099.52 </text:p>
          </table:table-cell>
          <table:table-cell table:style-name="ce427" table:formula="of:=[.C20]" office:value-type="float" office:value="130551.660914802" calcext:value-type="float">
            <text:p><text:s/>130,551.66 </text:p>
          </table:table-cell>
          <table:table-cell table:style-name="ce427" table:formula="of:=[.D20]" office:value-type="float" office:value="130551.660914802" calcext:value-type="float">
            <text:p><text:s/>130,551.66 </text:p>
          </table:table-cell>
          <table:table-cell table:style-name="ce427" table:formula="of:=[.E20]" office:value-type="float" office:value="130551.660914802" calcext:value-type="float">
            <text:p><text:s/>130,551.66 </text:p>
          </table:table-cell>
          <table:table-cell table:style-name="ce427" table:formula="of:=[.F20]" office:value-type="float" office:value="130551.660914802" calcext:value-type="float">
            <text:p><text:s/>130,551.66 </text:p>
          </table:table-cell>
          <table:table-cell table:style-name="ce283"/>
          <table:table-cell table:number-columns-repeated="16377"/>
        </table:table-row>
        <table:table-row table:style-name="ro21">
          <table:table-cell table:style-name="ce307" office:value-type="string" calcext:value-type="string">
            <text:p>Produccion Und</text:p>
          </table:table-cell>
          <table:table-cell table:style-name="ce427" table:formula="of:=[$INGRESOS.B13]" office:value-type="float" office:value="3440.46069833684" calcext:value-type="float">
            <text:p><text:s/>3,440.46 </text:p>
          </table:table-cell>
          <table:table-cell table:style-name="ce427" table:formula="of:=[$INGRESOS.C13]" office:value-type="float" office:value="11443.696" calcext:value-type="float">
            <text:p><text:s/>11,443.70 </text:p>
          </table:table-cell>
          <table:table-cell table:style-name="ce427" table:formula="of:=[$INGRESOS.D13]" office:value-type="float" office:value="11443.696" calcext:value-type="float">
            <text:p><text:s/>11,443.70 </text:p>
          </table:table-cell>
          <table:table-cell table:style-name="ce427" table:formula="of:=[$INGRESOS.E13]" office:value-type="float" office:value="11443.696" calcext:value-type="float">
            <text:p><text:s/>11,443.70 </text:p>
          </table:table-cell>
          <table:table-cell table:style-name="ce427" table:formula="of:=[$INGRESOS.F13]" office:value-type="float" office:value="11443.696" calcext:value-type="float">
            <text:p><text:s/>11,443.70 </text:p>
          </table:table-cell>
          <table:table-cell table:style-name="ce283"/>
          <table:table-cell table:number-columns-repeated="16377"/>
        </table:table-row>
        <table:table-row table:style-name="ro21">
          <table:table-cell table:style-name="ce307" office:value-type="string" calcext:value-type="string">
            <text:p>costo promedio unitario/und</text:p>
          </table:table-cell>
          <table:table-cell table:style-name="ce537" table:formula="of:=[.B27]/[.B28]" office:value-type="float" office:value="19.503063114672" calcext:value-type="float">
            <text:p><text:s/>19.50 </text:p>
          </table:table-cell>
          <table:table-cell table:style-name="ce537" table:formula="of:=[.C27]/[.C28]" office:value-type="float" office:value="11.4081727542223" calcext:value-type="float">
            <text:p><text:s/>11.41 </text:p>
          </table:table-cell>
          <table:table-cell table:style-name="ce537" table:formula="of:=[.D27]/[.D28]" office:value-type="float" office:value="11.4081727542223" calcext:value-type="float">
            <text:p><text:s/>11.41 </text:p>
          </table:table-cell>
          <table:table-cell table:style-name="ce537" table:formula="of:=[.E27]/[.E28]" office:value-type="float" office:value="11.4081727542223" calcext:value-type="float">
            <text:p><text:s/>11.41 </text:p>
          </table:table-cell>
          <table:table-cell table:style-name="ce537" table:formula="of:=[.F27]/[.F28]" office:value-type="float" office:value="11.4081727542223" calcext:value-type="float">
            <text:p><text:s/>11.41 </text:p>
          </table:table-cell>
          <table:table-cell table:style-name="ce283"/>
          <table:table-cell table:number-columns-repeated="16377"/>
        </table:table-row>
        <table:table-row table:style-name="ro21" table:number-rows-repeated="2">
          <table:table-cell table:style-name="ce283" table:number-columns-repeated="7"/>
          <table:table-cell table:number-columns-repeated="16377"/>
        </table:table-row>
        <table:table-row table:style-name="ro21">
          <table:table-cell table:style-name="ce283"/>
          <table:table-cell table:style-name="ce546"/>
          <table:table-cell table:style-name="ce283" table:number-columns-repeated="5"/>
          <table:table-cell table:number-columns-repeated="16377"/>
        </table:table-row>
        <table:table-row table:style-name="ro21">
          <table:table-cell table:style-name="ce283" table:number-columns-repeated="7"/>
          <table:table-cell table:number-columns-repeated="16377"/>
        </table:table-row>
        <table:table-row table:style-name="ro21" table:number-rows-repeated="3">
          <table:table-cell table:style-name="ce283" table:number-columns-repeated="7"/>
          <table:table-cell table:number-columns-repeated="16377"/>
        </table:table-row>
        <table:table-row table:style-name="ro21">
          <table:table-cell/>
          <table:table-cell table:style-name="ce462"/>
          <table:table-cell table:number-columns-repeated="16382"/>
        </table:table-row>
        <table:table-row table:style-name="ro21" table:number-rows-repeated="1048538">
          <table:table-cell table:number-columns-repeated="16384"/>
        </table:table-row>
        <table:table-row table:style-name="ro21">
          <table:table-cell table:number-columns-repeated="16384"/>
        </table:table-row>
        <table:named-expressions>
          <table:named-range table:name="_xlnm.Print_Area" table:base-cell-address="$POBLACION.$A$1" table:cell-range-address="$'COSTOS TOTALES'.$A$3:.$F$29" table:range-usable-as="print-range"/>
        </table:named-expressions>
      </table:table>
      <table:table table:name="INGRESOS" table:style-name="ta18" table:print-ranges="INGRESOS.A2:INGRESOS.F14">
        <table:table-column table:style-name="co95" table:default-cell-style-name="ce425"/>
        <table:table-column table:style-name="co71" table:default-cell-style-name="ce425"/>
        <table:table-column table:style-name="co36" table:default-cell-style-name="ce425"/>
        <table:table-column table:style-name="co92" table:default-cell-style-name="ce425"/>
        <table:table-column table:style-name="co36" table:number-columns-repeated="2" table:default-cell-style-name="ce425"/>
        <table:table-column table:style-name="co7" table:default-cell-style-name="ce425"/>
        <table:table-column table:style-name="co1" table:number-columns-repeated="2" table:default-cell-style-name="ce425"/>
        <table:table-column table:style-name="co96" table:default-cell-style-name="ce425"/>
        <table:table-column table:style-name="co1" table:number-columns-repeated="247" table:default-cell-style-name="ce425"/>
        <table:table-column table:style-name="co12" table:number-columns-repeated="16127"/>
        <table:table-row table:style-name="ro21">
          <table:table-cell table:style-name="ce429" table:number-columns-repeated="7"/>
          <table:table-cell table:number-columns-repeated="250"/>
        </table:table-row>
        <table:table-row table:style-name="ro21">
          <table:table-cell table:style-name="ce307" office:value-type="string" calcext:value-type="string">
            <text:p>PRECIO PROMEDIO (S/) x Und</text:p>
          </table:table-cell>
          <table:table-cell table:style-name="ce554" office:value-type="float" office:value="18" calcext:value-type="float">
            <text:p><text:s/>18.00 </text:p>
          </table:table-cell>
          <table:table-cell table:style-name="ce561"/>
          <table:table-cell table:number-columns-repeated="254"/>
        </table:table-row>
        <table:table-row table:style-name="ro21">
          <table:table-cell table:style-name="ce429" table:number-columns-repeated="2"/>
          <table:table-cell table:number-columns-repeated="255"/>
        </table:table-row>
        <table:table-row table:style-name="ro21">
          <table:table-cell table:number-columns-repeated="9"/>
          <table:table-cell table:style-name="ce463"/>
          <table:table-cell table:number-columns-repeated="247"/>
        </table:table-row>
        <table:table-row table:style-name="ro29">
          <table:table-cell table:style-name="ce301" office:value-type="string" calcext:value-type="string" table:number-columns-spanned="6" table:number-rows-spanned="1">
            <text:p>PRESUPUESTO DE INGRESOS (SOLES)</text:p>
          </table:table-cell>
          <table:covered-table-cell table:number-columns-repeated="5" table:style-name="ce301"/>
          <table:table-cell table:number-columns-repeated="3"/>
          <table:table-cell table:style-name="ce463"/>
          <table:table-cell table:number-columns-repeated="247"/>
        </table:table-row>
        <table:table-row table:style-name="ro8">
          <table:table-cell table:style-name="ce487" office:value-type="string" calcext:value-type="string" table:number-columns-spanned="1" table:number-rows-spanned="3">
            <text:p>CONCEPTO</text:p>
          </table:table-cell>
          <table:table-cell table:style-name="ce540" office:value-type="string" calcext:value-type="string" table:number-columns-spanned="5" table:number-rows-spanned="1">
            <text:p>AÑOS</text:p>
          </table:table-cell>
          <table:covered-table-cell table:number-columns-repeated="4" table:style-name="ce540"/>
          <table:table-cell table:number-columns-repeated="3"/>
          <table:table-cell table:style-name="ce463"/>
          <table:table-cell table:number-columns-repeated="247"/>
        </table:table-row>
        <table:table-row table:style-name="ro21">
          <table:covered-table-cell table:style-name="ce487"/>
          <table:table-cell table:style-name="ce540" office:value-type="float" office:value="1" calcext:value-type="float">
            <text:p>1</text:p>
          </table:table-cell>
          <table:table-cell table:style-name="ce540" office:value-type="float" office:value="2" calcext:value-type="float">
            <text:p>2</text:p>
          </table:table-cell>
          <table:table-cell table:style-name="ce540" office:value-type="float" office:value="3" calcext:value-type="float">
            <text:p>3</text:p>
          </table:table-cell>
          <table:table-cell table:style-name="ce540" office:value-type="float" office:value="4" calcext:value-type="float">
            <text:p>4</text:p>
          </table:table-cell>
          <table:table-cell table:style-name="ce540" office:value-type="float" office:value="5" calcext:value-type="float">
            <text:p>5</text:p>
          </table:table-cell>
          <table:table-cell table:style-name="ce416" table:number-columns-repeated="3"/>
          <table:table-cell table:style-name="ce572"/>
          <table:table-cell table:style-name="ce416" table:number-columns-repeated="16374"/>
        </table:table-row>
        <table:table-row table:style-name="ro21">
          <table:covered-table-cell table:style-name="ce487"/>
          <table:table-cell table:style-name="ce426" table:formula="of:=[.B10]*[.B9]" office:value-type="float" office:value="61928.2925700631" calcext:value-type="float">
            <text:p><text:s/>61,928.29 </text:p>
          </table:table-cell>
          <table:table-cell table:style-name="ce426" table:formula="of:=[.C10]*[.C9]" office:value-type="float" office:value="205986.528" calcext:value-type="float">
            <text:p><text:s/>205,986.53 </text:p>
          </table:table-cell>
          <table:table-cell table:style-name="ce426" table:formula="of:=[.D10]*[.D9]" office:value-type="float" office:value="205986.528" calcext:value-type="float">
            <text:p><text:s/>205,986.53 </text:p>
          </table:table-cell>
          <table:table-cell table:style-name="ce426" table:formula="of:=[.E10]*[.E9]" office:value-type="float" office:value="205986.528" calcext:value-type="float">
            <text:p><text:s/>205,986.53 </text:p>
          </table:table-cell>
          <table:table-cell table:style-name="ce426" table:formula="of:=[.F10]*[.F9]" office:value-type="float" office:value="205986.528" calcext:value-type="float">
            <text:p><text:s/>205,986.53 </text:p>
          </table:table-cell>
          <table:table-cell table:number-columns-repeated="3"/>
          <table:table-cell table:style-name="ce428"/>
          <table:table-cell table:number-columns-repeated="247"/>
        </table:table-row>
        <table:table-row table:style-name="ro21">
          <table:table-cell table:style-name="ce307" office:value-type="string" calcext:value-type="string">
            <text:p>Produccion Anual (Und)</text:p>
          </table:table-cell>
          <table:table-cell table:style-name="ce555" table:formula="of:=[$'PLAN DE PRODUCCION'.C4]" office:value-type="float" office:value="3440.46069833684" calcext:value-type="float">
            <text:p><text:s/>3,440 </text:p>
          </table:table-cell>
          <table:table-cell table:style-name="ce555" table:formula="of:=[$'PLAN DE PRODUCCION'.C5]" office:value-type="float" office:value="11443.696" calcext:value-type="float">
            <text:p><text:s/>11,444 </text:p>
          </table:table-cell>
          <table:table-cell table:style-name="ce555" table:formula="of:=[$'PLAN DE PRODUCCION'.C6]" office:value-type="float" office:value="11443.696" calcext:value-type="float">
            <text:p><text:s/>11,444 </text:p>
          </table:table-cell>
          <table:table-cell table:style-name="ce555" table:formula="of:=[$'PLAN DE PRODUCCION'.C7]" office:value-type="float" office:value="11443.696" calcext:value-type="float">
            <text:p><text:s/>11,444 </text:p>
          </table:table-cell>
          <table:table-cell table:style-name="ce555" table:formula="of:=[$'PLAN DE PRODUCCION'.C8]" office:value-type="float" office:value="11443.696" calcext:value-type="float">
            <text:p><text:s/>11,444 </text:p>
          </table:table-cell>
          <table:table-cell/>
          <table:table-cell table:style-name="ce463"/>
          <table:table-cell/>
          <table:table-cell table:style-name="ce463"/>
          <table:table-cell table:number-columns-repeated="247"/>
        </table:table-row>
        <table:table-row table:style-name="ro21">
          <table:table-cell table:style-name="ce307" office:value-type="string" calcext:value-type="string">
            <text:p><text:s/>Precio <text:s/>proyectado <text:s/>Und</text:p>
          </table:table-cell>
          <table:table-cell table:style-name="ce555" table:formula="of:=[.B2]" office:value-type="float" office:value="18" calcext:value-type="float">
            <text:p><text:s/>18 </text:p>
          </table:table-cell>
          <table:table-cell table:style-name="ce555" table:formula="of:=+[.B10]" office:value-type="float" office:value="18" calcext:value-type="float">
            <text:p><text:s/>18 </text:p>
          </table:table-cell>
          <table:table-cell table:style-name="ce555" table:formula="of:=+[.C10]" office:value-type="float" office:value="18" calcext:value-type="float">
            <text:p><text:s/>18 </text:p>
          </table:table-cell>
          <table:table-cell table:style-name="ce555" table:formula="of:=+[.D10]" office:value-type="float" office:value="18" calcext:value-type="float">
            <text:p><text:s/>18 </text:p>
          </table:table-cell>
          <table:table-cell table:style-name="ce555" table:formula="of:=+[.E10]" office:value-type="float" office:value="18" calcext:value-type="float">
            <text:p><text:s/>18 </text:p>
          </table:table-cell>
          <table:table-cell table:number-columns-repeated="2"/>
          <table:table-cell table:style-name="ce463"/>
          <table:table-cell/>
          <table:table-cell table:style-name="ce463"/>
          <table:table-cell table:number-columns-repeated="246"/>
        </table:table-row>
        <table:table-row table:style-name="ro21">
          <table:table-cell table:style-name="ce304" office:value-type="string" calcext:value-type="string">
            <text:p>TOTAL INGRESO</text:p>
          </table:table-cell>
          <table:table-cell table:style-name="ce426" table:formula="of:=[.B8]" office:value-type="float" office:value="61928.2925700631" calcext:value-type="float">
            <text:p><text:s/>61,928.29 </text:p>
          </table:table-cell>
          <table:table-cell table:style-name="ce426" table:formula="of:=[.C8]" office:value-type="float" office:value="205986.528" calcext:value-type="float">
            <text:p><text:s/>205,986.53 </text:p>
          </table:table-cell>
          <table:table-cell table:style-name="ce426" table:formula="of:=[.D8]" office:value-type="float" office:value="205986.528" calcext:value-type="float">
            <text:p><text:s/>205,986.53 </text:p>
          </table:table-cell>
          <table:table-cell table:style-name="ce426" table:formula="of:=[.E8]" office:value-type="float" office:value="205986.528" calcext:value-type="float">
            <text:p><text:s/>205,986.53 </text:p>
          </table:table-cell>
          <table:table-cell table:style-name="ce426" table:formula="of:=[.F8]" office:value-type="float" office:value="205986.528" calcext:value-type="float">
            <text:p><text:s/>205,986.53 </text:p>
          </table:table-cell>
          <table:table-cell table:number-columns-repeated="3"/>
          <table:table-cell table:style-name="ce463"/>
          <table:table-cell table:style-name="ce570"/>
          <table:table-cell table:number-columns-repeated="246"/>
        </table:table-row>
        <table:table-row table:style-name="ro21">
          <table:table-cell table:style-name="ce416" office:value-type="string" calcext:value-type="string">
            <text:p>ELABORACION PROPIA</text:p>
          </table:table-cell>
          <table:table-cell table:number-columns-repeated="9"/>
          <table:table-cell table:style-name="ce570"/>
          <table:table-cell table:number-columns-repeated="246"/>
        </table:table-row>
        <table:table-row table:style-name="ro21">
          <table:table-cell table:style-name="ce304" office:value-type="string" calcext:value-type="string">
            <text:p>Q</text:p>
          </table:table-cell>
          <table:table-cell table:style-name="ce426" table:formula="of:=[.B11]/[.B10]" office:value-type="float" office:value="3440.46069833684" calcext:value-type="float">
            <text:p><text:s/>3,440.46 </text:p>
          </table:table-cell>
          <table:table-cell table:style-name="ce426" table:formula="of:=[.C11]/[.C10]" office:value-type="float" office:value="11443.696" calcext:value-type="float">
            <text:p><text:s/>11,443.70 </text:p>
          </table:table-cell>
          <table:table-cell table:style-name="ce426" table:formula="of:=[.D11]/[.D10]" office:value-type="float" office:value="11443.696" calcext:value-type="float">
            <text:p><text:s/>11,443.70 </text:p>
          </table:table-cell>
          <table:table-cell table:style-name="ce426" table:formula="of:=[.E11]/[.E10]" office:value-type="float" office:value="11443.696" calcext:value-type="float">
            <text:p><text:s/>11,443.70 </text:p>
          </table:table-cell>
          <table:table-cell table:style-name="ce426" table:formula="of:=[.F11]/[.F10]" office:value-type="float" office:value="11443.696" calcext:value-type="float">
            <text:p><text:s/>11,443.70 </text:p>
          </table:table-cell>
          <table:table-cell table:style-name="ce571" office:value-type="string" calcext:value-type="string">
            <text:p>NO BORRAR</text:p>
          </table:table-cell>
          <table:table-cell table:number-columns-repeated="3"/>
          <table:table-cell table:style-name="ce570"/>
          <table:table-cell table:number-columns-repeated="246"/>
        </table:table-row>
        <table:table-row table:style-name="ro21">
          <table:table-cell/>
          <table:table-cell table:style-name="ce556"/>
          <table:table-cell table:style-name="ce463" table:number-columns-repeated="3"/>
          <table:table-cell table:number-columns-repeated="5"/>
          <table:table-cell table:style-name="ce570"/>
          <table:table-cell table:number-columns-repeated="246"/>
        </table:table-row>
        <table:table-row table:style-name="ro16">
          <table:table-cell table:style-name="ce548" office:value-type="string" calcext:value-type="string" table:number-columns-spanned="6" table:number-rows-spanned="1">
            <text:p>NOTA: CONSIDERANDO UN INCREMENTO PROYECTADO EN LAS VENTAS, EN BASE AL CUADRO DE PROYECCION DEL CUY Y CONSTANTE EL PRECIO DURANTE LOS CINCO AÑOS.</text:p>
          </table:table-cell>
          <table:covered-table-cell table:number-columns-repeated="5" table:style-name="ce548"/>
          <table:table-cell table:number-columns-repeated="4"/>
          <table:table-cell table:style-name="ce570"/>
          <table:table-cell table:number-columns-repeated="246"/>
        </table:table-row>
        <table:table-row table:style-name="ro21">
          <table:table-cell table:number-columns-repeated="257"/>
        </table:table-row>
        <table:table-row table:style-name="ro21">
          <table:table-cell table:number-columns-repeated="5"/>
          <table:table-cell table:formula="of:=+[.B9]/12" office:value-type="float" office:value="286.705058194736" calcext:value-type="float">
            <text:p>286.705058194736</text:p>
          </table:table-cell>
          <table:table-cell table:number-columns-repeated="251"/>
        </table:table-row>
        <table:table-row table:style-name="ro42">
          <table:table-cell table:style-name="ce549" office:value-type="string" calcext:value-type="string">
            <text:p>COSTOS DE PRODUCCION</text:p>
          </table:table-cell>
          <table:table-cell table:style-name="ce557" office:value-type="string" calcext:value-type="string">
            <text:p>COSTO UNITARIO</text:p>
          </table:table-cell>
          <table:table-cell table:style-name="ce557" office:value-type="string" calcext:value-type="string">
            <text:p>CANTIDAD</text:p>
          </table:table-cell>
          <table:table-cell table:style-name="ce565" office:value-type="string" calcext:value-type="string">
            <text:p><text:s/>COSTO TOTAL</text:p>
          </table:table-cell>
          <table:table-cell/>
          <table:table-cell table:style-name="ce570" table:formula="of:=+[.C9]/12" office:value-type="float" office:value="953.641333333333" calcext:value-type="float">
            <text:p>953.64</text:p>
          </table:table-cell>
          <table:table-cell table:number-columns-repeated="251"/>
        </table:table-row>
        <table:table-row table:style-name="ro21">
          <table:table-cell table:style-name="ce550" office:value-type="string" calcext:value-type="string">
            <text:p>MATERIA PRIMA (1unid.)</text:p>
          </table:table-cell>
          <table:table-cell table:style-name="ce558" office:value-type="string" calcext:value-type="string">
            <text:p>S/.</text:p>
          </table:table-cell>
          <table:table-cell table:style-name="ce558" office:value-type="string" calcext:value-type="string">
            <text:p>unid.</text:p>
          </table:table-cell>
          <table:table-cell table:style-name="ce566" office:value-type="string" calcext:value-type="string">
            <text:p>S/.</text:p>
          </table:table-cell>
          <table:table-cell/>
          <table:table-cell table:style-name="ce570"/>
          <table:table-cell table:number-columns-repeated="251"/>
        </table:table-row>
        <table:table-row table:style-name="ro21">
          <table:table-cell table:style-name="ce551" office:value-type="string" calcext:value-type="string">
            <text:p>1. Alimentacion</text:p>
          </table:table-cell>
          <table:table-cell table:style-name="ce319" office:value-type="float" office:value="7" calcext:value-type="float">
            <text:p>7.00</text:p>
          </table:table-cell>
          <table:table-cell table:style-name="ce562" office:value-type="float" office:value="1" calcext:value-type="float">
            <text:p>1</text:p>
          </table:table-cell>
          <table:table-cell table:style-name="ce567" table:formula="of:=+[.B20]*[.C20]" office:value-type="float" office:value="7" calcext:value-type="float">
            <text:p>7</text:p>
          </table:table-cell>
          <table:table-cell/>
          <table:table-cell table:style-name="ce570"/>
          <table:table-cell table:number-columns-repeated="251"/>
        </table:table-row>
        <table:table-row table:style-name="ro21">
          <table:table-cell table:style-name="ce551" office:value-type="string" calcext:value-type="string">
            <text:p>2. Mano de Obra en op. Y mant.</text:p>
          </table:table-cell>
          <table:table-cell table:style-name="ce319" office:value-type="float" office:value="0.8" calcext:value-type="float">
            <text:p>0.80</text:p>
          </table:table-cell>
          <table:table-cell table:style-name="ce562" office:value-type="float" office:value="1" calcext:value-type="float">
            <text:p>1</text:p>
          </table:table-cell>
          <table:table-cell table:style-name="ce567" table:formula="of:=+[.B21]*[.C21]" office:value-type="float" office:value="0.8" calcext:value-type="float">
            <text:p>0.8</text:p>
          </table:table-cell>
          <table:table-cell/>
          <table:table-cell table:style-name="ce570"/>
          <table:table-cell table:number-columns-repeated="251"/>
        </table:table-row>
        <table:table-row table:style-name="ro21">
          <table:table-cell table:style-name="ce551" office:value-type="string" calcext:value-type="string">
            <text:p>3. Tratamiento sanitario</text:p>
          </table:table-cell>
          <table:table-cell table:style-name="ce319" office:value-type="float" office:value="0.4" calcext:value-type="float">
            <text:p>0.40</text:p>
          </table:table-cell>
          <table:table-cell table:style-name="ce562" office:value-type="float" office:value="1" calcext:value-type="float">
            <text:p>1</text:p>
          </table:table-cell>
          <table:table-cell table:style-name="ce567" table:formula="of:=+[.B22]*[.C22]" office:value-type="float" office:value="0.4" calcext:value-type="float">
            <text:p>0.4</text:p>
          </table:table-cell>
          <table:table-cell/>
          <table:table-cell table:style-name="ce570"/>
          <table:table-cell table:number-columns-repeated="251"/>
        </table:table-row>
        <table:table-row table:style-name="ro21">
          <table:table-cell table:style-name="ce550" office:value-type="string" calcext:value-type="string">
            <text:p>OTROS</text:p>
          </table:table-cell>
          <table:table-cell table:style-name="ce558" office:value-type="string" calcext:value-type="string">
            <text:p>S/.</text:p>
          </table:table-cell>
          <table:table-cell table:style-name="ce558" office:value-type="string" calcext:value-type="string">
            <text:p>UNIDAD</text:p>
          </table:table-cell>
          <table:table-cell table:style-name="ce566" office:value-type="string" calcext:value-type="string">
            <text:p>S/.</text:p>
          </table:table-cell>
          <table:table-cell table:number-columns-repeated="253"/>
        </table:table-row>
        <table:table-row table:style-name="ro21">
          <table:table-cell table:style-name="ce551" office:value-type="string" calcext:value-type="string">
            <text:p>4. mano de obra en empaque</text:p>
          </table:table-cell>
          <table:table-cell table:style-name="ce319" office:value-type="float" office:value="0.03" calcext:value-type="float">
            <text:p>0.03</text:p>
          </table:table-cell>
          <table:table-cell table:style-name="ce562" office:value-type="float" office:value="1" calcext:value-type="float">
            <text:p>1</text:p>
          </table:table-cell>
          <table:table-cell table:style-name="ce567" table:formula="of:=+[.B24]*[.C24]" office:value-type="float" office:value="0.03" calcext:value-type="float">
            <text:p>0.03</text:p>
          </table:table-cell>
          <table:table-cell table:number-columns-repeated="253"/>
        </table:table-row>
        <table:table-row table:style-name="ro21">
          <table:table-cell table:style-name="ce551" office:value-type="string" calcext:value-type="string">
            <text:p>5. otros gastos</text:p>
          </table:table-cell>
          <table:table-cell table:style-name="ce319" office:value-type="float" office:value="0.03" calcext:value-type="float">
            <text:p>0.03</text:p>
          </table:table-cell>
          <table:table-cell table:style-name="ce562" office:value-type="float" office:value="1" calcext:value-type="float">
            <text:p>1</text:p>
          </table:table-cell>
          <table:table-cell table:style-name="ce567" table:formula="of:=+[.B25]*[.C25]" office:value-type="float" office:value="0.03" calcext:value-type="float">
            <text:p>0.03</text:p>
          </table:table-cell>
          <table:table-cell table:number-columns-repeated="253"/>
        </table:table-row>
        <table:table-row table:style-name="ro21">
          <table:table-cell table:style-name="ce552" office:value-type="string" calcext:value-type="string">
            <text:p>6. servicio de transporte</text:p>
          </table:table-cell>
          <table:table-cell table:style-name="ce559" office:value-type="float" office:value="0.15" calcext:value-type="float">
            <text:p>0.15</text:p>
          </table:table-cell>
          <table:table-cell table:style-name="ce563" office:value-type="float" office:value="1" calcext:value-type="float">
            <text:p>1</text:p>
          </table:table-cell>
          <table:table-cell table:style-name="ce568" table:formula="of:=+[.B26]*[.C26]" office:value-type="float" office:value="0.15" calcext:value-type="float">
            <text:p>0.15</text:p>
          </table:table-cell>
          <table:table-cell table:number-columns-repeated="253"/>
        </table:table-row>
        <table:table-row table:style-name="ro21">
          <table:table-cell table:style-name="ce553" office:value-type="string" calcext:value-type="string">
            <text:p>COSTO TOTAL POR 1 unid. (S.)</text:p>
          </table:table-cell>
          <table:table-cell table:style-name="ce560"/>
          <table:table-cell table:style-name="ce564"/>
          <table:table-cell table:style-name="ce569" table:formula="of:=+SUM([.D20:.D26])" office:value-type="float" office:value="8.41" calcext:value-type="float">
            <text:p>8.41</text:p>
          </table:table-cell>
          <table:table-cell table:number-columns-repeated="253"/>
        </table:table-row>
        <table:table-row table:style-name="ro21" table:number-rows-repeated="1048548">
          <table:table-cell table:number-columns-repeated="257"/>
        </table:table-row>
        <table:table-row table:style-name="ro21">
          <table:table-cell table:number-columns-repeated="257"/>
        </table:table-row>
        <table:named-expressions>
          <table:named-range table:name="_xlnm.Print_Area" table:base-cell-address="$POBLACION.$A$1" table:cell-range-address="$INGRESOS.$A$2:.$F$14" table:range-usable-as="print-range"/>
        </table:named-expressions>
      </table:table>
      <table:table table:name="ESTADO GyP" table:style-name="ta19" table:print-ranges="'ESTADO GyP'.A4:'ESTADO GyP'.N80">
        <table:table-column table:style-name="co57" table:default-cell-style-name="ce573"/>
        <table:table-column table:style-name="co61" table:number-columns-repeated="4" table:default-cell-style-name="ce573"/>
        <table:table-column table:style-name="co97" table:default-cell-style-name="ce573"/>
        <table:table-column table:style-name="co39" table:default-cell-style-name="ce573"/>
        <table:table-column table:style-name="co98" table:default-cell-style-name="ce573"/>
        <table:table-column table:style-name="co87" table:default-cell-style-name="ce573"/>
        <table:table-column table:style-name="co61" table:number-columns-repeated="2" table:default-cell-style-name="ce573"/>
        <table:table-column table:style-name="co7" table:number-columns-repeated="2" table:default-cell-style-name="ce573"/>
        <table:table-column table:style-name="co99" table:default-cell-style-name="ce573"/>
        <table:table-column table:style-name="co1" table:number-columns-repeated="243" table:default-cell-style-name="ce573"/>
        <table:table-column table:style-name="co12" table:number-columns-repeated="16127"/>
        <table:table-row table:style-name="ro22" table:number-rows-repeated="3">
          <table:table-cell table:number-columns-repeated="257"/>
        </table:table-row>
        <table:table-row table:style-name="ro8">
          <table:table-cell table:style-name="ce574" office:value-type="string" calcext:value-type="string" table:number-columns-spanned="6" table:number-rows-spanned="1">
            <text:p><text:s/>ESTADO DE RESULTADOS SIN FINANCIAMIENTO</text:p>
          </table:table-cell>
          <table:covered-table-cell table:number-columns-repeated="5" table:style-name="ce574"/>
          <table:table-cell/>
          <table:table-cell table:style-name="ce574" office:value-type="string" calcext:value-type="string" table:number-columns-spanned="6" table:number-rows-spanned="1">
            <text:p><text:s/>ESTADO DE RESULTADOS CON GASTOS FINANCIEROS</text:p>
          </table:table-cell>
          <table:covered-table-cell table:number-columns-repeated="5" table:style-name="ce574"/>
          <table:table-cell table:number-columns-repeated="244"/>
        </table:table-row>
        <table:table-row table:style-name="ro8">
          <table:table-cell table:style-name="ce341" office:value-type="string" calcext:value-type="string" table:number-columns-spanned="1" table:number-rows-spanned="2">
            <text:p>CONCEPTO</text:p>
          </table:table-cell>
          <table:table-cell table:style-name="ce341" office:value-type="string" calcext:value-type="string" table:number-columns-spanned="5" table:number-rows-spanned="1">
            <text:p>AÑOS</text:p>
          </table:table-cell>
          <table:covered-table-cell table:number-columns-repeated="4" table:style-name="ce341"/>
          <table:table-cell table:style-name="ce580"/>
          <table:table-cell table:style-name="ce341" office:value-type="string" calcext:value-type="string" table:number-columns-spanned="1" table:number-rows-spanned="2">
            <text:p>CONCEPTO</text:p>
          </table:table-cell>
          <table:table-cell table:style-name="ce341" office:value-type="string" calcext:value-type="string" table:number-columns-spanned="5" table:number-rows-spanned="1">
            <text:p>AÑOS</text:p>
          </table:table-cell>
          <table:covered-table-cell table:number-columns-repeated="4" table:style-name="ce341"/>
          <table:table-cell table:number-columns-repeated="244"/>
        </table:table-row>
        <table:table-row table:style-name="ro43">
          <table:covered-table-cell table:style-name="ce341"/>
          <table:table-cell table:style-name="ce341" office:value-type="float" office:value="1" calcext:value-type="float">
            <text:p>1</text:p>
          </table:table-cell>
          <table:table-cell table:style-name="ce341" office:value-type="float" office:value="2" calcext:value-type="float">
            <text:p>2</text:p>
          </table:table-cell>
          <table:table-cell table:style-name="ce341" office:value-type="float" office:value="3" calcext:value-type="float">
            <text:p>3</text:p>
          </table:table-cell>
          <table:table-cell table:style-name="ce341" office:value-type="float" office:value="4" calcext:value-type="float">
            <text:p>4</text:p>
          </table:table-cell>
          <table:table-cell table:style-name="ce341" office:value-type="float" office:value="5" calcext:value-type="float">
            <text:p>5</text:p>
          </table:table-cell>
          <table:table-cell/>
          <table:covered-table-cell table:style-name="ce341"/>
          <table:table-cell table:style-name="ce341" office:value-type="float" office:value="1" calcext:value-type="float">
            <text:p>1</text:p>
          </table:table-cell>
          <table:table-cell table:style-name="ce341" office:value-type="float" office:value="2" calcext:value-type="float">
            <text:p>2</text:p>
          </table:table-cell>
          <table:table-cell table:style-name="ce341" office:value-type="float" office:value="3" calcext:value-type="float">
            <text:p>3</text:p>
          </table:table-cell>
          <table:table-cell table:style-name="ce341" office:value-type="float" office:value="4" calcext:value-type="float">
            <text:p>4</text:p>
          </table:table-cell>
          <table:table-cell table:style-name="ce341" office:value-type="float" office:value="5" calcext:value-type="float">
            <text:p>5</text:p>
          </table:table-cell>
          <table:table-cell table:number-columns-repeated="244"/>
        </table:table-row>
        <table:table-row table:style-name="ro17">
          <table:table-cell table:style-name="ce575" office:value-type="string" calcext:value-type="string">
            <text:p>I. INGRESOS (VENTAS)</text:p>
          </table:table-cell>
          <table:table-cell table:style-name="ce581" table:formula="of:=SUM([.B8:.B9])" office:value-type="float" office:value="61928.2925700631" calcext:value-type="float">
            <text:p><text:s/>61,928.29 </text:p>
          </table:table-cell>
          <table:table-cell table:style-name="ce581" table:formula="of:=SUM([.C8:.C9])" office:value-type="float" office:value="205986.528" calcext:value-type="float">
            <text:p><text:s/>205,986.53 </text:p>
          </table:table-cell>
          <table:table-cell table:style-name="ce581" table:formula="of:=SUM([.D8:.D9])" office:value-type="float" office:value="205986.528" calcext:value-type="float">
            <text:p><text:s/>205,986.53 </text:p>
          </table:table-cell>
          <table:table-cell table:style-name="ce581" table:formula="of:=SUM([.E8:.E9])" office:value-type="float" office:value="205986.528" calcext:value-type="float">
            <text:p><text:s/>205,986.53 </text:p>
          </table:table-cell>
          <table:table-cell table:style-name="ce581" table:formula="of:=SUM([.F8:.F9])" office:value-type="float" office:value="294281.091559322" calcext:value-type="float">
            <text:p><text:s/>294,281.09 </text:p>
          </table:table-cell>
          <table:table-cell/>
          <table:table-cell table:style-name="ce575" office:value-type="string" calcext:value-type="string">
            <text:p>I. INGRESOS (VENTAS)</text:p>
          </table:table-cell>
          <table:table-cell table:style-name="ce581" table:formula="of:=SUM([.I8:.I9])" office:value-type="float" office:value="61928.2925700631" calcext:value-type="float">
            <text:p><text:s/>61,928.29 </text:p>
          </table:table-cell>
          <table:table-cell table:style-name="ce581" table:formula="of:=SUM([.J8:.J9])" office:value-type="float" office:value="205986.528" calcext:value-type="float">
            <text:p><text:s/>205,986.53 </text:p>
          </table:table-cell>
          <table:table-cell table:style-name="ce581" table:formula="of:=SUM([.K8:.K9])" office:value-type="float" office:value="205986.528" calcext:value-type="float">
            <text:p><text:s/>205,986.53 </text:p>
          </table:table-cell>
          <table:table-cell table:style-name="ce581" table:formula="of:=SUM([.L8:.L9])" office:value-type="float" office:value="205986.528" calcext:value-type="float">
            <text:p><text:s/>205,986.53 </text:p>
          </table:table-cell>
          <table:table-cell table:style-name="ce581" table:formula="of:=SUM([.M8:.M9])" office:value-type="float" office:value="294281.091559322" calcext:value-type="float">
            <text:p><text:s/>294,281.09 </text:p>
          </table:table-cell>
          <table:table-cell table:number-columns-repeated="244"/>
        </table:table-row>
        <table:table-row table:style-name="ro44">
          <table:table-cell table:style-name="ce576" office:value-type="string" calcext:value-type="string">
            <text:p>Ventas</text:p>
          </table:table-cell>
          <table:table-cell table:style-name="ce582" table:formula="of:=[$INGRESOS.B11]" office:value-type="float" office:value="61928.2925700631" calcext:value-type="float">
            <text:p><text:s/>61,928.29 </text:p>
          </table:table-cell>
          <table:table-cell table:style-name="ce582" table:formula="of:=[$INGRESOS.C11]" office:value-type="float" office:value="205986.528" calcext:value-type="float">
            <text:p><text:s/>205,986.53 </text:p>
          </table:table-cell>
          <table:table-cell table:style-name="ce582" table:formula="of:=[$INGRESOS.D11]" office:value-type="float" office:value="205986.528" calcext:value-type="float">
            <text:p><text:s/>205,986.53 </text:p>
          </table:table-cell>
          <table:table-cell table:style-name="ce582" table:formula="of:=[$INGRESOS.E11]" office:value-type="float" office:value="205986.528" calcext:value-type="float">
            <text:p><text:s/>205,986.53 </text:p>
          </table:table-cell>
          <table:table-cell table:style-name="ce582" table:formula="of:=[$INGRESOS.F11]" office:value-type="float" office:value="205986.528" calcext:value-type="float">
            <text:p><text:s/>205,986.53 </text:p>
          </table:table-cell>
          <table:table-cell/>
          <table:table-cell table:style-name="ce576" office:value-type="string" calcext:value-type="string">
            <text:p>Ventas</text:p>
          </table:table-cell>
          <table:table-cell table:style-name="ce582" table:formula="of:=[.B8]" office:value-type="float" office:value="61928.2925700631" calcext:value-type="float">
            <text:p><text:s/>61,928.29 </text:p>
          </table:table-cell>
          <table:table-cell table:style-name="ce582" table:formula="of:=[.C8]" office:value-type="float" office:value="205986.528" calcext:value-type="float">
            <text:p><text:s/>205,986.53 </text:p>
          </table:table-cell>
          <table:table-cell table:style-name="ce582" table:formula="of:=[.D8]" office:value-type="float" office:value="205986.528" calcext:value-type="float">
            <text:p><text:s/>205,986.53 </text:p>
          </table:table-cell>
          <table:table-cell table:style-name="ce582" table:formula="of:=[.E8]" office:value-type="float" office:value="205986.528" calcext:value-type="float">
            <text:p><text:s/>205,986.53 </text:p>
          </table:table-cell>
          <table:table-cell table:style-name="ce582" table:formula="of:=[.F8]" office:value-type="float" office:value="205986.528" calcext:value-type="float">
            <text:p><text:s/>205,986.53 </text:p>
          </table:table-cell>
          <table:table-cell table:number-columns-repeated="244"/>
          <table:table-cell table:style-name="ce573" table:number-columns-repeated="16127"/>
        </table:table-row>
        <table:table-row table:style-name="ro44">
          <table:table-cell table:style-name="ce576" office:value-type="string" calcext:value-type="string">
            <text:p>Ingresos extraordinarios</text:p>
          </table:table-cell>
          <table:table-cell table:style-name="ce582" table:number-columns-repeated="4"/>
          <table:table-cell table:style-name="ce582" table:formula="of:=[$'DEPRECIAC '.H16]" office:value-type="float" office:value="88294.563559322" calcext:value-type="float">
            <text:p><text:s/>88,294.56 </text:p>
          </table:table-cell>
          <table:table-cell/>
          <table:table-cell table:style-name="ce576" office:value-type="string" calcext:value-type="string">
            <text:p>Ingresos extraordinarios</text:p>
          </table:table-cell>
          <table:table-cell table:style-name="ce582" table:formula="of:=[.B9]" office:value-type="float" office:value="0" calcext:value-type="float">
            <text:p><text:s/>- <text:s text:c="2"/></text:p>
          </table:table-cell>
          <table:table-cell table:style-name="ce582" table:formula="of:=[.C9]" office:value-type="float" office:value="0" calcext:value-type="float">
            <text:p><text:s/>- <text:s text:c="2"/></text:p>
          </table:table-cell>
          <table:table-cell table:style-name="ce582" table:formula="of:=[.D9]" office:value-type="float" office:value="0" calcext:value-type="float">
            <text:p><text:s/>- <text:s text:c="2"/></text:p>
          </table:table-cell>
          <table:table-cell table:style-name="ce582" table:formula="of:=[.E9]" office:value-type="float" office:value="0" calcext:value-type="float">
            <text:p><text:s/>- <text:s text:c="2"/></text:p>
          </table:table-cell>
          <table:table-cell table:style-name="ce582" table:formula="of:=[.F9]" office:value-type="float" office:value="88294.563559322" calcext:value-type="float">
            <text:p><text:s/>88,294.56 </text:p>
          </table:table-cell>
          <table:table-cell table:number-columns-repeated="244"/>
          <table:table-cell table:style-name="ce573" table:number-columns-repeated="16127"/>
        </table:table-row>
        <table:table-row table:style-name="ro43">
          <table:table-cell table:style-name="ce575" office:value-type="string" calcext:value-type="string">
            <text:p>II. COSTOS DE PRODUCCIÒN</text:p>
          </table:table-cell>
          <table:table-cell table:style-name="ce582" table:formula="of:=[$'COSTOS TOTALES'.B6]" office:value-type="float" office:value="47345.6730719438" calcext:value-type="float">
            <text:p><text:s/>47,345.67 </text:p>
          </table:table-cell>
          <table:table-cell table:style-name="ce582" table:formula="of:=[$'COSTOS TOTALES'.C6]" office:value-type="float" office:value="116186.673626667" calcext:value-type="float">
            <text:p><text:s/>116,186.67 </text:p>
          </table:table-cell>
          <table:table-cell table:style-name="ce582" table:formula="of:=[$'COSTOS TOTALES'.D6]" office:value-type="float" office:value="116186.673626667" calcext:value-type="float">
            <text:p><text:s/>116,186.67 </text:p>
          </table:table-cell>
          <table:table-cell table:style-name="ce582" table:formula="of:=[$'COSTOS TOTALES'.E6]" office:value-type="float" office:value="116186.673626667" calcext:value-type="float">
            <text:p><text:s/>116,186.67 </text:p>
          </table:table-cell>
          <table:table-cell table:style-name="ce582" table:formula="of:=[$'COSTOS TOTALES'.F6]" office:value-type="float" office:value="116186.673626667" calcext:value-type="float">
            <text:p><text:s/>116,186.67 </text:p>
          </table:table-cell>
          <table:table-cell/>
          <table:table-cell table:style-name="ce575" office:value-type="string" calcext:value-type="string">
            <text:p>II. COSTOS DE PRODUCCIÒN</text:p>
          </table:table-cell>
          <table:table-cell table:style-name="ce581" table:formula="of:=[.B10]" office:value-type="float" office:value="47345.6730719438" calcext:value-type="float">
            <text:p><text:s/>47,345.67 </text:p>
          </table:table-cell>
          <table:table-cell table:style-name="ce581" table:formula="of:=[.C10]" office:value-type="float" office:value="116186.673626667" calcext:value-type="float">
            <text:p><text:s/>116,186.67 </text:p>
          </table:table-cell>
          <table:table-cell table:style-name="ce581" table:formula="of:=[.D10]" office:value-type="float" office:value="116186.673626667" calcext:value-type="float">
            <text:p><text:s/>116,186.67 </text:p>
          </table:table-cell>
          <table:table-cell table:style-name="ce581" table:formula="of:=[.E10]" office:value-type="float" office:value="116186.673626667" calcext:value-type="float">
            <text:p><text:s/>116,186.67 </text:p>
          </table:table-cell>
          <table:table-cell table:style-name="ce581" table:formula="of:=[.F10]" office:value-type="float" office:value="116186.673626667" calcext:value-type="float">
            <text:p><text:s/>116,186.67 </text:p>
          </table:table-cell>
          <table:table-cell table:number-columns-repeated="244"/>
        </table:table-row>
        <table:table-row table:style-name="ro43">
          <table:table-cell table:style-name="ce575" office:value-type="string" calcext:value-type="string">
            <text:p>III. UTILIDAD BRUTA</text:p>
          </table:table-cell>
          <table:table-cell table:style-name="ce581" table:formula="of:=[.B7]-[.B10]" office:value-type="float" office:value="14582.6194981192" calcext:value-type="float">
            <text:p><text:s/>14,582.62 </text:p>
          </table:table-cell>
          <table:table-cell table:style-name="ce581" table:formula="of:=[.C7]-[.C10]" office:value-type="float" office:value="89799.8543733333" calcext:value-type="float">
            <text:p><text:s/>89,799.85 </text:p>
          </table:table-cell>
          <table:table-cell table:style-name="ce581" table:formula="of:=[.D7]-[.D10]" office:value-type="float" office:value="89799.8543733333" calcext:value-type="float">
            <text:p><text:s/>89,799.85 </text:p>
          </table:table-cell>
          <table:table-cell table:style-name="ce581" table:formula="of:=[.E7]-[.E10]" office:value-type="float" office:value="89799.8543733333" calcext:value-type="float">
            <text:p><text:s/>89,799.85 </text:p>
          </table:table-cell>
          <table:table-cell table:style-name="ce581" table:formula="of:=[.F7]-[.F10]" office:value-type="float" office:value="178094.417932655" calcext:value-type="float">
            <text:p><text:s/>178,094.42 </text:p>
          </table:table-cell>
          <table:table-cell table:style-name="ce579"/>
          <table:table-cell table:style-name="ce575" office:value-type="string" calcext:value-type="string">
            <text:p>III. UTILIDAD BRUTA</text:p>
          </table:table-cell>
          <table:table-cell table:style-name="ce581" table:formula="of:=[.I7]-[.I10]" office:value-type="float" office:value="14582.6194981192" calcext:value-type="float">
            <text:p><text:s/>14,582.62 </text:p>
          </table:table-cell>
          <table:table-cell table:style-name="ce581" table:formula="of:=[.J7]-[.J10]" office:value-type="float" office:value="89799.8543733333" calcext:value-type="float">
            <text:p><text:s/>89,799.85 </text:p>
          </table:table-cell>
          <table:table-cell table:style-name="ce581" table:formula="of:=[.K7]-[.K10]" office:value-type="float" office:value="89799.8543733333" calcext:value-type="float">
            <text:p><text:s/>89,799.85 </text:p>
          </table:table-cell>
          <table:table-cell table:style-name="ce581" table:formula="of:=[.L7]-[.L10]" office:value-type="float" office:value="89799.8543733333" calcext:value-type="float">
            <text:p><text:s/>89,799.85 </text:p>
          </table:table-cell>
          <table:table-cell table:style-name="ce581" table:formula="of:=[.M7]-[.M10]" office:value-type="float" office:value="178094.417932655" calcext:value-type="float">
            <text:p><text:s/>178,094.42 </text:p>
          </table:table-cell>
          <table:table-cell table:style-name="ce579" table:number-columns-repeated="16371"/>
        </table:table-row>
        <table:table-row table:style-name="ro8">
          <table:table-cell table:style-name="ce575" office:value-type="string" calcext:value-type="string">
            <text:p>IV. GASTOS DE OPERACIÒN</text:p>
          </table:table-cell>
          <table:table-cell table:style-name="ce581" table:formula="of:=[.B13]+[.B14]" office:value-type="float" office:value="3907" calcext:value-type="float">
            <text:p><text:s/>3,907.00 </text:p>
          </table:table-cell>
          <table:table-cell table:style-name="ce581" table:formula="of:=[.C13]+[.C14]" office:value-type="float" office:value="3907" calcext:value-type="float">
            <text:p><text:s/>3,907.00 </text:p>
          </table:table-cell>
          <table:table-cell table:style-name="ce581" table:formula="of:=[.D13]+[.D14]" office:value-type="float" office:value="3907" calcext:value-type="float">
            <text:p><text:s/>3,907.00 </text:p>
          </table:table-cell>
          <table:table-cell table:style-name="ce581" table:formula="of:=[.E13]+[.E14]" office:value-type="float" office:value="3907" calcext:value-type="float">
            <text:p><text:s/>3,907.00 </text:p>
          </table:table-cell>
          <table:table-cell table:style-name="ce581" table:formula="of:=[.F13]+[.F14]" office:value-type="float" office:value="3907" calcext:value-type="float">
            <text:p><text:s/>3,907.00 </text:p>
          </table:table-cell>
          <table:table-cell/>
          <table:table-cell table:style-name="ce575" office:value-type="string" calcext:value-type="string">
            <text:p>IV. GASTOS DE OPERACIÒN</text:p>
          </table:table-cell>
          <table:table-cell table:style-name="ce581" table:formula="of:=[.I13]+[.I14]" office:value-type="float" office:value="3907" calcext:value-type="float">
            <text:p><text:s/>3,907.00 </text:p>
          </table:table-cell>
          <table:table-cell table:style-name="ce581" table:formula="of:=[.J13]+[.J14]" office:value-type="float" office:value="3907" calcext:value-type="float">
            <text:p><text:s/>3,907.00 </text:p>
          </table:table-cell>
          <table:table-cell table:style-name="ce581" table:formula="of:=[.K13]+[.K14]" office:value-type="float" office:value="3907" calcext:value-type="float">
            <text:p><text:s/>3,907.00 </text:p>
          </table:table-cell>
          <table:table-cell table:style-name="ce581" table:formula="of:=[.L13]+[.L14]" office:value-type="float" office:value="3907" calcext:value-type="float">
            <text:p><text:s/>3,907.00 </text:p>
          </table:table-cell>
          <table:table-cell table:style-name="ce581" table:formula="of:=[.M13]+[.M14]" office:value-type="float" office:value="3907" calcext:value-type="float">
            <text:p><text:s/>3,907.00 </text:p>
          </table:table-cell>
          <table:table-cell table:number-columns-repeated="244"/>
        </table:table-row>
        <table:table-row table:style-name="ro43">
          <table:table-cell table:style-name="ce577" office:value-type="string" calcext:value-type="string">
            <text:p><text:s text:c="5"/>Gastos de venta</text:p>
          </table:table-cell>
          <table:table-cell table:style-name="ce582" table:formula="of:=[$'COSTOS TOTALES'.B15]" office:value-type="float" office:value="2707" calcext:value-type="float">
            <text:p><text:s/>2,707.00 </text:p>
          </table:table-cell>
          <table:table-cell table:style-name="ce582" table:formula="of:=[$'COSTOS TOTALES'.C15]" office:value-type="float" office:value="2707" calcext:value-type="float">
            <text:p><text:s/>2,707.00 </text:p>
          </table:table-cell>
          <table:table-cell table:style-name="ce582" table:formula="of:=[$'COSTOS TOTALES'.D15]" office:value-type="float" office:value="2707" calcext:value-type="float">
            <text:p><text:s/>2,707.00 </text:p>
          </table:table-cell>
          <table:table-cell table:style-name="ce582" table:formula="of:=[$'COSTOS TOTALES'.E15]" office:value-type="float" office:value="2707" calcext:value-type="float">
            <text:p><text:s/>2,707.00 </text:p>
          </table:table-cell>
          <table:table-cell table:style-name="ce582" table:formula="of:=[$'COSTOS TOTALES'.F15]" office:value-type="float" office:value="2707" calcext:value-type="float">
            <text:p><text:s/>2,707.00 </text:p>
          </table:table-cell>
          <table:table-cell/>
          <table:table-cell table:style-name="ce577" office:value-type="string" calcext:value-type="string">
            <text:p><text:s text:c="5"/>Gastos de venta</text:p>
          </table:table-cell>
          <table:table-cell table:style-name="ce582" table:formula="of:=[.B13]" office:value-type="float" office:value="2707" calcext:value-type="float">
            <text:p><text:s/>2,707.00 </text:p>
          </table:table-cell>
          <table:table-cell table:style-name="ce582" table:formula="of:=[.C13]" office:value-type="float" office:value="2707" calcext:value-type="float">
            <text:p><text:s/>2,707.00 </text:p>
          </table:table-cell>
          <table:table-cell table:style-name="ce582" table:formula="of:=[.D13]" office:value-type="float" office:value="2707" calcext:value-type="float">
            <text:p><text:s/>2,707.00 </text:p>
          </table:table-cell>
          <table:table-cell table:style-name="ce582" table:formula="of:=[.E13]" office:value-type="float" office:value="2707" calcext:value-type="float">
            <text:p><text:s/>2,707.00 </text:p>
          </table:table-cell>
          <table:table-cell table:style-name="ce582" table:formula="of:=[.F13]" office:value-type="float" office:value="2707" calcext:value-type="float">
            <text:p><text:s/>2,707.00 </text:p>
          </table:table-cell>
          <table:table-cell table:number-columns-repeated="244"/>
        </table:table-row>
        <table:table-row table:style-name="ro43">
          <table:table-cell table:style-name="ce577" office:value-type="string" calcext:value-type="string">
            <text:p><text:s text:c="4"/>Gastos administrativos</text:p>
          </table:table-cell>
          <table:table-cell table:style-name="ce582" table:formula="of:=[$'COSTOS TOTALES'.B16]" office:value-type="float" office:value="1200" calcext:value-type="float">
            <text:p><text:s/>1,200.00 </text:p>
          </table:table-cell>
          <table:table-cell table:style-name="ce582" table:formula="of:=[$'COSTOS TOTALES'.C16]" office:value-type="float" office:value="1200" calcext:value-type="float">
            <text:p><text:s/>1,200.00 </text:p>
          </table:table-cell>
          <table:table-cell table:style-name="ce582" table:formula="of:=[$'COSTOS TOTALES'.D16]" office:value-type="float" office:value="1200" calcext:value-type="float">
            <text:p><text:s/>1,200.00 </text:p>
          </table:table-cell>
          <table:table-cell table:style-name="ce582" table:formula="of:=[$'COSTOS TOTALES'.E16]" office:value-type="float" office:value="1200" calcext:value-type="float">
            <text:p><text:s/>1,200.00 </text:p>
          </table:table-cell>
          <table:table-cell table:style-name="ce582" table:formula="of:=[$'COSTOS TOTALES'.F16]" office:value-type="float" office:value="1200" calcext:value-type="float">
            <text:p><text:s/>1,200.00 </text:p>
          </table:table-cell>
          <table:table-cell/>
          <table:table-cell table:style-name="ce577" office:value-type="string" calcext:value-type="string">
            <text:p><text:s text:c="4"/>Gastos administrativos</text:p>
          </table:table-cell>
          <table:table-cell table:style-name="ce582" table:formula="of:=[.B14]" office:value-type="float" office:value="1200" calcext:value-type="float">
            <text:p><text:s/>1,200.00 </text:p>
          </table:table-cell>
          <table:table-cell table:style-name="ce582" table:formula="of:=[.C14]" office:value-type="float" office:value="1200" calcext:value-type="float">
            <text:p><text:s/>1,200.00 </text:p>
          </table:table-cell>
          <table:table-cell table:style-name="ce582" table:formula="of:=[.D14]" office:value-type="float" office:value="1200" calcext:value-type="float">
            <text:p><text:s/>1,200.00 </text:p>
          </table:table-cell>
          <table:table-cell table:style-name="ce582" table:formula="of:=[.E14]" office:value-type="float" office:value="1200" calcext:value-type="float">
            <text:p><text:s/>1,200.00 </text:p>
          </table:table-cell>
          <table:table-cell table:style-name="ce582" table:formula="of:=[.F14]" office:value-type="float" office:value="1200" calcext:value-type="float">
            <text:p><text:s/>1,200.00 </text:p>
          </table:table-cell>
          <table:table-cell table:number-columns-repeated="244"/>
        </table:table-row>
        <table:table-row table:style-name="ro43">
          <table:table-cell table:style-name="ce575" office:value-type="string" calcext:value-type="string">
            <text:p>V. DEPRECIACIÒN DE A.F. Y AMORT. INTANG</text:p>
          </table:table-cell>
          <table:table-cell table:style-name="ce582" table:formula="of:=[$'COSTOS TOTALES'.B17]" office:value-type="float" office:value="10457.9872881356" calcext:value-type="float">
            <text:p><text:s/>10,457.99 </text:p>
          </table:table-cell>
          <table:table-cell table:style-name="ce582" table:formula="of:=[$'COSTOS TOTALES'.C17]" office:value-type="float" office:value="10457.9872881356" calcext:value-type="float">
            <text:p><text:s/>10,457.99 </text:p>
          </table:table-cell>
          <table:table-cell table:style-name="ce582" table:formula="of:=[$'COSTOS TOTALES'.D17]" office:value-type="float" office:value="10457.9872881356" calcext:value-type="float">
            <text:p><text:s/>10,457.99 </text:p>
          </table:table-cell>
          <table:table-cell table:style-name="ce582" table:formula="of:=[$'COSTOS TOTALES'.E17]" office:value-type="float" office:value="10457.9872881356" calcext:value-type="float">
            <text:p><text:s/>10,457.99 </text:p>
          </table:table-cell>
          <table:table-cell table:style-name="ce582" table:formula="of:=[$'COSTOS TOTALES'.F17]" office:value-type="float" office:value="10457.9872881356" calcext:value-type="float">
            <text:p><text:s/>10,457.99 </text:p>
          </table:table-cell>
          <table:table-cell/>
          <table:table-cell table:style-name="ce575" office:value-type="string" calcext:value-type="string">
            <text:p>V. DEPRECIACIÒN DE A.F. Y AMORT. INTANG</text:p>
          </table:table-cell>
          <table:table-cell table:style-name="ce581" table:formula="of:=[.B15]" office:value-type="float" office:value="10457.9872881356" calcext:value-type="float">
            <text:p><text:s/>10,457.99 </text:p>
          </table:table-cell>
          <table:table-cell table:style-name="ce581" table:formula="of:=[.C15]" office:value-type="float" office:value="10457.9872881356" calcext:value-type="float">
            <text:p><text:s/>10,457.99 </text:p>
          </table:table-cell>
          <table:table-cell table:style-name="ce581" table:formula="of:=[.D15]" office:value-type="float" office:value="10457.9872881356" calcext:value-type="float">
            <text:p><text:s/>10,457.99 </text:p>
          </table:table-cell>
          <table:table-cell table:style-name="ce581" table:formula="of:=[.E15]" office:value-type="float" office:value="10457.9872881356" calcext:value-type="float">
            <text:p><text:s/>10,457.99 </text:p>
          </table:table-cell>
          <table:table-cell table:style-name="ce581" table:formula="of:=[.F15]" office:value-type="float" office:value="10457.9872881356" calcext:value-type="float">
            <text:p><text:s/>10,457.99 </text:p>
          </table:table-cell>
          <table:table-cell table:number-columns-repeated="244"/>
        </table:table-row>
        <table:table-row table:style-name="ro43">
          <table:table-cell table:style-name="ce575" office:value-type="string" calcext:value-type="string">
            <text:p>VI. UTILIDAD OPERATIVA</text:p>
          </table:table-cell>
          <table:table-cell table:style-name="ce581" table:formula="of:=[.B11]-[.B12]-[.B15]" office:value-type="float" office:value="217.632209983614" calcext:value-type="float">
            <text:p><text:s/>217.63 </text:p>
          </table:table-cell>
          <table:table-cell table:style-name="ce581" table:formula="of:=[.C11]-[.C12]-[.C15]" office:value-type="float" office:value="75434.8670851977" calcext:value-type="float">
            <text:p><text:s/>75,434.87 </text:p>
          </table:table-cell>
          <table:table-cell table:style-name="ce581" table:formula="of:=[.D11]-[.D12]-[.D15]" office:value-type="float" office:value="75434.8670851977" calcext:value-type="float">
            <text:p><text:s/>75,434.87 </text:p>
          </table:table-cell>
          <table:table-cell table:style-name="ce581" table:formula="of:=[.E11]-[.E12]-[.E15]" office:value-type="float" office:value="75434.8670851977" calcext:value-type="float">
            <text:p><text:s/>75,434.87 </text:p>
          </table:table-cell>
          <table:table-cell table:style-name="ce581" table:formula="of:=[.F11]-[.F12]-[.F15]" office:value-type="float" office:value="163729.43064452" calcext:value-type="float">
            <text:p><text:s/>163,729.43 </text:p>
          </table:table-cell>
          <table:table-cell table:style-name="ce579"/>
          <table:table-cell table:style-name="ce575" office:value-type="string" calcext:value-type="string">
            <text:p>VI. UTILIDAD OPERATIVA</text:p>
          </table:table-cell>
          <table:table-cell table:style-name="ce581" table:formula="of:=[.I11]-[.I12]-[.I15]" office:value-type="float" office:value="217.632209983614" calcext:value-type="float">
            <text:p><text:s/>217.63 </text:p>
          </table:table-cell>
          <table:table-cell table:style-name="ce581" table:formula="of:=[.J11]-[.J12]-[.J15]" office:value-type="float" office:value="75434.8670851977" calcext:value-type="float">
            <text:p><text:s/>75,434.87 </text:p>
          </table:table-cell>
          <table:table-cell table:style-name="ce581" table:formula="of:=[.K11]-[.K12]-[.K15]" office:value-type="float" office:value="75434.8670851977" calcext:value-type="float">
            <text:p><text:s/>75,434.87 </text:p>
          </table:table-cell>
          <table:table-cell table:style-name="ce581" table:formula="of:=[.L11]-[.L12]-[.L15]" office:value-type="float" office:value="75434.8670851977" calcext:value-type="float">
            <text:p><text:s/>75,434.87 </text:p>
          </table:table-cell>
          <table:table-cell table:style-name="ce581" table:formula="of:=[.M11]-[.M12]-[.M15]" office:value-type="float" office:value="163729.43064452" calcext:value-type="float">
            <text:p><text:s/>163,729.43 </text:p>
          </table:table-cell>
          <table:table-cell table:style-name="ce579" table:number-columns-repeated="16371"/>
        </table:table-row>
        <table:table-row table:style-name="ro43">
          <table:table-cell table:style-name="ce575" office:value-type="string" calcext:value-type="string">
            <text:p>IX. IMPUESTO A LA RENTA ( 30 % )</text:p>
          </table:table-cell>
          <table:table-cell table:style-name="ce581" table:formula="of:=[.B16]*0.3" office:value-type="float" office:value="65.2896629950843" calcext:value-type="float">
            <text:p><text:s/>65.29 </text:p>
          </table:table-cell>
          <table:table-cell table:style-name="ce581" table:formula="of:=[.C16]*0.3" office:value-type="float" office:value="22630.4601255593" calcext:value-type="float">
            <text:p><text:s/>22,630.46 </text:p>
          </table:table-cell>
          <table:table-cell table:style-name="ce581" table:formula="of:=[.D16]*0.3" office:value-type="float" office:value="22630.4601255593" calcext:value-type="float">
            <text:p><text:s/>22,630.46 </text:p>
          </table:table-cell>
          <table:table-cell table:style-name="ce581" table:formula="of:=[.E16]*0.3" office:value-type="float" office:value="22630.4601255593" calcext:value-type="float">
            <text:p><text:s/>22,630.46 </text:p>
          </table:table-cell>
          <table:table-cell table:style-name="ce581" table:formula="of:=[.F16]*0.3" office:value-type="float" office:value="49118.8291933559" calcext:value-type="float">
            <text:p><text:s/>49,118.83 </text:p>
          </table:table-cell>
          <table:table-cell/>
          <table:table-cell table:style-name="ce587" office:value-type="string" calcext:value-type="string">
            <text:p>VII. GASTOS FINANCIEROS</text:p>
          </table:table-cell>
          <table:table-cell table:style-name="ce590" table:formula="of:=SUM([.I18:.I18])" office:value-type="float" office:value="388.861783132514" calcext:value-type="float">
            <text:p><text:s/>388.86 </text:p>
          </table:table-cell>
          <table:table-cell table:style-name="ce590" table:formula="of:=SUM([.J18:.J18])" office:value-type="float" office:value="0" calcext:value-type="float">
            <text:p><text:s/>- <text:s text:c="2"/></text:p>
          </table:table-cell>
          <table:table-cell table:style-name="ce590" table:formula="of:=SUM([.K18:.K18])" office:value-type="float" office:value="0" calcext:value-type="float">
            <text:p><text:s/>- <text:s text:c="2"/></text:p>
          </table:table-cell>
          <table:table-cell table:style-name="ce590" table:formula="of:=SUM([.L18:.L18])" office:value-type="float" office:value="0" calcext:value-type="float">
            <text:p><text:s/>- <text:s text:c="2"/></text:p>
          </table:table-cell>
          <table:table-cell table:style-name="ce590" table:formula="of:=SUM([.M18:.M18])" office:value-type="float" office:value="0" calcext:value-type="float">
            <text:p><text:s/>- <text:s text:c="2"/></text:p>
          </table:table-cell>
          <table:table-cell table:number-columns-repeated="244"/>
        </table:table-row>
        <table:table-row table:style-name="ro43">
          <table:table-cell table:style-name="ce575" office:value-type="string" calcext:value-type="string">
            <text:p>UTILIDAD NETA</text:p>
          </table:table-cell>
          <table:table-cell table:style-name="ce581" table:formula="of:=[.B16]-[.B17]" office:value-type="float" office:value="152.34254698853" calcext:value-type="float">
            <text:p><text:s/>152.34 </text:p>
          </table:table-cell>
          <table:table-cell table:style-name="ce581" table:formula="of:=[.C16]-[.C17]" office:value-type="float" office:value="52804.4069596384" calcext:value-type="float">
            <text:p><text:s/>52,804.41 </text:p>
          </table:table-cell>
          <table:table-cell table:style-name="ce581" table:formula="of:=[.D16]-[.D17]" office:value-type="float" office:value="52804.4069596384" calcext:value-type="float">
            <text:p><text:s/>52,804.41 </text:p>
          </table:table-cell>
          <table:table-cell table:style-name="ce581" table:formula="of:=[.E16]-[.E17]" office:value-type="float" office:value="52804.4069596384" calcext:value-type="float">
            <text:p><text:s/>52,804.41 </text:p>
          </table:table-cell>
          <table:table-cell table:style-name="ce581" table:formula="of:=[.F16]-[.F17]" office:value-type="float" office:value="114610.601451164" calcext:value-type="float">
            <text:p><text:s/>114,610.60 </text:p>
          </table:table-cell>
          <table:table-cell/>
          <table:table-cell table:style-name="ce588" office:value-type="string" calcext:value-type="string">
            <text:p><text:s text:c="4"/>Pago de intereses</text:p>
          </table:table-cell>
          <table:table-cell table:style-name="ce591" table:formula="of:=[$FINANCIAMIENT.B52]" office:value-type="float" office:value="388.861783132514" calcext:value-type="float">
            <text:p><text:s/>388.86 </text:p>
          </table:table-cell>
          <table:table-cell table:style-name="ce591" table:formula="of:=[$FINANCIAMIENT.C52]" office:value-type="float" office:value="0" calcext:value-type="float">
            <text:p><text:s/>- <text:s text:c="2"/></text:p>
          </table:table-cell>
          <table:table-cell table:style-name="ce591" table:formula="of:=[$FINANCIAMIENT.D52]" office:value-type="float" office:value="0" calcext:value-type="float">
            <text:p><text:s/>- <text:s text:c="2"/></text:p>
          </table:table-cell>
          <table:table-cell table:number-columns-repeated="2" table:style-name="ce591" office:value-type="float" office:value="0" calcext:value-type="float">
            <text:p><text:s/>- <text:s text:c="2"/></text:p>
          </table:table-cell>
          <table:table-cell table:number-columns-repeated="244"/>
        </table:table-row>
        <table:table-row table:style-name="ro43">
          <table:table-cell table:style-name="ce578"/>
          <table:table-cell table:style-name="ce583" table:number-columns-repeated="5"/>
          <table:table-cell table:style-name="ce579"/>
          <table:table-cell table:style-name="ce587" office:value-type="string" calcext:value-type="string">
            <text:p>VIII. UTILIDAD ANTES DE IMPUESTO</text:p>
          </table:table-cell>
          <table:table-cell table:style-name="ce590" table:formula="of:=[.I16]-[.I17]" office:value-type="float" office:value="-171.2295731489" calcext:value-type="float">
            <text:p><text:s/>(171.23)</text:p>
          </table:table-cell>
          <table:table-cell table:style-name="ce590" table:formula="of:=[.J16]-[.J17]" office:value-type="float" office:value="75434.8670851977" calcext:value-type="float">
            <text:p><text:s/>75,434.87 </text:p>
          </table:table-cell>
          <table:table-cell table:style-name="ce590" table:formula="of:=[.K16]-[.K17]" office:value-type="float" office:value="75434.8670851977" calcext:value-type="float">
            <text:p><text:s/>75,434.87 </text:p>
          </table:table-cell>
          <table:table-cell table:style-name="ce590" table:formula="of:=[.L16]-[.L17]" office:value-type="float" office:value="75434.8670851977" calcext:value-type="float">
            <text:p><text:s/>75,434.87 </text:p>
          </table:table-cell>
          <table:table-cell table:style-name="ce590" table:formula="of:=[.M16]-[.M17]" office:value-type="float" office:value="163729.43064452" calcext:value-type="float">
            <text:p><text:s/>163,729.43 </text:p>
          </table:table-cell>
          <table:table-cell table:style-name="ce579" table:number-columns-repeated="16371"/>
        </table:table-row>
        <table:table-row table:style-name="ro43">
          <table:table-cell table:number-columns-repeated="7"/>
          <table:table-cell table:style-name="ce575" office:value-type="string" calcext:value-type="string">
            <text:p>IX. IMPUESTO A LA RENTA ( 30 % )</text:p>
          </table:table-cell>
          <table:table-cell table:style-name="ce581" table:formula="of:=[.I19]*0.3" office:value-type="float" office:value="-51.36887194467" calcext:value-type="float">
            <text:p><text:s/>(51.37)</text:p>
          </table:table-cell>
          <table:table-cell table:style-name="ce581" table:formula="of:=[.J19]*0.3" office:value-type="float" office:value="22630.4601255593" calcext:value-type="float">
            <text:p><text:s/>22,630.46 </text:p>
          </table:table-cell>
          <table:table-cell table:style-name="ce581" table:formula="of:=[.K19]*0.3" office:value-type="float" office:value="22630.4601255593" calcext:value-type="float">
            <text:p><text:s/>22,630.46 </text:p>
          </table:table-cell>
          <table:table-cell table:style-name="ce581" table:formula="of:=[.L19]*0.3" office:value-type="float" office:value="22630.4601255593" calcext:value-type="float">
            <text:p><text:s/>22,630.46 </text:p>
          </table:table-cell>
          <table:table-cell table:style-name="ce581" table:formula="of:=[.M19]*0.3" office:value-type="float" office:value="49118.8291933559" calcext:value-type="float">
            <text:p><text:s/>49,118.83 </text:p>
          </table:table-cell>
          <table:table-cell table:number-columns-repeated="244"/>
        </table:table-row>
        <table:table-row table:style-name="ro43">
          <table:table-cell table:style-name="ce579" table:number-columns-repeated="7"/>
          <table:table-cell table:style-name="ce575" office:value-type="string" calcext:value-type="string">
            <text:p>UTILIDAD NETA</text:p>
          </table:table-cell>
          <table:table-cell table:style-name="ce581" table:formula="of:=[.I19]-[.I20]" office:value-type="float" office:value="-119.86070120423" calcext:value-type="float">
            <text:p><text:s/>(119.86)</text:p>
          </table:table-cell>
          <table:table-cell table:style-name="ce581" table:formula="of:=[.J19]-[.J20]" office:value-type="float" office:value="52804.4069596384" calcext:value-type="float">
            <text:p><text:s/>52,804.41 </text:p>
          </table:table-cell>
          <table:table-cell table:style-name="ce581" table:formula="of:=[.K19]-[.K20]" office:value-type="float" office:value="52804.4069596384" calcext:value-type="float">
            <text:p><text:s/>52,804.41 </text:p>
          </table:table-cell>
          <table:table-cell table:style-name="ce581" table:formula="of:=[.L19]-[.L20]" office:value-type="float" office:value="52804.4069596384" calcext:value-type="float">
            <text:p><text:s/>52,804.41 </text:p>
          </table:table-cell>
          <table:table-cell table:style-name="ce581" table:formula="of:=[.M19]-[.M20]" office:value-type="float" office:value="114610.601451164" calcext:value-type="float">
            <text:p><text:s/>114,610.60 </text:p>
          </table:table-cell>
          <table:table-cell table:style-name="ce579" table:number-columns-repeated="16371"/>
        </table:table-row>
        <table:table-row table:style-name="ro43">
          <table:table-cell table:style-name="ce418" office:value-type="string" calcext:value-type="string">
            <text:p>ELABORACION PROPIA</text:p>
          </table:table-cell>
          <table:table-cell table:style-name="ce580" table:number-columns-repeated="6"/>
          <table:table-cell table:style-name="ce418" office:value-type="string" calcext:value-type="string">
            <text:p>ELABORACION PROPIA</text:p>
          </table:table-cell>
          <table:table-cell table:style-name="ce580" table:number-columns-repeated="5"/>
          <table:table-cell table:number-columns-repeated="244"/>
        </table:table-row>
        <table:table-row table:style-name="ro43">
          <table:table-cell table:style-name="ce418"/>
          <table:table-cell table:style-name="ce580"/>
          <table:table-cell table:style-name="ce584"/>
          <table:table-cell table:style-name="ce580" table:number-columns-repeated="4"/>
          <table:table-cell table:number-columns-repeated="250"/>
        </table:table-row>
        <table:table-row table:style-name="ro43">
          <table:table-cell table:style-name="ce580" table:number-columns-repeated="7"/>
          <table:table-cell table:number-columns-repeated="250"/>
        </table:table-row>
        <table:table-row table:style-name="ro43">
          <table:table-cell table:style-name="ce575" office:value-type="string" calcext:value-type="string">
            <text:p>INVERSION</text:p>
          </table:table-cell>
          <table:table-cell table:style-name="ce581" table:formula="of:=[$INVERSION.F16]" office:value-type="float" office:value="157481.215045237" calcext:value-type="float">
            <text:p><text:s/>157,481.22 </text:p>
          </table:table-cell>
          <table:table-cell table:style-name="ce580" table:number-columns-repeated="5"/>
          <table:table-cell table:number-columns-repeated="250"/>
        </table:table-row>
        <table:table-row table:style-name="ro43">
          <table:table-cell table:number-columns-repeated="7"/>
          <table:table-cell table:style-name="ce580" table:number-columns-repeated="3"/>
          <table:table-cell table:style-name="ce594" office:value-type="string" calcext:value-type="string">
            <text:p>PUNTO DE EQUILIBRIO CON PRESTAMO</text:p>
          </table:table-cell>
          <table:table-cell table:style-name="ce580" table:number-columns-repeated="3"/>
          <table:table-cell table:number-columns-repeated="243"/>
        </table:table-row>
        <table:table-row table:style-name="ro8">
          <table:table-cell table:number-columns-repeated="7"/>
          <table:table-cell table:style-name="ce229" office:value-type="string" calcext:value-type="string" table:number-columns-spanned="1" table:number-rows-spanned="2">
            <text:p>RUBROS</text:p>
          </table:table-cell>
          <table:table-cell table:style-name="ce229" office:value-type="string" calcext:value-type="string" table:number-columns-spanned="5" table:number-rows-spanned="1">
            <text:p>AÑOS</text:p>
          </table:table-cell>
          <table:covered-table-cell table:number-columns-repeated="4" table:style-name="ce229"/>
          <table:table-cell table:number-columns-repeated="244"/>
        </table:table-row>
        <table:table-row table:style-name="ro44">
          <table:table-cell table:number-columns-repeated="7"/>
          <table:covered-table-cell table:style-name="ce229"/>
          <table:table-cell table:style-name="ce229" office:value-type="float" office:value="1" calcext:value-type="float">
            <text:p>1</text:p>
          </table:table-cell>
          <table:table-cell table:style-name="ce229" office:value-type="float" office:value="2" calcext:value-type="float">
            <text:p>2</text:p>
          </table:table-cell>
          <table:table-cell table:style-name="ce229" office:value-type="float" office:value="3" calcext:value-type="float">
            <text:p>3</text:p>
          </table:table-cell>
          <table:table-cell table:style-name="ce229" office:value-type="float" office:value="4" calcext:value-type="float">
            <text:p>4</text:p>
          </table:table-cell>
          <table:table-cell table:style-name="ce229" office:value-type="float" office:value="5" calcext:value-type="float">
            <text:p>5</text:p>
          </table:table-cell>
          <table:table-cell table:number-columns-repeated="244"/>
        </table:table-row>
        <table:table-row table:style-name="ro44">
          <table:table-cell table:style-name="ce579" table:number-columns-repeated="7"/>
          <table:table-cell table:style-name="ce268" office:value-type="string" calcext:value-type="string">
            <text:p>COSTOS FIJOS.</text:p>
          </table:table-cell>
          <table:table-cell table:style-name="ce263" table:formula="of:=SUM([.I30:.I32])" office:value-type="float" office:value="17046.8490712681" calcext:value-type="float">
            <text:p><text:s/>17,046.85 </text:p>
          </table:table-cell>
          <table:table-cell table:style-name="ce263" table:formula="of:=SUM([.J30:.J32])" office:value-type="float" office:value="11657.9872881356" calcext:value-type="float">
            <text:p><text:s/>11,657.99 </text:p>
          </table:table-cell>
          <table:table-cell table:style-name="ce263" table:formula="of:=SUM([.K30:.K32])" office:value-type="float" office:value="11657.9872881356" calcext:value-type="float">
            <text:p><text:s/>11,657.99 </text:p>
          </table:table-cell>
          <table:table-cell table:style-name="ce263" table:formula="of:=SUM([.L30:.L32])" office:value-type="float" office:value="11657.9872881356" calcext:value-type="float">
            <text:p><text:s/>11,657.99 </text:p>
          </table:table-cell>
          <table:table-cell table:style-name="ce263" table:formula="of:=SUM([.M30:.M32])" office:value-type="float" office:value="11657.9872881356" calcext:value-type="float">
            <text:p><text:s/>11,657.99 </text:p>
          </table:table-cell>
          <table:table-cell table:style-name="ce579" office:value-type="string" calcext:value-type="string">
            <text:p>cf</text:p>
          </table:table-cell>
          <table:table-cell table:style-name="ce579" table:number-columns-repeated="16370"/>
        </table:table-row>
        <table:table-row table:style-name="ro44">
          <table:table-cell table:number-columns-repeated="7"/>
          <table:table-cell table:style-name="ce258" office:value-type="string" calcext:value-type="string">
            <text:p>DEPRECIACIÒN DE A.F. Y AMORT. INTANG</text:p>
          </table:table-cell>
          <table:table-cell table:style-name="ce262" table:formula="of:=[.B15]" office:value-type="float" office:value="10457.9872881356" calcext:value-type="float">
            <text:p><text:s/>10,457.99 </text:p>
          </table:table-cell>
          <table:table-cell table:style-name="ce262" table:formula="of:=[.C15]" office:value-type="float" office:value="10457.9872881356" calcext:value-type="float">
            <text:p><text:s/>10,457.99 </text:p>
          </table:table-cell>
          <table:table-cell table:style-name="ce262" table:formula="of:=[.D15]" office:value-type="float" office:value="10457.9872881356" calcext:value-type="float">
            <text:p><text:s/>10,457.99 </text:p>
          </table:table-cell>
          <table:table-cell table:style-name="ce262" table:formula="of:=[.E15]" office:value-type="float" office:value="10457.9872881356" calcext:value-type="float">
            <text:p><text:s/>10,457.99 </text:p>
          </table:table-cell>
          <table:table-cell table:style-name="ce262" table:formula="of:=[.F15]" office:value-type="float" office:value="10457.9872881356" calcext:value-type="float">
            <text:p><text:s/>10,457.99 </text:p>
          </table:table-cell>
          <table:table-cell table:number-columns-repeated="244"/>
        </table:table-row>
        <table:table-row table:style-name="ro44">
          <table:table-cell table:number-columns-repeated="7"/>
          <table:table-cell table:style-name="ce258" office:value-type="string" calcext:value-type="string">
            <text:p>GASTOS FINANCIEROS (Pago de prestamo)</text:p>
          </table:table-cell>
          <table:table-cell table:style-name="ce262" table:formula="of:=[$FINANCIAMIENT.B53]" office:value-type="float" office:value="5388.86178313251" calcext:value-type="float">
            <text:p><text:s/>5,388.86 </text:p>
          </table:table-cell>
          <table:table-cell table:style-name="ce262" table:formula="of:=[$FINANCIAMIENT.C53]" office:value-type="float" office:value="0" calcext:value-type="float">
            <text:p><text:s/>- <text:s text:c="2"/></text:p>
          </table:table-cell>
          <table:table-cell table:style-name="ce262" table:formula="of:=[$FINANCIAMIENT.D53]" office:value-type="float" office:value="0" calcext:value-type="float">
            <text:p><text:s/>- <text:s text:c="2"/></text:p>
          </table:table-cell>
          <table:table-cell table:style-name="ce262" table:formula="of:=[$FINANCIAMIENT.E53]" office:value-type="float" office:value="0" calcext:value-type="float">
            <text:p><text:s/>- <text:s text:c="2"/></text:p>
          </table:table-cell>
          <table:table-cell table:style-name="ce262" table:formula="of:=[$FINANCIAMIENT.F53]" office:value-type="float" office:value="0" calcext:value-type="float">
            <text:p><text:s/>- <text:s text:c="2"/></text:p>
          </table:table-cell>
          <table:table-cell table:number-columns-repeated="244"/>
        </table:table-row>
        <table:table-row table:style-name="ro44">
          <table:table-cell table:number-columns-repeated="4"/>
          <table:table-cell office:value-type="string" calcext:value-type="string">
            <text:p><text:s/></text:p>
          </table:table-cell>
          <table:table-cell table:number-columns-repeated="2"/>
          <table:table-cell table:style-name="ce258" office:value-type="string" calcext:value-type="string">
            <text:p>GASTOS ADMINISTRATIVOS</text:p>
          </table:table-cell>
          <table:table-cell table:style-name="ce262" table:formula="of:=[.B14]" office:value-type="float" office:value="1200" calcext:value-type="float">
            <text:p><text:s/>1,200.00 </text:p>
          </table:table-cell>
          <table:table-cell table:style-name="ce262" table:formula="of:=[.C14]" office:value-type="float" office:value="1200" calcext:value-type="float">
            <text:p><text:s/>1,200.00 </text:p>
          </table:table-cell>
          <table:table-cell table:style-name="ce262" table:formula="of:=[.D14]" office:value-type="float" office:value="1200" calcext:value-type="float">
            <text:p><text:s/>1,200.00 </text:p>
          </table:table-cell>
          <table:table-cell table:style-name="ce262" table:formula="of:=[.E14]" office:value-type="float" office:value="1200" calcext:value-type="float">
            <text:p><text:s/>1,200.00 </text:p>
          </table:table-cell>
          <table:table-cell table:style-name="ce262" table:formula="of:=[.F14]" office:value-type="float" office:value="1200" calcext:value-type="float">
            <text:p><text:s/>1,200.00 </text:p>
          </table:table-cell>
          <table:table-cell table:number-columns-repeated="244"/>
        </table:table-row>
        <table:table-row table:style-name="ro44">
          <table:table-cell table:style-name="ce579" table:number-columns-repeated="7"/>
          <table:table-cell table:style-name="ce268" office:value-type="string" calcext:value-type="string">
            <text:p>COSTOS VARIABLES</text:p>
          </table:table-cell>
          <table:table-cell table:style-name="ce263" table:formula="of:=[.I34]+[.I35]" office:value-type="float" office:value="50052.6730719438" calcext:value-type="float">
            <text:p><text:s/>50,052.67 </text:p>
          </table:table-cell>
          <table:table-cell table:style-name="ce263" table:formula="of:=[.J34]+[.J35]" office:value-type="float" office:value="118893.673626667" calcext:value-type="float">
            <text:p><text:s/>118,893.67 </text:p>
          </table:table-cell>
          <table:table-cell table:style-name="ce263" table:formula="of:=[.K34]+[.K35]" office:value-type="float" office:value="118893.673626667" calcext:value-type="float">
            <text:p><text:s/>118,893.67 </text:p>
          </table:table-cell>
          <table:table-cell table:style-name="ce263" table:formula="of:=[.L34]+[.L35]" office:value-type="float" office:value="118893.673626667" calcext:value-type="float">
            <text:p><text:s/>118,893.67 </text:p>
          </table:table-cell>
          <table:table-cell table:style-name="ce263" table:formula="of:=[.M34]+[.M35]" office:value-type="float" office:value="118893.673626667" calcext:value-type="float">
            <text:p><text:s/>118,893.67 </text:p>
          </table:table-cell>
          <table:table-cell table:style-name="ce579" table:number-columns-repeated="16371"/>
        </table:table-row>
        <table:table-row table:style-name="ro44">
          <table:table-cell table:number-columns-repeated="7"/>
          <table:table-cell table:style-name="ce258" office:value-type="string" calcext:value-type="string">
            <text:p>COSTOS DE PRODUCCIÒN</text:p>
          </table:table-cell>
          <table:table-cell table:style-name="ce262" table:formula="of:=[.B10]" office:value-type="float" office:value="47345.6730719438" calcext:value-type="float">
            <text:p><text:s/>47,345.67 </text:p>
          </table:table-cell>
          <table:table-cell table:style-name="ce262" table:formula="of:=[.C10]" office:value-type="float" office:value="116186.673626667" calcext:value-type="float">
            <text:p><text:s/>116,186.67 </text:p>
          </table:table-cell>
          <table:table-cell table:style-name="ce262" table:formula="of:=[.D10]" office:value-type="float" office:value="116186.673626667" calcext:value-type="float">
            <text:p><text:s/>116,186.67 </text:p>
          </table:table-cell>
          <table:table-cell table:style-name="ce262" table:formula="of:=[.E10]" office:value-type="float" office:value="116186.673626667" calcext:value-type="float">
            <text:p><text:s/>116,186.67 </text:p>
          </table:table-cell>
          <table:table-cell table:style-name="ce262" table:formula="of:=[.F10]" office:value-type="float" office:value="116186.673626667" calcext:value-type="float">
            <text:p><text:s/>116,186.67 </text:p>
          </table:table-cell>
          <table:table-cell table:number-columns-repeated="244"/>
        </table:table-row>
        <table:table-row table:style-name="ro44">
          <table:table-cell table:number-columns-repeated="7"/>
          <table:table-cell table:style-name="ce258" office:value-type="string" calcext:value-type="string">
            <text:p>GASTOS DE VENTA</text:p>
          </table:table-cell>
          <table:table-cell table:style-name="ce262" table:formula="of:=[.B13]" office:value-type="float" office:value="2707" calcext:value-type="float">
            <text:p><text:s/>2,707.00 </text:p>
          </table:table-cell>
          <table:table-cell table:style-name="ce262" table:formula="of:=[.C13]" office:value-type="float" office:value="2707" calcext:value-type="float">
            <text:p><text:s/>2,707.00 </text:p>
          </table:table-cell>
          <table:table-cell table:style-name="ce262" table:formula="of:=[.D13]" office:value-type="float" office:value="2707" calcext:value-type="float">
            <text:p><text:s/>2,707.00 </text:p>
          </table:table-cell>
          <table:table-cell table:style-name="ce262" table:formula="of:=[.E13]" office:value-type="float" office:value="2707" calcext:value-type="float">
            <text:p><text:s/>2,707.00 </text:p>
          </table:table-cell>
          <table:table-cell table:style-name="ce262" table:formula="of:=[.F13]" office:value-type="float" office:value="2707" calcext:value-type="float">
            <text:p><text:s/>2,707.00 </text:p>
          </table:table-cell>
          <table:table-cell table:number-columns-repeated="244"/>
        </table:table-row>
        <table:table-row table:style-name="ro44">
          <table:table-cell table:style-name="ce579" table:number-columns-repeated="7"/>
          <table:table-cell table:style-name="ce268" office:value-type="string" calcext:value-type="string">
            <text:p>COSTOS TOTALES</text:p>
          </table:table-cell>
          <table:table-cell table:style-name="ce263" table:formula="of:=[.I29]+[.I33]" office:value-type="float" office:value="67099.5221432119" calcext:value-type="float">
            <text:p><text:s/>67,099.52 </text:p>
          </table:table-cell>
          <table:table-cell table:style-name="ce263" table:formula="of:=[.J29]+[.J33]" office:value-type="float" office:value="130551.660914802" calcext:value-type="float">
            <text:p><text:s/>130,551.66 </text:p>
          </table:table-cell>
          <table:table-cell table:style-name="ce263" table:formula="of:=[.K29]+[.K33]" office:value-type="float" office:value="130551.660914802" calcext:value-type="float">
            <text:p><text:s/>130,551.66 </text:p>
          </table:table-cell>
          <table:table-cell table:style-name="ce263" table:formula="of:=[.L29]+[.L33]" office:value-type="float" office:value="130551.660914802" calcext:value-type="float">
            <text:p><text:s/>130,551.66 </text:p>
          </table:table-cell>
          <table:table-cell table:style-name="ce263" table:formula="of:=[.M29]+[.M33]" office:value-type="float" office:value="130551.660914802" calcext:value-type="float">
            <text:p><text:s/>130,551.66 </text:p>
          </table:table-cell>
          <table:table-cell table:style-name="ce579" table:number-columns-repeated="16371"/>
        </table:table-row>
        <table:table-row table:style-name="ro44">
          <table:table-cell table:number-columns-repeated="7"/>
          <table:table-cell table:style-name="ce258" office:value-type="string" calcext:value-type="string">
            <text:p>VENTAS <text:s/>PROMEDIO (Q)</text:p>
          </table:table-cell>
          <table:table-cell table:style-name="ce262" table:formula="of:=[$INGRESOS.B13]" office:value-type="float" office:value="3440.46069833684" calcext:value-type="float">
            <text:p><text:s/>3,440.46 </text:p>
          </table:table-cell>
          <table:table-cell table:style-name="ce262" table:formula="of:=[$INGRESOS.C13]" office:value-type="float" office:value="11443.696" calcext:value-type="float">
            <text:p><text:s/>11,443.70 </text:p>
          </table:table-cell>
          <table:table-cell table:style-name="ce262" table:formula="of:=[$INGRESOS.D13]" office:value-type="float" office:value="11443.696" calcext:value-type="float">
            <text:p><text:s/>11,443.70 </text:p>
          </table:table-cell>
          <table:table-cell table:style-name="ce262" table:formula="of:=[$INGRESOS.E13]" office:value-type="float" office:value="11443.696" calcext:value-type="float">
            <text:p><text:s/>11,443.70 </text:p>
          </table:table-cell>
          <table:table-cell table:style-name="ce262" table:formula="of:=[$INGRESOS.F13]" office:value-type="float" office:value="11443.696" calcext:value-type="float">
            <text:p><text:s/>11,443.70 </text:p>
          </table:table-cell>
          <table:table-cell table:style-name="ce579" office:value-type="string" calcext:value-type="string">
            <text:p>vt</text:p>
          </table:table-cell>
          <table:table-cell table:number-columns-repeated="243"/>
        </table:table-row>
        <table:table-row table:style-name="ro44">
          <table:table-cell table:number-columns-repeated="7"/>
          <table:table-cell table:style-name="ce258" office:value-type="string" calcext:value-type="string">
            <text:p>COSTO VARIABLE UNITARIO (CVu)</text:p>
          </table:table-cell>
          <table:table-cell table:style-name="ce592" table:formula="of:=[.I33]/[.I37]" office:value-type="float" office:value="14.5482473019209" calcext:value-type="float">
            <text:p><text:s/>14.548 </text:p>
          </table:table-cell>
          <table:table-cell table:style-name="ce262" table:formula="of:=[.J33]/[.J37]" office:value-type="float" office:value="10.3894470481099" calcext:value-type="float">
            <text:p><text:s/>10.39 </text:p>
          </table:table-cell>
          <table:table-cell table:style-name="ce262" table:formula="of:=[.K33]/[.K37]" office:value-type="float" office:value="10.3894470481099" calcext:value-type="float">
            <text:p><text:s/>10.39 </text:p>
          </table:table-cell>
          <table:table-cell table:style-name="ce262" table:formula="of:=[.L33]/[.L37]" office:value-type="float" office:value="10.3894470481099" calcext:value-type="float">
            <text:p><text:s/>10.39 </text:p>
          </table:table-cell>
          <table:table-cell table:style-name="ce262" table:formula="of:=[.M33]/[.M37]" office:value-type="float" office:value="10.3894470481099" calcext:value-type="float">
            <text:p><text:s/>10.39 </text:p>
          </table:table-cell>
          <table:table-cell table:number-columns-repeated="244"/>
        </table:table-row>
        <table:table-row table:style-name="ro44">
          <table:table-cell table:number-columns-repeated="7"/>
          <table:table-cell table:style-name="ce258" office:value-type="string" calcext:value-type="string">
            <text:p>PRECIO DE VENTA UNITARIO</text:p>
          </table:table-cell>
          <table:table-cell table:style-name="ce262" table:formula="of:=[$INGRESOS.B10]" office:value-type="float" office:value="18" calcext:value-type="float">
            <text:p><text:s/>18.00 </text:p>
          </table:table-cell>
          <table:table-cell table:style-name="ce262" table:formula="of:=[$INGRESOS.C10]" office:value-type="float" office:value="18" calcext:value-type="float">
            <text:p><text:s/>18.00 </text:p>
          </table:table-cell>
          <table:table-cell table:style-name="ce262" table:formula="of:=[$INGRESOS.D10]" office:value-type="float" office:value="18" calcext:value-type="float">
            <text:p><text:s/>18.00 </text:p>
          </table:table-cell>
          <table:table-cell table:style-name="ce262" table:formula="of:=[$INGRESOS.E10]" office:value-type="float" office:value="18" calcext:value-type="float">
            <text:p><text:s/>18.00 </text:p>
          </table:table-cell>
          <table:table-cell table:style-name="ce262" table:formula="of:=[$INGRESOS.F10]" office:value-type="float" office:value="18" calcext:value-type="float">
            <text:p><text:s/>18.00 </text:p>
          </table:table-cell>
          <table:table-cell table:number-columns-repeated="244"/>
        </table:table-row>
        <table:table-row table:style-name="ro44">
          <table:table-cell table:style-name="ce579" table:number-columns-repeated="7"/>
          <table:table-cell table:style-name="ce268" office:value-type="string" calcext:value-type="string">
            <text:p>PUNTO DE EQUILIBRIO (Q)</text:p>
          </table:table-cell>
          <table:table-cell table:style-name="ce263" table:formula="of:=[.I29]/([.I39]-[.I38])" office:value-type="float" office:value="4938.6067202192" calcext:value-type="float">
            <text:p><text:s/>4,938.61 </text:p>
          </table:table-cell>
          <table:table-cell table:style-name="ce263" table:formula="of:=[.J29]/([.J39]-[.J38])" office:value-type="float" office:value="1531.81869462458" calcext:value-type="float">
            <text:p><text:s/>1,531.82 </text:p>
          </table:table-cell>
          <table:table-cell table:style-name="ce263" table:formula="of:=[.K29]/([.K39]-[.K38])" office:value-type="float" office:value="1531.81869462458" calcext:value-type="float">
            <text:p><text:s/>1,531.82 </text:p>
          </table:table-cell>
          <table:table-cell table:style-name="ce263" table:formula="of:=[.L29]/([.L39]-[.L38])" office:value-type="float" office:value="1531.81869462458" calcext:value-type="float">
            <text:p><text:s/>1,531.82 </text:p>
          </table:table-cell>
          <table:table-cell table:style-name="ce263" table:formula="of:=[.M29]/([.M39]-[.M38])" office:value-type="float" office:value="1531.81869462458" calcext:value-type="float">
            <text:p><text:s/>1,531.82 </text:p>
          </table:table-cell>
          <table:table-cell table:style-name="ce579" table:number-columns-repeated="16371"/>
        </table:table-row>
        <table:table-row table:style-name="ro44">
          <table:table-cell table:style-name="ce579" table:number-columns-repeated="7"/>
          <table:table-cell table:style-name="ce268" office:value-type="string" calcext:value-type="string">
            <text:p>PUNTO DE EQUILIBRIO (S/.)</text:p>
          </table:table-cell>
          <table:table-cell table:style-name="ce263" table:formula="of:=[.I40]*[.I39]" office:value-type="float" office:value="88894.9209639457" calcext:value-type="float">
            <text:p><text:s/>88,894.92 </text:p>
          </table:table-cell>
          <table:table-cell table:style-name="ce263" table:formula="of:=[.J40]*[.J39]" office:value-type="float" office:value="27572.7365032425" calcext:value-type="float">
            <text:p><text:s/>27,572.74 </text:p>
          </table:table-cell>
          <table:table-cell table:style-name="ce263" table:formula="of:=[.K40]*[.K39]" office:value-type="float" office:value="27572.7365032425" calcext:value-type="float">
            <text:p><text:s/>27,572.74 </text:p>
          </table:table-cell>
          <table:table-cell table:style-name="ce263" table:formula="of:=[.L40]*[.L39]" office:value-type="float" office:value="27572.7365032425" calcext:value-type="float">
            <text:p><text:s/>27,572.74 </text:p>
          </table:table-cell>
          <table:table-cell table:style-name="ce263" table:formula="of:=[.M40]*[.M39]" office:value-type="float" office:value="27572.7365032425" calcext:value-type="float">
            <text:p><text:s/>27,572.74 </text:p>
          </table:table-cell>
          <table:table-cell table:style-name="ce579" table:number-columns-repeated="16371"/>
        </table:table-row>
        <table:table-row table:style-name="ro43">
          <table:table-cell table:number-columns-repeated="7"/>
          <table:table-cell table:style-name="ce579" office:value-type="string" calcext:value-type="string">
            <text:p>FUENTE: ELABORACION PROPIA</text:p>
          </table:table-cell>
          <table:table-cell table:number-columns-repeated="249"/>
        </table:table-row>
        <table:table-row table:style-name="ro43">
          <table:table-cell table:number-columns-repeated="257"/>
        </table:table-row>
        <table:table-row table:style-name="ro43">
          <table:table-cell table:number-columns-repeated="8"/>
          <table:table-cell table:style-name="ce580" office:value-type="string" calcext:value-type="string">
            <text:p>PE(Q) = CF/(Pu-Cvu)</text:p>
          </table:table-cell>
          <table:table-cell/>
          <table:table-cell table:style-name="ce595" table:number-columns-repeated="4"/>
          <table:table-cell table:number-columns-repeated="243"/>
        </table:table-row>
        <table:table-row table:style-name="ro43">
          <table:table-cell table:number-columns-repeated="6"/>
          <table:table-cell table:style-name="ce585" table:formula="of:=+[.I29]" office:value-type="float" office:value="17046.8490712681" calcext:value-type="float">
            <text:p><text:s/>17,046.84907 </text:p>
          </table:table-cell>
          <table:table-cell table:style-name="ce589" table:formula="of:=+[.I29]" office:value-type="float" office:value="17046.8490712681" calcext:value-type="float">
            <text:p><text:s/>17,046.8491 </text:p>
          </table:table-cell>
          <table:table-cell table:style-name="ce579" table:number-columns-repeated="2"/>
          <table:table-cell table:style-name="ce595"/>
          <table:table-cell table:number-columns-repeated="246"/>
        </table:table-row>
        <table:table-row table:style-name="ro43">
          <table:table-cell table:number-columns-repeated="6"/>
          <table:table-cell table:style-name="ce585"/>
          <table:table-cell table:style-name="ce589" table:formula="of:=+[.I39]*[.I37]" office:value-type="float" office:value="61928.2925700631" calcext:value-type="float">
            <text:p><text:s/>61,928.2926 </text:p>
          </table:table-cell>
          <table:table-cell table:number-columns-repeated="249"/>
        </table:table-row>
        <table:table-row table:style-name="ro43">
          <table:table-cell table:number-columns-repeated="6"/>
          <table:table-cell table:style-name="ce585" table:formula="of:=+[.I38]" office:value-type="float" office:value="14.5482473019209" calcext:value-type="float">
            <text:p><text:s/>14.54825 </text:p>
          </table:table-cell>
          <table:table-cell table:style-name="ce585" table:formula="of:=+[.I33]" office:value-type="float" office:value="50052.6730719438" calcext:value-type="float">
            <text:p><text:s/>50,052.67307 </text:p>
          </table:table-cell>
          <table:table-cell office:value-type="string" calcext:value-type="string">
            <text:p>PE (S/.) = CF/(1-CV/VENTAS)</text:p>
          </table:table-cell>
          <table:table-cell/>
          <table:table-cell table:style-name="ce596" table:formula="of:=[.I29]/(1-[.I33]/[.B7])" office:value-type="float" office:value="88894.9209639457" calcext:value-type="float">
            <text:p>88894.92</text:p>
          </table:table-cell>
          <table:table-cell table:style-name="ce596" table:formula="of:=[.J29]/(1-[.J33]/[.C7])" office:value-type="float" office:value="27572.7365032425" calcext:value-type="float">
            <text:p>27572.74</text:p>
          </table:table-cell>
          <table:table-cell table:style-name="ce596" table:formula="of:=[.K29]/(1-[.K33]/[.D7])" office:value-type="float" office:value="27572.7365032425" calcext:value-type="float">
            <text:p>27572.74</text:p>
          </table:table-cell>
          <table:table-cell table:style-name="ce596" table:formula="of:=[.L29]/(1-[.L33]/[.E7])" office:value-type="float" office:value="27572.7365032425" calcext:value-type="float">
            <text:p>27572.74</text:p>
          </table:table-cell>
          <table:table-cell table:number-columns-repeated="243"/>
        </table:table-row>
        <table:table-row table:style-name="ro43">
          <table:table-cell table:number-columns-repeated="6"/>
          <table:table-cell table:style-name="ce586" table:formula="of:=[.G45]/([.I39]-[.G47])" office:value-type="float" office:value="4938.6067202192" calcext:value-type="float">
            <text:p><text:s/>4,938.61 </text:p>
          </table:table-cell>
          <table:table-cell table:style-name="ce586" table:formula="of:=[.H45]/(1-[.H47]/[.H46])" office:value-type="float" office:value="88894.9209639457" calcext:value-type="float">
            <text:p><text:s/>88,894.92 </text:p>
          </table:table-cell>
          <table:table-cell table:style-name="ce579" table:number-columns-repeated="2"/>
          <table:table-cell table:style-name="ce586"/>
          <table:table-cell table:number-columns-repeated="246"/>
        </table:table-row>
        <table:table-row table:style-name="ro43">
          <table:table-cell table:number-columns-repeated="10"/>
          <table:table-cell table:style-name="ce586"/>
          <table:table-cell table:number-columns-repeated="246"/>
        </table:table-row>
        <table:table-row table:style-name="ro43">
          <table:table-cell table:number-columns-repeated="257"/>
        </table:table-row>
        <table:table-row table:style-name="ro8">
          <table:table-cell table:number-columns-repeated="8"/>
          <table:table-cell table:style-name="ce341" office:value-type="string" calcext:value-type="string" table:number-columns-spanned="1" table:number-rows-spanned="2">
            <text:p>RUBROS</text:p>
          </table:table-cell>
          <table:table-cell table:style-name="ce341" office:value-type="string" calcext:value-type="string" table:number-columns-spanned="5" table:number-rows-spanned="1">
            <text:p>AÑOS</text:p>
          </table:table-cell>
          <table:covered-table-cell table:number-columns-repeated="4" table:style-name="ce341"/>
          <table:table-cell table:number-columns-repeated="243"/>
        </table:table-row>
        <table:table-row table:style-name="ro43">
          <table:table-cell table:number-columns-repeated="8"/>
          <table:covered-table-cell table:style-name="ce341"/>
          <table:table-cell table:style-name="ce341" office:value-type="float" office:value="1" calcext:value-type="float">
            <text:p>1</text:p>
          </table:table-cell>
          <table:table-cell table:style-name="ce341" office:value-type="float" office:value="2" calcext:value-type="float">
            <text:p>2</text:p>
          </table:table-cell>
          <table:table-cell table:style-name="ce341" office:value-type="float" office:value="3" calcext:value-type="float">
            <text:p>3</text:p>
          </table:table-cell>
          <table:table-cell table:style-name="ce341" office:value-type="float" office:value="4" calcext:value-type="float">
            <text:p>4</text:p>
          </table:table-cell>
          <table:table-cell table:style-name="ce341" office:value-type="float" office:value="5" calcext:value-type="float">
            <text:p>5</text:p>
          </table:table-cell>
          <table:table-cell table:number-columns-repeated="243"/>
        </table:table-row>
        <table:table-row table:style-name="ro43">
          <table:table-cell table:number-columns-repeated="8"/>
          <table:table-cell table:style-name="ce345" office:value-type="string" calcext:value-type="string">
            <text:p>VENTAS</text:p>
          </table:table-cell>
          <table:table-cell table:style-name="ce170" table:formula="of:=[.B7]" office:value-type="float" office:value="61928.2925700631" calcext:value-type="float">
            <text:p><text:s/>61,928.29 </text:p>
          </table:table-cell>
          <table:table-cell table:style-name="ce170" table:formula="of:=[.J53]+[.C7]" office:value-type="float" office:value="267914.820570063" calcext:value-type="float">
            <text:p><text:s/>267,914.82 </text:p>
          </table:table-cell>
          <table:table-cell table:style-name="ce170" table:formula="of:=[.K53]+[.D7]" office:value-type="float" office:value="473901.348570063" calcext:value-type="float">
            <text:p><text:s/>473,901.35 </text:p>
          </table:table-cell>
          <table:table-cell table:style-name="ce170" table:formula="of:=[.L53]+[.E7]" office:value-type="float" office:value="679887.876570063" calcext:value-type="float">
            <text:p><text:s/>679,887.88 </text:p>
          </table:table-cell>
          <table:table-cell table:style-name="ce170" table:formula="of:=[.M53]+[.F7]" office:value-type="float" office:value="974168.968129385" calcext:value-type="float">
            <text:p><text:s/>974,168.97 </text:p>
          </table:table-cell>
          <table:table-cell table:number-columns-repeated="243"/>
        </table:table-row>
        <table:table-row table:style-name="ro45">
          <table:table-cell table:style-name="ce158" table:number-columns-repeated="8"/>
          <table:table-cell table:style-name="ce593" office:value-type="string" calcext:value-type="string">
            <text:p>COSTOS TOTALES <text:s/>ACUMULADOS</text:p>
          </table:table-cell>
          <table:table-cell table:style-name="ce176" table:formula="of:=[.B25]+[.I36]" office:value-type="float" office:value="224580.737188449" calcext:value-type="float">
            <text:p><text:s/>224,580.74 </text:p>
          </table:table-cell>
          <table:table-cell table:style-name="ce170" table:formula="of:=[.J54]+[.J36]" office:value-type="float" office:value="355132.398103251" calcext:value-type="float">
            <text:p><text:s/>355,132.40 </text:p>
          </table:table-cell>
          <table:table-cell table:style-name="ce170" table:formula="of:=[.K54]+[.K36]" office:value-type="float" office:value="485684.059018054" calcext:value-type="float">
            <text:p><text:s/>485,684.06 </text:p>
          </table:table-cell>
          <table:table-cell table:style-name="ce170" table:formula="of:=[.L54]+[.L36]" office:value-type="float" office:value="616235.719932856" calcext:value-type="float">
            <text:p><text:s/>616,235.72 </text:p>
          </table:table-cell>
          <table:table-cell table:style-name="ce170" table:formula="of:=[.M54]+[.M36]" office:value-type="float" office:value="746787.380847658" calcext:value-type="float">
            <text:p><text:s/>746,787.38 </text:p>
          </table:table-cell>
          <table:table-cell table:style-name="ce158" table:number-columns-repeated="16370"/>
        </table:table-row>
        <table:table-row table:style-name="ro43">
          <table:table-cell table:number-columns-repeated="8"/>
          <table:table-cell table:style-name="ce345" office:value-type="string" calcext:value-type="string">
            <text:p>COSTOS FIJOS</text:p>
          </table:table-cell>
          <table:table-cell table:style-name="ce170" table:formula="of:=[.I29]" office:value-type="float" office:value="17046.8490712681" calcext:value-type="float">
            <text:p><text:s/>17,046.85 </text:p>
          </table:table-cell>
          <table:table-cell table:style-name="ce170" table:formula="of:=[.J29]" office:value-type="float" office:value="11657.9872881356" calcext:value-type="float">
            <text:p><text:s/>11,657.99 </text:p>
          </table:table-cell>
          <table:table-cell table:style-name="ce170" table:formula="of:=[.K29]" office:value-type="float" office:value="11657.9872881356" calcext:value-type="float">
            <text:p><text:s/>11,657.99 </text:p>
          </table:table-cell>
          <table:table-cell table:style-name="ce170" table:formula="of:=[.L29]" office:value-type="float" office:value="11657.9872881356" calcext:value-type="float">
            <text:p><text:s/>11,657.99 </text:p>
          </table:table-cell>
          <table:table-cell table:style-name="ce170" table:formula="of:=[.M29]" office:value-type="float" office:value="11657.9872881356" calcext:value-type="float">
            <text:p><text:s/>11,657.99 </text:p>
          </table:table-cell>
          <table:table-cell table:number-columns-repeated="243"/>
        </table:table-row>
        <table:table-row table:style-name="ro43">
          <table:table-cell table:number-columns-repeated="8"/>
          <table:table-cell>
            <draw:frame draw:z-index="0" draw:name="Chart 1" draw:style-name="gr1" draw:text-style-name="P1" svg:width="14.192cm" svg:height="9.758cm" svg:x="0.696cm" svg:y="0.105cm">
              <draw:object draw:notify-on-update-of-ranges="'ESTADO GyP'.I53:'ESTADO GyP'.I53 'ESTADO GyP'.J53:'ESTADO GyP'.N53 'ESTADO GyP'.I54:'ESTADO GyP'.I54 'ESTADO GyP'.J54:'ESTADO GyP'.N54 'ESTADO GyP'.I55:'ESTADO GyP'.I55 'ESTADO GyP'.J55:'ESTADO GyP'.N55" xlink:href="./Object 3" xlink:type="simple" xlink:show="embed" xlink:actuate="onLoad">
                <loext:p/>
              </draw:object>
              <draw:image xlink:href="./ObjectReplacements/Object 3" xlink:type="simple" xlink:show="embed" xlink:actuate="onLoad"/>
            </draw:frame>
          </table:table-cell>
          <table:table-cell table:number-columns-repeated="248"/>
        </table:table-row>
        <table:table-row table:style-name="ro43" table:number-rows-repeated="3">
          <table:table-cell table:number-columns-repeated="257"/>
        </table:table-row>
        <table:table-row table:style-name="ro43">
          <table:table-cell table:number-columns-repeated="7"/>
          <table:table-cell table:style-name="ce586"/>
          <table:table-cell table:number-columns-repeated="249"/>
        </table:table-row>
        <table:table-row table:style-name="ro43" table:number-rows-repeated="20">
          <table:table-cell table:number-columns-repeated="257"/>
        </table:table-row>
        <table:table-row table:style-name="ro22" table:number-rows-repeated="1048495">
          <table:table-cell table:number-columns-repeated="257"/>
        </table:table-row>
        <table:table-row table:style-name="ro22">
          <table:table-cell table:number-columns-repeated="257"/>
        </table:table-row>
        <table:named-expressions>
          <table:named-range table:name="_xlnm.Print_Area" table:base-cell-address="$POBLACION.$A$1" table:cell-range-address="$'ESTADO GyP'.$A$4:.$N$80" table:range-usable-as="print-range"/>
        </table:named-expressions>
      </table:table>
      <table:table table:name="FLUJO DE CAJA " table:style-name="ta20" table:print-ranges="'FLUJO DE CAJA '.A6:'FLUJO DE CAJA '.G51">
        <table:table-column table:style-name="co100" table:default-cell-style-name="ce460"/>
        <table:table-column table:style-name="co5" table:default-cell-style-name="ce602"/>
        <table:table-column table:style-name="co93" table:default-cell-style-name="Default"/>
        <table:table-column table:style-name="co49" table:number-columns-repeated="4" table:default-cell-style-name="ce460"/>
        <table:table-column table:style-name="co93" table:default-cell-style-name="Default"/>
        <table:table-column table:style-name="co101" table:default-cell-style-name="ce460"/>
        <table:table-column table:style-name="co102" table:default-cell-style-name="ce460"/>
        <table:table-column table:style-name="co84" table:number-columns-repeated="4" table:default-cell-style-name="ce460"/>
        <table:table-column table:style-name="co10" table:default-cell-style-name="ce460"/>
        <table:table-column table:style-name="co93" table:number-columns-repeated="16369" table:default-cell-style-name="Default"/>
        <table:table-row table:style-name="ro21" table:number-rows-repeated="4">
          <table:table-cell table:number-columns-repeated="16384"/>
        </table:table-row>
        <table:table-row table:style-name="ro21">
          <table:table-cell table:number-columns-repeated="8"/>
          <table:table-cell table:style-name="ce638" office:value-type="string" calcext:value-type="string">
            <text:p>otra forma calculando el NOPAT</text:p>
          </table:table-cell>
          <table:table-cell table:number-columns-repeated="16375"/>
        </table:table-row>
        <table:table-row table:style-name="ro14">
          <table:table-cell table:style-name="ce597" office:value-type="string" calcext:value-type="string" table:number-columns-spanned="7" table:number-rows-spanned="1">
            <text:p>FLUJO DE CAJA ECONÓMICO Y FINANCIERO</text:p>
          </table:table-cell>
          <table:covered-table-cell table:number-columns-repeated="6" table:style-name="ce597"/>
          <table:table-cell table:number-columns-repeated="2"/>
          <table:table-cell table:style-name="ce301" office:value-type="string" calcext:value-type="string" table:number-columns-spanned="6" table:number-rows-spanned="1">
            <text:p>AÑOS</text:p>
          </table:table-cell>
          <table:covered-table-cell table:number-columns-repeated="5" table:style-name="ce301"/>
          <table:table-cell table:number-columns-repeated="16369"/>
        </table:table-row>
        <table:table-row table:style-name="ro46">
          <table:table-cell table:style-name="ce532" office:value-type="string" calcext:value-type="string" table:number-columns-spanned="7" table:number-rows-spanned="1">
            <text:p>FLUJO DE CAJA ECONOMICO Y FINANCIERO</text:p>
          </table:table-cell>
          <table:covered-table-cell table:number-columns-repeated="6" table:style-name="ce532"/>
          <table:table-cell/>
          <table:table-cell table:style-name="ce639" office:value-type="string" calcext:value-type="string">
            <text:p>CONCEPTO</text:p>
          </table:table-cell>
          <table:table-cell table:style-name="ce639" office:value-type="float" office:value="0" calcext:value-type="float">
            <text:p>0</text:p>
          </table:table-cell>
          <table:table-cell table:style-name="ce639" office:value-type="float" office:value="1" calcext:value-type="float">
            <text:p>1</text:p>
          </table:table-cell>
          <table:table-cell table:style-name="ce639" office:value-type="float" office:value="2" calcext:value-type="float">
            <text:p>2</text:p>
          </table:table-cell>
          <table:table-cell table:style-name="ce639" office:value-type="float" office:value="3" calcext:value-type="float">
            <text:p>3</text:p>
          </table:table-cell>
          <table:table-cell table:style-name="ce639" office:value-type="float" office:value="4" calcext:value-type="float">
            <text:p>4</text:p>
          </table:table-cell>
          <table:table-cell table:style-name="ce639" office:value-type="float" office:value="5" calcext:value-type="float">
            <text:p>5</text:p>
          </table:table-cell>
          <table:table-cell table:number-columns-repeated="16369"/>
        </table:table-row>
        <table:table-row table:style-name="ro47">
          <table:table-cell table:style-name="ce598" office:value-type="string" calcext:value-type="string">
            <text:p>CONCEPTO</text:p>
          </table:table-cell>
          <table:table-cell table:style-name="ce603" office:value-type="float" office:value="0" calcext:value-type="float">
            <text:p>0</text:p>
          </table:table-cell>
          <table:table-cell table:style-name="ce598" office:value-type="float" office:value="1" calcext:value-type="float">
            <text:p>1</text:p>
          </table:table-cell>
          <table:table-cell table:style-name="ce598" office:value-type="float" office:value="2" calcext:value-type="float">
            <text:p>2</text:p>
          </table:table-cell>
          <table:table-cell table:style-name="ce598" office:value-type="float" office:value="3" calcext:value-type="float">
            <text:p>3</text:p>
          </table:table-cell>
          <table:table-cell table:style-name="ce598" office:value-type="float" office:value="4" calcext:value-type="float">
            <text:p>4</text:p>
          </table:table-cell>
          <table:table-cell table:style-name="ce598" office:value-type="float" office:value="5" calcext:value-type="float">
            <text:p>5</text:p>
          </table:table-cell>
          <table:table-cell/>
          <table:table-cell table:style-name="ce429" office:value-type="string" calcext:value-type="string">
            <text:p>Utilidad Operativa</text:p>
          </table:table-cell>
          <table:table-cell table:style-name="ce425" office:value-type="float" office:value="0" calcext:value-type="float">
            <text:p>0</text:p>
          </table:table-cell>
          <table:table-cell table:style-name="ce428" table:formula="of:=[$'ESTADO GyP'.B16]" office:value-type="float" office:value="217.632209983614" calcext:value-type="float">
            <text:p><text:s/>217.63 </text:p>
          </table:table-cell>
          <table:table-cell table:style-name="ce428" table:formula="of:=[$'ESTADO GyP'.C16]" office:value-type="float" office:value="75434.8670851977" calcext:value-type="float">
            <text:p><text:s/>75,434.87 </text:p>
          </table:table-cell>
          <table:table-cell table:style-name="ce428" table:formula="of:=[$'ESTADO GyP'.D16]" office:value-type="float" office:value="75434.8670851977" calcext:value-type="float">
            <text:p><text:s/>75,434.87 </text:p>
          </table:table-cell>
          <table:table-cell table:style-name="ce428" table:formula="of:=[$'ESTADO GyP'.E16]" office:value-type="float" office:value="75434.8670851977" calcext:value-type="float">
            <text:p><text:s/>75,434.87 </text:p>
          </table:table-cell>
          <table:table-cell table:style-name="ce428" table:formula="of:=[$'ESTADO GyP'.F16]" office:value-type="float" office:value="163729.43064452" calcext:value-type="float">
            <text:p><text:s/>163,729.43 </text:p>
          </table:table-cell>
          <table:table-cell table:style-name="ce425"/>
          <table:table-cell table:number-columns-repeated="16368"/>
        </table:table-row>
        <table:table-row table:style-name="ro21">
          <table:table-cell table:style-name="ce304" office:value-type="string" calcext:value-type="string">
            <text:p>I. INGRESOS</text:p>
          </table:table-cell>
          <table:table-cell table:style-name="ce604" table:formula="of:=SUM([.B10:.B11])" office:value-type="float" office:value="0" calcext:value-type="float">
            <text:p><text:s/>- <text:s text:c="2"/></text:p>
          </table:table-cell>
          <table:table-cell table:style-name="ce426" table:formula="of:=SUM([.C10:.C11])" office:value-type="float" office:value="61928.2925700631" calcext:value-type="float">
            <text:p><text:s/>61,928.29 </text:p>
          </table:table-cell>
          <table:table-cell table:style-name="ce426" table:formula="of:=SUM([.D10:.D11])" office:value-type="float" office:value="205986.528" calcext:value-type="float">
            <text:p><text:s/>205,986.53 </text:p>
          </table:table-cell>
          <table:table-cell table:style-name="ce426" table:formula="of:=SUM([.E10:.E11])" office:value-type="float" office:value="205986.528" calcext:value-type="float">
            <text:p><text:s/>205,986.53 </text:p>
          </table:table-cell>
          <table:table-cell table:style-name="ce426" table:formula="of:=SUM([.F10:.F11])" office:value-type="float" office:value="205986.528" calcext:value-type="float">
            <text:p><text:s/>205,986.53 </text:p>
          </table:table-cell>
          <table:table-cell table:style-name="ce426" table:formula="of:=SUM([.G10:.G12])" office:value-type="float" office:value="393184.882022515" calcext:value-type="float">
            <text:p><text:s/>393,184.88 </text:p>
          </table:table-cell>
          <table:table-cell table:style-name="ce425"/>
          <table:table-cell table:style-name="ce429" office:value-type="string" calcext:value-type="string">
            <text:p>Ingresos Extraordinarios</text:p>
          </table:table-cell>
          <table:table-cell table:style-name="ce425"/>
          <table:table-cell table:style-name="ce428" table:number-columns-repeated="4"/>
          <table:table-cell table:style-name="ce428" table:formula="of:=[.G11]" office:value-type="float" office:value="88294.563559322" calcext:value-type="float">
            <text:p><text:s/>88,294.56 </text:p>
          </table:table-cell>
          <table:table-cell table:style-name="ce425" table:number-columns-repeated="12"/>
          <table:table-cell table:number-columns-repeated="16357"/>
        </table:table-row>
        <table:table-row table:style-name="ro21">
          <table:table-cell table:style-name="ce307" office:value-type="string" calcext:value-type="string">
            <text:p><text:s/>INGRESOS POR VENTA</text:p>
          </table:table-cell>
          <table:table-cell table:style-name="ce605"/>
          <table:table-cell table:style-name="ce427" table:formula="of:=[$'ESTADO GyP'.B7]" office:value-type="float" office:value="61928.2925700631" calcext:value-type="float">
            <text:p><text:s/>61,928.29 </text:p>
          </table:table-cell>
          <table:table-cell table:style-name="ce427" table:formula="of:=[$'ESTADO GyP'.C7]" office:value-type="float" office:value="205986.528" calcext:value-type="float">
            <text:p><text:s/>205,986.53 </text:p>
          </table:table-cell>
          <table:table-cell table:style-name="ce427" table:formula="of:=[$'ESTADO GyP'.D7]" office:value-type="float" office:value="205986.528" calcext:value-type="float">
            <text:p><text:s/>205,986.53 </text:p>
          </table:table-cell>
          <table:table-cell table:style-name="ce427" table:formula="of:=[$'ESTADO GyP'.E7]" office:value-type="float" office:value="205986.528" calcext:value-type="float">
            <text:p><text:s/>205,986.53 </text:p>
          </table:table-cell>
          <table:table-cell table:style-name="ce427" table:formula="of:=[$'ESTADO GyP'.F7]" office:value-type="float" office:value="294281.091559322" calcext:value-type="float">
            <text:p><text:s/>294,281.09 </text:p>
          </table:table-cell>
          <table:table-cell table:style-name="ce425"/>
          <table:table-cell table:style-name="ce429" office:value-type="string" calcext:value-type="string">
            <text:p>Impuesto a la Renta</text:p>
          </table:table-cell>
          <table:table-cell table:style-name="ce425"/>
          <table:table-cell table:style-name="ce428" table:formula="of:=-[$'ESTADO GyP'.B17]" office:value-type="float" office:value="-65.2896629950843" calcext:value-type="float">
            <text:p><text:s/>(65.29)</text:p>
          </table:table-cell>
          <table:table-cell table:style-name="ce428" table:formula="of:=-[$'ESTADO GyP'.C17]" office:value-type="float" office:value="-22630.4601255593" calcext:value-type="float">
            <text:p><text:s/>(22,630.46)</text:p>
          </table:table-cell>
          <table:table-cell table:style-name="ce428" table:formula="of:=-[$'ESTADO GyP'.D17]" office:value-type="float" office:value="-22630.4601255593" calcext:value-type="float">
            <text:p><text:s/>(22,630.46)</text:p>
          </table:table-cell>
          <table:table-cell table:style-name="ce428" table:formula="of:=-[$'ESTADO GyP'.E17]" office:value-type="float" office:value="-22630.4601255593" calcext:value-type="float">
            <text:p><text:s/>(22,630.46)</text:p>
          </table:table-cell>
          <table:table-cell table:style-name="ce428" table:formula="of:=-[$'ESTADO GyP'.F17]" office:value-type="float" office:value="-49118.8291933559" calcext:value-type="float">
            <text:p><text:s/>(49,118.83)</text:p>
          </table:table-cell>
          <table:table-cell table:style-name="ce425" table:number-columns-repeated="12"/>
          <table:table-cell table:number-columns-repeated="16357"/>
        </table:table-row>
        <table:table-row table:style-name="ro21">
          <table:table-cell table:style-name="ce307" office:value-type="string" calcext:value-type="string">
            <text:p>VALOR RESIDUAL</text:p>
          </table:table-cell>
          <table:table-cell table:style-name="ce605"/>
          <table:table-cell table:style-name="ce427" table:number-columns-repeated="4"/>
          <table:table-cell table:style-name="ce427" table:formula="of:=[$'DEPRECIAC '.H16]" office:value-type="float" office:value="88294.563559322" calcext:value-type="float">
            <text:p><text:s/>88,294.56 </text:p>
          </table:table-cell>
          <table:table-cell table:style-name="ce425"/>
          <table:table-cell table:style-name="ce640" office:value-type="string" calcext:value-type="string">
            <text:p>NOPAT</text:p>
          </table:table-cell>
          <table:table-cell table:style-name="ce640"/>
          <table:table-cell table:style-name="ce643" table:formula="of:=SUM([.K8:.K10])" office:value-type="float" office:value="152.34254698853" calcext:value-type="float">
            <text:p><text:s/>152.34 </text:p>
          </table:table-cell>
          <table:table-cell table:style-name="ce643" table:formula="of:=SUM([.L8:.L10])" office:value-type="float" office:value="52804.4069596384" calcext:value-type="float">
            <text:p><text:s/>52,804.41 </text:p>
          </table:table-cell>
          <table:table-cell table:style-name="ce643" table:formula="of:=SUM([.M8:.M10])" office:value-type="float" office:value="52804.4069596384" calcext:value-type="float">
            <text:p><text:s/>52,804.41 </text:p>
          </table:table-cell>
          <table:table-cell table:style-name="ce643" table:formula="of:=SUM([.N8:.N10])" office:value-type="float" office:value="52804.4069596384" calcext:value-type="float">
            <text:p><text:s/>52,804.41 </text:p>
          </table:table-cell>
          <table:table-cell table:style-name="ce643" table:formula="of:=SUM([.O8:.O10])" office:value-type="float" office:value="202905.165010486" calcext:value-type="float">
            <text:p><text:s/>202,905.17 </text:p>
          </table:table-cell>
          <table:table-cell table:style-name="ce425" table:number-columns-repeated="12"/>
          <table:table-cell table:number-columns-repeated="16357"/>
        </table:table-row>
        <table:table-row table:style-name="ro21">
          <table:table-cell table:style-name="ce307" office:value-type="string" calcext:value-type="string">
            <text:p>RECUPERO CAPITAL DE TRABAJO</text:p>
          </table:table-cell>
          <table:table-cell table:style-name="ce605"/>
          <table:table-cell table:style-name="ce427" table:number-columns-repeated="4"/>
          <table:table-cell table:style-name="ce427" table:formula="of:=[.B20]-SUM([.C20:.G20])" office:value-type="float" office:value="10609.2269038708" calcext:value-type="float">
            <text:p><text:s/>10,609.23 </text:p>
          </table:table-cell>
          <table:table-cell table:style-name="ce425"/>
          <table:table-cell table:number-columns-repeated="7"/>
          <table:table-cell table:style-name="ce425" table:number-columns-repeated="12"/>
          <table:table-cell table:number-columns-repeated="16357"/>
        </table:table-row>
        <table:table-row table:style-name="ro21">
          <table:table-cell table:style-name="ce304" office:value-type="string" calcext:value-type="string">
            <text:p>II. EGRESOS</text:p>
          </table:table-cell>
          <table:table-cell table:style-name="ce604" table:formula="of:=-SUM([.B14:.B16])" office:value-type="float" office:value="-0" calcext:value-type="float">
            <text:p><text:s/>- <text:s text:c="2"/></text:p>
          </table:table-cell>
          <table:table-cell table:style-name="ce426" table:formula="of:=SUM([.C14:.C20])" office:value-type="float" office:value="-52173.3052498058" calcext:value-type="float">
            <text:p><text:s/>(52,173.31)</text:p>
          </table:table-cell>
          <table:table-cell table:style-name="ce426" table:formula="of:=SUM([.D14:.D20])" office:value-type="float" office:value="-143750.544770066" calcext:value-type="float">
            <text:p><text:s/>(143,750.54)</text:p>
          </table:table-cell>
          <table:table-cell table:style-name="ce426" table:formula="of:=SUM([.E14:.E20])" office:value-type="float" office:value="-143955.826973634" calcext:value-type="float">
            <text:p><text:s/>(143,955.83)</text:p>
          </table:table-cell>
          <table:table-cell table:style-name="ce426" table:formula="of:=SUM([.F14:.F20])" office:value-type="float" office:value="-144202.165617916" calcext:value-type="float">
            <text:p><text:s/>(144,202.17)</text:p>
          </table:table-cell>
          <table:table-cell table:style-name="ce426" table:formula="of:=SUM([.G14:.G20])" office:value-type="float" office:value="-170986.141058851" calcext:value-type="float">
            <text:p><text:s/>(170,986.14)</text:p>
          </table:table-cell>
          <table:table-cell table:style-name="ce425"/>
          <table:table-cell table:number-columns-repeated="7"/>
          <table:table-cell table:style-name="ce425" table:number-columns-repeated="12"/>
          <table:table-cell table:number-columns-repeated="16357"/>
        </table:table-row>
        <table:table-row table:style-name="ro21">
          <table:table-cell table:style-name="ce307" office:value-type="string" calcext:value-type="string">
            <text:p>II.1. COSTOS DE PRODUCCIÒN</text:p>
          </table:table-cell>
          <table:table-cell table:style-name="ce605"/>
          <table:table-cell table:style-name="ce427" table:formula="of:=-[$'ESTADO GyP'.B10]" office:value-type="float" office:value="-47345.6730719438" calcext:value-type="float">
            <text:p><text:s/>(47,345.67)</text:p>
          </table:table-cell>
          <table:table-cell table:style-name="ce427" table:formula="of:=-[$'ESTADO GyP'.C10]" office:value-type="float" office:value="-116186.673626667" calcext:value-type="float">
            <text:p><text:s/>(116,186.67)</text:p>
          </table:table-cell>
          <table:table-cell table:style-name="ce427" table:formula="of:=-[$'ESTADO GyP'.D10]" office:value-type="float" office:value="-116186.673626667" calcext:value-type="float">
            <text:p><text:s/>(116,186.67)</text:p>
          </table:table-cell>
          <table:table-cell table:style-name="ce427" table:formula="of:=-[$'ESTADO GyP'.E10]" office:value-type="float" office:value="-116186.673626667" calcext:value-type="float">
            <text:p><text:s/>(116,186.67)</text:p>
          </table:table-cell>
          <table:table-cell table:style-name="ce427" table:formula="of:=-[$'ESTADO GyP'.F10]" office:value-type="float" office:value="-116186.673626667" calcext:value-type="float">
            <text:p><text:s/>(116,186.67)</text:p>
          </table:table-cell>
          <table:table-cell table:style-name="ce425"/>
          <table:table-cell table:number-columns-repeated="7"/>
          <table:table-cell table:style-name="ce425" table:number-columns-repeated="12"/>
          <table:table-cell table:number-columns-repeated="16357"/>
        </table:table-row>
        <table:table-row table:style-name="ro21">
          <table:table-cell table:style-name="ce307" office:value-type="string" calcext:value-type="string">
            <text:p>II.2. GASTOS DE OPERACIÒN</text:p>
          </table:table-cell>
          <table:table-cell table:style-name="ce605"/>
          <table:table-cell table:style-name="ce427" table:formula="of:=-[$'ESTADO GyP'.B12]" office:value-type="float" office:value="-3907" calcext:value-type="float">
            <text:p><text:s/>(3,907.00)</text:p>
          </table:table-cell>
          <table:table-cell table:style-name="ce427" table:formula="of:=-[$'ESTADO GyP'.C12]" office:value-type="float" office:value="-3907" calcext:value-type="float">
            <text:p><text:s/>(3,907.00)</text:p>
          </table:table-cell>
          <table:table-cell table:style-name="ce427" table:formula="of:=-[$'ESTADO GyP'.D12]" office:value-type="float" office:value="-3907" calcext:value-type="float">
            <text:p><text:s/>(3,907.00)</text:p>
          </table:table-cell>
          <table:table-cell table:style-name="ce427" table:formula="of:=-[$'ESTADO GyP'.E12]" office:value-type="float" office:value="-3907" calcext:value-type="float">
            <text:p><text:s/>(3,907.00)</text:p>
          </table:table-cell>
          <table:table-cell table:style-name="ce427" table:formula="of:=-[$'ESTADO GyP'.F12]" office:value-type="float" office:value="-3907" calcext:value-type="float">
            <text:p><text:s/>(3,907.00)</text:p>
          </table:table-cell>
          <table:table-cell table:style-name="ce425"/>
          <table:table-cell table:number-columns-repeated="7"/>
          <table:table-cell table:style-name="ce425" table:number-columns-repeated="12"/>
          <table:table-cell table:number-columns-repeated="16357"/>
        </table:table-row>
        <table:table-row table:style-name="ro21">
          <table:table-cell table:style-name="ce599" office:value-type="string" calcext:value-type="string">
            <text:p>II.3. IMPUESTO A LA RENTA</text:p>
          </table:table-cell>
          <table:table-cell table:style-name="ce606"/>
          <table:table-cell table:style-name="ce626" table:formula="of:=-[$'ESTADO GyP'.B17]" office:value-type="float" office:value="-65.2896629950843" calcext:value-type="float">
            <text:p><text:s/>(65.29)</text:p>
          </table:table-cell>
          <table:table-cell table:style-name="ce626" table:formula="of:=-[$'ESTADO GyP'.C17]" office:value-type="float" office:value="-22630.4601255593" calcext:value-type="float">
            <text:p><text:s/>(22,630.46)</text:p>
          </table:table-cell>
          <table:table-cell table:style-name="ce626" table:formula="of:=-[$'ESTADO GyP'.D17]" office:value-type="float" office:value="-22630.4601255593" calcext:value-type="float">
            <text:p><text:s/>(22,630.46)</text:p>
          </table:table-cell>
          <table:table-cell table:style-name="ce626" table:formula="of:=-[$'ESTADO GyP'.E17]" office:value-type="float" office:value="-22630.4601255593" calcext:value-type="float">
            <text:p><text:s/>(22,630.46)</text:p>
          </table:table-cell>
          <table:table-cell table:style-name="ce626" table:formula="of:=-[$'ESTADO GyP'.F17]" office:value-type="float" office:value="-49118.8291933559" calcext:value-type="float">
            <text:p><text:s/>(49,118.83)</text:p>
          </table:table-cell>
          <table:table-cell table:style-name="ce425"/>
          <table:table-cell table:number-columns-repeated="7"/>
          <table:table-cell table:style-name="ce425" table:number-columns-repeated="12"/>
          <table:table-cell table:number-columns-repeated="16357"/>
        </table:table-row>
        <table:table-row table:style-name="ro21">
          <table:table-cell table:style-name="ce307" office:value-type="string" calcext:value-type="string">
            <text:p>II.4. INVERSION FIJA </text:p>
          </table:table-cell>
          <table:table-cell table:style-name="ce604" table:formula="of:=-SUM([.B18:.B22])" office:value-type="float" office:value="-157481.215045237" calcext:value-type="float">
            <text:p><text:s/>(157,481.22)</text:p>
          </table:table-cell>
          <table:table-cell table:style-name="ce427" table:number-columns-repeated="5"/>
          <table:table-cell table:style-name="ce425"/>
          <table:table-cell table:number-columns-repeated="7"/>
          <table:table-cell table:style-name="ce425" table:number-columns-repeated="12"/>
          <table:table-cell table:number-columns-repeated="16357"/>
        </table:table-row>
        <table:table-row table:style-name="ro21">
          <table:table-cell table:style-name="ce307" office:value-type="string" calcext:value-type="string">
            <text:p><text:s text:c="3"/>ACTIVO FIJO</text:p>
          </table:table-cell>
          <table:table-cell table:style-name="ce605" table:formula="of:=[$INVERSION.F7]" office:value-type="float" office:value="126184.5" calcext:value-type="float">
            <text:p><text:s/>126,184.50 </text:p>
          </table:table-cell>
          <table:table-cell table:style-name="ce427" table:number-columns-repeated="5"/>
          <table:table-cell table:style-name="ce425"/>
          <table:table-cell table:style-name="ce429"/>
          <table:table-cell table:style-name="ce638" office:value-type="string" calcext:value-type="string">
            <text:p>FLUJO DE CAJA</text:p>
          </table:table-cell>
          <table:table-cell table:style-name="ce428" table:number-columns-repeated="5"/>
          <table:table-cell table:style-name="ce425" table:number-columns-repeated="12"/>
          <table:table-cell table:number-columns-repeated="16357"/>
        </table:table-row>
        <table:table-row table:style-name="ro21">
          <table:table-cell table:style-name="ce307" office:value-type="string" calcext:value-type="string">
            <text:p><text:s text:c="3"/>ACTIVO INTANGIBLE</text:p>
          </table:table-cell>
          <table:table-cell table:style-name="ce605" table:formula="of:=[$INVERSION.F12]" office:value-type="float" office:value="14400" calcext:value-type="float">
            <text:p><text:s/>14,400.00 </text:p>
          </table:table-cell>
          <table:table-cell table:style-name="ce427" table:number-columns-repeated="5"/>
          <table:table-cell table:style-name="ce425"/>
          <table:table-cell table:style-name="ce639" office:value-type="string" calcext:value-type="string">
            <text:p>CONCEPTO</text:p>
          </table:table-cell>
          <table:table-cell table:style-name="ce639" office:value-type="float" office:value="0" calcext:value-type="float">
            <text:p>0</text:p>
          </table:table-cell>
          <table:table-cell table:style-name="ce644" office:value-type="float" office:value="1" calcext:value-type="float">
            <text:p><text:s/>1 </text:p>
          </table:table-cell>
          <table:table-cell table:style-name="ce644" office:value-type="float" office:value="2" calcext:value-type="float">
            <text:p><text:s/>2 </text:p>
          </table:table-cell>
          <table:table-cell table:style-name="ce644" office:value-type="float" office:value="3" calcext:value-type="float">
            <text:p><text:s/>3 </text:p>
          </table:table-cell>
          <table:table-cell table:style-name="ce644" office:value-type="float" office:value="4" calcext:value-type="float">
            <text:p><text:s/>4 </text:p>
          </table:table-cell>
          <table:table-cell table:style-name="ce644" office:value-type="float" office:value="5" calcext:value-type="float">
            <text:p><text:s/>5 </text:p>
          </table:table-cell>
          <table:table-cell table:style-name="ce425" table:number-columns-repeated="12"/>
          <table:table-cell table:number-columns-repeated="16357"/>
        </table:table-row>
        <table:table-row table:style-name="ro21">
          <table:table-cell table:style-name="ce307" office:value-type="string" calcext:value-type="string">
            <text:p><text:s text:c="3"/>CAPITAL DE TRABAJO</text:p>
          </table:table-cell>
          <table:table-cell table:style-name="ce605" table:formula="of:=[$INVERSION.F13]" office:value-type="float" office:value="4244.11004523721" calcext:value-type="float">
            <text:p><text:s/>4,244.11 </text:p>
          </table:table-cell>
          <table:table-cell table:style-name="ce427" table:formula="of:=-[$'CAP TRABAJ'.C46]" office:value-type="float" office:value="-855.342514866915" calcext:value-type="float">
            <text:p><text:s/>(855.34)</text:p>
          </table:table-cell>
          <table:table-cell table:style-name="ce427" table:formula="of:=-[$'CAP TRABAJ'.D46]" office:value-type="float" office:value="-1026.4110178403" calcext:value-type="float">
            <text:p><text:s/>(1,026.41)</text:p>
          </table:table-cell>
          <table:table-cell table:style-name="ce427" table:formula="of:=-[$'CAP TRABAJ'.E46]" office:value-type="float" office:value="-1231.69322140836" calcext:value-type="float">
            <text:p><text:s/>(1,231.69)</text:p>
          </table:table-cell>
          <table:table-cell table:style-name="ce427" table:formula="of:=-[$'CAP TRABAJ'.F46]" office:value-type="float" office:value="-1478.03186569003" calcext:value-type="float">
            <text:p><text:s/>(1,478.03)</text:p>
          </table:table-cell>
          <table:table-cell table:style-name="ce427" table:formula="of:=-[$'CAP TRABAJ'.G46]" office:value-type="float" office:value="-1773.63823882803" calcext:value-type="float">
            <text:p><text:s/>(1,773.64)</text:p>
          </table:table-cell>
          <table:table-cell table:style-name="ce425"/>
          <table:table-cell table:style-name="ce429" office:value-type="string" calcext:value-type="string">
            <text:p>NOPAT</text:p>
          </table:table-cell>
          <table:table-cell table:style-name="ce425"/>
          <table:table-cell table:style-name="ce428" table:formula="of:=[.K11]" office:value-type="float" office:value="152.34254698853" calcext:value-type="float">
            <text:p><text:s/>152.34 </text:p>
          </table:table-cell>
          <table:table-cell table:style-name="ce428" table:formula="of:=[.L11]" office:value-type="float" office:value="52804.4069596384" calcext:value-type="float">
            <text:p><text:s/>52,804.41 </text:p>
          </table:table-cell>
          <table:table-cell table:style-name="ce428" table:formula="of:=[.M11]" office:value-type="float" office:value="52804.4069596384" calcext:value-type="float">
            <text:p><text:s/>52,804.41 </text:p>
          </table:table-cell>
          <table:table-cell table:style-name="ce428" table:formula="of:=[.N11]" office:value-type="float" office:value="52804.4069596384" calcext:value-type="float">
            <text:p><text:s/>52,804.41 </text:p>
          </table:table-cell>
          <table:table-cell table:style-name="ce428" table:formula="of:=[.O11]" office:value-type="float" office:value="202905.165010486" calcext:value-type="float">
            <text:p><text:s/>202,905.17 </text:p>
          </table:table-cell>
          <table:table-cell table:style-name="ce425" table:number-columns-repeated="12"/>
          <table:table-cell table:number-columns-repeated="16357"/>
        </table:table-row>
        <table:table-row table:style-name="ro21">
          <table:table-cell table:style-name="ce307" office:value-type="string" calcext:value-type="string">
            <text:p><text:s text:c="3"/>GASTOS GENERALES</text:p>
          </table:table-cell>
          <table:table-cell table:style-name="ce607" table:formula="of:=[$INVERSION.F14]" office:value-type="float" office:value="8435.07" calcext:value-type="float">
            <text:p><text:s/>8,435.07 </text:p>
          </table:table-cell>
          <table:table-cell table:style-name="ce427" table:number-columns-repeated="5"/>
          <table:table-cell table:style-name="ce425"/>
          <table:table-cell table:style-name="ce429" office:value-type="string" calcext:value-type="string">
            <text:p>Depreciacion</text:p>
          </table:table-cell>
          <table:table-cell table:style-name="ce425"/>
          <table:table-cell table:style-name="ce428" table:formula="of:=[$'ESTADO GyP'.B15]" office:value-type="float" office:value="10457.9872881356" calcext:value-type="float">
            <text:p><text:s/>10,457.99 </text:p>
          </table:table-cell>
          <table:table-cell table:style-name="ce428" table:formula="of:=[$'ESTADO GyP'.C15]" office:value-type="float" office:value="10457.9872881356" calcext:value-type="float">
            <text:p><text:s/>10,457.99 </text:p>
          </table:table-cell>
          <table:table-cell table:style-name="ce428" table:formula="of:=[$'ESTADO GyP'.D15]" office:value-type="float" office:value="10457.9872881356" calcext:value-type="float">
            <text:p><text:s/>10,457.99 </text:p>
          </table:table-cell>
          <table:table-cell table:style-name="ce428" table:formula="of:=[$'ESTADO GyP'.E15]" office:value-type="float" office:value="10457.9872881356" calcext:value-type="float">
            <text:p><text:s/>10,457.99 </text:p>
          </table:table-cell>
          <table:table-cell table:style-name="ce428" table:formula="of:=[$'ESTADO GyP'.F15]" office:value-type="float" office:value="10457.9872881356" calcext:value-type="float">
            <text:p><text:s/>10,457.99 </text:p>
          </table:table-cell>
          <table:table-cell table:style-name="ce425" table:number-columns-repeated="12"/>
          <table:table-cell table:number-columns-repeated="16357"/>
        </table:table-row>
        <table:table-row table:style-name="ro21">
          <table:table-cell table:style-name="ce307" office:value-type="string" calcext:value-type="string">
            <text:p><text:s text:c="3"/>GASTOS DE SUPERVISION</text:p>
          </table:table-cell>
          <table:table-cell table:style-name="ce607" table:formula="of:=[$INVERSION.F15]" office:value-type="float" office:value="4217.535" calcext:value-type="float">
            <text:p><text:s/>4,217.54 </text:p>
          </table:table-cell>
          <table:table-cell table:style-name="ce427" table:number-columns-repeated="5"/>
          <table:table-cell table:style-name="ce425"/>
          <table:table-cell table:style-name="ce429" office:value-type="string" calcext:value-type="string">
            <text:p>Recupero de CT</text:p>
          </table:table-cell>
          <table:table-cell table:style-name="ce425"/>
          <table:table-cell table:style-name="ce428" table:number-columns-repeated="4"/>
          <table:table-cell table:style-name="ce428" table:formula="of:=[.J26]" office:value-type="float" office:value="4244.11004523721" calcext:value-type="float">
            <text:p><text:s/>4,244.11 </text:p>
          </table:table-cell>
          <table:table-cell table:style-name="ce425" table:number-columns-repeated="12"/>
          <table:table-cell table:number-columns-repeated="16357"/>
        </table:table-row>
        <table:table-row table:style-name="ro21">
          <table:table-cell table:style-name="ce600" office:value-type="string" calcext:value-type="string">
            <text:p>FLUJO DE CAJA ECONÒMICO</text:p>
          </table:table-cell>
          <table:table-cell table:style-name="ce608" table:formula="of:=[.B17]" office:value-type="float" office:value="-157481.215045237" calcext:value-type="float">
            <text:p><text:s/>(157,481.22)</text:p>
          </table:table-cell>
          <table:table-cell table:style-name="ce627" table:formula="of:=[.C9]+[.C13]" office:value-type="float" office:value="9754.98732025721" calcext:value-type="float">
            <text:p><text:s/>9,754.99 </text:p>
          </table:table-cell>
          <table:table-cell table:style-name="ce627" table:formula="of:=[.D9]+[.D13]" office:value-type="float" office:value="62235.9832299337" calcext:value-type="float">
            <text:p><text:s/>62,235.98 </text:p>
          </table:table-cell>
          <table:table-cell table:style-name="ce627" table:formula="of:=[.E9]+[.E13]" office:value-type="float" office:value="62030.7010263657" calcext:value-type="float">
            <text:p><text:s/>62,030.70 </text:p>
          </table:table-cell>
          <table:table-cell table:style-name="ce627" table:formula="of:=[.F9]+[.F13]" office:value-type="float" office:value="61784.362382084" calcext:value-type="float">
            <text:p><text:s/>61,784.36 </text:p>
          </table:table-cell>
          <table:table-cell table:style-name="ce627" table:formula="of:=[.G9]+[.G13]" office:value-type="float" office:value="222198.740963664" calcext:value-type="float">
            <text:p><text:s/>222,198.74 </text:p>
          </table:table-cell>
          <table:table-cell table:style-name="ce425"/>
          <table:table-cell table:style-name="ce601" office:value-type="string" calcext:value-type="string">
            <text:p>INVERSION</text:p>
          </table:table-cell>
          <table:table-cell table:style-name="ce641" table:formula="of:=-SUM([.J24:.J28])" office:value-type="float" office:value="-157481.215045237" calcext:value-type="float">
            <text:p><text:s/>(157,481.22)</text:p>
          </table:table-cell>
          <table:table-cell table:style-name="ce641" table:formula="of:=-SUM([.K24:.K28])" office:value-type="float" office:value="-855.342514866915" calcext:value-type="float">
            <text:p><text:s/>(855.34)</text:p>
          </table:table-cell>
          <table:table-cell table:style-name="ce641" table:formula="of:=-SUM([.L24:.L28])" office:value-type="float" office:value="-1026.4110178403" calcext:value-type="float">
            <text:p><text:s/>(1,026.41)</text:p>
          </table:table-cell>
          <table:table-cell table:style-name="ce641" table:formula="of:=-SUM([.M24:.M28])" office:value-type="float" office:value="-1231.69322140836" calcext:value-type="float">
            <text:p><text:s/>(1,231.69)</text:p>
          </table:table-cell>
          <table:table-cell table:style-name="ce641" table:formula="of:=-SUM([.N24:.N28])" office:value-type="float" office:value="-1478.03186569003" calcext:value-type="float">
            <text:p><text:s/>(1,478.03)</text:p>
          </table:table-cell>
          <table:table-cell table:style-name="ce641" table:formula="of:=-SUM([.O24:.O28])" office:value-type="float" office:value="-1773.63823882803" calcext:value-type="float">
            <text:p><text:s/>(1,773.64)</text:p>
          </table:table-cell>
          <table:table-cell table:style-name="ce425" table:number-columns-repeated="12"/>
          <table:table-cell table:number-columns-repeated="16357"/>
        </table:table-row>
        <table:table-row table:style-name="ro21">
          <table:table-cell table:style-name="ce307" office:value-type="string" calcext:value-type="string">
            <text:p>PRESTAMO</text:p>
          </table:table-cell>
          <table:table-cell table:style-name="ce605" table:formula="of:=[$FINANCIAMIENT.B41]" office:value-type="float" office:value="5000" calcext:value-type="float">
            <text:p><text:s/>5,000.00 </text:p>
          </table:table-cell>
          <table:table-cell table:style-name="ce427" table:number-columns-repeated="5"/>
          <table:table-cell table:style-name="ce425"/>
          <table:table-cell table:style-name="ce429" office:value-type="string" calcext:value-type="string">
            <text:p>Activo Fijo</text:p>
          </table:table-cell>
          <table:table-cell table:style-name="ce556" table:formula="of:=[.B18]" office:value-type="float" office:value="126184.5" calcext:value-type="float">
            <text:p><text:s/>126,184.50 </text:p>
          </table:table-cell>
          <table:table-cell table:style-name="ce428" table:number-columns-repeated="5"/>
          <table:table-cell table:style-name="ce425" table:number-columns-repeated="12"/>
          <table:table-cell table:number-columns-repeated="16357"/>
        </table:table-row>
        <table:table-row table:style-name="ro21">
          <table:table-cell table:style-name="ce307" office:value-type="string" calcext:value-type="string">
            <text:p>SERVICIO DE DEUDA</text:p>
          </table:table-cell>
          <table:table-cell table:style-name="ce605"/>
          <table:table-cell table:style-name="ce427" table:formula="of:=-[$FINANCIAMIENT.B53]" office:value-type="float" office:value="-5388.86178313251" calcext:value-type="float">
            <text:p><text:s/>(5,388.86)</text:p>
          </table:table-cell>
          <table:table-cell table:style-name="ce427" table:formula="of:=-[$FINANCIAMIENT.C53]" office:value-type="float" office:value="-0" calcext:value-type="float">
            <text:p><text:s/>- <text:s text:c="2"/></text:p>
          </table:table-cell>
          <table:table-cell table:style-name="ce427" table:formula="of:=-[$FINANCIAMIENT.D53]" office:value-type="float" office:value="-0" calcext:value-type="float">
            <text:p><text:s/>- <text:s text:c="2"/></text:p>
          </table:table-cell>
          <table:table-cell table:style-name="ce427" table:number-columns-repeated="2"/>
          <table:table-cell table:style-name="ce425"/>
          <table:table-cell table:style-name="ce429" office:value-type="string" calcext:value-type="string">
            <text:p>Activo Intagible</text:p>
          </table:table-cell>
          <table:table-cell table:style-name="ce556" table:formula="of:=[.B19]" office:value-type="float" office:value="14400" calcext:value-type="float">
            <text:p><text:s/>14,400.00 </text:p>
          </table:table-cell>
          <table:table-cell table:style-name="ce428" table:number-columns-repeated="5"/>
          <table:table-cell table:style-name="ce425" table:number-columns-repeated="12"/>
          <table:table-cell table:number-columns-repeated="16357"/>
        </table:table-row>
        <table:table-row table:style-name="ro21">
          <table:table-cell table:style-name="ce307" office:value-type="string" calcext:value-type="string">
            <text:p>ESCUDO FISCAL</text:p>
          </table:table-cell>
          <table:table-cell table:style-name="ce605"/>
          <table:table-cell table:style-name="ce427" table:formula="of:=[$FINANCIAMIENT.B55]" office:value-type="float" office:value="116.658534939754" calcext:value-type="float">
            <text:p><text:s/>116.66 </text:p>
          </table:table-cell>
          <table:table-cell table:style-name="ce427" table:formula="of:=[$FINANCIAMIENT.C55]" office:value-type="float" office:value="0" calcext:value-type="float">
            <text:p><text:s/>- <text:s text:c="2"/></text:p>
          </table:table-cell>
          <table:table-cell table:style-name="ce427" table:formula="of:=[$FINANCIAMIENT.D55]" office:value-type="float" office:value="0" calcext:value-type="float">
            <text:p><text:s/>- <text:s text:c="2"/></text:p>
          </table:table-cell>
          <table:table-cell table:style-name="ce427" table:number-columns-repeated="2"/>
          <table:table-cell table:style-name="ce425"/>
          <table:table-cell table:style-name="ce429" office:value-type="string" calcext:value-type="string">
            <text:p>Capital de trabajo</text:p>
          </table:table-cell>
          <table:table-cell table:style-name="ce556" table:formula="of:=[.B20]" office:value-type="float" office:value="4244.11004523721" calcext:value-type="float">
            <text:p><text:s/>4,244.11 </text:p>
          </table:table-cell>
          <table:table-cell table:style-name="ce428" table:formula="of:=-[.C20]" office:value-type="float" office:value="855.342514866915" calcext:value-type="float">
            <text:p><text:s/>855.34 </text:p>
          </table:table-cell>
          <table:table-cell table:style-name="ce428" table:formula="of:=-[.D20]" office:value-type="float" office:value="1026.4110178403" calcext:value-type="float">
            <text:p><text:s/>1,026.41 </text:p>
          </table:table-cell>
          <table:table-cell table:style-name="ce428" table:formula="of:=-[.E20]" office:value-type="float" office:value="1231.69322140836" calcext:value-type="float">
            <text:p><text:s/>1,231.69 </text:p>
          </table:table-cell>
          <table:table-cell table:style-name="ce428" table:formula="of:=-[.F20]" office:value-type="float" office:value="1478.03186569003" calcext:value-type="float">
            <text:p><text:s/>1,478.03 </text:p>
          </table:table-cell>
          <table:table-cell table:style-name="ce428" table:formula="of:=-[.G20]" office:value-type="float" office:value="1773.63823882803" calcext:value-type="float">
            <text:p><text:s/>1,773.64 </text:p>
          </table:table-cell>
          <table:table-cell table:style-name="ce425" table:number-columns-repeated="12"/>
          <table:table-cell table:number-columns-repeated="16357"/>
        </table:table-row>
        <table:table-row table:style-name="ro21">
          <table:table-cell table:style-name="ce600" office:value-type="string" calcext:value-type="string">
            <text:p>FLUJO DE CAJA FINANCIERO</text:p>
          </table:table-cell>
          <table:table-cell table:style-name="ce608" table:formula="of:=SUM([.B23:.B26])" office:value-type="float" office:value="-152481.215045237" calcext:value-type="float">
            <text:p><text:s/>(152,481.22)</text:p>
          </table:table-cell>
          <table:table-cell table:style-name="ce627" table:formula="of:=SUM([.C23:.C26])" office:value-type="float" office:value="4482.78407206445" calcext:value-type="float">
            <text:p><text:s/>4,482.78 </text:p>
          </table:table-cell>
          <table:table-cell table:style-name="ce627" table:formula="of:=SUM([.D23:.D26])" office:value-type="float" office:value="62235.9832299337" calcext:value-type="float">
            <text:p><text:s/>62,235.98 </text:p>
          </table:table-cell>
          <table:table-cell table:style-name="ce627" table:formula="of:=SUM([.E23:.E26])" office:value-type="float" office:value="62030.7010263657" calcext:value-type="float">
            <text:p><text:s/>62,030.70 </text:p>
          </table:table-cell>
          <table:table-cell table:style-name="ce627" table:formula="of:=SUM([.F23:.F26])" office:value-type="float" office:value="61784.362382084" calcext:value-type="float">
            <text:p><text:s/>61,784.36 </text:p>
          </table:table-cell>
          <table:table-cell table:style-name="ce627" table:formula="of:=SUM([.G23:.G26])" office:value-type="float" office:value="222198.740963664" calcext:value-type="float">
            <text:p><text:s/>222,198.74 </text:p>
          </table:table-cell>
          <table:table-cell table:style-name="ce425"/>
          <table:table-cell table:style-name="ce429" office:value-type="string" calcext:value-type="string">
            <text:p>Gastos Generales</text:p>
          </table:table-cell>
          <table:table-cell table:style-name="ce556" table:formula="of:=[.B21]" office:value-type="float" office:value="8435.07" calcext:value-type="float">
            <text:p><text:s/>8,435.07 </text:p>
          </table:table-cell>
          <table:table-cell table:style-name="ce428" table:number-columns-repeated="5"/>
          <table:table-cell table:style-name="ce425" table:number-columns-repeated="12"/>
          <table:table-cell table:number-columns-repeated="16357"/>
        </table:table-row>
        <table:table-row table:style-name="ro21">
          <table:table-cell table:style-name="ce418" office:value-type="string" calcext:value-type="string">
            <text:p>FUENTE: ELABORACION PROPIA</text:p>
          </table:table-cell>
          <table:table-cell table:style-name="ce609"/>
          <table:table-cell table:style-name="ce628" table:number-columns-repeated="5"/>
          <table:table-cell table:style-name="ce425"/>
          <table:table-cell table:style-name="ce429" office:value-type="string" calcext:value-type="string">
            <text:p>Gastos de Supervision</text:p>
          </table:table-cell>
          <table:table-cell table:style-name="ce556" table:formula="of:=[.B22]" office:value-type="float" office:value="4217.535" calcext:value-type="float">
            <text:p><text:s/>4,217.54 </text:p>
          </table:table-cell>
          <table:table-cell table:style-name="ce428" table:number-columns-repeated="5"/>
          <table:table-cell table:style-name="ce425" table:number-columns-repeated="12"/>
          <table:table-cell table:number-columns-repeated="16357"/>
        </table:table-row>
        <table:table-row table:style-name="ro21">
          <table:table-cell table:number-columns-repeated="7"/>
          <table:table-cell table:style-name="ce425"/>
          <table:table-cell table:style-name="ce639" office:value-type="string" calcext:value-type="string">
            <text:p>FLUJO DE CAJA LIBRE (FCL)</text:p>
          </table:table-cell>
          <table:table-cell table:style-name="ce642" table:formula="of:=[.J23]" office:value-type="float" office:value="-157481.215045237" calcext:value-type="float">
            <text:p><text:s/>(157,481.22)</text:p>
          </table:table-cell>
          <table:table-cell table:style-name="ce645" table:formula="of:=SUM([.K20:.K23])" office:value-type="float" office:value="9754.98732025721" calcext:value-type="float">
            <text:p><text:s/>9,754.99 </text:p>
          </table:table-cell>
          <table:table-cell table:style-name="ce645" table:formula="of:=SUM([.L20:.L23])" office:value-type="float" office:value="62235.9832299337" calcext:value-type="float">
            <text:p><text:s/>62,235.98 </text:p>
          </table:table-cell>
          <table:table-cell table:style-name="ce645" table:formula="of:=SUM([.M20:.M23])" office:value-type="float" office:value="62030.7010263657" calcext:value-type="float">
            <text:p><text:s/>62,030.70 </text:p>
          </table:table-cell>
          <table:table-cell table:style-name="ce645" table:formula="of:=SUM([.N20:.N23])" office:value-type="float" office:value="61784.362382084" calcext:value-type="float">
            <text:p><text:s/>61,784.36 </text:p>
          </table:table-cell>
          <table:table-cell table:style-name="ce645" table:formula="of:=SUM([.O20:.O23])" office:value-type="float" office:value="215833.624105031" calcext:value-type="float">
            <text:p><text:s/>215,833.62 </text:p>
          </table:table-cell>
          <table:table-cell table:style-name="ce425" table:number-columns-repeated="12"/>
          <table:table-cell table:number-columns-repeated="16357"/>
        </table:table-row>
        <table:table-row table:style-name="ro21">
          <table:table-cell table:style-name="ce429"/>
          <table:table-cell table:style-name="ce610"/>
          <table:table-cell table:style-name="ce629" table:number-columns-repeated="5"/>
          <table:table-cell table:style-name="ce429"/>
          <table:table-cell table:style-name="ce429" office:value-type="string" calcext:value-type="string">
            <text:p>Prestamo</text:p>
          </table:table-cell>
          <table:table-cell table:style-name="ce428" table:formula="of:=[$FINANCIAMIENT.B41]" office:value-type="float" office:value="5000" calcext:value-type="float">
            <text:p><text:s/>5,000.00 </text:p>
          </table:table-cell>
          <table:table-cell table:style-name="ce428" table:number-columns-repeated="5"/>
          <table:table-cell table:style-name="ce425" table:number-columns-repeated="12"/>
          <table:table-cell table:number-columns-repeated="16357"/>
        </table:table-row>
        <table:table-row table:style-name="ro21">
          <table:table-cell table:style-name="ce307" office:value-type="string" calcext:value-type="string">
            <text:p>COK</text:p>
          </table:table-cell>
          <table:table-cell table:style-name="ce611" office:value-type="percentage" office:value="0.2" calcext:value-type="percentage">
            <text:p>20 %</text:p>
          </table:table-cell>
          <table:table-cell table:style-name="ce428" table:number-columns-repeated="5"/>
          <table:table-cell table:style-name="ce429"/>
          <table:table-cell table:style-name="ce429" office:value-type="string" calcext:value-type="string">
            <text:p>Servicio a la deuda</text:p>
          </table:table-cell>
          <table:table-cell table:style-name="ce428"/>
          <table:table-cell table:style-name="ce428" table:formula="of:=-[$FINANCIAMIENT.B53]" office:value-type="float" office:value="-5388.86178313251" calcext:value-type="float">
            <text:p><text:s/>(5,388.86)</text:p>
          </table:table-cell>
          <table:table-cell table:style-name="ce428" table:formula="of:=-[$FINANCIAMIENT.C53]" office:value-type="float" office:value="-0" calcext:value-type="float">
            <text:p><text:s/>- <text:s text:c="2"/></text:p>
          </table:table-cell>
          <table:table-cell table:style-name="ce428" table:formula="of:=-[$FINANCIAMIENT.D53]" office:value-type="float" office:value="-0" calcext:value-type="float">
            <text:p><text:s/>- <text:s text:c="2"/></text:p>
          </table:table-cell>
          <table:table-cell table:style-name="ce428" table:formula="of:=-[$FINANCIAMIENT.E105]" office:value-type="float" office:value="-0" calcext:value-type="float">
            <text:p><text:s/>- <text:s text:c="2"/></text:p>
          </table:table-cell>
          <table:table-cell table:style-name="ce428" table:formula="of:=-[$FINANCIAMIENT.F105]" office:value-type="float" office:value="-0" calcext:value-type="float">
            <text:p><text:s/>- <text:s text:c="2"/></text:p>
          </table:table-cell>
          <table:table-cell/>
          <table:table-cell table:style-name="ce425" table:number-columns-repeated="11"/>
          <table:table-cell table:number-columns-repeated="16357"/>
        </table:table-row>
        <table:table-row table:style-name="ro21">
          <table:table-cell table:style-name="ce307" office:value-type="string" calcext:value-type="string">
            <text:p>TASA DE DESCUENTO</text:p>
          </table:table-cell>
          <table:table-cell table:style-name="ce612" table:formula="of:=[$FINANCIAMIENT.B42]" office:value-type="percentage" office:value="0.15" calcext:value-type="percentage">
            <text:p>15 %</text:p>
          </table:table-cell>
          <table:table-cell table:style-name="ce429"/>
          <table:table-cell table:style-name="ce307" office:value-type="string" calcext:value-type="string">
            <text:p>WACC</text:p>
          </table:table-cell>
          <table:table-cell table:style-name="ce634" table:formula="of:=(([$FINANCIAMIENT.B35])/([$FINANCIAMIENT.B37])*[.B32]*(1-28%))+[$FINANCIAMIENT.B36]/[$FINANCIAMIENT.B37]*[$'FLUJO DE CAJA '.B31]" office:value-type="percentage" office:value="0.197079016694989" calcext:value-type="percentage">
            <text:p>19.71 %</text:p>
          </table:table-cell>
          <table:table-cell table:style-name="ce636"/>
          <table:table-cell table:style-name="ce429" table:number-columns-repeated="2"/>
          <table:table-cell table:style-name="ce429" office:value-type="string" calcext:value-type="string">
            <text:p>Escudo Fiscal Tributario</text:p>
          </table:table-cell>
          <table:table-cell table:style-name="ce428"/>
          <table:table-cell table:style-name="ce428" table:formula="of:=[$FINANCIAMIENT.B55]" office:value-type="float" office:value="116.658534939754" calcext:value-type="float">
            <text:p><text:s/>116.66 </text:p>
          </table:table-cell>
          <table:table-cell table:style-name="ce428" table:formula="of:=[$FINANCIAMIENT.C55]" office:value-type="float" office:value="0" calcext:value-type="float">
            <text:p><text:s/>- <text:s text:c="2"/></text:p>
          </table:table-cell>
          <table:table-cell table:style-name="ce428" table:formula="of:=[$FINANCIAMIENT.D55]" office:value-type="float" office:value="0" calcext:value-type="float">
            <text:p><text:s/>- <text:s text:c="2"/></text:p>
          </table:table-cell>
          <table:table-cell table:style-name="ce428" table:formula="of:=[$FINANCIAMIENT.E107]" office:value-type="float" office:value="0" calcext:value-type="float">
            <text:p><text:s/>- <text:s text:c="2"/></text:p>
          </table:table-cell>
          <table:table-cell table:style-name="ce428" table:formula="of:=[$FINANCIAMIENT.F107]" office:value-type="float" office:value="0" calcext:value-type="float">
            <text:p><text:s/>- <text:s text:c="2"/></text:p>
          </table:table-cell>
          <table:table-cell/>
          <table:table-cell table:style-name="ce425" table:number-columns-repeated="11"/>
          <table:table-cell table:number-columns-repeated="16357"/>
        </table:table-row>
        <table:table-row table:style-name="ro21">
          <table:table-cell table:style-name="ce429"/>
          <table:table-cell table:style-name="ce610"/>
          <table:table-cell table:style-name="ce429" table:number-columns-repeated="2"/>
          <table:table-cell/>
          <table:table-cell table:style-name="ce429" table:number-columns-repeated="3"/>
          <table:table-cell table:style-name="ce639" office:value-type="string" calcext:value-type="string">
            <text:p>FLUJO DE CAJA FINANCIERO</text:p>
          </table:table-cell>
          <table:table-cell table:style-name="ce642" table:formula="of:=SUM([.J29:.J32])" office:value-type="float" office:value="-152481.215045237" calcext:value-type="float">
            <text:p><text:s/>(152,481.22)</text:p>
          </table:table-cell>
          <table:table-cell table:style-name="ce642" table:formula="of:=SUM([.K29:.K32])" office:value-type="float" office:value="4482.78407206445" calcext:value-type="float">
            <text:p><text:s/>4,482.78 </text:p>
          </table:table-cell>
          <table:table-cell table:style-name="ce642" table:formula="of:=SUM([.L29:.L32])" office:value-type="float" office:value="62235.9832299337" calcext:value-type="float">
            <text:p><text:s/>62,235.98 </text:p>
          </table:table-cell>
          <table:table-cell table:style-name="ce642" table:formula="of:=SUM([.M29:.M32])" office:value-type="float" office:value="62030.7010263657" calcext:value-type="float">
            <text:p><text:s/>62,030.70 </text:p>
          </table:table-cell>
          <table:table-cell table:style-name="ce642" table:formula="of:=SUM([.N29:.N32])" office:value-type="float" office:value="61784.362382084" calcext:value-type="float">
            <text:p><text:s/>61,784.36 </text:p>
          </table:table-cell>
          <table:table-cell table:style-name="ce642" table:formula="of:=SUM([.O29:.O32])" office:value-type="float" office:value="215833.624105031" calcext:value-type="float">
            <text:p><text:s/>215,833.62 </text:p>
          </table:table-cell>
          <table:table-cell/>
          <table:table-cell table:style-name="ce425" table:number-columns-repeated="11"/>
          <table:table-cell table:number-columns-repeated="16357"/>
        </table:table-row>
        <table:table-row table:style-name="ro21">
          <table:table-cell table:style-name="ce307" office:value-type="string" calcext:value-type="string">
            <text:p>VANE</text:p>
          </table:table-cell>
          <table:table-cell table:style-name="ce613" table:formula="of:=NPV([.E32];[.C23:.G23])+[.B23]" office:value-type="float" office:value="50738.266689428" calcext:value-type="float">
            <text:p>S/. 50,738.27</text:p>
          </table:table-cell>
          <table:table-cell table:style-name="ce630"/>
          <table:table-cell table:style-name="ce633" table:number-columns-repeated="2"/>
          <table:table-cell table:style-name="ce637"/>
          <table:table-cell table:style-name="ce636"/>
          <table:table-cell table:style-name="ce429"/>
          <table:table-cell table:number-columns-repeated="8"/>
          <table:table-cell table:style-name="ce425" table:number-columns-repeated="11"/>
          <table:table-cell table:number-columns-repeated="16357"/>
        </table:table-row>
        <table:table-row table:style-name="ro21">
          <table:table-cell table:style-name="ce307" office:value-type="string" calcext:value-type="string">
            <text:p>VANF</text:p>
          </table:table-cell>
          <table:table-cell table:style-name="ce613" table:formula="of:=+[.B27]+NPV([.B31];[.C27:.G27])" office:value-type="float" office:value="49463.6575488383" calcext:value-type="float">
            <text:p>S/. 49,463.66</text:p>
          </table:table-cell>
          <table:table-cell table:style-name="ce630"/>
          <table:table-cell table:style-name="ce429" table:number-columns-repeated="4"/>
          <table:table-cell table:style-name="ce429" office:value-type="float" office:value="4050.000002528" calcext:value-type="float">
            <text:p>4050.000002528</text:p>
          </table:table-cell>
          <table:table-cell office:value-type="float" office:value="4050" calcext:value-type="float">
            <text:p>4050</text:p>
          </table:table-cell>
          <table:table-cell table:number-columns-repeated="7"/>
          <table:table-cell table:style-name="ce425" table:number-columns-repeated="11"/>
          <table:table-cell table:number-columns-repeated="16357"/>
        </table:table-row>
        <table:table-row table:style-name="ro21">
          <table:table-cell table:style-name="ce307" office:value-type="string" calcext:value-type="string">
            <text:p>TIRE</text:p>
          </table:table-cell>
          <table:table-cell table:style-name="ce614" table:formula="of:=IRR([.B23:.G23])" office:value-type="percentage" office:value="0.292018786595351" calcext:value-type="percentage">
            <text:p>29.20 %</text:p>
          </table:table-cell>
          <table:table-cell table:style-name="ce429"/>
          <table:table-cell/>
          <table:table-cell table:style-name="ce635"/>
          <table:table-cell table:style-name="ce429" table:number-columns-repeated="2"/>
          <table:table-cell table:style-name="ce429" office:value-type="float" office:value="156465.140377955" calcext:value-type="float">
            <text:p>156465.140377955</text:p>
          </table:table-cell>
          <table:table-cell office:value-type="float" office:value="156465.14" calcext:value-type="float">
            <text:p>156465.14</text:p>
          </table:table-cell>
          <table:table-cell table:number-columns-repeated="7"/>
          <table:table-cell table:style-name="ce425" table:number-columns-repeated="11"/>
          <table:table-cell table:number-columns-repeated="16357"/>
        </table:table-row>
        <table:table-row table:style-name="ro21">
          <table:table-cell table:style-name="ce307" office:value-type="string" calcext:value-type="string">
            <text:p>TIRF</text:p>
          </table:table-cell>
          <table:table-cell table:style-name="ce614" table:formula="of:=IRR([.B27:.G27])" office:value-type="percentage" office:value="0.294142931080383" calcext:value-type="percentage">
            <text:p>29.41 %</text:p>
          </table:table-cell>
          <table:table-cell table:style-name="ce429"/>
          <table:table-cell/>
          <table:table-cell table:style-name="ce429" table:number-columns-repeated="3"/>
          <table:table-cell table:style-name="ce460" table:formula="of:=SUM([.H35:.H36])" office:value-type="float" office:value="160515.140380483" calcext:value-type="float">
            <text:p>160515.140380483</text:p>
          </table:table-cell>
          <table:table-cell table:formula="of:=SUM([.I35:.I36])" office:value-type="float" office:value="160515.14" calcext:value-type="float">
            <text:p>160515.14</text:p>
          </table:table-cell>
          <table:table-cell table:number-columns-repeated="7"/>
          <table:table-cell table:style-name="ce425" table:number-columns-repeated="11"/>
          <table:table-cell table:number-columns-repeated="16357"/>
        </table:table-row>
        <table:table-row table:style-name="ro21">
          <table:table-cell table:style-name="ce429"/>
          <table:table-cell table:style-name="ce615"/>
          <table:table-cell table:style-name="ce429" table:number-columns-repeated="6"/>
          <table:table-cell table:number-columns-repeated="8"/>
          <table:table-cell table:style-name="ce425" table:number-columns-repeated="11"/>
          <table:table-cell table:number-columns-repeated="16357"/>
        </table:table-row>
        <table:table-row table:style-name="ro21">
          <table:table-cell table:style-name="ce429"/>
          <table:table-cell table:style-name="ce616" office:value-type="string" calcext:value-type="string">
            <text:p>INDICADOR BENEFICIO/COSTO</text:p>
          </table:table-cell>
          <table:table-cell table:style-name="ce429" table:number-columns-repeated="5"/>
          <table:table-cell table:style-name="ce460" table:formula="of:=([.H35]/([.H37]*[.B32]))*(1-0.28)+([.H36]/[.H37])*[.B31]" office:value-type="float" office:value="0.316063817827206" calcext:value-type="float">
            <text:p>0.316063817827206</text:p>
          </table:table-cell>
          <table:table-cell table:formula="of:=([.I35]/[.I37])*[.B32]*(1-0.28)+([.I36]/[.I37])*[.B31]" office:value-type="float" office:value="0.197678723639403" calcext:value-type="float">
            <text:p>0.197678723639403</text:p>
          </table:table-cell>
          <table:table-cell table:number-columns-repeated="7"/>
          <table:table-cell table:style-name="ce425" table:number-columns-repeated="11"/>
          <table:table-cell table:number-columns-repeated="16357"/>
        </table:table-row>
        <table:table-row table:style-name="ro29">
          <table:table-cell table:style-name="ce598" office:value-type="string" calcext:value-type="string" table:number-columns-spanned="1" table:number-rows-spanned="2">
            <text:p>INDICE BENEFICIO/COSTO</text:p>
          </table:table-cell>
          <table:table-cell table:style-name="ce617" office:value-type="string" calcext:value-type="string" table:number-columns-spanned="6" table:number-rows-spanned="1">
            <text:p>AÑOS</text:p>
          </table:table-cell>
          <table:covered-table-cell table:number-columns-repeated="5" table:style-name="ce617"/>
          <table:table-cell table:style-name="ce429"/>
          <table:table-cell table:formula="of:=(([.I35])/([.I37])*[.B32]*(1-28%))+[.I36]/[.I37]*[.B31]" office:value-type="float" office:value="0.197678723639403" calcext:value-type="float">
            <text:p>0.197678723639403</text:p>
          </table:table-cell>
          <table:table-cell table:number-columns-repeated="7"/>
          <table:table-cell table:style-name="ce425" table:number-columns-repeated="11"/>
          <table:table-cell table:number-columns-repeated="16357"/>
        </table:table-row>
        <table:table-row table:style-name="ro21">
          <table:covered-table-cell table:style-name="ce598"/>
          <table:table-cell table:style-name="ce618" office:value-type="float" office:value="0" calcext:value-type="float">
            <text:p>0</text:p>
          </table:table-cell>
          <table:table-cell table:style-name="ce617" office:value-type="float" office:value="1" calcext:value-type="float">
            <text:p>1</text:p>
          </table:table-cell>
          <table:table-cell table:style-name="ce617" office:value-type="float" office:value="2" calcext:value-type="float">
            <text:p>2</text:p>
          </table:table-cell>
          <table:table-cell table:style-name="ce617" office:value-type="float" office:value="3" calcext:value-type="float">
            <text:p>3</text:p>
          </table:table-cell>
          <table:table-cell table:style-name="ce617" office:value-type="float" office:value="4" calcext:value-type="float">
            <text:p>4</text:p>
          </table:table-cell>
          <table:table-cell table:style-name="ce617" office:value-type="float" office:value="5" calcext:value-type="float">
            <text:p>5</text:p>
          </table:table-cell>
          <table:table-cell table:style-name="ce429"/>
          <table:table-cell table:number-columns-repeated="8"/>
          <table:table-cell table:style-name="ce425" table:number-columns-repeated="11"/>
          <table:table-cell table:number-columns-repeated="16357"/>
        </table:table-row>
        <table:table-row table:style-name="ro21">
          <table:table-cell table:style-name="ce307" office:value-type="string" calcext:value-type="string">
            <text:p>BENEFICIOS</text:p>
          </table:table-cell>
          <table:table-cell table:style-name="ce619" table:formula="of:=[.B9]" office:value-type="float" office:value="0" calcext:value-type="float">
            <text:p>0</text:p>
          </table:table-cell>
          <table:table-cell table:style-name="ce427" table:formula="of:=[.C9]" office:value-type="float" office:value="61928.2925700631" calcext:value-type="float">
            <text:p><text:s/>61,928.29 </text:p>
          </table:table-cell>
          <table:table-cell table:style-name="ce427" table:formula="of:=[.D9]" office:value-type="float" office:value="205986.528" calcext:value-type="float">
            <text:p><text:s/>205,986.53 </text:p>
          </table:table-cell>
          <table:table-cell table:style-name="ce427" table:formula="of:=[.E9]" office:value-type="float" office:value="205986.528" calcext:value-type="float">
            <text:p><text:s/>205,986.53 </text:p>
          </table:table-cell>
          <table:table-cell table:style-name="ce427" table:formula="of:=[.F9]" office:value-type="float" office:value="205986.528" calcext:value-type="float">
            <text:p><text:s/>205,986.53 </text:p>
          </table:table-cell>
          <table:table-cell table:style-name="ce427" table:formula="of:=[.G9]" office:value-type="float" office:value="393184.882022515" calcext:value-type="float">
            <text:p><text:s/>393,184.88 </text:p>
          </table:table-cell>
          <table:table-cell table:style-name="ce425"/>
          <table:table-cell table:number-columns-repeated="8"/>
          <table:table-cell table:style-name="ce425" table:number-columns-repeated="11"/>
          <table:table-cell table:number-columns-repeated="16357"/>
        </table:table-row>
        <table:table-row table:style-name="ro21">
          <table:table-cell table:style-name="ce307" office:value-type="string" calcext:value-type="string">
            <text:p>COSTOS</text:p>
          </table:table-cell>
          <table:table-cell table:style-name="ce605" table:formula="of:=[.B17]" office:value-type="float" office:value="-157481.215045237" calcext:value-type="float">
            <text:p><text:s/>(157,481.22)</text:p>
          </table:table-cell>
          <table:table-cell table:style-name="ce427" table:formula="of:=[.C13]" office:value-type="float" office:value="-52173.3052498058" calcext:value-type="float">
            <text:p><text:s/>(52,173.31)</text:p>
          </table:table-cell>
          <table:table-cell table:style-name="ce427" table:formula="of:=[.D13]" office:value-type="float" office:value="-143750.544770066" calcext:value-type="float">
            <text:p><text:s/>(143,750.54)</text:p>
          </table:table-cell>
          <table:table-cell table:style-name="ce427" table:formula="of:=[.E13]" office:value-type="float" office:value="-143955.826973634" calcext:value-type="float">
            <text:p><text:s/>(143,955.83)</text:p>
          </table:table-cell>
          <table:table-cell table:style-name="ce427" table:formula="of:=[.F13]" office:value-type="float" office:value="-144202.165617916" calcext:value-type="float">
            <text:p><text:s/>(144,202.17)</text:p>
          </table:table-cell>
          <table:table-cell table:style-name="ce427" table:formula="of:=[.G13]" office:value-type="float" office:value="-170986.141058851" calcext:value-type="float">
            <text:p><text:s/>(170,986.14)</text:p>
          </table:table-cell>
          <table:table-cell table:style-name="ce425"/>
          <table:table-cell table:number-columns-repeated="8"/>
          <table:table-cell table:style-name="ce425" table:number-columns-repeated="11"/>
          <table:table-cell table:number-columns-repeated="16357"/>
        </table:table-row>
        <table:table-row table:style-name="ro21">
          <table:table-cell table:style-name="ce307" office:value-type="string" calcext:value-type="string">
            <text:p>FACTOR DE ACTUALIZACION</text:p>
          </table:table-cell>
          <table:table-cell table:style-name="ce620" table:formula="of:=1/(1+[.$B$32])^[.B41]" office:value-type="float" office:value="1" calcext:value-type="float">
            <text:p>1.0000000</text:p>
          </table:table-cell>
          <table:table-cell table:style-name="ce631" table:formula="of:=1/(1+[.$E$32])^[.C41]" office:value-type="float" office:value="0.835366743592997" calcext:value-type="float">
            <text:p><text:s/>0.835367 </text:p>
          </table:table-cell>
          <table:table-cell table:style-name="ce631" table:formula="of:=1/(1+[.$E$32])^[.D41]" office:value-type="float" office:value="0.697837596301168" calcext:value-type="float">
            <text:p><text:s/>0.697838 </text:p>
          </table:table-cell>
          <table:table-cell table:style-name="ce631" table:formula="of:=1/(1+[.$E$32])^[.E41]" office:value-type="float" office:value="0.582950320378872" calcext:value-type="float">
            <text:p><text:s/>0.582950 </text:p>
          </table:table-cell>
          <table:table-cell table:style-name="ce631" table:formula="of:=1/(1+[.$E$32])^[.F41]" office:value-type="float" office:value="0.486977310811392" calcext:value-type="float">
            <text:p><text:s/>0.486977 </text:p>
          </table:table-cell>
          <table:table-cell table:style-name="ce631" table:formula="of:=1/(1+[.$E$32])^[.G41]" office:value-type="float" office:value="0.406804650336188" calcext:value-type="float">
            <text:p><text:s/>0.406805 </text:p>
          </table:table-cell>
          <table:table-cell table:style-name="ce425"/>
          <table:table-cell table:number-columns-repeated="8"/>
          <table:table-cell table:style-name="ce425" table:number-columns-repeated="11"/>
          <table:table-cell table:number-columns-repeated="16357"/>
        </table:table-row>
        <table:table-row table:style-name="ro21">
          <table:table-cell table:style-name="ce307" office:value-type="string" calcext:value-type="string">
            <text:p>BENEFICIOS ACTUALIZADOS</text:p>
          </table:table-cell>
          <table:table-cell table:style-name="ce619" table:formula="of:=[.B42]*[.B44]" office:value-type="float" office:value="0" calcext:value-type="float">
            <text:p>0</text:p>
          </table:table-cell>
          <table:table-cell table:style-name="ce427" table:formula="of:=[.C42]*[.C44]" office:value-type="float" office:value="51732.836100528" calcext:value-type="float">
            <text:p><text:s/>51,732.84 </text:p>
          </table:table-cell>
          <table:table-cell table:style-name="ce427" table:formula="of:=[.D42]*[.D44]" office:value-type="float" office:value="143745.143569943" calcext:value-type="float">
            <text:p><text:s/>143,745.14 </text:p>
          </table:table-cell>
          <table:table-cell table:style-name="ce427" table:formula="of:=[.E42]*[.E44]" office:value-type="float" office:value="120079.912491331" calcext:value-type="float">
            <text:p><text:s/>120,079.91 </text:p>
          </table:table-cell>
          <table:table-cell table:style-name="ce427" table:formula="of:=[.F42]*[.F44]" office:value-type="float" office:value="100310.765468816" calcext:value-type="float">
            <text:p><text:s/>100,310.77 </text:p>
          </table:table-cell>
          <table:table-cell table:style-name="ce427" table:formula="of:=[.G42]*[.G44]" office:value-type="float" office:value="159949.438448644" calcext:value-type="float">
            <text:p><text:s/>159,949.44 </text:p>
          </table:table-cell>
          <table:table-cell table:style-name="ce425"/>
          <table:table-cell table:number-columns-repeated="8"/>
          <table:table-cell table:style-name="ce425" table:number-columns-repeated="11"/>
          <table:table-cell table:number-columns-repeated="16357"/>
        </table:table-row>
        <table:table-row table:style-name="ro21">
          <table:table-cell table:style-name="ce307" office:value-type="string" calcext:value-type="string">
            <text:p>COSTOS ACTUALIZADOS</text:p>
          </table:table-cell>
          <table:table-cell table:style-name="ce619" table:formula="of:=[.B43]*[.B44]" office:value-type="float" office:value="-157481.215045237" calcext:value-type="float">
            <text:p>-157481</text:p>
          </table:table-cell>
          <table:table-cell table:style-name="ce427" table:formula="of:=[.C43]*[.C44]" office:value-type="float" office:value="-43583.8441090137" calcext:value-type="float">
            <text:p><text:s/>(43,583.84)</text:p>
          </table:table-cell>
          <table:table-cell table:style-name="ce427" table:formula="of:=[.D43]*[.D44]" office:value-type="float" office:value="-100314.534629327" calcext:value-type="float">
            <text:p><text:s/>(100,314.53)</text:p>
          </table:table-cell>
          <table:table-cell table:style-name="ce427" table:formula="of:=[.E43]*[.E44]" office:value-type="float" office:value="-83919.0954546855" calcext:value-type="float">
            <text:p><text:s/>(83,919.10)</text:p>
          </table:table-cell>
          <table:table-cell table:style-name="ce427" table:formula="of:=[.F43]*[.F44]" office:value-type="float" office:value="-70223.1828257918" calcext:value-type="float">
            <text:p><text:s/>(70,223.18)</text:p>
          </table:table-cell>
          <table:table-cell table:style-name="ce427" table:formula="of:=[.G43]*[.G44]" office:value-type="float" office:value="-69557.9573257798" calcext:value-type="float">
            <text:p><text:s/>(69,557.96)</text:p>
          </table:table-cell>
          <table:table-cell table:style-name="ce425"/>
          <table:table-cell table:number-columns-repeated="8"/>
          <table:table-cell table:style-name="ce425" table:number-columns-repeated="11"/>
          <table:table-cell table:number-columns-repeated="16357"/>
        </table:table-row>
        <table:table-row table:style-name="ro21">
          <table:table-cell table:style-name="ce307" office:value-type="string" calcext:value-type="string">
            <text:p>FLUJO ECONOMICO ACTUALIZADO</text:p>
          </table:table-cell>
          <table:table-cell table:style-name="ce605" table:formula="of:=[.B45]+[.B46]" office:value-type="float" office:value="-157481.215045237" calcext:value-type="float">
            <text:p><text:s/>(157,481.22)</text:p>
          </table:table-cell>
          <table:table-cell table:style-name="ce427" table:formula="of:=[.C45]+[.C46]" office:value-type="float" office:value="8148.99199151425" calcext:value-type="float">
            <text:p><text:s/>8,148.99 </text:p>
          </table:table-cell>
          <table:table-cell table:style-name="ce427" table:formula="of:=[.D45]+[.D46]" office:value-type="float" office:value="43430.6089406168" calcext:value-type="float">
            <text:p><text:s/>43,430.61 </text:p>
          </table:table-cell>
          <table:table-cell table:style-name="ce427" table:formula="of:=[.E45]+[.E46]" office:value-type="float" office:value="36160.8170366459" calcext:value-type="float">
            <text:p><text:s/>36,160.82 </text:p>
          </table:table-cell>
          <table:table-cell table:style-name="ce427" table:formula="of:=[.F45]+[.F46]" office:value-type="float" office:value="30087.5826430238" calcext:value-type="float">
            <text:p><text:s/>30,087.58 </text:p>
          </table:table-cell>
          <table:table-cell table:style-name="ce427" table:formula="of:=[.G45]+[.G46]" office:value-type="float" office:value="90391.4811228646" calcext:value-type="float">
            <text:p><text:s/>90,391.48 </text:p>
          </table:table-cell>
          <table:table-cell table:style-name="ce425"/>
          <table:table-cell table:number-columns-repeated="8"/>
          <table:table-cell table:style-name="ce425" table:number-columns-repeated="11"/>
          <table:table-cell table:number-columns-repeated="16357"/>
        </table:table-row>
        <table:table-row table:style-name="ro21" table:visibility="collapse">
          <table:table-cell table:style-name="ce429"/>
          <table:table-cell table:style-name="ce621"/>
          <table:table-cell table:style-name="ce632" table:number-columns-repeated="5"/>
          <table:table-cell table:style-name="ce425" table:number-columns-repeated="20"/>
          <table:table-cell table:number-columns-repeated="16357"/>
        </table:table-row>
        <table:table-row table:style-name="ro21">
          <table:table-cell table:style-name="ce304" office:value-type="string" calcext:value-type="string">
            <text:p>INDICADOR BENEFICIO/COSTO</text:p>
          </table:table-cell>
          <table:table-cell table:style-name="ce622" table:formula="of:=SUM([.B45:.G45])/-SUM([.B46:.G46])" office:value-type="float" office:value="1.09662962439138" calcext:value-type="float">
            <text:p>1.0966</text:p>
          </table:table-cell>
          <table:table-cell table:style-name="ce547" table:number-columns-repeated="5"/>
          <table:table-cell table:number-columns-repeated="3"/>
          <table:table-cell table:style-name="ce462"/>
          <table:table-cell table:number-columns-repeated="16373"/>
        </table:table-row>
        <table:table-row table:style-name="ro21">
          <table:table-cell table:style-name="ce304" office:value-type="string" calcext:value-type="string">
            <text:p>INDICE DE RENTABILIDAD</text:p>
          </table:table-cell>
          <table:table-cell table:style-name="ce623" table:formula="of:=SUM([.C47:.G47])/-[.B43]" office:value-type="float" office:value="1.32218615201091" calcext:value-type="float">
            <text:p>1.322</text:p>
          </table:table-cell>
          <table:table-cell table:style-name="ce547" table:number-columns-repeated="5"/>
          <table:table-cell table:number-columns-repeated="3"/>
          <table:table-cell table:style-name="ce462"/>
          <table:table-cell table:number-columns-repeated="16373"/>
        </table:table-row>
        <table:table-row table:style-name="ro21" table:number-rows-repeated="2">
          <table:table-cell table:style-name="ce283"/>
          <table:table-cell table:style-name="ce624"/>
          <table:table-cell table:style-name="ce547" table:number-columns-repeated="5"/>
          <table:table-cell table:number-columns-repeated="16377"/>
        </table:table-row>
        <table:table-row table:style-name="ro21">
          <table:table-cell table:style-name="ce429"/>
          <table:table-cell table:style-name="ce624"/>
          <table:table-cell table:style-name="ce547" table:number-columns-repeated="5"/>
          <table:table-cell table:number-columns-repeated="16377"/>
        </table:table-row>
        <table:table-row table:style-name="ro21">
          <table:table-cell table:style-name="ce429"/>
          <table:table-cell table:style-name="ce624"/>
          <table:table-cell table:style-name="ce547" table:number-columns-repeated="5"/>
          <table:table-cell table:number-columns-repeated="16377"/>
        </table:table-row>
        <table:table-row table:style-name="ro21">
          <table:table-cell table:style-name="ce429"/>
          <table:table-cell table:style-name="ce624"/>
          <table:table-cell table:style-name="ce547" table:number-columns-repeated="5"/>
          <table:table-cell table:number-columns-repeated="16377"/>
        </table:table-row>
        <table:table-row table:style-name="ro21">
          <table:table-cell table:style-name="ce429"/>
          <table:table-cell table:style-name="ce624"/>
          <table:table-cell table:style-name="ce547" table:number-columns-repeated="5"/>
          <table:table-cell table:number-columns-repeated="16377"/>
        </table:table-row>
        <table:table-row table:style-name="ro21">
          <table:table-cell table:style-name="ce429"/>
          <table:table-cell table:style-name="ce625"/>
          <table:table-cell table:style-name="ce547" table:number-columns-repeated="5"/>
          <table:table-cell table:number-columns-repeated="16377"/>
        </table:table-row>
        <table:table-row table:style-name="ro21">
          <table:table-cell table:style-name="ce429"/>
          <table:table-cell table:style-name="ce624"/>
          <table:table-cell table:style-name="ce547" table:number-columns-repeated="5"/>
          <table:table-cell table:number-columns-repeated="16377"/>
        </table:table-row>
        <table:table-row table:style-name="ro21">
          <table:table-cell table:style-name="ce601"/>
          <table:table-cell table:number-columns-repeated="16383"/>
        </table:table-row>
        <table:table-row table:style-name="ro21" table:number-rows-repeated="1048516">
          <table:table-cell table:number-columns-repeated="16384"/>
        </table:table-row>
        <table:table-row table:style-name="ro21">
          <table:table-cell table:number-columns-repeated="16384"/>
        </table:table-row>
        <table:named-expressions>
          <table:named-range table:name="_xlnm.Print_Area" table:base-cell-address="$POBLACION.$A$1" table:cell-range-address="$'FLUJO DE CAJA '.$A$6:.$G$51" table:range-usable-as="print-range"/>
        </table:named-expressions>
      </table:table>
      <table:table table:name="ANALISIS SESIB" table:style-name="ta21" table:print-ranges="'ANALISIS SESIB'.F1:'ANALISIS SESIB'.K22">
        <table:table-column table:style-name="co49" table:default-cell-style-name="ce114"/>
        <table:table-column table:style-name="co83" table:default-cell-style-name="ce114"/>
        <table:table-column table:style-name="co21" table:default-cell-style-name="ce114"/>
        <table:table-column table:style-name="co103" table:default-cell-style-name="ce114"/>
        <table:table-column table:style-name="co1" table:default-cell-style-name="ce114"/>
        <table:table-column table:style-name="co104" table:default-cell-style-name="ce114"/>
        <table:table-column table:style-name="co1" table:default-cell-style-name="ce114"/>
        <table:table-column table:style-name="co39" table:default-cell-style-name="ce114"/>
        <table:table-column table:style-name="co1" table:default-cell-style-name="ce114"/>
        <table:table-column table:style-name="co105" table:default-cell-style-name="ce114"/>
        <table:table-column table:style-name="co1" table:number-columns-repeated="3" table:default-cell-style-name="ce114"/>
        <table:table-column table:style-name="co99" table:default-cell-style-name="ce114"/>
        <table:table-column table:style-name="co37" table:default-cell-style-name="ce114"/>
        <table:table-column table:style-name="co106" table:default-cell-style-name="ce114"/>
        <table:table-column table:style-name="co1" table:default-cell-style-name="ce114"/>
        <table:table-column table:style-name="co107" table:default-cell-style-name="ce114"/>
        <table:table-column table:style-name="co92" table:default-cell-style-name="ce114"/>
        <table:table-column table:style-name="co58" table:default-cell-style-name="ce114"/>
        <table:table-column table:style-name="co9" table:number-columns-repeated="4" table:default-cell-style-name="ce114"/>
        <table:table-column table:style-name="co1" table:number-columns-repeated="2" table:default-cell-style-name="ce114"/>
        <table:table-column table:style-name="co107" table:default-cell-style-name="ce114"/>
        <table:table-column table:style-name="co108" table:default-cell-style-name="ce114"/>
        <table:table-column table:style-name="co1" table:default-cell-style-name="ce114"/>
        <table:table-column table:style-name="co9" table:number-columns-repeated="4" table:default-cell-style-name="ce114"/>
        <table:table-column table:style-name="co1" table:number-columns-repeated="2" table:default-cell-style-name="ce114"/>
        <table:table-column table:style-name="co107" table:default-cell-style-name="ce114"/>
        <table:table-column table:style-name="co92" table:default-cell-style-name="ce114"/>
        <table:table-column table:style-name="co58" table:default-cell-style-name="ce114"/>
        <table:table-column table:style-name="co9" table:number-columns-repeated="4" table:default-cell-style-name="ce114"/>
        <table:table-column table:style-name="co1" table:number-columns-repeated="2" table:default-cell-style-name="ce114"/>
        <table:table-column table:style-name="co107" table:default-cell-style-name="ce114"/>
        <table:table-column table:style-name="co92" table:default-cell-style-name="ce114"/>
        <table:table-column table:style-name="co58" table:default-cell-style-name="ce114"/>
        <table:table-column table:style-name="co9" table:number-columns-repeated="4" table:default-cell-style-name="ce114"/>
        <table:table-column table:style-name="co36" table:default-cell-style-name="ce114"/>
        <table:table-column table:style-name="co1" table:default-cell-style-name="ce114"/>
        <table:table-column table:style-name="co107" table:default-cell-style-name="ce114"/>
        <table:table-column table:style-name="co92" table:default-cell-style-name="ce114"/>
        <table:table-column table:style-name="co58" table:default-cell-style-name="ce114"/>
        <table:table-column table:style-name="co9" table:number-columns-repeated="4" table:default-cell-style-name="ce114"/>
        <table:table-column table:style-name="co36" table:default-cell-style-name="ce114"/>
        <table:table-column table:style-name="co1" table:default-cell-style-name="ce114"/>
        <table:table-column table:style-name="co107" table:default-cell-style-name="ce114"/>
        <table:table-column table:style-name="co92" table:default-cell-style-name="ce114"/>
        <table:table-column table:style-name="co58" table:default-cell-style-name="ce114"/>
        <table:table-column table:style-name="co9" table:number-columns-repeated="4" table:default-cell-style-name="ce114"/>
        <table:table-column table:style-name="co36" table:default-cell-style-name="ce114"/>
        <table:table-column table:style-name="co1" table:default-cell-style-name="ce114"/>
        <table:table-column table:style-name="co107" table:default-cell-style-name="ce114"/>
        <table:table-column table:style-name="co92" table:default-cell-style-name="ce114"/>
        <table:table-column table:style-name="co58" table:default-cell-style-name="ce114"/>
        <table:table-column table:style-name="co9" table:number-columns-repeated="4" table:default-cell-style-name="ce114"/>
        <table:table-column table:style-name="co36" table:default-cell-style-name="ce114"/>
        <table:table-column table:style-name="co1" table:number-columns-repeated="178" table:default-cell-style-name="ce114"/>
        <table:table-column table:style-name="co12" table:number-columns-repeated="16127"/>
        <table:table-row table:style-name="ro46">
          <table:table-cell table:style-name="ce646" office:value-type="string" calcext:value-type="string">
            <text:p>WACC</text:p>
          </table:table-cell>
          <table:table-cell table:style-name="ce653" table:formula="of:=[$'FLUJO DE CAJA '.E32]" office:value-type="percentage" office:value="0.197079016694989" calcext:value-type="percentage">
            <text:p>19.71 %</text:p>
          </table:table-cell>
          <table:table-cell table:number-columns-repeated="4"/>
          <table:table-cell table:style-name="ce646" office:value-type="string" calcext:value-type="string">
            <text:p>COK</text:p>
          </table:table-cell>
          <table:table-cell table:style-name="ce653" table:formula="of:=[$'FLUJO DE CAJA '.B31]" office:value-type="percentage" office:value="0.2" calcext:value-type="percentage">
            <text:p>20.00 %</text:p>
          </table:table-cell>
          <table:table-cell table:number-columns-repeated="9"/>
          <table:table-cell table:style-name="ce681" office:value-type="string" calcext:value-type="string" table:number-columns-spanned="7" table:number-rows-spanned="1">
            <text:p>FLUJO DE CAJA ECONÓMICO Y FINANCIERO</text:p>
          </table:table-cell>
          <table:covered-table-cell table:number-columns-repeated="6" table:style-name="ce681"/>
          <table:table-cell table:number-columns-repeated="2"/>
          <table:table-cell table:style-name="ce681" office:value-type="string" calcext:value-type="string" table:number-columns-spanned="7" table:number-rows-spanned="1">
            <text:p>FLUJO DE CAJA ECONÓMICO Y FINANCIERO</text:p>
          </table:table-cell>
          <table:covered-table-cell table:number-columns-repeated="6" table:style-name="ce681"/>
          <table:table-cell table:number-columns-repeated="2"/>
          <table:table-cell table:style-name="ce681" office:value-type="string" calcext:value-type="string" table:number-columns-spanned="7" table:number-rows-spanned="1">
            <text:p>FLUJO DE CAJA ECONÓMICO Y FINANCIERO</text:p>
          </table:table-cell>
          <table:covered-table-cell table:number-columns-repeated="6" table:style-name="ce681"/>
          <table:table-cell table:number-columns-repeated="2"/>
          <table:table-cell table:style-name="ce681" office:value-type="string" calcext:value-type="string" table:number-columns-spanned="7" table:number-rows-spanned="1">
            <text:p>FLUJO DE CAJA ECONÓMICO Y FINANCIERO</text:p>
          </table:table-cell>
          <table:covered-table-cell table:number-columns-repeated="6" table:style-name="ce681"/>
          <table:table-cell table:number-columns-repeated="2"/>
          <table:table-cell table:style-name="ce681" office:value-type="string" calcext:value-type="string" table:number-columns-spanned="7" table:number-rows-spanned="1">
            <text:p>FLUJO DE CAJA ECONÓMICO Y FINANCIERO</text:p>
          </table:table-cell>
          <table:covered-table-cell table:number-columns-repeated="6" table:style-name="ce681"/>
          <table:table-cell table:number-columns-repeated="2"/>
          <table:table-cell table:style-name="ce681" office:value-type="string" calcext:value-type="string" table:number-columns-spanned="7" table:number-rows-spanned="1">
            <text:p>FLUJO DE CAJA ECONÓMICO Y FINANCIERO</text:p>
          </table:table-cell>
          <table:covered-table-cell table:number-columns-repeated="6" table:style-name="ce681"/>
          <table:table-cell table:number-columns-repeated="2"/>
          <table:table-cell table:style-name="ce681" office:value-type="string" calcext:value-type="string" table:number-columns-spanned="7" table:number-rows-spanned="1">
            <text:p>FLUJO DE CAJA ECONÓMICO Y FINANCIERO</text:p>
          </table:table-cell>
          <table:covered-table-cell table:number-columns-repeated="6" table:style-name="ce681"/>
          <table:table-cell table:number-columns-repeated="179"/>
        </table:table-row>
        <table:table-row table:style-name="ro14">
          <table:table-cell table:style-name="ce647" table:number-columns-spanned="4" table:number-rows-spanned="1"/>
          <table:covered-table-cell table:number-columns-repeated="3" table:style-name="ce647"/>
          <table:table-cell table:number-columns-repeated="2"/>
          <table:table-cell table:style-name="ce647" table:number-columns-spanned="4" table:number-rows-spanned="1"/>
          <table:covered-table-cell table:number-columns-repeated="3" table:style-name="ce647"/>
          <table:table-cell table:number-columns-repeated="7"/>
          <table:table-cell table:style-name="ce681" table:number-columns-spanned="2" table:number-rows-spanned="1"/>
          <table:covered-table-cell table:style-name="ce681"/>
          <table:table-cell table:style-name="ce689" office:value-type="string" calcext:value-type="string">
            <text:p>Producción</text:p>
          </table:table-cell>
          <table:table-cell table:style-name="ce692" table:formula="of:=+[.N3]" office:value-type="percentage" office:value="1" calcext:value-type="percentage">
            <text:p>100 %</text:p>
          </table:table-cell>
          <table:table-cell table:style-name="ce689" office:value-type="string" calcext:value-type="string">
            <text:p>Precio</text:p>
          </table:table-cell>
          <table:table-cell table:style-name="ce692" table:formula="of:=+[.O3]" office:value-type="percentage" office:value="1" calcext:value-type="percentage">
            <text:p>100 %</text:p>
          </table:table-cell>
          <table:table-cell table:style-name="ce460"/>
          <table:table-cell table:number-columns-repeated="2"/>
          <table:table-cell table:style-name="ce681" table:number-columns-spanned="2" table:number-rows-spanned="1"/>
          <table:covered-table-cell table:style-name="ce681"/>
          <table:table-cell table:style-name="ce689" office:value-type="string" calcext:value-type="string">
            <text:p>Producción</text:p>
          </table:table-cell>
          <table:table-cell table:style-name="ce692" table:formula="of:=+[.N15]" office:value-type="percentage" office:value="0.95" calcext:value-type="percentage">
            <text:p>95 %</text:p>
          </table:table-cell>
          <table:table-cell table:style-name="ce689" office:value-type="string" calcext:value-type="string">
            <text:p>Precio</text:p>
          </table:table-cell>
          <table:table-cell table:style-name="ce692" table:formula="of:=+[.O15]" office:value-type="percentage" office:value="1" calcext:value-type="percentage">
            <text:p>100 %</text:p>
          </table:table-cell>
          <table:table-cell table:style-name="ce460"/>
          <table:table-cell table:number-columns-repeated="2"/>
          <table:table-cell table:style-name="ce681" table:number-columns-spanned="2" table:number-rows-spanned="1"/>
          <table:covered-table-cell table:style-name="ce681"/>
          <table:table-cell table:style-name="ce689" office:value-type="string" calcext:value-type="string">
            <text:p>Producción</text:p>
          </table:table-cell>
          <table:table-cell table:style-name="ce692" table:formula="of:=+[.N26]" office:value-type="percentage" office:value="0.9" calcext:value-type="percentage">
            <text:p>90 %</text:p>
          </table:table-cell>
          <table:table-cell table:style-name="ce689" office:value-type="string" calcext:value-type="string">
            <text:p>Precio</text:p>
          </table:table-cell>
          <table:table-cell table:style-name="ce692" table:formula="of:=+[.O26]" office:value-type="percentage" office:value="1" calcext:value-type="percentage">
            <text:p>100 %</text:p>
          </table:table-cell>
          <table:table-cell table:style-name="ce460"/>
          <table:table-cell table:number-columns-repeated="2"/>
          <table:table-cell table:style-name="ce681" table:number-columns-spanned="2" table:number-rows-spanned="1"/>
          <table:covered-table-cell table:style-name="ce681"/>
          <table:table-cell table:style-name="ce689" office:value-type="string" calcext:value-type="string">
            <text:p>Producción</text:p>
          </table:table-cell>
          <table:table-cell table:style-name="ce692" table:formula="of:=+[.N37]" office:value-type="percentage" office:value="0.85" calcext:value-type="percentage">
            <text:p>85 %</text:p>
          </table:table-cell>
          <table:table-cell table:style-name="ce689" office:value-type="string" calcext:value-type="string">
            <text:p>Precio</text:p>
          </table:table-cell>
          <table:table-cell table:style-name="ce692" table:formula="of:=+[.O37]" office:value-type="percentage" office:value="1" calcext:value-type="percentage">
            <text:p>100 %</text:p>
          </table:table-cell>
          <table:table-cell table:style-name="ce460"/>
          <table:table-cell table:number-columns-repeated="2"/>
          <table:table-cell table:style-name="ce681" table:number-columns-spanned="2" table:number-rows-spanned="1"/>
          <table:covered-table-cell table:style-name="ce681"/>
          <table:table-cell table:style-name="ce689" office:value-type="string" calcext:value-type="string">
            <text:p>Producción</text:p>
          </table:table-cell>
          <table:table-cell table:style-name="ce692" table:formula="of:=+[.N48]" office:value-type="percentage" office:value="1" calcext:value-type="percentage">
            <text:p>100 %</text:p>
          </table:table-cell>
          <table:table-cell table:style-name="ce689" office:value-type="string" calcext:value-type="string">
            <text:p>Precio</text:p>
          </table:table-cell>
          <table:table-cell table:style-name="ce692" table:formula="of:=+[.O48]" office:value-type="percentage" office:value="0.97" calcext:value-type="percentage">
            <text:p>97 %</text:p>
          </table:table-cell>
          <table:table-cell table:style-name="ce460"/>
          <table:table-cell table:number-columns-repeated="2"/>
          <table:table-cell table:style-name="ce681" table:number-columns-spanned="2" table:number-rows-spanned="1"/>
          <table:covered-table-cell table:style-name="ce681"/>
          <table:table-cell table:style-name="ce689" office:value-type="string" calcext:value-type="string">
            <text:p>Producción</text:p>
          </table:table-cell>
          <table:table-cell table:style-name="ce692" table:formula="of:=+[.N59]" office:value-type="percentage" office:value="1" calcext:value-type="percentage">
            <text:p>100 %</text:p>
          </table:table-cell>
          <table:table-cell table:style-name="ce689" office:value-type="string" calcext:value-type="string">
            <text:p>Precio</text:p>
          </table:table-cell>
          <table:table-cell table:style-name="ce692" table:formula="of:=+[.O59]" office:value-type="percentage" office:value="0.92" calcext:value-type="percentage">
            <text:p>92 %</text:p>
          </table:table-cell>
          <table:table-cell table:style-name="ce460"/>
          <table:table-cell table:number-columns-repeated="2"/>
          <table:table-cell table:style-name="ce681" table:number-columns-spanned="2" table:number-rows-spanned="1"/>
          <table:covered-table-cell table:style-name="ce681"/>
          <table:table-cell table:style-name="ce689" office:value-type="string" calcext:value-type="string">
            <text:p>Producción</text:p>
          </table:table-cell>
          <table:table-cell table:style-name="ce692" table:formula="of:=+[.N70]" office:value-type="percentage" office:value="1" calcext:value-type="percentage">
            <text:p>100 %</text:p>
          </table:table-cell>
          <table:table-cell table:style-name="ce689" office:value-type="string" calcext:value-type="string">
            <text:p>Precio</text:p>
          </table:table-cell>
          <table:table-cell table:style-name="ce692" table:formula="of:=+[.O70]" office:value-type="percentage" office:value="0.84" calcext:value-type="percentage">
            <text:p>84 %</text:p>
          </table:table-cell>
          <table:table-cell table:style-name="ce460"/>
          <table:table-cell table:number-columns-repeated="179"/>
        </table:table-row>
        <table:table-row table:style-name="ro29">
          <table:table-cell table:style-name="ce648" office:value-type="string" calcext:value-type="string" table:number-columns-spanned="4" table:number-rows-spanned="1">
            <text:p>EVALUACION ECONOMICA</text:p>
          </table:table-cell>
          <table:covered-table-cell table:number-columns-repeated="3" table:style-name="ce648"/>
          <table:table-cell table:number-columns-repeated="2"/>
          <table:table-cell table:style-name="ce648" office:value-type="string" calcext:value-type="string" table:number-columns-spanned="4" table:number-rows-spanned="1">
            <text:p>EVALUACION FINANCIERA</text:p>
          </table:table-cell>
          <table:covered-table-cell table:number-columns-repeated="3" table:style-name="ce648"/>
          <table:table-cell table:number-columns-repeated="3"/>
          <table:table-cell table:number-columns-repeated="2" table:style-name="ce678" office:value-type="percentage" office:value="1" calcext:value-type="percentage">
            <text:p>100 %</text:p>
          </table:table-cell>
          <table:table-cell table:number-columns-repeated="2"/>
          <table:table-cell table:style-name="ce301" office:value-type="string" calcext:value-type="string" table:number-columns-spanned="7" table:number-rows-spanned="1">
            <text:p>FLUJO DE CAJA ECONOMICO Y FINANCIERO</text:p>
          </table:table-cell>
          <table:covered-table-cell table:number-columns-repeated="6" table:style-name="ce301"/>
          <table:table-cell table:number-columns-repeated="2"/>
          <table:table-cell table:style-name="ce301" office:value-type="string" calcext:value-type="string" table:number-columns-spanned="7" table:number-rows-spanned="1">
            <text:p>FLUJO DE CAJA ECONOMICO Y FINANCIERO</text:p>
          </table:table-cell>
          <table:covered-table-cell table:number-columns-repeated="6" table:style-name="ce301"/>
          <table:table-cell table:number-columns-repeated="2"/>
          <table:table-cell table:style-name="ce301" office:value-type="string" calcext:value-type="string" table:number-columns-spanned="7" table:number-rows-spanned="1">
            <text:p>FLUJO DE CAJA ECONOMICO Y FINANCIERO</text:p>
          </table:table-cell>
          <table:covered-table-cell table:number-columns-repeated="6" table:style-name="ce301"/>
          <table:table-cell table:number-columns-repeated="2"/>
          <table:table-cell table:style-name="ce301" office:value-type="string" calcext:value-type="string" table:number-columns-spanned="7" table:number-rows-spanned="1">
            <text:p>FLUJO DE CAJA ECONOMICO Y FINANCIERO</text:p>
          </table:table-cell>
          <table:covered-table-cell table:number-columns-repeated="6" table:style-name="ce301"/>
          <table:table-cell table:number-columns-repeated="2"/>
          <table:table-cell table:style-name="ce301" office:value-type="string" calcext:value-type="string" table:number-columns-spanned="7" table:number-rows-spanned="1">
            <text:p>FLUJO DE CAJA ECONOMICO Y FINANCIERO</text:p>
          </table:table-cell>
          <table:covered-table-cell table:number-columns-repeated="6" table:style-name="ce301"/>
          <table:table-cell table:number-columns-repeated="2"/>
          <table:table-cell table:style-name="ce301" office:value-type="string" calcext:value-type="string" table:number-columns-spanned="7" table:number-rows-spanned="1">
            <text:p>FLUJO DE CAJA ECONOMICO Y FINANCIERO</text:p>
          </table:table-cell>
          <table:covered-table-cell table:number-columns-repeated="6" table:style-name="ce301"/>
          <table:table-cell table:number-columns-repeated="2"/>
          <table:table-cell table:style-name="ce301" office:value-type="string" calcext:value-type="string" table:number-columns-spanned="7" table:number-rows-spanned="1">
            <text:p>FLUJO DE CAJA ECONOMICO Y FINANCIERO</text:p>
          </table:table-cell>
          <table:covered-table-cell table:number-columns-repeated="6" table:style-name="ce301"/>
          <table:table-cell table:number-columns-repeated="179"/>
        </table:table-row>
        <table:table-row table:style-name="ro9">
          <table:table-cell table:style-name="ce441" office:value-type="string" calcext:value-type="string">
            <text:p>AÑO</text:p>
          </table:table-cell>
          <table:table-cell table:style-name="ce441" office:value-type="string" calcext:value-type="string">
            <text:p>FCE</text:p>
          </table:table-cell>
          <table:table-cell table:style-name="ce441" office:value-type="string" calcext:value-type="string">
            <text:p>FA</text:p>
          </table:table-cell>
          <table:table-cell table:style-name="ce441" office:value-type="string" calcext:value-type="string">
            <text:p>VAN</text:p>
          </table:table-cell>
          <table:table-cell table:number-columns-repeated="2"/>
          <table:table-cell table:style-name="ce540" office:value-type="string" calcext:value-type="string">
            <text:p>AÑO</text:p>
          </table:table-cell>
          <table:table-cell table:style-name="ce540" office:value-type="string" calcext:value-type="string">
            <text:p>FCF</text:p>
          </table:table-cell>
          <table:table-cell table:style-name="ce540" office:value-type="string" calcext:value-type="string">
            <text:p>FAS</text:p>
          </table:table-cell>
          <table:table-cell table:style-name="ce540" office:value-type="string" calcext:value-type="string">
            <text:p>VANF</text:p>
          </table:table-cell>
          <table:table-cell table:number-columns-repeated="2"/>
          <table:table-cell table:style-name="ce165" office:value-type="string" calcext:value-type="string" table:number-columns-spanned="1" table:number-rows-spanned="2">
            <text:p>Años</text:p>
          </table:table-cell>
          <table:table-cell table:style-name="ce165" office:value-type="string" calcext:value-type="string" table:number-columns-spanned="1" table:number-rows-spanned="2">
            <text:p>Produccion (UND.)</text:p>
          </table:table-cell>
          <table:table-cell table:style-name="ce165" office:value-type="string" calcext:value-type="string" table:number-columns-spanned="1" table:number-rows-spanned="2">
            <text:p>Precio por Und (S/.)</text:p>
          </table:table-cell>
          <table:table-cell table:style-name="ce165" office:value-type="string" calcext:value-type="string" table:number-columns-spanned="1" table:number-rows-spanned="2">
            <text:p>Ventas proyectadas (S/.)</text:p>
          </table:table-cell>
          <table:table-cell/>
          <table:table-cell table:style-name="ce598" office:value-type="string" calcext:value-type="string">
            <text:p>CONCEPTO</text:p>
          </table:table-cell>
          <table:table-cell table:style-name="ce603" office:value-type="float" office:value="0" calcext:value-type="float">
            <text:p>0</text:p>
          </table:table-cell>
          <table:table-cell table:style-name="ce598" office:value-type="float" office:value="1" calcext:value-type="float">
            <text:p>1</text:p>
          </table:table-cell>
          <table:table-cell table:style-name="ce598" office:value-type="float" office:value="2" calcext:value-type="float">
            <text:p>2</text:p>
          </table:table-cell>
          <table:table-cell table:style-name="ce598" office:value-type="float" office:value="3" calcext:value-type="float">
            <text:p>3</text:p>
          </table:table-cell>
          <table:table-cell table:style-name="ce598" office:value-type="float" office:value="4" calcext:value-type="float">
            <text:p>4</text:p>
          </table:table-cell>
          <table:table-cell table:style-name="ce598" office:value-type="float" office:value="5" calcext:value-type="float">
            <text:p>5</text:p>
          </table:table-cell>
          <table:table-cell table:number-columns-repeated="2"/>
          <table:table-cell table:style-name="ce598" office:value-type="string" calcext:value-type="string">
            <text:p>CONCEPTO</text:p>
          </table:table-cell>
          <table:table-cell table:style-name="ce603" office:value-type="float" office:value="0" calcext:value-type="float">
            <text:p>0</text:p>
          </table:table-cell>
          <table:table-cell table:style-name="ce598" office:value-type="float" office:value="1" calcext:value-type="float">
            <text:p>1</text:p>
          </table:table-cell>
          <table:table-cell table:style-name="ce598" office:value-type="float" office:value="2" calcext:value-type="float">
            <text:p>2</text:p>
          </table:table-cell>
          <table:table-cell table:style-name="ce598" office:value-type="float" office:value="3" calcext:value-type="float">
            <text:p>3</text:p>
          </table:table-cell>
          <table:table-cell table:style-name="ce598" office:value-type="float" office:value="4" calcext:value-type="float">
            <text:p>4</text:p>
          </table:table-cell>
          <table:table-cell table:style-name="ce598" office:value-type="float" office:value="5" calcext:value-type="float">
            <text:p>5</text:p>
          </table:table-cell>
          <table:table-cell table:number-columns-repeated="2"/>
          <table:table-cell table:style-name="ce598" office:value-type="string" calcext:value-type="string">
            <text:p>CONCEPTO</text:p>
          </table:table-cell>
          <table:table-cell table:style-name="ce603" office:value-type="float" office:value="0" calcext:value-type="float">
            <text:p>0</text:p>
          </table:table-cell>
          <table:table-cell table:style-name="ce598" office:value-type="float" office:value="1" calcext:value-type="float">
            <text:p>1</text:p>
          </table:table-cell>
          <table:table-cell table:style-name="ce598" office:value-type="float" office:value="2" calcext:value-type="float">
            <text:p>2</text:p>
          </table:table-cell>
          <table:table-cell table:style-name="ce598" office:value-type="float" office:value="3" calcext:value-type="float">
            <text:p>3</text:p>
          </table:table-cell>
          <table:table-cell table:style-name="ce598" office:value-type="float" office:value="4" calcext:value-type="float">
            <text:p>4</text:p>
          </table:table-cell>
          <table:table-cell table:style-name="ce598" office:value-type="float" office:value="5" calcext:value-type="float">
            <text:p>5</text:p>
          </table:table-cell>
          <table:table-cell table:number-columns-repeated="2"/>
          <table:table-cell table:style-name="ce598" office:value-type="string" calcext:value-type="string">
            <text:p>CONCEPTO</text:p>
          </table:table-cell>
          <table:table-cell table:style-name="ce603" office:value-type="float" office:value="0" calcext:value-type="float">
            <text:p>0</text:p>
          </table:table-cell>
          <table:table-cell table:style-name="ce598" office:value-type="float" office:value="1" calcext:value-type="float">
            <text:p>1</text:p>
          </table:table-cell>
          <table:table-cell table:style-name="ce598" office:value-type="float" office:value="2" calcext:value-type="float">
            <text:p>2</text:p>
          </table:table-cell>
          <table:table-cell table:style-name="ce598" office:value-type="float" office:value="3" calcext:value-type="float">
            <text:p>3</text:p>
          </table:table-cell>
          <table:table-cell table:style-name="ce598" office:value-type="float" office:value="4" calcext:value-type="float">
            <text:p>4</text:p>
          </table:table-cell>
          <table:table-cell table:style-name="ce598" office:value-type="float" office:value="5" calcext:value-type="float">
            <text:p>5</text:p>
          </table:table-cell>
          <table:table-cell table:number-columns-repeated="2"/>
          <table:table-cell table:style-name="ce598" office:value-type="string" calcext:value-type="string">
            <text:p>CONCEPTO</text:p>
          </table:table-cell>
          <table:table-cell table:style-name="ce603" office:value-type="float" office:value="0" calcext:value-type="float">
            <text:p>0</text:p>
          </table:table-cell>
          <table:table-cell table:style-name="ce598" office:value-type="float" office:value="1" calcext:value-type="float">
            <text:p>1</text:p>
          </table:table-cell>
          <table:table-cell table:style-name="ce598" office:value-type="float" office:value="2" calcext:value-type="float">
            <text:p>2</text:p>
          </table:table-cell>
          <table:table-cell table:style-name="ce598" office:value-type="float" office:value="3" calcext:value-type="float">
            <text:p>3</text:p>
          </table:table-cell>
          <table:table-cell table:style-name="ce598" office:value-type="float" office:value="4" calcext:value-type="float">
            <text:p>4</text:p>
          </table:table-cell>
          <table:table-cell table:style-name="ce598" office:value-type="float" office:value="5" calcext:value-type="float">
            <text:p>5</text:p>
          </table:table-cell>
          <table:table-cell table:number-columns-repeated="2"/>
          <table:table-cell table:style-name="ce598" office:value-type="string" calcext:value-type="string">
            <text:p>CONCEPTO</text:p>
          </table:table-cell>
          <table:table-cell table:style-name="ce603" office:value-type="float" office:value="0" calcext:value-type="float">
            <text:p>0</text:p>
          </table:table-cell>
          <table:table-cell table:style-name="ce598" office:value-type="float" office:value="1" calcext:value-type="float">
            <text:p>1</text:p>
          </table:table-cell>
          <table:table-cell table:style-name="ce598" office:value-type="float" office:value="2" calcext:value-type="float">
            <text:p>2</text:p>
          </table:table-cell>
          <table:table-cell table:style-name="ce598" office:value-type="float" office:value="3" calcext:value-type="float">
            <text:p>3</text:p>
          </table:table-cell>
          <table:table-cell table:style-name="ce598" office:value-type="float" office:value="4" calcext:value-type="float">
            <text:p>4</text:p>
          </table:table-cell>
          <table:table-cell table:style-name="ce598" office:value-type="float" office:value="5" calcext:value-type="float">
            <text:p>5</text:p>
          </table:table-cell>
          <table:table-cell table:number-columns-repeated="2"/>
          <table:table-cell table:style-name="ce598" office:value-type="string" calcext:value-type="string">
            <text:p>CONCEPTO</text:p>
          </table:table-cell>
          <table:table-cell table:style-name="ce603" office:value-type="float" office:value="0" calcext:value-type="float">
            <text:p>0</text:p>
          </table:table-cell>
          <table:table-cell table:style-name="ce598" office:value-type="float" office:value="1" calcext:value-type="float">
            <text:p>1</text:p>
          </table:table-cell>
          <table:table-cell table:style-name="ce598" office:value-type="float" office:value="2" calcext:value-type="float">
            <text:p>2</text:p>
          </table:table-cell>
          <table:table-cell table:style-name="ce598" office:value-type="float" office:value="3" calcext:value-type="float">
            <text:p>3</text:p>
          </table:table-cell>
          <table:table-cell table:style-name="ce598" office:value-type="float" office:value="4" calcext:value-type="float">
            <text:p>4</text:p>
          </table:table-cell>
          <table:table-cell table:style-name="ce598" office:value-type="float" office:value="5" calcext:value-type="float">
            <text:p>5</text:p>
          </table:table-cell>
          <table:table-cell table:number-columns-repeated="179"/>
        </table:table-row>
        <table:table-row table:style-name="ro8">
          <table:table-cell table:style-name="ce649" office:value-type="float" office:value="0" calcext:value-type="float">
            <text:p>0</text:p>
          </table:table-cell>
          <table:table-cell table:style-name="ce654" table:formula="of:=[$'FLUJO DE CAJA '.B23]" office:value-type="float" office:value="-157481.215045237" calcext:value-type="float">
            <text:p><text:s/>(157,481.22)</text:p>
          </table:table-cell>
          <table:table-cell table:style-name="ce657" table:formula="of:=1/(1+[.$B$1])^[.A5]" office:value-type="float" office:value="1" calcext:value-type="float">
            <text:p><text:s/>1.00 </text:p>
          </table:table-cell>
          <table:table-cell table:style-name="ce654" table:formula="of:=[.B5]*[.C5]" office:value-type="float" office:value="-157481.215045237" calcext:value-type="float">
            <text:p><text:s/>(157,481.22)</text:p>
          </table:table-cell>
          <table:table-cell table:number-columns-repeated="2"/>
          <table:table-cell table:style-name="ce649" office:value-type="float" office:value="0" calcext:value-type="float">
            <text:p>0</text:p>
          </table:table-cell>
          <table:table-cell table:style-name="ce654" table:formula="of:=[$'FLUJO DE CAJA '.B27]" office:value-type="float" office:value="-152481.215045237" calcext:value-type="float">
            <text:p><text:s/>(152,481.22)</text:p>
          </table:table-cell>
          <table:table-cell table:style-name="ce673" table:formula="of:=1/(1+[.$H$1])^[.G5]" office:value-type="float" office:value="1" calcext:value-type="float">
            <text:p><text:s/>1.00 </text:p>
          </table:table-cell>
          <table:table-cell table:style-name="ce654" table:formula="of:=[.H5]*[.I5]" office:value-type="float" office:value="-152481.215045237" calcext:value-type="float">
            <text:p><text:s/>(152,481.22)</text:p>
          </table:table-cell>
          <table:table-cell table:number-columns-repeated="2"/>
          <table:covered-table-cell table:number-columns-repeated="4" table:style-name="ce165"/>
          <table:table-cell/>
          <table:table-cell table:style-name="ce304" office:value-type="string" calcext:value-type="string">
            <text:p>I. INGRESOS</text:p>
          </table:table-cell>
          <table:table-cell table:style-name="ce604" table:formula="of:=SUM([.S6:.S7])" office:value-type="float" office:value="0" calcext:value-type="float">
            <text:p><text:s/>- <text:s text:c="2"/></text:p>
          </table:table-cell>
          <table:table-cell table:style-name="ce426" table:formula="of:=SUM([.T6:.T7])" office:value-type="float" office:value="61928.2925700631" calcext:value-type="float">
            <text:p><text:s/>61,928.29 </text:p>
          </table:table-cell>
          <table:table-cell table:style-name="ce426" table:formula="of:=SUM([.U6:.U7])" office:value-type="float" office:value="205986.528" calcext:value-type="float">
            <text:p><text:s/>205,986.53 </text:p>
          </table:table-cell>
          <table:table-cell table:style-name="ce426" table:formula="of:=SUM([.V6:.V7])" office:value-type="float" office:value="205986.528" calcext:value-type="float">
            <text:p><text:s/>205,986.53 </text:p>
          </table:table-cell>
          <table:table-cell table:style-name="ce426" table:formula="of:=SUM([.W6:.W7])" office:value-type="float" office:value="205986.528" calcext:value-type="float">
            <text:p><text:s/>205,986.53 </text:p>
          </table:table-cell>
          <table:table-cell table:style-name="ce426" table:formula="of:=SUM([.X6:.X8])" office:value-type="float" office:value="386819.765163881" calcext:value-type="float">
            <text:p><text:s/>386,819.77 </text:p>
          </table:table-cell>
          <table:table-cell table:number-columns-repeated="2"/>
          <table:table-cell table:style-name="ce304" office:value-type="string" calcext:value-type="string">
            <text:p>I. INGRESOS</text:p>
          </table:table-cell>
          <table:table-cell table:style-name="ce604" table:formula="of:=SUM([.AB6:.AB7])" office:value-type="float" office:value="0" calcext:value-type="float">
            <text:p><text:s/>- <text:s text:c="2"/></text:p>
          </table:table-cell>
          <table:table-cell table:style-name="ce426" table:formula="of:=SUM([.AC6:.AC7])" office:value-type="float" office:value="58831.8779415599" calcext:value-type="float">
            <text:p><text:s/>58,831.88 </text:p>
          </table:table-cell>
          <table:table-cell table:style-name="ce426" table:formula="of:=SUM([.AD6:.AD7])" office:value-type="float" office:value="195687.2016" calcext:value-type="float">
            <text:p><text:s/>195,687.20 </text:p>
          </table:table-cell>
          <table:table-cell table:style-name="ce426" table:formula="of:=SUM([.AE6:.AE7])" office:value-type="float" office:value="195687.2016" calcext:value-type="float">
            <text:p><text:s/>195,687.20 </text:p>
          </table:table-cell>
          <table:table-cell table:style-name="ce426" table:formula="of:=SUM([.AF6:.AF7])" office:value-type="float" office:value="195687.2016" calcext:value-type="float">
            <text:p><text:s/>195,687.20 </text:p>
          </table:table-cell>
          <table:table-cell table:style-name="ce426" table:formula="of:=SUM([.AG6:.AG8])" office:value-type="float" office:value="376520.438763881" calcext:value-type="float">
            <text:p><text:s/>376,520.44 </text:p>
          </table:table-cell>
          <table:table-cell table:number-columns-repeated="2"/>
          <table:table-cell table:style-name="ce304" office:value-type="string" calcext:value-type="string">
            <text:p>I. INGRESOS</text:p>
          </table:table-cell>
          <table:table-cell table:style-name="ce604" table:formula="of:=SUM([.AK6:.AK7])" office:value-type="float" office:value="0" calcext:value-type="float">
            <text:p><text:s/>- <text:s text:c="2"/></text:p>
          </table:table-cell>
          <table:table-cell table:style-name="ce426" table:formula="of:=SUM([.AL6:.AL7])" office:value-type="float" office:value="55735.4633130567" calcext:value-type="float">
            <text:p><text:s/>55,735.46 </text:p>
          </table:table-cell>
          <table:table-cell table:style-name="ce426" table:formula="of:=SUM([.AM6:.AM7])" office:value-type="float" office:value="185387.8752" calcext:value-type="float">
            <text:p><text:s/>185,387.88 </text:p>
          </table:table-cell>
          <table:table-cell table:style-name="ce426" table:formula="of:=SUM([.AN6:.AN7])" office:value-type="float" office:value="185387.8752" calcext:value-type="float">
            <text:p><text:s/>185,387.88 </text:p>
          </table:table-cell>
          <table:table-cell table:style-name="ce426" table:formula="of:=SUM([.AO6:.AO7])" office:value-type="float" office:value="185387.8752" calcext:value-type="float">
            <text:p><text:s/>185,387.88 </text:p>
          </table:table-cell>
          <table:table-cell table:style-name="ce426" table:formula="of:=SUM([.AP6:.AP8])" office:value-type="float" office:value="366221.112363881" calcext:value-type="float">
            <text:p><text:s/>366,221.11 </text:p>
          </table:table-cell>
          <table:table-cell table:number-columns-repeated="2"/>
          <table:table-cell table:style-name="ce304" office:value-type="string" calcext:value-type="string">
            <text:p>I. INGRESOS</text:p>
          </table:table-cell>
          <table:table-cell table:style-name="ce604" table:formula="of:=SUM([.AT6:.AT7])" office:value-type="float" office:value="0" calcext:value-type="float">
            <text:p><text:s/>- <text:s text:c="2"/></text:p>
          </table:table-cell>
          <table:table-cell table:style-name="ce426" table:formula="of:=SUM([.AU6:.AU7])" office:value-type="float" office:value="52639.0486845536" calcext:value-type="float">
            <text:p><text:s/>52,639.05 </text:p>
          </table:table-cell>
          <table:table-cell table:style-name="ce426" table:formula="of:=SUM([.AV6:.AV7])" office:value-type="float" office:value="175088.5488" calcext:value-type="float">
            <text:p><text:s/>175,088.55 </text:p>
          </table:table-cell>
          <table:table-cell table:style-name="ce426" table:formula="of:=SUM([.AW6:.AW7])" office:value-type="float" office:value="175088.5488" calcext:value-type="float">
            <text:p><text:s/>175,088.55 </text:p>
          </table:table-cell>
          <table:table-cell table:style-name="ce426" table:formula="of:=SUM([.AX6:.AX7])" office:value-type="float" office:value="175088.5488" calcext:value-type="float">
            <text:p><text:s/>175,088.55 </text:p>
          </table:table-cell>
          <table:table-cell table:style-name="ce426" table:formula="of:=SUM([.AY6:.AY8])" office:value-type="float" office:value="355921.785963881" calcext:value-type="float">
            <text:p><text:s/>355,921.79 </text:p>
          </table:table-cell>
          <table:table-cell table:number-columns-repeated="2"/>
          <table:table-cell table:style-name="ce304" office:value-type="string" calcext:value-type="string">
            <text:p>I. INGRESOS</text:p>
          </table:table-cell>
          <table:table-cell table:style-name="ce604" table:formula="of:=SUM([.BC6:.BC7])" office:value-type="float" office:value="0" calcext:value-type="float">
            <text:p><text:s/>- <text:s text:c="2"/></text:p>
          </table:table-cell>
          <table:table-cell table:style-name="ce426" table:formula="of:=SUM([.BD6:.BD7])" office:value-type="float" office:value="60070.4437929612" calcext:value-type="float">
            <text:p><text:s/>60,070.44 </text:p>
          </table:table-cell>
          <table:table-cell table:style-name="ce426" table:formula="of:=SUM([.BE6:.BE7])" office:value-type="float" office:value="199806.93216" calcext:value-type="float">
            <text:p><text:s/>199,806.93 </text:p>
          </table:table-cell>
          <table:table-cell table:style-name="ce426" table:formula="of:=SUM([.BF6:.BF7])" office:value-type="float" office:value="199806.93216" calcext:value-type="float">
            <text:p><text:s/>199,806.93 </text:p>
          </table:table-cell>
          <table:table-cell table:style-name="ce426" table:formula="of:=SUM([.BG6:.BG7])" office:value-type="float" office:value="199806.93216" calcext:value-type="float">
            <text:p><text:s/>199,806.93 </text:p>
          </table:table-cell>
          <table:table-cell table:style-name="ce426" table:formula="of:=SUM([.BH6:.BH8])" office:value-type="float" office:value="380640.169323881" calcext:value-type="float">
            <text:p><text:s/>380,640.17 </text:p>
          </table:table-cell>
          <table:table-cell table:number-columns-repeated="2"/>
          <table:table-cell table:style-name="ce304" office:value-type="string" calcext:value-type="string">
            <text:p>I. INGRESOS</text:p>
          </table:table-cell>
          <table:table-cell table:style-name="ce604" table:formula="of:=SUM([.BL6:.BL7])" office:value-type="float" office:value="0" calcext:value-type="float">
            <text:p><text:s/>- <text:s text:c="2"/></text:p>
          </table:table-cell>
          <table:table-cell table:style-name="ce426" table:formula="of:=SUM([.BM6:.BM7])" office:value-type="float" office:value="56974.029164458" calcext:value-type="float">
            <text:p><text:s/>56,974.03 </text:p>
          </table:table-cell>
          <table:table-cell table:style-name="ce426" table:formula="of:=SUM([.BN6:.BN7])" office:value-type="float" office:value="189507.60576" calcext:value-type="float">
            <text:p><text:s/>189,507.61 </text:p>
          </table:table-cell>
          <table:table-cell table:style-name="ce426" table:formula="of:=SUM([.BO6:.BO7])" office:value-type="float" office:value="189507.60576" calcext:value-type="float">
            <text:p><text:s/>189,507.61 </text:p>
          </table:table-cell>
          <table:table-cell table:style-name="ce426" table:formula="of:=SUM([.BP6:.BP7])" office:value-type="float" office:value="189507.60576" calcext:value-type="float">
            <text:p><text:s/>189,507.61 </text:p>
          </table:table-cell>
          <table:table-cell table:style-name="ce426" table:formula="of:=SUM([.BQ6:.BQ8])" office:value-type="float" office:value="370340.842923881" calcext:value-type="float">
            <text:p><text:s/>370,340.84 </text:p>
          </table:table-cell>
          <table:table-cell table:number-columns-repeated="2"/>
          <table:table-cell table:style-name="ce304" office:value-type="string" calcext:value-type="string">
            <text:p>I. INGRESOS</text:p>
          </table:table-cell>
          <table:table-cell table:style-name="ce604" table:formula="of:=SUM([.BU6:.BU7])" office:value-type="float" office:value="0" calcext:value-type="float">
            <text:p><text:s/>- <text:s text:c="2"/></text:p>
          </table:table-cell>
          <table:table-cell table:style-name="ce426" table:formula="of:=SUM([.BV6:.BV7])" office:value-type="float" office:value="52019.765758853" calcext:value-type="float">
            <text:p><text:s/>52,019.77 </text:p>
          </table:table-cell>
          <table:table-cell table:style-name="ce426" table:formula="of:=SUM([.BW6:.BW7])" office:value-type="float" office:value="173028.68352" calcext:value-type="float">
            <text:p><text:s/>173,028.68 </text:p>
          </table:table-cell>
          <table:table-cell table:style-name="ce426" table:formula="of:=SUM([.BX6:.BX7])" office:value-type="float" office:value="173028.68352" calcext:value-type="float">
            <text:p><text:s/>173,028.68 </text:p>
          </table:table-cell>
          <table:table-cell table:style-name="ce426" table:formula="of:=SUM([.BY6:.BY7])" office:value-type="float" office:value="173028.68352" calcext:value-type="float">
            <text:p><text:s/>173,028.68 </text:p>
          </table:table-cell>
          <table:table-cell table:style-name="ce426" table:formula="of:=SUM([.BZ6:.BZ8])" office:value-type="float" office:value="353861.920683881" calcext:value-type="float">
            <text:p><text:s/>353,861.92 </text:p>
          </table:table-cell>
          <table:table-cell table:number-columns-repeated="179"/>
        </table:table-row>
        <table:table-row table:style-name="ro21">
          <table:table-cell table:style-name="ce649" office:value-type="float" office:value="1" calcext:value-type="float">
            <text:p>1</text:p>
          </table:table-cell>
          <table:table-cell table:style-name="ce654" table:formula="of:=[$'FLUJO DE CAJA '.C23]" office:value-type="float" office:value="9754.98732025721" calcext:value-type="float">
            <text:p><text:s/>9,754.99 </text:p>
          </table:table-cell>
          <table:table-cell table:style-name="ce657" table:formula="of:=1/(1+[.$B$1])^[.A6]" office:value-type="float" office:value="0.835366743592997" calcext:value-type="float">
            <text:p><text:s/>0.84 </text:p>
          </table:table-cell>
          <table:table-cell table:style-name="ce654" table:formula="of:=[.B6]*[.C6]" office:value-type="float" office:value="8148.99199151425" calcext:value-type="float">
            <text:p><text:s/>8,148.99 </text:p>
          </table:table-cell>
          <table:table-cell table:number-columns-repeated="2"/>
          <table:table-cell table:style-name="ce649" office:value-type="float" office:value="1" calcext:value-type="float">
            <text:p>1</text:p>
          </table:table-cell>
          <table:table-cell table:style-name="ce654" table:formula="of:=[$'FLUJO DE CAJA '.C27]" office:value-type="float" office:value="4482.78407206445" calcext:value-type="float">
            <text:p><text:s/>4,482.78 </text:p>
          </table:table-cell>
          <table:table-cell table:style-name="ce673" table:formula="of:=1/(1+[.$H$1])^[.G6]" office:value-type="float" office:value="0.833333333333333" calcext:value-type="float">
            <text:p><text:s/>0.83 </text:p>
          </table:table-cell>
          <table:table-cell table:style-name="ce654" table:formula="of:=[.H6]*[.I6]" office:value-type="float" office:value="3735.65339338705" calcext:value-type="float">
            <text:p><text:s/>3,735.65 </text:p>
          </table:table-cell>
          <table:table-cell table:number-columns-repeated="2"/>
          <table:table-cell table:style-name="ce162" table:formula="of:=+[$'PLAN DE PRODUCCION'.B22]" office:value-type="float" office:value="2021" calcext:value-type="float">
            <text:p>2021</text:p>
          </table:table-cell>
          <table:table-cell table:style-name="ce679" table:formula="of:=+[$'PLAN DE PRODUCCION'.C22]*[.$N$3]" office:value-type="float" office:value="3440.46069833684" calcext:value-type="float">
            <text:p>3440.46</text:p>
          </table:table-cell>
          <table:table-cell table:style-name="ce679" table:formula="of:=+[$'PLAN DE PRODUCCION'.D22]*[.$O$3]" office:value-type="float" office:value="18" calcext:value-type="float">
            <text:p>18.00</text:p>
          </table:table-cell>
          <table:table-cell table:style-name="ce679" table:formula="of:=[.N6]*[.O6]" office:value-type="float" office:value="61928.2925700631" calcext:value-type="float">
            <text:p>61928.29</text:p>
          </table:table-cell>
          <table:table-cell/>
          <table:table-cell table:style-name="ce307" office:value-type="string" calcext:value-type="string">
            <text:p><text:s/>INGRESOS POR VENTA</text:p>
          </table:table-cell>
          <table:table-cell table:style-name="ce605"/>
          <table:table-cell table:style-name="ce690" table:formula="of:=+[.P6]" office:value-type="float" office:value="61928.2925700631" calcext:value-type="float">
            <text:p><text:s/>61,928.29 </text:p>
          </table:table-cell>
          <table:table-cell table:style-name="ce690" table:formula="of:=+[.P7]" office:value-type="float" office:value="205986.528" calcext:value-type="float">
            <text:p><text:s/>205,986.53 </text:p>
          </table:table-cell>
          <table:table-cell table:style-name="ce690" table:formula="of:=+[.P8]" office:value-type="float" office:value="205986.528" calcext:value-type="float">
            <text:p><text:s/>205,986.53 </text:p>
          </table:table-cell>
          <table:table-cell table:style-name="ce690" table:formula="of:=+[.P9]" office:value-type="float" office:value="205986.528" calcext:value-type="float">
            <text:p><text:s/>205,986.53 </text:p>
          </table:table-cell>
          <table:table-cell table:style-name="ce427" table:formula="of:=+[$'ESTADO GyP'.$F$9]+[$'ANALISIS SESIB'.Y6]" office:value-type="float" office:value="294281.091559322" calcext:value-type="float">
            <text:p><text:s/>294,281.09 </text:p>
          </table:table-cell>
          <table:table-cell table:style-name="ce693" table:formula="of:=+[.P10]" office:value-type="float" office:value="205986.528" calcext:value-type="float">
            <text:p><text:s/>205,986.53 </text:p>
          </table:table-cell>
          <table:table-cell/>
          <table:table-cell table:style-name="ce307" office:value-type="string" calcext:value-type="string">
            <text:p><text:s/>INGRESOS POR VENTA</text:p>
          </table:table-cell>
          <table:table-cell table:style-name="ce605"/>
          <table:table-cell table:style-name="ce690" table:formula="of:=+[.P18]" office:value-type="float" office:value="58831.8779415599" calcext:value-type="float">
            <text:p><text:s/>58,831.88 </text:p>
          </table:table-cell>
          <table:table-cell table:style-name="ce690" table:formula="of:=+[.P19]" office:value-type="float" office:value="195687.2016" calcext:value-type="float">
            <text:p><text:s/>195,687.20 </text:p>
          </table:table-cell>
          <table:table-cell table:style-name="ce690" table:formula="of:=+[.P20]" office:value-type="float" office:value="195687.2016" calcext:value-type="float">
            <text:p><text:s/>195,687.20 </text:p>
          </table:table-cell>
          <table:table-cell table:style-name="ce690" table:formula="of:=+[.P21]" office:value-type="float" office:value="195687.2016" calcext:value-type="float">
            <text:p><text:s/>195,687.20 </text:p>
          </table:table-cell>
          <table:table-cell table:style-name="ce427" table:formula="of:=+[$'ESTADO GyP'.$F$9]+[$'ANALISIS SESIB'.AH6]" office:value-type="float" office:value="283981.765159322" calcext:value-type="float">
            <text:p><text:s/>283,981.77 </text:p>
          </table:table-cell>
          <table:table-cell table:style-name="ce693" table:formula="of:=+[.P22]" office:value-type="float" office:value="195687.2016" calcext:value-type="float">
            <text:p><text:s/>195,687.20 </text:p>
          </table:table-cell>
          <table:table-cell/>
          <table:table-cell table:style-name="ce307" office:value-type="string" calcext:value-type="string">
            <text:p><text:s/>INGRESOS POR VENTA</text:p>
          </table:table-cell>
          <table:table-cell table:style-name="ce605"/>
          <table:table-cell table:style-name="ce690" table:formula="of:=+[.P29]" office:value-type="float" office:value="55735.4633130567" calcext:value-type="float">
            <text:p><text:s/>55,735.46 </text:p>
          </table:table-cell>
          <table:table-cell table:style-name="ce690" table:formula="of:=+[.P30]" office:value-type="float" office:value="185387.8752" calcext:value-type="float">
            <text:p><text:s/>185,387.88 </text:p>
          </table:table-cell>
          <table:table-cell table:style-name="ce690" table:formula="of:=+[.P31]" office:value-type="float" office:value="185387.8752" calcext:value-type="float">
            <text:p><text:s/>185,387.88 </text:p>
          </table:table-cell>
          <table:table-cell table:style-name="ce690" table:formula="of:=+[.P32]" office:value-type="float" office:value="185387.8752" calcext:value-type="float">
            <text:p><text:s/>185,387.88 </text:p>
          </table:table-cell>
          <table:table-cell table:style-name="ce427" table:formula="of:=+[$'ESTADO GyP'.$F$9]+[$'ANALISIS SESIB'.AQ6]" office:value-type="float" office:value="273682.438759322" calcext:value-type="float">
            <text:p><text:s/>273,682.44 </text:p>
          </table:table-cell>
          <table:table-cell table:style-name="ce693" table:formula="of:=+[.P33]" office:value-type="float" office:value="185387.8752" calcext:value-type="float">
            <text:p><text:s/>185,387.88 </text:p>
          </table:table-cell>
          <table:table-cell/>
          <table:table-cell table:style-name="ce307" office:value-type="string" calcext:value-type="string">
            <text:p><text:s/>INGRESOS POR VENTA</text:p>
          </table:table-cell>
          <table:table-cell table:style-name="ce605"/>
          <table:table-cell table:style-name="ce690" table:formula="of:=+[.P40]" office:value-type="float" office:value="52639.0486845536" calcext:value-type="float">
            <text:p><text:s/>52,639.05 </text:p>
          </table:table-cell>
          <table:table-cell table:style-name="ce690" table:formula="of:=+[.P41]" office:value-type="float" office:value="175088.5488" calcext:value-type="float">
            <text:p><text:s/>175,088.55 </text:p>
          </table:table-cell>
          <table:table-cell table:style-name="ce690" table:formula="of:=+[.P42]" office:value-type="float" office:value="175088.5488" calcext:value-type="float">
            <text:p><text:s/>175,088.55 </text:p>
          </table:table-cell>
          <table:table-cell table:style-name="ce690" table:formula="of:=+[.P43]" office:value-type="float" office:value="175088.5488" calcext:value-type="float">
            <text:p><text:s/>175,088.55 </text:p>
          </table:table-cell>
          <table:table-cell table:style-name="ce427" table:formula="of:=+[$'ESTADO GyP'.$F$9]+[$'ANALISIS SESIB'.AZ6]" office:value-type="float" office:value="263383.112359322" calcext:value-type="float">
            <text:p><text:s/>263,383.11 </text:p>
          </table:table-cell>
          <table:table-cell table:style-name="ce693" table:formula="of:=+[.P44]" office:value-type="float" office:value="175088.5488" calcext:value-type="float">
            <text:p><text:s/>175,088.55 </text:p>
          </table:table-cell>
          <table:table-cell/>
          <table:table-cell table:style-name="ce307" office:value-type="string" calcext:value-type="string">
            <text:p><text:s/>INGRESOS POR VENTA</text:p>
          </table:table-cell>
          <table:table-cell table:style-name="ce605"/>
          <table:table-cell table:style-name="ce690" table:formula="of:=+[.P51]" office:value-type="float" office:value="60070.4437929612" calcext:value-type="float">
            <text:p><text:s/>60,070.44 </text:p>
          </table:table-cell>
          <table:table-cell table:style-name="ce690" table:formula="of:=+[.P52]" office:value-type="float" office:value="199806.93216" calcext:value-type="float">
            <text:p><text:s/>199,806.93 </text:p>
          </table:table-cell>
          <table:table-cell table:style-name="ce690" table:formula="of:=+[.P53]" office:value-type="float" office:value="199806.93216" calcext:value-type="float">
            <text:p><text:s/>199,806.93 </text:p>
          </table:table-cell>
          <table:table-cell table:style-name="ce690" table:formula="of:=+[.P54]" office:value-type="float" office:value="199806.93216" calcext:value-type="float">
            <text:p><text:s/>199,806.93 </text:p>
          </table:table-cell>
          <table:table-cell table:style-name="ce427" table:formula="of:=+[$'ESTADO GyP'.$F$9]+[$'ANALISIS SESIB'.BI6]" office:value-type="float" office:value="288101.495719322" calcext:value-type="float">
            <text:p><text:s/>288,101.50 </text:p>
          </table:table-cell>
          <table:table-cell table:style-name="ce693" table:formula="of:=+[.P55]" office:value-type="float" office:value="199806.93216" calcext:value-type="float">
            <text:p><text:s/>199,806.93 </text:p>
          </table:table-cell>
          <table:table-cell/>
          <table:table-cell table:style-name="ce307" office:value-type="string" calcext:value-type="string">
            <text:p><text:s/>INGRESOS POR VENTA</text:p>
          </table:table-cell>
          <table:table-cell table:style-name="ce605"/>
          <table:table-cell table:style-name="ce690" table:formula="of:=+[.P62]" office:value-type="float" office:value="56974.029164458" calcext:value-type="float">
            <text:p><text:s/>56,974.03 </text:p>
          </table:table-cell>
          <table:table-cell table:style-name="ce690" table:formula="of:=+[.P63]" office:value-type="float" office:value="189507.60576" calcext:value-type="float">
            <text:p><text:s/>189,507.61 </text:p>
          </table:table-cell>
          <table:table-cell table:style-name="ce690" table:formula="of:=+[.P64]" office:value-type="float" office:value="189507.60576" calcext:value-type="float">
            <text:p><text:s/>189,507.61 </text:p>
          </table:table-cell>
          <table:table-cell table:style-name="ce690" table:formula="of:=+[.P65]" office:value-type="float" office:value="189507.60576" calcext:value-type="float">
            <text:p><text:s/>189,507.61 </text:p>
          </table:table-cell>
          <table:table-cell table:style-name="ce427" table:formula="of:=+[$'ESTADO GyP'.$F$9]+[$'ANALISIS SESIB'.BR6]" office:value-type="float" office:value="277802.169319322" calcext:value-type="float">
            <text:p><text:s/>277,802.17 </text:p>
          </table:table-cell>
          <table:table-cell table:style-name="ce693" table:formula="of:=+[.P66]" office:value-type="float" office:value="189507.60576" calcext:value-type="float">
            <text:p><text:s/>189,507.61 </text:p>
          </table:table-cell>
          <table:table-cell/>
          <table:table-cell table:style-name="ce307" office:value-type="string" calcext:value-type="string">
            <text:p><text:s/>INGRESOS POR VENTA</text:p>
          </table:table-cell>
          <table:table-cell table:style-name="ce605"/>
          <table:table-cell table:style-name="ce690" table:formula="of:=+[.P73]" office:value-type="float" office:value="52019.765758853" calcext:value-type="float">
            <text:p><text:s/>52,019.77 </text:p>
          </table:table-cell>
          <table:table-cell table:style-name="ce690" table:formula="of:=+[.P74]" office:value-type="float" office:value="173028.68352" calcext:value-type="float">
            <text:p><text:s/>173,028.68 </text:p>
          </table:table-cell>
          <table:table-cell table:style-name="ce690" table:formula="of:=+[.P75]" office:value-type="float" office:value="173028.68352" calcext:value-type="float">
            <text:p><text:s/>173,028.68 </text:p>
          </table:table-cell>
          <table:table-cell table:style-name="ce690" table:formula="of:=+[.P76]" office:value-type="float" office:value="173028.68352" calcext:value-type="float">
            <text:p><text:s/>173,028.68 </text:p>
          </table:table-cell>
          <table:table-cell table:style-name="ce427" table:formula="of:=+[$'ESTADO GyP'.$F$9]+[$'ANALISIS SESIB'.CA6]" office:value-type="float" office:value="261323.247079322" calcext:value-type="float">
            <text:p><text:s/>261,323.25 </text:p>
          </table:table-cell>
          <table:table-cell table:style-name="ce693" table:formula="of:=+[.P77]" office:value-type="float" office:value="173028.68352" calcext:value-type="float">
            <text:p><text:s/>173,028.68 </text:p>
          </table:table-cell>
          <table:table-cell table:number-columns-repeated="178"/>
        </table:table-row>
        <table:table-row table:style-name="ro21">
          <table:table-cell table:style-name="ce649" office:value-type="float" office:value="2" calcext:value-type="float">
            <text:p>2</text:p>
          </table:table-cell>
          <table:table-cell table:style-name="ce654" table:formula="of:=[$'FLUJO DE CAJA '.D23]" office:value-type="float" office:value="62235.9832299337" calcext:value-type="float">
            <text:p><text:s/>62,235.98 </text:p>
          </table:table-cell>
          <table:table-cell table:style-name="ce657" table:formula="of:=1/(1+[.$B$1])^[.A7]" office:value-type="float" office:value="0.697837596301168" calcext:value-type="float">
            <text:p><text:s/>0.70 </text:p>
          </table:table-cell>
          <table:table-cell table:style-name="ce654" table:formula="of:=[.B7]*[.C7]" office:value-type="float" office:value="43430.6089406168" calcext:value-type="float">
            <text:p><text:s/>43,430.61 </text:p>
          </table:table-cell>
          <table:table-cell table:number-columns-repeated="2"/>
          <table:table-cell table:style-name="ce649" office:value-type="float" office:value="2" calcext:value-type="float">
            <text:p>2</text:p>
          </table:table-cell>
          <table:table-cell table:style-name="ce654" table:formula="of:=[$'FLUJO DE CAJA '.D27]" office:value-type="float" office:value="62235.9832299337" calcext:value-type="float">
            <text:p><text:s/>62,235.98 </text:p>
          </table:table-cell>
          <table:table-cell table:style-name="ce673" table:formula="of:=1/(1+[.$H$1])^[.G7]" office:value-type="float" office:value="0.694444444444444" calcext:value-type="float">
            <text:p><text:s/>0.69 </text:p>
          </table:table-cell>
          <table:table-cell table:style-name="ce654" table:formula="of:=[.H7]*[.I7]" office:value-type="float" office:value="43219.4327985651" calcext:value-type="float">
            <text:p><text:s/>43,219.43 </text:p>
          </table:table-cell>
          <table:table-cell table:number-columns-repeated="2"/>
          <table:table-cell table:style-name="ce162" table:formula="of:=+[$'PLAN DE PRODUCCION'.B23]" office:value-type="float" office:value="2022" calcext:value-type="float">
            <text:p>2022</text:p>
          </table:table-cell>
          <table:table-cell table:style-name="ce679" table:formula="of:=+[$'PLAN DE PRODUCCION'.C23]*[.$N$3]" office:value-type="float" office:value="11443.696" calcext:value-type="float">
            <text:p>11443.70</text:p>
          </table:table-cell>
          <table:table-cell table:style-name="ce679" table:formula="of:=+[$'PLAN DE PRODUCCION'.D23]*[.$O$3]" office:value-type="float" office:value="18" calcext:value-type="float">
            <text:p>18.00</text:p>
          </table:table-cell>
          <table:table-cell table:style-name="ce679" table:formula="of:=[.N7]*[.O7]" office:value-type="float" office:value="205986.528" calcext:value-type="float">
            <text:p>205986.53</text:p>
          </table:table-cell>
          <table:table-cell/>
          <table:table-cell table:style-name="ce307" office:value-type="string" calcext:value-type="string">
            <text:p>VALOR RESIDUAL</text:p>
          </table:table-cell>
          <table:table-cell table:style-name="ce605"/>
          <table:table-cell table:style-name="ce427" table:number-columns-repeated="4"/>
          <table:table-cell table:style-name="ce427" table:formula="of:=+[$'FLUJO DE CAJA '.G11]" office:value-type="float" office:value="88294.563559322" calcext:value-type="float">
            <text:p><text:s/>88,294.56 </text:p>
          </table:table-cell>
          <table:table-cell table:number-columns-repeated="2"/>
          <table:table-cell table:style-name="ce307" office:value-type="string" calcext:value-type="string">
            <text:p>VALOR RESIDUAL</text:p>
          </table:table-cell>
          <table:table-cell table:style-name="ce605"/>
          <table:table-cell table:style-name="ce427" table:number-columns-repeated="4"/>
          <table:table-cell table:style-name="ce427" table:formula="of:=+[.X7]" office:value-type="float" office:value="88294.563559322" calcext:value-type="float">
            <text:p><text:s/>88,294.56 </text:p>
          </table:table-cell>
          <table:table-cell table:number-columns-repeated="2"/>
          <table:table-cell table:style-name="ce307" office:value-type="string" calcext:value-type="string">
            <text:p>VALOR RESIDUAL</text:p>
          </table:table-cell>
          <table:table-cell table:style-name="ce605"/>
          <table:table-cell table:style-name="ce427" table:number-columns-repeated="4"/>
          <table:table-cell table:style-name="ce427" table:formula="of:=+[.AG7]" office:value-type="float" office:value="88294.563559322" calcext:value-type="float">
            <text:p><text:s/>88,294.56 </text:p>
          </table:table-cell>
          <table:table-cell table:number-columns-repeated="2"/>
          <table:table-cell table:style-name="ce307" office:value-type="string" calcext:value-type="string">
            <text:p>VALOR RESIDUAL</text:p>
          </table:table-cell>
          <table:table-cell table:style-name="ce605"/>
          <table:table-cell table:style-name="ce427" table:number-columns-repeated="4"/>
          <table:table-cell table:style-name="ce427" table:formula="of:=+[.AP7]" office:value-type="float" office:value="88294.563559322" calcext:value-type="float">
            <text:p><text:s/>88,294.56 </text:p>
          </table:table-cell>
          <table:table-cell table:number-columns-repeated="2"/>
          <table:table-cell table:style-name="ce307" office:value-type="string" calcext:value-type="string">
            <text:p>VALOR RESIDUAL</text:p>
          </table:table-cell>
          <table:table-cell table:style-name="ce605"/>
          <table:table-cell table:style-name="ce427" table:number-columns-repeated="4"/>
          <table:table-cell table:style-name="ce427" table:formula="of:=+[.AY7]" office:value-type="float" office:value="88294.563559322" calcext:value-type="float">
            <text:p><text:s/>88,294.56 </text:p>
          </table:table-cell>
          <table:table-cell table:number-columns-repeated="2"/>
          <table:table-cell table:style-name="ce307" office:value-type="string" calcext:value-type="string">
            <text:p>VALOR RESIDUAL</text:p>
          </table:table-cell>
          <table:table-cell table:style-name="ce605"/>
          <table:table-cell table:style-name="ce427" table:number-columns-repeated="4"/>
          <table:table-cell table:style-name="ce427" table:formula="of:=+[.BH7]" office:value-type="float" office:value="88294.563559322" calcext:value-type="float">
            <text:p><text:s/>88,294.56 </text:p>
          </table:table-cell>
          <table:table-cell table:number-columns-repeated="2"/>
          <table:table-cell table:style-name="ce307" office:value-type="string" calcext:value-type="string">
            <text:p>VALOR RESIDUAL</text:p>
          </table:table-cell>
          <table:table-cell table:style-name="ce605"/>
          <table:table-cell table:style-name="ce427" table:number-columns-repeated="4"/>
          <table:table-cell table:style-name="ce427" table:formula="of:=+[.BQ7]" office:value-type="float" office:value="88294.563559322" calcext:value-type="float">
            <text:p><text:s/>88,294.56 </text:p>
          </table:table-cell>
          <table:table-cell table:number-columns-repeated="179"/>
        </table:table-row>
        <table:table-row table:style-name="ro21">
          <table:table-cell table:style-name="ce649" office:value-type="float" office:value="3" calcext:value-type="float">
            <text:p>3</text:p>
          </table:table-cell>
          <table:table-cell table:style-name="ce654" table:formula="of:=[$'FLUJO DE CAJA '.E23]" office:value-type="float" office:value="62030.7010263657" calcext:value-type="float">
            <text:p><text:s/>62,030.70 </text:p>
          </table:table-cell>
          <table:table-cell table:style-name="ce657" table:formula="of:=1/(1+[.$B$1])^[.A8]" office:value-type="float" office:value="0.582950320378872" calcext:value-type="float">
            <text:p><text:s/>0.58 </text:p>
          </table:table-cell>
          <table:table-cell table:style-name="ce654" table:formula="of:=[.B8]*[.C8]" office:value-type="float" office:value="36160.8170366459" calcext:value-type="float">
            <text:p><text:s/>36,160.82 </text:p>
          </table:table-cell>
          <table:table-cell table:number-columns-repeated="2"/>
          <table:table-cell table:style-name="ce649" office:value-type="float" office:value="3" calcext:value-type="float">
            <text:p>3</text:p>
          </table:table-cell>
          <table:table-cell table:style-name="ce654" table:formula="of:=[$'FLUJO DE CAJA '.E27]" office:value-type="float" office:value="62030.7010263657" calcext:value-type="float">
            <text:p><text:s/>62,030.70 </text:p>
          </table:table-cell>
          <table:table-cell table:style-name="ce673" table:formula="of:=1/(1+[.$H$1])^[.G8]" office:value-type="float" office:value="0.578703703703704" calcext:value-type="float">
            <text:p><text:s/>0.58 </text:p>
          </table:table-cell>
          <table:table-cell table:style-name="ce654" table:formula="of:=[.H8]*[.I8]" office:value-type="float" office:value="35897.3964272949" calcext:value-type="float">
            <text:p><text:s/>35,897.40 </text:p>
          </table:table-cell>
          <table:table-cell table:number-columns-repeated="2"/>
          <table:table-cell table:style-name="ce162" table:formula="of:=+[$'PLAN DE PRODUCCION'.B24]" office:value-type="float" office:value="2023" calcext:value-type="float">
            <text:p>2023</text:p>
          </table:table-cell>
          <table:table-cell table:style-name="ce679" table:formula="of:=+[$'PLAN DE PRODUCCION'.C24]*[.$N$3]" office:value-type="float" office:value="11443.696" calcext:value-type="float">
            <text:p>11443.70</text:p>
          </table:table-cell>
          <table:table-cell table:style-name="ce679" table:formula="of:=+[$'PLAN DE PRODUCCION'.D24]*[.$O$3]" office:value-type="float" office:value="18" calcext:value-type="float">
            <text:p>18.00</text:p>
          </table:table-cell>
          <table:table-cell table:style-name="ce679" table:formula="of:=[.N8]*[.O8]" office:value-type="float" office:value="205986.528" calcext:value-type="float">
            <text:p>205986.53</text:p>
          </table:table-cell>
          <table:table-cell/>
          <table:table-cell table:style-name="ce307" office:value-type="string" calcext:value-type="string">
            <text:p>RECUPERO CAPITAL DE TRABAJO</text:p>
          </table:table-cell>
          <table:table-cell table:style-name="ce605"/>
          <table:table-cell table:style-name="ce427" table:number-columns-repeated="4"/>
          <table:table-cell table:style-name="ce427" table:formula="of:=[.S16]" office:value-type="float" office:value="4244.11004523721" calcext:value-type="float">
            <text:p><text:s/>4,244.11 </text:p>
          </table:table-cell>
          <table:table-cell table:number-columns-repeated="2"/>
          <table:table-cell table:style-name="ce307" office:value-type="string" calcext:value-type="string">
            <text:p>RECUPERO CAPITAL DE TRABAJO</text:p>
          </table:table-cell>
          <table:table-cell table:style-name="ce605"/>
          <table:table-cell table:style-name="ce427" table:number-columns-repeated="4"/>
          <table:table-cell table:style-name="ce427" table:formula="of:=[.AB16]" office:value-type="float" office:value="4244.11004523721" calcext:value-type="float">
            <text:p><text:s/>4,244.11 </text:p>
          </table:table-cell>
          <table:table-cell table:number-columns-repeated="2"/>
          <table:table-cell table:style-name="ce307" office:value-type="string" calcext:value-type="string">
            <text:p>RECUPERO CAPITAL DE TRABAJO</text:p>
          </table:table-cell>
          <table:table-cell table:style-name="ce605"/>
          <table:table-cell table:style-name="ce427" table:number-columns-repeated="4"/>
          <table:table-cell table:style-name="ce427" table:formula="of:=[.AK16]" office:value-type="float" office:value="4244.11004523721" calcext:value-type="float">
            <text:p><text:s/>4,244.11 </text:p>
          </table:table-cell>
          <table:table-cell table:number-columns-repeated="2"/>
          <table:table-cell table:style-name="ce307" office:value-type="string" calcext:value-type="string">
            <text:p>RECUPERO CAPITAL DE TRABAJO</text:p>
          </table:table-cell>
          <table:table-cell table:style-name="ce605"/>
          <table:table-cell table:style-name="ce427" table:number-columns-repeated="4"/>
          <table:table-cell table:style-name="ce427" table:formula="of:=[.AT16]" office:value-type="float" office:value="4244.11004523721" calcext:value-type="float">
            <text:p><text:s/>4,244.11 </text:p>
          </table:table-cell>
          <table:table-cell table:number-columns-repeated="2"/>
          <table:table-cell table:style-name="ce307" office:value-type="string" calcext:value-type="string">
            <text:p>RECUPERO CAPITAL DE TRABAJO</text:p>
          </table:table-cell>
          <table:table-cell table:style-name="ce605"/>
          <table:table-cell table:style-name="ce427" table:number-columns-repeated="4"/>
          <table:table-cell table:style-name="ce427" table:formula="of:=[.BC16]" office:value-type="float" office:value="4244.11004523721" calcext:value-type="float">
            <text:p><text:s/>4,244.11 </text:p>
          </table:table-cell>
          <table:table-cell table:number-columns-repeated="2"/>
          <table:table-cell table:style-name="ce307" office:value-type="string" calcext:value-type="string">
            <text:p>RECUPERO CAPITAL DE TRABAJO</text:p>
          </table:table-cell>
          <table:table-cell table:style-name="ce605"/>
          <table:table-cell table:style-name="ce427" table:number-columns-repeated="4"/>
          <table:table-cell table:style-name="ce427" table:formula="of:=[.BL16]" office:value-type="float" office:value="4244.11004523721" calcext:value-type="float">
            <text:p><text:s/>4,244.11 </text:p>
          </table:table-cell>
          <table:table-cell table:number-columns-repeated="2"/>
          <table:table-cell table:style-name="ce307" office:value-type="string" calcext:value-type="string">
            <text:p>RECUPERO CAPITAL DE TRABAJO</text:p>
          </table:table-cell>
          <table:table-cell table:style-name="ce605"/>
          <table:table-cell table:style-name="ce427" table:number-columns-repeated="4"/>
          <table:table-cell table:style-name="ce427" table:formula="of:=[.BU16]" office:value-type="float" office:value="4244.11004523721" calcext:value-type="float">
            <text:p><text:s/>4,244.11 </text:p>
          </table:table-cell>
          <table:table-cell table:number-columns-repeated="179"/>
        </table:table-row>
        <table:table-row table:style-name="ro21">
          <table:table-cell table:style-name="ce649" office:value-type="float" office:value="4" calcext:value-type="float">
            <text:p>4</text:p>
          </table:table-cell>
          <table:table-cell table:style-name="ce654" table:formula="of:=[$'FLUJO DE CAJA '.F23]" office:value-type="float" office:value="61784.362382084" calcext:value-type="float">
            <text:p><text:s/>61,784.36 </text:p>
          </table:table-cell>
          <table:table-cell table:style-name="ce657" table:formula="of:=1/(1+[.$B$1])^[.A9]" office:value-type="float" office:value="0.486977310811392" calcext:value-type="float">
            <text:p><text:s/>0.49 </text:p>
          </table:table-cell>
          <table:table-cell table:style-name="ce654" table:formula="of:=[.B9]*[.C9]" office:value-type="float" office:value="30087.5826430238" calcext:value-type="float">
            <text:p><text:s/>30,087.58 </text:p>
          </table:table-cell>
          <table:table-cell table:number-columns-repeated="2"/>
          <table:table-cell table:style-name="ce649" office:value-type="float" office:value="4" calcext:value-type="float">
            <text:p>4</text:p>
          </table:table-cell>
          <table:table-cell table:style-name="ce654" table:formula="of:=[$'FLUJO DE CAJA '.F27]" office:value-type="float" office:value="61784.362382084" calcext:value-type="float">
            <text:p><text:s/>61,784.36 </text:p>
          </table:table-cell>
          <table:table-cell table:style-name="ce673" table:formula="of:=1/(1+[.$H$1])^[.G9]" office:value-type="float" office:value="0.482253086419753" calcext:value-type="float">
            <text:p><text:s/>0.48 </text:p>
          </table:table-cell>
          <table:table-cell table:style-name="ce654" table:formula="of:=[.H9]*[.I9]" office:value-type="float" office:value="29795.6994512365" calcext:value-type="float">
            <text:p><text:s/>29,795.70 </text:p>
          </table:table-cell>
          <table:table-cell table:number-columns-repeated="2"/>
          <table:table-cell table:style-name="ce162" table:formula="of:=+[$'PLAN DE PRODUCCION'.B25]" office:value-type="float" office:value="2024" calcext:value-type="float">
            <text:p>2024</text:p>
          </table:table-cell>
          <table:table-cell table:style-name="ce679" table:formula="of:=+[$'PLAN DE PRODUCCION'.C25]*[.$N$3]" office:value-type="float" office:value="11443.696" calcext:value-type="float">
            <text:p>11443.70</text:p>
          </table:table-cell>
          <table:table-cell table:style-name="ce679" table:formula="of:=+[$'PLAN DE PRODUCCION'.D25]*[.$O$3]" office:value-type="float" office:value="18" calcext:value-type="float">
            <text:p>18.00</text:p>
          </table:table-cell>
          <table:table-cell table:style-name="ce679" table:formula="of:=[.N9]*[.O9]" office:value-type="float" office:value="205986.528" calcext:value-type="float">
            <text:p>205986.53</text:p>
          </table:table-cell>
          <table:table-cell/>
          <table:table-cell table:style-name="ce304" office:value-type="string" calcext:value-type="string">
            <text:p>II. EGRESOS</text:p>
          </table:table-cell>
          <table:table-cell table:style-name="ce604" table:formula="of:=-SUM([.S10:.S12])" office:value-type="float" office:value="-0" calcext:value-type="float">
            <text:p><text:s/>- <text:s text:c="2"/></text:p>
          </table:table-cell>
          <table:table-cell table:style-name="ce426" table:formula="of:=SUM([.T10:.T16])" office:value-type="float" office:value="-52173.3052498058" calcext:value-type="float">
            <text:p><text:s/>(52,173.31)</text:p>
          </table:table-cell>
          <table:table-cell table:style-name="ce426" table:formula="of:=SUM([.U10:.U16])" office:value-type="float" office:value="-143750.544770066" calcext:value-type="float">
            <text:p><text:s/>(143,750.54)</text:p>
          </table:table-cell>
          <table:table-cell table:style-name="ce426" table:formula="of:=SUM([.V10:.V16])" office:value-type="float" office:value="-143955.826973634" calcext:value-type="float">
            <text:p><text:s/>(143,955.83)</text:p>
          </table:table-cell>
          <table:table-cell table:style-name="ce426" table:formula="of:=SUM([.W10:.W16])" office:value-type="float" office:value="-144202.165617916" calcext:value-type="float">
            <text:p><text:s/>(144,202.17)</text:p>
          </table:table-cell>
          <table:table-cell table:style-name="ce426" table:formula="of:=SUM([.X10:.X16])" office:value-type="float" office:value="-170986.141058851" calcext:value-type="float">
            <text:p><text:s/>(170,986.14)</text:p>
          </table:table-cell>
          <table:table-cell table:number-columns-repeated="2"/>
          <table:table-cell table:style-name="ce304" office:value-type="string" calcext:value-type="string">
            <text:p>II. EGRESOS</text:p>
          </table:table-cell>
          <table:table-cell table:style-name="ce604" table:formula="of:=-SUM([.AB10:.AB12])" office:value-type="float" office:value="-0" calcext:value-type="float">
            <text:p><text:s/>- <text:s text:c="2"/></text:p>
          </table:table-cell>
          <table:table-cell table:style-name="ce426" table:formula="of:=SUM([.AC10:.AC16])" office:value-type="float" office:value="-52173.3052498058" calcext:value-type="float">
            <text:p><text:s/>(52,173.31)</text:p>
          </table:table-cell>
          <table:table-cell table:style-name="ce426" table:formula="of:=SUM([.AD10:.AD16])" office:value-type="float" office:value="-143750.544770066" calcext:value-type="float">
            <text:p><text:s/>(143,750.54)</text:p>
          </table:table-cell>
          <table:table-cell table:style-name="ce426" table:formula="of:=SUM([.AE10:.AE16])" office:value-type="float" office:value="-143955.826973634" calcext:value-type="float">
            <text:p><text:s/>(143,955.83)</text:p>
          </table:table-cell>
          <table:table-cell table:style-name="ce426" table:formula="of:=SUM([.AF10:.AF16])" office:value-type="float" office:value="-144202.165617916" calcext:value-type="float">
            <text:p><text:s/>(144,202.17)</text:p>
          </table:table-cell>
          <table:table-cell table:style-name="ce426" table:formula="of:=SUM([.AG10:.AG16])" office:value-type="float" office:value="-170986.141058851" calcext:value-type="float">
            <text:p><text:s/>(170,986.14)</text:p>
          </table:table-cell>
          <table:table-cell table:number-columns-repeated="2"/>
          <table:table-cell table:style-name="ce304" office:value-type="string" calcext:value-type="string">
            <text:p>II. EGRESOS</text:p>
          </table:table-cell>
          <table:table-cell table:style-name="ce604" table:formula="of:=-SUM([.AK10:.AK12])" office:value-type="float" office:value="-0" calcext:value-type="float">
            <text:p><text:s/>- <text:s text:c="2"/></text:p>
          </table:table-cell>
          <table:table-cell table:style-name="ce426" table:formula="of:=SUM([.AL10:.AL16])" office:value-type="float" office:value="-52173.3052498058" calcext:value-type="float">
            <text:p><text:s/>(52,173.31)</text:p>
          </table:table-cell>
          <table:table-cell table:style-name="ce426" table:formula="of:=SUM([.AM10:.AM16])" office:value-type="float" office:value="-143750.544770066" calcext:value-type="float">
            <text:p><text:s/>(143,750.54)</text:p>
          </table:table-cell>
          <table:table-cell table:style-name="ce426" table:formula="of:=SUM([.AN10:.AN16])" office:value-type="float" office:value="-143955.826973634" calcext:value-type="float">
            <text:p><text:s/>(143,955.83)</text:p>
          </table:table-cell>
          <table:table-cell table:style-name="ce426" table:formula="of:=SUM([.AO10:.AO16])" office:value-type="float" office:value="-144202.165617916" calcext:value-type="float">
            <text:p><text:s/>(144,202.17)</text:p>
          </table:table-cell>
          <table:table-cell table:style-name="ce426" table:formula="of:=SUM([.AP10:.AP16])" office:value-type="float" office:value="-170986.141058851" calcext:value-type="float">
            <text:p><text:s/>(170,986.14)</text:p>
          </table:table-cell>
          <table:table-cell table:number-columns-repeated="2"/>
          <table:table-cell table:style-name="ce304" office:value-type="string" calcext:value-type="string">
            <text:p>II. EGRESOS</text:p>
          </table:table-cell>
          <table:table-cell table:style-name="ce604" table:formula="of:=-SUM([.AT10:.AT12])" office:value-type="float" office:value="-0" calcext:value-type="float">
            <text:p><text:s/>- <text:s text:c="2"/></text:p>
          </table:table-cell>
          <table:table-cell table:style-name="ce426" table:formula="of:=SUM([.AU10:.AU16])" office:value-type="float" office:value="-52173.3052498058" calcext:value-type="float">
            <text:p><text:s/>(52,173.31)</text:p>
          </table:table-cell>
          <table:table-cell table:style-name="ce426" table:formula="of:=SUM([.AV10:.AV16])" office:value-type="float" office:value="-143750.544770066" calcext:value-type="float">
            <text:p><text:s/>(143,750.54)</text:p>
          </table:table-cell>
          <table:table-cell table:style-name="ce426" table:formula="of:=SUM([.AW10:.AW16])" office:value-type="float" office:value="-143955.826973634" calcext:value-type="float">
            <text:p><text:s/>(143,955.83)</text:p>
          </table:table-cell>
          <table:table-cell table:style-name="ce426" table:formula="of:=SUM([.AX10:.AX16])" office:value-type="float" office:value="-144202.165617916" calcext:value-type="float">
            <text:p><text:s/>(144,202.17)</text:p>
          </table:table-cell>
          <table:table-cell table:style-name="ce426" table:formula="of:=SUM([.AY10:.AY16])" office:value-type="float" office:value="-170986.141058851" calcext:value-type="float">
            <text:p><text:s/>(170,986.14)</text:p>
          </table:table-cell>
          <table:table-cell table:number-columns-repeated="2"/>
          <table:table-cell table:style-name="ce304" office:value-type="string" calcext:value-type="string">
            <text:p>II. EGRESOS</text:p>
          </table:table-cell>
          <table:table-cell table:style-name="ce604" table:formula="of:=-SUM([.BC10:.BC12])" office:value-type="float" office:value="-0" calcext:value-type="float">
            <text:p><text:s/>- <text:s text:c="2"/></text:p>
          </table:table-cell>
          <table:table-cell table:style-name="ce426" table:formula="of:=SUM([.BD10:.BD16])" office:value-type="float" office:value="-52173.3052498058" calcext:value-type="float">
            <text:p><text:s/>(52,173.31)</text:p>
          </table:table-cell>
          <table:table-cell table:style-name="ce426" table:formula="of:=SUM([.BE10:.BE16])" office:value-type="float" office:value="-143750.544770066" calcext:value-type="float">
            <text:p><text:s/>(143,750.54)</text:p>
          </table:table-cell>
          <table:table-cell table:style-name="ce426" table:formula="of:=SUM([.BF10:.BF16])" office:value-type="float" office:value="-143955.826973634" calcext:value-type="float">
            <text:p><text:s/>(143,955.83)</text:p>
          </table:table-cell>
          <table:table-cell table:style-name="ce426" table:formula="of:=SUM([.BG10:.BG16])" office:value-type="float" office:value="-144202.165617916" calcext:value-type="float">
            <text:p><text:s/>(144,202.17)</text:p>
          </table:table-cell>
          <table:table-cell table:style-name="ce426" table:formula="of:=SUM([.BH10:.BH16])" office:value-type="float" office:value="-170986.141058851" calcext:value-type="float">
            <text:p><text:s/>(170,986.14)</text:p>
          </table:table-cell>
          <table:table-cell table:number-columns-repeated="2"/>
          <table:table-cell table:style-name="ce304" office:value-type="string" calcext:value-type="string">
            <text:p>II. EGRESOS</text:p>
          </table:table-cell>
          <table:table-cell table:style-name="ce604" table:formula="of:=-SUM([.BL10:.BL12])" office:value-type="float" office:value="-0" calcext:value-type="float">
            <text:p><text:s/>- <text:s text:c="2"/></text:p>
          </table:table-cell>
          <table:table-cell table:style-name="ce426" table:formula="of:=SUM([.BM10:.BM16])" office:value-type="float" office:value="-52173.3052498058" calcext:value-type="float">
            <text:p><text:s/>(52,173.31)</text:p>
          </table:table-cell>
          <table:table-cell table:style-name="ce426" table:formula="of:=SUM([.BN10:.BN16])" office:value-type="float" office:value="-143750.544770066" calcext:value-type="float">
            <text:p><text:s/>(143,750.54)</text:p>
          </table:table-cell>
          <table:table-cell table:style-name="ce426" table:formula="of:=SUM([.BO10:.BO16])" office:value-type="float" office:value="-143955.826973634" calcext:value-type="float">
            <text:p><text:s/>(143,955.83)</text:p>
          </table:table-cell>
          <table:table-cell table:style-name="ce426" table:formula="of:=SUM([.BP10:.BP16])" office:value-type="float" office:value="-144202.165617916" calcext:value-type="float">
            <text:p><text:s/>(144,202.17)</text:p>
          </table:table-cell>
          <table:table-cell table:style-name="ce426" table:formula="of:=SUM([.BQ10:.BQ16])" office:value-type="float" office:value="-170986.141058851" calcext:value-type="float">
            <text:p><text:s/>(170,986.14)</text:p>
          </table:table-cell>
          <table:table-cell table:number-columns-repeated="2"/>
          <table:table-cell table:style-name="ce304" office:value-type="string" calcext:value-type="string">
            <text:p>II. EGRESOS</text:p>
          </table:table-cell>
          <table:table-cell table:style-name="ce604" table:formula="of:=-SUM([.BU10:.BU12])" office:value-type="float" office:value="-0" calcext:value-type="float">
            <text:p><text:s/>- <text:s text:c="2"/></text:p>
          </table:table-cell>
          <table:table-cell table:style-name="ce426" table:formula="of:=SUM([.BV10:.BV16])" office:value-type="float" office:value="-52173.3052498058" calcext:value-type="float">
            <text:p><text:s/>(52,173.31)</text:p>
          </table:table-cell>
          <table:table-cell table:style-name="ce426" table:formula="of:=SUM([.BW10:.BW16])" office:value-type="float" office:value="-143750.544770066" calcext:value-type="float">
            <text:p><text:s/>(143,750.54)</text:p>
          </table:table-cell>
          <table:table-cell table:style-name="ce426" table:formula="of:=SUM([.BX10:.BX16])" office:value-type="float" office:value="-143955.826973634" calcext:value-type="float">
            <text:p><text:s/>(143,955.83)</text:p>
          </table:table-cell>
          <table:table-cell table:style-name="ce426" table:formula="of:=SUM([.BY10:.BY16])" office:value-type="float" office:value="-144202.165617916" calcext:value-type="float">
            <text:p><text:s/>(144,202.17)</text:p>
          </table:table-cell>
          <table:table-cell table:style-name="ce426" table:formula="of:=SUM([.BZ10:.BZ16])" office:value-type="float" office:value="-170986.141058851" calcext:value-type="float">
            <text:p><text:s/>(170,986.14)</text:p>
          </table:table-cell>
          <table:table-cell table:number-columns-repeated="179"/>
        </table:table-row>
        <table:table-row table:style-name="ro21">
          <table:table-cell table:style-name="ce649" office:value-type="float" office:value="5" calcext:value-type="float">
            <text:p>5</text:p>
          </table:table-cell>
          <table:table-cell table:style-name="ce654" table:formula="of:=[$'FLUJO DE CAJA '.G23]" office:value-type="float" office:value="222198.740963664" calcext:value-type="float">
            <text:p><text:s/>222,198.74 </text:p>
          </table:table-cell>
          <table:table-cell table:style-name="ce657" table:formula="of:=1/(1+[.$B$1])^[.A10]" office:value-type="float" office:value="0.406804650336188" calcext:value-type="float">
            <text:p><text:s/>0.41 </text:p>
          </table:table-cell>
          <table:table-cell table:style-name="ce654" table:formula="of:=[.B10]*[.C10]" office:value-type="float" office:value="90391.4811228646" calcext:value-type="float">
            <text:p><text:s/>90,391.48 </text:p>
          </table:table-cell>
          <table:table-cell table:number-columns-repeated="2"/>
          <table:table-cell table:style-name="ce649" office:value-type="float" office:value="5" calcext:value-type="float">
            <text:p>5</text:p>
          </table:table-cell>
          <table:table-cell table:style-name="ce654" table:formula="of:=[$'FLUJO DE CAJA '.G27]" office:value-type="float" office:value="222198.740963664" calcext:value-type="float">
            <text:p><text:s/>222,198.74 </text:p>
          </table:table-cell>
          <table:table-cell table:style-name="ce673" table:formula="of:=1/(1+[.$H$1])^[.G10]" office:value-type="float" office:value="0.401877572016461" calcext:value-type="float">
            <text:p><text:s/>0.40 </text:p>
          </table:table-cell>
          <table:table-cell table:style-name="ce654" table:formula="of:=[.H10]*[.I10]" office:value-type="float" office:value="89296.6905235919" calcext:value-type="float">
            <text:p><text:s/>89,296.69 </text:p>
          </table:table-cell>
          <table:table-cell table:number-columns-repeated="2"/>
          <table:table-cell table:style-name="ce162" table:formula="of:=+[$'PLAN DE PRODUCCION'.B26]" office:value-type="float" office:value="2025" calcext:value-type="float">
            <text:p>2025</text:p>
          </table:table-cell>
          <table:table-cell table:style-name="ce679" table:formula="of:=+[$'PLAN DE PRODUCCION'.C26]*[.$N$3]" office:value-type="float" office:value="11443.696" calcext:value-type="float">
            <text:p>11443.70</text:p>
          </table:table-cell>
          <table:table-cell table:style-name="ce679" table:formula="of:=+[$'PLAN DE PRODUCCION'.D26]*[.$O$3]" office:value-type="float" office:value="18" calcext:value-type="float">
            <text:p>18.00</text:p>
          </table:table-cell>
          <table:table-cell table:style-name="ce679" table:formula="of:=[.N10]*[.O10]" office:value-type="float" office:value="205986.528" calcext:value-type="float">
            <text:p>205986.53</text:p>
          </table:table-cell>
          <table:table-cell/>
          <table:table-cell table:style-name="ce307" office:value-type="string" calcext:value-type="string">
            <text:p>II.1. COSTOS DE PRODUCCIÒN</text:p>
          </table:table-cell>
          <table:table-cell table:style-name="ce605"/>
          <table:table-cell table:style-name="ce427" table:formula="of:=+[$'FLUJO DE CAJA '.C14]" office:value-type="float" office:value="-47345.6730719438" calcext:value-type="float">
            <text:p><text:s/>(47,345.67)</text:p>
          </table:table-cell>
          <table:table-cell table:style-name="ce427" table:formula="of:=+[$'FLUJO DE CAJA '.D14]" office:value-type="float" office:value="-116186.673626667" calcext:value-type="float">
            <text:p><text:s/>(116,186.67)</text:p>
          </table:table-cell>
          <table:table-cell table:style-name="ce427" table:formula="of:=+[$'FLUJO DE CAJA '.E14]" office:value-type="float" office:value="-116186.673626667" calcext:value-type="float">
            <text:p><text:s/>(116,186.67)</text:p>
          </table:table-cell>
          <table:table-cell table:style-name="ce427" table:formula="of:=+[$'FLUJO DE CAJA '.F14]" office:value-type="float" office:value="-116186.673626667" calcext:value-type="float">
            <text:p><text:s/>(116,186.67)</text:p>
          </table:table-cell>
          <table:table-cell table:style-name="ce427" table:formula="of:=+[$'FLUJO DE CAJA '.G14]" office:value-type="float" office:value="-116186.673626667" calcext:value-type="float">
            <text:p><text:s/>(116,186.67)</text:p>
          </table:table-cell>
          <table:table-cell table:number-columns-repeated="2"/>
          <table:table-cell table:style-name="ce307" office:value-type="string" calcext:value-type="string">
            <text:p>II.1. COSTOS DE PRODUCCIÒN</text:p>
          </table:table-cell>
          <table:table-cell table:style-name="ce605"/>
          <table:table-cell table:style-name="ce427" table:formula="of:=+[.T10]" office:value-type="float" office:value="-47345.6730719438" calcext:value-type="float">
            <text:p><text:s/>(47,345.67)</text:p>
          </table:table-cell>
          <table:table-cell table:style-name="ce427" table:formula="of:=+[.U10]" office:value-type="float" office:value="-116186.673626667" calcext:value-type="float">
            <text:p><text:s/>(116,186.67)</text:p>
          </table:table-cell>
          <table:table-cell table:style-name="ce427" table:formula="of:=+[.V10]" office:value-type="float" office:value="-116186.673626667" calcext:value-type="float">
            <text:p><text:s/>(116,186.67)</text:p>
          </table:table-cell>
          <table:table-cell table:style-name="ce427" table:formula="of:=+[.W10]" office:value-type="float" office:value="-116186.673626667" calcext:value-type="float">
            <text:p><text:s/>(116,186.67)</text:p>
          </table:table-cell>
          <table:table-cell table:style-name="ce427" table:formula="of:=+[.X10]" office:value-type="float" office:value="-116186.673626667" calcext:value-type="float">
            <text:p><text:s/>(116,186.67)</text:p>
          </table:table-cell>
          <table:table-cell table:number-columns-repeated="2"/>
          <table:table-cell table:style-name="ce307" office:value-type="string" calcext:value-type="string">
            <text:p>II.1. COSTOS DE PRODUCCIÒN</text:p>
          </table:table-cell>
          <table:table-cell table:style-name="ce605"/>
          <table:table-cell table:style-name="ce427" table:formula="of:=+[.AC10]" office:value-type="float" office:value="-47345.6730719438" calcext:value-type="float">
            <text:p><text:s/>(47,345.67)</text:p>
          </table:table-cell>
          <table:table-cell table:style-name="ce427" table:formula="of:=+[.AD10]" office:value-type="float" office:value="-116186.673626667" calcext:value-type="float">
            <text:p><text:s/>(116,186.67)</text:p>
          </table:table-cell>
          <table:table-cell table:style-name="ce427" table:formula="of:=+[.AE10]" office:value-type="float" office:value="-116186.673626667" calcext:value-type="float">
            <text:p><text:s/>(116,186.67)</text:p>
          </table:table-cell>
          <table:table-cell table:style-name="ce427" table:formula="of:=+[.AF10]" office:value-type="float" office:value="-116186.673626667" calcext:value-type="float">
            <text:p><text:s/>(116,186.67)</text:p>
          </table:table-cell>
          <table:table-cell table:style-name="ce427" table:formula="of:=+[.AG10]" office:value-type="float" office:value="-116186.673626667" calcext:value-type="float">
            <text:p><text:s/>(116,186.67)</text:p>
          </table:table-cell>
          <table:table-cell table:number-columns-repeated="2"/>
          <table:table-cell table:style-name="ce307" office:value-type="string" calcext:value-type="string">
            <text:p>II.1. COSTOS DE PRODUCCIÒN</text:p>
          </table:table-cell>
          <table:table-cell table:style-name="ce605"/>
          <table:table-cell table:style-name="ce427" table:formula="of:=+[.AL10]" office:value-type="float" office:value="-47345.6730719438" calcext:value-type="float">
            <text:p><text:s/>(47,345.67)</text:p>
          </table:table-cell>
          <table:table-cell table:style-name="ce427" table:formula="of:=+[.AM10]" office:value-type="float" office:value="-116186.673626667" calcext:value-type="float">
            <text:p><text:s/>(116,186.67)</text:p>
          </table:table-cell>
          <table:table-cell table:style-name="ce427" table:formula="of:=+[.AN10]" office:value-type="float" office:value="-116186.673626667" calcext:value-type="float">
            <text:p><text:s/>(116,186.67)</text:p>
          </table:table-cell>
          <table:table-cell table:style-name="ce427" table:formula="of:=+[.AO10]" office:value-type="float" office:value="-116186.673626667" calcext:value-type="float">
            <text:p><text:s/>(116,186.67)</text:p>
          </table:table-cell>
          <table:table-cell table:style-name="ce427" table:formula="of:=+[.AP10]" office:value-type="float" office:value="-116186.673626667" calcext:value-type="float">
            <text:p><text:s/>(116,186.67)</text:p>
          </table:table-cell>
          <table:table-cell table:number-columns-repeated="2"/>
          <table:table-cell table:style-name="ce307" office:value-type="string" calcext:value-type="string">
            <text:p>II.1. COSTOS DE PRODUCCIÒN</text:p>
          </table:table-cell>
          <table:table-cell table:style-name="ce605"/>
          <table:table-cell table:style-name="ce427" table:formula="of:=+[.AU10]" office:value-type="float" office:value="-47345.6730719438" calcext:value-type="float">
            <text:p><text:s/>(47,345.67)</text:p>
          </table:table-cell>
          <table:table-cell table:style-name="ce427" table:formula="of:=+[.AV10]" office:value-type="float" office:value="-116186.673626667" calcext:value-type="float">
            <text:p><text:s/>(116,186.67)</text:p>
          </table:table-cell>
          <table:table-cell table:style-name="ce427" table:formula="of:=+[.AW10]" office:value-type="float" office:value="-116186.673626667" calcext:value-type="float">
            <text:p><text:s/>(116,186.67)</text:p>
          </table:table-cell>
          <table:table-cell table:style-name="ce427" table:formula="of:=+[.AX10]" office:value-type="float" office:value="-116186.673626667" calcext:value-type="float">
            <text:p><text:s/>(116,186.67)</text:p>
          </table:table-cell>
          <table:table-cell table:style-name="ce427" table:formula="of:=+[.AY10]" office:value-type="float" office:value="-116186.673626667" calcext:value-type="float">
            <text:p><text:s/>(116,186.67)</text:p>
          </table:table-cell>
          <table:table-cell table:number-columns-repeated="2"/>
          <table:table-cell table:style-name="ce307" office:value-type="string" calcext:value-type="string">
            <text:p>II.1. COSTOS DE PRODUCCIÒN</text:p>
          </table:table-cell>
          <table:table-cell table:style-name="ce605"/>
          <table:table-cell table:style-name="ce427" table:formula="of:=+[.BD10]" office:value-type="float" office:value="-47345.6730719438" calcext:value-type="float">
            <text:p><text:s/>(47,345.67)</text:p>
          </table:table-cell>
          <table:table-cell table:style-name="ce427" table:formula="of:=+[.BE10]" office:value-type="float" office:value="-116186.673626667" calcext:value-type="float">
            <text:p><text:s/>(116,186.67)</text:p>
          </table:table-cell>
          <table:table-cell table:style-name="ce427" table:formula="of:=+[.BF10]" office:value-type="float" office:value="-116186.673626667" calcext:value-type="float">
            <text:p><text:s/>(116,186.67)</text:p>
          </table:table-cell>
          <table:table-cell table:style-name="ce427" table:formula="of:=+[.BG10]" office:value-type="float" office:value="-116186.673626667" calcext:value-type="float">
            <text:p><text:s/>(116,186.67)</text:p>
          </table:table-cell>
          <table:table-cell table:style-name="ce427" table:formula="of:=+[.BH10]" office:value-type="float" office:value="-116186.673626667" calcext:value-type="float">
            <text:p><text:s/>(116,186.67)</text:p>
          </table:table-cell>
          <table:table-cell table:number-columns-repeated="2"/>
          <table:table-cell table:style-name="ce307" office:value-type="string" calcext:value-type="string">
            <text:p>II.1. COSTOS DE PRODUCCIÒN</text:p>
          </table:table-cell>
          <table:table-cell table:style-name="ce605"/>
          <table:table-cell table:style-name="ce427" table:formula="of:=+[.BM10]" office:value-type="float" office:value="-47345.6730719438" calcext:value-type="float">
            <text:p><text:s/>(47,345.67)</text:p>
          </table:table-cell>
          <table:table-cell table:style-name="ce427" table:formula="of:=+[.BN10]" office:value-type="float" office:value="-116186.673626667" calcext:value-type="float">
            <text:p><text:s/>(116,186.67)</text:p>
          </table:table-cell>
          <table:table-cell table:style-name="ce427" table:formula="of:=+[.BO10]" office:value-type="float" office:value="-116186.673626667" calcext:value-type="float">
            <text:p><text:s/>(116,186.67)</text:p>
          </table:table-cell>
          <table:table-cell table:style-name="ce427" table:formula="of:=+[.BP10]" office:value-type="float" office:value="-116186.673626667" calcext:value-type="float">
            <text:p><text:s/>(116,186.67)</text:p>
          </table:table-cell>
          <table:table-cell table:style-name="ce427" table:formula="of:=+[.BQ10]" office:value-type="float" office:value="-116186.673626667" calcext:value-type="float">
            <text:p><text:s/>(116,186.67)</text:p>
          </table:table-cell>
          <table:table-cell table:number-columns-repeated="179"/>
        </table:table-row>
        <table:table-row table:style-name="ro17">
          <table:table-cell table:style-name="ce650" office:value-type="string" calcext:value-type="string" table:number-columns-spanned="3" table:number-rows-spanned="1">
            <text:p>VANE</text:p>
          </table:table-cell>
          <table:covered-table-cell table:number-columns-repeated="2" table:style-name="ce650"/>
          <table:table-cell table:style-name="ce658" table:formula="of:=SUM([.D5:.D10])" office:value-type="float" office:value="50738.266689428" calcext:value-type="float">
            <text:p><text:s/>50,738.27 </text:p>
          </table:table-cell>
          <table:table-cell table:number-columns-repeated="2"/>
          <table:table-cell table:style-name="ce650" office:value-type="string" calcext:value-type="string" table:number-columns-spanned="3" table:number-rows-spanned="1">
            <text:p>VANE</text:p>
          </table:table-cell>
          <table:covered-table-cell table:number-columns-repeated="2" table:style-name="ce650"/>
          <table:table-cell table:style-name="ce658" table:formula="of:=SUM([.J5:.J10])" office:value-type="float" office:value="49463.6575488383" calcext:value-type="float">
            <text:p><text:s/>49,463.66 </text:p>
          </table:table-cell>
          <table:table-cell table:number-columns-repeated="7"/>
          <table:table-cell table:style-name="ce307" office:value-type="string" calcext:value-type="string">
            <text:p>II.2. GASTOS DE OPERACIÒN</text:p>
          </table:table-cell>
          <table:table-cell table:style-name="ce605"/>
          <table:table-cell table:style-name="ce427" table:formula="of:=+[$'FLUJO DE CAJA '.C15]" office:value-type="float" office:value="-3907" calcext:value-type="float">
            <text:p><text:s/>(3,907.00)</text:p>
          </table:table-cell>
          <table:table-cell table:style-name="ce427" table:formula="of:=+[$'FLUJO DE CAJA '.D15]" office:value-type="float" office:value="-3907" calcext:value-type="float">
            <text:p><text:s/>(3,907.00)</text:p>
          </table:table-cell>
          <table:table-cell table:style-name="ce427" table:formula="of:=+[$'FLUJO DE CAJA '.E15]" office:value-type="float" office:value="-3907" calcext:value-type="float">
            <text:p><text:s/>(3,907.00)</text:p>
          </table:table-cell>
          <table:table-cell table:style-name="ce427" table:formula="of:=+[$'FLUJO DE CAJA '.F15]" office:value-type="float" office:value="-3907" calcext:value-type="float">
            <text:p><text:s/>(3,907.00)</text:p>
          </table:table-cell>
          <table:table-cell table:style-name="ce427" table:formula="of:=+[$'FLUJO DE CAJA '.G15]" office:value-type="float" office:value="-3907" calcext:value-type="float">
            <text:p><text:s/>(3,907.00)</text:p>
          </table:table-cell>
          <table:table-cell table:number-columns-repeated="2"/>
          <table:table-cell table:style-name="ce307" office:value-type="string" calcext:value-type="string">
            <text:p>II.2. GASTOS DE OPERACIÒN</text:p>
          </table:table-cell>
          <table:table-cell table:style-name="ce605"/>
          <table:table-cell table:style-name="ce427" table:formula="of:=+[.T11]" office:value-type="float" office:value="-3907" calcext:value-type="float">
            <text:p><text:s/>(3,907.00)</text:p>
          </table:table-cell>
          <table:table-cell table:style-name="ce427" table:formula="of:=+[.U11]" office:value-type="float" office:value="-3907" calcext:value-type="float">
            <text:p><text:s/>(3,907.00)</text:p>
          </table:table-cell>
          <table:table-cell table:style-name="ce427" table:formula="of:=+[.V11]" office:value-type="float" office:value="-3907" calcext:value-type="float">
            <text:p><text:s/>(3,907.00)</text:p>
          </table:table-cell>
          <table:table-cell table:style-name="ce427" table:formula="of:=+[.W11]" office:value-type="float" office:value="-3907" calcext:value-type="float">
            <text:p><text:s/>(3,907.00)</text:p>
          </table:table-cell>
          <table:table-cell table:style-name="ce427" table:formula="of:=+[.X11]" office:value-type="float" office:value="-3907" calcext:value-type="float">
            <text:p><text:s/>(3,907.00)</text:p>
          </table:table-cell>
          <table:table-cell table:number-columns-repeated="2"/>
          <table:table-cell table:style-name="ce307" office:value-type="string" calcext:value-type="string">
            <text:p>II.2. GASTOS DE OPERACIÒN</text:p>
          </table:table-cell>
          <table:table-cell table:style-name="ce605"/>
          <table:table-cell table:style-name="ce427" table:formula="of:=+[.AC11]" office:value-type="float" office:value="-3907" calcext:value-type="float">
            <text:p><text:s/>(3,907.00)</text:p>
          </table:table-cell>
          <table:table-cell table:style-name="ce427" table:formula="of:=+[.AD11]" office:value-type="float" office:value="-3907" calcext:value-type="float">
            <text:p><text:s/>(3,907.00)</text:p>
          </table:table-cell>
          <table:table-cell table:style-name="ce427" table:formula="of:=+[.AE11]" office:value-type="float" office:value="-3907" calcext:value-type="float">
            <text:p><text:s/>(3,907.00)</text:p>
          </table:table-cell>
          <table:table-cell table:style-name="ce427" table:formula="of:=+[.AF11]" office:value-type="float" office:value="-3907" calcext:value-type="float">
            <text:p><text:s/>(3,907.00)</text:p>
          </table:table-cell>
          <table:table-cell table:style-name="ce427" table:formula="of:=+[.AG11]" office:value-type="float" office:value="-3907" calcext:value-type="float">
            <text:p><text:s/>(3,907.00)</text:p>
          </table:table-cell>
          <table:table-cell table:number-columns-repeated="2"/>
          <table:table-cell table:style-name="ce307" office:value-type="string" calcext:value-type="string">
            <text:p>II.2. GASTOS DE OPERACIÒN</text:p>
          </table:table-cell>
          <table:table-cell table:style-name="ce605"/>
          <table:table-cell table:style-name="ce427" table:formula="of:=+[.AL11]" office:value-type="float" office:value="-3907" calcext:value-type="float">
            <text:p><text:s/>(3,907.00)</text:p>
          </table:table-cell>
          <table:table-cell table:style-name="ce427" table:formula="of:=+[.AM11]" office:value-type="float" office:value="-3907" calcext:value-type="float">
            <text:p><text:s/>(3,907.00)</text:p>
          </table:table-cell>
          <table:table-cell table:style-name="ce427" table:formula="of:=+[.AN11]" office:value-type="float" office:value="-3907" calcext:value-type="float">
            <text:p><text:s/>(3,907.00)</text:p>
          </table:table-cell>
          <table:table-cell table:style-name="ce427" table:formula="of:=+[.AO11]" office:value-type="float" office:value="-3907" calcext:value-type="float">
            <text:p><text:s/>(3,907.00)</text:p>
          </table:table-cell>
          <table:table-cell table:style-name="ce427" table:formula="of:=+[.AP11]" office:value-type="float" office:value="-3907" calcext:value-type="float">
            <text:p><text:s/>(3,907.00)</text:p>
          </table:table-cell>
          <table:table-cell table:number-columns-repeated="2"/>
          <table:table-cell table:style-name="ce307" office:value-type="string" calcext:value-type="string">
            <text:p>II.2. GASTOS DE OPERACIÒN</text:p>
          </table:table-cell>
          <table:table-cell table:style-name="ce605"/>
          <table:table-cell table:style-name="ce427" table:formula="of:=+[.AU11]" office:value-type="float" office:value="-3907" calcext:value-type="float">
            <text:p><text:s/>(3,907.00)</text:p>
          </table:table-cell>
          <table:table-cell table:style-name="ce427" table:formula="of:=+[.AV11]" office:value-type="float" office:value="-3907" calcext:value-type="float">
            <text:p><text:s/>(3,907.00)</text:p>
          </table:table-cell>
          <table:table-cell table:style-name="ce427" table:formula="of:=+[.AW11]" office:value-type="float" office:value="-3907" calcext:value-type="float">
            <text:p><text:s/>(3,907.00)</text:p>
          </table:table-cell>
          <table:table-cell table:style-name="ce427" table:formula="of:=+[.AX11]" office:value-type="float" office:value="-3907" calcext:value-type="float">
            <text:p><text:s/>(3,907.00)</text:p>
          </table:table-cell>
          <table:table-cell table:style-name="ce427" table:formula="of:=+[.AY11]" office:value-type="float" office:value="-3907" calcext:value-type="float">
            <text:p><text:s/>(3,907.00)</text:p>
          </table:table-cell>
          <table:table-cell table:number-columns-repeated="2"/>
          <table:table-cell table:style-name="ce307" office:value-type="string" calcext:value-type="string">
            <text:p>II.2. GASTOS DE OPERACIÒN</text:p>
          </table:table-cell>
          <table:table-cell table:style-name="ce605"/>
          <table:table-cell table:style-name="ce427" table:formula="of:=+[.BD11]" office:value-type="float" office:value="-3907" calcext:value-type="float">
            <text:p><text:s/>(3,907.00)</text:p>
          </table:table-cell>
          <table:table-cell table:style-name="ce427" table:formula="of:=+[.BE11]" office:value-type="float" office:value="-3907" calcext:value-type="float">
            <text:p><text:s/>(3,907.00)</text:p>
          </table:table-cell>
          <table:table-cell table:style-name="ce427" table:formula="of:=+[.BF11]" office:value-type="float" office:value="-3907" calcext:value-type="float">
            <text:p><text:s/>(3,907.00)</text:p>
          </table:table-cell>
          <table:table-cell table:style-name="ce427" table:formula="of:=+[.BG11]" office:value-type="float" office:value="-3907" calcext:value-type="float">
            <text:p><text:s/>(3,907.00)</text:p>
          </table:table-cell>
          <table:table-cell table:style-name="ce427" table:formula="of:=+[.BH11]" office:value-type="float" office:value="-3907" calcext:value-type="float">
            <text:p><text:s/>(3,907.00)</text:p>
          </table:table-cell>
          <table:table-cell table:number-columns-repeated="2"/>
          <table:table-cell table:style-name="ce307" office:value-type="string" calcext:value-type="string">
            <text:p>II.2. GASTOS DE OPERACIÒN</text:p>
          </table:table-cell>
          <table:table-cell table:style-name="ce605"/>
          <table:table-cell table:style-name="ce427" table:formula="of:=+[.BM11]" office:value-type="float" office:value="-3907" calcext:value-type="float">
            <text:p><text:s/>(3,907.00)</text:p>
          </table:table-cell>
          <table:table-cell table:style-name="ce427" table:formula="of:=+[.BN11]" office:value-type="float" office:value="-3907" calcext:value-type="float">
            <text:p><text:s/>(3,907.00)</text:p>
          </table:table-cell>
          <table:table-cell table:style-name="ce427" table:formula="of:=+[.BO11]" office:value-type="float" office:value="-3907" calcext:value-type="float">
            <text:p><text:s/>(3,907.00)</text:p>
          </table:table-cell>
          <table:table-cell table:style-name="ce427" table:formula="of:=+[.BP11]" office:value-type="float" office:value="-3907" calcext:value-type="float">
            <text:p><text:s/>(3,907.00)</text:p>
          </table:table-cell>
          <table:table-cell table:style-name="ce427" table:formula="of:=+[.BQ11]" office:value-type="float" office:value="-3907" calcext:value-type="float">
            <text:p><text:s/>(3,907.00)</text:p>
          </table:table-cell>
          <table:table-cell table:number-columns-repeated="179"/>
        </table:table-row>
        <table:table-row table:style-name="ro48">
          <table:table-cell table:style-name="ce650" office:value-type="string" calcext:value-type="string" table:number-columns-spanned="3" table:number-rows-spanned="1">
            <text:p>TIRE</text:p>
          </table:table-cell>
          <table:covered-table-cell table:number-columns-repeated="2" table:style-name="ce650"/>
          <table:table-cell table:style-name="ce659" table:formula="of:=IRR([.B5:.B10];[.B1])" office:value-type="percentage" office:value="0.292018786595352" calcext:value-type="percentage">
            <text:p>29.20 %</text:p>
          </table:table-cell>
          <table:table-cell table:number-columns-repeated="2"/>
          <table:table-cell table:style-name="ce650" office:value-type="string" calcext:value-type="string" table:number-columns-spanned="3" table:number-rows-spanned="1">
            <text:p>TIRE</text:p>
          </table:table-cell>
          <table:covered-table-cell table:number-columns-repeated="2" table:style-name="ce650"/>
          <table:table-cell table:style-name="ce659" table:formula="of:=IRR([.H5:.H10];[.H1])" office:value-type="percentage" office:value="0.294142931080385" calcext:value-type="percentage">
            <text:p>29.41 %</text:p>
          </table:table-cell>
          <table:table-cell table:number-columns-repeated="7"/>
          <table:table-cell table:style-name="ce599" office:value-type="string" calcext:value-type="string">
            <text:p>II.3. IMPUESTO A LA RENTA</text:p>
          </table:table-cell>
          <table:table-cell table:style-name="ce606"/>
          <table:table-cell table:style-name="ce427" table:formula="of:=+[$'FLUJO DE CAJA '.C16]" office:value-type="float" office:value="-65.2896629950843" calcext:value-type="float">
            <text:p><text:s/>(65.29)</text:p>
          </table:table-cell>
          <table:table-cell table:style-name="ce427" table:formula="of:=+[$'FLUJO DE CAJA '.D16]" office:value-type="float" office:value="-22630.4601255593" calcext:value-type="float">
            <text:p><text:s/>(22,630.46)</text:p>
          </table:table-cell>
          <table:table-cell table:style-name="ce427" table:formula="of:=+[$'FLUJO DE CAJA '.E16]" office:value-type="float" office:value="-22630.4601255593" calcext:value-type="float">
            <text:p><text:s/>(22,630.46)</text:p>
          </table:table-cell>
          <table:table-cell table:style-name="ce427" table:formula="of:=+[$'FLUJO DE CAJA '.F16]" office:value-type="float" office:value="-22630.4601255593" calcext:value-type="float">
            <text:p><text:s/>(22,630.46)</text:p>
          </table:table-cell>
          <table:table-cell table:style-name="ce427" table:formula="of:=+[$'FLUJO DE CAJA '.G16]" office:value-type="float" office:value="-49118.8291933559" calcext:value-type="float">
            <text:p><text:s/>(49,118.83)</text:p>
          </table:table-cell>
          <table:table-cell table:number-columns-repeated="2"/>
          <table:table-cell table:style-name="ce599" office:value-type="string" calcext:value-type="string">
            <text:p>II.3. IMPUESTO A LA RENTA</text:p>
          </table:table-cell>
          <table:table-cell table:style-name="ce606"/>
          <table:table-cell table:style-name="ce427" table:formula="of:=+[.T12]" office:value-type="float" office:value="-65.2896629950843" calcext:value-type="float">
            <text:p><text:s/>(65.29)</text:p>
          </table:table-cell>
          <table:table-cell table:style-name="ce427" table:formula="of:=+[.U12]" office:value-type="float" office:value="-22630.4601255593" calcext:value-type="float">
            <text:p><text:s/>(22,630.46)</text:p>
          </table:table-cell>
          <table:table-cell table:style-name="ce427" table:formula="of:=+[.V12]" office:value-type="float" office:value="-22630.4601255593" calcext:value-type="float">
            <text:p><text:s/>(22,630.46)</text:p>
          </table:table-cell>
          <table:table-cell table:style-name="ce427" table:formula="of:=+[.W12]" office:value-type="float" office:value="-22630.4601255593" calcext:value-type="float">
            <text:p><text:s/>(22,630.46)</text:p>
          </table:table-cell>
          <table:table-cell table:style-name="ce427" table:formula="of:=+[.X12]" office:value-type="float" office:value="-49118.8291933559" calcext:value-type="float">
            <text:p><text:s/>(49,118.83)</text:p>
          </table:table-cell>
          <table:table-cell table:number-columns-repeated="2"/>
          <table:table-cell table:style-name="ce599" office:value-type="string" calcext:value-type="string">
            <text:p>II.3. IMPUESTO A LA RENTA</text:p>
          </table:table-cell>
          <table:table-cell table:style-name="ce606"/>
          <table:table-cell table:style-name="ce427" table:formula="of:=+[.AC12]" office:value-type="float" office:value="-65.2896629950843" calcext:value-type="float">
            <text:p><text:s/>(65.29)</text:p>
          </table:table-cell>
          <table:table-cell table:style-name="ce427" table:formula="of:=+[.AD12]" office:value-type="float" office:value="-22630.4601255593" calcext:value-type="float">
            <text:p><text:s/>(22,630.46)</text:p>
          </table:table-cell>
          <table:table-cell table:style-name="ce427" table:formula="of:=+[.AE12]" office:value-type="float" office:value="-22630.4601255593" calcext:value-type="float">
            <text:p><text:s/>(22,630.46)</text:p>
          </table:table-cell>
          <table:table-cell table:style-name="ce427" table:formula="of:=+[.AF12]" office:value-type="float" office:value="-22630.4601255593" calcext:value-type="float">
            <text:p><text:s/>(22,630.46)</text:p>
          </table:table-cell>
          <table:table-cell table:style-name="ce427" table:formula="of:=+[.AG12]" office:value-type="float" office:value="-49118.8291933559" calcext:value-type="float">
            <text:p><text:s/>(49,118.83)</text:p>
          </table:table-cell>
          <table:table-cell table:number-columns-repeated="2"/>
          <table:table-cell table:style-name="ce599" office:value-type="string" calcext:value-type="string">
            <text:p>II.3. IMPUESTO A LA RENTA</text:p>
          </table:table-cell>
          <table:table-cell table:style-name="ce606"/>
          <table:table-cell table:style-name="ce427" table:formula="of:=+[.AL12]" office:value-type="float" office:value="-65.2896629950843" calcext:value-type="float">
            <text:p><text:s/>(65.29)</text:p>
          </table:table-cell>
          <table:table-cell table:style-name="ce427" table:formula="of:=+[.AM12]" office:value-type="float" office:value="-22630.4601255593" calcext:value-type="float">
            <text:p><text:s/>(22,630.46)</text:p>
          </table:table-cell>
          <table:table-cell table:style-name="ce427" table:formula="of:=+[.AN12]" office:value-type="float" office:value="-22630.4601255593" calcext:value-type="float">
            <text:p><text:s/>(22,630.46)</text:p>
          </table:table-cell>
          <table:table-cell table:style-name="ce427" table:formula="of:=+[.AO12]" office:value-type="float" office:value="-22630.4601255593" calcext:value-type="float">
            <text:p><text:s/>(22,630.46)</text:p>
          </table:table-cell>
          <table:table-cell table:style-name="ce427" table:formula="of:=+[.AP12]" office:value-type="float" office:value="-49118.8291933559" calcext:value-type="float">
            <text:p><text:s/>(49,118.83)</text:p>
          </table:table-cell>
          <table:table-cell table:number-columns-repeated="2"/>
          <table:table-cell table:style-name="ce599" office:value-type="string" calcext:value-type="string">
            <text:p>II.3. IMPUESTO A LA RENTA</text:p>
          </table:table-cell>
          <table:table-cell table:style-name="ce606"/>
          <table:table-cell table:style-name="ce427" table:formula="of:=+[.AU12]" office:value-type="float" office:value="-65.2896629950843" calcext:value-type="float">
            <text:p><text:s/>(65.29)</text:p>
          </table:table-cell>
          <table:table-cell table:style-name="ce427" table:formula="of:=+[.AV12]" office:value-type="float" office:value="-22630.4601255593" calcext:value-type="float">
            <text:p><text:s/>(22,630.46)</text:p>
          </table:table-cell>
          <table:table-cell table:style-name="ce427" table:formula="of:=+[.AW12]" office:value-type="float" office:value="-22630.4601255593" calcext:value-type="float">
            <text:p><text:s/>(22,630.46)</text:p>
          </table:table-cell>
          <table:table-cell table:style-name="ce427" table:formula="of:=+[.AX12]" office:value-type="float" office:value="-22630.4601255593" calcext:value-type="float">
            <text:p><text:s/>(22,630.46)</text:p>
          </table:table-cell>
          <table:table-cell table:style-name="ce427" table:formula="of:=+[.AY12]" office:value-type="float" office:value="-49118.8291933559" calcext:value-type="float">
            <text:p><text:s/>(49,118.83)</text:p>
          </table:table-cell>
          <table:table-cell table:number-columns-repeated="2"/>
          <table:table-cell table:style-name="ce599" office:value-type="string" calcext:value-type="string">
            <text:p>II.3. IMPUESTO A LA RENTA</text:p>
          </table:table-cell>
          <table:table-cell table:style-name="ce606"/>
          <table:table-cell table:style-name="ce427" table:formula="of:=+[.BD12]" office:value-type="float" office:value="-65.2896629950843" calcext:value-type="float">
            <text:p><text:s/>(65.29)</text:p>
          </table:table-cell>
          <table:table-cell table:style-name="ce427" table:formula="of:=+[.BE12]" office:value-type="float" office:value="-22630.4601255593" calcext:value-type="float">
            <text:p><text:s/>(22,630.46)</text:p>
          </table:table-cell>
          <table:table-cell table:style-name="ce427" table:formula="of:=+[.BF12]" office:value-type="float" office:value="-22630.4601255593" calcext:value-type="float">
            <text:p><text:s/>(22,630.46)</text:p>
          </table:table-cell>
          <table:table-cell table:style-name="ce427" table:formula="of:=+[.BG12]" office:value-type="float" office:value="-22630.4601255593" calcext:value-type="float">
            <text:p><text:s/>(22,630.46)</text:p>
          </table:table-cell>
          <table:table-cell table:style-name="ce427" table:formula="of:=+[.BH12]" office:value-type="float" office:value="-49118.8291933559" calcext:value-type="float">
            <text:p><text:s/>(49,118.83)</text:p>
          </table:table-cell>
          <table:table-cell table:number-columns-repeated="2"/>
          <table:table-cell table:style-name="ce599" office:value-type="string" calcext:value-type="string">
            <text:p>II.3. IMPUESTO A LA RENTA</text:p>
          </table:table-cell>
          <table:table-cell table:style-name="ce606"/>
          <table:table-cell table:style-name="ce427" table:formula="of:=+[.BM12]" office:value-type="float" office:value="-65.2896629950843" calcext:value-type="float">
            <text:p><text:s/>(65.29)</text:p>
          </table:table-cell>
          <table:table-cell table:style-name="ce427" table:formula="of:=+[.BN12]" office:value-type="float" office:value="-22630.4601255593" calcext:value-type="float">
            <text:p><text:s/>(22,630.46)</text:p>
          </table:table-cell>
          <table:table-cell table:style-name="ce427" table:formula="of:=+[.BO12]" office:value-type="float" office:value="-22630.4601255593" calcext:value-type="float">
            <text:p><text:s/>(22,630.46)</text:p>
          </table:table-cell>
          <table:table-cell table:style-name="ce427" table:formula="of:=+[.BP12]" office:value-type="float" office:value="-22630.4601255593" calcext:value-type="float">
            <text:p><text:s/>(22,630.46)</text:p>
          </table:table-cell>
          <table:table-cell table:style-name="ce427" table:formula="of:=+[.BQ12]" office:value-type="float" office:value="-49118.8291933559" calcext:value-type="float">
            <text:p><text:s/>(49,118.83)</text:p>
          </table:table-cell>
          <table:table-cell table:number-columns-repeated="179"/>
        </table:table-row>
        <table:table-row table:style-name="ro21">
          <table:table-cell table:number-columns-repeated="17"/>
          <table:table-cell table:style-name="ce307" office:value-type="string" calcext:value-type="string">
            <text:p>II.4. INVERSION FIJA </text:p>
          </table:table-cell>
          <table:table-cell table:style-name="ce604" table:formula="of:=-SUM([.S14:.S18])" office:value-type="float" office:value="-157481.215045237" calcext:value-type="float">
            <text:p><text:s/>(157,481.22)</text:p>
          </table:table-cell>
          <table:table-cell table:style-name="ce427" table:number-columns-repeated="5"/>
          <table:table-cell table:number-columns-repeated="2"/>
          <table:table-cell table:style-name="ce307" office:value-type="string" calcext:value-type="string">
            <text:p>II.4. INVERSION FIJA </text:p>
          </table:table-cell>
          <table:table-cell table:style-name="ce604" table:formula="of:=-SUM([.AB14:.AB18])" office:value-type="float" office:value="-157481.215045237" calcext:value-type="float">
            <text:p><text:s/>(157,481.22)</text:p>
          </table:table-cell>
          <table:table-cell table:style-name="ce427" table:number-columns-repeated="5"/>
          <table:table-cell table:number-columns-repeated="2"/>
          <table:table-cell table:style-name="ce307" office:value-type="string" calcext:value-type="string">
            <text:p>II.4. INVERSION FIJA </text:p>
          </table:table-cell>
          <table:table-cell table:style-name="ce604" table:formula="of:=-SUM([.AK14:.AK18])" office:value-type="float" office:value="-157481.215045237" calcext:value-type="float">
            <text:p><text:s/>(157,481.22)</text:p>
          </table:table-cell>
          <table:table-cell table:style-name="ce427" table:number-columns-repeated="5"/>
          <table:table-cell table:number-columns-repeated="2"/>
          <table:table-cell table:style-name="ce307" office:value-type="string" calcext:value-type="string">
            <text:p>II.4. INVERSION FIJA </text:p>
          </table:table-cell>
          <table:table-cell table:style-name="ce604" table:formula="of:=-SUM([.AT14:.AT18])" office:value-type="float" office:value="-157481.215045237" calcext:value-type="float">
            <text:p><text:s/>(157,481.22)</text:p>
          </table:table-cell>
          <table:table-cell table:style-name="ce427" table:number-columns-repeated="5"/>
          <table:table-cell table:number-columns-repeated="2"/>
          <table:table-cell table:style-name="ce307" office:value-type="string" calcext:value-type="string">
            <text:p>II.4. INVERSION FIJA </text:p>
          </table:table-cell>
          <table:table-cell table:style-name="ce604" table:formula="of:=-SUM([.BC14:.BC18])" office:value-type="float" office:value="-157481.215045237" calcext:value-type="float">
            <text:p><text:s/>(157,481.22)</text:p>
          </table:table-cell>
          <table:table-cell table:style-name="ce427" table:number-columns-repeated="5"/>
          <table:table-cell table:number-columns-repeated="2"/>
          <table:table-cell table:style-name="ce307" office:value-type="string" calcext:value-type="string">
            <text:p>II.4. INVERSION FIJA </text:p>
          </table:table-cell>
          <table:table-cell table:style-name="ce604" table:formula="of:=-SUM([.BL14:.BL18])" office:value-type="float" office:value="-157481.215045237" calcext:value-type="float">
            <text:p><text:s/>(157,481.22)</text:p>
          </table:table-cell>
          <table:table-cell table:style-name="ce427" table:number-columns-repeated="5"/>
          <table:table-cell table:number-columns-repeated="2"/>
          <table:table-cell table:style-name="ce307" office:value-type="string" calcext:value-type="string">
            <text:p>II.4. INVERSION FIJA </text:p>
          </table:table-cell>
          <table:table-cell table:style-name="ce604" table:formula="of:=-SUM([.BU14:.BU18])" office:value-type="float" office:value="-157481.215045237" calcext:value-type="float">
            <text:p><text:s/>(157,481.22)</text:p>
          </table:table-cell>
          <table:table-cell table:style-name="ce427" table:number-columns-repeated="5"/>
          <table:table-cell table:number-columns-repeated="179"/>
        </table:table-row>
        <table:table-row table:style-name="ro29">
          <table:table-cell table:number-columns-repeated="5"/>
          <table:table-cell table:style-name="ce648" office:value-type="string" calcext:value-type="string" table:number-columns-spanned="6" table:number-rows-spanned="1">
            <text:p>PUNTO DE QUIEBRE UTILIZANDO EL METODO DE ANALISIS DE SENSIBILIDAD</text:p>
          </table:table-cell>
          <table:covered-table-cell table:number-columns-repeated="5" table:style-name="ce648"/>
          <table:table-cell table:number-columns-repeated="6"/>
          <table:table-cell table:style-name="ce307" office:value-type="string" calcext:value-type="string">
            <text:p><text:s text:c="3"/>ACTIVO FIJO</text:p>
          </table:table-cell>
          <table:table-cell table:style-name="ce605" table:formula="of:=+[$'FLUJO DE CAJA '.B18]" office:value-type="float" office:value="126184.5" calcext:value-type="float">
            <text:p><text:s/>126,184.50 </text:p>
          </table:table-cell>
          <table:table-cell table:style-name="ce427" table:number-columns-repeated="5"/>
          <table:table-cell table:number-columns-repeated="2"/>
          <table:table-cell table:style-name="ce307" office:value-type="string" calcext:value-type="string">
            <text:p><text:s text:c="3"/>ACTIVO FIJO</text:p>
          </table:table-cell>
          <table:table-cell table:style-name="ce605" table:formula="of:=+[.S14]" office:value-type="float" office:value="126184.5" calcext:value-type="float">
            <text:p><text:s/>126,184.50 </text:p>
          </table:table-cell>
          <table:table-cell table:style-name="ce427" table:number-columns-repeated="5"/>
          <table:table-cell table:number-columns-repeated="2"/>
          <table:table-cell table:style-name="ce307" office:value-type="string" calcext:value-type="string">
            <text:p><text:s text:c="3"/>ACTIVO FIJO</text:p>
          </table:table-cell>
          <table:table-cell table:style-name="ce605" table:formula="of:=+[.AB14]" office:value-type="float" office:value="126184.5" calcext:value-type="float">
            <text:p><text:s/>126,184.50 </text:p>
          </table:table-cell>
          <table:table-cell table:style-name="ce427" table:number-columns-repeated="5"/>
          <table:table-cell table:number-columns-repeated="2"/>
          <table:table-cell table:style-name="ce307" office:value-type="string" calcext:value-type="string">
            <text:p><text:s text:c="3"/>ACTIVO FIJO</text:p>
          </table:table-cell>
          <table:table-cell table:style-name="ce605" table:formula="of:=+[.AK14]" office:value-type="float" office:value="126184.5" calcext:value-type="float">
            <text:p><text:s/>126,184.50 </text:p>
          </table:table-cell>
          <table:table-cell table:style-name="ce427" table:number-columns-repeated="5"/>
          <table:table-cell table:number-columns-repeated="2"/>
          <table:table-cell table:style-name="ce307" office:value-type="string" calcext:value-type="string">
            <text:p><text:s text:c="3"/>ACTIVO FIJO</text:p>
          </table:table-cell>
          <table:table-cell table:style-name="ce605" table:formula="of:=+[.AT14]" office:value-type="float" office:value="126184.5" calcext:value-type="float">
            <text:p><text:s/>126,184.50 </text:p>
          </table:table-cell>
          <table:table-cell table:style-name="ce427" table:number-columns-repeated="5"/>
          <table:table-cell table:number-columns-repeated="2"/>
          <table:table-cell table:style-name="ce307" office:value-type="string" calcext:value-type="string">
            <text:p><text:s text:c="3"/>ACTIVO FIJO</text:p>
          </table:table-cell>
          <table:table-cell table:style-name="ce605" table:formula="of:=+[.BC14]" office:value-type="float" office:value="126184.5" calcext:value-type="float">
            <text:p><text:s/>126,184.50 </text:p>
          </table:table-cell>
          <table:table-cell table:style-name="ce427" table:number-columns-repeated="5"/>
          <table:table-cell table:number-columns-repeated="2"/>
          <table:table-cell table:style-name="ce307" office:value-type="string" calcext:value-type="string">
            <text:p><text:s text:c="3"/>ACTIVO FIJO</text:p>
          </table:table-cell>
          <table:table-cell table:style-name="ce605" table:formula="of:=+[.BL14]" office:value-type="float" office:value="126184.5" calcext:value-type="float">
            <text:p><text:s/>126,184.50 </text:p>
          </table:table-cell>
          <table:table-cell table:style-name="ce427" table:number-columns-repeated="5"/>
          <table:table-cell table:number-columns-repeated="179"/>
        </table:table-row>
        <table:table-row table:style-name="ro8">
          <table:table-cell table:style-name="ce651" office:value-type="string" calcext:value-type="string" table:number-columns-spanned="3" table:number-rows-spanned="1">
            <text:p>Caida de la produccion en</text:p>
          </table:table-cell>
          <table:covered-table-cell table:number-columns-repeated="2" table:style-name="ce651"/>
          <table:table-cell table:style-name="ce660" office:value-type="percentage" office:value="0.05" calcext:value-type="percentage">
            <text:p>5 %</text:p>
          </table:table-cell>
          <table:table-cell table:style-name="ce662"/>
          <table:table-cell table:style-name="ce487" office:value-type="string" calcext:value-type="string">
            <text:p>VARIABLES</text:p>
          </table:table-cell>
          <table:table-cell table:style-name="ce487" office:value-type="string" calcext:value-type="string">
            <text:p>VARIACION</text:p>
          </table:table-cell>
          <table:table-cell table:style-name="ce487" office:value-type="string" calcext:value-type="string">
            <text:p>VANE INICIAL</text:p>
          </table:table-cell>
          <table:table-cell table:style-name="ce487" office:value-type="string" calcext:value-type="string">
            <text:p>TIRE INICIAL</text:p>
          </table:table-cell>
          <table:table-cell table:style-name="ce487" office:value-type="string" calcext:value-type="string">
            <text:p>VAN FINAL</text:p>
          </table:table-cell>
          <table:table-cell table:style-name="ce487" office:value-type="string" calcext:value-type="string">
            <text:p>TIR FINAL</text:p>
          </table:table-cell>
          <table:table-cell table:style-name="ce677"/>
          <table:table-cell table:style-name="ce662"/>
          <table:table-cell table:style-name="ce680" table:formula="of:=+[.N3]-[.D15]" office:value-type="percentage" office:value="0.95" calcext:value-type="percentage">
            <text:p>95 %</text:p>
          </table:table-cell>
          <table:table-cell table:style-name="ce680" table:formula="of:=+[.O3]" office:value-type="percentage" office:value="1" calcext:value-type="percentage">
            <text:p>100 %</text:p>
          </table:table-cell>
          <table:table-cell table:style-name="ce662" table:number-columns-repeated="2"/>
          <table:table-cell table:style-name="ce307" office:value-type="string" calcext:value-type="string">
            <text:p><text:s text:c="3"/>ACTIVO INTANGIBLE</text:p>
          </table:table-cell>
          <table:table-cell table:style-name="ce605" table:formula="of:=+[$'FLUJO DE CAJA '.B19]" office:value-type="float" office:value="14400" calcext:value-type="float">
            <text:p><text:s/>14,400.00 </text:p>
          </table:table-cell>
          <table:table-cell table:style-name="ce427" table:number-columns-repeated="5"/>
          <table:table-cell/>
          <table:table-cell table:style-name="ce662"/>
          <table:table-cell table:style-name="ce307" office:value-type="string" calcext:value-type="string">
            <text:p><text:s text:c="3"/>ACTIVO INTANGIBLE</text:p>
          </table:table-cell>
          <table:table-cell table:style-name="ce605" table:formula="of:=+[.S15]" office:value-type="float" office:value="14400" calcext:value-type="float">
            <text:p><text:s/>14,400.00 </text:p>
          </table:table-cell>
          <table:table-cell table:style-name="ce427" table:number-columns-repeated="5"/>
          <table:table-cell/>
          <table:table-cell table:style-name="ce662"/>
          <table:table-cell table:style-name="ce307" office:value-type="string" calcext:value-type="string">
            <text:p><text:s text:c="3"/>ACTIVO INTANGIBLE</text:p>
          </table:table-cell>
          <table:table-cell table:style-name="ce605" table:formula="of:=+[.AB15]" office:value-type="float" office:value="14400" calcext:value-type="float">
            <text:p><text:s/>14,400.00 </text:p>
          </table:table-cell>
          <table:table-cell table:style-name="ce427" table:number-columns-repeated="5"/>
          <table:table-cell/>
          <table:table-cell table:style-name="ce662"/>
          <table:table-cell table:style-name="ce307" office:value-type="string" calcext:value-type="string">
            <text:p><text:s text:c="3"/>ACTIVO INTANGIBLE</text:p>
          </table:table-cell>
          <table:table-cell table:style-name="ce605" table:formula="of:=+[.AK15]" office:value-type="float" office:value="14400" calcext:value-type="float">
            <text:p><text:s/>14,400.00 </text:p>
          </table:table-cell>
          <table:table-cell table:style-name="ce427" table:number-columns-repeated="5"/>
          <table:table-cell/>
          <table:table-cell table:style-name="ce662"/>
          <table:table-cell table:style-name="ce307" office:value-type="string" calcext:value-type="string">
            <text:p><text:s text:c="3"/>ACTIVO INTANGIBLE</text:p>
          </table:table-cell>
          <table:table-cell table:style-name="ce605" table:formula="of:=+[.AT15]" office:value-type="float" office:value="14400" calcext:value-type="float">
            <text:p><text:s/>14,400.00 </text:p>
          </table:table-cell>
          <table:table-cell table:style-name="ce427" table:number-columns-repeated="5"/>
          <table:table-cell/>
          <table:table-cell table:style-name="ce662"/>
          <table:table-cell table:style-name="ce307" office:value-type="string" calcext:value-type="string">
            <text:p><text:s text:c="3"/>ACTIVO INTANGIBLE</text:p>
          </table:table-cell>
          <table:table-cell table:style-name="ce605" table:formula="of:=+[.BC15]" office:value-type="float" office:value="14400" calcext:value-type="float">
            <text:p><text:s/>14,400.00 </text:p>
          </table:table-cell>
          <table:table-cell table:style-name="ce427" table:number-columns-repeated="5"/>
          <table:table-cell/>
          <table:table-cell table:style-name="ce662"/>
          <table:table-cell table:style-name="ce307" office:value-type="string" calcext:value-type="string">
            <text:p><text:s text:c="3"/>ACTIVO INTANGIBLE</text:p>
          </table:table-cell>
          <table:table-cell table:style-name="ce605" table:formula="of:=+[.BL15]" office:value-type="float" office:value="14400" calcext:value-type="float">
            <text:p><text:s/>14,400.00 </text:p>
          </table:table-cell>
          <table:table-cell table:style-name="ce427" table:number-columns-repeated="5"/>
          <table:table-cell/>
          <table:table-cell table:style-name="ce662" table:number-columns-repeated="16305"/>
        </table:table-row>
        <table:table-row table:style-name="ro29">
          <table:table-cell table:style-name="ce441" office:value-type="string" calcext:value-type="string">
            <text:p>AÑO</text:p>
          </table:table-cell>
          <table:table-cell table:style-name="ce441" office:value-type="string" calcext:value-type="string">
            <text:p>FCE</text:p>
          </table:table-cell>
          <table:table-cell table:style-name="ce441" office:value-type="string" calcext:value-type="string">
            <text:p>FA</text:p>
          </table:table-cell>
          <table:table-cell table:style-name="ce441" office:value-type="string" calcext:value-type="string">
            <text:p>VAN</text:p>
          </table:table-cell>
          <table:table-cell table:style-name="ce655"/>
          <table:table-cell table:style-name="ce664" office:value-type="string" calcext:value-type="string">
            <text:p>Situacion inicial</text:p>
          </table:table-cell>
          <table:table-cell table:style-name="ce667" office:value-type="float" office:value="0" calcext:value-type="float">
            <text:p>0</text:p>
          </table:table-cell>
          <table:table-cell table:style-name="ce671" table:formula="of:=[.D11]" office:value-type="float" office:value="50738.266689428" calcext:value-type="float">
            <text:p><text:s/>50,738.27 </text:p>
          </table:table-cell>
          <table:table-cell table:style-name="ce674" table:formula="of:=[.D12]" office:value-type="percentage" office:value="0.292018786595352" calcext:value-type="percentage">
            <text:p>29.20 %</text:p>
          </table:table-cell>
          <table:table-cell table:style-name="ce649" table:number-columns-repeated="2"/>
          <table:table-cell/>
          <table:table-cell table:style-name="ce165" office:value-type="string" calcext:value-type="string" table:number-columns-spanned="1" table:number-rows-spanned="2">
            <text:p>Años</text:p>
          </table:table-cell>
          <table:table-cell table:style-name="ce165" office:value-type="string" calcext:value-type="string" table:number-columns-spanned="1" table:number-rows-spanned="2">
            <text:p>Produccion (UND.)</text:p>
          </table:table-cell>
          <table:table-cell table:style-name="ce165" office:value-type="string" calcext:value-type="string" table:number-columns-spanned="1" table:number-rows-spanned="2">
            <text:p>Precio por Und (S/.)</text:p>
          </table:table-cell>
          <table:table-cell table:style-name="ce165" office:value-type="string" calcext:value-type="string" table:number-columns-spanned="1" table:number-rows-spanned="2">
            <text:p>Ventas proyectadas (S/.)</text:p>
          </table:table-cell>
          <table:table-cell/>
          <table:table-cell table:style-name="ce307" office:value-type="string" calcext:value-type="string">
            <text:p><text:s text:c="3"/>CAPITAL DE TRABAJO</text:p>
          </table:table-cell>
          <table:table-cell table:style-name="ce605" table:formula="of:=+[$'FLUJO DE CAJA '.B20]" office:value-type="float" office:value="4244.11004523721" calcext:value-type="float">
            <text:p><text:s/>4,244.11 </text:p>
          </table:table-cell>
          <table:table-cell table:style-name="ce427" table:formula="of:=+[$'FLUJO DE CAJA '.C20]" office:value-type="float" office:value="-855.342514866915" calcext:value-type="float">
            <text:p><text:s/>(855.34)</text:p>
          </table:table-cell>
          <table:table-cell table:style-name="ce427" table:formula="of:=+[$'FLUJO DE CAJA '.D20]" office:value-type="float" office:value="-1026.4110178403" calcext:value-type="float">
            <text:p><text:s/>(1,026.41)</text:p>
          </table:table-cell>
          <table:table-cell table:style-name="ce427" table:formula="of:=+[$'FLUJO DE CAJA '.E20]" office:value-type="float" office:value="-1231.69322140836" calcext:value-type="float">
            <text:p><text:s/>(1,231.69)</text:p>
          </table:table-cell>
          <table:table-cell table:style-name="ce427" table:formula="of:=+[$'FLUJO DE CAJA '.F20]" office:value-type="float" office:value="-1478.03186569003" calcext:value-type="float">
            <text:p><text:s/>(1,478.03)</text:p>
          </table:table-cell>
          <table:table-cell table:style-name="ce427" table:formula="of:=+[$'FLUJO DE CAJA '.G20]" office:value-type="float" office:value="-1773.63823882803" calcext:value-type="float">
            <text:p><text:s/>(1,773.64)</text:p>
          </table:table-cell>
          <table:table-cell table:style-name="ce662"/>
          <table:table-cell/>
          <table:table-cell table:style-name="ce307" office:value-type="string" calcext:value-type="string">
            <text:p><text:s text:c="3"/>CAPITAL DE TRABAJO</text:p>
          </table:table-cell>
          <table:table-cell table:style-name="ce605" table:formula="of:=+[.S16]" office:value-type="float" office:value="4244.11004523721" calcext:value-type="float">
            <text:p><text:s/>4,244.11 </text:p>
          </table:table-cell>
          <table:table-cell table:style-name="ce427" table:formula="of:=+[.T16]" office:value-type="float" office:value="-855.342514866915" calcext:value-type="float">
            <text:p><text:s/>(855.34)</text:p>
          </table:table-cell>
          <table:table-cell table:style-name="ce427" table:formula="of:=+[.U16]" office:value-type="float" office:value="-1026.4110178403" calcext:value-type="float">
            <text:p><text:s/>(1,026.41)</text:p>
          </table:table-cell>
          <table:table-cell table:style-name="ce427" table:formula="of:=+[.V16]" office:value-type="float" office:value="-1231.69322140836" calcext:value-type="float">
            <text:p><text:s/>(1,231.69)</text:p>
          </table:table-cell>
          <table:table-cell table:style-name="ce427" table:formula="of:=+[.W16]" office:value-type="float" office:value="-1478.03186569003" calcext:value-type="float">
            <text:p><text:s/>(1,478.03)</text:p>
          </table:table-cell>
          <table:table-cell table:style-name="ce427" table:formula="of:=+[.X16]" office:value-type="float" office:value="-1773.63823882803" calcext:value-type="float">
            <text:p><text:s/>(1,773.64)</text:p>
          </table:table-cell>
          <table:table-cell table:style-name="ce662"/>
          <table:table-cell/>
          <table:table-cell table:style-name="ce307" office:value-type="string" calcext:value-type="string">
            <text:p><text:s text:c="3"/>CAPITAL DE TRABAJO</text:p>
          </table:table-cell>
          <table:table-cell table:style-name="ce605" table:formula="of:=+[.AB16]" office:value-type="float" office:value="4244.11004523721" calcext:value-type="float">
            <text:p><text:s/>4,244.11 </text:p>
          </table:table-cell>
          <table:table-cell table:style-name="ce427" table:formula="of:=+[.AC16]" office:value-type="float" office:value="-855.342514866915" calcext:value-type="float">
            <text:p><text:s/>(855.34)</text:p>
          </table:table-cell>
          <table:table-cell table:style-name="ce427" table:formula="of:=+[.AD16]" office:value-type="float" office:value="-1026.4110178403" calcext:value-type="float">
            <text:p><text:s/>(1,026.41)</text:p>
          </table:table-cell>
          <table:table-cell table:style-name="ce427" table:formula="of:=+[.AE16]" office:value-type="float" office:value="-1231.69322140836" calcext:value-type="float">
            <text:p><text:s/>(1,231.69)</text:p>
          </table:table-cell>
          <table:table-cell table:style-name="ce427" table:formula="of:=+[.AF16]" office:value-type="float" office:value="-1478.03186569003" calcext:value-type="float">
            <text:p><text:s/>(1,478.03)</text:p>
          </table:table-cell>
          <table:table-cell table:style-name="ce427" table:formula="of:=+[.AG16]" office:value-type="float" office:value="-1773.63823882803" calcext:value-type="float">
            <text:p><text:s/>(1,773.64)</text:p>
          </table:table-cell>
          <table:table-cell table:style-name="ce662"/>
          <table:table-cell/>
          <table:table-cell table:style-name="ce307" office:value-type="string" calcext:value-type="string">
            <text:p><text:s text:c="3"/>CAPITAL DE TRABAJO</text:p>
          </table:table-cell>
          <table:table-cell table:style-name="ce605" table:formula="of:=+[.AK16]" office:value-type="float" office:value="4244.11004523721" calcext:value-type="float">
            <text:p><text:s/>4,244.11 </text:p>
          </table:table-cell>
          <table:table-cell table:style-name="ce427" table:formula="of:=+[.AL16]" office:value-type="float" office:value="-855.342514866915" calcext:value-type="float">
            <text:p><text:s/>(855.34)</text:p>
          </table:table-cell>
          <table:table-cell table:style-name="ce427" table:formula="of:=+[.AM16]" office:value-type="float" office:value="-1026.4110178403" calcext:value-type="float">
            <text:p><text:s/>(1,026.41)</text:p>
          </table:table-cell>
          <table:table-cell table:style-name="ce427" table:formula="of:=+[.AN16]" office:value-type="float" office:value="-1231.69322140836" calcext:value-type="float">
            <text:p><text:s/>(1,231.69)</text:p>
          </table:table-cell>
          <table:table-cell table:style-name="ce427" table:formula="of:=+[.AO16]" office:value-type="float" office:value="-1478.03186569003" calcext:value-type="float">
            <text:p><text:s/>(1,478.03)</text:p>
          </table:table-cell>
          <table:table-cell table:style-name="ce427" table:formula="of:=+[.AP16]" office:value-type="float" office:value="-1773.63823882803" calcext:value-type="float">
            <text:p><text:s/>(1,773.64)</text:p>
          </table:table-cell>
          <table:table-cell table:style-name="ce662"/>
          <table:table-cell/>
          <table:table-cell table:style-name="ce307" office:value-type="string" calcext:value-type="string">
            <text:p><text:s text:c="3"/>CAPITAL DE TRABAJO</text:p>
          </table:table-cell>
          <table:table-cell table:style-name="ce605" table:formula="of:=+[.AT16]" office:value-type="float" office:value="4244.11004523721" calcext:value-type="float">
            <text:p><text:s/>4,244.11 </text:p>
          </table:table-cell>
          <table:table-cell table:style-name="ce427" table:formula="of:=+[.AU16]" office:value-type="float" office:value="-855.342514866915" calcext:value-type="float">
            <text:p><text:s/>(855.34)</text:p>
          </table:table-cell>
          <table:table-cell table:style-name="ce427" table:formula="of:=+[.AV16]" office:value-type="float" office:value="-1026.4110178403" calcext:value-type="float">
            <text:p><text:s/>(1,026.41)</text:p>
          </table:table-cell>
          <table:table-cell table:style-name="ce427" table:formula="of:=+[.AW16]" office:value-type="float" office:value="-1231.69322140836" calcext:value-type="float">
            <text:p><text:s/>(1,231.69)</text:p>
          </table:table-cell>
          <table:table-cell table:style-name="ce427" table:formula="of:=+[.AX16]" office:value-type="float" office:value="-1478.03186569003" calcext:value-type="float">
            <text:p><text:s/>(1,478.03)</text:p>
          </table:table-cell>
          <table:table-cell table:style-name="ce427" table:formula="of:=+[.AY16]" office:value-type="float" office:value="-1773.63823882803" calcext:value-type="float">
            <text:p><text:s/>(1,773.64)</text:p>
          </table:table-cell>
          <table:table-cell table:style-name="ce662"/>
          <table:table-cell/>
          <table:table-cell table:style-name="ce307" office:value-type="string" calcext:value-type="string">
            <text:p><text:s text:c="3"/>CAPITAL DE TRABAJO</text:p>
          </table:table-cell>
          <table:table-cell table:style-name="ce605" table:formula="of:=+[.BC16]" office:value-type="float" office:value="4244.11004523721" calcext:value-type="float">
            <text:p><text:s/>4,244.11 </text:p>
          </table:table-cell>
          <table:table-cell table:style-name="ce427" table:formula="of:=+[.BD16]" office:value-type="float" office:value="-855.342514866915" calcext:value-type="float">
            <text:p><text:s/>(855.34)</text:p>
          </table:table-cell>
          <table:table-cell table:style-name="ce427" table:formula="of:=+[.BE16]" office:value-type="float" office:value="-1026.4110178403" calcext:value-type="float">
            <text:p><text:s/>(1,026.41)</text:p>
          </table:table-cell>
          <table:table-cell table:style-name="ce427" table:formula="of:=+[.BF16]" office:value-type="float" office:value="-1231.69322140836" calcext:value-type="float">
            <text:p><text:s/>(1,231.69)</text:p>
          </table:table-cell>
          <table:table-cell table:style-name="ce427" table:formula="of:=+[.BG16]" office:value-type="float" office:value="-1478.03186569003" calcext:value-type="float">
            <text:p><text:s/>(1,478.03)</text:p>
          </table:table-cell>
          <table:table-cell table:style-name="ce427" table:formula="of:=+[.BH16]" office:value-type="float" office:value="-1773.63823882803" calcext:value-type="float">
            <text:p><text:s/>(1,773.64)</text:p>
          </table:table-cell>
          <table:table-cell table:style-name="ce662"/>
          <table:table-cell/>
          <table:table-cell table:style-name="ce307" office:value-type="string" calcext:value-type="string">
            <text:p><text:s text:c="3"/>CAPITAL DE TRABAJO</text:p>
          </table:table-cell>
          <table:table-cell table:style-name="ce605" table:formula="of:=+[.BL16]" office:value-type="float" office:value="4244.11004523721" calcext:value-type="float">
            <text:p><text:s/>4,244.11 </text:p>
          </table:table-cell>
          <table:table-cell table:style-name="ce427" table:formula="of:=+[.BM16]" office:value-type="float" office:value="-855.342514866915" calcext:value-type="float">
            <text:p><text:s/>(855.34)</text:p>
          </table:table-cell>
          <table:table-cell table:style-name="ce427" table:formula="of:=+[.BN16]" office:value-type="float" office:value="-1026.4110178403" calcext:value-type="float">
            <text:p><text:s/>(1,026.41)</text:p>
          </table:table-cell>
          <table:table-cell table:style-name="ce427" table:formula="of:=+[.BO16]" office:value-type="float" office:value="-1231.69322140836" calcext:value-type="float">
            <text:p><text:s/>(1,231.69)</text:p>
          </table:table-cell>
          <table:table-cell table:style-name="ce427" table:formula="of:=+[.BP16]" office:value-type="float" office:value="-1478.03186569003" calcext:value-type="float">
            <text:p><text:s/>(1,478.03)</text:p>
          </table:table-cell>
          <table:table-cell table:style-name="ce427" table:formula="of:=+[.BQ16]" office:value-type="float" office:value="-1773.63823882803" calcext:value-type="float">
            <text:p><text:s/>(1,773.64)</text:p>
          </table:table-cell>
          <table:table-cell table:style-name="ce662"/>
          <table:table-cell table:number-columns-repeated="178"/>
        </table:table-row>
        <table:table-row table:style-name="ro29">
          <table:table-cell table:style-name="ce649" office:value-type="float" office:value="0" calcext:value-type="float">
            <text:p>0</text:p>
          </table:table-cell>
          <table:table-cell table:style-name="ce654" table:formula="of:=+[.AB19]" office:value-type="float" office:value="-157481.215045237" calcext:value-type="float">
            <text:p><text:s/>(157,481.22)</text:p>
          </table:table-cell>
          <table:table-cell table:style-name="ce657" table:formula="of:=1/(1+[.$B$1])^[.A17]" office:value-type="float" office:value="1" calcext:value-type="float">
            <text:p><text:s/>1.00 </text:p>
          </table:table-cell>
          <table:table-cell table:style-name="ce654" table:formula="of:=[.B17]*[.C17]" office:value-type="float" office:value="-157481.215045237" calcext:value-type="float">
            <text:p><text:s/>(157,481.22)</text:p>
          </table:table-cell>
          <table:table-cell table:style-name="ce655"/>
          <table:table-cell table:style-name="ce665" office:value-type="string" calcext:value-type="string" table:number-columns-spanned="1" table:number-rows-spanned="3">
            <text:p>Caida de la Produccion</text:p>
          </table:table-cell>
          <table:table-cell table:style-name="ce668" table:formula="of:=-+[.D15]" office:value-type="percentage" office:value="-0.05" calcext:value-type="percentage">
            <text:p>-5 %</text:p>
          </table:table-cell>
          <table:table-cell table:style-name="ce672" table:number-columns-repeated="2"/>
          <table:table-cell table:style-name="ce675" table:formula="of:=[.D23]" office:value-type="float" office:value="23165.6607950214" calcext:value-type="float">
            <text:p><text:s/>23,165.66 </text:p>
          </table:table-cell>
          <table:table-cell table:style-name="ce669" table:formula="of:=[.D24]" office:value-type="percentage" office:value="0.241439062973548" calcext:value-type="percentage">
            <text:p>24 %</text:p>
          </table:table-cell>
          <table:table-cell/>
          <table:covered-table-cell table:number-columns-repeated="4" table:style-name="ce165"/>
          <table:table-cell/>
          <table:table-cell table:style-name="ce307" office:value-type="string" calcext:value-type="string">
            <text:p><text:s text:c="3"/>GASTOS GENERALES</text:p>
          </table:table-cell>
          <table:table-cell table:style-name="ce605" table:formula="of:=+[$'FLUJO DE CAJA '.B21]" office:value-type="float" office:value="8435.07" calcext:value-type="float">
            <text:p><text:s/>8,435.07 </text:p>
          </table:table-cell>
          <table:table-cell table:style-name="ce427" table:number-columns-repeated="5"/>
          <table:table-cell table:number-columns-repeated="2"/>
          <table:table-cell table:style-name="ce307" office:value-type="string" calcext:value-type="string">
            <text:p><text:s text:c="3"/>GASTOS GENERALES</text:p>
          </table:table-cell>
          <table:table-cell table:style-name="ce605" table:formula="of:=+[.S17]" office:value-type="float" office:value="8435.07" calcext:value-type="float">
            <text:p><text:s/>8,435.07 </text:p>
          </table:table-cell>
          <table:table-cell table:style-name="ce427" table:number-columns-repeated="5"/>
          <table:table-cell table:number-columns-repeated="2"/>
          <table:table-cell table:style-name="ce307" office:value-type="string" calcext:value-type="string">
            <text:p><text:s text:c="3"/>GASTOS GENERALES</text:p>
          </table:table-cell>
          <table:table-cell table:style-name="ce605" table:formula="of:=+[.AB17]" office:value-type="float" office:value="8435.07" calcext:value-type="float">
            <text:p><text:s/>8,435.07 </text:p>
          </table:table-cell>
          <table:table-cell table:style-name="ce427" table:number-columns-repeated="5"/>
          <table:table-cell table:number-columns-repeated="2"/>
          <table:table-cell table:style-name="ce307" office:value-type="string" calcext:value-type="string">
            <text:p><text:s text:c="3"/>GASTOS GENERALES</text:p>
          </table:table-cell>
          <table:table-cell table:style-name="ce605" table:formula="of:=+[.AK17]" office:value-type="float" office:value="8435.07" calcext:value-type="float">
            <text:p><text:s/>8,435.07 </text:p>
          </table:table-cell>
          <table:table-cell table:style-name="ce427" table:number-columns-repeated="5"/>
          <table:table-cell table:number-columns-repeated="2"/>
          <table:table-cell table:style-name="ce307" office:value-type="string" calcext:value-type="string">
            <text:p><text:s text:c="3"/>GASTOS GENERALES</text:p>
          </table:table-cell>
          <table:table-cell table:style-name="ce605" table:formula="of:=+[.AT17]" office:value-type="float" office:value="8435.07" calcext:value-type="float">
            <text:p><text:s/>8,435.07 </text:p>
          </table:table-cell>
          <table:table-cell table:style-name="ce427" table:number-columns-repeated="5"/>
          <table:table-cell table:number-columns-repeated="2"/>
          <table:table-cell table:style-name="ce307" office:value-type="string" calcext:value-type="string">
            <text:p><text:s text:c="3"/>GASTOS GENERALES</text:p>
          </table:table-cell>
          <table:table-cell table:style-name="ce605" table:formula="of:=+[.BC17]" office:value-type="float" office:value="8435.07" calcext:value-type="float">
            <text:p><text:s/>8,435.07 </text:p>
          </table:table-cell>
          <table:table-cell table:style-name="ce427" table:number-columns-repeated="5"/>
          <table:table-cell table:number-columns-repeated="2"/>
          <table:table-cell table:style-name="ce307" office:value-type="string" calcext:value-type="string">
            <text:p><text:s text:c="3"/>GASTOS GENERALES</text:p>
          </table:table-cell>
          <table:table-cell table:style-name="ce605" table:formula="of:=+[.BL17]" office:value-type="float" office:value="8435.07" calcext:value-type="float">
            <text:p><text:s/>8,435.07 </text:p>
          </table:table-cell>
          <table:table-cell table:style-name="ce427" table:number-columns-repeated="5"/>
          <table:table-cell table:number-columns-repeated="179"/>
        </table:table-row>
        <table:table-row table:style-name="ro21">
          <table:table-cell table:style-name="ce649" office:value-type="float" office:value="1" calcext:value-type="float">
            <text:p>1</text:p>
          </table:table-cell>
          <table:table-cell table:style-name="ce654" table:formula="of:=+[.AC19]" office:value-type="float" office:value="6658.57269175406" calcext:value-type="float">
            <text:p><text:s/>6,658.57 </text:p>
          </table:table-cell>
          <table:table-cell table:style-name="ce657" table:formula="of:=1/(1+[.$B$1])^[.A18]" office:value-type="float" office:value="0.835366743592997" calcext:value-type="float">
            <text:p><text:s/>0.84 </text:p>
          </table:table-cell>
          <table:table-cell table:style-name="ce654" table:formula="of:=[.B18]*[.C18]" office:value-type="float" office:value="5562.35018648785" calcext:value-type="float">
            <text:p><text:s/>5,562.35 </text:p>
          </table:table-cell>
          <table:table-cell table:style-name="ce663"/>
          <table:covered-table-cell table:style-name="ce665"/>
          <table:table-cell table:style-name="ce669" table:formula="of:=-[.D26]" office:value-type="percentage" office:value="-0.1" calcext:value-type="percentage">
            <text:p>-10 %</text:p>
          </table:table-cell>
          <table:table-cell table:style-name="ce672" table:number-columns-repeated="2"/>
          <table:table-cell table:style-name="ce676" table:formula="of:=[.D34]" office:value-type="float" office:value="-1817.58596135971" calcext:value-type="float">
            <text:p><text:s/>(1,817.59)</text:p>
          </table:table-cell>
          <table:table-cell table:style-name="ce669" table:formula="of:=[.D35]" office:value-type="percentage" office:value="0.193545269634675" calcext:value-type="percentage">
            <text:p>19 %</text:p>
          </table:table-cell>
          <table:table-cell/>
          <table:table-cell table:style-name="ce162" table:formula="of:=+[.M6]" office:value-type="float" office:value="2021" calcext:value-type="float">
            <text:p>2021</text:p>
          </table:table-cell>
          <table:table-cell table:style-name="ce679" table:formula="of:=+[.N6]*[.$N$15]" office:value-type="float" office:value="3268.43766341999" calcext:value-type="float">
            <text:p>3268.44</text:p>
          </table:table-cell>
          <table:table-cell table:style-name="ce679" table:formula="of:=+[.O6]*[.$O$15]" office:value-type="float" office:value="18" calcext:value-type="float">
            <text:p>18.00</text:p>
          </table:table-cell>
          <table:table-cell table:style-name="ce679" table:formula="of:=[.N18]*[.O18]" office:value-type="float" office:value="58831.8779415599" calcext:value-type="float">
            <text:p>58831.88</text:p>
          </table:table-cell>
          <table:table-cell/>
          <table:table-cell table:style-name="ce307" office:value-type="string" calcext:value-type="string">
            <text:p><text:s text:c="3"/>GASTOS DE SUPERVISION</text:p>
          </table:table-cell>
          <table:table-cell table:style-name="ce605" table:formula="of:=+[$'FLUJO DE CAJA '.B22]" office:value-type="float" office:value="4217.535" calcext:value-type="float">
            <text:p><text:s/>4,217.54 </text:p>
          </table:table-cell>
          <table:table-cell table:style-name="ce427" table:number-columns-repeated="5"/>
          <table:table-cell table:number-columns-repeated="2"/>
          <table:table-cell table:style-name="ce307" office:value-type="string" calcext:value-type="string">
            <text:p><text:s text:c="3"/>GASTOS DE SUPERVISION</text:p>
          </table:table-cell>
          <table:table-cell table:style-name="ce605" table:formula="of:=+[.S18]" office:value-type="float" office:value="4217.535" calcext:value-type="float">
            <text:p><text:s/>4,217.54 </text:p>
          </table:table-cell>
          <table:table-cell table:style-name="ce427" table:number-columns-repeated="5"/>
          <table:table-cell table:number-columns-repeated="2"/>
          <table:table-cell table:style-name="ce307" office:value-type="string" calcext:value-type="string">
            <text:p><text:s text:c="3"/>GASTOS DE SUPERVISION</text:p>
          </table:table-cell>
          <table:table-cell table:style-name="ce605" table:formula="of:=+[.AB18]" office:value-type="float" office:value="4217.535" calcext:value-type="float">
            <text:p><text:s/>4,217.54 </text:p>
          </table:table-cell>
          <table:table-cell table:style-name="ce427" table:number-columns-repeated="5"/>
          <table:table-cell table:number-columns-repeated="2"/>
          <table:table-cell table:style-name="ce307" office:value-type="string" calcext:value-type="string">
            <text:p><text:s text:c="3"/>GASTOS DE SUPERVISION</text:p>
          </table:table-cell>
          <table:table-cell table:style-name="ce605" table:formula="of:=+[.AK18]" office:value-type="float" office:value="4217.535" calcext:value-type="float">
            <text:p><text:s/>4,217.54 </text:p>
          </table:table-cell>
          <table:table-cell table:style-name="ce427" table:number-columns-repeated="5"/>
          <table:table-cell table:number-columns-repeated="2"/>
          <table:table-cell table:style-name="ce307" office:value-type="string" calcext:value-type="string">
            <text:p><text:s text:c="3"/>GASTOS DE SUPERVISION</text:p>
          </table:table-cell>
          <table:table-cell table:style-name="ce605" table:formula="of:=+[.AT18]" office:value-type="float" office:value="4217.535" calcext:value-type="float">
            <text:p><text:s/>4,217.54 </text:p>
          </table:table-cell>
          <table:table-cell table:style-name="ce427" table:number-columns-repeated="5"/>
          <table:table-cell table:number-columns-repeated="2"/>
          <table:table-cell table:style-name="ce307" office:value-type="string" calcext:value-type="string">
            <text:p><text:s text:c="3"/>GASTOS DE SUPERVISION</text:p>
          </table:table-cell>
          <table:table-cell table:style-name="ce605" table:formula="of:=+[.BC18]" office:value-type="float" office:value="4217.535" calcext:value-type="float">
            <text:p><text:s/>4,217.54 </text:p>
          </table:table-cell>
          <table:table-cell table:style-name="ce427" table:number-columns-repeated="5"/>
          <table:table-cell table:number-columns-repeated="2"/>
          <table:table-cell table:style-name="ce307" office:value-type="string" calcext:value-type="string">
            <text:p><text:s text:c="3"/>GASTOS DE SUPERVISION</text:p>
          </table:table-cell>
          <table:table-cell table:style-name="ce605" table:formula="of:=+[.BL18]" office:value-type="float" office:value="4217.535" calcext:value-type="float">
            <text:p><text:s/>4,217.54 </text:p>
          </table:table-cell>
          <table:table-cell table:style-name="ce427" table:number-columns-repeated="5"/>
          <table:table-cell table:number-columns-repeated="179"/>
        </table:table-row>
        <table:table-row table:style-name="ro21">
          <table:table-cell table:style-name="ce649" office:value-type="float" office:value="2" calcext:value-type="float">
            <text:p>2</text:p>
          </table:table-cell>
          <table:table-cell table:style-name="ce654" table:formula="of:=+[.AD19]" office:value-type="float" office:value="51936.6568299337" calcext:value-type="float">
            <text:p><text:s/>51,936.66 </text:p>
          </table:table-cell>
          <table:table-cell table:style-name="ce657" table:formula="of:=1/(1+[.$B$1])^[.A19]" office:value-type="float" office:value="0.697837596301168" calcext:value-type="float">
            <text:p><text:s/>0.70 </text:p>
          </table:table-cell>
          <table:table-cell table:style-name="ce654" table:formula="of:=[.B19]*[.C19]" office:value-type="float" office:value="36243.3517621196" calcext:value-type="float">
            <text:p><text:s/>36,243.35 </text:p>
          </table:table-cell>
          <table:table-cell table:style-name="ce663"/>
          <table:covered-table-cell table:style-name="ce665"/>
          <table:table-cell table:style-name="ce670" table:formula="of:=-[.D37]" office:value-type="percentage" office:value="-0.15" calcext:value-type="percentage">
            <text:p>-15 %</text:p>
          </table:table-cell>
          <table:table-cell table:style-name="ce672" table:number-columns-repeated="2"/>
          <table:table-cell table:style-name="ce676" table:formula="of:=[.D45]" office:value-type="float" office:value="-26800.8327177409" calcext:value-type="float">
            <text:p><text:s/>(26,800.83)</text:p>
          </table:table-cell>
          <table:table-cell table:style-name="ce669" table:formula="of:=[.D46]" office:value-type="percentage" office:value="0.14414031202421" calcext:value-type="percentage">
            <text:p>14 %</text:p>
          </table:table-cell>
          <table:table-cell/>
          <table:table-cell table:style-name="ce162" table:formula="of:=+[.M7]" office:value-type="float" office:value="2022" calcext:value-type="float">
            <text:p>2022</text:p>
          </table:table-cell>
          <table:table-cell table:style-name="ce679" table:formula="of:=+[.N7]*[.$N$15]" office:value-type="float" office:value="10871.5112" calcext:value-type="float">
            <text:p>10871.51</text:p>
          </table:table-cell>
          <table:table-cell table:style-name="ce679" table:formula="of:=+[.O7]*[.$O$15]" office:value-type="float" office:value="18" calcext:value-type="float">
            <text:p>18.00</text:p>
          </table:table-cell>
          <table:table-cell table:style-name="ce679" table:formula="of:=[.N19]*[.O19]" office:value-type="float" office:value="195687.2016" calcext:value-type="float">
            <text:p>195687.20</text:p>
          </table:table-cell>
          <table:table-cell/>
          <table:table-cell table:style-name="ce600" office:value-type="string" calcext:value-type="string">
            <text:p>FLUJO DE CAJA ECONÒMICO</text:p>
          </table:table-cell>
          <table:table-cell table:style-name="ce608" table:formula="of:=[.S13]" office:value-type="float" office:value="-157481.215045237" calcext:value-type="float">
            <text:p><text:s/>(157,481.22)</text:p>
          </table:table-cell>
          <table:table-cell table:style-name="ce627" table:formula="of:=[.T5]+[.T9]" office:value-type="float" office:value="9754.98732025721" calcext:value-type="float">
            <text:p><text:s/>9,754.99 </text:p>
          </table:table-cell>
          <table:table-cell table:style-name="ce627" table:formula="of:=[.U5]+[.U9]" office:value-type="float" office:value="62235.9832299337" calcext:value-type="float">
            <text:p><text:s/>62,235.98 </text:p>
          </table:table-cell>
          <table:table-cell table:style-name="ce627" table:formula="of:=[.V5]+[.V9]" office:value-type="float" office:value="62030.7010263657" calcext:value-type="float">
            <text:p><text:s/>62,030.70 </text:p>
          </table:table-cell>
          <table:table-cell table:style-name="ce627" table:formula="of:=[.W5]+[.W9]" office:value-type="float" office:value="61784.362382084" calcext:value-type="float">
            <text:p><text:s/>61,784.36 </text:p>
          </table:table-cell>
          <table:table-cell table:style-name="ce627" table:formula="of:=[.X5]+[.X9]" office:value-type="float" office:value="215833.624105031" calcext:value-type="float">
            <text:p><text:s/>215,833.62 </text:p>
          </table:table-cell>
          <table:table-cell table:number-columns-repeated="2"/>
          <table:table-cell table:style-name="ce600" office:value-type="string" calcext:value-type="string">
            <text:p>FLUJO DE CAJA ECONÒMICO</text:p>
          </table:table-cell>
          <table:table-cell table:style-name="ce608" table:formula="of:=[.AB13]" office:value-type="float" office:value="-157481.215045237" calcext:value-type="float">
            <text:p><text:s/>(157,481.22)</text:p>
          </table:table-cell>
          <table:table-cell table:style-name="ce627" table:formula="of:=[.AC5]+[.AC9]" office:value-type="float" office:value="6658.57269175406" calcext:value-type="float">
            <text:p><text:s/>6,658.57 </text:p>
          </table:table-cell>
          <table:table-cell table:style-name="ce627" table:formula="of:=[.AD5]+[.AD9]" office:value-type="float" office:value="51936.6568299337" calcext:value-type="float">
            <text:p><text:s/>51,936.66 </text:p>
          </table:table-cell>
          <table:table-cell table:style-name="ce627" table:formula="of:=[.AE5]+[.AE9]" office:value-type="float" office:value="51731.3746263656" calcext:value-type="float">
            <text:p><text:s/>51,731.37 </text:p>
          </table:table-cell>
          <table:table-cell table:style-name="ce627" table:formula="of:=[.AF5]+[.AF9]" office:value-type="float" office:value="51485.035982084" calcext:value-type="float">
            <text:p><text:s/>51,485.04 </text:p>
          </table:table-cell>
          <table:table-cell table:style-name="ce627" table:formula="of:=[.AG5]+[.AG9]" office:value-type="float" office:value="205534.297705031" calcext:value-type="float">
            <text:p><text:s/>205,534.30 </text:p>
          </table:table-cell>
          <table:table-cell table:number-columns-repeated="2"/>
          <table:table-cell table:style-name="ce600" office:value-type="string" calcext:value-type="string">
            <text:p>FLUJO DE CAJA ECONÒMICO</text:p>
          </table:table-cell>
          <table:table-cell table:style-name="ce608" table:formula="of:=[.AK13]" office:value-type="float" office:value="-157481.215045237" calcext:value-type="float">
            <text:p><text:s/>(157,481.22)</text:p>
          </table:table-cell>
          <table:table-cell table:style-name="ce627" table:formula="of:=[.AL5]+[.AL9]" office:value-type="float" office:value="3562.15806325091" calcext:value-type="float">
            <text:p><text:s/>3,562.16 </text:p>
          </table:table-cell>
          <table:table-cell table:style-name="ce627" table:formula="of:=[.AM5]+[.AM9]" office:value-type="float" office:value="41637.3304299337" calcext:value-type="float">
            <text:p><text:s/>41,637.33 </text:p>
          </table:table-cell>
          <table:table-cell table:style-name="ce627" table:formula="of:=[.AN5]+[.AN9]" office:value-type="float" office:value="41432.0482263657" calcext:value-type="float">
            <text:p><text:s/>41,432.05 </text:p>
          </table:table-cell>
          <table:table-cell table:style-name="ce627" table:formula="of:=[.AO5]+[.AO9]" office:value-type="float" office:value="41185.709582084" calcext:value-type="float">
            <text:p><text:s/>41,185.71 </text:p>
          </table:table-cell>
          <table:table-cell table:style-name="ce627" table:formula="of:=[.AP5]+[.AP9]" office:value-type="float" office:value="195234.971305031" calcext:value-type="float">
            <text:p><text:s/>195,234.97 </text:p>
          </table:table-cell>
          <table:table-cell table:number-columns-repeated="2"/>
          <table:table-cell table:style-name="ce600" office:value-type="string" calcext:value-type="string">
            <text:p>FLUJO DE CAJA ECONÒMICO</text:p>
          </table:table-cell>
          <table:table-cell table:style-name="ce608" table:formula="of:=[.AT13]" office:value-type="float" office:value="-157481.215045237" calcext:value-type="float">
            <text:p><text:s/>(157,481.22)</text:p>
          </table:table-cell>
          <table:table-cell table:style-name="ce627" table:formula="of:=[.AU5]+[.AU9]" office:value-type="float" office:value="465.743434747754" calcext:value-type="float">
            <text:p><text:s/>465.74 </text:p>
          </table:table-cell>
          <table:table-cell table:style-name="ce627" table:formula="of:=[.AV5]+[.AV9]" office:value-type="float" office:value="31338.0040299337" calcext:value-type="float">
            <text:p><text:s/>31,338.00 </text:p>
          </table:table-cell>
          <table:table-cell table:style-name="ce627" table:formula="of:=[.AW5]+[.AW9]" office:value-type="float" office:value="31132.7218263657" calcext:value-type="float">
            <text:p><text:s/>31,132.72 </text:p>
          </table:table-cell>
          <table:table-cell table:style-name="ce627" table:formula="of:=[.AX5]+[.AX9]" office:value-type="float" office:value="30886.383182084" calcext:value-type="float">
            <text:p><text:s/>30,886.38 </text:p>
          </table:table-cell>
          <table:table-cell table:style-name="ce627" table:formula="of:=[.AY5]+[.AY9]" office:value-type="float" office:value="184935.644905031" calcext:value-type="float">
            <text:p><text:s/>184,935.64 </text:p>
          </table:table-cell>
          <table:table-cell table:number-columns-repeated="2"/>
          <table:table-cell table:style-name="ce600" office:value-type="string" calcext:value-type="string">
            <text:p>FLUJO DE CAJA ECONÒMICO</text:p>
          </table:table-cell>
          <table:table-cell table:style-name="ce608" table:formula="of:=[.BC13]" office:value-type="float" office:value="-157481.215045237" calcext:value-type="float">
            <text:p><text:s/>(157,481.22)</text:p>
          </table:table-cell>
          <table:table-cell table:style-name="ce627" table:formula="of:=[.BD5]+[.BD9]" office:value-type="float" office:value="7897.13854315533" calcext:value-type="float">
            <text:p><text:s/>7,897.14 </text:p>
          </table:table-cell>
          <table:table-cell table:style-name="ce627" table:formula="of:=[.BE5]+[.BE9]" office:value-type="float" office:value="56056.3873899337" calcext:value-type="float">
            <text:p><text:s/>56,056.39 </text:p>
          </table:table-cell>
          <table:table-cell table:style-name="ce627" table:formula="of:=[.BF5]+[.BF9]" office:value-type="float" office:value="55851.1051863657" calcext:value-type="float">
            <text:p><text:s/>55,851.11 </text:p>
          </table:table-cell>
          <table:table-cell table:style-name="ce627" table:formula="of:=[.BG5]+[.BG9]" office:value-type="float" office:value="55604.766542084" calcext:value-type="float">
            <text:p><text:s/>55,604.77 </text:p>
          </table:table-cell>
          <table:table-cell table:style-name="ce627" table:formula="of:=[.BH5]+[.BH9]" office:value-type="float" office:value="209654.028265031" calcext:value-type="float">
            <text:p><text:s/>209,654.03 </text:p>
          </table:table-cell>
          <table:table-cell table:number-columns-repeated="2"/>
          <table:table-cell table:style-name="ce600" office:value-type="string" calcext:value-type="string">
            <text:p>FLUJO DE CAJA ECONÒMICO</text:p>
          </table:table-cell>
          <table:table-cell table:style-name="ce608" table:formula="of:=[.BL13]" office:value-type="float" office:value="-157481.215045237" calcext:value-type="float">
            <text:p><text:s/>(157,481.22)</text:p>
          </table:table-cell>
          <table:table-cell table:style-name="ce627" table:formula="of:=[.BM5]+[.BM9]" office:value-type="float" office:value="4800.72391465218" calcext:value-type="float">
            <text:p><text:s/>4,800.72 </text:p>
          </table:table-cell>
          <table:table-cell table:style-name="ce627" table:formula="of:=[.BN5]+[.BN9]" office:value-type="float" office:value="45757.0609899338" calcext:value-type="float">
            <text:p><text:s/>45,757.06 </text:p>
          </table:table-cell>
          <table:table-cell table:style-name="ce627" table:formula="of:=[.BO5]+[.BO9]" office:value-type="float" office:value="45551.7787863657" calcext:value-type="float">
            <text:p><text:s/>45,551.78 </text:p>
          </table:table-cell>
          <table:table-cell table:style-name="ce627" table:formula="of:=[.BP5]+[.BP9]" office:value-type="float" office:value="45305.440142084" calcext:value-type="float">
            <text:p><text:s/>45,305.44 </text:p>
          </table:table-cell>
          <table:table-cell table:style-name="ce627" table:formula="of:=[.BQ5]+[.BQ9]" office:value-type="float" office:value="199354.701865031" calcext:value-type="float">
            <text:p><text:s/>199,354.70 </text:p>
          </table:table-cell>
          <table:table-cell table:number-columns-repeated="2"/>
          <table:table-cell table:style-name="ce600" office:value-type="string" calcext:value-type="string">
            <text:p>FLUJO DE CAJA ECONÒMICO</text:p>
          </table:table-cell>
          <table:table-cell table:style-name="ce608" table:formula="of:=[.BU13]" office:value-type="float" office:value="-157481.215045237" calcext:value-type="float">
            <text:p><text:s/>(157,481.22)</text:p>
          </table:table-cell>
          <table:table-cell table:style-name="ce627" table:formula="of:=[.BV5]+[.BV9]" office:value-type="float" office:value="-153.539490952877" calcext:value-type="float">
            <text:p><text:s/>(153.54)</text:p>
          </table:table-cell>
          <table:table-cell table:style-name="ce627" table:formula="of:=[.BW5]+[.BW9]" office:value-type="float" office:value="29278.1387499337" calcext:value-type="float">
            <text:p><text:s/>29,278.14 </text:p>
          </table:table-cell>
          <table:table-cell table:style-name="ce627" table:formula="of:=[.BX5]+[.BX9]" office:value-type="float" office:value="29072.8565463657" calcext:value-type="float">
            <text:p><text:s/>29,072.86 </text:p>
          </table:table-cell>
          <table:table-cell table:style-name="ce627" table:formula="of:=[.BY5]+[.BY9]" office:value-type="float" office:value="28826.517902084" calcext:value-type="float">
            <text:p><text:s/>28,826.52 </text:p>
          </table:table-cell>
          <table:table-cell table:style-name="ce627" table:formula="of:=[.BZ5]+[.BZ9]" office:value-type="float" office:value="182875.779625031" calcext:value-type="float">
            <text:p><text:s/>182,875.78 </text:p>
          </table:table-cell>
          <table:table-cell table:number-columns-repeated="179"/>
        </table:table-row>
        <table:table-row table:style-name="ro29">
          <table:table-cell table:style-name="ce649" office:value-type="float" office:value="3" calcext:value-type="float">
            <text:p>3</text:p>
          </table:table-cell>
          <table:table-cell table:style-name="ce654" table:formula="of:=+[.AE19]" office:value-type="float" office:value="51731.3746263656" calcext:value-type="float">
            <text:p><text:s/>51,731.37 </text:p>
          </table:table-cell>
          <table:table-cell table:style-name="ce657" table:formula="of:=1/(1+[.$B$1])^[.A20]" office:value-type="float" office:value="0.582950320378872" calcext:value-type="float">
            <text:p><text:s/>0.58 </text:p>
          </table:table-cell>
          <table:table-cell table:style-name="ce654" table:formula="of:=[.B20]*[.C20]" office:value-type="float" office:value="30156.8214120793" calcext:value-type="float">
            <text:p><text:s/>30,156.82 </text:p>
          </table:table-cell>
          <table:table-cell table:style-name="ce663"/>
          <table:table-cell table:style-name="ce665" office:value-type="string" calcext:value-type="string" table:number-columns-spanned="1" table:number-rows-spanned="3">
            <text:p>Caida del Precio</text:p>
          </table:table-cell>
          <table:table-cell table:style-name="ce668" table:formula="of:=-[.D48]" office:value-type="percentage" office:value="-0.03" calcext:value-type="percentage">
            <text:p>-3 %</text:p>
          </table:table-cell>
          <table:table-cell table:style-name="ce672" table:number-columns-repeated="2"/>
          <table:table-cell table:style-name="ce675" table:formula="of:=[.D56]" office:value-type="float" office:value="33158.9594975739" calcext:value-type="float">
            <text:p><text:s/>33,158.96 </text:p>
          </table:table-cell>
          <table:table-cell table:style-name="ce669" table:formula="of:=[.D57]" office:value-type="percentage" office:value="0.260202423100335" calcext:value-type="percentage">
            <text:p>26 %</text:p>
          </table:table-cell>
          <table:table-cell/>
          <table:table-cell table:style-name="ce162" table:formula="of:=+[.M8]" office:value-type="float" office:value="2023" calcext:value-type="float">
            <text:p>2023</text:p>
          </table:table-cell>
          <table:table-cell table:style-name="ce679" table:formula="of:=+[.N8]*[.$N$15]" office:value-type="float" office:value="10871.5112" calcext:value-type="float">
            <text:p>10871.51</text:p>
          </table:table-cell>
          <table:table-cell table:style-name="ce679" table:formula="of:=+[.O8]*[.$O$15]" office:value-type="float" office:value="18" calcext:value-type="float">
            <text:p>18.00</text:p>
          </table:table-cell>
          <table:table-cell table:style-name="ce679" table:formula="of:=[.N20]*[.O20]" office:value-type="float" office:value="195687.2016" calcext:value-type="float">
            <text:p>195687.20</text:p>
          </table:table-cell>
          <table:table-cell/>
          <table:table-cell table:style-name="ce307" office:value-type="string" calcext:value-type="string">
            <text:p>PRESTAMO</text:p>
          </table:table-cell>
          <table:table-cell table:style-name="ce605" table:formula="of:=+[$'FLUJO DE CAJA '.B24]" office:value-type="float" office:value="5000" calcext:value-type="float">
            <text:p><text:s/>5,000.00 </text:p>
          </table:table-cell>
          <table:table-cell table:style-name="ce427" table:number-columns-repeated="5"/>
          <table:table-cell table:number-columns-repeated="2"/>
          <table:table-cell table:style-name="ce307" office:value-type="string" calcext:value-type="string">
            <text:p>PRESTAMO</text:p>
          </table:table-cell>
          <table:table-cell table:style-name="ce605" table:formula="of:=+[.S20]" office:value-type="float" office:value="5000" calcext:value-type="float">
            <text:p><text:s/>5,000.00 </text:p>
          </table:table-cell>
          <table:table-cell table:style-name="ce427" table:number-columns-repeated="5"/>
          <table:table-cell table:number-columns-repeated="2"/>
          <table:table-cell table:style-name="ce307" office:value-type="string" calcext:value-type="string">
            <text:p>PRESTAMO</text:p>
          </table:table-cell>
          <table:table-cell table:style-name="ce605" table:formula="of:=+[.AB20]" office:value-type="float" office:value="5000" calcext:value-type="float">
            <text:p><text:s/>5,000.00 </text:p>
          </table:table-cell>
          <table:table-cell table:style-name="ce427" table:number-columns-repeated="5"/>
          <table:table-cell table:number-columns-repeated="2"/>
          <table:table-cell table:style-name="ce307" office:value-type="string" calcext:value-type="string">
            <text:p>PRESTAMO</text:p>
          </table:table-cell>
          <table:table-cell table:style-name="ce605" table:formula="of:=+[.AK20]" office:value-type="float" office:value="5000" calcext:value-type="float">
            <text:p><text:s/>5,000.00 </text:p>
          </table:table-cell>
          <table:table-cell table:style-name="ce427" table:number-columns-repeated="5"/>
          <table:table-cell table:number-columns-repeated="2"/>
          <table:table-cell table:style-name="ce307" office:value-type="string" calcext:value-type="string">
            <text:p>PRESTAMO</text:p>
          </table:table-cell>
          <table:table-cell table:style-name="ce605" table:formula="of:=+[.AT20]" office:value-type="float" office:value="5000" calcext:value-type="float">
            <text:p><text:s/>5,000.00 </text:p>
          </table:table-cell>
          <table:table-cell table:style-name="ce427" table:number-columns-repeated="5"/>
          <table:table-cell table:number-columns-repeated="2"/>
          <table:table-cell table:style-name="ce307" office:value-type="string" calcext:value-type="string">
            <text:p>PRESTAMO</text:p>
          </table:table-cell>
          <table:table-cell table:style-name="ce605" table:formula="of:=+[.BC20]" office:value-type="float" office:value="5000" calcext:value-type="float">
            <text:p><text:s/>5,000.00 </text:p>
          </table:table-cell>
          <table:table-cell table:style-name="ce427" table:number-columns-repeated="5"/>
          <table:table-cell table:number-columns-repeated="2"/>
          <table:table-cell table:style-name="ce307" office:value-type="string" calcext:value-type="string">
            <text:p>PRESTAMO</text:p>
          </table:table-cell>
          <table:table-cell table:style-name="ce605" table:formula="of:=+[.BL20]" office:value-type="float" office:value="5000" calcext:value-type="float">
            <text:p><text:s/>5,000.00 </text:p>
          </table:table-cell>
          <table:table-cell table:style-name="ce427" table:number-columns-repeated="5"/>
          <table:table-cell table:number-columns-repeated="179"/>
        </table:table-row>
        <table:table-row table:style-name="ro21">
          <table:table-cell table:style-name="ce649" office:value-type="float" office:value="4" calcext:value-type="float">
            <text:p>4</text:p>
          </table:table-cell>
          <table:table-cell table:style-name="ce654" table:formula="of:=+[.AF19]" office:value-type="float" office:value="51485.035982084" calcext:value-type="float">
            <text:p><text:s/>51,485.04 </text:p>
          </table:table-cell>
          <table:table-cell table:style-name="ce657" table:formula="of:=1/(1+[.$B$1])^[.A21]" office:value-type="float" office:value="0.486977310811392" calcext:value-type="float">
            <text:p><text:s/>0.49 </text:p>
          </table:table-cell>
          <table:table-cell table:style-name="ce654" table:formula="of:=[.B21]*[.C21]" office:value-type="float" office:value="25072.044369583" calcext:value-type="float">
            <text:p><text:s/>25,072.04 </text:p>
          </table:table-cell>
          <table:table-cell table:style-name="ce663"/>
          <table:covered-table-cell table:style-name="ce665"/>
          <table:table-cell table:style-name="ce669" table:formula="of:=-[.D59]" office:value-type="percentage" office:value="-0.08" calcext:value-type="percentage">
            <text:p>-8 %</text:p>
          </table:table-cell>
          <table:table-cell table:style-name="ce672" table:number-columns-repeated="2"/>
          <table:table-cell table:style-name="ce676" table:formula="of:=[.D67]" office:value-type="float" office:value="8175.71274119284" calcext:value-type="float">
            <text:p><text:s/>8,175.71 </text:p>
          </table:table-cell>
          <table:table-cell table:style-name="ce669" table:formula="of:=[.D68]" office:value-type="percentage" office:value="0.212876734299591" calcext:value-type="percentage">
            <text:p>21 %</text:p>
          </table:table-cell>
          <table:table-cell/>
          <table:table-cell table:style-name="ce162" table:formula="of:=+[.M9]" office:value-type="float" office:value="2024" calcext:value-type="float">
            <text:p>2024</text:p>
          </table:table-cell>
          <table:table-cell table:style-name="ce679" table:formula="of:=+[.N9]*[.$N$15]" office:value-type="float" office:value="10871.5112" calcext:value-type="float">
            <text:p>10871.51</text:p>
          </table:table-cell>
          <table:table-cell table:style-name="ce679" table:formula="of:=+[.O9]*[.$O$15]" office:value-type="float" office:value="18" calcext:value-type="float">
            <text:p>18.00</text:p>
          </table:table-cell>
          <table:table-cell table:style-name="ce679" table:formula="of:=[.N21]*[.O21]" office:value-type="float" office:value="195687.2016" calcext:value-type="float">
            <text:p>195687.20</text:p>
          </table:table-cell>
          <table:table-cell/>
          <table:table-cell table:style-name="ce307" office:value-type="string" calcext:value-type="string">
            <text:p>SERVICIO DE DEUDA</text:p>
          </table:table-cell>
          <table:table-cell table:style-name="ce605"/>
          <table:table-cell table:style-name="ce427" table:formula="of:=+[$'FLUJO DE CAJA '.C25]" office:value-type="float" office:value="-5388.86178313251" calcext:value-type="float">
            <text:p><text:s/>(5,388.86)</text:p>
          </table:table-cell>
          <table:table-cell table:style-name="ce427" table:formula="of:=+[$'FLUJO DE CAJA '.D25]" office:value-type="float" office:value="-0" calcext:value-type="float">
            <text:p><text:s/>- <text:s text:c="2"/></text:p>
          </table:table-cell>
          <table:table-cell table:style-name="ce427" table:formula="of:=+[$'FLUJO DE CAJA '.E25]"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SERVICIO DE DEUDA</text:p>
          </table:table-cell>
          <table:table-cell table:style-name="ce605"/>
          <table:table-cell table:style-name="ce427" table:formula="of:=+[.T21]" office:value-type="float" office:value="-5388.86178313251" calcext:value-type="float">
            <text:p><text:s/>(5,388.86)</text:p>
          </table:table-cell>
          <table:table-cell table:style-name="ce427" table:formula="of:=+[.U21]" office:value-type="float" office:value="-0" calcext:value-type="float">
            <text:p><text:s/>- <text:s text:c="2"/></text:p>
          </table:table-cell>
          <table:table-cell table:style-name="ce427" table:formula="of:=+[.V21]"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SERVICIO DE DEUDA</text:p>
          </table:table-cell>
          <table:table-cell table:style-name="ce605"/>
          <table:table-cell table:style-name="ce427" table:formula="of:=+[.AC21]" office:value-type="float" office:value="-5388.86178313251" calcext:value-type="float">
            <text:p><text:s/>(5,388.86)</text:p>
          </table:table-cell>
          <table:table-cell table:style-name="ce427" table:formula="of:=+[.AD21]" office:value-type="float" office:value="-0" calcext:value-type="float">
            <text:p><text:s/>- <text:s text:c="2"/></text:p>
          </table:table-cell>
          <table:table-cell table:style-name="ce427" table:formula="of:=+[.AE21]"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SERVICIO DE DEUDA</text:p>
          </table:table-cell>
          <table:table-cell table:style-name="ce605"/>
          <table:table-cell table:style-name="ce427" table:formula="of:=+[.AL21]" office:value-type="float" office:value="-5388.86178313251" calcext:value-type="float">
            <text:p><text:s/>(5,388.86)</text:p>
          </table:table-cell>
          <table:table-cell table:style-name="ce427" table:formula="of:=+[.AM21]" office:value-type="float" office:value="-0" calcext:value-type="float">
            <text:p><text:s/>- <text:s text:c="2"/></text:p>
          </table:table-cell>
          <table:table-cell table:style-name="ce427" table:formula="of:=+[.AN21]"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SERVICIO DE DEUDA</text:p>
          </table:table-cell>
          <table:table-cell table:style-name="ce605"/>
          <table:table-cell table:style-name="ce427" table:formula="of:=+[.AU21]" office:value-type="float" office:value="-5388.86178313251" calcext:value-type="float">
            <text:p><text:s/>(5,388.86)</text:p>
          </table:table-cell>
          <table:table-cell table:style-name="ce427" table:formula="of:=+[.AV21]" office:value-type="float" office:value="-0" calcext:value-type="float">
            <text:p><text:s/>- <text:s text:c="2"/></text:p>
          </table:table-cell>
          <table:table-cell table:style-name="ce427" table:formula="of:=+[.AW21]"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SERVICIO DE DEUDA</text:p>
          </table:table-cell>
          <table:table-cell table:style-name="ce605"/>
          <table:table-cell table:style-name="ce427" table:formula="of:=+[.BD21]" office:value-type="float" office:value="-5388.86178313251" calcext:value-type="float">
            <text:p><text:s/>(5,388.86)</text:p>
          </table:table-cell>
          <table:table-cell table:style-name="ce427" table:formula="of:=+[.BE21]" office:value-type="float" office:value="-0" calcext:value-type="float">
            <text:p><text:s/>- <text:s text:c="2"/></text:p>
          </table:table-cell>
          <table:table-cell table:style-name="ce427" table:formula="of:=+[.BF21]"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SERVICIO DE DEUDA</text:p>
          </table:table-cell>
          <table:table-cell table:style-name="ce605"/>
          <table:table-cell table:style-name="ce427" table:formula="of:=+[.BM21]" office:value-type="float" office:value="-5388.86178313251" calcext:value-type="float">
            <text:p><text:s/>(5,388.86)</text:p>
          </table:table-cell>
          <table:table-cell table:style-name="ce427" table:formula="of:=+[.BN21]" office:value-type="float" office:value="-0" calcext:value-type="float">
            <text:p><text:s/>- <text:s text:c="2"/></text:p>
          </table:table-cell>
          <table:table-cell table:style-name="ce427" table:formula="of:=+[.BO21]" office:value-type="float" office:value="-0" calcext:value-type="float">
            <text:p><text:s/>- <text:s text:c="2"/></text:p>
          </table:table-cell>
          <table:table-cell table:style-name="ce427" table:number-columns-repeated="2"/>
          <table:table-cell table:number-columns-repeated="179"/>
        </table:table-row>
        <table:table-row table:style-name="ro21">
          <table:table-cell table:style-name="ce649" office:value-type="float" office:value="5" calcext:value-type="float">
            <text:p>5</text:p>
          </table:table-cell>
          <table:table-cell table:style-name="ce654" table:formula="of:=+[.AG19]" office:value-type="float" office:value="205534.297705031" calcext:value-type="float">
            <text:p><text:s/>205,534.30 </text:p>
          </table:table-cell>
          <table:table-cell table:style-name="ce657" table:formula="of:=1/(1+[.$B$1])^[.A22]" office:value-type="float" office:value="0.406804650336188" calcext:value-type="float">
            <text:p><text:s/>0.41 </text:p>
          </table:table-cell>
          <table:table-cell table:style-name="ce654" table:formula="of:=[.B22]*[.C22]" office:value-type="float" office:value="83612.3081099889" calcext:value-type="float">
            <text:p><text:s/>83,612.31 </text:p>
          </table:table-cell>
          <table:table-cell table:style-name="ce663"/>
          <table:covered-table-cell table:style-name="ce665"/>
          <table:table-cell table:style-name="ce668" table:formula="of:=-[.D70]" office:value-type="percentage" office:value="-0.16" calcext:value-type="percentage">
            <text:p>-16 %</text:p>
          </table:table-cell>
          <table:table-cell table:style-name="ce672" table:number-columns-repeated="2"/>
          <table:table-cell table:style-name="ce676" table:formula="of:=[.D78]" office:value-type="float" office:value="-31797.4820690172" calcext:value-type="float">
            <text:p><text:s/>(31,797.48)</text:p>
          </table:table-cell>
          <table:table-cell table:style-name="ce669" table:formula="of:=[.D79]" office:value-type="percentage" office:value="0.134066014887296" calcext:value-type="percentage">
            <text:p>13 %</text:p>
          </table:table-cell>
          <table:table-cell/>
          <table:table-cell table:style-name="ce162" table:formula="of:=+[.M10]" office:value-type="float" office:value="2025" calcext:value-type="float">
            <text:p>2025</text:p>
          </table:table-cell>
          <table:table-cell table:style-name="ce679" table:formula="of:=+[.N10]*[.$N$15]" office:value-type="float" office:value="10871.5112" calcext:value-type="float">
            <text:p>10871.51</text:p>
          </table:table-cell>
          <table:table-cell table:style-name="ce679" table:formula="of:=+[.O10]*[.$O$15]" office:value-type="float" office:value="18" calcext:value-type="float">
            <text:p>18.00</text:p>
          </table:table-cell>
          <table:table-cell table:style-name="ce679" table:formula="of:=[.N22]*[.O22]" office:value-type="float" office:value="195687.2016" calcext:value-type="float">
            <text:p>195687.20</text:p>
          </table:table-cell>
          <table:table-cell/>
          <table:table-cell table:style-name="ce307" office:value-type="string" calcext:value-type="string">
            <text:p>ESCUDO FISCAL</text:p>
          </table:table-cell>
          <table:table-cell table:style-name="ce605"/>
          <table:table-cell table:style-name="ce427" table:formula="of:=+[$'FLUJO DE CAJA '.C26]" office:value-type="float" office:value="116.658534939754" calcext:value-type="float">
            <text:p><text:s/>116.66 </text:p>
          </table:table-cell>
          <table:table-cell table:style-name="ce427" table:formula="of:=+[$'FLUJO DE CAJA '.D26]" office:value-type="float" office:value="0" calcext:value-type="float">
            <text:p><text:s/>- <text:s text:c="2"/></text:p>
          </table:table-cell>
          <table:table-cell table:style-name="ce427" table:formula="of:=+[$'FLUJO DE CAJA '.E26]"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ESCUDO FISCAL</text:p>
          </table:table-cell>
          <table:table-cell table:style-name="ce605"/>
          <table:table-cell table:style-name="ce427" table:formula="of:=+[.T22]" office:value-type="float" office:value="116.658534939754" calcext:value-type="float">
            <text:p><text:s/>116.66 </text:p>
          </table:table-cell>
          <table:table-cell table:style-name="ce427" table:formula="of:=+[.U22]" office:value-type="float" office:value="0" calcext:value-type="float">
            <text:p><text:s/>- <text:s text:c="2"/></text:p>
          </table:table-cell>
          <table:table-cell table:style-name="ce427" table:formula="of:=+[.V22]"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ESCUDO FISCAL</text:p>
          </table:table-cell>
          <table:table-cell table:style-name="ce605"/>
          <table:table-cell table:style-name="ce427" table:formula="of:=+[.AC22]" office:value-type="float" office:value="116.658534939754" calcext:value-type="float">
            <text:p><text:s/>116.66 </text:p>
          </table:table-cell>
          <table:table-cell table:style-name="ce427" table:formula="of:=+[.AD22]" office:value-type="float" office:value="0" calcext:value-type="float">
            <text:p><text:s/>- <text:s text:c="2"/></text:p>
          </table:table-cell>
          <table:table-cell table:style-name="ce427" table:formula="of:=+[.AE22]"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ESCUDO FISCAL</text:p>
          </table:table-cell>
          <table:table-cell table:style-name="ce605"/>
          <table:table-cell table:style-name="ce427" table:formula="of:=+[.AL22]" office:value-type="float" office:value="116.658534939754" calcext:value-type="float">
            <text:p><text:s/>116.66 </text:p>
          </table:table-cell>
          <table:table-cell table:style-name="ce427" table:formula="of:=+[.AM22]" office:value-type="float" office:value="0" calcext:value-type="float">
            <text:p><text:s/>- <text:s text:c="2"/></text:p>
          </table:table-cell>
          <table:table-cell table:style-name="ce427" table:formula="of:=+[.AN22]"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ESCUDO FISCAL</text:p>
          </table:table-cell>
          <table:table-cell table:style-name="ce605"/>
          <table:table-cell table:style-name="ce427" table:formula="of:=+[.AU22]" office:value-type="float" office:value="116.658534939754" calcext:value-type="float">
            <text:p><text:s/>116.66 </text:p>
          </table:table-cell>
          <table:table-cell table:style-name="ce427" table:formula="of:=+[.AV22]" office:value-type="float" office:value="0" calcext:value-type="float">
            <text:p><text:s/>- <text:s text:c="2"/></text:p>
          </table:table-cell>
          <table:table-cell table:style-name="ce427" table:formula="of:=+[.AW22]"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ESCUDO FISCAL</text:p>
          </table:table-cell>
          <table:table-cell table:style-name="ce605"/>
          <table:table-cell table:style-name="ce427" table:formula="of:=+[.BD22]" office:value-type="float" office:value="116.658534939754" calcext:value-type="float">
            <text:p><text:s/>116.66 </text:p>
          </table:table-cell>
          <table:table-cell table:style-name="ce427" table:formula="of:=+[.BE22]" office:value-type="float" office:value="0" calcext:value-type="float">
            <text:p><text:s/>- <text:s text:c="2"/></text:p>
          </table:table-cell>
          <table:table-cell table:style-name="ce427" table:formula="of:=+[.BF22]" office:value-type="float" office:value="0" calcext:value-type="float">
            <text:p><text:s/>- <text:s text:c="2"/></text:p>
          </table:table-cell>
          <table:table-cell table:style-name="ce427" table:number-columns-repeated="2"/>
          <table:table-cell table:number-columns-repeated="2"/>
          <table:table-cell table:style-name="ce307" office:value-type="string" calcext:value-type="string">
            <text:p>ESCUDO FISCAL</text:p>
          </table:table-cell>
          <table:table-cell table:style-name="ce605"/>
          <table:table-cell table:style-name="ce427" table:formula="of:=+[.BM22]" office:value-type="float" office:value="116.658534939754" calcext:value-type="float">
            <text:p><text:s/>116.66 </text:p>
          </table:table-cell>
          <table:table-cell table:style-name="ce427" table:formula="of:=+[.BN22]" office:value-type="float" office:value="0" calcext:value-type="float">
            <text:p><text:s/>- <text:s text:c="2"/></text:p>
          </table:table-cell>
          <table:table-cell table:style-name="ce427" table:formula="of:=+[.BO22]" office:value-type="float" office:value="0" calcext:value-type="float">
            <text:p><text:s/>- <text:s text:c="2"/></text:p>
          </table:table-cell>
          <table:table-cell table:style-name="ce427" table:number-columns-repeated="2"/>
          <table:table-cell table:number-columns-repeated="179"/>
        </table:table-row>
        <table:table-row table:style-name="ro29">
          <table:table-cell table:style-name="ce650" office:value-type="string" calcext:value-type="string" table:number-columns-spanned="3" table:number-rows-spanned="1">
            <text:p>VANE</text:p>
          </table:table-cell>
          <table:covered-table-cell table:number-columns-repeated="2" table:style-name="ce650"/>
          <table:table-cell table:style-name="ce658" table:formula="of:=SUM([.D17:.D22])" office:value-type="float" office:value="23165.6607950214" calcext:value-type="float">
            <text:p><text:s/>23,165.66 </text:p>
          </table:table-cell>
          <table:table-cell table:style-name="ce655"/>
          <table:table-cell table:number-columns-repeated="12"/>
          <table:table-cell table:style-name="ce600" office:value-type="string" calcext:value-type="string">
            <text:p>FLUJO DE CAJA FINANCIERO</text:p>
          </table:table-cell>
          <table:table-cell table:style-name="ce608" table:formula="of:=SUM([.S19:.S22])" office:value-type="float" office:value="-152481.215045237" calcext:value-type="float">
            <text:p><text:s/>(152,481.22)</text:p>
          </table:table-cell>
          <table:table-cell table:style-name="ce627" table:formula="of:=SUM([.T19:.T22])" office:value-type="float" office:value="4482.78407206445" calcext:value-type="float">
            <text:p><text:s/>4,482.78 </text:p>
          </table:table-cell>
          <table:table-cell table:style-name="ce627" table:formula="of:=SUM([.U19:.U22])" office:value-type="float" office:value="62235.9832299337" calcext:value-type="float">
            <text:p><text:s/>62,235.98 </text:p>
          </table:table-cell>
          <table:table-cell table:style-name="ce627" table:formula="of:=SUM([.V19:.V22])" office:value-type="float" office:value="62030.7010263657" calcext:value-type="float">
            <text:p><text:s/>62,030.70 </text:p>
          </table:table-cell>
          <table:table-cell table:style-name="ce627" table:formula="of:=SUM([.W19:.W22])" office:value-type="float" office:value="61784.362382084" calcext:value-type="float">
            <text:p><text:s/>61,784.36 </text:p>
          </table:table-cell>
          <table:table-cell table:style-name="ce627" table:formula="of:=SUM([.X19:.X22])" office:value-type="float" office:value="215833.624105031" calcext:value-type="float">
            <text:p><text:s/>215,833.62 </text:p>
          </table:table-cell>
          <table:table-cell table:number-columns-repeated="2"/>
          <table:table-cell table:style-name="ce600" office:value-type="string" calcext:value-type="string">
            <text:p>FLUJO DE CAJA FINANCIERO</text:p>
          </table:table-cell>
          <table:table-cell table:style-name="ce608" table:formula="of:=SUM([.AB19:.AB22])" office:value-type="float" office:value="-152481.215045237" calcext:value-type="float">
            <text:p><text:s/>(152,481.22)</text:p>
          </table:table-cell>
          <table:table-cell table:style-name="ce627" table:formula="of:=SUM([.AC19:.AC22])" office:value-type="float" office:value="1386.3694435613" calcext:value-type="float">
            <text:p><text:s/>1,386.37 </text:p>
          </table:table-cell>
          <table:table-cell table:style-name="ce627" table:formula="of:=SUM([.AD19:.AD22])" office:value-type="float" office:value="51936.6568299337" calcext:value-type="float">
            <text:p><text:s/>51,936.66 </text:p>
          </table:table-cell>
          <table:table-cell table:style-name="ce627" table:formula="of:=SUM([.AE19:.AE22])" office:value-type="float" office:value="51731.3746263656" calcext:value-type="float">
            <text:p><text:s/>51,731.37 </text:p>
          </table:table-cell>
          <table:table-cell table:style-name="ce627" table:formula="of:=SUM([.AF19:.AF22])" office:value-type="float" office:value="51485.035982084" calcext:value-type="float">
            <text:p><text:s/>51,485.04 </text:p>
          </table:table-cell>
          <table:table-cell table:style-name="ce627" table:formula="of:=SUM([.AG19:.AG22])" office:value-type="float" office:value="205534.297705031" calcext:value-type="float">
            <text:p><text:s/>205,534.30 </text:p>
          </table:table-cell>
          <table:table-cell table:number-columns-repeated="2"/>
          <table:table-cell table:style-name="ce600" office:value-type="string" calcext:value-type="string">
            <text:p>FLUJO DE CAJA FINANCIERO</text:p>
          </table:table-cell>
          <table:table-cell table:style-name="ce608" table:formula="of:=SUM([.AK19:.AK22])" office:value-type="float" office:value="-152481.215045237" calcext:value-type="float">
            <text:p><text:s/>(152,481.22)</text:p>
          </table:table-cell>
          <table:table-cell table:style-name="ce627" table:formula="of:=SUM([.AL19:.AL22])" office:value-type="float" office:value="-1710.04518494185" calcext:value-type="float">
            <text:p><text:s/>(1,710.05)</text:p>
          </table:table-cell>
          <table:table-cell table:style-name="ce627" table:formula="of:=SUM([.AM19:.AM22])" office:value-type="float" office:value="41637.3304299337" calcext:value-type="float">
            <text:p><text:s/>41,637.33 </text:p>
          </table:table-cell>
          <table:table-cell table:style-name="ce627" table:formula="of:=SUM([.AN19:.AN22])" office:value-type="float" office:value="41432.0482263657" calcext:value-type="float">
            <text:p><text:s/>41,432.05 </text:p>
          </table:table-cell>
          <table:table-cell table:style-name="ce627" table:formula="of:=SUM([.AO19:.AO22])" office:value-type="float" office:value="41185.709582084" calcext:value-type="float">
            <text:p><text:s/>41,185.71 </text:p>
          </table:table-cell>
          <table:table-cell table:style-name="ce627" table:formula="of:=SUM([.AP19:.AP22])" office:value-type="float" office:value="195234.971305031" calcext:value-type="float">
            <text:p><text:s/>195,234.97 </text:p>
          </table:table-cell>
          <table:table-cell table:number-columns-repeated="2"/>
          <table:table-cell table:style-name="ce600" office:value-type="string" calcext:value-type="string">
            <text:p>FLUJO DE CAJA FINANCIERO</text:p>
          </table:table-cell>
          <table:table-cell table:style-name="ce608" table:formula="of:=SUM([.AT19:.AT22])" office:value-type="float" office:value="-152481.215045237" calcext:value-type="float">
            <text:p><text:s/>(152,481.22)</text:p>
          </table:table-cell>
          <table:table-cell table:style-name="ce627" table:formula="of:=SUM([.AU19:.AU22])" office:value-type="float" office:value="-4806.459813445" calcext:value-type="float">
            <text:p><text:s/>(4,806.46)</text:p>
          </table:table-cell>
          <table:table-cell table:style-name="ce627" table:formula="of:=SUM([.AV19:.AV22])" office:value-type="float" office:value="31338.0040299337" calcext:value-type="float">
            <text:p><text:s/>31,338.00 </text:p>
          </table:table-cell>
          <table:table-cell table:style-name="ce627" table:formula="of:=SUM([.AW19:.AW22])" office:value-type="float" office:value="31132.7218263657" calcext:value-type="float">
            <text:p><text:s/>31,132.72 </text:p>
          </table:table-cell>
          <table:table-cell table:style-name="ce627" table:formula="of:=SUM([.AX19:.AX22])" office:value-type="float" office:value="30886.383182084" calcext:value-type="float">
            <text:p><text:s/>30,886.38 </text:p>
          </table:table-cell>
          <table:table-cell table:style-name="ce627" table:formula="of:=SUM([.AY19:.AY22])" office:value-type="float" office:value="184935.644905031" calcext:value-type="float">
            <text:p><text:s/>184,935.64 </text:p>
          </table:table-cell>
          <table:table-cell table:number-columns-repeated="2"/>
          <table:table-cell table:style-name="ce600" office:value-type="string" calcext:value-type="string">
            <text:p>FLUJO DE CAJA FINANCIERO</text:p>
          </table:table-cell>
          <table:table-cell table:style-name="ce608" table:formula="of:=SUM([.BC19:.BC22])" office:value-type="float" office:value="-152481.215045237" calcext:value-type="float">
            <text:p><text:s/>(152,481.22)</text:p>
          </table:table-cell>
          <table:table-cell table:style-name="ce627" table:formula="of:=SUM([.BD19:.BD22])" office:value-type="float" office:value="2624.93529496257" calcext:value-type="float">
            <text:p><text:s/>2,624.94 </text:p>
          </table:table-cell>
          <table:table-cell table:style-name="ce627" table:formula="of:=SUM([.BE19:.BE22])" office:value-type="float" office:value="56056.3873899337" calcext:value-type="float">
            <text:p><text:s/>56,056.39 </text:p>
          </table:table-cell>
          <table:table-cell table:style-name="ce627" table:formula="of:=SUM([.BF19:.BF22])" office:value-type="float" office:value="55851.1051863657" calcext:value-type="float">
            <text:p><text:s/>55,851.11 </text:p>
          </table:table-cell>
          <table:table-cell table:style-name="ce627" table:formula="of:=SUM([.BG19:.BG22])" office:value-type="float" office:value="55604.766542084" calcext:value-type="float">
            <text:p><text:s/>55,604.77 </text:p>
          </table:table-cell>
          <table:table-cell table:style-name="ce627" table:formula="of:=SUM([.BH19:.BH22])" office:value-type="float" office:value="209654.028265031" calcext:value-type="float">
            <text:p><text:s/>209,654.03 </text:p>
          </table:table-cell>
          <table:table-cell table:number-columns-repeated="2"/>
          <table:table-cell table:style-name="ce600" office:value-type="string" calcext:value-type="string">
            <text:p>FLUJO DE CAJA FINANCIERO</text:p>
          </table:table-cell>
          <table:table-cell table:style-name="ce608" table:formula="of:=SUM([.BL19:.BL22])" office:value-type="float" office:value="-152481.215045237" calcext:value-type="float">
            <text:p><text:s/>(152,481.22)</text:p>
          </table:table-cell>
          <table:table-cell table:style-name="ce627" table:formula="of:=SUM([.BM19:.BM22])" office:value-type="float" office:value="-471.479333540583" calcext:value-type="float">
            <text:p><text:s/>(471.48)</text:p>
          </table:table-cell>
          <table:table-cell table:style-name="ce627" table:formula="of:=SUM([.BN19:.BN22])" office:value-type="float" office:value="45757.0609899338" calcext:value-type="float">
            <text:p><text:s/>45,757.06 </text:p>
          </table:table-cell>
          <table:table-cell table:style-name="ce627" table:formula="of:=SUM([.BO19:.BO22])" office:value-type="float" office:value="45551.7787863657" calcext:value-type="float">
            <text:p><text:s/>45,551.78 </text:p>
          </table:table-cell>
          <table:table-cell table:style-name="ce627" table:formula="of:=SUM([.BP19:.BP22])" office:value-type="float" office:value="45305.440142084" calcext:value-type="float">
            <text:p><text:s/>45,305.44 </text:p>
          </table:table-cell>
          <table:table-cell table:style-name="ce627" table:formula="of:=SUM([.BQ19:.BQ22])" office:value-type="float" office:value="199354.701865031" calcext:value-type="float">
            <text:p><text:s/>199,354.70 </text:p>
          </table:table-cell>
          <table:table-cell table:number-columns-repeated="2"/>
          <table:table-cell table:style-name="ce600" office:value-type="string" calcext:value-type="string">
            <text:p>FLUJO DE CAJA FINANCIERO</text:p>
          </table:table-cell>
          <table:table-cell table:style-name="ce608" table:formula="of:=SUM([.BU19:.BU22])" office:value-type="float" office:value="-152481.215045237" calcext:value-type="float">
            <text:p><text:s/>(152,481.22)</text:p>
          </table:table-cell>
          <table:table-cell table:style-name="ce627" table:formula="of:=SUM([.BV19:.BV22])" office:value-type="float" office:value="-5425.74273914564" calcext:value-type="float">
            <text:p><text:s/>(5,425.74)</text:p>
          </table:table-cell>
          <table:table-cell table:style-name="ce627" table:formula="of:=SUM([.BW19:.BW22])" office:value-type="float" office:value="29278.1387499337" calcext:value-type="float">
            <text:p><text:s/>29,278.14 </text:p>
          </table:table-cell>
          <table:table-cell table:style-name="ce627" table:formula="of:=SUM([.BX19:.BX22])" office:value-type="float" office:value="29072.8565463657" calcext:value-type="float">
            <text:p><text:s/>29,072.86 </text:p>
          </table:table-cell>
          <table:table-cell table:style-name="ce627" table:formula="of:=SUM([.BY19:.BY22])" office:value-type="float" office:value="28826.517902084" calcext:value-type="float">
            <text:p><text:s/>28,826.52 </text:p>
          </table:table-cell>
          <table:table-cell table:style-name="ce627" table:formula="of:=SUM([.BZ19:.BZ22])" office:value-type="float" office:value="182875.779625031" calcext:value-type="float">
            <text:p><text:s/>182,875.78 </text:p>
          </table:table-cell>
          <table:table-cell table:number-columns-repeated="179"/>
        </table:table-row>
        <table:table-row table:style-name="ro12">
          <table:table-cell table:style-name="ce650" office:value-type="string" calcext:value-type="string" table:number-columns-spanned="3" table:number-rows-spanned="1">
            <text:p>TIRE</text:p>
          </table:table-cell>
          <table:covered-table-cell table:number-columns-repeated="2" table:style-name="ce650"/>
          <table:table-cell table:style-name="ce659" table:formula="of:=IRR([.B17:.B22];[.B13])" office:value-type="percentage" office:value="0.241439062973548" calcext:value-type="percentage">
            <text:p>24.14 %</text:p>
          </table:table-cell>
          <table:table-cell table:style-name="ce655"/>
          <table:table-cell table:number-columns-repeated="12"/>
          <table:table-cell table:style-name="ce418" office:value-type="string" calcext:value-type="string">
            <text:p>FUENTE: ELABORACION PROPIA</text:p>
          </table:table-cell>
          <table:table-cell table:style-name="ce609"/>
          <table:table-cell table:style-name="ce628" table:number-columns-repeated="5"/>
          <table:table-cell table:number-columns-repeated="2"/>
          <table:table-cell table:style-name="ce418" office:value-type="string" calcext:value-type="string">
            <text:p>FUENTE: ELABORACION PROPIA</text:p>
          </table:table-cell>
          <table:table-cell table:style-name="ce609"/>
          <table:table-cell table:style-name="ce628" table:number-columns-repeated="5"/>
          <table:table-cell table:number-columns-repeated="2"/>
          <table:table-cell table:style-name="ce418" office:value-type="string" calcext:value-type="string">
            <text:p>FUENTE: ELABORACION PROPIA</text:p>
          </table:table-cell>
          <table:table-cell table:style-name="ce609"/>
          <table:table-cell table:style-name="ce628" table:number-columns-repeated="5"/>
          <table:table-cell table:number-columns-repeated="2"/>
          <table:table-cell table:style-name="ce418" office:value-type="string" calcext:value-type="string">
            <text:p>FUENTE: ELABORACION PROPIA</text:p>
          </table:table-cell>
          <table:table-cell table:style-name="ce609"/>
          <table:table-cell table:style-name="ce628" table:number-columns-repeated="5"/>
          <table:table-cell table:number-columns-repeated="2"/>
          <table:table-cell table:style-name="ce418" office:value-type="string" calcext:value-type="string">
            <text:p>FUENTE: ELABORACION PROPIA</text:p>
          </table:table-cell>
          <table:table-cell table:style-name="ce609"/>
          <table:table-cell table:style-name="ce628" table:number-columns-repeated="5"/>
          <table:table-cell table:number-columns-repeated="2"/>
          <table:table-cell table:style-name="ce418" office:value-type="string" calcext:value-type="string">
            <text:p>FUENTE: ELABORACION PROPIA</text:p>
          </table:table-cell>
          <table:table-cell table:style-name="ce609"/>
          <table:table-cell table:style-name="ce628" table:number-columns-repeated="5"/>
          <table:table-cell table:number-columns-repeated="2"/>
          <table:table-cell table:style-name="ce418" office:value-type="string" calcext:value-type="string">
            <text:p>FUENTE: ELABORACION PROPIA</text:p>
          </table:table-cell>
          <table:table-cell table:style-name="ce609"/>
          <table:table-cell table:style-name="ce628" table:number-columns-repeated="5"/>
          <table:table-cell table:number-columns-repeated="179"/>
        </table:table-row>
        <table:table-row table:style-name="ro46">
          <table:table-cell table:style-name="ce652"/>
          <table:table-cell table:style-name="ce655" table:number-columns-repeated="2"/>
          <table:table-cell table:style-name="ce661"/>
          <table:table-cell table:style-name="ce655"/>
          <table:table-cell table:number-columns-repeated="12"/>
          <table:table-cell table:style-name="ce460"/>
          <table:table-cell table:style-name="ce602"/>
          <table:table-cell table:style-name="ce460" table:number-columns-repeated="5"/>
          <table:table-cell table:number-columns-repeated="2"/>
          <table:table-cell table:style-name="ce460"/>
          <table:table-cell table:style-name="ce602"/>
          <table:table-cell table:style-name="ce460" table:number-columns-repeated="5"/>
          <table:table-cell table:number-columns-repeated="2"/>
          <table:table-cell table:style-name="ce460"/>
          <table:table-cell table:style-name="ce602"/>
          <table:table-cell table:style-name="ce460" table:number-columns-repeated="5"/>
          <table:table-cell table:number-columns-repeated="2"/>
          <table:table-cell table:style-name="ce460"/>
          <table:table-cell table:style-name="ce602"/>
          <table:table-cell table:style-name="ce460" table:number-columns-repeated="5"/>
          <table:table-cell table:number-columns-repeated="2"/>
          <table:table-cell table:style-name="ce460"/>
          <table:table-cell table:style-name="ce602"/>
          <table:table-cell table:style-name="ce460" table:number-columns-repeated="5"/>
          <table:table-cell table:number-columns-repeated="2"/>
          <table:table-cell table:style-name="ce460"/>
          <table:table-cell table:style-name="ce602"/>
          <table:table-cell table:style-name="ce460" table:number-columns-repeated="5"/>
          <table:table-cell table:number-columns-repeated="2"/>
          <table:table-cell table:style-name="ce460"/>
          <table:table-cell table:style-name="ce602"/>
          <table:table-cell table:style-name="ce460" table:number-columns-repeated="5"/>
          <table:table-cell table:number-columns-repeated="179"/>
        </table:table-row>
        <table:table-row table:style-name="ro8">
          <table:table-cell table:style-name="ce651" office:value-type="string" calcext:value-type="string" table:number-columns-spanned="3" table:number-rows-spanned="1">
            <text:p>Caida de la produccion en</text:p>
          </table:table-cell>
          <table:covered-table-cell table:number-columns-repeated="2" table:style-name="ce651"/>
          <table:table-cell table:style-name="ce660" office:value-type="percentage" office:value="0.1" calcext:value-type="percentage">
            <text:p>10 %</text:p>
          </table:table-cell>
          <table:table-cell table:style-name="ce655"/>
          <table:table-cell table:number-columns-repeated="8"/>
          <table:table-cell table:style-name="ce680" table:formula="of:=+[.N3]-[.D26]" office:value-type="percentage" office:value="0.9" calcext:value-type="percentage">
            <text:p>90 %</text:p>
          </table:table-cell>
          <table:table-cell table:style-name="ce680" table:formula="of:=+[.O3]" office:value-type="percentage" office:value="1" calcext:value-type="percentage">
            <text:p>100 %</text:p>
          </table:table-cell>
          <table:table-cell table:number-columns-repeated="2"/>
          <table:table-cell table:style-name="ce429"/>
          <table:table-cell table:style-name="ce610"/>
          <table:table-cell table:style-name="ce629" table:number-columns-repeated="5"/>
          <table:table-cell table:number-columns-repeated="2"/>
          <table:table-cell table:style-name="ce429"/>
          <table:table-cell table:style-name="ce610"/>
          <table:table-cell table:style-name="ce629" table:number-columns-repeated="5"/>
          <table:table-cell table:number-columns-repeated="2"/>
          <table:table-cell table:style-name="ce429"/>
          <table:table-cell table:style-name="ce610"/>
          <table:table-cell table:style-name="ce629" table:number-columns-repeated="5"/>
          <table:table-cell table:number-columns-repeated="2"/>
          <table:table-cell table:style-name="ce429"/>
          <table:table-cell table:style-name="ce610"/>
          <table:table-cell table:style-name="ce629" table:number-columns-repeated="5"/>
          <table:table-cell table:number-columns-repeated="2"/>
          <table:table-cell table:style-name="ce429"/>
          <table:table-cell table:style-name="ce610"/>
          <table:table-cell table:style-name="ce629" table:number-columns-repeated="5"/>
          <table:table-cell table:number-columns-repeated="2"/>
          <table:table-cell table:style-name="ce429"/>
          <table:table-cell table:style-name="ce610"/>
          <table:table-cell table:style-name="ce629" table:number-columns-repeated="5"/>
          <table:table-cell table:number-columns-repeated="2"/>
          <table:table-cell table:style-name="ce429"/>
          <table:table-cell table:style-name="ce610"/>
          <table:table-cell table:style-name="ce629" table:number-columns-repeated="5"/>
          <table:table-cell table:number-columns-repeated="179"/>
        </table:table-row>
        <table:table-row table:style-name="ro29">
          <table:table-cell table:style-name="ce441" office:value-type="string" calcext:value-type="string">
            <text:p>AÑO</text:p>
          </table:table-cell>
          <table:table-cell table:style-name="ce441" office:value-type="string" calcext:value-type="string">
            <text:p>FCE</text:p>
          </table:table-cell>
          <table:table-cell table:style-name="ce441" office:value-type="string" calcext:value-type="string">
            <text:p>FA</text:p>
          </table:table-cell>
          <table:table-cell table:style-name="ce441" office:value-type="string" calcext:value-type="string">
            <text:p>VAN</text:p>
          </table:table-cell>
          <table:table-cell table:style-name="ce655"/>
          <table:table-cell table:number-columns-repeated="7"/>
          <table:table-cell table:style-name="ce165" office:value-type="string" calcext:value-type="string" table:number-columns-spanned="1" table:number-rows-spanned="2">
            <text:p>Años</text:p>
          </table:table-cell>
          <table:table-cell table:style-name="ce165" office:value-type="string" calcext:value-type="string" table:number-columns-spanned="1" table:number-rows-spanned="2">
            <text:p>Produccion (UND.)</text:p>
          </table:table-cell>
          <table:table-cell table:style-name="ce165" office:value-type="string" calcext:value-type="string" table:number-columns-spanned="1" table:number-rows-spanned="2">
            <text:p>Precio por Und (S/.)</text:p>
          </table:table-cell>
          <table:table-cell table:style-name="ce165" office:value-type="string" calcext:value-type="string" table:number-columns-spanned="1" table:number-rows-spanned="2">
            <text:p>Ventas proyectadas (S/.)</text:p>
          </table:table-cell>
          <table:table-cell/>
          <table:table-cell table:style-name="ce307" office:value-type="string" calcext:value-type="string">
            <text:p>COK</text:p>
          </table:table-cell>
          <table:table-cell table:style-name="ce611" office:value-type="percentage" office:value="0.2" calcext:value-type="percentage">
            <text:p>20 %</text:p>
          </table:table-cell>
          <table:table-cell table:style-name="ce428" table:number-columns-repeated="5"/>
          <table:table-cell table:number-columns-repeated="2"/>
          <table:table-cell table:style-name="ce307" office:value-type="string" calcext:value-type="string">
            <text:p>COK</text:p>
          </table:table-cell>
          <table:table-cell table:style-name="ce611" office:value-type="percentage" office:value="0.2" calcext:value-type="percentage">
            <text:p>20 %</text:p>
          </table:table-cell>
          <table:table-cell table:style-name="ce428" table:number-columns-repeated="5"/>
          <table:table-cell table:number-columns-repeated="2"/>
          <table:table-cell table:style-name="ce307" office:value-type="string" calcext:value-type="string">
            <text:p>COK</text:p>
          </table:table-cell>
          <table:table-cell table:style-name="ce611" office:value-type="percentage" office:value="0.2" calcext:value-type="percentage">
            <text:p>20 %</text:p>
          </table:table-cell>
          <table:table-cell table:style-name="ce428" table:number-columns-repeated="5"/>
          <table:table-cell table:number-columns-repeated="2"/>
          <table:table-cell table:style-name="ce307" office:value-type="string" calcext:value-type="string">
            <text:p>COK</text:p>
          </table:table-cell>
          <table:table-cell table:style-name="ce611" office:value-type="percentage" office:value="0.2" calcext:value-type="percentage">
            <text:p>20 %</text:p>
          </table:table-cell>
          <table:table-cell table:style-name="ce428" table:number-columns-repeated="5"/>
          <table:table-cell table:number-columns-repeated="2"/>
          <table:table-cell table:style-name="ce307" office:value-type="string" calcext:value-type="string">
            <text:p>COK</text:p>
          </table:table-cell>
          <table:table-cell table:style-name="ce611" office:value-type="percentage" office:value="0.2" calcext:value-type="percentage">
            <text:p>20 %</text:p>
          </table:table-cell>
          <table:table-cell table:style-name="ce428" table:number-columns-repeated="5"/>
          <table:table-cell table:number-columns-repeated="2"/>
          <table:table-cell table:style-name="ce307" office:value-type="string" calcext:value-type="string">
            <text:p>COK</text:p>
          </table:table-cell>
          <table:table-cell table:style-name="ce611" office:value-type="percentage" office:value="0.2" calcext:value-type="percentage">
            <text:p>20 %</text:p>
          </table:table-cell>
          <table:table-cell table:style-name="ce428" table:number-columns-repeated="5"/>
          <table:table-cell table:number-columns-repeated="2"/>
          <table:table-cell table:style-name="ce307" office:value-type="string" calcext:value-type="string">
            <text:p>COK</text:p>
          </table:table-cell>
          <table:table-cell table:style-name="ce611" office:value-type="percentage" office:value="0.2" calcext:value-type="percentage">
            <text:p>20 %</text:p>
          </table:table-cell>
          <table:table-cell table:style-name="ce428" table:number-columns-repeated="5"/>
          <table:table-cell table:number-columns-repeated="179"/>
        </table:table-row>
        <table:table-row table:style-name="ro21">
          <table:table-cell table:style-name="ce649" office:value-type="float" office:value="0" calcext:value-type="float">
            <text:p>0</text:p>
          </table:table-cell>
          <table:table-cell table:style-name="ce654" table:formula="of:=+[.AK19]" office:value-type="float" office:value="-157481.215045237" calcext:value-type="float">
            <text:p><text:s/>(157,481.22)</text:p>
          </table:table-cell>
          <table:table-cell table:style-name="ce657" table:formula="of:=1/(1+[.$B$1])^[.A28]" office:value-type="float" office:value="1" calcext:value-type="float">
            <text:p><text:s/>1.00 </text:p>
          </table:table-cell>
          <table:table-cell table:style-name="ce654" table:formula="of:=[.B28]*[.C28]" office:value-type="float" office:value="-157481.215045237" calcext:value-type="float">
            <text:p><text:s/>(157,481.22)</text:p>
          </table:table-cell>
          <table:table-cell table:style-name="ce655"/>
          <table:table-cell table:style-name="ce666"/>
          <table:table-cell table:number-columns-repeated="6"/>
          <table:covered-table-cell table:number-columns-repeated="4" table:style-name="ce165"/>
          <table:table-cell/>
          <table:table-cell table:style-name="ce307" office:value-type="string" calcext:value-type="string">
            <text:p>TASA DE DESCUENTO</text:p>
          </table:table-cell>
          <table:table-cell table:style-name="ce612" table:formula="of:=+[$'FLUJO DE CAJA '.B32]" office:value-type="percentage" office:value="0.15" calcext:value-type="percentage">
            <text:p>15 %</text:p>
          </table:table-cell>
          <table:table-cell table:style-name="ce429"/>
          <table:table-cell table:style-name="ce307" office:value-type="string" calcext:value-type="string">
            <text:p>WACC</text:p>
          </table:table-cell>
          <table:table-cell table:style-name="ce634" table:formula="of:=+[$'FLUJO DE CAJA '.E32]" office:value-type="percentage" office:value="0.197079016694989" calcext:value-type="percentage">
            <text:p>19.71 %</text:p>
          </table:table-cell>
          <table:table-cell table:style-name="ce636"/>
          <table:table-cell table:style-name="ce429"/>
          <table:table-cell table:number-columns-repeated="2"/>
          <table:table-cell table:style-name="ce307" office:value-type="string" calcext:value-type="string">
            <text:p>TASA DE DESCUENTO</text:p>
          </table:table-cell>
          <table:table-cell table:style-name="ce612" table:formula="of:=+[.S28]" office:value-type="percentage" office:value="0.15" calcext:value-type="percentage">
            <text:p>15 %</text:p>
          </table:table-cell>
          <table:table-cell table:style-name="ce429"/>
          <table:table-cell table:style-name="ce307" office:value-type="string" calcext:value-type="string">
            <text:p>WACC</text:p>
          </table:table-cell>
          <table:table-cell table:style-name="ce634" table:formula="of:=+[.V28]" office:value-type="percentage" office:value="0.197079016694989" calcext:value-type="percentage">
            <text:p>19.71 %</text:p>
          </table:table-cell>
          <table:table-cell table:style-name="ce636"/>
          <table:table-cell table:style-name="ce429"/>
          <table:table-cell table:number-columns-repeated="2"/>
          <table:table-cell table:style-name="ce307" office:value-type="string" calcext:value-type="string">
            <text:p>TASA DE DESCUENTO</text:p>
          </table:table-cell>
          <table:table-cell table:style-name="ce612" table:formula="of:=+[.AB28]" office:value-type="percentage" office:value="0.15" calcext:value-type="percentage">
            <text:p>15 %</text:p>
          </table:table-cell>
          <table:table-cell table:style-name="ce429"/>
          <table:table-cell table:style-name="ce307" office:value-type="string" calcext:value-type="string">
            <text:p>WACC</text:p>
          </table:table-cell>
          <table:table-cell table:style-name="ce634" table:formula="of:=+[.AE28]" office:value-type="percentage" office:value="0.197079016694989" calcext:value-type="percentage">
            <text:p>19.71 %</text:p>
          </table:table-cell>
          <table:table-cell table:style-name="ce636"/>
          <table:table-cell table:style-name="ce429"/>
          <table:table-cell table:number-columns-repeated="2"/>
          <table:table-cell table:style-name="ce307" office:value-type="string" calcext:value-type="string">
            <text:p>TASA DE DESCUENTO</text:p>
          </table:table-cell>
          <table:table-cell table:style-name="ce612" table:formula="of:=+[.AK28]" office:value-type="percentage" office:value="0.15" calcext:value-type="percentage">
            <text:p>15 %</text:p>
          </table:table-cell>
          <table:table-cell table:style-name="ce429"/>
          <table:table-cell table:style-name="ce307" office:value-type="string" calcext:value-type="string">
            <text:p>WACC</text:p>
          </table:table-cell>
          <table:table-cell table:style-name="ce634" table:formula="of:=+[.AN28]" office:value-type="percentage" office:value="0.197079016694989" calcext:value-type="percentage">
            <text:p>19.71 %</text:p>
          </table:table-cell>
          <table:table-cell table:style-name="ce636"/>
          <table:table-cell table:style-name="ce429"/>
          <table:table-cell table:number-columns-repeated="2"/>
          <table:table-cell table:style-name="ce307" office:value-type="string" calcext:value-type="string">
            <text:p>TASA DE DESCUENTO</text:p>
          </table:table-cell>
          <table:table-cell table:style-name="ce612" table:formula="of:=+[.AT28]" office:value-type="percentage" office:value="0.15" calcext:value-type="percentage">
            <text:p>15 %</text:p>
          </table:table-cell>
          <table:table-cell table:style-name="ce429"/>
          <table:table-cell table:style-name="ce307" office:value-type="string" calcext:value-type="string">
            <text:p>WACC</text:p>
          </table:table-cell>
          <table:table-cell table:style-name="ce634" table:formula="of:=+[.AW28]" office:value-type="percentage" office:value="0.197079016694989" calcext:value-type="percentage">
            <text:p>19.71 %</text:p>
          </table:table-cell>
          <table:table-cell table:style-name="ce636"/>
          <table:table-cell table:style-name="ce429"/>
          <table:table-cell table:number-columns-repeated="2"/>
          <table:table-cell table:style-name="ce307" office:value-type="string" calcext:value-type="string">
            <text:p>TASA DE DESCUENTO</text:p>
          </table:table-cell>
          <table:table-cell table:style-name="ce612" table:formula="of:=+[.BC28]" office:value-type="percentage" office:value="0.15" calcext:value-type="percentage">
            <text:p>15 %</text:p>
          </table:table-cell>
          <table:table-cell table:style-name="ce429"/>
          <table:table-cell table:style-name="ce307" office:value-type="string" calcext:value-type="string">
            <text:p>WACC</text:p>
          </table:table-cell>
          <table:table-cell table:style-name="ce634" table:formula="of:=+[.BF28]" office:value-type="percentage" office:value="0.197079016694989" calcext:value-type="percentage">
            <text:p>19.71 %</text:p>
          </table:table-cell>
          <table:table-cell table:style-name="ce636"/>
          <table:table-cell table:style-name="ce429"/>
          <table:table-cell table:number-columns-repeated="2"/>
          <table:table-cell table:style-name="ce307" office:value-type="string" calcext:value-type="string">
            <text:p>TASA DE DESCUENTO</text:p>
          </table:table-cell>
          <table:table-cell table:style-name="ce612" table:formula="of:=+[.BL28]" office:value-type="percentage" office:value="0.15" calcext:value-type="percentage">
            <text:p>15 %</text:p>
          </table:table-cell>
          <table:table-cell table:style-name="ce429"/>
          <table:table-cell table:style-name="ce307" office:value-type="string" calcext:value-type="string">
            <text:p>WACC</text:p>
          </table:table-cell>
          <table:table-cell table:style-name="ce634" table:formula="of:=+[.BO28]" office:value-type="percentage" office:value="0.197079016694989" calcext:value-type="percentage">
            <text:p>19.71 %</text:p>
          </table:table-cell>
          <table:table-cell table:style-name="ce636"/>
          <table:table-cell table:style-name="ce429"/>
          <table:table-cell table:number-columns-repeated="179"/>
        </table:table-row>
        <table:table-row table:style-name="ro21">
          <table:table-cell table:style-name="ce649" office:value-type="float" office:value="1" calcext:value-type="float">
            <text:p>1</text:p>
          </table:table-cell>
          <table:table-cell table:style-name="ce654" table:formula="of:=+[.AL19]" office:value-type="float" office:value="3562.15806325091" calcext:value-type="float">
            <text:p><text:s/>3,562.16 </text:p>
          </table:table-cell>
          <table:table-cell table:style-name="ce657" table:formula="of:=1/(1+[.$B$1])^[.A29]" office:value-type="float" office:value="0.835366743592997" calcext:value-type="float">
            <text:p><text:s/>0.84 </text:p>
          </table:table-cell>
          <table:table-cell table:style-name="ce654" table:formula="of:=[.B29]*[.C29]" office:value-type="float" office:value="2975.70838146145" calcext:value-type="float">
            <text:p><text:s/>2,975.71 </text:p>
          </table:table-cell>
          <table:table-cell table:style-name="ce663"/>
          <table:table-cell table:number-columns-repeated="7"/>
          <table:table-cell table:style-name="ce162" table:formula="of:=+[.M18]" office:value-type="float" office:value="2021" calcext:value-type="float">
            <text:p>2021</text:p>
          </table:table-cell>
          <table:table-cell table:style-name="ce679" table:formula="of:=+[.N6]*[.$N$26]" office:value-type="float" office:value="3096.41462850315" calcext:value-type="float">
            <text:p>3096.41</text:p>
          </table:table-cell>
          <table:table-cell table:style-name="ce679" table:formula="of:=+[.O6]*[.$O$26]" office:value-type="float" office:value="18" calcext:value-type="float">
            <text:p>18.00</text:p>
          </table:table-cell>
          <table:table-cell table:style-name="ce679" table:formula="of:=[.N29]*[.O29]" office:value-type="float" office:value="55735.4633130567" calcext:value-type="float">
            <text:p>55735.46</text:p>
          </table:table-cell>
          <table:table-cell/>
          <table:table-cell table:style-name="ce429"/>
          <table:table-cell table:style-name="ce610"/>
          <table:table-cell table:style-name="ce429" table:number-columns-repeated="2"/>
          <table:table-cell table:style-name="ce460"/>
          <table:table-cell table:style-name="ce429" table:number-columns-repeated="2"/>
          <table:table-cell table:number-columns-repeated="2"/>
          <table:table-cell table:style-name="ce429"/>
          <table:table-cell table:style-name="ce610"/>
          <table:table-cell table:style-name="ce429" table:number-columns-repeated="2"/>
          <table:table-cell table:style-name="ce460"/>
          <table:table-cell table:style-name="ce429" table:number-columns-repeated="2"/>
          <table:table-cell table:number-columns-repeated="2"/>
          <table:table-cell table:style-name="ce429"/>
          <table:table-cell table:style-name="ce610"/>
          <table:table-cell table:style-name="ce429" table:number-columns-repeated="2"/>
          <table:table-cell table:style-name="ce460"/>
          <table:table-cell table:style-name="ce429" table:number-columns-repeated="2"/>
          <table:table-cell table:number-columns-repeated="2"/>
          <table:table-cell table:style-name="ce429"/>
          <table:table-cell table:style-name="ce610"/>
          <table:table-cell table:style-name="ce429" table:number-columns-repeated="2"/>
          <table:table-cell table:style-name="ce460"/>
          <table:table-cell table:style-name="ce429" table:number-columns-repeated="2"/>
          <table:table-cell table:number-columns-repeated="2"/>
          <table:table-cell table:style-name="ce429"/>
          <table:table-cell table:style-name="ce610"/>
          <table:table-cell table:style-name="ce429" table:number-columns-repeated="2"/>
          <table:table-cell table:style-name="ce460"/>
          <table:table-cell table:style-name="ce429" table:number-columns-repeated="2"/>
          <table:table-cell table:number-columns-repeated="2"/>
          <table:table-cell table:style-name="ce429"/>
          <table:table-cell table:style-name="ce610"/>
          <table:table-cell table:style-name="ce429" table:number-columns-repeated="2"/>
          <table:table-cell table:style-name="ce460"/>
          <table:table-cell table:style-name="ce429" table:number-columns-repeated="2"/>
          <table:table-cell table:number-columns-repeated="2"/>
          <table:table-cell table:style-name="ce429"/>
          <table:table-cell table:style-name="ce610"/>
          <table:table-cell table:style-name="ce429" table:number-columns-repeated="2"/>
          <table:table-cell table:style-name="ce460"/>
          <table:table-cell table:style-name="ce429" table:number-columns-repeated="2"/>
          <table:table-cell table:number-columns-repeated="179"/>
        </table:table-row>
        <table:table-row table:style-name="ro21">
          <table:table-cell table:style-name="ce649" office:value-type="float" office:value="2" calcext:value-type="float">
            <text:p>2</text:p>
          </table:table-cell>
          <table:table-cell table:style-name="ce654" table:formula="of:=+[.AM19]" office:value-type="float" office:value="41637.3304299337" calcext:value-type="float">
            <text:p><text:s/>41,637.33 </text:p>
          </table:table-cell>
          <table:table-cell table:style-name="ce657" table:formula="of:=1/(1+[.$B$1])^[.A30]" office:value-type="float" office:value="0.697837596301168" calcext:value-type="float">
            <text:p><text:s/>0.70 </text:p>
          </table:table-cell>
          <table:table-cell table:style-name="ce654" table:formula="of:=[.B30]*[.C30]" office:value-type="float" office:value="29056.0945836224" calcext:value-type="float">
            <text:p><text:s/>29,056.09 </text:p>
          </table:table-cell>
          <table:table-cell table:style-name="ce663"/>
          <table:table-cell table:number-columns-repeated="7"/>
          <table:table-cell table:style-name="ce162" table:formula="of:=+[.M19]" office:value-type="float" office:value="2022" calcext:value-type="float">
            <text:p>2022</text:p>
          </table:table-cell>
          <table:table-cell table:style-name="ce679" table:formula="of:=+[.N7]*[.$N$26]" office:value-type="float" office:value="10299.3264" calcext:value-type="float">
            <text:p>10299.33</text:p>
          </table:table-cell>
          <table:table-cell table:style-name="ce679" table:formula="of:=+[.O7]*[.$O$26]" office:value-type="float" office:value="18" calcext:value-type="float">
            <text:p>18.00</text:p>
          </table:table-cell>
          <table:table-cell table:style-name="ce679" table:formula="of:=[.N30]*[.O30]" office:value-type="float" office:value="185387.8752" calcext:value-type="float">
            <text:p>185387.88</text:p>
          </table:table-cell>
          <table:table-cell/>
          <table:table-cell table:style-name="ce307" office:value-type="string" calcext:value-type="string">
            <text:p>VANE</text:p>
          </table:table-cell>
          <table:table-cell table:style-name="ce613" table:formula="of:=NPV([.V28];[.T19:.X19])+[.S19]" office:value-type="float" office:value="48148.9075514026" calcext:value-type="float">
            <text:p>S/. 48,148.91</text:p>
          </table:table-cell>
          <table:table-cell table:style-name="ce630"/>
          <table:table-cell table:style-name="ce633" table:number-columns-repeated="2"/>
          <table:table-cell table:style-name="ce637"/>
          <table:table-cell table:style-name="ce636"/>
          <table:table-cell table:number-columns-repeated="2"/>
          <table:table-cell table:style-name="ce307" office:value-type="string" calcext:value-type="string">
            <text:p>VANE</text:p>
          </table:table-cell>
          <table:table-cell table:style-name="ce613" table:formula="of:=NPV([.AE28];[.AC19:.AG19])+[.AB19]" office:value-type="float" office:value="23165.6607950214" calcext:value-type="float">
            <text:p>S/. 23,165.66</text:p>
          </table:table-cell>
          <table:table-cell table:style-name="ce630"/>
          <table:table-cell table:style-name="ce633" table:number-columns-repeated="2"/>
          <table:table-cell table:style-name="ce637"/>
          <table:table-cell table:style-name="ce636"/>
          <table:table-cell table:number-columns-repeated="2"/>
          <table:table-cell table:style-name="ce307" office:value-type="string" calcext:value-type="string">
            <text:p>VANE</text:p>
          </table:table-cell>
          <table:table-cell table:style-name="ce613" table:formula="of:=NPV([.AN28];[.AL19:.AP19])+[.AK19]" office:value-type="float" office:value="-1817.5859613597" calcext:value-type="float">
            <text:p>-S/. 1,817.59</text:p>
          </table:table-cell>
          <table:table-cell table:style-name="ce630"/>
          <table:table-cell table:style-name="ce633" table:number-columns-repeated="2"/>
          <table:table-cell table:style-name="ce637"/>
          <table:table-cell table:style-name="ce636"/>
          <table:table-cell table:number-columns-repeated="2"/>
          <table:table-cell table:style-name="ce307" office:value-type="string" calcext:value-type="string">
            <text:p>VANE</text:p>
          </table:table-cell>
          <table:table-cell table:style-name="ce613" table:formula="of:=NPV([.AW28];[.AU19:.AY19])+[.AT19]" office:value-type="float" office:value="-26800.8327177409" calcext:value-type="float">
            <text:p>-S/. 26,800.83</text:p>
          </table:table-cell>
          <table:table-cell table:style-name="ce630"/>
          <table:table-cell table:style-name="ce633" table:number-columns-repeated="2"/>
          <table:table-cell table:style-name="ce637"/>
          <table:table-cell table:style-name="ce636"/>
          <table:table-cell table:number-columns-repeated="2"/>
          <table:table-cell table:style-name="ce307" office:value-type="string" calcext:value-type="string">
            <text:p>VANE</text:p>
          </table:table-cell>
          <table:table-cell table:style-name="ce613" table:formula="of:=NPV([.BF28];[.BD19:.BH19])+[.BC19]" office:value-type="float" office:value="33158.9594975739" calcext:value-type="float">
            <text:p>S/. 33,158.96</text:p>
          </table:table-cell>
          <table:table-cell table:style-name="ce630"/>
          <table:table-cell table:style-name="ce633" table:number-columns-repeated="2"/>
          <table:table-cell table:style-name="ce637"/>
          <table:table-cell table:style-name="ce636"/>
          <table:table-cell table:number-columns-repeated="2"/>
          <table:table-cell table:style-name="ce307" office:value-type="string" calcext:value-type="string">
            <text:p>VANE</text:p>
          </table:table-cell>
          <table:table-cell table:style-name="ce613" table:formula="of:=NPV([.BO28];[.BM19:.BQ19])+[.BL19]" office:value-type="float" office:value="8175.71274119284" calcext:value-type="float">
            <text:p>S/. 8,175.71</text:p>
          </table:table-cell>
          <table:table-cell table:style-name="ce630"/>
          <table:table-cell table:style-name="ce633" table:number-columns-repeated="2"/>
          <table:table-cell table:style-name="ce637"/>
          <table:table-cell table:style-name="ce636"/>
          <table:table-cell table:number-columns-repeated="2"/>
          <table:table-cell table:style-name="ce307" office:value-type="string" calcext:value-type="string">
            <text:p>VANE</text:p>
          </table:table-cell>
          <table:table-cell table:style-name="ce613" table:formula="of:=NPV([.BX28];[.BV19:.BZ19])+[.BU19]" office:value-type="float" office:value="-31797.4820690172" calcext:value-type="float">
            <text:p>-S/. 31,797.48</text:p>
          </table:table-cell>
          <table:table-cell table:style-name="ce630"/>
          <table:table-cell table:style-name="ce633" table:number-columns-repeated="2"/>
          <table:table-cell table:style-name="ce637"/>
          <table:table-cell table:style-name="ce636"/>
          <table:table-cell table:number-columns-repeated="179"/>
        </table:table-row>
        <table:table-row table:style-name="ro21">
          <table:table-cell table:style-name="ce649" office:value-type="float" office:value="3" calcext:value-type="float">
            <text:p>3</text:p>
          </table:table-cell>
          <table:table-cell table:style-name="ce654" table:formula="of:=+[.AN19]" office:value-type="float" office:value="41432.0482263657" calcext:value-type="float">
            <text:p><text:s/>41,432.05 </text:p>
          </table:table-cell>
          <table:table-cell table:style-name="ce657" table:formula="of:=1/(1+[.$B$1])^[.A31]" office:value-type="float" office:value="0.582950320378872" calcext:value-type="float">
            <text:p><text:s/>0.58 </text:p>
          </table:table-cell>
          <table:table-cell table:style-name="ce654" table:formula="of:=[.B31]*[.C31]" office:value-type="float" office:value="24152.8257875127" calcext:value-type="float">
            <text:p><text:s/>24,152.83 </text:p>
          </table:table-cell>
          <table:table-cell table:style-name="ce663"/>
          <table:table-cell table:number-columns-repeated="7"/>
          <table:table-cell table:style-name="ce162" table:formula="of:=+[.M20]" office:value-type="float" office:value="2023" calcext:value-type="float">
            <text:p>2023</text:p>
          </table:table-cell>
          <table:table-cell table:style-name="ce679" table:formula="of:=+[.N8]*[.$N$26]" office:value-type="float" office:value="10299.3264" calcext:value-type="float">
            <text:p>10299.33</text:p>
          </table:table-cell>
          <table:table-cell table:style-name="ce679" table:formula="of:=+[.O8]*[.$O$26]" office:value-type="float" office:value="18" calcext:value-type="float">
            <text:p>18.00</text:p>
          </table:table-cell>
          <table:table-cell table:style-name="ce679" table:formula="of:=[.N31]*[.O31]" office:value-type="float" office:value="185387.8752" calcext:value-type="float">
            <text:p>185387.88</text:p>
          </table:table-cell>
          <table:table-cell/>
          <table:table-cell table:style-name="ce307" office:value-type="string" calcext:value-type="string">
            <text:p>VANF</text:p>
          </table:table-cell>
          <table:table-cell table:style-name="ce613" table:formula="of:=+[.S23]+NPV([.S27];[.T23:.X23])" office:value-type="float" office:value="46905.6598400896" calcext:value-type="float">
            <text:p>S/. 46,905.66</text:p>
          </table:table-cell>
          <table:table-cell table:style-name="ce630"/>
          <table:table-cell table:style-name="ce429" table:number-columns-repeated="4"/>
          <table:table-cell table:number-columns-repeated="2"/>
          <table:table-cell table:style-name="ce307" office:value-type="string" calcext:value-type="string">
            <text:p>VANF</text:p>
          </table:table-cell>
          <table:table-cell table:style-name="ce613" table:formula="of:=+[.AB23]+NPV([.AB27];[.AC23:.AG23])" office:value-type="float" office:value="22106.7957515221" calcext:value-type="float">
            <text:p>S/. 22,106.80</text:p>
          </table:table-cell>
          <table:table-cell table:style-name="ce630"/>
          <table:table-cell table:style-name="ce429" table:number-columns-repeated="4"/>
          <table:table-cell table:number-columns-repeated="2"/>
          <table:table-cell table:style-name="ce307" office:value-type="string" calcext:value-type="string">
            <text:p>VANF</text:p>
          </table:table-cell>
          <table:table-cell table:style-name="ce613" table:formula="of:=+[.AK23]+NPV([.AK27];[.AL23:.AP23])" office:value-type="float" office:value="-2692.06833704526" calcext:value-type="float">
            <text:p>-S/. 2,692.07</text:p>
          </table:table-cell>
          <table:table-cell table:style-name="ce630"/>
          <table:table-cell table:style-name="ce429" table:number-columns-repeated="4"/>
          <table:table-cell table:number-columns-repeated="2"/>
          <table:table-cell table:style-name="ce307" office:value-type="string" calcext:value-type="string">
            <text:p>VANF</text:p>
          </table:table-cell>
          <table:table-cell table:style-name="ce613" table:formula="of:=+[.AT23]+NPV([.AT27];[.AU23:.AY23])" office:value-type="float" office:value="-27490.9324256128" calcext:value-type="float">
            <text:p>-S/. 27,490.93</text:p>
          </table:table-cell>
          <table:table-cell table:style-name="ce630"/>
          <table:table-cell table:style-name="ce429" table:number-columns-repeated="4"/>
          <table:table-cell table:number-columns-repeated="2"/>
          <table:table-cell table:style-name="ce307" office:value-type="string" calcext:value-type="string">
            <text:p>VANF</text:p>
          </table:table-cell>
          <table:table-cell table:style-name="ce613" table:formula="of:=+[.BC23]+NPV([.BC27];[.BD23:.BH23])" office:value-type="float" office:value="32026.3413869491" calcext:value-type="float">
            <text:p>S/. 32,026.34</text:p>
          </table:table-cell>
          <table:table-cell table:style-name="ce630"/>
          <table:table-cell table:style-name="ce429" table:number-columns-repeated="4"/>
          <table:table-cell table:number-columns-repeated="2"/>
          <table:table-cell table:style-name="ce307" office:value-type="string" calcext:value-type="string">
            <text:p>VANF</text:p>
          </table:table-cell>
          <table:table-cell table:style-name="ce613" table:formula="of:=+[.BL23]+NPV([.BL27];[.BM23:.BQ23])" office:value-type="float" office:value="7227.47729838177" calcext:value-type="float">
            <text:p>S/. 7,227.48</text:p>
          </table:table-cell>
          <table:table-cell table:style-name="ce630"/>
          <table:table-cell table:style-name="ce429" table:number-columns-repeated="4"/>
          <table:table-cell table:number-columns-repeated="2"/>
          <table:table-cell table:style-name="ce307" office:value-type="string" calcext:value-type="string">
            <text:p>VANF</text:p>
          </table:table-cell>
          <table:table-cell table:style-name="ce613" table:formula="of:=+[.BU23]+NPV([.BU27];[.BV23:.BZ23])" office:value-type="float" office:value="-32450.7052433263" calcext:value-type="float">
            <text:p>-S/. 32,450.71</text:p>
          </table:table-cell>
          <table:table-cell table:style-name="ce630"/>
          <table:table-cell table:style-name="ce429" table:number-columns-repeated="4"/>
          <table:table-cell table:number-columns-repeated="179"/>
        </table:table-row>
        <table:table-row table:style-name="ro21">
          <table:table-cell table:style-name="ce649" office:value-type="float" office:value="4" calcext:value-type="float">
            <text:p>4</text:p>
          </table:table-cell>
          <table:table-cell table:style-name="ce654" table:formula="of:=+[.AO19]" office:value-type="float" office:value="41185.709582084" calcext:value-type="float">
            <text:p><text:s/>41,185.71 </text:p>
          </table:table-cell>
          <table:table-cell table:style-name="ce657" table:formula="of:=1/(1+[.$B$1])^[.A32]" office:value-type="float" office:value="0.486977310811392" calcext:value-type="float">
            <text:p><text:s/>0.49 </text:p>
          </table:table-cell>
          <table:table-cell table:style-name="ce654" table:formula="of:=[.B32]*[.C32]" office:value-type="float" office:value="20056.5060961423" calcext:value-type="float">
            <text:p><text:s/>20,056.51 </text:p>
          </table:table-cell>
          <table:table-cell table:style-name="ce663"/>
          <table:table-cell table:number-columns-repeated="7"/>
          <table:table-cell table:style-name="ce162" table:formula="of:=+[.M21]" office:value-type="float" office:value="2024" calcext:value-type="float">
            <text:p>2024</text:p>
          </table:table-cell>
          <table:table-cell table:style-name="ce679" table:formula="of:=+[.N9]*[.$N$26]" office:value-type="float" office:value="10299.3264" calcext:value-type="float">
            <text:p>10299.33</text:p>
          </table:table-cell>
          <table:table-cell table:style-name="ce679" table:formula="of:=+[.O9]*[.$O$26]" office:value-type="float" office:value="18" calcext:value-type="float">
            <text:p>18.00</text:p>
          </table:table-cell>
          <table:table-cell table:style-name="ce679" table:formula="of:=[.N32]*[.O32]" office:value-type="float" office:value="185387.8752" calcext:value-type="float">
            <text:p>185387.88</text:p>
          </table:table-cell>
          <table:table-cell/>
          <table:table-cell table:style-name="ce307" office:value-type="string" calcext:value-type="string">
            <text:p>TIRE</text:p>
          </table:table-cell>
          <table:table-cell table:style-name="ce614" table:formula="of:=IRR([.S19:.X19])" office:value-type="percentage" office:value="0.287949370314758" calcext:value-type="percentage">
            <text:p>28.79 %</text:p>
          </table:table-cell>
          <table:table-cell table:style-name="ce429"/>
          <table:table-cell table:style-name="ce460"/>
          <table:table-cell table:style-name="ce635"/>
          <table:table-cell table:style-name="ce429" table:number-columns-repeated="2"/>
          <table:table-cell table:number-columns-repeated="2"/>
          <table:table-cell table:style-name="ce307" office:value-type="string" calcext:value-type="string">
            <text:p>TIRE</text:p>
          </table:table-cell>
          <table:table-cell table:style-name="ce614" table:formula="of:=IRR([.AB19:.AG19])" office:value-type="percentage" office:value="0.241439062973548" calcext:value-type="percentage">
            <text:p>24.14 %</text:p>
          </table:table-cell>
          <table:table-cell table:style-name="ce429"/>
          <table:table-cell table:style-name="ce460"/>
          <table:table-cell table:style-name="ce635"/>
          <table:table-cell table:style-name="ce429" table:number-columns-repeated="2"/>
          <table:table-cell table:number-columns-repeated="2"/>
          <table:table-cell table:style-name="ce307" office:value-type="string" calcext:value-type="string">
            <text:p>TIRE</text:p>
          </table:table-cell>
          <table:table-cell table:style-name="ce614" table:formula="of:=IRR([.AK19:.AP19])" office:value-type="percentage" office:value="0.193545269634675" calcext:value-type="percentage">
            <text:p>19.35 %</text:p>
          </table:table-cell>
          <table:table-cell table:style-name="ce429"/>
          <table:table-cell table:style-name="ce460"/>
          <table:table-cell table:style-name="ce635"/>
          <table:table-cell table:style-name="ce429" table:number-columns-repeated="2"/>
          <table:table-cell table:number-columns-repeated="2"/>
          <table:table-cell table:style-name="ce307" office:value-type="string" calcext:value-type="string">
            <text:p>TIRE</text:p>
          </table:table-cell>
          <table:table-cell table:style-name="ce614" table:formula="of:=IRR([.AT19:.AY19])" office:value-type="percentage" office:value="0.14414031202421" calcext:value-type="percentage">
            <text:p>14.41 %</text:p>
          </table:table-cell>
          <table:table-cell table:style-name="ce429"/>
          <table:table-cell table:style-name="ce460"/>
          <table:table-cell table:style-name="ce635"/>
          <table:table-cell table:style-name="ce429" table:number-columns-repeated="2"/>
          <table:table-cell table:number-columns-repeated="2"/>
          <table:table-cell table:style-name="ce307" office:value-type="string" calcext:value-type="string">
            <text:p>TIRE</text:p>
          </table:table-cell>
          <table:table-cell table:style-name="ce614" table:formula="of:=IRR([.BC19:.BH19])" office:value-type="percentage" office:value="0.260202423100335" calcext:value-type="percentage">
            <text:p>26.02 %</text:p>
          </table:table-cell>
          <table:table-cell table:style-name="ce429"/>
          <table:table-cell table:style-name="ce460"/>
          <table:table-cell table:style-name="ce635"/>
          <table:table-cell table:style-name="ce429" table:number-columns-repeated="2"/>
          <table:table-cell table:number-columns-repeated="2"/>
          <table:table-cell table:style-name="ce307" office:value-type="string" calcext:value-type="string">
            <text:p>TIRE</text:p>
          </table:table-cell>
          <table:table-cell table:style-name="ce614" table:formula="of:=IRR([.BL19:.BQ19])" office:value-type="percentage" office:value="0.212876734299591" calcext:value-type="percentage">
            <text:p>21.29 %</text:p>
          </table:table-cell>
          <table:table-cell table:style-name="ce429"/>
          <table:table-cell table:style-name="ce460"/>
          <table:table-cell table:style-name="ce635"/>
          <table:table-cell table:style-name="ce429" table:number-columns-repeated="2"/>
          <table:table-cell table:number-columns-repeated="2"/>
          <table:table-cell table:style-name="ce307" office:value-type="string" calcext:value-type="string">
            <text:p>TIRE</text:p>
          </table:table-cell>
          <table:table-cell table:style-name="ce614" table:formula="of:=IRR([.BU19:.BZ19])" office:value-type="percentage" office:value="0.134066014887296" calcext:value-type="percentage">
            <text:p>13.41 %</text:p>
          </table:table-cell>
          <table:table-cell table:style-name="ce429"/>
          <table:table-cell table:style-name="ce460"/>
          <table:table-cell table:style-name="ce635"/>
          <table:table-cell table:style-name="ce429" table:number-columns-repeated="2"/>
          <table:table-cell table:number-columns-repeated="179"/>
        </table:table-row>
        <table:table-row table:style-name="ro21">
          <table:table-cell table:style-name="ce649" office:value-type="float" office:value="5" calcext:value-type="float">
            <text:p>5</text:p>
          </table:table-cell>
          <table:table-cell table:style-name="ce654" table:formula="of:=+[.AP19]" office:value-type="float" office:value="195234.971305031" calcext:value-type="float">
            <text:p><text:s/>195,234.97 </text:p>
          </table:table-cell>
          <table:table-cell table:style-name="ce657" table:formula="of:=1/(1+[.$B$1])^[.A33]" office:value-type="float" office:value="0.406804650336188" calcext:value-type="float">
            <text:p><text:s/>0.41 </text:p>
          </table:table-cell>
          <table:table-cell table:style-name="ce654" table:formula="of:=[.B33]*[.C33]" office:value-type="float" office:value="79422.4942351386" calcext:value-type="float">
            <text:p><text:s/>79,422.49 </text:p>
          </table:table-cell>
          <table:table-cell table:style-name="ce663"/>
          <table:table-cell table:number-columns-repeated="7"/>
          <table:table-cell table:style-name="ce162" table:formula="of:=+[.M22]" office:value-type="float" office:value="2025" calcext:value-type="float">
            <text:p>2025</text:p>
          </table:table-cell>
          <table:table-cell table:style-name="ce679" table:formula="of:=+[.N10]*[.$N$26]" office:value-type="float" office:value="10299.3264" calcext:value-type="float">
            <text:p>10299.33</text:p>
          </table:table-cell>
          <table:table-cell table:style-name="ce679" table:formula="of:=+[.O10]*[.$O$26]" office:value-type="float" office:value="18" calcext:value-type="float">
            <text:p>18.00</text:p>
          </table:table-cell>
          <table:table-cell table:style-name="ce679" table:formula="of:=[.N33]*[.O33]" office:value-type="float" office:value="185387.8752" calcext:value-type="float">
            <text:p>185387.88</text:p>
          </table:table-cell>
          <table:table-cell/>
          <table:table-cell table:style-name="ce307" office:value-type="string" calcext:value-type="string">
            <text:p>TIRF</text:p>
          </table:table-cell>
          <table:table-cell table:style-name="ce614" table:formula="of:=IRR([.S23:.X23])" office:value-type="percentage" office:value="0.290043147946908" calcext:value-type="percentage">
            <text:p>29.00 %</text:p>
          </table:table-cell>
          <table:table-cell table:style-name="ce429"/>
          <table:table-cell table:style-name="ce460"/>
          <table:table-cell table:style-name="ce429" table:number-columns-repeated="3"/>
          <table:table-cell table:number-columns-repeated="2"/>
          <table:table-cell table:style-name="ce307" office:value-type="string" calcext:value-type="string">
            <text:p>TIRF</text:p>
          </table:table-cell>
          <table:table-cell table:style-name="ce614" table:formula="of:=IRR([.AB23:.AG23])" office:value-type="percentage" office:value="0.243043134604749" calcext:value-type="percentage">
            <text:p>24.30 %</text:p>
          </table:table-cell>
          <table:table-cell table:style-name="ce429"/>
          <table:table-cell table:style-name="ce460"/>
          <table:table-cell table:style-name="ce429" table:number-columns-repeated="3"/>
          <table:table-cell table:number-columns-repeated="2"/>
          <table:table-cell table:style-name="ce307" office:value-type="string" calcext:value-type="string">
            <text:p>TIRF</text:p>
          </table:table-cell>
          <table:table-cell table:style-name="ce614" table:formula="of:=IRR([.AK23:.AP23])" office:value-type="percentage" office:value="0.194680310137573" calcext:value-type="percentage">
            <text:p>19.47 %</text:p>
          </table:table-cell>
          <table:table-cell table:style-name="ce429"/>
          <table:table-cell table:style-name="ce460"/>
          <table:table-cell table:style-name="ce429" table:number-columns-repeated="3"/>
          <table:table-cell table:number-columns-repeated="2"/>
          <table:table-cell table:style-name="ce307" office:value-type="string" calcext:value-type="string">
            <text:p>TIRF</text:p>
          </table:table-cell>
          <table:table-cell table:style-name="ce614" table:formula="of:=IRR([.AT23:.AY23])" office:value-type="percentage" office:value="0.144831717522157" calcext:value-type="percentage">
            <text:p>14.48 %</text:p>
          </table:table-cell>
          <table:table-cell table:style-name="ce429"/>
          <table:table-cell table:style-name="ce460"/>
          <table:table-cell table:style-name="ce429" table:number-columns-repeated="3"/>
          <table:table-cell table:number-columns-repeated="2"/>
          <table:table-cell table:style-name="ce307" office:value-type="string" calcext:value-type="string">
            <text:p>TIRF</text:p>
          </table:table-cell>
          <table:table-cell table:style-name="ce614" table:formula="of:=IRR([.BC23:.BH23])" office:value-type="percentage" office:value="0.262000127374852" calcext:value-type="percentage">
            <text:p>26.20 %</text:p>
          </table:table-cell>
          <table:table-cell table:style-name="ce429"/>
          <table:table-cell table:style-name="ce460"/>
          <table:table-cell table:style-name="ce429" table:number-columns-repeated="3"/>
          <table:table-cell table:number-columns-repeated="2"/>
          <table:table-cell table:style-name="ce307" office:value-type="string" calcext:value-type="string">
            <text:p>TIRF</text:p>
          </table:table-cell>
          <table:table-cell table:style-name="ce614" table:formula="of:=IRR([.BL23:.BQ23])" office:value-type="percentage" office:value="0.214196627086274" calcext:value-type="percentage">
            <text:p>21.42 %</text:p>
          </table:table-cell>
          <table:table-cell table:style-name="ce429"/>
          <table:table-cell table:style-name="ce460"/>
          <table:table-cell table:style-name="ce429" table:number-columns-repeated="3"/>
          <table:table-cell table:number-columns-repeated="2"/>
          <table:table-cell table:style-name="ce307" office:value-type="string" calcext:value-type="string">
            <text:p>TIRF</text:p>
          </table:table-cell>
          <table:table-cell table:style-name="ce614" table:formula="of:=IRR([.BU23:.BZ23])" office:value-type="percentage" office:value="0.134672233009847" calcext:value-type="percentage">
            <text:p>13.47 %</text:p>
          </table:table-cell>
          <table:table-cell table:style-name="ce429"/>
          <table:table-cell table:style-name="ce460"/>
          <table:table-cell table:style-name="ce429" table:number-columns-repeated="3"/>
          <table:table-cell table:number-columns-repeated="179"/>
        </table:table-row>
        <table:table-row table:style-name="ro29">
          <table:table-cell table:style-name="ce650" office:value-type="string" calcext:value-type="string" table:number-columns-spanned="3" table:number-rows-spanned="1">
            <text:p>VANE</text:p>
          </table:table-cell>
          <table:covered-table-cell table:number-columns-repeated="2" table:style-name="ce650"/>
          <table:table-cell table:style-name="ce658" table:formula="of:=SUM([.D28:.D33])" office:value-type="float" office:value="-1817.58596135971" calcext:value-type="float">
            <text:p><text:s/>(1,817.59)</text:p>
          </table:table-cell>
          <table:table-cell table:style-name="ce655"/>
          <table:table-cell table:number-columns-repeated="12"/>
          <table:table-cell table:style-name="ce429"/>
          <table:table-cell table:style-name="ce616"/>
          <table:table-cell table:style-name="ce429" table:number-columns-repeated="5"/>
          <table:table-cell table:number-columns-repeated="233"/>
        </table:table-row>
        <table:table-row table:style-name="ro29">
          <table:table-cell table:style-name="ce650" office:value-type="string" calcext:value-type="string" table:number-columns-spanned="3" table:number-rows-spanned="1">
            <text:p>TIRE</text:p>
          </table:table-cell>
          <table:covered-table-cell table:number-columns-repeated="2" table:style-name="ce650"/>
          <table:table-cell table:style-name="ce659" table:formula="of:=IRR([.B28:.B33];[.B24])" office:value-type="percentage" office:value="0.193545269634675" calcext:value-type="percentage">
            <text:p>19.35 %</text:p>
          </table:table-cell>
          <table:table-cell table:style-name="ce655"/>
          <table:table-cell table:number-columns-repeated="12"/>
          <table:table-cell table:style-name="ce682" table:number-columns-spanned="1" table:number-rows-spanned="2"/>
          <table:table-cell table:style-name="ce683" table:number-columns-spanned="6" table:number-rows-spanned="1"/>
          <table:covered-table-cell table:number-columns-repeated="5" table:style-name="ce683"/>
          <table:table-cell table:number-columns-repeated="233"/>
        </table:table-row>
        <table:table-row table:style-name="ro21">
          <table:table-cell table:style-name="ce652"/>
          <table:table-cell table:style-name="ce656" table:number-columns-repeated="3"/>
          <table:table-cell table:style-name="ce655"/>
          <table:table-cell table:number-columns-repeated="12"/>
          <table:covered-table-cell table:style-name="ce682"/>
          <table:table-cell table:style-name="ce684"/>
          <table:table-cell table:style-name="ce683" table:number-columns-repeated="5"/>
          <table:table-cell table:number-columns-repeated="233"/>
        </table:table-row>
        <table:table-row table:style-name="ro8">
          <table:table-cell table:style-name="ce651" office:value-type="string" calcext:value-type="string" table:number-columns-spanned="3" table:number-rows-spanned="1">
            <text:p>Caida de la produccion en</text:p>
          </table:table-cell>
          <table:covered-table-cell table:number-columns-repeated="2" table:style-name="ce651"/>
          <table:table-cell table:style-name="ce660" office:value-type="percentage" office:value="0.15" calcext:value-type="percentage">
            <text:p>15 %</text:p>
          </table:table-cell>
          <table:table-cell table:style-name="ce655"/>
          <table:table-cell table:number-columns-repeated="8"/>
          <table:table-cell table:style-name="ce680" table:formula="of:=+[.N3]-[.D37]" office:value-type="percentage" office:value="0.85" calcext:value-type="percentage">
            <text:p>85 %</text:p>
          </table:table-cell>
          <table:table-cell table:style-name="ce680" table:formula="of:=+[.O3]" office:value-type="percentage" office:value="1" calcext:value-type="percentage">
            <text:p>100 %</text:p>
          </table:table-cell>
          <table:table-cell table:number-columns-repeated="2"/>
          <table:table-cell table:style-name="ce429"/>
          <table:table-cell table:style-name="ce621"/>
          <table:table-cell table:style-name="ce428" table:number-columns-repeated="5"/>
          <table:table-cell table:number-columns-repeated="233"/>
        </table:table-row>
        <table:table-row table:style-name="ro29">
          <table:table-cell table:style-name="ce441" office:value-type="string" calcext:value-type="string">
            <text:p>AÑO</text:p>
          </table:table-cell>
          <table:table-cell table:style-name="ce441" office:value-type="string" calcext:value-type="string">
            <text:p>FCE</text:p>
          </table:table-cell>
          <table:table-cell table:style-name="ce441" office:value-type="string" calcext:value-type="string">
            <text:p>FA</text:p>
          </table:table-cell>
          <table:table-cell table:style-name="ce441" office:value-type="string" calcext:value-type="string">
            <text:p>VAN</text:p>
          </table:table-cell>
          <table:table-cell table:style-name="ce655"/>
          <table:table-cell table:number-columns-repeated="7"/>
          <table:table-cell table:style-name="ce165" office:value-type="string" calcext:value-type="string" table:number-columns-spanned="1" table:number-rows-spanned="2">
            <text:p>Años</text:p>
          </table:table-cell>
          <table:table-cell table:style-name="ce165" office:value-type="string" calcext:value-type="string" table:number-columns-spanned="1" table:number-rows-spanned="2">
            <text:p>Produccion (UND.)</text:p>
          </table:table-cell>
          <table:table-cell table:style-name="ce165" office:value-type="string" calcext:value-type="string" table:number-columns-spanned="1" table:number-rows-spanned="2">
            <text:p>Precio por Und (S/.)</text:p>
          </table:table-cell>
          <table:table-cell table:style-name="ce165" office:value-type="string" calcext:value-type="string" table:number-columns-spanned="1" table:number-rows-spanned="2">
            <text:p>Ventas proyectadas (S/.)</text:p>
          </table:table-cell>
          <table:table-cell/>
          <table:table-cell table:style-name="ce429"/>
          <table:table-cell table:style-name="ce685"/>
          <table:table-cell table:style-name="ce428" table:number-columns-repeated="5"/>
          <table:table-cell table:number-columns-repeated="233"/>
        </table:table-row>
        <table:table-row table:style-name="ro21">
          <table:table-cell table:style-name="ce649" office:value-type="float" office:value="0" calcext:value-type="float">
            <text:p>0</text:p>
          </table:table-cell>
          <table:table-cell table:style-name="ce654" table:formula="of:=+[.AT19]" office:value-type="float" office:value="-157481.215045237" calcext:value-type="float">
            <text:p><text:s/>(157,481.22)</text:p>
          </table:table-cell>
          <table:table-cell table:style-name="ce657" table:formula="of:=1/(1+[.$B$1])^[.A39]" office:value-type="float" office:value="1" calcext:value-type="float">
            <text:p><text:s/>1.00 </text:p>
          </table:table-cell>
          <table:table-cell table:style-name="ce654" table:formula="of:=[.B39]*[.C39]" office:value-type="float" office:value="-157481.215045237" calcext:value-type="float">
            <text:p><text:s/>(157,481.22)</text:p>
          </table:table-cell>
          <table:table-cell table:style-name="ce655"/>
          <table:table-cell table:number-columns-repeated="7"/>
          <table:covered-table-cell table:number-columns-repeated="4" table:style-name="ce165"/>
          <table:table-cell/>
          <table:table-cell table:style-name="ce429"/>
          <table:table-cell table:style-name="ce686"/>
          <table:table-cell table:style-name="ce691" table:number-columns-repeated="5"/>
          <table:table-cell table:number-columns-repeated="233"/>
        </table:table-row>
        <table:table-row table:style-name="ro21">
          <table:table-cell table:style-name="ce649" office:value-type="float" office:value="1" calcext:value-type="float">
            <text:p>1</text:p>
          </table:table-cell>
          <table:table-cell table:style-name="ce654" table:formula="of:=+[.AU19]" office:value-type="float" office:value="465.743434747754" calcext:value-type="float">
            <text:p><text:s/>465.74 </text:p>
          </table:table-cell>
          <table:table-cell table:style-name="ce657" table:formula="of:=1/(1+[.$B$1])^[.A40]" office:value-type="float" office:value="0.835366743592997" calcext:value-type="float">
            <text:p><text:s/>0.84 </text:p>
          </table:table-cell>
          <table:table-cell table:style-name="ce654" table:formula="of:=[.B40]*[.C40]" office:value-type="float" office:value="389.066576435049" calcext:value-type="float">
            <text:p><text:s/>389.07 </text:p>
          </table:table-cell>
          <table:table-cell table:style-name="ce655"/>
          <table:table-cell table:number-columns-repeated="7"/>
          <table:table-cell table:style-name="ce162" table:formula="of:=+[.M29]" office:value-type="float" office:value="2021" calcext:value-type="float">
            <text:p>2021</text:p>
          </table:table-cell>
          <table:table-cell table:style-name="ce679" table:formula="of:=+[.N6]*[.$N$37]" office:value-type="float" office:value="2924.39159358631" calcext:value-type="float">
            <text:p>2924.39</text:p>
          </table:table-cell>
          <table:table-cell table:style-name="ce679" table:formula="of:=+[.O6]*[.$O$37]" office:value-type="float" office:value="18" calcext:value-type="float">
            <text:p>18.00</text:p>
          </table:table-cell>
          <table:table-cell table:style-name="ce679" table:formula="of:=[.N40]*[.O40]" office:value-type="float" office:value="52639.0486845536" calcext:value-type="float">
            <text:p>52639.05</text:p>
          </table:table-cell>
          <table:table-cell/>
          <table:table-cell table:style-name="ce429"/>
          <table:table-cell table:style-name="ce621"/>
          <table:table-cell table:style-name="ce428" table:number-columns-repeated="5"/>
          <table:table-cell table:number-columns-repeated="233"/>
        </table:table-row>
        <table:table-row table:style-name="ro21">
          <table:table-cell table:style-name="ce649" office:value-type="float" office:value="2" calcext:value-type="float">
            <text:p>2</text:p>
          </table:table-cell>
          <table:table-cell table:style-name="ce654" table:formula="of:=+[.AV19]" office:value-type="float" office:value="31338.0040299337" calcext:value-type="float">
            <text:p><text:s/>31,338.00 </text:p>
          </table:table-cell>
          <table:table-cell table:style-name="ce657" table:formula="of:=1/(1+[.$B$1])^[.A41]" office:value-type="float" office:value="0.697837596301168" calcext:value-type="float">
            <text:p><text:s/>0.70 </text:p>
          </table:table-cell>
          <table:table-cell table:style-name="ce654" table:formula="of:=[.B41]*[.C41]" office:value-type="float" office:value="21868.8374051253" calcext:value-type="float">
            <text:p><text:s/>21,868.84 </text:p>
          </table:table-cell>
          <table:table-cell table:style-name="ce655"/>
          <table:table-cell table:number-columns-repeated="7"/>
          <table:table-cell table:style-name="ce162" table:formula="of:=+[.M30]" office:value-type="float" office:value="2022" calcext:value-type="float">
            <text:p>2022</text:p>
          </table:table-cell>
          <table:table-cell table:style-name="ce679" table:formula="of:=+[.N7]*[.$N$37]" office:value-type="float" office:value="9727.1416" calcext:value-type="float">
            <text:p>9727.14</text:p>
          </table:table-cell>
          <table:table-cell table:style-name="ce679" table:formula="of:=+[.O7]*[.$O$37]" office:value-type="float" office:value="18" calcext:value-type="float">
            <text:p>18.00</text:p>
          </table:table-cell>
          <table:table-cell table:style-name="ce679" table:formula="of:=[.N41]*[.O41]" office:value-type="float" office:value="175088.5488" calcext:value-type="float">
            <text:p>175088.55</text:p>
          </table:table-cell>
          <table:table-cell/>
          <table:table-cell table:style-name="ce429"/>
          <table:table-cell table:style-name="ce621"/>
          <table:table-cell table:style-name="ce428" table:number-columns-repeated="5"/>
          <table:table-cell table:number-columns-repeated="233"/>
        </table:table-row>
        <table:table-row table:style-name="ro21">
          <table:table-cell table:style-name="ce649" office:value-type="float" office:value="3" calcext:value-type="float">
            <text:p>3</text:p>
          </table:table-cell>
          <table:table-cell table:style-name="ce654" table:formula="of:=+[.AW19]" office:value-type="float" office:value="31132.7218263657" calcext:value-type="float">
            <text:p><text:s/>31,132.72 </text:p>
          </table:table-cell>
          <table:table-cell table:style-name="ce657" table:formula="of:=1/(1+[.$B$1])^[.A42]" office:value-type="float" office:value="0.582950320378872" calcext:value-type="float">
            <text:p><text:s/>0.58 </text:p>
          </table:table-cell>
          <table:table-cell table:style-name="ce654" table:formula="of:=[.B42]*[.C42]" office:value-type="float" office:value="18148.8301629461" calcext:value-type="float">
            <text:p><text:s/>18,148.83 </text:p>
          </table:table-cell>
          <table:table-cell table:style-name="ce655"/>
          <table:table-cell table:number-columns-repeated="7"/>
          <table:table-cell table:style-name="ce162" table:formula="of:=+[.M31]" office:value-type="float" office:value="2023" calcext:value-type="float">
            <text:p>2023</text:p>
          </table:table-cell>
          <table:table-cell table:style-name="ce679" table:formula="of:=+[.N8]*[.$N$37]" office:value-type="float" office:value="9727.1416" calcext:value-type="float">
            <text:p>9727.14</text:p>
          </table:table-cell>
          <table:table-cell table:style-name="ce679" table:formula="of:=+[.O8]*[.$O$37]" office:value-type="float" office:value="18" calcext:value-type="float">
            <text:p>18.00</text:p>
          </table:table-cell>
          <table:table-cell table:style-name="ce679" table:formula="of:=[.N42]*[.O42]" office:value-type="float" office:value="175088.5488" calcext:value-type="float">
            <text:p>175088.55</text:p>
          </table:table-cell>
          <table:table-cell/>
          <table:table-cell table:style-name="ce429"/>
          <table:table-cell table:style-name="ce685"/>
          <table:table-cell table:style-name="ce428" table:number-columns-repeated="5"/>
          <table:table-cell table:number-columns-repeated="233"/>
        </table:table-row>
        <table:table-row table:style-name="ro21">
          <table:table-cell table:style-name="ce649" office:value-type="float" office:value="4" calcext:value-type="float">
            <text:p>4</text:p>
          </table:table-cell>
          <table:table-cell table:style-name="ce654" table:formula="of:=+[.AX19]" office:value-type="float" office:value="30886.383182084" calcext:value-type="float">
            <text:p><text:s/>30,886.38 </text:p>
          </table:table-cell>
          <table:table-cell table:style-name="ce657" table:formula="of:=1/(1+[.$B$1])^[.A43]" office:value-type="float" office:value="0.486977310811392" calcext:value-type="float">
            <text:p><text:s/>0.49 </text:p>
          </table:table-cell>
          <table:table-cell table:style-name="ce654" table:formula="of:=[.B43]*[.C43]" office:value-type="float" office:value="15040.9678227015" calcext:value-type="float">
            <text:p><text:s/>15,040.97 </text:p>
          </table:table-cell>
          <table:table-cell table:style-name="ce655"/>
          <table:table-cell table:number-columns-repeated="7"/>
          <table:table-cell table:style-name="ce162" table:formula="of:=+[.M32]" office:value-type="float" office:value="2024" calcext:value-type="float">
            <text:p>2024</text:p>
          </table:table-cell>
          <table:table-cell table:style-name="ce679" table:formula="of:=+[.N9]*[.$N$37]" office:value-type="float" office:value="9727.1416" calcext:value-type="float">
            <text:p>9727.14</text:p>
          </table:table-cell>
          <table:table-cell table:style-name="ce679" table:formula="of:=+[.O9]*[.$O$37]" office:value-type="float" office:value="18" calcext:value-type="float">
            <text:p>18.00</text:p>
          </table:table-cell>
          <table:table-cell table:style-name="ce679" table:formula="of:=[.N43]*[.O43]" office:value-type="float" office:value="175088.5488" calcext:value-type="float">
            <text:p>175088.55</text:p>
          </table:table-cell>
          <table:table-cell/>
          <table:table-cell table:style-name="ce429"/>
          <table:table-cell table:style-name="ce621"/>
          <table:table-cell table:style-name="ce632" table:number-columns-repeated="5"/>
          <table:table-cell table:number-columns-repeated="233"/>
        </table:table-row>
        <table:table-row table:style-name="ro21">
          <table:table-cell table:style-name="ce649" office:value-type="float" office:value="5" calcext:value-type="float">
            <text:p>5</text:p>
          </table:table-cell>
          <table:table-cell table:style-name="ce654" table:formula="of:=+[.AY19]" office:value-type="float" office:value="184935.644905031" calcext:value-type="float">
            <text:p><text:s/>184,935.64 </text:p>
          </table:table-cell>
          <table:table-cell table:style-name="ce657" table:formula="of:=1/(1+[.$B$1])^[.A44]" office:value-type="float" office:value="0.406804650336188" calcext:value-type="float">
            <text:p><text:s/>0.41 </text:p>
          </table:table-cell>
          <table:table-cell table:style-name="ce654" table:formula="of:=[.B44]*[.C44]" office:value-type="float" office:value="75232.6803602884" calcext:value-type="float">
            <text:p><text:s/>75,232.68 </text:p>
          </table:table-cell>
          <table:table-cell table:style-name="ce655"/>
          <table:table-cell table:number-columns-repeated="7"/>
          <table:table-cell table:style-name="ce162" table:formula="of:=+[.M33]" office:value-type="float" office:value="2025" calcext:value-type="float">
            <text:p>2025</text:p>
          </table:table-cell>
          <table:table-cell table:style-name="ce679" table:formula="of:=+[.N10]*[.$N$37]" office:value-type="float" office:value="9727.1416" calcext:value-type="float">
            <text:p>9727.14</text:p>
          </table:table-cell>
          <table:table-cell table:style-name="ce679" table:formula="of:=+[.O10]*[.$O$37]" office:value-type="float" office:value="18" calcext:value-type="float">
            <text:p>18.00</text:p>
          </table:table-cell>
          <table:table-cell table:style-name="ce679" table:formula="of:=[.N44]*[.O44]" office:value-type="float" office:value="175088.5488" calcext:value-type="float">
            <text:p>175088.55</text:p>
          </table:table-cell>
          <table:table-cell/>
          <table:table-cell table:style-name="ce601"/>
          <table:table-cell table:style-name="ce687"/>
          <table:table-cell table:style-name="ce547" table:number-columns-repeated="5"/>
          <table:table-cell table:number-columns-repeated="233"/>
        </table:table-row>
        <table:table-row table:style-name="ro29">
          <table:table-cell table:style-name="ce650" office:value-type="string" calcext:value-type="string" table:number-columns-spanned="3" table:number-rows-spanned="1">
            <text:p>VANE</text:p>
          </table:table-cell>
          <table:covered-table-cell table:number-columns-repeated="2" table:style-name="ce650"/>
          <table:table-cell table:style-name="ce658" table:formula="of:=SUM([.D39:.D44])" office:value-type="float" office:value="-26800.8327177409" calcext:value-type="float">
            <text:p><text:s/>(26,800.83)</text:p>
          </table:table-cell>
          <table:table-cell table:style-name="ce655"/>
          <table:table-cell table:number-columns-repeated="12"/>
          <table:table-cell table:style-name="ce601"/>
          <table:table-cell table:style-name="ce688"/>
          <table:table-cell table:style-name="ce547" table:number-columns-repeated="5"/>
          <table:table-cell table:number-columns-repeated="233"/>
        </table:table-row>
        <table:table-row table:style-name="ro49">
          <table:table-cell table:style-name="ce650" office:value-type="string" calcext:value-type="string" table:number-columns-spanned="3" table:number-rows-spanned="1">
            <text:p>TIRE</text:p>
          </table:table-cell>
          <table:covered-table-cell table:number-columns-repeated="2" table:style-name="ce650"/>
          <table:table-cell table:style-name="ce659" table:formula="of:=IRR([.B39:.B44];[.B35])" office:value-type="percentage" office:value="0.14414031202421" calcext:value-type="percentage">
            <text:p>14.41 %</text:p>
          </table:table-cell>
          <table:table-cell table:style-name="ce655"/>
          <table:table-cell table:number-columns-repeated="12"/>
          <table:table-cell table:style-name="ce655" table:number-columns-repeated="7"/>
          <table:table-cell table:number-columns-repeated="233"/>
        </table:table-row>
        <table:table-row table:style-name="ro49">
          <table:table-cell table:style-name="ce652"/>
          <table:table-cell table:style-name="ce655" table:number-columns-repeated="2"/>
          <table:table-cell table:style-name="ce661"/>
          <table:table-cell table:style-name="ce655"/>
          <table:table-cell table:number-columns-repeated="252"/>
        </table:table-row>
        <table:table-row table:style-name="ro8">
          <table:table-cell table:style-name="ce651" office:value-type="string" calcext:value-type="string" table:number-columns-spanned="3" table:number-rows-spanned="1">
            <text:p>Caida del precio en</text:p>
          </table:table-cell>
          <table:covered-table-cell table:number-columns-repeated="2" table:style-name="ce651"/>
          <table:table-cell table:style-name="ce660" office:value-type="percentage" office:value="0.03" calcext:value-type="percentage">
            <text:p>3 %</text:p>
          </table:table-cell>
          <table:table-cell table:style-name="ce655"/>
          <table:table-cell table:number-columns-repeated="8"/>
          <table:table-cell table:style-name="ce680" table:formula="of:=+[.N3]" office:value-type="percentage" office:value="1" calcext:value-type="percentage">
            <text:p>100 %</text:p>
          </table:table-cell>
          <table:table-cell table:style-name="ce680" table:formula="of:=+[.O3]-[.D48]" office:value-type="percentage" office:value="0.97" calcext:value-type="percentage">
            <text:p>97 %</text:p>
          </table:table-cell>
          <table:table-cell table:number-columns-repeated="242"/>
        </table:table-row>
        <table:table-row table:style-name="ro29">
          <table:table-cell table:style-name="ce441" office:value-type="string" calcext:value-type="string">
            <text:p>AÑO</text:p>
          </table:table-cell>
          <table:table-cell table:style-name="ce441" office:value-type="string" calcext:value-type="string">
            <text:p>FCE</text:p>
          </table:table-cell>
          <table:table-cell table:style-name="ce441" office:value-type="string" calcext:value-type="string">
            <text:p>FA</text:p>
          </table:table-cell>
          <table:table-cell table:style-name="ce441" office:value-type="string" calcext:value-type="string">
            <text:p>VAN</text:p>
          </table:table-cell>
          <table:table-cell table:style-name="ce655"/>
          <table:table-cell table:number-columns-repeated="7"/>
          <table:table-cell table:style-name="ce165" office:value-type="string" calcext:value-type="string" table:number-columns-spanned="1" table:number-rows-spanned="2">
            <text:p>Años</text:p>
          </table:table-cell>
          <table:table-cell table:style-name="ce165" office:value-type="string" calcext:value-type="string" table:number-columns-spanned="1" table:number-rows-spanned="2">
            <text:p>Produccion (UND.)</text:p>
          </table:table-cell>
          <table:table-cell table:style-name="ce165" office:value-type="string" calcext:value-type="string" table:number-columns-spanned="1" table:number-rows-spanned="2">
            <text:p>Precio por Und (S/.)</text:p>
          </table:table-cell>
          <table:table-cell table:style-name="ce165" office:value-type="string" calcext:value-type="string" table:number-columns-spanned="1" table:number-rows-spanned="2">
            <text:p>Ventas proyectadas (S/.)</text:p>
          </table:table-cell>
          <table:table-cell table:number-columns-repeated="241"/>
        </table:table-row>
        <table:table-row table:style-name="ro21">
          <table:table-cell table:style-name="ce649" office:value-type="float" office:value="0" calcext:value-type="float">
            <text:p>0</text:p>
          </table:table-cell>
          <table:table-cell table:style-name="ce654" table:formula="of:=+[.BC19]" office:value-type="float" office:value="-157481.215045237" calcext:value-type="float">
            <text:p><text:s/>(157,481.22)</text:p>
          </table:table-cell>
          <table:table-cell table:style-name="ce657" table:formula="of:=1/(1+[.$B$1])^[.A50]" office:value-type="float" office:value="1" calcext:value-type="float">
            <text:p><text:s/>1.00 </text:p>
          </table:table-cell>
          <table:table-cell table:style-name="ce654" table:formula="of:=[.B50]*[.C50]" office:value-type="float" office:value="-157481.215045237" calcext:value-type="float">
            <text:p><text:s/>(157,481.22)</text:p>
          </table:table-cell>
          <table:table-cell table:style-name="ce655"/>
          <table:table-cell table:style-name="ce666"/>
          <table:table-cell table:number-columns-repeated="6"/>
          <table:covered-table-cell table:number-columns-repeated="4" table:style-name="ce165"/>
          <table:table-cell table:number-columns-repeated="241"/>
        </table:table-row>
        <table:table-row table:style-name="ro21">
          <table:table-cell table:style-name="ce649" office:value-type="float" office:value="1" calcext:value-type="float">
            <text:p>1</text:p>
          </table:table-cell>
          <table:table-cell table:style-name="ce654" table:formula="of:=+[.BD19]" office:value-type="float" office:value="7897.13854315533" calcext:value-type="float">
            <text:p><text:s/>7,897.14 </text:p>
          </table:table-cell>
          <table:table-cell table:style-name="ce657" table:formula="of:=1/(1+[.$B$1])^[.A51]" office:value-type="float" office:value="0.835366743592997" calcext:value-type="float">
            <text:p><text:s/>0.84 </text:p>
          </table:table-cell>
          <table:table-cell table:style-name="ce654" table:formula="of:=[.B51]*[.C51]" office:value-type="float" office:value="6597.00690849841" calcext:value-type="float">
            <text:p><text:s/>6,597.01 </text:p>
          </table:table-cell>
          <table:table-cell table:style-name="ce655"/>
          <table:table-cell table:number-columns-repeated="7"/>
          <table:table-cell table:style-name="ce162" table:formula="of:=+[.M40]" office:value-type="float" office:value="2021" calcext:value-type="float">
            <text:p>2021</text:p>
          </table:table-cell>
          <table:table-cell table:style-name="ce679" table:formula="of:=+[.N6]*[.$N$48]" office:value-type="float" office:value="3440.46069833684" calcext:value-type="float">
            <text:p>3440.46</text:p>
          </table:table-cell>
          <table:table-cell table:style-name="ce679" table:formula="of:=+[.O6]*[.$O$48]" office:value-type="float" office:value="17.46" calcext:value-type="float">
            <text:p>17.46</text:p>
          </table:table-cell>
          <table:table-cell table:style-name="ce679" table:formula="of:=[.N51]*[.O51]" office:value-type="float" office:value="60070.4437929612" calcext:value-type="float">
            <text:p>60070.44</text:p>
          </table:table-cell>
          <table:table-cell table:number-columns-repeated="241"/>
        </table:table-row>
        <table:table-row table:style-name="ro21">
          <table:table-cell table:style-name="ce649" office:value-type="float" office:value="2" calcext:value-type="float">
            <text:p>2</text:p>
          </table:table-cell>
          <table:table-cell table:style-name="ce654" table:formula="of:=+[.BE19]" office:value-type="float" office:value="56056.3873899337" calcext:value-type="float">
            <text:p><text:s/>56,056.39 </text:p>
          </table:table-cell>
          <table:table-cell table:style-name="ce657" table:formula="of:=1/(1+[.$B$1])^[.A52]" office:value-type="float" office:value="0.697837596301168" calcext:value-type="float">
            <text:p><text:s/>0.70 </text:p>
          </table:table-cell>
          <table:table-cell table:style-name="ce654" table:formula="of:=[.B52]*[.C52]" office:value-type="float" office:value="39118.2546335185" calcext:value-type="float">
            <text:p><text:s/>39,118.25 </text:p>
          </table:table-cell>
          <table:table-cell table:style-name="ce655"/>
          <table:table-cell table:number-columns-repeated="7"/>
          <table:table-cell table:style-name="ce162" table:formula="of:=+[.M41]" office:value-type="float" office:value="2022" calcext:value-type="float">
            <text:p>2022</text:p>
          </table:table-cell>
          <table:table-cell table:style-name="ce679" table:formula="of:=+[.N7]*[.$N$48]" office:value-type="float" office:value="11443.696" calcext:value-type="float">
            <text:p>11443.70</text:p>
          </table:table-cell>
          <table:table-cell table:style-name="ce679" table:formula="of:=+[.O7]*[.$O$48]" office:value-type="float" office:value="17.46" calcext:value-type="float">
            <text:p>17.46</text:p>
          </table:table-cell>
          <table:table-cell table:style-name="ce679" table:formula="of:=[.N52]*[.O52]" office:value-type="float" office:value="199806.93216" calcext:value-type="float">
            <text:p>199806.93</text:p>
          </table:table-cell>
          <table:table-cell table:number-columns-repeated="241"/>
        </table:table-row>
        <table:table-row table:style-name="ro21">
          <table:table-cell table:style-name="ce649" office:value-type="float" office:value="3" calcext:value-type="float">
            <text:p>3</text:p>
          </table:table-cell>
          <table:table-cell table:style-name="ce654" table:formula="of:=+[.BF19]" office:value-type="float" office:value="55851.1051863657" calcext:value-type="float">
            <text:p><text:s/>55,851.11 </text:p>
          </table:table-cell>
          <table:table-cell table:style-name="ce657" table:formula="of:=1/(1+[.$B$1])^[.A53]" office:value-type="float" office:value="0.582950320378872" calcext:value-type="float">
            <text:p><text:s/>0.58 </text:p>
          </table:table-cell>
          <table:table-cell table:style-name="ce654" table:formula="of:=[.B53]*[.C53]" office:value-type="float" office:value="32558.4196619059" calcext:value-type="float">
            <text:p><text:s/>32,558.42 </text:p>
          </table:table-cell>
          <table:table-cell table:style-name="ce655"/>
          <table:table-cell table:number-columns-repeated="7"/>
          <table:table-cell table:style-name="ce162" table:formula="of:=+[.M42]" office:value-type="float" office:value="2023" calcext:value-type="float">
            <text:p>2023</text:p>
          </table:table-cell>
          <table:table-cell table:style-name="ce679" table:formula="of:=+[.N8]*[.$N$48]" office:value-type="float" office:value="11443.696" calcext:value-type="float">
            <text:p>11443.70</text:p>
          </table:table-cell>
          <table:table-cell table:style-name="ce679" table:formula="of:=+[.O8]*[.$O$48]" office:value-type="float" office:value="17.46" calcext:value-type="float">
            <text:p>17.46</text:p>
          </table:table-cell>
          <table:table-cell table:style-name="ce679" table:formula="of:=[.N53]*[.O53]" office:value-type="float" office:value="199806.93216" calcext:value-type="float">
            <text:p>199806.93</text:p>
          </table:table-cell>
          <table:table-cell table:number-columns-repeated="241"/>
        </table:table-row>
        <table:table-row table:style-name="ro21">
          <table:table-cell table:style-name="ce649" office:value-type="float" office:value="4" calcext:value-type="float">
            <text:p>4</text:p>
          </table:table-cell>
          <table:table-cell table:style-name="ce654" table:formula="of:=+[.BG19]" office:value-type="float" office:value="55604.766542084" calcext:value-type="float">
            <text:p><text:s/>55,604.77 </text:p>
          </table:table-cell>
          <table:table-cell table:style-name="ce657" table:formula="of:=1/(1+[.$B$1])^[.A54]" office:value-type="float" office:value="0.486977310811392" calcext:value-type="float">
            <text:p><text:s/>0.49 </text:p>
          </table:table-cell>
          <table:table-cell table:style-name="ce654" table:formula="of:=[.B54]*[.C54]" office:value-type="float" office:value="27078.2596789593" calcext:value-type="float">
            <text:p><text:s/>27,078.26 </text:p>
          </table:table-cell>
          <table:table-cell table:style-name="ce655"/>
          <table:table-cell table:number-columns-repeated="7"/>
          <table:table-cell table:style-name="ce162" table:formula="of:=+[.M43]" office:value-type="float" office:value="2024" calcext:value-type="float">
            <text:p>2024</text:p>
          </table:table-cell>
          <table:table-cell table:style-name="ce679" table:formula="of:=+[.N9]*[.$N$48]" office:value-type="float" office:value="11443.696" calcext:value-type="float">
            <text:p>11443.70</text:p>
          </table:table-cell>
          <table:table-cell table:style-name="ce679" table:formula="of:=+[.O9]*[.$O$48]" office:value-type="float" office:value="17.46" calcext:value-type="float">
            <text:p>17.46</text:p>
          </table:table-cell>
          <table:table-cell table:style-name="ce679" table:formula="of:=[.N54]*[.O54]" office:value-type="float" office:value="199806.93216" calcext:value-type="float">
            <text:p>199806.93</text:p>
          </table:table-cell>
          <table:table-cell table:number-columns-repeated="241"/>
        </table:table-row>
        <table:table-row table:style-name="ro21">
          <table:table-cell table:style-name="ce649" office:value-type="float" office:value="5" calcext:value-type="float">
            <text:p>5</text:p>
          </table:table-cell>
          <table:table-cell table:style-name="ce654" table:formula="of:=+[.BH19]" office:value-type="float" office:value="209654.028265031" calcext:value-type="float">
            <text:p><text:s/>209,654.03 </text:p>
          </table:table-cell>
          <table:table-cell table:style-name="ce657" table:formula="of:=1/(1+[.$B$1])^[.A55]" office:value-type="float" office:value="0.406804650336188" calcext:value-type="float">
            <text:p><text:s/>0.41 </text:p>
          </table:table-cell>
          <table:table-cell table:style-name="ce654" table:formula="of:=[.B55]*[.C55]" office:value-type="float" office:value="85288.233659929" calcext:value-type="float">
            <text:p><text:s/>85,288.23 </text:p>
          </table:table-cell>
          <table:table-cell table:style-name="ce655"/>
          <table:table-cell table:number-columns-repeated="7"/>
          <table:table-cell table:style-name="ce162" table:formula="of:=+[.M44]" office:value-type="float" office:value="2025" calcext:value-type="float">
            <text:p>2025</text:p>
          </table:table-cell>
          <table:table-cell table:style-name="ce679" table:formula="of:=+[.N10]*[.$N$48]" office:value-type="float" office:value="11443.696" calcext:value-type="float">
            <text:p>11443.70</text:p>
          </table:table-cell>
          <table:table-cell table:style-name="ce679" table:formula="of:=+[.O10]*[.$O$48]" office:value-type="float" office:value="17.46" calcext:value-type="float">
            <text:p>17.46</text:p>
          </table:table-cell>
          <table:table-cell table:style-name="ce679" table:formula="of:=[.N55]*[.O55]" office:value-type="float" office:value="199806.93216" calcext:value-type="float">
            <text:p>199806.93</text:p>
          </table:table-cell>
          <table:table-cell table:number-columns-repeated="241"/>
        </table:table-row>
        <table:table-row table:style-name="ro29">
          <table:table-cell table:style-name="ce650" office:value-type="string" calcext:value-type="string" table:number-columns-spanned="3" table:number-rows-spanned="1">
            <text:p>VANE</text:p>
          </table:table-cell>
          <table:covered-table-cell table:number-columns-repeated="2" table:style-name="ce650"/>
          <table:table-cell table:style-name="ce658" table:formula="of:=SUM([.D50:.D55])" office:value-type="float" office:value="33158.9594975739" calcext:value-type="float">
            <text:p><text:s/>33,158.96 </text:p>
          </table:table-cell>
          <table:table-cell table:style-name="ce655"/>
          <table:table-cell table:number-columns-repeated="252"/>
        </table:table-row>
        <table:table-row table:style-name="ro29">
          <table:table-cell table:style-name="ce650" office:value-type="string" calcext:value-type="string" table:number-columns-spanned="3" table:number-rows-spanned="1">
            <text:p>TIRE</text:p>
          </table:table-cell>
          <table:covered-table-cell table:number-columns-repeated="2" table:style-name="ce650"/>
          <table:table-cell table:style-name="ce659" table:formula="of:=IRR([.B50:.B55];[.B46])" office:value-type="percentage" office:value="0.260202423100335" calcext:value-type="percentage">
            <text:p>26.02 %</text:p>
          </table:table-cell>
          <table:table-cell table:style-name="ce655"/>
          <table:table-cell table:number-columns-repeated="252"/>
        </table:table-row>
        <table:table-row table:style-name="ro17">
          <table:table-cell table:style-name="ce652"/>
          <table:table-cell table:style-name="ce656" table:number-columns-repeated="3"/>
          <table:table-cell table:style-name="ce655"/>
          <table:table-cell table:number-columns-repeated="252"/>
        </table:table-row>
        <table:table-row table:style-name="ro17">
          <table:table-cell table:style-name="ce651" office:value-type="string" calcext:value-type="string" table:number-columns-spanned="3" table:number-rows-spanned="1">
            <text:p>Caida del precio en</text:p>
          </table:table-cell>
          <table:covered-table-cell table:number-columns-repeated="2" table:style-name="ce651"/>
          <table:table-cell table:style-name="ce660" office:value-type="percentage" office:value="0.08" calcext:value-type="percentage">
            <text:p>8 %</text:p>
          </table:table-cell>
          <table:table-cell table:style-name="ce655"/>
          <table:table-cell table:number-columns-repeated="8"/>
          <table:table-cell table:style-name="ce680" table:formula="of:=+[.N3]" office:value-type="percentage" office:value="1" calcext:value-type="percentage">
            <text:p>100 %</text:p>
          </table:table-cell>
          <table:table-cell table:style-name="ce680" table:formula="of:=+[.O3]-[.D59]" office:value-type="percentage" office:value="0.92" calcext:value-type="percentage">
            <text:p>92 %</text:p>
          </table:table-cell>
          <table:table-cell table:number-columns-repeated="242"/>
        </table:table-row>
        <table:table-row table:style-name="ro29">
          <table:table-cell table:style-name="ce441" office:value-type="string" calcext:value-type="string">
            <text:p>AÑO</text:p>
          </table:table-cell>
          <table:table-cell table:style-name="ce441" office:value-type="string" calcext:value-type="string">
            <text:p>FCE</text:p>
          </table:table-cell>
          <table:table-cell table:style-name="ce441" office:value-type="string" calcext:value-type="string">
            <text:p>FA</text:p>
          </table:table-cell>
          <table:table-cell table:style-name="ce441" office:value-type="string" calcext:value-type="string">
            <text:p>VAN</text:p>
          </table:table-cell>
          <table:table-cell table:style-name="ce655"/>
          <table:table-cell table:number-columns-repeated="7"/>
          <table:table-cell table:style-name="ce165" office:value-type="string" calcext:value-type="string" table:number-columns-spanned="1" table:number-rows-spanned="2">
            <text:p>Años</text:p>
          </table:table-cell>
          <table:table-cell table:style-name="ce165" office:value-type="string" calcext:value-type="string" table:number-columns-spanned="1" table:number-rows-spanned="2">
            <text:p>Produccion (UND.)</text:p>
          </table:table-cell>
          <table:table-cell table:style-name="ce165" office:value-type="string" calcext:value-type="string" table:number-columns-spanned="1" table:number-rows-spanned="2">
            <text:p>Precio por Und (S/.)</text:p>
          </table:table-cell>
          <table:table-cell table:style-name="ce165" office:value-type="string" calcext:value-type="string" table:number-columns-spanned="1" table:number-rows-spanned="2">
            <text:p>Ventas proyectadas (S/.)</text:p>
          </table:table-cell>
          <table:table-cell table:number-columns-repeated="241"/>
        </table:table-row>
        <table:table-row table:style-name="ro21">
          <table:table-cell table:style-name="ce649" office:value-type="float" office:value="0" calcext:value-type="float">
            <text:p>0</text:p>
          </table:table-cell>
          <table:table-cell table:style-name="ce654" table:formula="of:=+[.BL19]" office:value-type="float" office:value="-157481.215045237" calcext:value-type="float">
            <text:p><text:s/>(157,481.22)</text:p>
          </table:table-cell>
          <table:table-cell table:style-name="ce657" table:formula="of:=1/(1+[.$B$1])^[.A61]" office:value-type="float" office:value="1" calcext:value-type="float">
            <text:p><text:s/>1.00 </text:p>
          </table:table-cell>
          <table:table-cell table:style-name="ce654" table:formula="of:=[.B61]*[.C61]" office:value-type="float" office:value="-157481.215045237" calcext:value-type="float">
            <text:p><text:s/>(157,481.22)</text:p>
          </table:table-cell>
          <table:table-cell table:number-columns-repeated="8"/>
          <table:covered-table-cell table:number-columns-repeated="4" table:style-name="ce165"/>
          <table:table-cell table:number-columns-repeated="241"/>
        </table:table-row>
        <table:table-row table:style-name="ro21">
          <table:table-cell table:style-name="ce649" office:value-type="float" office:value="1" calcext:value-type="float">
            <text:p>1</text:p>
          </table:table-cell>
          <table:table-cell table:style-name="ce654" table:formula="of:=+[.BM19]" office:value-type="float" office:value="4800.72391465218" calcext:value-type="float">
            <text:p><text:s/>4,800.72 </text:p>
          </table:table-cell>
          <table:table-cell table:style-name="ce657" table:formula="of:=1/(1+[.$B$1])^[.A62]" office:value-type="float" office:value="0.835366743592997" calcext:value-type="float">
            <text:p><text:s/>0.84 </text:p>
          </table:table-cell>
          <table:table-cell table:style-name="ce654" table:formula="of:=[.B62]*[.C62]" office:value-type="float" office:value="4010.36510347201" calcext:value-type="float">
            <text:p><text:s/>4,010.37 </text:p>
          </table:table-cell>
          <table:table-cell table:number-columns-repeated="8"/>
          <table:table-cell table:style-name="ce162" table:formula="of:=+[.M51]" office:value-type="float" office:value="2021" calcext:value-type="float">
            <text:p>2021</text:p>
          </table:table-cell>
          <table:table-cell table:style-name="ce679" table:formula="of:=+[.N6]*[.$N$59]" office:value-type="float" office:value="3440.46069833684" calcext:value-type="float">
            <text:p>3440.46</text:p>
          </table:table-cell>
          <table:table-cell table:style-name="ce679" table:formula="of:=+[.O6]*[.$O$59]" office:value-type="float" office:value="16.56" calcext:value-type="float">
            <text:p>16.56</text:p>
          </table:table-cell>
          <table:table-cell table:style-name="ce679" table:formula="of:=[.N62]*[.O62]" office:value-type="float" office:value="56974.029164458" calcext:value-type="float">
            <text:p>56974.03</text:p>
          </table:table-cell>
          <table:table-cell table:number-columns-repeated="241"/>
        </table:table-row>
        <table:table-row table:style-name="ro21">
          <table:table-cell table:style-name="ce649" office:value-type="float" office:value="2" calcext:value-type="float">
            <text:p>2</text:p>
          </table:table-cell>
          <table:table-cell table:style-name="ce654" table:formula="of:=+[.BN19]" office:value-type="float" office:value="45757.0609899338" calcext:value-type="float">
            <text:p><text:s/>45,757.06 </text:p>
          </table:table-cell>
          <table:table-cell table:style-name="ce657" table:formula="of:=1/(1+[.$B$1])^[.A63]" office:value-type="float" office:value="0.697837596301168" calcext:value-type="float">
            <text:p><text:s/>0.70 </text:p>
          </table:table-cell>
          <table:table-cell table:style-name="ce654" table:formula="of:=[.B63]*[.C63]" office:value-type="float" office:value="31930.9974550213" calcext:value-type="float">
            <text:p><text:s/>31,931.00 </text:p>
          </table:table-cell>
          <table:table-cell table:number-columns-repeated="8"/>
          <table:table-cell table:style-name="ce162" table:formula="of:=+[.M52]" office:value-type="float" office:value="2022" calcext:value-type="float">
            <text:p>2022</text:p>
          </table:table-cell>
          <table:table-cell table:style-name="ce679" table:formula="of:=+[.N7]*[.$N$59]" office:value-type="float" office:value="11443.696" calcext:value-type="float">
            <text:p>11443.70</text:p>
          </table:table-cell>
          <table:table-cell table:style-name="ce679" table:formula="of:=+[.O7]*[.$O$59]" office:value-type="float" office:value="16.56" calcext:value-type="float">
            <text:p>16.56</text:p>
          </table:table-cell>
          <table:table-cell table:style-name="ce679" table:formula="of:=[.N63]*[.O63]" office:value-type="float" office:value="189507.60576" calcext:value-type="float">
            <text:p>189507.61</text:p>
          </table:table-cell>
          <table:table-cell table:number-columns-repeated="241"/>
        </table:table-row>
        <table:table-row table:style-name="ro21">
          <table:table-cell table:style-name="ce649" office:value-type="float" office:value="3" calcext:value-type="float">
            <text:p>3</text:p>
          </table:table-cell>
          <table:table-cell table:style-name="ce654" table:formula="of:=+[.BO19]" office:value-type="float" office:value="45551.7787863657" calcext:value-type="float">
            <text:p><text:s/>45,551.78 </text:p>
          </table:table-cell>
          <table:table-cell table:style-name="ce657" table:formula="of:=1/(1+[.$B$1])^[.A64]" office:value-type="float" office:value="0.582950320378872" calcext:value-type="float">
            <text:p><text:s/>0.58 </text:p>
          </table:table-cell>
          <table:table-cell table:style-name="ce654" table:formula="of:=[.B64]*[.C64]" office:value-type="float" office:value="26554.4240373394" calcext:value-type="float">
            <text:p><text:s/>26,554.42 </text:p>
          </table:table-cell>
          <table:table-cell table:number-columns-repeated="8"/>
          <table:table-cell table:style-name="ce162" table:formula="of:=+[.M53]" office:value-type="float" office:value="2023" calcext:value-type="float">
            <text:p>2023</text:p>
          </table:table-cell>
          <table:table-cell table:style-name="ce679" table:formula="of:=+[.N8]*[.$N$59]" office:value-type="float" office:value="11443.696" calcext:value-type="float">
            <text:p>11443.70</text:p>
          </table:table-cell>
          <table:table-cell table:style-name="ce679" table:formula="of:=+[.O8]*[.$O$59]" office:value-type="float" office:value="16.56" calcext:value-type="float">
            <text:p>16.56</text:p>
          </table:table-cell>
          <table:table-cell table:style-name="ce679" table:formula="of:=[.N64]*[.O64]" office:value-type="float" office:value="189507.60576" calcext:value-type="float">
            <text:p>189507.61</text:p>
          </table:table-cell>
          <table:table-cell table:number-columns-repeated="241"/>
        </table:table-row>
        <table:table-row table:style-name="ro21">
          <table:table-cell table:style-name="ce649" office:value-type="float" office:value="4" calcext:value-type="float">
            <text:p>4</text:p>
          </table:table-cell>
          <table:table-cell table:style-name="ce654" table:formula="of:=+[.BP19]" office:value-type="float" office:value="45305.440142084" calcext:value-type="float">
            <text:p><text:s/>45,305.44 </text:p>
          </table:table-cell>
          <table:table-cell table:style-name="ce657" table:formula="of:=1/(1+[.$B$1])^[.A65]" office:value-type="float" office:value="0.486977310811392" calcext:value-type="float">
            <text:p><text:s/>0.49 </text:p>
          </table:table-cell>
          <table:table-cell table:style-name="ce654" table:formula="of:=[.B65]*[.C65]" office:value-type="float" office:value="22062.7214055186" calcext:value-type="float">
            <text:p><text:s/>22,062.72 </text:p>
          </table:table-cell>
          <table:table-cell table:number-columns-repeated="8"/>
          <table:table-cell table:style-name="ce162" table:formula="of:=+[.M54]" office:value-type="float" office:value="2024" calcext:value-type="float">
            <text:p>2024</text:p>
          </table:table-cell>
          <table:table-cell table:style-name="ce679" table:formula="of:=+[.N9]*[.$N$59]" office:value-type="float" office:value="11443.696" calcext:value-type="float">
            <text:p>11443.70</text:p>
          </table:table-cell>
          <table:table-cell table:style-name="ce679" table:formula="of:=+[.O9]*[.$O$59]" office:value-type="float" office:value="16.56" calcext:value-type="float">
            <text:p>16.56</text:p>
          </table:table-cell>
          <table:table-cell table:style-name="ce679" table:formula="of:=[.N65]*[.O65]" office:value-type="float" office:value="189507.60576" calcext:value-type="float">
            <text:p>189507.61</text:p>
          </table:table-cell>
          <table:table-cell table:number-columns-repeated="241"/>
        </table:table-row>
        <table:table-row table:style-name="ro21">
          <table:table-cell table:style-name="ce649" office:value-type="float" office:value="5" calcext:value-type="float">
            <text:p>5</text:p>
          </table:table-cell>
          <table:table-cell table:style-name="ce654" table:formula="of:=+[.BQ19]" office:value-type="float" office:value="199354.701865031" calcext:value-type="float">
            <text:p><text:s/>199,354.70 </text:p>
          </table:table-cell>
          <table:table-cell table:style-name="ce657" table:formula="of:=1/(1+[.$B$1])^[.A66]" office:value-type="float" office:value="0.406804650336188" calcext:value-type="float">
            <text:p><text:s/>0.41 </text:p>
          </table:table-cell>
          <table:table-cell table:style-name="ce654" table:formula="of:=[.B66]*[.C66]" office:value-type="float" office:value="81098.4197850788" calcext:value-type="float">
            <text:p><text:s/>81,098.42 </text:p>
          </table:table-cell>
          <table:table-cell table:number-columns-repeated="8"/>
          <table:table-cell table:style-name="ce162" table:formula="of:=+[.M55]" office:value-type="float" office:value="2025" calcext:value-type="float">
            <text:p>2025</text:p>
          </table:table-cell>
          <table:table-cell table:style-name="ce679" table:formula="of:=+[.N10]*[.$N$59]" office:value-type="float" office:value="11443.696" calcext:value-type="float">
            <text:p>11443.70</text:p>
          </table:table-cell>
          <table:table-cell table:style-name="ce679" table:formula="of:=+[.O10]*[.$O$59]" office:value-type="float" office:value="16.56" calcext:value-type="float">
            <text:p>16.56</text:p>
          </table:table-cell>
          <table:table-cell table:style-name="ce679" table:formula="of:=[.N66]*[.O66]" office:value-type="float" office:value="189507.60576" calcext:value-type="float">
            <text:p>189507.61</text:p>
          </table:table-cell>
          <table:table-cell table:number-columns-repeated="241"/>
        </table:table-row>
        <table:table-row table:style-name="ro29">
          <table:table-cell table:style-name="ce650" office:value-type="string" calcext:value-type="string" table:number-columns-spanned="3" table:number-rows-spanned="1">
            <text:p>VANE</text:p>
          </table:table-cell>
          <table:covered-table-cell table:number-columns-repeated="2" table:style-name="ce650"/>
          <table:table-cell table:style-name="ce658" table:formula="of:=SUM([.D61:.D66])" office:value-type="float" office:value="8175.71274119284" calcext:value-type="float">
            <text:p><text:s/>8,175.71 </text:p>
          </table:table-cell>
          <table:table-cell table:number-columns-repeated="253"/>
        </table:table-row>
        <table:table-row table:style-name="ro29">
          <table:table-cell table:style-name="ce650" office:value-type="string" calcext:value-type="string" table:number-columns-spanned="3" table:number-rows-spanned="1">
            <text:p>TIRE</text:p>
          </table:table-cell>
          <table:covered-table-cell table:number-columns-repeated="2" table:style-name="ce650"/>
          <table:table-cell table:style-name="ce659" table:formula="of:=IRR([.B61:.B66];[.B57])" office:value-type="percentage" office:value="0.212876734299591" calcext:value-type="percentage">
            <text:p>21.29 %</text:p>
          </table:table-cell>
          <table:table-cell table:number-columns-repeated="253"/>
        </table:table-row>
        <table:table-row table:style-name="ro21">
          <table:table-cell table:number-columns-repeated="257"/>
        </table:table-row>
        <table:table-row table:style-name="ro8">
          <table:table-cell table:style-name="ce651" office:value-type="string" calcext:value-type="string" table:number-columns-spanned="3" table:number-rows-spanned="1">
            <text:p>Caida del precio en</text:p>
          </table:table-cell>
          <table:covered-table-cell table:number-columns-repeated="2" table:style-name="ce651"/>
          <table:table-cell table:style-name="ce660" office:value-type="percentage" office:value="0.16" calcext:value-type="percentage">
            <text:p>16 %</text:p>
          </table:table-cell>
          <table:table-cell table:number-columns-repeated="9"/>
          <table:table-cell table:style-name="ce680" table:formula="of:=+[.N3]" office:value-type="percentage" office:value="1" calcext:value-type="percentage">
            <text:p>100 %</text:p>
          </table:table-cell>
          <table:table-cell table:style-name="ce680" table:formula="of:=+[.O3]-[.D70]" office:value-type="percentage" office:value="0.84" calcext:value-type="percentage">
            <text:p>84 %</text:p>
          </table:table-cell>
          <table:table-cell table:number-columns-repeated="242"/>
        </table:table-row>
        <table:table-row table:style-name="ro29">
          <table:table-cell table:style-name="ce441" office:value-type="string" calcext:value-type="string">
            <text:p>AÑO</text:p>
          </table:table-cell>
          <table:table-cell table:style-name="ce441" office:value-type="string" calcext:value-type="string">
            <text:p>FCE</text:p>
          </table:table-cell>
          <table:table-cell table:style-name="ce441" office:value-type="string" calcext:value-type="string">
            <text:p>FA</text:p>
          </table:table-cell>
          <table:table-cell table:style-name="ce441" office:value-type="string" calcext:value-type="string">
            <text:p>VAN</text:p>
          </table:table-cell>
          <table:table-cell table:number-columns-repeated="8"/>
          <table:table-cell table:style-name="ce165" office:value-type="string" calcext:value-type="string" table:number-columns-spanned="1" table:number-rows-spanned="2">
            <text:p>Años</text:p>
          </table:table-cell>
          <table:table-cell table:style-name="ce165" office:value-type="string" calcext:value-type="string" table:number-columns-spanned="1" table:number-rows-spanned="2">
            <text:p>Produccion (UND.)</text:p>
          </table:table-cell>
          <table:table-cell table:style-name="ce165" office:value-type="string" calcext:value-type="string" table:number-columns-spanned="1" table:number-rows-spanned="2">
            <text:p>Precio por Und (S/.)</text:p>
          </table:table-cell>
          <table:table-cell table:style-name="ce165" office:value-type="string" calcext:value-type="string" table:number-columns-spanned="1" table:number-rows-spanned="2">
            <text:p>Ventas proyectadas (S/.)</text:p>
          </table:table-cell>
          <table:table-cell table:number-columns-repeated="241"/>
        </table:table-row>
        <table:table-row table:style-name="ro21">
          <table:table-cell table:style-name="ce649" office:value-type="float" office:value="0" calcext:value-type="float">
            <text:p>0</text:p>
          </table:table-cell>
          <table:table-cell table:style-name="ce654" table:formula="of:=+[.BU19]" office:value-type="float" office:value="-157481.215045237" calcext:value-type="float">
            <text:p><text:s/>(157,481.22)</text:p>
          </table:table-cell>
          <table:table-cell table:style-name="ce657" table:formula="of:=1/(1+[.$B$1])^[.A72]" office:value-type="float" office:value="1" calcext:value-type="float">
            <text:p><text:s/>1.00 </text:p>
          </table:table-cell>
          <table:table-cell table:style-name="ce654" table:formula="of:=[.B72]*[.C72]" office:value-type="float" office:value="-157481.215045237" calcext:value-type="float">
            <text:p><text:s/>(157,481.22)</text:p>
          </table:table-cell>
          <table:table-cell table:number-columns-repeated="8"/>
          <table:covered-table-cell table:number-columns-repeated="4" table:style-name="ce165"/>
          <table:table-cell table:number-columns-repeated="241"/>
        </table:table-row>
        <table:table-row table:style-name="ro21">
          <table:table-cell table:style-name="ce649" office:value-type="float" office:value="1" calcext:value-type="float">
            <text:p>1</text:p>
          </table:table-cell>
          <table:table-cell table:style-name="ce654" table:formula="of:=+[.BV19]" office:value-type="float" office:value="-153.539490952877" calcext:value-type="float">
            <text:p><text:s/>(153.54)</text:p>
          </table:table-cell>
          <table:table-cell table:style-name="ce657" table:formula="of:=1/(1+[.$B$1])^[.A73]" office:value-type="float" office:value="0.835366743592997" calcext:value-type="float">
            <text:p><text:s/>0.84 </text:p>
          </table:table-cell>
          <table:table-cell table:style-name="ce654" table:formula="of:=[.B73]*[.C73]" office:value-type="float" office:value="-128.261784570231" calcext:value-type="float">
            <text:p><text:s/>(128.26)</text:p>
          </table:table-cell>
          <table:table-cell table:number-columns-repeated="8"/>
          <table:table-cell table:style-name="ce162" table:formula="of:=+[.M62]" office:value-type="float" office:value="2021" calcext:value-type="float">
            <text:p>2021</text:p>
          </table:table-cell>
          <table:table-cell table:style-name="ce679" table:formula="of:=+[.N6]*[.$N$70]" office:value-type="float" office:value="3440.46069833684" calcext:value-type="float">
            <text:p>3440.46</text:p>
          </table:table-cell>
          <table:table-cell table:style-name="ce679" table:formula="of:=+[.O6]*[.$O$70]" office:value-type="float" office:value="15.12" calcext:value-type="float">
            <text:p>15.12</text:p>
          </table:table-cell>
          <table:table-cell table:style-name="ce679" table:formula="of:=[.N73]*[.O73]" office:value-type="float" office:value="52019.765758853" calcext:value-type="float">
            <text:p>52019.77</text:p>
          </table:table-cell>
          <table:table-cell table:number-columns-repeated="241"/>
        </table:table-row>
        <table:table-row table:style-name="ro21">
          <table:table-cell table:style-name="ce649" office:value-type="float" office:value="2" calcext:value-type="float">
            <text:p>2</text:p>
          </table:table-cell>
          <table:table-cell table:style-name="ce654" table:formula="of:=+[.BW19]" office:value-type="float" office:value="29278.1387499337" calcext:value-type="float">
            <text:p><text:s/>29,278.14 </text:p>
          </table:table-cell>
          <table:table-cell table:style-name="ce657" table:formula="of:=1/(1+[.$B$1])^[.A74]" office:value-type="float" office:value="0.697837596301168" calcext:value-type="float">
            <text:p><text:s/>0.70 </text:p>
          </table:table-cell>
          <table:table-cell table:style-name="ce654" table:formula="of:=[.B74]*[.C74]" office:value-type="float" office:value="20431.3859694258" calcext:value-type="float">
            <text:p><text:s/>20,431.39 </text:p>
          </table:table-cell>
          <table:table-cell table:number-columns-repeated="8"/>
          <table:table-cell table:style-name="ce162" table:formula="of:=+[.M63]" office:value-type="float" office:value="2022" calcext:value-type="float">
            <text:p>2022</text:p>
          </table:table-cell>
          <table:table-cell table:style-name="ce679" table:formula="of:=+[.N7]*[.$N$70]" office:value-type="float" office:value="11443.696" calcext:value-type="float">
            <text:p>11443.70</text:p>
          </table:table-cell>
          <table:table-cell table:style-name="ce679" table:formula="of:=+[.O7]*[.$O$70]" office:value-type="float" office:value="15.12" calcext:value-type="float">
            <text:p>15.12</text:p>
          </table:table-cell>
          <table:table-cell table:style-name="ce679" table:formula="of:=[.N74]*[.O74]" office:value-type="float" office:value="173028.68352" calcext:value-type="float">
            <text:p>173028.68</text:p>
          </table:table-cell>
          <table:table-cell table:number-columns-repeated="241"/>
        </table:table-row>
        <table:table-row table:style-name="ro21">
          <table:table-cell table:style-name="ce649" office:value-type="float" office:value="3" calcext:value-type="float">
            <text:p>3</text:p>
          </table:table-cell>
          <table:table-cell table:style-name="ce654" table:formula="of:=+[.BX19]" office:value-type="float" office:value="29072.8565463657" calcext:value-type="float">
            <text:p><text:s/>29,072.86 </text:p>
          </table:table-cell>
          <table:table-cell table:style-name="ce657" table:formula="of:=1/(1+[.$B$1])^[.A75]" office:value-type="float" office:value="0.582950320378872" calcext:value-type="float">
            <text:p><text:s/>0.58 </text:p>
          </table:table-cell>
          <table:table-cell table:style-name="ce654" table:formula="of:=[.B75]*[.C75]" office:value-type="float" office:value="16948.0310380328" calcext:value-type="float">
            <text:p><text:s/>16,948.03 </text:p>
          </table:table-cell>
          <table:table-cell table:number-columns-repeated="8"/>
          <table:table-cell table:style-name="ce162" table:formula="of:=+[.M64]" office:value-type="float" office:value="2023" calcext:value-type="float">
            <text:p>2023</text:p>
          </table:table-cell>
          <table:table-cell table:style-name="ce679" table:formula="of:=+[.N8]*[.$N$70]" office:value-type="float" office:value="11443.696" calcext:value-type="float">
            <text:p>11443.70</text:p>
          </table:table-cell>
          <table:table-cell table:style-name="ce679" table:formula="of:=+[.O8]*[.$O$70]" office:value-type="float" office:value="15.12" calcext:value-type="float">
            <text:p>15.12</text:p>
          </table:table-cell>
          <table:table-cell table:style-name="ce679" table:formula="of:=[.N75]*[.O75]" office:value-type="float" office:value="173028.68352" calcext:value-type="float">
            <text:p>173028.68</text:p>
          </table:table-cell>
          <table:table-cell table:number-columns-repeated="241"/>
        </table:table-row>
        <table:table-row table:style-name="ro21">
          <table:table-cell table:style-name="ce649" office:value-type="float" office:value="4" calcext:value-type="float">
            <text:p>4</text:p>
          </table:table-cell>
          <table:table-cell table:style-name="ce654" table:formula="of:=+[.BY19]" office:value-type="float" office:value="28826.517902084" calcext:value-type="float">
            <text:p><text:s/>28,826.52 </text:p>
          </table:table-cell>
          <table:table-cell table:style-name="ce657" table:formula="of:=1/(1+[.$B$1])^[.A76]" office:value-type="float" office:value="0.486977310811392" calcext:value-type="float">
            <text:p><text:s/>0.49 </text:p>
          </table:table-cell>
          <table:table-cell table:style-name="ce654" table:formula="of:=[.B76]*[.C76]" office:value-type="float" office:value="14037.8601680133" calcext:value-type="float">
            <text:p><text:s/>14,037.86 </text:p>
          </table:table-cell>
          <table:table-cell table:number-columns-repeated="8"/>
          <table:table-cell table:style-name="ce162" table:formula="of:=+[.M65]" office:value-type="float" office:value="2024" calcext:value-type="float">
            <text:p>2024</text:p>
          </table:table-cell>
          <table:table-cell table:style-name="ce679" table:formula="of:=+[.N9]*[.$N$70]" office:value-type="float" office:value="11443.696" calcext:value-type="float">
            <text:p>11443.70</text:p>
          </table:table-cell>
          <table:table-cell table:style-name="ce679" table:formula="of:=+[.O9]*[.$O$70]" office:value-type="float" office:value="15.12" calcext:value-type="float">
            <text:p>15.12</text:p>
          </table:table-cell>
          <table:table-cell table:style-name="ce679" table:formula="of:=[.N76]*[.O76]" office:value-type="float" office:value="173028.68352" calcext:value-type="float">
            <text:p>173028.68</text:p>
          </table:table-cell>
          <table:table-cell table:number-columns-repeated="241"/>
        </table:table-row>
        <table:table-row table:style-name="ro21">
          <table:table-cell table:style-name="ce649" office:value-type="float" office:value="5" calcext:value-type="float">
            <text:p>5</text:p>
          </table:table-cell>
          <table:table-cell table:style-name="ce654" table:formula="of:=+[.BZ19]" office:value-type="float" office:value="182875.779625031" calcext:value-type="float">
            <text:p><text:s/>182,875.78 </text:p>
          </table:table-cell>
          <table:table-cell table:style-name="ce657" table:formula="of:=1/(1+[.$B$1])^[.A77]" office:value-type="float" office:value="0.406804650336188" calcext:value-type="float">
            <text:p><text:s/>0.41 </text:p>
          </table:table-cell>
          <table:table-cell table:style-name="ce654" table:formula="of:=[.B77]*[.C77]" office:value-type="float" office:value="74394.7175853183" calcext:value-type="float">
            <text:p><text:s/>74,394.72 </text:p>
          </table:table-cell>
          <table:table-cell table:number-columns-repeated="8"/>
          <table:table-cell table:style-name="ce162" table:formula="of:=+[.M66]" office:value-type="float" office:value="2025" calcext:value-type="float">
            <text:p>2025</text:p>
          </table:table-cell>
          <table:table-cell table:style-name="ce679" table:formula="of:=+[.N10]*[.$N$70]" office:value-type="float" office:value="11443.696" calcext:value-type="float">
            <text:p>11443.70</text:p>
          </table:table-cell>
          <table:table-cell table:style-name="ce679" table:formula="of:=+[.O10]*[.$O$70]" office:value-type="float" office:value="15.12" calcext:value-type="float">
            <text:p>15.12</text:p>
          </table:table-cell>
          <table:table-cell table:style-name="ce679" table:formula="of:=[.N77]*[.O77]" office:value-type="float" office:value="173028.68352" calcext:value-type="float">
            <text:p>173028.68</text:p>
          </table:table-cell>
          <table:table-cell table:number-columns-repeated="241"/>
        </table:table-row>
        <table:table-row table:style-name="ro29">
          <table:table-cell table:style-name="ce650" office:value-type="string" calcext:value-type="string" table:number-columns-spanned="3" table:number-rows-spanned="1">
            <text:p>VANE</text:p>
          </table:table-cell>
          <table:covered-table-cell table:number-columns-repeated="2" table:style-name="ce650"/>
          <table:table-cell table:style-name="ce658" table:formula="of:=SUM([.D72:.D77])" office:value-type="float" office:value="-31797.4820690172" calcext:value-type="float">
            <text:p><text:s/>(31,797.48)</text:p>
          </table:table-cell>
          <table:table-cell table:number-columns-repeated="253"/>
        </table:table-row>
        <table:table-row table:style-name="ro29">
          <table:table-cell table:style-name="ce650" office:value-type="string" calcext:value-type="string" table:number-columns-spanned="3" table:number-rows-spanned="1">
            <text:p>TIRE</text:p>
          </table:table-cell>
          <table:covered-table-cell table:number-columns-repeated="2" table:style-name="ce650"/>
          <table:table-cell table:style-name="ce659" table:formula="of:=IRR([.B72:.B77];[.B68])" office:value-type="percentage" office:value="0.134066014887296" calcext:value-type="percentage">
            <text:p>13.41 %</text:p>
          </table:table-cell>
          <table:table-cell table:number-columns-repeated="253"/>
        </table:table-row>
        <table:table-row table:style-name="ro21" table:number-rows-repeated="1048496">
          <table:table-cell table:number-columns-repeated="257"/>
        </table:table-row>
        <table:table-row table:style-name="ro21">
          <table:table-cell table:number-columns-repeated="257"/>
        </table:table-row>
        <table:named-expressions>
          <table:named-range table:name="_xlnm.Print_Area" table:base-cell-address="$POBLACION.$A$1" table:cell-range-address="$'ANALISIS SESIB'.$F$1:.$K$22" table:range-usable-as="print-range"/>
        </table:named-expressions>
      </table:table>
      <table:table table:name="INDICADORES" table:style-name="ta22" table:print-ranges="INDICADORES.A1:INDICADORES.I21">
        <table:table-column table:style-name="co109" table:default-cell-style-name="ce460"/>
        <table:table-column table:style-name="co110" table:default-cell-style-name="ce460"/>
        <table:table-column table:style-name="co19" table:number-columns-repeated="2" table:default-cell-style-name="ce460"/>
        <table:table-column table:style-name="co61" table:default-cell-style-name="ce460"/>
        <table:table-column table:style-name="co1" table:default-cell-style-name="ce460"/>
        <table:table-column table:style-name="co75" table:number-columns-repeated="3" table:default-cell-style-name="ce460"/>
        <table:table-column table:style-name="co111" table:number-columns-repeated="2" table:default-cell-style-name="Default"/>
        <table:table-column table:style-name="co10" table:default-cell-style-name="ce460"/>
        <table:table-column table:style-name="co111" table:number-columns-repeated="16372"/>
        <table:table-row table:style-name="ro50">
          <table:table-cell table:style-name="ce694" office:value-type="string" calcext:value-type="string" table:number-columns-spanned="1" table:number-rows-spanned="2">
            <text:p>Indicadores</text:p>
          </table:table-cell>
          <table:table-cell table:style-name="ce694" office:value-type="string" calcext:value-type="string" table:number-columns-spanned="1" table:number-rows-spanned="2">
            <text:p>Unidad de Medida</text:p>
          </table:table-cell>
          <table:table-cell table:style-name="ce694" office:value-type="string" calcext:value-type="string" table:number-columns-spanned="1" table:number-rows-spanned="2">
            <text:p>Línea de Base</text:p>
          </table:table-cell>
          <table:table-cell table:style-name="ce694" office:value-type="string" calcext:value-type="string">
            <text:p>Meta al Finalizar Ciclo / Campaña / Año I</text:p>
          </table:table-cell>
          <table:table-cell table:style-name="ce694" office:value-type="string" calcext:value-type="string">
            <text:p>Meta al Finalizar Ciclo / Campaña / Año II</text:p>
          </table:table-cell>
          <table:table-cell table:style-name="ce694" office:value-type="string" calcext:value-type="string">
            <text:p>Meta al Finalizar Ciclo / Campaña / Año III</text:p>
          </table:table-cell>
          <table:table-cell table:style-name="ce694" office:value-type="string" calcext:value-type="string">
            <text:p>Meta al Finalizar Ciclo / Campaña / Año IV</text:p>
          </table:table-cell>
          <table:table-cell table:style-name="ce694" office:value-type="string" calcext:value-type="string">
            <text:p>Meta al Finalizar Ciclo / Campaña / Año V</text:p>
          </table:table-cell>
          <table:table-cell table:style-name="ce694" office:value-type="string" calcext:value-type="string">
            <text:p>Meta Total</text:p>
          </table:table-cell>
          <table:table-cell table:style-name="ce15"/>
          <table:table-cell table:number-columns-repeated="2"/>
        </table:table-row>
        <table:table-row table:style-name="ro21">
          <table:covered-table-cell table:number-columns-repeated="3" table:style-name="ce694"/>
          <table:table-cell table:number-columns-repeated="6" table:style-name="ce694" office:value-type="string" calcext:value-type="string">
            <text:p>Programada</text:p>
          </table:table-cell>
          <table:table-cell table:style-name="ce15"/>
          <table:table-cell table:number-columns-repeated="2"/>
        </table:table-row>
        <table:table-row table:style-name="ro21">
          <table:table-cell table:style-name="ce695" office:value-type="string" calcext:value-type="string">
            <text:p>Empleos generados</text:p>
          </table:table-cell>
          <table:table-cell table:style-name="ce698" office:value-type="string" calcext:value-type="string">
            <text:p>Und</text:p>
          </table:table-cell>
          <table:table-cell table:style-name="ce699" office:value-type="float" office:value="3" calcext:value-type="float">
            <text:p>3.00</text:p>
          </table:table-cell>
          <table:table-cell table:style-name="ce699" office:value-type="float" office:value="8" calcext:value-type="float">
            <text:p>8.00</text:p>
          </table:table-cell>
          <table:table-cell table:style-name="ce699" office:value-type="float" office:value="16" calcext:value-type="float">
            <text:p>16.00</text:p>
          </table:table-cell>
          <table:table-cell table:number-columns-repeated="4" table:style-name="ce699" office:value-type="float" office:value="26" calcext:value-type="float">
            <text:p>26.00</text:p>
          </table:table-cell>
          <table:table-cell table:style-name="ce15"/>
          <table:table-cell table:number-columns-repeated="2"/>
        </table:table-row>
        <table:table-row table:style-name="ro21">
          <table:table-cell table:style-name="ce695" office:value-type="string" calcext:value-type="string">
            <text:p>Rendimientos</text:p>
          </table:table-cell>
          <table:table-cell table:style-name="ce698" office:value-type="string" calcext:value-type="string">
            <text:p>Und/Galpon</text:p>
          </table:table-cell>
          <table:table-cell table:style-name="ce699" office:value-type="float" office:value="100" calcext:value-type="float">
            <text:p>100.00</text:p>
          </table:table-cell>
          <table:table-cell table:style-name="ce703" table:formula="of:=+[$OFERTA.O11]" office:value-type="float" office:value="1720.23034916842" calcext:value-type="float">
            <text:p>1720</text:p>
          </table:table-cell>
          <table:table-cell table:style-name="ce703" table:formula="of:=+[$OFERTA.O15]" office:value-type="float" office:value="5721.848" calcext:value-type="float">
            <text:p>5722</text:p>
          </table:table-cell>
          <table:table-cell table:style-name="ce703" table:formula="of:=+[$OFERTA.O19]" office:value-type="float" office:value="5721.848" calcext:value-type="float">
            <text:p>5722</text:p>
          </table:table-cell>
          <table:table-cell table:style-name="ce703" table:formula="of:=+[.F4]" office:value-type="float" office:value="5721.848" calcext:value-type="float">
            <text:p>5722</text:p>
          </table:table-cell>
          <table:table-cell table:style-name="ce703" table:formula="of:=+[.G4]" office:value-type="float" office:value="5721.848" calcext:value-type="float">
            <text:p>5722</text:p>
          </table:table-cell>
          <table:table-cell table:style-name="ce703" table:formula="of:=+[.H4]" office:value-type="float" office:value="5721.848" calcext:value-type="float">
            <text:p>5722</text:p>
          </table:table-cell>
          <table:table-cell table:style-name="ce15"/>
          <table:table-cell table:number-columns-repeated="2"/>
        </table:table-row>
        <table:table-row table:style-name="ro21">
          <table:table-cell table:style-name="ce695" office:value-type="string" calcext:value-type="string">
            <text:p>Producción</text:p>
          </table:table-cell>
          <table:table-cell table:style-name="ce698" office:value-type="string" calcext:value-type="string">
            <text:p>Und</text:p>
          </table:table-cell>
          <table:table-cell table:style-name="ce700" office:value-type="float" office:value="1241" calcext:value-type="float">
            <text:p>1241</text:p>
          </table:table-cell>
          <table:table-cell table:style-name="ce700" table:formula="of:=[.D4]*3" office:value-type="float" office:value="5160.69104750526" calcext:value-type="float">
            <text:p>5161</text:p>
          </table:table-cell>
          <table:table-cell table:style-name="ce700" table:formula="of:=[.E4]*3" office:value-type="float" office:value="17165.544" calcext:value-type="float">
            <text:p>17166</text:p>
          </table:table-cell>
          <table:table-cell table:style-name="ce700" table:formula="of:=[.F4]*3" office:value-type="float" office:value="17165.544" calcext:value-type="float">
            <text:p>17166</text:p>
          </table:table-cell>
          <table:table-cell table:style-name="ce700" table:formula="of:=[.G4]*3" office:value-type="float" office:value="17165.544" calcext:value-type="float">
            <text:p>17166</text:p>
          </table:table-cell>
          <table:table-cell table:style-name="ce700" table:formula="of:=[.H4]*3" office:value-type="float" office:value="17165.544" calcext:value-type="float">
            <text:p>17166</text:p>
          </table:table-cell>
          <table:table-cell table:style-name="ce700" table:formula="of:=[.I4]*3" office:value-type="float" office:value="17165.544" calcext:value-type="float">
            <text:p>17166</text:p>
          </table:table-cell>
          <table:table-cell table:style-name="ce15"/>
          <table:table-cell table:number-columns-repeated="2"/>
        </table:table-row>
        <table:table-row table:style-name="ro21">
          <table:table-cell table:style-name="ce695" office:value-type="string" calcext:value-type="string">
            <text:p>Costo Unitario</text:p>
          </table:table-cell>
          <table:table-cell table:style-name="ce698" office:value-type="string" calcext:value-type="string">
            <text:p>S/ </text:p>
          </table:table-cell>
          <table:table-cell table:style-name="ce699" office:value-type="float" office:value="8" calcext:value-type="float">
            <text:p>8.00</text:p>
          </table:table-cell>
          <table:table-cell table:style-name="ce699" table:formula="of:=+[$'ESTADO GyP'.I38]" office:value-type="float" office:value="14.5482473019209" calcext:value-type="float">
            <text:p>14.55</text:p>
          </table:table-cell>
          <table:table-cell table:style-name="ce699" table:formula="of:=+[$'ESTADO GyP'.J38]" office:value-type="float" office:value="10.3894470481099" calcext:value-type="float">
            <text:p>10.39</text:p>
          </table:table-cell>
          <table:table-cell table:style-name="ce699" table:formula="of:=+[$'ESTADO GyP'.K38]" office:value-type="float" office:value="10.3894470481099" calcext:value-type="float">
            <text:p>10.39</text:p>
          </table:table-cell>
          <table:table-cell table:style-name="ce699" table:formula="of:=+[$'ESTADO GyP'.L38]" office:value-type="float" office:value="10.3894470481099" calcext:value-type="float">
            <text:p>10.39</text:p>
          </table:table-cell>
          <table:table-cell table:style-name="ce699" table:formula="of:=+[$'ESTADO GyP'.M38]" office:value-type="float" office:value="10.3894470481099" calcext:value-type="float">
            <text:p>10.39</text:p>
          </table:table-cell>
          <table:table-cell table:style-name="ce699" table:formula="of:=+[.H6]" office:value-type="float" office:value="10.3894470481099" calcext:value-type="float">
            <text:p>10.39</text:p>
          </table:table-cell>
          <table:table-cell table:style-name="ce15"/>
          <table:table-cell table:number-columns-repeated="2"/>
        </table:table-row>
        <table:table-row table:style-name="ro21">
          <table:table-cell table:style-name="ce695" office:value-type="string" calcext:value-type="string">
            <text:p>Número de Unidades Vendidas</text:p>
          </table:table-cell>
          <table:table-cell table:style-name="ce698" office:value-type="string" calcext:value-type="string">
            <text:p>Und</text:p>
          </table:table-cell>
          <table:table-cell table:style-name="ce700" table:formula="of:=+[.C5]" office:value-type="float" office:value="1241" calcext:value-type="float">
            <text:p>1241</text:p>
          </table:table-cell>
          <table:table-cell table:style-name="ce700" table:formula="of:=+[.D5]" office:value-type="float" office:value="5160.69104750526" calcext:value-type="float">
            <text:p>5161</text:p>
          </table:table-cell>
          <table:table-cell table:style-name="ce700" table:formula="of:=+[.E5]" office:value-type="float" office:value="17165.544" calcext:value-type="float">
            <text:p>17166</text:p>
          </table:table-cell>
          <table:table-cell table:style-name="ce700" table:formula="of:=+[.F5]" office:value-type="float" office:value="17165.544" calcext:value-type="float">
            <text:p>17166</text:p>
          </table:table-cell>
          <table:table-cell table:style-name="ce700" table:formula="of:=+[.G5]" office:value-type="float" office:value="17165.544" calcext:value-type="float">
            <text:p>17166</text:p>
          </table:table-cell>
          <table:table-cell table:style-name="ce700" table:formula="of:=+[.H5]" office:value-type="float" office:value="17165.544" calcext:value-type="float">
            <text:p>17166</text:p>
          </table:table-cell>
          <table:table-cell table:style-name="ce700" table:formula="of:=+[.I5]" office:value-type="float" office:value="17165.544" calcext:value-type="float">
            <text:p>17166</text:p>
          </table:table-cell>
          <table:table-cell table:style-name="ce15"/>
          <table:table-cell table:number-columns-repeated="2"/>
        </table:table-row>
        <table:table-row table:style-name="ro21">
          <table:table-cell table:style-name="ce696" office:value-type="string" calcext:value-type="string">
            <text:p>Precio Unitario</text:p>
          </table:table-cell>
          <table:table-cell table:style-name="ce698" office:value-type="string" calcext:value-type="string">
            <text:p>S/</text:p>
          </table:table-cell>
          <table:table-cell table:style-name="ce701" office:value-type="float" office:value="16" calcext:value-type="float">
            <text:p>16.00</text:p>
          </table:table-cell>
          <table:table-cell table:style-name="ce701" table:formula="of:=+[$INGRESOS.B10]" office:value-type="float" office:value="18" calcext:value-type="float">
            <text:p>18.00</text:p>
          </table:table-cell>
          <table:table-cell table:style-name="ce701" table:formula="of:=+[$INGRESOS.C10]" office:value-type="float" office:value="18" calcext:value-type="float">
            <text:p>18.00</text:p>
          </table:table-cell>
          <table:table-cell table:style-name="ce701" table:formula="of:=+[$INGRESOS.D10]" office:value-type="float" office:value="18" calcext:value-type="float">
            <text:p>18.00</text:p>
          </table:table-cell>
          <table:table-cell table:style-name="ce701" table:formula="of:=+[$INGRESOS.E10]" office:value-type="float" office:value="18" calcext:value-type="float">
            <text:p>18.00</text:p>
          </table:table-cell>
          <table:table-cell table:style-name="ce701" table:formula="of:=+[$INGRESOS.F10]" office:value-type="float" office:value="18" calcext:value-type="float">
            <text:p>18.00</text:p>
          </table:table-cell>
          <table:table-cell table:style-name="ce701" table:formula="of:=+[.H8]" office:value-type="float" office:value="18" calcext:value-type="float">
            <text:p>18.00</text:p>
          </table:table-cell>
          <table:table-cell table:style-name="ce15"/>
          <table:table-cell table:number-columns-repeated="2"/>
        </table:table-row>
        <table:table-row table:style-name="ro21">
          <table:table-cell table:style-name="ce696" office:value-type="string" calcext:value-type="string">
            <text:p>Ingresos por Ventas</text:p>
          </table:table-cell>
          <table:table-cell table:style-name="ce698" office:value-type="string" calcext:value-type="string">
            <text:p>S/ </text:p>
          </table:table-cell>
          <table:table-cell table:style-name="ce701" table:formula="of:=PRODUCT([.C7:.C8])" office:value-type="float" office:value="19856" calcext:value-type="float">
            <text:p>19856.00</text:p>
          </table:table-cell>
          <table:table-cell table:style-name="ce701" table:formula="of:=PRODUCT([.D7:.D8])" office:value-type="float" office:value="92892.4388550946" calcext:value-type="float">
            <text:p>92892.44</text:p>
          </table:table-cell>
          <table:table-cell table:style-name="ce701" table:formula="of:=PRODUCT([.E7:.E8])" office:value-type="float" office:value="308979.792" calcext:value-type="float">
            <text:p>308979.79</text:p>
          </table:table-cell>
          <table:table-cell table:style-name="ce701" table:formula="of:=PRODUCT([.F7:.F8])" office:value-type="float" office:value="308979.792" calcext:value-type="float">
            <text:p>308979.79</text:p>
          </table:table-cell>
          <table:table-cell table:style-name="ce701" table:formula="of:=PRODUCT([.G7:.G8])" office:value-type="float" office:value="308979.792" calcext:value-type="float">
            <text:p>308979.79</text:p>
          </table:table-cell>
          <table:table-cell table:style-name="ce701" table:formula="of:=PRODUCT([.H7:.H8])" office:value-type="float" office:value="308979.792" calcext:value-type="float">
            <text:p>308979.79</text:p>
          </table:table-cell>
          <table:table-cell table:style-name="ce701" table:formula="of:=PRODUCT([.I7:.I8])" office:value-type="float" office:value="308979.792" calcext:value-type="float">
            <text:p>308979.79</text:p>
          </table:table-cell>
          <table:table-cell table:style-name="ce15"/>
          <table:table-cell table:number-columns-repeated="2"/>
        </table:table-row>
        <table:table-row table:style-name="ro21">
          <table:table-cell table:style-name="ce695" office:value-type="string" calcext:value-type="string">
            <text:p>Utilidades netas</text:p>
          </table:table-cell>
          <table:table-cell table:style-name="ce698" office:value-type="string" calcext:value-type="string">
            <text:p>S/</text:p>
          </table:table-cell>
          <table:table-cell table:style-name="ce701" office:value-type="float" office:value="100" calcext:value-type="float">
            <text:p>100.00</text:p>
          </table:table-cell>
          <table:table-cell table:style-name="ce701" table:formula="of:=+[$'ESTADO GyP'.I21]" office:value-type="float" office:value="-119.86070120423" calcext:value-type="float">
            <text:p>-119.86</text:p>
          </table:table-cell>
          <table:table-cell table:style-name="ce701" table:formula="of:=+[$'ESTADO GyP'.J21]" office:value-type="float" office:value="52804.4069596384" calcext:value-type="float">
            <text:p>52804.41</text:p>
          </table:table-cell>
          <table:table-cell table:style-name="ce701" table:formula="of:=+[.E10]" office:value-type="float" office:value="52804.4069596384" calcext:value-type="float">
            <text:p>52804.41</text:p>
          </table:table-cell>
          <table:table-cell table:style-name="ce701" table:formula="of:=+[.F10]" office:value-type="float" office:value="52804.4069596384" calcext:value-type="float">
            <text:p>52804.41</text:p>
          </table:table-cell>
          <table:table-cell table:style-name="ce701" table:formula="of:=+[.G10]" office:value-type="float" office:value="52804.4069596384" calcext:value-type="float">
            <text:p>52804.41</text:p>
          </table:table-cell>
          <table:table-cell table:style-name="ce699" table:formula="of:=+[.H10]" office:value-type="float" office:value="52804.4069596384" calcext:value-type="float">
            <text:p>52804.41</text:p>
          </table:table-cell>
          <table:table-cell table:style-name="ce15"/>
          <table:table-cell table:number-columns-repeated="2"/>
        </table:table-row>
        <table:table-row table:style-name="ro21">
          <table:table-cell table:style-name="ce695" office:value-type="string" calcext:value-type="string">
            <text:p>Número de socios</text:p>
          </table:table-cell>
          <table:table-cell table:style-name="ce698" office:value-type="string" calcext:value-type="string">
            <text:p>Und</text:p>
          </table:table-cell>
          <table:table-cell table:style-name="ce701" office:value-type="float" office:value="15" calcext:value-type="float">
            <text:p>15.00</text:p>
          </table:table-cell>
          <table:table-cell table:style-name="ce701" office:value-type="float" office:value="29" calcext:value-type="float">
            <text:p>29.00</text:p>
          </table:table-cell>
          <table:table-cell table:style-name="ce701" table:formula="of:=[.D11]" office:value-type="float" office:value="29" calcext:value-type="float">
            <text:p>29.00</text:p>
          </table:table-cell>
          <table:table-cell table:style-name="ce701" table:formula="of:=[.E11]" office:value-type="float" office:value="29" calcext:value-type="float">
            <text:p>29.00</text:p>
          </table:table-cell>
          <table:table-cell table:style-name="ce701" table:formula="of:=[.F11]" office:value-type="float" office:value="29" calcext:value-type="float">
            <text:p>29.00</text:p>
          </table:table-cell>
          <table:table-cell table:style-name="ce701" table:formula="of:=[.G11]" office:value-type="float" office:value="29" calcext:value-type="float">
            <text:p>29.00</text:p>
          </table:table-cell>
          <table:table-cell table:style-name="ce701" table:formula="of:=[.H11]" office:value-type="float" office:value="29" calcext:value-type="float">
            <text:p>29.00</text:p>
          </table:table-cell>
          <table:table-cell table:style-name="ce15"/>
          <table:table-cell table:number-columns-repeated="2"/>
        </table:table-row>
        <table:table-row table:style-name="ro21">
          <table:table-cell table:style-name="ce695" office:value-type="string" calcext:value-type="string">
            <text:p>Utilidad promedio por cada socio del AEO*</text:p>
          </table:table-cell>
          <table:table-cell table:style-name="ce696"/>
          <table:table-cell table:style-name="ce701" table:formula="of:=[.C10]/[.C11]" office:value-type="float" office:value="6.66666666666667" calcext:value-type="float">
            <text:p>6.67</text:p>
          </table:table-cell>
          <table:table-cell table:style-name="ce701" table:formula="of:=[.D10]/[.D11]" office:value-type="float" office:value="-4.13312762773207" calcext:value-type="float">
            <text:p>-4.13</text:p>
          </table:table-cell>
          <table:table-cell table:style-name="ce701" table:formula="of:=[.E10]/[.E11]" office:value-type="float" office:value="1820.84161929788" calcext:value-type="float">
            <text:p>1820.84</text:p>
          </table:table-cell>
          <table:table-cell table:style-name="ce701" table:formula="of:=[.F10]/[.F11]" office:value-type="float" office:value="1820.84161929788" calcext:value-type="float">
            <text:p>1820.84</text:p>
          </table:table-cell>
          <table:table-cell table:style-name="ce701" table:formula="of:=[.G10]/[.G11]" office:value-type="float" office:value="1820.84161929788" calcext:value-type="float">
            <text:p>1820.84</text:p>
          </table:table-cell>
          <table:table-cell table:style-name="ce701" table:formula="of:=[.H10]/[.H11]" office:value-type="float" office:value="1820.84161929788" calcext:value-type="float">
            <text:p>1820.84</text:p>
          </table:table-cell>
          <table:table-cell table:style-name="ce701" table:formula="of:=[.I10]/[.I11]" office:value-type="float" office:value="1820.84161929788" calcext:value-type="float">
            <text:p>1820.84</text:p>
          </table:table-cell>
          <table:table-cell table:style-name="ce15"/>
          <table:table-cell table:number-columns-repeated="2"/>
        </table:table-row>
        <table:table-row table:style-name="ro21">
          <table:table-cell table:style-name="ce695" office:value-type="string" calcext:value-type="string">
            <text:p>Rentabilidad de las Ventas **</text:p>
          </table:table-cell>
          <table:table-cell table:style-name="ce696"/>
          <table:table-cell table:style-name="ce702" table:formula="of:=[.C10]/[.C9]" office:value-type="percentage" office:value="0.00503626107977438" calcext:value-type="percentage">
            <text:p>0.50 %</text:p>
          </table:table-cell>
          <table:table-cell table:style-name="ce702" table:formula="of:=[.D10]/[.D9]" office:value-type="percentage" office:value="-0.00129031708803775" calcext:value-type="percentage">
            <text:p>-0.13 %</text:p>
          </table:table-cell>
          <table:table-cell table:style-name="ce702" table:formula="of:=[.E10]/[.E9]" office:value-type="percentage" office:value="0.170899224890534" calcext:value-type="percentage">
            <text:p>17.09 %</text:p>
          </table:table-cell>
          <table:table-cell table:style-name="ce702" table:formula="of:=[.F10]/[.F9]" office:value-type="percentage" office:value="0.170899224890534" calcext:value-type="percentage">
            <text:p>17.09 %</text:p>
          </table:table-cell>
          <table:table-cell table:style-name="ce702" table:formula="of:=[.G10]/[.G9]" office:value-type="percentage" office:value="0.170899224890534" calcext:value-type="percentage">
            <text:p>17.09 %</text:p>
          </table:table-cell>
          <table:table-cell table:style-name="ce702" table:formula="of:=[.H10]/[.H9]" office:value-type="percentage" office:value="0.170899224890534" calcext:value-type="percentage">
            <text:p>17.09 %</text:p>
          </table:table-cell>
          <table:table-cell table:style-name="ce702" table:formula="of:=[.I10]/[.I9]" office:value-type="percentage" office:value="0.170899224890534" calcext:value-type="percentage">
            <text:p>17.09 %</text:p>
          </table:table-cell>
          <table:table-cell table:style-name="ce15"/>
          <table:table-cell table:number-columns-repeated="2"/>
        </table:table-row>
        <table:table-row table:style-name="ro21">
          <table:table-cell table:style-name="ce695" office:value-type="string" calcext:value-type="string">
            <text:p>Rentabilidad de la Inversión***</text:p>
          </table:table-cell>
          <table:table-cell table:style-name="ce696"/>
          <table:table-cell table:style-name="ce701" table:formula="of:=([.C9]-[.C6]*[.C7])/[.$L$16]" office:value-type="float" office:value="0.0630424396785873" calcext:value-type="float">
            <text:p>0.06</text:p>
          </table:table-cell>
          <table:table-cell table:style-name="ce701" table:formula="of:=([.D9]-[.D6]*[.D7])/[.$L$16]" office:value-type="float" office:value="0.113114629208708" calcext:value-type="float">
            <text:p>0.11</text:p>
          </table:table-cell>
          <table:table-cell table:style-name="ce701" table:formula="of:=([.E9]-[.E6]*[.E7])/[.$L$16]" office:value-type="float" office:value="0.829554696555226" calcext:value-type="float">
            <text:p>0.83</text:p>
          </table:table-cell>
          <table:table-cell table:style-name="ce701" table:formula="of:=([.F9]-[.F6]*[.F7])/[.$L$16]" office:value-type="float" office:value="0.829554696555226" calcext:value-type="float">
            <text:p>0.83</text:p>
          </table:table-cell>
          <table:table-cell table:style-name="ce701" table:formula="of:=([.G9]-[.G6]*[.G7])/[.$L$16]" office:value-type="float" office:value="0.829554696555226" calcext:value-type="float">
            <text:p>0.83</text:p>
          </table:table-cell>
          <table:table-cell table:style-name="ce701" table:formula="of:=([.H9]-[.H6]*[.H7])/[.$L$16]" office:value-type="float" office:value="0.829554696555226" calcext:value-type="float">
            <text:p>0.83</text:p>
          </table:table-cell>
          <table:table-cell table:style-name="ce701" table:formula="of:=([.I9]-[.I6]*[.I7])/[.$L$16]" office:value-type="float" office:value="0.829554696555226" calcext:value-type="float">
            <text:p>0.83</text:p>
          </table:table-cell>
          <table:table-cell table:style-name="ce15"/>
          <table:table-cell table:number-columns-repeated="2"/>
        </table:table-row>
        <table:table-row table:style-name="ro21">
          <table:table-cell table:style-name="ce695" office:value-type="string" calcext:value-type="string">
            <text:p>Ingresos promedio por cada socio del AEO ****</text:p>
          </table:table-cell>
          <table:table-cell table:style-name="ce698"/>
          <table:table-cell table:style-name="ce701" table:formula="of:=[.C9]/[.C11]" office:value-type="float" office:value="1323.73333333333" calcext:value-type="float">
            <text:p>1323.73</text:p>
          </table:table-cell>
          <table:table-cell table:style-name="ce701" table:formula="of:=[.D9]/[.D11]" office:value-type="float" office:value="3203.1875467274" calcext:value-type="float">
            <text:p>3203.19</text:p>
          </table:table-cell>
          <table:table-cell table:style-name="ce701" table:formula="of:=[.E9]/[.E11]" office:value-type="float" office:value="10654.4755862069" calcext:value-type="float">
            <text:p>10654.48</text:p>
          </table:table-cell>
          <table:table-cell table:style-name="ce701" table:formula="of:=[.F9]/[.F11]" office:value-type="float" office:value="10654.4755862069" calcext:value-type="float">
            <text:p>10654.48</text:p>
          </table:table-cell>
          <table:table-cell table:style-name="ce701" table:formula="of:=[.G9]/[.G11]" office:value-type="float" office:value="10654.4755862069" calcext:value-type="float">
            <text:p>10654.48</text:p>
          </table:table-cell>
          <table:table-cell table:style-name="ce701" table:formula="of:=[.H9]/[.H11]" office:value-type="float" office:value="10654.4755862069" calcext:value-type="float">
            <text:p>10654.48</text:p>
          </table:table-cell>
          <table:table-cell table:style-name="ce701" table:formula="of:=[.I9]/[.I11]" office:value-type="float" office:value="10654.4755862069" calcext:value-type="float">
            <text:p>10654.48</text:p>
          </table:table-cell>
          <table:table-cell table:style-name="ce15"/>
          <table:table-cell table:number-columns-repeated="2"/>
        </table:table-row>
        <table:table-row table:style-name="ro9">
          <table:table-cell table:style-name="ce697" office:value-type="string" calcext:value-type="string" table:number-columns-spanned="9" table:number-rows-spanned="1">
            <text:p>* Se obtiene de dividir la utilidad total entre el número de productores que integran un AEO.</text:p>
          </table:table-cell>
          <table:covered-table-cell table:number-columns-repeated="8" table:style-name="ce697"/>
          <table:table-cell table:style-name="ce15"/>
          <table:table-cell table:style-name="ce704" office:value-type="string" calcext:value-type="string">
            <text:p>Inv. Total</text:p>
          </table:table-cell>
          <table:table-cell table:style-name="ce705" table:formula="of:=+[$INVERSION.F16]" office:value-type="float" office:value="157481.215045237" calcext:value-type="float">
            <text:p>157,481.22</text:p>
          </table:table-cell>
        </table:table-row>
        <table:table-row table:style-name="ro9">
          <table:table-cell table:style-name="ce697" office:value-type="string" calcext:value-type="string" table:number-columns-spanned="9" table:number-rows-spanned="1">
            <text:p>** Se obtiene dividiendo las Utilidades Generadas entre los Ingresos por Ventas.</text:p>
          </table:table-cell>
          <table:covered-table-cell table:number-columns-repeated="8" table:style-name="ce697"/>
          <table:table-cell table:style-name="ce15"/>
          <table:table-cell table:number-columns-repeated="2"/>
        </table:table-row>
        <table:table-row table:style-name="ro9">
          <table:table-cell table:style-name="ce697" office:value-type="string" calcext:value-type="string" table:number-columns-spanned="9" table:number-rows-spanned="1">
            <text:p>*** Se obtiene dividiendo la diferencia entre Ingresos por Ventas y el producto del costo unitario por unidades vendidas, entre el total de la inversión de la propuesta productiva.</text:p>
          </table:table-cell>
          <table:covered-table-cell table:number-columns-repeated="8" table:style-name="ce697"/>
          <table:table-cell table:style-name="ce15"/>
          <table:table-cell table:number-columns-repeated="2"/>
        </table:table-row>
        <table:table-row table:style-name="ro9">
          <table:table-cell table:style-name="ce697" office:value-type="string" calcext:value-type="string" table:number-columns-spanned="9" table:number-rows-spanned="1">
            <text:p>**** Se obtiene dividiendo los Ingresos por Ventas entre el número de productores que integran un AEO.</text:p>
          </table:table-cell>
          <table:covered-table-cell table:number-columns-repeated="8" table:style-name="ce697"/>
          <table:table-cell table:style-name="ce15"/>
          <table:table-cell table:number-columns-repeated="2"/>
        </table:table-row>
        <table:table-row table:style-name="ro9">
          <table:table-cell table:style-name="ce697" office:value-type="string" calcext:value-type="string" table:number-columns-spanned="9" table:number-rows-spanned="1">
            <text:p>El costo de mano de obra se obtiene de multiplicar el costo unitario de la mano de obra por el número de unidades vendidas</text:p>
          </table:table-cell>
          <table:covered-table-cell table:number-columns-repeated="8" table:style-name="ce697"/>
          <table:table-cell table:style-name="ce15"/>
          <table:table-cell table:number-columns-repeated="2"/>
        </table:table-row>
        <table:table-row table:style-name="ro9">
          <table:table-cell table:style-name="ce697" office:value-type="string" calcext:value-type="string" table:number-columns-spanned="9" table:number-rows-spanned="1">
            <text:p>Los últimos tres indicadores se levantan a partir del año 3 y hasta el año 5 de manera anual, por ser considerados resultados Finales o de Impacto.</text:p>
          </table:table-cell>
          <table:covered-table-cell table:number-columns-repeated="8" table:style-name="ce697"/>
          <table:table-cell table:style-name="ce15"/>
          <table:table-cell table:number-columns-repeated="2"/>
        </table:table-row>
        <table:table-row table:style-name="ro21">
          <table:table-cell table:number-columns-repeated="12"/>
        </table:table-row>
        <table:table-row table:style-name="ro21">
          <table:table-cell table:number-columns-repeated="3"/>
          <table:table-cell office:value-type="float" office:value="3254.97173580515" calcext:value-type="float">
            <text:p>3254.97173580515</text:p>
          </table:table-cell>
          <table:table-cell table:number-columns-repeated="3" office:value-type="float" office:value="65892.9181191187" calcext:value-type="float">
            <text:p>65892.9181191187</text:p>
          </table:table-cell>
          <table:table-cell office:value-type="float" office:value="139350.031254712" calcext:value-type="float">
            <text:p>139350.031254712</text:p>
          </table:table-cell>
          <table:table-cell table:number-columns-repeated="4"/>
        </table:table-row>
        <table:table-row table:style-name="ro21" table:number-rows-repeated="1048552">
          <table:table-cell table:number-columns-repeated="12"/>
        </table:table-row>
        <table:table-row table:style-name="ro21">
          <table:table-cell table:number-columns-repeated="12"/>
        </table:table-row>
        <table:named-expressions>
          <table:named-range table:name="_xlnm.Print_Area" table:base-cell-address="$POBLACION.$A$1" table:cell-range-address="$INDICADORES.$A$1:.$I$21" table:range-usable-as="print-range"/>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Narrow" svg:font-family="'Arial Narrow'"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3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3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percentage-style style:name="N134">
      <number:number number:decimal-places="0" number:min-decimal-places="0" number:min-integer-digits="1"/>
      <number:text> %</number:text>
    </number:percentage-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2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2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percentage-style style:name="N135">
      <number:number number:decimal-places="2" number:min-decimal-places="2" number:min-integer-digits="1"/>
      <number:text> %</number:text>
    </number:percentage-style>
    <number:number-style style:name="N136">
      <number:number number:decimal-places="1" number:min-decimal-places="1" number:min-integer-digits="1"/>
    </number:number-style>
    <number:number-style style:name="N137">
      <number:number number:decimal-places="3" number:min-decimal-places="3" number:min-integer-digits="1"/>
    </number:number-style>
    <number:number-style style:name="N138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38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38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38">
      <number:text loext:blank-width-char=" "> </number:text>
      <number:text-content/>
      <number:text loext:blank-width-char=" "> </number:text>
      <style:map style:condition="value()&gt;0" style:apply-style-name="N138P0"/>
      <style:map style:condition="value()&lt;0" style:apply-style-name="N138P1"/>
      <style:map style:condition="value()=0" style:apply-style-name="N138P2"/>
    </number:text-style>
    <number:number-style style:name="N13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9P1" style:volatile="true">
      <number:text>-</number:text>
      <number:fill-character> </number:fill-character>
      <number:number number:decimal-places="2" number:min-decimal-places="2" number:min-integer-digits="1" number:grouping="true"/>
      <number:text loext:blank-width-char="-"> </number:text>
    </number:number-style>
    <number:number-style style:name="N13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0">
      <number:number number:decimal-places="4" number:min-decimal-places="4" number:min-integer-digits="1"/>
    </number:number-style>
    <number:number-style style:name="N141P0" style:volatile="true">
      <number:text loext:blank-width-char=" "> </number:text>
      <number:fill-character> </number:fill-character>
      <number:number number:decimal-places="5" number:min-decimal-places="5" number:min-integer-digits="1" number:grouping="true"/>
      <number:text loext:blank-width-char=" "> </number:text>
    </number:number-style>
    <number:number-style style:name="N141P1" style:volatile="true">
      <number:text loext:blank-width-char=" "> </number:text>
      <number:fill-character> </number:fill-character>
      <number:text>-</number:text>
      <number:number number:decimal-places="5" number:min-decimal-places="5" number:min-integer-digits="1" number:grouping="true"/>
      <number:text loext:blank-width-char=" "> </number:text>
    </number:number-style>
    <number:number-style style:name="N141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1">
      <number:text loext:blank-width-char=" "> </number:text>
      <number:text-content/>
      <number:text loext:blank-width-char=" "> </number:text>
      <style:map style:condition="value()&gt;0" style:apply-style-name="N141P0"/>
      <style:map style:condition="value()&lt;0" style:apply-style-name="N141P1"/>
      <style:map style:condition="value()=0" style:apply-style-name="N141P2"/>
    </number:text-style>
    <number:number-style style:name="N142P0" style:volatile="true">
      <number:text loext:blank-width-char="("> </number:text>
      <number:fill-character> </number:fill-character>
      <number:number number:decimal-places="4" number:min-decimal-places="4" number:min-integer-digits="1" number:grouping="true"/>
      <number:text loext:blank-width-char=")"> </number:text>
    </number:number-style>
    <number:number-style style:name="N142P1" style:volatile="true">
      <number:text loext:blank-width-char="("> </number:text>
      <number:fill-character> </number:fill-character>
      <number:text>(</number:text>
      <number:number number:decimal-places="4" number:min-decimal-places="4" number:min-integer-digits="1" number:grouping="true"/>
      <number:text>)</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3P0" style:volatile="true">
      <number:text>S/. </number:text>
      <number:number number:decimal-places="2" number:min-decimal-places="2" number:min-integer-digits="1" number:grouping="true"/>
    </number:number-style>
    <number:number-style style:name="N143">
      <style:text-properties fo:color="#ff0000"/>
      <number:text>S/. -</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text loext:blank-width-char=" "> </number:text>
    </number:number-style>
    <number:number-style style:name="N144">
      <style:text-properties fo:color="#ff0000"/>
      <number:text>-</number:text>
      <number:number number:decimal-places="2" number:min-decimal-places="2" number:min-integer-digits="1" number:grouping="true"/>
      <number:text> </number:text>
      <style:map style:condition="value()&gt;=0" style:apply-style-name="N144P0"/>
    </number:number-style>
    <number:number-style style:name="N14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5P1" style:volatile="true">
      <number:text>-</number:text>
      <number:fill-character> </number:fill-character>
      <number:number number:decimal-places="2" number:min-decimal-places="2" number:min-integer-digits="1" number:grouping="true"/>
      <number:text loext:blank-width-char="€1_-3">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 </number:text>
      <number:fill-character> </number:fill-character>
      <number:number number:decimal-places="4" number:min-decimal-places="4" number:min-integer-digits="1" number:grouping="true"/>
      <number:text loext:blank-width-char=" "> </number:text>
    </number:number-style>
    <number:number-style style:name="N146P1" style:volatile="true">
      <number:text loext:blank-width-char=" "> </number:text>
      <number:fill-character> </number:fill-character>
      <number:text>-</number:text>
      <number:number number:decimal-places="4" number:min-decimal-places="4" number:min-integer-digits="1" number:grouping="true"/>
      <number:text loext:blank-width-char=" "> </number:text>
    </number:number-style>
    <number:number-style style:name="N146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6">
      <number:text loext:blank-width-char=" "> </number:text>
      <number:text-content/>
      <number:text loext:blank-width-char=" "> </number:text>
      <style:map style:condition="value()&gt;0" style:apply-style-name="N146P0"/>
      <style:map style:condition="value()&lt;0" style:apply-style-name="N146P1"/>
      <style:map style:condition="value()=0" style:apply-style-name="N146P2"/>
    </number:text-style>
    <number:number-style style:name="N147P0" style:volatile="true">
      <number:text loext:blank-width-char="("> </number:text>
      <number:fill-character> </number:fill-character>
      <number:number number:decimal-places="5" number:min-decimal-places="5" number:min-integer-digits="1" number:grouping="true"/>
      <number:text loext:blank-width-char=")"> </number:text>
    </number:number-style>
    <number:number-style style:name="N147P1" style:volatile="true">
      <number:text loext:blank-width-char="("> </number:text>
      <number:fill-character> </number:fill-character>
      <number:text>(</number:text>
      <number:number number:decimal-places="5" number:min-decimal-places="5" number:min-integer-digits="1" number:grouping="true"/>
      <number:text>)</number:text>
    </number:number-style>
    <number:number-style style:name="N14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4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8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number-style style:name="N149P0" style:volatile="true">
      <number:text loext:blank-width-char="("> </number:text>
      <number:fill-character> </number:fill-character>
      <number:number number:decimal-places="3" number:min-decimal-places="3" number:min-integer-digits="1" number:grouping="true"/>
      <number:text loext:blank-width-char=")"> </number:text>
    </number:number-style>
    <number:number-style style:name="N149P1" style:volatile="true">
      <number:text loext:blank-width-char="("> </number:text>
      <number:fill-character> </number:fill-character>
      <number:text>(</number:text>
      <number:number number:decimal-places="3" number:min-decimal-places="3" number:min-integer-digits="1" number:grouping="true"/>
      <number:text>)</number:text>
    </number:number-style>
    <number:number-style style:name="N14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
      <number:number number:decimal-places="5" number:min-decimal-places="5" number:min-integer-digits="1"/>
    </number:number-style>
    <number:number-style style:name="N151P0" style:volatile="true">
      <number:text loext:blank-width-char=" "> </number:text>
      <number:fill-character> </number:fill-character>
      <number:number number:decimal-places="6" number:min-decimal-places="6" number:min-integer-digits="1" number:grouping="true"/>
      <number:text loext:blank-width-char=" "> </number:text>
    </number:number-style>
    <number:number-style style:name="N151P1" style:volatile="true">
      <number:text loext:blank-width-char=" "> </number:text>
      <number:fill-character> </number:fill-character>
      <number:text>-</number:text>
      <number:number number:decimal-places="6" number:min-decimal-places="6" number:min-integer-digits="1" number:grouping="true"/>
      <number:text loext:blank-width-char=" "> </number:text>
    </number:number-style>
    <number:number-style style:name="N151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51">
      <number:text loext:blank-width-char=" "> </number:text>
      <number:text-content/>
      <number:text loext:blank-width-char=" "> </number:text>
      <style:map style:condition="value()&gt;0" style:apply-style-name="N151P0"/>
      <style:map style:condition="value()&lt;0" style:apply-style-name="N151P1"/>
      <style:map style:condition="value()=0" style:apply-style-name="N151P2"/>
    </number:text-style>
    <number:number-style style:name="N152">
      <number:text>S/. </number:text>
      <number:number number:decimal-places="2" number:min-decimal-places="2" number:min-integer-digits="1" number:grouping="true"/>
    </number:number-style>
    <number:number-style style:name="N153">
      <number:number number:decimal-places="7" number:min-decimal-places="7" number:min-integer-digits="1"/>
    </number:number-style>
    <number:number-style style:name="N154P0" style:volatile="true">
      <number:text loext:blank-width-char="("> </number:text>
      <number:fill-character> </number:fill-character>
      <number:number number:decimal-places="6" number:min-decimal-places="6" number:min-integer-digits="1" number:grouping="true"/>
      <number:text loext:blank-width-char=")"> </number:text>
    </number:number-style>
    <number:number-style style:name="N154P1" style:volatile="true">
      <number:text loext:blank-width-char="("> </number:text>
      <number:fill-character> </number:fill-character>
      <number:text>(</number:text>
      <number:number number:decimal-places="6" number:min-decimal-places="6" number:min-integer-digits="1" number:grouping="true"/>
      <number:text>)</number:text>
    </number:number-style>
    <number:number-style style:name="N15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4">
      <number:text loext:blank-width-char="("> </number:text>
      <number:text-content/>
      <number:text loext:blank-width-char=")"> </number:text>
      <style:map style:condition="value()&gt;0" style:apply-style-name="N154P0"/>
      <style:map style:condition="value()&lt;0" style:apply-style-name="N154P1"/>
      <style:map style:condition="value()=0" style:apply-style-name="N154P2"/>
    </number:text-style>
    <style:style style:name="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25__20_-_20_Énfasis1_20_2" style:display-name="20% - Énfasis1 2" style:family="table-cell" style:parent-style-name="Default" style:data-style-name="N0">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_20_2" style:display-name="20% - Énfasis2 2" style:family="table-cell" style:parent-style-name="Default" style:data-style-name="N0">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_20_2" style:display-name="20% - Énfasis3 2" style:family="table-cell" style:parent-style-name="Default" style:data-style-name="N0">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_20_2" style:display-name="20% - Énfasis4 2" style:family="table-cell" style:parent-style-name="Default" style:data-style-name="N0">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_20_2" style:display-name="40% - Énfasis3 2" style:family="table-cell" style:parent-style-name="Default" style:data-style-name="N0">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_20_2" style:display-name="60% - Énfasis3 2" style:family="table-cell" style:parent-style-name="Default" style:data-style-name="N0">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_20_2" style:display-name="60% - Énfasis4 2" style:family="table-cell" style:parent-style-name="Default" style:data-style-name="N0">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_20_2" style:display-name="60% - Énfasis6 2" style:family="table-cell" style:parent-style-name="Default" style:data-style-name="N0">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ipervínculo_20_2" style:display-name="Hipervínculo 2" style:family="table-cell" style:parent-style-name="Default" style:data-style-name="N0">
      <style:table-cell-properties fo:background-color="transparen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33">
      <style:table-cell-properties fo:background-color="transparent"/>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as_20_2" style:display-name="Notas 2" style:family="table-cell" style:parent-style-name="Default" style:data-style-name="N0">
      <style:table-cell-properties fo:background-color="#ffffcc" style:diagonal-bl-tr="none" style:diagonal-tl-br="none" fo:border="0.74pt solid #c0c0c0"/>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Porcentaje_20_2" style:display-name="Porcentaje 2" style:family="table-cell" style:parent-style-name="Default" style:data-style-name="N134">
      <style:table-cell-properties fo:background-color="transparent"/>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Excel_20_Built-in_20_Comma" style:display-name="Excel Built-in Comma" style:family="table-cell" style:parent-style-name="Default" style:data-style-name="N133">
      <style:table-cell-properties fo:background-color="transparent"/>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Excel_20_Built-in_20_Percent" style:display-name="Excel Built-in Percent" style:family="table-cell" style:parent-style-name="Default" style:data-style-name="N134">
      <style:table-cell-properties fo:background-color="transparent"/>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draw:marker draw:name="Puntas_20_de_20_flecha_20_1" draw:display-name="Puntas de flecha 1" svg:viewBox="0 0 20 30" svg:d="M10 0l-10 30h20z"/>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76%"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6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3.5cm" fo:margin-bottom="2.499cm" fo:margin-left="0.7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9.7cm" fo:page-height="21.001cm" style:num-format="1" style:print-orientation="landscape" fo:margin-top="1.168cm" fo:margin-bottom="2.54cm" fo:margin-left="1.372cm" fo:margin-right="1.905cm" style:print-page-order="ttb" style:first-page-number="continue" style:scale-to="59%"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5.944cm" fo:margin-bottom="2.54cm" fo:margin-left="1.016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2.54cm" fo:margin-bottom="2.54cm" fo:margin-left="1.905cm" fo:margin-right="1.905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1.499cm" fo:margin-bottom="2.54cm" fo:margin-left="0.711cm" fo:margin-right="1.905cm" style:print-page-order="ttb" style:first-page-number="continue" style:scale-to="7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2">
      <style:page-layout-properties fo:page-width="29.7cm" fo:page-height="21.001cm" style:num-format="1" style:print-orientation="landscape" fo:margin-top="2.499cm" fo:margin-bottom="2.499cm" fo:margin-left="1.9cm" fo:margin-right="1.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3">
      <style:page-layout-properties fo:page-width="21.001cm" fo:page-height="29.7cm" style:num-format="1" style:print-orientation="portrait" fo:margin-top="2.54cm" fo:margin-bottom="2.54cm" fo:margin-left="1.905cm" fo:margin-right="1.905cm" style:print-page-order="ttb" style:first-page-number="continue" style:scale-to="4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4">
      <style:page-layout-properties fo:page-width="29.7cm" fo:page-height="21.001cm" style:num-format="1" style:print-orientation="landscape" fo:margin-top="2.896cm" fo:margin-bottom="2.54cm" fo:margin-left="2.591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5">
      <style:page-layout-properties fo:page-width="21.001cm" fo:page-height="29.7cm" style:num-format="1" style:print-orientation="portrait" fo:margin-top="6.426cm" fo:margin-bottom="2.54cm" fo:margin-left="2.032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6">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7">
      <style:page-layout-properties fo:page-width="21.001cm" fo:page-height="29.7cm" style:num-format="1" style:print-orientation="portrait" fo:margin-top="2.54cm" fo:margin-bottom="2.54cm" fo:margin-left="1.905cm" fo:margin-right="1.905cm" style:print-page-order="ttb" style:first-page-number="continue" style:scale-to="89%"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8">
      <style:page-layout-properties fo:page-width="21.59cm" fo:page-height="27.94cm" style:num-format="1" style:print-orientation="portrait" fo:margin-top="2.54cm" fo:margin-bottom="2.54cm" fo:margin-left="1.905cm" fo:margin-right="1.905cm" style:print-page-order="ttb" style:first-page-number="continue" style:scale-to="78%"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9">
      <style:page-layout-properties fo:page-width="29.7cm" fo:page-height="21.001cm" style:num-format="1" style:print-orientation="landscape" fo:margin-top="2.413cm" fo:margin-bottom="2.54cm" fo:margin-left="0.965cm" fo:margin-right="1.905cm" style:print-page-order="ttb" style:first-page-number="continue" style:scale-to="78%"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0">
      <style:page-layout-properties fo:page-width="21.001cm" fo:page-height="29.7cm" style:num-format="1" style:print-orientation="portrait" fo:margin-top="2.54cm" fo:margin-bottom="2.54cm" fo:margin-left="1.905cm" fo:margin-right="1.905cm" style:print-page-order="ttb" style:first-page-number="continue" style:scale-to="63%"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1">
      <style:page-layout-properties fo:page-width="21.59cm" fo:page-height="27.94cm" style:num-format="1" style:print-orientation="portrait" fo:margin-top="1.905cm" fo:margin-bottom="1.905cm" fo:margin-left="1.778cm" fo:margin-right="1.778cm" style:print-page-order="ttb" style:first-page-number="continue" style:scale-to="7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POBLACION" style:display-name="PageStyle_POBLAC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PLAN_20_DE_20_PRODUCCION" style:display-name="PageStyle_PLAN DE PRODUCCION" style:page-layout-name="Mpm4">
      <style:header style:display="false"/>
      <style:header-left style:display="false"/>
      <style:header-first style:display="false"/>
      <style:footer style:display="false"/>
      <style:footer-left style:display="false"/>
      <style:footer-first style:display="false"/>
    </style:master-page>
    <style:master-page style:name="PageStyle_5f_BRECHA" style:display-name="PageStyle_BRECHA" style:page-layout-name="Mpm5">
      <style:header style:display="false"/>
      <style:header-left style:display="false"/>
      <style:header-first style:display="false"/>
      <style:footer style:display="false"/>
      <style:footer-left style:display="false"/>
      <style:footer-first style:display="false"/>
    </style:master-page>
    <style:master-page style:name="PageStyle_5f_MUEB_2c__20_MAQ_2c_EQUIP" style:display-name="PageStyle_MUEB, MAQ,EQUIP" style:page-layout-name="Mpm6">
      <style:header style:display="false"/>
      <style:header-left style:display="false"/>
      <style:header-first style:display="false"/>
      <style:footer style:display="false"/>
      <style:footer-left style:display="false"/>
      <style:footer-first style:display="false"/>
    </style:master-page>
    <style:master-page style:name="PageStyle_5f_TERREN_20_Y_20_OBR_20_CIV" style:display-name="PageStyle_TERREN Y OBR CIV" style:page-layout-name="Mpm7">
      <style:header style:display="false"/>
      <style:header-left style:display="false"/>
      <style:header-first style:display="false"/>
      <style:footer style:display="false"/>
      <style:footer-left style:display="false"/>
      <style:footer-first style:display="false"/>
    </style:master-page>
    <style:master-page style:name="PageStyle_5f_INVERS_20_FIJ_20_INTANG" style:display-name="PageStyle_INVERS FIJ INTANG" style:page-layout-name="Mpm8">
      <style:header style:display="false"/>
      <style:header-left style:display="false"/>
      <style:header-first style:display="false"/>
      <style:footer style:display="false"/>
      <style:footer-left style:display="false"/>
      <style:footer-first style:display="false"/>
    </style:master-page>
    <style:master-page style:name="PageStyle_5f_DEMANDA" style:display-name="PageStyle_DEMANDA" style:page-layout-name="Mpm5">
      <style:header style:display="false"/>
      <style:header-left style:display="false"/>
      <style:header-first style:display="false"/>
      <style:footer style:display="false"/>
      <style:footer-left style:display="false"/>
      <style:footer-first style:display="false"/>
    </style:master-page>
    <style:master-page style:name="PageStyle_5f_OFERTA" style:display-name="PageStyle_OFERTA" style:page-layout-name="Mpm9">
      <style:header style:display="false"/>
      <style:header-left style:display="false"/>
      <style:header-first style:display="false"/>
      <style:footer style:display="false"/>
      <style:footer-left style:display="false"/>
      <style:footer-first style:display="false"/>
    </style:master-page>
    <style:master-page style:name="PageStyle_5f_REMUNERACION" style:display-name="PageStyle_REMUNERACION" style:page-layout-name="Mpm10">
      <style:header style:display="false"/>
      <style:header-left style:display="false"/>
      <style:header-first style:display="false"/>
      <style:footer style:display="false"/>
      <style:footer-left style:display="false"/>
      <style:footer-first style:display="false"/>
    </style:master-page>
    <style:master-page style:name="PageStyle_5f_CAP_20_TRABAJ" style:display-name="PageStyle_CAP TRABAJ" style:page-layout-name="Mpm11">
      <style:header style:display="false"/>
      <style:header-left style:display="false"/>
      <style:header-first style:display="false"/>
      <style:footer style:display="false"/>
      <style:footer-left style:display="false"/>
      <style:footer-first style:display="false"/>
    </style:master-page>
    <style:master-page style:name="PageStyle_5f_CRONOG" style:display-name="PageStyle_CRONOG" style:page-layout-name="Mpm12">
      <style:header style:display="false"/>
      <style:header-left style:display="false"/>
      <style:header-first style:display="false"/>
      <style:footer style:display="false"/>
      <style:footer-left style:display="false"/>
      <style:footer-first style:display="false"/>
    </style:master-page>
    <style:master-page style:name="PageStyle_5f_COSTO_20_PROD_20_Y_20_OPER" style:display-name="PageStyle_COSTO PROD Y OPER" style:page-layout-name="Mpm13">
      <style:header style:display="false"/>
      <style:header-left style:display="false"/>
      <style:header-first style:display="false"/>
      <style:footer style:display="false"/>
      <style:footer-left style:display="false"/>
      <style:footer-first style:display="false"/>
    </style:master-page>
    <style:master-page style:name="PageStyle_5f_FINANCIAMIENT" style:display-name="PageStyle_FINANCIAMIENT" style:page-layout-name="Mpm14">
      <style:header style:display="false"/>
      <style:header-left style:display="false"/>
      <style:header-first style:display="false"/>
      <style:footer style:display="false"/>
      <style:footer-left style:display="false"/>
      <style:footer-first style:display="false"/>
    </style:master-page>
    <style:master-page style:name="PageStyle_5f_RESUM_20_INVER" style:display-name="PageStyle_RESUM INVER" style:page-layout-name="Mpm15">
      <style:header style:display="false"/>
      <style:header-left style:display="false"/>
      <style:header-first style:display="false"/>
      <style:footer style:display="false"/>
      <style:footer-left style:display="false"/>
      <style:footer-first style:display="false"/>
    </style:master-page>
    <style:master-page style:name="PageStyle_5f_INVERSION" style:display-name="PageStyle_INVERSION" style:page-layout-name="Mpm15">
      <style:header style:display="false"/>
      <style:header-left style:display="false"/>
      <style:header-first style:display="false"/>
      <style:footer style:display="false"/>
      <style:footer-left style:display="false"/>
      <style:footer-first style:display="false"/>
    </style:master-page>
    <style:master-page style:name="PageStyle_5f_INGRESOS" style:display-name="PageStyle_INGRESOS" style:page-layout-name="Mpm16">
      <style:header style:display="false"/>
      <style:header-left style:display="false"/>
      <style:header-first style:display="false"/>
      <style:footer style:display="false"/>
      <style:footer-left style:display="false"/>
      <style:footer-first style:display="false"/>
    </style:master-page>
    <style:master-page style:name="PageStyle_5f_COSTOS_20_TOTALES" style:display-name="PageStyle_COSTOS TOTALES" style:page-layout-name="Mpm17">
      <style:header style:display="false"/>
      <style:header-left style:display="false"/>
      <style:header-first style:display="false"/>
      <style:footer style:display="false"/>
      <style:footer-left style:display="false"/>
      <style:footer-first style:display="false"/>
    </style:master-page>
    <style:master-page style:name="PageStyle_5f_DEPRECIAC_20_" style:display-name="PageStyle_DEPRECIAC " style:page-layout-name="Mpm18">
      <style:header style:display="false"/>
      <style:header-left style:display="false"/>
      <style:header-first style:display="false"/>
      <style:footer style:display="false"/>
      <style:footer-left style:display="false"/>
      <style:footer-first style:display="false"/>
    </style:master-page>
    <style:master-page style:name="PageStyle_5f_FLUJO_20_DE_20_CAJA_20_" style:display-name="PageStyle_FLUJO DE CAJA " style:page-layout-name="Mpm19">
      <style:header style:display="false"/>
      <style:header-left style:display="false"/>
      <style:header-first style:display="false"/>
      <style:footer style:display="false"/>
      <style:footer-left style:display="false"/>
      <style:footer-first style:display="false"/>
    </style:master-page>
    <style:master-page style:name="PageStyle_5f_ESTADO_20_GyP" style:display-name="PageStyle_ESTADO GyP" style:page-layout-name="Mpm20">
      <style:header style:display="false"/>
      <style:header-left style:display="false"/>
      <style:header-first style:display="false"/>
      <style:footer style:display="false"/>
      <style:footer-left style:display="false"/>
      <style:footer-first style:display="false"/>
    </style:master-page>
    <style:master-page style:name="PageStyle_5f_INDICADORES" style:display-name="PageStyle_INDICADORES" style:page-layout-name="Mpm21">
      <style:header style:display="false"/>
      <style:header-left style:display="false"/>
      <style:header-first style:display="false"/>
      <style:footer style:display="false"/>
      <style:footer-left style:display="false"/>
      <style:footer-first style:display="false"/>
    </style:master-page>
    <style:master-page style:name="PageStyle_5f_ANALISIS_20_SESIB" style:display-name="PageStyle_ANALISIS SESIB" style:page-layout-name="Mpm9">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0-04-30T20:29:57</meta:creation-date>
    <meta:initial-creator>.</meta:initial-creator>
    <dc:language>es-PE</dc:language>
    <dc:creator>Edison Achalma</dc:creator>
    <meta:print-date>2016-01-05T16:09:48</meta:print-date>
    <dc:date>2023-03-24T15:46:43</dc:date>
    <meta:editing-cycles>15</meta:editing-cycles>
    <meta:editing-duration>PT2H54M</meta:editing-duration>
    <meta:generator>LibreOffice/24.2.4.2$Linux_X86_64 LibreOffice_project/420$Build-2</meta:generator>
    <meta:document-statistic meta:table-count="22" meta:cell-count="5679" meta:object-count="5"/>
    <meta:user-defined meta:name="AppVersion">15.0000</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solid" svg:stroke-color="#33cccc" draw:fill="gradient" draw:fill-gradient-name="msFillGradient_20_1"/>
    </style:style>
    <style:style style:name="ch2" style:family="chart">
      <style:chart-properties style:rotation-angle="0"/>
      <style:text-properties fo:color="#000000" style:text-position="0% 100%" fo:font-family="'Times New Roman'" fo:font-size="12pt" fo:language="es" fo:country="PE" fo:font-weight="bold" style:font-family-asian="'DejaVu Sans'" style:font-size-asian="12pt" style:font-weight-asian="bold" style:font-family-complex="'DejaVu Sans'" style:font-size-complex="12pt" style:font-weight-complex="bold"/>
    </style:style>
    <style:style style:name="ch3" style:family="chart">
      <style:graphic-properties draw:stroke="none" draw:fill="none" draw:fill-color="#d9d9d9"/>
      <style:text-properties fo:color="#000000" style:text-position="0% 100%" fo:font-family="'Times New Roman'" fo:font-size="10pt" fo:language="es" fo:country="PE" style:font-family-asian="'DejaVu Sans'" style:font-size-asian="10pt" style:font-family-complex="'DejaVu Sans'" style:font-size-complex="10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808080"/>
      <style:text-properties fo:color="#000000" style:text-position="0% 100%" fo:font-family="'Times New Roman'" fo:font-size="10pt" fo:language="es" fo:country="PE" style:font-family-asian="'DejaVu Sans'" style:font-size-asian="10pt" style:font-family-complex="'DejaVu Sans'" style:font-size-complex="10pt"/>
    </style:style>
    <style:style style:name="ch6" style:family="chart" style:data-style-name="N1">
      <style:chart-properties chart:display-label="true" chart:logarithmic="false" chart:interval-minor-divisor="5" chart:reverse-direction="false" text:line-break="false" loext:try-staggering-first="false" chart:link-data-style-to-source="false" chart:axis-position="1" chart:tick-mark-position="at-axis"/>
      <style:graphic-properties svg:stroke-color="#808080"/>
      <style:text-properties fo:color="#000000" style:text-position="0% 100%" fo:font-family="'Times New Roman'" fo:font-size="10pt" fo:language="es" fo:country="PE" style:font-family-asian="'DejaVu Sans'" style:font-size-asian="10pt" style:font-family-complex="'DejaVu Sans'" style:font-size-complex="10pt"/>
    </style:style>
    <style:style style:name="ch7" style:family="chart">
      <style:graphic-properties svg:stroke-color="#808080"/>
    </style:style>
    <style:style style:name="ch8" style:family="chart" style:data-style-name="N0">
      <style:chart-properties chart:symbol-type="named-symbol" chart:symbol-name="square" chart:symbol-width="0.247cm" chart:symbol-height="0.247cm" chart:link-data-style-to-source="true" chart:label-position="right"/>
      <style:graphic-properties svg:stroke-width="0.07cm" svg:stroke-color="#666699" draw:fill-color="#666699"/>
      <style:text-properties fo:color="#000000" style:text-position="0% 100%" fo:font-family="Arial" fo:font-size="10pt" fo:language="es" fo:country="PE" style:font-family-asian="'DejaVu Sans'" style:font-size-asian="10pt" style:font-family-complex="'DejaVu Sans'" style:font-size-complex="10pt"/>
    </style:style>
    <style:style style:name="ch9" style:family="chart">
      <style:chart-properties chart:regression-name="" chart:regression-max-degree="2" chart:regression-force-intercept="false" chart:regression-period="2" loext:regression-extrapolate-forward="0" loext:regression-extrapolate-backward="0" chart:regression-type="linear"/>
    </style:style>
    <style:style style:name="ch10" style:family="chart">
      <style:text-properties fo:color="#000000" style:text-position="0% 100%" fo:font-family="Arial" style:font-family-asian="'DejaVu Sans'" style:font-family-complex="'DejaVu Sans'"/>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1.002cm" svg:height="10.775cm" xlink:href=".." xlink:type="simple" chart:class="chart:line" chart:style-name="ch1">
        <chart:title svg:x="1.737cm" svg:y="0.425cm" chart:style-name="ch2">
          <text:p>OFERTA CON PROYECTO CARNE DE CUY UNID/ANUALES</text:p>
        </chart:title>
        <chart:legend chart:legend-position="end" svg:x="0.985cm" svg:y="9.356cm" style:legend-expansion="custom" svg:width="9.215cm" svg:height="0.953cm" style:legend-expansion-aspect-ratio="9.6694648478489" chart:style-name="ch3"/>
        <chart:plot-area chart:style-name="ch4" table:cell-range-address="OFERTA.Q36:OFERTA.Q42" chart:data-source-has-labels="row" svg:x="0.389cm" svg:y="1.998cm" svg:width="9.879cm" svg:height="7.716cm">
          <chart:coordinate-region svg:x="1.487cm" svg:y="2.198cm" svg:width="8.7cm" svg:height="6.869cm"/>
          <chart:axis chart:dimension="x" chart:name="primary-x" chart:style-name="ch5"/>
          <chart:axis chart:dimension="y" chart:name="primary-y" chart:style-name="ch6">
            <chart:grid chart:style-name="ch7" chart:class="major"/>
          </chart:axis>
          <chart:series chart:style-name="ch8" chart:values-cell-range-address="OFERTA.Q37:OFERTA.Q42" chart:label-cell-address="OFERTA.Q36:OFERTA.Q36" chart:class="chart:line">
            <chart:regression-curve chart:style-name="ch9">
              <chart:equation chart:display-equation="true" chart:display-r-square="true" chart:style-name="ch10"/>
            </chart:regression-curve>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OFERTA CON PROYECTO CARNE DE CUY UNID/ANUALES</text:p>
                <draw:g>
                  <svg:desc>OFERTA.Q36:OFERTA.Q36</svg:desc>
                </draw:g>
              </table:table-cell>
            </table:table-row>
          </table:table-header-rows>
          <table:table-rows>
            <table:table-row>
              <table:table-cell office:value-type="string">
                <text:p>1</text:p>
              </table:table-cell>
              <table:table-cell office:value-type="float" office:value="0">
                <text:p>0</text:p>
                <draw:g>
                  <svg:desc>OFERTA.Q37:OFERTA.Q42</svg:desc>
                </draw:g>
              </table:table-cell>
            </table:table-row>
            <table:table-row>
              <table:table-cell office:value-type="string">
                <text:p>2</text:p>
              </table:table-cell>
              <table:table-cell office:value-type="float" office:value="3440.46069833684">
                <text:p>3440.46069833684</text:p>
              </table:table-cell>
            </table:table-row>
            <table:table-row>
              <table:table-cell office:value-type="string">
                <text:p>3</text:p>
              </table:table-cell>
              <table:table-cell office:value-type="float" office:value="11443.696">
                <text:p>11443.696</text:p>
              </table:table-cell>
            </table:table-row>
            <table:table-row>
              <table:table-cell office:value-type="string">
                <text:p>4</text:p>
              </table:table-cell>
              <table:table-cell office:value-type="float" office:value="11443.696">
                <text:p>11443.696</text:p>
              </table:table-cell>
            </table:table-row>
            <table:table-row>
              <table:table-cell office:value-type="string">
                <text:p>5</text:p>
              </table:table-cell>
              <table:table-cell office:value-type="float" office:value="11443.696">
                <text:p>11443.696</text:p>
              </table:table-cell>
            </table:table-row>
            <table:table-row>
              <table:table-cell office:value-type="string">
                <text:p>6</text:p>
              </table:table-cell>
              <table:table-cell office:value-type="float" office:value="11443.696">
                <text:p>11443.69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msFillGradient_20_1" draw:display-name="msFillGradient 1" draw:style="linear" draw:start-color="#9eeaff" draw:end-color="#e4f9ff" draw:start-intensity="100%" draw:end-intensity="100%" draw:angle="180deg" draw:border="0%">
      <loext:gradient-stop svg:offset="0" loext:color-type="rgb" loext:color-value="#9eeaff"/>
      <loext:gradient-stop svg:offset="1" loext:color-type="rgb" loext:color-value="#e4f9ff"/>
    </draw:gradient>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solid" svg:stroke-color="#666699" draw:fill="gradient" draw:fill-gradient-name="msFillGradient_20_1_20_-1"/>
    </style:style>
    <style:style style:name="ch2" style:family="chart">
      <style:chart-properties style:rotation-angle="0"/>
      <style:text-properties fo:color="#000000" style:text-position="0% 100%" fo:font-family="Calibri" fo:font-size="14pt" fo:language="es" fo:country="PE" style:font-family-asian="'DejaVu Sans'" style:font-size-asian="14pt" style:font-family-complex="'DejaVu Sans'" style:font-size-complex="14pt"/>
    </style:style>
    <style:style style:name="ch3" style:family="chart">
      <style:graphic-properties draw:stroke="none" draw:fill="none" draw:fill-color="#d9d9d9"/>
      <style:text-properties fo:color="#000000" style:text-position="0% 100%" fo:font-family="Calibri" fo:font-size="9pt" fo:language="es" fo:country="PE" style:font-family-asian="'DejaVu Sans'" style:font-size-asian="9pt" style:font-family-complex="'DejaVu Sans'" style:font-size-complex="9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color="#c0c0c0"/>
      <style:text-properties fo:color="#000000" style:text-position="0% 100%" fo:font-family="Calibri" fo:font-size="9pt" fo:language="es" fo:country="PE" style:font-family-asian="'DejaVu Sans'" style:font-size-asian="9pt" style:font-family-complex="'DejaVu Sans'" style:font-size-complex="9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1" chart:tick-mark-position="at-axis"/>
      <style:graphic-properties draw:stroke="none" svg:stroke-color="#b3b3b3"/>
      <style:text-properties fo:color="#000000" style:text-position="0% 100%" fo:font-family="Calibri" fo:font-size="9pt" fo:language="es" fo:country="PE" style:font-family-asian="'DejaVu Sans'" style:font-size-asian="9pt" style:font-family-complex="'DejaVu Sans'" style:font-size-complex="9pt"/>
    </style:style>
    <style:style style:name="ch7" style:family="chart">
      <style:graphic-properties svg:stroke-color="#c0c0c0"/>
    </style:style>
    <style:style style:name="ch8" style:family="chart" style:data-style-name="N0">
      <style:chart-properties chart:symbol-type="named-symbol" chart:symbol-name="circle" chart:symbol-width="0.176cm" chart:symbol-height="0.176cm" chart:link-data-style-to-source="true" chart:label-position="right"/>
      <style:graphic-properties svg:stroke-width="0.07cm" svg:stroke-color="#0066cc" draw:fill-color="#0066cc"/>
      <style:text-properties fo:color="#000000" style:text-position="0% 100%" fo:font-family="Arial" fo:font-size="10pt" fo:language="es" fo:country="PE" style:font-family-asian="'DejaVu Sans'" style:font-size-asian="10pt" style:font-family-complex="'DejaVu Sans'" style:font-size-complex="10pt"/>
    </style:style>
    <style:style style:name="ch9" style:family="chart">
      <style:chart-properties chart:regression-name="" chart:regression-max-degree="2" chart:regression-force-intercept="false" chart:regression-period="2" loext:regression-extrapolate-forward="0" loext:regression-extrapolate-backward="0" chart:regression-type="linear"/>
      <style:graphic-properties svg:stroke-width="0.035cm" svg:stroke-color="#ff0000"/>
    </style:style>
    <style:style style:name="ch10" style:family="chart">
      <style:text-properties fo:color="#000000" style:text-position="0% 100%" fo:font-family="Arial" style:font-family-asian="'DejaVu Sans'" style:font-family-complex="'DejaVu Sans'"/>
    </style:style>
    <style:style style:name="ch11" style:family="chart">
      <style:graphic-properties draw:stroke="solid" svg:stroke-color="#33cccc" draw:fill="gradient" draw:fill-color="#d9d9d9" draw:fill-gradient-name="msFillGradient_20_2_20_-1"/>
    </style:style>
    <style:style style:name="ch12" style:family="chart">
      <style:graphic-properties draw:fill-color="#d9d9d9"/>
    </style:style>
  </office:automatic-styles>
  <office:body>
    <office:chart>
      <chart:chart svg:width="11.972cm" svg:height="10.537cm" xlink:href="." xlink:type="simple" chart:class="chart:line" chart:style-name="ch1">
        <chart:title svg:x="1.829cm" svg:y="0.428cm" chart:style-name="ch2">
          <text:p>POBLACION DE CUYES (UNIDADES) TOTAL</text:p>
        </chart:title>
        <chart:legend chart:legend-position="end" svg:x="1.082cm" svg:y="9.481cm" style:legend-expansion="custom" svg:width="9.703cm" svg:height="0.564cm" style:legend-expansion-aspect-ratio="17.2039007092199" chart:style-name="ch3"/>
        <chart:plot-area chart:style-name="ch4" chart:data-source-has-labels="row" svg:x="0.502cm" svg:y="1.093cm" svg:width="7.247cm" svg:height="9.438cm">
          <chart:coordinate-region svg:x="0.921cm" svg:y="1.279cm" svg:width="6.828cm" svg:height="8.782cm"/>
          <chart:axis chart:dimension="x" chart:name="primary-x" chart:style-name="ch5"/>
          <chart:axis chart:dimension="y" chart:name="primary-y" chart:style-name="ch6">
            <chart:grid chart:style-name="ch7" chart:class="major"/>
          </chart:axis>
          <chart:series chart:style-name="ch8" chart:values-cell-range-address="local-table.$B$2:.$B$9" chart:class="chart:line">
            <chart:regression-curve chart:style-name="ch9">
              <chart:equation chart:display-equation="true" chart:display-r-square="false" chart:style-name="ch10"/>
            </chart:regression-curv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1</text:p>
              </table:table-cell>
            </table:table-row>
          </table:table-header-rows>
          <table:table-rows>
            <table:table-row>
              <table:table-cell office:value-type="string"/>
              <table:table-cell office:value-type="float" office:value="NaN">
                <text:p>NaN</text:p>
              </table:table-cell>
            </table:table-row>
            <table:table-row>
              <table:table-cell office:value-type="string"/>
              <table:table-cell office:value-type="float" office:value="NaN">
                <text:p>NaN</text:p>
              </table:table-cell>
            </table:table-row>
            <table:table-row>
              <table:table-cell office:value-type="string"/>
              <table:table-cell office:value-type="float" office:value="NaN">
                <text:p>NaN</text:p>
              </table:table-cell>
            </table:table-row>
            <table:table-row>
              <table:table-cell office:value-type="string"/>
              <table:table-cell office:value-type="float" office:value="NaN">
                <text:p>NaN</text:p>
              </table:table-cell>
            </table:table-row>
            <table:table-row>
              <table:table-cell office:value-type="string"/>
              <table:table-cell office:value-type="float" office:value="NaN">
                <text:p>NaN</text:p>
              </table:table-cell>
            </table:table-row>
            <table:table-row>
              <table:table-cell office:value-type="string"/>
              <table:table-cell office:value-type="float" office:value="NaN">
                <text:p>NaN</text:p>
              </table:table-cell>
            </table:table-row>
            <table:table-row>
              <table:table-cell office:value-type="string"/>
              <table:table-cell office:value-type="float" office:value="NaN">
                <text:p>NaN</text:p>
              </table:table-cell>
            </table:table-row>
            <table:table-row>
              <table:table-cell office:value-type="string"/>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msFillGradient_20_1" draw:display-name="msFillGradient 1" draw:style="linear" draw:start-color="#c9b5e8" draw:end-color="#f0eaf9" draw:start-intensity="100%" draw:end-intensity="100%" draw:angle="180deg" draw:border="0%">
      <loext:gradient-stop svg:offset="0" loext:color-type="rgb" loext:color-value="#c9b5e8"/>
      <loext:gradient-stop svg:offset="1" loext:color-type="rgb" loext:color-value="#f0eaf9"/>
    </draw:gradient>
    <draw:gradient draw:name="msFillGradient_20_1_20_-1" draw:display-name="msFillGradient 1 -1" draw:style="linear" draw:start-color="#c9b5e8" draw:end-color="#f0eaf9" draw:start-intensity="100%" draw:end-intensity="100%" draw:angle="180deg" draw:border="0%">
      <loext:gradient-stop svg:offset="0" loext:color-type="rgb" loext:color-value="#c9b5e8"/>
      <loext:gradient-stop svg:offset="1" loext:color-type="rgb" loext:color-value="#f0eaf9"/>
    </draw:gradient>
    <draw:gradient draw:name="msFillGradient_20_2" draw:display-name="msFillGradient 2" draw:style="linear" draw:start-color="#9eeaff" draw:end-color="#e4f9ff" draw:start-intensity="100%" draw:end-intensity="100%" draw:angle="180deg" draw:border="0%">
      <loext:gradient-stop svg:offset="0" loext:color-type="rgb" loext:color-value="#9eeaff"/>
      <loext:gradient-stop svg:offset="1" loext:color-type="rgb" loext:color-value="#e4f9ff"/>
    </draw:gradient>
    <draw:gradient draw:name="msFillGradient_20_2_20_-1" draw:display-name="msFillGradient 2 -1" draw:style="linear" draw:start-color="#9eeaff" draw:end-color="#e4f9ff" draw:start-intensity="100%" draw:end-intensity="100%" draw:angle="180deg" draw:border="0%">
      <loext:gradient-stop svg:offset="0" loext:color-type="rgb" loext:color-value="#9eeaff"/>
      <loext:gradient-stop svg:offset="1" loext:color-type="rgb" loext:color-value="#e4f9ff"/>
    </draw:gradient>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3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style:style style:name="ch1" style:family="chart">
      <style:graphic-properties draw:stroke="solid" svg:stroke-color="#33cccc" draw:fill="gradient" draw:fill-gradient-name="msFillGradient_20_1"/>
    </style:style>
    <style:style style:name="ch2" style:family="chart">
      <style:chart-properties style:rotation-angle="0"/>
      <style:graphic-properties draw:fill="solid" draw:fill-color="#ffffff"/>
      <style:text-properties fo:color="#000000" style:text-position="0% 100%" fo:font-family="'Times New Roman'" fo:font-size="12pt" fo:language="es" fo:country="PE" fo:font-weight="bold" style:font-family-asian="'DejaVu Sans'" style:font-size-asian="12pt" style:font-weight-asian="bold" style:font-family-complex="'DejaVu Sans'" style:font-size-complex="12pt" style:font-weight-complex="bold"/>
    </style:style>
    <style:style style:name="ch3" style:family="chart">
      <style:graphic-properties draw:stroke="none" draw:fill="none" draw:fill-color="#d9d9d9"/>
      <style:text-properties fo:color="#000000" style:text-position="0% 100%" fo:font-family="'Times New Roman'" fo:font-size="10pt" fo:language="es" fo:country="PE" style:font-family-asian="'DejaVu Sans'" style:font-size-asian="10pt" style:font-family-complex="'DejaVu Sans'" style:font-size-complex="10pt"/>
    </style:style>
    <style:style style:name="ch4" style:family="chart">
      <style:chart-properties chart:include-hidden-cells="false" chart:treat-empty-cells="leave-gap" chart:series-source="rows"/>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color="#c0c0c0"/>
      <style:text-properties fo:color="#000000" style:text-position="0% 100%" fo:font-family="'Times New Roman'" fo:font-size="10pt" fo:language="es" fo:country="PE" style:font-family-asian="'DejaVu Sans'" style:font-size-asian="10pt" style:font-family-complex="'DejaVu Sans'" style:font-size-complex="10pt"/>
    </style:style>
    <style:style style:name="ch6" style:family="chart">
      <style:graphic-properties svg:stroke-color="#ffffff"/>
    </style:style>
    <style:style style:name="ch7" style:family="chart" style:data-style-name="N133">
      <style:chart-properties chart:display-label="true" chart:tick-marks-major-inner="false" chart:tick-marks-major-outer="false" chart:logarithmic="false" chart:interval-minor-divisor="5" chart:reverse-direction="false" text:line-break="false" loext:try-staggering-first="false" chart:link-data-style-to-source="false" chart:axis-position="1" chart:tick-mark-position="at-axis"/>
      <style:graphic-properties draw:stroke="none" svg:stroke-color="#b3b3b3"/>
      <style:text-properties fo:color="#000000" style:text-position="0% 100%" fo:font-family="'Times New Roman'" fo:font-size="10pt" fo:language="es" fo:country="PE" style:font-family-asian="'DejaVu Sans'" style:font-size-asian="10pt" style:font-family-complex="'DejaVu Sans'" style:font-size-complex="10pt"/>
    </style:style>
    <style:style style:name="ch8" style:family="chart">
      <style:graphic-properties svg:stroke-color="#c0c0c0"/>
    </style:style>
    <style:style style:name="ch9" style:family="chart" style:data-style-name="N0">
      <style:chart-properties chart:symbol-type="none" chart:link-data-style-to-source="true" chart:label-position="right"/>
      <style:graphic-properties svg:stroke-width="0.07cm" svg:stroke-color="#003366" draw:fill-color="#003366"/>
      <style:text-properties fo:color="#000000" style:text-position="0% 100%" fo:font-family="Arial" fo:font-size="10pt" fo:language="es" fo:country="PE" style:font-family-asian="'DejaVu Sans'" style:font-size-asian="10pt" style:font-family-complex="'DejaVu Sans'" style:font-size-complex="10pt"/>
    </style:style>
    <style:style style:name="ch10" style:family="chart" style:data-style-name="N0">
      <style:chart-properties chart:symbol-type="none" chart:link-data-style-to-source="true" chart:label-position="right"/>
      <style:graphic-properties svg:stroke-width="0.07cm" svg:stroke-color="#ff0000" draw:fill-color="#ff0000"/>
      <style:text-properties fo:color="#000000" style:text-position="0% 100%" fo:font-family="Arial" fo:font-size="10pt" fo:language="es" fo:country="PE" style:font-family-asian="'DejaVu Sans'" style:font-size-asian="10pt" style:font-family-complex="'DejaVu Sans'" style:font-size-complex="10pt"/>
    </style:style>
    <style:style style:name="ch11" style:family="chart" style:data-style-name="N0">
      <style:chart-properties chart:symbol-type="none" chart:link-data-style-to-source="true" chart:label-position="right"/>
      <style:graphic-properties svg:stroke-width="0.07cm" svg:stroke-color="#339966" draw:fill-color="#339966"/>
      <style:text-properties fo:color="#000000" style:text-position="0% 100%" fo:font-family="Arial" fo:font-size="10pt" fo:language="es" fo:country="PE" style:font-family-asian="'DejaVu Sans'" style:font-size-asian="10pt" style:font-family-complex="'DejaVu Sans'" style:font-size-complex="10pt"/>
    </style:style>
    <style:style style:name="ch12" style:family="chart">
      <style:graphic-properties draw:stroke="solid" svg:stroke-color="#666699" draw:fill="gradient" draw:fill-color="#d9d9d9" draw:fill-gradient-name="msFillGradient_20_2"/>
    </style:style>
    <style:style style:name="ch13" style:family="chart">
      <style:graphic-properties draw:fill-color="#d9d9d9"/>
    </style:style>
  </office:automatic-styles>
  <office:body>
    <office:chart>
      <chart:chart svg:width="14.193cm" svg:height="9.759cm" xlink:href=".." xlink:type="simple" chart:class="chart:line" chart:style-name="ch1">
        <chart:title svg:x="4.255cm" svg:y="0.405cm" chart:style-name="ch2">
          <text:p>GRAFICO DE PUNTO DE EQUILIBRIO</text:p>
        </chart:title>
        <chart:legend chart:legend-position="end" svg:x="1.643cm" svg:y="8.203cm" style:legend-expansion="custom" svg:width="11.819cm" svg:height="1.199cm" style:legend-expansion-aspect-ratio="9.85738115095913" chart:style-name="ch3"/>
        <chart:plot-area chart:style-name="ch4" table:cell-range-address="'ESTADO GyP'.I53:'ESTADO GyP'.N55" chart:data-source-has-labels="column" svg:x="0.461cm" svg:y="1.257cm" svg:width="13.162cm" svg:height="7.55cm">
          <chart:coordinate-region svg:x="2.52cm" svg:y="1.456cm" svg:width="11.022cm" svg:height="6.854cm"/>
          <chart:axis chart:dimension="x" chart:name="primary-x" chart:style-name="ch5">
            <chart:grid chart:style-name="ch6" chart:class="minor"/>
          </chart:axis>
          <chart:axis chart:dimension="y" chart:name="primary-y" chart:style-name="ch7">
            <chart:grid chart:style-name="ch8" chart:class="major"/>
          </chart:axis>
          <chart:series chart:style-name="ch9" chart:values-cell-range-address="'ESTADO GyP'.J53:'ESTADO GyP'.N53" chart:label-cell-address="'ESTADO GyP'.I53:'ESTADO GyP'.I53" chart:class="chart:line">
            <chart:data-point chart:repeated="5"/>
          </chart:series>
          <chart:series chart:style-name="ch10" chart:values-cell-range-address="'ESTADO GyP'.J54:'ESTADO GyP'.N54" chart:label-cell-address="'ESTADO GyP'.I54:'ESTADO GyP'.I54" chart:class="chart:line">
            <chart:data-point chart:repeated="5"/>
          </chart:series>
          <chart:series chart:style-name="ch11" chart:values-cell-range-address="'ESTADO GyP'.J55:'ESTADO GyP'.N55" chart:label-cell-address="'ESTADO GyP'.I55:'ESTADO GyP'.I55"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VENTAS</text:p>
                <draw:g>
                  <svg:desc>'ESTADO GyP'.I53:'ESTADO GyP'.I53</svg:desc>
                </draw:g>
              </table:table-cell>
              <table:table-cell office:value-type="float" office:value="61928.2925700631">
                <text:p>61928.2925700631</text:p>
                <draw:g>
                  <svg:desc>'ESTADO GyP'.J53:'ESTADO GyP'.N53</svg:desc>
                </draw:g>
              </table:table-cell>
              <table:table-cell office:value-type="float" office:value="267914.820570063">
                <text:p>267914.820570063</text:p>
              </table:table-cell>
              <table:table-cell office:value-type="float" office:value="473901.348570063">
                <text:p>473901.348570063</text:p>
              </table:table-cell>
              <table:table-cell office:value-type="float" office:value="679887.876570063">
                <text:p>679887.876570063</text:p>
              </table:table-cell>
              <table:table-cell office:value-type="float" office:value="974168.968129385">
                <text:p>974168.968129385</text:p>
              </table:table-cell>
            </table:table-row>
            <table:table-row>
              <table:table-cell office:value-type="string">
                <text:p>COSTOS TOTALES  ACUMULADOS</text:p>
                <draw:g>
                  <svg:desc>'ESTADO GyP'.I54:'ESTADO GyP'.I54</svg:desc>
                </draw:g>
              </table:table-cell>
              <table:table-cell office:value-type="float" office:value="224580.737188449">
                <text:p>224580.737188449</text:p>
                <draw:g>
                  <svg:desc>'ESTADO GyP'.J54:'ESTADO GyP'.N54</svg:desc>
                </draw:g>
              </table:table-cell>
              <table:table-cell office:value-type="float" office:value="355132.398103251">
                <text:p>355132.398103251</text:p>
              </table:table-cell>
              <table:table-cell office:value-type="float" office:value="485684.059018054">
                <text:p>485684.059018054</text:p>
              </table:table-cell>
              <table:table-cell office:value-type="float" office:value="616235.719932856">
                <text:p>616235.719932856</text:p>
              </table:table-cell>
              <table:table-cell office:value-type="float" office:value="746787.380847658">
                <text:p>746787.380847658</text:p>
              </table:table-cell>
            </table:table-row>
            <table:table-row>
              <table:table-cell office:value-type="string">
                <text:p>COSTOS FIJOS</text:p>
                <draw:g>
                  <svg:desc>'ESTADO GyP'.I55:'ESTADO GyP'.I55</svg:desc>
                </draw:g>
              </table:table-cell>
              <table:table-cell office:value-type="float" office:value="17046.8490712681">
                <text:p>17046.8490712681</text:p>
                <draw:g>
                  <svg:desc>'ESTADO GyP'.J55:'ESTADO GyP'.N55</svg:desc>
                </draw:g>
              </table:table-cell>
              <table:table-cell office:value-type="float" office:value="11657.9872881356">
                <text:p>11657.9872881356</text:p>
              </table:table-cell>
              <table:table-cell office:value-type="float" office:value="11657.9872881356">
                <text:p>11657.9872881356</text:p>
              </table:table-cell>
              <table:table-cell office:value-type="float" office:value="11657.9872881356">
                <text:p>11657.9872881356</text:p>
              </table:table-cell>
              <table:table-cell office:value-type="float" office:value="11657.9872881356">
                <text:p>11657.987288135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msFillGradient_20_1" draw:display-name="msFillGradient 1" draw:style="linear" draw:start-color="#9eeaff" draw:end-color="#e4f9ff" draw:start-intensity="100%" draw:end-intensity="100%" draw:angle="180deg" draw:border="0%">
      <loext:gradient-stop svg:offset="0" loext:color-type="rgb" loext:color-value="#9eeaff"/>
      <loext:gradient-stop svg:offset="1" loext:color-type="rgb" loext:color-value="#e4f9ff"/>
    </draw:gradient>
    <draw:gradient draw:name="msFillGradient_20_2" draw:display-name="msFillGradient 2" draw:style="linear" draw:start-color="#c9b5e8" draw:end-color="#f0eaf9" draw:start-intensity="100%" draw:end-intensity="100%" draw:angle="180deg" draw:border="0%">
      <loext:gradient-stop svg:offset="0" loext:color-type="rgb" loext:color-value="#c9b5e8"/>
      <loext:gradient-stop svg:offset="1" loext:color-type="rgb" loext:color-value="#f0eaf9"/>
    </draw:gradient>
  </office:styles>
</office:document-styles>
</file>