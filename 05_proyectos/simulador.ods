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VBAProject/Módulo2.xml" manifest:media-type="text/xml"/>
  <manifest:file-entry manifest:full-path="Basic/VBAProject/Módulo3.xml" manifest:media-type="text/xml"/>
  <manifest:file-entry manifest:full-path="Basic/VBAProject/Módulo9.xml" manifest:media-type="text/xml"/>
  <manifest:file-entry manifest:full-path="Basic/VBAProject/ThisWorkbook.xml" manifest:media-type="text/xml"/>
  <manifest:file-entry manifest:full-path="Basic/VBAProject/Hoja3.xml" manifest:media-type="text/xml"/>
  <manifest:file-entry manifest:full-path="Basic/VBAProject/Módulo4.xml" manifest:media-type="text/xml"/>
  <manifest:file-entry manifest:full-path="Basic/VBAProject/Módulo5.xml" manifest:media-type="text/xml"/>
  <manifest:file-entry manifest:full-path="Basic/VBAProject/Módulo6.xml" manifest:media-type="text/xml"/>
  <manifest:file-entry manifest:full-path="Basic/VBAProject/Hoja1.xml" manifest:media-type="text/xml"/>
  <manifest:file-entry manifest:full-path="Basic/VBAProject/Módulo7.xml" manifest:media-type="text/xml"/>
  <manifest:file-entry manifest:full-path="Basic/VBAProject/Hoja2.xml" manifest:media-type="text/xml"/>
  <manifest:file-entry manifest:full-path="Basic/VBAProject/Módulo8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6BD4E3B510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0.42cm"/>
    </style:style>
    <style:style style:name="co10" style:family="table-column">
      <style:table-column-properties fo:break-before="auto" style:column-width="0.783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3.635cm"/>
    </style:style>
    <style:style style:name="co14" style:family="table-column">
      <style:table-column-properties fo:break-before="auto" style:column-width="2.824cm"/>
    </style:style>
    <style:style style:name="co15" style:family="table-column">
      <style:table-column-properties fo:break-before="auto" style:column-width="0.111cm"/>
    </style:style>
    <style:style style:name="co16" style:family="table-column">
      <style:table-column-properties fo:break-before="auto" style:column-width="2.88cm"/>
    </style:style>
    <style:style style:name="co17" style:family="table-column">
      <style:table-column-properties fo:break-before="auto" style:column-width="0.951cm"/>
    </style:style>
    <style:style style:name="co18" style:family="table-column">
      <style:table-column-properties fo:break-before="auto" style:column-width="9.285cm"/>
    </style:style>
    <style:style style:name="co19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2.545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1.09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1.453cm"/>
    </style:style>
    <style:style style:name="co28" style:family="table-column">
      <style:table-column-properties fo:break-before="auto" style:column-width="1.175cm"/>
    </style:style>
    <style:style style:name="co29" style:family="table-column">
      <style:table-column-properties fo:break-before="auto" style:column-width="4.195cm"/>
    </style:style>
    <style:style style:name="co30" style:family="table-column">
      <style:table-column-properties fo:break-before="auto" style:column-width="0.866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3.161cm"/>
    </style:style>
    <style:style style:name="co33" style:family="table-column">
      <style:table-column-properties fo:break-before="auto" style:column-width="3.133cm"/>
    </style:style>
    <style:style style:name="co34" style:family="table-column">
      <style:table-column-properties fo:break-before="auto" style:column-width="3.048cm"/>
    </style:style>
    <style:style style:name="co35" style:family="table-column">
      <style:table-column-properties fo:break-before="auto" style:column-width="0.307cm"/>
    </style:style>
    <style:style style:name="co36" style:family="table-column">
      <style:table-column-properties fo:break-before="auto" style:column-width="5.846cm"/>
    </style:style>
    <style:style style:name="co37" style:family="table-column">
      <style:table-column-properties fo:break-before="auto" style:column-width="2.574cm"/>
    </style:style>
    <style:style style:name="co38" style:family="table-column">
      <style:table-column-properties fo:break-before="auto" style:column-width="1.649cm"/>
    </style:style>
    <style:style style:name="co39" style:family="table-column">
      <style:table-column-properties fo:break-before="auto" style:column-width="2.265cm"/>
    </style:style>
    <style:style style:name="co40" style:family="table-column">
      <style:table-column-properties fo:break-before="auto" style:column-width="3.357cm"/>
    </style:style>
    <style:style style:name="co41" style:family="table-column">
      <style:table-column-properties fo:break-before="auto" style:column-width="1.595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3.02cm"/>
    </style:style>
    <style:style style:name="ro1" style:family="table-row">
      <style:table-row-properties style:row-height="0.159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079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397cm" fo:break-before="auto" style:use-optimal-row-height="tru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Factores">
      <style:table-properties table:display="true" style:writing-mode="lr-tb"/>
    </style:style>
    <style:style style:name="ta3" style:family="table" style:master-page-name="PageStyle_5f_TABLA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0000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cell-protect="none" style:print-content="true" style:diagonal-bl-tr="none" style:diagonal-tl-br="none" fo:border-left="0.74pt solid #003366" fo:border-right="none" style:rotation-align="none" fo:border-top="0.74pt solid #00336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0.74pt solid #003366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3366" style:cell-protect="none" style:print-content="true" style:diagonal-bl-tr="none" style:diagonal-tl-br="none" fo:border-left="0.74pt solid #003366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fo:background-color="#000000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order-left="none" fo:border-right="none" style:rotation-align="none" fo:border-top="0.74pt solid #00336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008080" style:cell-protect="none" style:print-content="true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3366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8080"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Comma" style:data-style-name="N134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35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3366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Comma" style:data-style-name="N13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S$8]=&quot;Fecha Variable&quot;)" style:apply-style-name="ConditionalStyle_5f_1" style:base-cell-address="Cronograma.F14"/>
    </style:style>
    <style:style style:name="ce26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008080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 formula-hidden" style:print-content="tru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cell-protect="protected formula-hidden" style:print-content="true"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 style:data-style-name="N127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Comma" style:data-style-name="N127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Comma" style:data-style-name="N134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Comma" style:data-style-name="N135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Comma" style:data-style-name="N134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S$8]=&quot;Fecha Variable&quot;)" style:apply-style-name="ConditionalStyle_5f_2" style:base-cell-address="Cronograma.G14"/>
    </style:style>
    <style:style style:name="ce40" style:family="table-cell" style:parent-style-name="Excel_20_Built-in_20_Comma" style:data-style-name="N127">
      <style:table-cell-properties fo:background-color="#cc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3">
      <style:table-cell-properties fo:background-color="#ccffff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291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3366" style:cell-protect="none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135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36">
      <style:table-cell-properties fo:border-bottom="none" style:cell-protect="protected formula-hidden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87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36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87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3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87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87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 style:data-style-name="N36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Comma" style:data-style-name="N127">
      <style:table-cell-properties fo:background-color="#ffc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91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37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873cm" style:writing-mode="page"/>
      <style:text-properties fo:color="#ff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8" style:family="table-cell" style:parent-style-name="Excel_20_Built-in_20_Comma" style:data-style-name="N127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Comma" style:data-style-name="N127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Excel_20_Built-in_20_Comma" style:data-style-name="N127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Comma" style:data-style-name="N127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Comma" style:data-style-name="N127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fo:border-bottom="none" fo:background-color="#008080" style:cell-protect="none" style:print-content="true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008080" style:cell-protect="none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008080" style:cell-protect="none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008080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fo:border-bottom="0.74pt solid #ffffff" fo:background-color="#008080" style:cell-protect="none" style:print-content="true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008080" style:cell-protect="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>
      <style:table-cell-properties fo:background-color="#008080"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omma" style:data-style-name="N127">
      <style:table-cell-properties fo:background-color="#ffc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fo:background-color="#00808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00808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33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Comma" style:data-style-name="N127">
      <style:table-cell-properties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Comma" style:data-style-name="N127">
      <style:table-cell-properties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Comma" style:data-style-name="N127">
      <style:table-cell-properties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Comma" style:data-style-name="N127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20_Built-in_20_Comma" style:data-style-name="N127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order-bottom="none" style:cell-protect="none" style:print-content="true" style:diagonal-bl-tr="none" style:diagonal-tl-br="none" fo:border-left="none" fo:border-right="none" style:rotation-align="none" fo:border-top="0.74pt solid #00336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Excel_20_Built-in_20_Comma" style:data-style-name="N127">
      <style:table-cell-properties fo:background-color="#ffffff" style:cell-protect="formula-hidden" style:print-content="true" style:diagonal-bl-tr="none" style:diagonal-tl-br="none" style:text-align-source="value-type" style:repeat-content="false" fo:wrap-option="no-wrap" fo:border="0.74pt solid #00808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$O$8]=&quot;Sin Gracia&quot;)" style:apply-style-name="ConditionalStyle_5f_3" style:base-cell-address="Cronograma.M10"/>
    </style:style>
    <style:style style:name="ce83" style:family="table-cell" style:parent-style-name="Excel_20_Built-in_20_Percent" style:data-style-name="N136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20_Built-in_20_Comma" style:data-style-name="N127">
      <style:table-cell-properties fo:background-color="#ffcc00" style:cell-protect="none" style:print-content="true" style:diagonal-bl-tr="none" style:diagonal-tl-br="none" style:text-align-source="fix" style:repeat-content="false" fo:wrap-option="no-wrap" fo:border="0.74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Comma" style:data-style-name="N127">
      <style:table-cell-properties fo:background-color="#ccffff" style:cell-protect="formula-hidden" style:print-content="true" style:diagonal-bl-tr="none" style:diagonal-tl-br="none" style:text-align-source="value-type" style:repeat-content="false" fo:wrap-option="no-wrap" fo:border="0.74pt solid #00808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3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Excel_20_Built-in_20_Percent" style:data-style-name="N136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Comma" style:data-style-name="N134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O$8]=&quot;Sin Gracia&quot;)" style:apply-style-name="ConditionalStyle_5f_3" style:base-cell-address="Cronograma.M10"/>
    </style:style>
    <style:style style:name="ce90" style:family="table-cell" style:parent-style-name="Excel_20_Built-in_20_Comma" style:data-style-name="N127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Comma" style:data-style-name="N127">
      <style:table-cell-properties fo:background-color="#008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00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008080" style:cell-protect="formula-hidden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 style:data-style-name="N127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127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 style:data-style-name="N127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 style:data-style-name="N127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 style:data-style-name="N127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Excel_20_Built-in_20_Comma" style:data-style-name="N127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3366" style:cell-protect="none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7" style:family="table-cell" style:parent-style-name="Default">
      <style:table-cell-properties fo:background-color="#ffff99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Comma" style:data-style-name="N127">
      <style:table-cell-properties fo:background-color="#ffc0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9" style:family="table-cell" style:parent-style-name="Default">
      <style:table-cell-properties style:cell-protect="none" style:print-content="true" style:rotation-align="none"/>
    </style:style>
    <style:style style:name="ce110" style:family="table-cell" style:parent-style-name="Excel_20_Built-in_20_Comma" style:data-style-name="N134">
      <style:table-cell-properties fo:background-color="#ffc0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Excel_20_Built-in_20_Comma" style:data-style-name="N127">
      <style:table-cell-properties fo:border-bottom="0.74pt solid #008080" fo:background-color="#ccffff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2" style:family="table-cell" style:parent-style-name="Excel_20_Built-in_20_Comma" style:data-style-name="N127">
      <style:table-cell-properties fo:border-bottom="0.74pt solid #008080" fo:background-color="#ccffff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808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3" style:family="table-cell" style:parent-style-name="Default">
      <style:table-cell-properties fo:border-bottom="none" style:cell-protect="none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115" style:family="table-cell" style:parent-style-name="Default">
      <style:table-cell-properties fo:border-bottom="none" style:cell-protect="none" style:print-content="tru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none" fo:border-right="0.74pt solid #00336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3366" style:cell-protect="none" style:print-content="true" style:diagonal-bl-tr="none" style:diagonal-tl-br="none" fo:border-left="none" fo:border-right="0.74pt solid #00336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c0c0c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 style:cell-protect="none" style:print-content="true" style:rotation-align="none"/>
    </style:style>
    <style:style style:name="ce121" style:family="table-cell" style:parent-style-name="Default">
      <style:table-cell-properties fo:background-color="#c0c0c0" style:cell-protect="none" style:print-content="true" style:rotation-align="non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22" style:family="table-cell" style:parent-style-name="Default" style:data-style-name="N2">
      <style:table-cell-properties fo:background-color="#c0c0c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Comma" style:data-style-name="N36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Comma" style:data-style-name="N141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Comma" style:data-style-name="N127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Comma" style:data-style-name="N139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 style:data-style-name="N127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 style:data-style-name="N0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Normal_5f_PLAN_20_DE_20_PAGOS" style:data-style-name="N138">
      <style:table-cell-properties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Normal_5f_PLAN_20_DE_20_PAGOS">
      <style:table-cell-properties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Normal_5f_PLAN_20_DE_20_PAGOS">
      <style:table-cell-properties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Excel_20_Built-in_20_Comma" style:data-style-name="N134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Default" style:data-style-name="N36">
      <style:table-cell-properties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 style:data-style-name="N36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 style:data-style-name="N36">
      <style:table-cell-properties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Normal_5f_PLAN_20_DE_20_PAGOS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Normal_5f_PLAN_20_DE_20_PAGOS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 style:data-style-name="N36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Normal_5f_PLAN_20_DE_20_PAGOS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Excel_20_Built-in_20_Comma" style:data-style-name="N140">
      <style:table-cell-properties fo:border-bottom="none" fo:background-color="#c0c0c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 style:data-style-name="N127">
      <style:table-cell-properties fo:background-color="#c0c0c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Normal_5f_PLAN_20_DE_20_PAGOS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Excel_20_Built-in_20_Comma" style:data-style-name="N127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Excel_20_Built-in_20_Comma" style:data-style-name="N127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Comma" style:data-style-name="N127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Excel_20_Built-in_20_Comma" style:data-style-name="N36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c0c0c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Normal_5f_PLAN_20_DE_20_PAGOS" style:data-style-name="N138">
      <style:table-cell-properties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Normal_5f_PLAN_20_DE_20_PAGOS">
      <style:table-cell-properties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Normal_5f_PLAN_20_DE_20_PAGOS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" style:family="table-cell" style:parent-style-name="Normal_5f_PLAN_20_DE_20_PAGOS" style:data-style-name="N138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Normal_5f_PLAN_20_DE_20_PAGOS" style:data-style-name="N138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Normal_5f_PLAN_20_DE_20_PAGOS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 style:data-style-name="N134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 style:data-style-name="N36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c0c0c0" style:cell-protect="none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33cc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33cccc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33cccc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Percent" style:data-style-name="N11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33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>
      <style:table-cell-properties fo:border-bottom="none" fo:background-color="#c0c0c0" style:cell-protect="none" style:print-content="true" style:diagonal-bl-tr="none" style:diagonal-tl-br="none" style:text-align-source="fix" style:repeat-content="false" fo:wrap-option="no-wrap" fo:border-left="0.74pt solid #33cccc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fix" style:repeat-content="false" fo:wrap-option="no-wrap" fo:border-left="0.74pt solid #33cccc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Comma" style:data-style-name="N127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Excel_20_Built-in_20_Percent" style:data-style-name="N144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Excel_20_Built-in_20_Percent" style:data-style-name="N143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Excel_20_Built-in_20_Percent" style:data-style-name="N142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 style:data-style-name="N133">
      <style:table-cell-properties fo:background-color="#c0c0c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34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99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fo:background-color="#c0c0c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 style:data-style-name="N134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Excel_20_Built-in_20_Comma" style:data-style-name="N134">
      <style:table-cell-properties fo:background-color="#c0c0c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 style:data-style-name="N135">
      <style:table-cell-properties fo:background-color="#c0c0c0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0c0c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ackground-color="#c0c0c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 style:data-style-name="N135">
      <style:table-cell-properties fo:background-color="#c0c0c0" style:cell-protect="none" style:print-content="true" style:diagonal-bl-tr="none" style:diagonal-tl-br="none" fo:border="none" style:rotation-align="non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3" style:family="table-cell" style:parent-style-name="Normal_20_4" style:data-style-name="N36">
      <style:table-cell-properties fo:background-color="transparent" style:rotation-align="non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" style:family="table-cell" style:parent-style-name="Normal_20_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Normal_20_4">
      <style:table-cell-properties fo:background-color="transparent" style:rotation-align="non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Normal_20_4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9" style:family="table-cell" style:parent-style-name="Excel_20_Built-in_20_Percent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 style:data-style-name="N1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Excel_20_Built-in_20_Comma" style:data-style-name="N134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Default">
      <style:table-cell-properties fo:background-color="#ccffff" style:rotation-align="non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Excel_20_Built-in_20_Comma" style:data-style-name="N140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5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1" style:family="table-cell" style:parent-style-name="Normal_20_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Excel_20_Built-in_20_Comma" style:data-style-name="N12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Excel_20_Built-in_20_Comma" style:data-style-name="N13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Excel_20_Built-in_20_Percent" style:data-style-name="N14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Excel_20_Built-in_20_Percent" style:data-style-name="N11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Excel_20_Built-in_20_Comma" style:data-style-name="N127">
      <style:table-cell-properties fo:background-color="#99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Excel_20_Built-in_20_Comma" style:data-style-name="N127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Excel_20_Built-in_20_Comma" style:data-style-name="N127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Excel_20_Built-in_20_Comma" style:data-style-name="N127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Normal_5f_Simulador_20_Microseguros_20_V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Excel_20_Built-in_20_Percen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Default">
      <style:table-cell-properties fo:border-bottom="1.76pt solid #ffffff" fo:background-color="#4f81bd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ackground-color="#4f81bd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1.76pt solid #ffffff" fo:background-color="#d0d8e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1">
      <style:table-cell-properties fo:background-color="#e9edf4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1">
      <style:table-cell-properties fo:background-color="#d0d8e8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textarea-vertical-align="middle" loext:decorative="false"/>
      <style:text-properties fo:color="#000000" style:text-line-through-style="none" style:text-line-through-type="none" fo:font-family="Tahoma" fo:font-size="8pt" fo:font-style="normal" style:text-underline-style="none" fo:font-weight="normal"/>
    </style:style>
    <style:style style:name="gr2" style:family="graphic" style:parent-style-name="Default">
      <style:graphic-properties draw:textarea-vertical-align="middle" fo:background-color="#ffff99" loext:decorative="false"/>
      <style:text-properties fo:color="#000000" style:text-line-through-style="none" style:text-line-through-type="none" fo:font-family="Tahoma" fo:font-size="8pt" fo:font-style="normal" style:text-underline-style="none" fo:font-weight="normal"/>
    </style:style>
    <style:style style:name="gr3" style:family="graphic" style:parent-style-name="Default">
      <style:graphic-properties draw:stroke="solid" svg:stroke-width="0.026cm" svg:stroke-color="#0000ff" draw:stroke-linejoin="miter" draw:fill="solid" draw:fill-color="#ccffff" draw:textarea-horizontal-align="justify" draw:textarea-vertical-align="middle" draw:auto-grow-height="false" draw:fit-to-size="false" style:shrink-to-fit="false" fo:min-height="0cm" fo:min-width="0cm" fo:padding-top="0.076cm" fo:padding-bottom="0.076cm" fo:padding-left="0.102cm" fo:padding-right="0.102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4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14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79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79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75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color="#000000" style:text-line-through-style="none" style:text-line-through-type="none" fo:font-family="Tahoma" fo:font-size="8pt" fo:font-style="normal" style:text-underline-style="none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7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12pt" fo:letter-spacing="normal" fo:language="es" fo:country="PE" fo:font-style="normal" style:text-underline-style="none" fo:font-weight="bold" fo:background-color="transparent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ffffff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ffffff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 fo:color="#ff9900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ffffff" fo:font-weight="normal" style:font-weight-asian="normal" style:font-weight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ffff00" fo:font-weight="bold" style:font-weight-asian="bold" style:font-weight-complex="bold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3366ff" fo:font-weight="bold" style:font-weight-asian="bold" style:font-weight-complex="bold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3366ff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999999999999945"/>
      </table:calculation-settings>
      <table:content-validations>
        <table:content-validation table:name="val1" table:condition="of:cell-content-is-in-list(&quot;Tasa Efectiva Mensual Fija&quot;;&quot;Tasa Efectiva Anual Fija&quot;)" table:allow-empty-cell="true" table:display-list="unsorted" table:base-cell-address="Factores.D8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40)" table:allow-empty-cell="true" table:base-cell-address="Factores.G10">
          <table:error-message table:message-type="stop" table:title="Importante" table:display="true">
            <text:p>Solo Ingresar valores entre 1 y 240</text:p>
          </table:error-message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13&quot;;&quot;14&quot;;&quot;17&quot;;&quot;18&quot;;&quot;19&quot;;&quot;20&quot;;&quot;21&quot;;&quot;22&quot;;&quot;23&quot;;&quot;24&quot;;&quot;25&quot;;&quot;26&quot;;&quot;27&quot;)" table:allow-empty-cell="true" table:display-list="no" table:base-cell-address="Factores.G14">
          <table:help-message table:display="true"/>
          <table:error-message table:message-type="stop" table:title="Importante" table:display="true">
            <text:p>No ingresar los siguientes valores:</text:p>
            <text:p>15,16,28,29,30,31</text:p>
          </table:error-message>
        </table:content-validation>
        <table:content-validation table:name="val4" table:condition="of:cell-content-is-in-list(&quot;Soles&quot;;&quot;Dolares&quot;)" table:allow-empty-cell="true" table:display-list="unsorted" table:base-cell-address="Factores.H6">
          <table:help-message table:display="true"/>
          <table:error-message table:message-type="stop" table:display="true"/>
        </table:content-validation>
        <table:content-validation table:name="val5" table:condition="of:cell-content-is-in-list(&quot;Quincenal&quot;;&quot;Mensual&quot;;&quot;Trimestral&quot;)" table:allow-empty-cell="false" table:display-list="unsorted" table:base-cell-address="Factores.K8">
          <table:help-message table:display="true"/>
          <table:error-message table:message-type="stop" table:display="true"/>
        </table:content-validation>
        <table:content-validation table:name="val6" table:condition="of:cell-content-is-in-list(&quot;Si&quot;;&quot;No&quot;)" table:allow-empty-cell="true" table:display-list="unsorted" table:base-cell-address="Factores.M16">
          <table:help-message table:display="true"/>
          <table:error-message table:message-type="stop" table:display="true"/>
        </table:content-validation>
        <table:content-validation table:name="val7" table:condition="of:cell-content-is-in-list(&quot;Sin Gracia&quot;;&quot;Gracia Relativa&quot;;&quot;Gracia Absoluta&quot;)" table:allow-empty-cell="true" table:display-list="unsorted" table:base-cell-address="Factores.O8">
          <table:help-message table:display="true"/>
          <table:error-message table:message-type="stop" table:display="true"/>
        </table:content-validation>
        <table:content-validation table:name="val8" table:condition="of:cell-content-is-whole-number() and cell-content()&lt;=[.G10]-1" table:allow-empty-cell="true" table:base-cell-address="Factores.O10">
          <table:help-message table:display="true"/>
          <table:error-message table:message-type="stop" table:title="Importante" table:display="true">
            <text:p>No puede ser igual o mayor que el Plazo del Prestamo.</text:p>
          </table:error-message>
        </table:content-validation>
        <table:content-validation table:name="val9" table:condition="of:cell-content-is-in-list(&quot;Fecha Fija&quot;;&quot;Fecha Variable&quot;)" table:allow-empty-cell="true" table:display-list="unsorted" table:base-cell-address="Factores.S8">
          <table:help-message table:display="true"/>
          <table:error-message table:message-type="stop" table:display="true"/>
        </table:content-validation>
        <table:content-validation table:name="val10" table:condition="of:is-true-formula([.CF16]=0)" table:allow-empty-cell="true" table:base-cell-address="Factores.CF14">
          <table:help-message table:display="true"/>
          <table:error-message table:message-type="stop" table:title="Valor No permitido" table:display="true">
            <text:p>Los plazos mayores a 120 meses, solo aplican para Cred. Hipotecarios.</text:p>
          </table:error-message>
        </table:content-validation>
        <table:content-validation table:name="val11" table:base-cell-address="Factores.CF16">
          <table:help-message table:display="true"/>
          <table:error-message table:message-type="stop" table:title="Valor No permitido" table:display="true">
            <text:p>Los plazos mayores a 120 meses solo esta permitido para Cred. Hipotecarios.</text:p>
          </table:error-message>
        </table:content-validation>
      </table:content-validations>
      <table:table table:name="Cronograma" table:style-name="ta1" table:protected="true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34" form:control-implementation="ooo:com.sun.star.form.component.CheckBox" xml:id="control1" form:id="control1" form:label="Negocio Protegido" form:input-required="false" form:linked-cell="Factores.M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" form:id="control2" form:label="Familia Protegida" form:input-required="false" form:linked-cell="Factores.M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3" form:id="control3" form:label="Protección Financiera" form:input-required="false" form:linked-cell="Factores.M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23" form:control-implementation="ooo:com.sun.star.form.component.CheckBox" xml:id="control4" form:id="control4" form:label="Fam. Prot.- Plan Familiar" form:input-required="false" form:linked-cell="Factores.M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071" form:control-implementation="ooo:com.sun.star.form.component.CheckBox" xml:id="control5" form:id="control5" form:label="Oncologico" form:input-required="false" form:linked-cell="Factores.M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212" form:control-implementation="ooo:com.sun.star.form.component.RadioButton" xml:id="control6" form:id="control6" form:label="Sí" form:visual-effect="flat" form:input-required="false" formx:group-name="autoGroup_formControl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Módulo8.MULTI_RIESGO?language=Basic&amp;location=document" xlink:type="simple"/>
              </office:event-listeners>
            </form:radio>
            <form:radio form:name="Option Button 1213" form:control-implementation="ooo:com.sun.star.form.component.RadioButton" xml:id="control7" form:id="control7" form:label="No" form:current-selected="true" form:selected="true" form:visual-effect="flat" form:input-required="false" formx:group-name="autoGroup_formControl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Módulo8.no_multi?language=Basic&amp;location=document" xlink:type="simple"/>
              </office:event-listeners>
            </form:radio>
          </form:form>
        </office:forms>
        <table:shapes>
          <draw:control draw:z-index="2" draw:style-name="gr1" draw:text-style-name="P1" svg:width="3.653cm" svg:height="0.608cm" svg:x="26.816cm" svg:y="5.212cm" draw:control="control1"/>
          <draw:control draw:z-index="3" draw:style-name="gr1" draw:text-style-name="P1" svg:width="3.653cm" svg:height="0.608cm" svg:x="26.816cm" svg:y="5.821cm" draw:control="control2"/>
          <draw:control draw:z-index="4" draw:style-name="gr1" draw:text-style-name="P1" svg:width="3.653cm" svg:height="0.608cm" svg:x="26.816cm" svg:y="6.429cm" draw:control="control3"/>
          <draw:control draw:z-index="5" draw:style-name="gr1" draw:text-style-name="P1" svg:width="3.942cm" svg:height="0.609cm" svg:x="26.816cm" svg:y="4.656cm" draw:control="control4"/>
          <draw:control draw:z-index="6" draw:style-name="gr1" draw:text-style-name="P1" svg:width="2.598cm" svg:height="0.636cm" svg:x="26.816cm" svg:y="7.037cm" draw:control="control5"/>
          <draw:control draw:z-index="7" draw:style-name="gr2" draw:text-style-name="P1" svg:width="2.834cm" svg:height="0.582cm" svg:x="10.984cm" svg:y="6.376cm" draw:control="control6"/>
          <draw:control draw:z-index="8" draw:style-name="gr2" draw:text-style-name="P1" svg:width="2.834cm" svg:height="0.583cm" svg:x="10.984cm" svg:y="7.037cm" draw:control="control7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109"/>
        <table:table-column table:style-name="co11" table:default-cell-style-name="ce109"/>
        <table:table-column table:style-name="co1" table:default-cell-style-name="ce109"/>
        <table:table-column table:style-name="co2" table:default-cell-style-name="ce109"/>
        <table:table-column table:style-name="co18" table:default-cell-style-name="ce109"/>
        <table:table-column table:style-name="co19" table:number-columns-repeated="9" table:default-cell-style-name="ce120"/>
        <table:table-column table:style-name="co20" table:number-columns-repeated="3" table:default-cell-style-name="ce120"/>
        <table:table-column table:style-name="co21" table:number-columns-repeated="2" table:default-cell-style-name="ce120"/>
        <table:table-column table:style-name="co22" table:default-cell-style-name="ce120"/>
        <table:table-column table:style-name="co19" table:number-columns-repeated="5" table:default-cell-style-name="ce120"/>
        <table:table-column table:style-name="co23" table:default-cell-style-name="ce120"/>
        <table:table-column table:style-name="co24" table:default-cell-style-name="ce120"/>
        <table:table-column table:style-name="co25" table:default-cell-style-name="ce149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7" table:default-cell-style-name="ce45"/>
        <table:table-column table:style-name="co28" table:default-cell-style-name="ce45"/>
        <table:table-column table:style-name="co27" table:default-cell-style-name="ce45"/>
        <table:table-column table:style-name="co28" table:default-cell-style-name="ce45"/>
        <table:table-column table:style-name="co27" table:default-cell-style-name="ce45"/>
        <table:table-column table:style-name="co24" table:default-cell-style-name="ce120"/>
        <table:table-column table:style-name="co19" table:number-columns-repeated="21" table:default-cell-style-name="ce120"/>
        <table:table-column table:style-name="co29" table:default-cell-style-name="ce120"/>
        <table:table-column table:style-name="co30" table:default-cell-style-name="ce120"/>
        <table:table-column table:style-name="co29" table:default-cell-style-name="ce120"/>
        <table:table-column table:style-name="co30" table:default-cell-style-name="ce120"/>
        <table:table-column table:style-name="co29" table:default-cell-style-name="ce120"/>
        <table:table-column table:style-name="co8" table:default-cell-style-name="ce120"/>
        <table:table-column table:style-name="co29" table:default-cell-style-name="ce120"/>
        <table:table-column table:style-name="co30" table:default-cell-style-name="ce120"/>
        <table:table-column table:style-name="co29" table:default-cell-style-name="ce120"/>
        <table:table-column table:style-name="co30" table:default-cell-style-name="ce120"/>
        <table:table-column table:style-name="co29" table:default-cell-style-name="ce120"/>
        <table:table-column table:style-name="co30" table:default-cell-style-name="ce120"/>
        <table:table-column table:style-name="co29" table:default-cell-style-name="ce120"/>
        <table:table-column table:style-name="co30" table:default-cell-style-name="ce120"/>
        <table:table-column table:style-name="co19" table:number-columns-repeated="2" table:default-cell-style-name="ce120"/>
        <table:table-column table:style-name="co31" table:default-cell-style-name="ce120"/>
        <table:table-column table:style-name="co19" table:default-cell-style-name="ce120"/>
        <table:table-column table:style-name="co32" table:default-cell-style-name="ce120"/>
        <table:table-column table:style-name="co33" table:default-cell-style-name="ce120"/>
        <table:table-column table:style-name="co19" table:default-cell-style-name="ce120"/>
        <table:table-column table:style-name="co34" table:default-cell-style-name="ce120"/>
        <table:table-column table:style-name="co19" table:number-columns-repeated="19" table:default-cell-style-name="ce120"/>
        <table:table-column table:style-name="co35" table:default-cell-style-name="ce120"/>
        <table:table-column table:style-name="co19" table:number-columns-repeated="16264" table:default-cell-style-name="ce120"/>
        <table:table-row table:style-name="ro1">
          <table:table-cell table:number-columns-repeated="19"/>
          <table:table-cell table:style-name="ce2" table:number-columns-repeated="6"/>
          <table:table-cell table:style-name="ce118" table:number-columns-repeated="22"/>
          <table:table-cell table:number-columns-repeated="9"/>
          <table:table-cell table:style-name="ce118" table:number-columns-repeated="23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2"/>
        </table:table-row>
        <table:table-row table:style-name="ro2">
          <table:table-cell/>
          <table:table-cell table:style-name="ce7"/>
          <table:table-cell table:style-name="ce12" office:value-type="string" calcext:value-type="string">
            <text:p>NOTA: <text:span text:style-name="T3">Elegir las caracteristicas del prestamo con las celdas</text:span><text:span text:style-name="T4"> </text:span><text:span text:style-name="T5">Naranjas</text:span><text:span text:style-name="T6"> e ingresar datos en las celdas de </text:span><text:span text:style-name="T7">Amarillo</text:span><text:span text:style-name="T6"> y presione el botón </text:span><text:span text:style-name="T8">Calcular</text:span><text:span text:style-name="T9">.</text:span></text:p>
          </table:table-cell>
          <table:table-cell table:style-name="ce7" table:number-columns-repeated="21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3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2"/>
        </table:table-row>
        <table:table-row table:style-name="ro1">
          <table:table-cell table:number-columns-repeated="19"/>
          <table:table-cell table:style-name="ce2" table:number-columns-repeated="6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3">
          <table:table-cell/>
          <table:table-cell table:style-name="ce8"/>
          <table:table-cell table:style-name="ce13" table:number-columns-repeated="9"/>
          <table:table-cell table:style-name="ce79"/>
          <table:table-cell table:style-name="ce13" table:number-columns-repeated="10"/>
          <table:table-cell table:style-name="ce113"/>
          <table:table-cell table:style-name="ce115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/>
          <table:table-cell table:style-name="ce9"/>
          <table:table-cell table:style-name="ce14"/>
          <table:table-cell table:style-name="ce16" table:number-columns-repeated="5"/>
          <table:table-cell table:style-name="ce63"/>
          <table:table-cell table:style-name="ce14"/>
          <table:table-cell table:style-name="ce16" table:number-columns-repeated="13"/>
          <table:table-cell table:style-name="ce116"/>
          <table:table-cell table:style-name="ce4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5">
          <table:table-cell/>
          <table:table-cell table:style-name="ce9"/>
          <table:table-cell table:style-name="ce14"/>
          <table:table-cell table:style-name="ce17" table:number-columns-repeated="2"/>
          <table:table-cell table:style-name="ce20" office:value-type="string" calcext:value-type="string">
            <text:p>Monto Solicitado</text:p>
          </table:table-cell>
          <table:table-cell table:style-name="ce36" table:formula="of:=['file:///b1ecd61295a042a9/Documentos/Classroom/Evaluaci%C3%B3n%20Privada%20de%20Proyectos/COLLABORATION%20SPACE/Group%20Project%201.%20Estampado%20de%20Polos%20Personalizados%202.0/Estampado%20de%20Polos%20Personalizados%202.0.xlsx'#$'Estudio ADEK'.$K$538]" office:value-type="float" office:value="-18000.0033333333" calcext:value-type="float">
            <text:p><text:s/>(18,000.00)</text:p>
          </table:table-cell>
          <table:table-cell table:style-name="ce53" table:content-validation-name="val4" office:value-type="string" office:string-value="Soles" calcext:value-type="string">
            <text:p><text:s/>Soles </text:p>
          </table:table-cell>
          <table:table-cell table:style-name="ce63"/>
          <table:table-cell table:style-name="ce14"/>
          <table:table-cell table:style-name="ce69" office:value-type="string" calcext:value-type="string">
            <text:p>Tipo de Cronograma</text:p>
          </table:table-cell>
          <table:table-cell table:style-name="ce16" table:number-columns-repeated="12"/>
          <table:table-cell table:style-name="ce116"/>
          <table:table-cell table:style-name="ce11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18" table:number-columns-repeated="5"/>
          <table:table-cell table:style-name="ce63"/>
          <table:table-cell table:style-name="ce14"/>
          <table:table-cell table:style-name="ce16" table:number-columns-repeated="13"/>
          <table:table-cell table:style-name="ce116"/>
          <table:table-cell table:style-name="ce11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5">
          <table:table-cell/>
          <table:table-cell table:style-name="ce9"/>
          <table:table-cell table:style-name="ce14"/>
          <table:table-cell table:style-name="ce19" table:content-validation-name="val1" office:value-type="string" calcext:value-type="string" table:number-columns-spanned="3" table:number-rows-spanned="1">
            <text:p>Tasa Efectiva Mensual Fija</text:p>
          </table:table-cell>
          <table:covered-table-cell table:number-columns-repeated="2" table:style-name="ce19" table:content-validation-name="val1"/>
          <table:table-cell table:style-name="ce36" table:formula="of:=['file:///b1ecd61295a042a9/Documentos/Classroom/Evaluaci%C3%B3n%20Privada%20de%20Proyectos/COLLABORATION%20SPACE/Group%20Project%201.%20Estampado%20de%20Polos%20Personalizados%202.0/Estampado%20de%20Polos%20Personalizados%202.0.xlsx'#$'Flujo_Deuda FRANCES'.$I$5]" office:value-type="float" office:value="1.63610732374868" calcext:value-type="float">
            <text:p><text:s/>1.64 </text:p>
          </table:table-cell>
          <table:table-cell table:style-name="ce54" office:value-type="string" calcext:value-type="string">
            <text:p>%</text:p>
          </table:table-cell>
          <table:table-cell table:style-name="ce63"/>
          <table:table-cell table:style-name="ce14"/>
          <table:table-cell table:style-name="ce70" table:content-validation-name="val5" office:value-type="string" office:string-value="Mensual" calcext:value-type="string">
            <text:p><text:s/>Mensual </text:p>
          </table:table-cell>
          <table:table-cell table:style-name="ce16" table:number-columns-repeated="3"/>
          <table:table-cell table:style-name="ce70" table:content-validation-name="val7" office:value-type="string" office:string-value="Sin Gracia" calcext:value-type="string" table:number-columns-spanned="2" table:number-rows-spanned="1">
            <text:p><text:s/>Sin Gracia </text:p>
          </table:table-cell>
          <table:covered-table-cell table:style-name="ce70"/>
          <table:table-cell table:style-name="ce16" table:number-columns-repeated="2"/>
          <table:table-cell table:style-name="ce70" table:content-validation-name="val9" office:value-type="string" office:string-value="Fecha Fija" calcext:value-type="string">
            <text:p><text:s/>Fecha Fija </text:p>
          </table:table-cell>
          <table:table-cell table:style-name="ce16" table:number-columns-repeated="4"/>
          <table:table-cell table:style-name="ce116"/>
          <table:table-cell table:style-name="ce11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/>
          <table:table-cell table:style-name="ce9"/>
          <table:table-cell table:style-name="ce14"/>
          <table:table-cell table:style-name="ce18" table:number-columns-repeated="2"/>
          <table:table-cell table:style-name="ce20" table:number-columns-repeated="3"/>
          <table:table-cell table:style-name="ce63"/>
          <table:table-cell table:style-name="ce14"/>
          <table:table-cell table:style-name="ce71" table:number-columns-repeated="2"/>
          <table:table-cell table:style-name="ce16"/>
          <table:table-cell table:style-name="ce71" table:number-columns-repeated="4"/>
          <table:table-cell table:style-name="ce16"/>
          <table:table-cell table:style-name="ce71"/>
          <table:table-cell table:style-name="ce16" table:number-columns-repeated="4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5">
          <table:table-cell/>
          <table:table-cell table:style-name="ce9"/>
          <table:table-cell table:style-name="ce14"/>
          <table:table-cell table:style-name="ce18" table:number-columns-repeated="2"/>
          <table:table-cell table:style-name="ce20" office:value-type="string" calcext:value-type="string">
            <text:p>Plazo (cuotas)</text:p>
          </table:table-cell>
          <table:table-cell table:style-name="ce37" table:content-validation-name="val2" office:value-type="float" office:value="36" calcext:value-type="float">
            <text:p><text:s/>36 </text:p>
          </table:table-cell>
          <table:table-cell table:style-name="ce55"/>
          <table:table-cell table:style-name="ce63"/>
          <table:table-cell table:style-name="ce14"/>
          <table:table-cell table:style-name="ce70" office:value-type="string" office:string-value="Ptmos en general" calcext:value-type="string">
            <text:p><text:s/>Ptmos en general </text:p>
          </table:table-cell>
          <table:table-cell table:style-name="ce71"/>
          <table:table-cell table:style-name="ce82" office:value-type="string" office:string-value="Nro cuotas" calcext:value-type="string">
            <text:p><text:s/>Nro cuotas </text:p>
          </table:table-cell>
          <table:table-cell table:style-name="ce71"/>
          <table:table-cell table:style-name="ce89" table:content-validation-name="val8" office:value-type="float" office:value="0" calcext:value-type="float">
            <office:annotation office:display="true" draw:style-name="gr5" draw:text-style-name="P5" svg:width="2.735cm" svg:height="1.781cm" svg:x="21.521cm" svg:y="3.202cm" draw:caption-point-x="-1.253cm" draw:caption-point-y="-0.493cm">
              <dc:creator>Edison Achalma Mendoza</dc:creator>
              <dc:date>2024-07-31T04:04:00</dc:date>
              <text:p>Solo para Gracia Relativa y Absoluta.</text:p>
              <text:p/>
            </office:annotation>
            <text:p><text:s/>- <text:s text:c="2"/></text:p>
          </table:table-cell>
          <table:table-cell table:style-name="ce71" table:number-columns-repeated="2"/>
          <table:table-cell table:style-name="ce16"/>
          <table:table-cell table:style-name="ce71" table:number-columns-repeated="5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/>
          <table:table-cell table:style-name="ce9"/>
          <table:table-cell table:style-name="ce14"/>
          <table:table-cell table:style-name="ce16" table:number-columns-repeated="5"/>
          <table:table-cell table:style-name="ce63"/>
          <table:table-cell table:style-name="ce67"/>
          <table:table-cell table:style-name="ce72" table:number-columns-repeated="13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5">
          <table:table-cell/>
          <table:table-cell table:style-name="ce9"/>
          <table:table-cell table:style-name="ce14"/>
          <table:table-cell table:style-name="ce18" table:number-columns-repeated="2"/>
          <table:table-cell table:style-name="ce20" office:value-type="string" calcext:value-type="string">
            <text:p>Fecha Desembolso</text:p>
          </table:table-cell>
          <table:table-cell table:style-name="ce38" office:value-type="date" office:date-value="2021-05-24" calcext:value-type="date">
            <office:annotation office:display="true" draw:style-name="gr6" draw:text-style-name="P6" svg:width="2.02cm" svg:height="1.346cm" svg:x="7.991cm" svg:y="3.36cm" draw:caption-point-x="-0.169cm" draw:caption-point-y="0.01cm">
              <dc:creator>Edison Achalma Mendoza</dc:creator>
              <dc:date>2024-07-31T04:04:00</dc:date>
              <text:p>dd/mm/aaaa</text:p>
              <text:p><text:span text:style-name="T2"/></text:p>
            </office:annotation>
            <text:p>24/05/2021</text:p>
          </table:table-cell>
          <table:table-cell table:style-name="ce16"/>
          <table:table-cell table:style-name="ce63"/>
          <table:table-cell table:style-name="ce16"/>
          <table:table-cell table:style-name="ce69" office:value-type="string" calcext:value-type="string">
            <text:p>Cargos</text:p>
          </table:table-cell>
          <table:table-cell table:style-name="ce16" table:number-columns-repeated="12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/>
          <table:table-cell table:style-name="ce9"/>
          <table:table-cell table:style-name="ce14"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3"/>
          <table:table-cell table:style-name="ce16" table:number-columns-repeated="14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5">
          <table:table-cell/>
          <table:table-cell table:style-name="ce9"/>
          <table:table-cell table:style-name="ce14"/>
          <table:table-cell table:style-name="ce16" table:number-columns-repeated="2"/>
          <table:table-cell table:style-name="ce25" office:value-type="string" calcext:value-type="string">
            <text:p>Dia de Pago</text:p>
          </table:table-cell>
          <table:table-cell table:style-name="ce39" table:content-validation-name="val3" office:value-type="float" office:value="24" calcext:value-type="float">
            <text:p><text:s/>24 </text:p>
          </table:table-cell>
          <table:table-cell table:style-name="ce16"/>
          <table:table-cell table:style-name="ce63"/>
          <table:table-cell table:style-name="ce16" table:number-columns-repeated="2"/>
          <table:table-cell table:style-name="ce20" office:value-type="string" calcext:value-type="string">
            <text:p>% ITF </text:p>
          </table:table-cell>
          <table:table-cell table:style-name="ce83" office:value-type="percentage" office:value="0.00005" calcext:value-type="percentage">
            <text:p>0.005%</text:p>
          </table:table-cell>
          <table:table-cell table:style-name="ce16"/>
          <table:table-cell table:style-name="ce85" table:formula="of:=TRUNC((([.G6]/(1-[.$M$14]))-[.G6]);1)+(IF(MOD((([.G6]/(1-[.$M$14]))-[.G6])*100; 10)&gt;=5; 5;0)/100)" office:value-type="float" office:value="-0.85" calcext:value-type="float">
            <text:p><text:s/>(0.85)</text:p>
          </table:table-cell>
          <table:table-cell table:style-name="ce16" table:number-columns-repeated="8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 table:content-validation-name="val10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4">
          <table:table-cell/>
          <table:table-cell table:style-name="ce9"/>
          <table:table-cell table:style-name="ce14"/>
          <table:table-cell table:style-name="ce16" table:number-columns-repeated="5"/>
          <table:table-cell table:style-name="ce63"/>
          <table:table-cell table:style-name="ce16" table:number-columns-repeated="2"/>
          <table:table-cell table:style-name="ce69"/>
          <table:table-cell table:style-name="ce16" table:number-columns-repeated="2"/>
          <table:table-cell table:style-name="ce90" table:number-columns-repeated="9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6">
          <table:table-cell/>
          <table:table-cell table:style-name="ce9"/>
          <table:table-cell table:style-name="ce14"/>
          <table:table-cell table:style-name="ce18" table:number-columns-repeated="2"/>
          <table:table-cell table:style-name="ce20" office:value-type="string" calcext:value-type="string">
            <text:p>Monto Prestado</text:p>
          </table:table-cell>
          <table:table-cell table:style-name="ce40" table:formula="of:=[.G6]+[.O14]+[.M17]+[.Q18]" office:value-type="float" office:value="-18000.8533333333" calcext:value-type="float">
            <text:p><text:s/>(18,000.85)</text:p>
          </table:table-cell>
          <table:table-cell table:style-name="ce16"/>
          <table:table-cell table:style-name="ce63"/>
          <table:table-cell table:style-name="ce16" table:number-columns-repeated="2"/>
          <table:table-cell table:style-name="ce20" office:value-type="string" calcext:value-type="string">
            <text:p>Seg. Desgravamen</text:p>
          </table:table-cell>
          <table:table-cell table:style-name="ce84" table:content-validation-name="val6" office:value-type="string" office:string-value="No" calcext:value-type="string">
            <text:p><text:s/>No </text:p>
          </table:table-cell>
          <table:table-cell table:style-name="ce16" table:number-columns-repeated="2"/>
          <table:table-cell table:style-name="ce90" table:number-columns-repeated="3"/>
          <table:table-cell table:style-name="ce101"/>
          <table:table-cell table:style-name="ce107" table:number-columns-repeated="2"/>
          <table:table-cell table:style-name="ce111" table:formula="of:=IF([$Factores.M24]=TRUE();[$Factores.L24];0)" office:value-type="float" office:value="0" calcext:value-type="float">
            <text:p><text:s/>- <text:s text:c="2"/></text:p>
          </table:table-cell>
          <table:table-cell table:style-name="ce90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18" table:content-validation-name="val11" table:formula="of:=IF(AND([.CF20]=0;[.CF17]&gt;120);1;0)" office:value-type="float" office:value="0" calcext:value-type="float">
            <text:p>0</text:p>
          </table:table-cell>
          <table:table-cell table:style-name="ce153"/>
          <table:table-cell table:style-name="ce118"/>
          <table:table-cell table:style-name="ce185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6">
          <table:table-cell/>
          <table:table-cell table:style-name="ce9"/>
          <table:table-cell table:style-name="ce14"/>
          <table:table-cell table:style-name="ce16" table:number-columns-repeated="5"/>
          <table:table-cell table:style-name="ce64"/>
          <table:table-cell table:style-name="ce16" table:number-columns-repeated="3"/>
          <table:table-cell table:style-name="ce85" table:formula="of:=IF([.CF20]=0;[.$CE$35];[.$CE$36])" office:value-type="float" office:value="0" calcext:value-type="float">
            <text:p><text:s/>- <text:s text:c="2"/></text:p>
          </table:table-cell>
          <table:table-cell table:style-name="ce16"/>
          <table:table-cell table:style-name="ce90" table:number-columns-repeated="2"/>
          <table:table-cell table:style-name="ce20" office:value-type="string" calcext:value-type="string">
            <text:p>Microseguros</text:p>
          </table:table-cell>
          <table:table-cell table:style-name="ce16"/>
          <table:table-cell table:style-name="ce101"/>
          <table:table-cell table:style-name="ce107" table:number-columns-repeated="2"/>
          <table:table-cell table:style-name="ce111" table:formula="of:=IF([$Factores.M16]=TRUE();[$Factores.L16];0)" office:value-type="float" office:value="0" calcext:value-type="float">
            <text:p><text:s/>- <text:s text:c="2"/></text:p>
          </table:table-cell>
          <table:table-cell table:style-name="ce90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82" table:formula="of:=[.G10]" office:value-type="float" office:value="36" calcext:value-type="float">
            <text:p><text:s/>36 </text:p>
          </table:table-cell>
          <table:table-cell table:style-name="ce153"/>
          <table:table-cell table:style-name="ce118"/>
          <table:table-cell table:style-name="ce153" table:formula="of:=VLOOKUP([.$G$10]*([.CJ23]-1);[$Factores.$G:.$H];2;1)" office:value-type="float" office:value="0.0188167335893405" calcext:value-type="float">
            <text:p>0.0188167335893405</text:p>
          </table:table-cell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6">
          <table:table-cell/>
          <table:table-cell table:style-name="ce9"/>
          <table:table-cell table:style-name="ce14"/>
          <table:table-cell table:style-name="ce20" table:number-columns-repeated="2"/>
          <table:table-cell table:style-name="ce20" office:value-type="string" calcext:value-type="string">
            <text:p>TCEA</text:p>
          </table:table-cell>
          <table:table-cell table:style-name="ce41" table:formula="of:=IF([.G6]=&quot;&quot;;0;(POWER((1+[.$AT$26]);360)-1)*100)" office:value-type="float" office:value="14.8473111661303" calcext:value-type="float">
            <text:p>14.85</text:p>
          </table:table-cell>
          <table:table-cell table:style-name="ce56" office:value-type="string" calcext:value-type="string">
            <text:p>%</text:p>
          </table:table-cell>
          <table:table-cell table:style-name="ce65"/>
          <table:table-cell table:style-name="ce54"/>
          <table:table-cell table:style-name="ce54" office:value-type="string" calcext:value-type="string">
            <text:p>Seguro Multiriesgo</text:p>
          </table:table-cell>
          <table:table-cell table:style-name="ce54"/>
          <table:table-cell table:style-name="ce86" table:number-columns-repeated="2"/>
          <table:table-cell table:style-name="ce91"/>
          <table:table-cell table:style-name="ce93"/>
          <table:table-cell table:style-name="ce85" table:formula="of:=[.CG32]" office:value-type="float" office:value="0" calcext:value-type="float">
            <text:p><text:s/>- <text:s text:c="2"/></text:p>
          </table:table-cell>
          <table:table-cell table:style-name="ce16"/>
          <table:table-cell table:style-name="ce101"/>
          <table:table-cell table:style-name="ce107" table:number-columns-repeated="2"/>
          <table:table-cell table:style-name="ce112" table:formula="of:=IF([$Factores.M20]=TRUE();[$Factores.L20];0)" office:value-type="float" office:value="0" calcext:value-type="float">
            <text:p><text:s/>- <text:s text:c="2"/></text:p>
          </table:table-cell>
          <table:table-cell table:style-name="ce90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83" table:formula="of:=FALSE()" office:value-type="boolean" office:boolean-value="false" calcext:value-type="boolean">
            <text:p>FALSO</text:p>
          </table:table-cell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7" table:visibility="collapse">
          <table:table-cell/>
          <table:table-cell table:style-name="ce9"/>
          <table:table-cell table:style-name="ce14"/>
          <table:table-cell table:style-name="ce16" table:number-columns-repeated="2"/>
          <table:table-cell table:style-name="ce26"/>
          <table:table-cell table:style-name="ce16" table:number-columns-repeated="2"/>
          <table:table-cell table:style-name="ce65"/>
          <table:table-cell table:style-name="ce16" table:number-columns-repeated="3"/>
          <table:table-cell table:style-name="ce54" table:number-columns-repeated="2"/>
          <table:table-cell table:style-name="ce90" table:number-columns-repeated="3"/>
          <table:table-cell table:style-name="ce16"/>
          <table:table-cell table:style-name="ce90" table:number-columns-repeated="5"/>
          <table:table-cell table:style-name="ce116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45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6">
          <table:table-cell/>
          <table:table-cell table:style-name="ce9"/>
          <table:table-cell table:style-name="ce14"/>
          <table:table-cell table:style-name="ce16" table:number-columns-repeated="2"/>
          <table:table-cell table:style-name="ce26"/>
          <table:table-cell table:style-name="ce16" table:number-columns-repeated="2"/>
          <table:table-cell table:style-name="ce65"/>
          <table:table-cell table:style-name="ce16" table:number-columns-repeated="3"/>
          <table:table-cell table:style-name="ce86" table:number-columns-repeated="2"/>
          <table:table-cell table:style-name="ce91"/>
          <table:table-cell table:style-name="ce16" table:number-columns-repeated="3"/>
          <table:table-cell table:style-name="ce101"/>
          <table:table-cell table:style-name="ce107" table:number-columns-repeated="2"/>
          <table:table-cell table:style-name="ce112" table:formula="of:=IF([$Factores.M33]=TRUE();[$Factores.L33];0)" office:value-type="float" office:value="0" calcext:value-type="float">
            <text:p><text:s/>- <text:s text:c="2"/></text:p>
          </table:table-cell>
          <table:table-cell table:style-name="ce90"/>
          <table:table-cell table:style-name="ce116"/>
          <table:table-cell table:style-name="ce2"/>
          <table:table-cell table:style-name="ce118"/>
          <table:table-cell table:style-name="ce121" office:value-type="string" calcext:value-type="string">
            <text:p>P1</text:p>
          </table:table-cell>
          <table:table-cell table:style-name="ce118" table:number-columns-repeated="20"/>
          <table:table-cell table:number-columns-repeated="9"/>
          <table:table-cell table:style-name="ce118" table:number-columns-repeated="24"/>
          <table:table-cell table:style-name="ce153"/>
          <table:table-cell table:style-name="ce118"/>
          <table:table-cell table:style-name="ce153"/>
          <table:table-cell table:style-name="ce184" table:formula="of:=IF([.CF18]=TRUE();1;0)" office:value-type="float" office:value="0" calcext:value-type="float">
            <text:p>0</text:p>
          </table:table-cell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3"/>
        </table:table-row>
        <table:table-row table:style-name="ro6">
          <table:table-cell/>
          <table:table-cell table:style-name="ce9"/>
          <table:table-cell table:style-name="ce14"/>
          <table:table-cell table:style-name="ce16" table:number-columns-repeated="5"/>
          <table:table-cell table:style-name="ce65"/>
          <table:table-cell table:style-name="ce16" table:number-columns-repeated="3"/>
          <table:table-cell table:style-name="ce86" table:number-columns-repeated="2"/>
          <table:table-cell table:style-name="ce91"/>
          <table:table-cell table:style-name="ce16" table:number-columns-repeated="3"/>
          <table:table-cell table:style-name="ce101"/>
          <table:table-cell table:style-name="ce108" office:value-type="string" office:string-value="P1" calcext:value-type="string">
            <text:p><text:s/>P1 </text:p>
          </table:table-cell>
          <table:table-cell table:style-name="ce110" office:value-type="float" office:value="0" calcext:value-type="float">
            <office:annotation draw:style-name="gr7" draw:text-style-name="P7" svg:width="4.225cm" svg:height="0.991cm" svg:x="28.25cm" svg:y="6.746cm" draw:caption-point-x="3.37cm" draw:caption-point-y="0.275cm">
              <dc:creator>Edison Achalma Mendoza</dc:creator>
              <dc:date>2024-07-31T04:04:00</dc:date>
              <text:p>Número de afiliados, diferentes del titular.</text:p>
            </office:annotation>
            <text:p><text:s/>- <text:s text:c="2"/></text:p>
          </table:table-cell>
          <table:table-cell table:style-name="ce112" table:formula="of:=IF([$Factores.M29]=TRUE();[$Factores.L29];0)" office:value-type="float" office:value="0" calcext:value-type="float">
            <text:p><text:s/>- <text:s text:c="2"/></text:p>
          </table:table-cell>
          <table:table-cell table:style-name="ce90"/>
          <table:table-cell table:style-name="ce116"/>
          <table:table-cell table:style-name="ce2"/>
          <table:table-cell table:style-name="ce118"/>
          <table:table-cell table:style-name="ce121" office:value-type="string" calcext:value-type="string">
            <text:p>P2</text:p>
          </table:table-cell>
          <table:table-cell table:style-name="ce118" table:number-columns-repeated="20"/>
          <table:table-cell table:number-columns-repeated="9"/>
          <table:table-cell table:style-name="ce118" table:number-columns-repeated="23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2"/>
        </table:table-row>
        <table:table-row table:style-name="ro8">
          <table:table-cell/>
          <table:table-cell table:style-name="ce10"/>
          <table:table-cell table:style-name="ce15" table:number-columns-repeated="2"/>
          <table:table-cell table:style-name="ce22" table:number-columns-repeated="2"/>
          <table:table-cell table:style-name="ce42" table:number-columns-repeated="12"/>
          <table:table-cell table:style-name="ce102" table:number-columns-repeated="5"/>
          <table:table-cell table:style-name="ce117"/>
          <table:table-cell table:style-name="ce2"/>
          <table:table-cell table:style-name="ce118" table:number-columns-repeated="22"/>
          <table:table-cell table:number-columns-repeated="9"/>
          <table:table-cell table:style-name="ce118" table:number-columns-repeated="23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16292"/>
        </table:table-row>
        <table:table-row table:style-name="ro5">
          <table:table-cell table:style-name="ce4"/>
          <table:table-cell table:style-name="ce4" office:value-type="string" calcext:value-type="string">
            <text:p>Los datos emitidos por el simulador son referenciales, la aprobación del crédito está sujeto a evaluación crediticia.</text:p>
          </table:table-cell>
          <table:table-cell table:style-name="ce4" table:number-columns-repeated="4"/>
          <table:table-cell table:style-name="ce43" table:number-columns-repeated="6"/>
          <table:table-cell table:style-name="ce87"/>
          <table:table-cell table:style-name="ce43" table:number-columns-repeated="6"/>
          <table:table-cell table:style-name="ce4" table:number-columns-repeated="6"/>
          <table:table-cell table:style-name="ce45" table:number-columns-repeated="9"/>
          <table:table-cell table:style-name="ce125"/>
          <table:table-cell table:style-name="ce125" table:formula="of:=[.AJ24]" office:value-type="float" office:value="-668.6" calcext:value-type="float">
            <text:p><text:s/>(668.6)</text:p>
          </table:table-cell>
          <table:table-cell table:style-name="ce125" office:value-type="string" office:string-value="CUOTA" calcext:value-type="string">
            <text:p><text:s/>CUOTA </text:p>
          </table:table-cell>
          <table:table-cell table:style-name="ce45" table:number-columns-repeated="10"/>
          <table:table-cell table:style-name="ce150"/>
          <table:table-cell table:number-columns-repeated="8"/>
          <table:table-cell table:style-name="ce45" table:number-columns-repeated="22"/>
          <table:table-cell table:style-name="ce167" office:value-type="string" calcext:value-type="string">
            <text:p>MONEDA</text:p>
          </table:table-cell>
          <table:table-cell table:style-name="ce173" table:formula="of:=VLOOKUP([.$H$6];[.CA24:.CB28];2;0)" office:value-type="float" office:value="1" calcext:value-type="float">
            <text:p>1</text:p>
          </table:table-cell>
          <table:table-cell table:style-name="ce167" office:value-type="string" calcext:value-type="string">
            <text:p>TASA</text:p>
          </table:table-cell>
          <table:table-cell table:style-name="ce173" table:formula="of:=VLOOKUP([.$D$8];[.CC24:.CD28];2;0)" office:value-type="float" office:value="1" calcext:value-type="float">
            <text:p>1</text:p>
          </table:table-cell>
          <table:table-cell table:style-name="ce167" office:value-type="string" calcext:value-type="string">
            <text:p>DESGRAVAMEN</text:p>
          </table:table-cell>
          <table:table-cell table:style-name="ce173" table:formula="of:=VLOOKUP([.$M$16];[.CE24:.CF28];2;0)" office:value-type="float" office:value="2" calcext:value-type="float">
            <text:p>2</text:p>
          </table:table-cell>
          <table:table-cell table:style-name="ce167" office:value-type="string" calcext:value-type="string">
            <text:p>MICROSEGUROS</text:p>
          </table:table-cell>
          <table:table-cell table:style-name="ce173" table:formula="of:=VLOOKUP([.$K$8];[.CG24:.CH28];2;0)" office:value-type="float" office:value="2" calcext:value-type="float">
            <text:p>2</text:p>
          </table:table-cell>
          <table:table-cell table:style-name="ce167" office:value-type="string" calcext:value-type="string">
            <text:p>CRONOGRAMA</text:p>
          </table:table-cell>
          <table:table-cell table:style-name="ce173" table:formula="of:=VLOOKUP([.$K$8];[.CI24:.CJ28];2;0)" office:value-type="float" office:value="2" calcext:value-type="float">
            <text:p>2</text:p>
          </table:table-cell>
          <table:table-cell table:style-name="ce167" office:value-type="string" calcext:value-type="string">
            <text:p>PERIODO GRACIA</text:p>
          </table:table-cell>
          <table:table-cell table:style-name="ce173" table:formula="of:=VLOOKUP([.$O$8];[.CK24:.CL28];2;0)" office:value-type="float" office:value="1" calcext:value-type="float">
            <text:p>1</text:p>
          </table:table-cell>
          <table:table-cell table:style-name="ce167" office:value-type="string" calcext:value-type="string">
            <text:p>FECHAS</text:p>
          </table:table-cell>
          <table:table-cell table:style-name="ce173" table:formula="of:=VLOOKUP([.$S$8];[.CM24:.CN28];2;0)" office:value-type="float" office:value="1" calcext:value-type="float">
            <text:p>1</text:p>
          </table:table-cell>
          <table:table-cell table:style-name="ce45" table:number-columns-repeated="16292"/>
        </table:table-row>
        <table:table-row table:style-name="ro5">
          <table:table-cell table:style-name="ce4"/>
          <table:table-cell table:style-name="ce11" office:value-type="string" calcext:value-type="string">
            <text:p>Los seguros deberán ser cancelados por el cliente al inicio del crédito o si lo requiere como parte del financiamiento. El cliente tiene el derecho a elegir entre: a) La contratación del seguro ofrecido por la empresa.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43" table:number-columns-repeated="2"/>
          <table:table-cell table:style-name="ce73"/>
          <table:table-cell table:style-name="ce43"/>
          <table:table-cell table:style-name="ce88"/>
          <table:table-cell table:style-name="ce43" table:number-columns-repeated="6"/>
          <table:table-cell table:style-name="ce4" table:number-columns-repeated="6"/>
          <table:table-cell table:style-name="ce45" table:number-columns-repeated="10"/>
          <table:table-cell table:style-name="ce125" table:formula="of:=TRUNC(ROUND([.$AJ$25]/[.AI29];2);1)" office:value-type="float" office:value="-668.6" calcext:value-type="float">
            <text:p><text:s/>(668.6)</text:p>
          </table:table-cell>
          <table:table-cell table:style-name="ce125" office:value-type="string" office:string-value="CUOTA PREVIA" calcext:value-type="string">
            <text:p><text:s/>CUOTA PREVIA </text:p>
          </table:table-cell>
          <table:table-cell table:style-name="ce45" table:number-columns-repeated="6"/>
          <table:table-cell table:style-name="ce133"/>
          <table:table-cell table:style-name="ce45" table:number-columns-repeated="3"/>
          <table:table-cell table:style-name="ce150"/>
          <table:table-cell table:number-columns-repeated="8"/>
          <table:table-cell table:style-name="ce45" table:number-columns-repeated="22"/>
          <table:table-cell table:style-name="ce168" office:value-type="string" calcext:value-type="string">
            <text:p>Soles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Tasa Efectiva Mensual Fija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Si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Quincenal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Quincenal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Sin Gracia</text:p>
          </table:table-cell>
          <table:table-cell table:style-name="ce174" office:value-type="float" office:value="1" calcext:value-type="float">
            <text:p>1</text:p>
          </table:table-cell>
          <table:table-cell table:style-name="ce168" office:value-type="string" calcext:value-type="string">
            <text:p>Fecha Fija</text:p>
          </table:table-cell>
          <table:table-cell table:style-name="ce174" office:value-type="float" office:value="1" calcext:value-type="float">
            <text:p>1</text:p>
          </table:table-cell>
          <table:table-cell table:style-name="ce45" table:number-columns-repeated="16292"/>
        </table:table-row>
        <table:table-row table:style-name="ro5">
          <table:table-cell table:style-name="ce4"/>
          <table:table-cell table:style-name="ce11" office:value-type="string" calcext:value-type="string">
            <text:p>b) Un seguro contratado directamente por el cliente o a través de la designación de un corredor de seguros, siempre que cumpla con las condiciones previamente informadas en el certificado o póliza de seguros. </text:p>
          </table:table-cell>
          <table:table-cell table:style-name="ce4" table:number-columns-repeated="4"/>
          <table:table-cell table:style-name="ce45"/>
          <table:table-cell table:style-name="ce4" table:number-columns-repeated="5"/>
          <table:table-cell table:style-name="ce87"/>
          <table:table-cell table:style-name="ce4" table:number-columns-repeated="6"/>
          <table:table-cell table:style-name="ce4">
            <draw:custom-shape table:end-cell-address="Cronograma.W27" table:end-x="0.332cm" table:end-y="0.211cm" draw:z-index="0" draw:name="Rectangle 15" draw:style-name="gr3" draw:text-style-name="P3" svg:width="3.84cm" svg:height="0.899cm" svg:x="0.462cm" svg:y="0.212cm">
              <office:event-listeners>
                <script:event-listener script:language="ooo:script" script:event-name="dom:click" xlink:href="vnd.sun.star.script:VBAProject.Módulo1.a2_simular?language=Basic&amp;location=document" xlink:type="simple"/>
              </office:event-listeners>
              <text:p text:style-name="P2"><text:span text:style-name="T1">Calcula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4"/>
          <table:table-cell table:style-name="ce5"/>
          <table:table-cell table:style-name="ce45" table:number-columns-repeated="9"/>
          <table:table-cell table:style-name="ce45" table:formula="of:=[.AJ25]/[.AI29]" office:value-type="float" office:value="-668.632466799143" calcext:value-type="float">
            <text:p>-668.632466799143</text:p>
          </table:table-cell>
          <table:table-cell table:style-name="ce128" table:formula="of:=IF([.$CL$23]=3;[.$G$16]*POWER(1+[.$CC$32];[.$CK$33]-[.$G$12]);[.$G$16])" office:value-type="float" office:value="-18000.8533333333" calcext:value-type="float">
            <text:p><text:s/>(18,000.85)</text:p>
          </table:table-cell>
          <table:table-cell table:style-name="ce129" table:formula="of:=[.AJ25]/SUM([.AI31:.AI42])" office:value-type="float" office:value="-1667.80878986784" calcext:value-type="float">
            <text:p>-1667.80878986784</text:p>
          </table:table-cell>
          <table:table-cell table:style-name="ce45" table:number-columns-repeated="5"/>
          <table:table-cell table:style-name="ce136"/>
          <table:table-cell table:style-name="ce45" table:number-columns-repeated="4"/>
          <table:table-cell table:style-name="ce151"/>
          <table:table-cell table:number-columns-repeated="8"/>
          <table:table-cell table:style-name="ce45" table:number-columns-repeated="22"/>
          <table:table-cell table:style-name="ce169" office:value-type="string" calcext:value-type="string">
            <text:p>Dolares</text:p>
          </table:table-cell>
          <table:table-cell table:style-name="ce175" office:value-type="float" office:value="2" calcext:value-type="float">
            <text:p>2</text:p>
          </table:table-cell>
          <table:table-cell table:style-name="ce169" office:value-type="string" calcext:value-type="string">
            <text:p>Tasa Efectiva Anual Fija</text:p>
          </table:table-cell>
          <table:table-cell table:style-name="ce175" office:value-type="float" office:value="2" calcext:value-type="float">
            <text:p>2</text:p>
          </table:table-cell>
          <table:table-cell table:style-name="ce169" office:value-type="string" calcext:value-type="string">
            <text:p>No</text:p>
          </table:table-cell>
          <table:table-cell table:style-name="ce175" office:value-type="float" office:value="2" calcext:value-type="float">
            <text:p>2</text:p>
          </table:table-cell>
          <table:table-cell table:style-name="ce169" office:value-type="string" calcext:value-type="string">
            <text:p>Mensual</text:p>
          </table:table-cell>
          <table:table-cell table:style-name="ce175" office:value-type="float" office:value="2" calcext:value-type="float">
            <text:p>2</text:p>
          </table:table-cell>
          <table:table-cell table:style-name="ce169" office:value-type="string" calcext:value-type="string">
            <text:p>Mensual</text:p>
          </table:table-cell>
          <table:table-cell table:style-name="ce175" table:formula="of:=[.CJ24]+1" office:value-type="float" office:value="2" calcext:value-type="float">
            <text:p>2</text:p>
          </table:table-cell>
          <table:table-cell table:style-name="ce169" office:value-type="string" calcext:value-type="string">
            <text:p>Gracia Relativa</text:p>
          </table:table-cell>
          <table:table-cell table:style-name="ce175" office:value-type="float" office:value="2" calcext:value-type="float">
            <text:p>2</text:p>
          </table:table-cell>
          <table:table-cell table:style-name="ce169" office:value-type="string" calcext:value-type="string">
            <text:p>Fecha Variable</text:p>
          </table:table-cell>
          <table:table-cell table:style-name="ce175" office:value-type="float" office:value="2" calcext:value-type="float">
            <text:p>2</text:p>
          </table:table-cell>
          <table:table-cell table:style-name="ce45" table:number-columns-repeated="16292"/>
        </table:table-row>
        <table:table-row table:style-name="ro5">
          <table:table-cell table:style-name="ce4"/>
          <table:table-cell table:style-name="ce4" office:value-type="string" calcext:value-type="string">
            <text:p>Fecha de actualización:Junio 2020</text:p>
          </table:table-cell>
          <table:table-cell table:style-name="ce4"/>
          <table:table-cell table:style-name="ce21"/>
          <table:table-cell table:style-name="ce4" table:number-columns-repeated="19"/>
          <table:table-cell table:style-name="ce5" table:number-columns-repeated="2"/>
          <table:table-cell table:style-name="ce45" table:number-columns-repeated="17"/>
          <table:table-cell table:style-name="ce136"/>
          <table:table-cell table:style-name="ce45" table:number-columns-repeated="2"/>
          <table:table-cell table:style-name="ce142" office:value-type="float" office:value="0.000384610974874887" calcext:value-type="float">
            <text:p><text:s/>0.000385 </text:p>
          </table:table-cell>
          <table:table-cell table:style-name="ce45"/>
          <table:table-cell table:style-name="ce150"/>
          <table:table-cell table:number-columns-repeated="8"/>
          <table:table-cell table:style-name="ce45" table:number-columns-repeated="22"/>
          <table:table-cell table:style-name="ce169" office:value-type="string" calcext:value-type="string">
            <text:p>Euros</text:p>
          </table:table-cell>
          <table:table-cell table:style-name="ce175" office:value-type="float" office:value="3" calcext:value-type="float">
            <text:p>3</text:p>
          </table:table-cell>
          <table:table-cell table:style-name="ce169"/>
          <table:table-cell table:style-name="ce175"/>
          <table:table-cell table:style-name="ce169"/>
          <table:table-cell table:style-name="ce175"/>
          <table:table-cell table:style-name="ce169" office:value-type="string" calcext:value-type="string">
            <text:p>Bimestral</text:p>
          </table:table-cell>
          <table:table-cell table:style-name="ce175" office:value-type="float" office:value="3" calcext:value-type="float">
            <text:p>3</text:p>
          </table:table-cell>
          <table:table-cell table:style-name="ce169" office:value-type="string" calcext:value-type="string">
            <text:p>Bimestral</text:p>
          </table:table-cell>
          <table:table-cell table:style-name="ce175" table:formula="of:=[.CJ25]+1" office:value-type="float" office:value="3" calcext:value-type="float">
            <text:p>3</text:p>
          </table:table-cell>
          <table:table-cell table:style-name="ce169" office:value-type="string" calcext:value-type="string">
            <text:p>Gracia Absoluta</text:p>
          </table:table-cell>
          <table:table-cell table:style-name="ce175" office:value-type="float" office:value="3" calcext:value-type="float">
            <text:p>3</text:p>
          </table:table-cell>
          <table:table-cell table:style-name="ce169"/>
          <table:table-cell table:style-name="ce175"/>
          <table:table-cell table:style-name="ce45" table:number-columns-repeated="16292"/>
        </table:table-row>
        <table:table-row table:style-name="ro5">
          <table:table-cell table:style-name="ce5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57" office:value-type="string" calcext:value-type="string">
            <text:p>SIMULACION DE CRONOGRAMA DE PAGOS</text:p>
          </table:table-cell>
          <table:table-cell table:style-name="ce4" table:number-columns-repeated="15"/>
          <table:table-cell table:style-name="ce5" table:number-columns-repeated="2"/>
          <table:table-cell table:style-name="ce45" table:number-columns-repeated="17"/>
          <table:table-cell table:style-name="ce138" office:value-type="string" calcext:value-type="string">
            <text:p>FECHAS</text:p>
          </table:table-cell>
          <table:table-cell table:style-name="ce138" office:value-type="string" calcext:value-type="string">
            <text:p>1RA</text:p>
          </table:table-cell>
          <table:table-cell table:style-name="ce141" office:value-type="string" calcext:value-type="string">
            <text:p>2DA</text:p>
          </table:table-cell>
          <table:table-cell table:style-name="ce143" table:formula="of:=[.G6]-[.AT29]" office:value-type="float" office:value="-36000.006612824" calcext:value-type="float">
            <text:p><text:s/>(36,000.01)</text:p>
          </table:table-cell>
          <table:table-cell table:style-name="ce45"/>
          <table:table-cell table:style-name="ce150"/>
          <table:table-cell table:style-name="ce155" office:value-type="string" calcext:value-type="string">
            <text:p>Quincenal</text:p>
          </table:table-cell>
          <table:table-cell table:style-name="ce155"/>
          <table:table-cell table:style-name="ce155" office:value-type="string" calcext:value-type="string">
            <text:p>Mensual</text:p>
          </table:table-cell>
          <table:table-cell table:style-name="ce155"/>
          <table:table-cell table:style-name="ce155" office:value-type="string" calcext:value-type="string">
            <text:p>Bimestral</text:p>
          </table:table-cell>
          <table:table-cell table:style-name="ce155"/>
          <table:table-cell table:style-name="ce155" office:value-type="string" calcext:value-type="string">
            <text:p>Trimestral</text:p>
          </table:table-cell>
          <table:table-cell table:style-name="ce155"/>
          <table:table-cell table:style-name="ce45" table:number-columns-repeated="22"/>
          <table:table-cell table:style-name="ce169"/>
          <table:table-cell table:style-name="ce175"/>
          <table:table-cell table:style-name="ce169"/>
          <table:table-cell table:style-name="ce175"/>
          <table:table-cell table:style-name="ce169"/>
          <table:table-cell table:style-name="ce175"/>
          <table:table-cell table:style-name="ce169" office:value-type="string" calcext:value-type="string">
            <text:p>Trimestral</text:p>
          </table:table-cell>
          <table:table-cell table:style-name="ce175" office:value-type="float" office:value="4" calcext:value-type="float">
            <text:p>4</text:p>
          </table:table-cell>
          <table:table-cell table:style-name="ce169" office:value-type="string" calcext:value-type="string">
            <text:p>Trimestral</text:p>
          </table:table-cell>
          <table:table-cell table:style-name="ce175" table:formula="of:=[.CJ26]+1" office:value-type="float" office:value="4" calcext:value-type="float">
            <text:p>4</text:p>
          </table:table-cell>
          <table:table-cell table:style-name="ce169"/>
          <table:table-cell table:style-name="ce175"/>
          <table:table-cell table:style-name="ce169"/>
          <table:table-cell table:style-name="ce175"/>
          <table:table-cell table:style-name="ce45" table:number-columns-repeated="16292"/>
        </table:table-row>
        <table:table-row table:style-name="ro5">
          <table:table-cell table:style-name="ce5"/>
          <table:table-cell table:style-name="ce4">
            <draw:frame draw:z-index="1" draw:name="1 Imagen" draw:style-name="gr4" draw:text-style-name="P4" svg:width="2.385cm" svg:height="1.243cm" svg:x="0.085cm" svg:y="0.021cm">
              <draw:image xlink:href="Pictures/10000000000000C80000006BD4E3B510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21"/>
          <table:table-cell table:style-name="ce4" table:number-columns-repeated="19"/>
          <table:table-cell table:style-name="ce5" table:number-columns-repeated="2"/>
          <table:table-cell table:style-name="ce45" table:number-columns-repeated="7"/>
          <table:table-cell table:style-name="ce123" office:value-type="string" calcext:value-type="string">
            <text:p>FV Y PGA</text:p>
          </table:table-cell>
          <table:table-cell table:style-name="ce45"/>
          <table:table-cell table:style-name="ce123" office:value-type="string" calcext:value-type="string">
            <text:p>FACTOR ACT</text:p>
          </table:table-cell>
          <table:table-cell table:style-name="ce123" office:value-type="string" calcext:value-type="string">
            <text:p>FACTOR ACT GR</text:p>
          </table:table-cell>
          <table:table-cell table:style-name="ce123" office:value-type="string" calcext:value-type="string">
            <text:p>FACTOR ACT GA</text:p>
          </table:table-cell>
          <table:table-cell table:style-name="ce123" office:value-type="string" calcext:value-type="string">
            <text:p>MES</text:p>
          </table:table-cell>
          <table:table-cell table:style-name="ce123" office:value-type="string" calcext:value-type="string">
            <text:p>AÑO</text:p>
          </table:table-cell>
          <table:table-cell table:style-name="ce132" office:value-type="string" calcext:value-type="string">
            <text:p>DIAS</text:p>
          </table:table-cell>
          <table:table-cell table:style-name="ce132" office:value-type="string" calcext:value-type="string">
            <text:p>DIAS ACUM</text:p>
          </table:table-cell>
          <table:table-cell table:style-name="ce132" office:value-type="string" calcext:value-type="string">
            <text:p>FIN DE MES</text:p>
          </table:table-cell>
          <table:table-cell table:style-name="ce139" office:value-type="string" calcext:value-type="string">
            <text:p>INICIALES</text:p>
          </table:table-cell>
          <table:table-cell table:number-columns-repeated="2" table:style-name="ce139" office:value-type="string" calcext:value-type="string">
            <text:p>VALIDACION</text:p>
          </table:table-cell>
          <table:table-cell table:style-name="ce144" office:value-type="string" calcext:value-type="string">
            <text:p>VA</text:p>
          </table:table-cell>
          <table:table-cell table:style-name="ce45"/>
          <table:table-cell table:style-name="ce152" table:formula="of:=[.CJ23]" office:value-type="float" office:value="2" calcext:value-type="float">
            <text:p>2</text:p>
          </table:table-cell>
          <table:table-cell table:style-name="ce156" office:value-type="string" calcext:value-type="string">
            <text:p>DIA</text:p>
          </table:table-cell>
          <table:table-cell table:style-name="ce158" office:value-type="string" calcext:value-type="string">
            <text:p>AÑO</text:p>
          </table:table-cell>
          <table:table-cell table:style-name="ce158" office:value-type="string" calcext:value-type="string">
            <text:p>MES</text:p>
          </table:table-cell>
          <table:table-cell table:style-name="ce158" office:value-type="string" calcext:value-type="string">
            <text:p>AÑO</text:p>
          </table:table-cell>
          <table:table-cell table:style-name="ce158" office:value-type="string" calcext:value-type="string">
            <text:p>MES</text:p>
          </table:table-cell>
          <table:table-cell table:style-name="ce158" office:value-type="string" calcext:value-type="string">
            <text:p>AÑO</text:p>
          </table:table-cell>
          <table:table-cell table:style-name="ce158" office:value-type="string" calcext:value-type="string">
            <text:p>MES</text:p>
          </table:table-cell>
          <table:table-cell table:style-name="ce164" office:value-type="string" calcext:value-type="string">
            <text:p>AÑO</text:p>
          </table:table-cell>
          <table:table-cell table:style-name="ce165" table:formula="of:=INT([.G10]/2)+1" office:value-type="float" office:value="19" calcext:value-type="float">
            <text:p><text:s/>19 </text:p>
          </table:table-cell>
          <table:table-cell table:style-name="ce45" table:number-columns-repeated="21"/>
          <table:table-cell table:style-name="ce170"/>
          <table:table-cell table:style-name="ce176"/>
          <table:table-cell table:style-name="ce170"/>
          <table:table-cell table:style-name="ce176"/>
          <table:table-cell table:style-name="ce170"/>
          <table:table-cell table:style-name="ce176"/>
          <table:table-cell table:style-name="ce170"/>
          <table:table-cell table:style-name="ce176"/>
          <table:table-cell table:style-name="ce170"/>
          <table:table-cell table:style-name="ce176"/>
          <table:table-cell table:style-name="ce170"/>
          <table:table-cell table:style-name="ce176"/>
          <table:table-cell table:style-name="ce170"/>
          <table:table-cell table:style-name="ce176"/>
          <table:table-cell table:style-name="ce45" table:number-columns-repeated="16292"/>
        </table:table-row>
        <table:table-row table:style-name="ro6">
          <table:table-cell table:style-name="ce6"/>
          <table:table-cell table:number-columns-repeated="2"/>
          <table:table-cell table:style-name="ce21"/>
          <table:table-cell/>
          <table:table-cell table:style-name="ce27" office:value-type="string" calcext:value-type="string">
            <text:p>N°</text:p>
          </table:table-cell>
          <table:table-cell table:style-name="ce27" office:value-type="string" calcext:value-type="string">
            <text:p>FECHA PAGO</text:p>
          </table:table-cell>
          <table:table-cell table:style-name="ce27" office:value-type="string" calcext:value-type="string" table:number-columns-spanned="3" table:number-rows-spanned="1">
            <text:p>SALDO</text:p>
          </table:table-cell>
          <table:covered-table-cell table:style-name="ce66"/>
          <table:covered-table-cell table:style-name="ce68"/>
          <table:table-cell table:style-name="ce27" office:value-type="string" calcext:value-type="string">
            <text:p>CAPITAL</text:p>
          </table:table-cell>
          <table:table-cell table:style-name="ce27" office:value-type="string" calcext:value-type="string" table:number-columns-spanned="3" table:number-rows-spanned="1">
            <text:p>INTERESES</text:p>
          </table:table-cell>
          <table:covered-table-cell table:style-name="ce66"/>
          <table:covered-table-cell table:style-name="ce68"/>
          <table:table-cell table:style-name="ce92" office:value-type="string" calcext:value-type="string">
            <text:p>Seg.multiriesgo</text:p>
          </table:table-cell>
          <table:table-cell table:style-name="ce94" office:value-type="string" calcext:value-type="string">
            <text:p>CUOTA SIN ITF</text:p>
          </table:table-cell>
          <table:table-cell table:style-name="ce27" office:value-type="string" calcext:value-type="string">
            <text:p>ITF</text:p>
          </table:table-cell>
          <table:table-cell table:style-name="ce27" office:value-type="string" calcext:value-type="string" table:number-columns-spanned="2" table:number-rows-spanned="1">
            <text:p>CUOTA</text:p>
          </table:table-cell>
          <table:covered-table-cell table:style-name="ce68"/>
          <table:table-cell table:style-name="ce2" table:number-columns-repeated="4"/>
          <table:table-cell table:style-name="ce6" table:number-columns-repeated="2"/>
          <table:table-cell table:style-name="ce118" table:number-columns-repeated="9"/>
          <table:table-cell table:style-name="ce126" table:formula="of:=IF([.$CL$23]=1;SUM([.AI30:.AI329]);IF([.$CL$23]=2;SUM([.AJ30:.AJ329]);SUM([.AK30:.AK329])))" office:value-type="float" office:value="26.9218954016793" calcext:value-type="float">
            <text:p><text:s/>26.92 </text:p>
          </table:table-cell>
          <table:table-cell table:style-name="ce118" table:number-columns-repeated="2"/>
          <table:table-cell table:style-name="ce130" table:formula="of:=IF([.$AV$28]=1;[.AW29];IF([.$AV$28]=2;[.AY29];IF([.$AV$28]=3;[.BA29];[.BC29])))" office:value-type="float" office:value="5" calcext:value-type="float">
            <text:p>05</text:p>
          </table:table-cell>
          <table:table-cell table:style-name="ce130" table:formula="of:=IF([.$AV$28]=1;[.AX29];IF([.$AV$28]=2;[.AZ29];IF([.$AV$28]=3;[.BB29];[.BD29])))" office:value-type="float" office:value="2021" calcext:value-type="float">
            <text:p>2021</text:p>
          </table:table-cell>
          <table:table-cell table:style-name="ce133" table:number-columns-repeated="2"/>
          <table:table-cell table:style-name="ce135" table:formula="of:=IF([.$AV$28]=1;&quot;&quot;;DATE([.AM31];[.AL31];1)-1)" office:value-type="date" office:date-value="2021-05-31" calcext:value-type="date">
            <text:p>31/05/2021</text:p>
          </table:table-cell>
          <table:table-cell table:style-name="ce137" table:number-columns-repeated="3"/>
          <table:table-cell table:style-name="ce145" table:formula="of:=SUM([.AT30:.AT329])" office:value-type="float" office:value="18000.0032794906" calcext:value-type="float">
            <text:p><text:s/>18,000.00 </text:p>
          </table:table-cell>
          <table:table-cell table:style-name="ce118"/>
          <table:table-cell/>
          <table:table-cell table:style-name="ce157" table:formula="of:=IF(DAY([.G12])&gt;[.G14];MONTH([.G12])+1;MONTH([.G12]))" office:value-type="float" office:value="5" calcext:value-type="float">
            <text:p>05</text:p>
          </table:table-cell>
          <table:table-cell table:style-name="ce159" table:formula="of:=IF([.AY29]&gt;12;YEAR([.G12])+1;YEAR([.G12]))" office:value-type="float" office:value="2021" calcext:value-type="float">
            <text:p>2021</text:p>
          </table:table-cell>
          <table:table-cell table:style-name="ce157" table:formula="of:=IF(AND(DAY([.G12])&gt;[.G14];[.CN23]=1);MONTH([.G12])+1;MONTH([.G12]))" office:value-type="float" office:value="5" calcext:value-type="float">
            <text:p>05</text:p>
          </table:table-cell>
          <table:table-cell table:style-name="ce159" table:formula="of:=IF([.AY29]&gt;12;YEAR([.G12])+1;YEAR([.G12]))" office:value-type="float" office:value="2021" calcext:value-type="float">
            <text:p>2021</text:p>
          </table:table-cell>
          <table:table-cell table:style-name="ce157" table:formula="of:=IF(DAY([.G12])&gt;[.G14];MONTH([.G12])+1;MONTH([.G12]))" office:value-type="float" office:value="5" calcext:value-type="float">
            <text:p>05</text:p>
          </table:table-cell>
          <table:table-cell table:style-name="ce159" table:formula="of:=IF([.AY29]&gt;12;YEAR([.G12])+1;YEAR([.G12]))" office:value-type="float" office:value="2021" calcext:value-type="float">
            <text:p>2021</text:p>
          </table:table-cell>
          <table:table-cell table:style-name="ce157" table:formula="of:=IF(DAY([.G12])&gt;[.G14];MONTH([.G12]);MONTH([.G12]))" office:value-type="float" office:value="5" calcext:value-type="float">
            <text:p>05</text:p>
          </table:table-cell>
          <table:table-cell table:style-name="ce159" table:formula="of:=IF([.BC29]&gt;12;YEAR([.G12])+1;YEAR([.G12]))" office:value-type="float" office:value="2021" calcext:value-type="float">
            <text:p>2021</text:p>
          </table:table-cell>
          <table:table-cell table:style-name="ce45" table:number-columns-repeated="2"/>
          <table:table-cell table:style-name="ce118" table:number-columns-repeated="20"/>
          <table:table-cell table:style-name="ce171"/>
          <table:table-cell table:style-name="ce153"/>
          <table:table-cell table:style-name="ce171"/>
          <table:table-cell table:style-name="ce153"/>
          <table:table-cell table:style-name="ce171"/>
          <table:table-cell table:style-name="ce153"/>
          <table:table-cell table:style-name="ce171"/>
          <table:table-cell table:style-name="ce153"/>
          <table:table-cell table:style-name="ce118" table:number-columns-repeated="10"/>
          <table:table-cell table:style-name="ce188" office:value-type="string" calcext:value-type="string">
            <text:p>Gracia Relativa</text:p>
          </table:table-cell>
          <table:table-cell table:style-name="ce188" office:value-type="string" calcext:value-type="string">
            <text:p>Gracia Absoluta</text:p>
          </table:table-cell>
          <table:table-cell table:style-name="ce189"/>
          <table:table-cell table:style-name="ce188" office:value-type="string" calcext:value-type="string">
            <text:p>FECHA_FINAL</text:p>
          </table:table-cell>
          <table:table-cell table:style-name="ce191" office:value-type="string" calcext:value-type="string">
            <text:p>Dias</text:p>
          </table:table-cell>
          <table:table-cell table:style-name="ce191" office:value-type="string" calcext:value-type="string">
            <text:p>Dias Acum</text:p>
          </table:table-cell>
          <table:table-cell table:style-name="ce118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8"/>
          <table:table-cell table:style-name="ce46"/>
          <table:table-cell table:style-name="ce58" table:formula="of:=[.G16]" office:value-type="float" office:value="-18000.8533333333" calcext:value-type="float" table:number-columns-spanned="3" table:number-rows-spanned="1">
            <text:p><text:s/>(18,000.85)</text:p>
          </table:table-cell>
          <table:covered-table-cell table:number-columns-repeated="2" table:style-name="ce58"/>
          <table:table-cell table:style-name="ce74"/>
          <table:table-cell table:style-name="ce58" table:number-columns-spanned="3" table:number-rows-spanned="1"/>
          <table:covered-table-cell table:number-columns-repeated="2" table:style-name="ce58"/>
          <table:table-cell table:style-name="ce75" table:number-columns-repeated="2"/>
          <table:table-cell table:style-name="ce28"/>
          <table:table-cell table:style-name="ce96" table:number-columns-spanned="2" table:number-rows-spanned="1"/>
          <table:covered-table-cell table:style-name="ce96"/>
          <table:table-cell table:style-name="ce2" table:number-columns-repeated="4"/>
          <table:table-cell table:style-name="ce6" table:number-columns-repeated="2"/>
          <table:table-cell table:style-name="ce118" table:number-columns-repeated="12"/>
          <table:table-cell table:style-name="ce130" table:number-columns-repeated="2"/>
          <table:table-cell table:style-name="ce118" table:number-columns-repeated="6"/>
          <table:table-cell table:style-name="ce146"/>
          <table:table-cell table:style-name="ce133"/>
          <table:table-cell table:style-name="ce153"/>
          <table:table-cell table:style-name="ce155" table:number-columns-repeated="8"/>
          <table:table-cell table:style-name="ce45" table:number-columns-repeated="2"/>
          <table:table-cell table:style-name="ce118" table:number-columns-repeated="21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/>
          <table:table-cell table:style-name="ce153"/>
          <table:table-cell table:style-name="ce118" table:number-columns-repeated="7"/>
          <table:table-cell table:style-name="ce187" table:formula="of:=IF(AND([.$CL$23]=3;[.$O$10]&gt;=[.$AH31]);[.$G$12];IF(AND([.$CL$23]=3;[.$CN$23]=2);[.AG31];IF([.$AV$28]=1;[.$AW$31];IF([.$CN$23]=1;DATE([.AM31];[.AL31];[.$G$14]);IF([.$AV$28]=2;[.$G$12]+30;IF([.$AV$28]=3;[.$G$12]+60;[.$G$12]+90))))))" office:value-type="date" office:date-value="2021-06-24" calcext:value-type="date">
            <text:p>24/06/2021</text:p>
          </table:table-cell>
          <table:table-cell table:style-name="ce118" table:number-columns-repeated="16290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office:value-type="float" office:value="1" calcext:value-type="float">
            <text:p>1</text:p>
          </table:table-cell>
          <table:table-cell table:style-name="ce47" office:value-type="date" office:date-value="2021-06-24" calcext:value-type="date">
            <text:p>24/06/2021</text:p>
          </table:table-cell>
          <table:table-cell table:style-name="ce59" table:formula="of:=[.H30]-[.K31]" office:value-type="float" office:value="-18401.5433333333" calcext:value-type="float" table:number-columns-spanned="3" table:number-rows-spanned="1">
            <text:p><text:s/>(18,401.54)</text:p>
          </table:table-cell>
          <table:covered-table-cell table:number-columns-repeated="2" table:style-name="ce59"/>
          <table:table-cell table:style-name="ce75" office:value-type="float" office:value="400.69" calcext:value-type="float">
            <text:p><text:s/>400.69 </text:p>
          </table:table-cell>
          <table:table-cell table:style-name="ce59" office:value-type="float" office:value="215.81" calcext:value-type="float" table:number-columns-spanned="3" table:number-rows-spanned="1">
            <text:p><text:s/>215.81 </text:p>
          </table:table-cell>
          <table:covered-table-cell table:number-columns-repeated="2" table:style-name="ce59"/>
          <table:table-cell table:style-name="ce75"/>
          <table:table-cell table:style-name="ce75" table:formula="of:=[.K31]+[.L31]+[.O31]" office:value-type="float" office:value="616.5" calcext:value-type="float">
            <text:p><text:s/>616.50 </text:p>
          </table:table-cell>
          <table:table-cell table:style-name="ce75" table:formula="of:=TRUNC(((([.$P31])/(1-[.$M$14]))-([.$P31]));1)+(IF(MOD(((([.$P31])/(1-[.$M$14]))-([.$P31]))*100; 10)&gt;=5; 5; 0)/100)" office:value-type="float" office:value="0" calcext:value-type="float">
            <text:p><text:s/>- <text:s text:c="2"/></text:p>
          </table:table-cell>
          <table:table-cell table:style-name="ce97" table:formula="of:=[.Q31]+[.P31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$G$12]+30" office:value-type="date" office:date-value="2021-06-23" calcext:value-type="date">
            <text:p>23/06/2021</text:p>
          </table:table-cell>
          <table:table-cell table:style-name="ce119" office:value-type="float" office:value="1" calcext:value-type="float">
            <text:p>1</text:p>
          </table:table-cell>
          <table:table-cell table:style-name="ce127" table:formula="of:=1/POWER(1+[.$CC$32];IF([.$CL$23]=3;[.$CX31];[.$AO31]))" office:value-type="float" office:value="0.98337019868114" calcext:value-type="float">
            <text:p><text:s/>0.983 </text:p>
          </table:table-cell>
          <table:table-cell table:style-name="ce127" table:formula="of:=IF([.$AH31]&lt;=[.$CK$32];0;1/POWER(1+[.$CC$32];[.$CV31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1]=0;[.$AJ30]=0);0;[.$AI31])" office:value-type="string" office:string-value="" calcext:value-type="error">
            <text:p>#N/D</text:p>
          </table:table-cell>
          <table:table-cell table:style-name="ce130" table:formula="of:=IF([.$AV$28]=1;[.AW31];IF([.$AV$28]=2;[.AY31];IF([.$AV$28]=3;[.BA31];[.BC31])))" office:value-type="float" office:value="6" calcext:value-type="float">
            <text:p>06</text:p>
          </table:table-cell>
          <table:table-cell table:style-name="ce130" table:formula="of:=IF([.$AV$28]=1;[.AX31];IF([.$AV$28]=2;[.AZ31];IF([.$AV$28]=3;[.BB31];[.BD31])))" office:value-type="float" office:value="2021" calcext:value-type="float">
            <text:p>2021</text:p>
          </table:table-cell>
          <table:table-cell table:style-name="ce134" table:formula="of:=IF([.$CN$23]=2;[.CW31];[.CV31]-[.G12])" office:value-type="float" office:value="31" calcext:value-type="float">
            <text:p><text:s/>31 </text:p>
          </table:table-cell>
          <table:table-cell table:style-name="ce134" table:formula="of:=IF([.$CN$23]=2;[.CX31];[.CV31]-[.$G$12])" office:value-type="float" office:value="31" calcext:value-type="float">
            <text:p><text:s/>31 </text:p>
          </table:table-cell>
          <table:table-cell table:style-name="ce136" table:formula="of:=IF([.$AV$28]=1;&quot;&quot;;DATE([.AM32];[.AL32];1)-1)" office:value-type="date" office:date-value="2021-06-30" calcext:value-type="date">
            <text:p>30/06/2021</text:p>
          </table:table-cell>
          <table:table-cell table:style-name="ce136" table:formula="of:=IF(AND([.$CL$23]=3;[.$O$10]&gt;=[.$AH31]);[.$G$12];IF(AND([.$CL$23]=3;[.$CN$23]=2);[.AG31];IF([.$AV$28]=1;[.$AW$31];IF([.$CN$23]=1;DATE([.AM31];[.AL31];[.$G$14]);IF([.$AV$28]=2;[.$G$12]+30;IF([.$AV$28]=3;[.$G$12]+60;[.$G$12]+90))))))" office:value-type="date" office:date-value="2021-06-24" calcext:value-type="date">
            <text:p>24/06/2021</text:p>
          </table:table-cell>
          <table:table-cell table:style-name="ce140" table:formula="of:=[.$AQ31]+IF(AND(DAY([.$AQ31])=27;MONTH([.$AQ31])=7);3;IF(AND(WEEKDAY([.$AQ31])=5;ISERROR(VLOOKUP([.$AQ31]+1;[$Factores.$A:.$A];1;0))=FALSE());4;IF(OR(WEEKDAY([.$AQ31])=1;ISERROR(VLOOKUP([.$AQ31];[$Factores.$A:.$A];1;0))=FALSE());1;IF(WEEKDAY([.$AQ31])=7;2;0))))" office:value-type="date" office:date-value="2021-06-24" calcext:value-type="date">
            <text:p>24/06/2021</text:p>
          </table:table-cell>
          <table:table-cell table:style-name="ce140" office:value-type="date" office:date-value="2021-06-24" calcext:value-type="date">
            <text:p>24/06/2021</text:p>
          </table:table-cell>
          <table:table-cell table:style-name="ce126" table:formula="of:=[.P31]/POWER(1+[.$AT$26];[.AO31])" office:value-type="float" office:value="609.194549890518" calcext:value-type="float">
            <text:p><text:s/>609.19 </text:p>
          </table:table-cell>
          <table:table-cell table:style-name="ce148"/>
          <table:table-cell table:style-name="ce154"/>
          <table:table-cell table:style-name="ce136" table:formula="of:=[.G12]+15" office:value-type="date" office:date-value="2021-06-08" calcext:value-type="date">
            <text:p>08/06/2021</text:p>
          </table:table-cell>
          <table:table-cell table:style-name="ce155"/>
          <table:table-cell table:style-name="ce161" table:formula="of:=IF([.AY29]&lt;12;[.AY29]+1;[.AY29]+1-12)" office:value-type="float" office:value="6" calcext:value-type="float">
            <text:p>06</text:p>
          </table:table-cell>
          <table:table-cell table:style-name="ce160" table:formula="of:=IF([.AY29]=12;[.AZ29]+1;[.AZ29])" office:value-type="float" office:value="2021" calcext:value-type="float">
            <text:p>2021</text:p>
          </table:table-cell>
          <table:table-cell table:style-name="ce161" table:formula="of:=IF([.BA29]&lt;=10;[.BA29]+2;IF([.BA29]=11;1;IF([.BA29]=12;2;IF([.BA29]=13;3;4))))" office:value-type="float" office:value="7" calcext:value-type="float">
            <text:p>07</text:p>
          </table:table-cell>
          <table:table-cell table:style-name="ce160" table:formula="of:=IF([.BA29]&gt;=11;[.BB29]+1;[.BB29])" office:value-type="float" office:value="2021" calcext:value-type="float">
            <text:p>2021</text:p>
          </table:table-cell>
          <table:table-cell table:style-name="ce161" table:formula="of:=IF([.BC29]&lt;=9;[.BC29]+3;IF([.BC29]=10;1;IF([.BC29]=11;2;IF([.BC29]=12;3;4))))" office:value-type="float" office:value="8" calcext:value-type="float">
            <text:p>08</text:p>
          </table:table-cell>
          <table:table-cell table:style-name="ce160" table:formula="of:=IF([.BC29]&gt;=10;[.BD29]+1;[.BD29])" office:value-type="float" office:value="2021" calcext:value-type="float">
            <text:p>2021</text:p>
          </table:table-cell>
          <table:table-cell table:style-name="ce166" table:formula="of:=DATE([.AZ31];[.AY31];[.$G$14])" office:value-type="date" office:date-value="2021-06-24" calcext:value-type="date">
            <text:p>24/06/2021</text:p>
          </table:table-cell>
          <table:table-cell table:style-name="ce166" table:formula="of:=[.$BE31]+IF(OR(WEEKDAY([.$BE31])=1;ISERROR(VLOOKUP([.$BE31];[$Factores.$A:.$A];1;0))=FALSE());1;IF(WEEKDAY([.$BE31])=7;2;0))" office:value-type="date" office:date-value="2021-06-24" calcext:value-type="date">
            <text:p>24/06/2021</text:p>
          </table:table-cell>
          <table:table-cell table:style-name="ce166" table:formula="of:=IF(AND(DAY([.$BE31])=27;WEEKDAY([.$BE31])=1);[.$BE31]-2;IF(AND(DAY([.$BE31])=27;WEEKDAY([.$BE31])=7);[.$BE31]-1;IF(AND(DAY([.$BE31])=26;WEEKDAY([.$BE31])=1);[.$BE31]-2;IF(AND(DAY([.$BE31])=26;WEEKDAY([.$BE31])=7);[.$BE31]-1;IF(DAY([.$BF31])=15;[.$BF31]+2;IF(DAY([.$BF31])=16;[.$BF31]+1;[.$BF31]))))))" office:value-type="date" office:date-value="2021-06-24" calcext:value-type="date">
            <text:p>24/06/2021</text:p>
          </table:table-cell>
          <table:table-cell table:style-name="ce119" table:number-columns-repeated="21"/>
          <table:table-cell table:style-name="ce177" table:formula="of:=IF([.CD23]=1;[.$G$8]*12;(POWER(1+[.$G$8]/100;1/12)-1)*1200)" office:value-type="float" office:value="19.6332878849842" calcext:value-type="float">
            <office:annotation office:display="true" draw:style-name="gr8" draw:text-style-name="P6" svg:width="1.178cm" svg:height="0.991cm" svg:x="159.594cm" svg:y="10.954cm" draw:caption-point-x="5.621cm" draw:caption-point-y="0.512cm">
              <dc:creator>Edison Achalma Mendoza</dc:creator>
              <dc:date>2024-07-31T04:04:00</dc:date>
              <text:p>TNA</text:p>
              <text:p/>
            </office:annotation>
            <text:p><text:s/>19.63 </text:p>
          </table:table-cell>
          <table:table-cell table:style-name="ce155"/>
          <table:table-cell table:style-name="ce180" table:formula="of:=IF([.$CF$20]=1;[$Factores.$C$4];IF([.K8]=&quot;Quincenal&quot;;VLOOKUP([.$G$10];[$Factores.$G:.$H];2;1);VLOOKUP([.$G$10]*([.CJ23]-1);[$Factores.$G:.$H];2;1)))" office:value-type="percentage" office:value="0.0188167335893405" calcext:value-type="percentage">
            <text:p>1.8817%</text:p>
          </table:table-cell>
          <table:table-cell table:style-name="ce119"/>
          <table:table-cell table:style-name="ce177" table:formula="of:=SUM([.V16:.V21])" office:value-type="float" office:value="0" calcext:value-type="float">
            <text:p><text:s/>- <text:s text:c="2"/></text:p>
          </table:table-cell>
          <table:table-cell table:style-name="ce119" table:number-columns-repeated="3"/>
          <table:table-cell table:style-name="ce45" office:value-type="string" calcext:value-type="string">
            <text:p>Valida Gracia</text:p>
          </table:table-cell>
          <table:table-cell table:style-name="ce119" table:number-columns-repeated="3"/>
          <table:table-cell table:style-name="ce119" office:value-type="float" office:value="1" calcext:value-type="float">
            <text:p>1</text:p>
          </table:table-cell>
          <table:table-cell table:style-name="ce187" table:formula="of:=[.$CP$30]+IF(DAY([.$CP$30]+1)=16;2;IF(DAY([.$CP$30])=15;1;IF(DAY([.$CP$30])=28;4;IF(WEEKDAY([.$CP$30])=7;2;IF(WEEKDAY([.$CP$30])=1;1;0)))))" office:value-type="date" office:date-value="2021-06-24" calcext:value-type="date">
            <text:p>24/06/2021</text:p>
          </table:table-cell>
          <table:table-cell table:style-name="ce187" table:formula="of:=[.$CP31]+IF(AND(WEEKDAY([.$CP31])=6;ISERROR(VLOOKUP([.$CP31];[$Factores.$A:.$A];1;0))=FALSE());2;0)" office:value-type="date" office:date-value="2021-06-24" calcext:value-type="date">
            <text:p>24/06/2021</text:p>
          </table:table-cell>
          <table:table-cell table:style-name="ce187" table:formula="of:=[.CQ31]+IF(WEEKDAY([.CQ31])=7;2;IF(WEEKDAY([.CQ31])=1;1;IF(AND(WEEKDAY([.CQ31])=6;ISERROR(VLOOKUP([.CQ31];[$Factores.$A:.$A];1;0))=FALSE());3;0)))" office:value-type="date" office:date-value="2021-06-24" calcext:value-type="date">
            <text:p>24/06/2021</text:p>
          </table:table-cell>
          <table:table-cell table:style-name="ce187" table:formula="of:=[.$CR31]+IF(AND(WEEKDAY([.$CR31])=6; ISERROR(VLOOKUP([.$CR31];[$Factores.$A:.$A];1;0))=FALSE());2;0)" office:value-type="date" office:date-value="2021-06-24" calcext:value-type="date">
            <text:p>24/06/2021</text:p>
          </table:table-cell>
          <table:table-cell table:style-name="ce187" table:formula="of:=IF(AND([.$CL$23]=3;[.$O$10]&gt;=[.$CO31]);[.$G$12];[.$CS31])" office:value-type="date" office:date-value="2021-06-24" calcext:value-type="date">
            <text:p>24/06/2021</text:p>
          </table:table-cell>
          <table:table-cell table:style-name="ce119"/>
          <table:table-cell table:style-name="ce190" table:formula="of:=IF([.$CN$23]=1;IF(OR([.$CL$23]=3;[.$CL$23]=2);[.$CT31];[.AS31]);IF(AND([.$CN$23]=2;[.$CL$23]=3);[.CT31];[.CS31]))" office:value-type="date" office:date-value="2021-06-24" calcext:value-type="date">
            <text:p>24/06/2021</text:p>
          </table:table-cell>
          <table:table-cell table:style-name="ce119" table:formula="of:=[.CV31]-[.$G$12]" office:value-type="float" office:value="31" calcext:value-type="float">
            <text:p>31</text:p>
          </table:table-cell>
          <table:table-cell table:style-name="ce119" table:formula="of:=IF([.$CL$23]=3;0;[.CW31]+[.CW30])" office:value-type="float" office:value="31" calcext:value-type="float">
            <text:p>31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table:formula="of:=[.F31]+1" office:value-type="float" office:value="2" calcext:value-type="float">
            <text:p>2</text:p>
          </table:table-cell>
          <table:table-cell table:style-name="ce47" office:value-type="date" office:date-value="2021-07-26" calcext:value-type="date">
            <text:p>26/07/2021</text:p>
          </table:table-cell>
          <table:table-cell table:style-name="ce59" table:formula="of:=[.H31]-[.K32]" office:value-type="float" office:value="-18800.1833333333" calcext:value-type="float" table:number-columns-spanned="3" table:number-rows-spanned="1">
            <text:p><text:s/>(18,800.18)</text:p>
          </table:table-cell>
          <table:covered-table-cell table:number-columns-repeated="2" table:style-name="ce59"/>
          <table:table-cell table:style-name="ce75" office:value-type="float" office:value="398.64" calcext:value-type="float">
            <text:p><text:s/>398.64 </text:p>
          </table:table-cell>
          <table:table-cell table:style-name="ce59" office:value-type="float" office:value="217.86" calcext:value-type="float" table:number-columns-spanned="3" table:number-rows-spanned="1">
            <text:p><text:s/>217.86 </text:p>
          </table:table-cell>
          <table:covered-table-cell table:number-columns-repeated="2" table:style-name="ce59"/>
          <table:table-cell table:style-name="ce75"/>
          <table:table-cell table:style-name="ce75" table:formula="of:=[.K32]+[.L32]+[.O32]" office:value-type="float" office:value="616.5" calcext:value-type="float">
            <text:p><text:s/>616.50 </text:p>
          </table:table-cell>
          <table:table-cell table:style-name="ce75" table:formula="of:=TRUNC(((([.$P32])/(1-[.$M$14]))-([.$P32]));1)+(IF(MOD(((([.$P32])/(1-[.$M$14]))-([.$P32]))*100; 10)&gt;=5; 5; 0)/100)" office:value-type="float" office:value="0" calcext:value-type="float">
            <text:p><text:s/>- <text:s text:c="2"/></text:p>
          </table:table-cell>
          <table:table-cell table:style-name="ce97" table:formula="of:=[.Q32]+[.P32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1]+30" office:value-type="date" office:date-value="2021-07-23" calcext:value-type="date">
            <text:p>23/07/2021</text:p>
          </table:table-cell>
          <table:table-cell table:style-name="ce119" table:formula="of:=[.AH31]+1" office:value-type="float" office:value="2" calcext:value-type="float">
            <text:p>2</text:p>
          </table:table-cell>
          <table:table-cell table:style-name="ce127" table:formula="of:=1/POWER(1+[.$CC$32];IF([.$CL$23]=3;[.$CX32];[.$AO32]))" office:value-type="float" office:value="0.966493975722853" calcext:value-type="float">
            <text:p><text:s/>0.966 </text:p>
          </table:table-cell>
          <table:table-cell table:style-name="ce127" table:formula="of:=IF([.$AH32]&lt;=[.$CK$32];0;1/POWER(1+[.$CC$32];[.$CV32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2]=0;[.$AJ31]=0);0;[.$AI32])" office:value-type="string" office:string-value="" calcext:value-type="error">
            <text:p>#N/D</text:p>
          </table:table-cell>
          <table:table-cell table:style-name="ce130" table:formula="of:=IF([.$AV$28]=1;[.AW32];IF([.$AV$28]=2;[.AY32];IF([.$AV$28]=3;[.BA32];[.BC32])))" office:value-type="float" office:value="7" calcext:value-type="float">
            <text:p>07</text:p>
          </table:table-cell>
          <table:table-cell table:style-name="ce130" table:formula="of:=IF([.$AV$28]=1;[.AX32];IF([.$AV$28]=2;[.AZ32];IF([.$AV$28]=3;[.BB32];[.BD32])))" office:value-type="float" office:value="2021" calcext:value-type="float">
            <text:p>2021</text:p>
          </table:table-cell>
          <table:table-cell table:style-name="ce134" table:formula="of:=[.CV32]-[.CV31]" office:value-type="float" office:value="32" calcext:value-type="float">
            <text:p><text:s/>32 </text:p>
          </table:table-cell>
          <table:table-cell table:style-name="ce134" table:formula="of:=IF([.$CN$23]=2;[.CX32];[.CV32]-[.$G$12])" office:value-type="float" office:value="63" calcext:value-type="float">
            <text:p><text:s/>63 </text:p>
          </table:table-cell>
          <table:table-cell table:style-name="ce136" table:formula="of:=IF([.$AV$28]=1;&quot;&quot;;DATE([.AM33];[.AL33];1)-1)" office:value-type="date" office:date-value="2021-07-31" calcext:value-type="date">
            <text:p>31/07/2021</text:p>
          </table:table-cell>
          <table:table-cell table:style-name="ce136" table:formula="of:=IF(AND([.$CL$23]=3;[.$O$10]&gt;=[.$AH32]);[.$G$12];IF(AND([.$CL$23]=3;[.$CN$23]=2);[.AG32];IF([.$AV$28]=1;[.$AW32];IF([.$CN$23]=1;DATE([.AM32];[.AL32];[.$G$14]);IF([.$AV$28]=2;[.AS31]+30;IF([.$AV$28]=3;[.AS31]+60;[.AS31]+90))))))" office:value-type="date" office:date-value="2021-07-24" calcext:value-type="date">
            <text:p>24/07/2021</text:p>
          </table:table-cell>
          <table:table-cell table:style-name="ce140" table:formula="of:=[.$AQ32]+IF(AND(DAY([.$AQ32])=27;MONTH([.$AQ32])=7);3;IF(AND(WEEKDAY([.$AQ32])=5;ISERROR(VLOOKUP([.$AQ32]+1;[$Factores.$A:.$A];1;0))=FALSE());4;IF(OR(WEEKDAY([.$AQ32])=1;ISERROR(VLOOKUP([.$AQ32];[$Factores.$A:.$A];1;0))=FALSE());1;IF(WEEKDAY([.$AQ32])=7;2;0))))" office:value-type="date" office:date-value="2021-07-26" calcext:value-type="date">
            <text:p>26/07/2021</text:p>
          </table:table-cell>
          <table:table-cell table:style-name="ce140" office:value-type="date" office:date-value="2021-07-26" calcext:value-type="date">
            <text:p>26/07/2021</text:p>
          </table:table-cell>
          <table:table-cell table:style-name="ce126" table:formula="of:=[.P32]/POWER(1+[.$AT$26];[.AO32])" office:value-type="float" office:value="601.744231042064" calcext:value-type="float">
            <text:p><text:s/>601.74 </text:p>
          </table:table-cell>
          <table:table-cell table:style-name="ce148"/>
          <table:table-cell table:style-name="ce154"/>
          <table:table-cell table:style-name="ce136" office:value-type="date" office:date-value="2021-06-24" calcext:value-type="date">
            <text:p>24/06/2021</text:p>
          </table:table-cell>
          <table:table-cell table:style-name="ce155"/>
          <table:table-cell table:style-name="ce162" table:formula="of:=IF([.AY31]&lt;12;[.AY31]+1;[.AY31]+1-12)" office:value-type="float" office:value="7" calcext:value-type="float">
            <text:p>07</text:p>
          </table:table-cell>
          <table:table-cell table:style-name="ce163" table:formula="of:=IF([.AY31]=12;[.AZ31]+1;[.AZ31])" office:value-type="float" office:value="2021" calcext:value-type="float">
            <text:p>2021</text:p>
          </table:table-cell>
          <table:table-cell table:style-name="ce162" table:formula="of:=IF([.BA31]&lt;=10;[.BA31]+2;IF([.BA31]=11;1;IF([.BA31]=12;2;IF([.BA31]=13;3;4))))" office:value-type="float" office:value="9" calcext:value-type="float">
            <text:p>09</text:p>
          </table:table-cell>
          <table:table-cell table:style-name="ce163" table:formula="of:=IF([.BA31]&gt;=11;[.BB31]+1;[.BB31])" office:value-type="float" office:value="2021" calcext:value-type="float">
            <text:p>2021</text:p>
          </table:table-cell>
          <table:table-cell table:style-name="ce162" table:formula="of:=IF([.BC31]&lt;=9;[.BC31]+3;IF([.BC31]=10;1;IF([.BC31]=11;2;IF([.BC31]=12;3;4))))" office:value-type="float" office:value="11" calcext:value-type="float">
            <text:p>11</text:p>
          </table:table-cell>
          <table:table-cell table:style-name="ce163" table:formula="of:=IF([.BC31]&gt;=10;[.BD31]+1;[.BD31])" office:value-type="float" office:value="2021" calcext:value-type="float">
            <text:p>2021</text:p>
          </table:table-cell>
          <table:table-cell table:style-name="ce166" table:formula="of:=DATE([.AZ32];[.AY32];[.$G$14])" office:value-type="date" office:date-value="2021-07-24" calcext:value-type="date">
            <text:p>24/07/2021</text:p>
          </table:table-cell>
          <table:table-cell table:style-name="ce166" table:formula="of:=[.$BE32]+IF(OR(WEEKDAY([.$BE32])=1;ISERROR(VLOOKUP([.$BE32];[$Factores.$A:.$A];1;0))=FALSE());1;IF(WEEKDAY([.$BE32])=7;2;0))" office:value-type="date" office:date-value="2021-07-26" calcext:value-type="date">
            <text:p>26/07/2021</text:p>
          </table:table-cell>
          <table:table-cell table:style-name="ce166" table:formula="of:=IF(AND(DAY([.$BE32])=27;WEEKDAY([.$BE32])=1);[.$BE32]-2;IF(AND(DAY([.$BE32])=27;WEEKDAY([.$BE32])=7);[.$BE32]-1;IF(AND(DAY([.$BE32])=26;WEEKDAY([.$BE32])=1);[.$BE32]-2;IF(AND(DAY([.$BE32])=26;WEEKDAY([.$BE32])=7);[.$BE32]-1;IF(DAY([.$BF32])=15;[.$BF32]+2;IF(DAY([.$BF32])=16;[.$BF32]+1;[.$BF32]))))))" office:value-type="date" office:date-value="2021-07-26" calcext:value-type="date">
            <text:p>26/07/2021</text:p>
          </table:table-cell>
          <table:table-cell table:style-name="ce119" table:number-columns-repeated="21"/>
          <table:table-cell table:style-name="ce178" table:formula="of:=POWER(1+[.CC31]/1200;1/30)-1" office:value-type="percentage" office:value="0.000541102111827119" calcext:value-type="percentage">
            <office:annotation office:display="true" draw:style-name="gr8" draw:text-style-name="P6" svg:width="1.072cm" svg:height="0.991cm" svg:x="151.297cm" svg:y="11.456cm" draw:caption-point-x="13.918cm" draw:caption-point-y="0.46cm">
              <dc:creator>Edison Achalma Mendoza</dc:creator>
              <dc:date>2024-07-31T04:04:00</dc:date>
              <text:p>TED</text:p>
              <text:p/>
            </office:annotation>
            <text:p>0.05411021%</text:p>
          </table:table-cell>
          <table:table-cell table:style-name="ce155"/>
          <table:table-cell table:style-name="ce180" table:formula="of:=IF([.CF23]=1;[.CE31];0)" office:value-type="percentage" office:value="0" calcext:value-type="percentage">
            <text:p>0.0000%</text:p>
          </table:table-cell>
          <table:table-cell table:style-name="ce119"/>
          <table:table-cell table:style-name="ce177" table:formula="of:=[.CG31]" office:value-type="float" office:value="0" calcext:value-type="float">
            <text:p><text:s/>- <text:s text:c="2"/></text:p>
          </table:table-cell>
          <table:table-cell table:style-name="ce119" table:number-columns-repeated="3"/>
          <table:table-cell table:style-name="ce186" table:formula="of:=[.O10]" office:value-type="float" office:value="0" calcext:value-type="float">
            <office:annotation office:display="true" draw:style-name="gr9" draw:text-style-name="P7" svg:width="2.183cm" svg:height="0.951cm" svg:x="168.975cm" svg:y="10.795cm" draw:caption-point-x="17.77cm" draw:caption-point-y="1.121cm">
              <dc:creator>Edison Achalma Mendoza</dc:creator>
              <dc:date>2024-07-31T04:04:00</dc:date>
              <text:p>Cuotas PG</text:p>
              <text:p><text:span text:style-name="T2"/></text:p>
            </office:annotation>
            <text:p><text:s/>- <text:s text:c="2"/></text:p>
          </table:table-cell>
          <table:table-cell table:style-name="ce119" table:number-columns-repeated="3"/>
          <table:table-cell table:style-name="ce119" table:formula="of:=[.CO31]+1" office:value-type="float" office:value="2" calcext:value-type="float">
            <text:p>2</text:p>
          </table:table-cell>
          <table:table-cell table:style-name="ce119"/>
          <table:table-cell table:style-name="ce187" table:formula="of:=[.CS31]+30" office:value-type="date" office:date-value="2021-07-24" calcext:value-type="date">
            <text:p>24/07/2021</text:p>
          </table:table-cell>
          <table:table-cell table:style-name="ce187" table:formula="of:=[.$CQ32]+IF(WEEKDAY([.$CQ32])=7;2;IF(WEEKDAY([.$CQ32])=1;1;0))" office:value-type="date" office:date-value="2021-07-26" calcext:value-type="date">
            <text:p>26/07/2021</text:p>
          </table:table-cell>
          <table:table-cell table:style-name="ce187" table:formula="of:=[.$CR32]+IF(AND(WEEKDAY([.$CR32])=6; ISERROR(VLOOKUP([.$CR32];[$Factores.$A:.$A];1;0))=FALSE());3;0)" office:value-type="date" office:date-value="2021-07-26" calcext:value-type="date">
            <text:p>26/07/2021</text:p>
          </table:table-cell>
          <table:table-cell table:style-name="ce187" table:formula="of:=IF(AND([.$CL$23]=3;[.$O$10]&gt;=[.$CO32]);[.$G$12];[.$CS32])" office:value-type="date" office:date-value="2021-07-26" calcext:value-type="date">
            <text:p>26/07/2021</text:p>
          </table:table-cell>
          <table:table-cell table:style-name="ce119"/>
          <table:table-cell table:style-name="ce190" table:formula="of:=IF([.$CN$23]=1;IF(AND([.$CL$23]=3;[.CT32]=[.CT31]);[.$CT32];[.AS32]);IF(AND([.$CN$23]=2;[.$CL$23]=3);[.CT32];[.CS32]))" office:value-type="date" office:date-value="2021-07-26" calcext:value-type="date">
            <text:p>26/07/2021</text:p>
          </table:table-cell>
          <table:table-cell table:style-name="ce119" table:formula="of:=([.CV32]-[.CV31])" office:value-type="float" office:value="32" calcext:value-type="float">
            <text:p>32</text:p>
          </table:table-cell>
          <table:table-cell table:style-name="ce119" table:formula="of:=IF(OR([.$CL$23]=2;[.$CL$23]=1);[.CW32]+[.CX31];IF([.CX30]=0;[.CW32];[.CW32]+[.CX31]))" office:value-type="float" office:value="63" calcext:value-type="float">
            <text:p>63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table:formula="of:=[.F32]+1" office:value-type="float" office:value="3" calcext:value-type="float">
            <text:p>3</text:p>
          </table:table-cell>
          <table:table-cell table:style-name="ce47" office:value-type="date" office:date-value="2021-08-24" calcext:value-type="date">
            <text:p>24/08/2021</text:p>
          </table:table-cell>
          <table:table-cell table:style-name="ce59" table:formula="of:=[.H32]-[.K33]" office:value-type="float" office:value="-19223.8333333333" calcext:value-type="float" table:number-columns-spanned="3" table:number-rows-spanned="1">
            <text:p><text:s/>(19,223.83)</text:p>
          </table:table-cell>
          <table:covered-table-cell table:number-columns-repeated="2" table:style-name="ce59"/>
          <table:table-cell table:style-name="ce75" office:value-type="float" office:value="423.65" calcext:value-type="float">
            <text:p><text:s/>423.65 </text:p>
          </table:table-cell>
          <table:table-cell table:style-name="ce59" office:value-type="float" office:value="192.85" calcext:value-type="float" table:number-columns-spanned="3" table:number-rows-spanned="1">
            <text:p><text:s/>192.85 </text:p>
          </table:table-cell>
          <table:covered-table-cell table:number-columns-repeated="2" table:style-name="ce59"/>
          <table:table-cell table:style-name="ce75"/>
          <table:table-cell table:style-name="ce75" table:formula="of:=[.K33]+[.L33]+[.O33]" office:value-type="float" office:value="616.5" calcext:value-type="float">
            <text:p><text:s/>616.50 </text:p>
          </table:table-cell>
          <table:table-cell table:style-name="ce75" table:formula="of:=TRUNC(((([.$P33])/(1-[.$M$14]))-([.$P33]));1)+(IF(MOD(((([.$P33])/(1-[.$M$14]))-([.$P33]))*100; 10)&gt;=5; 5; 0)/100)" office:value-type="float" office:value="0" calcext:value-type="float">
            <text:p><text:s/>- <text:s text:c="2"/></text:p>
          </table:table-cell>
          <table:table-cell table:style-name="ce97" table:formula="of:=[.Q33]+[.P33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2]+30" office:value-type="date" office:date-value="2021-08-22" calcext:value-type="date">
            <text:p>22/08/2021</text:p>
          </table:table-cell>
          <table:table-cell table:style-name="ce119" table:formula="of:=[.AH32]+1" office:value-type="float" office:value="3" calcext:value-type="float">
            <text:p>3</text:p>
          </table:table-cell>
          <table:table-cell table:style-name="ce127" table:formula="of:=1/POWER(1+[.$CC$32];IF([.$CL$23]=3;[.$CX33];[.$AO33]))" office:value-type="float" office:value="0.951450201230044" calcext:value-type="float">
            <text:p><text:s/>0.951 </text:p>
          </table:table-cell>
          <table:table-cell table:style-name="ce127" table:formula="of:=IF([.$AH33]&lt;=[.$CK$32];0;1/POWER(1+[.$CC$32];[.$CV33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3]=0;[.$AJ32]=0);0;[.$AI33])" office:value-type="string" office:string-value="" calcext:value-type="error">
            <text:p>#N/D</text:p>
          </table:table-cell>
          <table:table-cell table:style-name="ce130" table:formula="of:=IF([.$AV$28]=1;[.AW33];IF([.$AV$28]=2;[.AY33];IF([.$AV$28]=3;[.BA33];[.BC33])))" office:value-type="float" office:value="8" calcext:value-type="float">
            <text:p>08</text:p>
          </table:table-cell>
          <table:table-cell table:style-name="ce130" table:formula="of:=IF([.$AV$28]=1;[.AX33];IF([.$AV$28]=2;[.AZ33];IF([.$AV$28]=3;[.BB33];[.BD33])))" office:value-type="float" office:value="2021" calcext:value-type="float">
            <text:p>2021</text:p>
          </table:table-cell>
          <table:table-cell table:style-name="ce134" table:formula="of:=[.CV33]-[.CV32]" office:value-type="float" office:value="29" calcext:value-type="float">
            <text:p><text:s/>29 </text:p>
          </table:table-cell>
          <table:table-cell table:style-name="ce134" table:formula="of:=IF([.$CN$23]=2;[.CX33];[.CV33]-[.$G$12])" office:value-type="float" office:value="92" calcext:value-type="float">
            <text:p><text:s/>92 </text:p>
          </table:table-cell>
          <table:table-cell table:style-name="ce136" table:formula="of:=IF([.$AV$28]=1;&quot;&quot;;DATE([.AM34];[.AL34];1)-1)" office:value-type="date" office:date-value="2021-08-31" calcext:value-type="date">
            <text:p>31/08/2021</text:p>
          </table:table-cell>
          <table:table-cell table:style-name="ce136" table:formula="of:=IF(AND([.$CL$23]=3;[.$O$10]&gt;=[.$AH33]);[.$G$12];IF(AND([.$CL$23]=3;[.$CN$23]=2);[.AG33];IF([.$AV$28]=1;[.$AW33];IF([.$CN$23]=1;DATE([.AM33];[.AL33];[.$G$14]);IF([.$AV$28]=2;[.AS32]+30;IF([.$AV$28]=3;[.AS32]+60;[.AS32]+90))))))" office:value-type="date" office:date-value="2021-08-24" calcext:value-type="date">
            <text:p>24/08/2021</text:p>
          </table:table-cell>
          <table:table-cell table:style-name="ce140" table:formula="of:=[.$AQ33]+IF(AND(DAY([.$AQ33])=27;MONTH([.$AQ33])=7);3;IF(AND(WEEKDAY([.$AQ33])=5;ISERROR(VLOOKUP([.$AQ33]+1;[$Factores.$A:.$A];1;0))=FALSE());4;IF(OR(WEEKDAY([.$AQ33])=1;ISERROR(VLOOKUP([.$AQ33];[$Factores.$A:.$A];1;0))=FALSE());1;IF(WEEKDAY([.$AQ33])=7;2;0))))" office:value-type="date" office:date-value="2021-08-24" calcext:value-type="date">
            <text:p>24/08/2021</text:p>
          </table:table-cell>
          <table:table-cell table:style-name="ce140" office:value-type="date" office:date-value="2021-08-24" calcext:value-type="date">
            <text:p>24/08/2021</text:p>
          </table:table-cell>
          <table:table-cell table:style-name="ce126" table:formula="of:=[.P33]/POWER(1+[.$AT$26];[.AO33])" office:value-type="float" office:value="595.071112820491" calcext:value-type="float">
            <text:p><text:s/>595.07 </text:p>
          </table:table-cell>
          <table:table-cell table:style-name="ce148"/>
          <table:table-cell table:style-name="ce154"/>
          <table:table-cell table:style-name="ce136" table:formula="of:=[.AW32]+15" office:value-type="date" office:date-value="2021-07-09" calcext:value-type="date">
            <text:p>09/07/2021</text:p>
          </table:table-cell>
          <table:table-cell table:style-name="ce155"/>
          <table:table-cell table:style-name="ce162" table:formula="of:=IF([.AY32]&lt;12;[.AY32]+1;[.AY32]+1-12)" office:value-type="float" office:value="8" calcext:value-type="float">
            <text:p>08</text:p>
          </table:table-cell>
          <table:table-cell table:style-name="ce163" table:formula="of:=IF([.AY32]=12;[.AZ32]+1;[.AZ32])" office:value-type="float" office:value="2021" calcext:value-type="float">
            <text:p>2021</text:p>
          </table:table-cell>
          <table:table-cell table:style-name="ce162" table:formula="of:=IF([.BA32]&lt;=10;[.BA32]+2;IF([.BA32]=11;1;IF([.BA32]=12;2;IF([.BA32]=13;3;4))))" office:value-type="float" office:value="11" calcext:value-type="float">
            <text:p>11</text:p>
          </table:table-cell>
          <table:table-cell table:style-name="ce163" table:formula="of:=IF([.BA32]&gt;=11;[.BB32]+1;[.BB32])" office:value-type="float" office:value="2021" calcext:value-type="float">
            <text:p>2021</text:p>
          </table:table-cell>
          <table:table-cell table:style-name="ce162" table:formula="of:=IF([.BC32]&lt;=9;[.BC32]+3;IF([.BC32]=10;1;IF([.BC32]=11;2;IF([.BC32]=12;3;4))))" office:value-type="float" office:value="2" calcext:value-type="float">
            <text:p>02</text:p>
          </table:table-cell>
          <table:table-cell table:style-name="ce163" table:formula="of:=IF([.BC32]&gt;=10;[.BD32]+1;[.BD32])" office:value-type="float" office:value="2022" calcext:value-type="float">
            <text:p>2022</text:p>
          </table:table-cell>
          <table:table-cell table:style-name="ce166" table:formula="of:=DATE([.AZ33];[.AY33];[.$G$14])" office:value-type="date" office:date-value="2021-08-24" calcext:value-type="date">
            <text:p>24/08/2021</text:p>
          </table:table-cell>
          <table:table-cell table:style-name="ce166" table:formula="of:=[.$BE33]+IF(OR(WEEKDAY([.$BE33])=1;ISERROR(VLOOKUP([.$BE33];[$Factores.$A:.$A];1;0))=FALSE());1;IF(WEEKDAY([.$BE33])=7;2;0))" office:value-type="date" office:date-value="2021-08-24" calcext:value-type="date">
            <text:p>24/08/2021</text:p>
          </table:table-cell>
          <table:table-cell table:style-name="ce166" table:formula="of:=IF(AND(DAY([.$BE33])=27;WEEKDAY([.$BE33])=1);[.$BE33]-2;IF(AND(DAY([.$BE33])=27;WEEKDAY([.$BE33])=7);[.$BE33]-1;IF(AND(DAY([.$BE33])=26;WEEKDAY([.$BE33])=1);[.$BE33]-2;IF(AND(DAY([.$BE33])=26;WEEKDAY([.$BE33])=7);[.$BE33]-1;IF(DAY([.$BF33])=15;[.$BF33]+2;IF(DAY([.$BF33])=16;[.$BF33]+1;[.$BF33]))))))" office:value-type="date" office:date-value="2021-08-24" calcext:value-type="date">
            <text:p>24/08/2021</text:p>
          </table:table-cell>
          <table:table-cell table:style-name="ce119" table:number-columns-repeated="21"/>
          <table:table-cell table:style-name="ce172"/>
          <table:table-cell table:style-name="ce119" table:number-columns-repeated="7"/>
          <table:table-cell table:style-name="ce136" table:formula="of:=IF([.$CL$23]=3;[.$G$12];VLOOKUP([.$CK$32];[.$AH$31:.$CV$500];67;0))" office:value-type="string" office:string-value="" calcext:value-type="error">
            <text:p>#N/D</text:p>
          </table:table-cell>
          <table:table-cell table:style-name="ce119" table:number-columns-repeated="3"/>
          <table:table-cell table:style-name="ce119" table:formula="of:=[.CO32]+1" office:value-type="float" office:value="3" calcext:value-type="float">
            <text:p>3</text:p>
          </table:table-cell>
          <table:table-cell table:style-name="ce119"/>
          <table:table-cell table:style-name="ce187" table:formula="of:=[.CS32]+30" office:value-type="date" office:date-value="2021-08-25" calcext:value-type="date">
            <text:p>25/08/2021</text:p>
          </table:table-cell>
          <table:table-cell table:style-name="ce187" table:formula="of:=[.$CQ33]+IF(WEEKDAY([.$CQ33])=7;2;IF(WEEKDAY([.$CQ33])=1;1;0))" office:value-type="date" office:date-value="2021-08-25" calcext:value-type="date">
            <text:p>25/08/2021</text:p>
          </table:table-cell>
          <table:table-cell table:style-name="ce187" table:formula="of:=[.$CR33]+IF(AND(WEEKDAY([.$CR33])=6; ISERROR(VLOOKUP([.$CR33];[$Factores.$A:.$A];1;0))=FALSE());3;0)" office:value-type="date" office:date-value="2021-08-25" calcext:value-type="date">
            <text:p>25/08/2021</text:p>
          </table:table-cell>
          <table:table-cell table:style-name="ce187" table:formula="of:=IF(AND([.$CL$23]=3;[.$O$10]&gt;=[.$CO33]);[.$G$12];[.$CS33])" office:value-type="date" office:date-value="2021-08-25" calcext:value-type="date">
            <text:p>25/08/2021</text:p>
          </table:table-cell>
          <table:table-cell table:style-name="ce119"/>
          <table:table-cell table:style-name="ce190" table:formula="of:=IF([.$CN$23]=1;IF(AND([.$CL$23]=3;[.CT33]=[.CT32]);[.$CT33];[.AS33]);IF(AND([.$CN$23]=2;[.$CL$23]=3);[.CT33];[.CS33]))" office:value-type="date" office:date-value="2021-08-24" calcext:value-type="date">
            <text:p>24/08/2021</text:p>
          </table:table-cell>
          <table:table-cell table:style-name="ce119" table:formula="of:=([.CV33]-[.CV32])" office:value-type="float" office:value="29" calcext:value-type="float">
            <text:p>29</text:p>
          </table:table-cell>
          <table:table-cell table:style-name="ce119" table:formula="of:=IF([.CX31]=0;[.CW33];[.CW33]+[.CX32])" office:value-type="float" office:value="92" calcext:value-type="float">
            <text:p>92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table:formula="of:=[.F33]+1" office:value-type="float" office:value="4" calcext:value-type="float">
            <text:p>4</text:p>
          </table:table-cell>
          <table:table-cell table:style-name="ce47" office:value-type="date" office:date-value="2021-09-24" calcext:value-type="date">
            <text:p>24/09/2021</text:p>
          </table:table-cell>
          <table:table-cell table:style-name="ce59" table:formula="of:=[.H33]-[.K34]" office:value-type="float" office:value="-19639.1833333333" calcext:value-type="float" table:number-columns-spanned="3" table:number-rows-spanned="1">
            <text:p><text:s/>(19,639.18)</text:p>
          </table:table-cell>
          <table:covered-table-cell table:number-columns-repeated="2" table:style-name="ce59"/>
          <table:table-cell table:style-name="ce75" office:value-type="float" office:value="415.35" calcext:value-type="float">
            <text:p><text:s/>415.35 </text:p>
          </table:table-cell>
          <table:table-cell table:style-name="ce59" office:value-type="float" office:value="201.15" calcext:value-type="float" table:number-columns-spanned="3" table:number-rows-spanned="1">
            <text:p><text:s/>201.15 </text:p>
          </table:table-cell>
          <table:covered-table-cell table:number-columns-repeated="2" table:style-name="ce59"/>
          <table:table-cell table:style-name="ce75"/>
          <table:table-cell table:style-name="ce75" table:formula="of:=[.K34]+[.L34]+[.O34]" office:value-type="float" office:value="616.5" calcext:value-type="float">
            <text:p><text:s/>616.50 </text:p>
          </table:table-cell>
          <table:table-cell table:style-name="ce75" table:formula="of:=TRUNC(((([.$P34])/(1-[.$M$14]))-([.$P34]));1)+(IF(MOD(((([.$P34])/(1-[.$M$14]))-([.$P34]))*100; 10)&gt;=5; 5; 0)/100)" office:value-type="float" office:value="0" calcext:value-type="float">
            <text:p><text:s/>- <text:s text:c="2"/></text:p>
          </table:table-cell>
          <table:table-cell table:style-name="ce97" table:formula="of:=[.Q34]+[.P34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3]+30" office:value-type="date" office:date-value="2021-09-21" calcext:value-type="date">
            <text:p>21/09/2021</text:p>
          </table:table-cell>
          <table:table-cell table:style-name="ce119" table:formula="of:=[.AH33]+1" office:value-type="float" office:value="4" calcext:value-type="float">
            <text:p>4</text:p>
          </table:table-cell>
          <table:table-cell table:style-name="ce127" table:formula="of:=1/POWER(1+[.$CC$32];IF([.$CL$23]=3;[.$CX34];[.$AO34]))" office:value-type="float" office:value="0.935627773418801" calcext:value-type="float">
            <text:p><text:s/>0.936 </text:p>
          </table:table-cell>
          <table:table-cell table:style-name="ce127" table:formula="of:=IF([.$AH34]&lt;=[.$CK$32];0;1/POWER(1+[.$CC$32];[.$CV34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4]=0;[.$AJ33]=0);0;[.$AI34])" office:value-type="string" office:string-value="" calcext:value-type="error">
            <text:p>#N/D</text:p>
          </table:table-cell>
          <table:table-cell table:style-name="ce130" table:formula="of:=IF([.$AV$28]=1;[.AW34];IF([.$AV$28]=2;[.AY34];IF([.$AV$28]=3;[.BA34];[.BC34])))" office:value-type="float" office:value="9" calcext:value-type="float">
            <text:p>09</text:p>
          </table:table-cell>
          <table:table-cell table:style-name="ce130" table:formula="of:=IF([.$AV$28]=1;[.AX34];IF([.$AV$28]=2;[.AZ34];IF([.$AV$28]=3;[.BB34];[.BD34])))" office:value-type="float" office:value="2021" calcext:value-type="float">
            <text:p>2021</text:p>
          </table:table-cell>
          <table:table-cell table:style-name="ce134" table:formula="of:=[.CV34]-[.CV33]" office:value-type="float" office:value="31" calcext:value-type="float">
            <text:p><text:s/>31 </text:p>
          </table:table-cell>
          <table:table-cell table:style-name="ce134" table:formula="of:=IF([.$CN$23]=2;[.CX34];[.CV34]-[.$G$12])" office:value-type="float" office:value="123" calcext:value-type="float">
            <text:p><text:s/>123 </text:p>
          </table:table-cell>
          <table:table-cell table:style-name="ce136" table:formula="of:=IF([.$AV$28]=1;&quot;&quot;;DATE([.AM35];[.AL35];1)-1)" office:value-type="date" office:date-value="2021-09-30" calcext:value-type="date">
            <text:p>30/09/2021</text:p>
          </table:table-cell>
          <table:table-cell table:style-name="ce136" table:formula="of:=IF(AND([.$CL$23]=3;[.$O$10]&gt;=[.$AH34]);[.$G$12];IF(AND([.$CL$23]=3;[.$CN$23]=2);[.AG34];IF([.$AV$28]=1;[.$AW34];IF([.$CN$23]=1;DATE([.AM34];[.AL34];[.$G$14]);IF([.$AV$28]=2;[.AS33]+30;IF([.$AV$28]=3;[.AS33]+60;[.AS33]+90))))))" office:value-type="date" office:date-value="2021-09-24" calcext:value-type="date">
            <text:p>24/09/2021</text:p>
          </table:table-cell>
          <table:table-cell table:style-name="ce140" table:formula="of:=[.$AQ34]+IF(AND(DAY([.$AQ34])=27;MONTH([.$AQ34])=7);3;IF(AND(WEEKDAY([.$AQ34])=5;ISERROR(VLOOKUP([.$AQ34]+1;[$Factores.$A:.$A];1;0))=FALSE());4;IF(OR(WEEKDAY([.$AQ34])=1;ISERROR(VLOOKUP([.$AQ34];[$Factores.$A:.$A];1;0))=FALSE());1;IF(WEEKDAY([.$AQ34])=7;2;0))))" office:value-type="date" office:date-value="2021-09-24" calcext:value-type="date">
            <text:p>24/09/2021</text:p>
          </table:table-cell>
          <table:table-cell table:style-name="ce140" office:value-type="date" office:date-value="2021-09-24" calcext:value-type="date">
            <text:p>24/09/2021</text:p>
          </table:table-cell>
          <table:table-cell table:style-name="ce126" table:formula="of:=[.P34]/POWER(1+[.$AT$26];[.AO34])" office:value-type="float" office:value="588.019592420971" calcext:value-type="float">
            <text:p><text:s/>588.02 </text:p>
          </table:table-cell>
          <table:table-cell table:style-name="ce148"/>
          <table:table-cell table:style-name="ce154"/>
          <table:table-cell table:style-name="ce136" office:value-type="date" office:date-value="2021-07-26" calcext:value-type="date">
            <text:p>26/07/2021</text:p>
          </table:table-cell>
          <table:table-cell table:style-name="ce155"/>
          <table:table-cell table:style-name="ce162" table:formula="of:=IF([.AY33]&lt;12;[.AY33]+1;[.AY33]+1-12)" office:value-type="float" office:value="9" calcext:value-type="float">
            <text:p>09</text:p>
          </table:table-cell>
          <table:table-cell table:style-name="ce163" table:formula="of:=IF([.AY33]=12;[.AZ33]+1;[.AZ33])" office:value-type="float" office:value="2021" calcext:value-type="float">
            <text:p>2021</text:p>
          </table:table-cell>
          <table:table-cell table:style-name="ce162" table:formula="of:=IF([.BA33]&lt;=10;[.BA33]+2;IF([.BA33]=11;1;IF([.BA33]=12;2;IF([.BA33]=13;3;4))))" office:value-type="float" office:value="1" calcext:value-type="float">
            <text:p>01</text:p>
          </table:table-cell>
          <table:table-cell table:style-name="ce163" table:formula="of:=IF([.BA33]&gt;=11;[.BB33]+1;[.BB33])" office:value-type="float" office:value="2022" calcext:value-type="float">
            <text:p>2022</text:p>
          </table:table-cell>
          <table:table-cell table:style-name="ce162" table:formula="of:=IF([.BC33]&lt;=9;[.BC33]+3;IF([.BC33]=10;1;IF([.BC33]=11;2;IF([.BC33]=12;3;4))))" office:value-type="float" office:value="5" calcext:value-type="float">
            <text:p>05</text:p>
          </table:table-cell>
          <table:table-cell table:style-name="ce163" table:formula="of:=IF([.BC33]&gt;=10;[.BD33]+1;[.BD33])" office:value-type="float" office:value="2022" calcext:value-type="float">
            <text:p>2022</text:p>
          </table:table-cell>
          <table:table-cell table:style-name="ce166" table:formula="of:=DATE([.AZ34];[.AY34];[.$G$14])" office:value-type="date" office:date-value="2021-09-24" calcext:value-type="date">
            <text:p>24/09/2021</text:p>
          </table:table-cell>
          <table:table-cell table:style-name="ce166" table:formula="of:=[.$BE34]+IF(OR(WEEKDAY([.$BE34])=1;ISERROR(VLOOKUP([.$BE34];[$Factores.$A:.$A];1;0))=FALSE());1;IF(WEEKDAY([.$BE34])=7;2;0))" office:value-type="date" office:date-value="2021-09-24" calcext:value-type="date">
            <text:p>24/09/2021</text:p>
          </table:table-cell>
          <table:table-cell table:style-name="ce166" table:formula="of:=IF(AND(DAY([.$BE34])=27;WEEKDAY([.$BE34])=1);[.$BE34]-2;IF(AND(DAY([.$BE34])=27;WEEKDAY([.$BE34])=7);[.$BE34]-1;IF(AND(DAY([.$BE34])=26;WEEKDAY([.$BE34])=1);[.$BE34]-2;IF(AND(DAY([.$BE34])=26;WEEKDAY([.$BE34])=7);[.$BE34]-1;IF(DAY([.$BF34])=15;[.$BF34]+2;IF(DAY([.$BF34])=16;[.$BF34]+1;[.$BF34]))))))" office:value-type="date" office:date-value="2021-09-24" calcext:value-type="date">
            <text:p>24/09/2021</text:p>
          </table:table-cell>
          <table:table-cell table:style-name="ce119" table:number-columns-repeated="33"/>
          <table:table-cell table:style-name="ce119" table:formula="of:=[.CO33]+1" office:value-type="float" office:value="4" calcext:value-type="float">
            <text:p>4</text:p>
          </table:table-cell>
          <table:table-cell table:style-name="ce119"/>
          <table:table-cell table:style-name="ce187" table:formula="of:=[.CS33]+30" office:value-type="date" office:date-value="2021-09-24" calcext:value-type="date">
            <text:p>24/09/2021</text:p>
          </table:table-cell>
          <table:table-cell table:style-name="ce187" table:formula="of:=[.$CQ34]+IF(WEEKDAY([.$CQ34])=7;2;IF(WEEKDAY([.$CQ34])=1;1;0))" office:value-type="date" office:date-value="2021-09-24" calcext:value-type="date">
            <text:p>24/09/2021</text:p>
          </table:table-cell>
          <table:table-cell table:style-name="ce187" table:formula="of:=[.$CR34]+IF(AND(WEEKDAY([.$CR34])=6; ISERROR(VLOOKUP([.$CR34];[$Factores.$A:.$A];1;0))=FALSE());3;0)" office:value-type="date" office:date-value="2021-09-24" calcext:value-type="date">
            <text:p>24/09/2021</text:p>
          </table:table-cell>
          <table:table-cell table:style-name="ce187" table:formula="of:=IF(AND([.$CL$23]=3;[.$O$10]&gt;=[.$CO34]);[.$G$12];[.$CS34])" office:value-type="date" office:date-value="2021-09-24" calcext:value-type="date">
            <text:p>24/09/2021</text:p>
          </table:table-cell>
          <table:table-cell table:style-name="ce119"/>
          <table:table-cell table:style-name="ce190" table:formula="of:=IF([.$CN$23]=1;IF(AND([.$CL$23]=3;[.CT34]=[.CT33]);[.$CT34];[.AS34]);IF(AND([.$CN$23]=2;[.$CL$23]=3);[.CT34];[.CS34]))" office:value-type="date" office:date-value="2021-09-24" calcext:value-type="date">
            <text:p>24/09/2021</text:p>
          </table:table-cell>
          <table:table-cell table:style-name="ce119" table:formula="of:=([.CV34]-[.CV33])" office:value-type="float" office:value="31" calcext:value-type="float">
            <text:p>31</text:p>
          </table:table-cell>
          <table:table-cell table:style-name="ce119" table:formula="of:=IF([.CX32]=0;[.CW34];[.CW34]+[.CX33])" office:value-type="float" office:value="123" calcext:value-type="float">
            <text:p>123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table:formula="of:=[.F34]+1" office:value-type="float" office:value="5" calcext:value-type="float">
            <text:p>5</text:p>
          </table:table-cell>
          <table:table-cell table:style-name="ce47" office:value-type="date" office:date-value="2021-10-25" calcext:value-type="date">
            <text:p>25/10/2021</text:p>
          </table:table-cell>
          <table:table-cell table:style-name="ce59" table:formula="of:=[.H34]-[.K35]" office:value-type="float" office:value="-20059.5133333333" calcext:value-type="float" table:number-columns-spanned="3" table:number-rows-spanned="1">
            <text:p><text:s/>(20,059.51)</text:p>
          </table:table-cell>
          <table:covered-table-cell table:number-columns-repeated="2" table:style-name="ce59"/>
          <table:table-cell table:style-name="ce75" office:value-type="float" office:value="420.33" calcext:value-type="float">
            <text:p><text:s/>420.33 </text:p>
          </table:table-cell>
          <table:table-cell table:style-name="ce59" office:value-type="float" office:value="196.17" calcext:value-type="float" table:number-columns-spanned="3" table:number-rows-spanned="1">
            <text:p><text:s/>196.17 </text:p>
          </table:table-cell>
          <table:covered-table-cell table:number-columns-repeated="2" table:style-name="ce59"/>
          <table:table-cell table:style-name="ce75"/>
          <table:table-cell table:style-name="ce75" table:formula="of:=[.K35]+[.L35]+[.O35]" office:value-type="float" office:value="616.5" calcext:value-type="float">
            <text:p><text:s/>616.50 </text:p>
          </table:table-cell>
          <table:table-cell table:style-name="ce75" table:formula="of:=TRUNC(((([.$P35])/(1-[.$M$14]))-([.$P35]));1)+(IF(MOD(((([.$P35])/(1-[.$M$14]))-([.$P35]))*100; 10)&gt;=5; 5; 0)/100)" office:value-type="float" office:value="0" calcext:value-type="float">
            <text:p><text:s/>- <text:s text:c="2"/></text:p>
          </table:table-cell>
          <table:table-cell table:style-name="ce97" table:formula="of:=[.Q35]+[.P35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4]+30" office:value-type="date" office:date-value="2021-10-21" calcext:value-type="date">
            <text:p>21/10/2021</text:p>
          </table:table-cell>
          <table:table-cell table:style-name="ce119" table:formula="of:=[.AH34]+1" office:value-type="float" office:value="5" calcext:value-type="float">
            <text:p>5</text:p>
          </table:table-cell>
          <table:table-cell table:style-name="ce127" table:formula="of:=1/POWER(1+[.$CC$32];IF([.$CL$23]=3;[.$CX35];[.$AO35]))" office:value-type="float" office:value="0.920068469438441" calcext:value-type="float">
            <text:p><text:s/>0.920 </text:p>
          </table:table-cell>
          <table:table-cell table:style-name="ce127" table:formula="of:=IF([.$AH35]&lt;=[.$CK$32];0;1/POWER(1+[.$CC$32];[.$CV35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5]=0;[.$AJ34]=0);0;[.$AI35])" office:value-type="string" office:string-value="" calcext:value-type="error">
            <text:p>#N/D</text:p>
          </table:table-cell>
          <table:table-cell table:style-name="ce130" table:formula="of:=IF([.$AV$28]=1;[.AW35];IF([.$AV$28]=2;[.AY35];IF([.$AV$28]=3;[.BA35];[.BC35])))" office:value-type="float" office:value="10" calcext:value-type="float">
            <text:p>10</text:p>
          </table:table-cell>
          <table:table-cell table:style-name="ce130" table:formula="of:=IF([.$AV$28]=1;[.AX35];IF([.$AV$28]=2;[.AZ35];IF([.$AV$28]=3;[.BB35];[.BD35])))" office:value-type="float" office:value="2021" calcext:value-type="float">
            <text:p>2021</text:p>
          </table:table-cell>
          <table:table-cell table:style-name="ce134" table:formula="of:=[.CV35]-[.CV34]" office:value-type="float" office:value="31" calcext:value-type="float">
            <text:p><text:s/>31 </text:p>
          </table:table-cell>
          <table:table-cell table:style-name="ce134" table:formula="of:=IF([.$CN$23]=2;[.CX35];[.CV35]-[.$G$12])" office:value-type="float" office:value="154" calcext:value-type="float">
            <text:p><text:s/>154 </text:p>
          </table:table-cell>
          <table:table-cell table:style-name="ce136" table:formula="of:=IF([.$AV$28]=1;&quot;&quot;;DATE([.AM36];[.AL36];1)-1)" office:value-type="date" office:date-value="2021-10-31" calcext:value-type="date">
            <text:p>31/10/2021</text:p>
          </table:table-cell>
          <table:table-cell table:style-name="ce136" table:formula="of:=IF(AND([.$CL$23]=3;[.$O$10]&gt;=[.$AH35]);[.$G$12];IF(AND([.$CL$23]=3;[.$CN$23]=2);[.AG35];IF([.$AV$28]=1;[.$AW35];IF([.$CN$23]=1;DATE([.AM35];[.AL35];[.$G$14]);IF([.$AV$28]=2;[.AS34]+30;IF([.$AV$28]=3;[.AS34]+60;[.AS34]+90))))))" office:value-type="date" office:date-value="2021-10-24" calcext:value-type="date">
            <text:p>24/10/2021</text:p>
          </table:table-cell>
          <table:table-cell table:style-name="ce140" table:formula="of:=[.$AQ35]+IF(AND(DAY([.$AQ35])=27;MONTH([.$AQ35])=7);3;IF(AND(WEEKDAY([.$AQ35])=5;ISERROR(VLOOKUP([.$AQ35]+1;[$Factores.$A:.$A];1;0))=FALSE());4;IF(OR(WEEKDAY([.$AQ35])=1;ISERROR(VLOOKUP([.$AQ35];[$Factores.$A:.$A];1;0))=FALSE());1;IF(WEEKDAY([.$AQ35])=7;2;0))))" office:value-type="date" office:date-value="2021-10-25" calcext:value-type="date">
            <text:p>25/10/2021</text:p>
          </table:table-cell>
          <table:table-cell table:style-name="ce140" office:value-type="date" office:date-value="2021-10-25" calcext:value-type="date">
            <text:p>25/10/2021</text:p>
          </table:table-cell>
          <table:table-cell table:style-name="ce126" table:formula="of:=[.P35]/POWER(1+[.$AT$26];[.AO35])" office:value-type="float" office:value="581.051631681588" calcext:value-type="float">
            <text:p><text:s/>581.05 </text:p>
          </table:table-cell>
          <table:table-cell table:style-name="ce148"/>
          <table:table-cell table:style-name="ce154"/>
          <table:table-cell table:style-name="ce136" table:formula="of:=[.AW34]+15" office:value-type="date" office:date-value="2021-08-10" calcext:value-type="date">
            <text:p>10/08/2021</text:p>
          </table:table-cell>
          <table:table-cell table:style-name="ce155"/>
          <table:table-cell table:style-name="ce162" table:formula="of:=IF([.AY34]&lt;12;[.AY34]+1;[.AY34]+1-12)" office:value-type="float" office:value="10" calcext:value-type="float">
            <text:p>10</text:p>
          </table:table-cell>
          <table:table-cell table:style-name="ce163" table:formula="of:=IF([.AY34]=12;[.AZ34]+1;[.AZ34])" office:value-type="float" office:value="2021" calcext:value-type="float">
            <text:p>2021</text:p>
          </table:table-cell>
          <table:table-cell table:style-name="ce162" table:formula="of:=IF([.BA34]&lt;=10;[.BA34]+2;IF([.BA34]=11;1;IF([.BA34]=12;2;IF([.BA34]=13;3;4))))" office:value-type="float" office:value="3" calcext:value-type="float">
            <text:p>03</text:p>
          </table:table-cell>
          <table:table-cell table:style-name="ce163" table:formula="of:=IF([.BA34]&gt;=11;[.BB34]+1;[.BB34])" office:value-type="float" office:value="2022" calcext:value-type="float">
            <text:p>2022</text:p>
          </table:table-cell>
          <table:table-cell table:style-name="ce162" table:formula="of:=IF([.BC34]&lt;=9;[.BC34]+3;IF([.BC34]=10;1;IF([.BC34]=11;2;IF([.BC34]=12;3;4))))" office:value-type="float" office:value="8" calcext:value-type="float">
            <text:p>08</text:p>
          </table:table-cell>
          <table:table-cell table:style-name="ce163" table:formula="of:=IF([.BC34]&gt;=10;[.BD34]+1;[.BD34])" office:value-type="float" office:value="2022" calcext:value-type="float">
            <text:p>2022</text:p>
          </table:table-cell>
          <table:table-cell table:style-name="ce166" table:formula="of:=DATE([.AZ35];[.AY35];[.$G$14])" office:value-type="date" office:date-value="2021-10-24" calcext:value-type="date">
            <text:p>24/10/2021</text:p>
          </table:table-cell>
          <table:table-cell table:style-name="ce166" table:formula="of:=[.$BE35]+IF(OR(WEEKDAY([.$BE35])=1;ISERROR(VLOOKUP([.$BE35];[$Factores.$A:.$A];1;0))=FALSE());1;IF(WEEKDAY([.$BE35])=7;2;0))" office:value-type="date" office:date-value="2021-10-25" calcext:value-type="date">
            <text:p>25/10/2021</text:p>
          </table:table-cell>
          <table:table-cell table:style-name="ce166" table:formula="of:=IF(AND(DAY([.$BE35])=27;WEEKDAY([.$BE35])=1);[.$BE35]-2;IF(AND(DAY([.$BE35])=27;WEEKDAY([.$BE35])=7);[.$BE35]-1;IF(AND(DAY([.$BE35])=26;WEEKDAY([.$BE35])=1);[.$BE35]-2;IF(AND(DAY([.$BE35])=26;WEEKDAY([.$BE35])=7);[.$BE35]-1;IF(DAY([.$BF35])=15;[.$BF35]+2;IF(DAY([.$BF35])=16;[.$BF35]+1;[.$BF35]))))))" office:value-type="date" office:date-value="2021-10-25" calcext:value-type="date">
            <text:p>25/10/2021</text:p>
          </table:table-cell>
          <table:table-cell table:style-name="ce119" table:number-columns-repeated="19"/>
          <table:table-cell table:style-name="ce172" office:value-type="percentage" office:value="0.408" calcext:value-type="percentage">
            <text:p>40.80 %</text:p>
          </table:table-cell>
          <table:table-cell table:style-name="ce119" table:number-columns-repeated="3"/>
          <table:table-cell table:style-name="ce119" table:formula="of:=ROUND(([.G6]+[.O14]+[.Q18])*[.$CE$32]/(1-[.$CE$32]);2)" office:value-type="float" office:value="0" calcext:value-type="float">
            <text:p>0</text:p>
          </table:table-cell>
          <table:table-cell table:style-name="ce119" table:number-columns-repeated="9"/>
          <table:table-cell table:style-name="ce119" table:formula="of:=[.CO34]+1" office:value-type="float" office:value="5" calcext:value-type="float">
            <text:p>5</text:p>
          </table:table-cell>
          <table:table-cell table:style-name="ce119"/>
          <table:table-cell table:style-name="ce187" table:formula="of:=[.CS34]+30" office:value-type="date" office:date-value="2021-10-24" calcext:value-type="date">
            <text:p>24/10/2021</text:p>
          </table:table-cell>
          <table:table-cell table:style-name="ce187" table:formula="of:=[.$CQ35]+IF(WEEKDAY([.$CQ35])=7;2;IF(WEEKDAY([.$CQ35])=1;1;0))" office:value-type="date" office:date-value="2021-10-25" calcext:value-type="date">
            <text:p>25/10/2021</text:p>
          </table:table-cell>
          <table:table-cell table:style-name="ce187" table:formula="of:=[.$CR35]+IF(AND(WEEKDAY([.$CR35])=6; ISERROR(VLOOKUP([.$CR35];[$Factores.$A:.$A];1;0))=FALSE());3;0)" office:value-type="date" office:date-value="2021-10-25" calcext:value-type="date">
            <text:p>25/10/2021</text:p>
          </table:table-cell>
          <table:table-cell table:style-name="ce187" table:formula="of:=IF(AND([.$CL$23]=3;[.$O$10]&gt;=[.$CO35]);[.$G$12];[.$CS35])" office:value-type="date" office:date-value="2021-10-25" calcext:value-type="date">
            <text:p>25/10/2021</text:p>
          </table:table-cell>
          <table:table-cell table:style-name="ce119"/>
          <table:table-cell table:style-name="ce190" table:formula="of:=IF([.$CN$23]=1;IF(AND([.$CL$23]=3;[.CT35]=[.CT34]);[.$CT35];[.AS35]);IF(AND([.$CN$23]=2;[.$CL$23]=3);[.CT35];[.CS35]))" office:value-type="date" office:date-value="2021-10-25" calcext:value-type="date">
            <text:p>25/10/2021</text:p>
          </table:table-cell>
          <table:table-cell table:style-name="ce119" table:formula="of:=([.CV35]-[.CV34])" office:value-type="float" office:value="31" calcext:value-type="float">
            <text:p>31</text:p>
          </table:table-cell>
          <table:table-cell table:style-name="ce119" table:formula="of:=IF([.CX33]=0;[.CW35];[.CW35]+[.CX34])" office:value-type="float" office:value="154" calcext:value-type="float">
            <text:p>154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 table:style-name="ce23"/>
          <table:table-cell table:style-name="ce29" table:formula="of:=[.F35]+1" office:value-type="float" office:value="6" calcext:value-type="float">
            <text:p>6</text:p>
          </table:table-cell>
          <table:table-cell table:style-name="ce47" office:value-type="date" office:date-value="2021-11-24" calcext:value-type="date">
            <text:p>24/11/2021</text:p>
          </table:table-cell>
          <table:table-cell table:style-name="ce59" table:formula="of:=[.H35]-[.K36]" office:value-type="float" office:value="-20491.0833333333" calcext:value-type="float" table:number-columns-spanned="3" table:number-rows-spanned="1">
            <text:p><text:s/>(20,491.08)</text:p>
          </table:table-cell>
          <table:covered-table-cell table:number-columns-repeated="2" table:style-name="ce59"/>
          <table:table-cell table:style-name="ce75" office:value-type="float" office:value="431.57" calcext:value-type="float">
            <text:p><text:s/>431.57 </text:p>
          </table:table-cell>
          <table:table-cell table:style-name="ce59" office:value-type="float" office:value="184.93" calcext:value-type="float" table:number-columns-spanned="3" table:number-rows-spanned="1">
            <text:p><text:s/>184.93 </text:p>
          </table:table-cell>
          <table:covered-table-cell table:number-columns-repeated="2" table:style-name="ce59"/>
          <table:table-cell table:style-name="ce75"/>
          <table:table-cell table:style-name="ce75" table:formula="of:=[.K36]+[.L36]+[.O36]" office:value-type="float" office:value="616.5" calcext:value-type="float">
            <text:p><text:s/>616.50 </text:p>
          </table:table-cell>
          <table:table-cell table:style-name="ce75" table:formula="of:=TRUNC(((([.$P36])/(1-[.$M$14]))-([.$P36]));1)+(IF(MOD(((([.$P36])/(1-[.$M$14]))-([.$P36]))*100; 10)&gt;=5; 5; 0)/100)" office:value-type="float" office:value="0" calcext:value-type="float">
            <text:p><text:s/>- <text:s text:c="2"/></text:p>
          </table:table-cell>
          <table:table-cell table:style-name="ce97" table:formula="of:=[.Q36]+[.P36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5]+30" office:value-type="date" office:date-value="2021-11-20" calcext:value-type="date">
            <text:p>20/11/2021</text:p>
          </table:table-cell>
          <table:table-cell table:style-name="ce119" table:formula="of:=[.AH35]+1" office:value-type="float" office:value="6" calcext:value-type="float">
            <text:p>6</text:p>
          </table:table-cell>
          <table:table-cell table:style-name="ce127" table:formula="of:=1/POWER(1+[.$CC$32];IF([.$CL$23]=3;[.$CX36];[.$AO36]))" office:value-type="float" office:value="0.905257485420692" calcext:value-type="float">
            <text:p><text:s/>0.905 </text:p>
          </table:table-cell>
          <table:table-cell table:style-name="ce127" table:formula="of:=IF([.$AH36]&lt;=[.$CK$32];0;1/POWER(1+[.$CC$32];[.$CV36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6]=0;[.$AJ35]=0);0;[.$AI36])" office:value-type="string" office:string-value="" calcext:value-type="error">
            <text:p>#N/D</text:p>
          </table:table-cell>
          <table:table-cell table:style-name="ce130" table:formula="of:=IF([.$AV$28]=1;[.AW36];IF([.$AV$28]=2;[.AY36];IF([.$AV$28]=3;[.BA36];[.BC36])))" office:value-type="float" office:value="11" calcext:value-type="float">
            <text:p>11</text:p>
          </table:table-cell>
          <table:table-cell table:style-name="ce130" table:formula="of:=IF([.$AV$28]=1;[.AX36];IF([.$AV$28]=2;[.AZ36];IF([.$AV$28]=3;[.BB36];[.BD36])))" office:value-type="float" office:value="2021" calcext:value-type="float">
            <text:p>2021</text:p>
          </table:table-cell>
          <table:table-cell table:style-name="ce134" table:formula="of:=[.CV36]-[.CV35]" office:value-type="float" office:value="30" calcext:value-type="float">
            <text:p><text:s/>30 </text:p>
          </table:table-cell>
          <table:table-cell table:style-name="ce134" table:formula="of:=IF([.$CN$23]=2;[.CX36];[.CV36]-[.$G$12])" office:value-type="float" office:value="184" calcext:value-type="float">
            <text:p><text:s/>184 </text:p>
          </table:table-cell>
          <table:table-cell table:style-name="ce136" table:formula="of:=IF([.$AV$28]=1;&quot;&quot;;DATE([.AM37];[.AL37];1)-1)" office:value-type="date" office:date-value="2021-11-30" calcext:value-type="date">
            <text:p>30/11/2021</text:p>
          </table:table-cell>
          <table:table-cell table:style-name="ce136" table:formula="of:=IF(AND([.$CL$23]=3;[.$O$10]&gt;=[.$AH36]);[.$G$12];IF(AND([.$CL$23]=3;[.$CN$23]=2);[.AG36];IF([.$AV$28]=1;[.$AW36];IF([.$CN$23]=1;DATE([.AM36];[.AL36];[.$G$14]);IF([.$AV$28]=2;[.AS35]+30;IF([.$AV$28]=3;[.AS35]+60;[.AS35]+90))))))" office:value-type="date" office:date-value="2021-11-24" calcext:value-type="date">
            <text:p>24/11/2021</text:p>
          </table:table-cell>
          <table:table-cell table:style-name="ce140" table:formula="of:=[.$AQ36]+IF(AND(DAY([.$AQ36])=27;MONTH([.$AQ36])=7);3;IF(AND(WEEKDAY([.$AQ36])=5;ISERROR(VLOOKUP([.$AQ36]+1;[$Factores.$A:.$A];1;0))=FALSE());4;IF(OR(WEEKDAY([.$AQ36])=1;ISERROR(VLOOKUP([.$AQ36];[$Factores.$A:.$A];1;0))=FALSE());1;IF(WEEKDAY([.$AQ36])=7;2;0))))" office:value-type="date" office:date-value="2021-11-24" calcext:value-type="date">
            <text:p>24/11/2021</text:p>
          </table:table-cell>
          <table:table-cell table:style-name="ce140" office:value-type="date" office:date-value="2021-11-24" calcext:value-type="date">
            <text:p>24/11/2021</text:p>
          </table:table-cell>
          <table:table-cell table:style-name="ce126" table:formula="of:=[.P36]/POWER(1+[.$AT$26];[.AO36])" office:value-type="float" office:value="574.387071067993" calcext:value-type="float">
            <text:p><text:s/>574.39 </text:p>
          </table:table-cell>
          <table:table-cell table:style-name="ce148"/>
          <table:table-cell table:style-name="ce154"/>
          <table:table-cell table:style-name="ce136" office:value-type="date" office:date-value="2021-08-24" calcext:value-type="date">
            <text:p>24/08/2021</text:p>
          </table:table-cell>
          <table:table-cell table:style-name="ce155"/>
          <table:table-cell table:style-name="ce162" table:formula="of:=IF([.AY35]&lt;12;[.AY35]+1;[.AY35]+1-12)" office:value-type="float" office:value="11" calcext:value-type="float">
            <text:p>11</text:p>
          </table:table-cell>
          <table:table-cell table:style-name="ce163" table:formula="of:=IF([.AY35]=12;[.AZ35]+1;[.AZ35])" office:value-type="float" office:value="2021" calcext:value-type="float">
            <text:p>2021</text:p>
          </table:table-cell>
          <table:table-cell table:style-name="ce162" table:formula="of:=IF([.BA35]&lt;=10;[.BA35]+2;IF([.BA35]=11;1;IF([.BA35]=12;2;IF([.BA35]=13;3;4))))" office:value-type="float" office:value="5" calcext:value-type="float">
            <text:p>05</text:p>
          </table:table-cell>
          <table:table-cell table:style-name="ce163" table:formula="of:=IF([.BA35]&gt;=11;[.BB35]+1;[.BB35])" office:value-type="float" office:value="2022" calcext:value-type="float">
            <text:p>2022</text:p>
          </table:table-cell>
          <table:table-cell table:style-name="ce162" table:formula="of:=IF([.BC35]&lt;=9;[.BC35]+3;IF([.BC35]=10;1;IF([.BC35]=11;2;IF([.BC35]=12;3;4))))" office:value-type="float" office:value="11" calcext:value-type="float">
            <text:p>11</text:p>
          </table:table-cell>
          <table:table-cell table:style-name="ce163" table:formula="of:=IF([.BC35]&gt;=10;[.BD35]+1;[.BD35])" office:value-type="float" office:value="2022" calcext:value-type="float">
            <text:p>2022</text:p>
          </table:table-cell>
          <table:table-cell table:style-name="ce166" table:formula="of:=DATE([.AZ36];[.AY36];[.$G$14])" office:value-type="date" office:date-value="2021-11-24" calcext:value-type="date">
            <text:p>24/11/2021</text:p>
          </table:table-cell>
          <table:table-cell table:style-name="ce166" table:formula="of:=[.$BE36]+IF(OR(WEEKDAY([.$BE36])=1;ISERROR(VLOOKUP([.$BE36];[$Factores.$A:.$A];1;0))=FALSE());1;IF(WEEKDAY([.$BE36])=7;2;0))" office:value-type="date" office:date-value="2021-11-24" calcext:value-type="date">
            <text:p>24/11/2021</text:p>
          </table:table-cell>
          <table:table-cell table:style-name="ce166" table:formula="of:=IF(AND(DAY([.$BE36])=27;WEEKDAY([.$BE36])=1);[.$BE36]-2;IF(AND(DAY([.$BE36])=27;WEEKDAY([.$BE36])=7);[.$BE36]-1;IF(AND(DAY([.$BE36])=26;WEEKDAY([.$BE36])=1);[.$BE36]-2;IF(AND(DAY([.$BE36])=26;WEEKDAY([.$BE36])=7);[.$BE36]-1;IF(DAY([.$BF36])=15;[.$BF36]+2;IF(DAY([.$BF36])=16;[.$BF36]+1;[.$BF36]))))))" office:value-type="date" office:date-value="2021-11-24" calcext:value-type="date">
            <text:p>24/11/2021</text:p>
          </table:table-cell>
          <table:table-cell table:style-name="ce119" table:number-columns-repeated="19"/>
          <table:table-cell table:style-name="ce119" table:formula="of:=[.CA35]/12" office:value-type="float" office:value="0.034" calcext:value-type="float">
            <text:p>0.034</text:p>
          </table:table-cell>
          <table:table-cell table:style-name="ce119"/>
          <table:table-cell table:style-name="ce179" table:formula="of:=(1+[.CA35]/12)^12-1" office:value-type="percentage" office:value="0.493641821071044" calcext:value-type="percentage">
            <text:p>49.364182%</text:p>
          </table:table-cell>
          <table:table-cell table:style-name="ce119"/>
          <table:table-cell table:style-name="ce181" table:formula="of:=[.$CE$35]*[.$G$10]" office:value-type="float" office:value="0" calcext:value-type="float">
            <text:p><text:s/>- <text:s text:c="2"/></text:p>
          </table:table-cell>
          <table:table-cell table:style-name="ce119" table:number-columns-repeated="9"/>
          <table:table-cell table:style-name="ce119" table:formula="of:=[.CO35]+1" office:value-type="float" office:value="6" calcext:value-type="float">
            <text:p>6</text:p>
          </table:table-cell>
          <table:table-cell table:style-name="ce119"/>
          <table:table-cell table:style-name="ce187" table:formula="of:=[.CS35]+30" office:value-type="date" office:date-value="2021-11-24" calcext:value-type="date">
            <text:p>24/11/2021</text:p>
          </table:table-cell>
          <table:table-cell table:style-name="ce187" table:formula="of:=[.$CQ36]+IF(WEEKDAY([.$CQ36])=7;2;IF(WEEKDAY([.$CQ36])=1;1;0))" office:value-type="date" office:date-value="2021-11-24" calcext:value-type="date">
            <text:p>24/11/2021</text:p>
          </table:table-cell>
          <table:table-cell table:style-name="ce187" table:formula="of:=[.$CR36]+IF(AND(WEEKDAY([.$CR36])=6; ISERROR(VLOOKUP([.$CR36];[$Factores.$A:.$A];1;0))=FALSE());3;0)" office:value-type="date" office:date-value="2021-11-24" calcext:value-type="date">
            <text:p>24/11/2021</text:p>
          </table:table-cell>
          <table:table-cell table:style-name="ce187" table:formula="of:=IF(AND([.$CL$23]=3;[.$O$10]&gt;=[.$CO36]);[.$G$12];[.$CS36])" office:value-type="date" office:date-value="2021-11-24" calcext:value-type="date">
            <text:p>24/11/2021</text:p>
          </table:table-cell>
          <table:table-cell table:style-name="ce119"/>
          <table:table-cell table:style-name="ce190" table:formula="of:=IF([.$CN$23]=1;IF(AND([.$CL$23]=3;[.CT36]=[.CT35]);[.$CT36];[.AS36]);IF(AND([.$CN$23]=2;[.$CL$23]=3);[.CT36];[.CS36]))" office:value-type="date" office:date-value="2021-11-24" calcext:value-type="date">
            <text:p>24/11/2021</text:p>
          </table:table-cell>
          <table:table-cell table:style-name="ce119" table:formula="of:=([.CV36]-[.CV35])" office:value-type="float" office:value="30" calcext:value-type="float">
            <text:p>30</text:p>
          </table:table-cell>
          <table:table-cell table:style-name="ce119" table:formula="of:=IF([.CX34]=0;[.CW36];[.CW36]+[.CX35])" office:value-type="float" office:value="184" calcext:value-type="float">
            <text:p>184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36]+1" office:value-type="float" office:value="7" calcext:value-type="float">
            <text:p>7</text:p>
          </table:table-cell>
          <table:table-cell table:style-name="ce47" office:value-type="date" office:date-value="2021-12-24" calcext:value-type="date">
            <text:p>24/12/2021</text:p>
          </table:table-cell>
          <table:table-cell table:style-name="ce59" table:formula="of:=[.H36]-[.K37]" office:value-type="float" office:value="-20927.6633333333" calcext:value-type="float" table:number-columns-spanned="3" table:number-rows-spanned="1">
            <text:p><text:s/>(20,927.66)</text:p>
          </table:table-cell>
          <table:covered-table-cell table:number-columns-repeated="2" table:style-name="ce59"/>
          <table:table-cell table:style-name="ce75" office:value-type="float" office:value="436.58" calcext:value-type="float">
            <text:p><text:s/>436.58 </text:p>
          </table:table-cell>
          <table:table-cell table:style-name="ce59" office:value-type="float" office:value="179.92" calcext:value-type="float" table:number-columns-spanned="3" table:number-rows-spanned="1">
            <text:p><text:s/>179.92 </text:p>
          </table:table-cell>
          <table:covered-table-cell table:number-columns-repeated="2" table:style-name="ce59"/>
          <table:table-cell table:style-name="ce75"/>
          <table:table-cell table:style-name="ce75" table:formula="of:=[.K37]+[.L37]+[.O37]" office:value-type="float" office:value="616.5" calcext:value-type="float">
            <text:p><text:s/>616.50 </text:p>
          </table:table-cell>
          <table:table-cell table:style-name="ce75" table:formula="of:=TRUNC(((([.$P37])/(1-[.$M$14]))-([.$P37]));1)+(IF(MOD(((([.$P37])/(1-[.$M$14]))-([.$P37]))*100; 10)&gt;=5; 5; 0)/100)" office:value-type="float" office:value="0" calcext:value-type="float">
            <text:p><text:s/>- <text:s text:c="2"/></text:p>
          </table:table-cell>
          <table:table-cell table:style-name="ce97" table:formula="of:=[.Q37]+[.P37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95"/>
          <table:table-cell table:style-name="ce6" table:number-columns-repeated="5"/>
          <table:table-cell table:style-name="ce119" table:number-columns-repeated="6"/>
          <table:table-cell table:style-name="ce122"/>
          <table:table-cell table:style-name="ce124" table:formula="of:=[.AG36]+30" office:value-type="date" office:date-value="2021-12-20" calcext:value-type="date">
            <text:p>20/12/2021</text:p>
          </table:table-cell>
          <table:table-cell table:style-name="ce119" table:formula="of:=[.AH36]+1" office:value-type="float" office:value="7" calcext:value-type="float">
            <text:p>7</text:p>
          </table:table-cell>
          <table:table-cell table:style-name="ce127" table:formula="of:=1/POWER(1+[.$CC$32];IF([.$CL$23]=3;[.$CX37];[.$AO37]))" office:value-type="float" office:value="0.890684924145228" calcext:value-type="float">
            <text:p><text:s/>0.891 </text:p>
          </table:table-cell>
          <table:table-cell table:style-name="ce127" table:formula="of:=IF([.$AH37]&lt;=[.$CK$32];0;1/POWER(1+[.$CC$32];[.$CV37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7]=0;[.$AJ36]=0);0;[.$AI37])" office:value-type="string" office:string-value="" calcext:value-type="error">
            <text:p>#N/D</text:p>
          </table:table-cell>
          <table:table-cell table:style-name="ce130" table:formula="of:=IF([.$AV$28]=1;[.AW37];IF([.$AV$28]=2;[.AY37];IF([.$AV$28]=3;[.BA37];[.BC37])))" office:value-type="float" office:value="12" calcext:value-type="float">
            <text:p>12</text:p>
          </table:table-cell>
          <table:table-cell table:style-name="ce130" table:formula="of:=IF([.$AV$28]=1;[.AX37];IF([.$AV$28]=2;[.AZ37];IF([.$AV$28]=3;[.BB37];[.BD37])))" office:value-type="float" office:value="2021" calcext:value-type="float">
            <text:p>2021</text:p>
          </table:table-cell>
          <table:table-cell table:style-name="ce134" table:formula="of:=[.CV37]-[.CV36]" office:value-type="float" office:value="30" calcext:value-type="float">
            <text:p><text:s/>30 </text:p>
          </table:table-cell>
          <table:table-cell table:style-name="ce134" table:formula="of:=IF([.$CN$23]=2;[.CX37];[.CV37]-[.$G$12])" office:value-type="float" office:value="214" calcext:value-type="float">
            <text:p><text:s/>214 </text:p>
          </table:table-cell>
          <table:table-cell table:style-name="ce136" table:formula="of:=IF([.$AV$28]=1;&quot;&quot;;DATE([.AM38];[.AL38];1)-1)" office:value-type="date" office:date-value="2021-12-31" calcext:value-type="date">
            <text:p>31/12/2021</text:p>
          </table:table-cell>
          <table:table-cell table:style-name="ce136" table:formula="of:=IF(AND([.$CL$23]=3;[.$O$10]&gt;=[.$AH37]);[.$G$12];IF(AND([.$CL$23]=3;[.$CN$23]=2);[.AG37];IF([.$AV$28]=1;[.$AW37];IF([.$CN$23]=1;DATE([.AM37];[.AL37];[.$G$14]);IF([.$AV$28]=2;[.AS36]+30;IF([.$AV$28]=3;[.AS36]+60;[.AS36]+90))))))" office:value-type="date" office:date-value="2021-12-24" calcext:value-type="date">
            <text:p>24/12/2021</text:p>
          </table:table-cell>
          <table:table-cell table:style-name="ce140" table:formula="of:=[.$AQ37]+IF(AND(DAY([.$AQ37])=27;MONTH([.$AQ37])=7);3;IF(AND(WEEKDAY([.$AQ37])=5;ISERROR(VLOOKUP([.$AQ37]+1;[$Factores.$A:.$A];1;0))=FALSE());4;IF(OR(WEEKDAY([.$AQ37])=1;ISERROR(VLOOKUP([.$AQ37];[$Factores.$A:.$A];1;0))=FALSE());1;IF(WEEKDAY([.$AQ37])=7;2;0))))" office:value-type="date" office:date-value="2021-12-24" calcext:value-type="date">
            <text:p>24/12/2021</text:p>
          </table:table-cell>
          <table:table-cell table:style-name="ce140" office:value-type="date" office:date-value="2021-12-24" calcext:value-type="date">
            <text:p>24/12/2021</text:p>
          </table:table-cell>
          <table:table-cell table:style-name="ce126" table:formula="of:=[.P37]/POWER(1+[.$AT$26];[.AO37])" office:value-type="float" office:value="567.79895179928" calcext:value-type="float">
            <text:p><text:s/>567.80 </text:p>
          </table:table-cell>
          <table:table-cell table:style-name="ce148"/>
          <table:table-cell table:style-name="ce154"/>
          <table:table-cell table:style-name="ce136" table:formula="of:=[.AW36]+15" office:value-type="date" office:date-value="2021-09-08" calcext:value-type="date">
            <text:p>08/09/2021</text:p>
          </table:table-cell>
          <table:table-cell table:style-name="ce155"/>
          <table:table-cell table:style-name="ce162" table:formula="of:=IF([.AY36]&lt;12;[.AY36]+1;[.AY36]+1-12)" office:value-type="float" office:value="12" calcext:value-type="float">
            <text:p>12</text:p>
          </table:table-cell>
          <table:table-cell table:style-name="ce163" table:formula="of:=IF([.AY36]=12;[.AZ36]+1;[.AZ36])" office:value-type="float" office:value="2021" calcext:value-type="float">
            <text:p>2021</text:p>
          </table:table-cell>
          <table:table-cell table:style-name="ce162" table:formula="of:=IF([.BA36]&lt;=10;[.BA36]+2;IF([.BA36]=11;1;IF([.BA36]=12;2;IF([.BA36]=13;3;4))))" office:value-type="float" office:value="7" calcext:value-type="float">
            <text:p>07</text:p>
          </table:table-cell>
          <table:table-cell table:style-name="ce163" table:formula="of:=IF([.BA36]&gt;=11;[.BB36]+1;[.BB36])" office:value-type="float" office:value="2022" calcext:value-type="float">
            <text:p>2022</text:p>
          </table:table-cell>
          <table:table-cell table:style-name="ce162" table:formula="of:=IF([.BC36]&lt;=9;[.BC36]+3;IF([.BC36]=10;1;IF([.BC36]=11;2;IF([.BC36]=12;3;4))))" office:value-type="float" office:value="2" calcext:value-type="float">
            <text:p>02</text:p>
          </table:table-cell>
          <table:table-cell table:style-name="ce163" table:formula="of:=IF([.BC36]&gt;=10;[.BD36]+1;[.BD36])" office:value-type="float" office:value="2023" calcext:value-type="float">
            <text:p>2023</text:p>
          </table:table-cell>
          <table:table-cell table:style-name="ce166" table:formula="of:=DATE([.AZ37];[.AY37];[.$G$14])" office:value-type="date" office:date-value="2021-12-24" calcext:value-type="date">
            <text:p>24/12/2021</text:p>
          </table:table-cell>
          <table:table-cell table:style-name="ce166" table:formula="of:=[.$BE37]+IF(OR(WEEKDAY([.$BE37])=1;ISERROR(VLOOKUP([.$BE37];[$Factores.$A:.$A];1;0))=FALSE());1;IF(WEEKDAY([.$BE37])=7;2;0))" office:value-type="date" office:date-value="2021-12-24" calcext:value-type="date">
            <text:p>24/12/2021</text:p>
          </table:table-cell>
          <table:table-cell table:style-name="ce166" table:formula="of:=IF(AND(DAY([.$BE37])=27;WEEKDAY([.$BE37])=1);[.$BE37]-2;IF(AND(DAY([.$BE37])=27;WEEKDAY([.$BE37])=7);[.$BE37]-1;IF(AND(DAY([.$BE37])=26;WEEKDAY([.$BE37])=1);[.$BE37]-2;IF(AND(DAY([.$BE37])=26;WEEKDAY([.$BE37])=7);[.$BE37]-1;IF(DAY([.$BF37])=15;[.$BF37]+2;IF(DAY([.$BF37])=16;[.$BF37]+1;[.$BF37]))))))" office:value-type="date" office:date-value="2021-12-24" calcext:value-type="date">
            <text:p>24/12/2021</text:p>
          </table:table-cell>
          <table:table-cell table:style-name="ce119" table:number-columns-repeated="21"/>
          <table:table-cell table:style-name="ce119" table:formula="of:=[.CC36]*100" office:value-type="float" office:value="49.3641821071044" calcext:value-type="float">
            <text:p>49.3641821071044</text:p>
          </table:table-cell>
          <table:table-cell table:style-name="ce119" table:number-columns-repeated="11"/>
          <table:table-cell table:style-name="ce119" table:formula="of:=[.CO36]+1" office:value-type="float" office:value="7" calcext:value-type="float">
            <text:p>7</text:p>
          </table:table-cell>
          <table:table-cell table:style-name="ce119"/>
          <table:table-cell table:style-name="ce187" table:formula="of:=[.CS36]+30" office:value-type="date" office:date-value="2021-12-24" calcext:value-type="date">
            <text:p>24/12/2021</text:p>
          </table:table-cell>
          <table:table-cell table:style-name="ce187" table:formula="of:=[.$CQ37]+IF(WEEKDAY([.$CQ37])=7;2;IF(WEEKDAY([.$CQ37])=1;1;0))" office:value-type="date" office:date-value="2021-12-24" calcext:value-type="date">
            <text:p>24/12/2021</text:p>
          </table:table-cell>
          <table:table-cell table:style-name="ce187" table:formula="of:=[.$CR37]+IF(AND(WEEKDAY([.$CR37])=6; ISERROR(VLOOKUP([.$CR37];[$Factores.$A:.$A];1;0))=FALSE());3;0)" office:value-type="date" office:date-value="2021-12-24" calcext:value-type="date">
            <text:p>24/12/2021</text:p>
          </table:table-cell>
          <table:table-cell table:style-name="ce187" table:formula="of:=IF(AND([.$CL$23]=3;[.$O$10]&gt;=[.$CO37]);[.$G$12];[.$CS37])" office:value-type="date" office:date-value="2021-12-24" calcext:value-type="date">
            <text:p>24/12/2021</text:p>
          </table:table-cell>
          <table:table-cell table:style-name="ce119"/>
          <table:table-cell table:style-name="ce190" table:formula="of:=IF([.$CN$23]=1;IF(AND([.$CL$23]=3;[.CT37]=[.CT36]);[.$CT37];[.AS37]);IF(AND([.$CN$23]=2;[.$CL$23]=3);[.CT37];[.CS37]))" office:value-type="date" office:date-value="2021-12-24" calcext:value-type="date">
            <text:p>24/12/2021</text:p>
          </table:table-cell>
          <table:table-cell table:style-name="ce119" table:formula="of:=([.CV37]-[.CV36])" office:value-type="float" office:value="30" calcext:value-type="float">
            <text:p>30</text:p>
          </table:table-cell>
          <table:table-cell table:style-name="ce119" table:formula="of:=IF([.CX35]=0;[.CW37];[.CW37]+[.CX36])" office:value-type="float" office:value="214" calcext:value-type="float">
            <text:p>214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37]+1" office:value-type="float" office:value="8" calcext:value-type="float">
            <text:p>8</text:p>
          </table:table-cell>
          <table:table-cell table:style-name="ce47" office:value-type="date" office:date-value="2022-01-24" calcext:value-type="date">
            <text:p>24/01/2022</text:p>
          </table:table-cell>
          <table:table-cell table:style-name="ce59" table:formula="of:=[.H37]-[.K38]" office:value-type="float" office:value="-21363.4433333333" calcext:value-type="float" table:number-columns-spanned="3" table:number-rows-spanned="1">
            <text:p><text:s/>(21,363.44)</text:p>
          </table:table-cell>
          <table:covered-table-cell table:number-columns-repeated="2" table:style-name="ce59"/>
          <table:table-cell table:style-name="ce75" office:value-type="float" office:value="435.78" calcext:value-type="float">
            <text:p><text:s/>435.78 </text:p>
          </table:table-cell>
          <table:table-cell table:style-name="ce59" office:value-type="float" office:value="180.72" calcext:value-type="float" table:number-columns-spanned="3" table:number-rows-spanned="1">
            <text:p><text:s/>180.72 </text:p>
          </table:table-cell>
          <table:covered-table-cell table:number-columns-repeated="2" table:style-name="ce59"/>
          <table:table-cell table:style-name="ce75"/>
          <table:table-cell table:style-name="ce75" table:formula="of:=[.K38]+[.L38]+[.O38]" office:value-type="float" office:value="616.5" calcext:value-type="float">
            <text:p><text:s/>616.50 </text:p>
          </table:table-cell>
          <table:table-cell table:style-name="ce75" table:formula="of:=TRUNC(((([.$P38])/(1-[.$M$14]))-([.$P38]));1)+(IF(MOD(((([.$P38])/(1-[.$M$14]))-([.$P38]))*100; 10)&gt;=5; 5; 0)/100)" office:value-type="float" office:value="0" calcext:value-type="float">
            <text:p><text:s/>- <text:s text:c="2"/></text:p>
          </table:table-cell>
          <table:table-cell table:style-name="ce97" table:formula="of:=[.Q38]+[.P38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7]+30" office:value-type="date" office:date-value="2022-01-19" calcext:value-type="date">
            <text:p>19/01/2022</text:p>
          </table:table-cell>
          <table:table-cell table:style-name="ce119" table:formula="of:=[.AH37]+1" office:value-type="float" office:value="8" calcext:value-type="float">
            <text:p>8</text:p>
          </table:table-cell>
          <table:table-cell table:style-name="ce127" table:formula="of:=1/POWER(1+[.$CC$32];IF([.$CL$23]=3;[.$CX38];[.$AO38]))" office:value-type="float" office:value="0.875873010818991" calcext:value-type="float">
            <text:p><text:s/>0.876 </text:p>
          </table:table-cell>
          <table:table-cell table:style-name="ce127" table:formula="of:=IF([.$AH38]&lt;=[.$CK$32];0;1/POWER(1+[.$CC$32];[.$CV38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8]=0;[.$AJ37]=0);0;[.$AI38])" office:value-type="string" office:string-value="" calcext:value-type="error">
            <text:p>#N/D</text:p>
          </table:table-cell>
          <table:table-cell table:style-name="ce130" table:formula="of:=IF([.$AV$28]=1;[.AW38];IF([.$AV$28]=2;[.AY38];IF([.$AV$28]=3;[.BA38];[.BC38])))" office:value-type="float" office:value="1" calcext:value-type="float">
            <text:p>01</text:p>
          </table:table-cell>
          <table:table-cell table:style-name="ce130" table:formula="of:=IF([.$AV$28]=1;[.AX38];IF([.$AV$28]=2;[.AZ38];IF([.$AV$28]=3;[.BB38];[.BD38])))" office:value-type="float" office:value="2022" calcext:value-type="float">
            <text:p>2022</text:p>
          </table:table-cell>
          <table:table-cell table:style-name="ce134" table:formula="of:=[.CV38]-[.CV37]" office:value-type="float" office:value="31" calcext:value-type="float">
            <text:p><text:s/>31 </text:p>
          </table:table-cell>
          <table:table-cell table:style-name="ce134" table:formula="of:=IF([.$CN$23]=2;[.CX38];[.CV38]-[.$G$12])" office:value-type="float" office:value="245" calcext:value-type="float">
            <text:p><text:s/>245 </text:p>
          </table:table-cell>
          <table:table-cell table:style-name="ce136" table:formula="of:=IF([.$AV$28]=1;&quot;&quot;;DATE([.AM39];[.AL39];1)-1)" office:value-type="date" office:date-value="2022-01-31" calcext:value-type="date">
            <text:p>31/01/2022</text:p>
          </table:table-cell>
          <table:table-cell table:style-name="ce136" table:formula="of:=IF(AND([.$CL$23]=3;[.$O$10]&gt;=[.$AH38]);[.$G$12];IF(AND([.$CL$23]=3;[.$CN$23]=2);[.AG38];IF([.$AV$28]=1;[.$AW38];IF([.$CN$23]=1;DATE([.AM38];[.AL38];[.$G$14]);IF([.$AV$28]=2;[.AS37]+30;IF([.$AV$28]=3;[.AS37]+60;[.AS37]+90))))))" office:value-type="date" office:date-value="2022-01-24" calcext:value-type="date">
            <text:p>24/01/2022</text:p>
          </table:table-cell>
          <table:table-cell table:style-name="ce140" table:formula="of:=[.$AQ38]+IF(AND(DAY([.$AQ38])=27;MONTH([.$AQ38])=7);3;IF(AND(WEEKDAY([.$AQ38])=5;ISERROR(VLOOKUP([.$AQ38]+1;[$Factores.$A:.$A];1;0))=FALSE());4;IF(OR(WEEKDAY([.$AQ38])=1;ISERROR(VLOOKUP([.$AQ38];[$Factores.$A:.$A];1;0))=FALSE());1;IF(WEEKDAY([.$AQ38])=7;2;0))))" office:value-type="date" office:date-value="2022-01-24" calcext:value-type="date">
            <text:p>24/01/2022</text:p>
          </table:table-cell>
          <table:table-cell table:style-name="ce140" office:value-type="date" office:date-value="2022-01-24" calcext:value-type="date">
            <text:p>24/01/2022</text:p>
          </table:table-cell>
          <table:table-cell table:style-name="ce126" table:formula="of:=[.P38]/POWER(1+[.$AT$26];[.AO38])" office:value-type="float" office:value="561.070603194924" calcext:value-type="float">
            <text:p><text:s/>561.07 </text:p>
          </table:table-cell>
          <table:table-cell table:style-name="ce148"/>
          <table:table-cell table:style-name="ce154"/>
          <table:table-cell table:style-name="ce136" office:value-type="date" office:date-value="2021-09-24" calcext:value-type="date">
            <text:p>24/09/2021</text:p>
          </table:table-cell>
          <table:table-cell table:style-name="ce155"/>
          <table:table-cell table:style-name="ce162" table:formula="of:=IF([.AY37]&lt;12;[.AY37]+1;[.AY37]+1-12)" office:value-type="float" office:value="1" calcext:value-type="float">
            <text:p>01</text:p>
          </table:table-cell>
          <table:table-cell table:style-name="ce163" table:formula="of:=IF([.AY37]=12;[.AZ37]+1;[.AZ37])" office:value-type="float" office:value="2022" calcext:value-type="float">
            <text:p>2022</text:p>
          </table:table-cell>
          <table:table-cell table:style-name="ce162" table:formula="of:=IF([.BA37]&lt;=10;[.BA37]+2;IF([.BA37]=11;1;IF([.BA37]=12;2;IF([.BA37]=13;3;4))))" office:value-type="float" office:value="9" calcext:value-type="float">
            <text:p>09</text:p>
          </table:table-cell>
          <table:table-cell table:style-name="ce163" table:formula="of:=IF([.BA37]&gt;=11;[.BB37]+1;[.BB37])" office:value-type="float" office:value="2022" calcext:value-type="float">
            <text:p>2022</text:p>
          </table:table-cell>
          <table:table-cell table:style-name="ce162" table:formula="of:=IF([.BC37]&lt;=9;[.BC37]+3;IF([.BC37]=10;1;IF([.BC37]=11;2;IF([.BC37]=12;3;4))))" office:value-type="float" office:value="5" calcext:value-type="float">
            <text:p>05</text:p>
          </table:table-cell>
          <table:table-cell table:style-name="ce163" table:formula="of:=IF([.BC37]&gt;=10;[.BD37]+1;[.BD37])" office:value-type="float" office:value="2023" calcext:value-type="float">
            <text:p>2023</text:p>
          </table:table-cell>
          <table:table-cell table:style-name="ce166" table:formula="of:=DATE([.AZ38];[.AY38];[.$G$14])" office:value-type="date" office:date-value="2022-01-24" calcext:value-type="date">
            <text:p>24/01/2022</text:p>
          </table:table-cell>
          <table:table-cell table:style-name="ce166" table:formula="of:=[.$BE38]+IF(OR(WEEKDAY([.$BE38])=1;ISERROR(VLOOKUP([.$BE38];[$Factores.$A:.$A];1;0))=FALSE());1;IF(WEEKDAY([.$BE38])=7;2;0))" office:value-type="date" office:date-value="2022-01-24" calcext:value-type="date">
            <text:p>24/01/2022</text:p>
          </table:table-cell>
          <table:table-cell table:style-name="ce166" table:formula="of:=IF(AND(DAY([.$BE38])=27;WEEKDAY([.$BE38])=1);[.$BE38]-2;IF(AND(DAY([.$BE38])=27;WEEKDAY([.$BE38])=7);[.$BE38]-1;IF(AND(DAY([.$BE38])=26;WEEKDAY([.$BE38])=1);[.$BE38]-2;IF(AND(DAY([.$BE38])=26;WEEKDAY([.$BE38])=7);[.$BE38]-1;IF(DAY([.$BF38])=15;[.$BF38]+2;IF(DAY([.$BF38])=16;[.$BF38]+1;[.$BF38]))))))" office:value-type="date" office:date-value="2022-01-24" calcext:value-type="date">
            <text:p>24/01/2022</text:p>
          </table:table-cell>
          <table:table-cell table:style-name="ce119" table:number-columns-repeated="21"/>
          <table:table-cell table:style-name="ce119" table:formula="of:=(1+[.CC36])^(1/365)-1" office:value-type="float" office:value="0.00109982988495649" calcext:value-type="float">
            <text:p>0.00109982988495649</text:p>
          </table:table-cell>
          <table:table-cell table:style-name="ce119" table:number-columns-repeated="11"/>
          <table:table-cell table:style-name="ce119" table:formula="of:=[.CO37]+1" office:value-type="float" office:value="8" calcext:value-type="float">
            <text:p>8</text:p>
          </table:table-cell>
          <table:table-cell table:style-name="ce119"/>
          <table:table-cell table:style-name="ce187" table:formula="of:=[.CS37]+30" office:value-type="date" office:date-value="2022-01-23" calcext:value-type="date">
            <text:p>23/01/2022</text:p>
          </table:table-cell>
          <table:table-cell table:style-name="ce187" table:formula="of:=[.$CQ38]+IF(WEEKDAY([.$CQ38])=7;2;IF(WEEKDAY([.$CQ38])=1;1;0))" office:value-type="date" office:date-value="2022-01-24" calcext:value-type="date">
            <text:p>24/01/2022</text:p>
          </table:table-cell>
          <table:table-cell table:style-name="ce187" table:formula="of:=[.$CR38]+IF(AND(WEEKDAY([.$CR38])=6; ISERROR(VLOOKUP([.$CR38];[$Factores.$A:.$A];1;0))=FALSE());3;0)" office:value-type="date" office:date-value="2022-01-24" calcext:value-type="date">
            <text:p>24/01/2022</text:p>
          </table:table-cell>
          <table:table-cell table:style-name="ce187" table:formula="of:=IF(AND([.$CL$23]=3;[.$O$10]&gt;=[.$CO38]);[.$G$12];[.$CS38])" office:value-type="date" office:date-value="2022-01-24" calcext:value-type="date">
            <text:p>24/01/2022</text:p>
          </table:table-cell>
          <table:table-cell table:style-name="ce119"/>
          <table:table-cell table:style-name="ce190" table:formula="of:=IF([.$CN$23]=1;IF(AND([.$CL$23]=3;[.CT38]=[.CT37]);[.$CT38];[.AS38]);IF(AND([.$CN$23]=2;[.$CL$23]=3);[.CT38];[.CS38]))" office:value-type="date" office:date-value="2022-01-24" calcext:value-type="date">
            <text:p>24/01/2022</text:p>
          </table:table-cell>
          <table:table-cell table:style-name="ce119" table:formula="of:=([.CV38]-[.CV37])" office:value-type="float" office:value="31" calcext:value-type="float">
            <text:p>31</text:p>
          </table:table-cell>
          <table:table-cell table:style-name="ce119" table:formula="of:=IF([.CX36]=0;[.CW38];[.CW38]+[.CX37])" office:value-type="float" office:value="245" calcext:value-type="float">
            <text:p>245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38]+1" office:value-type="float" office:value="9" calcext:value-type="float">
            <text:p>9</text:p>
          </table:table-cell>
          <table:table-cell table:style-name="ce47" office:value-type="date" office:date-value="2022-02-24" calcext:value-type="date">
            <text:p>24/02/2022</text:p>
          </table:table-cell>
          <table:table-cell table:style-name="ce59" table:formula="of:=[.H38]-[.K39]" office:value-type="float" office:value="-21804.4433333333" calcext:value-type="float" table:number-columns-spanned="3" table:number-rows-spanned="1">
            <text:p><text:s/>(21,804.44)</text:p>
          </table:table-cell>
          <table:covered-table-cell table:number-columns-repeated="2" table:style-name="ce59"/>
          <table:table-cell table:style-name="ce75" office:value-type="float" office:value="441" calcext:value-type="float">
            <text:p><text:s/>441.00 </text:p>
          </table:table-cell>
          <table:table-cell table:style-name="ce59" office:value-type="float" office:value="175.5" calcext:value-type="float" table:number-columns-spanned="3" table:number-rows-spanned="1">
            <text:p><text:s/>175.50 </text:p>
          </table:table-cell>
          <table:covered-table-cell table:number-columns-repeated="2" table:style-name="ce59"/>
          <table:table-cell table:style-name="ce75"/>
          <table:table-cell table:style-name="ce75" table:formula="of:=[.K39]+[.L39]+[.O39]" office:value-type="float" office:value="616.5" calcext:value-type="float">
            <text:p><text:s/>616.50 </text:p>
          </table:table-cell>
          <table:table-cell table:style-name="ce75" table:formula="of:=TRUNC(((([.$P39])/(1-[.$M$14]))-([.$P39]));1)+(IF(MOD(((([.$P39])/(1-[.$M$14]))-([.$P39]))*100; 10)&gt;=5; 5; 0)/100)" office:value-type="float" office:value="0" calcext:value-type="float">
            <text:p><text:s/>- <text:s text:c="2"/></text:p>
          </table:table-cell>
          <table:table-cell table:style-name="ce97" table:formula="of:=[.Q39]+[.P39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8]+30" office:value-type="date" office:date-value="2022-02-18" calcext:value-type="date">
            <text:p>18/02/2022</text:p>
          </table:table-cell>
          <table:table-cell table:style-name="ce119" table:formula="of:=[.AH38]+1" office:value-type="float" office:value="9" calcext:value-type="float">
            <text:p>9</text:p>
          </table:table-cell>
          <table:table-cell table:style-name="ce127" table:formula="of:=1/POWER(1+[.$CC$32];IF([.$CL$23]=3;[.$CX39];[.$AO39]))" office:value-type="float" office:value="0.861307416668521" calcext:value-type="float">
            <text:p><text:s/>0.861 </text:p>
          </table:table-cell>
          <table:table-cell table:style-name="ce127" table:formula="of:=IF([.$AH39]&lt;=[.$CK$32];0;1/POWER(1+[.$CC$32];[.$CV39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39]=0;[.$AJ38]=0);0;[.$AI39])" office:value-type="string" office:string-value="" calcext:value-type="error">
            <text:p>#N/D</text:p>
          </table:table-cell>
          <table:table-cell table:style-name="ce130" table:formula="of:=IF([.$AV$28]=1;[.AW39];IF([.$AV$28]=2;[.AY39];IF([.$AV$28]=3;[.BA39];[.BC39])))" office:value-type="float" office:value="2" calcext:value-type="float">
            <text:p>02</text:p>
          </table:table-cell>
          <table:table-cell table:style-name="ce130" table:formula="of:=IF([.$AV$28]=1;[.AX39];IF([.$AV$28]=2;[.AZ39];IF([.$AV$28]=3;[.BB39];[.BD39])))" office:value-type="float" office:value="2022" calcext:value-type="float">
            <text:p>2022</text:p>
          </table:table-cell>
          <table:table-cell table:style-name="ce134" table:formula="of:=[.CV39]-[.CV38]" office:value-type="float" office:value="31" calcext:value-type="float">
            <text:p><text:s/>31 </text:p>
          </table:table-cell>
          <table:table-cell table:style-name="ce134" table:formula="of:=IF([.$CN$23]=2;[.CX39];[.CV39]-[.$G$12])" office:value-type="float" office:value="276" calcext:value-type="float">
            <text:p><text:s/>276 </text:p>
          </table:table-cell>
          <table:table-cell table:style-name="ce136" table:formula="of:=IF([.$AV$28]=1;&quot;&quot;;DATE([.AM40];[.AL40];1)-1)" office:value-type="date" office:date-value="2022-02-28" calcext:value-type="date">
            <text:p>28/02/2022</text:p>
          </table:table-cell>
          <table:table-cell table:style-name="ce136" table:formula="of:=IF(AND([.$CL$23]=3;[.$O$10]&gt;=[.$AH39]);[.$G$12];IF(AND([.$CL$23]=3;[.$CN$23]=2);[.AG39];IF([.$AV$28]=1;[.$AW39];IF([.$CN$23]=1;DATE([.AM39];[.AL39];[.$G$14]);IF([.$AV$28]=2;[.AS38]+30;IF([.$AV$28]=3;[.AS38]+60;[.AS38]+90))))))" office:value-type="date" office:date-value="2022-02-24" calcext:value-type="date">
            <text:p>24/02/2022</text:p>
          </table:table-cell>
          <table:table-cell table:style-name="ce140" table:formula="of:=[.$AQ39]+IF(AND(DAY([.$AQ39])=27;MONTH([.$AQ39])=7);3;IF(AND(WEEKDAY([.$AQ39])=5;ISERROR(VLOOKUP([.$AQ39]+1;[$Factores.$A:.$A];1;0))=FALSE());4;IF(OR(WEEKDAY([.$AQ39])=1;ISERROR(VLOOKUP([.$AQ39];[$Factores.$A:.$A];1;0))=FALSE());1;IF(WEEKDAY([.$AQ39])=7;2;0))))" office:value-type="date" office:date-value="2022-02-24" calcext:value-type="date">
            <text:p>24/02/2022</text:p>
          </table:table-cell>
          <table:table-cell table:style-name="ce140" office:value-type="date" office:date-value="2022-02-24" calcext:value-type="date">
            <text:p>24/02/2022</text:p>
          </table:table-cell>
          <table:table-cell table:style-name="ce126" table:formula="of:=[.P39]/POWER(1+[.$AT$26];[.AO39])" office:value-type="float" office:value="554.421984704189" calcext:value-type="float">
            <text:p><text:s/>554.42 </text:p>
          </table:table-cell>
          <table:table-cell table:style-name="ce148"/>
          <table:table-cell table:style-name="ce154"/>
          <table:table-cell table:style-name="ce136" table:formula="of:=[.AW38]+15" office:value-type="date" office:date-value="2021-10-09" calcext:value-type="date">
            <text:p>09/10/2021</text:p>
          </table:table-cell>
          <table:table-cell table:style-name="ce155"/>
          <table:table-cell table:style-name="ce162" table:formula="of:=IF([.AY38]&lt;12;[.AY38]+1;[.AY38]+1-12)" office:value-type="float" office:value="2" calcext:value-type="float">
            <text:p>02</text:p>
          </table:table-cell>
          <table:table-cell table:style-name="ce163" table:formula="of:=IF([.AY38]=12;[.AZ38]+1;[.AZ38])" office:value-type="float" office:value="2022" calcext:value-type="float">
            <text:p>2022</text:p>
          </table:table-cell>
          <table:table-cell table:style-name="ce162" table:formula="of:=IF([.BA38]&lt;=10;[.BA38]+2;IF([.BA38]=11;1;IF([.BA38]=12;2;IF([.BA38]=13;3;4))))" office:value-type="float" office:value="11" calcext:value-type="float">
            <text:p>11</text:p>
          </table:table-cell>
          <table:table-cell table:style-name="ce163" table:formula="of:=IF([.BA38]&gt;=11;[.BB38]+1;[.BB38])" office:value-type="float" office:value="2022" calcext:value-type="float">
            <text:p>2022</text:p>
          </table:table-cell>
          <table:table-cell table:style-name="ce162" table:formula="of:=IF([.BC38]&lt;=9;[.BC38]+3;IF([.BC38]=10;1;IF([.BC38]=11;2;IF([.BC38]=12;3;4))))" office:value-type="float" office:value="8" calcext:value-type="float">
            <text:p>08</text:p>
          </table:table-cell>
          <table:table-cell table:style-name="ce163" table:formula="of:=IF([.BC38]&gt;=10;[.BD38]+1;[.BD38])" office:value-type="float" office:value="2023" calcext:value-type="float">
            <text:p>2023</text:p>
          </table:table-cell>
          <table:table-cell table:style-name="ce166" table:formula="of:=DATE([.AZ39];[.AY39];[.$G$14])" office:value-type="date" office:date-value="2022-02-24" calcext:value-type="date">
            <text:p>24/02/2022</text:p>
          </table:table-cell>
          <table:table-cell table:style-name="ce166" table:formula="of:=[.$BE39]+IF(OR(WEEKDAY([.$BE39])=1;ISERROR(VLOOKUP([.$BE39];[$Factores.$A:.$A];1;0))=FALSE());1;IF(WEEKDAY([.$BE39])=7;2;0))" office:value-type="date" office:date-value="2022-02-24" calcext:value-type="date">
            <text:p>24/02/2022</text:p>
          </table:table-cell>
          <table:table-cell table:style-name="ce166" table:formula="of:=IF(AND(DAY([.$BE39])=27;WEEKDAY([.$BE39])=1);[.$BE39]-2;IF(AND(DAY([.$BE39])=27;WEEKDAY([.$BE39])=7);[.$BE39]-1;IF(AND(DAY([.$BE39])=26;WEEKDAY([.$BE39])=1);[.$BE39]-2;IF(AND(DAY([.$BE39])=26;WEEKDAY([.$BE39])=7);[.$BE39]-1;IF(DAY([.$BF39])=15;[.$BF39]+2;IF(DAY([.$BF39])=16;[.$BF39]+1;[.$BF39]))))))" office:value-type="date" office:date-value="2022-02-24" calcext:value-type="date">
            <text:p>24/02/2022</text:p>
          </table:table-cell>
          <table:table-cell table:style-name="ce119" table:number-columns-repeated="33"/>
          <table:table-cell table:style-name="ce119" table:formula="of:=[.CO38]+1" office:value-type="float" office:value="9" calcext:value-type="float">
            <text:p>9</text:p>
          </table:table-cell>
          <table:table-cell table:style-name="ce119"/>
          <table:table-cell table:style-name="ce187" table:formula="of:=[.CS38]+30" office:value-type="date" office:date-value="2022-02-23" calcext:value-type="date">
            <text:p>23/02/2022</text:p>
          </table:table-cell>
          <table:table-cell table:style-name="ce187" table:formula="of:=[.$CQ39]+IF(WEEKDAY([.$CQ39])=7;2;IF(WEEKDAY([.$CQ39])=1;1;0))" office:value-type="date" office:date-value="2022-02-23" calcext:value-type="date">
            <text:p>23/02/2022</text:p>
          </table:table-cell>
          <table:table-cell table:style-name="ce187" table:formula="of:=[.$CR39]+IF(AND(WEEKDAY([.$CR39])=6; ISERROR(VLOOKUP([.$CR39];[$Factores.$A:.$A];1;0))=FALSE());3;0)" office:value-type="date" office:date-value="2022-02-23" calcext:value-type="date">
            <text:p>23/02/2022</text:p>
          </table:table-cell>
          <table:table-cell table:style-name="ce187" table:formula="of:=IF(AND([.$CL$23]=3;[.$O$10]&gt;=[.$CO39]);[.$G$12];[.$CS39])" office:value-type="date" office:date-value="2022-02-23" calcext:value-type="date">
            <text:p>23/02/2022</text:p>
          </table:table-cell>
          <table:table-cell table:style-name="ce119"/>
          <table:table-cell table:style-name="ce190" table:formula="of:=IF([.$CN$23]=1;IF(AND([.$CL$23]=3;[.CT39]=[.CT38]);[.$CT39];[.AS39]);IF(AND([.$CN$23]=2;[.$CL$23]=3);[.CT39];[.CS39]))" office:value-type="date" office:date-value="2022-02-24" calcext:value-type="date">
            <text:p>24/02/2022</text:p>
          </table:table-cell>
          <table:table-cell table:style-name="ce119" table:formula="of:=([.CV39]-[.CV38])" office:value-type="float" office:value="31" calcext:value-type="float">
            <text:p>31</text:p>
          </table:table-cell>
          <table:table-cell table:style-name="ce119" table:formula="of:=IF([.CX37]=0;[.CW39];[.CW39]+[.CX38])" office:value-type="float" office:value="276" calcext:value-type="float">
            <text:p>276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39]+1" office:value-type="float" office:value="10" calcext:value-type="float">
            <text:p>10</text:p>
          </table:table-cell>
          <table:table-cell table:style-name="ce47" office:value-type="date" office:date-value="2022-03-24" calcext:value-type="date">
            <text:p>24/03/2022</text:p>
          </table:table-cell>
          <table:table-cell table:style-name="ce59" table:formula="of:=[.H39]-[.K40]" office:value-type="float" office:value="-22267.2933333333" calcext:value-type="float" table:number-columns-spanned="3" table:number-rows-spanned="1">
            <text:p><text:s/>(22,267.29)</text:p>
          </table:table-cell>
          <table:covered-table-cell table:number-columns-repeated="2" table:style-name="ce59"/>
          <table:table-cell table:style-name="ce75" office:value-type="float" office:value="462.85" calcext:value-type="float">
            <text:p><text:s/>462.85 </text:p>
          </table:table-cell>
          <table:table-cell table:style-name="ce59" office:value-type="float" office:value="153.65" calcext:value-type="float" table:number-columns-spanned="3" table:number-rows-spanned="1">
            <text:p><text:s/>153.65 </text:p>
          </table:table-cell>
          <table:covered-table-cell table:number-columns-repeated="2" table:style-name="ce59"/>
          <table:table-cell table:style-name="ce75"/>
          <table:table-cell table:style-name="ce75" table:formula="of:=[.K40]+[.L40]+[.O40]" office:value-type="float" office:value="616.5" calcext:value-type="float">
            <text:p><text:s/>616.50 </text:p>
          </table:table-cell>
          <table:table-cell table:style-name="ce75" table:formula="of:=TRUNC(((([.$P40])/(1-[.$M$14]))-([.$P40]));1)+(IF(MOD(((([.$P40])/(1-[.$M$14]))-([.$P40]))*100; 10)&gt;=5; 5; 0)/100)" office:value-type="float" office:value="0" calcext:value-type="float">
            <text:p><text:s/>- <text:s text:c="2"/></text:p>
          </table:table-cell>
          <table:table-cell table:style-name="ce97" table:formula="of:=[.Q40]+[.P40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39]+30" office:value-type="date" office:date-value="2022-03-20" calcext:value-type="date">
            <text:p>20/03/2022</text:p>
          </table:table-cell>
          <table:table-cell table:style-name="ce119" table:formula="of:=[.AH39]+1" office:value-type="float" office:value="10" calcext:value-type="float">
            <text:p>10</text:p>
          </table:table-cell>
          <table:table-cell table:style-name="ce127" table:formula="of:=1/POWER(1+[.$CC$32];IF([.$CL$23]=3;[.$CX40];[.$AO40]))" office:value-type="float" office:value="0.848359704125267" calcext:value-type="float">
            <text:p><text:s/>0.848 </text:p>
          </table:table-cell>
          <table:table-cell table:style-name="ce127" table:formula="of:=IF([.$AH40]&lt;=[.$CK$32];0;1/POWER(1+[.$CC$32];[.$CV40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0]=0;[.$AJ39]=0);0;[.$AI40])" office:value-type="string" office:string-value="" calcext:value-type="error">
            <text:p>#N/D</text:p>
          </table:table-cell>
          <table:table-cell table:style-name="ce130" table:formula="of:=IF([.$AV$28]=1;[.AW40];IF([.$AV$28]=2;[.AY40];IF([.$AV$28]=3;[.BA40];[.BC40])))" office:value-type="float" office:value="3" calcext:value-type="float">
            <text:p>03</text:p>
          </table:table-cell>
          <table:table-cell table:style-name="ce130" table:formula="of:=IF([.$AV$28]=1;[.AX40];IF([.$AV$28]=2;[.AZ40];IF([.$AV$28]=3;[.BB40];[.BD40])))" office:value-type="float" office:value="2022" calcext:value-type="float">
            <text:p>2022</text:p>
          </table:table-cell>
          <table:table-cell table:style-name="ce134" table:formula="of:=[.CV40]-[.CV39]" office:value-type="float" office:value="28" calcext:value-type="float">
            <text:p><text:s/>28 </text:p>
          </table:table-cell>
          <table:table-cell table:style-name="ce134" table:formula="of:=IF([.$CN$23]=2;[.CX40];[.CV40]-[.$G$12])" office:value-type="float" office:value="304" calcext:value-type="float">
            <text:p><text:s/>304 </text:p>
          </table:table-cell>
          <table:table-cell table:style-name="ce136" table:formula="of:=IF([.$AV$28]=1;&quot;&quot;;DATE([.AM41];[.AL41];1)-1)" office:value-type="date" office:date-value="2022-03-31" calcext:value-type="date">
            <text:p>31/03/2022</text:p>
          </table:table-cell>
          <table:table-cell table:style-name="ce136" table:formula="of:=IF(AND([.$CL$23]=3;[.$O$10]&gt;=[.$AH40]);[.$G$12];IF(AND([.$CL$23]=3;[.$CN$23]=2);[.AG40];IF([.$AV$28]=1;[.$AW40];IF([.$CN$23]=1;DATE([.AM40];[.AL40];[.$G$14]);IF([.$AV$28]=2;[.AS39]+30;IF([.$AV$28]=3;[.AS39]+60;[.AS39]+90))))))" office:value-type="date" office:date-value="2022-03-24" calcext:value-type="date">
            <text:p>24/03/2022</text:p>
          </table:table-cell>
          <table:table-cell table:style-name="ce140" table:formula="of:=[.$AQ40]+IF(AND(DAY([.$AQ40])=27;MONTH([.$AQ40])=7);3;IF(AND(WEEKDAY([.$AQ40])=5;ISERROR(VLOOKUP([.$AQ40]+1;[$Factores.$A:.$A];1;0))=FALSE());4;IF(OR(WEEKDAY([.$AQ40])=1;ISERROR(VLOOKUP([.$AQ40];[$Factores.$A:.$A];1;0))=FALSE());1;IF(WEEKDAY([.$AQ40])=7;2;0))))" office:value-type="date" office:date-value="2022-03-24" calcext:value-type="date">
            <text:p>24/03/2022</text:p>
          </table:table-cell>
          <table:table-cell table:style-name="ce140" office:value-type="date" office:date-value="2022-03-24" calcext:value-type="date">
            <text:p>24/03/2022</text:p>
          </table:table-cell>
          <table:table-cell table:style-name="ce126" table:formula="of:=[.P40]/POWER(1+[.$AT$26];[.AO40])" office:value-type="float" office:value="548.484524540431" calcext:value-type="float">
            <text:p><text:s/>548.48 </text:p>
          </table:table-cell>
          <table:table-cell table:style-name="ce148"/>
          <table:table-cell table:style-name="ce154"/>
          <table:table-cell table:style-name="ce136" office:value-type="date" office:date-value="2021-10-25" calcext:value-type="date">
            <text:p>25/10/2021</text:p>
          </table:table-cell>
          <table:table-cell table:style-name="ce155"/>
          <table:table-cell table:style-name="ce162" table:formula="of:=IF([.AY39]&lt;12;[.AY39]+1;[.AY39]+1-12)" office:value-type="float" office:value="3" calcext:value-type="float">
            <text:p>03</text:p>
          </table:table-cell>
          <table:table-cell table:style-name="ce163" table:formula="of:=IF([.AY39]=12;[.AZ39]+1;[.AZ39])" office:value-type="float" office:value="2022" calcext:value-type="float">
            <text:p>2022</text:p>
          </table:table-cell>
          <table:table-cell table:style-name="ce162" table:formula="of:=IF([.BA39]&lt;=10;[.BA39]+2;IF([.BA39]=11;1;IF([.BA39]=12;2;IF([.BA39]=13;3;4))))" office:value-type="float" office:value="1" calcext:value-type="float">
            <text:p>01</text:p>
          </table:table-cell>
          <table:table-cell table:style-name="ce163" table:formula="of:=IF([.BA39]&gt;=11;[.BB39]+1;[.BB39])" office:value-type="float" office:value="2023" calcext:value-type="float">
            <text:p>2023</text:p>
          </table:table-cell>
          <table:table-cell table:style-name="ce162" table:formula="of:=IF([.BC39]&lt;=9;[.BC39]+3;IF([.BC39]=10;1;IF([.BC39]=11;2;IF([.BC39]=12;3;4))))" office:value-type="float" office:value="11" calcext:value-type="float">
            <text:p>11</text:p>
          </table:table-cell>
          <table:table-cell table:style-name="ce163" table:formula="of:=IF([.BC39]&gt;=10;[.BD39]+1;[.BD39])" office:value-type="float" office:value="2023" calcext:value-type="float">
            <text:p>2023</text:p>
          </table:table-cell>
          <table:table-cell table:style-name="ce166" table:formula="of:=DATE([.AZ40];[.AY40];[.$G$14])" office:value-type="date" office:date-value="2022-03-24" calcext:value-type="date">
            <text:p>24/03/2022</text:p>
          </table:table-cell>
          <table:table-cell table:style-name="ce166" table:formula="of:=[.$BE40]+IF(OR(WEEKDAY([.$BE40])=1;ISERROR(VLOOKUP([.$BE40];[$Factores.$A:.$A];1;0))=FALSE());1;IF(WEEKDAY([.$BE40])=7;2;0))" office:value-type="date" office:date-value="2022-03-24" calcext:value-type="date">
            <text:p>24/03/2022</text:p>
          </table:table-cell>
          <table:table-cell table:style-name="ce166" table:formula="of:=IF(AND(DAY([.$BE40])=27;WEEKDAY([.$BE40])=1);[.$BE40]-2;IF(AND(DAY([.$BE40])=27;WEEKDAY([.$BE40])=7);[.$BE40]-1;IF(AND(DAY([.$BE40])=26;WEEKDAY([.$BE40])=1);[.$BE40]-2;IF(AND(DAY([.$BE40])=26;WEEKDAY([.$BE40])=7);[.$BE40]-1;IF(DAY([.$BF40])=15;[.$BF40]+2;IF(DAY([.$BF40])=16;[.$BF40]+1;[.$BF40]))))))" office:value-type="date" office:date-value="2022-03-24" calcext:value-type="date">
            <text:p>24/03/2022</text:p>
          </table:table-cell>
          <table:table-cell table:style-name="ce119" table:number-columns-repeated="33"/>
          <table:table-cell table:style-name="ce119" table:formula="of:=[.CO39]+1" office:value-type="float" office:value="10" calcext:value-type="float">
            <text:p>10</text:p>
          </table:table-cell>
          <table:table-cell table:style-name="ce119"/>
          <table:table-cell table:style-name="ce187" table:formula="of:=[.CS39]+30" office:value-type="date" office:date-value="2022-03-25" calcext:value-type="date">
            <text:p>25/03/2022</text:p>
          </table:table-cell>
          <table:table-cell table:style-name="ce187" table:formula="of:=[.$CQ40]+IF(WEEKDAY([.$CQ40])=7;2;IF(WEEKDAY([.$CQ40])=1;1;0))" office:value-type="date" office:date-value="2022-03-25" calcext:value-type="date">
            <text:p>25/03/2022</text:p>
          </table:table-cell>
          <table:table-cell table:style-name="ce187" table:formula="of:=[.$CR40]+IF(AND(WEEKDAY([.$CR40])=6; ISERROR(VLOOKUP([.$CR40];[$Factores.$A:.$A];1;0))=FALSE());3;0)" office:value-type="date" office:date-value="2022-03-25" calcext:value-type="date">
            <text:p>25/03/2022</text:p>
          </table:table-cell>
          <table:table-cell table:style-name="ce187" table:formula="of:=IF(AND([.$CL$23]=3;[.$O$10]&gt;=[.$CO40]);[.$G$12];[.$CS40])" office:value-type="date" office:date-value="2022-03-25" calcext:value-type="date">
            <text:p>25/03/2022</text:p>
          </table:table-cell>
          <table:table-cell table:style-name="ce119"/>
          <table:table-cell table:style-name="ce190" table:formula="of:=IF([.$CN$23]=1;IF(AND([.$CL$23]=3;[.CT40]=[.CT39]);[.$CT40];[.AS40]);IF(AND([.$CN$23]=2;[.$CL$23]=3);[.CT40];[.CS40]))" office:value-type="date" office:date-value="2022-03-24" calcext:value-type="date">
            <text:p>24/03/2022</text:p>
          </table:table-cell>
          <table:table-cell table:style-name="ce119" table:formula="of:=([.CV40]-[.CV39])" office:value-type="float" office:value="28" calcext:value-type="float">
            <text:p>28</text:p>
          </table:table-cell>
          <table:table-cell table:style-name="ce119" table:formula="of:=IF([.CX38]=0;[.CW40];[.CW40]+[.CX39])" office:value-type="float" office:value="304" calcext:value-type="float">
            <text:p>304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0]+1" office:value-type="float" office:value="11" calcext:value-type="float">
            <text:p>11</text:p>
          </table:table-cell>
          <table:table-cell table:style-name="ce47" office:value-type="date" office:date-value="2022-04-25" calcext:value-type="date">
            <text:p>25/04/2022</text:p>
          </table:table-cell>
          <table:table-cell table:style-name="ce59" table:formula="of:=[.H40]-[.K41]" office:value-type="float" office:value="-22713.7833333333" calcext:value-type="float" table:number-columns-spanned="3" table:number-rows-spanned="1">
            <text:p><text:s/>(22,713.78)</text:p>
          </table:table-cell>
          <table:covered-table-cell table:number-columns-repeated="2" table:style-name="ce59"/>
          <table:table-cell table:style-name="ce75" office:value-type="float" office:value="446.49" calcext:value-type="float">
            <text:p><text:s/>446.49 </text:p>
          </table:table-cell>
          <table:table-cell table:style-name="ce59" office:value-type="float" office:value="170.01" calcext:value-type="float" table:number-columns-spanned="3" table:number-rows-spanned="1">
            <text:p><text:s/>170.01 </text:p>
          </table:table-cell>
          <table:covered-table-cell table:number-columns-repeated="2" table:style-name="ce59"/>
          <table:table-cell table:style-name="ce75"/>
          <table:table-cell table:style-name="ce75" table:formula="of:=[.K41]+[.L41]+[.O41]" office:value-type="float" office:value="616.5" calcext:value-type="float">
            <text:p><text:s/>616.50 </text:p>
          </table:table-cell>
          <table:table-cell table:style-name="ce75" table:formula="of:=TRUNC(((([.$P41])/(1-[.$M$14]))-([.$P41]));1)+(IF(MOD(((([.$P41])/(1-[.$M$14]))-([.$P41]))*100; 10)&gt;=5; 5; 0)/100)" office:value-type="float" office:value="0" calcext:value-type="float">
            <text:p><text:s/>- <text:s text:c="2"/></text:p>
          </table:table-cell>
          <table:table-cell table:style-name="ce97" table:formula="of:=[.Q41]+[.P41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40]+30" office:value-type="date" office:date-value="2022-04-19" calcext:value-type="date">
            <text:p>19/04/2022</text:p>
          </table:table-cell>
          <table:table-cell table:style-name="ce119" table:formula="of:=[.AH40]+1" office:value-type="float" office:value="11" calcext:value-type="float">
            <text:p>11</text:p>
          </table:table-cell>
          <table:table-cell table:style-name="ce127" table:formula="of:=1/POWER(1+[.$CC$32];IF([.$CL$23]=3;[.$CX41];[.$AO41]))" office:value-type="float" office:value="0.833800479598385" calcext:value-type="float">
            <text:p><text:s/>0.834 </text:p>
          </table:table-cell>
          <table:table-cell table:style-name="ce127" table:formula="of:=IF([.$AH41]&lt;=[.$CK$32];0;1/POWER(1+[.$CC$32];[.$CV41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1]=0;[.$AJ40]=0);0;[.$AI41])" office:value-type="string" office:string-value="" calcext:value-type="error">
            <text:p>#N/D</text:p>
          </table:table-cell>
          <table:table-cell table:style-name="ce130" table:formula="of:=IF([.$AV$28]=1;[.AW41];IF([.$AV$28]=2;[.AY41];IF([.$AV$28]=3;[.BA41];[.BC41])))" office:value-type="float" office:value="4" calcext:value-type="float">
            <text:p>04</text:p>
          </table:table-cell>
          <table:table-cell table:style-name="ce130" table:formula="of:=IF([.$AV$28]=1;[.AX41];IF([.$AV$28]=2;[.AZ41];IF([.$AV$28]=3;[.BB41];[.BD41])))" office:value-type="float" office:value="2022" calcext:value-type="float">
            <text:p>2022</text:p>
          </table:table-cell>
          <table:table-cell table:style-name="ce134" table:formula="of:=[.CV41]-[.CV40]" office:value-type="float" office:value="32" calcext:value-type="float">
            <text:p><text:s/>32 </text:p>
          </table:table-cell>
          <table:table-cell table:style-name="ce134" table:formula="of:=IF([.$CN$23]=2;[.CX41];[.CV41]-[.$G$12])" office:value-type="float" office:value="336" calcext:value-type="float">
            <text:p><text:s/>336 </text:p>
          </table:table-cell>
          <table:table-cell table:style-name="ce136" table:formula="of:=IF([.$AV$28]=1;&quot;&quot;;DATE([.AM42];[.AL42];1)-1)" office:value-type="date" office:date-value="2022-04-30" calcext:value-type="date">
            <text:p>30/04/2022</text:p>
          </table:table-cell>
          <table:table-cell table:style-name="ce136" table:formula="of:=IF(AND([.$CL$23]=3;[.$O$10]&gt;=[.$AH41]);[.$G$12];IF(AND([.$CL$23]=3;[.$CN$23]=2);[.AG41];IF([.$AV$28]=1;[.$AW41];IF([.$CN$23]=1;DATE([.AM41];[.AL41];[.$G$14]);IF([.$AV$28]=2;[.AS40]+30;IF([.$AV$28]=3;[.AS40]+60;[.AS40]+90))))))" office:value-type="date" office:date-value="2022-04-24" calcext:value-type="date">
            <text:p>24/04/2022</text:p>
          </table:table-cell>
          <table:table-cell table:style-name="ce140" table:formula="of:=[.$AQ41]+IF(AND(DAY([.$AQ41])=27;MONTH([.$AQ41])=7);3;IF(AND(WEEKDAY([.$AQ41])=5;ISERROR(VLOOKUP([.$AQ41]+1;[$Factores.$A:.$A];1;0))=FALSE());4;IF(OR(WEEKDAY([.$AQ41])=1;ISERROR(VLOOKUP([.$AQ41];[$Factores.$A:.$A];1;0))=FALSE());1;IF(WEEKDAY([.$AQ41])=7;2;0))))" office:value-type="date" office:date-value="2022-04-25" calcext:value-type="date">
            <text:p>25/04/2022</text:p>
          </table:table-cell>
          <table:table-cell table:style-name="ce140" office:value-type="date" office:date-value="2022-04-25" calcext:value-type="date">
            <text:p>25/04/2022</text:p>
          </table:table-cell>
          <table:table-cell table:style-name="ce126" table:formula="of:=[.P41]/POWER(1+[.$AT$26];[.AO41])" office:value-type="float" office:value="541.7766762972" calcext:value-type="float">
            <text:p><text:s/>541.78 </text:p>
          </table:table-cell>
          <table:table-cell table:style-name="ce148"/>
          <table:table-cell table:style-name="ce154"/>
          <table:table-cell table:style-name="ce136" table:formula="of:=[.AW40]+15" office:value-type="date" office:date-value="2021-11-09" calcext:value-type="date">
            <text:p>09/11/2021</text:p>
          </table:table-cell>
          <table:table-cell table:style-name="ce155"/>
          <table:table-cell table:style-name="ce162" table:formula="of:=IF([.AY40]&lt;12;[.AY40]+1;[.AY40]+1-12)" office:value-type="float" office:value="4" calcext:value-type="float">
            <text:p>04</text:p>
          </table:table-cell>
          <table:table-cell table:style-name="ce163" table:formula="of:=IF([.AY40]=12;[.AZ40]+1;[.AZ40])" office:value-type="float" office:value="2022" calcext:value-type="float">
            <text:p>2022</text:p>
          </table:table-cell>
          <table:table-cell table:style-name="ce162" table:formula="of:=IF([.BA40]&lt;=10;[.BA40]+2;IF([.BA40]=11;1;IF([.BA40]=12;2;IF([.BA40]=13;3;4))))" office:value-type="float" office:value="3" calcext:value-type="float">
            <text:p>03</text:p>
          </table:table-cell>
          <table:table-cell table:style-name="ce163" table:formula="of:=IF([.BA40]&gt;=11;[.BB40]+1;[.BB40])" office:value-type="float" office:value="2023" calcext:value-type="float">
            <text:p>2023</text:p>
          </table:table-cell>
          <table:table-cell table:style-name="ce162" table:formula="of:=IF([.BC40]&lt;=9;[.BC40]+3;IF([.BC40]=10;1;IF([.BC40]=11;2;IF([.BC40]=12;3;4))))" office:value-type="float" office:value="2" calcext:value-type="float">
            <text:p>02</text:p>
          </table:table-cell>
          <table:table-cell table:style-name="ce163" table:formula="of:=IF([.BC40]&gt;=10;[.BD40]+1;[.BD40])" office:value-type="float" office:value="2024" calcext:value-type="float">
            <text:p>2024</text:p>
          </table:table-cell>
          <table:table-cell table:style-name="ce166" table:formula="of:=DATE([.AZ41];[.AY41];[.$G$14])" office:value-type="date" office:date-value="2022-04-24" calcext:value-type="date">
            <text:p>24/04/2022</text:p>
          </table:table-cell>
          <table:table-cell table:style-name="ce166" table:formula="of:=[.$BE41]+IF(OR(WEEKDAY([.$BE41])=1;ISERROR(VLOOKUP([.$BE41];[$Factores.$A:.$A];1;0))=FALSE());1;IF(WEEKDAY([.$BE41])=7;2;0))" office:value-type="date" office:date-value="2022-04-25" calcext:value-type="date">
            <text:p>25/04/2022</text:p>
          </table:table-cell>
          <table:table-cell table:style-name="ce166" table:formula="of:=IF(AND(DAY([.$BE41])=27;WEEKDAY([.$BE41])=1);[.$BE41]-2;IF(AND(DAY([.$BE41])=27;WEEKDAY([.$BE41])=7);[.$BE41]-1;IF(AND(DAY([.$BE41])=26;WEEKDAY([.$BE41])=1);[.$BE41]-2;IF(AND(DAY([.$BE41])=26;WEEKDAY([.$BE41])=7);[.$BE41]-1;IF(DAY([.$BF41])=15;[.$BF41]+2;IF(DAY([.$BF41])=16;[.$BF41]+1;[.$BF41]))))))" office:value-type="date" office:date-value="2022-04-25" calcext:value-type="date">
            <text:p>25/04/2022</text:p>
          </table:table-cell>
          <table:table-cell table:style-name="ce119" table:number-columns-repeated="33"/>
          <table:table-cell table:style-name="ce119" table:formula="of:=[.CO40]+1" office:value-type="float" office:value="11" calcext:value-type="float">
            <text:p>11</text:p>
          </table:table-cell>
          <table:table-cell table:style-name="ce119"/>
          <table:table-cell table:style-name="ce187" table:formula="of:=[.CS40]+30" office:value-type="date" office:date-value="2022-04-24" calcext:value-type="date">
            <text:p>24/04/2022</text:p>
          </table:table-cell>
          <table:table-cell table:style-name="ce187" table:formula="of:=[.$CQ41]+IF(WEEKDAY([.$CQ41])=7;2;IF(WEEKDAY([.$CQ41])=1;1;0))" office:value-type="date" office:date-value="2022-04-25" calcext:value-type="date">
            <text:p>25/04/2022</text:p>
          </table:table-cell>
          <table:table-cell table:style-name="ce187" table:formula="of:=[.$CR41]+IF(AND(WEEKDAY([.$CR41])=6; ISERROR(VLOOKUP([.$CR41];[$Factores.$A:.$A];1;0))=FALSE());3;0)" office:value-type="date" office:date-value="2022-04-25" calcext:value-type="date">
            <text:p>25/04/2022</text:p>
          </table:table-cell>
          <table:table-cell table:style-name="ce187" table:formula="of:=IF(AND([.$CL$23]=3;[.$O$10]&gt;=[.$CO41]);[.$G$12];[.$CS41])" office:value-type="date" office:date-value="2022-04-25" calcext:value-type="date">
            <text:p>25/04/2022</text:p>
          </table:table-cell>
          <table:table-cell table:style-name="ce119"/>
          <table:table-cell table:style-name="ce190" table:formula="of:=IF([.$CN$23]=1;IF(AND([.$CL$23]=3;[.CT41]=[.CT40]);[.$CT41];[.AS41]);IF(AND([.$CN$23]=2;[.$CL$23]=3);[.CT41];[.CS41]))" office:value-type="date" office:date-value="2022-04-25" calcext:value-type="date">
            <text:p>25/04/2022</text:p>
          </table:table-cell>
          <table:table-cell table:style-name="ce119" table:formula="of:=([.CV41]-[.CV40])" office:value-type="float" office:value="32" calcext:value-type="float">
            <text:p>32</text:p>
          </table:table-cell>
          <table:table-cell table:style-name="ce119" table:formula="of:=IF([.CX39]=0;[.CW41];[.CW41]+[.CX40])" office:value-type="float" office:value="336" calcext:value-type="float">
            <text:p>336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1]+1" office:value-type="float" office:value="12" calcext:value-type="float">
            <text:p>12</text:p>
          </table:table-cell>
          <table:table-cell table:style-name="ce47" office:value-type="date" office:date-value="2022-05-24" calcext:value-type="date">
            <text:p>24/05/2022</text:p>
          </table:table-cell>
          <table:table-cell table:style-name="ce59" table:formula="of:=[.H41]-[.K42]" office:value-type="float" office:value="-23181.3133333333" calcext:value-type="float" table:number-columns-spanned="3" table:number-rows-spanned="1">
            <text:p><text:s/>(23,181.31)</text:p>
          </table:table-cell>
          <table:covered-table-cell table:number-columns-repeated="2" table:style-name="ce59"/>
          <table:table-cell table:style-name="ce75" office:value-type="float" office:value="467.53" calcext:value-type="float">
            <text:p><text:s/>467.53 </text:p>
          </table:table-cell>
          <table:table-cell table:style-name="ce59" office:value-type="float" office:value="148.97" calcext:value-type="float" table:number-columns-spanned="3" table:number-rows-spanned="1">
            <text:p><text:s/>148.97 </text:p>
          </table:table-cell>
          <table:covered-table-cell table:number-columns-repeated="2" table:style-name="ce59"/>
          <table:table-cell table:style-name="ce75"/>
          <table:table-cell table:style-name="ce75" table:formula="of:=[.K42]+[.L42]+[.O42]" office:value-type="float" office:value="616.5" calcext:value-type="float">
            <text:p><text:s/>616.50 </text:p>
          </table:table-cell>
          <table:table-cell table:style-name="ce75" table:formula="of:=TRUNC(((([.$P42])/(1-[.$M$14]))-([.$P42]));1)+(IF(MOD(((([.$P42])/(1-[.$M$14]))-([.$P42]))*100; 10)&gt;=5; 5; 0)/100)" office:value-type="float" office:value="0" calcext:value-type="float">
            <text:p><text:s/>- <text:s text:c="2"/></text:p>
          </table:table-cell>
          <table:table-cell table:style-name="ce97" table:formula="of:=[.Q42]+[.P42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6"/>
          <table:table-cell table:style-name="ce122"/>
          <table:table-cell table:style-name="ce124" table:formula="of:=[.AG41]+30" office:value-type="date" office:date-value="2022-05-19" calcext:value-type="date">
            <text:p>19/05/2022</text:p>
          </table:table-cell>
          <table:table-cell table:style-name="ce119" table:formula="of:=[.AH41]+1" office:value-type="float" office:value="12" calcext:value-type="float">
            <text:p>12</text:p>
          </table:table-cell>
          <table:table-cell table:style-name="ce127" table:formula="of:=1/POWER(1+[.$CC$32];IF([.$CL$23]=3;[.$CX42];[.$AO42]))" office:value-type="float" office:value="0.820822119978818" calcext:value-type="float">
            <text:p><text:s/>0.821 </text:p>
          </table:table-cell>
          <table:table-cell table:style-name="ce127" table:formula="of:=IF([.$AH42]&lt;=[.$CK$32];0;1/POWER(1+[.$CC$32];[.$CV42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2]=0;[.$AJ41]=0);0;[.$AI42])" office:value-type="string" office:string-value="" calcext:value-type="error">
            <text:p>#N/D</text:p>
          </table:table-cell>
          <table:table-cell table:style-name="ce130" table:formula="of:=IF([.$AV$28]=1;[.AW42];IF([.$AV$28]=2;[.AY42];IF([.$AV$28]=3;[.BA42];[.BC42])))" office:value-type="float" office:value="5" calcext:value-type="float">
            <text:p>05</text:p>
          </table:table-cell>
          <table:table-cell table:style-name="ce130" table:formula="of:=IF([.$AV$28]=1;[.AX42];IF([.$AV$28]=2;[.AZ42];IF([.$AV$28]=3;[.BB42];[.BD42])))" office:value-type="float" office:value="2022" calcext:value-type="float">
            <text:p>2022</text:p>
          </table:table-cell>
          <table:table-cell table:style-name="ce134" table:formula="of:=[.CV42]-[.CV41]" office:value-type="float" office:value="29" calcext:value-type="float">
            <text:p><text:s/>29 </text:p>
          </table:table-cell>
          <table:table-cell table:style-name="ce134" table:formula="of:=IF([.$CN$23]=2;[.CX42];[.CV42]-[.$G$12])" office:value-type="float" office:value="365" calcext:value-type="float">
            <text:p><text:s/>365 </text:p>
          </table:table-cell>
          <table:table-cell table:style-name="ce136" table:formula="of:=IF([.$AV$28]=1;&quot;&quot;;DATE([.AM43];[.AL43];1)-1)" office:value-type="date" office:date-value="2022-05-31" calcext:value-type="date">
            <text:p>31/05/2022</text:p>
          </table:table-cell>
          <table:table-cell table:style-name="ce136" table:formula="of:=IF(AND([.$CL$23]=3;[.$O$10]&gt;=[.$AH42]);[.$G$12];IF(AND([.$CL$23]=3;[.$CN$23]=2);[.AG42];IF([.$AV$28]=1;[.$AW42];IF([.$CN$23]=1;DATE([.AM42];[.AL42];[.$G$14]);IF([.$AV$28]=2;[.AS41]+30;IF([.$AV$28]=3;[.AS41]+60;[.AS41]+90))))))" office:value-type="date" office:date-value="2022-05-24" calcext:value-type="date">
            <text:p>24/05/2022</text:p>
          </table:table-cell>
          <table:table-cell table:style-name="ce140" table:formula="of:=[.$AQ42]+IF(AND(DAY([.$AQ42])=27;MONTH([.$AQ42])=7);3;IF(AND(WEEKDAY([.$AQ42])=5;ISERROR(VLOOKUP([.$AQ42]+1;[$Factores.$A:.$A];1;0))=FALSE());4;IF(OR(WEEKDAY([.$AQ42])=1;ISERROR(VLOOKUP([.$AQ42];[$Factores.$A:.$A];1;0))=FALSE());1;IF(WEEKDAY([.$AQ42])=7;2;0))))" office:value-type="date" office:date-value="2022-05-24" calcext:value-type="date">
            <text:p>24/05/2022</text:p>
          </table:table-cell>
          <table:table-cell table:style-name="ce140" office:value-type="date" office:date-value="2022-05-24" calcext:value-type="date">
            <text:p>24/05/2022</text:p>
          </table:table-cell>
          <table:table-cell table:style-name="ce126" table:formula="of:=[.P42]/POWER(1+[.$AT$26];[.AO42])" office:value-type="float" office:value="535.768575805134" calcext:value-type="float">
            <text:p><text:s/>535.77 </text:p>
          </table:table-cell>
          <table:table-cell table:style-name="ce148"/>
          <table:table-cell table:style-name="ce154"/>
          <table:table-cell table:style-name="ce136" office:value-type="date" office:date-value="2021-11-24" calcext:value-type="date">
            <text:p>24/11/2021</text:p>
          </table:table-cell>
          <table:table-cell table:style-name="ce155"/>
          <table:table-cell table:style-name="ce162" table:formula="of:=IF([.AY41]&lt;12;[.AY41]+1;[.AY41]+1-12)" office:value-type="float" office:value="5" calcext:value-type="float">
            <text:p>05</text:p>
          </table:table-cell>
          <table:table-cell table:style-name="ce163" table:formula="of:=IF([.AY41]=12;[.AZ41]+1;[.AZ41])" office:value-type="float" office:value="2022" calcext:value-type="float">
            <text:p>2022</text:p>
          </table:table-cell>
          <table:table-cell table:style-name="ce162" table:formula="of:=IF([.BA41]&lt;=10;[.BA41]+2;IF([.BA41]=11;1;IF([.BA41]=12;2;IF([.BA41]=13;3;4))))" office:value-type="float" office:value="5" calcext:value-type="float">
            <text:p>05</text:p>
          </table:table-cell>
          <table:table-cell table:style-name="ce163" table:formula="of:=IF([.BA41]&gt;=11;[.BB41]+1;[.BB41])" office:value-type="float" office:value="2023" calcext:value-type="float">
            <text:p>2023</text:p>
          </table:table-cell>
          <table:table-cell table:style-name="ce162" table:formula="of:=IF([.BC41]&lt;=9;[.BC41]+3;IF([.BC41]=10;1;IF([.BC41]=11;2;IF([.BC41]=12;3;4))))" office:value-type="float" office:value="5" calcext:value-type="float">
            <text:p>05</text:p>
          </table:table-cell>
          <table:table-cell table:style-name="ce163" table:formula="of:=IF([.BC41]&gt;=10;[.BD41]+1;[.BD41])" office:value-type="float" office:value="2024" calcext:value-type="float">
            <text:p>2024</text:p>
          </table:table-cell>
          <table:table-cell table:style-name="ce166" table:formula="of:=DATE([.AZ42];[.AY42];[.$G$14])" office:value-type="date" office:date-value="2022-05-24" calcext:value-type="date">
            <text:p>24/05/2022</text:p>
          </table:table-cell>
          <table:table-cell table:style-name="ce166" table:formula="of:=[.$BE42]+IF(OR(WEEKDAY([.$BE42])=1;ISERROR(VLOOKUP([.$BE42];[$Factores.$A:.$A];1;0))=FALSE());1;IF(WEEKDAY([.$BE42])=7;2;0))" office:value-type="date" office:date-value="2022-05-24" calcext:value-type="date">
            <text:p>24/05/2022</text:p>
          </table:table-cell>
          <table:table-cell table:style-name="ce166" table:formula="of:=IF(AND(DAY([.$BE42])=27;WEEKDAY([.$BE42])=1);[.$BE42]-2;IF(AND(DAY([.$BE42])=27;WEEKDAY([.$BE42])=7);[.$BE42]-1;IF(AND(DAY([.$BE42])=26;WEEKDAY([.$BE42])=1);[.$BE42]-2;IF(AND(DAY([.$BE42])=26;WEEKDAY([.$BE42])=7);[.$BE42]-1;IF(DAY([.$BF42])=15;[.$BF42]+2;IF(DAY([.$BF42])=16;[.$BF42]+1;[.$BF42]))))))" office:value-type="date" office:date-value="2022-05-24" calcext:value-type="date">
            <text:p>24/05/2022</text:p>
          </table:table-cell>
          <table:table-cell table:style-name="ce119" table:number-columns-repeated="33"/>
          <table:table-cell table:style-name="ce119" table:formula="of:=[.CO41]+1" office:value-type="float" office:value="12" calcext:value-type="float">
            <text:p>12</text:p>
          </table:table-cell>
          <table:table-cell table:style-name="ce119"/>
          <table:table-cell table:style-name="ce187" table:formula="of:=[.CS41]+30" office:value-type="date" office:date-value="2022-05-25" calcext:value-type="date">
            <text:p>25/05/2022</text:p>
          </table:table-cell>
          <table:table-cell table:style-name="ce187" table:formula="of:=[.$CQ42]+IF(WEEKDAY([.$CQ42])=7;2;IF(WEEKDAY([.$CQ42])=1;1;0))" office:value-type="date" office:date-value="2022-05-25" calcext:value-type="date">
            <text:p>25/05/2022</text:p>
          </table:table-cell>
          <table:table-cell table:style-name="ce187" table:formula="of:=[.$CR42]+IF(AND(WEEKDAY([.$CR42])=6; ISERROR(VLOOKUP([.$CR42];[$Factores.$A:.$A];1;0))=FALSE());3;0)" office:value-type="date" office:date-value="2022-05-25" calcext:value-type="date">
            <text:p>25/05/2022</text:p>
          </table:table-cell>
          <table:table-cell table:style-name="ce187" table:formula="of:=IF(AND([.$CL$23]=3;[.$O$10]&gt;=[.$CO42]);[.$G$12];[.$CS42])" office:value-type="date" office:date-value="2022-05-25" calcext:value-type="date">
            <text:p>25/05/2022</text:p>
          </table:table-cell>
          <table:table-cell table:style-name="ce119"/>
          <table:table-cell table:style-name="ce190" table:formula="of:=IF([.$CN$23]=1;IF(AND([.$CL$23]=3;[.CT42]=[.CT41]);[.$CT42];[.AS42]);IF(AND([.$CN$23]=2;[.$CL$23]=3);[.CT42];[.CS42]))" office:value-type="date" office:date-value="2022-05-24" calcext:value-type="date">
            <text:p>24/05/2022</text:p>
          </table:table-cell>
          <table:table-cell table:style-name="ce119" table:formula="of:=([.CV42]-[.CV41])" office:value-type="float" office:value="29" calcext:value-type="float">
            <text:p>29</text:p>
          </table:table-cell>
          <table:table-cell table:style-name="ce119" table:formula="of:=IF([.CX40]=0;[.CW42];[.CW42]+[.CX41])" office:value-type="float" office:value="365" calcext:value-type="float">
            <text:p>365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2]+1" office:value-type="float" office:value="13" calcext:value-type="float">
            <text:p>13</text:p>
          </table:table-cell>
          <table:table-cell table:style-name="ce47" office:value-type="date" office:date-value="2022-06-24" calcext:value-type="date">
            <text:p>24/06/2022</text:p>
          </table:table-cell>
          <table:table-cell table:style-name="ce59" table:formula="of:=[.H42]-[.K43]" office:value-type="float" office:value="-23644.1133333333" calcext:value-type="float" table:number-columns-spanned="3" table:number-rows-spanned="1">
            <text:p><text:s/>(23,644.11)</text:p>
          </table:table-cell>
          <table:covered-table-cell table:number-columns-repeated="2" table:style-name="ce59"/>
          <table:table-cell table:style-name="ce75" office:value-type="float" office:value="462.8" calcext:value-type="float">
            <text:p><text:s/>462.80 </text:p>
          </table:table-cell>
          <table:table-cell table:style-name="ce59" office:value-type="float" office:value="153.7" calcext:value-type="float" table:number-columns-spanned="3" table:number-rows-spanned="1">
            <text:p><text:s/>153.70 </text:p>
          </table:table-cell>
          <table:covered-table-cell table:number-columns-repeated="2" table:style-name="ce59"/>
          <table:table-cell table:style-name="ce75"/>
          <table:table-cell table:style-name="ce75" table:formula="of:=[.K43]+[.L43]+[.O43]" office:value-type="float" office:value="616.5" calcext:value-type="float">
            <text:p><text:s/>616.50 </text:p>
          </table:table-cell>
          <table:table-cell table:style-name="ce75" table:formula="of:=TRUNC(((([.$P43])/(1-[.$M$14]))-([.$P43]));1)+(IF(MOD(((([.$P43])/(1-[.$M$14]))-([.$P43]))*100; 10)&gt;=5; 5; 0)/100)" office:value-type="float" office:value="0" calcext:value-type="float">
            <text:p><text:s/>- <text:s text:c="2"/></text:p>
          </table:table-cell>
          <table:table-cell table:style-name="ce97" table:formula="of:=[.Q43]+[.P43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7"/>
          <table:table-cell table:style-name="ce124" table:formula="of:=[.AG42]+30" office:value-type="date" office:date-value="2022-06-18" calcext:value-type="date">
            <text:p>18/06/2022</text:p>
          </table:table-cell>
          <table:table-cell table:style-name="ce119" table:formula="of:=[.AH42]+1" office:value-type="float" office:value="13" calcext:value-type="float">
            <text:p>13</text:p>
          </table:table-cell>
          <table:table-cell table:style-name="ce127" table:formula="of:=1/POWER(1+[.$CC$32];IF([.$CL$23]=3;[.$CX43];[.$AO43]))" office:value-type="float" office:value="0.807172011205446" calcext:value-type="float">
            <text:p><text:s/>0.807 </text:p>
          </table:table-cell>
          <table:table-cell table:style-name="ce127" table:formula="of:=IF([.$AH43]&lt;=[.$CK$32];0;1/POWER(1+[.$CC$32];[.$CV43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3]=0;[.$AJ42]=0);0;[.$AI43])" office:value-type="string" office:string-value="" calcext:value-type="error">
            <text:p>#N/D</text:p>
          </table:table-cell>
          <table:table-cell table:style-name="ce130" table:formula="of:=IF([.$AV$28]=1;[.AW43];IF([.$AV$28]=2;[.AY43];IF([.$AV$28]=3;[.BA43];[.BC43])))" office:value-type="float" office:value="6" calcext:value-type="float">
            <text:p>06</text:p>
          </table:table-cell>
          <table:table-cell table:style-name="ce130" table:formula="of:=IF([.$AV$28]=1;[.AX43];IF([.$AV$28]=2;[.AZ43];IF([.$AV$28]=3;[.BB43];[.BD43])))" office:value-type="float" office:value="2022" calcext:value-type="float">
            <text:p>2022</text:p>
          </table:table-cell>
          <table:table-cell table:style-name="ce134" table:formula="of:=[.CV43]-[.CV42]" office:value-type="float" office:value="31" calcext:value-type="float">
            <text:p><text:s/>31 </text:p>
          </table:table-cell>
          <table:table-cell table:style-name="ce134" table:formula="of:=IF([.$CN$23]=2;[.CX43];[.CV43]-[.$G$12])" office:value-type="float" office:value="396" calcext:value-type="float">
            <text:p><text:s/>396 </text:p>
          </table:table-cell>
          <table:table-cell table:style-name="ce136" table:formula="of:=IF([.$AV$28]=1;&quot;&quot;;DATE([.AM44];[.AL44];1)-1)" office:value-type="date" office:date-value="2022-06-30" calcext:value-type="date">
            <text:p>30/06/2022</text:p>
          </table:table-cell>
          <table:table-cell table:style-name="ce136" table:formula="of:=IF(AND([.$CL$23]=3;[.$O$10]&gt;=[.$AH43]);[.$G$12];IF(AND([.$CL$23]=3;[.$CN$23]=2);[.AG43];IF([.$AV$28]=1;[.$AW43];IF([.$CN$23]=1;DATE([.AM43];[.AL43];[.$G$14]);IF([.$AV$28]=2;[.AS42]+30;IF([.$AV$28]=3;[.AS42]+60;[.AS42]+90))))))" office:value-type="date" office:date-value="2022-06-24" calcext:value-type="date">
            <text:p>24/06/2022</text:p>
          </table:table-cell>
          <table:table-cell table:style-name="ce140" table:formula="of:=[.$AQ43]+IF(AND(DAY([.$AQ43])=27;MONTH([.$AQ43])=7);3;IF(AND(WEEKDAY([.$AQ43])=5;ISERROR(VLOOKUP([.$AQ43]+1;[$Factores.$A:.$A];1;0))=FALSE());4;IF(OR(WEEKDAY([.$AQ43])=1;ISERROR(VLOOKUP([.$AQ43];[$Factores.$A:.$A];1;0))=FALSE());1;IF(WEEKDAY([.$AQ43])=7;2;0))))" office:value-type="date" office:date-value="2022-06-24" calcext:value-type="date">
            <text:p>24/06/2022</text:p>
          </table:table-cell>
          <table:table-cell table:style-name="ce140" office:value-type="date" office:date-value="2022-06-24" calcext:value-type="date">
            <text:p>24/06/2022</text:p>
          </table:table-cell>
          <table:table-cell table:style-name="ce126" table:formula="of:=[.P43]/POWER(1+[.$AT$26];[.AO43])" office:value-type="float" office:value="529.419783265357" calcext:value-type="float">
            <text:p><text:s/>529.42 </text:p>
          </table:table-cell>
          <table:table-cell table:style-name="ce148"/>
          <table:table-cell table:style-name="ce154"/>
          <table:table-cell table:style-name="ce136" table:formula="of:=[.AW42]+15" office:value-type="date" office:date-value="2021-12-09" calcext:value-type="date">
            <text:p>09/12/2021</text:p>
          </table:table-cell>
          <table:table-cell table:style-name="ce155"/>
          <table:table-cell table:style-name="ce162" table:formula="of:=IF([.AY42]&lt;12;[.AY42]+1;[.AY42]+1-12)" office:value-type="float" office:value="6" calcext:value-type="float">
            <text:p>06</text:p>
          </table:table-cell>
          <table:table-cell table:style-name="ce163" table:formula="of:=IF([.AY42]=12;[.AZ42]+1;[.AZ42])" office:value-type="float" office:value="2022" calcext:value-type="float">
            <text:p>2022</text:p>
          </table:table-cell>
          <table:table-cell table:style-name="ce162" table:formula="of:=IF([.BA42]&lt;=10;[.BA42]+2;IF([.BA42]=11;1;IF([.BA42]=12;2;IF([.BA42]=13;3;4))))" office:value-type="float" office:value="7" calcext:value-type="float">
            <text:p>07</text:p>
          </table:table-cell>
          <table:table-cell table:style-name="ce163" table:formula="of:=IF([.BA42]&gt;=11;[.BB42]+1;[.BB42])" office:value-type="float" office:value="2023" calcext:value-type="float">
            <text:p>2023</text:p>
          </table:table-cell>
          <table:table-cell table:style-name="ce162" table:formula="of:=IF([.BC42]&lt;=9;[.BC42]+3;IF([.BC42]=10;1;IF([.BC42]=11;2;IF([.BC42]=12;3;4))))" office:value-type="float" office:value="8" calcext:value-type="float">
            <text:p>08</text:p>
          </table:table-cell>
          <table:table-cell table:style-name="ce163" table:formula="of:=IF([.BC42]&gt;=10;[.BD42]+1;[.BD42])" office:value-type="float" office:value="2024" calcext:value-type="float">
            <text:p>2024</text:p>
          </table:table-cell>
          <table:table-cell table:style-name="ce166" table:formula="of:=DATE([.AZ43];[.AY43];[.$G$14])" office:value-type="date" office:date-value="2022-06-24" calcext:value-type="date">
            <text:p>24/06/2022</text:p>
          </table:table-cell>
          <table:table-cell table:style-name="ce166" table:formula="of:=[.$BE43]+IF(OR(WEEKDAY([.$BE43])=1;ISERROR(VLOOKUP([.$BE43];[$Factores.$A:.$A];1;0))=FALSE());1;IF(WEEKDAY([.$BE43])=7;2;0))" office:value-type="date" office:date-value="2022-06-24" calcext:value-type="date">
            <text:p>24/06/2022</text:p>
          </table:table-cell>
          <table:table-cell table:style-name="ce166" table:formula="of:=IF(AND(DAY([.$BE43])=27;WEEKDAY([.$BE43])=1);[.$BE43]-2;IF(AND(DAY([.$BE43])=27;WEEKDAY([.$BE43])=7);[.$BE43]-1;IF(AND(DAY([.$BE43])=26;WEEKDAY([.$BE43])=1);[.$BE43]-2;IF(AND(DAY([.$BE43])=26;WEEKDAY([.$BE43])=7);[.$BE43]-1;IF(DAY([.$BF43])=15;[.$BF43]+2;IF(DAY([.$BF43])=16;[.$BF43]+1;[.$BF43]))))))" office:value-type="date" office:date-value="2022-06-24" calcext:value-type="date">
            <text:p>24/06/2022</text:p>
          </table:table-cell>
          <table:table-cell table:style-name="ce119" table:number-columns-repeated="33"/>
          <table:table-cell table:style-name="ce119" table:formula="of:=[.CO42]+1" office:value-type="float" office:value="13" calcext:value-type="float">
            <text:p>13</text:p>
          </table:table-cell>
          <table:table-cell table:style-name="ce119"/>
          <table:table-cell table:style-name="ce187" table:formula="of:=[.CS42]+30" office:value-type="date" office:date-value="2022-06-24" calcext:value-type="date">
            <text:p>24/06/2022</text:p>
          </table:table-cell>
          <table:table-cell table:style-name="ce187" table:formula="of:=[.$CQ43]+IF(WEEKDAY([.$CQ43])=7;2;IF(WEEKDAY([.$CQ43])=1;1;0))" office:value-type="date" office:date-value="2022-06-24" calcext:value-type="date">
            <text:p>24/06/2022</text:p>
          </table:table-cell>
          <table:table-cell table:style-name="ce187" table:formula="of:=[.$CR43]+IF(AND(WEEKDAY([.$CR43])=6; ISERROR(VLOOKUP([.$CR43];[$Factores.$A:.$A];1;0))=FALSE());3;0)" office:value-type="date" office:date-value="2022-06-24" calcext:value-type="date">
            <text:p>24/06/2022</text:p>
          </table:table-cell>
          <table:table-cell table:style-name="ce187" table:formula="of:=IF(AND([.$CL$23]=3;[.$O$10]&gt;=[.$CO43]);[.$G$12];[.$CS43])" office:value-type="date" office:date-value="2022-06-24" calcext:value-type="date">
            <text:p>24/06/2022</text:p>
          </table:table-cell>
          <table:table-cell table:style-name="ce119"/>
          <table:table-cell table:style-name="ce190" table:formula="of:=IF([.$CN$23]=1;IF(AND([.$CL$23]=3;[.CT43]=[.CT42]);[.$CT43];[.AS43]);IF(AND([.$CN$23]=2;[.$CL$23]=3);[.CT43];[.CS43]))" office:value-type="date" office:date-value="2022-06-24" calcext:value-type="date">
            <text:p>24/06/2022</text:p>
          </table:table-cell>
          <table:table-cell table:style-name="ce119" table:formula="of:=([.CV43]-[.CV42])" office:value-type="float" office:value="31" calcext:value-type="float">
            <text:p>31</text:p>
          </table:table-cell>
          <table:table-cell table:style-name="ce119" table:formula="of:=IF([.CX41]=0;[.CW43];[.CW43]+[.CX42])" office:value-type="float" office:value="396" calcext:value-type="float">
            <text:p>396</text:p>
          </table:table-cell>
          <table:table-cell table:style-name="ce119" table:number-columns-repeated="16282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3]+1" office:value-type="float" office:value="14" calcext:value-type="float">
            <text:p>14</text:p>
          </table:table-cell>
          <table:table-cell table:style-name="ce47" office:value-type="date" office:date-value="2022-07-25" calcext:value-type="date">
            <text:p>25/07/2022</text:p>
          </table:table-cell>
          <table:table-cell table:style-name="ce59" table:formula="of:=[.H43]-[.K44]" office:value-type="float" office:value="-24112.4533333333" calcext:value-type="float" table:number-columns-spanned="3" table:number-rows-spanned="1">
            <text:p><text:s/>(24,112.45)</text:p>
          </table:table-cell>
          <table:covered-table-cell table:number-columns-repeated="2" table:style-name="ce59"/>
          <table:table-cell table:style-name="ce75" office:value-type="float" office:value="468.34" calcext:value-type="float">
            <text:p><text:s/>468.34 </text:p>
          </table:table-cell>
          <table:table-cell table:style-name="ce59" office:value-type="float" office:value="148.16" calcext:value-type="float" table:number-columns-spanned="3" table:number-rows-spanned="1">
            <text:p><text:s/>148.16 </text:p>
          </table:table-cell>
          <table:covered-table-cell table:number-columns-repeated="2" table:style-name="ce59"/>
          <table:table-cell table:style-name="ce75"/>
          <table:table-cell table:style-name="ce75" table:formula="of:=[.K44]+[.L44]+[.O44]" office:value-type="float" office:value="616.5" calcext:value-type="float">
            <text:p><text:s/>616.50 </text:p>
          </table:table-cell>
          <table:table-cell table:style-name="ce75" table:formula="of:=TRUNC(((([.$P44])/(1-[.$M$14]))-([.$P44]));1)+(IF(MOD(((([.$P44])/(1-[.$M$14]))-([.$P44]))*100; 10)&gt;=5; 5; 0)/100)" office:value-type="float" office:value="0" calcext:value-type="float">
            <text:p><text:s/>- <text:s text:c="2"/></text:p>
          </table:table-cell>
          <table:table-cell table:style-name="ce97" table:formula="of:=[.Q44]+[.P44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7"/>
          <table:table-cell table:style-name="ce124" table:formula="of:=[.AG43]+30" office:value-type="date" office:date-value="2022-07-18" calcext:value-type="date">
            <text:p>18/07/2022</text:p>
          </table:table-cell>
          <table:table-cell table:style-name="ce119" table:formula="of:=[.AH43]+1" office:value-type="float" office:value="14" calcext:value-type="float">
            <text:p>14</text:p>
          </table:table-cell>
          <table:table-cell table:style-name="ce127" table:formula="of:=1/POWER(1+[.$CC$32];IF([.$CL$23]=3;[.$CX44];[.$AO44]))" office:value-type="float" office:value="0.793748901028956" calcext:value-type="float">
            <text:p><text:s/>0.794 </text:p>
          </table:table-cell>
          <table:table-cell table:style-name="ce127" table:formula="of:=IF([.$AH44]&lt;=[.$CK$32];0;1/POWER(1+[.$CC$32];[.$CV44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4]=0;[.$AJ43]=0);0;[.$AI44])" office:value-type="string" office:string-value="" calcext:value-type="error">
            <text:p>#N/D</text:p>
          </table:table-cell>
          <table:table-cell table:style-name="ce130" table:formula="of:=IF([.$AV$28]=1;[.AW44];IF([.$AV$28]=2;[.AY44];IF([.$AV$28]=3;[.BA44];[.BC44])))" office:value-type="float" office:value="7" calcext:value-type="float">
            <text:p>07</text:p>
          </table:table-cell>
          <table:table-cell table:style-name="ce130" table:formula="of:=IF([.$AV$28]=1;[.AX44];IF([.$AV$28]=2;[.AZ44];IF([.$AV$28]=3;[.BB44];[.BD44])))" office:value-type="float" office:value="2022" calcext:value-type="float">
            <text:p>2022</text:p>
          </table:table-cell>
          <table:table-cell table:style-name="ce134" table:formula="of:=[.CV44]-[.CV43]" office:value-type="float" office:value="31" calcext:value-type="float">
            <text:p><text:s/>31 </text:p>
          </table:table-cell>
          <table:table-cell table:style-name="ce134" table:formula="of:=IF([.$CN$23]=2;[.CX44];[.CV44]-[.$G$12])" office:value-type="float" office:value="427" calcext:value-type="float">
            <text:p><text:s/>427 </text:p>
          </table:table-cell>
          <table:table-cell table:style-name="ce136" table:formula="of:=IF([.$AV$28]=1;&quot;&quot;;DATE([.AM45];[.AL45];1)-1)" office:value-type="date" office:date-value="2022-07-31" calcext:value-type="date">
            <text:p>31/07/2022</text:p>
          </table:table-cell>
          <table:table-cell table:style-name="ce136" table:formula="of:=IF(AND([.$CL$23]=3;[.$O$10]&gt;=[.$AH44]);[.$G$12];IF(AND([.$CL$23]=3;[.$CN$23]=2);[.AG44];IF([.$AV$28]=1;[.$AW44];IF([.$CN$23]=1;DATE([.AM44];[.AL44];[.$G$14]);IF([.$AV$28]=2;[.AS43]+30;IF([.$AV$28]=3;[.AS43]+60;[.AS43]+90))))))" office:value-type="date" office:date-value="2022-07-24" calcext:value-type="date">
            <text:p>24/07/2022</text:p>
          </table:table-cell>
          <table:table-cell table:style-name="ce140" table:formula="of:=[.$AQ44]+IF(AND(DAY([.$AQ44])=27;MONTH([.$AQ44])=7);3;IF(AND(WEEKDAY([.$AQ44])=5;ISERROR(VLOOKUP([.$AQ44]+1;[$Factores.$A:.$A];1;0))=FALSE());4;IF(OR(WEEKDAY([.$AQ44])=1;ISERROR(VLOOKUP([.$AQ44];[$Factores.$A:.$A];1;0))=FALSE());1;IF(WEEKDAY([.$AQ44])=7;2;0))))" office:value-type="date" office:date-value="2022-07-25" calcext:value-type="date">
            <text:p>25/07/2022</text:p>
          </table:table-cell>
          <table:table-cell table:style-name="ce140" office:value-type="date" office:date-value="2022-07-25" calcext:value-type="date">
            <text:p>25/07/2022</text:p>
          </table:table-cell>
          <table:table-cell table:style-name="ce126" table:formula="of:=[.P44]/POWER(1+[.$AT$26];[.AO44])" office:value-type="float" office:value="523.146223145944" calcext:value-type="float">
            <text:p><text:s/>523.15 </text:p>
          </table:table-cell>
          <table:table-cell table:style-name="ce148"/>
          <table:table-cell table:style-name="ce154"/>
          <table:table-cell table:style-name="ce136" office:value-type="date" office:date-value="2021-12-24" calcext:value-type="date">
            <text:p>24/12/2021</text:p>
          </table:table-cell>
          <table:table-cell table:style-name="ce155"/>
          <table:table-cell table:style-name="ce162" table:formula="of:=IF([.AY43]&lt;12;[.AY43]+1;[.AY43]+1-12)" office:value-type="float" office:value="7" calcext:value-type="float">
            <text:p>07</text:p>
          </table:table-cell>
          <table:table-cell table:style-name="ce163" table:formula="of:=IF([.AY43]=12;[.AZ43]+1;[.AZ43])" office:value-type="float" office:value="2022" calcext:value-type="float">
            <text:p>2022</text:p>
          </table:table-cell>
          <table:table-cell table:style-name="ce162" table:formula="of:=IF([.BA43]&lt;=10;[.BA43]+2;IF([.BA43]=11;1;IF([.BA43]=12;2;IF([.BA43]=13;3;4))))" office:value-type="float" office:value="9" calcext:value-type="float">
            <text:p>09</text:p>
          </table:table-cell>
          <table:table-cell table:style-name="ce163" table:formula="of:=IF([.BA43]&gt;=11;[.BB43]+1;[.BB43])" office:value-type="float" office:value="2023" calcext:value-type="float">
            <text:p>2023</text:p>
          </table:table-cell>
          <table:table-cell table:style-name="ce162" table:formula="of:=IF([.BC43]&lt;=9;[.BC43]+3;IF([.BC43]=10;1;IF([.BC43]=11;2;IF([.BC43]=12;3;4))))" office:value-type="float" office:value="11" calcext:value-type="float">
            <text:p>11</text:p>
          </table:table-cell>
          <table:table-cell table:style-name="ce163" table:formula="of:=IF([.BC43]&gt;=10;[.BD43]+1;[.BD43])" office:value-type="float" office:value="2024" calcext:value-type="float">
            <text:p>2024</text:p>
          </table:table-cell>
          <table:table-cell table:style-name="ce166" table:formula="of:=DATE([.AZ44];[.AY44];[.$G$14])" office:value-type="date" office:date-value="2022-07-24" calcext:value-type="date">
            <text:p>24/07/2022</text:p>
          </table:table-cell>
          <table:table-cell table:style-name="ce166" table:formula="of:=[.$BE44]+IF(OR(WEEKDAY([.$BE44])=1;ISERROR(VLOOKUP([.$BE44];[$Factores.$A:.$A];1;0))=FALSE());1;IF(WEEKDAY([.$BE44])=7;2;0))" office:value-type="date" office:date-value="2022-07-25" calcext:value-type="date">
            <text:p>25/07/2022</text:p>
          </table:table-cell>
          <table:table-cell table:style-name="ce166" table:formula="of:=IF(AND(DAY([.$BE44])=27;WEEKDAY([.$BE44])=1);[.$BE44]-2;IF(AND(DAY([.$BE44])=27;WEEKDAY([.$BE44])=7);[.$BE44]-1;IF(AND(DAY([.$BE44])=26;WEEKDAY([.$BE44])=1);[.$BE44]-2;IF(AND(DAY([.$BE44])=26;WEEKDAY([.$BE44])=7);[.$BE44]-1;IF(DAY([.$BF44])=15;[.$BF44]+2;IF(DAY([.$BF44])=16;[.$BF44]+1;[.$BF44]))))))" office:value-type="date" office:date-value="2022-07-25" calcext:value-type="date">
            <text:p>25/07/2022</text:p>
          </table:table-cell>
          <table:table-cell table:style-name="ce119" table:number-columns-repeated="33"/>
          <table:table-cell table:style-name="ce119" table:formula="of:=[.CO43]+1" office:value-type="float" office:value="14" calcext:value-type="float">
            <text:p>14</text:p>
          </table:table-cell>
          <table:table-cell table:style-name="ce119"/>
          <table:table-cell table:style-name="ce187" table:formula="of:=[.CS43]+30" office:value-type="date" office:date-value="2022-07-24" calcext:value-type="date">
            <text:p>24/07/2022</text:p>
          </table:table-cell>
          <table:table-cell table:style-name="ce187" table:formula="of:=[.$CQ44]+IF(WEEKDAY([.$CQ44])=7;2;IF(WEEKDAY([.$CQ44])=1;1;0))" office:value-type="date" office:date-value="2022-07-25" calcext:value-type="date">
            <text:p>25/07/2022</text:p>
          </table:table-cell>
          <table:table-cell table:style-name="ce187" table:formula="of:=[.$CR44]+IF(AND(WEEKDAY([.$CR44])=6; ISERROR(VLOOKUP([.$CR44];[$Factores.$A:.$A];1;0))=FALSE());3;0)" office:value-type="date" office:date-value="2022-07-25" calcext:value-type="date">
            <text:p>25/07/2022</text:p>
          </table:table-cell>
          <table:table-cell table:style-name="ce187" table:formula="of:=IF(AND([.$CL$23]=3;[.$O$10]&gt;=[.$CO44]);[.$G$12];[.$CS44])" office:value-type="date" office:date-value="2022-07-25" calcext:value-type="date">
            <text:p>25/07/2022</text:p>
          </table:table-cell>
          <table:table-cell table:style-name="ce119"/>
          <table:table-cell table:style-name="ce190" table:formula="of:=IF([.$CN$23]=1;IF(AND([.$CL$23]=3;[.CT44]=[.CT43]);[.$CT44];[.AS44]);IF(AND([.$CN$23]=2;[.$CL$23]=3);[.CT44];[.CS44]))" office:value-type="date" office:date-value="2022-07-25" calcext:value-type="date">
            <text:p>25/07/2022</text:p>
          </table:table-cell>
          <table:table-cell table:style-name="ce119" table:number-columns-repeated="16284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4]+1" office:value-type="float" office:value="15" calcext:value-type="float">
            <text:p>15</text:p>
          </table:table-cell>
          <table:table-cell table:style-name="ce48" office:value-type="date" office:date-value="2022-08-24" calcext:value-type="date">
            <text:p>24/08/2022</text:p>
          </table:table-cell>
          <table:table-cell table:style-name="ce59" table:formula="of:=[.H44]-[.K45]" office:value-type="float" office:value="-24591.0333333333" calcext:value-type="float" table:number-columns-spanned="3" table:number-rows-spanned="1">
            <text:p><text:s/>(24,591.03)</text:p>
          </table:table-cell>
          <table:covered-table-cell table:number-columns-repeated="2" table:style-name="ce59"/>
          <table:table-cell table:style-name="ce75" office:value-type="float" office:value="478.58" calcext:value-type="float">
            <text:p><text:s/>478.58 </text:p>
          </table:table-cell>
          <table:table-cell table:style-name="ce59" office:value-type="float" office:value="137.92" calcext:value-type="float" table:number-columns-spanned="3" table:number-rows-spanned="1">
            <text:p><text:s/>137.92 </text:p>
          </table:table-cell>
          <table:covered-table-cell table:number-columns-repeated="2" table:style-name="ce59"/>
          <table:table-cell table:style-name="ce75"/>
          <table:table-cell table:style-name="ce75" table:formula="of:=[.K45]+[.L45]+[.O45]" office:value-type="float" office:value="616.5" calcext:value-type="float">
            <text:p><text:s/>616.50 </text:p>
          </table:table-cell>
          <table:table-cell table:style-name="ce75" table:formula="of:=TRUNC(((([.$P45])/(1-[.$M$14]))-([.$P45]));1)+(IF(MOD(((([.$P45])/(1-[.$M$14]))-([.$P45]))*100; 10)&gt;=5; 5; 0)/100)" office:value-type="float" office:value="0" calcext:value-type="float">
            <text:p><text:s/>- <text:s text:c="2"/></text:p>
          </table:table-cell>
          <table:table-cell table:style-name="ce97" table:formula="of:=[.Q45]+[.P45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7"/>
          <table:table-cell table:style-name="ce124" table:formula="of:=[.AG44]+30" office:value-type="date" office:date-value="2022-08-17" calcext:value-type="date">
            <text:p>17/08/2022</text:p>
          </table:table-cell>
          <table:table-cell table:style-name="ce119" table:formula="of:=[.AH44]+1" office:value-type="float" office:value="15" calcext:value-type="float">
            <text:p>15</text:p>
          </table:table-cell>
          <table:table-cell table:style-name="ce127" table:formula="of:=1/POWER(1+[.$CC$32];IF([.$CL$23]=3;[.$CX45];[.$AO45]))" office:value-type="float" office:value="0.780971371227917" calcext:value-type="float">
            <text:p><text:s/>0.781 </text:p>
          </table:table-cell>
          <table:table-cell table:style-name="ce127" table:formula="of:=IF([.$AH45]&lt;=[.$CK$32];0;1/POWER(1+[.$CC$32];[.$CV45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5]=0;[.$AJ44]=0);0;[.$AI45])" office:value-type="string" office:string-value="" calcext:value-type="error">
            <text:p>#N/D</text:p>
          </table:table-cell>
          <table:table-cell table:style-name="ce130" table:formula="of:=IF([.$AV$28]=1;[.AW45];IF([.$AV$28]=2;[.AY45];IF([.$AV$28]=3;[.BA45];[.BC45])))" office:value-type="float" office:value="8" calcext:value-type="float">
            <text:p>08</text:p>
          </table:table-cell>
          <table:table-cell table:style-name="ce130" table:formula="of:=IF([.$AV$28]=1;[.AX45];IF([.$AV$28]=2;[.AZ45];IF([.$AV$28]=3;[.BB45];[.BD45])))" office:value-type="float" office:value="2022" calcext:value-type="float">
            <text:p>2022</text:p>
          </table:table-cell>
          <table:table-cell table:style-name="ce134" table:formula="of:=[.CV45]-[.CV44]" office:value-type="float" office:value="30" calcext:value-type="float">
            <text:p><text:s/>30 </text:p>
          </table:table-cell>
          <table:table-cell table:style-name="ce134" table:formula="of:=IF([.$CN$23]=2;[.CX45];[.CV45]-[.$G$12])" office:value-type="float" office:value="457" calcext:value-type="float">
            <text:p><text:s/>457 </text:p>
          </table:table-cell>
          <table:table-cell table:style-name="ce136" table:formula="of:=IF([.$AV$28]=1;&quot;&quot;;DATE([.AM46];[.AL46];1)-1)" office:value-type="date" office:date-value="2022-08-31" calcext:value-type="date">
            <text:p>31/08/2022</text:p>
          </table:table-cell>
          <table:table-cell table:style-name="ce136" table:formula="of:=IF(AND([.$CL$23]=3;[.$O$10]&gt;=[.$AH45]);[.$G$12];IF(AND([.$CL$23]=3;[.$CN$23]=2);[.AG45];IF([.$AV$28]=1;[.$AW45];IF([.$CN$23]=1;DATE([.AM45];[.AL45];[.$G$14]);IF([.$AV$28]=2;[.AS44]+30;IF([.$AV$28]=3;[.AS44]+60;[.AS44]+90))))))" office:value-type="date" office:date-value="2022-08-24" calcext:value-type="date">
            <text:p>24/08/2022</text:p>
          </table:table-cell>
          <table:table-cell table:style-name="ce140" table:formula="of:=[.$AQ45]+IF(AND(DAY([.$AQ45])=27;MONTH([.$AQ45])=7);3;IF(AND(WEEKDAY([.$AQ45])=5;ISERROR(VLOOKUP([.$AQ45]+1;[$Factores.$A:.$A];1;0))=FALSE());4;IF(OR(WEEKDAY([.$AQ45])=1;ISERROR(VLOOKUP([.$AQ45];[$Factores.$A:.$A];1;0))=FALSE());1;IF(WEEKDAY([.$AQ45])=7;2;0))))" office:value-type="date" office:date-value="2022-08-24" calcext:value-type="date">
            <text:p>24/08/2022</text:p>
          </table:table-cell>
          <table:table-cell table:style-name="ce140" office:value-type="date" office:date-value="2022-08-24" calcext:value-type="date">
            <text:p>24/08/2022</text:p>
          </table:table-cell>
          <table:table-cell table:style-name="ce126" table:formula="of:=[.P45]/POWER(1+[.$AT$26];[.AO45])" office:value-type="float" office:value="517.145827443002" calcext:value-type="float">
            <text:p><text:s/>517.15 </text:p>
          </table:table-cell>
          <table:table-cell table:style-name="ce148"/>
          <table:table-cell table:style-name="ce154"/>
          <table:table-cell table:style-name="ce136" table:formula="of:=[.AW44]+15" office:value-type="date" office:date-value="2022-01-08" calcext:value-type="date">
            <text:p>08/01/2022</text:p>
          </table:table-cell>
          <table:table-cell table:style-name="ce155"/>
          <table:table-cell table:style-name="ce162" table:formula="of:=IF([.AY44]&lt;12;[.AY44]+1;[.AY44]+1-12)" office:value-type="float" office:value="8" calcext:value-type="float">
            <text:p>08</text:p>
          </table:table-cell>
          <table:table-cell table:style-name="ce163" table:formula="of:=IF([.AY44]=12;[.AZ44]+1;[.AZ44])" office:value-type="float" office:value="2022" calcext:value-type="float">
            <text:p>2022</text:p>
          </table:table-cell>
          <table:table-cell table:style-name="ce162" table:formula="of:=IF([.BA44]&lt;=10;[.BA44]+2;IF([.BA44]=11;1;IF([.BA44]=12;2;IF([.BA44]=13;3;4))))" office:value-type="float" office:value="11" calcext:value-type="float">
            <text:p>11</text:p>
          </table:table-cell>
          <table:table-cell table:style-name="ce163" table:formula="of:=IF([.BA44]&gt;=11;[.BB44]+1;[.BB44])" office:value-type="float" office:value="2023" calcext:value-type="float">
            <text:p>2023</text:p>
          </table:table-cell>
          <table:table-cell table:style-name="ce162" table:formula="of:=IF([.BC44]&lt;=9;[.BC44]+3;IF([.BC44]=10;1;IF([.BC44]=11;2;IF([.BC44]=12;3;4))))" office:value-type="float" office:value="2" calcext:value-type="float">
            <text:p>02</text:p>
          </table:table-cell>
          <table:table-cell table:style-name="ce163" table:formula="of:=IF([.BC44]&gt;=10;[.BD44]+1;[.BD44])" office:value-type="float" office:value="2025" calcext:value-type="float">
            <text:p>2025</text:p>
          </table:table-cell>
          <table:table-cell table:style-name="ce166" table:formula="of:=DATE([.AZ45];[.AY45];[.$G$14])" office:value-type="date" office:date-value="2022-08-24" calcext:value-type="date">
            <text:p>24/08/2022</text:p>
          </table:table-cell>
          <table:table-cell table:style-name="ce166" table:formula="of:=[.$BE45]+IF(OR(WEEKDAY([.$BE45])=1;ISERROR(VLOOKUP([.$BE45];[$Factores.$A:.$A];1;0))=FALSE());1;IF(WEEKDAY([.$BE45])=7;2;0))" office:value-type="date" office:date-value="2022-08-24" calcext:value-type="date">
            <text:p>24/08/2022</text:p>
          </table:table-cell>
          <table:table-cell table:style-name="ce166" table:formula="of:=IF(AND(DAY([.$BE45])=27;WEEKDAY([.$BE45])=1);[.$BE45]-2;IF(AND(DAY([.$BE45])=27;WEEKDAY([.$BE45])=7);[.$BE45]-1;IF(AND(DAY([.$BE45])=26;WEEKDAY([.$BE45])=1);[.$BE45]-2;IF(AND(DAY([.$BE45])=26;WEEKDAY([.$BE45])=7);[.$BE45]-1;IF(DAY([.$BF45])=15;[.$BF45]+2;IF(DAY([.$BF45])=16;[.$BF45]+1;[.$BF45]))))))" office:value-type="date" office:date-value="2022-08-24" calcext:value-type="date">
            <text:p>24/08/2022</text:p>
          </table:table-cell>
          <table:table-cell table:style-name="ce119" table:number-columns-repeated="33"/>
          <table:table-cell table:style-name="ce119" table:formula="of:=[.CO44]+1" office:value-type="float" office:value="15" calcext:value-type="float">
            <text:p>15</text:p>
          </table:table-cell>
          <table:table-cell table:style-name="ce119"/>
          <table:table-cell table:style-name="ce187" table:formula="of:=[.CS44]+30" office:value-type="date" office:date-value="2022-08-24" calcext:value-type="date">
            <text:p>24/08/2022</text:p>
          </table:table-cell>
          <table:table-cell table:style-name="ce187" table:formula="of:=[.$CQ45]+IF(WEEKDAY([.$CQ45])=7;2;IF(WEEKDAY([.$CQ45])=1;1;0))" office:value-type="date" office:date-value="2022-08-24" calcext:value-type="date">
            <text:p>24/08/2022</text:p>
          </table:table-cell>
          <table:table-cell table:style-name="ce187" table:formula="of:=[.$CR45]+IF(AND(WEEKDAY([.$CR45])=6; ISERROR(VLOOKUP([.$CR45];[$Factores.$A:.$A];1;0))=FALSE());3;0)" office:value-type="date" office:date-value="2022-08-24" calcext:value-type="date">
            <text:p>24/08/2022</text:p>
          </table:table-cell>
          <table:table-cell table:style-name="ce187" table:formula="of:=IF(AND([.$CL$23]=3;[.$O$10]&gt;=[.$CO45]);[.$G$12];[.$CS45])" office:value-type="date" office:date-value="2022-08-24" calcext:value-type="date">
            <text:p>24/08/2022</text:p>
          </table:table-cell>
          <table:table-cell table:style-name="ce119"/>
          <table:table-cell table:style-name="ce190" table:formula="of:=IF([.$CN$23]=1;IF(AND([.$CL$23]=3;[.CT45]=[.CT44]);[.$CT45];[.AS45]);IF(AND([.$CN$23]=2;[.$CL$23]=3);[.CT45];[.CS45]))" office:value-type="date" office:date-value="2022-08-24" calcext:value-type="date">
            <text:p>24/08/2022</text:p>
          </table:table-cell>
          <table:table-cell table:style-name="ce119" table:number-columns-repeated="16284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5]+1" office:value-type="float" office:value="16" calcext:value-type="float">
            <text:p>16</text:p>
          </table:table-cell>
          <table:table-cell table:style-name="ce48" office:value-type="date" office:date-value="2022-09-26" calcext:value-type="date">
            <text:p>26/09/2022</text:p>
          </table:table-cell>
          <table:table-cell table:style-name="ce59" table:formula="of:=[.H45]-[.K46]" office:value-type="float" office:value="-25061.8533333333" calcext:value-type="float" table:number-columns-spanned="3" table:number-rows-spanned="1">
            <text:p><text:s/>(25,061.85)</text:p>
          </table:table-cell>
          <table:covered-table-cell table:number-columns-repeated="2" table:style-name="ce59"/>
          <table:table-cell table:style-name="ce75" office:value-type="float" office:value="470.82" calcext:value-type="float">
            <text:p><text:s/>470.82 </text:p>
          </table:table-cell>
          <table:table-cell table:style-name="ce59" office:value-type="float" office:value="145.68" calcext:value-type="float" table:number-columns-spanned="3" table:number-rows-spanned="1">
            <text:p><text:s/>145.68 </text:p>
          </table:table-cell>
          <table:covered-table-cell table:number-columns-repeated="2" table:style-name="ce59"/>
          <table:table-cell table:style-name="ce75"/>
          <table:table-cell table:style-name="ce75" table:formula="of:=[.K46]+[.L46]+[.O46]" office:value-type="float" office:value="616.5" calcext:value-type="float">
            <text:p><text:s/>616.50 </text:p>
          </table:table-cell>
          <table:table-cell table:style-name="ce75" table:formula="of:=TRUNC(((([.$P46])/(1-[.$M$14]))-([.$P46]));1)+(IF(MOD(((([.$P46])/(1-[.$M$14]))-([.$P46]))*100; 10)&gt;=5; 5; 0)/100)" office:value-type="float" office:value="0" calcext:value-type="float">
            <text:p><text:s/>- <text:s text:c="2"/></text:p>
          </table:table-cell>
          <table:table-cell table:style-name="ce97" table:formula="of:=[.Q46]+[.P46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7"/>
          <table:table-cell table:style-name="ce124" table:formula="of:=[.AG45]+30" office:value-type="date" office:date-value="2022-09-16" calcext:value-type="date">
            <text:p>16/09/2022</text:p>
          </table:table-cell>
          <table:table-cell table:style-name="ce119" table:formula="of:=[.AH45]+1" office:value-type="float" office:value="16" calcext:value-type="float">
            <text:p>16</text:p>
          </table:table-cell>
          <table:table-cell table:style-name="ce127" table:formula="of:=1/POWER(1+[.$CC$32];IF([.$CL$23]=3;[.$CX46];[.$AO46]))" office:value-type="float" office:value="0.767153531081124" calcext:value-type="float">
            <text:p><text:s/>0.767 </text:p>
          </table:table-cell>
          <table:table-cell table:style-name="ce127" table:formula="of:=IF([.$AH46]&lt;=[.$CK$32];0;1/POWER(1+[.$CC$32];[.$CV46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6]=0;[.$AJ45]=0);0;[.$AI46])" office:value-type="string" office:string-value="" calcext:value-type="error">
            <text:p>#N/D</text:p>
          </table:table-cell>
          <table:table-cell table:style-name="ce130" table:formula="of:=IF([.$AV$28]=1;[.AW46];IF([.$AV$28]=2;[.AY46];IF([.$AV$28]=3;[.BA46];[.BC46])))" office:value-type="float" office:value="9" calcext:value-type="float">
            <text:p>09</text:p>
          </table:table-cell>
          <table:table-cell table:style-name="ce130" table:formula="of:=IF([.$AV$28]=1;[.AX46];IF([.$AV$28]=2;[.AZ46];IF([.$AV$28]=3;[.BB46];[.BD46])))" office:value-type="float" office:value="2022" calcext:value-type="float">
            <text:p>2022</text:p>
          </table:table-cell>
          <table:table-cell table:style-name="ce134" table:formula="of:=[.CV46]-[.CV45]" office:value-type="float" office:value="33" calcext:value-type="float">
            <text:p><text:s/>33 </text:p>
          </table:table-cell>
          <table:table-cell table:style-name="ce134" table:formula="of:=IF([.$CN$23]=2;[.CX46];[.CV46]-[.$G$12])" office:value-type="float" office:value="490" calcext:value-type="float">
            <text:p><text:s/>490 </text:p>
          </table:table-cell>
          <table:table-cell table:style-name="ce136" table:formula="of:=IF([.$AV$28]=1;&quot;&quot;;DATE([.AM47];[.AL47];1)-1)" office:value-type="date" office:date-value="2022-09-30" calcext:value-type="date">
            <text:p>30/09/2022</text:p>
          </table:table-cell>
          <table:table-cell table:style-name="ce136" table:formula="of:=IF(AND([.$CL$23]=3;[.$O$10]&gt;=[.$AH46]);[.$G$12];IF(AND([.$CL$23]=3;[.$CN$23]=2);[.AG46];IF([.$AV$28]=1;[.$AW46];IF([.$CN$23]=1;DATE([.AM46];[.AL46];[.$G$14]);IF([.$AV$28]=2;[.AS45]+30;IF([.$AV$28]=3;[.AS45]+60;[.AS45]+90))))))" office:value-type="date" office:date-value="2022-09-24" calcext:value-type="date">
            <text:p>24/09/2022</text:p>
          </table:table-cell>
          <table:table-cell table:style-name="ce140" table:formula="of:=[.$AQ46]+IF(AND(DAY([.$AQ46])=27;MONTH([.$AQ46])=7);3;IF(AND(WEEKDAY([.$AQ46])=5;ISERROR(VLOOKUP([.$AQ46]+1;[$Factores.$A:.$A];1;0))=FALSE());4;IF(OR(WEEKDAY([.$AQ46])=1;ISERROR(VLOOKUP([.$AQ46];[$Factores.$A:.$A];1;0))=FALSE());1;IF(WEEKDAY([.$AQ46])=7;2;0))))" office:value-type="date" office:date-value="2022-09-26" calcext:value-type="date">
            <text:p>26/09/2022</text:p>
          </table:table-cell>
          <table:table-cell table:style-name="ce140" office:value-type="date" office:date-value="2022-09-26" calcext:value-type="date">
            <text:p>26/09/2022</text:p>
          </table:table-cell>
          <table:table-cell table:style-name="ce126" table:formula="of:=[.P46]/POWER(1+[.$AT$26];[.AO46])" office:value-type="float" office:value="510.624852829709" calcext:value-type="float">
            <text:p><text:s/>510.62 </text:p>
          </table:table-cell>
          <table:table-cell table:style-name="ce148"/>
          <table:table-cell table:style-name="ce154"/>
          <table:table-cell table:style-name="ce136" office:value-type="date" office:date-value="2022-01-24" calcext:value-type="date">
            <text:p>24/01/2022</text:p>
          </table:table-cell>
          <table:table-cell table:style-name="ce160"/>
          <table:table-cell table:style-name="ce162" table:formula="of:=IF([.AY45]&lt;12;[.AY45]+1;[.AY45]+1-12)" office:value-type="float" office:value="9" calcext:value-type="float">
            <text:p>09</text:p>
          </table:table-cell>
          <table:table-cell table:style-name="ce163" table:formula="of:=IF([.AY45]=12;[.AZ45]+1;[.AZ45])" office:value-type="float" office:value="2022" calcext:value-type="float">
            <text:p>2022</text:p>
          </table:table-cell>
          <table:table-cell table:style-name="ce162" table:formula="of:=IF([.BA45]&lt;=10;[.BA45]+2;IF([.BA45]=11;1;IF([.BA45]=12;2;IF([.BA45]=13;3;4))))" office:value-type="float" office:value="1" calcext:value-type="float">
            <text:p>01</text:p>
          </table:table-cell>
          <table:table-cell table:style-name="ce163" table:formula="of:=IF([.BA45]&gt;=11;[.BB45]+1;[.BB45])" office:value-type="float" office:value="2024" calcext:value-type="float">
            <text:p>2024</text:p>
          </table:table-cell>
          <table:table-cell table:style-name="ce162" table:formula="of:=IF([.BC45]&lt;=9;[.BC45]+3;IF([.BC45]=10;1;IF([.BC45]=11;2;IF([.BC45]=12;3;4))))" office:value-type="float" office:value="5" calcext:value-type="float">
            <text:p>05</text:p>
          </table:table-cell>
          <table:table-cell table:style-name="ce163" table:formula="of:=IF([.BC45]&gt;=10;[.BD45]+1;[.BD45])" office:value-type="float" office:value="2025" calcext:value-type="float">
            <text:p>2025</text:p>
          </table:table-cell>
          <table:table-cell table:style-name="ce166" table:formula="of:=DATE([.AZ46];[.AY46];[.$G$14])" office:value-type="date" office:date-value="2022-09-24" calcext:value-type="date">
            <text:p>24/09/2022</text:p>
          </table:table-cell>
          <table:table-cell table:style-name="ce166" table:formula="of:=[.$BE46]+IF(OR(WEEKDAY([.$BE46])=1;ISERROR(VLOOKUP([.$BE46];[$Factores.$A:.$A];1;0))=FALSE());1;IF(WEEKDAY([.$BE46])=7;2;0))" office:value-type="date" office:date-value="2022-09-26" calcext:value-type="date">
            <text:p>26/09/2022</text:p>
          </table:table-cell>
          <table:table-cell table:style-name="ce166" table:formula="of:=IF(AND(DAY([.$BE46])=27;WEEKDAY([.$BE46])=1);[.$BE46]-2;IF(AND(DAY([.$BE46])=27;WEEKDAY([.$BE46])=7);[.$BE46]-1;IF(AND(DAY([.$BE46])=26;WEEKDAY([.$BE46])=1);[.$BE46]-2;IF(AND(DAY([.$BE46])=26;WEEKDAY([.$BE46])=7);[.$BE46]-1;IF(DAY([.$BF46])=15;[.$BF46]+2;IF(DAY([.$BF46])=16;[.$BF46]+1;[.$BF46]))))))" office:value-type="date" office:date-value="2022-09-26" calcext:value-type="date">
            <text:p>26/09/2022</text:p>
          </table:table-cell>
          <table:table-cell table:style-name="ce119" table:number-columns-repeated="33"/>
          <table:table-cell table:style-name="ce119" table:formula="of:=[.CO45]+1" office:value-type="float" office:value="16" calcext:value-type="float">
            <text:p>16</text:p>
          </table:table-cell>
          <table:table-cell table:style-name="ce119"/>
          <table:table-cell table:style-name="ce187" table:formula="of:=[.CS45]+30" office:value-type="date" office:date-value="2022-09-23" calcext:value-type="date">
            <text:p>23/09/2022</text:p>
          </table:table-cell>
          <table:table-cell table:style-name="ce187" table:formula="of:=[.$CQ46]+IF(WEEKDAY([.$CQ46])=7;2;IF(WEEKDAY([.$CQ46])=1;1;0))" office:value-type="date" office:date-value="2022-09-23" calcext:value-type="date">
            <text:p>23/09/2022</text:p>
          </table:table-cell>
          <table:table-cell table:style-name="ce187" table:formula="of:=[.$CR46]+IF(AND(WEEKDAY([.$CR46])=6; ISERROR(VLOOKUP([.$CR46];[$Factores.$A:.$A];1;0))=FALSE());3;0)" office:value-type="date" office:date-value="2022-09-23" calcext:value-type="date">
            <text:p>23/09/2022</text:p>
          </table:table-cell>
          <table:table-cell table:style-name="ce187" table:formula="of:=IF(AND([.$CL$23]=3;[.$O$10]&gt;=[.$CO46]);[.$G$12];[.$CS46])" office:value-type="date" office:date-value="2022-09-23" calcext:value-type="date">
            <text:p>23/09/2022</text:p>
          </table:table-cell>
          <table:table-cell table:style-name="ce119"/>
          <table:table-cell table:style-name="ce190" table:formula="of:=IF([.$CN$23]=1;IF(AND([.$CL$23]=3;[.CT46]=[.CT45]);[.$CT46];[.AS46]);IF(AND([.$CN$23]=2;[.$CL$23]=3);[.CT46];[.CS46]))" office:value-type="date" office:date-value="2022-09-26" calcext:value-type="date">
            <text:p>26/09/2022</text:p>
          </table:table-cell>
          <table:table-cell table:style-name="ce119" table:number-columns-repeated="16284"/>
        </table:table-row>
        <table:table-row table:style-name="ro5">
          <table:table-cell table:style-name="ce6"/>
          <table:table-cell table:number-columns-repeated="2"/>
          <table:table-cell table:style-name="ce21"/>
          <table:table-cell/>
          <table:table-cell table:style-name="ce29" table:formula="of:=[.F46]+1" office:value-type="float" office:value="17" calcext:value-type="float">
            <text:p>17</text:p>
          </table:table-cell>
          <table:table-cell table:style-name="ce48" office:value-type="date" office:date-value="2022-10-24" calcext:value-type="date">
            <text:p>24/10/2022</text:p>
          </table:table-cell>
          <table:table-cell table:style-name="ce59" table:formula="of:=[.H46]-[.K47]" office:value-type="float" office:value="-25559.9533333333" calcext:value-type="float" table:number-columns-spanned="3" table:number-rows-spanned="1">
            <text:p><text:s/>(25,559.95)</text:p>
          </table:table-cell>
          <table:covered-table-cell table:number-columns-repeated="2" table:style-name="ce59"/>
          <table:table-cell table:style-name="ce75" office:value-type="float" office:value="498.1" calcext:value-type="float">
            <text:p><text:s/>498.10 </text:p>
          </table:table-cell>
          <table:table-cell table:style-name="ce59" office:value-type="float" office:value="118.4" calcext:value-type="float" table:number-columns-spanned="3" table:number-rows-spanned="1">
            <text:p><text:s/>118.40 </text:p>
          </table:table-cell>
          <table:covered-table-cell table:number-columns-repeated="2" table:style-name="ce59"/>
          <table:table-cell table:style-name="ce75"/>
          <table:table-cell table:style-name="ce75" table:formula="of:=[.K47]+[.L47]+[.O47]" office:value-type="float" office:value="616.5" calcext:value-type="float">
            <text:p><text:s/>616.50 </text:p>
          </table:table-cell>
          <table:table-cell table:style-name="ce75" table:formula="of:=TRUNC(((([.$P47])/(1-[.$M$14]))-([.$P47]));1)+(IF(MOD(((([.$P47])/(1-[.$M$14]))-([.$P47]))*100; 10)&gt;=5; 5; 0)/100)" office:value-type="float" office:value="0" calcext:value-type="float">
            <text:p><text:s/>- <text:s text:c="2"/></text:p>
          </table:table-cell>
          <table:table-cell table:style-name="ce97" table:formula="of:=[.Q47]+[.P47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6" table:number-columns-repeated="6"/>
          <table:table-cell table:style-name="ce119" table:number-columns-repeated="7"/>
          <table:table-cell table:style-name="ce124" table:formula="of:=[.AG46]+30" office:value-type="date" office:date-value="2022-10-16" calcext:value-type="date">
            <text:p>16/10/2022</text:p>
          </table:table-cell>
          <table:table-cell table:style-name="ce119" table:formula="of:=[.AH46]+1" office:value-type="float" office:value="17" calcext:value-type="float">
            <text:p>17</text:p>
          </table:table-cell>
          <table:table-cell table:style-name="ce127" table:formula="of:=1/POWER(1+[.$CC$32];IF([.$CL$23]=3;[.$CX47];[.$AO47]))" office:value-type="float" office:value="0.755621198716682" calcext:value-type="float">
            <text:p><text:s/>0.756 </text:p>
          </table:table-cell>
          <table:table-cell table:style-name="ce127" table:formula="of:=IF([.$AH47]&lt;=[.$CK$32];0;1/POWER(1+[.$CC$32];[.$CV47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7]=0;[.$AJ46]=0);0;[.$AI47])" office:value-type="string" office:string-value="" calcext:value-type="error">
            <text:p>#N/D</text:p>
          </table:table-cell>
          <table:table-cell table:style-name="ce130" table:formula="of:=IF([.$AV$28]=1;[.AW47];IF([.$AV$28]=2;[.AY47];IF([.$AV$28]=3;[.BA47];[.BC47])))" office:value-type="float" office:value="10" calcext:value-type="float">
            <text:p>10</text:p>
          </table:table-cell>
          <table:table-cell table:style-name="ce130" table:formula="of:=IF([.$AV$28]=1;[.AX47];IF([.$AV$28]=2;[.AZ47];IF([.$AV$28]=3;[.BB47];[.BD47])))" office:value-type="float" office:value="2022" calcext:value-type="float">
            <text:p>2022</text:p>
          </table:table-cell>
          <table:table-cell table:style-name="ce134" table:formula="of:=[.CV47]-[.CV46]" office:value-type="float" office:value="28" calcext:value-type="float">
            <text:p><text:s/>28 </text:p>
          </table:table-cell>
          <table:table-cell table:style-name="ce134" table:formula="of:=IF([.$CN$23]=2;[.CX47];[.CV47]-[.$G$12])" office:value-type="float" office:value="518" calcext:value-type="float">
            <text:p><text:s/>518 </text:p>
          </table:table-cell>
          <table:table-cell table:style-name="ce136" table:formula="of:=IF([.$AV$28]=1;&quot;&quot;;DATE([.AM48];[.AL48];1)-1)" office:value-type="date" office:date-value="2022-10-31" calcext:value-type="date">
            <text:p>31/10/2022</text:p>
          </table:table-cell>
          <table:table-cell table:style-name="ce136" table:formula="of:=IF(AND([.$CL$23]=3;[.$O$10]&gt;=[.$AH47]);[.$G$12];IF(AND([.$CL$23]=3;[.$CN$23]=2);[.AG47];IF([.$AV$28]=1;[.$AW47];IF([.$CN$23]=1;DATE([.AM47];[.AL47];[.$G$14]);IF([.$AV$28]=2;[.AS46]+30;IF([.$AV$28]=3;[.AS46]+60;[.AS46]+90))))))" office:value-type="date" office:date-value="2022-10-24" calcext:value-type="date">
            <text:p>24/10/2022</text:p>
          </table:table-cell>
          <table:table-cell table:style-name="ce140" table:formula="of:=[.$AQ47]+IF(AND(DAY([.$AQ47])=27;MONTH([.$AQ47])=7);3;IF(AND(WEEKDAY([.$AQ47])=5;ISERROR(VLOOKUP([.$AQ47]+1;[$Factores.$A:.$A];1;0))=FALSE());4;IF(OR(WEEKDAY([.$AQ47])=1;ISERROR(VLOOKUP([.$AQ47];[$Factores.$A:.$A];1;0))=FALSE());1;IF(WEEKDAY([.$AQ47])=7;2;0))))" office:value-type="date" office:date-value="2022-10-24" calcext:value-type="date">
            <text:p>24/10/2022</text:p>
          </table:table-cell>
          <table:table-cell table:style-name="ce140" office:value-type="date" office:date-value="2022-10-24" calcext:value-type="date">
            <text:p>24/10/2022</text:p>
          </table:table-cell>
          <table:table-cell table:style-name="ce126" table:formula="of:=[.P47]/POWER(1+[.$AT$26];[.AO47])" office:value-type="float" office:value="505.156428405813" calcext:value-type="float">
            <text:p><text:s/>505.16 </text:p>
          </table:table-cell>
          <table:table-cell table:style-name="ce148"/>
          <table:table-cell table:style-name="ce154"/>
          <table:table-cell table:style-name="ce136" table:formula="of:=[.AW46]+15" office:value-type="date" office:date-value="2022-02-08" calcext:value-type="date">
            <text:p>08/02/2022</text:p>
          </table:table-cell>
          <table:table-cell table:style-name="ce160"/>
          <table:table-cell table:style-name="ce162" table:formula="of:=IF([.AY46]&lt;12;[.AY46]+1;[.AY46]+1-12)" office:value-type="float" office:value="10" calcext:value-type="float">
            <text:p>10</text:p>
          </table:table-cell>
          <table:table-cell table:style-name="ce163" table:formula="of:=IF([.AY46]=12;[.AZ46]+1;[.AZ46])" office:value-type="float" office:value="2022" calcext:value-type="float">
            <text:p>2022</text:p>
          </table:table-cell>
          <table:table-cell table:style-name="ce162" table:formula="of:=IF([.BA46]&lt;=10;[.BA46]+2;IF([.BA46]=11;1;IF([.BA46]=12;2;IF([.BA46]=13;3;4))))" office:value-type="float" office:value="3" calcext:value-type="float">
            <text:p>03</text:p>
          </table:table-cell>
          <table:table-cell table:style-name="ce163" table:formula="of:=IF([.BA46]&gt;=11;[.BB46]+1;[.BB46])" office:value-type="float" office:value="2024" calcext:value-type="float">
            <text:p>2024</text:p>
          </table:table-cell>
          <table:table-cell table:style-name="ce162" table:formula="of:=IF([.BC46]&lt;=9;[.BC46]+3;IF([.BC46]=10;1;IF([.BC46]=11;2;IF([.BC46]=12;3;4))))" office:value-type="float" office:value="8" calcext:value-type="float">
            <text:p>08</text:p>
          </table:table-cell>
          <table:table-cell table:style-name="ce163" table:formula="of:=IF([.BC46]&gt;=10;[.BD46]+1;[.BD46])" office:value-type="float" office:value="2025" calcext:value-type="float">
            <text:p>2025</text:p>
          </table:table-cell>
          <table:table-cell table:style-name="ce166" table:formula="of:=DATE([.AZ47];[.AY47];[.$G$14])" office:value-type="date" office:date-value="2022-10-24" calcext:value-type="date">
            <text:p>24/10/2022</text:p>
          </table:table-cell>
          <table:table-cell table:style-name="ce166" table:formula="of:=[.$BE47]+IF(OR(WEEKDAY([.$BE47])=1;ISERROR(VLOOKUP([.$BE47];[$Factores.$A:.$A];1;0))=FALSE());1;IF(WEEKDAY([.$BE47])=7;2;0))" office:value-type="date" office:date-value="2022-10-24" calcext:value-type="date">
            <text:p>24/10/2022</text:p>
          </table:table-cell>
          <table:table-cell table:style-name="ce166" table:formula="of:=IF(AND(DAY([.$BE47])=27;WEEKDAY([.$BE47])=1);[.$BE47]-2;IF(AND(DAY([.$BE47])=27;WEEKDAY([.$BE47])=7);[.$BE47]-1;IF(AND(DAY([.$BE47])=26;WEEKDAY([.$BE47])=1);[.$BE47]-2;IF(AND(DAY([.$BE47])=26;WEEKDAY([.$BE47])=7);[.$BE47]-1;IF(DAY([.$BF47])=15;[.$BF47]+2;IF(DAY([.$BF47])=16;[.$BF47]+1;[.$BF47]))))))" office:value-type="date" office:date-value="2022-10-24" calcext:value-type="date">
            <text:p>24/10/2022</text:p>
          </table:table-cell>
          <table:table-cell table:style-name="ce119" table:number-columns-repeated="33"/>
          <table:table-cell table:style-name="ce119" table:formula="of:=[.CO46]+1" office:value-type="float" office:value="17" calcext:value-type="float">
            <text:p>17</text:p>
          </table:table-cell>
          <table:table-cell table:style-name="ce119"/>
          <table:table-cell table:style-name="ce187" table:formula="of:=[.CS46]+30" office:value-type="date" office:date-value="2022-10-23" calcext:value-type="date">
            <text:p>23/10/2022</text:p>
          </table:table-cell>
          <table:table-cell table:style-name="ce187" table:formula="of:=[.$CQ47]+IF(WEEKDAY([.$CQ47])=7;2;IF(WEEKDAY([.$CQ47])=1;1;0))" office:value-type="date" office:date-value="2022-10-24" calcext:value-type="date">
            <text:p>24/10/2022</text:p>
          </table:table-cell>
          <table:table-cell table:style-name="ce187" table:formula="of:=[.$CR47]+IF(AND(WEEKDAY([.$CR47])=6; ISERROR(VLOOKUP([.$CR47];[$Factores.$A:.$A];1;0))=FALSE());3;0)" office:value-type="date" office:date-value="2022-10-24" calcext:value-type="date">
            <text:p>24/10/2022</text:p>
          </table:table-cell>
          <table:table-cell table:style-name="ce187" table:formula="of:=IF(AND([.$CL$23]=3;[.$O$10]&gt;=[.$CO47]);[.$G$12];[.$CS47])" office:value-type="date" office:date-value="2022-10-24" calcext:value-type="date">
            <text:p>24/10/2022</text:p>
          </table:table-cell>
          <table:table-cell table:style-name="ce119"/>
          <table:table-cell table:style-name="ce190" table:formula="of:=IF([.$CN$23]=1;IF(AND([.$CL$23]=3;[.CT47]=[.CT46]);[.$CT47];[.AS47]);IF(AND([.$CN$23]=2;[.$CL$23]=3);[.CT47];[.CS47]))" office:value-type="date" office:date-value="2022-10-24" calcext:value-type="date">
            <text:p>24/10/2022</text:p>
          </table:table-cell>
          <table:table-cell table:style-name="ce119" table:number-columns-repeated="16284"/>
        </table:table-row>
        <table:table-row table:style-name="ro5">
          <table:table-cell table:number-columns-repeated="3"/>
          <table:table-cell table:style-name="ce4"/>
          <table:table-cell table:style-name="ce24"/>
          <table:table-cell table:style-name="ce29" table:formula="of:=[.F47]+1" office:value-type="float" office:value="18" calcext:value-type="float">
            <text:p>18</text:p>
          </table:table-cell>
          <table:table-cell table:style-name="ce48" office:value-type="date" office:date-value="2022-11-24" calcext:value-type="date">
            <text:p>24/11/2022</text:p>
          </table:table-cell>
          <table:table-cell table:style-name="ce59" table:formula="of:=[.H47]-[.K48]" office:value-type="float" office:value="-26051.2633333333" calcext:value-type="float" table:number-columns-spanned="3" table:number-rows-spanned="1">
            <text:p><text:s/>(26,051.26)</text:p>
          </table:table-cell>
          <table:covered-table-cell table:number-columns-repeated="2" table:style-name="ce59"/>
          <table:table-cell table:style-name="ce75" office:value-type="float" office:value="491.31" calcext:value-type="float">
            <text:p><text:s/>491.31 </text:p>
          </table:table-cell>
          <table:table-cell table:style-name="ce59" office:value-type="float" office:value="125.19" calcext:value-type="float" table:number-columns-spanned="3" table:number-rows-spanned="1">
            <text:p><text:s/>125.19 </text:p>
          </table:table-cell>
          <table:covered-table-cell table:number-columns-repeated="2" table:style-name="ce59"/>
          <table:table-cell table:style-name="ce75"/>
          <table:table-cell table:style-name="ce75" table:formula="of:=[.K48]+[.L48]+[.O48]" office:value-type="float" office:value="616.5" calcext:value-type="float">
            <text:p><text:s/>616.50 </text:p>
          </table:table-cell>
          <table:table-cell table:style-name="ce75" table:formula="of:=TRUNC(((([.$P48])/(1-[.$M$14]))-([.$P48]));1)+(IF(MOD(((([.$P48])/(1-[.$M$14]))-([.$P48]))*100; 10)&gt;=5; 5; 0)/100)" office:value-type="float" office:value="0" calcext:value-type="float">
            <text:p><text:s/>- <text:s text:c="2"/></text:p>
          </table:table-cell>
          <table:table-cell table:style-name="ce97" table:formula="of:=[.Q48]+[.P48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4"/>
          <table:table-cell table:style-name="ce6" table:number-columns-repeated="2"/>
          <table:table-cell table:style-name="ce118" table:number-columns-repeated="7"/>
          <table:table-cell table:style-name="ce124" table:formula="of:=[.AG47]+30" office:value-type="date" office:date-value="2022-11-15" calcext:value-type="date">
            <text:p>15/11/2022</text:p>
          </table:table-cell>
          <table:table-cell table:style-name="ce119" table:formula="of:=[.AH47]+1" office:value-type="float" office:value="18" calcext:value-type="float">
            <text:p>18</text:p>
          </table:table-cell>
          <table:table-cell table:style-name="ce127" table:formula="of:=1/POWER(1+[.$CC$32];IF([.$CL$23]=3;[.$CX48];[.$AO48]))" office:value-type="float" office:value="0.743055368309706" calcext:value-type="float">
            <text:p><text:s/>0.743 </text:p>
          </table:table-cell>
          <table:table-cell table:style-name="ce127" table:formula="of:=IF([.$AH48]&lt;=[.$CK$32];0;1/POWER(1+[.$CC$32];[.$CV48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8]=0;[.$AJ47]=0);0;[.$AI48])" office:value-type="string" office:string-value="" calcext:value-type="error">
            <text:p>#N/D</text:p>
          </table:table-cell>
          <table:table-cell table:style-name="ce130" table:formula="of:=IF([.$AV$28]=1;[.AW48];IF([.$AV$28]=2;[.AY48];IF([.$AV$28]=3;[.BA48];[.BC48])))" office:value-type="float" office:value="11" calcext:value-type="float">
            <text:p>11</text:p>
          </table:table-cell>
          <table:table-cell table:style-name="ce130" table:formula="of:=IF([.$AV$28]=1;[.AX48];IF([.$AV$28]=2;[.AZ48];IF([.$AV$28]=3;[.BB48];[.BD48])))" office:value-type="float" office:value="2022" calcext:value-type="float">
            <text:p>2022</text:p>
          </table:table-cell>
          <table:table-cell table:style-name="ce134" table:formula="of:=[.CV48]-[.CV47]" office:value-type="float" office:value="31" calcext:value-type="float">
            <text:p><text:s/>31 </text:p>
          </table:table-cell>
          <table:table-cell table:style-name="ce134" table:formula="of:=IF([.$CN$23]=2;[.CX48];[.CV48]-[.$G$12])" office:value-type="float" office:value="549" calcext:value-type="float">
            <text:p><text:s/>549 </text:p>
          </table:table-cell>
          <table:table-cell table:style-name="ce136" table:formula="of:=IF([.$AV$28]=1;&quot;&quot;;DATE([.AM49];[.AL49];1)-1)" office:value-type="date" office:date-value="2022-11-30" calcext:value-type="date">
            <text:p>30/11/2022</text:p>
          </table:table-cell>
          <table:table-cell table:style-name="ce136" table:formula="of:=IF(AND([.$CL$23]=3;[.$O$10]&gt;=[.$AH48]);[.$G$12];IF(AND([.$CL$23]=3;[.$CN$23]=2);[.AG48];IF([.$AV$28]=1;[.$AW48];IF([.$CN$23]=1;DATE([.AM48];[.AL48];[.$G$14]);IF([.$AV$28]=2;[.AS47]+30;IF([.$AV$28]=3;[.AS47]+60;[.AS47]+90))))))" office:value-type="date" office:date-value="2022-11-24" calcext:value-type="date">
            <text:p>24/11/2022</text:p>
          </table:table-cell>
          <table:table-cell table:style-name="ce140" table:formula="of:=[.$AQ48]+IF(AND(DAY([.$AQ48])=27;MONTH([.$AQ48])=7);3;IF(AND(WEEKDAY([.$AQ48])=5;ISERROR(VLOOKUP([.$AQ48]+1;[$Factores.$A:.$A];1;0))=FALSE());4;IF(OR(WEEKDAY([.$AQ48])=1;ISERROR(VLOOKUP([.$AQ48];[$Factores.$A:.$A];1;0))=FALSE());1;IF(WEEKDAY([.$AQ48])=7;2;0))))" office:value-type="date" office:date-value="2022-11-24" calcext:value-type="date">
            <text:p>24/11/2022</text:p>
          </table:table-cell>
          <table:table-cell table:style-name="ce140" office:value-type="date" office:date-value="2022-11-24" calcext:value-type="date">
            <text:p>24/11/2022</text:p>
          </table:table-cell>
          <table:table-cell table:style-name="ce126" table:formula="of:=[.P48]/POWER(1+[.$AT$26];[.AO48])" office:value-type="float" office:value="499.170386094048" calcext:value-type="float">
            <text:p><text:s/>499.17 </text:p>
          </table:table-cell>
          <table:table-cell table:style-name="ce148"/>
          <table:table-cell table:style-name="ce153"/>
          <table:table-cell table:style-name="ce136" office:value-type="date" office:date-value="2022-02-24" calcext:value-type="date">
            <text:p>24/02/2022</text:p>
          </table:table-cell>
          <table:table-cell table:style-name="ce160"/>
          <table:table-cell table:style-name="ce162" table:formula="of:=IF([.AY47]&lt;12;[.AY47]+1;[.AY47]+1-12)" office:value-type="float" office:value="11" calcext:value-type="float">
            <text:p>11</text:p>
          </table:table-cell>
          <table:table-cell table:style-name="ce163" table:formula="of:=IF([.AY47]=12;[.AZ47]+1;[.AZ47])" office:value-type="float" office:value="2022" calcext:value-type="float">
            <text:p>2022</text:p>
          </table:table-cell>
          <table:table-cell table:style-name="ce162" table:formula="of:=IF([.BA47]&lt;=10;[.BA47]+2;IF([.BA47]=11;1;IF([.BA47]=12;2;IF([.BA47]=13;3;4))))" office:value-type="float" office:value="5" calcext:value-type="float">
            <text:p>05</text:p>
          </table:table-cell>
          <table:table-cell table:style-name="ce163" table:formula="of:=IF([.BA47]&gt;=11;[.BB47]+1;[.BB47])" office:value-type="float" office:value="2024" calcext:value-type="float">
            <text:p>2024</text:p>
          </table:table-cell>
          <table:table-cell table:style-name="ce162" table:formula="of:=IF([.BC47]&lt;=9;[.BC47]+3;IF([.BC47]=10;1;IF([.BC47]=11;2;IF([.BC47]=12;3;4))))" office:value-type="float" office:value="11" calcext:value-type="float">
            <text:p>11</text:p>
          </table:table-cell>
          <table:table-cell table:style-name="ce163" table:formula="of:=IF([.BC47]&gt;=10;[.BD47]+1;[.BD47])" office:value-type="float" office:value="2025" calcext:value-type="float">
            <text:p>2025</text:p>
          </table:table-cell>
          <table:table-cell table:style-name="ce166" table:formula="of:=DATE([.AZ48];[.AY48];[.$G$14])" office:value-type="date" office:date-value="2022-11-24" calcext:value-type="date">
            <text:p>24/11/2022</text:p>
          </table:table-cell>
          <table:table-cell table:style-name="ce166" table:formula="of:=[.$BE48]+IF(OR(WEEKDAY([.$BE48])=1;ISERROR(VLOOKUP([.$BE48];[$Factores.$A:.$A];1;0))=FALSE());1;IF(WEEKDAY([.$BE48])=7;2;0))" office:value-type="date" office:date-value="2022-11-24" calcext:value-type="date">
            <text:p>24/11/2022</text:p>
          </table:table-cell>
          <table:table-cell table:style-name="ce166" table:formula="of:=IF(AND(DAY([.$BE48])=27;WEEKDAY([.$BE48])=1);[.$BE48]-2;IF(AND(DAY([.$BE48])=27;WEEKDAY([.$BE48])=7);[.$BE48]-1;IF(AND(DAY([.$BE48])=26;WEEKDAY([.$BE48])=1);[.$BE48]-2;IF(AND(DAY([.$BE48])=26;WEEKDAY([.$BE48])=7);[.$BE48]-1;IF(DAY([.$BF48])=15;[.$BF48]+2;IF(DAY([.$BF48])=16;[.$BF48]+1;[.$BF48]))))))" office:value-type="date" office:date-value="2022-11-24" calcext:value-type="date">
            <text:p>24/11/2022</text:p>
          </table:table-cell>
          <table:table-cell table:style-name="ce118" table:number-columns-repeated="33"/>
          <table:table-cell table:style-name="ce119" table:formula="of:=[.CO47]+1" office:value-type="float" office:value="18" calcext:value-type="float">
            <text:p>18</text:p>
          </table:table-cell>
          <table:table-cell table:style-name="ce119"/>
          <table:table-cell table:style-name="ce187" table:formula="of:=[.CS47]+30" office:value-type="date" office:date-value="2022-11-23" calcext:value-type="date">
            <text:p>23/11/2022</text:p>
          </table:table-cell>
          <table:table-cell table:style-name="ce187" table:formula="of:=[.$CQ48]+IF(WEEKDAY([.$CQ48])=7;2;IF(WEEKDAY([.$CQ48])=1;1;0))" office:value-type="date" office:date-value="2022-11-23" calcext:value-type="date">
            <text:p>23/11/2022</text:p>
          </table:table-cell>
          <table:table-cell table:style-name="ce187" table:formula="of:=[.$CR48]+IF(AND(WEEKDAY([.$CR48])=6; ISERROR(VLOOKUP([.$CR48];[$Factores.$A:.$A];1;0))=FALSE());3;0)" office:value-type="date" office:date-value="2022-11-23" calcext:value-type="date">
            <text:p>23/11/2022</text:p>
          </table:table-cell>
          <table:table-cell table:style-name="ce187" table:formula="of:=IF(AND([.$CL$23]=3;[.$O$10]&gt;=[.$CO48]);[.$G$12];[.$CS48])" office:value-type="date" office:date-value="2022-11-23" calcext:value-type="date">
            <text:p>23/11/2022</text:p>
          </table:table-cell>
          <table:table-cell table:style-name="ce119"/>
          <table:table-cell table:style-name="ce190" table:formula="of:=IF([.$CN$23]=1;IF(AND([.$CL$23]=3;[.CT48]=[.CT47]);[.$CT48];[.AS48]);IF(AND([.$CN$23]=2;[.$CL$23]=3);[.CT48];[.CS48]))" office:value-type="date" office:date-value="2022-11-24" calcext:value-type="date">
            <text:p>24/11/2022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/>
          <table:table-cell table:style-name="ce24"/>
          <table:table-cell table:style-name="ce29" table:formula="of:=[.F48]+1" office:value-type="float" office:value="19" calcext:value-type="float">
            <text:p>19</text:p>
          </table:table-cell>
          <table:table-cell table:style-name="ce48" office:value-type="date" office:date-value="2022-12-26" calcext:value-type="date">
            <text:p>26/12/2022</text:p>
          </table:table-cell>
          <table:table-cell table:style-name="ce59" table:formula="of:=[.H48]-[.K49]" office:value-type="float" office:value="-26544.5933333333" calcext:value-type="float" table:number-columns-spanned="3" table:number-rows-spanned="1">
            <text:p><text:s/>(26,544.59)</text:p>
          </table:table-cell>
          <table:covered-table-cell table:number-columns-repeated="2" table:style-name="ce59"/>
          <table:table-cell table:style-name="ce75" office:value-type="float" office:value="493.33" calcext:value-type="float">
            <text:p><text:s/>493.33 </text:p>
          </table:table-cell>
          <table:table-cell table:style-name="ce59" office:value-type="float" office:value="123.17" calcext:value-type="float" table:number-columns-spanned="3" table:number-rows-spanned="1">
            <text:p><text:s/>123.17 </text:p>
          </table:table-cell>
          <table:covered-table-cell table:number-columns-repeated="2" table:style-name="ce59"/>
          <table:table-cell table:style-name="ce75"/>
          <table:table-cell table:style-name="ce75" table:formula="of:=[.K49]+[.L49]+[.O49]" office:value-type="float" office:value="616.5" calcext:value-type="float">
            <text:p><text:s/>616.50 </text:p>
          </table:table-cell>
          <table:table-cell table:style-name="ce75" table:formula="of:=TRUNC(((([.$P49])/(1-[.$M$14]))-([.$P49]));1)+(IF(MOD(((([.$P49])/(1-[.$M$14]))-([.$P49]))*100; 10)&gt;=5; 5; 0)/100)" office:value-type="float" office:value="0" calcext:value-type="float">
            <text:p><text:s/>- <text:s text:c="2"/></text:p>
          </table:table-cell>
          <table:table-cell table:style-name="ce97" table:formula="of:=[.Q49]+[.P49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4"/>
          <table:table-cell table:style-name="ce6" table:number-columns-repeated="2"/>
          <table:table-cell table:style-name="ce118" table:number-columns-repeated="7"/>
          <table:table-cell table:style-name="ce124" table:formula="of:=[.AG48]+30" office:value-type="date" office:date-value="2022-12-15" calcext:value-type="date">
            <text:p>15/12/2022</text:p>
          </table:table-cell>
          <table:table-cell table:style-name="ce119" table:formula="of:=[.AH48]+1" office:value-type="float" office:value="19" calcext:value-type="float">
            <text:p>19</text:p>
          </table:table-cell>
          <table:table-cell table:style-name="ce127" table:formula="of:=1/POWER(1+[.$CC$32];IF([.$CL$23]=3;[.$CX49];[.$AO49]))" office:value-type="float" office:value="0.730303336488156" calcext:value-type="float">
            <text:p><text:s/>0.730 </text:p>
          </table:table-cell>
          <table:table-cell table:style-name="ce127" table:formula="of:=IF([.$AH49]&lt;=[.$CK$32];0;1/POWER(1+[.$CC$32];[.$CV49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49]=0;[.$AJ48]=0);0;[.$AI49])" office:value-type="string" office:string-value="" calcext:value-type="error">
            <text:p>#N/D</text:p>
          </table:table-cell>
          <table:table-cell table:style-name="ce130" table:formula="of:=IF([.$AV$28]=1;[.AW49];IF([.$AV$28]=2;[.AY49];IF([.$AV$28]=3;[.BA49];[.BC49])))" office:value-type="float" office:value="12" calcext:value-type="float">
            <text:p>12</text:p>
          </table:table-cell>
          <table:table-cell table:style-name="ce130" table:formula="of:=IF([.$AV$28]=1;[.AX49];IF([.$AV$28]=2;[.AZ49];IF([.$AV$28]=3;[.BB49];[.BD49])))" office:value-type="float" office:value="2022" calcext:value-type="float">
            <text:p>2022</text:p>
          </table:table-cell>
          <table:table-cell table:style-name="ce134" table:formula="of:=[.CV49]-[.CV48]" office:value-type="float" office:value="32" calcext:value-type="float">
            <text:p><text:s/>32 </text:p>
          </table:table-cell>
          <table:table-cell table:style-name="ce134" table:formula="of:=IF([.$CN$23]=2;[.CX49];[.CV49]-[.$G$12])" office:value-type="float" office:value="581" calcext:value-type="float">
            <text:p><text:s/>581 </text:p>
          </table:table-cell>
          <table:table-cell table:style-name="ce136" table:formula="of:=IF([.$AV$28]=1;&quot;&quot;;DATE([.AM50];[.AL50];1)-1)" office:value-type="date" office:date-value="2022-12-31" calcext:value-type="date">
            <text:p>31/12/2022</text:p>
          </table:table-cell>
          <table:table-cell table:style-name="ce136" table:formula="of:=IF(AND([.$CL$23]=3;[.$O$10]&gt;=[.$AH49]);[.$G$12];IF(AND([.$CL$23]=3;[.$CN$23]=2);[.AG49];IF([.$AV$28]=1;[.$AW49];IF([.$CN$23]=1;DATE([.AM49];[.AL49];[.$G$14]);IF([.$AV$28]=2;[.AS48]+30;IF([.$AV$28]=3;[.AS48]+60;[.AS48]+90))))))" office:value-type="date" office:date-value="2022-12-24" calcext:value-type="date">
            <text:p>24/12/2022</text:p>
          </table:table-cell>
          <table:table-cell table:style-name="ce140" table:formula="of:=[.$AQ49]+IF(AND(DAY([.$AQ49])=27;MONTH([.$AQ49])=7);3;IF(AND(WEEKDAY([.$AQ49])=5;ISERROR(VLOOKUP([.$AQ49]+1;[$Factores.$A:.$A];1;0))=FALSE());4;IF(OR(WEEKDAY([.$AQ49])=1;ISERROR(VLOOKUP([.$AQ49];[$Factores.$A:.$A];1;0))=FALSE());1;IF(WEEKDAY([.$AQ49])=7;2;0))))" office:value-type="date" office:date-value="2022-12-26" calcext:value-type="date">
            <text:p>26/12/2022</text:p>
          </table:table-cell>
          <table:table-cell table:style-name="ce140" office:value-type="date" office:date-value="2022-12-26" calcext:value-type="date">
            <text:p>26/12/2022</text:p>
          </table:table-cell>
          <table:table-cell table:style-name="ce126" table:formula="of:=[.P49]/POWER(1+[.$AT$26];[.AO49])" office:value-type="float" office:value="493.065639200342" calcext:value-type="float">
            <text:p><text:s/>493.07 </text:p>
          </table:table-cell>
          <table:table-cell table:style-name="ce148"/>
          <table:table-cell table:style-name="ce153"/>
          <table:table-cell table:style-name="ce136" table:formula="of:=[.AW48]+15" office:value-type="date" office:date-value="2022-03-11" calcext:value-type="date">
            <text:p>11/03/2022</text:p>
          </table:table-cell>
          <table:table-cell table:style-name="ce160"/>
          <table:table-cell table:style-name="ce162" table:formula="of:=IF([.AY48]&lt;12;[.AY48]+1;[.AY48]+1-12)" office:value-type="float" office:value="12" calcext:value-type="float">
            <text:p>12</text:p>
          </table:table-cell>
          <table:table-cell table:style-name="ce163" table:formula="of:=IF([.AY48]=12;[.AZ48]+1;[.AZ48])" office:value-type="float" office:value="2022" calcext:value-type="float">
            <text:p>2022</text:p>
          </table:table-cell>
          <table:table-cell table:style-name="ce162" table:formula="of:=IF([.BA48]&lt;=10;[.BA48]+2;IF([.BA48]=11;1;IF([.BA48]=12;2;IF([.BA48]=13;3;4))))" office:value-type="float" office:value="7" calcext:value-type="float">
            <text:p>07</text:p>
          </table:table-cell>
          <table:table-cell table:style-name="ce163" table:formula="of:=IF([.BA48]&gt;=11;[.BB48]+1;[.BB48])" office:value-type="float" office:value="2024" calcext:value-type="float">
            <text:p>2024</text:p>
          </table:table-cell>
          <table:table-cell table:style-name="ce162" table:formula="of:=IF([.BC48]&lt;=9;[.BC48]+3;IF([.BC48]=10;1;IF([.BC48]=11;2;IF([.BC48]=12;3;4))))" office:value-type="float" office:value="2" calcext:value-type="float">
            <text:p>02</text:p>
          </table:table-cell>
          <table:table-cell table:style-name="ce163" table:formula="of:=IF([.BC48]&gt;=10;[.BD48]+1;[.BD48])" office:value-type="float" office:value="2026" calcext:value-type="float">
            <text:p>2026</text:p>
          </table:table-cell>
          <table:table-cell table:style-name="ce166" table:formula="of:=DATE([.AZ49];[.AY49];[.$G$14])" office:value-type="date" office:date-value="2022-12-24" calcext:value-type="date">
            <text:p>24/12/2022</text:p>
          </table:table-cell>
          <table:table-cell table:style-name="ce166" table:formula="of:=[.$BE49]+IF(OR(WEEKDAY([.$BE49])=1;ISERROR(VLOOKUP([.$BE49];[$Factores.$A:.$A];1;0))=FALSE());1;IF(WEEKDAY([.$BE49])=7;2;0))" office:value-type="date" office:date-value="2022-12-26" calcext:value-type="date">
            <text:p>26/12/2022</text:p>
          </table:table-cell>
          <table:table-cell table:style-name="ce166" table:formula="of:=IF(AND(DAY([.$BE49])=27;WEEKDAY([.$BE49])=1);[.$BE49]-2;IF(AND(DAY([.$BE49])=27;WEEKDAY([.$BE49])=7);[.$BE49]-1;IF(AND(DAY([.$BE49])=26;WEEKDAY([.$BE49])=1);[.$BE49]-2;IF(AND(DAY([.$BE49])=26;WEEKDAY([.$BE49])=7);[.$BE49]-1;IF(DAY([.$BF49])=15;[.$BF49]+2;IF(DAY([.$BF49])=16;[.$BF49]+1;[.$BF49]))))))" office:value-type="date" office:date-value="2022-12-26" calcext:value-type="date">
            <text:p>26/12/2022</text:p>
          </table:table-cell>
          <table:table-cell table:style-name="ce118" table:number-columns-repeated="33"/>
          <table:table-cell table:style-name="ce119" table:formula="of:=[.CO48]+1" office:value-type="float" office:value="19" calcext:value-type="float">
            <text:p>19</text:p>
          </table:table-cell>
          <table:table-cell table:style-name="ce119"/>
          <table:table-cell table:style-name="ce187" table:formula="of:=[.CS48]+30" office:value-type="date" office:date-value="2022-12-23" calcext:value-type="date">
            <text:p>23/12/2022</text:p>
          </table:table-cell>
          <table:table-cell table:style-name="ce187" table:formula="of:=[.$CQ49]+IF(WEEKDAY([.$CQ49])=7;2;IF(WEEKDAY([.$CQ49])=1;1;0))" office:value-type="date" office:date-value="2022-12-23" calcext:value-type="date">
            <text:p>23/12/2022</text:p>
          </table:table-cell>
          <table:table-cell table:style-name="ce187" table:formula="of:=[.$CR49]+IF(AND(WEEKDAY([.$CR49])=6; ISERROR(VLOOKUP([.$CR49];[$Factores.$A:.$A];1;0))=FALSE());3;0)" office:value-type="date" office:date-value="2022-12-23" calcext:value-type="date">
            <text:p>23/12/2022</text:p>
          </table:table-cell>
          <table:table-cell table:style-name="ce187" table:formula="of:=IF(AND([.$CL$23]=3;[.$O$10]&gt;=[.$CO49]);[.$G$12];[.$CS49])" office:value-type="date" office:date-value="2022-12-23" calcext:value-type="date">
            <text:p>23/12/2022</text:p>
          </table:table-cell>
          <table:table-cell table:style-name="ce119"/>
          <table:table-cell table:style-name="ce190" table:formula="of:=IF([.$CN$23]=1;IF(AND([.$CL$23]=3;[.CT49]=[.CT48]);[.$CT49];[.AS49]);IF(AND([.$CN$23]=2;[.$CL$23]=3);[.CT49];[.CS49]))" office:value-type="date" office:date-value="2022-12-26" calcext:value-type="date">
            <text:p>26/12/2022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/>
          <table:table-cell table:style-name="ce24"/>
          <table:table-cell table:style-name="ce29" table:formula="of:=[.F49]+1" office:value-type="float" office:value="20" calcext:value-type="float">
            <text:p>20</text:p>
          </table:table-cell>
          <table:table-cell table:style-name="ce48" office:value-type="date" office:date-value="2023-01-24" calcext:value-type="date">
            <text:p>24/01/2023</text:p>
          </table:table-cell>
          <table:table-cell table:style-name="ce59" table:formula="of:=[.H49]-[.K50]" office:value-type="float" office:value="-27055.0633333333" calcext:value-type="float" table:number-columns-spanned="3" table:number-rows-spanned="1">
            <text:p><text:s/>(27,055.06)</text:p>
          </table:table-cell>
          <table:covered-table-cell table:number-columns-repeated="2" table:style-name="ce59"/>
          <table:table-cell table:style-name="ce75" office:value-type="float" office:value="510.47" calcext:value-type="float">
            <text:p><text:s/>510.47 </text:p>
          </table:table-cell>
          <table:table-cell table:style-name="ce59" office:value-type="float" office:value="106.03" calcext:value-type="float" table:number-columns-spanned="3" table:number-rows-spanned="1">
            <text:p><text:s/>106.03 </text:p>
          </table:table-cell>
          <table:covered-table-cell table:number-columns-repeated="2" table:style-name="ce59"/>
          <table:table-cell table:style-name="ce75"/>
          <table:table-cell table:style-name="ce75" table:formula="of:=[.K50]+[.L50]+[.O50]" office:value-type="float" office:value="616.5" calcext:value-type="float">
            <text:p><text:s/>616.50 </text:p>
          </table:table-cell>
          <table:table-cell table:style-name="ce75" table:formula="of:=TRUNC(((([.$P50])/(1-[.$M$14]))-([.$P50]));1)+(IF(MOD(((([.$P50])/(1-[.$M$14]))-([.$P50]))*100; 10)&gt;=5; 5; 0)/100)" office:value-type="float" office:value="0" calcext:value-type="float">
            <text:p><text:s/>- <text:s text:c="2"/></text:p>
          </table:table-cell>
          <table:table-cell table:style-name="ce97" table:formula="of:=[.Q50]+[.P50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4"/>
          <table:table-cell table:style-name="ce6" table:number-columns-repeated="2"/>
          <table:table-cell table:style-name="ce118" table:number-columns-repeated="7"/>
          <table:table-cell table:style-name="ce124" table:formula="of:=[.AG49]+30" office:value-type="date" office:date-value="2023-01-14" calcext:value-type="date">
            <text:p>14/01/2023</text:p>
          </table:table-cell>
          <table:table-cell table:style-name="ce119" table:formula="of:=[.AH49]+1" office:value-type="float" office:value="20" calcext:value-type="float">
            <text:p>20</text:p>
          </table:table-cell>
          <table:table-cell table:style-name="ce127" table:formula="of:=1/POWER(1+[.$CC$32];IF([.$CL$23]=3;[.$CX50];[.$AO50]))" office:value-type="float" office:value="0.718935941572674" calcext:value-type="float">
            <text:p><text:s/>0.719 </text:p>
          </table:table-cell>
          <table:table-cell table:style-name="ce127" table:formula="of:=IF([.$AH50]&lt;=[.$CK$32];0;1/POWER(1+[.$CC$32];[.$CV50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0]=0;[.$AJ49]=0);0;[.$AI50])" office:value-type="string" office:string-value="" calcext:value-type="error">
            <text:p>#N/D</text:p>
          </table:table-cell>
          <table:table-cell table:style-name="ce130" table:formula="of:=IF([.$AV$28]=1;[.AW50];IF([.$AV$28]=2;[.AY50];IF([.$AV$28]=3;[.BA50];[.BC50])))" office:value-type="float" office:value="1" calcext:value-type="float">
            <text:p>01</text:p>
          </table:table-cell>
          <table:table-cell table:style-name="ce130" table:formula="of:=IF([.$AV$28]=1;[.AX50];IF([.$AV$28]=2;[.AZ50];IF([.$AV$28]=3;[.BB50];[.BD50])))" office:value-type="float" office:value="2023" calcext:value-type="float">
            <text:p>2023</text:p>
          </table:table-cell>
          <table:table-cell table:style-name="ce134" table:formula="of:=[.CV50]-[.CV49]" office:value-type="float" office:value="29" calcext:value-type="float">
            <text:p><text:s/>29 </text:p>
          </table:table-cell>
          <table:table-cell table:style-name="ce134" table:formula="of:=IF([.$CN$23]=2;[.CX50];[.CV50]-[.$G$12])" office:value-type="float" office:value="610" calcext:value-type="float">
            <text:p><text:s/>610 </text:p>
          </table:table-cell>
          <table:table-cell table:style-name="ce136" table:formula="of:=IF([.$AV$28]=1;&quot;&quot;;DATE([.AM51];[.AL51];1)-1)" office:value-type="date" office:date-value="2023-01-31" calcext:value-type="date">
            <text:p>31/01/2023</text:p>
          </table:table-cell>
          <table:table-cell table:style-name="ce136" table:formula="of:=IF(AND([.$CL$23]=3;[.$O$10]&gt;=[.$AH50]);[.$G$12];IF(AND([.$CL$23]=3;[.$CN$23]=2);[.AG50];IF([.$AV$28]=1;[.$AW50];IF([.$CN$23]=1;DATE([.AM50];[.AL50];[.$G$14]);IF([.$AV$28]=2;[.AS49]+30;IF([.$AV$28]=3;[.AS49]+60;[.AS49]+90))))))" office:value-type="date" office:date-value="2023-01-24" calcext:value-type="date">
            <text:p>24/01/2023</text:p>
          </table:table-cell>
          <table:table-cell table:style-name="ce140" table:formula="of:=[.$AQ50]+IF(AND(DAY([.$AQ50])=27;MONTH([.$AQ50])=7);3;IF(AND(WEEKDAY([.$AQ50])=5;ISERROR(VLOOKUP([.$AQ50]+1;[$Factores.$A:.$A];1;0))=FALSE());4;IF(OR(WEEKDAY([.$AQ50])=1;ISERROR(VLOOKUP([.$AQ50];[$Factores.$A:.$A];1;0))=FALSE());1;IF(WEEKDAY([.$AQ50])=7;2;0))))" office:value-type="date" office:date-value="2023-01-24" calcext:value-type="date">
            <text:p>24/01/2023</text:p>
          </table:table-cell>
          <table:table-cell table:style-name="ce140" office:value-type="date" office:date-value="2023-01-24" calcext:value-type="date">
            <text:p>24/01/2023</text:p>
          </table:table-cell>
          <table:table-cell table:style-name="ce126" table:formula="of:=[.P50]/POWER(1+[.$AT$26];[.AO50])" office:value-type="float" office:value="487.597725871649" calcext:value-type="float">
            <text:p><text:s/>487.60 </text:p>
          </table:table-cell>
          <table:table-cell table:style-name="ce148"/>
          <table:table-cell table:style-name="ce153"/>
          <table:table-cell table:style-name="ce136" office:value-type="date" office:date-value="2022-03-24" calcext:value-type="date">
            <text:p>24/03/2022</text:p>
          </table:table-cell>
          <table:table-cell table:style-name="ce160"/>
          <table:table-cell table:style-name="ce162" table:formula="of:=IF([.AY49]&lt;12;[.AY49]+1;[.AY49]+1-12)" office:value-type="float" office:value="1" calcext:value-type="float">
            <text:p>01</text:p>
          </table:table-cell>
          <table:table-cell table:style-name="ce163" table:formula="of:=IF([.AY49]=12;[.AZ49]+1;[.AZ49])" office:value-type="float" office:value="2023" calcext:value-type="float">
            <text:p>2023</text:p>
          </table:table-cell>
          <table:table-cell table:style-name="ce162" table:formula="of:=IF([.BA49]&lt;=10;[.BA49]+2;IF([.BA49]=11;1;IF([.BA49]=12;2;IF([.BA49]=13;3;4))))" office:value-type="float" office:value="9" calcext:value-type="float">
            <text:p>09</text:p>
          </table:table-cell>
          <table:table-cell table:style-name="ce163" table:formula="of:=IF([.BA49]&gt;=11;[.BB49]+1;[.BB49])" office:value-type="float" office:value="2024" calcext:value-type="float">
            <text:p>2024</text:p>
          </table:table-cell>
          <table:table-cell table:style-name="ce162" table:formula="of:=IF([.BC49]&lt;=9;[.BC49]+3;IF([.BC49]=10;1;IF([.BC49]=11;2;IF([.BC49]=12;3;4))))" office:value-type="float" office:value="5" calcext:value-type="float">
            <text:p>05</text:p>
          </table:table-cell>
          <table:table-cell table:style-name="ce163" table:formula="of:=IF([.BC49]&gt;=10;[.BD49]+1;[.BD49])" office:value-type="float" office:value="2026" calcext:value-type="float">
            <text:p>2026</text:p>
          </table:table-cell>
          <table:table-cell table:style-name="ce166" table:formula="of:=DATE([.AZ50];[.AY50];[.$G$14])" office:value-type="date" office:date-value="2023-01-24" calcext:value-type="date">
            <text:p>24/01/2023</text:p>
          </table:table-cell>
          <table:table-cell table:style-name="ce166" table:formula="of:=[.$BE50]+IF(OR(WEEKDAY([.$BE50])=1;ISERROR(VLOOKUP([.$BE50];[$Factores.$A:.$A];1;0))=FALSE());1;IF(WEEKDAY([.$BE50])=7;2;0))" office:value-type="date" office:date-value="2023-01-24" calcext:value-type="date">
            <text:p>24/01/2023</text:p>
          </table:table-cell>
          <table:table-cell table:style-name="ce166" table:formula="of:=IF(AND(DAY([.$BE50])=27;WEEKDAY([.$BE50])=1);[.$BE50]-2;IF(AND(DAY([.$BE50])=27;WEEKDAY([.$BE50])=7);[.$BE50]-1;IF(AND(DAY([.$BE50])=26;WEEKDAY([.$BE50])=1);[.$BE50]-2;IF(AND(DAY([.$BE50])=26;WEEKDAY([.$BE50])=7);[.$BE50]-1;IF(DAY([.$BF50])=15;[.$BF50]+2;IF(DAY([.$BF50])=16;[.$BF50]+1;[.$BF50]))))))" office:value-type="date" office:date-value="2023-01-24" calcext:value-type="date">
            <text:p>24/01/2023</text:p>
          </table:table-cell>
          <table:table-cell table:style-name="ce118" table:number-columns-repeated="33"/>
          <table:table-cell table:style-name="ce119" table:formula="of:=[.CO49]+1" office:value-type="float" office:value="20" calcext:value-type="float">
            <text:p>20</text:p>
          </table:table-cell>
          <table:table-cell table:style-name="ce119"/>
          <table:table-cell table:style-name="ce187" table:formula="of:=[.CS49]+30" office:value-type="date" office:date-value="2023-01-22" calcext:value-type="date">
            <text:p>22/01/2023</text:p>
          </table:table-cell>
          <table:table-cell table:style-name="ce187" table:formula="of:=[.$CQ50]+IF(WEEKDAY([.$CQ50])=7;2;IF(WEEKDAY([.$CQ50])=1;1;0))" office:value-type="date" office:date-value="2023-01-23" calcext:value-type="date">
            <text:p>23/01/2023</text:p>
          </table:table-cell>
          <table:table-cell table:style-name="ce187" table:formula="of:=[.$CR50]+IF(AND(WEEKDAY([.$CR50])=6; ISERROR(VLOOKUP([.$CR50];[$Factores.$A:.$A];1;0))=FALSE());3;0)" office:value-type="date" office:date-value="2023-01-23" calcext:value-type="date">
            <text:p>23/01/2023</text:p>
          </table:table-cell>
          <table:table-cell table:style-name="ce187" table:formula="of:=IF(AND([.$CL$23]=3;[.$O$10]&gt;=[.$CO50]);[.$G$12];[.$CS50])" office:value-type="date" office:date-value="2023-01-23" calcext:value-type="date">
            <text:p>23/01/2023</text:p>
          </table:table-cell>
          <table:table-cell table:style-name="ce119"/>
          <table:table-cell table:style-name="ce190" table:formula="of:=IF([.$CN$23]=1;IF(AND([.$CL$23]=3;[.CT50]=[.CT49]);[.$CT50];[.AS50]);IF(AND([.$CN$23]=2;[.$CL$23]=3);[.CT50];[.CS50]))" office:value-type="date" office:date-value="2023-01-24" calcext:value-type="date">
            <text:p>24/01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0]+1" office:value-type="float" office:value="21" calcext:value-type="float">
            <text:p>21</text:p>
          </table:table-cell>
          <table:table-cell table:style-name="ce48" office:value-type="date" office:date-value="2023-02-24" calcext:value-type="date">
            <text:p>24/02/2023</text:p>
          </table:table-cell>
          <table:table-cell table:style-name="ce59" table:formula="of:=[.H50]-[.K51]" office:value-type="float" office:value="-27564.3033333333" calcext:value-type="float" table:number-columns-spanned="3" table:number-rows-spanned="1">
            <text:p><text:s/>(27,564.30)</text:p>
          </table:table-cell>
          <table:covered-table-cell table:number-columns-repeated="2" table:style-name="ce59"/>
          <table:table-cell table:style-name="ce75" office:value-type="float" office:value="509.24" calcext:value-type="float">
            <text:p><text:s/>509.24 </text:p>
          </table:table-cell>
          <table:table-cell table:style-name="ce59" office:value-type="float" office:value="107.26" calcext:value-type="float" table:number-columns-spanned="3" table:number-rows-spanned="1">
            <text:p><text:s/>107.26 </text:p>
          </table:table-cell>
          <table:covered-table-cell table:number-columns-repeated="2" table:style-name="ce59"/>
          <table:table-cell table:style-name="ce75"/>
          <table:table-cell table:style-name="ce75" table:formula="of:=[.K51]+[.L51]+[.O51]" office:value-type="float" office:value="616.5" calcext:value-type="float">
            <text:p><text:s/>616.50 </text:p>
          </table:table-cell>
          <table:table-cell table:style-name="ce75" table:formula="of:=TRUNC(((([.$P51])/(1-[.$M$14]))-([.$P51]));1)+(IF(MOD(((([.$P51])/(1-[.$M$14]))-([.$P51]))*100; 10)&gt;=5; 5; 0)/100)" office:value-type="float" office:value="0" calcext:value-type="float">
            <text:p><text:s/>- <text:s text:c="2"/></text:p>
          </table:table-cell>
          <table:table-cell table:style-name="ce97" table:formula="of:=[.Q51]+[.P51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4"/>
          <table:table-cell table:style-name="ce6" table:number-columns-repeated="2"/>
          <table:table-cell table:style-name="ce118" table:number-columns-repeated="7"/>
          <table:table-cell table:style-name="ce124" table:formula="of:=[.AG50]+30" office:value-type="date" office:date-value="2023-02-13" calcext:value-type="date">
            <text:p>13/02/2023</text:p>
          </table:table-cell>
          <table:table-cell table:style-name="ce119" table:formula="of:=[.AH50]+1" office:value-type="float" office:value="21" calcext:value-type="float">
            <text:p>21</text:p>
          </table:table-cell>
          <table:table-cell table:style-name="ce127" table:formula="of:=1/POWER(1+[.$CC$32];IF([.$CL$23]=3;[.$CX51];[.$AO51]))" office:value-type="float" office:value="0.706980179703334" calcext:value-type="float">
            <text:p><text:s/>0.707 </text:p>
          </table:table-cell>
          <table:table-cell table:style-name="ce127" table:formula="of:=IF([.$AH51]&lt;=[.$CK$32];0;1/POWER(1+[.$CC$32];[.$CV51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1]=0;[.$AJ50]=0);0;[.$AI51])" office:value-type="string" office:string-value="" calcext:value-type="error">
            <text:p>#N/D</text:p>
          </table:table-cell>
          <table:table-cell table:style-name="ce130" table:formula="of:=IF([.$AV$28]=1;[.AW51];IF([.$AV$28]=2;[.AY51];IF([.$AV$28]=3;[.BA51];[.BC51])))" office:value-type="float" office:value="2" calcext:value-type="float">
            <text:p>02</text:p>
          </table:table-cell>
          <table:table-cell table:style-name="ce130" table:formula="of:=IF([.$AV$28]=1;[.AX51];IF([.$AV$28]=2;[.AZ51];IF([.$AV$28]=3;[.BB51];[.BD51])))" office:value-type="float" office:value="2023" calcext:value-type="float">
            <text:p>2023</text:p>
          </table:table-cell>
          <table:table-cell table:style-name="ce134" table:formula="of:=[.CV51]-[.CV50]" office:value-type="float" office:value="31" calcext:value-type="float">
            <text:p><text:s/>31 </text:p>
          </table:table-cell>
          <table:table-cell table:style-name="ce134" table:formula="of:=IF([.$CN$23]=2;[.CX51];[.CV51]-[.$G$12])" office:value-type="float" office:value="641" calcext:value-type="float">
            <text:p><text:s/>641 </text:p>
          </table:table-cell>
          <table:table-cell table:style-name="ce136" table:formula="of:=IF([.$AV$28]=1;&quot;&quot;;DATE([.AM52];[.AL52];1)-1)" office:value-type="date" office:date-value="2023-02-28" calcext:value-type="date">
            <text:p>28/02/2023</text:p>
          </table:table-cell>
          <table:table-cell table:style-name="ce136" table:formula="of:=IF(AND([.$CL$23]=3;[.$O$10]&gt;=[.$AH51]);[.$G$12];IF(AND([.$CL$23]=3;[.$CN$23]=2);[.AG51];IF([.$AV$28]=1;[.$AW51];IF([.$CN$23]=1;DATE([.AM51];[.AL51];[.$G$14]);IF([.$AV$28]=2;[.AS50]+30;IF([.$AV$28]=3;[.AS50]+60;[.AS50]+90))))))" office:value-type="date" office:date-value="2023-02-24" calcext:value-type="date">
            <text:p>24/02/2023</text:p>
          </table:table-cell>
          <table:table-cell table:style-name="ce140" table:formula="of:=[.$AQ51]+IF(AND(DAY([.$AQ51])=27;MONTH([.$AQ51])=7);3;IF(AND(WEEKDAY([.$AQ51])=5;ISERROR(VLOOKUP([.$AQ51]+1;[$Factores.$A:.$A];1;0))=FALSE());4;IF(OR(WEEKDAY([.$AQ51])=1;ISERROR(VLOOKUP([.$AQ51];[$Factores.$A:.$A];1;0))=FALSE());1;IF(WEEKDAY([.$AQ51])=7;2;0))))" office:value-type="date" office:date-value="2023-02-24" calcext:value-type="date">
            <text:p>24/02/2023</text:p>
          </table:table-cell>
          <table:table-cell table:style-name="ce140" office:value-type="date" office:date-value="2023-02-24" calcext:value-type="date">
            <text:p>24/02/2023</text:p>
          </table:table-cell>
          <table:table-cell table:style-name="ce126" table:formula="of:=[.P51]/POWER(1+[.$AT$26];[.AO51])" office:value-type="float" office:value="481.819752051937" calcext:value-type="float">
            <text:p><text:s/>481.82 </text:p>
          </table:table-cell>
          <table:table-cell table:style-name="ce148"/>
          <table:table-cell table:style-name="ce153"/>
          <table:table-cell table:style-name="ce136" table:formula="of:=[.AW50]+15" office:value-type="date" office:date-value="2022-04-08" calcext:value-type="date">
            <text:p>08/04/2022</text:p>
          </table:table-cell>
          <table:table-cell/>
          <table:table-cell table:style-name="ce162" table:formula="of:=IF([.AY50]&lt;12;[.AY50]+1;[.AY50]+1-12)" office:value-type="float" office:value="2" calcext:value-type="float">
            <text:p>02</text:p>
          </table:table-cell>
          <table:table-cell table:style-name="ce163" table:formula="of:=IF([.AY50]=12;[.AZ50]+1;[.AZ50])" office:value-type="float" office:value="2023" calcext:value-type="float">
            <text:p>2023</text:p>
          </table:table-cell>
          <table:table-cell table:style-name="ce162" table:formula="of:=IF([.BA50]&lt;=10;[.BA50]+2;IF([.BA50]=11;1;IF([.BA50]=12;2;IF([.BA50]=13;3;4))))" office:value-type="float" office:value="11" calcext:value-type="float">
            <text:p>11</text:p>
          </table:table-cell>
          <table:table-cell table:style-name="ce163" table:formula="of:=IF([.BA50]&gt;=11;[.BB50]+1;[.BB50])" office:value-type="float" office:value="2024" calcext:value-type="float">
            <text:p>2024</text:p>
          </table:table-cell>
          <table:table-cell table:style-name="ce162" table:formula="of:=IF([.BC50]&lt;=9;[.BC50]+3;IF([.BC50]=10;1;IF([.BC50]=11;2;IF([.BC50]=12;3;4))))" office:value-type="float" office:value="8" calcext:value-type="float">
            <text:p>08</text:p>
          </table:table-cell>
          <table:table-cell table:style-name="ce163" table:formula="of:=IF([.BC50]&gt;=10;[.BD50]+1;[.BD50])" office:value-type="float" office:value="2026" calcext:value-type="float">
            <text:p>2026</text:p>
          </table:table-cell>
          <table:table-cell table:style-name="ce166" table:formula="of:=DATE([.AZ51];[.AY51];[.$G$14])" office:value-type="date" office:date-value="2023-02-24" calcext:value-type="date">
            <text:p>24/02/2023</text:p>
          </table:table-cell>
          <table:table-cell table:style-name="ce166" table:formula="of:=[.$BE51]+IF(OR(WEEKDAY([.$BE51])=1;ISERROR(VLOOKUP([.$BE51];[$Factores.$A:.$A];1;0))=FALSE());1;IF(WEEKDAY([.$BE51])=7;2;0))" office:value-type="date" office:date-value="2023-02-24" calcext:value-type="date">
            <text:p>24/02/2023</text:p>
          </table:table-cell>
          <table:table-cell table:style-name="ce166" table:formula="of:=IF(AND(DAY([.$BE51])=27;WEEKDAY([.$BE51])=1);[.$BE51]-2;IF(AND(DAY([.$BE51])=27;WEEKDAY([.$BE51])=7);[.$BE51]-1;IF(AND(DAY([.$BE51])=26;WEEKDAY([.$BE51])=1);[.$BE51]-2;IF(AND(DAY([.$BE51])=26;WEEKDAY([.$BE51])=7);[.$BE51]-1;IF(DAY([.$BF51])=15;[.$BF51]+2;IF(DAY([.$BF51])=16;[.$BF51]+1;[.$BF51]))))))" office:value-type="date" office:date-value="2023-02-24" calcext:value-type="date">
            <text:p>24/02/2023</text:p>
          </table:table-cell>
          <table:table-cell table:style-name="ce118" table:number-columns-repeated="33"/>
          <table:table-cell table:style-name="ce119" table:formula="of:=[.CO50]+1" office:value-type="float" office:value="21" calcext:value-type="float">
            <text:p>21</text:p>
          </table:table-cell>
          <table:table-cell table:style-name="ce119"/>
          <table:table-cell table:style-name="ce187" table:formula="of:=[.CS50]+30" office:value-type="date" office:date-value="2023-02-22" calcext:value-type="date">
            <text:p>22/02/2023</text:p>
          </table:table-cell>
          <table:table-cell table:style-name="ce187" table:formula="of:=[.$CQ51]+IF(WEEKDAY([.$CQ51])=7;2;IF(WEEKDAY([.$CQ51])=1;1;0))" office:value-type="date" office:date-value="2023-02-22" calcext:value-type="date">
            <text:p>22/02/2023</text:p>
          </table:table-cell>
          <table:table-cell table:style-name="ce187" table:formula="of:=[.$CR51]+IF(AND(WEEKDAY([.$CR51])=6; ISERROR(VLOOKUP([.$CR51];[$Factores.$A:.$A];1;0))=FALSE());3;0)" office:value-type="date" office:date-value="2023-02-22" calcext:value-type="date">
            <text:p>22/02/2023</text:p>
          </table:table-cell>
          <table:table-cell table:style-name="ce187" table:formula="of:=IF(AND([.$CL$23]=3;[.$O$10]&gt;=[.$CO51]);[.$G$12];[.$CS51])" office:value-type="date" office:date-value="2023-02-22" calcext:value-type="date">
            <text:p>22/02/2023</text:p>
          </table:table-cell>
          <table:table-cell table:style-name="ce119"/>
          <table:table-cell table:style-name="ce190" table:formula="of:=IF([.$CN$23]=1;IF(AND([.$CL$23]=3;[.CT51]=[.CT50]);[.$CT51];[.AS51]);IF(AND([.$CN$23]=2;[.$CL$23]=3);[.CT51];[.CS51]))" office:value-type="date" office:date-value="2023-02-24" calcext:value-type="date">
            <text:p>24/02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1]+1" office:value-type="float" office:value="22" calcext:value-type="float">
            <text:p>22</text:p>
          </table:table-cell>
          <table:table-cell table:style-name="ce48" office:value-type="date" office:date-value="2023-03-24" calcext:value-type="date">
            <text:p>24/03/2023</text:p>
          </table:table-cell>
          <table:table-cell table:style-name="ce59" table:formula="of:=[.H51]-[.K52]" office:value-type="float" office:value="-28089.4933333333" calcext:value-type="float" table:number-columns-spanned="3" table:number-rows-spanned="1">
            <text:p><text:s/>(28,089.49)</text:p>
          </table:table-cell>
          <table:covered-table-cell table:number-columns-repeated="2" table:style-name="ce59"/>
          <table:table-cell table:style-name="ce75" office:value-type="float" office:value="525.19" calcext:value-type="float">
            <text:p><text:s/>525.19 </text:p>
          </table:table-cell>
          <table:table-cell table:style-name="ce59" office:value-type="float" office:value="91.31" calcext:value-type="float" table:number-columns-spanned="3" table:number-rows-spanned="1">
            <text:p><text:s/>91.31 </text:p>
          </table:table-cell>
          <table:covered-table-cell table:number-columns-repeated="2" table:style-name="ce59"/>
          <table:table-cell table:style-name="ce75"/>
          <table:table-cell table:style-name="ce75" table:formula="of:=[.K52]+[.L52]+[.O52]" office:value-type="float" office:value="616.5" calcext:value-type="float">
            <text:p><text:s/>616.50 </text:p>
          </table:table-cell>
          <table:table-cell table:style-name="ce75" table:formula="of:=TRUNC(((([.$P52])/(1-[.$M$14]))-([.$P52]));1)+(IF(MOD(((([.$P52])/(1-[.$M$14]))-([.$P52]))*100; 10)&gt;=5; 5; 0)/100)" office:value-type="float" office:value="0" calcext:value-type="float">
            <text:p><text:s/>- <text:s text:c="2"/></text:p>
          </table:table-cell>
          <table:table-cell table:style-name="ce97" table:formula="of:=[.Q52]+[.P52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1]+30" office:value-type="date" office:date-value="2023-03-15" calcext:value-type="date">
            <text:p>15/03/2023</text:p>
          </table:table-cell>
          <table:table-cell table:style-name="ce119" table:formula="of:=[.AH51]+1" office:value-type="float" office:value="22" calcext:value-type="float">
            <text:p>22</text:p>
          </table:table-cell>
          <table:table-cell table:style-name="ce127" table:formula="of:=1/POWER(1+[.$CC$32];IF([.$CL$23]=3;[.$CX52];[.$AO52]))" office:value-type="float" office:value="0.696352410844704" calcext:value-type="float">
            <text:p><text:s/>0.696 </text:p>
          </table:table-cell>
          <table:table-cell table:style-name="ce127" table:formula="of:=IF([.$AH52]&lt;=[.$CK$32];0;1/POWER(1+[.$CC$32];[.$CV52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2]=0;[.$AJ51]=0);0;[.$AI52])" office:value-type="string" office:string-value="" calcext:value-type="error">
            <text:p>#N/D</text:p>
          </table:table-cell>
          <table:table-cell table:style-name="ce130" table:formula="of:=IF([.$AV$28]=1;[.AW52];IF([.$AV$28]=2;[.AY52];IF([.$AV$28]=3;[.BA52];[.BC52])))" office:value-type="float" office:value="3" calcext:value-type="float">
            <text:p>03</text:p>
          </table:table-cell>
          <table:table-cell table:style-name="ce130" table:formula="of:=IF([.$AV$28]=1;[.AX52];IF([.$AV$28]=2;[.AZ52];IF([.$AV$28]=3;[.BB52];[.BD52])))" office:value-type="float" office:value="2023" calcext:value-type="float">
            <text:p>2023</text:p>
          </table:table-cell>
          <table:table-cell table:style-name="ce134" table:formula="of:=[.CV52]-[.CV51]" office:value-type="float" office:value="28" calcext:value-type="float">
            <text:p><text:s/>28 </text:p>
          </table:table-cell>
          <table:table-cell table:style-name="ce134" table:formula="of:=IF([.$CN$23]=2;[.CX52];[.CV52]-[.$G$12])" office:value-type="float" office:value="669" calcext:value-type="float">
            <text:p><text:s/>669 </text:p>
          </table:table-cell>
          <table:table-cell table:style-name="ce136" table:formula="of:=IF([.$AV$28]=1;&quot;&quot;;DATE([.AM53];[.AL53];1)-1)" office:value-type="date" office:date-value="2023-03-31" calcext:value-type="date">
            <text:p>31/03/2023</text:p>
          </table:table-cell>
          <table:table-cell table:style-name="ce136" table:formula="of:=IF(AND([.$CL$23]=3;[.$O$10]&gt;=[.$AH52]);[.$G$12];IF(AND([.$CL$23]=3;[.$CN$23]=2);[.AG52];IF([.$AV$28]=1;[.$AW52];IF([.$CN$23]=1;DATE([.AM52];[.AL52];[.$G$14]);IF([.$AV$28]=2;[.AS51]+30;IF([.$AV$28]=3;[.AS51]+60;[.AS51]+90))))))" office:value-type="date" office:date-value="2023-03-24" calcext:value-type="date">
            <text:p>24/03/2023</text:p>
          </table:table-cell>
          <table:table-cell table:style-name="ce140" table:formula="of:=[.$AQ52]+IF(AND(DAY([.$AQ52])=27;MONTH([.$AQ52])=7);3;IF(AND(WEEKDAY([.$AQ52])=5;ISERROR(VLOOKUP([.$AQ52]+1;[$Factores.$A:.$A];1;0))=FALSE());4;IF(OR(WEEKDAY([.$AQ52])=1;ISERROR(VLOOKUP([.$AQ52];[$Factores.$A:.$A];1;0))=FALSE());1;IF(WEEKDAY([.$AQ52])=7;2;0))))" office:value-type="date" office:date-value="2023-03-24" calcext:value-type="date">
            <text:p>24/03/2023</text:p>
          </table:table-cell>
          <table:table-cell table:style-name="ce140" office:value-type="date" office:date-value="2023-03-24" calcext:value-type="date">
            <text:p>24/03/2023</text:p>
          </table:table-cell>
          <table:table-cell table:style-name="ce126" table:formula="of:=[.P52]/POWER(1+[.$AT$26];[.AO52])" office:value-type="float" office:value="476.659809512057" calcext:value-type="float">
            <text:p><text:s/>476.66 </text:p>
          </table:table-cell>
          <table:table-cell table:style-name="ce148"/>
          <table:table-cell table:style-name="ce153"/>
          <table:table-cell table:style-name="ce136" office:value-type="date" office:date-value="2022-04-25" calcext:value-type="date">
            <text:p>25/04/2022</text:p>
          </table:table-cell>
          <table:table-cell/>
          <table:table-cell table:style-name="ce162" table:formula="of:=IF([.AY51]&lt;12;[.AY51]+1;[.AY51]+1-12)" office:value-type="float" office:value="3" calcext:value-type="float">
            <text:p>03</text:p>
          </table:table-cell>
          <table:table-cell table:style-name="ce163" table:formula="of:=IF([.AY51]=12;[.AZ51]+1;[.AZ51])" office:value-type="float" office:value="2023" calcext:value-type="float">
            <text:p>2023</text:p>
          </table:table-cell>
          <table:table-cell table:style-name="ce162" table:formula="of:=IF([.BA51]&lt;=10;[.BA51]+2;IF([.BA51]=11;1;IF([.BA51]=12;2;IF([.BA51]=13;3;4))))" office:value-type="float" office:value="1" calcext:value-type="float">
            <text:p>01</text:p>
          </table:table-cell>
          <table:table-cell table:style-name="ce163" table:formula="of:=IF([.BA51]&gt;=11;[.BB51]+1;[.BB51])" office:value-type="float" office:value="2025" calcext:value-type="float">
            <text:p>2025</text:p>
          </table:table-cell>
          <table:table-cell table:style-name="ce162" table:formula="of:=IF([.BC51]&lt;=9;[.BC51]+3;IF([.BC51]=10;1;IF([.BC51]=11;2;IF([.BC51]=12;3;4))))" office:value-type="float" office:value="11" calcext:value-type="float">
            <text:p>11</text:p>
          </table:table-cell>
          <table:table-cell table:style-name="ce163" table:formula="of:=IF([.BC51]&gt;=10;[.BD51]+1;[.BD51])" office:value-type="float" office:value="2026" calcext:value-type="float">
            <text:p>2026</text:p>
          </table:table-cell>
          <table:table-cell table:style-name="ce166" table:formula="of:=DATE([.AZ52];[.AY52];[.$G$14])" office:value-type="date" office:date-value="2023-03-24" calcext:value-type="date">
            <text:p>24/03/2023</text:p>
          </table:table-cell>
          <table:table-cell table:style-name="ce166" table:formula="of:=[.$BE52]+IF(OR(WEEKDAY([.$BE52])=1;ISERROR(VLOOKUP([.$BE52];[$Factores.$A:.$A];1;0))=FALSE());1;IF(WEEKDAY([.$BE52])=7;2;0))" office:value-type="date" office:date-value="2023-03-24" calcext:value-type="date">
            <text:p>24/03/2023</text:p>
          </table:table-cell>
          <table:table-cell table:style-name="ce166" table:formula="of:=IF(AND(DAY([.$BE52])=27;WEEKDAY([.$BE52])=1);[.$BE52]-2;IF(AND(DAY([.$BE52])=27;WEEKDAY([.$BE52])=7);[.$BE52]-1;IF(AND(DAY([.$BE52])=26;WEEKDAY([.$BE52])=1);[.$BE52]-2;IF(AND(DAY([.$BE52])=26;WEEKDAY([.$BE52])=7);[.$BE52]-1;IF(DAY([.$BF52])=15;[.$BF52]+2;IF(DAY([.$BF52])=16;[.$BF52]+1;[.$BF52]))))))" office:value-type="date" office:date-value="2023-03-24" calcext:value-type="date">
            <text:p>24/03/2023</text:p>
          </table:table-cell>
          <table:table-cell table:style-name="ce118" table:number-columns-repeated="33"/>
          <table:table-cell table:style-name="ce119" table:formula="of:=[.CO51]+1" office:value-type="float" office:value="22" calcext:value-type="float">
            <text:p>22</text:p>
          </table:table-cell>
          <table:table-cell table:style-name="ce119"/>
          <table:table-cell table:style-name="ce187" table:formula="of:=[.CS51]+30" office:value-type="date" office:date-value="2023-03-24" calcext:value-type="date">
            <text:p>24/03/2023</text:p>
          </table:table-cell>
          <table:table-cell table:style-name="ce187" table:formula="of:=[.$CQ52]+IF(WEEKDAY([.$CQ52])=7;2;IF(WEEKDAY([.$CQ52])=1;1;0))" office:value-type="date" office:date-value="2023-03-24" calcext:value-type="date">
            <text:p>24/03/2023</text:p>
          </table:table-cell>
          <table:table-cell table:style-name="ce187" table:formula="of:=[.$CR52]+IF(AND(WEEKDAY([.$CR52])=6; ISERROR(VLOOKUP([.$CR52];[$Factores.$A:.$A];1;0))=FALSE());3;0)" office:value-type="date" office:date-value="2023-03-24" calcext:value-type="date">
            <text:p>24/03/2023</text:p>
          </table:table-cell>
          <table:table-cell table:style-name="ce187" table:formula="of:=IF(AND([.$CL$23]=3;[.$O$10]&gt;=[.$CO52]);[.$G$12];[.$CS52])" office:value-type="date" office:date-value="2023-03-24" calcext:value-type="date">
            <text:p>24/03/2023</text:p>
          </table:table-cell>
          <table:table-cell table:style-name="ce119"/>
          <table:table-cell table:style-name="ce190" table:formula="of:=IF([.$CN$23]=1;IF(AND([.$CL$23]=3;[.CT52]=[.CT51]);[.$CT52];[.AS52]);IF(AND([.$CN$23]=2;[.$CL$23]=3);[.CT52];[.CS52]))" office:value-type="date" office:date-value="2023-03-24" calcext:value-type="date">
            <text:p>24/03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2]+1" office:value-type="float" office:value="23" calcext:value-type="float">
            <text:p>23</text:p>
          </table:table-cell>
          <table:table-cell table:style-name="ce48" office:value-type="date" office:date-value="2023-04-24" calcext:value-type="date">
            <text:p>24/04/2023</text:p>
          </table:table-cell>
          <table:table-cell table:style-name="ce59" table:formula="of:=[.H52]-[.K53]" office:value-type="float" office:value="-28611.1333333333" calcext:value-type="float" table:number-columns-spanned="3" table:number-rows-spanned="1">
            <text:p><text:s/>(28,611.13)</text:p>
          </table:table-cell>
          <table:covered-table-cell table:number-columns-repeated="2" table:style-name="ce59"/>
          <table:table-cell table:style-name="ce75" office:value-type="float" office:value="521.64" calcext:value-type="float">
            <text:p><text:s/>521.64 </text:p>
          </table:table-cell>
          <table:table-cell table:style-name="ce59" office:value-type="float" office:value="94.86" calcext:value-type="float" table:number-columns-spanned="3" table:number-rows-spanned="1">
            <text:p><text:s/>94.86 </text:p>
          </table:table-cell>
          <table:covered-table-cell table:number-columns-repeated="2" table:style-name="ce59"/>
          <table:table-cell table:style-name="ce75"/>
          <table:table-cell table:style-name="ce75" table:formula="of:=[.K53]+[.L53]+[.O53]" office:value-type="float" office:value="616.5" calcext:value-type="float">
            <text:p><text:s/>616.50 </text:p>
          </table:table-cell>
          <table:table-cell table:style-name="ce75" table:formula="of:=TRUNC(((([.$P53])/(1-[.$M$14]))-([.$P53]));1)+(IF(MOD(((([.$P53])/(1-[.$M$14]))-([.$P53]))*100; 10)&gt;=5; 5; 0)/100)" office:value-type="float" office:value="0" calcext:value-type="float">
            <text:p><text:s/>- <text:s text:c="2"/></text:p>
          </table:table-cell>
          <table:table-cell table:style-name="ce97" table:formula="of:=[.Q53]+[.P53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2]+30" office:value-type="date" office:date-value="2023-04-14" calcext:value-type="date">
            <text:p>14/04/2023</text:p>
          </table:table-cell>
          <table:table-cell table:style-name="ce119" table:formula="of:=[.AH52]+1" office:value-type="float" office:value="23" calcext:value-type="float">
            <text:p>23</text:p>
          </table:table-cell>
          <table:table-cell table:style-name="ce127" table:formula="of:=1/POWER(1+[.$CC$32];IF([.$CL$23]=3;[.$CX53];[.$AO53]))" office:value-type="float" office:value="0.684772208604448" calcext:value-type="float">
            <text:p><text:s/>0.685 </text:p>
          </table:table-cell>
          <table:table-cell table:style-name="ce127" table:formula="of:=IF([.$AH53]&lt;=[.$CK$32];0;1/POWER(1+[.$CC$32];[.$CV53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3]=0;[.$AJ52]=0);0;[.$AI53])" office:value-type="string" office:string-value="" calcext:value-type="error">
            <text:p>#N/D</text:p>
          </table:table-cell>
          <table:table-cell table:style-name="ce130" table:formula="of:=IF([.$AV$28]=1;[.AW53];IF([.$AV$28]=2;[.AY53];IF([.$AV$28]=3;[.BA53];[.BC53])))" office:value-type="float" office:value="4" calcext:value-type="float">
            <text:p>04</text:p>
          </table:table-cell>
          <table:table-cell table:style-name="ce130" table:formula="of:=IF([.$AV$28]=1;[.AX53];IF([.$AV$28]=2;[.AZ53];IF([.$AV$28]=3;[.BB53];[.BD53])))" office:value-type="float" office:value="2023" calcext:value-type="float">
            <text:p>2023</text:p>
          </table:table-cell>
          <table:table-cell table:style-name="ce134" table:formula="of:=[.CV53]-[.CV52]" office:value-type="float" office:value="31" calcext:value-type="float">
            <text:p><text:s/>31 </text:p>
          </table:table-cell>
          <table:table-cell table:style-name="ce134" table:formula="of:=IF([.$CN$23]=2;[.CX53];[.CV53]-[.$G$12])" office:value-type="float" office:value="700" calcext:value-type="float">
            <text:p><text:s/>700 </text:p>
          </table:table-cell>
          <table:table-cell table:style-name="ce136" table:formula="of:=IF([.$AV$28]=1;&quot;&quot;;DATE([.AM54];[.AL54];1)-1)" office:value-type="date" office:date-value="2023-04-30" calcext:value-type="date">
            <text:p>30/04/2023</text:p>
          </table:table-cell>
          <table:table-cell table:style-name="ce136" table:formula="of:=IF(AND([.$CL$23]=3;[.$O$10]&gt;=[.$AH53]);[.$G$12];IF(AND([.$CL$23]=3;[.$CN$23]=2);[.AG53];IF([.$AV$28]=1;[.$AW53];IF([.$CN$23]=1;DATE([.AM53];[.AL53];[.$G$14]);IF([.$AV$28]=2;[.AS52]+30;IF([.$AV$28]=3;[.AS52]+60;[.AS52]+90))))))" office:value-type="date" office:date-value="2023-04-24" calcext:value-type="date">
            <text:p>24/04/2023</text:p>
          </table:table-cell>
          <table:table-cell table:style-name="ce140" table:formula="of:=[.$AQ53]+IF(AND(DAY([.$AQ53])=27;MONTH([.$AQ53])=7);3;IF(AND(WEEKDAY([.$AQ53])=5;ISERROR(VLOOKUP([.$AQ53]+1;[$Factores.$A:.$A];1;0))=FALSE());4;IF(OR(WEEKDAY([.$AQ53])=1;ISERROR(VLOOKUP([.$AQ53];[$Factores.$A:.$A];1;0))=FALSE());1;IF(WEEKDAY([.$AQ53])=7;2;0))))" office:value-type="date" office:date-value="2023-04-24" calcext:value-type="date">
            <text:p>24/04/2023</text:p>
          </table:table-cell>
          <table:table-cell table:style-name="ce140" office:value-type="date" office:date-value="2023-04-24" calcext:value-type="date">
            <text:p>24/04/2023</text:p>
          </table:table-cell>
          <table:table-cell table:style-name="ce126" table:formula="of:=[.P53]/POWER(1+[.$AT$26];[.AO53])" office:value-type="float" office:value="471.011448672502" calcext:value-type="float">
            <text:p><text:s/>471.01 </text:p>
          </table:table-cell>
          <table:table-cell table:style-name="ce148"/>
          <table:table-cell table:style-name="ce153"/>
          <table:table-cell table:style-name="ce136" table:formula="of:=[.AW52]+15" office:value-type="date" office:date-value="2022-05-10" calcext:value-type="date">
            <text:p>10/05/2022</text:p>
          </table:table-cell>
          <table:table-cell/>
          <table:table-cell table:style-name="ce162" table:formula="of:=IF([.AY52]&lt;12;[.AY52]+1;[.AY52]+1-12)" office:value-type="float" office:value="4" calcext:value-type="float">
            <text:p>04</text:p>
          </table:table-cell>
          <table:table-cell table:style-name="ce163" table:formula="of:=IF([.AY52]=12;[.AZ52]+1;[.AZ52])" office:value-type="float" office:value="2023" calcext:value-type="float">
            <text:p>2023</text:p>
          </table:table-cell>
          <table:table-cell table:style-name="ce162" table:formula="of:=IF([.BA52]&lt;=10;[.BA52]+2;IF([.BA52]=11;1;IF([.BA52]=12;2;IF([.BA52]=13;3;4))))" office:value-type="float" office:value="3" calcext:value-type="float">
            <text:p>03</text:p>
          </table:table-cell>
          <table:table-cell table:style-name="ce163" table:formula="of:=IF([.BA52]&gt;=11;[.BB52]+1;[.BB52])" office:value-type="float" office:value="2025" calcext:value-type="float">
            <text:p>2025</text:p>
          </table:table-cell>
          <table:table-cell table:style-name="ce162" table:formula="of:=IF([.BC52]&lt;=9;[.BC52]+3;IF([.BC52]=10;1;IF([.BC52]=11;2;IF([.BC52]=12;3;4))))" office:value-type="float" office:value="2" calcext:value-type="float">
            <text:p>02</text:p>
          </table:table-cell>
          <table:table-cell table:style-name="ce163" table:formula="of:=IF([.BC52]&gt;=10;[.BD52]+1;[.BD52])" office:value-type="float" office:value="2027" calcext:value-type="float">
            <text:p>2027</text:p>
          </table:table-cell>
          <table:table-cell table:style-name="ce166" table:formula="of:=DATE([.AZ53];[.AY53];[.$G$14])" office:value-type="date" office:date-value="2023-04-24" calcext:value-type="date">
            <text:p>24/04/2023</text:p>
          </table:table-cell>
          <table:table-cell table:style-name="ce166" table:formula="of:=[.$BE53]+IF(OR(WEEKDAY([.$BE53])=1;ISERROR(VLOOKUP([.$BE53];[$Factores.$A:.$A];1;0))=FALSE());1;IF(WEEKDAY([.$BE53])=7;2;0))" office:value-type="date" office:date-value="2023-04-24" calcext:value-type="date">
            <text:p>24/04/2023</text:p>
          </table:table-cell>
          <table:table-cell table:style-name="ce166" table:formula="of:=IF(AND(DAY([.$BE53])=27;WEEKDAY([.$BE53])=1);[.$BE53]-2;IF(AND(DAY([.$BE53])=27;WEEKDAY([.$BE53])=7);[.$BE53]-1;IF(AND(DAY([.$BE53])=26;WEEKDAY([.$BE53])=1);[.$BE53]-2;IF(AND(DAY([.$BE53])=26;WEEKDAY([.$BE53])=7);[.$BE53]-1;IF(DAY([.$BF53])=15;[.$BF53]+2;IF(DAY([.$BF53])=16;[.$BF53]+1;[.$BF53]))))))" office:value-type="date" office:date-value="2023-04-24" calcext:value-type="date">
            <text:p>24/04/2023</text:p>
          </table:table-cell>
          <table:table-cell table:style-name="ce118" table:number-columns-repeated="33"/>
          <table:table-cell table:style-name="ce119" table:formula="of:=[.CO52]+1" office:value-type="float" office:value="23" calcext:value-type="float">
            <text:p>23</text:p>
          </table:table-cell>
          <table:table-cell table:style-name="ce119"/>
          <table:table-cell table:style-name="ce187" table:formula="of:=[.CS52]+30" office:value-type="date" office:date-value="2023-04-23" calcext:value-type="date">
            <text:p>23/04/2023</text:p>
          </table:table-cell>
          <table:table-cell table:style-name="ce187" table:formula="of:=[.$CQ53]+IF(WEEKDAY([.$CQ53])=7;2;IF(WEEKDAY([.$CQ53])=1;1;0))" office:value-type="date" office:date-value="2023-04-24" calcext:value-type="date">
            <text:p>24/04/2023</text:p>
          </table:table-cell>
          <table:table-cell table:style-name="ce187" table:formula="of:=[.$CR53]+IF(AND(WEEKDAY([.$CR53])=6; ISERROR(VLOOKUP([.$CR53];[$Factores.$A:.$A];1;0))=FALSE());3;0)" office:value-type="date" office:date-value="2023-04-24" calcext:value-type="date">
            <text:p>24/04/2023</text:p>
          </table:table-cell>
          <table:table-cell table:style-name="ce187" table:formula="of:=IF(AND([.$CL$23]=3;[.$O$10]&gt;=[.$CO53]);[.$G$12];[.$CS53])" office:value-type="date" office:date-value="2023-04-24" calcext:value-type="date">
            <text:p>24/04/2023</text:p>
          </table:table-cell>
          <table:table-cell table:style-name="ce119"/>
          <table:table-cell table:style-name="ce190" table:formula="of:=IF([.$CN$23]=1;IF(AND([.$CL$23]=3;[.CT53]=[.CT52]);[.$CT53];[.AS53]);IF(AND([.$CN$23]=2;[.$CL$23]=3);[.CT53];[.CS53]))" office:value-type="date" office:date-value="2023-04-24" calcext:value-type="date">
            <text:p>24/04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3]+1" office:value-type="float" office:value="24" calcext:value-type="float">
            <text:p>24</text:p>
          </table:table-cell>
          <table:table-cell table:style-name="ce48" office:value-type="date" office:date-value="2023-05-24" calcext:value-type="date">
            <text:p>24/05/2023</text:p>
          </table:table-cell>
          <table:table-cell table:style-name="ce59" table:formula="of:=[.H53]-[.K54]" office:value-type="float" office:value="-29141.9033333333" calcext:value-type="float" table:number-columns-spanned="3" table:number-rows-spanned="1">
            <text:p><text:s/>(29,141.90)</text:p>
          </table:table-cell>
          <table:covered-table-cell table:number-columns-repeated="2" table:style-name="ce59"/>
          <table:table-cell table:style-name="ce75" office:value-type="float" office:value="530.77" calcext:value-type="float">
            <text:p><text:s/>530.77 </text:p>
          </table:table-cell>
          <table:table-cell table:style-name="ce59" office:value-type="float" office:value="85.73" calcext:value-type="float" table:number-columns-spanned="3" table:number-rows-spanned="1">
            <text:p><text:s/>85.73 </text:p>
          </table:table-cell>
          <table:covered-table-cell table:number-columns-repeated="2" table:style-name="ce59"/>
          <table:table-cell table:style-name="ce75"/>
          <table:table-cell table:style-name="ce75" table:formula="of:=[.K54]+[.L54]+[.O54]" office:value-type="float" office:value="616.5" calcext:value-type="float">
            <text:p><text:s/>616.50 </text:p>
          </table:table-cell>
          <table:table-cell table:style-name="ce75" table:formula="of:=TRUNC(((([.$P54])/(1-[.$M$14]))-([.$P54]));1)+(IF(MOD(((([.$P54])/(1-[.$M$14]))-([.$P54]))*100; 10)&gt;=5; 5; 0)/100)" office:value-type="float" office:value="0" calcext:value-type="float">
            <text:p><text:s/>- <text:s text:c="2"/></text:p>
          </table:table-cell>
          <table:table-cell table:style-name="ce97" table:formula="of:=[.Q54]+[.P54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3]+30" office:value-type="date" office:date-value="2023-05-14" calcext:value-type="date">
            <text:p>14/05/2023</text:p>
          </table:table-cell>
          <table:table-cell table:style-name="ce119" table:formula="of:=[.AH53]+1" office:value-type="float" office:value="24" calcext:value-type="float">
            <text:p>24</text:p>
          </table:table-cell>
          <table:table-cell table:style-name="ce127" table:formula="of:=1/POWER(1+[.$CC$32];IF([.$CL$23]=3;[.$CX54];[.$AO54]))" office:value-type="float" office:value="0.67374895264652" calcext:value-type="float">
            <text:p><text:s/>0.674 </text:p>
          </table:table-cell>
          <table:table-cell table:style-name="ce127" table:formula="of:=IF([.$AH54]&lt;=[.$CK$32];0;1/POWER(1+[.$CC$32];[.$CV54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4]=0;[.$AJ53]=0);0;[.$AI54])" office:value-type="string" office:string-value="" calcext:value-type="error">
            <text:p>#N/D</text:p>
          </table:table-cell>
          <table:table-cell table:style-name="ce130" table:formula="of:=IF([.$AV$28]=1;[.AW54];IF([.$AV$28]=2;[.AY54];IF([.$AV$28]=3;[.BA54];[.BC54])))" office:value-type="float" office:value="5" calcext:value-type="float">
            <text:p>05</text:p>
          </table:table-cell>
          <table:table-cell table:style-name="ce130" table:formula="of:=IF([.$AV$28]=1;[.AX54];IF([.$AV$28]=2;[.AZ54];IF([.$AV$28]=3;[.BB54];[.BD54])))" office:value-type="float" office:value="2023" calcext:value-type="float">
            <text:p>2023</text:p>
          </table:table-cell>
          <table:table-cell table:style-name="ce134" table:formula="of:=[.CV54]-[.CV53]" office:value-type="float" office:value="30" calcext:value-type="float">
            <text:p><text:s/>30 </text:p>
          </table:table-cell>
          <table:table-cell table:style-name="ce134" table:formula="of:=IF([.$CN$23]=2;[.CX54];[.CV54]-[.$G$12])" office:value-type="float" office:value="730" calcext:value-type="float">
            <text:p><text:s/>730 </text:p>
          </table:table-cell>
          <table:table-cell table:style-name="ce136" table:formula="of:=IF([.$AV$28]=1;&quot;&quot;;DATE([.AM55];[.AL55];1)-1)" office:value-type="date" office:date-value="2023-05-31" calcext:value-type="date">
            <text:p>31/05/2023</text:p>
          </table:table-cell>
          <table:table-cell table:style-name="ce136" table:formula="of:=IF(AND([.$CL$23]=3;[.$O$10]&gt;=[.$AH54]);[.$G$12];IF(AND([.$CL$23]=3;[.$CN$23]=2);[.AG54];IF([.$AV$28]=1;[.$AW54];IF([.$CN$23]=1;DATE([.AM54];[.AL54];[.$G$14]);IF([.$AV$28]=2;[.AS53]+30;IF([.$AV$28]=3;[.AS53]+60;[.AS53]+90))))))" office:value-type="date" office:date-value="2023-05-24" calcext:value-type="date">
            <text:p>24/05/2023</text:p>
          </table:table-cell>
          <table:table-cell table:style-name="ce140" table:formula="of:=[.$AQ54]+IF(AND(DAY([.$AQ54])=27;MONTH([.$AQ54])=7);3;IF(AND(WEEKDAY([.$AQ54])=5;ISERROR(VLOOKUP([.$AQ54]+1;[$Factores.$A:.$A];1;0))=FALSE());4;IF(OR(WEEKDAY([.$AQ54])=1;ISERROR(VLOOKUP([.$AQ54];[$Factores.$A:.$A];1;0))=FALSE());1;IF(WEEKDAY([.$AQ54])=7;2;0))))" office:value-type="date" office:date-value="2023-05-24" calcext:value-type="date">
            <text:p>24/05/2023</text:p>
          </table:table-cell>
          <table:table-cell table:style-name="ce140" office:value-type="date" office:date-value="2023-05-24" calcext:value-type="date">
            <text:p>24/05/2023</text:p>
          </table:table-cell>
          <table:table-cell table:style-name="ce126" table:formula="of:=[.P54]/POWER(1+[.$AT$26];[.AO54])" office:value-type="float" office:value="465.609029716564" calcext:value-type="float">
            <text:p><text:s/>465.61 </text:p>
          </table:table-cell>
          <table:table-cell table:style-name="ce148"/>
          <table:table-cell table:style-name="ce153"/>
          <table:table-cell table:style-name="ce136" office:value-type="date" office:date-value="2022-05-24" calcext:value-type="date">
            <text:p>24/05/2022</text:p>
          </table:table-cell>
          <table:table-cell/>
          <table:table-cell table:style-name="ce162" table:formula="of:=IF([.AY53]&lt;12;[.AY53]+1;[.AY53]+1-12)" office:value-type="float" office:value="5" calcext:value-type="float">
            <text:p>05</text:p>
          </table:table-cell>
          <table:table-cell table:style-name="ce163" table:formula="of:=IF([.AY53]=12;[.AZ53]+1;[.AZ53])" office:value-type="float" office:value="2023" calcext:value-type="float">
            <text:p>2023</text:p>
          </table:table-cell>
          <table:table-cell table:style-name="ce162" table:formula="of:=IF([.BA53]&lt;=10;[.BA53]+2;IF([.BA53]=11;1;IF([.BA53]=12;2;IF([.BA53]=13;3;4))))" office:value-type="float" office:value="5" calcext:value-type="float">
            <text:p>05</text:p>
          </table:table-cell>
          <table:table-cell table:style-name="ce163" table:formula="of:=IF([.BA53]&gt;=11;[.BB53]+1;[.BB53])" office:value-type="float" office:value="2025" calcext:value-type="float">
            <text:p>2025</text:p>
          </table:table-cell>
          <table:table-cell table:style-name="ce162" table:formula="of:=IF([.BC53]&lt;=9;[.BC53]+3;IF([.BC53]=10;1;IF([.BC53]=11;2;IF([.BC53]=12;3;4))))" office:value-type="float" office:value="5" calcext:value-type="float">
            <text:p>05</text:p>
          </table:table-cell>
          <table:table-cell table:style-name="ce163" table:formula="of:=IF([.BC53]&gt;=10;[.BD53]+1;[.BD53])" office:value-type="float" office:value="2027" calcext:value-type="float">
            <text:p>2027</text:p>
          </table:table-cell>
          <table:table-cell table:style-name="ce166" table:formula="of:=DATE([.AZ54];[.AY54];[.$G$14])" office:value-type="date" office:date-value="2023-05-24" calcext:value-type="date">
            <text:p>24/05/2023</text:p>
          </table:table-cell>
          <table:table-cell table:style-name="ce166" table:formula="of:=[.$BE54]+IF(OR(WEEKDAY([.$BE54])=1;ISERROR(VLOOKUP([.$BE54];[$Factores.$A:.$A];1;0))=FALSE());1;IF(WEEKDAY([.$BE54])=7;2;0))" office:value-type="date" office:date-value="2023-05-24" calcext:value-type="date">
            <text:p>24/05/2023</text:p>
          </table:table-cell>
          <table:table-cell table:style-name="ce166" table:formula="of:=IF(AND(DAY([.$BE54])=27;WEEKDAY([.$BE54])=1);[.$BE54]-2;IF(AND(DAY([.$BE54])=27;WEEKDAY([.$BE54])=7);[.$BE54]-1;IF(AND(DAY([.$BE54])=26;WEEKDAY([.$BE54])=1);[.$BE54]-2;IF(AND(DAY([.$BE54])=26;WEEKDAY([.$BE54])=7);[.$BE54]-1;IF(DAY([.$BF54])=15;[.$BF54]+2;IF(DAY([.$BF54])=16;[.$BF54]+1;[.$BF54]))))))" office:value-type="date" office:date-value="2023-05-24" calcext:value-type="date">
            <text:p>24/05/2023</text:p>
          </table:table-cell>
          <table:table-cell table:style-name="ce118" table:number-columns-repeated="33"/>
          <table:table-cell table:style-name="ce119" table:formula="of:=[.CO53]+1" office:value-type="float" office:value="24" calcext:value-type="float">
            <text:p>24</text:p>
          </table:table-cell>
          <table:table-cell table:style-name="ce119"/>
          <table:table-cell table:style-name="ce187" table:formula="of:=[.CS53]+30" office:value-type="date" office:date-value="2023-05-24" calcext:value-type="date">
            <text:p>24/05/2023</text:p>
          </table:table-cell>
          <table:table-cell table:style-name="ce187" table:formula="of:=[.$CQ54]+IF(WEEKDAY([.$CQ54])=7;2;IF(WEEKDAY([.$CQ54])=1;1;0))" office:value-type="date" office:date-value="2023-05-24" calcext:value-type="date">
            <text:p>24/05/2023</text:p>
          </table:table-cell>
          <table:table-cell table:style-name="ce187" table:formula="of:=[.$CR54]+IF(AND(WEEKDAY([.$CR54])=6; ISERROR(VLOOKUP([.$CR54];[$Factores.$A:.$A];1;0))=FALSE());3;0)" office:value-type="date" office:date-value="2023-05-24" calcext:value-type="date">
            <text:p>24/05/2023</text:p>
          </table:table-cell>
          <table:table-cell table:style-name="ce187" table:formula="of:=IF(AND([.$CL$23]=3;[.$O$10]&gt;=[.$CO54]);[.$G$12];[.$CS54])" office:value-type="date" office:date-value="2023-05-24" calcext:value-type="date">
            <text:p>24/05/2023</text:p>
          </table:table-cell>
          <table:table-cell table:style-name="ce119"/>
          <table:table-cell table:style-name="ce190" table:formula="of:=IF([.$CN$23]=1;IF(AND([.$CL$23]=3;[.CT54]=[.CT53]);[.$CT54];[.AS54]);IF(AND([.$CN$23]=2;[.$CL$23]=3);[.CT54];[.CS54]))" office:value-type="date" office:date-value="2023-05-24" calcext:value-type="date">
            <text:p>24/05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4]+1" office:value-type="float" office:value="25" calcext:value-type="float">
            <text:p>25</text:p>
          </table:table-cell>
          <table:table-cell table:style-name="ce48" office:value-type="date" office:date-value="2023-06-26" calcext:value-type="date">
            <text:p>26/06/2023</text:p>
          </table:table-cell>
          <table:table-cell table:style-name="ce59" table:formula="of:=[.H54]-[.K55]" office:value-type="float" office:value="-29670.8233333333" calcext:value-type="float" table:number-columns-spanned="3" table:number-rows-spanned="1">
            <text:p><text:s/>(29,670.82)</text:p>
          </table:table-cell>
          <table:covered-table-cell table:number-columns-repeated="2" table:style-name="ce59"/>
          <table:table-cell table:style-name="ce75" office:value-type="float" office:value="528.92" calcext:value-type="float">
            <text:p><text:s/>528.92 </text:p>
          </table:table-cell>
          <table:table-cell table:style-name="ce59" office:value-type="float" office:value="87.58" calcext:value-type="float" table:number-columns-spanned="3" table:number-rows-spanned="1">
            <text:p><text:s/>87.58 </text:p>
          </table:table-cell>
          <table:covered-table-cell table:number-columns-repeated="2" table:style-name="ce59"/>
          <table:table-cell table:style-name="ce75"/>
          <table:table-cell table:style-name="ce75" table:formula="of:=[.K55]+[.L55]+[.O55]" office:value-type="float" office:value="616.5" calcext:value-type="float">
            <text:p><text:s/>616.50 </text:p>
          </table:table-cell>
          <table:table-cell table:style-name="ce75" table:formula="of:=TRUNC(((([.$P55])/(1-[.$M$14]))-([.$P55]));1)+(IF(MOD(((([.$P55])/(1-[.$M$14]))-([.$P55]))*100; 10)&gt;=5; 5; 0)/100)" office:value-type="float" office:value="0" calcext:value-type="float">
            <text:p><text:s/>- <text:s text:c="2"/></text:p>
          </table:table-cell>
          <table:table-cell table:style-name="ce97" table:formula="of:=[.Q55]+[.P55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4]+30" office:value-type="date" office:date-value="2023-06-13" calcext:value-type="date">
            <text:p>13/06/2023</text:p>
          </table:table-cell>
          <table:table-cell table:style-name="ce119" table:formula="of:=[.AH54]+1" office:value-type="float" office:value="25" calcext:value-type="float">
            <text:p>25</text:p>
          </table:table-cell>
          <table:table-cell table:style-name="ce127" table:formula="of:=1/POWER(1+[.$CC$32];IF([.$CL$23]=3;[.$CX55];[.$AO55]))" office:value-type="float" office:value="0.661828214358635" calcext:value-type="float">
            <text:p><text:s/>0.662 </text:p>
          </table:table-cell>
          <table:table-cell table:style-name="ce127" table:formula="of:=IF([.$AH55]&lt;=[.$CK$32];0;1/POWER(1+[.$CC$32];[.$CV55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5]=0;[.$AJ54]=0);0;[.$AI55])" office:value-type="string" office:string-value="" calcext:value-type="error">
            <text:p>#N/D</text:p>
          </table:table-cell>
          <table:table-cell table:style-name="ce130" table:formula="of:=IF([.$AV$28]=1;[.AW55];IF([.$AV$28]=2;[.AY55];IF([.$AV$28]=3;[.BA55];[.BC55])))" office:value-type="float" office:value="6" calcext:value-type="float">
            <text:p>06</text:p>
          </table:table-cell>
          <table:table-cell table:style-name="ce130" table:formula="of:=IF([.$AV$28]=1;[.AX55];IF([.$AV$28]=2;[.AZ55];IF([.$AV$28]=3;[.BB55];[.BD55])))" office:value-type="float" office:value="2023" calcext:value-type="float">
            <text:p>2023</text:p>
          </table:table-cell>
          <table:table-cell table:style-name="ce134" table:formula="of:=[.CV55]-[.CV54]" office:value-type="float" office:value="33" calcext:value-type="float">
            <text:p><text:s/>33 </text:p>
          </table:table-cell>
          <table:table-cell table:style-name="ce134" table:formula="of:=IF([.$CN$23]=2;[.CX55];[.CV55]-[.$G$12])" office:value-type="float" office:value="763" calcext:value-type="float">
            <text:p><text:s/>763 </text:p>
          </table:table-cell>
          <table:table-cell table:style-name="ce136" table:formula="of:=IF([.$AV$28]=1;&quot;&quot;;DATE([.AM56];[.AL56];1)-1)" office:value-type="date" office:date-value="2023-06-30" calcext:value-type="date">
            <text:p>30/06/2023</text:p>
          </table:table-cell>
          <table:table-cell table:style-name="ce136" table:formula="of:=IF(AND([.$CL$23]=3;[.$O$10]&gt;=[.$AH55]);[.$G$12];IF(AND([.$CL$23]=3;[.$CN$23]=2);[.AG55];IF([.$AV$28]=1;[.$AW55];IF([.$CN$23]=1;DATE([.AM55];[.AL55];[.$G$14]);IF([.$AV$28]=2;[.AS54]+30;IF([.$AV$28]=3;[.AS54]+60;[.AS54]+90))))))" office:value-type="date" office:date-value="2023-06-24" calcext:value-type="date">
            <text:p>24/06/2023</text:p>
          </table:table-cell>
          <table:table-cell table:style-name="ce140" table:formula="of:=[.$AQ55]+IF(AND(DAY([.$AQ55])=27;MONTH([.$AQ55])=7);3;IF(AND(WEEKDAY([.$AQ55])=5;ISERROR(VLOOKUP([.$AQ55]+1;[$Factores.$A:.$A];1;0))=FALSE());4;IF(OR(WEEKDAY([.$AQ55])=1;ISERROR(VLOOKUP([.$AQ55];[$Factores.$A:.$A];1;0))=FALSE());1;IF(WEEKDAY([.$AQ55])=7;2;0))))" office:value-type="date" office:date-value="2023-06-26" calcext:value-type="date">
            <text:p>26/06/2023</text:p>
          </table:table-cell>
          <table:table-cell table:style-name="ce140" office:value-type="date" office:date-value="2023-06-26" calcext:value-type="date">
            <text:p>26/06/2023</text:p>
          </table:table-cell>
          <table:table-cell table:style-name="ce126" table:formula="of:=[.P55]/POWER(1+[.$AT$26];[.AO55])" office:value-type="float" office:value="459.737910776063" calcext:value-type="float">
            <text:p><text:s/>459.74 </text:p>
          </table:table-cell>
          <table:table-cell table:style-name="ce148"/>
          <table:table-cell table:style-name="ce153"/>
          <table:table-cell table:style-name="ce136" table:formula="of:=[.AW54]+15" office:value-type="date" office:date-value="2022-06-08" calcext:value-type="date">
            <text:p>08/06/2022</text:p>
          </table:table-cell>
          <table:table-cell/>
          <table:table-cell table:style-name="ce162" table:formula="of:=IF([.AY54]&lt;12;[.AY54]+1;[.AY54]+1-12)" office:value-type="float" office:value="6" calcext:value-type="float">
            <text:p>06</text:p>
          </table:table-cell>
          <table:table-cell table:style-name="ce163" table:formula="of:=IF([.AY54]=12;[.AZ54]+1;[.AZ54])" office:value-type="float" office:value="2023" calcext:value-type="float">
            <text:p>2023</text:p>
          </table:table-cell>
          <table:table-cell table:style-name="ce162" table:formula="of:=IF([.BA54]&lt;=10;[.BA54]+2;IF([.BA54]=11;1;IF([.BA54]=12;2;IF([.BA54]=13;3;4))))" office:value-type="float" office:value="7" calcext:value-type="float">
            <text:p>07</text:p>
          </table:table-cell>
          <table:table-cell table:style-name="ce163" table:formula="of:=IF([.BA54]&gt;=11;[.BB54]+1;[.BB54])" office:value-type="float" office:value="2025" calcext:value-type="float">
            <text:p>2025</text:p>
          </table:table-cell>
          <table:table-cell table:style-name="ce162" table:formula="of:=IF([.BC54]&lt;=9;[.BC54]+3;IF([.BC54]=10;1;IF([.BC54]=11;2;IF([.BC54]=12;3;4))))" office:value-type="float" office:value="8" calcext:value-type="float">
            <text:p>08</text:p>
          </table:table-cell>
          <table:table-cell table:style-name="ce163" table:formula="of:=IF([.BC54]&gt;=10;[.BD54]+1;[.BD54])" office:value-type="float" office:value="2027" calcext:value-type="float">
            <text:p>2027</text:p>
          </table:table-cell>
          <table:table-cell table:style-name="ce166" table:formula="of:=DATE([.AZ55];[.AY55];[.$G$14])" office:value-type="date" office:date-value="2023-06-24" calcext:value-type="date">
            <text:p>24/06/2023</text:p>
          </table:table-cell>
          <table:table-cell table:style-name="ce166" table:formula="of:=[.$BE55]+IF(OR(WEEKDAY([.$BE55])=1;ISERROR(VLOOKUP([.$BE55];[$Factores.$A:.$A];1;0))=FALSE());1;IF(WEEKDAY([.$BE55])=7;2;0))" office:value-type="date" office:date-value="2023-06-26" calcext:value-type="date">
            <text:p>26/06/2023</text:p>
          </table:table-cell>
          <table:table-cell table:style-name="ce166" table:formula="of:=IF(AND(DAY([.$BE55])=27;WEEKDAY([.$BE55])=1);[.$BE55]-2;IF(AND(DAY([.$BE55])=27;WEEKDAY([.$BE55])=7);[.$BE55]-1;IF(AND(DAY([.$BE55])=26;WEEKDAY([.$BE55])=1);[.$BE55]-2;IF(AND(DAY([.$BE55])=26;WEEKDAY([.$BE55])=7);[.$BE55]-1;IF(DAY([.$BF55])=15;[.$BF55]+2;IF(DAY([.$BF55])=16;[.$BF55]+1;[.$BF55]))))))" office:value-type="date" office:date-value="2023-06-26" calcext:value-type="date">
            <text:p>26/06/2023</text:p>
          </table:table-cell>
          <table:table-cell table:style-name="ce118" table:number-columns-repeated="33"/>
          <table:table-cell table:style-name="ce119" table:formula="of:=[.CO54]+1" office:value-type="float" office:value="25" calcext:value-type="float">
            <text:p>25</text:p>
          </table:table-cell>
          <table:table-cell table:style-name="ce119"/>
          <table:table-cell table:style-name="ce187" table:formula="of:=[.CS54]+30" office:value-type="date" office:date-value="2023-06-23" calcext:value-type="date">
            <text:p>23/06/2023</text:p>
          </table:table-cell>
          <table:table-cell table:style-name="ce187" table:formula="of:=[.$CQ55]+IF(WEEKDAY([.$CQ55])=7;2;IF(WEEKDAY([.$CQ55])=1;1;0))" office:value-type="date" office:date-value="2023-06-23" calcext:value-type="date">
            <text:p>23/06/2023</text:p>
          </table:table-cell>
          <table:table-cell table:style-name="ce187" table:formula="of:=[.$CR55]+IF(AND(WEEKDAY([.$CR55])=6; ISERROR(VLOOKUP([.$CR55];[$Factores.$A:.$A];1;0))=FALSE());3;0)" office:value-type="date" office:date-value="2023-06-23" calcext:value-type="date">
            <text:p>23/06/2023</text:p>
          </table:table-cell>
          <table:table-cell table:style-name="ce187" table:formula="of:=IF(AND([.$CL$23]=3;[.$O$10]&gt;=[.$CO55]);[.$G$12];[.$CS55])" office:value-type="date" office:date-value="2023-06-23" calcext:value-type="date">
            <text:p>23/06/2023</text:p>
          </table:table-cell>
          <table:table-cell table:style-name="ce119"/>
          <table:table-cell table:style-name="ce190" table:formula="of:=IF([.$CN$23]=1;IF(AND([.$CL$23]=3;[.CT55]=[.CT54]);[.$CT55];[.AS55]);IF(AND([.$CN$23]=2;[.$CL$23]=3);[.CT55];[.CS55]))" office:value-type="date" office:date-value="2023-06-26" calcext:value-type="date">
            <text:p>26/06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5]+1" office:value-type="float" office:value="26" calcext:value-type="float">
            <text:p>26</text:p>
          </table:table-cell>
          <table:table-cell table:style-name="ce48" office:value-type="date" office:date-value="2023-07-24" calcext:value-type="date">
            <text:p>24/07/2023</text:p>
          </table:table-cell>
          <table:table-cell table:style-name="ce59" table:formula="of:=[.H55]-[.K56]" office:value-type="float" office:value="-30218.8033333333" calcext:value-type="float" table:number-columns-spanned="3" table:number-rows-spanned="1">
            <text:p><text:s/>(30,218.80)</text:p>
          </table:table-cell>
          <table:covered-table-cell table:number-columns-repeated="2" table:style-name="ce59"/>
          <table:table-cell table:style-name="ce75" office:value-type="float" office:value="547.98" calcext:value-type="float">
            <text:p><text:s/>547.98 </text:p>
          </table:table-cell>
          <table:table-cell table:style-name="ce59" office:value-type="float" office:value="68.52" calcext:value-type="float" table:number-columns-spanned="3" table:number-rows-spanned="1">
            <text:p><text:s/>68.52 </text:p>
          </table:table-cell>
          <table:covered-table-cell table:number-columns-repeated="2" table:style-name="ce59"/>
          <table:table-cell table:style-name="ce75"/>
          <table:table-cell table:style-name="ce75" table:formula="of:=[.K56]+[.L56]+[.O56]" office:value-type="float" office:value="616.5" calcext:value-type="float">
            <text:p><text:s/>616.50 </text:p>
          </table:table-cell>
          <table:table-cell table:style-name="ce75" table:formula="of:=TRUNC(((([.$P56])/(1-[.$M$14]))-([.$P56]));1)+(IF(MOD(((([.$P56])/(1-[.$M$14]))-([.$P56]))*100; 10)&gt;=5; 5; 0)/100)" office:value-type="float" office:value="0" calcext:value-type="float">
            <text:p><text:s/>- <text:s text:c="2"/></text:p>
          </table:table-cell>
          <table:table-cell table:style-name="ce97" table:formula="of:=[.Q56]+[.P56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5]+30" office:value-type="date" office:date-value="2023-07-13" calcext:value-type="date">
            <text:p>13/07/2023</text:p>
          </table:table-cell>
          <table:table-cell table:style-name="ce119" table:formula="of:=[.AH55]+1" office:value-type="float" office:value="26" calcext:value-type="float">
            <text:p>26</text:p>
          </table:table-cell>
          <table:table-cell table:style-name="ce127" table:formula="of:=1/POWER(1+[.$CC$32];IF([.$CL$23]=3;[.$CX56];[.$AO56]))" office:value-type="float" office:value="0.651879198122741" calcext:value-type="float">
            <text:p><text:s/>0.652 </text:p>
          </table:table-cell>
          <table:table-cell table:style-name="ce127" table:formula="of:=IF([.$AH56]&lt;=[.$CK$32];0;1/POWER(1+[.$CC$32];[.$CV56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6]=0;[.$AJ55]=0);0;[.$AI56])" office:value-type="string" office:string-value="" calcext:value-type="error">
            <text:p>#N/D</text:p>
          </table:table-cell>
          <table:table-cell table:style-name="ce130" table:formula="of:=IF([.$AV$28]=1;[.AW56];IF([.$AV$28]=2;[.AY56];IF([.$AV$28]=3;[.BA56];[.BC56])))" office:value-type="float" office:value="7" calcext:value-type="float">
            <text:p>07</text:p>
          </table:table-cell>
          <table:table-cell table:style-name="ce130" table:formula="of:=IF([.$AV$28]=1;[.AX56];IF([.$AV$28]=2;[.AZ56];IF([.$AV$28]=3;[.BB56];[.BD56])))" office:value-type="float" office:value="2023" calcext:value-type="float">
            <text:p>2023</text:p>
          </table:table-cell>
          <table:table-cell table:style-name="ce134" table:formula="of:=[.CV56]-[.CV55]" office:value-type="float" office:value="28" calcext:value-type="float">
            <text:p><text:s/>28 </text:p>
          </table:table-cell>
          <table:table-cell table:style-name="ce134" table:formula="of:=IF([.$CN$23]=2;[.CX56];[.CV56]-[.$G$12])" office:value-type="float" office:value="791" calcext:value-type="float">
            <text:p><text:s/>791 </text:p>
          </table:table-cell>
          <table:table-cell table:style-name="ce136" table:formula="of:=IF([.$AV$28]=1;&quot;&quot;;DATE([.AM57];[.AL57];1)-1)" office:value-type="date" office:date-value="2023-07-31" calcext:value-type="date">
            <text:p>31/07/2023</text:p>
          </table:table-cell>
          <table:table-cell table:style-name="ce136" table:formula="of:=IF(AND([.$CL$23]=3;[.$O$10]&gt;=[.$AH56]);[.$G$12];IF(AND([.$CL$23]=3;[.$CN$23]=2);[.AG56];IF([.$AV$28]=1;[.$AW56];IF([.$CN$23]=1;DATE([.AM56];[.AL56];[.$G$14]);IF([.$AV$28]=2;[.AS55]+30;IF([.$AV$28]=3;[.AS55]+60;[.AS55]+90))))))" office:value-type="date" office:date-value="2023-07-24" calcext:value-type="date">
            <text:p>24/07/2023</text:p>
          </table:table-cell>
          <table:table-cell table:style-name="ce140" table:formula="of:=[.$AQ56]+IF(AND(DAY([.$AQ56])=27;MONTH([.$AQ56])=7);3;IF(AND(WEEKDAY([.$AQ56])=5;ISERROR(VLOOKUP([.$AQ56]+1;[$Factores.$A:.$A];1;0))=FALSE());4;IF(OR(WEEKDAY([.$AQ56])=1;ISERROR(VLOOKUP([.$AQ56];[$Factores.$A:.$A];1;0))=FALSE());1;IF(WEEKDAY([.$AQ56])=7;2;0))))" office:value-type="date" office:date-value="2023-07-24" calcext:value-type="date">
            <text:p>24/07/2023</text:p>
          </table:table-cell>
          <table:table-cell table:style-name="ce140" office:value-type="date" office:date-value="2023-07-24" calcext:value-type="date">
            <text:p>24/07/2023</text:p>
          </table:table-cell>
          <table:table-cell table:style-name="ce126" table:formula="of:=[.P56]/POWER(1+[.$AT$26];[.AO56])" office:value-type="float" office:value="454.814448852996" calcext:value-type="float">
            <text:p><text:s/>454.81 </text:p>
          </table:table-cell>
          <table:table-cell table:style-name="ce148"/>
          <table:table-cell table:style-name="ce153"/>
          <table:table-cell table:style-name="ce136" office:value-type="date" office:date-value="2022-06-24" calcext:value-type="date">
            <text:p>24/06/2022</text:p>
          </table:table-cell>
          <table:table-cell/>
          <table:table-cell table:style-name="ce162" table:formula="of:=IF([.AY55]&lt;12;[.AY55]+1;[.AY55]+1-12)" office:value-type="float" office:value="7" calcext:value-type="float">
            <text:p>07</text:p>
          </table:table-cell>
          <table:table-cell table:style-name="ce163" table:formula="of:=IF([.AY55]=12;[.AZ55]+1;[.AZ55])" office:value-type="float" office:value="2023" calcext:value-type="float">
            <text:p>2023</text:p>
          </table:table-cell>
          <table:table-cell table:style-name="ce162" table:formula="of:=IF([.BA55]&lt;=10;[.BA55]+2;IF([.BA55]=11;1;IF([.BA55]=12;2;IF([.BA55]=13;3;4))))" office:value-type="float" office:value="9" calcext:value-type="float">
            <text:p>09</text:p>
          </table:table-cell>
          <table:table-cell table:style-name="ce163" table:formula="of:=IF([.BA55]&gt;=11;[.BB55]+1;[.BB55])" office:value-type="float" office:value="2025" calcext:value-type="float">
            <text:p>2025</text:p>
          </table:table-cell>
          <table:table-cell table:style-name="ce162" table:formula="of:=IF([.BC55]&lt;=9;[.BC55]+3;IF([.BC55]=10;1;IF([.BC55]=11;2;IF([.BC55]=12;3;4))))" office:value-type="float" office:value="11" calcext:value-type="float">
            <text:p>11</text:p>
          </table:table-cell>
          <table:table-cell table:style-name="ce163" table:formula="of:=IF([.BC55]&gt;=10;[.BD55]+1;[.BD55])" office:value-type="float" office:value="2027" calcext:value-type="float">
            <text:p>2027</text:p>
          </table:table-cell>
          <table:table-cell table:style-name="ce166" table:formula="of:=DATE([.AZ56];[.AY56];[.$G$14])" office:value-type="date" office:date-value="2023-07-24" calcext:value-type="date">
            <text:p>24/07/2023</text:p>
          </table:table-cell>
          <table:table-cell table:style-name="ce166" table:formula="of:=[.$BE56]+IF(OR(WEEKDAY([.$BE56])=1;ISERROR(VLOOKUP([.$BE56];[$Factores.$A:.$A];1;0))=FALSE());1;IF(WEEKDAY([.$BE56])=7;2;0))" office:value-type="date" office:date-value="2023-07-24" calcext:value-type="date">
            <text:p>24/07/2023</text:p>
          </table:table-cell>
          <table:table-cell table:style-name="ce166" table:formula="of:=IF(AND(DAY([.$BE56])=27;WEEKDAY([.$BE56])=1);[.$BE56]-2;IF(AND(DAY([.$BE56])=27;WEEKDAY([.$BE56])=7);[.$BE56]-1;IF(AND(DAY([.$BE56])=26;WEEKDAY([.$BE56])=1);[.$BE56]-2;IF(AND(DAY([.$BE56])=26;WEEKDAY([.$BE56])=7);[.$BE56]-1;IF(DAY([.$BF56])=15;[.$BF56]+2;IF(DAY([.$BF56])=16;[.$BF56]+1;[.$BF56]))))))" office:value-type="date" office:date-value="2023-07-24" calcext:value-type="date">
            <text:p>24/07/2023</text:p>
          </table:table-cell>
          <table:table-cell table:style-name="ce118" table:number-columns-repeated="33"/>
          <table:table-cell table:style-name="ce119" table:formula="of:=[.CO55]+1" office:value-type="float" office:value="26" calcext:value-type="float">
            <text:p>26</text:p>
          </table:table-cell>
          <table:table-cell table:style-name="ce119"/>
          <table:table-cell table:style-name="ce187" table:formula="of:=[.CS55]+30" office:value-type="date" office:date-value="2023-07-23" calcext:value-type="date">
            <text:p>23/07/2023</text:p>
          </table:table-cell>
          <table:table-cell table:style-name="ce187" table:formula="of:=[.$CQ56]+IF(WEEKDAY([.$CQ56])=7;2;IF(WEEKDAY([.$CQ56])=1;1;0))" office:value-type="date" office:date-value="2023-07-24" calcext:value-type="date">
            <text:p>24/07/2023</text:p>
          </table:table-cell>
          <table:table-cell table:style-name="ce187" table:formula="of:=[.$CR56]+IF(AND(WEEKDAY([.$CR56])=6; ISERROR(VLOOKUP([.$CR56];[$Factores.$A:.$A];1;0))=FALSE());3;0)" office:value-type="date" office:date-value="2023-07-24" calcext:value-type="date">
            <text:p>24/07/2023</text:p>
          </table:table-cell>
          <table:table-cell table:style-name="ce187" table:formula="of:=IF(AND([.$CL$23]=3;[.$O$10]&gt;=[.$CO56]);[.$G$12];[.$CS56])" office:value-type="date" office:date-value="2023-07-24" calcext:value-type="date">
            <text:p>24/07/2023</text:p>
          </table:table-cell>
          <table:table-cell table:style-name="ce119"/>
          <table:table-cell table:style-name="ce190" table:formula="of:=IF([.$CN$23]=1;IF(AND([.$CL$23]=3;[.CT56]=[.CT55]);[.$CT56];[.AS56]);IF(AND([.$CN$23]=2;[.$CL$23]=3);[.CT56];[.CS56]))" office:value-type="date" office:date-value="2023-07-24" calcext:value-type="date">
            <text:p>24/07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6]+1" office:value-type="float" office:value="27" calcext:value-type="float">
            <text:p>27</text:p>
          </table:table-cell>
          <table:table-cell table:style-name="ce48" office:value-type="date" office:date-value="2023-08-24" calcext:value-type="date">
            <text:p>24/08/2023</text:p>
          </table:table-cell>
          <table:table-cell table:style-name="ce59" table:formula="of:=[.H56]-[.K57]" office:value-type="float" office:value="-30765.9733333333" calcext:value-type="float" table:number-columns-spanned="3" table:number-rows-spanned="1">
            <text:p><text:s/>(30,765.97)</text:p>
          </table:table-cell>
          <table:covered-table-cell table:number-columns-repeated="2" table:style-name="ce59"/>
          <table:table-cell table:style-name="ce75" office:value-type="float" office:value="547.17" calcext:value-type="float">
            <text:p><text:s/>547.17 </text:p>
          </table:table-cell>
          <table:table-cell table:style-name="ce59" office:value-type="float" office:value="69.33" calcext:value-type="float" table:number-columns-spanned="3" table:number-rows-spanned="1">
            <text:p><text:s/>69.33 </text:p>
          </table:table-cell>
          <table:covered-table-cell table:number-columns-repeated="2" table:style-name="ce59"/>
          <table:table-cell table:style-name="ce75"/>
          <table:table-cell table:style-name="ce75" table:formula="of:=[.K57]+[.L57]+[.O57]" office:value-type="float" office:value="616.5" calcext:value-type="float">
            <text:p><text:s/>616.50 </text:p>
          </table:table-cell>
          <table:table-cell table:style-name="ce75" table:formula="of:=TRUNC(((([.$P57])/(1-[.$M$14]))-([.$P57]));1)+(IF(MOD(((([.$P57])/(1-[.$M$14]))-([.$P57]))*100; 10)&gt;=5; 5; 0)/100)" office:value-type="float" office:value="0" calcext:value-type="float">
            <text:p><text:s/>- <text:s text:c="2"/></text:p>
          </table:table-cell>
          <table:table-cell table:style-name="ce97" table:formula="of:=[.Q57]+[.P57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6]+30" office:value-type="date" office:date-value="2023-08-12" calcext:value-type="date">
            <text:p>12/08/2023</text:p>
          </table:table-cell>
          <table:table-cell table:style-name="ce119" table:formula="of:=[.AH56]+1" office:value-type="float" office:value="27" calcext:value-type="float">
            <text:p>27</text:p>
          </table:table-cell>
          <table:table-cell table:style-name="ce127" table:formula="of:=1/POWER(1+[.$CC$32];IF([.$CL$23]=3;[.$CX57];[.$AO57]))" office:value-type="float" office:value="0.641038576574063" calcext:value-type="float">
            <text:p><text:s/>0.641 </text:p>
          </table:table-cell>
          <table:table-cell table:style-name="ce127" table:formula="of:=IF([.$AH57]&lt;=[.$CK$32];0;1/POWER(1+[.$CC$32];[.$CV57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7]=0;[.$AJ56]=0);0;[.$AI57])" office:value-type="string" office:string-value="" calcext:value-type="error">
            <text:p>#N/D</text:p>
          </table:table-cell>
          <table:table-cell table:style-name="ce130" table:formula="of:=IF([.$AV$28]=1;[.AW57];IF([.$AV$28]=2;[.AY57];IF([.$AV$28]=3;[.BA57];[.BC57])))" office:value-type="float" office:value="8" calcext:value-type="float">
            <text:p>08</text:p>
          </table:table-cell>
          <table:table-cell table:style-name="ce130" table:formula="of:=IF([.$AV$28]=1;[.AX57];IF([.$AV$28]=2;[.AZ57];IF([.$AV$28]=3;[.BB57];[.BD57])))" office:value-type="float" office:value="2023" calcext:value-type="float">
            <text:p>2023</text:p>
          </table:table-cell>
          <table:table-cell table:style-name="ce134" table:formula="of:=[.CV57]-[.CV56]" office:value-type="float" office:value="31" calcext:value-type="float">
            <text:p><text:s/>31 </text:p>
          </table:table-cell>
          <table:table-cell table:style-name="ce134" table:formula="of:=IF([.$CN$23]=2;[.CX57];[.CV57]-[.$G$12])" office:value-type="float" office:value="822" calcext:value-type="float">
            <text:p><text:s/>822 </text:p>
          </table:table-cell>
          <table:table-cell table:style-name="ce136" table:formula="of:=IF([.$AV$28]=1;&quot;&quot;;DATE([.AM58];[.AL58];1)-1)" office:value-type="date" office:date-value="2023-08-31" calcext:value-type="date">
            <text:p>31/08/2023</text:p>
          </table:table-cell>
          <table:table-cell table:style-name="ce136" table:formula="of:=IF(AND([.$CL$23]=3;[.$O$10]&gt;=[.$AH57]);[.$G$12];IF(AND([.$CL$23]=3;[.$CN$23]=2);[.AG57];IF([.$AV$28]=1;[.$AW57];IF([.$CN$23]=1;DATE([.AM57];[.AL57];[.$G$14]);IF([.$AV$28]=2;[.AS56]+30;IF([.$AV$28]=3;[.AS56]+60;[.AS56]+90))))))" office:value-type="date" office:date-value="2023-08-24" calcext:value-type="date">
            <text:p>24/08/2023</text:p>
          </table:table-cell>
          <table:table-cell table:style-name="ce140" table:formula="of:=[.$AQ57]+IF(AND(DAY([.$AQ57])=27;MONTH([.$AQ57])=7);3;IF(AND(WEEKDAY([.$AQ57])=5;ISERROR(VLOOKUP([.$AQ57]+1;[$Factores.$A:.$A];1;0))=FALSE());4;IF(OR(WEEKDAY([.$AQ57])=1;ISERROR(VLOOKUP([.$AQ57];[$Factores.$A:.$A];1;0))=FALSE());1;IF(WEEKDAY([.$AQ57])=7;2;0))))" office:value-type="date" office:date-value="2023-08-24" calcext:value-type="date">
            <text:p>24/08/2023</text:p>
          </table:table-cell>
          <table:table-cell table:style-name="ce140" office:value-type="date" office:date-value="2023-08-24" calcext:value-type="date">
            <text:p>24/08/2023</text:p>
          </table:table-cell>
          <table:table-cell table:style-name="ce126" table:formula="of:=[.P57]/POWER(1+[.$AT$26];[.AO57])" office:value-type="float" office:value="449.424952883544" calcext:value-type="float">
            <text:p><text:s/>449.42 </text:p>
          </table:table-cell>
          <table:table-cell table:style-name="ce148"/>
          <table:table-cell table:style-name="ce153"/>
          <table:table-cell table:style-name="ce136" table:formula="of:=[.AW56]+15" office:value-type="date" office:date-value="2022-07-09" calcext:value-type="date">
            <text:p>09/07/2022</text:p>
          </table:table-cell>
          <table:table-cell/>
          <table:table-cell table:style-name="ce162" table:formula="of:=IF([.AY56]&lt;12;[.AY56]+1;[.AY56]+1-12)" office:value-type="float" office:value="8" calcext:value-type="float">
            <text:p>08</text:p>
          </table:table-cell>
          <table:table-cell table:style-name="ce163" table:formula="of:=IF([.AY56]=12;[.AZ56]+1;[.AZ56])" office:value-type="float" office:value="2023" calcext:value-type="float">
            <text:p>2023</text:p>
          </table:table-cell>
          <table:table-cell table:style-name="ce162" table:formula="of:=IF([.BA56]&lt;=10;[.BA56]+2;IF([.BA56]=11;1;IF([.BA56]=12;2;IF([.BA56]=13;3;4))))" office:value-type="float" office:value="11" calcext:value-type="float">
            <text:p>11</text:p>
          </table:table-cell>
          <table:table-cell table:style-name="ce163" table:formula="of:=IF([.BA56]&gt;=11;[.BB56]+1;[.BB56])" office:value-type="float" office:value="2025" calcext:value-type="float">
            <text:p>2025</text:p>
          </table:table-cell>
          <table:table-cell table:style-name="ce162" table:formula="of:=IF([.BC56]&lt;=9;[.BC56]+3;IF([.BC56]=10;1;IF([.BC56]=11;2;IF([.BC56]=12;3;4))))" office:value-type="float" office:value="2" calcext:value-type="float">
            <text:p>02</text:p>
          </table:table-cell>
          <table:table-cell table:style-name="ce163" table:formula="of:=IF([.BC56]&gt;=10;[.BD56]+1;[.BD56])" office:value-type="float" office:value="2028" calcext:value-type="float">
            <text:p>2028</text:p>
          </table:table-cell>
          <table:table-cell table:style-name="ce166" table:formula="of:=DATE([.AZ57];[.AY57];[.$G$14])" office:value-type="date" office:date-value="2023-08-24" calcext:value-type="date">
            <text:p>24/08/2023</text:p>
          </table:table-cell>
          <table:table-cell table:style-name="ce166" table:formula="of:=[.$BE57]+IF(OR(WEEKDAY([.$BE57])=1;ISERROR(VLOOKUP([.$BE57];[$Factores.$A:.$A];1;0))=FALSE());1;IF(WEEKDAY([.$BE57])=7;2;0))" office:value-type="date" office:date-value="2023-08-24" calcext:value-type="date">
            <text:p>24/08/2023</text:p>
          </table:table-cell>
          <table:table-cell table:style-name="ce166" table:formula="of:=IF(AND(DAY([.$BE57])=27;WEEKDAY([.$BE57])=1);[.$BE57]-2;IF(AND(DAY([.$BE57])=27;WEEKDAY([.$BE57])=7);[.$BE57]-1;IF(AND(DAY([.$BE57])=26;WEEKDAY([.$BE57])=1);[.$BE57]-2;IF(AND(DAY([.$BE57])=26;WEEKDAY([.$BE57])=7);[.$BE57]-1;IF(DAY([.$BF57])=15;[.$BF57]+2;IF(DAY([.$BF57])=16;[.$BF57]+1;[.$BF57]))))))" office:value-type="date" office:date-value="2023-08-24" calcext:value-type="date">
            <text:p>24/08/2023</text:p>
          </table:table-cell>
          <table:table-cell table:style-name="ce118" table:number-columns-repeated="33"/>
          <table:table-cell table:style-name="ce119" table:formula="of:=[.CO56]+1" office:value-type="float" office:value="27" calcext:value-type="float">
            <text:p>27</text:p>
          </table:table-cell>
          <table:table-cell table:style-name="ce119"/>
          <table:table-cell table:style-name="ce187" table:formula="of:=[.CS56]+30" office:value-type="date" office:date-value="2023-08-23" calcext:value-type="date">
            <text:p>23/08/2023</text:p>
          </table:table-cell>
          <table:table-cell table:style-name="ce187" table:formula="of:=[.$CQ57]+IF(WEEKDAY([.$CQ57])=7;2;IF(WEEKDAY([.$CQ57])=1;1;0))" office:value-type="date" office:date-value="2023-08-23" calcext:value-type="date">
            <text:p>23/08/2023</text:p>
          </table:table-cell>
          <table:table-cell table:style-name="ce187" table:formula="of:=[.$CR57]+IF(AND(WEEKDAY([.$CR57])=6; ISERROR(VLOOKUP([.$CR57];[$Factores.$A:.$A];1;0))=FALSE());3;0)" office:value-type="date" office:date-value="2023-08-23" calcext:value-type="date">
            <text:p>23/08/2023</text:p>
          </table:table-cell>
          <table:table-cell table:style-name="ce187" table:formula="of:=IF(AND([.$CL$23]=3;[.$O$10]&gt;=[.$CO57]);[.$G$12];[.$CS57])" office:value-type="date" office:date-value="2023-08-23" calcext:value-type="date">
            <text:p>23/08/2023</text:p>
          </table:table-cell>
          <table:table-cell table:style-name="ce119"/>
          <table:table-cell table:style-name="ce190" table:formula="of:=IF([.$CN$23]=1;IF(AND([.$CL$23]=3;[.CT57]=[.CT56]);[.$CT57];[.AS57]);IF(AND([.$CN$23]=2;[.$CL$23]=3);[.CT57];[.CS57]))" office:value-type="date" office:date-value="2023-08-24" calcext:value-type="date">
            <text:p>24/08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7]+1" office:value-type="float" office:value="28" calcext:value-type="float">
            <text:p>28</text:p>
          </table:table-cell>
          <table:table-cell table:style-name="ce48" office:value-type="date" office:date-value="2023-09-25" calcext:value-type="date">
            <text:p>25/09/2023</text:p>
          </table:table-cell>
          <table:table-cell table:style-name="ce59" table:formula="of:=[.H57]-[.K58]" office:value-type="float" office:value="-31317.6633333333" calcext:value-type="float" table:number-columns-spanned="3" table:number-rows-spanned="1">
            <text:p><text:s/>(31,317.66)</text:p>
          </table:table-cell>
          <table:covered-table-cell table:number-columns-repeated="2" table:style-name="ce59"/>
          <table:table-cell table:style-name="ce75" office:value-type="float" office:value="551.69" calcext:value-type="float">
            <text:p><text:s/>551.69 </text:p>
          </table:table-cell>
          <table:table-cell table:style-name="ce59" office:value-type="float" office:value="64.81" calcext:value-type="float" table:number-columns-spanned="3" table:number-rows-spanned="1">
            <text:p><text:s/>64.81 </text:p>
          </table:table-cell>
          <table:covered-table-cell table:number-columns-repeated="2" table:style-name="ce59"/>
          <table:table-cell table:style-name="ce75"/>
          <table:table-cell table:style-name="ce75" table:formula="of:=[.K58]+[.L58]+[.O58]" office:value-type="float" office:value="616.5" calcext:value-type="float">
            <text:p><text:s/>616.50 </text:p>
          </table:table-cell>
          <table:table-cell table:style-name="ce75" table:formula="of:=TRUNC(((([.$P58])/(1-[.$M$14]))-([.$P58]));1)+(IF(MOD(((([.$P58])/(1-[.$M$14]))-([.$P58]))*100; 10)&gt;=5; 5; 0)/100)" office:value-type="float" office:value="0" calcext:value-type="float">
            <text:p><text:s/>- <text:s text:c="2"/></text:p>
          </table:table-cell>
          <table:table-cell table:style-name="ce97" table:formula="of:=[.Q58]+[.P58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7]+30" office:value-type="date" office:date-value="2023-09-11" calcext:value-type="date">
            <text:p>11/09/2023</text:p>
          </table:table-cell>
          <table:table-cell table:style-name="ce119" table:formula="of:=[.AH57]+1" office:value-type="float" office:value="28" calcext:value-type="float">
            <text:p>28</text:p>
          </table:table-cell>
          <table:table-cell table:style-name="ce127" table:formula="of:=1/POWER(1+[.$CC$32];IF([.$CL$23]=3;[.$CX58];[.$AO58]))" office:value-type="float" office:value="0.630037317884676" calcext:value-type="float">
            <text:p><text:s/>0.630 </text:p>
          </table:table-cell>
          <table:table-cell table:style-name="ce127" table:formula="of:=IF([.$AH58]&lt;=[.$CK$32];0;1/POWER(1+[.$CC$32];[.$CV58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8]=0;[.$AJ57]=0);0;[.$AI58])" office:value-type="string" office:string-value="" calcext:value-type="error">
            <text:p>#N/D</text:p>
          </table:table-cell>
          <table:table-cell table:style-name="ce130" table:formula="of:=IF([.$AV$28]=1;[.AW58];IF([.$AV$28]=2;[.AY58];IF([.$AV$28]=3;[.BA58];[.BC58])))" office:value-type="float" office:value="9" calcext:value-type="float">
            <text:p>09</text:p>
          </table:table-cell>
          <table:table-cell table:style-name="ce130" table:formula="of:=IF([.$AV$28]=1;[.AX58];IF([.$AV$28]=2;[.AZ58];IF([.$AV$28]=3;[.BB58];[.BD58])))" office:value-type="float" office:value="2023" calcext:value-type="float">
            <text:p>2023</text:p>
          </table:table-cell>
          <table:table-cell table:style-name="ce134" table:formula="of:=[.CV58]-[.CV57]" office:value-type="float" office:value="32" calcext:value-type="float">
            <text:p><text:s/>32 </text:p>
          </table:table-cell>
          <table:table-cell table:style-name="ce134" table:formula="of:=IF([.$CN$23]=2;[.CX58];[.CV58]-[.$G$12])" office:value-type="float" office:value="854" calcext:value-type="float">
            <text:p><text:s/>854 </text:p>
          </table:table-cell>
          <table:table-cell table:style-name="ce136" table:formula="of:=IF([.$AV$28]=1;&quot;&quot;;DATE([.AM59];[.AL59];1)-1)" office:value-type="date" office:date-value="2023-09-30" calcext:value-type="date">
            <text:p>30/09/2023</text:p>
          </table:table-cell>
          <table:table-cell table:style-name="ce136" table:formula="of:=IF(AND([.$CL$23]=3;[.$O$10]&gt;=[.$AH58]);[.$G$12];IF(AND([.$CL$23]=3;[.$CN$23]=2);[.AG58];IF([.$AV$28]=1;[.$AW58];IF([.$CN$23]=1;DATE([.AM58];[.AL58];[.$G$14]);IF([.$AV$28]=2;[.AS57]+30;IF([.$AV$28]=3;[.AS57]+60;[.AS57]+90))))))" office:value-type="date" office:date-value="2023-09-24" calcext:value-type="date">
            <text:p>24/09/2023</text:p>
          </table:table-cell>
          <table:table-cell table:style-name="ce140" table:formula="of:=[.$AQ58]+IF(AND(DAY([.$AQ58])=27;MONTH([.$AQ58])=7);3;IF(AND(WEEKDAY([.$AQ58])=5;ISERROR(VLOOKUP([.$AQ58]+1;[$Factores.$A:.$A];1;0))=FALSE());4;IF(OR(WEEKDAY([.$AQ58])=1;ISERROR(VLOOKUP([.$AQ58];[$Factores.$A:.$A];1;0))=FALSE());1;IF(WEEKDAY([.$AQ58])=7;2;0))))" office:value-type="date" office:date-value="2023-09-25" calcext:value-type="date">
            <text:p>25/09/2023</text:p>
          </table:table-cell>
          <table:table-cell table:style-name="ce140" office:value-type="date" office:date-value="2023-09-25" calcext:value-type="date">
            <text:p>25/09/2023</text:p>
          </table:table-cell>
          <table:table-cell table:style-name="ce126" table:formula="of:=[.P58]/POWER(1+[.$AT$26];[.AO58])" office:value-type="float" office:value="443.928581981939" calcext:value-type="float">
            <text:p><text:s/>443.93 </text:p>
          </table:table-cell>
          <table:table-cell table:style-name="ce148"/>
          <table:table-cell table:style-name="ce153"/>
          <table:table-cell table:style-name="ce136" office:value-type="date" office:date-value="2022-07-25" calcext:value-type="date">
            <text:p>25/07/2022</text:p>
          </table:table-cell>
          <table:table-cell/>
          <table:table-cell table:style-name="ce162" table:formula="of:=IF([.AY57]&lt;12;[.AY57]+1;[.AY57]+1-12)" office:value-type="float" office:value="9" calcext:value-type="float">
            <text:p>09</text:p>
          </table:table-cell>
          <table:table-cell table:style-name="ce163" table:formula="of:=IF([.AY57]=12;[.AZ57]+1;[.AZ57])" office:value-type="float" office:value="2023" calcext:value-type="float">
            <text:p>2023</text:p>
          </table:table-cell>
          <table:table-cell table:style-name="ce162" table:formula="of:=IF([.BA57]&lt;=10;[.BA57]+2;IF([.BA57]=11;1;IF([.BA57]=12;2;IF([.BA57]=13;3;4))))" office:value-type="float" office:value="1" calcext:value-type="float">
            <text:p>01</text:p>
          </table:table-cell>
          <table:table-cell table:style-name="ce163" table:formula="of:=IF([.BA57]&gt;=11;[.BB57]+1;[.BB57])" office:value-type="float" office:value="2026" calcext:value-type="float">
            <text:p>2026</text:p>
          </table:table-cell>
          <table:table-cell table:style-name="ce162" table:formula="of:=IF([.BC57]&lt;=9;[.BC57]+3;IF([.BC57]=10;1;IF([.BC57]=11;2;IF([.BC57]=12;3;4))))" office:value-type="float" office:value="5" calcext:value-type="float">
            <text:p>05</text:p>
          </table:table-cell>
          <table:table-cell table:style-name="ce163" table:formula="of:=IF([.BC57]&gt;=10;[.BD57]+1;[.BD57])" office:value-type="float" office:value="2028" calcext:value-type="float">
            <text:p>2028</text:p>
          </table:table-cell>
          <table:table-cell table:style-name="ce166" table:formula="of:=DATE([.AZ58];[.AY58];[.$G$14])" office:value-type="date" office:date-value="2023-09-24" calcext:value-type="date">
            <text:p>24/09/2023</text:p>
          </table:table-cell>
          <table:table-cell table:style-name="ce166" table:formula="of:=[.$BE58]+IF(OR(WEEKDAY([.$BE58])=1;ISERROR(VLOOKUP([.$BE58];[$Factores.$A:.$A];1;0))=FALSE());1;IF(WEEKDAY([.$BE58])=7;2;0))" office:value-type="date" office:date-value="2023-09-25" calcext:value-type="date">
            <text:p>25/09/2023</text:p>
          </table:table-cell>
          <table:table-cell table:style-name="ce166" table:formula="of:=IF(AND(DAY([.$BE58])=27;WEEKDAY([.$BE58])=1);[.$BE58]-2;IF(AND(DAY([.$BE58])=27;WEEKDAY([.$BE58])=7);[.$BE58]-1;IF(AND(DAY([.$BE58])=26;WEEKDAY([.$BE58])=1);[.$BE58]-2;IF(AND(DAY([.$BE58])=26;WEEKDAY([.$BE58])=7);[.$BE58]-1;IF(DAY([.$BF58])=15;[.$BF58]+2;IF(DAY([.$BF58])=16;[.$BF58]+1;[.$BF58]))))))" office:value-type="date" office:date-value="2023-09-25" calcext:value-type="date">
            <text:p>25/09/2023</text:p>
          </table:table-cell>
          <table:table-cell table:style-name="ce118" table:number-columns-repeated="33"/>
          <table:table-cell table:style-name="ce119" table:formula="of:=[.CO57]+1" office:value-type="float" office:value="28" calcext:value-type="float">
            <text:p>28</text:p>
          </table:table-cell>
          <table:table-cell table:style-name="ce119"/>
          <table:table-cell table:style-name="ce187" table:formula="of:=[.CS57]+30" office:value-type="date" office:date-value="2023-09-22" calcext:value-type="date">
            <text:p>22/09/2023</text:p>
          </table:table-cell>
          <table:table-cell table:style-name="ce187" table:formula="of:=[.$CQ58]+IF(WEEKDAY([.$CQ58])=7;2;IF(WEEKDAY([.$CQ58])=1;1;0))" office:value-type="date" office:date-value="2023-09-22" calcext:value-type="date">
            <text:p>22/09/2023</text:p>
          </table:table-cell>
          <table:table-cell table:style-name="ce187" table:formula="of:=[.$CR58]+IF(AND(WEEKDAY([.$CR58])=6; ISERROR(VLOOKUP([.$CR58];[$Factores.$A:.$A];1;0))=FALSE());3;0)" office:value-type="date" office:date-value="2023-09-22" calcext:value-type="date">
            <text:p>22/09/2023</text:p>
          </table:table-cell>
          <table:table-cell table:style-name="ce187" table:formula="of:=IF(AND([.$CL$23]=3;[.$O$10]&gt;=[.$CO58]);[.$G$12];[.$CS58])" office:value-type="date" office:date-value="2023-09-22" calcext:value-type="date">
            <text:p>22/09/2023</text:p>
          </table:table-cell>
          <table:table-cell table:style-name="ce119"/>
          <table:table-cell table:style-name="ce190" table:formula="of:=IF([.$CN$23]=1;IF(AND([.$CL$23]=3;[.CT58]=[.CT57]);[.$CT58];[.AS58]);IF(AND([.$CN$23]=2;[.$CL$23]=3);[.CT58];[.CS58]))" office:value-type="date" office:date-value="2023-09-25" calcext:value-type="date">
            <text:p>25/09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8]+1" office:value-type="float" office:value="29" calcext:value-type="float">
            <text:p>29</text:p>
          </table:table-cell>
          <table:table-cell table:style-name="ce48" office:value-type="date" office:date-value="2023-10-24" calcext:value-type="date">
            <text:p>24/10/2023</text:p>
          </table:table-cell>
          <table:table-cell table:style-name="ce59" table:formula="of:=[.H58]-[.K59]" office:value-type="float" office:value="-31881.6533333333" calcext:value-type="float" table:number-columns-spanned="3" table:number-rows-spanned="1">
            <text:p><text:s/>(31,881.65)</text:p>
          </table:table-cell>
          <table:covered-table-cell table:number-columns-repeated="2" table:style-name="ce59"/>
          <table:table-cell table:style-name="ce75" office:value-type="float" office:value="563.99" calcext:value-type="float">
            <text:p><text:s/>563.99 </text:p>
          </table:table-cell>
          <table:table-cell table:style-name="ce59" office:value-type="float" office:value="52.51" calcext:value-type="float" table:number-columns-spanned="3" table:number-rows-spanned="1">
            <text:p><text:s/>52.51 </text:p>
          </table:table-cell>
          <table:covered-table-cell table:number-columns-repeated="2" table:style-name="ce59"/>
          <table:table-cell table:style-name="ce75"/>
          <table:table-cell table:style-name="ce75" table:formula="of:=[.K59]+[.L59]+[.O59]" office:value-type="float" office:value="616.5" calcext:value-type="float">
            <text:p><text:s/>616.50 </text:p>
          </table:table-cell>
          <table:table-cell table:style-name="ce75" table:formula="of:=TRUNC(((([.$P59])/(1-[.$M$14]))-([.$P59]));1)+(IF(MOD(((([.$P59])/(1-[.$M$14]))-([.$P59]))*100; 10)&gt;=5; 5; 0)/100)" office:value-type="float" office:value="0" calcext:value-type="float">
            <text:p><text:s/>- <text:s text:c="2"/></text:p>
          </table:table-cell>
          <table:table-cell table:style-name="ce97" table:formula="of:=[.Q59]+[.P59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8]+30" office:value-type="date" office:date-value="2023-10-11" calcext:value-type="date">
            <text:p>11/10/2023</text:p>
          </table:table-cell>
          <table:table-cell table:style-name="ce119" table:formula="of:=[.AH58]+1" office:value-type="float" office:value="29" calcext:value-type="float">
            <text:p>29</text:p>
          </table:table-cell>
          <table:table-cell table:style-name="ce127" table:formula="of:=1/POWER(1+[.$CC$32];IF([.$CL$23]=3;[.$CX59];[.$AO59]))" office:value-type="float" office:value="0.620230594231562" calcext:value-type="float">
            <text:p><text:s/>0.620 </text:p>
          </table:table-cell>
          <table:table-cell table:style-name="ce127" table:formula="of:=IF([.$AH59]&lt;=[.$CK$32];0;1/POWER(1+[.$CC$32];[.$CV59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59]=0;[.$AJ58]=0);0;[.$AI59])" office:value-type="string" office:string-value="" calcext:value-type="error">
            <text:p>#N/D</text:p>
          </table:table-cell>
          <table:table-cell table:style-name="ce130" table:formula="of:=IF([.$AV$28]=1;[.AW59];IF([.$AV$28]=2;[.AY59];IF([.$AV$28]=3;[.BA59];[.BC59])))" office:value-type="float" office:value="10" calcext:value-type="float">
            <text:p>10</text:p>
          </table:table-cell>
          <table:table-cell table:style-name="ce130" table:formula="of:=IF([.$AV$28]=1;[.AX59];IF([.$AV$28]=2;[.AZ59];IF([.$AV$28]=3;[.BB59];[.BD59])))" office:value-type="float" office:value="2023" calcext:value-type="float">
            <text:p>2023</text:p>
          </table:table-cell>
          <table:table-cell table:style-name="ce134" table:formula="of:=[.CV59]-[.CV58]" office:value-type="float" office:value="29" calcext:value-type="float">
            <text:p><text:s/>29 </text:p>
          </table:table-cell>
          <table:table-cell table:style-name="ce134" table:formula="of:=IF([.$CN$23]=2;[.CX59];[.CV59]-[.$G$12])" office:value-type="float" office:value="883" calcext:value-type="float">
            <text:p><text:s/>883 </text:p>
          </table:table-cell>
          <table:table-cell table:style-name="ce136" table:formula="of:=IF([.$AV$28]=1;&quot;&quot;;DATE([.AM60];[.AL60];1)-1)" office:value-type="date" office:date-value="2023-10-31" calcext:value-type="date">
            <text:p>31/10/2023</text:p>
          </table:table-cell>
          <table:table-cell table:style-name="ce136" table:formula="of:=IF(AND([.$CL$23]=3;[.$O$10]&gt;=[.$AH59]);[.$G$12];IF(AND([.$CL$23]=3;[.$CN$23]=2);[.AG59];IF([.$AV$28]=1;[.$AW59];IF([.$CN$23]=1;DATE([.AM59];[.AL59];[.$G$14]);IF([.$AV$28]=2;[.AS58]+30;IF([.$AV$28]=3;[.AS58]+60;[.AS58]+90))))))" office:value-type="date" office:date-value="2023-10-24" calcext:value-type="date">
            <text:p>24/10/2023</text:p>
          </table:table-cell>
          <table:table-cell table:style-name="ce140" table:formula="of:=[.$AQ59]+IF(AND(DAY([.$AQ59])=27;MONTH([.$AQ59])=7);3;IF(AND(WEEKDAY([.$AQ59])=5;ISERROR(VLOOKUP([.$AQ59]+1;[$Factores.$A:.$A];1;0))=FALSE());4;IF(OR(WEEKDAY([.$AQ59])=1;ISERROR(VLOOKUP([.$AQ59];[$Factores.$A:.$A];1;0))=FALSE());1;IF(WEEKDAY([.$AQ59])=7;2;0))))" office:value-type="date" office:date-value="2023-10-24" calcext:value-type="date">
            <text:p>24/10/2023</text:p>
          </table:table-cell>
          <table:table-cell table:style-name="ce140" office:value-type="date" office:date-value="2023-10-24" calcext:value-type="date">
            <text:p>24/10/2023</text:p>
          </table:table-cell>
          <table:table-cell table:style-name="ce126" table:formula="of:=[.P59]/POWER(1+[.$AT$26];[.AO59])" office:value-type="float" office:value="439.00558022026" calcext:value-type="float">
            <text:p><text:s/>439.01 </text:p>
          </table:table-cell>
          <table:table-cell table:style-name="ce148"/>
          <table:table-cell table:style-name="ce153"/>
          <table:table-cell table:style-name="ce136" table:formula="of:=[.AW58]+15" office:value-type="date" office:date-value="2022-08-09" calcext:value-type="date">
            <text:p>09/08/2022</text:p>
          </table:table-cell>
          <table:table-cell/>
          <table:table-cell table:style-name="ce162" table:formula="of:=IF([.AY58]&lt;12;[.AY58]+1;[.AY58]+1-12)" office:value-type="float" office:value="10" calcext:value-type="float">
            <text:p>10</text:p>
          </table:table-cell>
          <table:table-cell table:style-name="ce163" table:formula="of:=IF([.AY58]=12;[.AZ58]+1;[.AZ58])" office:value-type="float" office:value="2023" calcext:value-type="float">
            <text:p>2023</text:p>
          </table:table-cell>
          <table:table-cell table:style-name="ce162" table:formula="of:=IF([.BA58]&lt;=10;[.BA58]+2;IF([.BA58]=11;1;IF([.BA58]=12;2;IF([.BA58]=13;3;4))))" office:value-type="float" office:value="3" calcext:value-type="float">
            <text:p>03</text:p>
          </table:table-cell>
          <table:table-cell table:style-name="ce163" table:formula="of:=IF([.BA58]&gt;=11;[.BB58]+1;[.BB58])" office:value-type="float" office:value="2026" calcext:value-type="float">
            <text:p>2026</text:p>
          </table:table-cell>
          <table:table-cell table:style-name="ce162" table:formula="of:=IF([.BC58]&lt;=9;[.BC58]+3;IF([.BC58]=10;1;IF([.BC58]=11;2;IF([.BC58]=12;3;4))))" office:value-type="float" office:value="8" calcext:value-type="float">
            <text:p>08</text:p>
          </table:table-cell>
          <table:table-cell table:style-name="ce163" table:formula="of:=IF([.BC58]&gt;=10;[.BD58]+1;[.BD58])" office:value-type="float" office:value="2028" calcext:value-type="float">
            <text:p>2028</text:p>
          </table:table-cell>
          <table:table-cell table:style-name="ce166" table:formula="of:=DATE([.AZ59];[.AY59];[.$G$14])" office:value-type="date" office:date-value="2023-10-24" calcext:value-type="date">
            <text:p>24/10/2023</text:p>
          </table:table-cell>
          <table:table-cell table:style-name="ce166" table:formula="of:=[.$BE59]+IF(OR(WEEKDAY([.$BE59])=1;ISERROR(VLOOKUP([.$BE59];[$Factores.$A:.$A];1;0))=FALSE());1;IF(WEEKDAY([.$BE59])=7;2;0))" office:value-type="date" office:date-value="2023-10-24" calcext:value-type="date">
            <text:p>24/10/2023</text:p>
          </table:table-cell>
          <table:table-cell table:style-name="ce166" table:formula="of:=IF(AND(DAY([.$BE59])=27;WEEKDAY([.$BE59])=1);[.$BE59]-2;IF(AND(DAY([.$BE59])=27;WEEKDAY([.$BE59])=7);[.$BE59]-1;IF(AND(DAY([.$BE59])=26;WEEKDAY([.$BE59])=1);[.$BE59]-2;IF(AND(DAY([.$BE59])=26;WEEKDAY([.$BE59])=7);[.$BE59]-1;IF(DAY([.$BF59])=15;[.$BF59]+2;IF(DAY([.$BF59])=16;[.$BF59]+1;[.$BF59]))))))" office:value-type="date" office:date-value="2023-10-24" calcext:value-type="date">
            <text:p>24/10/2023</text:p>
          </table:table-cell>
          <table:table-cell table:style-name="ce118" table:number-columns-repeated="33"/>
          <table:table-cell table:style-name="ce119" table:formula="of:=[.CO58]+1" office:value-type="float" office:value="29" calcext:value-type="float">
            <text:p>29</text:p>
          </table:table-cell>
          <table:table-cell table:style-name="ce119"/>
          <table:table-cell table:style-name="ce187" table:formula="of:=[.CS58]+30" office:value-type="date" office:date-value="2023-10-22" calcext:value-type="date">
            <text:p>22/10/2023</text:p>
          </table:table-cell>
          <table:table-cell table:style-name="ce187" table:formula="of:=[.$CQ59]+IF(WEEKDAY([.$CQ59])=7;2;IF(WEEKDAY([.$CQ59])=1;1;0))" office:value-type="date" office:date-value="2023-10-23" calcext:value-type="date">
            <text:p>23/10/2023</text:p>
          </table:table-cell>
          <table:table-cell table:style-name="ce187" table:formula="of:=[.$CR59]+IF(AND(WEEKDAY([.$CR59])=6; ISERROR(VLOOKUP([.$CR59];[$Factores.$A:.$A];1;0))=FALSE());3;0)" office:value-type="date" office:date-value="2023-10-23" calcext:value-type="date">
            <text:p>23/10/2023</text:p>
          </table:table-cell>
          <table:table-cell table:style-name="ce187" table:formula="of:=IF(AND([.$CL$23]=3;[.$O$10]&gt;=[.$CO59]);[.$G$12];[.$CS59])" office:value-type="date" office:date-value="2023-10-23" calcext:value-type="date">
            <text:p>23/10/2023</text:p>
          </table:table-cell>
          <table:table-cell table:style-name="ce119"/>
          <table:table-cell table:style-name="ce190" table:formula="of:=IF([.$CN$23]=1;IF(AND([.$CL$23]=3;[.CT59]=[.CT58]);[.$CT59];[.AS59]);IF(AND([.$CN$23]=2;[.$CL$23]=3);[.CT59];[.CS59]))" office:value-type="date" office:date-value="2023-10-24" calcext:value-type="date">
            <text:p>24/10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59]+1" office:value-type="float" office:value="30" calcext:value-type="float">
            <text:p>30</text:p>
          </table:table-cell>
          <table:table-cell table:style-name="ce48" office:value-type="date" office:date-value="2023-11-24" calcext:value-type="date">
            <text:p>24/11/2023</text:p>
          </table:table-cell>
          <table:table-cell table:style-name="ce59" table:formula="of:=[.H59]-[.K60]" office:value-type="float" office:value="-32448.7533333333" calcext:value-type="float" table:number-columns-spanned="3" table:number-rows-spanned="1">
            <text:p><text:s/>(32,448.75)</text:p>
          </table:table-cell>
          <table:covered-table-cell table:number-columns-repeated="2" table:style-name="ce59"/>
          <table:table-cell table:style-name="ce75" office:value-type="float" office:value="567.1" calcext:value-type="float">
            <text:p><text:s/>567.10 </text:p>
          </table:table-cell>
          <table:table-cell table:style-name="ce59" office:value-type="float" office:value="49.4" calcext:value-type="float" table:number-columns-spanned="3" table:number-rows-spanned="1">
            <text:p><text:s/>49.40 </text:p>
          </table:table-cell>
          <table:covered-table-cell table:number-columns-repeated="2" table:style-name="ce59"/>
          <table:table-cell table:style-name="ce75"/>
          <table:table-cell table:style-name="ce75" table:formula="of:=[.K60]+[.L60]+[.O60]" office:value-type="float" office:value="616.5" calcext:value-type="float">
            <text:p><text:s/>616.50 </text:p>
          </table:table-cell>
          <table:table-cell table:style-name="ce75" table:formula="of:=TRUNC(((([.$P60])/(1-[.$M$14]))-([.$P60]));1)+(IF(MOD(((([.$P60])/(1-[.$M$14]))-([.$P60]))*100; 10)&gt;=5; 5; 0)/100)" office:value-type="float" office:value="0" calcext:value-type="float">
            <text:p><text:s/>- <text:s text:c="2"/></text:p>
          </table:table-cell>
          <table:table-cell table:style-name="ce97" table:formula="of:=[.Q60]+[.P60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59]+30" office:value-type="date" office:date-value="2023-11-10" calcext:value-type="date">
            <text:p>10/11/2023</text:p>
          </table:table-cell>
          <table:table-cell table:style-name="ce119" table:formula="of:=[.AH59]+1" office:value-type="float" office:value="30" calcext:value-type="float">
            <text:p>30</text:p>
          </table:table-cell>
          <table:table-cell table:style-name="ce127" table:formula="of:=1/POWER(1+[.$CC$32];IF([.$CL$23]=3;[.$CX60];[.$AO60]))" office:value-type="float" office:value="0.609916282677614" calcext:value-type="float">
            <text:p><text:s/>0.610 </text:p>
          </table:table-cell>
          <table:table-cell table:style-name="ce127" table:formula="of:=IF([.$AH60]&lt;=[.$CK$32];0;1/POWER(1+[.$CC$32];[.$CV60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0]=0;[.$AJ59]=0);0;[.$AI60])" office:value-type="string" office:string-value="" calcext:value-type="error">
            <text:p>#N/D</text:p>
          </table:table-cell>
          <table:table-cell table:style-name="ce130" table:formula="of:=IF([.$AV$28]=1;[.AW60];IF([.$AV$28]=2;[.AY60];IF([.$AV$28]=3;[.BA60];[.BC60])))" office:value-type="float" office:value="11" calcext:value-type="float">
            <text:p>11</text:p>
          </table:table-cell>
          <table:table-cell table:style-name="ce130" table:formula="of:=IF([.$AV$28]=1;[.AX60];IF([.$AV$28]=2;[.AZ60];IF([.$AV$28]=3;[.BB60];[.BD60])))" office:value-type="float" office:value="2023" calcext:value-type="float">
            <text:p>2023</text:p>
          </table:table-cell>
          <table:table-cell table:style-name="ce134" table:formula="of:=[.CV60]-[.CV59]" office:value-type="float" office:value="31" calcext:value-type="float">
            <text:p><text:s/>31 </text:p>
          </table:table-cell>
          <table:table-cell table:style-name="ce134" table:formula="of:=IF([.$CN$23]=2;[.CX60];[.CV60]-[.$G$12])" office:value-type="float" office:value="914" calcext:value-type="float">
            <text:p><text:s/>914 </text:p>
          </table:table-cell>
          <table:table-cell table:style-name="ce136" table:formula="of:=IF([.$AV$28]=1;&quot;&quot;;DATE([.AM61];[.AL61];1)-1)" office:value-type="date" office:date-value="2023-11-30" calcext:value-type="date">
            <text:p>30/11/2023</text:p>
          </table:table-cell>
          <table:table-cell table:style-name="ce136" table:formula="of:=IF(AND([.$CL$23]=3;[.$O$10]&gt;=[.$AH60]);[.$G$12];IF(AND([.$CL$23]=3;[.$CN$23]=2);[.AG60];IF([.$AV$28]=1;[.$AW60];IF([.$CN$23]=1;DATE([.AM60];[.AL60];[.$G$14]);IF([.$AV$28]=2;[.AS59]+30;IF([.$AV$28]=3;[.AS59]+60;[.AS59]+90))))))" office:value-type="date" office:date-value="2023-11-24" calcext:value-type="date">
            <text:p>24/11/2023</text:p>
          </table:table-cell>
          <table:table-cell table:style-name="ce140" table:formula="of:=[.$AQ60]+IF(AND(DAY([.$AQ60])=27;MONTH([.$AQ60])=7);3;IF(AND(WEEKDAY([.$AQ60])=5;ISERROR(VLOOKUP([.$AQ60]+1;[$Factores.$A:.$A];1;0))=FALSE());4;IF(OR(WEEKDAY([.$AQ60])=1;ISERROR(VLOOKUP([.$AQ60];[$Factores.$A:.$A];1;0))=FALSE());1;IF(WEEKDAY([.$AQ60])=7;2;0))))" office:value-type="date" office:date-value="2023-11-24" calcext:value-type="date">
            <text:p>24/11/2023</text:p>
          </table:table-cell>
          <table:table-cell table:style-name="ce140" office:value-type="date" office:date-value="2023-11-24" calcext:value-type="date">
            <text:p>24/11/2023</text:p>
          </table:table-cell>
          <table:table-cell table:style-name="ce126" table:formula="of:=[.P60]/POWER(1+[.$AT$26];[.AO60])" office:value-type="float" office:value="433.803417423693" calcext:value-type="float">
            <text:p><text:s/>433.80 </text:p>
          </table:table-cell>
          <table:table-cell table:style-name="ce148"/>
          <table:table-cell table:style-name="ce153"/>
          <table:table-cell table:style-name="ce136" office:value-type="date" office:date-value="2022-08-24" calcext:value-type="date">
            <text:p>24/08/2022</text:p>
          </table:table-cell>
          <table:table-cell/>
          <table:table-cell table:style-name="ce162" table:formula="of:=IF([.AY59]&lt;12;[.AY59]+1;[.AY59]+1-12)" office:value-type="float" office:value="11" calcext:value-type="float">
            <text:p>11</text:p>
          </table:table-cell>
          <table:table-cell table:style-name="ce163" table:formula="of:=IF([.AY59]=12;[.AZ59]+1;[.AZ59])" office:value-type="float" office:value="2023" calcext:value-type="float">
            <text:p>2023</text:p>
          </table:table-cell>
          <table:table-cell table:style-name="ce162" table:formula="of:=IF([.BA59]&lt;=10;[.BA59]+2;IF([.BA59]=11;1;IF([.BA59]=12;2;IF([.BA59]=13;3;4))))" office:value-type="float" office:value="5" calcext:value-type="float">
            <text:p>05</text:p>
          </table:table-cell>
          <table:table-cell table:style-name="ce163" table:formula="of:=IF([.BA59]&gt;=11;[.BB59]+1;[.BB59])" office:value-type="float" office:value="2026" calcext:value-type="float">
            <text:p>2026</text:p>
          </table:table-cell>
          <table:table-cell table:style-name="ce162" table:formula="of:=IF([.BC59]&lt;=9;[.BC59]+3;IF([.BC59]=10;1;IF([.BC59]=11;2;IF([.BC59]=12;3;4))))" office:value-type="float" office:value="11" calcext:value-type="float">
            <text:p>11</text:p>
          </table:table-cell>
          <table:table-cell table:style-name="ce163" table:formula="of:=IF([.BC59]&gt;=10;[.BD59]+1;[.BD59])" office:value-type="float" office:value="2028" calcext:value-type="float">
            <text:p>2028</text:p>
          </table:table-cell>
          <table:table-cell table:style-name="ce166" table:formula="of:=DATE([.AZ60];[.AY60];[.$G$14])" office:value-type="date" office:date-value="2023-11-24" calcext:value-type="date">
            <text:p>24/11/2023</text:p>
          </table:table-cell>
          <table:table-cell table:style-name="ce166" table:formula="of:=[.$BE60]+IF(OR(WEEKDAY([.$BE60])=1;ISERROR(VLOOKUP([.$BE60];[$Factores.$A:.$A];1;0))=FALSE());1;IF(WEEKDAY([.$BE60])=7;2;0))" office:value-type="date" office:date-value="2023-11-24" calcext:value-type="date">
            <text:p>24/11/2023</text:p>
          </table:table-cell>
          <table:table-cell table:style-name="ce166" table:formula="of:=IF(AND(DAY([.$BE60])=27;WEEKDAY([.$BE60])=1);[.$BE60]-2;IF(AND(DAY([.$BE60])=27;WEEKDAY([.$BE60])=7);[.$BE60]-1;IF(AND(DAY([.$BE60])=26;WEEKDAY([.$BE60])=1);[.$BE60]-2;IF(AND(DAY([.$BE60])=26;WEEKDAY([.$BE60])=7);[.$BE60]-1;IF(DAY([.$BF60])=15;[.$BF60]+2;IF(DAY([.$BF60])=16;[.$BF60]+1;[.$BF60]))))))" office:value-type="date" office:date-value="2023-11-24" calcext:value-type="date">
            <text:p>24/11/2023</text:p>
          </table:table-cell>
          <table:table-cell table:style-name="ce118" table:number-columns-repeated="33"/>
          <table:table-cell table:style-name="ce119" table:formula="of:=[.CO59]+1" office:value-type="float" office:value="30" calcext:value-type="float">
            <text:p>30</text:p>
          </table:table-cell>
          <table:table-cell table:style-name="ce119"/>
          <table:table-cell table:style-name="ce187" table:formula="of:=[.CS59]+30" office:value-type="date" office:date-value="2023-11-22" calcext:value-type="date">
            <text:p>22/11/2023</text:p>
          </table:table-cell>
          <table:table-cell table:style-name="ce187" table:formula="of:=[.$CQ60]+IF(WEEKDAY([.$CQ60])=7;2;IF(WEEKDAY([.$CQ60])=1;1;0))" office:value-type="date" office:date-value="2023-11-22" calcext:value-type="date">
            <text:p>22/11/2023</text:p>
          </table:table-cell>
          <table:table-cell table:style-name="ce187" table:formula="of:=[.$CR60]+IF(AND(WEEKDAY([.$CR60])=6; ISERROR(VLOOKUP([.$CR60];[$Factores.$A:.$A];1;0))=FALSE());3;0)" office:value-type="date" office:date-value="2023-11-22" calcext:value-type="date">
            <text:p>22/11/2023</text:p>
          </table:table-cell>
          <table:table-cell table:style-name="ce187" table:formula="of:=IF(AND([.$CL$23]=3;[.$O$10]&gt;=[.$CO60]);[.$G$12];[.$CS60])" office:value-type="date" office:date-value="2023-11-22" calcext:value-type="date">
            <text:p>22/11/2023</text:p>
          </table:table-cell>
          <table:table-cell table:style-name="ce119"/>
          <table:table-cell table:style-name="ce190" table:formula="of:=IF([.$CN$23]=1;IF(AND([.$CL$23]=3;[.CT60]=[.CT59]);[.$CT60];[.AS60]);IF(AND([.$CN$23]=2;[.$CL$23]=3);[.CT60];[.CS60]))" office:value-type="date" office:date-value="2023-11-24" calcext:value-type="date">
            <text:p>24/11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60]+1" office:value-type="float" office:value="31" calcext:value-type="float">
            <text:p>31</text:p>
          </table:table-cell>
          <table:table-cell table:style-name="ce48" office:value-type="date" office:date-value="2023-12-25" calcext:value-type="date">
            <text:p>25/12/2023</text:p>
          </table:table-cell>
          <table:table-cell table:style-name="ce59" table:formula="of:=[.H60]-[.K61]" office:value-type="float" office:value="-33022.6533333333" calcext:value-type="float" table:number-columns-spanned="3" table:number-rows-spanned="1">
            <text:p><text:s/>(33,022.65)</text:p>
          </table:table-cell>
          <table:covered-table-cell table:number-columns-repeated="2" table:style-name="ce59"/>
          <table:table-cell table:style-name="ce75" office:value-type="float" office:value="573.9" calcext:value-type="float">
            <text:p><text:s/>573.90 </text:p>
          </table:table-cell>
          <table:table-cell table:style-name="ce59" office:value-type="float" office:value="42.6" calcext:value-type="float" table:number-columns-spanned="3" table:number-rows-spanned="1">
            <text:p><text:s/>42.60 </text:p>
          </table:table-cell>
          <table:covered-table-cell table:number-columns-repeated="2" table:style-name="ce59"/>
          <table:table-cell table:style-name="ce75"/>
          <table:table-cell table:style-name="ce75" table:formula="of:=[.K61]+[.L61]+[.O61]" office:value-type="float" office:value="616.5" calcext:value-type="float">
            <text:p><text:s/>616.50 </text:p>
          </table:table-cell>
          <table:table-cell table:style-name="ce75" table:formula="of:=TRUNC(((([.$P61])/(1-[.$M$14]))-([.$P61]));1)+(IF(MOD(((([.$P61])/(1-[.$M$14]))-([.$P61]))*100; 10)&gt;=5; 5; 0)/100)" office:value-type="float" office:value="0" calcext:value-type="float">
            <text:p><text:s/>- <text:s text:c="2"/></text:p>
          </table:table-cell>
          <table:table-cell table:style-name="ce97" table:formula="of:=[.Q61]+[.P61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0]+30" office:value-type="date" office:date-value="2023-12-10" calcext:value-type="date">
            <text:p>10/12/2023</text:p>
          </table:table-cell>
          <table:table-cell table:style-name="ce119" table:formula="of:=[.AH60]+1" office:value-type="float" office:value="31" calcext:value-type="float">
            <text:p>31</text:p>
          </table:table-cell>
          <table:table-cell table:style-name="ce127" table:formula="of:=1/POWER(1+[.$CC$32];IF([.$CL$23]=3;[.$CX61];[.$AO61]))" office:value-type="float" office:value="0.599773496075548" calcext:value-type="float">
            <text:p><text:s/>0.600 </text:p>
          </table:table-cell>
          <table:table-cell table:style-name="ce127" table:formula="of:=IF([.$AH61]&lt;=[.$CK$32];0;1/POWER(1+[.$CC$32];[.$CV61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1]=0;[.$AJ60]=0);0;[.$AI61])" office:value-type="string" office:string-value="" calcext:value-type="error">
            <text:p>#N/D</text:p>
          </table:table-cell>
          <table:table-cell table:style-name="ce130" table:formula="of:=IF([.$AV$28]=1;[.AW61];IF([.$AV$28]=2;[.AY61];IF([.$AV$28]=3;[.BA61];[.BC61])))" office:value-type="float" office:value="12" calcext:value-type="float">
            <text:p>12</text:p>
          </table:table-cell>
          <table:table-cell table:style-name="ce130" table:formula="of:=IF([.$AV$28]=1;[.AX61];IF([.$AV$28]=2;[.AZ61];IF([.$AV$28]=3;[.BB61];[.BD61])))" office:value-type="float" office:value="2023" calcext:value-type="float">
            <text:p>2023</text:p>
          </table:table-cell>
          <table:table-cell table:style-name="ce134" table:formula="of:=[.CV61]-[.CV60]" office:value-type="float" office:value="31" calcext:value-type="float">
            <text:p><text:s/>31 </text:p>
          </table:table-cell>
          <table:table-cell table:style-name="ce134" table:formula="of:=IF([.$CN$23]=2;[.CX61];[.CV61]-[.$G$12])" office:value-type="float" office:value="945" calcext:value-type="float">
            <text:p><text:s/>945 </text:p>
          </table:table-cell>
          <table:table-cell table:style-name="ce136" table:formula="of:=IF([.$AV$28]=1;&quot;&quot;;DATE([.AM62];[.AL62];1)-1)" office:value-type="date" office:date-value="2023-12-31" calcext:value-type="date">
            <text:p>31/12/2023</text:p>
          </table:table-cell>
          <table:table-cell table:style-name="ce136" table:formula="of:=IF(AND([.$CL$23]=3;[.$O$10]&gt;=[.$AH61]);[.$G$12];IF(AND([.$CL$23]=3;[.$CN$23]=2);[.AG61];IF([.$AV$28]=1;[.$AW61];IF([.$CN$23]=1;DATE([.AM61];[.AL61];[.$G$14]);IF([.$AV$28]=2;[.AS60]+30;IF([.$AV$28]=3;[.AS60]+60;[.AS60]+90))))))" office:value-type="date" office:date-value="2023-12-24" calcext:value-type="date">
            <text:p>24/12/2023</text:p>
          </table:table-cell>
          <table:table-cell table:style-name="ce140" table:formula="of:=[.$AQ61]+IF(AND(DAY([.$AQ61])=27;MONTH([.$AQ61])=7);3;IF(AND(WEEKDAY([.$AQ61])=5;ISERROR(VLOOKUP([.$AQ61]+1;[$Factores.$A:.$A];1;0))=FALSE());4;IF(OR(WEEKDAY([.$AQ61])=1;ISERROR(VLOOKUP([.$AQ61];[$Factores.$A:.$A];1;0))=FALSE());1;IF(WEEKDAY([.$AQ61])=7;2;0))))" office:value-type="date" office:date-value="2023-12-25" calcext:value-type="date">
            <text:p>25/12/2023</text:p>
          </table:table-cell>
          <table:table-cell table:style-name="ce140" office:value-type="date" office:date-value="2023-12-25" calcext:value-type="date">
            <text:p>25/12/2023</text:p>
          </table:table-cell>
          <table:table-cell table:style-name="ce126" table:formula="of:=[.P61]/POWER(1+[.$AT$26];[.AO61])" office:value-type="float" office:value="428.662899624323" calcext:value-type="float">
            <text:p><text:s/>428.66 </text:p>
          </table:table-cell>
          <table:table-cell table:style-name="ce148"/>
          <table:table-cell table:style-name="ce153"/>
          <table:table-cell table:style-name="ce136" table:formula="of:=[.AW60]+15" office:value-type="date" office:date-value="2022-09-08" calcext:value-type="date">
            <text:p>08/09/2022</text:p>
          </table:table-cell>
          <table:table-cell/>
          <table:table-cell table:style-name="ce162" table:formula="of:=IF([.AY60]&lt;12;[.AY60]+1;[.AY60]+1-12)" office:value-type="float" office:value="12" calcext:value-type="float">
            <text:p>12</text:p>
          </table:table-cell>
          <table:table-cell table:style-name="ce163" table:formula="of:=IF([.AY60]=12;[.AZ60]+1;[.AZ60])" office:value-type="float" office:value="2023" calcext:value-type="float">
            <text:p>2023</text:p>
          </table:table-cell>
          <table:table-cell table:style-name="ce162" table:formula="of:=IF([.BA60]&lt;=10;[.BA60]+2;IF([.BA60]=11;1;IF([.BA60]=12;2;IF([.BA60]=13;3;4))))" office:value-type="float" office:value="7" calcext:value-type="float">
            <text:p>07</text:p>
          </table:table-cell>
          <table:table-cell table:style-name="ce163" table:formula="of:=IF([.BA60]&gt;=11;[.BB60]+1;[.BB60])" office:value-type="float" office:value="2026" calcext:value-type="float">
            <text:p>2026</text:p>
          </table:table-cell>
          <table:table-cell table:style-name="ce162" table:formula="of:=IF([.BC60]&lt;=9;[.BC60]+3;IF([.BC60]=10;1;IF([.BC60]=11;2;IF([.BC60]=12;3;4))))" office:value-type="float" office:value="2" calcext:value-type="float">
            <text:p>02</text:p>
          </table:table-cell>
          <table:table-cell table:style-name="ce163" table:formula="of:=IF([.BC60]&gt;=10;[.BD60]+1;[.BD60])" office:value-type="float" office:value="2029" calcext:value-type="float">
            <text:p>2029</text:p>
          </table:table-cell>
          <table:table-cell table:style-name="ce166" table:formula="of:=DATE([.AZ61];[.AY61];[.$G$14])" office:value-type="date" office:date-value="2023-12-24" calcext:value-type="date">
            <text:p>24/12/2023</text:p>
          </table:table-cell>
          <table:table-cell table:style-name="ce166" table:formula="of:=[.$BE61]+IF(OR(WEEKDAY([.$BE61])=1;ISERROR(VLOOKUP([.$BE61];[$Factores.$A:.$A];1;0))=FALSE());1;IF(WEEKDAY([.$BE61])=7;2;0))" office:value-type="date" office:date-value="2023-12-25" calcext:value-type="date">
            <text:p>25/12/2023</text:p>
          </table:table-cell>
          <table:table-cell table:style-name="ce166" table:formula="of:=IF(AND(DAY([.$BE61])=27;WEEKDAY([.$BE61])=1);[.$BE61]-2;IF(AND(DAY([.$BE61])=27;WEEKDAY([.$BE61])=7);[.$BE61]-1;IF(AND(DAY([.$BE61])=26;WEEKDAY([.$BE61])=1);[.$BE61]-2;IF(AND(DAY([.$BE61])=26;WEEKDAY([.$BE61])=7);[.$BE61]-1;IF(DAY([.$BF61])=15;[.$BF61]+2;IF(DAY([.$BF61])=16;[.$BF61]+1;[.$BF61]))))))" office:value-type="date" office:date-value="2023-12-25" calcext:value-type="date">
            <text:p>25/12/2023</text:p>
          </table:table-cell>
          <table:table-cell table:style-name="ce118" table:number-columns-repeated="33"/>
          <table:table-cell table:style-name="ce119" table:formula="of:=[.CO60]+1" office:value-type="float" office:value="31" calcext:value-type="float">
            <text:p>31</text:p>
          </table:table-cell>
          <table:table-cell table:style-name="ce119"/>
          <table:table-cell table:style-name="ce187" table:formula="of:=[.CS60]+30" office:value-type="date" office:date-value="2023-12-22" calcext:value-type="date">
            <text:p>22/12/2023</text:p>
          </table:table-cell>
          <table:table-cell table:style-name="ce187" table:formula="of:=[.$CQ61]+IF(WEEKDAY([.$CQ61])=7;2;IF(WEEKDAY([.$CQ61])=1;1;0))" office:value-type="date" office:date-value="2023-12-22" calcext:value-type="date">
            <text:p>22/12/2023</text:p>
          </table:table-cell>
          <table:table-cell table:style-name="ce187" table:formula="of:=[.$CR61]+IF(AND(WEEKDAY([.$CR61])=6; ISERROR(VLOOKUP([.$CR61];[$Factores.$A:.$A];1;0))=FALSE());3;0)" office:value-type="date" office:date-value="2023-12-22" calcext:value-type="date">
            <text:p>22/12/2023</text:p>
          </table:table-cell>
          <table:table-cell table:style-name="ce187" table:formula="of:=IF(AND([.$CL$23]=3;[.$O$10]&gt;=[.$CO61]);[.$G$12];[.$CS61])" office:value-type="date" office:date-value="2023-12-22" calcext:value-type="date">
            <text:p>22/12/2023</text:p>
          </table:table-cell>
          <table:table-cell table:style-name="ce119"/>
          <table:table-cell table:style-name="ce190" table:formula="of:=IF([.$CN$23]=1;IF(AND([.$CL$23]=3;[.CT61]=[.CT60]);[.$CT61];[.AS61]);IF(AND([.$CN$23]=2;[.$CL$23]=3);[.CT61];[.CS61]))" office:value-type="date" office:date-value="2023-12-25" calcext:value-type="date">
            <text:p>25/12/2023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61]+1" office:value-type="float" office:value="32" calcext:value-type="float">
            <text:p>32</text:p>
          </table:table-cell>
          <table:table-cell table:style-name="ce48" office:value-type="date" office:date-value="2024-01-24" calcext:value-type="date">
            <text:p>24/01/2024</text:p>
          </table:table-cell>
          <table:table-cell table:style-name="ce59" table:formula="of:=[.H61]-[.K62]" office:value-type="float" office:value="-33604.5933333333" calcext:value-type="float" table:number-columns-spanned="3" table:number-rows-spanned="1">
            <text:p><text:s/>(33,604.59)</text:p>
          </table:table-cell>
          <table:covered-table-cell table:number-columns-repeated="2" table:style-name="ce59"/>
          <table:table-cell table:style-name="ce75" office:value-type="float" office:value="581.94" calcext:value-type="float">
            <text:p><text:s/>581.94 </text:p>
          </table:table-cell>
          <table:table-cell table:style-name="ce59" office:value-type="float" office:value="34.56" calcext:value-type="float" table:number-columns-spanned="3" table:number-rows-spanned="1">
            <text:p><text:s/>34.56 </text:p>
          </table:table-cell>
          <table:covered-table-cell table:number-columns-repeated="2" table:style-name="ce59"/>
          <table:table-cell table:style-name="ce75"/>
          <table:table-cell table:style-name="ce75" table:formula="of:=[.K62]+[.L62]+[.O62]" office:value-type="float" office:value="616.5" calcext:value-type="float">
            <text:p><text:s/>616.50 </text:p>
          </table:table-cell>
          <table:table-cell table:style-name="ce75" table:formula="of:=TRUNC(((([.$P62])/(1-[.$M$14]))-([.$P62]));1)+(IF(MOD(((([.$P62])/(1-[.$M$14]))-([.$P62]))*100; 10)&gt;=5; 5; 0)/100)" office:value-type="float" office:value="0" calcext:value-type="float">
            <text:p><text:s/>- <text:s text:c="2"/></text:p>
          </table:table-cell>
          <table:table-cell table:style-name="ce97" table:formula="of:=[.Q62]+[.P62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1]+30" office:value-type="date" office:date-value="2024-01-09" calcext:value-type="date">
            <text:p>09/01/2024</text:p>
          </table:table-cell>
          <table:table-cell table:style-name="ce119" table:formula="of:=[.AH61]+1" office:value-type="float" office:value="32" calcext:value-type="float">
            <text:p>32</text:p>
          </table:table-cell>
          <table:table-cell table:style-name="ce127" table:formula="of:=1/POWER(1+[.$CC$32];IF([.$CL$23]=3;[.$CX62];[.$AO62]))" office:value-type="float" office:value="0.590118523690649" calcext:value-type="float">
            <text:p><text:s/>0.590 </text:p>
          </table:table-cell>
          <table:table-cell table:style-name="ce127" table:formula="of:=IF([.$AH62]&lt;=[.$CK$32];0;1/POWER(1+[.$CC$32];[.$CV62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2]=0;[.$AJ61]=0);0;[.$AI62])" office:value-type="string" office:string-value="" calcext:value-type="error">
            <text:p>#N/D</text:p>
          </table:table-cell>
          <table:table-cell table:style-name="ce130" table:formula="of:=IF([.$AV$28]=1;[.AW62];IF([.$AV$28]=2;[.AY62];IF([.$AV$28]=3;[.BA62];[.BC62])))" office:value-type="float" office:value="1" calcext:value-type="float">
            <text:p>01</text:p>
          </table:table-cell>
          <table:table-cell table:style-name="ce130" table:formula="of:=IF([.$AV$28]=1;[.AX62];IF([.$AV$28]=2;[.AZ62];IF([.$AV$28]=3;[.BB62];[.BD62])))" office:value-type="float" office:value="2024" calcext:value-type="float">
            <text:p>2024</text:p>
          </table:table-cell>
          <table:table-cell table:style-name="ce134" table:formula="of:=[.CV62]-[.CV61]" office:value-type="float" office:value="30" calcext:value-type="float">
            <text:p><text:s/>30 </text:p>
          </table:table-cell>
          <table:table-cell table:style-name="ce134" table:formula="of:=IF([.$CN$23]=2;[.CX62];[.CV62]-[.$G$12])" office:value-type="float" office:value="975" calcext:value-type="float">
            <text:p><text:s/>975 </text:p>
          </table:table-cell>
          <table:table-cell table:style-name="ce136" table:formula="of:=IF([.$AV$28]=1;&quot;&quot;;DATE([.AM63];[.AL63];1)-1)" office:value-type="date" office:date-value="2024-01-31" calcext:value-type="date">
            <text:p>31/01/2024</text:p>
          </table:table-cell>
          <table:table-cell table:style-name="ce136" table:formula="of:=IF(AND([.$CL$23]=3;[.$O$10]&gt;=[.$AH62]);[.$G$12];IF(AND([.$CL$23]=3;[.$CN$23]=2);[.AG62];IF([.$AV$28]=1;[.$AW62];IF([.$CN$23]=1;DATE([.AM62];[.AL62];[.$G$14]);IF([.$AV$28]=2;[.AS61]+30;IF([.$AV$28]=3;[.AS61]+60;[.AS61]+90))))))" office:value-type="date" office:date-value="2024-01-24" calcext:value-type="date">
            <text:p>24/01/2024</text:p>
          </table:table-cell>
          <table:table-cell table:style-name="ce140" table:formula="of:=[.$AQ62]+IF(AND(DAY([.$AQ62])=27;MONTH([.$AQ62])=7);3;IF(AND(WEEKDAY([.$AQ62])=5;ISERROR(VLOOKUP([.$AQ62]+1;[$Factores.$A:.$A];1;0))=FALSE());4;IF(OR(WEEKDAY([.$AQ62])=1;ISERROR(VLOOKUP([.$AQ62];[$Factores.$A:.$A];1;0))=FALSE());1;IF(WEEKDAY([.$AQ62])=7;2;0))))" office:value-type="date" office:date-value="2024-01-24" calcext:value-type="date">
            <text:p>24/01/2024</text:p>
          </table:table-cell>
          <table:table-cell table:style-name="ce140" office:value-type="date" office:date-value="2024-01-24" calcext:value-type="date">
            <text:p>24/01/2024</text:p>
          </table:table-cell>
          <table:table-cell table:style-name="ce126" table:formula="of:=[.P62]/POWER(1+[.$AT$26];[.AO62])" office:value-type="float" office:value="423.746211120966" calcext:value-type="float">
            <text:p><text:s/>423.75 </text:p>
          </table:table-cell>
          <table:table-cell table:style-name="ce148"/>
          <table:table-cell table:style-name="ce153"/>
          <table:table-cell table:style-name="ce136" office:value-type="date" office:date-value="2022-09-26" calcext:value-type="date">
            <text:p>26/09/2022</text:p>
          </table:table-cell>
          <table:table-cell/>
          <table:table-cell table:style-name="ce162" table:formula="of:=IF([.AY61]&lt;12;[.AY61]+1;[.AY61]+1-12)" office:value-type="float" office:value="1" calcext:value-type="float">
            <text:p>01</text:p>
          </table:table-cell>
          <table:table-cell table:style-name="ce163" table:formula="of:=IF([.AY61]=12;[.AZ61]+1;[.AZ61])" office:value-type="float" office:value="2024" calcext:value-type="float">
            <text:p>2024</text:p>
          </table:table-cell>
          <table:table-cell table:style-name="ce162" table:formula="of:=IF([.BA61]&lt;=10;[.BA61]+2;IF([.BA61]=11;1;IF([.BA61]=12;2;IF([.BA61]=13;3;4))))" office:value-type="float" office:value="9" calcext:value-type="float">
            <text:p>09</text:p>
          </table:table-cell>
          <table:table-cell table:style-name="ce163" table:formula="of:=IF([.BA61]&gt;=11;[.BB61]+1;[.BB61])" office:value-type="float" office:value="2026" calcext:value-type="float">
            <text:p>2026</text:p>
          </table:table-cell>
          <table:table-cell table:style-name="ce162" table:formula="of:=IF([.BC61]&lt;=9;[.BC61]+3;IF([.BC61]=10;1;IF([.BC61]=11;2;IF([.BC61]=12;3;4))))" office:value-type="float" office:value="5" calcext:value-type="float">
            <text:p>05</text:p>
          </table:table-cell>
          <table:table-cell table:style-name="ce163" table:formula="of:=IF([.BC61]&gt;=10;[.BD61]+1;[.BD61])" office:value-type="float" office:value="2029" calcext:value-type="float">
            <text:p>2029</text:p>
          </table:table-cell>
          <table:table-cell table:style-name="ce166" table:formula="of:=DATE([.AZ62];[.AY62];[.$G$14])" office:value-type="date" office:date-value="2024-01-24" calcext:value-type="date">
            <text:p>24/01/2024</text:p>
          </table:table-cell>
          <table:table-cell table:style-name="ce166" table:formula="of:=[.$BE62]+IF(OR(WEEKDAY([.$BE62])=1;ISERROR(VLOOKUP([.$BE62];[$Factores.$A:.$A];1;0))=FALSE());1;IF(WEEKDAY([.$BE62])=7;2;0))" office:value-type="date" office:date-value="2024-01-24" calcext:value-type="date">
            <text:p>24/01/2024</text:p>
          </table:table-cell>
          <table:table-cell table:style-name="ce166" table:formula="of:=IF(AND(DAY([.$BE62])=27;WEEKDAY([.$BE62])=1);[.$BE62]-2;IF(AND(DAY([.$BE62])=27;WEEKDAY([.$BE62])=7);[.$BE62]-1;IF(AND(DAY([.$BE62])=26;WEEKDAY([.$BE62])=1);[.$BE62]-2;IF(AND(DAY([.$BE62])=26;WEEKDAY([.$BE62])=7);[.$BE62]-1;IF(DAY([.$BF62])=15;[.$BF62]+2;IF(DAY([.$BF62])=16;[.$BF62]+1;[.$BF62]))))))" office:value-type="date" office:date-value="2024-01-24" calcext:value-type="date">
            <text:p>24/01/2024</text:p>
          </table:table-cell>
          <table:table-cell table:style-name="ce118" table:number-columns-repeated="33"/>
          <table:table-cell table:style-name="ce119" table:formula="of:=[.CO61]+1" office:value-type="float" office:value="32" calcext:value-type="float">
            <text:p>32</text:p>
          </table:table-cell>
          <table:table-cell table:style-name="ce119"/>
          <table:table-cell table:style-name="ce187" table:formula="of:=[.CS61]+30" office:value-type="date" office:date-value="2024-01-21" calcext:value-type="date">
            <text:p>21/01/2024</text:p>
          </table:table-cell>
          <table:table-cell table:style-name="ce187" table:formula="of:=[.$CQ62]+IF(WEEKDAY([.$CQ62])=7;2;IF(WEEKDAY([.$CQ62])=1;1;0))" office:value-type="date" office:date-value="2024-01-22" calcext:value-type="date">
            <text:p>22/01/2024</text:p>
          </table:table-cell>
          <table:table-cell table:style-name="ce187" table:formula="of:=[.$CR62]+IF(AND(WEEKDAY([.$CR62])=6; ISERROR(VLOOKUP([.$CR62];[$Factores.$A:.$A];1;0))=FALSE());3;0)" office:value-type="date" office:date-value="2024-01-22" calcext:value-type="date">
            <text:p>22/01/2024</text:p>
          </table:table-cell>
          <table:table-cell table:style-name="ce187" table:formula="of:=IF(AND([.$CL$23]=3;[.$O$10]&gt;=[.$CO62]);[.$G$12];[.$CS62])" office:value-type="date" office:date-value="2024-01-22" calcext:value-type="date">
            <text:p>22/01/2024</text:p>
          </table:table-cell>
          <table:table-cell table:style-name="ce119"/>
          <table:table-cell table:style-name="ce190" table:formula="of:=IF([.$CN$23]=1;IF(AND([.$CL$23]=3;[.CT62]=[.CT61]);[.$CT62];[.AS62]);IF(AND([.$CN$23]=2;[.$CL$23]=3);[.CT62];[.CS62]))" office:value-type="date" office:date-value="2024-01-24" calcext:value-type="date">
            <text:p>24/01/2024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62]+1" office:value-type="float" office:value="33" calcext:value-type="float">
            <text:p>33</text:p>
          </table:table-cell>
          <table:table-cell table:style-name="ce48" office:value-type="date" office:date-value="2024-02-26" calcext:value-type="date">
            <text:p>26/02/2024</text:p>
          </table:table-cell>
          <table:table-cell table:style-name="ce59" table:formula="of:=[.H62]-[.K63]" office:value-type="float" office:value="-34190.4833333333" calcext:value-type="float" table:number-columns-spanned="3" table:number-rows-spanned="1">
            <text:p><text:s/>(34,190.48)</text:p>
          </table:table-cell>
          <table:covered-table-cell table:number-columns-repeated="2" table:style-name="ce59"/>
          <table:table-cell table:style-name="ce75" office:value-type="float" office:value="585.89" calcext:value-type="float">
            <text:p><text:s/>585.89 </text:p>
          </table:table-cell>
          <table:table-cell table:style-name="ce59" office:value-type="float" office:value="30.61" calcext:value-type="float" table:number-columns-spanned="3" table:number-rows-spanned="1">
            <text:p><text:s/>30.61 </text:p>
          </table:table-cell>
          <table:covered-table-cell table:number-columns-repeated="2" table:style-name="ce59"/>
          <table:table-cell table:style-name="ce75"/>
          <table:table-cell table:style-name="ce75" table:formula="of:=[.K63]+[.L63]+[.O63]" office:value-type="float" office:value="616.5" calcext:value-type="float">
            <text:p><text:s/>616.50 </text:p>
          </table:table-cell>
          <table:table-cell table:style-name="ce75" table:formula="of:=TRUNC(((([.$P63])/(1-[.$M$14]))-([.$P63]));1)+(IF(MOD(((([.$P63])/(1-[.$M$14]))-([.$P63]))*100; 10)&gt;=5; 5; 0)/100)" office:value-type="float" office:value="0" calcext:value-type="float">
            <text:p><text:s/>- <text:s text:c="2"/></text:p>
          </table:table-cell>
          <table:table-cell table:style-name="ce97" table:formula="of:=[.Q63]+[.P63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2]+30" office:value-type="date" office:date-value="2024-02-08" calcext:value-type="date">
            <text:p>08/02/2024</text:p>
          </table:table-cell>
          <table:table-cell table:style-name="ce119" table:formula="of:=[.AH62]+1" office:value-type="float" office:value="33" calcext:value-type="float">
            <text:p>33</text:p>
          </table:table-cell>
          <table:table-cell table:style-name="ce127" table:formula="of:=1/POWER(1+[.$CC$32];IF([.$CL$23]=3;[.$CX63];[.$AO63]))" office:value-type="float" office:value="0.579677470755254" calcext:value-type="float">
            <text:p><text:s/>0.580 </text:p>
          </table:table-cell>
          <table:table-cell table:style-name="ce127" table:formula="of:=IF([.$AH63]&lt;=[.$CK$32];0;1/POWER(1+[.$CC$32];[.$CV63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3]=0;[.$AJ62]=0);0;[.$AI63])" office:value-type="string" office:string-value="" calcext:value-type="error">
            <text:p>#N/D</text:p>
          </table:table-cell>
          <table:table-cell table:style-name="ce130" table:formula="of:=IF([.$AV$28]=1;[.AW63];IF([.$AV$28]=2;[.AY63];IF([.$AV$28]=3;[.BA63];[.BC63])))" office:value-type="float" office:value="2" calcext:value-type="float">
            <text:p>02</text:p>
          </table:table-cell>
          <table:table-cell table:style-name="ce130" table:formula="of:=IF([.$AV$28]=1;[.AX63];IF([.$AV$28]=2;[.AZ63];IF([.$AV$28]=3;[.BB63];[.BD63])))" office:value-type="float" office:value="2024" calcext:value-type="float">
            <text:p>2024</text:p>
          </table:table-cell>
          <table:table-cell table:style-name="ce134" table:formula="of:=[.CV63]-[.CV62]" office:value-type="float" office:value="33" calcext:value-type="float">
            <text:p><text:s/>33 </text:p>
          </table:table-cell>
          <table:table-cell table:style-name="ce134" table:formula="of:=IF([.$CN$23]=2;[.CX63];[.CV63]-[.$G$12])" office:value-type="float" office:value="1008" calcext:value-type="float">
            <text:p><text:s/>1,008 </text:p>
          </table:table-cell>
          <table:table-cell table:style-name="ce136" table:formula="of:=IF([.$AV$28]=1;&quot;&quot;;DATE([.AM64];[.AL64];1)-1)" office:value-type="date" office:date-value="2024-02-29" calcext:value-type="date">
            <text:p>29/02/2024</text:p>
          </table:table-cell>
          <table:table-cell table:style-name="ce136" table:formula="of:=IF(AND([.$CL$23]=3;[.$O$10]&gt;=[.$AH63]);[.$G$12];IF(AND([.$CL$23]=3;[.$CN$23]=2);[.AG63];IF([.$AV$28]=1;[.$AW63];IF([.$CN$23]=1;DATE([.AM63];[.AL63];[.$G$14]);IF([.$AV$28]=2;[.AS62]+30;IF([.$AV$28]=3;[.AS62]+60;[.AS62]+90))))))" office:value-type="date" office:date-value="2024-02-24" calcext:value-type="date">
            <text:p>24/02/2024</text:p>
          </table:table-cell>
          <table:table-cell table:style-name="ce140" table:formula="of:=[.$AQ63]+IF(AND(DAY([.$AQ63])=27;MONTH([.$AQ63])=7);3;IF(AND(WEEKDAY([.$AQ63])=5;ISERROR(VLOOKUP([.$AQ63]+1;[$Factores.$A:.$A];1;0))=FALSE());4;IF(OR(WEEKDAY([.$AQ63])=1;ISERROR(VLOOKUP([.$AQ63];[$Factores.$A:.$A];1;0))=FALSE());1;IF(WEEKDAY([.$AQ63])=7;2;0))))" office:value-type="date" office:date-value="2024-02-26" calcext:value-type="date">
            <text:p>26/02/2024</text:p>
          </table:table-cell>
          <table:table-cell table:style-name="ce140" office:value-type="date" office:date-value="2024-02-26" calcext:value-type="date">
            <text:p>26/02/2024</text:p>
          </table:table-cell>
          <table:table-cell table:style-name="ce126" table:formula="of:=[.P63]/POWER(1+[.$AT$26];[.AO63])" office:value-type="float" office:value="418.402963358799" calcext:value-type="float">
            <text:p><text:s/>418.40 </text:p>
          </table:table-cell>
          <table:table-cell table:style-name="ce148"/>
          <table:table-cell table:style-name="ce153"/>
          <table:table-cell table:style-name="ce136" table:formula="of:=[.AW62]+15" office:value-type="date" office:date-value="2022-10-11" calcext:value-type="date">
            <text:p>11/10/2022</text:p>
          </table:table-cell>
          <table:table-cell/>
          <table:table-cell table:style-name="ce162" table:formula="of:=IF([.AY62]&lt;12;[.AY62]+1;[.AY62]+1-12)" office:value-type="float" office:value="2" calcext:value-type="float">
            <text:p>02</text:p>
          </table:table-cell>
          <table:table-cell table:style-name="ce163" table:formula="of:=IF([.AY62]=12;[.AZ62]+1;[.AZ62])" office:value-type="float" office:value="2024" calcext:value-type="float">
            <text:p>2024</text:p>
          </table:table-cell>
          <table:table-cell table:style-name="ce162" table:formula="of:=IF([.BA62]&lt;=10;[.BA62]+2;IF([.BA62]=11;1;IF([.BA62]=12;2;IF([.BA62]=13;3;4))))" office:value-type="float" office:value="11" calcext:value-type="float">
            <text:p>11</text:p>
          </table:table-cell>
          <table:table-cell table:style-name="ce163" table:formula="of:=IF([.BA62]&gt;=11;[.BB62]+1;[.BB62])" office:value-type="float" office:value="2026" calcext:value-type="float">
            <text:p>2026</text:p>
          </table:table-cell>
          <table:table-cell table:style-name="ce162" table:formula="of:=IF([.BC62]&lt;=9;[.BC62]+3;IF([.BC62]=10;1;IF([.BC62]=11;2;IF([.BC62]=12;3;4))))" office:value-type="float" office:value="8" calcext:value-type="float">
            <text:p>08</text:p>
          </table:table-cell>
          <table:table-cell table:style-name="ce163" table:formula="of:=IF([.BC62]&gt;=10;[.BD62]+1;[.BD62])" office:value-type="float" office:value="2029" calcext:value-type="float">
            <text:p>2029</text:p>
          </table:table-cell>
          <table:table-cell table:style-name="ce166" table:formula="of:=DATE([.AZ63];[.AY63];[.$G$14])" office:value-type="date" office:date-value="2024-02-24" calcext:value-type="date">
            <text:p>24/02/2024</text:p>
          </table:table-cell>
          <table:table-cell table:style-name="ce166" table:formula="of:=[.$BE63]+IF(OR(WEEKDAY([.$BE63])=1;ISERROR(VLOOKUP([.$BE63];[$Factores.$A:.$A];1;0))=FALSE());1;IF(WEEKDAY([.$BE63])=7;2;0))" office:value-type="date" office:date-value="2024-02-26" calcext:value-type="date">
            <text:p>26/02/2024</text:p>
          </table:table-cell>
          <table:table-cell table:style-name="ce166" table:formula="of:=IF(AND(DAY([.$BE63])=27;WEEKDAY([.$BE63])=1);[.$BE63]-2;IF(AND(DAY([.$BE63])=27;WEEKDAY([.$BE63])=7);[.$BE63]-1;IF(AND(DAY([.$BE63])=26;WEEKDAY([.$BE63])=1);[.$BE63]-2;IF(AND(DAY([.$BE63])=26;WEEKDAY([.$BE63])=7);[.$BE63]-1;IF(DAY([.$BF63])=15;[.$BF63]+2;IF(DAY([.$BF63])=16;[.$BF63]+1;[.$BF63]))))))" office:value-type="date" office:date-value="2024-02-26" calcext:value-type="date">
            <text:p>26/02/2024</text:p>
          </table:table-cell>
          <table:table-cell table:style-name="ce118" table:number-columns-repeated="33"/>
          <table:table-cell table:style-name="ce119" table:formula="of:=[.CO62]+1" office:value-type="float" office:value="33" calcext:value-type="float">
            <text:p>33</text:p>
          </table:table-cell>
          <table:table-cell table:style-name="ce119"/>
          <table:table-cell table:style-name="ce187" table:formula="of:=[.CS62]+30" office:value-type="date" office:date-value="2024-02-21" calcext:value-type="date">
            <text:p>21/02/2024</text:p>
          </table:table-cell>
          <table:table-cell table:style-name="ce187" table:formula="of:=[.$CQ63]+IF(WEEKDAY([.$CQ63])=7;2;IF(WEEKDAY([.$CQ63])=1;1;0))" office:value-type="date" office:date-value="2024-02-21" calcext:value-type="date">
            <text:p>21/02/2024</text:p>
          </table:table-cell>
          <table:table-cell table:style-name="ce187" table:formula="of:=[.$CR63]+IF(AND(WEEKDAY([.$CR63])=6; ISERROR(VLOOKUP([.$CR63];[$Factores.$A:.$A];1;0))=FALSE());3;0)" office:value-type="date" office:date-value="2024-02-21" calcext:value-type="date">
            <text:p>21/02/2024</text:p>
          </table:table-cell>
          <table:table-cell table:style-name="ce187" table:formula="of:=IF(AND([.$CL$23]=3;[.$O$10]&gt;=[.$CO63]);[.$G$12];[.$CS63])" office:value-type="date" office:date-value="2024-02-21" calcext:value-type="date">
            <text:p>21/02/2024</text:p>
          </table:table-cell>
          <table:table-cell table:style-name="ce119"/>
          <table:table-cell table:style-name="ce190" table:formula="of:=IF([.$CN$23]=1;IF(AND([.$CL$23]=3;[.CT63]=[.CT62]);[.$CT63];[.AS63]);IF(AND([.$CN$23]=2;[.$CL$23]=3);[.CT63];[.CS63]))" office:value-type="date" office:date-value="2024-02-26" calcext:value-type="date">
            <text:p>26/02/2024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63]+1" office:value-type="float" office:value="34" calcext:value-type="float">
            <text:p>34</text:p>
          </table:table-cell>
          <table:table-cell table:style-name="ce48" office:value-type="date" office:date-value="2024-03-25" calcext:value-type="date">
            <text:p>25/03/2024</text:p>
          </table:table-cell>
          <table:table-cell table:style-name="ce59" table:formula="of:=[.H63]-[.K64]" office:value-type="float" office:value="-34787.3833333333" calcext:value-type="float" table:number-columns-spanned="3" table:number-rows-spanned="1">
            <text:p><text:s/>(34,787.38)</text:p>
          </table:table-cell>
          <table:covered-table-cell table:number-columns-repeated="2" table:style-name="ce59"/>
          <table:table-cell table:style-name="ce75" office:value-type="float" office:value="596.9" calcext:value-type="float">
            <text:p><text:s/>596.90 </text:p>
          </table:table-cell>
          <table:table-cell table:style-name="ce59" office:value-type="float" office:value="19.6" calcext:value-type="float" table:number-columns-spanned="3" table:number-rows-spanned="1">
            <text:p><text:s/>19.60 </text:p>
          </table:table-cell>
          <table:covered-table-cell table:number-columns-repeated="2" table:style-name="ce59"/>
          <table:table-cell table:style-name="ce75"/>
          <table:table-cell table:style-name="ce75" table:formula="of:=[.K64]+[.L64]+[.O64]" office:value-type="float" office:value="616.5" calcext:value-type="float">
            <text:p><text:s/>616.50 </text:p>
          </table:table-cell>
          <table:table-cell table:style-name="ce75" table:formula="of:=TRUNC(((([.$P64])/(1-[.$M$14]))-([.$P64]));1)+(IF(MOD(((([.$P64])/(1-[.$M$14]))-([.$P64]))*100; 10)&gt;=5; 5; 0)/100)" office:value-type="float" office:value="0" calcext:value-type="float">
            <text:p><text:s/>- <text:s text:c="2"/></text:p>
          </table:table-cell>
          <table:table-cell table:style-name="ce97" table:formula="of:=[.Q64]+[.P64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3]+30" office:value-type="date" office:date-value="2024-03-09" calcext:value-type="date">
            <text:p>09/03/2024</text:p>
          </table:table-cell>
          <table:table-cell table:style-name="ce119" table:formula="of:=[.AH63]+1" office:value-type="float" office:value="34" calcext:value-type="float">
            <text:p>34</text:p>
          </table:table-cell>
          <table:table-cell table:style-name="ce127" table:formula="of:=1/POWER(1+[.$CC$32];IF([.$CL$23]=3;[.$CX64];[.$AO64]))" office:value-type="float" office:value="0.570963395950035" calcext:value-type="float">
            <text:p><text:s/>0.571 </text:p>
          </table:table-cell>
          <table:table-cell table:style-name="ce127" table:formula="of:=IF([.$AH64]&lt;=[.$CK$32];0;1/POWER(1+[.$CC$32];[.$CV64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4]=0;[.$AJ63]=0);0;[.$AI64])" office:value-type="string" office:string-value="" calcext:value-type="error">
            <text:p>#N/D</text:p>
          </table:table-cell>
          <table:table-cell table:style-name="ce130" table:formula="of:=IF([.$AV$28]=1;[.AW64];IF([.$AV$28]=2;[.AY64];IF([.$AV$28]=3;[.BA64];[.BC64])))" office:value-type="float" office:value="3" calcext:value-type="float">
            <text:p>03</text:p>
          </table:table-cell>
          <table:table-cell table:style-name="ce130" table:formula="of:=IF([.$AV$28]=1;[.AX64];IF([.$AV$28]=2;[.AZ64];IF([.$AV$28]=3;[.BB64];[.BD64])))" office:value-type="float" office:value="2024" calcext:value-type="float">
            <text:p>2024</text:p>
          </table:table-cell>
          <table:table-cell table:style-name="ce134" table:formula="of:=[.CV64]-[.CV63]" office:value-type="float" office:value="28" calcext:value-type="float">
            <text:p><text:s/>28 </text:p>
          </table:table-cell>
          <table:table-cell table:style-name="ce134" table:formula="of:=IF([.$CN$23]=2;[.CX64];[.CV64]-[.$G$12])" office:value-type="float" office:value="1036" calcext:value-type="float">
            <text:p><text:s/>1,036 </text:p>
          </table:table-cell>
          <table:table-cell table:style-name="ce136" table:formula="of:=IF([.$AV$28]=1;&quot;&quot;;DATE([.AM65];[.AL65];1)-1)" office:value-type="date" office:date-value="2024-03-31" calcext:value-type="date">
            <text:p>31/03/2024</text:p>
          </table:table-cell>
          <table:table-cell table:style-name="ce136" table:formula="of:=IF(AND([.$CL$23]=3;[.$O$10]&gt;=[.$AH64]);[.$G$12];IF(AND([.$CL$23]=3;[.$CN$23]=2);[.AG64];IF([.$AV$28]=1;[.$AW64];IF([.$CN$23]=1;DATE([.AM64];[.AL64];[.$G$14]);IF([.$AV$28]=2;[.AS63]+30;IF([.$AV$28]=3;[.AS63]+60;[.AS63]+90))))))" office:value-type="date" office:date-value="2024-03-24" calcext:value-type="date">
            <text:p>24/03/2024</text:p>
          </table:table-cell>
          <table:table-cell table:style-name="ce140" table:formula="of:=[.$AQ64]+IF(AND(DAY([.$AQ64])=27;MONTH([.$AQ64])=7);3;IF(AND(WEEKDAY([.$AQ64])=5;ISERROR(VLOOKUP([.$AQ64]+1;[$Factores.$A:.$A];1;0))=FALSE());4;IF(OR(WEEKDAY([.$AQ64])=1;ISERROR(VLOOKUP([.$AQ64];[$Factores.$A:.$A];1;0))=FALSE());1;IF(WEEKDAY([.$AQ64])=7;2;0))))" office:value-type="date" office:date-value="2024-03-25" calcext:value-type="date">
            <text:p>25/03/2024</text:p>
          </table:table-cell>
          <table:table-cell table:style-name="ce140" office:value-type="date" office:date-value="2024-03-25" calcext:value-type="date">
            <text:p>25/03/2024</text:p>
          </table:table-cell>
          <table:table-cell table:style-name="ce126" table:formula="of:=[.P64]/POWER(1+[.$AT$26];[.AO64])" office:value-type="float" office:value="413.922168953312" calcext:value-type="float">
            <text:p><text:s/>413.92 </text:p>
          </table:table-cell>
          <table:table-cell table:style-name="ce148"/>
          <table:table-cell table:style-name="ce153"/>
          <table:table-cell table:style-name="ce136" office:value-type="date" office:date-value="2022-10-24" calcext:value-type="date">
            <text:p>24/10/2022</text:p>
          </table:table-cell>
          <table:table-cell/>
          <table:table-cell table:style-name="ce162" table:formula="of:=IF([.AY63]&lt;12;[.AY63]+1;[.AY63]+1-12)" office:value-type="float" office:value="3" calcext:value-type="float">
            <text:p>03</text:p>
          </table:table-cell>
          <table:table-cell table:style-name="ce163" table:formula="of:=IF([.AY63]=12;[.AZ63]+1;[.AZ63])" office:value-type="float" office:value="2024" calcext:value-type="float">
            <text:p>2024</text:p>
          </table:table-cell>
          <table:table-cell table:style-name="ce162" table:formula="of:=IF([.BA63]&lt;=10;[.BA63]+2;IF([.BA63]=11;1;IF([.BA63]=12;2;IF([.BA63]=13;3;4))))" office:value-type="float" office:value="1" calcext:value-type="float">
            <text:p>01</text:p>
          </table:table-cell>
          <table:table-cell table:style-name="ce163" table:formula="of:=IF([.BA63]&gt;=11;[.BB63]+1;[.BB63])" office:value-type="float" office:value="2027" calcext:value-type="float">
            <text:p>2027</text:p>
          </table:table-cell>
          <table:table-cell table:style-name="ce162" table:formula="of:=IF([.BC63]&lt;=9;[.BC63]+3;IF([.BC63]=10;1;IF([.BC63]=11;2;IF([.BC63]=12;3;4))))" office:value-type="float" office:value="11" calcext:value-type="float">
            <text:p>11</text:p>
          </table:table-cell>
          <table:table-cell table:style-name="ce163" table:formula="of:=IF([.BC63]&gt;=10;[.BD63]+1;[.BD63])" office:value-type="float" office:value="2029" calcext:value-type="float">
            <text:p>2029</text:p>
          </table:table-cell>
          <table:table-cell table:style-name="ce166" table:formula="of:=DATE([.AZ64];[.AY64];[.$G$14])" office:value-type="date" office:date-value="2024-03-24" calcext:value-type="date">
            <text:p>24/03/2024</text:p>
          </table:table-cell>
          <table:table-cell table:style-name="ce166" table:formula="of:=[.$BE64]+IF(OR(WEEKDAY([.$BE64])=1;ISERROR(VLOOKUP([.$BE64];[$Factores.$A:.$A];1;0))=FALSE());1;IF(WEEKDAY([.$BE64])=7;2;0))" office:value-type="date" office:date-value="2024-03-25" calcext:value-type="date">
            <text:p>25/03/2024</text:p>
          </table:table-cell>
          <table:table-cell table:style-name="ce166" table:formula="of:=IF(AND(DAY([.$BE64])=27;WEEKDAY([.$BE64])=1);[.$BE64]-2;IF(AND(DAY([.$BE64])=27;WEEKDAY([.$BE64])=7);[.$BE64]-1;IF(AND(DAY([.$BE64])=26;WEEKDAY([.$BE64])=1);[.$BE64]-2;IF(AND(DAY([.$BE64])=26;WEEKDAY([.$BE64])=7);[.$BE64]-1;IF(DAY([.$BF64])=15;[.$BF64]+2;IF(DAY([.$BF64])=16;[.$BF64]+1;[.$BF64]))))))" office:value-type="date" office:date-value="2024-03-25" calcext:value-type="date">
            <text:p>25/03/2024</text:p>
          </table:table-cell>
          <table:table-cell table:style-name="ce118" table:number-columns-repeated="33"/>
          <table:table-cell table:style-name="ce119" table:formula="of:=[.CO63]+1" office:value-type="float" office:value="34" calcext:value-type="float">
            <text:p>34</text:p>
          </table:table-cell>
          <table:table-cell table:style-name="ce119"/>
          <table:table-cell table:style-name="ce187" table:formula="of:=[.CS63]+30" office:value-type="date" office:date-value="2024-03-22" calcext:value-type="date">
            <text:p>22/03/2024</text:p>
          </table:table-cell>
          <table:table-cell table:style-name="ce187" table:formula="of:=[.$CQ64]+IF(WEEKDAY([.$CQ64])=7;2;IF(WEEKDAY([.$CQ64])=1;1;0))" office:value-type="date" office:date-value="2024-03-22" calcext:value-type="date">
            <text:p>22/03/2024</text:p>
          </table:table-cell>
          <table:table-cell table:style-name="ce187" table:formula="of:=[.$CR64]+IF(AND(WEEKDAY([.$CR64])=6; ISERROR(VLOOKUP([.$CR64];[$Factores.$A:.$A];1;0))=FALSE());3;0)" office:value-type="date" office:date-value="2024-03-22" calcext:value-type="date">
            <text:p>22/03/2024</text:p>
          </table:table-cell>
          <table:table-cell table:style-name="ce187" table:formula="of:=IF(AND([.$CL$23]=3;[.$O$10]&gt;=[.$CO64]);[.$G$12];[.$CS64])" office:value-type="date" office:date-value="2024-03-22" calcext:value-type="date">
            <text:p>22/03/2024</text:p>
          </table:table-cell>
          <table:table-cell table:style-name="ce119"/>
          <table:table-cell table:style-name="ce190" table:formula="of:=IF([.$CN$23]=1;IF(AND([.$CL$23]=3;[.CT64]=[.CT63]);[.$CT64];[.AS64]);IF(AND([.$CN$23]=2;[.$CL$23]=3);[.CT64];[.CS64]))" office:value-type="date" office:date-value="2024-03-25" calcext:value-type="date">
            <text:p>25/03/2024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29" table:formula="of:=[.F64]+1" office:value-type="float" office:value="35" calcext:value-type="float">
            <text:p>35</text:p>
          </table:table-cell>
          <table:table-cell table:style-name="ce48" office:value-type="date" office:date-value="2024-04-24" calcext:value-type="date">
            <text:p>24/04/2024</text:p>
          </table:table-cell>
          <table:table-cell table:style-name="ce59" table:formula="of:=[.H64]-[.K65]" office:value-type="float" office:value="-35389.7933333333" calcext:value-type="float" table:number-columns-spanned="3" table:number-rows-spanned="1">
            <text:p><text:s/>(35,389.79)</text:p>
          </table:table-cell>
          <table:covered-table-cell table:number-columns-repeated="2" table:style-name="ce59"/>
          <table:table-cell table:style-name="ce75" office:value-type="float" office:value="602.41" calcext:value-type="float">
            <text:p><text:s/>602.41 </text:p>
          </table:table-cell>
          <table:table-cell table:style-name="ce59" office:value-type="float" office:value="14.09" calcext:value-type="float" table:number-columns-spanned="3" table:number-rows-spanned="1">
            <text:p><text:s/>14.09 </text:p>
          </table:table-cell>
          <table:covered-table-cell table:number-columns-repeated="2" table:style-name="ce59"/>
          <table:table-cell table:style-name="ce75"/>
          <table:table-cell table:style-name="ce75" table:formula="of:=[.K65]+[.L65]+[.O65]" office:value-type="float" office:value="616.5" calcext:value-type="float">
            <text:p><text:s/>616.50 </text:p>
          </table:table-cell>
          <table:table-cell table:style-name="ce75" table:formula="of:=TRUNC(((([.$P65])/(1-[.$M$14]))-([.$P65]));1)+(IF(MOD(((([.$P65])/(1-[.$M$14]))-([.$P65]))*100; 10)&gt;=5; 5; 0)/100)" office:value-type="float" office:value="0" calcext:value-type="float">
            <text:p><text:s/>- <text:s text:c="2"/></text:p>
          </table:table-cell>
          <table:table-cell table:style-name="ce97" table:formula="of:=[.Q65]+[.P65]" office:value-type="float" office:value="616.5" calcext:value-type="float" table:number-columns-spanned="2" table:number-rows-spanned="1">
            <text:p><text:s/>616.50 </text:p>
          </table:table-cell>
          <table:covered-table-cell table:style-name="ce103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4]+30" office:value-type="date" office:date-value="2024-04-08" calcext:value-type="date">
            <text:p>08/04/2024</text:p>
          </table:table-cell>
          <table:table-cell table:style-name="ce119" table:formula="of:=[.AH64]+1" office:value-type="float" office:value="35" calcext:value-type="float">
            <text:p>35</text:p>
          </table:table-cell>
          <table:table-cell table:style-name="ce127" table:formula="of:=1/POWER(1+[.$CC$32];IF([.$CL$23]=3;[.$CX65];[.$AO65]))" office:value-type="float" office:value="0.561772199845578" calcext:value-type="float">
            <text:p><text:s/>0.562 </text:p>
          </table:table-cell>
          <table:table-cell table:style-name="ce127" table:formula="of:=IF([.$AH65]&lt;=[.$CK$32];0;1/POWER(1+[.$CC$32];[.$CV65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5]=0;[.$AJ64]=0);0;[.$AI65])" office:value-type="string" office:string-value="" calcext:value-type="error">
            <text:p>#N/D</text:p>
          </table:table-cell>
          <table:table-cell table:style-name="ce130" table:formula="of:=IF([.$AV$28]=1;[.AW65];IF([.$AV$28]=2;[.AY65];IF([.$AV$28]=3;[.BA65];[.BC65])))" office:value-type="float" office:value="4" calcext:value-type="float">
            <text:p>04</text:p>
          </table:table-cell>
          <table:table-cell table:style-name="ce130" table:formula="of:=IF([.$AV$28]=1;[.AX65];IF([.$AV$28]=2;[.AZ65];IF([.$AV$28]=3;[.BB65];[.BD65])))" office:value-type="float" office:value="2024" calcext:value-type="float">
            <text:p>2024</text:p>
          </table:table-cell>
          <table:table-cell table:style-name="ce134" table:formula="of:=[.CV65]-[.CV64]" office:value-type="float" office:value="30" calcext:value-type="float">
            <text:p><text:s/>30 </text:p>
          </table:table-cell>
          <table:table-cell table:style-name="ce134" table:formula="of:=IF([.$CN$23]=2;[.CX65];[.CV65]-[.$G$12])" office:value-type="float" office:value="1066" calcext:value-type="float">
            <text:p><text:s/>1,066 </text:p>
          </table:table-cell>
          <table:table-cell table:style-name="ce136" table:formula="of:=IF([.$AV$28]=1;&quot;&quot;;DATE([.AM66];[.AL66];1)-1)" office:value-type="date" office:date-value="2024-04-30" calcext:value-type="date">
            <text:p>30/04/2024</text:p>
          </table:table-cell>
          <table:table-cell table:style-name="ce136" table:formula="of:=IF(AND([.$CL$23]=3;[.$O$10]&gt;=[.$AH65]);[.$G$12];IF(AND([.$CL$23]=3;[.$CN$23]=2);[.AG65];IF([.$AV$28]=1;[.$AW65];IF([.$CN$23]=1;DATE([.AM65];[.AL65];[.$G$14]);IF([.$AV$28]=2;[.AS64]+30;IF([.$AV$28]=3;[.AS64]+60;[.AS64]+90))))))" office:value-type="date" office:date-value="2024-04-24" calcext:value-type="date">
            <text:p>24/04/2024</text:p>
          </table:table-cell>
          <table:table-cell table:style-name="ce140" table:formula="of:=[.$AQ65]+IF(AND(DAY([.$AQ65])=27;MONTH([.$AQ65])=7);3;IF(AND(WEEKDAY([.$AQ65])=5;ISERROR(VLOOKUP([.$AQ65]+1;[$Factores.$A:.$A];1;0))=FALSE());4;IF(OR(WEEKDAY([.$AQ65])=1;ISERROR(VLOOKUP([.$AQ65];[$Factores.$A:.$A];1;0))=FALSE());1;IF(WEEKDAY([.$AQ65])=7;2;0))))" office:value-type="date" office:date-value="2024-04-24" calcext:value-type="date">
            <text:p>24/04/2024</text:p>
          </table:table-cell>
          <table:table-cell table:style-name="ce140" office:value-type="date" office:date-value="2024-04-24" calcext:value-type="date">
            <text:p>24/04/2024</text:p>
          </table:table-cell>
          <table:table-cell table:style-name="ce126" table:formula="of:=[.P65]/POWER(1+[.$AT$26];[.AO65])" office:value-type="float" office:value="409.17455405321" calcext:value-type="float">
            <text:p><text:s/>409.17 </text:p>
          </table:table-cell>
          <table:table-cell table:style-name="ce148"/>
          <table:table-cell table:style-name="ce153"/>
          <table:table-cell table:style-name="ce136" table:formula="of:=[.AW64]+15" office:value-type="date" office:date-value="2022-11-08" calcext:value-type="date">
            <text:p>08/11/2022</text:p>
          </table:table-cell>
          <table:table-cell/>
          <table:table-cell table:style-name="ce162" table:formula="of:=IF([.AY64]&lt;12;[.AY64]+1;[.AY64]+1-12)" office:value-type="float" office:value="4" calcext:value-type="float">
            <text:p>04</text:p>
          </table:table-cell>
          <table:table-cell table:style-name="ce163" table:formula="of:=IF([.AY64]=12;[.AZ64]+1;[.AZ64])" office:value-type="float" office:value="2024" calcext:value-type="float">
            <text:p>2024</text:p>
          </table:table-cell>
          <table:table-cell table:style-name="ce162" table:formula="of:=IF([.BA64]&lt;=10;[.BA64]+2;IF([.BA64]=11;1;IF([.BA64]=12;2;IF([.BA64]=13;3;4))))" office:value-type="float" office:value="3" calcext:value-type="float">
            <text:p>03</text:p>
          </table:table-cell>
          <table:table-cell table:style-name="ce163" table:formula="of:=IF([.BA64]&gt;=11;[.BB64]+1;[.BB64])" office:value-type="float" office:value="2027" calcext:value-type="float">
            <text:p>2027</text:p>
          </table:table-cell>
          <table:table-cell table:style-name="ce162" table:formula="of:=IF([.BC64]&lt;=9;[.BC64]+3;IF([.BC64]=10;1;IF([.BC64]=11;2;IF([.BC64]=12;3;4))))" office:value-type="float" office:value="2" calcext:value-type="float">
            <text:p>02</text:p>
          </table:table-cell>
          <table:table-cell table:style-name="ce163" table:formula="of:=IF([.BC64]&gt;=10;[.BD64]+1;[.BD64])" office:value-type="float" office:value="2030" calcext:value-type="float">
            <text:p>2030</text:p>
          </table:table-cell>
          <table:table-cell table:style-name="ce166" table:formula="of:=DATE([.AZ65];[.AY65];[.$G$14])" office:value-type="date" office:date-value="2024-04-24" calcext:value-type="date">
            <text:p>24/04/2024</text:p>
          </table:table-cell>
          <table:table-cell table:style-name="ce166" table:formula="of:=[.$BE65]+IF(OR(WEEKDAY([.$BE65])=1;ISERROR(VLOOKUP([.$BE65];[$Factores.$A:.$A];1;0))=FALSE());1;IF(WEEKDAY([.$BE65])=7;2;0))" office:value-type="date" office:date-value="2024-04-24" calcext:value-type="date">
            <text:p>24/04/2024</text:p>
          </table:table-cell>
          <table:table-cell table:style-name="ce166" table:formula="of:=IF(AND(DAY([.$BE65])=27;WEEKDAY([.$BE65])=1);[.$BE65]-2;IF(AND(DAY([.$BE65])=27;WEEKDAY([.$BE65])=7);[.$BE65]-1;IF(AND(DAY([.$BE65])=26;WEEKDAY([.$BE65])=1);[.$BE65]-2;IF(AND(DAY([.$BE65])=26;WEEKDAY([.$BE65])=7);[.$BE65]-1;IF(DAY([.$BF65])=15;[.$BF65]+2;IF(DAY([.$BF65])=16;[.$BF65]+1;[.$BF65]))))))" office:value-type="date" office:date-value="2024-04-24" calcext:value-type="date">
            <text:p>24/04/2024</text:p>
          </table:table-cell>
          <table:table-cell table:style-name="ce118" table:number-columns-repeated="33"/>
          <table:table-cell table:style-name="ce119" table:formula="of:=[.CO64]+1" office:value-type="float" office:value="35" calcext:value-type="float">
            <text:p>35</text:p>
          </table:table-cell>
          <table:table-cell table:style-name="ce119"/>
          <table:table-cell table:style-name="ce187" table:formula="of:=[.CS64]+30" office:value-type="date" office:date-value="2024-04-21" calcext:value-type="date">
            <text:p>21/04/2024</text:p>
          </table:table-cell>
          <table:table-cell table:style-name="ce187" table:formula="of:=[.$CQ65]+IF(WEEKDAY([.$CQ65])=7;2;IF(WEEKDAY([.$CQ65])=1;1;0))" office:value-type="date" office:date-value="2024-04-22" calcext:value-type="date">
            <text:p>22/04/2024</text:p>
          </table:table-cell>
          <table:table-cell table:style-name="ce187" table:formula="of:=[.$CR65]+IF(AND(WEEKDAY([.$CR65])=6; ISERROR(VLOOKUP([.$CR65];[$Factores.$A:.$A];1;0))=FALSE());3;0)" office:value-type="date" office:date-value="2024-04-22" calcext:value-type="date">
            <text:p>22/04/2024</text:p>
          </table:table-cell>
          <table:table-cell table:style-name="ce187" table:formula="of:=IF(AND([.$CL$23]=3;[.$O$10]&gt;=[.$CO65]);[.$G$12];[.$CS65])" office:value-type="date" office:date-value="2024-04-22" calcext:value-type="date">
            <text:p>22/04/2024</text:p>
          </table:table-cell>
          <table:table-cell table:style-name="ce119"/>
          <table:table-cell table:style-name="ce190" table:formula="of:=IF([.$CN$23]=1;IF(AND([.$CL$23]=3;[.CT65]=[.CT64]);[.$CT65];[.AS65]);IF(AND([.$CN$23]=2;[.$CL$23]=3);[.CT65];[.CS65]))" office:value-type="date" office:date-value="2024-04-24" calcext:value-type="date">
            <text:p>24/04/2024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0" table:formula="of:=[.F65]+1" office:value-type="float" office:value="36" calcext:value-type="float">
            <text:p>36</text:p>
          </table:table-cell>
          <table:table-cell table:style-name="ce49" office:value-type="date" office:date-value="2024-05-24" calcext:value-type="date">
            <text:p>24/05/2024</text:p>
          </table:table-cell>
          <table:table-cell table:style-name="ce60" table:formula="of:=[.H65]-[.K66]" office:value-type="float" office:value="-36001.7566666667" calcext:value-type="float" table:number-columns-spanned="3" table:number-rows-spanned="1">
            <text:p><text:s/>(36,001.76)</text:p>
          </table:table-cell>
          <table:covered-table-cell table:number-columns-repeated="2" table:style-name="ce60"/>
          <table:table-cell table:style-name="ce76" office:value-type="float" office:value="611.963333333336" calcext:value-type="float">
            <text:p><text:s/>611.96 </text:p>
          </table:table-cell>
          <table:table-cell table:style-name="ce60" office:value-type="float" office:value="7.1" calcext:value-type="float" table:number-columns-spanned="3" table:number-rows-spanned="1">
            <text:p><text:s/>7.10 </text:p>
          </table:table-cell>
          <table:covered-table-cell table:number-columns-repeated="2" table:style-name="ce60"/>
          <table:table-cell table:style-name="ce76"/>
          <table:table-cell table:style-name="ce76" table:formula="of:=[.K66]+[.L66]+[.O66]" office:value-type="float" office:value="619.063333333336" calcext:value-type="float">
            <text:p><text:s/>619.06 </text:p>
          </table:table-cell>
          <table:table-cell table:style-name="ce76" table:formula="of:=TRUNC(((([.$P66])/(1-[.$M$14]))-([.$P66]));1)+(IF(MOD(((([.$P66])/(1-[.$M$14]))-([.$P66]))*100; 10)&gt;=5; 5; 0)/100)" office:value-type="float" office:value="0" calcext:value-type="float">
            <text:p><text:s/>- <text:s text:c="2"/></text:p>
          </table:table-cell>
          <table:table-cell table:style-name="ce98" table:formula="of:=[.Q66]+[.P66]" office:value-type="float" office:value="619.063333333336" calcext:value-type="float" table:number-columns-spanned="2" table:number-rows-spanned="1">
            <text:p><text:s/>619.06 </text:p>
          </table:table-cell>
          <table:covered-table-cell table:style-name="ce10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 table:formula="of:=[.AG65]+30" office:value-type="date" office:date-value="2024-05-08" calcext:value-type="date">
            <text:p>08/05/2024</text:p>
          </table:table-cell>
          <table:table-cell table:style-name="ce119" table:formula="of:=[.AH65]+1" office:value-type="float" office:value="36" calcext:value-type="float">
            <text:p>36</text:p>
          </table:table-cell>
          <table:table-cell table:style-name="ce127" table:formula="of:=1/POWER(1+[.$CC$32];IF([.$CL$23]=3;[.$CX66];[.$AO66]))" office:value-type="float" office:value="0.552728960836848" calcext:value-type="float">
            <text:p><text:s/>0.553 </text:p>
          </table:table-cell>
          <table:table-cell table:style-name="ce127" table:formula="of:=IF([.$AH66]&lt;=[.$CK$32];0;1/POWER(1+[.$CC$32];[.$CV66]-[.$G$12]-VLOOKUP([.$CK$32];[.$AH$31:.$AO$500];8;0)))" office:value-type="string" office:string-value="" calcext:value-type="error">
            <text:p>#N/D</text:p>
          </table:table-cell>
          <table:table-cell table:style-name="ce119" table:formula="of:=IF(OR([.$AJ66]=0;[.$AJ65]=0);0;[.$AI66])" office:value-type="string" office:string-value="" calcext:value-type="error">
            <text:p>#N/D</text:p>
          </table:table-cell>
          <table:table-cell table:style-name="ce130" table:formula="of:=IF([.$AV$28]=1;[.AW66];IF([.$AV$28]=2;[.AY66];IF([.$AV$28]=3;[.BA66];[.BC66])))" office:value-type="float" office:value="5" calcext:value-type="float">
            <text:p>05</text:p>
          </table:table-cell>
          <table:table-cell table:style-name="ce130" table:formula="of:=IF([.$AV$28]=1;[.AX66];IF([.$AV$28]=2;[.AZ66];IF([.$AV$28]=3;[.BB66];[.BD66])))" office:value-type="float" office:value="2024" calcext:value-type="float">
            <text:p>2024</text:p>
          </table:table-cell>
          <table:table-cell table:style-name="ce134" table:formula="of:=[.CV66]-[.CV65]" office:value-type="float" office:value="30" calcext:value-type="float">
            <text:p><text:s/>30 </text:p>
          </table:table-cell>
          <table:table-cell table:style-name="ce134" table:formula="of:=IF([.$CN$23]=2;[.CX66];[.CV66]-[.$G$12])" office:value-type="float" office:value="1096" calcext:value-type="float">
            <text:p><text:s/>1,096 </text:p>
          </table:table-cell>
          <table:table-cell table:style-name="ce136"/>
          <table:table-cell table:style-name="ce136" table:formula="of:=IF(AND([.$CL$23]=3;[.$O$10]&gt;=[.$AH66]);[.$G$12];IF(AND([.$CL$23]=3;[.$CN$23]=2);[.AG66];IF([.$AV$28]=1;[.$AW66];IF([.$CN$23]=1;DATE([.AM66];[.AL66];[.$G$14]);IF([.$AV$28]=2;[.AS65]+30;IF([.$AV$28]=3;[.AS65]+60;[.AS65]+90))))))" office:value-type="date" office:date-value="2024-05-24" calcext:value-type="date">
            <text:p>24/05/2024</text:p>
          </table:table-cell>
          <table:table-cell table:style-name="ce140" table:formula="of:=[.$AQ66]+IF(AND(DAY([.$AQ66])=27;MONTH([.$AQ66])=7);3;IF(AND(WEEKDAY([.$AQ66])=5;ISERROR(VLOOKUP([.$AQ66]+1;[$Factores.$A:.$A];1;0))=FALSE());4;IF(OR(WEEKDAY([.$AQ66])=1;ISERROR(VLOOKUP([.$AQ66];[$Factores.$A:.$A];1;0))=FALSE());1;IF(WEEKDAY([.$AQ66])=7;2;0))))" office:value-type="date" office:date-value="2024-05-24" calcext:value-type="date">
            <text:p>24/05/2024</text:p>
          </table:table-cell>
          <table:table-cell table:style-name="ce140" office:value-type="date" office:date-value="2024-05-24" calcext:value-type="date">
            <text:p>24/05/2024</text:p>
          </table:table-cell>
          <table:table-cell table:style-name="ce126" table:formula="of:=[.P66]/POWER(1+[.$AT$26];[.AO66])" office:value-type="float" office:value="406.163178767693" calcext:value-type="float">
            <text:p><text:s/>406.16 </text:p>
          </table:table-cell>
          <table:table-cell table:style-name="ce148"/>
          <table:table-cell table:style-name="ce153"/>
          <table:table-cell table:style-name="ce136" office:value-type="date" office:date-value="2022-11-24" calcext:value-type="date">
            <text:p>24/11/2022</text:p>
          </table:table-cell>
          <table:table-cell/>
          <table:table-cell table:style-name="ce162" table:formula="of:=IF([.AY65]&lt;12;[.AY65]+1;[.AY65]+1-12)" office:value-type="float" office:value="5" calcext:value-type="float">
            <text:p>05</text:p>
          </table:table-cell>
          <table:table-cell table:style-name="ce163" table:formula="of:=IF([.AY65]=12;[.AZ65]+1;[.AZ65])" office:value-type="float" office:value="2024" calcext:value-type="float">
            <text:p>2024</text:p>
          </table:table-cell>
          <table:table-cell table:style-name="ce162" table:formula="of:=IF([.BA65]&lt;=10;[.BA65]+2;IF([.BA65]=11;1;IF([.BA65]=12;2;IF([.BA65]=13;3;4))))" office:value-type="float" office:value="5" calcext:value-type="float">
            <text:p>05</text:p>
          </table:table-cell>
          <table:table-cell table:style-name="ce163" table:formula="of:=IF([.BA65]&gt;=11;[.BB65]+1;[.BB65])" office:value-type="float" office:value="2027" calcext:value-type="float">
            <text:p>2027</text:p>
          </table:table-cell>
          <table:table-cell table:style-name="ce162" table:formula="of:=IF([.BC65]&lt;=9;[.BC65]+3;IF([.BC65]=10;1;IF([.BC65]=11;2;IF([.BC65]=12;3;4))))" office:value-type="float" office:value="5" calcext:value-type="float">
            <text:p>05</text:p>
          </table:table-cell>
          <table:table-cell table:style-name="ce163" table:formula="of:=IF([.BC65]&gt;=10;[.BD65]+1;[.BD65])" office:value-type="float" office:value="2030" calcext:value-type="float">
            <text:p>2030</text:p>
          </table:table-cell>
          <table:table-cell table:style-name="ce166" table:formula="of:=DATE([.AZ66];[.AY66];[.$G$14])" office:value-type="date" office:date-value="2024-05-24" calcext:value-type="date">
            <text:p>24/05/2024</text:p>
          </table:table-cell>
          <table:table-cell table:style-name="ce166" table:formula="of:=[.$BE66]+IF(OR(WEEKDAY([.$BE66])=1;ISERROR(VLOOKUP([.$BE66];[$Factores.$A:.$A];1;0))=FALSE());1;IF(WEEKDAY([.$BE66])=7;2;0))" office:value-type="date" office:date-value="2024-05-24" calcext:value-type="date">
            <text:p>24/05/2024</text:p>
          </table:table-cell>
          <table:table-cell table:style-name="ce166" table:formula="of:=IF(AND(DAY([.$BE66])=27;WEEKDAY([.$BE66])=1);[.$BE66]-2;IF(AND(DAY([.$BE66])=27;WEEKDAY([.$BE66])=7);[.$BE66]-1;IF(AND(DAY([.$BE66])=26;WEEKDAY([.$BE66])=1);[.$BE66]-2;IF(AND(DAY([.$BE66])=26;WEEKDAY([.$BE66])=7);[.$BE66]-1;IF(DAY([.$BF66])=15;[.$BF66]+2;IF(DAY([.$BF66])=16;[.$BF66]+1;[.$BF66]))))))" office:value-type="date" office:date-value="2024-05-24" calcext:value-type="date">
            <text:p>24/05/2024</text:p>
          </table:table-cell>
          <table:table-cell table:style-name="ce118" table:number-columns-repeated="33"/>
          <table:table-cell table:style-name="ce119" table:formula="of:=[.CO65]+1" office:value-type="float" office:value="36" calcext:value-type="float">
            <text:p>36</text:p>
          </table:table-cell>
          <table:table-cell table:style-name="ce119"/>
          <table:table-cell table:style-name="ce187" table:formula="of:=[.CS65]+30" office:value-type="date" office:date-value="2024-05-22" calcext:value-type="date">
            <text:p>22/05/2024</text:p>
          </table:table-cell>
          <table:table-cell table:style-name="ce187" table:formula="of:=[.$CQ66]+IF(WEEKDAY([.$CQ66])=7;2;IF(WEEKDAY([.$CQ66])=1;1;0))" office:value-type="date" office:date-value="2024-05-22" calcext:value-type="date">
            <text:p>22/05/2024</text:p>
          </table:table-cell>
          <table:table-cell table:style-name="ce187" table:formula="of:=[.$CR66]+IF(AND(WEEKDAY([.$CR66])=6; ISERROR(VLOOKUP([.$CR66];[$Factores.$A:.$A];1;0))=FALSE());3;0)" office:value-type="date" office:date-value="2024-05-22" calcext:value-type="date">
            <text:p>22/05/2024</text:p>
          </table:table-cell>
          <table:table-cell table:style-name="ce187" table:formula="of:=IF(AND([.$CL$23]=3;[.$O$10]&gt;=[.$CO66]);[.$G$12];[.$CS66])" office:value-type="date" office:date-value="2024-05-22" calcext:value-type="date">
            <text:p>22/05/2024</text:p>
          </table:table-cell>
          <table:table-cell table:style-name="ce119"/>
          <table:table-cell table:style-name="ce190" table:formula="of:=IF([.$CN$23]=1;IF(AND([.$CL$23]=3;[.CT66]=[.CT65]);[.$CT66];[.AS66]);IF(AND([.$CN$23]=2;[.$CL$23]=3);[.CT66];[.CS66]))" office:value-type="date" office:date-value="2024-05-24" calcext:value-type="date">
            <text:p>24/05/2024</text:p>
          </table:table-cell>
          <table:table-cell table:style-name="ce118" table:number-columns-repeated="1628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 table:formula="of:=[.AH66]+1" office:value-type="float" office:value="37" calcext:value-type="float">
            <text:p>37</text:p>
          </table:table-cell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 table:formula="of:=[.AW66]+15" office:value-type="date" office:date-value="2022-12-09" calcext:value-type="date">
            <text:p>09/12/2022</text:p>
          </table:table-cell>
          <table:table-cell/>
          <table:table-cell table:style-name="ce162" table:formula="of:=IF([.AY66]&lt;12;[.AY66]+1;[.AY66]+1-12)" office:value-type="float" office:value="6" calcext:value-type="float">
            <text:p>06</text:p>
          </table:table-cell>
          <table:table-cell table:style-name="ce163" table:formula="of:=IF([.AY66]=12;[.AZ66]+1;[.AZ66])" office:value-type="float" office:value="2024" calcext:value-type="float">
            <text:p>2024</text:p>
          </table:table-cell>
          <table:table-cell table:style-name="ce162" table:formula="of:=IF([.BA66]&lt;=10;[.BA66]+2;IF([.BA66]=11;1;IF([.BA66]=12;2;IF([.BA66]=13;3;4))))" office:value-type="float" office:value="7" calcext:value-type="float">
            <text:p>07</text:p>
          </table:table-cell>
          <table:table-cell table:style-name="ce163" table:formula="of:=IF([.BA66]&gt;=11;[.BB66]+1;[.BB66])" office:value-type="float" office:value="2027" calcext:value-type="float">
            <text:p>2027</text:p>
          </table:table-cell>
          <table:table-cell table:style-name="ce162" table:formula="of:=IF([.BC66]&lt;=9;[.BC66]+3;IF([.BC66]=10;1;IF([.BC66]=11;2;IF([.BC66]=12;3;4))))" office:value-type="float" office:value="8" calcext:value-type="float">
            <text:p>08</text:p>
          </table:table-cell>
          <table:table-cell table:style-name="ce163" table:formula="of:=IF([.BC66]&gt;=10;[.BD66]+1;[.BD66])" office:value-type="float" office:value="2030" calcext:value-type="float">
            <text:p>2030</text:p>
          </table:table-cell>
          <table:table-cell table:style-name="ce166" table:formula="of:=DATE([.AZ67];[.AY67];[.$G$14])" office:value-type="date" office:date-value="2024-06-24" calcext:value-type="date">
            <text:p>24/06/2024</text:p>
          </table:table-cell>
          <table:table-cell table:style-name="ce166" table:formula="of:=[.$BE67]+IF(OR(WEEKDAY([.$BE67])=1;ISERROR(VLOOKUP([.$BE67];[$Factores.$A:.$A];1;0))=FALSE());1;IF(WEEKDAY([.$BE67])=7;2;0))" office:value-type="date" office:date-value="2024-06-24" calcext:value-type="date">
            <text:p>24/06/2024</text:p>
          </table:table-cell>
          <table:table-cell table:style-name="ce166" table:formula="of:=IF(AND(DAY([.$BE67])=27;WEEKDAY([.$BE67])=1);[.$BE67]-2;IF(AND(DAY([.$BE67])=27;WEEKDAY([.$BE67])=7);[.$BE67]-1;IF(AND(DAY([.$BE67])=26;WEEKDAY([.$BE67])=1);[.$BE67]-2;IF(AND(DAY([.$BE67])=26;WEEKDAY([.$BE67])=7);[.$BE67]-1;IF(DAY([.$BF67])=15;[.$BF67]+2;IF(DAY([.$BF67])=16;[.$BF67]+1;[.$BF67]))))))" office:value-type="date" office:date-value="2024-06-24" calcext:value-type="date">
            <text:p>24/06/2024</text:p>
          </table:table-cell>
          <table:table-cell table:style-name="ce118" table:number-columns-repeated="33"/>
          <table:table-cell table:style-name="ce119" table:formula="of:=[.CO66]+1" office:value-type="float" office:value="37" calcext:value-type="float">
            <text:p>37</text:p>
          </table:table-cell>
          <table:table-cell table:style-name="ce119"/>
          <table:table-cell table:style-name="ce187" table:formula="of:=[.CS66]+30" office:value-type="date" office:date-value="2024-06-21" calcext:value-type="date">
            <text:p>21/06/2024</text:p>
          </table:table-cell>
          <table:table-cell table:style-name="ce187" table:formula="of:=[.$CQ67]+IF(WEEKDAY([.$CQ67])=7;2;IF(WEEKDAY([.$CQ67])=1;1;0))" office:value-type="date" office:date-value="2024-06-21" calcext:value-type="date">
            <text:p>21/06/2024</text:p>
          </table:table-cell>
          <table:table-cell table:style-name="ce187" table:formula="of:=[.$CR67]+IF(AND(WEEKDAY([.$CR67])=6; ISERROR(VLOOKUP([.$CR67];[$Factores.$A:.$A];1;0))=FALSE());3;0)" office:value-type="date" office:date-value="2024-06-21" calcext:value-type="date">
            <text:p>21/06/2024</text:p>
          </table:table-cell>
          <table:table-cell table:style-name="ce187" table:formula="of:=IF(AND([.$CL$23]=3;[.$O$10]&gt;=[.$CO67]);[.$G$12];[.$CS67])" office:value-type="date" office:date-value="2024-06-21" calcext:value-type="date">
            <text:p>21/06/2024</text:p>
          </table:table-cell>
          <table:table-cell table:style-name="ce119"/>
          <table:table-cell table:style-name="ce190" table:formula="of:=IF([.$CN$23]=1;IF(AND([.$CL$23]=3;[.CT67]=[.CT66]);[.$CT67];[.AS67]);IF(AND([.$CN$23]=2;[.$CL$23]=3);[.CT67];[.CS67]))" office:value-type="date" office:date-value="1899-12-30" calcext:value-type="date">
            <text:p>30/12/1899</text:p>
          </table:table-cell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2"/>
          <table:table-cell table:style-name="ce51"/>
          <table:table-cell table:style-name="ce62" table:number-columns-spanned="3" table:number-rows-spanned="1"/>
          <table:covered-table-cell table:number-columns-repeated="2" table:style-name="ce62"/>
          <table:table-cell table:style-name="ce78" table:formula="of:=SUM([.K$31:.K66])" office:value-type="float" office:value="18000.9033333333" calcext:value-type="float">
            <text:p><text:s/>18,000.90 </text:p>
          </table:table-cell>
          <table:table-cell table:style-name="ce62" table:formula="of:=SUM([.L$31:.N66])" office:value-type="float" office:value="4195.66" calcext:value-type="float" table:number-columns-spanned="3" table:number-rows-spanned="1">
            <text:p><text:s/>4,195.66 </text:p>
          </table:table-cell>
          <table:covered-table-cell table:number-columns-repeated="2" table:style-name="ce62"/>
          <table:table-cell table:style-name="ce78"/>
          <table:table-cell table:style-name="ce78" table:formula="of:=SUM([.P$31:.P66])" office:value-type="float" office:value="22196.5633333333" calcext:value-type="float">
            <text:p><text:s/>22,196.56 </text:p>
          </table:table-cell>
          <table:table-cell table:style-name="ce78"/>
          <table:table-cell table:style-name="ce100" table:formula="of:=SUM([.R$31:.S66])" office:value-type="float" office:value="22196.5633333333" calcext:value-type="float" table:number-columns-spanned="2" table:number-rows-spanned="1">
            <text:p><text:s/>22,196.56 </text:p>
          </table:table-cell>
          <table:covered-table-cell table:style-name="ce106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 table:formula="of:=[.AH67]+1" office:value-type="float" office:value="38" calcext:value-type="float">
            <text:p>38</text:p>
          </table:table-cell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 office:value-type="date" office:date-value="2022-12-26" calcext:value-type="date">
            <text:p>26/12/2022</text:p>
          </table:table-cell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 table:formula="of:=[.AW68]+15" office:value-type="date" office:date-value="2023-01-10" calcext:value-type="date">
            <text:p>10/01/2023</text:p>
          </table:table-cell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5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13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 table:formula="of:=[.AW70]+15" office:value-type="date" office:date-value="1900-01-14" calcext:value-type="date">
            <text:p>14/01/1900</text:p>
          </table:table-cell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1"/>
          <table:table-cell table:style-name="ce50"/>
          <table:table-cell table:style-name="ce61" table:number-columns-spanned="3" table:number-rows-spanned="1"/>
          <table:covered-table-cell table:number-columns-repeated="2" table:style-name="ce61"/>
          <table:table-cell table:style-name="ce77"/>
          <table:table-cell table:style-name="ce61" table:number-columns-spanned="3" table:number-rows-spanned="1"/>
          <table:covered-table-cell table:number-columns-repeated="2" table:style-name="ce61"/>
          <table:table-cell table:style-name="ce77" table:number-columns-repeated="3"/>
          <table:table-cell table:style-name="ce99" table:number-columns-spanned="2" table:number-rows-spanned="1"/>
          <table:covered-table-cell table:style-name="ce105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 table:number-columns-repeated="2"/>
          <table:table-cell table:style-name="ce119"/>
          <table:table-cell table:style-name="ce130" table:number-columns-repeated="2"/>
          <table:table-cell table:style-name="ce134" table:number-columns-repeated="2"/>
          <table:table-cell table:style-name="ce136" table:number-columns-repeated="2"/>
          <table:table-cell table:style-name="ce140" table:number-columns-repeated="2"/>
          <table:table-cell table:style-name="ce126"/>
          <table:table-cell table:style-name="ce14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0"/>
          <table:table-cell table:style-name="ce34" table:number-columns-repeated="2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/>
          <table:table-cell table:style-name="ce162"/>
          <table:table-cell table:style-name="ce163"/>
          <table:table-cell table:style-name="ce162"/>
          <table:table-cell table:style-name="ce163"/>
          <table:table-cell table:style-name="ce162"/>
          <table:table-cell table:style-name="ce163"/>
          <table:table-cell table:style-name="ce166" table:number-columns-repeated="3"/>
          <table:table-cell table:style-name="ce118" table:number-columns-repeated="33"/>
          <table:table-cell table:style-name="ce119" table:number-columns-repeated="2"/>
          <table:table-cell table:style-name="ce187" table:number-columns-repeated="4"/>
          <table:table-cell table:style-name="ce119"/>
          <table:table-cell table:style-name="ce190"/>
          <table:table-cell table:style-name="ce118" table:number-columns-repeated="16284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 table:number-columns-repeated="2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95" table:number-columns-repeated="2"/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9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/>
          <table:table-cell table:style-name="ce5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5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style-name="ce2" table:number-columns-repeated="3"/>
          <table:table-cell table:style-name="ce6" table:number-columns-repeated="3"/>
          <table:table-cell table:style-name="ce118" table:number-columns-repeated="7"/>
          <table:table-cell table:style-name="ce124"/>
          <table:table-cell table:style-name="ce118"/>
          <table:table-cell table:style-name="ce127"/>
          <table:table-cell table:style-name="ce118"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 table:number-columns-repeated="2"/>
          <table:table-cell table:style-name="ce126"/>
          <table:table-cell table:style-name="ce118"/>
          <table:table-cell table:style-name="ce153"/>
          <table:table-cell table:style-name="ce136"/>
          <table:table-cell table:number-columns-repeated="7"/>
          <table:table-cell table:style-name="ce118" table:number-columns-repeated="1632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3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81" table:number-columns-spanned="3" table:number-rows-spanned="1"/>
          <table:covered-table-cell table:number-columns-repeated="2" table:style-name="ce81"/>
          <table:table-cell table:style-name="ce3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2"/>
          <table:table-cell table:style-name="ce136"/>
          <table:table-cell table:number-columns-repeated="16335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/>
          <table:table-cell table:style-name="ce127"/>
          <table:table-cell table:number-columns-repeated="2"/>
          <table:table-cell table:style-name="ce131" table:number-columns-repeated="3"/>
          <table:table-cell table:style-name="ce134"/>
          <table:table-cell table:style-name="ce137" table:number-columns-repeated="2"/>
          <table:table-cell table:style-name="ce118"/>
          <table:table-cell/>
          <table:table-cell table:style-name="ce126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3"/>
          <table:table-cell table:style-name="ce4" table:number-columns-repeated="2"/>
          <table:table-cell table:style-name="ce34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4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/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0]+30" office:value-type="date" office:date-value="1900-01-29" calcext:value-type="date">
            <text:p>29/01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1]+30" office:value-type="date" office:date-value="1900-02-28" calcext:value-type="date">
            <text:p>28/02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2]+30" office:value-type="date" office:date-value="1900-03-30" calcext:value-type="date">
            <text:p>30/03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3]+30" office:value-type="date" office:date-value="1900-04-29" calcext:value-type="date">
            <text:p>29/04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4]+30" office:value-type="date" office:date-value="1900-05-29" calcext:value-type="date">
            <text:p>29/05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5]+30" office:value-type="date" office:date-value="1900-06-28" calcext:value-type="date">
            <text:p>28/06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6]+30" office:value-type="date" office:date-value="1900-07-28" calcext:value-type="date">
            <text:p>28/07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7]+30" office:value-type="date" office:date-value="1900-08-27" calcext:value-type="date">
            <text:p>27/08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8]+30" office:value-type="date" office:date-value="1900-09-26" calcext:value-type="date">
            <text:p>26/09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59]+30" office:value-type="date" office:date-value="1900-10-26" calcext:value-type="date">
            <text:p>26/10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0]+30" office:value-type="date" office:date-value="1900-11-25" calcext:value-type="date">
            <text:p>25/11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1]+30" office:value-type="date" office:date-value="1900-12-25" calcext:value-type="date">
            <text:p>25/12/190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2]+30" office:value-type="date" office:date-value="1901-01-24" calcext:value-type="date">
            <text:p>24/01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3]+30" office:value-type="date" office:date-value="1901-02-23" calcext:value-type="date">
            <text:p>23/02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3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3"/>
          <table:table-cell table:style-name="ce6" table:number-columns-repeated="4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4]+30" office:value-type="date" office:date-value="1901-03-25" calcext:value-type="date">
            <text:p>25/03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5]+30" office:value-type="date" office:date-value="1901-04-24" calcext:value-type="date">
            <text:p>24/04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6]+30" office:value-type="date" office:date-value="1901-05-24" calcext:value-type="date">
            <text:p>24/05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7]+30" office:value-type="date" office:date-value="1901-06-23" calcext:value-type="date">
            <text:p>23/06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8]+30" office:value-type="date" office:date-value="1901-07-23" calcext:value-type="date">
            <text:p>23/07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69]+30" office:value-type="date" office:date-value="1901-08-22" calcext:value-type="date">
            <text:p>22/08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0]+30" office:value-type="date" office:date-value="1901-09-21" calcext:value-type="date">
            <text:p>21/09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1]+30" office:value-type="date" office:date-value="1901-10-21" calcext:value-type="date">
            <text:p>21/10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2]+30" office:value-type="date" office:date-value="1901-11-20" calcext:value-type="date">
            <text:p>20/11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3]+30" office:value-type="date" office:date-value="1901-12-20" calcext:value-type="date">
            <text:p>20/12/190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4]+30" office:value-type="date" office:date-value="1902-01-19" calcext:value-type="date">
            <text:p>19/01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5]+30" office:value-type="date" office:date-value="1902-02-18" calcext:value-type="date">
            <text:p>18/02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6]+30" office:value-type="date" office:date-value="1902-03-20" calcext:value-type="date">
            <text:p>20/03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7]+30" office:value-type="date" office:date-value="1902-04-19" calcext:value-type="date">
            <text:p>19/04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8]+30" office:value-type="date" office:date-value="1902-05-19" calcext:value-type="date">
            <text:p>19/05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79]+30" office:value-type="date" office:date-value="1902-06-18" calcext:value-type="date">
            <text:p>18/06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0]+30" office:value-type="date" office:date-value="1902-07-18" calcext:value-type="date">
            <text:p>18/07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1]+30" office:value-type="date" office:date-value="1902-08-17" calcext:value-type="date">
            <text:p>17/08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2]+30" office:value-type="date" office:date-value="1902-09-16" calcext:value-type="date">
            <text:p>16/09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3]+30" office:value-type="date" office:date-value="1902-10-16" calcext:value-type="date">
            <text:p>16/10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4]+30" office:value-type="date" office:date-value="1902-11-15" calcext:value-type="date">
            <text:p>15/11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5]+30" office:value-type="date" office:date-value="1902-12-15" calcext:value-type="date">
            <text:p>15/12/190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6]+30" office:value-type="date" office:date-value="1903-01-14" calcext:value-type="date">
            <text:p>14/01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7]+30" office:value-type="date" office:date-value="1903-02-13" calcext:value-type="date">
            <text:p>13/02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8]+30" office:value-type="date" office:date-value="1903-03-15" calcext:value-type="date">
            <text:p>15/03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89]+30" office:value-type="date" office:date-value="1903-04-14" calcext:value-type="date">
            <text:p>14/04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0]+30" office:value-type="date" office:date-value="1903-05-14" calcext:value-type="date">
            <text:p>14/05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1]+30" office:value-type="date" office:date-value="1903-06-13" calcext:value-type="date">
            <text:p>13/06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2]+30" office:value-type="date" office:date-value="1903-07-13" calcext:value-type="date">
            <text:p>13/07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3]+30" office:value-type="date" office:date-value="1903-08-12" calcext:value-type="date">
            <text:p>12/08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4]+30" office:value-type="date" office:date-value="1903-09-11" calcext:value-type="date">
            <text:p>11/09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5]+30" office:value-type="date" office:date-value="1903-10-11" calcext:value-type="date">
            <text:p>11/10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6]+30" office:value-type="date" office:date-value="1903-11-10" calcext:value-type="date">
            <text:p>10/11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7]+30" office:value-type="date" office:date-value="1903-12-10" calcext:value-type="date">
            <text:p>10/12/190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8]+30" office:value-type="date" office:date-value="1904-01-09" calcext:value-type="date">
            <text:p>09/01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599]+30" office:value-type="date" office:date-value="1904-02-08" calcext:value-type="date">
            <text:p>08/02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0]+30" office:value-type="date" office:date-value="1904-03-09" calcext:value-type="date">
            <text:p>09/03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1]+30" office:value-type="date" office:date-value="1904-04-08" calcext:value-type="date">
            <text:p>08/04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2]+30" office:value-type="date" office:date-value="1904-05-08" calcext:value-type="date">
            <text:p>08/05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3]+30" office:value-type="date" office:date-value="1904-06-07" calcext:value-type="date">
            <text:p>07/06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4]+30" office:value-type="date" office:date-value="1904-07-07" calcext:value-type="date">
            <text:p>07/07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5]+30" office:value-type="date" office:date-value="1904-08-06" calcext:value-type="date">
            <text:p>06/08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6]+30" office:value-type="date" office:date-value="1904-09-05" calcext:value-type="date">
            <text:p>05/09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7]+30" office:value-type="date" office:date-value="1904-10-05" calcext:value-type="date">
            <text:p>05/10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8]+30" office:value-type="date" office:date-value="1904-11-04" calcext:value-type="date">
            <text:p>04/11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09]+30" office:value-type="date" office:date-value="1904-12-04" calcext:value-type="date">
            <text:p>04/12/190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0]+30" office:value-type="date" office:date-value="1905-01-03" calcext:value-type="date">
            <text:p>03/01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1]+30" office:value-type="date" office:date-value="1905-02-02" calcext:value-type="date">
            <text:p>02/02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2]+30" office:value-type="date" office:date-value="1905-03-04" calcext:value-type="date">
            <text:p>04/03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3]+30" office:value-type="date" office:date-value="1905-04-03" calcext:value-type="date">
            <text:p>03/04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4]+30" office:value-type="date" office:date-value="1905-05-03" calcext:value-type="date">
            <text:p>03/05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5]+30" office:value-type="date" office:date-value="1905-06-02" calcext:value-type="date">
            <text:p>02/06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6]+30" office:value-type="date" office:date-value="1905-07-02" calcext:value-type="date">
            <text:p>02/07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7]+30" office:value-type="date" office:date-value="1905-08-01" calcext:value-type="date">
            <text:p>01/08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8]+30" office:value-type="date" office:date-value="1905-08-31" calcext:value-type="date">
            <text:p>31/08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19]+30" office:value-type="date" office:date-value="1905-09-30" calcext:value-type="date">
            <text:p>30/09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0]+30" office:value-type="date" office:date-value="1905-10-30" calcext:value-type="date">
            <text:p>30/10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1]+30" office:value-type="date" office:date-value="1905-11-29" calcext:value-type="date">
            <text:p>29/11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2]+30" office:value-type="date" office:date-value="1905-12-29" calcext:value-type="date">
            <text:p>29/12/190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3]+30" office:value-type="date" office:date-value="1906-01-28" calcext:value-type="date">
            <text:p>28/01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4]+30" office:value-type="date" office:date-value="1906-02-27" calcext:value-type="date">
            <text:p>27/02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5]+30" office:value-type="date" office:date-value="1906-03-29" calcext:value-type="date">
            <text:p>29/03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6]+30" office:value-type="date" office:date-value="1906-04-28" calcext:value-type="date">
            <text:p>28/04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7]+30" office:value-type="date" office:date-value="1906-05-28" calcext:value-type="date">
            <text:p>28/05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8]+30" office:value-type="date" office:date-value="1906-06-27" calcext:value-type="date">
            <text:p>27/06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29]+30" office:value-type="date" office:date-value="1906-07-27" calcext:value-type="date">
            <text:p>27/07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0]+30" office:value-type="date" office:date-value="1906-08-26" calcext:value-type="date">
            <text:p>26/08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1]+30" office:value-type="date" office:date-value="1906-09-25" calcext:value-type="date">
            <text:p>25/09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2]+30" office:value-type="date" office:date-value="1906-10-25" calcext:value-type="date">
            <text:p>25/10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3]+30" office:value-type="date" office:date-value="1906-11-24" calcext:value-type="date">
            <text:p>24/11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4]+30" office:value-type="date" office:date-value="1906-12-24" calcext:value-type="date">
            <text:p>24/12/190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5]+30" office:value-type="date" office:date-value="1907-01-23" calcext:value-type="date">
            <text:p>23/01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6]+30" office:value-type="date" office:date-value="1907-02-22" calcext:value-type="date">
            <text:p>22/02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7]+30" office:value-type="date" office:date-value="1907-03-24" calcext:value-type="date">
            <text:p>24/03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8]+30" office:value-type="date" office:date-value="1907-04-23" calcext:value-type="date">
            <text:p>23/04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39]+30" office:value-type="date" office:date-value="1907-05-23" calcext:value-type="date">
            <text:p>23/05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0]+30" office:value-type="date" office:date-value="1907-06-22" calcext:value-type="date">
            <text:p>22/06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1]+30" office:value-type="date" office:date-value="1907-07-22" calcext:value-type="date">
            <text:p>22/07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2]+30" office:value-type="date" office:date-value="1907-08-21" calcext:value-type="date">
            <text:p>21/08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3]+30" office:value-type="date" office:date-value="1907-09-20" calcext:value-type="date">
            <text:p>20/09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4]+30" office:value-type="date" office:date-value="1907-10-20" calcext:value-type="date">
            <text:p>20/10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5]+30" office:value-type="date" office:date-value="1907-11-19" calcext:value-type="date">
            <text:p>19/11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6]+30" office:value-type="date" office:date-value="1907-12-19" calcext:value-type="date">
            <text:p>19/12/190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7]+30" office:value-type="date" office:date-value="1908-01-18" calcext:value-type="date">
            <text:p>18/01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8]+30" office:value-type="date" office:date-value="1908-02-17" calcext:value-type="date">
            <text:p>17/02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49]+30" office:value-type="date" office:date-value="1908-03-18" calcext:value-type="date">
            <text:p>18/03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0]+30" office:value-type="date" office:date-value="1908-04-17" calcext:value-type="date">
            <text:p>17/04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1]+30" office:value-type="date" office:date-value="1908-05-17" calcext:value-type="date">
            <text:p>17/05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2]+30" office:value-type="date" office:date-value="1908-06-16" calcext:value-type="date">
            <text:p>16/06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3]+30" office:value-type="date" office:date-value="1908-07-16" calcext:value-type="date">
            <text:p>16/07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4]+30" office:value-type="date" office:date-value="1908-08-15" calcext:value-type="date">
            <text:p>15/08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5]+30" office:value-type="date" office:date-value="1908-09-14" calcext:value-type="date">
            <text:p>14/09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6]+30" office:value-type="date" office:date-value="1908-10-14" calcext:value-type="date">
            <text:p>14/10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7]+30" office:value-type="date" office:date-value="1908-11-13" calcext:value-type="date">
            <text:p>13/11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8]+30" office:value-type="date" office:date-value="1908-12-13" calcext:value-type="date">
            <text:p>13/12/190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59]+30" office:value-type="date" office:date-value="1909-01-12" calcext:value-type="date">
            <text:p>12/01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0]+30" office:value-type="date" office:date-value="1909-02-11" calcext:value-type="date">
            <text:p>11/02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1]+30" office:value-type="date" office:date-value="1909-03-13" calcext:value-type="date">
            <text:p>13/03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2]+30" office:value-type="date" office:date-value="1909-04-12" calcext:value-type="date">
            <text:p>12/04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3]+30" office:value-type="date" office:date-value="1909-05-12" calcext:value-type="date">
            <text:p>12/05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4]+30" office:value-type="date" office:date-value="1909-06-11" calcext:value-type="date">
            <text:p>11/06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5]+30" office:value-type="date" office:date-value="1909-07-11" calcext:value-type="date">
            <text:p>11/07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6]+30" office:value-type="date" office:date-value="1909-08-10" calcext:value-type="date">
            <text:p>10/08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7]+30" office:value-type="date" office:date-value="1909-09-09" calcext:value-type="date">
            <text:p>09/09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8]+30" office:value-type="date" office:date-value="1909-10-09" calcext:value-type="date">
            <text:p>09/10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69]+30" office:value-type="date" office:date-value="1909-11-08" calcext:value-type="date">
            <text:p>08/11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0]+30" office:value-type="date" office:date-value="1909-12-08" calcext:value-type="date">
            <text:p>08/12/190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1]+30" office:value-type="date" office:date-value="1910-01-07" calcext:value-type="date">
            <text:p>07/01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2]+30" office:value-type="date" office:date-value="1910-02-06" calcext:value-type="date">
            <text:p>06/02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3]+30" office:value-type="date" office:date-value="1910-03-08" calcext:value-type="date">
            <text:p>08/03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4]+30" office:value-type="date" office:date-value="1910-04-07" calcext:value-type="date">
            <text:p>07/04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5]+30" office:value-type="date" office:date-value="1910-05-07" calcext:value-type="date">
            <text:p>07/05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6]+30" office:value-type="date" office:date-value="1910-06-06" calcext:value-type="date">
            <text:p>06/06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7]+30" office:value-type="date" office:date-value="1910-07-06" calcext:value-type="date">
            <text:p>06/07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8]+30" office:value-type="date" office:date-value="1910-08-05" calcext:value-type="date">
            <text:p>05/08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79]+30" office:value-type="date" office:date-value="1910-09-04" calcext:value-type="date">
            <text:p>04/09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0]+30" office:value-type="date" office:date-value="1910-10-04" calcext:value-type="date">
            <text:p>04/10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1]+30" office:value-type="date" office:date-value="1910-11-03" calcext:value-type="date">
            <text:p>03/11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2]+30" office:value-type="date" office:date-value="1910-12-03" calcext:value-type="date">
            <text:p>03/12/191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3]+30" office:value-type="date" office:date-value="1911-01-02" calcext:value-type="date">
            <text:p>02/01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4]+30" office:value-type="date" office:date-value="1911-02-01" calcext:value-type="date">
            <text:p>01/02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5]+30" office:value-type="date" office:date-value="1911-03-03" calcext:value-type="date">
            <text:p>03/03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6]+30" office:value-type="date" office:date-value="1911-04-02" calcext:value-type="date">
            <text:p>02/04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7]+30" office:value-type="date" office:date-value="1911-05-02" calcext:value-type="date">
            <text:p>02/05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8]+30" office:value-type="date" office:date-value="1911-06-01" calcext:value-type="date">
            <text:p>01/06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89]+30" office:value-type="date" office:date-value="1911-07-01" calcext:value-type="date">
            <text:p>01/07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0]+30" office:value-type="date" office:date-value="1911-07-31" calcext:value-type="date">
            <text:p>31/07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1]+30" office:value-type="date" office:date-value="1911-08-30" calcext:value-type="date">
            <text:p>30/08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2]+30" office:value-type="date" office:date-value="1911-09-29" calcext:value-type="date">
            <text:p>29/09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3]+30" office:value-type="date" office:date-value="1911-10-29" calcext:value-type="date">
            <text:p>29/10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4]+30" office:value-type="date" office:date-value="1911-11-28" calcext:value-type="date">
            <text:p>28/11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5]+30" office:value-type="date" office:date-value="1911-12-28" calcext:value-type="date">
            <text:p>28/12/1911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6]+30" office:value-type="date" office:date-value="1912-01-27" calcext:value-type="date">
            <text:p>27/01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7]+30" office:value-type="date" office:date-value="1912-02-26" calcext:value-type="date">
            <text:p>26/02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8]+30" office:value-type="date" office:date-value="1912-03-27" calcext:value-type="date">
            <text:p>27/03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699]+30" office:value-type="date" office:date-value="1912-04-26" calcext:value-type="date">
            <text:p>26/04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0]+30" office:value-type="date" office:date-value="1912-05-26" calcext:value-type="date">
            <text:p>26/05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1]+30" office:value-type="date" office:date-value="1912-06-25" calcext:value-type="date">
            <text:p>25/06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2]+30" office:value-type="date" office:date-value="1912-07-25" calcext:value-type="date">
            <text:p>25/07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3]+30" office:value-type="date" office:date-value="1912-08-24" calcext:value-type="date">
            <text:p>24/08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4]+30" office:value-type="date" office:date-value="1912-09-23" calcext:value-type="date">
            <text:p>23/09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5]+30" office:value-type="date" office:date-value="1912-10-23" calcext:value-type="date">
            <text:p>23/10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6]+30" office:value-type="date" office:date-value="1912-11-22" calcext:value-type="date">
            <text:p>22/11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7]+30" office:value-type="date" office:date-value="1912-12-22" calcext:value-type="date">
            <text:p>22/12/1912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8]+30" office:value-type="date" office:date-value="1913-01-21" calcext:value-type="date">
            <text:p>21/01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09]+30" office:value-type="date" office:date-value="1913-02-20" calcext:value-type="date">
            <text:p>20/02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0]+30" office:value-type="date" office:date-value="1913-03-22" calcext:value-type="date">
            <text:p>22/03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1]+30" office:value-type="date" office:date-value="1913-04-21" calcext:value-type="date">
            <text:p>21/04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2]+30" office:value-type="date" office:date-value="1913-05-21" calcext:value-type="date">
            <text:p>21/05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3]+30" office:value-type="date" office:date-value="1913-06-20" calcext:value-type="date">
            <text:p>20/06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4]+30" office:value-type="date" office:date-value="1913-07-20" calcext:value-type="date">
            <text:p>20/07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5]+30" office:value-type="date" office:date-value="1913-08-19" calcext:value-type="date">
            <text:p>19/08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6]+30" office:value-type="date" office:date-value="1913-09-18" calcext:value-type="date">
            <text:p>18/09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7]+30" office:value-type="date" office:date-value="1913-10-18" calcext:value-type="date">
            <text:p>18/10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8]+30" office:value-type="date" office:date-value="1913-11-17" calcext:value-type="date">
            <text:p>17/11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19]+30" office:value-type="date" office:date-value="1913-12-17" calcext:value-type="date">
            <text:p>17/12/1913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0]+30" office:value-type="date" office:date-value="1914-01-16" calcext:value-type="date">
            <text:p>16/01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1]+30" office:value-type="date" office:date-value="1914-02-15" calcext:value-type="date">
            <text:p>15/02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2]+30" office:value-type="date" office:date-value="1914-03-17" calcext:value-type="date">
            <text:p>17/03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3]+30" office:value-type="date" office:date-value="1914-04-16" calcext:value-type="date">
            <text:p>16/04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4]+30" office:value-type="date" office:date-value="1914-05-16" calcext:value-type="date">
            <text:p>16/05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5]+30" office:value-type="date" office:date-value="1914-06-15" calcext:value-type="date">
            <text:p>15/06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6]+30" office:value-type="date" office:date-value="1914-07-15" calcext:value-type="date">
            <text:p>15/07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7]+30" office:value-type="date" office:date-value="1914-08-14" calcext:value-type="date">
            <text:p>14/08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8]+30" office:value-type="date" office:date-value="1914-09-13" calcext:value-type="date">
            <text:p>13/09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29]+30" office:value-type="date" office:date-value="1914-10-13" calcext:value-type="date">
            <text:p>13/10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0]+30" office:value-type="date" office:date-value="1914-11-12" calcext:value-type="date">
            <text:p>12/11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1]+30" office:value-type="date" office:date-value="1914-12-12" calcext:value-type="date">
            <text:p>12/12/1914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2]+30" office:value-type="date" office:date-value="1915-01-11" calcext:value-type="date">
            <text:p>11/01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3]+30" office:value-type="date" office:date-value="1915-02-10" calcext:value-type="date">
            <text:p>10/02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4]+30" office:value-type="date" office:date-value="1915-03-12" calcext:value-type="date">
            <text:p>12/03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5]+30" office:value-type="date" office:date-value="1915-04-11" calcext:value-type="date">
            <text:p>11/04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6]+30" office:value-type="date" office:date-value="1915-05-11" calcext:value-type="date">
            <text:p>11/05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7]+30" office:value-type="date" office:date-value="1915-06-10" calcext:value-type="date">
            <text:p>10/06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8]+30" office:value-type="date" office:date-value="1915-07-10" calcext:value-type="date">
            <text:p>10/07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39]+30" office:value-type="date" office:date-value="1915-08-09" calcext:value-type="date">
            <text:p>09/08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0]+30" office:value-type="date" office:date-value="1915-09-08" calcext:value-type="date">
            <text:p>08/09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1]+30" office:value-type="date" office:date-value="1915-10-08" calcext:value-type="date">
            <text:p>08/10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2]+30" office:value-type="date" office:date-value="1915-11-07" calcext:value-type="date">
            <text:p>07/11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3]+30" office:value-type="date" office:date-value="1915-12-07" calcext:value-type="date">
            <text:p>07/12/1915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4]+30" office:value-type="date" office:date-value="1916-01-06" calcext:value-type="date">
            <text:p>06/01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5]+30" office:value-type="date" office:date-value="1916-02-05" calcext:value-type="date">
            <text:p>05/02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6]+30" office:value-type="date" office:date-value="1916-03-06" calcext:value-type="date">
            <text:p>06/03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7]+30" office:value-type="date" office:date-value="1916-04-05" calcext:value-type="date">
            <text:p>05/04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8]+30" office:value-type="date" office:date-value="1916-05-05" calcext:value-type="date">
            <text:p>05/05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49]+30" office:value-type="date" office:date-value="1916-06-04" calcext:value-type="date">
            <text:p>04/06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0]+30" office:value-type="date" office:date-value="1916-07-04" calcext:value-type="date">
            <text:p>04/07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1]+30" office:value-type="date" office:date-value="1916-08-03" calcext:value-type="date">
            <text:p>03/08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2]+30" office:value-type="date" office:date-value="1916-09-02" calcext:value-type="date">
            <text:p>02/09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3]+30" office:value-type="date" office:date-value="1916-10-02" calcext:value-type="date">
            <text:p>02/10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4]+30" office:value-type="date" office:date-value="1916-11-01" calcext:value-type="date">
            <text:p>01/11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5]+30" office:value-type="date" office:date-value="1916-12-01" calcext:value-type="date">
            <text:p>01/12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6]+30" office:value-type="date" office:date-value="1916-12-31" calcext:value-type="date">
            <text:p>31/12/1916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7]+30" office:value-type="date" office:date-value="1917-01-30" calcext:value-type="date">
            <text:p>30/01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8]+30" office:value-type="date" office:date-value="1917-03-01" calcext:value-type="date">
            <text:p>01/03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59]+30" office:value-type="date" office:date-value="1917-03-31" calcext:value-type="date">
            <text:p>31/03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0]+30" office:value-type="date" office:date-value="1917-04-30" calcext:value-type="date">
            <text:p>30/04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1]+30" office:value-type="date" office:date-value="1917-05-30" calcext:value-type="date">
            <text:p>30/05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2]+30" office:value-type="date" office:date-value="1917-06-29" calcext:value-type="date">
            <text:p>29/06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3]+30" office:value-type="date" office:date-value="1917-07-29" calcext:value-type="date">
            <text:p>29/07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4]+30" office:value-type="date" office:date-value="1917-08-28" calcext:value-type="date">
            <text:p>28/08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5]+30" office:value-type="date" office:date-value="1917-09-27" calcext:value-type="date">
            <text:p>27/09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6]+30" office:value-type="date" office:date-value="1917-10-27" calcext:value-type="date">
            <text:p>27/10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7]+30" office:value-type="date" office:date-value="1917-11-26" calcext:value-type="date">
            <text:p>26/11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8]+30" office:value-type="date" office:date-value="1917-12-26" calcext:value-type="date">
            <text:p>26/12/1917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3"/>
          <table:table-cell table:style-name="ce114" table:number-columns-repeated="3"/>
          <table:table-cell table:number-columns-repeated="7"/>
          <table:table-cell table:style-name="ce124" table:formula="of:=[.AG769]+30" office:value-type="date" office:date-value="1918-01-25" calcext:value-type="date">
            <text:p>25/01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0]+30" office:value-type="date" office:date-value="1918-02-24" calcext:value-type="date">
            <text:p>24/02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1]+30" office:value-type="date" office:date-value="1918-03-26" calcext:value-type="date">
            <text:p>26/03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2]+30" office:value-type="date" office:date-value="1918-04-25" calcext:value-type="date">
            <text:p>25/04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3]+30" office:value-type="date" office:date-value="1918-05-25" calcext:value-type="date">
            <text:p>25/05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4]+30" office:value-type="date" office:date-value="1918-06-24" calcext:value-type="date">
            <text:p>24/06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5]+30" office:value-type="date" office:date-value="1918-07-24" calcext:value-type="date">
            <text:p>24/07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6]+30" office:value-type="date" office:date-value="1918-08-23" calcext:value-type="date">
            <text:p>23/08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7]+30" office:value-type="date" office:date-value="1918-09-22" calcext:value-type="date">
            <text:p>22/09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8]+30" office:value-type="date" office:date-value="1918-10-22" calcext:value-type="date">
            <text:p>22/10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79]+30" office:value-type="date" office:date-value="1918-11-21" calcext:value-type="date">
            <text:p>21/11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0]+30" office:value-type="date" office:date-value="1918-12-21" calcext:value-type="date">
            <text:p>21/12/1918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1]+30" office:value-type="date" office:date-value="1919-01-20" calcext:value-type="date">
            <text:p>20/01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2]+30" office:value-type="date" office:date-value="1919-02-19" calcext:value-type="date">
            <text:p>19/02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3]+30" office:value-type="date" office:date-value="1919-03-21" calcext:value-type="date">
            <text:p>21/03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4]+30" office:value-type="date" office:date-value="1919-04-20" calcext:value-type="date">
            <text:p>20/04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5]+30" office:value-type="date" office:date-value="1919-05-20" calcext:value-type="date">
            <text:p>20/05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6]+30" office:value-type="date" office:date-value="1919-06-19" calcext:value-type="date">
            <text:p>19/06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7]+30" office:value-type="date" office:date-value="1919-07-19" calcext:value-type="date">
            <text:p>19/07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8]+30" office:value-type="date" office:date-value="1919-08-18" calcext:value-type="date">
            <text:p>18/08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89]+30" office:value-type="date" office:date-value="1919-09-17" calcext:value-type="date">
            <text:p>17/09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0]+30" office:value-type="date" office:date-value="1919-10-17" calcext:value-type="date">
            <text:p>17/10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1]+30" office:value-type="date" office:date-value="1919-11-16" calcext:value-type="date">
            <text:p>16/11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2]+30" office:value-type="date" office:date-value="1919-12-16" calcext:value-type="date">
            <text:p>16/12/1919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3]+30" office:value-type="date" office:date-value="1920-01-15" calcext:value-type="date">
            <text:p>15/01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4]+30" office:value-type="date" office:date-value="1920-02-14" calcext:value-type="date">
            <text:p>14/02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5]+30" office:value-type="date" office:date-value="1920-03-15" calcext:value-type="date">
            <text:p>15/03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6]+30" office:value-type="date" office:date-value="1920-04-14" calcext:value-type="date">
            <text:p>14/04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7]+30" office:value-type="date" office:date-value="1920-05-14" calcext:value-type="date">
            <text:p>14/05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8]+30" office:value-type="date" office:date-value="1920-06-13" calcext:value-type="date">
            <text:p>13/06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799]+30" office:value-type="date" office:date-value="1920-07-13" calcext:value-type="date">
            <text:p>13/07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800]+30" office:value-type="date" office:date-value="1920-08-12" calcext:value-type="date">
            <text:p>12/08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801]+30" office:value-type="date" office:date-value="1920-09-11" calcext:value-type="date">
            <text:p>11/09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802]+30" office:value-type="date" office:date-value="1920-10-11" calcext:value-type="date">
            <text:p>11/10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13"/>
          <table:table-cell table:style-name="ce124" table:formula="of:=[.AG803]+30" office:value-type="date" office:date-value="1920-11-10" calcext:value-type="date">
            <text:p>10/11/1920</text:p>
          </table:table-cell>
          <table:table-cell table:number-columns-repeated="12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5"/>
          <table:table-cell table:style-name="ce6" table:number-columns-repeated="6"/>
          <table:table-cell table:style-name="ce81" table:number-columns-spanned="3" table:number-rows-spanned="1"/>
          <table:covered-table-cell table:number-columns-repeated="2" table:style-name="ce81"/>
          <table:table-cell table:style-name="ce6" table:number-columns-repeated="5"/>
          <table:table-cell table:number-columns-repeated="26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>
          <table:table-cell table:number-columns-repeated="11"/>
          <table:table-cell table:style-name="ce81" table:number-columns-spanned="3" table:number-rows-spanned="1"/>
          <table:covered-table-cell table:number-columns-repeated="2" table:style-name="ce81"/>
          <table:table-cell table:number-columns-repeated="31"/>
          <table:table-cell table:style-name="ce147"/>
          <table:table-cell table:number-columns-repeated="16338"/>
        </table:table-row>
        <table:table-row table:style-name="ro9" table:number-rows-repeated="540">
          <table:table-cell table:number-columns-repeated="45"/>
          <table:table-cell table:style-name="ce147"/>
          <table:table-cell table:number-columns-repeated="16338"/>
        </table:table-row>
        <table:table-row table:style-name="ro9" table:number-rows-repeated="63795">
          <table:table-cell table:number-columns-repeated="16384"/>
        </table:table-row>
        <table:table-row table:style-name="ro9">
          <table:table-cell table:number-columns-repeated="5"/>
          <table:table-cell table:style-name="ce35" table:number-columns-repeated="14"/>
          <table:table-cell table:number-columns-repeated="16365"/>
        </table:table-row>
        <table:table-row table:style-name="ro9" table:number-rows-repeated="983039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Cronograma.F14:Cronograma.F14">
            <calcext:condition calcext:apply-style-name="ConditionalStyle_1" calcext:value="formula-is([.$S$8]=&quot;Fecha Variable&quot;)" calcext:base-cell-address="Cronograma.F14"/>
          </calcext:conditional-format>
          <calcext:conditional-format calcext:target-range-address="Cronograma.G14:Cronograma.G14">
            <calcext:condition calcext:apply-style-name="ConditionalStyle_2" calcext:value="formula-is([.$S$8]=&quot;Fecha Variable&quot;)" calcext:base-cell-address="Cronograma.G14"/>
          </calcext:conditional-format>
          <calcext:conditional-format calcext:target-range-address="Cronograma.O10:Cronograma.O10 Cronograma.M10:Cronograma.M10">
            <calcext:condition calcext:apply-style-name="ConditionalStyle_3" calcext:value="formula-is([.$O$8]=&quot;Sin Gracia&quot;)" calcext:base-cell-address="Cronograma.M10"/>
          </calcext:conditional-format>
        </calcext:conditional-formats>
      </table:table>
      <table:table table:name="Factores" table:style-name="ta2">
        <table:table-column table:style-name="co19" table:default-cell-style-name="ce195"/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19" table:default-cell-style-name="ce195"/>
        <table:table-column table:style-name="co27" table:default-cell-style-name="ce195"/>
        <table:table-column table:style-name="co39" table:default-cell-style-name="ce195"/>
        <table:table-column table:style-name="co19" table:default-cell-style-name="ce205"/>
        <table:table-column table:style-name="co19" table:default-cell-style-name="ce195"/>
        <table:table-column table:style-name="co27" table:default-cell-style-name="ce206"/>
        <table:table-column table:style-name="co33" table:default-cell-style-name="ce208"/>
        <table:table-column table:style-name="co39" table:default-cell-style-name="ce195"/>
        <table:table-column table:style-name="co40" table:default-cell-style-name="ce195"/>
        <table:table-column table:style-name="co19" table:number-columns-repeated="2" table:default-cell-style-name="ce195"/>
        <table:table-column table:style-name="co38" table:default-cell-style-name="ce195"/>
        <table:table-column table:style-name="co27" table:default-cell-style-name="ce195"/>
        <table:table-column table:style-name="co41" table:default-cell-style-name="ce195"/>
        <table:table-column table:style-name="co19" table:default-cell-style-name="ce195"/>
        <table:table-column table:style-name="co42" table:default-cell-style-name="ce195"/>
        <table:table-column table:style-name="co43" table:default-cell-style-name="ce195"/>
        <table:table-column table:style-name="co19" table:number-columns-repeated="16363" table:default-cell-style-name="ce195"/>
        <table:table-row table:style-name="ro10">
          <table:table-cell table:style-name="ce192" office:value-type="string" calcext:value-type="string">
            <text:p>FERIADOS</text:p>
          </table:table-cell>
          <table:table-cell table:style-name="ce194"/>
          <table:table-cell table:style-name="ce197" office:value-type="string" calcext:value-type="string">
            <text:p>DESGRAVAMEN</text:p>
          </table:table-cell>
          <table:table-cell table:number-columns-repeated="2"/>
          <table:table-cell table:style-name="ce197" office:value-type="string" calcext:value-type="string">
            <text:p>DESGRAVAMEN</text:p>
          </table:table-cell>
          <table:table-cell/>
          <table:table-cell table:style-name="ce195"/>
          <table:table-cell/>
          <table:table-cell table:style-name="ce192"/>
          <table:table-cell/>
          <table:table-cell table:style-name="ce197" office:value-type="string" calcext:value-type="string">
            <text:p>MICROSEGURO</text:p>
          </table:table-cell>
          <table:table-cell table:number-columns-repeated="3"/>
          <table:table-cell table:style-name="ce197" office:value-type="string" calcext:value-type="string">
            <text:p>MICROSEGURO</text:p>
          </table:table-cell>
          <table:table-cell table:number-columns-repeated="3"/>
          <table:table-cell table:style-name="ce197" office:value-type="string" calcext:value-type="string">
            <text:p>MICROSEGURO</text:p>
          </table:table-cell>
          <table:table-cell table:number-columns-repeated="3"/>
          <table:table-cell table:style-name="ce197" office:value-type="string" calcext:value-type="string">
            <text:p>MICROSEGURO</text:p>
          </table:table-cell>
          <table:table-cell table:number-columns-repeated="16360"/>
        </table:table-row>
        <table:table-row table:style-name="ro10">
          <table:table-cell table:style-name="ce193"/>
          <table:table-cell table:style-name="ce196"/>
          <table:table-cell table:number-columns-repeated="5"/>
          <table:table-cell table:style-name="ce195"/>
          <table:table-cell table:number-columns-repeated="3"/>
          <table:table-cell table:style-name="ce211" office:value-type="string" calcext:value-type="string">
            <text:p>NEGOCIO PROTEGIDO</text:p>
          </table:table-cell>
          <table:table-cell table:number-columns-repeated="3"/>
          <table:table-cell table:style-name="ce211" office:value-type="string" calcext:value-type="string">
            <text:p>PROTECCION FINANCIERA</text:p>
          </table:table-cell>
          <table:table-cell table:number-columns-repeated="3"/>
          <table:table-cell table:style-name="ce211" office:value-type="string" calcext:value-type="string">
            <text:p>NEGOCIO PROTEGIDO</text:p>
          </table:table-cell>
          <table:table-cell table:number-columns-repeated="3"/>
          <table:table-cell table:style-name="ce211" office:value-type="string" calcext:value-type="string">
            <text:p>ONCORESPALDO</text:p>
          </table:table-cell>
          <table:table-cell table:number-columns-repeated="16360"/>
        </table:table-row>
        <table:table-row table:style-name="ro11">
          <table:table-cell table:style-name="ce194" office:value-type="string" calcext:value-type="string">
            <text:p>FECHA</text:p>
          </table:table-cell>
          <table:table-cell table:style-name="ce194" office:value-type="string" calcext:value-type="string">
            <text:p>DESCRIPCION</text:p>
          </table:table-cell>
          <table:table-cell table:style-name="ce198" office:value-type="string" calcext:value-type="string">
            <text:p>TASA HIPOTECARIA</text:p>
          </table:table-cell>
          <table:table-cell table:number-columns-repeated="2"/>
          <table:table-cell table:style-name="ce194" office:value-type="string" calcext:value-type="string">
            <text:p>PLAZO 0 </text:p>
          </table:table-cell>
          <table:table-cell table:style-name="ce194" office:value-type="string" calcext:value-type="string">
            <text:p>PLAZO 1</text:p>
          </table:table-cell>
          <table:table-cell table:style-name="ce194" office:value-type="string" calcext:value-type="string">
            <text:p>TASA</text:p>
          </table:table-cell>
          <table:table-cell/>
          <table:table-cell table:style-name="ce194"/>
          <table:table-cell/>
          <table:table-cell table:style-name="ce194" office:value-type="string" calcext:value-type="string">
            <text:p>PLAZO 0 </text:p>
          </table:table-cell>
          <table:table-cell table:style-name="ce194" office:value-type="string" calcext:value-type="string">
            <text:p>PLAZO 1</text:p>
          </table:table-cell>
          <table:table-cell table:style-name="ce194" office:value-type="string" calcext:value-type="string">
            <text:p>TASA</text:p>
          </table:table-cell>
          <table:table-cell/>
          <table:table-cell table:style-name="ce194" office:value-type="string" calcext:value-type="string">
            <text:p>PLAZO 0 </text:p>
          </table:table-cell>
          <table:table-cell table:style-name="ce194" office:value-type="string" calcext:value-type="string">
            <text:p>PLAZO 1</text:p>
          </table:table-cell>
          <table:table-cell table:style-name="ce194" office:value-type="string" calcext:value-type="string">
            <text:p>TASA</text:p>
          </table:table-cell>
          <table:table-cell/>
          <table:table-cell table:style-name="ce194" office:value-type="string" calcext:value-type="string">
            <text:p>PLAZO 0 </text:p>
          </table:table-cell>
          <table:table-cell table:style-name="ce194" office:value-type="string" calcext:value-type="string">
            <text:p>PLAZO 1</text:p>
          </table:table-cell>
          <table:table-cell table:style-name="ce194" office:value-type="string" calcext:value-type="string">
            <text:p>TASA</text:p>
          </table:table-cell>
          <table:table-cell/>
          <table:table-cell table:style-name="ce194" office:value-type="string" calcext:value-type="string">
            <text:p>PLAN</text:p>
          </table:table-cell>
          <table:table-cell table:style-name="ce194" office:value-type="string" calcext:value-type="string">
            <text:p>PRIMA TITULAR</text:p>
          </table:table-cell>
          <table:table-cell table:style-name="ce194" office:value-type="string" calcext:value-type="string">
            <text:p>PRIMA AFILIADOS</text:p>
          </table:table-cell>
          <table:table-cell table:number-columns-repeated="16358"/>
        </table:table-row>
        <table:table-row table:style-name="ro10">
          <table:table-cell table:style-name="ce193" office:value-type="date" office:date-value="1998-01-01" calcext:value-type="date">
            <text:p>01/01/1998</text:p>
          </table:table-cell>
          <table:table-cell table:style-name="ce196" office:value-type="string" calcext:value-type="string">
            <text:p>AÑO NUEVO</text:p>
          </table:table-cell>
          <table:table-cell table:style-name="ce199" office:value-type="percentage" office:value="0.00043478" calcext:value-type="percentage">
            <text:p>0.0435%</text:p>
          </table:table-cell>
          <table:table-cell table:style-name="ce201" office:value-type="percentage" office:value="1.25" calcext:value-type="percentage">
            <text:p>125 %</text:p>
          </table:table-cell>
          <table:table-cell/>
          <table:table-cell table:style-name="ce202" office:value-type="float" office:value="6" calcext:value-type="float">
            <text:p><text:s/>6 </text:p>
          </table:table-cell>
          <table:table-cell table:style-name="ce204" office:value-type="float" office:value="0" calcext:value-type="float">
            <text:p><text:s/>- <text:s text:c="2"/></text:p>
          </table:table-cell>
          <table:table-cell table:style-name="ce199" office:value-type="percentage" office:value="0.00293280080410299" calcext:value-type="percentage">
            <text:p>0.2933%</text:p>
          </table:table-cell>
          <table:table-cell table:style-name="ce199"/>
          <table:table-cell table:number-columns-repeated="2"/>
          <table:table-cell table:style-name="ce202" office:value-type="float" office:value="0" calcext:value-type="float">
            <text:p><text:s/>- <text:s text:c="2"/></text:p>
          </table:table-cell>
          <table:table-cell table:style-name="ce202" office:value-type="float" office:value="1000" calcext:value-type="float">
            <text:p><text:s/>1,000 </text:p>
          </table:table-cell>
          <table:table-cell table:style-name="ce221" office:value-type="percentage" office:value="0.00158" calcext:value-type="percentage">
            <text:p>0.16 %</text:p>
          </table:table-cell>
          <table:table-cell/>
          <table:table-cell table:style-name="ce202" office:value-type="float" office:value="0" calcext:value-type="float">
            <text:p><text:s/>- <text:s text:c="2"/></text:p>
          </table:table-cell>
          <table:table-cell table:style-name="ce202" office:value-type="float" office:value="6" calcext:value-type="float">
            <text:p><text:s/>6 </text:p>
          </table:table-cell>
          <table:table-cell table:style-name="ce221" office:value-type="percentage" office:value="0.006142" calcext:value-type="percentage">
            <text:p>0.61 %</text:p>
          </table:table-cell>
          <table:table-cell table:style-name="ce221"/>
          <table:table-cell table:style-name="ce202" office:value-type="float" office:value="0" calcext:value-type="float">
            <text:p><text:s/>- <text:s text:c="2"/></text:p>
          </table:table-cell>
          <table:table-cell table:style-name="ce202" office:value-type="float" office:value="3000" calcext:value-type="float">
            <text:p><text:s/>3,000 </text:p>
          </table:table-cell>
          <table:table-cell table:style-name="ce224" office:value-type="percentage" office:value="0.001289" calcext:value-type="percentage">
            <text:p>0.129%</text:p>
          </table:table-cell>
          <table:table-cell/>
          <table:table-cell table:style-name="ce202" office:value-type="string" office:string-value="P1" calcext:value-type="string">
            <text:p><text:s/>P1 </text:p>
          </table:table-cell>
          <table:table-cell table:style-name="ce202" office:value-type="float" office:value="6" calcext:value-type="float">
            <text:p><text:s/>6 </text:p>
          </table:table-cell>
          <table:table-cell table:style-name="ce202" office:value-type="float" office:value="4" calcext:value-type="float">
            <text:p><text:s/>4 </text:p>
          </table:table-cell>
          <table:table-cell table:number-columns-repeated="16358"/>
        </table:table-row>
        <table:table-row table:style-name="ro10">
          <table:table-cell table:style-name="ce193" office:value-type="date" office:date-value="1998-04-09" calcext:value-type="date">
            <text:p>09/04/1998</text:p>
          </table:table-cell>
          <table:table-cell table:style-name="ce196" office:value-type="string" calcext:value-type="string">
            <text:p>JUEVES SANTO</text:p>
          </table:table-cell>
          <table:table-cell table:style-name="ce200"/>
          <table:table-cell table:style-name="ce201" table:formula="of:=MAX([.$I$4:.$I$23])" office:value-type="percentage" office:value="0" calcext:value-type="percentage">
            <text:p>0 %</text:p>
          </table:table-cell>
          <table:table-cell/>
          <table:table-cell table:style-name="ce202" office:value-type="float" office:value="12" calcext:value-type="float">
            <text:p><text:s/>12 </text:p>
          </table:table-cell>
          <table:table-cell table:style-name="ce204" office:value-type="float" office:value="6.000001" calcext:value-type="float">
            <text:p><text:s/>6.000001 </text:p>
          </table:table-cell>
          <table:table-cell table:style-name="ce199" office:value-type="percentage" office:value="0.0063460611839901" calcext:value-type="percentage">
            <text:p>0.6346%</text:p>
          </table:table-cell>
          <table:table-cell table:style-name="ce199"/>
          <table:table-cell table:style-name="ce207"/>
          <table:table-cell/>
          <table:table-cell table:style-name="ce202" office:value-type="float" office:value="1000.001" calcext:value-type="float">
            <text:p><text:s/>1,000 </text:p>
          </table:table-cell>
          <table:table-cell table:style-name="ce202" office:value-type="float" office:value="3000" calcext:value-type="float">
            <text:p><text:s/>3,000 </text:p>
          </table:table-cell>
          <table:table-cell table:style-name="ce221" office:value-type="percentage" office:value="0.00104" calcext:value-type="percentage">
            <text:p>0.10 %</text:p>
          </table:table-cell>
          <table:table-cell/>
          <table:table-cell table:style-name="ce202" office:value-type="float" office:value="7" calcext:value-type="float">
            <text:p><text:s/>7 </text:p>
          </table:table-cell>
          <table:table-cell table:style-name="ce202" office:value-type="float" office:value="12" calcext:value-type="float">
            <text:p><text:s/>12 </text:p>
          </table:table-cell>
          <table:table-cell table:style-name="ce221" office:value-type="percentage" office:value="0.01232" calcext:value-type="percentage">
            <text:p>1.23 %</text:p>
          </table:table-cell>
          <table:table-cell table:style-name="ce221"/>
          <table:table-cell table:style-name="ce202" office:value-type="float" office:value="3000.001" calcext:value-type="float">
            <text:p><text:s/>3,000 </text:p>
          </table:table-cell>
          <table:table-cell table:style-name="ce202" office:value-type="float" office:value="10000" calcext:value-type="float">
            <text:p><text:s/>10,000 </text:p>
          </table:table-cell>
          <table:table-cell table:style-name="ce224" office:value-type="percentage" office:value="0.001289" calcext:value-type="percentage">
            <text:p>0.129%</text:p>
          </table:table-cell>
          <table:table-cell/>
          <table:table-cell table:style-name="ce202" office:value-type="string" office:string-value="P2" calcext:value-type="string">
            <text:p><text:s/>P2 </text:p>
          </table:table-cell>
          <table:table-cell table:style-name="ce202" office:value-type="float" office:value="10" calcext:value-type="float">
            <text:p><text:s/>10 </text:p>
          </table:table-cell>
          <table:table-cell table:style-name="ce202" office:value-type="float" office:value="7" calcext:value-type="float">
            <text:p><text:s/>7 </text:p>
          </table:table-cell>
          <table:table-cell table:number-columns-repeated="16358"/>
        </table:table-row>
        <table:table-row table:style-name="ro10">
          <table:table-cell table:style-name="ce193" office:value-type="date" office:date-value="1998-04-10" calcext:value-type="date">
            <text:p>10/04/1998</text:p>
          </table:table-cell>
          <table:table-cell table:style-name="ce196" office:value-type="string" calcext:value-type="string">
            <text:p>VIERNES SANTO</text:p>
          </table:table-cell>
          <table:table-cell/>
          <table:table-cell table:style-name="ce201" table:formula="of:=MIN([.$I$4:.$I$23])" office:value-type="percentage" office:value="0" calcext:value-type="percentage">
            <text:p>0 %</text:p>
          </table:table-cell>
          <table:table-cell/>
          <table:table-cell table:style-name="ce202" office:value-type="float" office:value="18" calcext:value-type="float">
            <text:p><text:s/>18 </text:p>
          </table:table-cell>
          <table:table-cell table:style-name="ce204" office:value-type="float" office:value="12.000001" calcext:value-type="float">
            <text:p><text:s/>12.000001 </text:p>
          </table:table-cell>
          <table:table-cell table:style-name="ce199" office:value-type="percentage" office:value="0.00949086776114018" calcext:value-type="percentage">
            <text:p>0.9491%</text:p>
          </table:table-cell>
          <table:table-cell table:style-name="ce199"/>
          <table:table-cell table:style-name="ce207"/>
          <table:table-cell/>
          <table:table-cell table:style-name="ce202" table:number-columns-repeated="2"/>
          <table:table-cell table:style-name="ce221"/>
          <table:table-cell/>
          <table:table-cell table:style-name="ce202" office:value-type="float" office:value="13" calcext:value-type="float">
            <text:p><text:s/>13 </text:p>
          </table:table-cell>
          <table:table-cell table:style-name="ce202" office:value-type="float" office:value="18" calcext:value-type="float">
            <text:p><text:s/>18 </text:p>
          </table:table-cell>
          <table:table-cell table:style-name="ce221" office:value-type="percentage" office:value="0.016367" calcext:value-type="percentage">
            <text:p>1.64 %</text:p>
          </table:table-cell>
          <table:table-cell table:style-name="ce221"/>
          <table:table-cell table:style-name="ce202" office:value-type="float" office:value="10001" calcext:value-type="float">
            <text:p><text:s/>10,001 </text:p>
          </table:table-cell>
          <table:table-cell table:style-name="ce202" office:value-type="float" office:value="24000" calcext:value-type="float">
            <text:p><text:s/>24,000 </text:p>
          </table:table-cell>
          <table:table-cell table:style-name="ce224" office:value-type="percentage" office:value="0.000938" calcext:value-type="percentage">
            <text:p>0.094%</text:p>
          </table:table-cell>
          <table:table-cell table:number-columns-repeated="16362"/>
        </table:table-row>
        <table:table-row table:style-name="ro10">
          <table:table-cell table:style-name="ce193" office:value-type="date" office:date-value="1998-05-01" calcext:value-type="date">
            <text:p>01/05/199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3"/>
          <table:table-cell table:style-name="ce202" office:value-type="float" office:value="24" calcext:value-type="float">
            <text:p><text:s/>24 </text:p>
          </table:table-cell>
          <table:table-cell table:style-name="ce204" office:value-type="float" office:value="18.000001" calcext:value-type="float">
            <text:p><text:s/>18.000001 </text:p>
          </table:table-cell>
          <table:table-cell table:style-name="ce199" office:value-type="percentage" office:value="0.0126172201747378" calcext:value-type="percentage">
            <text:p>1.2617%</text:p>
          </table:table-cell>
          <table:table-cell table:style-name="ce199"/>
          <table:table-cell table:style-name="ce207"/>
          <table:table-cell/>
          <table:table-cell table:style-name="ce202" table:number-columns-repeated="2"/>
          <table:table-cell table:style-name="ce221"/>
          <table:table-cell/>
          <table:table-cell table:style-name="ce202" office:value-type="float" office:value="19" calcext:value-type="float">
            <text:p><text:s/>19 </text:p>
          </table:table-cell>
          <table:table-cell table:style-name="ce202" office:value-type="float" office:value="24" calcext:value-type="float">
            <text:p><text:s/>24 </text:p>
          </table:table-cell>
          <table:table-cell table:style-name="ce221" office:value-type="percentage" office:value="0.021492" calcext:value-type="percentage">
            <text:p>2.15 %</text:p>
          </table:table-cell>
          <table:table-cell table:style-name="ce221"/>
          <table:table-cell table:style-name="ce202" office:value-type="float" office:value="24001" calcext:value-type="float">
            <text:p><text:s/>24,001 </text:p>
          </table:table-cell>
          <table:table-cell table:style-name="ce202" office:value-type="float" office:value="150000" calcext:value-type="float">
            <text:p><text:s/>150,000 </text:p>
          </table:table-cell>
          <table:table-cell table:style-name="ce224" office:value-type="percentage" office:value="0.000938" calcext:value-type="percentage">
            <text:p>0.094%</text:p>
          </table:table-cell>
          <table:table-cell table:number-columns-repeated="16362"/>
        </table:table-row>
        <table:table-row table:style-name="ro10">
          <table:table-cell table:style-name="ce193" office:value-type="date" office:date-value="1998-06-29" calcext:value-type="date">
            <text:p>29/06/199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3"/>
          <table:table-cell table:style-name="ce202" office:value-type="float" office:value="30" calcext:value-type="float">
            <text:p><text:s/>30 </text:p>
          </table:table-cell>
          <table:table-cell table:style-name="ce204" office:value-type="float" office:value="24.000001" calcext:value-type="float">
            <text:p><text:s/>24.000001 </text:p>
          </table:table-cell>
          <table:table-cell table:style-name="ce199" office:value-type="percentage" office:value="0.0157262039638154" calcext:value-type="percentage">
            <text:p>1.5726%</text:p>
          </table:table-cell>
          <table:table-cell table:style-name="ce199"/>
          <table:table-cell table:style-name="ce207"/>
          <table:table-cell table:number-columns-repeated="5"/>
          <table:table-cell table:style-name="ce202" office:value-type="float" office:value="25" calcext:value-type="float">
            <text:p><text:s/>25 </text:p>
          </table:table-cell>
          <table:table-cell table:style-name="ce202" office:value-type="float" office:value="30" calcext:value-type="float">
            <text:p><text:s/>30 </text:p>
          </table:table-cell>
          <table:table-cell table:style-name="ce221" office:value-type="percentage" office:value="0.023305" calcext:value-type="percentage">
            <text:p>2.33 %</text:p>
          </table:table-cell>
          <table:table-cell table:style-name="ce221"/>
          <table:table-cell table:style-name="ce202" office:value-type="float" office:value="150001" calcext:value-type="float">
            <text:p><text:s/>150,001 </text:p>
          </table:table-cell>
          <table:table-cell table:style-name="ce202" office:value-type="float" office:value="200000" calcext:value-type="float">
            <text:p><text:s/>200,000 </text:p>
          </table:table-cell>
          <table:table-cell table:style-name="ce224" office:value-type="percentage" office:value="0.000774" calcext:value-type="percentage">
            <text:p>0.077%</text:p>
          </table:table-cell>
          <table:table-cell table:number-columns-repeated="16362"/>
        </table:table-row>
        <table:table-row table:style-name="ro10">
          <table:table-cell table:style-name="ce193" office:value-type="date" office:date-value="1998-07-28" calcext:value-type="date">
            <text:p>28/07/199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3"/>
          <table:table-cell table:style-name="ce202" office:value-type="float" office:value="36" calcext:value-type="float">
            <text:p><text:s/>36 </text:p>
          </table:table-cell>
          <table:table-cell table:style-name="ce204" office:value-type="float" office:value="30.000001" calcext:value-type="float">
            <text:p><text:s/>30.000001 </text:p>
          </table:table-cell>
          <table:table-cell table:style-name="ce199" office:value-type="percentage" office:value="0.0188167335893405" calcext:value-type="percentage">
            <text:p>1.8817%</text:p>
          </table:table-cell>
          <table:table-cell table:style-name="ce199"/>
          <table:table-cell table:style-name="ce207"/>
          <table:table-cell table:number-columns-repeated="5"/>
          <table:table-cell table:style-name="ce202" office:value-type="float" office:value="31" calcext:value-type="float">
            <text:p><text:s/>31 </text:p>
          </table:table-cell>
          <table:table-cell table:style-name="ce202" office:value-type="float" office:value="36" calcext:value-type="float">
            <text:p><text:s/>36 </text:p>
          </table:table-cell>
          <table:table-cell table:style-name="ce221" office:value-type="percentage" office:value="0.02555" calcext:value-type="percentage">
            <text:p>2.56 %</text:p>
          </table:table-cell>
          <table:table-cell table:style-name="ce221"/>
          <table:table-cell table:style-name="ce202" office:value-type="float" office:value="200001" calcext:value-type="float">
            <text:p><text:s/>200,001 </text:p>
          </table:table-cell>
          <table:table-cell table:style-name="ce202" office:value-type="float" office:value="21000000" calcext:value-type="float">
            <text:p><text:s/>21,000,000 </text:p>
          </table:table-cell>
          <table:table-cell table:style-name="ce224" office:value-type="percentage" office:value="0.000774" calcext:value-type="percentage">
            <text:p>0.077%</text:p>
          </table:table-cell>
          <table:table-cell table:number-columns-repeated="16362"/>
        </table:table-row>
        <table:table-row table:style-name="ro10">
          <table:table-cell table:style-name="ce193" office:value-type="date" office:date-value="1998-07-29" calcext:value-type="date">
            <text:p>29/07/199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3"/>
          <table:table-cell table:style-name="ce202" office:value-type="float" office:value="42" calcext:value-type="float">
            <text:p><text:s/>42 </text:p>
          </table:table-cell>
          <table:table-cell table:style-name="ce204" office:value-type="float" office:value="36.000001" calcext:value-type="float">
            <text:p><text:s/>36.000001 </text:p>
          </table:table-cell>
          <table:table-cell table:style-name="ce199" office:value-type="percentage" office:value="0.0218898945903456" calcext:value-type="percentage">
            <text:p>2.1890%</text:p>
          </table:table-cell>
          <table:table-cell table:style-name="ce199"/>
          <table:table-cell table:style-name="ce207"/>
          <table:table-cell table:style-name="ce195"/>
          <table:table-cell table:number-columns-repeated="4"/>
          <table:table-cell table:style-name="ce202" office:value-type="float" office:value="37" calcext:value-type="float">
            <text:p><text:s/>37 </text:p>
          </table:table-cell>
          <table:table-cell table:style-name="ce202" office:value-type="float" office:value="42" calcext:value-type="float">
            <text:p><text:s/>42 </text:p>
          </table:table-cell>
          <table:table-cell table:style-name="ce221" office:value-type="percentage" office:value="0.027702" calcext:value-type="percentage">
            <text:p>2.77 %</text:p>
          </table:table-cell>
          <table:table-cell table:style-name="ce221"/>
          <table:table-cell table:style-name="ce202" office:value-type="float" office:value="2100000001" calcext:value-type="float">
            <text:p><text:s/>2,100,000,001 </text:p>
          </table:table-cell>
          <table:table-cell table:style-name="ce202" office:value-type="float" office:value="1000000000000" calcext:value-type="float">
            <text:p><text:s/>1,000,000,000,000 </text:p>
          </table:table-cell>
          <table:table-cell table:style-name="ce224" office:value-type="percentage" office:value="0.000774" calcext:value-type="percentage">
            <text:p>0.077%</text:p>
          </table:table-cell>
          <table:table-cell table:number-columns-repeated="16362"/>
        </table:table-row>
        <table:table-row table:style-name="ro10">
          <table:table-cell table:style-name="ce193" office:value-type="date" office:date-value="1998-08-30" calcext:value-type="date">
            <text:p>30/08/199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3"/>
          <table:table-cell table:style-name="ce202" office:value-type="float" office:value="48" calcext:value-type="float">
            <text:p><text:s/>48 </text:p>
          </table:table-cell>
          <table:table-cell table:style-name="ce204" office:value-type="float" office:value="42.000001" calcext:value-type="float">
            <text:p><text:s/>42.000001 </text:p>
          </table:table-cell>
          <table:table-cell table:style-name="ce199" office:value-type="percentage" office:value="0.0249456869668308" calcext:value-type="percentage">
            <text:p>2.4946%</text:p>
          </table:table-cell>
          <table:table-cell table:style-name="ce199"/>
          <table:table-cell table:style-name="ce207"/>
          <table:table-cell office:value-type="string" calcext:value-type="string">
            <text:p>ITF</text:p>
          </table:table-cell>
          <table:table-cell table:style-name="ce212" table:formula="of:=[$Cronograma.O14]" office:value-type="float" office:value="-0.85" calcext:value-type="float">
            <text:p><text:s/>(0.85)</text:p>
          </table:table-cell>
          <table:table-cell table:number-columns-repeated="3"/>
          <table:table-cell table:style-name="ce202" office:value-type="float" office:value="43" calcext:value-type="float">
            <text:p><text:s/>43 </text:p>
          </table:table-cell>
          <table:table-cell table:style-name="ce202" office:value-type="float" office:value="48" calcext:value-type="float">
            <text:p><text:s/>48 </text:p>
          </table:table-cell>
          <table:table-cell table:style-name="ce221" office:value-type="percentage" office:value="0.031914" calcext:value-type="percentage">
            <text:p>3.19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8-10-08" calcext:value-type="date">
            <text:p>08/10/199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3"/>
          <table:table-cell table:style-name="ce202" office:value-type="float" office:value="54" calcext:value-type="float">
            <text:p><text:s/>54 </text:p>
          </table:table-cell>
          <table:table-cell table:style-name="ce204" office:value-type="float" office:value="48.000001" calcext:value-type="float">
            <text:p><text:s/>48.000001 </text:p>
          </table:table-cell>
          <table:table-cell table:style-name="ce199" office:value-type="percentage" office:value="0.0279830251797634" calcext:value-type="percentage">
            <text:p>2.7983%</text:p>
          </table:table-cell>
          <table:table-cell table:style-name="ce199"/>
          <table:table-cell table:style-name="ce207"/>
          <table:table-cell office:value-type="string" calcext:value-type="string">
            <text:p>Monto Neto</text:p>
          </table:table-cell>
          <table:table-cell table:style-name="ce213" table:formula="of:=[$Cronograma.G6]" office:value-type="float" office:value="-18000.0033333333" calcext:value-type="float">
            <text:p><text:s/>(18,000)</text:p>
          </table:table-cell>
          <table:table-cell table:number-columns-repeated="3"/>
          <table:table-cell table:style-name="ce202" office:value-type="float" office:value="49" calcext:value-type="float">
            <text:p><text:s/>49 </text:p>
          </table:table-cell>
          <table:table-cell table:style-name="ce202" office:value-type="float" office:value="54" calcext:value-type="float">
            <text:p><text:s/>54 </text:p>
          </table:table-cell>
          <table:table-cell table:style-name="ce221" office:value-type="percentage" office:value="0.034621" calcext:value-type="percentage">
            <text:p>3.46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8-11-01" calcext:value-type="date">
            <text:p>01/11/199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3"/>
          <table:table-cell table:style-name="ce202" office:value-type="float" office:value="60" calcext:value-type="float">
            <text:p><text:s/>60 </text:p>
          </table:table-cell>
          <table:table-cell table:style-name="ce204" office:value-type="float" office:value="54.000001" calcext:value-type="float">
            <text:p><text:s/>54.000001 </text:p>
          </table:table-cell>
          <table:table-cell table:style-name="ce199" office:value-type="percentage" office:value="0.0310029947681761" calcext:value-type="percentage">
            <text:p>3.1003%</text:p>
          </table:table-cell>
          <table:table-cell table:style-name="ce199"/>
          <table:table-cell table:style-name="ce207"/>
          <table:table-cell table:style-name="ce195" office:value-type="string" calcext:value-type="string">
            <text:p>Desgravamen</text:p>
          </table:table-cell>
          <table:table-cell table:style-name="ce214" table:formula="of:=IF([$Cronograma.M16]=&quot;No&quot;;0;[$Cronograma.CE31])" office:value-type="percentage" office:value="0" calcext:value-type="percentage">
            <text:p>0.0000%</text:p>
          </table:table-cell>
          <table:table-cell table:number-columns-repeated="3"/>
          <table:table-cell table:style-name="ce202" office:value-type="float" office:value="55" calcext:value-type="float">
            <text:p><text:s/>55 </text:p>
          </table:table-cell>
          <table:table-cell table:style-name="ce202" office:value-type="float" office:value="60" calcext:value-type="float">
            <text:p><text:s/>60 </text:p>
          </table:table-cell>
          <table:table-cell table:style-name="ce221" office:value-type="percentage" office:value="0.038657" calcext:value-type="percentage">
            <text:p>3.87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8-12-08" calcext:value-type="date">
            <text:p>08/12/199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3"/>
          <table:table-cell table:style-name="ce202" office:value-type="float" office:value="66" calcext:value-type="float">
            <text:p><text:s/>66 </text:p>
          </table:table-cell>
          <table:table-cell table:style-name="ce204" office:value-type="float" office:value="60.000001" calcext:value-type="float">
            <text:p><text:s/>60.000001 </text:p>
          </table:table-cell>
          <table:table-cell table:style-name="ce199" office:value-type="percentage" office:value="0.0340066812711013" calcext:value-type="percentage">
            <text:p>3.4007%</text:p>
          </table:table-cell>
          <table:table-cell table:style-name="ce199"/>
          <table:table-cell table:style-name="ce207"/>
          <table:table-cell/>
          <table:table-cell table:style-name="ce215" table:formula="of:=IF([.L12]=&quot;&quot;;0;VLOOKUP([.L12];[.$T$4:.$V$11];3;1))" office:value-type="string" office:string-value="" calcext:value-type="error">
            <text:p>#N/D</text:p>
          </table:table-cell>
          <table:table-cell table:number-columns-repeated="3"/>
          <table:table-cell table:style-name="ce202" office:value-type="float" office:value="61" calcext:value-type="float">
            <text:p><text:s/>61 </text:p>
          </table:table-cell>
          <table:table-cell table:style-name="ce202" office:value-type="float" office:value="66" calcext:value-type="float">
            <text:p><text:s/>66 </text:p>
          </table:table-cell>
          <table:table-cell table:style-name="ce221" office:value-type="percentage" office:value="0.040963" calcext:value-type="percentage">
            <text:p>4.10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8-12-24" calcext:value-type="date">
            <text:p>24/12/1998</text:p>
          </table:table-cell>
          <table:table-cell table:style-name="ce196" office:value-type="string" calcext:value-type="string">
            <text:p>NAVIDAD</text:p>
          </table:table-cell>
          <table:table-cell table:number-columns-repeated="3"/>
          <table:table-cell table:style-name="ce202" office:value-type="float" office:value="72" calcext:value-type="float">
            <text:p><text:s/>72 </text:p>
          </table:table-cell>
          <table:table-cell table:style-name="ce204" office:value-type="float" office:value="66.000001" calcext:value-type="float">
            <text:p><text:s/>66.000001 </text:p>
          </table:table-cell>
          <table:table-cell table:style-name="ce199" office:value-type="percentage" office:value="0.0369929991495065" calcext:value-type="percentage">
            <text:p>3.6993%</text:p>
          </table:table-cell>
          <table:table-cell table:style-name="ce199"/>
          <table:table-cell table:style-name="ce207"/>
          <table:table-cell office:value-type="string" calcext:value-type="string">
            <text:p>Plazo</text:p>
          </table:table-cell>
          <table:table-cell table:style-name="ce213" table:formula="of:=[$Cronograma.G10]" office:value-type="float" office:value="36" calcext:value-type="float">
            <text:p><text:s/>36 </text:p>
          </table:table-cell>
          <table:table-cell table:number-columns-repeated="3"/>
          <table:table-cell table:style-name="ce202" office:value-type="float" office:value="67" calcext:value-type="float">
            <text:p><text:s/>67 </text:p>
          </table:table-cell>
          <table:table-cell table:style-name="ce202" office:value-type="float" office:value="72" calcext:value-type="float">
            <text:p><text:s/>72 </text:p>
          </table:table-cell>
          <table:table-cell table:style-name="ce221" office:value-type="percentage" office:value="0.0414" calcext:value-type="percentage">
            <text:p>4.14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8-12-25" calcext:value-type="date">
            <text:p>25/12/1998</text:p>
          </table:table-cell>
          <table:table-cell table:style-name="ce196" office:value-type="string" calcext:value-type="string">
            <text:p>NAVIDAD</text:p>
          </table:table-cell>
          <table:table-cell table:number-columns-repeated="3"/>
          <table:table-cell table:style-name="ce202" office:value-type="float" office:value="78" calcext:value-type="float">
            <text:p><text:s/>78 </text:p>
          </table:table-cell>
          <table:table-cell table:style-name="ce204" office:value-type="float" office:value="72.000001" calcext:value-type="float">
            <text:p><text:s/>72.000001 </text:p>
          </table:table-cell>
          <table:table-cell table:style-name="ce199" office:value-type="percentage" office:value="0.0399619484033917" calcext:value-type="percentage">
            <text:p>3.9962%</text:p>
          </table:table-cell>
          <table:table-cell table:style-name="ce199"/>
          <table:table-cell table:style-name="ce207" office:value-type="string" calcext:value-type="string">
            <text:p>A</text:p>
          </table:table-cell>
          <table:table-cell table:style-name="ce209" office:value-type="string" calcext:value-type="string">
            <text:p>Negoc. Protegido</text:p>
          </table:table-cell>
          <table:table-cell table:style-name="ce216" table:formula="of:=[.L12]*[.L14]*[.L15]" office:value-type="string" office:string-value="" calcext:value-type="error">
            <text:p>#N/D</text:p>
          </table:table-cell>
          <table:table-cell table:style-name="ce220" table:formula="of:=FALSE()" office:value-type="boolean" office:boolean-value="false" calcext:value-type="boolean">
            <text:p>FALSO</text:p>
          </table:table-cell>
          <table:table-cell table:style-name="ce222" table:formula="of:=[.L16]" office:value-type="string" office:string-value="" calcext:value-type="error">
            <text:p>#N/D</text:p>
          </table:table-cell>
          <table:table-cell/>
          <table:table-cell table:style-name="ce202" office:value-type="float" office:value="73" calcext:value-type="float">
            <text:p><text:s/>73 </text:p>
          </table:table-cell>
          <table:table-cell table:style-name="ce202" office:value-type="float" office:value="78" calcext:value-type="float">
            <text:p><text:s/>78 </text:p>
          </table:table-cell>
          <table:table-cell table:style-name="ce221" office:value-type="percentage" office:value="0.042364" calcext:value-type="percentage">
            <text:p>4.24 %</text:p>
          </table:table-cell>
          <table:table-cell table:style-name="ce221"/>
          <table:table-cell table:style-name="ce200"/>
          <table:table-cell table:number-columns-repeated="16364"/>
        </table:table-row>
        <table:table-row table:style-name="ro10">
          <table:table-cell table:style-name="ce193" office:value-type="date" office:date-value="1999-01-01" calcext:value-type="date">
            <text:p>01/01/1999</text:p>
          </table:table-cell>
          <table:table-cell table:style-name="ce196" office:value-type="string" calcext:value-type="string">
            <text:p>AÑO NUEVO</text:p>
          </table:table-cell>
          <table:table-cell table:number-columns-repeated="3"/>
          <table:table-cell table:style-name="ce202" office:value-type="float" office:value="84" calcext:value-type="float">
            <text:p><text:s/>84 </text:p>
          </table:table-cell>
          <table:table-cell table:style-name="ce204" office:value-type="float" office:value="78.000001" calcext:value-type="float">
            <text:p><text:s/>78.000001 </text:p>
          </table:table-cell>
          <table:table-cell table:style-name="ce199" office:value-type="percentage" office:value="0.0429146145717894" calcext:value-type="percentage">
            <text:p>4.2915%</text:p>
          </table:table-cell>
          <table:table-cell table:style-name="ce199"/>
          <table:table-cell table:style-name="ce207"/>
          <table:table-cell table:style-name="ce195"/>
          <table:table-cell table:number-columns-repeated="4"/>
          <table:table-cell table:style-name="ce202" office:value-type="float" office:value="79" calcext:value-type="float">
            <text:p><text:s/>79 </text:p>
          </table:table-cell>
          <table:table-cell table:style-name="ce202" office:value-type="float" office:value="84" calcext:value-type="float">
            <text:p><text:s/>84 </text:p>
          </table:table-cell>
          <table:table-cell table:style-name="ce221" office:value-type="percentage" office:value="0.042383" calcext:value-type="percentage">
            <text:p>4.24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4-01" calcext:value-type="date">
            <text:p>01/04/199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3"/>
          <table:table-cell table:style-name="ce202" office:value-type="float" office:value="90" calcext:value-type="float">
            <text:p><text:s/>90 </text:p>
          </table:table-cell>
          <table:table-cell table:style-name="ce204" office:value-type="float" office:value="84.000001" calcext:value-type="float">
            <text:p><text:s/>84.000001 </text:p>
          </table:table-cell>
          <table:table-cell table:style-name="ce199" office:value-type="percentage" office:value="0.0458499121156671" calcext:value-type="percentage">
            <text:p>4.5850%</text:p>
          </table:table-cell>
          <table:table-cell table:style-name="ce199"/>
          <table:table-cell table:style-name="ce207"/>
          <table:table-cell table:number-columns-repeated="5"/>
          <table:table-cell table:style-name="ce202" office:value-type="float" office:value="85" calcext:value-type="float">
            <text:p><text:s/>85 </text:p>
          </table:table-cell>
          <table:table-cell table:style-name="ce202" office:value-type="float" office:value="90" calcext:value-type="float">
            <text:p><text:s/>90 </text:p>
          </table:table-cell>
          <table:table-cell table:style-name="ce221" office:value-type="percentage" office:value="0.043355" calcext:value-type="percentage">
            <text:p>4.34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4-02" calcext:value-type="date">
            <text:p>02/04/199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3"/>
          <table:table-cell table:style-name="ce202" office:value-type="float" office:value="96" calcext:value-type="float">
            <text:p><text:s/>96 </text:p>
          </table:table-cell>
          <table:table-cell table:style-name="ce204" office:value-type="float" office:value="90.000001" calcext:value-type="float">
            <text:p><text:s/>90.000001 </text:p>
          </table:table-cell>
          <table:table-cell table:style-name="ce199" office:value-type="percentage" office:value="0.0487700121130899" calcext:value-type="percentage">
            <text:p>4.8770%</text:p>
          </table:table-cell>
          <table:table-cell table:style-name="ce199"/>
          <table:table-cell table:style-name="ce207"/>
          <table:table-cell office:value-type="string" calcext:value-type="string">
            <text:p>Prima Mensual</text:p>
          </table:table-cell>
          <table:table-cell table:style-name="ce217" office:value-type="float" office:value="4" calcext:value-type="float">
            <text:p><text:s/>4.00 </text:p>
          </table:table-cell>
          <table:table-cell table:number-columns-repeated="3"/>
          <table:table-cell table:style-name="ce202" office:value-type="float" office:value="91" calcext:value-type="float">
            <text:p><text:s/>91 </text:p>
          </table:table-cell>
          <table:table-cell table:style-name="ce202" office:value-type="float" office:value="96" calcext:value-type="float">
            <text:p><text:s/>96 </text:p>
          </table:table-cell>
          <table:table-cell table:style-name="ce221" office:value-type="percentage" office:value="0.046345" calcext:value-type="percentage">
            <text:p>4.63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5-01" calcext:value-type="date">
            <text:p>01/05/199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3"/>
          <table:table-cell table:style-name="ce202" office:value-type="float" office:value="120" calcext:value-type="float">
            <text:p><text:s/>120 </text:p>
          </table:table-cell>
          <table:table-cell table:style-name="ce204" office:value-type="float" office:value="96.000001" calcext:value-type="float">
            <text:p><text:s/>96.000001 </text:p>
          </table:table-cell>
          <table:table-cell table:style-name="ce199" office:value-type="percentage" office:value="0.060285410169841" calcext:value-type="percentage">
            <text:p>6.0285%</text:p>
          </table:table-cell>
          <table:table-cell table:style-name="ce199"/>
          <table:table-cell table:style-name="ce207" office:value-type="string" calcext:value-type="string">
            <text:p>B</text:p>
          </table:table-cell>
          <table:table-cell table:style-name="ce209" office:value-type="string" calcext:value-type="string">
            <text:p>Familia Protegida</text:p>
          </table:table-cell>
          <table:table-cell table:style-name="ce216" table:formula="of:=[.L15]*[.L19]*([$Cronograma.CH23]-1)" office:value-type="float" office:value="144" calcext:value-type="float">
            <text:p><text:s/>144.00 </text:p>
          </table:table-cell>
          <table:table-cell table:style-name="ce220" table:formula="of:=FALSE()" office:value-type="boolean" office:boolean-value="false" calcext:value-type="boolean">
            <text:p>FALSO</text:p>
          </table:table-cell>
          <table:table-cell table:style-name="ce222" table:formula="of:=[.L20]" office:value-type="float" office:value="144" calcext:value-type="float">
            <text:p><text:s/>144.00 </text:p>
          </table:table-cell>
          <table:table-cell/>
          <table:table-cell table:style-name="ce202" office:value-type="float" office:value="97" calcext:value-type="float">
            <text:p><text:s/>97 </text:p>
          </table:table-cell>
          <table:table-cell table:style-name="ce202" office:value-type="float" office:value="102" calcext:value-type="float">
            <text:p><text:s/>102 </text:p>
          </table:table-cell>
          <table:table-cell table:style-name="ce221" office:value-type="percentage" office:value="0.049335" calcext:value-type="percentage">
            <text:p>4.93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6-29" calcext:value-type="date">
            <text:p>29/06/199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3"/>
          <table:table-cell table:style-name="ce202" office:value-type="float" office:value="144" calcext:value-type="float">
            <text:p><text:s/>144 </text:p>
          </table:table-cell>
          <table:table-cell table:style-name="ce204" office:value-type="float" office:value="120.000001" calcext:value-type="float">
            <text:p><text:s/>120.000001 </text:p>
          </table:table-cell>
          <table:table-cell table:style-name="ce199" office:value-type="percentage" office:value="0.0715467920929873" calcext:value-type="percentage">
            <text:p>7.1547%</text:p>
          </table:table-cell>
          <table:table-cell table:style-name="ce199"/>
          <table:table-cell table:style-name="ce207"/>
          <table:table-cell table:style-name="ce195"/>
          <table:table-cell table:number-columns-repeated="4"/>
          <table:table-cell table:style-name="ce202" office:value-type="float" office:value="103" calcext:value-type="float">
            <text:p><text:s/>103 </text:p>
          </table:table-cell>
          <table:table-cell table:style-name="ce202" office:value-type="float" office:value="108" calcext:value-type="float">
            <text:p><text:s/>108 </text:p>
          </table:table-cell>
          <table:table-cell table:style-name="ce221" office:value-type="percentage" office:value="0.05221" calcext:value-type="percentage">
            <text:p>5.22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7-28" calcext:value-type="date">
            <text:p>28/07/199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3"/>
          <table:table-cell table:style-name="ce202" office:value-type="float" office:value="168" calcext:value-type="float">
            <text:p><text:s/>168 </text:p>
          </table:table-cell>
          <table:table-cell table:style-name="ce204" office:value-type="float" office:value="144.000001" calcext:value-type="float">
            <text:p><text:s/>144.000001 </text:p>
          </table:table-cell>
          <table:table-cell table:style-name="ce199" office:value-type="percentage" office:value="0.0825650132728538" calcext:value-type="percentage">
            <text:p>8.2565%</text:p>
          </table:table-cell>
          <table:table-cell table:style-name="ce199"/>
          <table:table-cell table:style-name="ce207"/>
          <table:table-cell table:style-name="ce195"/>
          <table:table-cell table:number-columns-repeated="4"/>
          <table:table-cell table:style-name="ce202" office:value-type="float" office:value="109" calcext:value-type="float">
            <text:p><text:s/>109 </text:p>
          </table:table-cell>
          <table:table-cell table:style-name="ce202" office:value-type="float" office:value="114" calcext:value-type="float">
            <text:p><text:s/>114 </text:p>
          </table:table-cell>
          <table:table-cell table:style-name="ce221" office:value-type="percentage" office:value="0.0552" calcext:value-type="percentage">
            <text:p>5.52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7-29" calcext:value-type="date">
            <text:p>29/07/199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3"/>
          <table:table-cell table:style-name="ce202" office:value-type="float" office:value="180" calcext:value-type="float">
            <text:p><text:s/>180 </text:p>
          </table:table-cell>
          <table:table-cell table:style-name="ce204" office:value-type="float" office:value="168.000001" calcext:value-type="float">
            <text:p><text:s/>168.000001 </text:p>
          </table:table-cell>
          <table:table-cell table:style-name="ce199" office:value-type="percentage" office:value="0.0879840241230896" calcext:value-type="percentage">
            <text:p>8.7984%</text:p>
          </table:table-cell>
          <table:table-cell table:style-name="ce199"/>
          <table:table-cell/>
          <table:table-cell table:style-name="ce209" office:value-type="string" calcext:value-type="string">
            <text:p>Accidente</text:p>
          </table:table-cell>
          <table:table-cell table:style-name="ce217" office:value-type="float" office:value="5.5" calcext:value-type="float">
            <text:p><text:s/>5.50 </text:p>
          </table:table-cell>
          <table:table-cell table:number-columns-repeated="3"/>
          <table:table-cell table:style-name="ce202" office:value-type="float" office:value="115" calcext:value-type="float">
            <text:p><text:s/>115 </text:p>
          </table:table-cell>
          <table:table-cell table:style-name="ce202" office:value-type="float" office:value="120" calcext:value-type="float">
            <text:p><text:s/>120 </text:p>
          </table:table-cell>
          <table:table-cell table:style-name="ce221" office:value-type="percentage" office:value="0.05819" calcext:value-type="percentage">
            <text:p>5.82 %</text:p>
          </table:table-cell>
          <table:table-cell table:style-name="ce221"/>
          <table:table-cell table:number-columns-repeated="16365"/>
        </table:table-row>
        <table:table-row table:style-name="ro10">
          <table:table-cell table:style-name="ce193" office:value-type="date" office:date-value="1999-08-30" calcext:value-type="date">
            <text:p>30/08/199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3"/>
          <table:table-cell table:style-name="ce202" office:value-type="float" office:value="190" calcext:value-type="float">
            <text:p><text:s/>190 </text:p>
          </table:table-cell>
          <table:table-cell table:style-name="ce204" office:value-type="float" office:value="180.000001" calcext:value-type="float">
            <text:p><text:s/>180.000001 </text:p>
          </table:table-cell>
          <table:table-cell office:value-type="percentage" office:value="0.093" calcext:value-type="percentage">
            <text:p>9.3000%</text:p>
          </table:table-cell>
          <table:table-cell/>
          <table:table-cell office:value-type="string" calcext:value-type="string">
            <text:p>D</text:p>
          </table:table-cell>
          <table:table-cell table:style-name="ce209" office:value-type="string" calcext:value-type="string">
            <text:p>Familia Protegida</text:p>
          </table:table-cell>
          <table:table-cell table:style-name="ce216" table:formula="of:=[.L15]*[.L23]" office:value-type="float" office:value="198" calcext:value-type="float">
            <text:p><text:s/>198.00 </text:p>
          </table:table-cell>
          <table:table-cell table:style-name="ce220" table:formula="of:=FALSE()" office:value-type="boolean" office:boolean-value="false" calcext:value-type="boolean">
            <text:p>FALSO</text:p>
          </table:table-cell>
          <table:table-cell table:style-name="ce222" table:formula="of:=[.L24]" office:value-type="float" office:value="198" calcext:value-type="float">
            <text:p><text:s/>198.00 </text:p>
          </table:table-cell>
          <table:table-cell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1999-10-08" calcext:value-type="date">
            <text:p>08/10/199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3"/>
          <table:table-cell table:style-name="ce202" office:value-type="float" office:value="196" calcext:value-type="float">
            <text:p><text:s/>196 </text:p>
          </table:table-cell>
          <table:table-cell table:style-name="ce204" office:value-type="float" office:value="190.000001" calcext:value-type="float">
            <text:p><text:s/>190.000001 </text:p>
          </table:table-cell>
          <table:table-cell office:value-type="percentage" office:value="0.1" calcext:value-type="percentage">
            <text:p>10.0000%</text:p>
          </table:table-cell>
          <table:table-cell/>
          <table:table-cell table:style-name="ce207"/>
          <table:table-cell table:style-name="ce195"/>
          <table:table-cell table:number-columns-repeated="4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1999-11-01" calcext:value-type="date">
            <text:p>01/11/199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3"/>
          <table:table-cell table:style-name="ce202" office:value-type="float" office:value="216" calcext:value-type="float">
            <text:p><text:s/>216 </text:p>
          </table:table-cell>
          <table:table-cell table:style-name="ce204" office:value-type="float" office:value="196.000001" calcext:value-type="float">
            <text:p><text:s/>196.000001 </text:p>
          </table:table-cell>
          <table:table-cell office:value-type="percentage" office:value="0.106" calcext:value-type="percentage">
            <text:p>10.6000%</text:p>
          </table:table-cell>
          <table:table-cell/>
          <table:table-cell table:style-name="ce207"/>
          <table:table-cell table:style-name="ce195"/>
          <table:table-cell table:number-columns-repeated="4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1999-12-08" calcext:value-type="date">
            <text:p>08/12/199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3"/>
          <table:table-cell table:style-name="ce202" office:value-type="float" office:value="228" calcext:value-type="float">
            <text:p><text:s/>228 </text:p>
          </table:table-cell>
          <table:table-cell table:style-name="ce204" office:value-type="float" office:value="216.000001" calcext:value-type="float">
            <text:p><text:s/>216.000001 </text:p>
          </table:table-cell>
          <table:table-cell office:value-type="percentage" office:value="0.111" calcext:value-type="percentage">
            <text:p>11.1000%</text:p>
          </table:table-cell>
          <table:table-cell table:number-columns-repeated="2"/>
          <table:table-cell table:style-name="ce209" office:value-type="string" calcext:value-type="string">
            <text:p>PLAN</text:p>
          </table:table-cell>
          <table:table-cell table:style-name="ce210" table:formula="of:=[$Cronograma.T21]" office:value-type="string" office:string-value="P1" calcext:value-type="string">
            <text:p>P1</text:p>
          </table:table-cell>
          <table:table-cell table:number-columns-repeated="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1999-12-25" calcext:value-type="date">
            <text:p>25/12/1999</text:p>
          </table:table-cell>
          <table:table-cell table:style-name="ce196" office:value-type="string" calcext:value-type="string">
            <text:p>NAVIDAD</text:p>
          </table:table-cell>
          <table:table-cell table:number-columns-repeated="3"/>
          <table:table-cell table:style-name="ce202" office:value-type="float" office:value="240" calcext:value-type="float">
            <text:p><text:s/>240 </text:p>
          </table:table-cell>
          <table:table-cell table:style-name="ce204" office:value-type="float" office:value="228.000001" calcext:value-type="float">
            <text:p><text:s/>228.000001 </text:p>
          </table:table-cell>
          <table:table-cell office:value-type="percentage" office:value="0.117" calcext:value-type="percentage">
            <text:p>11.7000%</text:p>
          </table:table-cell>
          <table:table-cell table:number-columns-repeated="2"/>
          <table:table-cell office:value-type="string" calcext:value-type="string">
            <text:p>Afiliados además del titular</text:p>
          </table:table-cell>
          <table:table-cell table:style-name="ce217" table:formula="of:=[$Cronograma.U21]" office:value-type="float" office:value="0" calcext:value-type="float">
            <text:p><text:s/>- <text:s text:c="2"/></text:p>
          </table:table-cell>
          <table:table-cell table:number-columns-repeated="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1-01" calcext:value-type="date">
            <text:p>01/01/2000</text:p>
          </table:table-cell>
          <table:table-cell table:style-name="ce196" office:value-type="string" calcext:value-type="string">
            <text:p>AÑO NUEVO</text:p>
          </table:table-cell>
          <table:table-cell table:number-columns-repeated="3"/>
          <table:table-cell table:style-name="ce202" office:value-type="float" office:value="240" calcext:value-type="float">
            <text:p><text:s/>240 </text:p>
          </table:table-cell>
          <table:table-cell table:style-name="ce204" office:value-type="float" office:value="240" calcext:value-type="float">
            <text:p><text:s/>240.000000 </text:p>
          </table:table-cell>
          <table:table-cell office:value-type="percentage" office:value="0.117" calcext:value-type="percentage">
            <text:p>11.7000%</text:p>
          </table:table-cell>
          <table:table-cell/>
          <table:table-cell office:value-type="string" calcext:value-type="string">
            <text:p>E</text:p>
          </table:table-cell>
          <table:table-cell table:style-name="ce209" office:value-type="string" calcext:value-type="string">
            <text:p>OncoRespaldo</text:p>
          </table:table-cell>
          <table:table-cell table:style-name="ce216" table:formula="of:=(VLOOKUP([.L27];[.$X$4:.$Z$5];2;0)+[.L28]*VLOOKUP([.L27];[.$X$4:.$Z$5];3;0))*[.L15]" office:value-type="float" office:value="216" calcext:value-type="float">
            <text:p><text:s/>216.00 </text:p>
          </table:table-cell>
          <table:table-cell table:style-name="ce220" table:formula="of:=FALSE()" office:value-type="boolean" office:boolean-value="false" calcext:value-type="boolean">
            <text:p>FALSO</text:p>
          </table:table-cell>
          <table:table-cell table:style-name="ce222" table:formula="of:=[.L29]" office:value-type="float" office:value="216" calcext:value-type="float">
            <text:p><text:s/>216.00 </text:p>
          </table:table-cell>
          <table:table-cell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4-20" calcext:value-type="date">
            <text:p>20/04/200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3"/>
          <table:table-cell table:style-name="ce202"/>
          <table:table-cell table:style-name="ce204"/>
          <table:table-cell table:number-columns-repeated="8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4-21" calcext:value-type="date">
            <text:p>21/04/200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3"/>
          <table:table-cell table:style-name="ce202"/>
          <table:table-cell table:style-name="ce204"/>
          <table:table-cell table:number-columns-repeated="8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5-01" calcext:value-type="date">
            <text:p>01/05/200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3"/>
          <table:table-cell table:style-name="ce202"/>
          <table:table-cell table:style-name="ce204"/>
          <table:table-cell table:number-columns-repeated="2"/>
          <table:table-cell table:style-name="ce207"/>
          <table:table-cell/>
          <table:table-cell table:style-name="ce215" table:formula="of:=IF([.L15]=&quot;&quot;;0;VLOOKUP([.L15];[.$P$1:.$R$72];3;1))" office:value-type="percentage" office:value="0.02555" calcext:value-type="percentage">
            <text:p>2.56 %</text:p>
          </table:table-cell>
          <table:table-cell table:number-columns-repeated="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6-29" calcext:value-type="date">
            <text:p>29/06/200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3"/>
          <table:table-cell table:style-name="ce202"/>
          <table:table-cell table:style-name="ce204"/>
          <table:table-cell table:number-columns-repeated="2"/>
          <table:table-cell office:value-type="string" calcext:value-type="string">
            <text:p>C</text:p>
          </table:table-cell>
          <table:table-cell table:style-name="ce209" office:value-type="string" calcext:value-type="string">
            <text:p>Protec. Financiera</text:p>
          </table:table-cell>
          <table:table-cell table:style-name="ce218" table:formula="of:=ROUND(([.L11]+[.L12]+[.L36])*[.L32]/(1-[.L32]-[.L13]);2)" office:value-type="float" office:value="-471.98" calcext:value-type="float">
            <text:p><text:s/>(471.98)</text:p>
          </table:table-cell>
          <table:table-cell table:style-name="ce220" table:formula="of:=FALSE()" office:value-type="boolean" office:boolean-value="false" calcext:value-type="boolean">
            <text:p>FALSO</text:p>
          </table:table-cell>
          <table:table-cell table:number-columns-repeated="2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7-28" calcext:value-type="date">
            <text:p>28/07/200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3"/>
          <table:table-cell table:style-name="ce203"/>
          <table:table-cell table:style-name="ce204"/>
          <table:table-cell table:number-columns-repeated="8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7-29" calcext:value-type="date">
            <text:p>29/07/200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08-30" calcext:value-type="date">
            <text:p>30/08/200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8"/>
          <table:table-cell table:style-name="ce210"/>
          <table:table-cell table:style-name="ce219" table:formula="of:=SUMIF([.M16:.M29];[.L37];[.N16:.N29])" office:value-type="float" office:value="0" calcext:value-type="float">
            <text:p><text:s/>- <text:s text:c="2"/></text:p>
          </table:table-cell>
          <table:table-cell table:number-columns-repeated="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10-08" calcext:value-type="date">
            <text:p>08/10/200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9"/>
          <table:table-cell table:style-name="ce220" table:formula="of:=TRUE()" office:value-type="boolean" office:boolean-value="true" calcext:value-type="boolean">
            <text:p>VERDADERO</text:p>
          </table:table-cell>
          <table:table-cell table:number-columns-repeated="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11-01" calcext:value-type="date">
            <text:p>01/11/200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12-08" calcext:value-type="date">
            <text:p>08/12/200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0-12-25" calcext:value-type="date">
            <text:p>25/12/2000</text:p>
          </table:table-cell>
          <table:table-cell table:style-name="ce196" office:value-type="string" calcext:value-type="string">
            <text:p>NAVIDAD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1-01" calcext:value-type="date">
            <text:p>01/01/200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4-12" calcext:value-type="date">
            <text:p>12/04/200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4-13" calcext:value-type="date">
            <text:p>13/04/200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4-14" calcext:value-type="date">
            <text:p>14/04/2001</text:p>
          </table:table-cell>
          <table:table-cell table:style-name="ce196" office:value-type="string" calcext:value-type="string">
            <text:p>NO LABORABLE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5-01" calcext:value-type="date">
            <text:p>01/05/200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6-29" calcext:value-type="date">
            <text:p>29/06/200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7-28" calcext:value-type="date">
            <text:p>28/07/200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7-29" calcext:value-type="date">
            <text:p>29/07/200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3"/>
          <table:table-cell table:style-name="ce223" table:number-columns-repeated="3"/>
          <table:table-cell table:number-columns-repeated="16366"/>
        </table:table-row>
        <table:table-row table:style-name="ro10">
          <table:table-cell table:style-name="ce193" office:value-type="date" office:date-value="2001-08-30" calcext:value-type="date">
            <text:p>30/08/200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1-10-08" calcext:value-type="date">
            <text:p>08/10/200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1-11-01" calcext:value-type="date">
            <text:p>01/11/200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1-12-08" calcext:value-type="date">
            <text:p>08/12/200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1-12-25" calcext:value-type="date">
            <text:p>25/12/200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1-01" calcext:value-type="date">
            <text:p>01/01/200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3-28" calcext:value-type="date">
            <text:p>28/03/200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3-29" calcext:value-type="date">
            <text:p>29/03/200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5-01" calcext:value-type="date">
            <text:p>01/05/200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6-29" calcext:value-type="date">
            <text:p>29/06/200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7-28" calcext:value-type="date">
            <text:p>28/07/200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7-29" calcext:value-type="date">
            <text:p>29/07/200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08-30" calcext:value-type="date">
            <text:p>30/08/200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10-08" calcext:value-type="date">
            <text:p>08/10/200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11-01" calcext:value-type="date">
            <text:p>01/11/200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12-08" calcext:value-type="date">
            <text:p>08/12/200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2-12-25" calcext:value-type="date">
            <text:p>25/12/200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1-01" calcext:value-type="date">
            <text:p>01/01/200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4-17" calcext:value-type="date">
            <text:p>17/04/200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4-18" calcext:value-type="date">
            <text:p>18/04/200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5-01" calcext:value-type="date">
            <text:p>01/05/200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6-29" calcext:value-type="date">
            <text:p>29/06/200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7-28" calcext:value-type="date">
            <text:p>28/07/200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7-29" calcext:value-type="date">
            <text:p>29/07/200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08-30" calcext:value-type="date">
            <text:p>30/08/200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10-08" calcext:value-type="date">
            <text:p>08/10/200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11-01" calcext:value-type="date">
            <text:p>01/11/200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12-08" calcext:value-type="date">
            <text:p>08/12/200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3-12-25" calcext:value-type="date">
            <text:p>25/12/200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1-01" calcext:value-type="date">
            <text:p>01/01/200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4-08" calcext:value-type="date">
            <text:p>08/04/200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4-09" calcext:value-type="date">
            <text:p>09/04/200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5-01" calcext:value-type="date">
            <text:p>01/05/200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6-29" calcext:value-type="date">
            <text:p>29/06/200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7-28" calcext:value-type="date">
            <text:p>28/07/200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7-29" calcext:value-type="date">
            <text:p>29/07/200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08-30" calcext:value-type="date">
            <text:p>30/08/200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10-08" calcext:value-type="date">
            <text:p>08/10/200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11-01" calcext:value-type="date">
            <text:p>01/11/200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12-08" calcext:value-type="date">
            <text:p>08/12/200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4-12-25" calcext:value-type="date">
            <text:p>25/12/200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1-01" calcext:value-type="date">
            <text:p>01/01/200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3-24" calcext:value-type="date">
            <text:p>24/03/200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3-25" calcext:value-type="date">
            <text:p>25/03/200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5-01" calcext:value-type="date">
            <text:p>01/05/200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5-02" calcext:value-type="date">
            <text:p>02/05/200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6-29" calcext:value-type="date">
            <text:p>29/06/200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7-28" calcext:value-type="date">
            <text:p>28/07/200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7-29" calcext:value-type="date">
            <text:p>29/07/200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08-30" calcext:value-type="date">
            <text:p>30/08/200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10-08" calcext:value-type="date">
            <text:p>08/10/200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11-01" calcext:value-type="date">
            <text:p>01/11/200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12-08" calcext:value-type="date">
            <text:p>08/12/200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5-12-25" calcext:value-type="date">
            <text:p>25/12/200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1-01" calcext:value-type="date">
            <text:p>01/01/2006</text:p>
          </table:table-cell>
          <table:table-cell table:style-name="ce196" office:value-type="string" calcext:value-type="string">
            <text:p>ANI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4-13" calcext:value-type="date">
            <text:p>13/04/200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4-14" calcext:value-type="date">
            <text:p>14/04/200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5-01" calcext:value-type="date">
            <text:p>01/05/200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6-29" calcext:value-type="date">
            <text:p>29/06/200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7-28" calcext:value-type="date">
            <text:p>28/07/200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7-29" calcext:value-type="date">
            <text:p>29/07/200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08-30" calcext:value-type="date">
            <text:p>30/08/200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10-08" calcext:value-type="date">
            <text:p>08/10/200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11-01" calcext:value-type="date">
            <text:p>01/11/200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12-08" calcext:value-type="date">
            <text:p>08/12/200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6-12-25" calcext:value-type="date">
            <text:p>25/12/200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1-01" calcext:value-type="date">
            <text:p>01/01/200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4-05" calcext:value-type="date">
            <text:p>05/04/200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4-06" calcext:value-type="date">
            <text:p>06/04/200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5-01" calcext:value-type="date">
            <text:p>01/05/200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6-29" calcext:value-type="date">
            <text:p>29/06/200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7-28" calcext:value-type="date">
            <text:p>28/07/200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7-29" calcext:value-type="date">
            <text:p>29/07/200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08-30" calcext:value-type="date">
            <text:p>30/08/200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10-08" calcext:value-type="date">
            <text:p>08/10/200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11-01" calcext:value-type="date">
            <text:p>01/11/200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12-08" calcext:value-type="date">
            <text:p>08/12/200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12-24" calcext:value-type="date">
            <text:p>24/12/2007</text:p>
          </table:table-cell>
          <table:table-cell table:style-name="ce196" office:value-type="string" calcext:value-type="string">
            <text:p>FERIADO INSTITUCIONAL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7-12-25" calcext:value-type="date">
            <text:p>25/12/200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1-01" calcext:value-type="date">
            <text:p>01/01/200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3-20" calcext:value-type="date">
            <text:p>20/03/200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3-21" calcext:value-type="date">
            <text:p>21/03/200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5-01" calcext:value-type="date">
            <text:p>01/05/200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6-29" calcext:value-type="date">
            <text:p>29/06/200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7-28" calcext:value-type="date">
            <text:p>28/07/200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7-29" calcext:value-type="date">
            <text:p>29/07/200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08-30" calcext:value-type="date">
            <text:p>30/08/200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10-08" calcext:value-type="date">
            <text:p>08/10/200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11-01" calcext:value-type="date">
            <text:p>01/11/200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12-08" calcext:value-type="date">
            <text:p>08/12/200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8-12-25" calcext:value-type="date">
            <text:p>25/12/200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1-01" calcext:value-type="date">
            <text:p>01/01/200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4-09" calcext:value-type="date">
            <text:p>09/04/200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4-10" calcext:value-type="date">
            <text:p>10/04/200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5-01" calcext:value-type="date">
            <text:p>01/05/200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6-29" calcext:value-type="date">
            <text:p>29/06/200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7-28" calcext:value-type="date">
            <text:p>28/07/200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7-29" calcext:value-type="date">
            <text:p>29/07/200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08-30" calcext:value-type="date">
            <text:p>30/08/200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10-08" calcext:value-type="date">
            <text:p>08/10/200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11-01" calcext:value-type="date">
            <text:p>01/11/200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12-08" calcext:value-type="date">
            <text:p>08/12/200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09-12-25" calcext:value-type="date">
            <text:p>25/12/200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1-01" calcext:value-type="date">
            <text:p>01/01/201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4-01" calcext:value-type="date">
            <text:p>01/04/201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4-02" calcext:value-type="date">
            <text:p>02/04/201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5-01" calcext:value-type="date">
            <text:p>01/05/201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6-29" calcext:value-type="date">
            <text:p>29/06/201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7-28" calcext:value-type="date">
            <text:p>28/07/201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7-29" calcext:value-type="date">
            <text:p>29/07/201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08-30" calcext:value-type="date">
            <text:p>30/08/201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10-08" calcext:value-type="date">
            <text:p>08/10/201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11-01" calcext:value-type="date">
            <text:p>01/11/201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12-08" calcext:value-type="date">
            <text:p>08/12/201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0-12-25" calcext:value-type="date">
            <text:p>25/12/201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1-01" calcext:value-type="date">
            <text:p>01/01/201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4-21" calcext:value-type="date">
            <text:p>21/04/201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4-22" calcext:value-type="date">
            <text:p>22/04/201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5-01" calcext:value-type="date">
            <text:p>01/05/201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6-29" calcext:value-type="date">
            <text:p>29/06/201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7-28" calcext:value-type="date">
            <text:p>28/07/201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7-29" calcext:value-type="date">
            <text:p>29/07/201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08-30" calcext:value-type="date">
            <text:p>30/08/201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10-08" calcext:value-type="date">
            <text:p>08/10/201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11-01" calcext:value-type="date">
            <text:p>01/11/201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12-08" calcext:value-type="date">
            <text:p>08/12/201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1-12-25" calcext:value-type="date">
            <text:p>25/12/201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1-01" calcext:value-type="date">
            <text:p>01/01/2012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4-05" calcext:value-type="date">
            <text:p>05/04/201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4-06" calcext:value-type="date">
            <text:p>06/04/201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5-01" calcext:value-type="date">
            <text:p>01/05/201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6-29" calcext:value-type="date">
            <text:p>29/06/201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7-28" calcext:value-type="date">
            <text:p>28/07/201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7-29" calcext:value-type="date">
            <text:p>29/07/201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08-30" calcext:value-type="date">
            <text:p>30/08/201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10-08" calcext:value-type="date">
            <text:p>08/10/201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11-01" calcext:value-type="date">
            <text:p>01/11/201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12-08" calcext:value-type="date">
            <text:p>08/12/201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2-12-25" calcext:value-type="date">
            <text:p>25/12/201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1-01" calcext:value-type="date">
            <text:p>01/01/201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3-28" calcext:value-type="date">
            <text:p>28/03/201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3-29" calcext:value-type="date">
            <text:p>29/03/201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5-01" calcext:value-type="date">
            <text:p>01/05/201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6-29" calcext:value-type="date">
            <text:p>29/06/201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7-28" calcext:value-type="date">
            <text:p>28/07/201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7-29" calcext:value-type="date">
            <text:p>29/07/201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08-30" calcext:value-type="date">
            <text:p>30/08/201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10-08" calcext:value-type="date">
            <text:p>08/10/201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11-01" calcext:value-type="date">
            <text:p>01/11/201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12-08" calcext:value-type="date">
            <text:p>08/12/201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3-12-25" calcext:value-type="date">
            <text:p>25/12/201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1-01" calcext:value-type="date">
            <text:p>01/01/201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4-17" calcext:value-type="date">
            <text:p>17/04/201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4-18" calcext:value-type="date">
            <text:p>18/04/201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5-01" calcext:value-type="date">
            <text:p>01/05/201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6-29" calcext:value-type="date">
            <text:p>29/06/201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7-28" calcext:value-type="date">
            <text:p>28/07/201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7-29" calcext:value-type="date">
            <text:p>29/07/201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08-30" calcext:value-type="date">
            <text:p>30/08/201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10-08" calcext:value-type="date">
            <text:p>08/10/201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11-01" calcext:value-type="date">
            <text:p>01/11/201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12-08" calcext:value-type="date">
            <text:p>08/12/201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4-12-25" calcext:value-type="date">
            <text:p>25/12/201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1-01" calcext:value-type="date">
            <text:p>01/01/201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4-02" calcext:value-type="date">
            <text:p>02/04/201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4-03" calcext:value-type="date">
            <text:p>03/04/201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5-01" calcext:value-type="date">
            <text:p>01/05/201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6-29" calcext:value-type="date">
            <text:p>29/06/201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7-28" calcext:value-type="date">
            <text:p>28/07/201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7-29" calcext:value-type="date">
            <text:p>29/07/201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08-30" calcext:value-type="date">
            <text:p>30/08/201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10-08" calcext:value-type="date">
            <text:p>08/10/201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11-01" calcext:value-type="date">
            <text:p>01/11/201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12-08" calcext:value-type="date">
            <text:p>08/12/201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5-12-25" calcext:value-type="date">
            <text:p>25/12/201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1-01" calcext:value-type="date">
            <text:p>01/01/201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3-24" calcext:value-type="date">
            <text:p>24/03/201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3-25" calcext:value-type="date">
            <text:p>25/03/201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5-01" calcext:value-type="date">
            <text:p>01/05/201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6-29" calcext:value-type="date">
            <text:p>29/06/201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7-28" calcext:value-type="date">
            <text:p>28/07/201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7-29" calcext:value-type="date">
            <text:p>29/07/201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08-30" calcext:value-type="date">
            <text:p>30/08/201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10-08" calcext:value-type="date">
            <text:p>08/10/201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11-01" calcext:value-type="date">
            <text:p>01/11/201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12-08" calcext:value-type="date">
            <text:p>08/12/201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6-12-25" calcext:value-type="date">
            <text:p>25/12/201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1-01" calcext:value-type="date">
            <text:p>01/01/2017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4-13" calcext:value-type="date">
            <text:p>13/04/201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4-14" calcext:value-type="date">
            <text:p>14/04/201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5-01" calcext:value-type="date">
            <text:p>01/05/201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6-29" calcext:value-type="date">
            <text:p>29/06/201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7-28" calcext:value-type="date">
            <text:p>28/07/201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7-29" calcext:value-type="date">
            <text:p>29/07/201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08-30" calcext:value-type="date">
            <text:p>30/08/201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10-08" calcext:value-type="date">
            <text:p>08/10/201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11-01" calcext:value-type="date">
            <text:p>01/11/201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12-08" calcext:value-type="date">
            <text:p>08/12/201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7-12-25" calcext:value-type="date">
            <text:p>25/12/201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1-01" calcext:value-type="date">
            <text:p>01/01/201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3-29" calcext:value-type="date">
            <text:p>29/03/201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3-30" calcext:value-type="date">
            <text:p>30/03/201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5-01" calcext:value-type="date">
            <text:p>01/05/201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6-29" calcext:value-type="date">
            <text:p>29/06/201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7-28" calcext:value-type="date">
            <text:p>28/07/201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7-29" calcext:value-type="date">
            <text:p>29/07/201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08-30" calcext:value-type="date">
            <text:p>30/08/201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10-08" calcext:value-type="date">
            <text:p>08/10/201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11-01" calcext:value-type="date">
            <text:p>01/11/201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12-08" calcext:value-type="date">
            <text:p>08/12/201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8-12-25" calcext:value-type="date">
            <text:p>25/12/201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1-01" calcext:value-type="date">
            <text:p>01/01/201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4-18" calcext:value-type="date">
            <text:p>18/04/201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4-19" calcext:value-type="date">
            <text:p>19/04/201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5-01" calcext:value-type="date">
            <text:p>01/05/201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6-29" calcext:value-type="date">
            <text:p>29/06/201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7-28" calcext:value-type="date">
            <text:p>28/07/201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7-29" calcext:value-type="date">
            <text:p>29/07/201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08-30" calcext:value-type="date">
            <text:p>30/08/201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10-08" calcext:value-type="date">
            <text:p>08/10/201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11-01" calcext:value-type="date">
            <text:p>01/11/201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12-08" calcext:value-type="date">
            <text:p>08/12/201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19-12-25" calcext:value-type="date">
            <text:p>25/12/201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1-01" calcext:value-type="date">
            <text:p>01/01/202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4-09" calcext:value-type="date">
            <text:p>09/04/202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4-10" calcext:value-type="date">
            <text:p>10/04/202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5-01" calcext:value-type="date">
            <text:p>01/05/202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6-29" calcext:value-type="date">
            <text:p>29/06/202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7-28" calcext:value-type="date">
            <text:p>28/07/202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7-29" calcext:value-type="date">
            <text:p>29/07/202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08-30" calcext:value-type="date">
            <text:p>30/08/202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10-08" calcext:value-type="date">
            <text:p>08/10/202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11-01" calcext:value-type="date">
            <text:p>01/11/202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12-08" calcext:value-type="date">
            <text:p>08/12/202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0-12-25" calcext:value-type="date">
            <text:p>25/12/202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1-01" calcext:value-type="date">
            <text:p>01/01/202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4-01" calcext:value-type="date">
            <text:p>01/04/202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4-02" calcext:value-type="date">
            <text:p>02/04/202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5-01" calcext:value-type="date">
            <text:p>01/05/202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6-29" calcext:value-type="date">
            <text:p>29/06/202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7-28" calcext:value-type="date">
            <text:p>28/07/202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7-29" calcext:value-type="date">
            <text:p>29/07/202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08-30" calcext:value-type="date">
            <text:p>30/08/202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10-08" calcext:value-type="date">
            <text:p>08/10/202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11-01" calcext:value-type="date">
            <text:p>01/11/202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12-08" calcext:value-type="date">
            <text:p>08/12/202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1-12-25" calcext:value-type="date">
            <text:p>25/12/202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1-01" calcext:value-type="date">
            <text:p>01/01/202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4-14" calcext:value-type="date">
            <text:p>14/04/202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4-15" calcext:value-type="date">
            <text:p>15/04/202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5-01" calcext:value-type="date">
            <text:p>01/05/202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6-29" calcext:value-type="date">
            <text:p>29/06/202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7-28" calcext:value-type="date">
            <text:p>28/07/202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7-29" calcext:value-type="date">
            <text:p>29/07/202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08-30" calcext:value-type="date">
            <text:p>30/08/202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10-08" calcext:value-type="date">
            <text:p>08/10/202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11-01" calcext:value-type="date">
            <text:p>01/11/202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12-08" calcext:value-type="date">
            <text:p>08/12/202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2-12-25" calcext:value-type="date">
            <text:p>25/12/202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1-01" calcext:value-type="date">
            <text:p>01/01/2023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4-06" calcext:value-type="date">
            <text:p>06/04/202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4-07" calcext:value-type="date">
            <text:p>07/04/202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5-01" calcext:value-type="date">
            <text:p>01/05/202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6-29" calcext:value-type="date">
            <text:p>29/06/202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7-28" calcext:value-type="date">
            <text:p>28/07/202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7-29" calcext:value-type="date">
            <text:p>29/07/202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08-30" calcext:value-type="date">
            <text:p>30/08/202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10-08" calcext:value-type="date">
            <text:p>08/10/202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11-01" calcext:value-type="date">
            <text:p>01/11/202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12-08" calcext:value-type="date">
            <text:p>08/12/202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3-12-25" calcext:value-type="date">
            <text:p>25/12/202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1-01" calcext:value-type="date">
            <text:p>01/01/202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3-28" calcext:value-type="date">
            <text:p>28/03/202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3-29" calcext:value-type="date">
            <text:p>29/03/202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5-01" calcext:value-type="date">
            <text:p>01/05/202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6-29" calcext:value-type="date">
            <text:p>29/06/202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7-28" calcext:value-type="date">
            <text:p>28/07/202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7-29" calcext:value-type="date">
            <text:p>29/07/202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08-30" calcext:value-type="date">
            <text:p>30/08/202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10-08" calcext:value-type="date">
            <text:p>08/10/202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11-01" calcext:value-type="date">
            <text:p>01/11/202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12-08" calcext:value-type="date">
            <text:p>08/12/202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4-12-25" calcext:value-type="date">
            <text:p>25/12/202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1-01" calcext:value-type="date">
            <text:p>01/01/202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4-17" calcext:value-type="date">
            <text:p>17/04/202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4-18" calcext:value-type="date">
            <text:p>18/04/202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5-01" calcext:value-type="date">
            <text:p>01/05/202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6-29" calcext:value-type="date">
            <text:p>29/06/202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7-28" calcext:value-type="date">
            <text:p>28/07/202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7-29" calcext:value-type="date">
            <text:p>29/07/202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08-30" calcext:value-type="date">
            <text:p>30/08/202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10-08" calcext:value-type="date">
            <text:p>08/10/202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11-01" calcext:value-type="date">
            <text:p>01/11/202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12-08" calcext:value-type="date">
            <text:p>08/12/202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5-12-25" calcext:value-type="date">
            <text:p>25/12/202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1-01" calcext:value-type="date">
            <text:p>01/01/202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4-02" calcext:value-type="date">
            <text:p>02/04/202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4-03" calcext:value-type="date">
            <text:p>03/04/202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5-01" calcext:value-type="date">
            <text:p>01/05/202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6-29" calcext:value-type="date">
            <text:p>29/06/202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7-28" calcext:value-type="date">
            <text:p>28/07/202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7-29" calcext:value-type="date">
            <text:p>29/07/202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08-30" calcext:value-type="date">
            <text:p>30/08/202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10-08" calcext:value-type="date">
            <text:p>08/10/202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11-01" calcext:value-type="date">
            <text:p>01/11/202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12-08" calcext:value-type="date">
            <text:p>08/12/202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6-12-25" calcext:value-type="date">
            <text:p>25/12/202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1-01" calcext:value-type="date">
            <text:p>01/01/202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3-25" calcext:value-type="date">
            <text:p>25/03/202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3-26" calcext:value-type="date">
            <text:p>26/03/202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5-01" calcext:value-type="date">
            <text:p>01/05/202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6-29" calcext:value-type="date">
            <text:p>29/06/202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7-28" calcext:value-type="date">
            <text:p>28/07/202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7-29" calcext:value-type="date">
            <text:p>29/07/202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08-30" calcext:value-type="date">
            <text:p>30/08/202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10-08" calcext:value-type="date">
            <text:p>08/10/202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11-01" calcext:value-type="date">
            <text:p>01/11/202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12-08" calcext:value-type="date">
            <text:p>08/12/202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7-12-25" calcext:value-type="date">
            <text:p>25/12/202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1-01" calcext:value-type="date">
            <text:p>01/01/202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4-13" calcext:value-type="date">
            <text:p>13/04/202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4-14" calcext:value-type="date">
            <text:p>14/04/202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5-01" calcext:value-type="date">
            <text:p>01/05/202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6-29" calcext:value-type="date">
            <text:p>29/06/202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7-28" calcext:value-type="date">
            <text:p>28/07/202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7-29" calcext:value-type="date">
            <text:p>29/07/202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08-30" calcext:value-type="date">
            <text:p>30/08/202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10-08" calcext:value-type="date">
            <text:p>08/10/202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11-01" calcext:value-type="date">
            <text:p>01/11/202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12-08" calcext:value-type="date">
            <text:p>08/12/202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8-12-25" calcext:value-type="date">
            <text:p>25/12/202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1-01" calcext:value-type="date">
            <text:p>01/01/202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3-29" calcext:value-type="date">
            <text:p>29/03/202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3-30" calcext:value-type="date">
            <text:p>30/03/202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5-01" calcext:value-type="date">
            <text:p>01/05/202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6-29" calcext:value-type="date">
            <text:p>29/06/202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7-28" calcext:value-type="date">
            <text:p>28/07/202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7-29" calcext:value-type="date">
            <text:p>29/07/202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08-30" calcext:value-type="date">
            <text:p>30/08/202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10-08" calcext:value-type="date">
            <text:p>08/10/202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11-01" calcext:value-type="date">
            <text:p>01/11/202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12-08" calcext:value-type="date">
            <text:p>08/12/202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29-12-25" calcext:value-type="date">
            <text:p>25/12/202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1-01" calcext:value-type="date">
            <text:p>01/01/203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4-18" calcext:value-type="date">
            <text:p>18/04/203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4-19" calcext:value-type="date">
            <text:p>19/04/203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5-01" calcext:value-type="date">
            <text:p>01/05/203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6-29" calcext:value-type="date">
            <text:p>29/06/203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7-28" calcext:value-type="date">
            <text:p>28/07/203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7-29" calcext:value-type="date">
            <text:p>29/07/203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08-30" calcext:value-type="date">
            <text:p>30/08/203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10-08" calcext:value-type="date">
            <text:p>08/10/203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11-01" calcext:value-type="date">
            <text:p>01/11/203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12-08" calcext:value-type="date">
            <text:p>08/12/203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0-12-25" calcext:value-type="date">
            <text:p>25/12/203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1-01" calcext:value-type="date">
            <text:p>01/01/203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4-10" calcext:value-type="date">
            <text:p>10/04/203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4-11" calcext:value-type="date">
            <text:p>11/04/203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5-01" calcext:value-type="date">
            <text:p>01/05/203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6-29" calcext:value-type="date">
            <text:p>29/06/203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7-28" calcext:value-type="date">
            <text:p>28/07/203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7-29" calcext:value-type="date">
            <text:p>29/07/203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08-30" calcext:value-type="date">
            <text:p>30/08/203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10-08" calcext:value-type="date">
            <text:p>08/10/203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11-01" calcext:value-type="date">
            <text:p>01/11/203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12-08" calcext:value-type="date">
            <text:p>08/12/203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1-12-25" calcext:value-type="date">
            <text:p>25/12/203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1-01" calcext:value-type="date">
            <text:p>01/01/203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3-25" calcext:value-type="date">
            <text:p>25/03/203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3-26" calcext:value-type="date">
            <text:p>26/03/203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5-01" calcext:value-type="date">
            <text:p>01/05/203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6-29" calcext:value-type="date">
            <text:p>29/06/203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7-28" calcext:value-type="date">
            <text:p>28/07/203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7-29" calcext:value-type="date">
            <text:p>29/07/203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08-30" calcext:value-type="date">
            <text:p>30/08/203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10-08" calcext:value-type="date">
            <text:p>08/10/203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11-01" calcext:value-type="date">
            <text:p>01/11/203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12-08" calcext:value-type="date">
            <text:p>08/12/203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2-12-25" calcext:value-type="date">
            <text:p>25/12/203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1-01" calcext:value-type="date">
            <text:p>01/01/203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4-14" calcext:value-type="date">
            <text:p>14/04/203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4-15" calcext:value-type="date">
            <text:p>15/04/203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5-01" calcext:value-type="date">
            <text:p>01/05/203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6-29" calcext:value-type="date">
            <text:p>29/06/203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7-28" calcext:value-type="date">
            <text:p>28/07/203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7-29" calcext:value-type="date">
            <text:p>29/07/203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08-30" calcext:value-type="date">
            <text:p>30/08/203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10-08" calcext:value-type="date">
            <text:p>08/10/203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11-01" calcext:value-type="date">
            <text:p>01/11/203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12-08" calcext:value-type="date">
            <text:p>08/12/203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3-12-25" calcext:value-type="date">
            <text:p>25/12/203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1-01" calcext:value-type="date">
            <text:p>01/01/2034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4-06" calcext:value-type="date">
            <text:p>06/04/203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4-07" calcext:value-type="date">
            <text:p>07/04/203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5-01" calcext:value-type="date">
            <text:p>01/05/203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6-29" calcext:value-type="date">
            <text:p>29/06/203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7-28" calcext:value-type="date">
            <text:p>28/07/203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7-29" calcext:value-type="date">
            <text:p>29/07/203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08-30" calcext:value-type="date">
            <text:p>30/08/203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10-08" calcext:value-type="date">
            <text:p>08/10/203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11-01" calcext:value-type="date">
            <text:p>01/11/203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12-08" calcext:value-type="date">
            <text:p>08/12/203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4-12-25" calcext:value-type="date">
            <text:p>25/12/203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1-01" calcext:value-type="date">
            <text:p>01/01/203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3-22" calcext:value-type="date">
            <text:p>22/03/203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3-23" calcext:value-type="date">
            <text:p>23/03/203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5-01" calcext:value-type="date">
            <text:p>01/05/203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6-29" calcext:value-type="date">
            <text:p>29/06/203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7-28" calcext:value-type="date">
            <text:p>28/07/203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7-29" calcext:value-type="date">
            <text:p>29/07/203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08-30" calcext:value-type="date">
            <text:p>30/08/203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10-08" calcext:value-type="date">
            <text:p>08/10/203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11-01" calcext:value-type="date">
            <text:p>01/11/203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12-08" calcext:value-type="date">
            <text:p>08/12/203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5-12-25" calcext:value-type="date">
            <text:p>25/12/203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1-01" calcext:value-type="date">
            <text:p>01/01/203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4-10" calcext:value-type="date">
            <text:p>10/04/203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4-11" calcext:value-type="date">
            <text:p>11/04/203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5-01" calcext:value-type="date">
            <text:p>01/05/203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6-29" calcext:value-type="date">
            <text:p>29/06/203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7-28" calcext:value-type="date">
            <text:p>28/07/203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7-29" calcext:value-type="date">
            <text:p>29/07/203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08-30" calcext:value-type="date">
            <text:p>30/08/203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10-08" calcext:value-type="date">
            <text:p>08/10/203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11-01" calcext:value-type="date">
            <text:p>01/11/203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12-08" calcext:value-type="date">
            <text:p>08/12/203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6-12-25" calcext:value-type="date">
            <text:p>25/12/203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1-01" calcext:value-type="date">
            <text:p>01/01/203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4-02" calcext:value-type="date">
            <text:p>02/04/203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4-03" calcext:value-type="date">
            <text:p>03/04/203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5-01" calcext:value-type="date">
            <text:p>01/05/203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6-29" calcext:value-type="date">
            <text:p>29/06/203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7-28" calcext:value-type="date">
            <text:p>28/07/203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7-29" calcext:value-type="date">
            <text:p>29/07/203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08-30" calcext:value-type="date">
            <text:p>30/08/203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10-08" calcext:value-type="date">
            <text:p>08/10/203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11-01" calcext:value-type="date">
            <text:p>01/11/203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12-08" calcext:value-type="date">
            <text:p>08/12/203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7-12-25" calcext:value-type="date">
            <text:p>25/12/203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1-01" calcext:value-type="date">
            <text:p>01/01/203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4-22" calcext:value-type="date">
            <text:p>22/04/203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4-23" calcext:value-type="date">
            <text:p>23/04/203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5-01" calcext:value-type="date">
            <text:p>01/05/203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6-29" calcext:value-type="date">
            <text:p>29/06/203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7-28" calcext:value-type="date">
            <text:p>28/07/203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7-29" calcext:value-type="date">
            <text:p>29/07/203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08-30" calcext:value-type="date">
            <text:p>30/08/203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10-08" calcext:value-type="date">
            <text:p>08/10/203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11-01" calcext:value-type="date">
            <text:p>01/11/203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12-08" calcext:value-type="date">
            <text:p>08/12/203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8-12-25" calcext:value-type="date">
            <text:p>25/12/203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1-01" calcext:value-type="date">
            <text:p>01/01/203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4-07" calcext:value-type="date">
            <text:p>07/04/203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4-08" calcext:value-type="date">
            <text:p>08/04/203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5-01" calcext:value-type="date">
            <text:p>01/05/203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6-29" calcext:value-type="date">
            <text:p>29/06/203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7-28" calcext:value-type="date">
            <text:p>28/07/203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7-29" calcext:value-type="date">
            <text:p>29/07/203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08-30" calcext:value-type="date">
            <text:p>30/08/203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10-08" calcext:value-type="date">
            <text:p>08/10/203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11-01" calcext:value-type="date">
            <text:p>01/11/203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12-08" calcext:value-type="date">
            <text:p>08/12/203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39-12-25" calcext:value-type="date">
            <text:p>25/12/203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1-01" calcext:value-type="date">
            <text:p>01/01/2040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3-29" calcext:value-type="date">
            <text:p>29/03/204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3-30" calcext:value-type="date">
            <text:p>30/03/204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5-01" calcext:value-type="date">
            <text:p>01/05/204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6-29" calcext:value-type="date">
            <text:p>29/06/204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7-28" calcext:value-type="date">
            <text:p>28/07/204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7-29" calcext:value-type="date">
            <text:p>29/07/204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08-30" calcext:value-type="date">
            <text:p>30/08/204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10-08" calcext:value-type="date">
            <text:p>08/10/204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11-01" calcext:value-type="date">
            <text:p>01/11/204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12-08" calcext:value-type="date">
            <text:p>08/12/204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0-12-25" calcext:value-type="date">
            <text:p>25/12/204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1-01" calcext:value-type="date">
            <text:p>01/01/204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4-18" calcext:value-type="date">
            <text:p>18/04/204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4-19" calcext:value-type="date">
            <text:p>19/04/204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5-01" calcext:value-type="date">
            <text:p>01/05/204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6-29" calcext:value-type="date">
            <text:p>29/06/204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7-28" calcext:value-type="date">
            <text:p>28/07/204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7-29" calcext:value-type="date">
            <text:p>29/07/204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08-30" calcext:value-type="date">
            <text:p>30/08/204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10-08" calcext:value-type="date">
            <text:p>08/10/204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11-01" calcext:value-type="date">
            <text:p>01/11/204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12-08" calcext:value-type="date">
            <text:p>08/12/204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1-12-25" calcext:value-type="date">
            <text:p>25/12/204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1-01" calcext:value-type="date">
            <text:p>01/01/204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4-03" calcext:value-type="date">
            <text:p>03/04/204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4-04" calcext:value-type="date">
            <text:p>04/04/204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5-01" calcext:value-type="date">
            <text:p>01/05/204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6-29" calcext:value-type="date">
            <text:p>29/06/204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7-28" calcext:value-type="date">
            <text:p>28/07/204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7-29" calcext:value-type="date">
            <text:p>29/07/204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08-30" calcext:value-type="date">
            <text:p>30/08/204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10-08" calcext:value-type="date">
            <text:p>08/10/204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11-01" calcext:value-type="date">
            <text:p>01/11/204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12-08" calcext:value-type="date">
            <text:p>08/12/204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2-12-25" calcext:value-type="date">
            <text:p>25/12/204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1-01" calcext:value-type="date">
            <text:p>01/01/204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3-26" calcext:value-type="date">
            <text:p>26/03/204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3-27" calcext:value-type="date">
            <text:p>27/03/204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5-01" calcext:value-type="date">
            <text:p>01/05/204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6-29" calcext:value-type="date">
            <text:p>29/06/204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7-28" calcext:value-type="date">
            <text:p>28/07/204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7-29" calcext:value-type="date">
            <text:p>29/07/204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08-30" calcext:value-type="date">
            <text:p>30/08/204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10-08" calcext:value-type="date">
            <text:p>08/10/204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11-01" calcext:value-type="date">
            <text:p>01/11/204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12-08" calcext:value-type="date">
            <text:p>08/12/204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3-12-25" calcext:value-type="date">
            <text:p>25/12/204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1-01" calcext:value-type="date">
            <text:p>01/01/204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4-14" calcext:value-type="date">
            <text:p>14/04/204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4-15" calcext:value-type="date">
            <text:p>15/04/204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5-01" calcext:value-type="date">
            <text:p>01/05/204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6-29" calcext:value-type="date">
            <text:p>29/06/204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7-28" calcext:value-type="date">
            <text:p>28/07/204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7-29" calcext:value-type="date">
            <text:p>29/07/204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08-30" calcext:value-type="date">
            <text:p>30/08/204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10-08" calcext:value-type="date">
            <text:p>08/10/204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11-01" calcext:value-type="date">
            <text:p>01/11/204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12-08" calcext:value-type="date">
            <text:p>08/12/204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4-12-25" calcext:value-type="date">
            <text:p>25/12/204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1-01" calcext:value-type="date">
            <text:p>01/01/2045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4-06" calcext:value-type="date">
            <text:p>06/04/204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4-07" calcext:value-type="date">
            <text:p>07/04/204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5-01" calcext:value-type="date">
            <text:p>01/05/204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6-29" calcext:value-type="date">
            <text:p>29/06/204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7-28" calcext:value-type="date">
            <text:p>28/07/204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7-29" calcext:value-type="date">
            <text:p>29/07/204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08-30" calcext:value-type="date">
            <text:p>30/08/204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10-08" calcext:value-type="date">
            <text:p>08/10/204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11-01" calcext:value-type="date">
            <text:p>01/11/204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12-08" calcext:value-type="date">
            <text:p>08/12/204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5-12-25" calcext:value-type="date">
            <text:p>25/12/204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1-01" calcext:value-type="date">
            <text:p>01/01/204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3-22" calcext:value-type="date">
            <text:p>22/03/204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3-23" calcext:value-type="date">
            <text:p>23/03/204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5-01" calcext:value-type="date">
            <text:p>01/05/204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6-29" calcext:value-type="date">
            <text:p>29/06/204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7-28" calcext:value-type="date">
            <text:p>28/07/204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7-29" calcext:value-type="date">
            <text:p>29/07/204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08-30" calcext:value-type="date">
            <text:p>30/08/204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10-08" calcext:value-type="date">
            <text:p>08/10/204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11-01" calcext:value-type="date">
            <text:p>01/11/204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12-08" calcext:value-type="date">
            <text:p>08/12/204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6-12-25" calcext:value-type="date">
            <text:p>25/12/204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1-01" calcext:value-type="date">
            <text:p>01/01/204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4-11" calcext:value-type="date">
            <text:p>11/04/204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4-12" calcext:value-type="date">
            <text:p>12/04/204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5-01" calcext:value-type="date">
            <text:p>01/05/204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6-29" calcext:value-type="date">
            <text:p>29/06/204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7-28" calcext:value-type="date">
            <text:p>28/07/204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7-29" calcext:value-type="date">
            <text:p>29/07/204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08-30" calcext:value-type="date">
            <text:p>30/08/204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10-08" calcext:value-type="date">
            <text:p>08/10/204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11-01" calcext:value-type="date">
            <text:p>01/11/204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12-08" calcext:value-type="date">
            <text:p>08/12/204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7-12-25" calcext:value-type="date">
            <text:p>25/12/204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1-01" calcext:value-type="date">
            <text:p>01/01/204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4-02" calcext:value-type="date">
            <text:p>02/04/204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4-03" calcext:value-type="date">
            <text:p>03/04/204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5-01" calcext:value-type="date">
            <text:p>01/05/204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6-29" calcext:value-type="date">
            <text:p>29/06/204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7-28" calcext:value-type="date">
            <text:p>28/07/204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7-29" calcext:value-type="date">
            <text:p>29/07/204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08-30" calcext:value-type="date">
            <text:p>30/08/204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10-08" calcext:value-type="date">
            <text:p>08/10/204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11-01" calcext:value-type="date">
            <text:p>01/11/204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12-08" calcext:value-type="date">
            <text:p>08/12/204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8-12-25" calcext:value-type="date">
            <text:p>25/12/204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1-01" calcext:value-type="date">
            <text:p>01/01/204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4-15" calcext:value-type="date">
            <text:p>15/04/204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4-16" calcext:value-type="date">
            <text:p>16/04/204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5-01" calcext:value-type="date">
            <text:p>01/05/204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6-29" calcext:value-type="date">
            <text:p>29/06/204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7-28" calcext:value-type="date">
            <text:p>28/07/204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7-29" calcext:value-type="date">
            <text:p>29/07/204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08-30" calcext:value-type="date">
            <text:p>30/08/204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10-08" calcext:value-type="date">
            <text:p>08/10/204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11-01" calcext:value-type="date">
            <text:p>01/11/204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12-08" calcext:value-type="date">
            <text:p>08/12/204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49-12-25" calcext:value-type="date">
            <text:p>25/12/204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1-01" calcext:value-type="date">
            <text:p>01/01/205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4-07" calcext:value-type="date">
            <text:p>07/04/205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4-08" calcext:value-type="date">
            <text:p>08/04/205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5-01" calcext:value-type="date">
            <text:p>01/05/205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6-29" calcext:value-type="date">
            <text:p>29/06/205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7-28" calcext:value-type="date">
            <text:p>28/07/205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7-29" calcext:value-type="date">
            <text:p>29/07/205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08-30" calcext:value-type="date">
            <text:p>30/08/205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10-08" calcext:value-type="date">
            <text:p>08/10/205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11-01" calcext:value-type="date">
            <text:p>01/11/205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12-08" calcext:value-type="date">
            <text:p>08/12/205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0-12-25" calcext:value-type="date">
            <text:p>25/12/205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1-01" calcext:value-type="date">
            <text:p>01/01/2051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3-30" calcext:value-type="date">
            <text:p>30/03/205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3-31" calcext:value-type="date">
            <text:p>31/03/205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5-01" calcext:value-type="date">
            <text:p>01/05/205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6-29" calcext:value-type="date">
            <text:p>29/06/205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7-28" calcext:value-type="date">
            <text:p>28/07/205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7-29" calcext:value-type="date">
            <text:p>29/07/205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08-30" calcext:value-type="date">
            <text:p>30/08/205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10-08" calcext:value-type="date">
            <text:p>08/10/205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11-01" calcext:value-type="date">
            <text:p>01/11/205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12-08" calcext:value-type="date">
            <text:p>08/12/205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1-12-25" calcext:value-type="date">
            <text:p>25/12/205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1-01" calcext:value-type="date">
            <text:p>01/01/205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4-18" calcext:value-type="date">
            <text:p>18/04/205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4-19" calcext:value-type="date">
            <text:p>19/04/205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5-01" calcext:value-type="date">
            <text:p>01/05/205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6-29" calcext:value-type="date">
            <text:p>29/06/205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7-28" calcext:value-type="date">
            <text:p>28/07/205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7-29" calcext:value-type="date">
            <text:p>29/07/205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08-30" calcext:value-type="date">
            <text:p>30/08/205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10-08" calcext:value-type="date">
            <text:p>08/10/205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11-01" calcext:value-type="date">
            <text:p>01/11/205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12-08" calcext:value-type="date">
            <text:p>08/12/205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2-12-25" calcext:value-type="date">
            <text:p>25/12/205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1-01" calcext:value-type="date">
            <text:p>01/01/205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4-03" calcext:value-type="date">
            <text:p>03/04/205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4-04" calcext:value-type="date">
            <text:p>04/04/205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5-01" calcext:value-type="date">
            <text:p>01/05/205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6-29" calcext:value-type="date">
            <text:p>29/06/205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7-28" calcext:value-type="date">
            <text:p>28/07/205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7-29" calcext:value-type="date">
            <text:p>29/07/205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08-30" calcext:value-type="date">
            <text:p>30/08/205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10-08" calcext:value-type="date">
            <text:p>08/10/205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11-01" calcext:value-type="date">
            <text:p>01/11/205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12-08" calcext:value-type="date">
            <text:p>08/12/205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3-12-25" calcext:value-type="date">
            <text:p>25/12/205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1-01" calcext:value-type="date">
            <text:p>01/01/205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3-26" calcext:value-type="date">
            <text:p>26/03/205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3-27" calcext:value-type="date">
            <text:p>27/03/205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5-01" calcext:value-type="date">
            <text:p>01/05/205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6-29" calcext:value-type="date">
            <text:p>29/06/205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7-28" calcext:value-type="date">
            <text:p>28/07/205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7-29" calcext:value-type="date">
            <text:p>29/07/205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08-30" calcext:value-type="date">
            <text:p>30/08/205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10-08" calcext:value-type="date">
            <text:p>08/10/205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11-01" calcext:value-type="date">
            <text:p>01/11/205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12-08" calcext:value-type="date">
            <text:p>08/12/205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4-12-25" calcext:value-type="date">
            <text:p>25/12/205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1-01" calcext:value-type="date">
            <text:p>01/01/205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4-15" calcext:value-type="date">
            <text:p>15/04/205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4-16" calcext:value-type="date">
            <text:p>16/04/205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5-01" calcext:value-type="date">
            <text:p>01/05/205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6-29" calcext:value-type="date">
            <text:p>29/06/205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7-28" calcext:value-type="date">
            <text:p>28/07/205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7-29" calcext:value-type="date">
            <text:p>29/07/205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08-30" calcext:value-type="date">
            <text:p>30/08/205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10-08" calcext:value-type="date">
            <text:p>08/10/205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11-01" calcext:value-type="date">
            <text:p>01/11/205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12-08" calcext:value-type="date">
            <text:p>08/12/205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5-12-25" calcext:value-type="date">
            <text:p>25/12/205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1-01" calcext:value-type="date">
            <text:p>01/01/205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3-30" calcext:value-type="date">
            <text:p>30/03/205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3-31" calcext:value-type="date">
            <text:p>31/03/205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5-01" calcext:value-type="date">
            <text:p>01/05/205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6-29" calcext:value-type="date">
            <text:p>29/06/205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7-28" calcext:value-type="date">
            <text:p>28/07/205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7-29" calcext:value-type="date">
            <text:p>29/07/205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08-30" calcext:value-type="date">
            <text:p>30/08/205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10-08" calcext:value-type="date">
            <text:p>08/10/205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11-01" calcext:value-type="date">
            <text:p>01/11/205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12-08" calcext:value-type="date">
            <text:p>08/12/205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6-12-25" calcext:value-type="date">
            <text:p>25/12/205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1-01" calcext:value-type="date">
            <text:p>01/01/205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4-19" calcext:value-type="date">
            <text:p>19/04/205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4-20" calcext:value-type="date">
            <text:p>20/04/205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5-01" calcext:value-type="date">
            <text:p>01/05/205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6-29" calcext:value-type="date">
            <text:p>29/06/205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7-28" calcext:value-type="date">
            <text:p>28/07/205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7-29" calcext:value-type="date">
            <text:p>29/07/205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08-30" calcext:value-type="date">
            <text:p>30/08/205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10-08" calcext:value-type="date">
            <text:p>08/10/205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11-01" calcext:value-type="date">
            <text:p>01/11/205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12-08" calcext:value-type="date">
            <text:p>08/12/205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7-12-25" calcext:value-type="date">
            <text:p>25/12/205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1-01" calcext:value-type="date">
            <text:p>01/01/205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4-11" calcext:value-type="date">
            <text:p>11/04/205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4-12" calcext:value-type="date">
            <text:p>12/04/205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5-01" calcext:value-type="date">
            <text:p>01/05/205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6-29" calcext:value-type="date">
            <text:p>29/06/205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7-28" calcext:value-type="date">
            <text:p>28/07/205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7-29" calcext:value-type="date">
            <text:p>29/07/205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08-30" calcext:value-type="date">
            <text:p>30/08/205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10-08" calcext:value-type="date">
            <text:p>08/10/205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11-01" calcext:value-type="date">
            <text:p>01/11/205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12-08" calcext:value-type="date">
            <text:p>08/12/205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8-12-25" calcext:value-type="date">
            <text:p>25/12/205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1-01" calcext:value-type="date">
            <text:p>01/01/205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3-27" calcext:value-type="date">
            <text:p>27/03/205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3-28" calcext:value-type="date">
            <text:p>28/03/205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5-01" calcext:value-type="date">
            <text:p>01/05/205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6-29" calcext:value-type="date">
            <text:p>29/06/205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7-28" calcext:value-type="date">
            <text:p>28/07/205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7-29" calcext:value-type="date">
            <text:p>29/07/205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08-30" calcext:value-type="date">
            <text:p>30/08/205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10-08" calcext:value-type="date">
            <text:p>08/10/205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11-01" calcext:value-type="date">
            <text:p>01/11/205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12-08" calcext:value-type="date">
            <text:p>08/12/205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59-12-25" calcext:value-type="date">
            <text:p>25/12/205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1-01" calcext:value-type="date">
            <text:p>01/01/206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4-15" calcext:value-type="date">
            <text:p>15/04/206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4-16" calcext:value-type="date">
            <text:p>16/04/206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5-01" calcext:value-type="date">
            <text:p>01/05/206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6-29" calcext:value-type="date">
            <text:p>29/06/206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7-28" calcext:value-type="date">
            <text:p>28/07/206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7-29" calcext:value-type="date">
            <text:p>29/07/206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08-30" calcext:value-type="date">
            <text:p>30/08/206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10-08" calcext:value-type="date">
            <text:p>08/10/206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11-01" calcext:value-type="date">
            <text:p>01/11/206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12-08" calcext:value-type="date">
            <text:p>08/12/206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0-12-25" calcext:value-type="date">
            <text:p>25/12/206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1-01" calcext:value-type="date">
            <text:p>01/01/206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4-07" calcext:value-type="date">
            <text:p>07/04/206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4-08" calcext:value-type="date">
            <text:p>08/04/206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5-01" calcext:value-type="date">
            <text:p>01/05/206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6-29" calcext:value-type="date">
            <text:p>29/06/206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7-28" calcext:value-type="date">
            <text:p>28/07/206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7-29" calcext:value-type="date">
            <text:p>29/07/206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08-30" calcext:value-type="date">
            <text:p>30/08/206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10-08" calcext:value-type="date">
            <text:p>08/10/206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11-01" calcext:value-type="date">
            <text:p>01/11/206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12-08" calcext:value-type="date">
            <text:p>08/12/206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1-12-25" calcext:value-type="date">
            <text:p>25/12/206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1-01" calcext:value-type="date">
            <text:p>01/01/2062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3-23" calcext:value-type="date">
            <text:p>23/03/206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3-24" calcext:value-type="date">
            <text:p>24/03/206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5-01" calcext:value-type="date">
            <text:p>01/05/206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6-29" calcext:value-type="date">
            <text:p>29/06/206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7-28" calcext:value-type="date">
            <text:p>28/07/206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7-29" calcext:value-type="date">
            <text:p>29/07/206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08-30" calcext:value-type="date">
            <text:p>30/08/206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10-08" calcext:value-type="date">
            <text:p>08/10/206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11-01" calcext:value-type="date">
            <text:p>01/11/206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12-08" calcext:value-type="date">
            <text:p>08/12/206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2-12-25" calcext:value-type="date">
            <text:p>25/12/206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1-01" calcext:value-type="date">
            <text:p>01/01/206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4-12" calcext:value-type="date">
            <text:p>12/04/206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4-13" calcext:value-type="date">
            <text:p>13/04/206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5-01" calcext:value-type="date">
            <text:p>01/05/206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6-29" calcext:value-type="date">
            <text:p>29/06/206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7-28" calcext:value-type="date">
            <text:p>28/07/206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7-29" calcext:value-type="date">
            <text:p>29/07/206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08-30" calcext:value-type="date">
            <text:p>30/08/206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10-08" calcext:value-type="date">
            <text:p>08/10/206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11-01" calcext:value-type="date">
            <text:p>01/11/206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12-08" calcext:value-type="date">
            <text:p>08/12/206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3-12-25" calcext:value-type="date">
            <text:p>25/12/206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1-01" calcext:value-type="date">
            <text:p>01/01/206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4-03" calcext:value-type="date">
            <text:p>03/04/206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4-04" calcext:value-type="date">
            <text:p>04/04/206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5-01" calcext:value-type="date">
            <text:p>01/05/206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6-29" calcext:value-type="date">
            <text:p>29/06/206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7-28" calcext:value-type="date">
            <text:p>28/07/206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7-29" calcext:value-type="date">
            <text:p>29/07/206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08-30" calcext:value-type="date">
            <text:p>30/08/206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10-08" calcext:value-type="date">
            <text:p>08/10/206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11-01" calcext:value-type="date">
            <text:p>01/11/206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12-08" calcext:value-type="date">
            <text:p>08/12/206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4-12-25" calcext:value-type="date">
            <text:p>25/12/206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1-01" calcext:value-type="date">
            <text:p>01/01/206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3-26" calcext:value-type="date">
            <text:p>26/03/206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3-27" calcext:value-type="date">
            <text:p>27/03/206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5-01" calcext:value-type="date">
            <text:p>01/05/206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6-29" calcext:value-type="date">
            <text:p>29/06/206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7-28" calcext:value-type="date">
            <text:p>28/07/206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7-29" calcext:value-type="date">
            <text:p>29/07/206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08-30" calcext:value-type="date">
            <text:p>30/08/206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10-08" calcext:value-type="date">
            <text:p>08/10/206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11-01" calcext:value-type="date">
            <text:p>01/11/206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12-08" calcext:value-type="date">
            <text:p>08/12/206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5-12-25" calcext:value-type="date">
            <text:p>25/12/206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1-01" calcext:value-type="date">
            <text:p>01/01/206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4-08" calcext:value-type="date">
            <text:p>08/04/206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4-09" calcext:value-type="date">
            <text:p>09/04/206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5-01" calcext:value-type="date">
            <text:p>01/05/206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6-29" calcext:value-type="date">
            <text:p>29/06/206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7-28" calcext:value-type="date">
            <text:p>28/07/206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7-29" calcext:value-type="date">
            <text:p>29/07/206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08-30" calcext:value-type="date">
            <text:p>30/08/206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10-08" calcext:value-type="date">
            <text:p>08/10/206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11-01" calcext:value-type="date">
            <text:p>01/11/206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12-08" calcext:value-type="date">
            <text:p>08/12/206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6-12-25" calcext:value-type="date">
            <text:p>25/12/206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1-01" calcext:value-type="date">
            <text:p>01/01/206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3-31" calcext:value-type="date">
            <text:p>31/03/206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4-01" calcext:value-type="date">
            <text:p>01/04/206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5-01" calcext:value-type="date">
            <text:p>01/05/206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6-29" calcext:value-type="date">
            <text:p>29/06/206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7-28" calcext:value-type="date">
            <text:p>28/07/206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7-29" calcext:value-type="date">
            <text:p>29/07/206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08-30" calcext:value-type="date">
            <text:p>30/08/206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10-08" calcext:value-type="date">
            <text:p>08/10/206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11-01" calcext:value-type="date">
            <text:p>01/11/206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12-08" calcext:value-type="date">
            <text:p>08/12/206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7-12-25" calcext:value-type="date">
            <text:p>25/12/206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1-01" calcext:value-type="date">
            <text:p>01/01/2068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4-19" calcext:value-type="date">
            <text:p>19/04/206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4-20" calcext:value-type="date">
            <text:p>20/04/206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5-01" calcext:value-type="date">
            <text:p>01/05/206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6-29" calcext:value-type="date">
            <text:p>29/06/206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7-28" calcext:value-type="date">
            <text:p>28/07/206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7-29" calcext:value-type="date">
            <text:p>29/07/206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08-30" calcext:value-type="date">
            <text:p>30/08/206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10-08" calcext:value-type="date">
            <text:p>08/10/206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11-01" calcext:value-type="date">
            <text:p>01/11/206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12-08" calcext:value-type="date">
            <text:p>08/12/206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8-12-25" calcext:value-type="date">
            <text:p>25/12/206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1-01" calcext:value-type="date">
            <text:p>01/01/206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4-11" calcext:value-type="date">
            <text:p>11/04/206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4-12" calcext:value-type="date">
            <text:p>12/04/206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5-01" calcext:value-type="date">
            <text:p>01/05/206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6-29" calcext:value-type="date">
            <text:p>29/06/206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7-28" calcext:value-type="date">
            <text:p>28/07/206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7-29" calcext:value-type="date">
            <text:p>29/07/206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08-30" calcext:value-type="date">
            <text:p>30/08/206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10-08" calcext:value-type="date">
            <text:p>08/10/206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11-01" calcext:value-type="date">
            <text:p>01/11/206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12-08" calcext:value-type="date">
            <text:p>08/12/206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69-12-25" calcext:value-type="date">
            <text:p>25/12/206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1-01" calcext:value-type="date">
            <text:p>01/01/207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3-27" calcext:value-type="date">
            <text:p>27/03/207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3-28" calcext:value-type="date">
            <text:p>28/03/207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5-01" calcext:value-type="date">
            <text:p>01/05/207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6-29" calcext:value-type="date">
            <text:p>29/06/207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7-28" calcext:value-type="date">
            <text:p>28/07/207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7-29" calcext:value-type="date">
            <text:p>29/07/207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08-30" calcext:value-type="date">
            <text:p>30/08/207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10-08" calcext:value-type="date">
            <text:p>08/10/207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11-01" calcext:value-type="date">
            <text:p>01/11/207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12-08" calcext:value-type="date">
            <text:p>08/12/207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0-12-25" calcext:value-type="date">
            <text:p>25/12/207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1-01" calcext:value-type="date">
            <text:p>01/01/207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4-16" calcext:value-type="date">
            <text:p>16/04/207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4-17" calcext:value-type="date">
            <text:p>17/04/207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5-01" calcext:value-type="date">
            <text:p>01/05/207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6-29" calcext:value-type="date">
            <text:p>29/06/207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7-28" calcext:value-type="date">
            <text:p>28/07/207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7-29" calcext:value-type="date">
            <text:p>29/07/207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08-30" calcext:value-type="date">
            <text:p>30/08/207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10-08" calcext:value-type="date">
            <text:p>08/10/207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11-01" calcext:value-type="date">
            <text:p>01/11/207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12-08" calcext:value-type="date">
            <text:p>08/12/207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1-12-25" calcext:value-type="date">
            <text:p>25/12/207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1-01" calcext:value-type="date">
            <text:p>01/01/207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4-07" calcext:value-type="date">
            <text:p>07/04/207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4-08" calcext:value-type="date">
            <text:p>08/04/207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5-01" calcext:value-type="date">
            <text:p>01/05/207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6-29" calcext:value-type="date">
            <text:p>29/06/207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7-28" calcext:value-type="date">
            <text:p>28/07/207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7-29" calcext:value-type="date">
            <text:p>29/07/207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08-30" calcext:value-type="date">
            <text:p>30/08/207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10-08" calcext:value-type="date">
            <text:p>08/10/207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11-01" calcext:value-type="date">
            <text:p>01/11/207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12-08" calcext:value-type="date">
            <text:p>08/12/207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2-12-25" calcext:value-type="date">
            <text:p>25/12/207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1-01" calcext:value-type="date">
            <text:p>01/01/2073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3-23" calcext:value-type="date">
            <text:p>23/03/207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3-24" calcext:value-type="date">
            <text:p>24/03/207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5-01" calcext:value-type="date">
            <text:p>01/05/207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6-29" calcext:value-type="date">
            <text:p>29/06/207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7-28" calcext:value-type="date">
            <text:p>28/07/207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7-29" calcext:value-type="date">
            <text:p>29/07/207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08-30" calcext:value-type="date">
            <text:p>30/08/207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10-08" calcext:value-type="date">
            <text:p>08/10/207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11-01" calcext:value-type="date">
            <text:p>01/11/207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12-08" calcext:value-type="date">
            <text:p>08/12/207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3-12-25" calcext:value-type="date">
            <text:p>25/12/207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1-01" calcext:value-type="date">
            <text:p>01/01/207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4-12" calcext:value-type="date">
            <text:p>12/04/207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4-13" calcext:value-type="date">
            <text:p>13/04/207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5-01" calcext:value-type="date">
            <text:p>01/05/207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6-29" calcext:value-type="date">
            <text:p>29/06/207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7-28" calcext:value-type="date">
            <text:p>28/07/207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7-29" calcext:value-type="date">
            <text:p>29/07/207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08-30" calcext:value-type="date">
            <text:p>30/08/207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10-08" calcext:value-type="date">
            <text:p>08/10/207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11-01" calcext:value-type="date">
            <text:p>01/11/207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12-08" calcext:value-type="date">
            <text:p>08/12/207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4-12-25" calcext:value-type="date">
            <text:p>25/12/207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1-01" calcext:value-type="date">
            <text:p>01/01/207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4-04" calcext:value-type="date">
            <text:p>04/04/207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4-05" calcext:value-type="date">
            <text:p>05/04/207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5-01" calcext:value-type="date">
            <text:p>01/05/207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6-29" calcext:value-type="date">
            <text:p>29/06/207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7-28" calcext:value-type="date">
            <text:p>28/07/207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7-29" calcext:value-type="date">
            <text:p>29/07/207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08-30" calcext:value-type="date">
            <text:p>30/08/207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10-08" calcext:value-type="date">
            <text:p>08/10/207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11-01" calcext:value-type="date">
            <text:p>01/11/207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12-08" calcext:value-type="date">
            <text:p>08/12/207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5-12-25" calcext:value-type="date">
            <text:p>25/12/207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1-01" calcext:value-type="date">
            <text:p>01/01/207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4-16" calcext:value-type="date">
            <text:p>16/04/207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4-17" calcext:value-type="date">
            <text:p>17/04/207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5-01" calcext:value-type="date">
            <text:p>01/05/207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6-29" calcext:value-type="date">
            <text:p>29/06/207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7-28" calcext:value-type="date">
            <text:p>28/07/207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7-29" calcext:value-type="date">
            <text:p>29/07/207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08-30" calcext:value-type="date">
            <text:p>30/08/207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10-08" calcext:value-type="date">
            <text:p>08/10/207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11-01" calcext:value-type="date">
            <text:p>01/11/207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12-08" calcext:value-type="date">
            <text:p>08/12/207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6-12-25" calcext:value-type="date">
            <text:p>25/12/207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1-01" calcext:value-type="date">
            <text:p>01/01/207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4-08" calcext:value-type="date">
            <text:p>08/04/207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4-09" calcext:value-type="date">
            <text:p>09/04/207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5-01" calcext:value-type="date">
            <text:p>01/05/207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6-29" calcext:value-type="date">
            <text:p>29/06/207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7-28" calcext:value-type="date">
            <text:p>28/07/207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7-29" calcext:value-type="date">
            <text:p>29/07/207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08-30" calcext:value-type="date">
            <text:p>30/08/207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10-08" calcext:value-type="date">
            <text:p>08/10/207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11-01" calcext:value-type="date">
            <text:p>01/11/207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12-08" calcext:value-type="date">
            <text:p>08/12/207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7-12-25" calcext:value-type="date">
            <text:p>25/12/207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1-01" calcext:value-type="date">
            <text:p>01/01/207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3-31" calcext:value-type="date">
            <text:p>31/03/207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4-01" calcext:value-type="date">
            <text:p>01/04/207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5-01" calcext:value-type="date">
            <text:p>01/05/207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6-29" calcext:value-type="date">
            <text:p>29/06/207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7-28" calcext:value-type="date">
            <text:p>28/07/207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7-29" calcext:value-type="date">
            <text:p>29/07/207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08-30" calcext:value-type="date">
            <text:p>30/08/207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10-08" calcext:value-type="date">
            <text:p>08/10/207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11-01" calcext:value-type="date">
            <text:p>01/11/207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12-08" calcext:value-type="date">
            <text:p>08/12/207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8-12-25" calcext:value-type="date">
            <text:p>25/12/207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1-01" calcext:value-type="date">
            <text:p>01/01/2079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4-20" calcext:value-type="date">
            <text:p>20/04/207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4-21" calcext:value-type="date">
            <text:p>21/04/207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5-01" calcext:value-type="date">
            <text:p>01/05/207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6-29" calcext:value-type="date">
            <text:p>29/06/207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7-28" calcext:value-type="date">
            <text:p>28/07/207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7-29" calcext:value-type="date">
            <text:p>29/07/207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08-30" calcext:value-type="date">
            <text:p>30/08/207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10-08" calcext:value-type="date">
            <text:p>08/10/207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11-01" calcext:value-type="date">
            <text:p>01/11/207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12-08" calcext:value-type="date">
            <text:p>08/12/207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79-12-25" calcext:value-type="date">
            <text:p>25/12/207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1-01" calcext:value-type="date">
            <text:p>01/01/208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4-04" calcext:value-type="date">
            <text:p>04/04/208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4-05" calcext:value-type="date">
            <text:p>05/04/208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5-01" calcext:value-type="date">
            <text:p>01/05/208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6-29" calcext:value-type="date">
            <text:p>29/06/208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7-28" calcext:value-type="date">
            <text:p>28/07/208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7-29" calcext:value-type="date">
            <text:p>29/07/208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08-30" calcext:value-type="date">
            <text:p>30/08/208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10-08" calcext:value-type="date">
            <text:p>08/10/208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11-01" calcext:value-type="date">
            <text:p>01/11/208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12-08" calcext:value-type="date">
            <text:p>08/12/208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0-12-25" calcext:value-type="date">
            <text:p>25/12/208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1-01" calcext:value-type="date">
            <text:p>01/01/208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3-27" calcext:value-type="date">
            <text:p>27/03/208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3-28" calcext:value-type="date">
            <text:p>28/03/208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5-01" calcext:value-type="date">
            <text:p>01/05/208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6-29" calcext:value-type="date">
            <text:p>29/06/208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7-28" calcext:value-type="date">
            <text:p>28/07/208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7-29" calcext:value-type="date">
            <text:p>29/07/208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08-30" calcext:value-type="date">
            <text:p>30/08/208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10-08" calcext:value-type="date">
            <text:p>08/10/208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11-01" calcext:value-type="date">
            <text:p>01/11/208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12-08" calcext:value-type="date">
            <text:p>08/12/208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1-12-25" calcext:value-type="date">
            <text:p>25/12/208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1-01" calcext:value-type="date">
            <text:p>01/01/208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4-16" calcext:value-type="date">
            <text:p>16/04/208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4-17" calcext:value-type="date">
            <text:p>17/04/208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5-01" calcext:value-type="date">
            <text:p>01/05/208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6-29" calcext:value-type="date">
            <text:p>29/06/208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7-28" calcext:value-type="date">
            <text:p>28/07/208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7-29" calcext:value-type="date">
            <text:p>29/07/208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08-30" calcext:value-type="date">
            <text:p>30/08/208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10-08" calcext:value-type="date">
            <text:p>08/10/208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11-01" calcext:value-type="date">
            <text:p>01/11/208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12-08" calcext:value-type="date">
            <text:p>08/12/208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2-12-25" calcext:value-type="date">
            <text:p>25/12/208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1-01" calcext:value-type="date">
            <text:p>01/01/208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4-01" calcext:value-type="date">
            <text:p>01/04/208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4-02" calcext:value-type="date">
            <text:p>02/04/208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5-01" calcext:value-type="date">
            <text:p>01/05/208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6-29" calcext:value-type="date">
            <text:p>29/06/208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7-28" calcext:value-type="date">
            <text:p>28/07/208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7-29" calcext:value-type="date">
            <text:p>29/07/208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08-30" calcext:value-type="date">
            <text:p>30/08/208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10-08" calcext:value-type="date">
            <text:p>08/10/208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11-01" calcext:value-type="date">
            <text:p>01/11/208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12-08" calcext:value-type="date">
            <text:p>08/12/208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3-12-25" calcext:value-type="date">
            <text:p>25/12/208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1-01" calcext:value-type="date">
            <text:p>01/01/208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3-23" calcext:value-type="date">
            <text:p>23/03/208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3-24" calcext:value-type="date">
            <text:p>24/03/208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5-01" calcext:value-type="date">
            <text:p>01/05/208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6-29" calcext:value-type="date">
            <text:p>29/06/208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7-28" calcext:value-type="date">
            <text:p>28/07/208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7-29" calcext:value-type="date">
            <text:p>29/07/208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08-30" calcext:value-type="date">
            <text:p>30/08/208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10-08" calcext:value-type="date">
            <text:p>08/10/208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11-01" calcext:value-type="date">
            <text:p>01/11/208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12-08" calcext:value-type="date">
            <text:p>08/12/208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4-12-25" calcext:value-type="date">
            <text:p>25/12/208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1-01" calcext:value-type="date">
            <text:p>01/01/208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4-12" calcext:value-type="date">
            <text:p>12/04/208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4-13" calcext:value-type="date">
            <text:p>13/04/208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5-01" calcext:value-type="date">
            <text:p>01/05/208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6-29" calcext:value-type="date">
            <text:p>29/06/208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7-28" calcext:value-type="date">
            <text:p>28/07/208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7-29" calcext:value-type="date">
            <text:p>29/07/208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08-30" calcext:value-type="date">
            <text:p>30/08/208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10-08" calcext:value-type="date">
            <text:p>08/10/208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11-01" calcext:value-type="date">
            <text:p>01/11/208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12-08" calcext:value-type="date">
            <text:p>08/12/208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5-12-25" calcext:value-type="date">
            <text:p>25/12/208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1-01" calcext:value-type="date">
            <text:p>01/01/2086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3-28" calcext:value-type="date">
            <text:p>28/03/208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3-29" calcext:value-type="date">
            <text:p>29/03/208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5-01" calcext:value-type="date">
            <text:p>01/05/208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6-29" calcext:value-type="date">
            <text:p>29/06/208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7-28" calcext:value-type="date">
            <text:p>28/07/208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7-29" calcext:value-type="date">
            <text:p>29/07/208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08-30" calcext:value-type="date">
            <text:p>30/08/208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10-08" calcext:value-type="date">
            <text:p>08/10/208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11-01" calcext:value-type="date">
            <text:p>01/11/208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12-08" calcext:value-type="date">
            <text:p>08/12/208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6-12-25" calcext:value-type="date">
            <text:p>25/12/208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1-01" calcext:value-type="date">
            <text:p>01/01/208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4-17" calcext:value-type="date">
            <text:p>17/04/208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4-18" calcext:value-type="date">
            <text:p>18/04/208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5-01" calcext:value-type="date">
            <text:p>01/05/208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6-29" calcext:value-type="date">
            <text:p>29/06/208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7-28" calcext:value-type="date">
            <text:p>28/07/208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7-29" calcext:value-type="date">
            <text:p>29/07/208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08-30" calcext:value-type="date">
            <text:p>30/08/208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10-08" calcext:value-type="date">
            <text:p>08/10/208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11-01" calcext:value-type="date">
            <text:p>01/11/208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12-08" calcext:value-type="date">
            <text:p>08/12/208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7-12-25" calcext:value-type="date">
            <text:p>25/12/208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1-01" calcext:value-type="date">
            <text:p>01/01/208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4-08" calcext:value-type="date">
            <text:p>08/04/208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4-09" calcext:value-type="date">
            <text:p>09/04/208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5-01" calcext:value-type="date">
            <text:p>01/05/208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6-29" calcext:value-type="date">
            <text:p>29/06/208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7-28" calcext:value-type="date">
            <text:p>28/07/208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7-29" calcext:value-type="date">
            <text:p>29/07/208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08-30" calcext:value-type="date">
            <text:p>30/08/208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10-08" calcext:value-type="date">
            <text:p>08/10/208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11-01" calcext:value-type="date">
            <text:p>01/11/208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12-08" calcext:value-type="date">
            <text:p>08/12/208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8-12-25" calcext:value-type="date">
            <text:p>25/12/208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1-01" calcext:value-type="date">
            <text:p>01/01/208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3-31" calcext:value-type="date">
            <text:p>31/03/208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4-01" calcext:value-type="date">
            <text:p>01/04/208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5-01" calcext:value-type="date">
            <text:p>01/05/208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6-29" calcext:value-type="date">
            <text:p>29/06/208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7-28" calcext:value-type="date">
            <text:p>28/07/208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7-29" calcext:value-type="date">
            <text:p>29/07/208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08-30" calcext:value-type="date">
            <text:p>30/08/208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10-08" calcext:value-type="date">
            <text:p>08/10/208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11-01" calcext:value-type="date">
            <text:p>01/11/208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12-08" calcext:value-type="date">
            <text:p>08/12/208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89-12-25" calcext:value-type="date">
            <text:p>25/12/208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1-01" calcext:value-type="date">
            <text:p>01/01/2090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4-13" calcext:value-type="date">
            <text:p>13/04/209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4-14" calcext:value-type="date">
            <text:p>14/04/209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5-01" calcext:value-type="date">
            <text:p>01/05/209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6-29" calcext:value-type="date">
            <text:p>29/06/209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7-28" calcext:value-type="date">
            <text:p>28/07/209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7-29" calcext:value-type="date">
            <text:p>29/07/209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08-30" calcext:value-type="date">
            <text:p>30/08/209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10-08" calcext:value-type="date">
            <text:p>08/10/209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11-01" calcext:value-type="date">
            <text:p>01/11/209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12-08" calcext:value-type="date">
            <text:p>08/12/209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0-12-25" calcext:value-type="date">
            <text:p>25/12/209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1-01" calcext:value-type="date">
            <text:p>01/01/2091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4-05" calcext:value-type="date">
            <text:p>05/04/2091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4-06" calcext:value-type="date">
            <text:p>06/04/2091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5-01" calcext:value-type="date">
            <text:p>01/05/2091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6-29" calcext:value-type="date">
            <text:p>29/06/2091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7-28" calcext:value-type="date">
            <text:p>28/07/209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7-29" calcext:value-type="date">
            <text:p>29/07/2091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08-30" calcext:value-type="date">
            <text:p>30/08/2091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10-08" calcext:value-type="date">
            <text:p>08/10/2091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11-01" calcext:value-type="date">
            <text:p>01/11/2091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12-08" calcext:value-type="date">
            <text:p>08/12/2091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1-12-25" calcext:value-type="date">
            <text:p>25/12/2091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1-01" calcext:value-type="date">
            <text:p>01/01/2092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3-27" calcext:value-type="date">
            <text:p>27/03/2092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3-28" calcext:value-type="date">
            <text:p>28/03/2092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5-01" calcext:value-type="date">
            <text:p>01/05/2092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6-29" calcext:value-type="date">
            <text:p>29/06/2092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7-28" calcext:value-type="date">
            <text:p>28/07/209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7-29" calcext:value-type="date">
            <text:p>29/07/2092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08-30" calcext:value-type="date">
            <text:p>30/08/2092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10-08" calcext:value-type="date">
            <text:p>08/10/2092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11-01" calcext:value-type="date">
            <text:p>01/11/2092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12-08" calcext:value-type="date">
            <text:p>08/12/2092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2-12-25" calcext:value-type="date">
            <text:p>25/12/2092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1-01" calcext:value-type="date">
            <text:p>01/01/2093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4-09" calcext:value-type="date">
            <text:p>09/04/2093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4-10" calcext:value-type="date">
            <text:p>10/04/2093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5-01" calcext:value-type="date">
            <text:p>01/05/2093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6-29" calcext:value-type="date">
            <text:p>29/06/2093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7-28" calcext:value-type="date">
            <text:p>28/07/209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7-29" calcext:value-type="date">
            <text:p>29/07/2093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08-30" calcext:value-type="date">
            <text:p>30/08/2093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10-08" calcext:value-type="date">
            <text:p>08/10/2093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11-01" calcext:value-type="date">
            <text:p>01/11/2093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12-08" calcext:value-type="date">
            <text:p>08/12/2093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3-12-25" calcext:value-type="date">
            <text:p>25/12/2093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1-01" calcext:value-type="date">
            <text:p>01/01/2094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4-01" calcext:value-type="date">
            <text:p>01/04/2094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4-02" calcext:value-type="date">
            <text:p>02/04/2094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5-01" calcext:value-type="date">
            <text:p>01/05/2094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6-29" calcext:value-type="date">
            <text:p>29/06/2094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7-28" calcext:value-type="date">
            <text:p>28/07/209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7-29" calcext:value-type="date">
            <text:p>29/07/2094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08-30" calcext:value-type="date">
            <text:p>30/08/2094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10-08" calcext:value-type="date">
            <text:p>08/10/2094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11-01" calcext:value-type="date">
            <text:p>01/11/2094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12-08" calcext:value-type="date">
            <text:p>08/12/2094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4-12-25" calcext:value-type="date">
            <text:p>25/12/2094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1-01" calcext:value-type="date">
            <text:p>01/01/2095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4-21" calcext:value-type="date">
            <text:p>21/04/2095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4-22" calcext:value-type="date">
            <text:p>22/04/2095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5-01" calcext:value-type="date">
            <text:p>01/05/2095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6-29" calcext:value-type="date">
            <text:p>29/06/2095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7-28" calcext:value-type="date">
            <text:p>28/07/209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7-29" calcext:value-type="date">
            <text:p>29/07/2095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08-30" calcext:value-type="date">
            <text:p>30/08/2095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10-08" calcext:value-type="date">
            <text:p>08/10/2095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11-01" calcext:value-type="date">
            <text:p>01/11/2095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12-08" calcext:value-type="date">
            <text:p>08/12/2095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5-12-25" calcext:value-type="date">
            <text:p>25/12/2095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1-01" calcext:value-type="date">
            <text:p>01/01/2096</text:p>
          </table:table-cell>
          <table:table-cell table:style-name="ce196" office:value-type="string" calcext:value-type="string">
            <text:p>AN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4-12" calcext:value-type="date">
            <text:p>12/04/2096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4-13" calcext:value-type="date">
            <text:p>13/04/2096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5-01" calcext:value-type="date">
            <text:p>01/05/2096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6-29" calcext:value-type="date">
            <text:p>29/06/2096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7-28" calcext:value-type="date">
            <text:p>28/07/209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7-29" calcext:value-type="date">
            <text:p>29/07/2096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08-30" calcext:value-type="date">
            <text:p>30/08/2096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10-08" calcext:value-type="date">
            <text:p>08/10/2096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11-01" calcext:value-type="date">
            <text:p>01/11/2096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12-08" calcext:value-type="date">
            <text:p>08/12/2096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6-12-25" calcext:value-type="date">
            <text:p>25/12/2096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1-01" calcext:value-type="date">
            <text:p>01/01/2097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3-28" calcext:value-type="date">
            <text:p>28/03/2097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3-29" calcext:value-type="date">
            <text:p>29/03/2097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5-01" calcext:value-type="date">
            <text:p>01/05/2097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6-29" calcext:value-type="date">
            <text:p>29/06/2097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7-28" calcext:value-type="date">
            <text:p>28/07/209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7-29" calcext:value-type="date">
            <text:p>29/07/2097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08-30" calcext:value-type="date">
            <text:p>30/08/2097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10-08" calcext:value-type="date">
            <text:p>08/10/2097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11-01" calcext:value-type="date">
            <text:p>01/11/2097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12-08" calcext:value-type="date">
            <text:p>08/12/2097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7-12-25" calcext:value-type="date">
            <text:p>25/12/2097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1-01" calcext:value-type="date">
            <text:p>01/01/2098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4-17" calcext:value-type="date">
            <text:p>17/04/2098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4-18" calcext:value-type="date">
            <text:p>18/04/2098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5-01" calcext:value-type="date">
            <text:p>01/05/2098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6-29" calcext:value-type="date">
            <text:p>29/06/2098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7-28" calcext:value-type="date">
            <text:p>28/07/209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7-29" calcext:value-type="date">
            <text:p>29/07/2098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08-30" calcext:value-type="date">
            <text:p>30/08/2098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10-08" calcext:value-type="date">
            <text:p>08/10/2098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11-01" calcext:value-type="date">
            <text:p>01/11/2098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12-08" calcext:value-type="date">
            <text:p>08/12/2098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8-12-25" calcext:value-type="date">
            <text:p>25/12/2098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1-01" calcext:value-type="date">
            <text:p>01/01/2099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4-09" calcext:value-type="date">
            <text:p>09/04/2099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4-10" calcext:value-type="date">
            <text:p>10/04/2099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5-01" calcext:value-type="date">
            <text:p>01/05/2099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6-29" calcext:value-type="date">
            <text:p>29/06/2099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7-28" calcext:value-type="date">
            <text:p>28/07/209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7-29" calcext:value-type="date">
            <text:p>29/07/2099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08-30" calcext:value-type="date">
            <text:p>30/08/2099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10-08" calcext:value-type="date">
            <text:p>08/10/2099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11-01" calcext:value-type="date">
            <text:p>01/11/2099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12-08" calcext:value-type="date">
            <text:p>08/12/2099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099-12-25" calcext:value-type="date">
            <text:p>25/12/2099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1-01" calcext:value-type="date">
            <text:p>01/01/2100</text:p>
          </table:table-cell>
          <table:table-cell table:style-name="ce196" office:value-type="string" calcext:value-type="string">
            <text:p>AÑO NUEV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3-25" calcext:value-type="date">
            <text:p>25/03/2100</text:p>
          </table:table-cell>
          <table:table-cell table:style-name="ce196" office:value-type="string" calcext:value-type="string">
            <text:p>JUEV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3-26" calcext:value-type="date">
            <text:p>26/03/2100</text:p>
          </table:table-cell>
          <table:table-cell table:style-name="ce196" office:value-type="string" calcext:value-type="string">
            <text:p>VIERNES SANT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5-01" calcext:value-type="date">
            <text:p>01/05/2100</text:p>
          </table:table-cell>
          <table:table-cell table:style-name="ce196" office:value-type="string" calcext:value-type="string">
            <text:p>DIA DEL TRABAJ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6-29" calcext:value-type="date">
            <text:p>29/06/2100</text:p>
          </table:table-cell>
          <table:table-cell table:style-name="ce196" office:value-type="string" calcext:value-type="string">
            <text:p>SAN PEDRO Y SAN PABLO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7-28" calcext:value-type="date">
            <text:p>28/07/210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7-29" calcext:value-type="date">
            <text:p>29/07/2100</text:p>
          </table:table-cell>
          <table:table-cell table:style-name="ce196" office:value-type="string" calcext:value-type="string">
            <text:p>FIESTAS PATRIA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08-30" calcext:value-type="date">
            <text:p>30/08/2100</text:p>
          </table:table-cell>
          <table:table-cell table:style-name="ce196" office:value-type="string" calcext:value-type="string">
            <text:p>SANTA ROSA DE LIMA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10-08" calcext:value-type="date">
            <text:p>08/10/2100</text:p>
          </table:table-cell>
          <table:table-cell table:style-name="ce196" office:value-type="string" calcext:value-type="string">
            <text:p>COMBATE DE ANGAM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11-01" calcext:value-type="date">
            <text:p>01/11/2100</text:p>
          </table:table-cell>
          <table:table-cell table:style-name="ce196" office:value-type="string" calcext:value-type="string">
            <text:p>DIA DE LOS DIFUNTOS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12-08" calcext:value-type="date">
            <text:p>08/12/2100</text:p>
          </table:table-cell>
          <table:table-cell table:style-name="ce196" office:value-type="string" calcext:value-type="string">
            <text:p>DIA INMACULADA CONCEPCION</text:p>
          </table:table-cell>
          <table:table-cell table:number-columns-repeated="16382"/>
        </table:table-row>
        <table:table-row table:style-name="ro10">
          <table:table-cell table:style-name="ce193" office:value-type="date" office:date-value="2100-12-25" calcext:value-type="date">
            <text:p>25/12/2100</text:p>
          </table:table-cell>
          <table:table-cell table:style-name="ce196" office:value-type="string" calcext:value-type="string">
            <text:p>NAVIDAD</text:p>
          </table:table-cell>
          <table:table-cell table:number-columns-repeated="16382"/>
        </table:table-row>
        <table:table-row table:style-name="ro10" table:number-rows-repeated="11">
          <table:table-cell table:style-name="ce193"/>
          <table:table-cell table:style-name="ce196"/>
          <table:table-cell table:number-columns-repeated="16382"/>
        </table:table-row>
        <table:table-row table:style-name="ro10" table:number-rows-repeated="1047321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TABLA" table:style-name="ta3">
        <table:table-column table:style-name="co39" table:default-cell-style-name="ce226"/>
        <table:table-column table:style-name="co39" table:default-cell-style-name="ce228"/>
        <table:table-column table:style-name="co39" table:number-columns-repeated="16382" table:default-cell-style-name="Default"/>
        <table:table-row table:style-name="ro12">
          <table:table-cell table:style-name="ce225" office:value-type="string" calcext:value-type="string">
            <text:p>Plan</text:p>
          </table:table-cell>
          <table:table-cell table:style-name="ce227" office:value-type="string" calcext:value-type="string">
            <text:p>inc IGV</text:p>
          </table:table-cell>
          <table:table-cell table:number-columns-repeated="16382"/>
        </table:table-row>
        <table:table-row table:style-name="ro12">
          <table:table-cell office:value-type="string" calcext:value-type="string">
            <text:p>Edificación</text:p>
          </table:table-cell>
          <table:table-cell office:value-type="percentage" office:value="0.0002384" calcext:value-type="percentage">
            <text:p>0.02 %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Existencias/Contenido</text:p>
          </table:table-cell>
          <table:table-cell table:style-name="ce229" office:value-type="percentage" office:value="0.0002902" calcext:value-type="percentage">
            <text:p>0.03 %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Maq Equipo Fijo</text:p>
          </table:table-cell>
          <table:table-cell office:value-type="percentage" office:value="0.0003283" calcext:value-type="percentage">
            <text:p>0.03 %</text:p>
          </table:table-cell>
          <table:table-cell table:number-columns-repeated="16382"/>
        </table:table-row>
      </table:table>
      <table:named-expressions>
        <table:named-expression table:name="c_switch" table:base-cell-address="$Cronograma.$A$1" table:expression="#N/A"/>
        <table:named-expression table:name="q_total" table:base-cell-address="$Cronograma.$A$1" table:expression="#N/A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5">
      <number:text-content/>
      <style:map style:condition="value()&lt;=1.7976931348623157E+308" style:apply-style-name="N135P0"/>
    </number:text-style>
    <number:percentage-style style:name="N136">
      <number:number number:decimal-places="3" number:min-decimal-places="3" number:min-integer-digits="1"/>
      <number:text>%</number:text>
    </number:percentage-style>
    <number:number-style style:name="N137">
      <number:number number:decimal-places="1" number:min-decimal-places="1" number:min-integer-digits="1"/>
    </number:number-style>
    <number:number-style style:name="N138">
      <number:number number:decimal-places="0" number:min-decimal-places="0" number:min-integer-digits="2"/>
    </number:number-style>
    <number:number-style style:name="N139P0" style:volatile="true">
      <number:text loext:blank-width-char="("> </number:text>
      <number:fill-character> </number:fill-character>
      <number:number number:decimal-places="3" number:min-decimal-places="3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</number:text>
      <number:fill-character> </number:fill-character>
      <number:number number:decimal-places="6" number:min-decimal-places="6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percentage-style style:name="N142">
      <number:number number:decimal-places="4" number:min-decimal-places="4" number:min-integer-digits="1"/>
      <number:text>%</number:text>
    </number:percentage-style>
    <number:percentage-style style:name="N143">
      <number:number number:decimal-places="6" number:min-decimal-places="6" number:min-integer-digits="1"/>
      <number:text>%</number:text>
    </number:percentage-style>
    <number:percentage-style style:name="N144">
      <number:number number:decimal-places="8" number:min-decimal-places="8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LAN_20_DE_20_PAGOS" style:display-name="Normal_PLAN DE PAGO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imulador_20_Microseguros_20_V1" style:display-name="Normal_Simulador Microseguros 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style:style style:name="ConditionalStyle_5f_1" style:display-name="ConditionalStyle_1" style:family="table-cell" style:parent-style-name="Default">
      <style:text-properties fo:color="#008080"/>
    </style:style>
    <style:style style:name="ConditionalStyle_5f_2" style:display-name="ConditionalStyle_2" style:family="table-cell" style:parent-style-name="Default">
      <style:table-cell-properties fo:background-color="#008080"/>
      <style:text-properties fo:color="#008080"/>
    </style:style>
    <style:style style:name="ConditionalStyle_5f_3" style:display-name="ConditionalStyle_3" style:family="table-cell" style:parent-style-name="Default">
      <style:table-cell-properties fo:background-color="#008080"/>
      <style:text-properties fo:color="#008080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A" style:display-name="PageStyle_TAB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ores" style:display-name="PageStyle_Factor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00:36:33</meta:creation-date>
    <dc:date>2021-06-24T21:59:34</dc:date>
    <meta:generator>LibreOffice/24.2.4.2$Linux_X86_64 LibreOffice_project/420$Build-2</meta:generator>
    <meta:document-statistic meta:table-count="3" meta:cell-count="4602" meta:object-count="9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Private Sub CommandButton1_Click()

End Sub

Private Sub Worksheet_Change(ByVal Target As Excel.Range)
 
If Range("G6") &lt;&gt; 0 Or Range("G8") &lt;&gt; 0 Or Range("G10") &lt;&gt; 0 Or Range("G12") &lt;&gt; 0 Or Range("G14") &lt;&gt; 0 Then Call a1_llenar_datos

If Target.Address = "$G$10" Then
'If Range("CF16") &lt;&gt; 0 Then
' ans = MsgBox("Los plazos mayores a 120 meses solo aplican a los Cred. Hipotecarios, ingrese otro valor.", vbAbortRetryIgnore + vbQuestion, "Valor No permitido")
    ''ans = MsgBox("Los plazos mayores a 120 meses solo aplican a los Cred. Hipotecarios", vbOKCancel, "Mensaje de Error, lo que quiere realizar es incorrecto")
 If ans = 3 Or ans = 5 Then
 Range("G10").Select
 Selection.ClearContents
 Else
 Range("G10").Select
''End If
End If
End If

 
End Sub


</script:module>
</file>

<file path=Basic/VBAProject/Hoja2.xml><?xml version="1.0" encoding="utf-8"?>
<!DOCTYPE module  PUBLIC '-//OpenOffice.org//DTD OfficeDocument 1.0//EN'  'module.dtd'>
<script:module xmlns:script="http://openoffice.org/2000/script" script:name="Hoja2" script:language="StarBasic" script:moduleType="document">Rem Attribute VBA_ModuleType=VBADocumentModule
Option VBASupport 1

</script:module>
</file>

<file path=Basic/VBAProject/Hoja3.xml><?xml version="1.0" encoding="utf-8"?>
<!DOCTYPE module  PUBLIC '-//OpenOffice.org//DTD OfficeDocument 1.0//EN'  'module.dtd'>
<script:module xmlns:script="http://openoffice.org/2000/script" script:name="Hoja3" script:language="StarBasic" script:moduleType="document">Rem Attribute VBA_ModuleType=VBADocumentModule
Option VBASupport 1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a0_Inicio()

    'Sheets("Factores").Visible = xlVeryHidden
    'Sheets("Factores").Visible = True

    Application.ScreenUpdating = False
    
    Hoja1.Unprotect ("Acuario16")

    Range("G6").Select
    Selection.ClearContents
    Range("G8").Select
    Selection.ClearContents
    Range("G10").Select
    Selection.ClearContents
    Range("G12").Select
    ActiveCell.FormulaR1C1 = 0
    Range("G14").Select
    Selection.ClearContents
    
    Range("O10").Select
    ActiveCell.FormulaR1C1 = 0

'LINEAS
    Range("F30:S300").Select
    Selection.ClearContents
    Selection.Borders(xlEdgeLeft).LineStyle = xlNone
    Selection.Borders(xlEdgeBottom).LineStyle = xlNone
    Selection.Borders(xlEdgeRight).LineStyle = xlNone
    Selection.Borders(xlInsideVertical).LineStyle = xlNone
    Selection.Borders(xlInsideHorizontal).LineStyle = xlNone
    
    Hoja1.Protect ("Acuario16")

    Range("D23").Select

End Sub


Sub a1_llenar_datos()

  Application.ScreenUpdating = False
  R = ActiveCell.Row
  If R = 7 Then
     Range("G8").Select
  Else
      If R = 9 Then
         Range("G10").Select
      Else
          If R = 11 Then
             Range("G12").Select
          Else
              If R = 13 Then
                 Range("G14").Select
             Else
                  If R = 15 Then
                     Range("S16").Select
                  End If
              End If
          End If
      End If
  End If

End Sub


Sub a2_simular()

''Sheets("Factores").Visible = False

' Macro grabada el 27/02/2013 por Elmer Cortez
    
    Application.ScreenUpdating = False
    
    Hoja1.Unprotect ("Acuario16")
    
    'Range("G16").Select
    'ActiveCell.FormulaR1C1 = "=R[-10]C+R[-2]C[8]+R[1]C[6]+R[3]C[10]"
    'Range("G18").Select
    'ActiveCell.FormulaR1C1 = "=IF(R[-12]C="""",0,(POWER((1+R26C46),360)-1)*100)"
    'Range("O14").Select
    'ActiveCell.FormulaR1C1 = _
        "=TRUNC(((R[-8]C[-8]/(1-R14C13))-R[-8]C[-8]),1)+(IF(MOD(((R[-8]C[-8]/(1-R14C13))-R[-8]C[-8])*100, 10)&gt;=5, 5,0)/100)"
    'Range("M17").Select
    'ActiveCell.FormulaR1C1 = _
        "=ROUND((R[-11]C[-6]+R[-3]C[2]+R[2]C[4])*R32C83/(1-R32C83),2)"
    'Range("Q19").Select
    'ActiveCell.FormulaR1C1 = "=R[13]C[68]"
    'Range("V17").Select
    'ActiveCell.FormulaR1C1 = "=IF(Factores!R[-1]C[-9]=TRUE,Factores!R[-1]C[-10],0)"
    'Range("V18").Select
    'ActiveCell.FormulaR1C1 = "=IF(Factores!R[2]C[-9]=TRUE,Factores!R[2]C[-10],0)"
    'Range("V19").Select
    'ActiveCell.FormulaR1C1 = "=IF(Factores!R[5]C[-9]=TRUE,Factores!R[5]C[-10],0)"
    
    'EDITAR COLUMNAS Y FILAS
    
    Columns("A:A").ColumnWidth = 1.57
    Columns("B:B").ColumnWidth = 0.4
    Columns("C:C").ColumnWidth = 1.3
    Columns("D:D").ColumnWidth = 7.29
    Columns("E:E").ColumnWidth = 4.5
    Columns("F:F").ColumnWidth = 5.7
    Columns("G:G").ColumnWidth = 14.57
    Columns("H:H").ColumnWidth = 10.29
    Columns("I:J").ColumnWidth = 1.49
    Columns("K:K").ColumnWidth = 14.57
    Columns("L:L").ColumnWidth = 3.29
    Columns("M:M").ColumnWidth = 9.86
    Columns("N:N").ColumnWidth = 0.42
    Columns("O:O").ColumnWidth = 17
    Columns("P:P").ColumnWidth = 17.86
    Columns("Q:Q").ColumnWidth = 13.67
    Columns("R:R").ColumnWidth = 0.33
    Columns("S:S").ColumnWidth = 14
    Columns("T:T").ColumnWidth = 4.14 '3.14
    Columns("U:U").ColumnWidth = 4.14 '0.33
    Columns("V:V").ColumnWidth = 9.91
    Columns("W:W").ColumnWidth = 1.57
    Columns("X:X").ColumnWidth = 0.42
    Columns("Y:Y").ColumnWidth = 46.7
    
    Rows("1:1").RowHeight = 4.5
    Rows("2:2").RowHeight = 22
    Rows("3:3").RowHeight = 4.5
    Rows("4:4").RowHeight = "2.25"
    Rows("5:5").RowHeight = "6"
    Rows("6:6").RowHeight = "12.75"
    Rows("7:7").RowHeight = "6"
    Rows("8:8").RowHeight = "12.75"
    Rows("9:9").RowHeight = "6"
    Rows("10:10").RowHeight = "12.75"
    Rows("11:11").RowHeight = "6"
    Rows("12:12").RowHeight = "12.75"
    Rows("13:13").RowHeight = "6"
    Rows("14:14").RowHeight = "12.75"
    Rows("15:15").RowHeight = "6"
    Rows("16:16").RowHeight = "16.5" '12.75
    Rows("17:17").RowHeight = "16.5"
    Rows("18:18").RowHeight = "16.5"
    Rows("20:20").RowHeight = "16.5"
    Rows("21:21").RowHeight = "16.5"
    Rows("22:22").RowHeight = "4"
    
    Rows("23:28").RowHeight = "13"
    Rows("29:29").RowHeight = "16.5"
    
    Rows("30:300").Select
    Selection.RowHeight = 12.75
    Selection.Font.Bold = False
    
    'Columns("Z:GF").Select
    'Selection.EntireColumn.Hidden = True
    
    'LINEAS
    Range("F30:S300").Select
    Selection.Borders(xlEdgeLeft).LineStyle = xlNone
    Selection.Borders(xlEdgeBottom).LineStyle = xlNone
    Selection.Borders(xlEdgeRight).LineStyle = xlNone
    Selection.Borders(xlInsideVertical).LineStyle = xlNone
    Selection.Borders(xlInsideHorizontal).LineStyle = xlNone
    '''''

    Range("AT26").Select
    ActiveCell.FormulaR1C1 = "0"

    PLAZO = Range("G10").Value

    Range("F30:AU550").Select
    Selection.ClearContents
    
    Range("AW33:BG550").Select
    Selection.ClearContents
    Range("CO33:CV600").Select
    Selection.ClearContents
    
''SOLO PARA CRONOGRAMAS QUINCENALES
'________________________________________________________________________________________
    Range("AW31:AW330").Select
    Selection.ClearContents

    PLAZO1 = Int(PLAZO / 2) + 1
    
    If PLAZO = 1 Or PLAZO = 2 Then
    
    Else
    
    Range("AY32:BG32").Select
    Selection.AutoFill Destination:=Range("AY32", "BG" &amp; 32 + PLAZO - 1) 'cambiar -2 x -1

    End If
    
    For i = 1 To PLAZO1
    
    Range("BG30").Select
    ActiveCell.Offset(i, 0).Range("A1").Select
    Selection.Copy
        
        Range("AW30").Select
        ActiveCell.Offset(2 * i, 0).Range("A1").Select
        Selection.PasteSpecial Paste:=xlPasteValues

    Next i
    
    Range("AW31").Select
    ActiveCell.FormulaR1C1 = "=R[-19]C[-42]+15"
    Range("AW33").Select
    ActiveCell.FormulaR1C1 = "=R[-1]C+15"
    
    For K = 1 To PLAZO1
    
    Selection.Copy
    ActiveCell.Offset(2, 0).Range("A1").Select
    ActiveSheet.Paste
    
    Next K
    
    '________________________________________________________________________________________
    
     
    'TIPO DE SIMULADORES
    
    If PLAZO = 1 Or PLAZO = 2 Then
    
    Else
        
    Range("AY32:BG32").Select
    Selection.AutoFill Destination:=Range("AY32", "BG" &amp; 32 + PLAZO - 1) 'cambiar -2 x -1
    
    End If
    
    Range("H30:J30").Select
    ActiveCell.FormulaR1C1 = "=R[-14]C[-1]"
    Range("H31:J31").Select
    ActiveCell.FormulaR1C1 = "=R[-1]C-RC[3]"
    
    Range("K31").Select
    ActiveCell.FormulaR1C1 = _
        "=IF(R23C90&gt;1,IF(OR(RC6&lt;=R32C89,(RC16-RC12)&lt;0),0,IF(RC6=R10C7,R[-1]C8,RC16-RC12)),RC16-RC12)"
    
    Range("L31:N31").Select
    ActiveCell.FormulaR1C1 = _
        "=IF(AND(R23C90=3,RC6&lt;=R32C89),0,IF(AND(R23C90=3,RC6=R32C89+1),ROUND(R[-1]C[-4]*(POWER(1+R32C81,RC41)-1),2),ROUND(R[-1]C[-4]*(POWER(1+R32C81,RC40)-1),2)))"
      
    Range("p31:P31").Select
    ActiveCell.FormulaR1C1 = "=R[-8]C[20]"
    
    Range("Q31").Select
    ActiveCell.FormulaR1C1 = _
        "=TRUNC((((RC16)/(1-R14C13))-(RC16)),1)+(IF(MOD((((RC16)/(1-R14C13))-(RC16))*100, 10)&gt;=5, 5, 0)/100)"
    Range("R31:S31").Select
    ActiveCell.FormulaR1C1 = "=RC[-1]+RC[-2]"
    
    Range("AH31").Select
    ActiveCell.FormulaR1C1 = "1"
    Range("AH32").Select
    ActiveCell.FormulaR1C1 = "=R[-1]C+1"
    Selection.AutoFill Destination:=Range("AH32", "AH" &amp; 32 + PLAZO)
    
    Range("AI29").Select
    ActiveCell.FormulaR1C1 = _
        "=IF(R23C90=1,SUM(R[1]C:R[300]C),IF(R23C90=2,SUM(R[1]C[1]:R[300]C[1]),SUM(R[1]C[2]:R[300]C[2])))"
 
    Range("AI31").Select
    ActiveCell.FormulaR1C1 = "=1/POWER(1+R32C81,IF(R23C90=3,RC102,RC41))"
    
    Range("AJ31").Select
    ActiveCell.FormulaR1C1 = _
        "=IF(RC34&lt;=R32C89,0,1/POWER(1+R32C81,RC100-R12C7-VLOOKUP(R32C89,R31C34:R500C41,8,0)))"
    'ActiveCell.FormulaR1C1 = _
        "=IF(OR(RC34&gt;R10C7,RC34&lt;=R32C89),0,IF(R32C89&gt;0,1/POWER(1+R32C81,RC45-R12C7-VLOOKUP(R32C89,R31C34:R500C41,8,0)),1/POWER(1+R32C81,RC45-R12C7)))"
        
    Range("AK31").Select
    ActiveCell.FormulaR1C1 = "=IF(OR(RC36=0,R[-1]C36=0),0,RC35)"
    

    'TIPO DE SIMULADOR
    
    Range("AL29").Select
    ActiveCell.FormulaR1C1 = _
        "=IF(R28C48=1,RC[11],IF(R28C48=2,RC[13],IF(R28C48=3,RC[15],RC[17])))"
    Range("AM29").Select
    ActiveCell.FormulaR1C1 = _
        "=IF(R28C48=1,RC[11],IF(R28C48=2,RC[13],IF(R28C48=3,RC[15],RC[17])))"
    Range("AL29:AM29").Select
    Selection.Copy
    Range("AL31:AM31").Select
    ActiveSheet.Paste
    
    Range("AN31").Select
    ActiveCell.FormulaR1C1 = "=IF(R23C92=2,RC[61],RC[60]-R[-19]C[-33])"
    Range("AO31").Select
    ActiveCell.FormulaR1C1 = "=IF(R23C92=2,RC[61],RC[59]-R12C7)"
    
    Range("AP29").Select
    ActiveCell.FormulaR1C1 = "=IF(R28C48=1,"""",DATE(R[2]C[-3],R[2]C[-4],1)-1)"
    Range("AP31").Select
    ActiveCell.FormulaR1C1 = "=IF(R28C48=1,"""",DATE(R[1]C[-3],R[1]C[-4],1)-1)"
    
    
     '' Application.CutCopyMode = False
    ''ActiveCell.FormulaR1C1 = _
     ''   "=IF(AND(R23C90=3,R10C15&gt;=RC34),R12C7,IF(R28C48=1,R31C49,IF(R23C92=1,DATE(RC[-4],RC[-5],R14C7),IF(R28C48=2,R12C7+30,IF(R28C48=3,R12C7+60,R12C7+90)))))"
    ''Range("AS31").Select
    ''ActiveCell.FormulaR1C1 = _
    ''    "=IF(AND(R23C90=3,R10C15&gt;=RC34),R12C7,IF(AND(DAY(RC43)=27,WEEKDAY(RC43)=1),RC43-2,IF(AND(DAY(RC43)=27,WEEKDAY(RC43)=7),RC43-1,IF(AND(DAY(RC43)=26,WEEKDAY(RC43)=1),RC43-2,IF(AND(DAY(RC43)=26,WEEKDAY(RC43)=7),RC43-1,IF(DAY(RC44)=15,RC44+2,IF(DAY(RC44)=16,RC44+1,RC44)))))))"
    ''Range("AS32").Select
    

    
    
    '''''''''''''''''''''''''''''CALCULO DE FECHAS COREGIDAS'''''''''''''''''''''''''''''''''''
    
    Range("AQ31").Select
    ActiveCell.FormulaR1C1 = _
        "=IF(AND(R23C90=3,R10C15&gt;=RC34),R12C7,IF(AND(R23C90=3,R23C92=2),RC[-10],IF(R28C48=1,R31C49,IF(R23C92=1,DATE(RC[-4],RC[-5],R14C7),IF(R28C48=2,R12C7+30,IF(R28C48=3,R12C7+60,R12C7+90))))))"
        ''"=IF(R28C48=1,RC49,IF(R23C92=1,DATE(RC[-4],RC[-5],R14C7),IF(R28C48=2,R12C7+30,IF(R28C48=3,R12C7+60,R12C7+90))))"
       
    Range("AR31").Select
    'ActiveCell.FormulaR1C1 = _
        '"=RC43+IF(OR(WEEKDAY(RC43)=1,ISERROR(VLOOKUP(RC43,Factores!C1,1,0))=FALSE),1,IF(WEEKDAY(RC43)=7,2,0))"
   ActiveCell.FormulaR1C1 = _
        "=RC43+IF(AND(DAY(RC43)=27,MONTH(RC43)=7),3,IF(AND(WEEKDAY(RC43)=5,ISERROR(VLOOKUP(RC43+1,Factores!C1,1,0))=FALSE),4,IF(OR(WEEKDAY(RC43)=1,ISERROR(VLOOKUP(RC43,Factores!C1,1,0))=FALSE),1,IF(WEEKDAY(RC43)=7,2,0))))"
    
    Range("AS31").Select
    ActiveCell.FormulaR1C1 = _
          "=IF(AND(R23C90=3,R10C15&gt;=RC34),R12C7,IF(AND(DAY(RC43)=27,WEEKDAY(RC43)=1),RC43-2,IF(AND(DAY(RC43)=27,WEEKDAY(RC43)=7),RC43-1,IF(AND(DAY(RC43)=26,WEEKDAY(RC43)=1),RC43-2,IF(AND(DAY(RC43)=26,WEEKDAY(RC43)=7),RC43-1,IF(DAY(RC44)=15,RC44+2,IF(DAY(RC44)=16,RC44+1,RC44)))))))"
        ''"=IF(AND(DAY(RC43)=27,WEEKDAY(RC43)=1),RC43-2,IF(AND(DAY(RC43)=27,WEEKDAY(RC43)=7),RC43-1,IF(AND(DAY(RC43)=26,WEEKDAY(RC43)=1),RC43-2,IF(AND(DAY(RC43)=26,WEEKDAY(RC43)=7),RC43-1,IF(DAY(RC44)=15,RC44+2,IF(DAY(RC44)=16,RC44+1,RC44))))))"
    Range("AT29").Select
    ActiveCell.FormulaR1C1 = "=SUM(R[1]C:R[300]C)"
    Range("AT31").Select
    ActiveCell.FormulaR1C1 = "=RC[-30]/POWER(1+R26C46,RC[-5])"
    
    If PLAZO = 1 Then
    
        Range("F31").Select
        ActiveCell.FormulaR1C1 = "1"
        
        Range("AS31").Select
        Selection.Copy
        ActiveCell.Offset(0, -38).Range("A1").Select
        Selection.PasteSpecial Paste:=xlPasteValues
        
        Range("AP550").Select
        Selection.End(xlUp).Select
        Selection.ClearContents
    
    Else
    
            Range("H32:J32").Select
            ActiveCell.FormulaR1C1 = "=R[-1]C-RC[3]"
            
            Range("K32").Select
            ActiveCell.FormulaR1C1 = _
                    "=IF(R23C90&gt;1,IF(OR(RC6&lt;=R32C89,(RC16-RC12)&lt;0),0,IF(RC6=R10C7,R[-1]C8,RC16-RC12)),RC16-RC12)"
            
            Range("L32:N32").Select
            ActiveCell.FormulaR1C1 = _
                "=IF(AND(R23C90=3,RC6&lt;=R32C89),0,IF(AND(R23C90=3,RC6=R32C89+1),ROUND(R[-1]C[-4]*(POWER(1+R32C81,RC41)-1),2),ROUND(R[-1]C[-4]*(POWER(1+R32C81,RC40)-1),2)))"
            Range("P32:P32").Select
            ActiveCell.FormulaR1C1 = "=R[-1]C"
                
            Range("Q32").Select
            ActiveCell.FormulaR1C1 = _
                "=TRUNC((((RC16)/(1-R14C13))-(RC16)),1)+(IF(MOD((((RC16)/(1-R14C13))-(RC16))*100, 10)&gt;=5, 5, 0)/100)"
            Range("R32:S32").Select
            ActiveCell.FormulaR1C1 = "=RC[-1]+RC[-2]"
            
            Range("AI32").Select
            ActiveCell.FormulaR1C1 = "=1/POWER(1+R32C81,IF(R23C90=3,RC102,RC41))"
            
            'Range("AJ31").Select
            'Selection.AutoFill Destination:=Range("AJ31:AJ32")
            'Range("AJ32").Select
            'ActiveCell.FormulaR1C1 = _
                "=IF(OR(RC34&gt;R10C7,RC34&lt;=R32C89),0,IF(R32C89&gt;0,1/POWER(1+R32C81,RC45-R33C89),1/POWER(1+R32C81,RC45-R12C7)))"
            
            Range("AJ31:AM31").Select
            Selection.AutoFill Destination:=Range("AJ31:AM32")

            Range("AN32").Select
            ActiveCell.FormulaR1C1 = "=RC[60]-R[-1]C[60]"
            
            Range("AQ32").Select
            ActiveCell.FormulaR1C1 = _
                    "=IF(AND(R23C90=3,R10C15&gt;=RC34),R12C7,IF(AND(R23C90=3,R23C92=2),RC[-10],IF(R28C48=1,RC49,IF(R23C92=1,DATE(RC[-4],RC[-5],R14C7),IF(R28C48=2,R[-1]C[2]+30,IF(R28C48=3,R[-1]C[2]+60,R[-1]C[2]+90))))))"
            
            Range("AO31:AP31").Select
            Selection.AutoFill Destination:=Range("AO31:AP32")
            
            Range("AS32").Select
            ActiveCell.FormulaR1C1 = _
                   "=IF(AND(R23C90=3,R10C15&gt;=RC34),R12C7,IF(AND(DAY(RC43)=27,WEEKDAY(RC43)=7),RC43-1,IF(AND(DAY(RC43)=26,WEEKDAY(RC43)=1),RC43-2,IF(AND(DAY(RC43)=26,WEEKDAY(RC43)=7),RC43-1,RC44))))"
            Range("AR31").Select
            Selection.AutoFill Destination:=Range("AR31:AR32")
     
            Range("AT31").Select
            Selection.AutoFill Destination:=Range("AT31:AT32")
            
        If PLAZO = 2 Then
        
           Range("F31").Select
           ActiveCell.FormulaR1C1 = "1"
           Range("F32").Select
           ActiveCell.FormulaR1C1 = "=R[-1]C+1"
           
           ''''NUEVA FECHA CORREGIDA
           
           Range("AS31").Select
       Selection.End(xlDown).Select
       TTT = ActiveCell.Row
       Range("AU31").Select
       ActiveCell.FormulaR1C1 = "=IF(WEEKDAY(RC45)=7,RC45+2,IF(WEEKDAY(RC45)=1,RC45+1,IF(DAY(RC45)=30,RC45+1,RC45)))"
       
       Range("AU32").Select
       ActiveCell.FormulaR1C1 = "=IF(WEEKDAY(RC45)=7,RC45+2,IF(WEEKDAY(RC45)=1,RC45+1,RC45))"
       
   
       Range("AU31").Select
       Range(Selection, Selection.End(xlDown)).Select
       Selection.Copy
       Range("AS31").Select
       Selection.PasteSpecial Paste:=xlPasteValues, Operation:=xlNone, SkipBlanks _
        :=False, Transpose:=False
        
        Range("AU31", "AU" &amp; TTT).Select
        Selection.ClearContents
        
        Range("CO33:CV33").Select
        Selection.AutoFill Destination:=Range("CO32", "CV" &amp; TTT + 1), Type:=xlFillDefault
        
    '''''''''''''''-----
    Range("AG31").Select
    
    ActiveCell.FormulaR1C1 = "=R12C7+30"
    Range("AG32").Select
    ActiveCell.FormulaR1C1 = "=R[-1]C+30"
    Range("AG32").Select
    Selection.AutoFill Destination:=Range("AG32", "AG" &amp; TTT + 1), Type:=xlFillDefault
    Range("AG32", "AG" &amp; TTT).Select
    '''''''''''''''''''
           
           Range("AS31:AS32").Select
           Selection.Copy
           ActiveCell.Offset(0, -38).Range("A1").Select
           Selection.PasteSpecial Paste:=xlPasteValues
           
           Range("AP550").Select
           Selection.End(xlUp).Select
           Selection.ClearContents
        
        Else
        Range("H32:S32").Select
        Selection.Copy
        
        Range("H33", "S" &amp; 32 + PLAZO - 2).Select
        ActiveSheet.Paste
        
        Range("AI32:AT32").Select
        Selection.AutoFill Destination:=Range("AI32", "AT" &amp; 32 + PLAZO - 2)
        
        '''''''''''''''''''''''NUEVA CORRECION FECHAS' ' ''''''''''''''''
            
    Range("AS31").Select
    Selection.End(xlDown).Select
    TTT = ActiveCell.Row
    Range("AG31").Select
    
    ActiveCell.FormulaR1C1 = "=R12C7+30"
    Range("AG32").Select
    ActiveCell.FormulaR1C1 = "=R[-1]C+30"
    Range("AG32").Select
    Selection.AutoFill Destination:=Range("AG32", "AG" &amp; TTT), Type:=xlFillDefault
    Range("AG32", "AG" &amp; TTT).Select
    '''''''''''''''''''
    Range("CO32:CV32").Select
    Selection.AutoFill Destination:=Range("CO32", "CV" &amp; TTT + 1), Type:=xlFillDefault
    
    '''''''''''''''''''
        
       Range("AS31").Select
       Selection.End(xlDown).Select
       TTT = ActiveCell.Row
       Range("AU31").Select
       ActiveCell.FormulaR1C1 = "=IF(WEEKDAY(RC45)=7,RC45+2,IF(WEEKDAY(RC45)=1,RC45+1,IF(DAY(RC45)=30,RC45+1,RC45)))"
       
       Range("AU32").Select
       ActiveCell.FormulaR1C1 = "=IF(WEEKDAY(RC45)=7,RC45+2,IF(WEEKDAY(RC45)=1,RC45+1,RC45))"
       Selection.AutoFill Destination:=Range("AU32", "AU" &amp; TTT)
   
       Range("AU31").Select
       Range(Selection, Selection.End(xlDown)).Select
       Selection.Copy
       Range("AS31").Select
       Selection.PasteSpecial Paste:=xlPasteValues, Operation:=xlNone, SkipBlanks _
        :=False, Transpose:=False
        
        Range("AU31", "AU" &amp; TTT).Select
        Selection.ClearContents
        
        ''''''''''''''''''''''''
      
        Range("CV31", "CV" &amp; 32 + PLAZO - 2).Select
        Selection.Copy
        Range("G31").PasteSpecial Paste:=xlPasteValues
        
        Range("F31").Select
        ActiveCell.FormulaR1C1 = "1"
        Range("F32").Select
        ActiveCell.FormulaR1C1 = "=R[-1]C+1"
        Range("F32").Select
        Selection.AutoFill Destination:=Range("F32", "F" &amp; 32 + PLAZO - 2)
        
        Range("AP550").Select
        Selection.End(xlUp).Select
        Selection.ClearContents
        
        Range("F28").Select

        End If
    
    End If
    
    Range("H30").Select
    Selection.End(xlDown).Select
    ActiveCell.Offset(0, 1).Range("A1").Select
    ActiveCell.FormulaR1C1 = "=R[-1]C[-3]"
    ActiveCell.Offset(0, 5).Range("A1").Select
    ActiveCell.FormulaR1C1 = "=RC[-5]+RC[-4]+RC[-1]"
    
    Range("AT27").Select
    ActiveCell.GoalSeek Goal:=0, ChangingCell:=ActiveCell.Offset(-1, 0).Range( _
        "A1")
        
    Range("F30", "S" &amp; 32 + PLAZO - 2).Select
    With Selection.Borders(xlEdgeLeft)
        .LineStyle = xlContinuous
        .Weight = xlThin
        .ColorIndex = xlAutomatic
    End With
    With Selection.Borders(xlEdgeRight)
        .LineStyle = xlContinuous
        .Weight = xlThin
        .ColorIndex = xlAutomatic
    End With
    With Selection.Borders(xlInsideVertical)
        .LineStyle = xlContinuous
        .Weight = xlThin
        .ColorIndex = xlAutomatic
    End With
    
    'TOTAL
    
    If PLAZO = 1 Then
    
    Range("F31").Select
    
    Else

    Range("F31").Select
    Selection.End(xlDown).Select
    
    End If
    
    ActiveCell.Offset(0, 0).Range("A1:N1").Select
    With Selection.Borders(xlEdgeBottom)
        .LineStyle = xlContinuous
        .Weight = xlThin
        .ColorIndex = xlAutomatic
    End With
    
    ActiveCell.Offset(1, 0).Rows("1:1").EntireRow.RowHeight = 4.5
    ActiveCell.Offset(2, 0).Range("A1:N1").Select
    
    With Selection.Borders(xlEdgeLeft)
        .LineStyle = xlContinuous
        .Weight = xlThin
        .ColorIndex = xlAutomatic
    End With
    With Selection.Borders(xlEdgeRight)
        .LineStyle = xlContinuous
        .Weight = xlThin
        .ColorIndex = xlAutomatic
    End With
    With Selection.Borders(xlEdgeTop)
        .LineStyle = xlContinuous
        .Weight = xlThin
        .ColorIndex = xlAutomatic
    End With
    With Selection.Borders(xlEdgeBottom)
        .LineStyle = xlContinuous
        .Weight = xlThin
        .ColorIndex = xlAutomatic
    End With
    With Selection.Borders(xlInsideVertical)
        .LineStyle = xlContinuous
        .Weight = xlThin
        .ColorIndex = xlAutomatic
    End With

    ActiveCell.Offset(0, 5).Range("A1").Select
    ActiveCell.FormulaR1C1 = "=SUM(R31C:R[-2]C)"
    ActiveCell.Offset(0, 1).Range("A1:C1").Select
    ActiveCell.FormulaR1C1 = "=SUM(R31C:R[-2]C[2])"
    ActiveCell.Offset(0, 2).Range("A1:a1").Select
    ActiveCell.FormulaR1C1 = "=SUM(R31C:R[-2]C[0])"
    ActiveCell.Offset(0, 3).Range("A1").Select
    ActiveCell.FormulaR1C1 = "=SUM(R31C:R[-2]C[1])"
    
    ActiveCell.Offset(0, -12).Range("A1:N1").Select
    Selection.Font.Bold = True
    
'--otro metodo de PG Absoluta
'___________________________________________
    
    TIPO = Range("CL23").Value
    
    N_CUO = Range("CK32").Value
    
    If TIPO = 3 Then
    
        If N_CUO = 1 Then
           
        Range("H31:J31").Select
        ActiveCell.FormulaR1C1 = "=R[-1]C*POWER(1+R32C81,RC[-1]-R12C7)"
        
        Else
        
            If N_CUO = 2 Then
               
            Range("H31:J31").Select
            ActiveCell.FormulaR1C1 = "=R[-1]C*POWER(1+R32C81,RC[-1]-R12C7)"
            Range("H32:J32").Select
            ActiveCell.FormulaR1C1 = "=R[-1]C*POWER(1+R32C81,RC[-1]-R[-1]C[-1])"
        
            Else
            
            Range("H31:J31").Select
            ActiveCell.FormulaR1C1 = "=R[-1]C*POWER(1+R32C81,RC[-1]-R12C7)"
            Range("H32:J32").Select
            ActiveCell.FormulaR1C1 = "=R[-1]C*POWER(1+R32C81,RC[-1]-R[-1]C[-1])"
            Selection.Copy
            Range("H33", "J" &amp; 33 + N_CUO - 2).Select
            
            End If
        End If
    End If
    
'___________________________________________
    
    'SIN FORMULAS
    Range("K31", "N" &amp; 31 + PLAZO - 1).Select
    Selection.Copy
    Selection.PasteSpecial Paste:=xlPasteValues
    
    Range("P31:P31").Select
    ActiveCell.FormulaR1C1 = "=RC[-5]+RC[-4]+RC[-1]"
    If PLAZO = 2 Then
    Selection.AutoFill Destination:=Range("P31", "P" &amp; 31 + PLAZO - 1)
    Else
    Selection.AutoFill Destination:=Range("P31", "P" &amp; 31 + PLAZO - 2)
    End If
  '  Range("Q31", "Q" &amp; 31 + PLAZO - 1).Select
  '  Selection.Copy
  '  Selection.PasteSpecial Paste:=xlPasteValues
    
    Range("AT26").Select
    ActiveCell = 0
    Range("AT27").Select
    Range("AT27").GoalSeek Goal:=0, ChangingCell:=Range("AT26")
    
    '---
    'Range("G16").Select
    'Selection.Copy
    'Selection.PasteSpecial Paste:=xlPasteValues
    'Range("G18").Select
    'Selection.Copy
    'Selection.PasteSpecial Paste:=xlPasteValues
    'Range("M17").Select
    'Selection.Copy
    'Selection.PasteSpecial Paste:=xlPasteValues
    'Range("O14").Select
    'Selection.Copy
    'Selection.PasteSpecial Paste:=xlPasteValues
    'Range("Q19").Select
    'Selection.Copy
    'Selection.PasteSpecial Paste:=xlPasteValues
    'Range("V17:V19").Select
    'Selection.Copy
    'Selection.PasteSpecial Paste:=xlPasteValues
    '---
 
    'Sheets("Factores").Visible = xlVeryHidden
    ''Sheets("Factores").Visible = True
    Range("F28").Select
    
    '----
    fin = Range("f" &amp; Rows.Count).End(xlUp).Row
    If Range("o20") &lt;&gt; "" And Range("o8") = "Sin Gracia" Then
    cocientex = Range("o20") * Range("m21")
    Range("o31:o" &amp; fin) = cocientex
    Range("o" &amp; fin + 2).Formula = "=sum(o31:o" &amp; fin &amp; ")"
    End If
    
     If Range("o20") &lt;&gt; "" And Range("o8") = "Gracia Absoluta" Then
    cocientex = Range("o20") * Range("m21")
    Range("o31:o" &amp; fin) = "=if(and(L31&lt;&gt;0,O30=0),F31*" &amp; cocientex &amp; ",if(and(L31&lt;&gt;0,L30&lt;&gt;0)," &amp; cocientex &amp; ",0))"
    Range("o" &amp; fin + 2).Formula = "=sum(o31:o" &amp; fin &amp; ")"
    End If
    
     If Range("o20") &lt;&gt; "" And Range("o8") = "Gracia Relativa" Then
    cocientex = Range("o20") * Range("m21")
    Range("o31:o" &amp; fin) = "=if(and(L31&lt;&gt;0,O30=0),F31*" &amp; cocientex &amp; ",if(and(L31&lt;&gt;0,L30&lt;&gt;0)," &amp; cocientex &amp; ",0))"
    Range("o" &amp; fin + 2).Formula = "=sum(o31:o" &amp; fin &amp; ")"
    End If
    
    
    
    '----
    
    Hoja1.Protect ("Acuario16")
    
End Sub



</script:module>
</file>

<file path=Basic/VBAProject/Módulo2.xml><?xml version="1.0" encoding="utf-8"?>
<!DOCTYPE module  PUBLIC '-//OpenOffice.org//DTD OfficeDocument 1.0//EN'  'module.dtd'>
<script:module xmlns:script="http://openoffice.org/2000/script" script:name="Módulo2" script:language="StarBasic" script:moduleType="normal">Rem Attribute VBA_ModuleType=VBAModule
Option VBASupport 1

</script:module>
</file>

<file path=Basic/VBAProject/Módulo3.xml><?xml version="1.0" encoding="utf-8"?>
<!DOCTYPE module  PUBLIC '-//OpenOffice.org//DTD OfficeDocument 1.0//EN'  'module.dtd'>
<script:module xmlns:script="http://openoffice.org/2000/script" script:name="Módulo3" script:language="StarBasic" script:moduleType="normal">Rem Attribute VBA_ModuleType=VBAModule
Option VBASupport 1

</script:module>
</file>

<file path=Basic/VBAProject/Módulo4.xml><?xml version="1.0" encoding="utf-8"?>
<!DOCTYPE module  PUBLIC '-//OpenOffice.org//DTD OfficeDocument 1.0//EN'  'module.dtd'>
<script:module xmlns:script="http://openoffice.org/2000/script" script:name="Módulo4" script:language="StarBasic" script:moduleType="normal">Rem Attribute VBA_ModuleType=VBAModule
Option VBASupport 1

</script:module>
</file>

<file path=Basic/VBAProject/Módulo5.xml><?xml version="1.0" encoding="utf-8"?>
<!DOCTYPE module  PUBLIC '-//OpenOffice.org//DTD OfficeDocument 1.0//EN'  'module.dtd'>
<script:module xmlns:script="http://openoffice.org/2000/script" script:name="Módulo5" script:language="StarBasic" script:moduleType="normal">Rem Attribute VBA_ModuleType=VBAModule
Option VBASupport 1

</script:module>
</file>

<file path=Basic/VBAProject/Módulo6.xml><?xml version="1.0" encoding="utf-8"?>
<!DOCTYPE module  PUBLIC '-//OpenOffice.org//DTD OfficeDocument 1.0//EN'  'module.dtd'>
<script:module xmlns:script="http://openoffice.org/2000/script" script:name="Módulo6" script:language="StarBasic" script:moduleType="normal">Rem Attribute VBA_ModuleType=VBAModule
Option VBASupport 1

</script:module>
</file>

<file path=Basic/VBAProject/Módulo7.xml><?xml version="1.0" encoding="utf-8"?>
<!DOCTYPE module  PUBLIC '-//OpenOffice.org//DTD OfficeDocument 1.0//EN'  'module.dtd'>
<script:module xmlns:script="http://openoffice.org/2000/script" script:name="Módulo7" script:language="StarBasic" script:moduleType="normal">Rem Attribute VBA_ModuleType=VBAModule
Option VBASupport 1
Sub Casilladeverificación797_Haga_clic_en()
If Range("CF20") = 0 And Range("G10") &gt; 120 Then
MsgBox "Cambiar plazo, plazos mayores a 120 solo permitidos a cred. Hipotecarios", vbExclamation, "Aviso Importante"
End If
End Sub

</script:module>
</file>

<file path=Basic/VBAProject/Módulo8.xml><?xml version="1.0" encoding="utf-8"?>
<!DOCTYPE module  PUBLIC '-//OpenOffice.org//DTD OfficeDocument 1.0//EN'  'module.dtd'>
<script:module xmlns:script="http://openoffice.org/2000/script" script:name="Módulo8" script:language="StarBasic" script:moduleType="normal">Rem Attribute VBA_ModuleType=VBAModule
Option VBASupport 1
Sub MULTI_RIESGO()
Hoja1.Unprotect ("Acuario16")
Range("M20").Select
    With Selection.Validation
        .Delete
        .Add Type:=xlValidateList, AlertStyle:=xlValidAlertStop, Operator:= _
        xlBetween, Formula1:="=TABLA!$A$2:$A$4"
        .IgnoreBlank = True
        .InCellDropdown = True
        .InputTitle = ""
        .ErrorTitle = ""
        .InputMessage = ""
        .ErrorMessage = ""
        .ShowInput = True
        .ShowError = True
    End With
Range("M21").Formula = "=iferror(VLOOKUP(M20,TABLA!A:B,2,),"""")"
Range("O20").Interior.Color = RGB(255, 255, 153)
    Range("O20").Select
    Range("O21") = ChrW(&amp;H2191) &amp; "Ingrese Valor a Asegurar "
    
    Range("m20").Interior.Color = RGB(255, 255, 0)

Range("m20").Activate

Hoja1.Protect ("Acuario16")


End Sub
Sub no_multi()
Hoja1.Unprotect ("Acuario16")
    Range("m18:o18").Copy
    Range("M20:O21").Select
    ActiveSheet.Paste
    Application.CutCopyMode = False
Hoja1.Protect ("Acuario16")
End Sub

</script:module>
</file>

<file path=Basic/VBAProject/Módulo9.xml><?xml version="1.0" encoding="utf-8"?>
<!DOCTYPE module  PUBLIC '-//OpenOffice.org//DTD OfficeDocument 1.0//EN'  'module.dtd'>
<script:module xmlns:script="http://openoffice.org/2000/script" script:name="Módulo9" script:language="StarBasic" script:moduleType="normal">Rem Attribute VBA_ModuleType=VBAModule
Option VBASupport 1
Sub Macro2()
'
' Macro2 Macro
'

'
    Range("O20").Select
    Range("O20").AddComment
    Range("O20").Comment.Visible = False
    Range("O20").Comment.Text Text:="ingrese valor a asegurar" &amp; Chr(10) &amp; ""
    Range("Q26").Select
End Sub
Sub Macro3()
'
' Macro3 Macro
'

'
Range("O21") = "Ingrese Valor a Asegurar " &amp; ChrW(&amp;H2191)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Private Sub Workbook_open()

    On Error Resume Next
    Application.CommandBars("EuroValue").Visible = False

    Application.Caption = "MIBANCO, Banco de la Microempresa"
    Application.StatusBar = "Seguimiento y Gestion de Informacion - Division de Negocios"
   
    With ActiveWindow
        .DisplayHeadings = False 'encabezados
        .DisplayHorizontalScrollBar = False 'barras
        .DisplayWorkbookTabs = False 'hojas
        .Zoom = 95
        .ScrollRow = 1
        .ScrollColumn = 1
    End With
    Range("G6").Select
    
End Sub

Private Sub Workbook_Activate()

    Application.Caption = "MIBANCO, Banco de la Microempresa"
    Application.StatusBar = "Seguimiento y Gestion de Informacion - Division de Negocios"

    
End Sub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Hoja2"/>
  <library:element library:name="Hoja3"/>
  <library:element library:name="Módulo1"/>
  <library:element library:name="Módulo2"/>
  <library:element library:name="Módulo3"/>
  <library:element library:name="Módulo4"/>
  <library:element library:name="Módulo5"/>
  <library:element library:name="Módulo6"/>
  <library:element library:name="Módulo7"/>
  <library:element library:name="Módulo8"/>
  <library:element library:name="Módulo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