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Calibri" svg:font-family="Calibri" style:font-family-generic="swiss"/>
    <style:font-face style:name="Geneva" svg:font-family="Geneva" style:font-family-generic="swiss"/>
    <style:font-face style:name="Geneva1" svg:font-family="Geneva"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svg:font-family="Times" style:font-family-generic="roman"/>
    <style:font-face style:name="Times New Roman" svg:font-family="'Times New Roman'" style:font-family-generic="roman"/>
  </office:font-face-decls>
  <office:automatic-styles>
    <style:style style:name="co1" style:family="table-column">
      <style:table-column-properties fo:break-before="auto" style:column-width="5.23cm"/>
    </style:style>
    <style:style style:name="co2" style:family="table-column">
      <style:table-column-properties fo:break-before="auto" style:column-width="16.614cm"/>
    </style:style>
    <style:style style:name="co3" style:family="table-column">
      <style:table-column-properties fo:break-before="auto" style:column-width="2.265cm"/>
    </style:style>
    <style:style style:name="co4" style:family="table-column">
      <style:table-column-properties fo:break-before="auto" style:column-width="3.048cm"/>
    </style:style>
    <style:style style:name="co5" style:family="table-column">
      <style:table-column-properties fo:break-before="auto" style:column-width="4.56cm"/>
    </style:style>
    <style:style style:name="co6" style:family="table-column">
      <style:table-column-properties fo:break-before="auto" style:column-width="3.776cm"/>
    </style:style>
    <style:style style:name="co7" style:family="table-column">
      <style:table-column-properties fo:break-before="auto" style:column-width="3.189cm"/>
    </style:style>
    <style:style style:name="co8" style:family="table-column">
      <style:table-column-properties fo:break-before="auto" style:column-width="4.055cm"/>
    </style:style>
    <style:style style:name="co9" style:family="table-column">
      <style:table-column-properties fo:break-before="auto" style:column-width="3.664cm"/>
    </style:style>
    <style:style style:name="co10" style:family="table-column">
      <style:table-column-properties fo:break-before="auto" style:column-width="2.88cm"/>
    </style:style>
    <style:style style:name="co11" style:family="table-column">
      <style:table-column-properties fo:break-before="auto" style:column-width="3.385cm"/>
    </style:style>
    <style:style style:name="co12" style:family="table-column">
      <style:table-column-properties fo:break-before="auto" style:column-width="3.161cm"/>
    </style:style>
    <style:style style:name="co13" style:family="table-column">
      <style:table-column-properties fo:break-before="auto" style:column-width="3.411cm"/>
    </style:style>
    <style:style style:name="co14" style:family="table-column">
      <style:table-column-properties fo:break-before="auto" style:column-width="3.692cm"/>
    </style:style>
    <style:style style:name="co15" style:family="table-column">
      <style:table-column-properties fo:break-before="auto" style:column-width="2.741cm"/>
    </style:style>
    <style:style style:name="co16" style:family="table-column">
      <style:table-column-properties fo:break-before="auto" style:column-width="4.503cm"/>
    </style:style>
    <style:style style:name="co17" style:family="table-column">
      <style:table-column-properties fo:break-before="auto" style:column-width="2.769cm"/>
    </style:style>
    <style:style style:name="co18" style:family="table-column">
      <style:table-column-properties fo:break-before="auto" style:column-width="2.517cm"/>
    </style:style>
    <style:style style:name="co19" style:family="table-column">
      <style:table-column-properties fo:break-before="auto" style:column-width="2.824cm"/>
    </style:style>
    <style:style style:name="co20" style:family="table-column">
      <style:table-column-properties fo:break-before="auto" style:column-width="2.097cm"/>
    </style:style>
    <style:style style:name="co21" style:family="table-column">
      <style:table-column-properties fo:break-before="auto" style:column-width="1.762cm"/>
    </style:style>
    <style:style style:name="co22" style:family="table-column">
      <style:table-column-properties fo:break-before="auto" style:column-width="2.154cm"/>
    </style:style>
    <style:style style:name="co23" style:family="table-column">
      <style:table-column-properties fo:break-before="auto" style:column-width="3.468cm"/>
    </style:style>
    <style:style style:name="co24" style:family="table-column">
      <style:table-column-properties fo:break-before="auto" style:column-width="4.671cm"/>
    </style:style>
    <style:style style:name="co25" style:family="table-column">
      <style:table-column-properties fo:break-before="auto" style:column-width="8.754cm"/>
    </style:style>
    <style:style style:name="co26" style:family="table-column">
      <style:table-column-properties fo:break-before="auto" style:column-width="2.321cm"/>
    </style:style>
    <style:style style:name="co27" style:family="table-column">
      <style:table-column-properties fo:break-before="auto" style:column-width="3.216cm"/>
    </style:style>
    <style:style style:name="ro1" style:family="table-row">
      <style:table-row-properties style:row-height="2.263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2.29cm" fo:break-before="auto" style:use-optimal-row-height="true"/>
    </style:style>
    <style:style style:name="ro4" style:family="table-row">
      <style:table-row-properties style:row-height="4.974cm" fo:break-before="auto" style:use-optimal-row-height="true"/>
    </style:style>
    <style:style style:name="ro5" style:family="table-row">
      <style:table-row-properties style:row-height="1.842cm" fo:break-before="auto" style:use-optimal-row-height="true"/>
    </style:style>
    <style:style style:name="ro6" style:family="table-row">
      <style:table-row-properties style:row-height="0.947cm" fo:break-before="auto" style:use-optimal-row-height="true"/>
    </style:style>
    <style:style style:name="ro7" style:family="table-row">
      <style:table-row-properties style:row-height="0.556cm" fo:break-before="auto" style:use-optimal-row-height="false"/>
    </style:style>
    <style:style style:name="ro8" style:family="table-row">
      <style:table-row-properties style:row-height="2.738cm" fo:break-before="auto" style:use-optimal-row-height="true"/>
    </style:style>
    <style:style style:name="ro9" style:family="table-row">
      <style:table-row-properties style:row-height="0.45cm" fo:break-before="auto" style:use-optimal-row-height="true"/>
    </style:style>
    <style:style style:name="ro10" style:family="table-row">
      <style:table-row-properties style:row-height="0.556cm" fo:break-before="auto" style:use-optimal-row-height="true"/>
    </style:style>
    <style:style style:name="ro11" style:family="table-row">
      <style:table-row-properties style:row-height="0.612cm" fo:break-before="auto" style:use-optimal-row-height="true"/>
    </style:style>
    <style:style style:name="ro12" style:family="table-row">
      <style:table-row-properties style:row-height="1.552cm" fo:break-before="auto" style:use-optimal-row-height="true"/>
    </style:style>
    <style:style style:name="ro13" style:family="table-row">
      <style:table-row-properties style:row-height="0.953cm" fo:break-before="auto" style:use-optimal-row-height="false"/>
    </style:style>
    <style:style style:name="ro14" style:family="table-row">
      <style:table-row-properties style:row-height="0.476cm" fo:break-before="auto" style:use-optimal-row-height="false"/>
    </style:style>
    <style:style style:name="ro15" style:family="table-row">
      <style:table-row-properties style:row-height="0.894cm" fo:break-before="auto" style:use-optimal-row-height="true"/>
    </style:style>
    <style:style style:name="ta1" style:family="table" style:master-page-name="PageStyle_5f_Explanations_20_and_20_FAQ">
      <style:table-properties table:display="true" style:writing-mode="lr-tb"/>
    </style:style>
    <style:style style:name="ta2" style:family="table" style:master-page-name="PageStyle_5f_Retornos_20_x_20_año">
      <style:table-properties table:display="true" style:writing-mode="lr-tb" table:tab-color="#ffff00"/>
    </style:style>
    <style:style style:name="ta3" style:family="table" style:master-page-name="PageStyle_5f_S_26_P_20_500_20__26__20_Raw_20_Data">
      <style:table-properties table:display="true" style:writing-mode="lr-tb"/>
    </style:style>
    <style:style style:name="ta4" style:family="table" style:master-page-name="PageStyle_5f_T._20_Bond_20_yield_20__26__20_return">
      <style:table-properties table:display="true" style:writing-mode="lr-tb"/>
    </style:style>
    <style:style style:name="ta5" style:family="table" style:master-page-name="PageStyle_5f_T._20_Bill_20_rates">
      <style:table-properties table:display="true" style:writing-mode="lr-tb"/>
    </style:style>
    <style:style style:name="ta6" style:family="table" style:master-page-name="PageStyle_5f_Inflation_20_Rate">
      <style:table-properties table:display="true" style:writing-mode="lr-tb"/>
    </style:style>
    <style:style style:name="ta7" style:family="table" style:master-page-name="PageStyle_5f_Summary_20_for_20_ppt">
      <style:table-properties table:display="true" style:writing-mode="lr-tb"/>
    </style:style>
    <style:style style:name="ta8" style:family="table" style:master-page-name="PageStyle_5f_Home_20_Prices_20__28_Raw_20_Data_29_">
      <style:table-properties table:display="true" style:writing-mode="lr-tb"/>
    </style:style>
    <style:style style:name="ta9" style:family="table" style:master-page-name="PageStyle_5f_Moody_27_s_20_Rates">
      <style:table-properties table:display="true" style:writing-mode="lr-tb"/>
    </style:style>
    <number:percentage-style style:name="N11">
      <number:number number:decimal-places="2" number:min-decimal-places="2" number:min-integer-digits="1"/>
      <number:text> %</number:text>
    </number:percentage-style>
    <number:date-style style:name="N36" number:automatic-order="true">
      <number:day number:style="long"/>
      <number:text>/</number:text>
      <number:month number:style="long"/>
      <number:text>/</number:text>
      <number:year number:style="long"/>
    </number:date-style>
    <number:date-style style:name="N49">
      <number:year number:style="long"/>
      <number:text>-</number:text>
      <number:month number:style="long"/>
      <number:text>-</number:text>
      <number:day number:style="long"/>
    </number:date-style>
    <style:style style:name="ce1" style:family="table-cell" style:parent-style-name="Default">
      <style:table-cell-properties style:diagonal-bl-tr="none" style:diagonal-tl-br="none" style:text-align-source="value-type" style:repeat-content="false" fo:wrap-option="no-wrap" fo:border="1.76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Geneva" fo:font-size="14pt" fo:font-style="normal" fo:text-shadow="none" style:text-underline-style="none" fo:font-weight="bold" style:font-size-asian="14pt" style:font-style-asian="normal" style:font-weight-asian="bold" style:font-name-complex="Geneva" style:font-size-complex="14pt" style:font-style-complex="normal" style:font-weight-complex="bold"/>
    </style:style>
    <style:style style:name="ce2" style:family="table-cell" style:parent-style-name="Default">
      <style:table-cell-properties style:rotation-align="none"/>
      <style:text-properties style:use-window-font-color="true" style:text-outline="false" style:text-line-through-style="none" style:text-line-through-type="none" style:font-name="Geneva" fo:font-size="12pt" fo:font-style="normal" fo:text-shadow="none" style:text-underline-style="none" fo:font-weight="normal" style:font-size-asian="12pt" style:font-style-asian="normal" style:font-weight-asian="normal" style:font-name-complex="Geneva" style:font-size-complex="12pt" style:font-style-complex="normal" style:font-weight-complex="normal"/>
    </style:style>
    <style:style style:name="ce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2pt" fo:font-style="normal" fo:text-shadow="none" style:text-underline-style="none" fo:font-weight="bold" style:font-size-asian="12pt" style:font-style-asian="normal" style:font-weight-asian="bold" style:font-name-complex="Geneva" style:font-size-complex="12pt" style:font-style-complex="normal" style:font-weight-complex="bold"/>
    </style:style>
    <style:style style:name="ce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Geneva" fo:font-size="12pt" fo:font-style="normal" fo:text-shadow="none" style:text-underline-style="none" fo:font-weight="normal" style:font-size-asian="12pt" style:font-style-asian="normal" style:font-weight-asian="normal" style:font-name-complex="Geneva" style:font-size-complex="12pt" style:font-style-complex="normal" style:font-weight-complex="normal"/>
    </style:style>
    <style:style style:name="ce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Geneva" fo:font-size="12pt" fo:font-style="normal" fo:text-shadow="none" style:text-underline-style="none" fo:font-weight="normal" style:font-size-asian="12pt" style:font-style-asian="normal" style:font-weight-asian="normal" style:font-name-complex="Geneva" style:font-size-complex="12pt" style:font-style-complex="normal" style:font-weight-complex="normal"/>
    </style:style>
    <style:style style:name="ce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ff0000" style:text-outline="false" style:text-line-through-style="none" style:text-line-through-type="none" style:font-name="Geneva" fo:font-size="12pt" fo:font-style="normal" fo:text-shadow="none" style:text-underline-style="none" fo:font-weight="normal" style:font-size-asian="12pt" style:font-style-asian="normal" style:font-weight-asian="normal" style:font-name-complex="Geneva" style:font-size-complex="12pt" style:font-style-complex="normal" style:font-weight-complex="normal"/>
    </style:style>
    <style:style style:name="ce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Geneva" fo:font-size="12pt" fo:font-style="normal" fo:text-shadow="none" style:text-underline-style="none" fo:font-weight="normal" style:font-size-asian="12pt" style:font-style-asian="normal" style:font-weight-asian="normal" style:font-name-complex="Geneva" style:font-size-complex="12pt" style:font-style-complex="normal" style:font-weight-complex="normal"/>
    </style:style>
    <style:style style:name="ce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ff0000" style:text-outline="false" style:text-line-through-style="none" style:text-line-through-type="none" style:font-name="Geneva" fo:font-size="12pt" fo:font-style="normal" fo:text-shadow="none" style:text-underline-style="none" fo:font-weight="normal" style:font-size-asian="12pt" style:font-style-asian="normal" style:font-weight-asian="normal" style:font-name-complex="Geneva" style:font-size-complex="12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wrap" fo:border="1.76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Geneva" fo:font-size="14pt" fo:font-style="normal" fo:text-shadow="none" style:text-underline-style="none" fo:font-weight="normal" style:font-size-asian="14pt" style:font-style-asian="normal" style:font-weight-asian="normal" style:font-name-complex="Geneva" style:font-size-complex="14pt" style:font-style-complex="normal" style:font-weight-complex="normal"/>
    </style:style>
    <style:style style:name="ce1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Geneva" fo:font-size="12pt" fo:font-style="normal" fo:text-shadow="none" style:text-underline-style="none" fo:font-weight="normal" style:font-size-asian="12pt" style:font-style-asian="normal" style:font-weight-asian="normal" style:font-name-complex="Geneva" style:font-size-complex="12pt" style:font-style-complex="normal" style:font-weight-complex="normal"/>
    </style:style>
    <style:style style:name="ce12"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Geneva" fo:font-size="12pt" fo:font-style="normal" fo:text-shadow="none" style:text-underline-style="none" fo:font-weight="normal" style:font-size-asian="12pt" style:font-style-asian="normal" style:font-weight-asian="normal" style:font-name-complex="Geneva" style:font-size-complex="12pt" style:font-style-complex="normal" style:font-weight-complex="normal"/>
    </style:style>
    <style:style style:name="ce1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Geneva" fo:font-size="12pt" fo:font-style="normal" fo:text-shadow="none" style:text-underline-style="none" fo:font-weight="normal" style:font-size-asian="12pt" style:font-style-asian="normal" style:font-weight-asian="normal" style:font-name-complex="Geneva" style:font-size-complex="12pt" style:font-style-complex="normal" style:font-weight-complex="normal"/>
    </style:style>
    <style:style style:name="ce14" style:family="table-cell" style:parent-style-name="Default">
      <style:table-cell-properties fo:border-bottom="0.74pt solid #000000" fo:background-color="#eeece1" style:diagonal-bl-tr="none" style:diagonal-tl-br="none" fo:border-left="1.76pt solid #000000" fo:border-right="0.74pt solid #000000" style:rotation-align="none" fo:border-top="1.76pt solid #000000">
        <loext:background-complex-color loext:theme-type="light2" loext:color-type="theme"/>
      </style:table-cell-properties>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fo:border-bottom="0.74pt solid #000000" fo:background-color="#eeece1" style:diagonal-bl-tr="none" style:diagonal-tl-br="none" fo:border-left="1.76pt solid #000000" fo:border-right="0.74pt solid #000000" style:rotation-align="none" fo:border-top="none">
        <loext:background-complex-color loext:theme-type="light2" loext:color-type="theme"/>
      </style:table-cell-properties>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fo:border-bottom="1.76pt solid #000000" fo:background-color="#eeece1" style:diagonal-bl-tr="none" style:diagonal-tl-br="none" fo:border-left="1.76pt solid #000000" fo:border-right="0.74pt solid #000000" style:rotation-align="none" fo:border-top="none">
        <loext:background-complex-color loext:theme-type="light2" loext:color-type="theme"/>
      </style:table-cell-properties>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table-cell-properties style:rotation-align="none"/>
      <style:text-properties fo:color="#dd0806" style:text-outline="false" style:text-line-through-style="none" style:text-line-through-type="none" style:font-name="Times"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8" style:family="table-cell" style:parent-style-name="Default">
      <style:table-cell-properties style:rotation-align="none"/>
      <style:text-properties style:use-window-font-color="true" style:text-outline="false" style:text-line-through-style="none" style:text-line-through-typ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2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fo:background-color="#92d05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27" style:family="table-cell" style:parent-style-name="Default">
      <style:table-cell-properties fo:border-bottom="none" fo:background-color="#ffffff"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8"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9"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0"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1" style:family="table-cell" style:parent-style-name="Default">
      <style:table-cell-properties fo:background-color="#ffffff" style:diagonal-bl-tr="none" style:diagonal-tl-br="none" fo:border="none" style:rotation-align="none">
        <loext:background-complex-color loext:theme-type="light1" loext:color-type="theme"/>
      </style:table-cell-properties>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2"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3"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4" style:family="table-cell" style:parent-style-name="Default" style:data-style-name="N118">
      <style:table-cell-properties fo:border-bottom="0.74pt solid #000000" fo:background-color="#eeece1"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loext:background-complex-color loext:theme-type="light2" loext:color-type="theme"/>
      </style:table-cell-properties>
      <style:paragraph-properties fo:text-align="start" css3t:text-justify="auto" fo:margin-left="0cm" style:writing-mode="pag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35" style:family="table-cell" style:parent-style-name="Excel_20_Built-in_20_Hyperlink" style:data-style-name="N0">
      <style:table-cell-properties fo:border-bottom="0.74pt solid #000000" fo:background-color="#eeece1"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loext:background-complex-color loext:theme-type="light2" loext:color-type="theme"/>
      </style:table-cell-properties>
      <style:paragraph-properties fo:text-align="start" css3t:text-justify="auto" fo:margin-left="0cm" style:writing-mode="page"/>
      <style:text-properties fo:color="#0000d4" style:text-outline="false" style:text-line-through-style="none" style:text-line-through-type="none" style:font-name="Geneva" fo:font-size="10pt" fo:font-style="normal" fo:text-shadow="none" style:text-underline-style="solid" style:text-underline-width="auto" style:text-underline-color="font-color" fo:font-weight="normal" style:font-size-asian="10pt" style:font-style-asian="normal" style:font-weight-asian="normal" style:font-name-complex="Geneva" style:font-size-complex="10pt" style:font-style-complex="normal" style:font-weight-complex="normal"/>
    </style:style>
    <style:style style:name="ce36" style:family="table-cell" style:parent-style-name="Default">
      <style:table-cell-properties fo:background-color="#eeece1"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2"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 style:family="table-cell" style:parent-style-name="Excel_20_Built-in_20_Hyperlink" style:data-style-name="N118">
      <style:table-cell-properties fo:border-bottom="0.74pt solid #000000" fo:background-color="#eeece1"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loext:background-complex-color loext:theme-type="light2" loext:color-type="theme"/>
      </style:table-cell-properties>
      <style:paragraph-properties fo:text-align="start" css3t:text-justify="auto" fo:margin-left="0cm" style:writing-mode="page"/>
      <style:text-properties fo:color="#0000d4" style:text-outline="false" style:text-line-through-style="none" style:text-line-through-type="none" style:font-name="Geneva" fo:font-size="10pt" fo:font-style="normal" fo:text-shadow="none" style:text-underline-style="solid" style:text-underline-width="auto" style:text-underline-color="font-color" fo:font-weight="normal" style:font-size-asian="10pt" style:font-style-asian="normal" style:font-weight-asian="normal" style:font-name-complex="Geneva" style:font-size-complex="10pt" style:font-style-complex="normal" style:font-weight-complex="normal"/>
    </style:style>
    <style:style style:name="ce38" style:family="table-cell" style:parent-style-name="Excel_20_Built-in_20_Hyperlink" style:data-style-name="N0">
      <style:table-cell-properties fo:border-bottom="0.74pt solid #000000" fo:background-color="#eeece1" style:cell-protect="protected" style:print-content="true"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bottom" loext:vertical-justify="auto">
        <loext:background-complex-color loext:theme-type="light2" loext:color-type="theme"/>
      </style:table-cell-properties>
      <style:paragraph-properties css3t:text-justify="auto" fo:margin-left="0cm" style:writing-mode="page"/>
      <style:text-properties fo:color="#0000d4" style:text-outline="false" style:text-line-through-style="none" style:text-line-through-type="none" style:font-name="Geneva" fo:font-size="10pt" fo:font-style="normal" fo:text-shadow="none" style:text-underline-style="solid" style:text-underline-width="auto" style:text-underline-color="font-color" fo:font-weight="normal" style:font-size-asian="10pt" style:font-style-asian="normal" style:font-weight-asian="normal" style:font-name-complex="Geneva" style:font-size-complex="10pt" style:font-style-complex="normal" style:font-weight-complex="normal"/>
    </style:style>
    <style:style style:name="ce39" style:family="table-cell" style:parent-style-name="Excel_20_Built-in_20_Hyperlink" style:data-style-name="N0">
      <style:table-cell-properties fo:border-bottom="1.76pt solid #000000" fo:background-color="#eeece1"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loext:background-complex-color loext:theme-type="light2" loext:color-type="theme"/>
      </style:table-cell-properties>
      <style:paragraph-properties fo:text-align="start" css3t:text-justify="auto" fo:margin-left="0cm" style:writing-mode="page"/>
      <style:text-properties fo:color="#0000d4" style:text-outline="false" style:text-line-through-style="none" style:text-line-through-type="none" style:font-name="Geneva" fo:font-size="10pt" fo:font-style="normal" fo:text-shadow="none" style:text-underline-style="solid" style:text-underline-width="auto" style:text-underline-color="font-color" fo:font-weight="normal" style:font-size-asian="10pt" style:font-style-asian="normal" style:font-weight-asian="normal" style:font-name-complex="Geneva" style:font-size-complex="10pt" style:font-style-complex="normal" style:font-weight-complex="normal"/>
    </style:style>
    <style:style style:name="ce40"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Default" style:data-style-name="N11">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2" style:family="table-cell" style:parent-style-name="Default" style:data-style-name="N11">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 style:family="table-cell" style:parent-style-name="Default" style:data-style-name="N1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5"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6" style:family="table-cell" style:parent-style-name="Default" style:data-style-name="N1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47" style:family="table-cell" style:parent-style-name="Default" style:data-style-name="N1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8" style:family="table-cell" style:parent-style-name="Excel_20_Built-in_20_Percent" style:data-style-name="N11">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 style:family="table-cell" style:parent-style-name="Excel_20_Built-in_20_Percent" style:data-style-name="N11">
      <style:table-cell-properties fo:border-bottom="0.74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0" style:family="table-cell" style:parent-style-name="Default" style:data-style-name="N118">
      <style:table-cell-properties fo:border-bottom="0.74pt solid #000000" fo:background-color="#eeece1"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loext:background-complex-color loext:theme-type="light2" loext:color-type="theme"/>
      </style:table-cell-properties>
      <style:paragraph-properties fo:text-align="start" css3t:text-justify="auto" fo:margin-left="0cm" style:writing-mode="pag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51" style:family="table-cell" style:parent-style-name="Excel_20_Built-in_20_Hyperlink" style:data-style-name="N0">
      <style:table-cell-properties fo:border-bottom="0.74pt solid #000000" fo:background-color="#eeece1"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loext:background-complex-color loext:theme-type="light2" loext:color-type="theme"/>
      </style:table-cell-properties>
      <style:paragraph-properties fo:text-align="start" css3t:text-justify="auto" fo:margin-left="0cm" style:writing-mode="page"/>
      <style:text-properties fo:color="#0000d4" style:text-outline="false" style:text-line-through-style="none" style:text-line-through-type="none" style:font-name="Geneva" fo:font-size="10pt" fo:font-style="normal" fo:text-shadow="none" style:text-underline-style="solid" style:text-underline-width="auto" style:text-underline-color="font-color" fo:font-weight="normal" style:font-size-asian="10pt" style:font-style-asian="normal" style:font-weight-asian="normal" style:font-name-complex="Geneva" style:font-size-complex="10pt" style:font-style-complex="normal" style:font-weight-complex="normal"/>
    </style:style>
    <style:style style:name="ce52" style:family="table-cell" style:parent-style-name="Default">
      <style:table-cell-properties fo:border-bottom="0.74pt solid #000000" fo:background-color="#eeece1"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loext:background-complex-color loext:theme-type="light2"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 style:family="table-cell" style:parent-style-name="Excel_20_Built-in_20_Hyperlink" style:data-style-name="N118">
      <style:table-cell-properties fo:border-bottom="0.74pt solid #000000" fo:background-color="#eeece1"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loext:background-complex-color loext:theme-type="light2" loext:color-type="theme"/>
      </style:table-cell-properties>
      <style:paragraph-properties fo:text-align="start" css3t:text-justify="auto" fo:margin-left="0cm" style:writing-mode="page"/>
      <style:text-properties fo:color="#0000d4" style:text-outline="false" style:text-line-through-style="none" style:text-line-through-type="none" style:font-name="Geneva" fo:font-size="10pt" fo:font-style="normal" fo:text-shadow="none" style:text-underline-style="solid" style:text-underline-width="auto" style:text-underline-color="font-color" fo:font-weight="normal" style:font-size-asian="10pt" style:font-style-asian="normal" style:font-weight-asian="normal" style:font-name-complex="Geneva" style:font-size-complex="10pt" style:font-style-complex="normal" style:font-weight-complex="normal"/>
    </style:style>
    <style:style style:name="ce54" style:family="table-cell" style:parent-style-name="Excel_20_Built-in_20_Hyperlink" style:data-style-name="N0">
      <style:table-cell-properties fo:border-bottom="0.74pt solid #000000" fo:background-color="#eeece1"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loext:background-complex-color loext:theme-type="light2" loext:color-type="theme"/>
      </style:table-cell-properties>
      <style:paragraph-properties css3t:text-justify="auto" fo:margin-left="0cm" style:writing-mode="page"/>
      <style:text-properties fo:color="#0000d4" style:text-outline="false" style:text-line-through-style="none" style:text-line-through-type="none" style:font-name="Geneva" fo:font-size="10pt" fo:font-style="normal" fo:text-shadow="none" style:text-underline-style="solid" style:text-underline-width="auto" style:text-underline-color="font-color" fo:font-weight="normal" style:font-size-asian="10pt" style:font-style-asian="normal" style:font-weight-asian="normal" style:font-name-complex="Geneva" style:font-size-complex="10pt" style:font-style-complex="normal" style:font-weight-complex="normal"/>
    </style:style>
    <style:style style:name="ce55" style:family="table-cell" style:parent-style-name="Excel_20_Built-in_20_Hyperlink" style:data-style-name="N0">
      <style:table-cell-properties fo:border-bottom="1.76pt solid #000000" fo:background-color="#eeece1"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loext:background-complex-color loext:theme-type="light2" loext:color-type="theme"/>
      </style:table-cell-properties>
      <style:paragraph-properties fo:text-align="start" css3t:text-justify="auto" fo:margin-left="0cm" style:writing-mode="page"/>
      <style:text-properties fo:color="#0000d4" style:text-outline="false" style:text-line-through-style="none" style:text-line-through-type="none" style:font-name="Geneva" fo:font-size="10pt" fo:font-style="normal" fo:text-shadow="none" style:text-underline-style="solid" style:text-underline-width="auto" style:text-underline-color="font-color" fo:font-weight="normal" style:font-size-asian="10pt" style:font-style-asian="normal" style:font-weight-asian="normal" style:font-name-complex="Geneva" style:font-size-complex="10pt" style:font-style-complex="normal" style:font-weight-complex="normal"/>
    </style:style>
    <style:style style:name="ce56" style:family="table-cell" style:parent-style-name="Default">
      <style:table-cell-properties fo:background-color="#fcf305"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9" style:family="table-cell" style:parent-style-name="Default" style:data-style-name="N1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0" style:family="table-cell" style:parent-style-name="Excel_20_Built-in_20_Percent" style:data-style-name="N11">
      <style:table-cell-properties fo:background-color="#fac09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1" style:family="table-cell" style:parent-style-name="Excel_20_Built-in_20_Percent" style:data-style-name="N11">
      <style:table-cell-properties fo:border-bottom="0.74pt solid #000000" fo:background-color="#ffff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2" style:family="table-cell" style:parent-style-name="Default">
      <style:table-cell-properties fo:border-bottom="0.74pt solid #000000" fo:background-color="#eeece1"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loext:background-complex-color loext:theme-type="light2"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3"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 style:family="table-cell" style:parent-style-name="Excel_20_Built-in_20_Currency" style:data-style-name="N128">
      <style:table-cell-properties fo:background-color="#92d05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65" style:family="table-cell" style:parent-style-name="Default" style:data-style-name="N11">
      <style:table-cell-properties fo:border-bottom="1.76pt solid #000000" fo:background-color="#92d050"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 style:family="table-cell" style:parent-style-name="Default">
      <style:table-cell-properties fo:border-bottom="0.74pt solid #000000" fo:background-color="#eeece1"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loext:background-complex-color loext:theme-type="light2"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 style:family="table-cell" style:parent-style-name="Default">
      <style:table-cell-properties fo:border-bottom="none" style:diagonal-bl-tr="none" style:diagonal-tl-br="none" fo:border-left="0.74pt solid #000000" fo:border-right="none" style:rotation-align="none" fo:border-top="0.74pt solid #000000"/>
      <style:text-properties style:use-window-font-color="true" style:text-outline="false" style:text-line-through-style="none" style:text-line-through-type="none" style:font-name="Time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68"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Time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6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0" style:family="table-cell" style:parent-style-name="Excel_20_Built-in_20_Currency" style:data-style-name="N128">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1" style:family="table-cell" style:parent-style-name="Default" style:data-style-name="N133">
      <style:table-cell-properties fo:border-bottom="none"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2" style:family="table-cell" style:parent-style-name="Default" style:data-style-name="N13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3" style:family="table-cell" style:parent-style-name="Excel_20_Built-in_20_Currency" style:data-style-name="N128">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5" style:family="table-cell" style:parent-style-name="Default" style:data-style-name="N11">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76" style:family="table-cell" style:parent-style-name="Default" style:data-style-name="N11">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7" style:family="table-cell" style:parent-style-name="Excel_20_Built-in_20_Percent" style:data-style-name="N11">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8" style:family="table-cell" style:parent-style-name="Default" style:data-style-name="N118">
      <style:table-cell-properties fo:border-bottom="0.74pt solid #000000" fo:background-color="#eeece1"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loext:background-complex-color loext:theme-type="light2" loext:color-type="theme"/>
      </style:table-cell-properties>
      <style:paragraph-properties fo:text-align="start" css3t:text-justify="auto" fo:margin-left="0cm" style:writing-mode="pag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79" style:family="table-cell" style:parent-style-name="Excel_20_Built-in_20_Hyperlink" style:data-style-name="N0">
      <style:table-cell-properties fo:border-bottom="0.74pt solid #000000" fo:background-color="#eeece1" style:cell-protect="protected" style:print-content="true"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bottom" loext:vertical-justify="auto">
        <loext:background-complex-color loext:theme-type="light2" loext:color-type="theme"/>
      </style:table-cell-properties>
      <style:paragraph-properties fo:text-align="start" css3t:text-justify="auto" fo:margin-left="0cm" style:writing-mode="page"/>
      <style:text-properties fo:color="#0000d4" style:text-outline="false" style:text-line-through-style="none" style:text-line-through-type="none" style:font-name="Geneva" fo:font-size="10pt" fo:font-style="normal" fo:text-shadow="none" style:text-underline-style="solid" style:text-underline-width="auto" style:text-underline-color="font-color" fo:font-weight="normal" style:font-size-asian="10pt" style:font-style-asian="normal" style:font-weight-asian="normal" style:font-name-complex="Geneva" style:font-size-complex="10pt" style:font-style-complex="normal" style:font-weight-complex="normal"/>
    </style:style>
    <style:style style:name="ce80" style:family="table-cell" style:parent-style-name="Default">
      <style:table-cell-properties fo:border-bottom="0.74pt solid #000000" fo:background-color="#eeece1"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bottom" loext:vertical-justify="auto">
        <loext:background-complex-color loext:theme-type="light2"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1" style:family="table-cell" style:parent-style-name="Excel_20_Built-in_20_Hyperlink" style:data-style-name="N118">
      <style:table-cell-properties fo:border-bottom="0.74pt solid #000000" fo:background-color="#eeece1" style:cell-protect="protected" style:print-content="true"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bottom" loext:vertical-justify="auto">
        <loext:background-complex-color loext:theme-type="light2" loext:color-type="theme"/>
      </style:table-cell-properties>
      <style:paragraph-properties fo:text-align="start" css3t:text-justify="auto" fo:margin-left="0cm" style:writing-mode="page"/>
      <style:text-properties fo:color="#0000d4" style:text-outline="false" style:text-line-through-style="none" style:text-line-through-type="none" style:font-name="Geneva" fo:font-size="10pt" fo:font-style="normal" fo:text-shadow="none" style:text-underline-style="solid" style:text-underline-width="auto" style:text-underline-color="font-color" fo:font-weight="normal" style:font-size-asian="10pt" style:font-style-asian="normal" style:font-weight-asian="normal" style:font-name-complex="Geneva" style:font-size-complex="10pt" style:font-style-complex="normal" style:font-weight-complex="normal"/>
    </style:style>
    <style:style style:name="ce82" style:family="table-cell" style:parent-style-name="Excel_20_Built-in_20_Hyperlink" style:data-style-name="N0">
      <style:table-cell-properties fo:border-bottom="0.74pt solid #000000" fo:background-color="#eeece1" style:cell-protect="protected" style:print-content="true" style:diagonal-bl-tr="none" style:diagonal-tl-br="none" style:text-align-source="value-type" style:repeat-content="false" fo:wrap-option="no-wrap" fo:border-left="none" style:direction="ltr" fo:border-right="1.76pt solid #000000" style:rotation-angle="0" style:rotation-align="none" style:shrink-to-fit="false" fo:border-top="0.74pt solid #000000" style:vertical-align="bottom" loext:vertical-justify="auto">
        <loext:background-complex-color loext:theme-type="light2" loext:color-type="theme"/>
      </style:table-cell-properties>
      <style:paragraph-properties css3t:text-justify="auto" fo:margin-left="0cm" style:writing-mode="page"/>
      <style:text-properties fo:color="#0000d4" style:text-outline="false" style:text-line-through-style="none" style:text-line-through-type="none" style:font-name="Geneva" fo:font-size="10pt" fo:font-style="normal" fo:text-shadow="none" style:text-underline-style="solid" style:text-underline-width="auto" style:text-underline-color="font-color" fo:font-weight="normal" style:font-size-asian="10pt" style:font-style-asian="normal" style:font-weight-asian="normal" style:font-name-complex="Geneva" style:font-size-complex="10pt" style:font-style-complex="normal" style:font-weight-complex="normal"/>
    </style:style>
    <style:style style:name="ce83" style:family="table-cell" style:parent-style-name="Excel_20_Built-in_20_Hyperlink" style:data-style-name="N0">
      <style:table-cell-properties fo:border-bottom="1.76pt solid #000000" fo:background-color="#eeece1" style:cell-protect="protected" style:print-content="true"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bottom" loext:vertical-justify="auto">
        <loext:background-complex-color loext:theme-type="light2" loext:color-type="theme"/>
      </style:table-cell-properties>
      <style:paragraph-properties fo:text-align="start" css3t:text-justify="auto" fo:margin-left="0cm" style:writing-mode="page"/>
      <style:text-properties fo:color="#0000d4" style:text-outline="false" style:text-line-through-style="none" style:text-line-through-type="none" style:font-name="Geneva" fo:font-size="10pt" fo:font-style="normal" fo:text-shadow="none" style:text-underline-style="solid" style:text-underline-width="auto" style:text-underline-color="font-color" fo:font-weight="normal" style:font-size-asian="10pt" style:font-style-asian="normal" style:font-weight-asian="normal" style:font-name-complex="Geneva" style:font-size-complex="10pt" style:font-style-complex="normal" style:font-weight-complex="normal"/>
    </style:style>
    <style:style style:name="ce84"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5"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6" style:family="table-cell" style:parent-style-name="Default" style:data-style-name="N133">
      <style:table-cell-properties fo:background-color="#92d05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7" style:family="table-cell" style:parent-style-name="Excel_20_Built-in_20_Currency" style:data-style-name="N128">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8"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89"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0"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1"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2"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3"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4"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5"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6" style:family="table-cell" style:parent-style-name="Default">
      <style:table-cell-properties style:rotation-align="none"/>
      <style:text-properties fo:color="#dd0806" style:text-outline="false" style:text-line-through-style="none" style:text-line-through-type="none" style:font-name="Geneva" fo:font-size="14pt" fo:font-style="normal" fo:text-shadow="none" style:text-underline-style="none" fo:font-weight="normal" style:font-size-asian="14pt" style:font-style-asian="normal" style:font-weight-asian="normal" style:font-name-complex="Geneva" style:font-size-complex="14pt" style:font-style-complex="normal" style:font-weight-complex="normal"/>
    </style:style>
    <style:style style:name="ce97" style:family="table-cell" style:parent-style-name="Default">
      <style:table-cell-properties fo:border-bottom="0.74pt solid #000000" fo:background-color="#fac09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98" style:family="table-cell" style:parent-style-name="Excel_20_Built-in_20_Currency" style:data-style-name="N128">
      <style:table-cell-properties fo:background-color="#fac09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9" style:family="table-cell" style:parent-style-name="Default" style:data-style-name="N133">
      <style:table-cell-properties fo:border-bottom="none" fo:background-color="#fac09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0"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101"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102" style:family="table-cell" style:parent-style-name="Default" style:data-style-name="N11">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03"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4" style:family="table-cell" style:parent-style-name="Default" style:data-style-name="N11">
      <style:table-cell-properties fo:background-color="#fac090" style:diagonal-bl-tr="none" style:diagonal-tl-br="none" style:text-align-source="fix" style:repeat-content="false" fo:wrap-option="no-wrap" fo:border="none" style:direction="ltr" style:rotation-angle="0" style:rotation-align="none" style:shrink-to-fit="false" style:vertical-align="bottom"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05" style:family="table-cell" style:parent-style-name="Default" style:data-style-name="N11">
      <style:table-cell-properties fo:border-bottom="0.74pt solid #000000" fo:background-color="#ffff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0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7" style:family="table-cell" style:parent-style-name="Default" style:data-style-name="N11">
      <style:table-cell-properties fo:border-bottom="none"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8" style:family="table-cell" style:parent-style-name="Default" style:data-style-name="N1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9" style:family="table-cell" style:parent-style-name="Default">
      <style:table-cell-properties fo:border-bottom="0.74pt solid #000000" fo:background-color="#ffffff" style:diagonal-bl-tr="none" style:diagonal-tl-br="none" fo:border-left="none" fo:border-right="none" style:rotation-align="none" fo:border-top="none">
        <loext:background-complex-color loext:theme-type="light1" loext:color-type="theme"/>
      </style:table-cell-properties>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10" style:family="table-cell" style:parent-style-name="Default">
      <style:table-cell-properties fo:background-color="transparent" style:rotation-align="none"/>
      <style:text-properties style:use-window-font-color="true" style:text-outline="false" style:text-line-through-style="none" style:text-line-through-typ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1" style:family="table-cell" style:parent-style-name="Default">
      <style:table-cell-properties fo:background-color="transparent" style:rotation-align="none"/>
      <style:text-properties fo:color="#dd0806" style:text-outline="false" style:text-line-through-style="none" style:text-line-through-type="none" style:font-name="Geneva" fo:font-size="14pt" fo:font-style="normal" fo:text-shadow="none" style:text-underline-style="none" fo:font-weight="normal" style:font-size-asian="14pt" style:font-style-asian="normal" style:font-weight-asian="normal" style:font-name-complex="Geneva" style:font-size-complex="14pt" style:font-style-complex="normal" style:font-weight-complex="normal"/>
    </style:style>
    <style:style style:name="ce112" style:family="table-cell" style:parent-style-name="Default">
      <style:table-cell-properties fo:border-bottom="none" style:diagonal-bl-tr="none" style:diagonal-tl-br="none" fo:background-color="transparent" fo:border-left="none" fo:border-right="0.74pt solid #000000" style:rotation-align="none" fo:border-top="0.74pt solid #000000"/>
      <style:text-properties style:use-window-font-color="true" style:text-outline="false" style:text-line-through-style="none" style:text-line-through-typ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3" style:family="table-cell" style:parent-style-name="Default">
      <style:table-cell-properties fo:border-bottom="0.74pt solid #000000" style:diagonal-bl-tr="none" style:diagonal-tl-br="none" fo:background-color="transparent" fo:border-left="none" fo:border-right="0.74pt solid #000000" style:rotation-align="none" fo:border-top="none"/>
      <style:text-properties style:use-window-font-color="true" style:text-outline="false" style:text-line-through-style="none" style:text-line-through-typ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4" style:family="table-cell" style:parent-style-name="Default">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5" style:family="table-cell" style:parent-style-name="Default" style:data-style-name="N11">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6" style:family="table-cell" style:parent-style-name="Default" style:data-style-name="N11">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7"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18" style:family="table-cell" style:parent-style-name="Default" style:data-style-name="N1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119" style:family="table-cell" style:parent-style-name="Default">
      <style:table-cell-properties fo:border-bottom="0.74pt solid #000000" style:diagonal-bl-tr="none" style:diagonal-tl-br="none" fo:background-color="transparent" fo:border-left="none" fo:border-right="none" style:rotation-align="none" fo:border-top="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20"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1"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2" style:family="table-cell" style:parent-style-name="Default" style:data-style-name="N11">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3" style:family="table-cell" style:parent-style-name="Default" style:data-style-name="N11">
      <style:table-cell-properties fo:border-bottom="none"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4" style:family="table-cell" style:parent-style-name="Default" style:data-style-name="N11">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6" style:family="table-cell" style:parent-style-name="Default">
      <style:table-cell-properties fo:border-bottom="non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7" style:family="table-cell" style:parent-style-name="Excel_20_Built-in_20_Percent" style:data-style-name="N11">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128" style:family="table-cell" style:parent-style-name="Default" style:data-style-name="N11">
      <style:table-cell-properties fo:border-bottom="none"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9" style:family="table-cell" style:parent-style-name="Default" style:data-style-name="N1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2"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3" style:family="table-cell" style:parent-style-name="Default" style:data-style-name="N11">
      <style:table-cell-properties style:diagonal-bl-tr="none" style:diagonal-tl-br="none" fo:border="0.74pt solid #000000" style:rotation-align="none"/>
      <style:text-properties style:use-window-font-color="true" style:text-outline="false" style:text-line-through-style="none" style:text-line-through-typ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4" style:family="table-cell" style:parent-style-name="Default" style:data-style-name="N11">
      <style:table-cell-properties fo:border-bottom="none" fo:background-color="#bfbfbf" style:diagonal-bl-tr="none" style:diagonal-tl-br="none" fo:border-left="0.74pt solid #000000" fo:border-right="0.74pt solid #000000" style:rotation-align="none" fo:border-top="0.74pt solid #000000">
        <loext:background-complex-color loext:theme-type="light1" loext:color-type="theme">
          <loext:transformation loext:type="lummod" loext:value="7500"/>
        </loext:background-complex-color>
      </style:table-cell-properties>
      <style:text-properties style:use-window-font-color="true" style:text-outline="false" style:text-line-through-style="none" style:text-line-through-typ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5" style:family="table-cell" style:parent-style-name="Default" style:data-style-name="N11">
      <style:table-cell-properties style:diagonal-bl-tr="none" style:diagonal-tl-br="none" fo:background-color="transparent" fo:border="none" style:rotation-align="none"/>
      <style:text-properties style:use-window-font-color="true" style:text-outline="false" style:text-line-through-style="none" style:text-line-through-typ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6" style:family="table-cell" style:parent-style-name="Default" style:data-style-name="N11">
      <style:table-cell-properties style:diagonal-bl-tr="none" style:diagonal-tl-br="none" fo:border="none" style:rotation-align="none"/>
      <style:text-properties style:use-window-font-color="true" style:text-outline="false" style:text-line-through-style="none" style:text-line-through-typ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7" style:family="table-cell" style:parent-style-name="Default" style:data-style-name="N11">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138" style:family="table-cell" style:parent-style-name="Default" style:data-style-name="N11">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dd0806" style:text-outline="false" style:text-line-through-style="none" style:text-line-through-type="none" style:font-name="Geneva" fo:font-size="14pt" fo:font-style="normal" fo:text-shadow="none" style:text-underline-style="none" fo:font-weight="normal" style:font-size-asian="14pt" style:font-style-asian="normal" style:font-weight-asian="normal" style:font-name-complex="Geneva" style:font-size-complex="14pt" style:font-style-complex="normal" style:font-weight-complex="normal"/>
    </style:style>
    <style:style style:name="ce141" style:family="table-cell" style:parent-style-name="Default" style:data-style-name="N11">
      <style:table-cell-properties fo:border-bottom="none" style:diagonal-bl-tr="none" style:diagonal-tl-br="none" fo:border-left="0.74pt solid #000000" fo:border-right="0.74pt solid #000000" style:rotation-align="none" fo:border-top="0.74pt solid #000000"/>
      <style:text-properties style:use-window-font-color="true" style:text-outline="false" style:text-line-through-style="none" style:text-line-through-typ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2" style:family="table-cell" style:parent-style-name="Default">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4"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146"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7" style:family="table-cell" style:parent-style-name="Default">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150"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1"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2"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153" style:family="table-cell" style:parent-style-name="Default" style:data-style-name="N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4" style:family="table-cell" style:parent-style-name="Default" style:data-style-name="N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15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loext:char-complex-color loext:theme-type="dark1" loext:color-type="theme"/>
      </style:text-properties>
    </style:style>
    <style:style style:name="ce15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57" style:family="table-cell" style:parent-style-name="Excel_20_Built-in_20_Percent" style:data-style-name="N11">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8" style:family="table-cell" style:parent-style-name="Default" style:data-style-name="N11">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159" style:family="table-cell" style:parent-style-name="Default" style:data-style-name="N11">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0" style:family="table-cell" style:parent-style-name="Default" style:data-style-name="N11">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8000"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161"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62"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4"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165" style:family="table-cell" style:parent-style-name="Excel_20_Built-in_20_Percent" style:data-style-name="N11">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6" style:family="table-cell" style:parent-style-name="Excel_20_Built-in_20_Percent" style:data-style-name="N11">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167" style:family="table-cell" style:parent-style-name="Default" style:data-style-name="N11">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style>
    <style:style style:name="ce168"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17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17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3" style:family="table-cell" style:parent-style-name="Default" style:data-style-name="N11">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174" style:family="table-cell" style:parent-style-name="Default">
      <style:table-cell-properties style:cell-protect="none" style:print-content="true" style:rotation-align="none"/>
    </style:style>
    <style:style style:name="ce175" style:family="table-cell" style:parent-style-name="Default" style:data-style-name="N49">
      <style:table-cell-properties style:rotation-align="none"/>
    </style:style>
    <style:style style:name="ce176" style:family="table-cell" style:parent-style-name="Default" style:data-style-name="N36">
      <style:table-cell-properties style:rotation-align="none"/>
    </style:style>
    <style:style style:name="ce177" style:family="table-cell" style:parent-style-name="Default" style:data-style-name="N2">
      <style:table-cell-properties style:rotation-align="none"/>
    </style:style>
    <style:style style:name="ce17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style>
    <style:style style:name="ce179" style:family="table-cell" style:parent-style-name="Excel_20_Built-in_20_Percent" style:data-style-name="N11">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180" style:family="table-cell" style:parent-style-name="Default" style:data-style-name="N134">
      <style:table-cell-properties style:rotation-align="none"/>
    </style:style>
    <style:style style:name="ce181" style:family="table-cell" style:parent-style-name="Default">
      <style:table-cell-properties fo:border-bottom="0.74pt solid #000000" style:diagonal-bl-tr="none" style:diagonal-tl-br="none" fo:border-left="1.76pt solid #000000" fo:border-right="0.74pt solid #000000" style:rotation-align="none" fo:border-top="1.76pt solid #000000"/>
      <style:text-properties style:use-window-font-color="true" style:text-outline="false" style:text-line-through-style="none" style:text-line-through-type="none" style:font-name="Geneva" fo:font-size="12pt" fo:font-style="normal" fo:text-shadow="none" style:text-underline-style="none" fo:font-weight="normal" style:font-size-asian="12pt" style:font-style-asian="normal" style:font-weight-asian="normal" style:font-name-complex="Geneva" style:font-size-complex="12pt" style:font-style-complex="normal" style:font-weight-complex="normal"/>
    </style:style>
    <style:style style:name="ce182" style:family="table-cell" style:parent-style-name="Default">
      <style:table-cell-properties fo:border-bottom="0.74pt solid #000000" style:diagonal-bl-tr="none" style:diagonal-tl-br="none" fo:border-left="1.76pt solid #000000" fo:border-right="0.74pt solid #000000" style:rotation-align="none" fo:border-top="0.74pt solid #000000"/>
      <style:text-properties style:use-window-font-color="true" style:text-outline="false" style:text-line-through-style="none" style:text-line-through-type="none" style:font-name="Geneva" fo:font-size="12pt" fo:font-style="normal" fo:text-shadow="none" style:text-underline-style="none" fo:font-weight="normal" style:font-size-asian="12pt" style:font-style-asian="normal" style:font-weight-asian="normal" style:font-name-complex="Geneva" style:font-size-complex="12pt" style:font-style-complex="normal" style:font-weight-complex="normal"/>
    </style:style>
    <style:style style:name="ce183" style:family="table-cell" style:parent-style-name="Default">
      <style:table-cell-properties fo:border-bottom="0.74pt solid #000000" style:diagonal-bl-tr="none" style:diagonal-tl-br="none" fo:border-left="1.76pt solid #000000" fo:border-right="0.74pt solid #000000" style:rotation-align="none" fo:border-top="0.74pt solid #000000"/>
      <style:text-properties fo:color="#ff0000" style:text-outline="false" style:text-line-through-style="none" style:text-line-through-type="none" style:font-name="Geneva" fo:font-size="12pt" fo:font-style="normal" fo:text-shadow="none" style:text-underline-style="none" fo:font-weight="normal" style:font-size-asian="12pt" style:font-style-asian="normal" style:font-weight-asian="normal" style:font-name-complex="Geneva" style:font-size-complex="12pt" style:font-style-complex="normal" style:font-weight-complex="normal"/>
    </style:style>
    <style:style style:name="ce184" style:family="table-cell" style:parent-style-name="Default">
      <style:table-cell-properties fo:border-bottom="1.76pt solid #000000" style:diagonal-bl-tr="none" style:diagonal-tl-br="none" fo:border-left="1.76pt solid #000000" fo:border-right="0.74pt solid #000000" style:rotation-align="none" fo:border-top="0.74pt solid #000000"/>
      <style:text-properties fo:color="#ff0000" style:text-outline="false" style:text-line-through-style="none" style:text-line-through-type="none" style:font-name="Geneva" fo:font-size="12pt" fo:font-style="normal" fo:text-shadow="none" style:text-underline-style="none" fo:font-weight="normal" style:font-size-asian="12pt" style:font-style-asian="normal" style:font-weight-asian="normal" style:font-name-complex="Geneva" style:font-size-complex="12pt" style:font-style-complex="normal" style:font-weight-complex="normal"/>
    </style:style>
    <style:style style:name="ce18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2pt" fo:font-style="italic" fo:text-shadow="none" style:text-underline-style="none" fo:font-weight="normal" style:font-size-asian="12pt" style:font-style-asian="italic" style:font-weight-asian="normal" style:font-name-complex="Geneva" style:font-size-complex="12pt" style:font-style-complex="italic" style:font-weight-complex="normal"/>
    </style:style>
    <style:style style:name="ce18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2pt" fo:font-style="normal" fo:text-shadow="none" style:text-underline-style="none" fo:font-weight="normal" style:font-size-asian="12pt" style:font-style-asian="normal" style:font-weight-asian="normal" style:font-name-complex="Geneva" style:font-size-complex="12pt" style:font-style-complex="normal" style:font-weight-complex="normal"/>
    </style:style>
    <style:style style:name="ce187" style:family="table-cell" style:parent-style-name="Default" style:data-style-name="N11">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2pt" fo:font-style="normal" fo:text-shadow="none" style:text-underline-style="none" fo:font-weight="normal" style:font-size-asian="12pt" style:font-style-asian="normal" style:font-weight-asian="normal" style:font-name-complex="Geneva" style:font-size-complex="12pt" style:font-style-complex="normal" style:font-weight-complex="normal"/>
    </style:style>
    <style:style style:name="ce188" style:family="table-cell" style:parent-style-name="Default" style:data-style-name="N11">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Geneva" fo:font-size="12pt" fo:font-style="italic" fo:text-shadow="none" style:text-underline-style="none" fo:font-weight="normal" style:font-size-asian="12pt" style:font-style-asian="italic" style:font-weight-asian="normal" style:font-name-complex="Geneva" style:font-size-complex="12pt" style:font-style-complex="italic" style:font-weight-complex="normal"/>
    </style:style>
    <style:style style:name="ce189" style:family="table-cell" style:parent-style-name="Default" style:data-style-name="N11">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Geneva" fo:font-size="12pt" fo:font-style="italic" fo:text-shadow="none" style:text-underline-style="none" fo:font-weight="normal" style:font-size-asian="12pt" style:font-style-asian="italic" style:font-weight-asian="normal" style:font-name-complex="Geneva" style:font-size-complex="12pt" style:font-style-complex="italic" style:font-weight-complex="normal"/>
    </style:style>
    <style:style style:name="ce19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2pt" fo:font-style="italic" fo:text-shadow="none" style:text-underline-style="none" fo:font-weight="normal" style:font-size-asian="12pt" style:font-style-asian="italic" style:font-weight-asian="normal" style:font-name-complex="Geneva" style:font-size-complex="12pt" style:font-style-complex="italic" style:font-weight-complex="normal"/>
    </style:style>
    <style:style style:name="ce191"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2pt" fo:font-style="normal" fo:text-shadow="none" style:text-underline-style="none" fo:font-weight="normal" style:font-size-asian="12pt" style:font-style-asian="normal" style:font-weight-asian="normal" style:font-name-complex="Geneva" style:font-size-complex="12pt" style:font-style-complex="normal" style:font-weight-complex="normal"/>
    </style:style>
    <style:style style:name="ce19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2pt" fo:font-style="normal" fo:text-shadow="none" style:text-underline-style="none" fo:font-weight="normal" style:font-size-asian="12pt" style:font-style-asian="normal" style:font-weight-asian="normal" style:font-name-complex="Geneva" style:font-size-complex="12pt" style:font-style-complex="normal" style:font-weight-complex="normal"/>
    </style:style>
    <style:style style:name="ce193" style:family="table-cell" style:parent-style-name="Default" style:data-style-name="N11">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2pt" fo:font-style="normal" fo:text-shadow="none" style:text-underline-style="none" fo:font-weight="normal" style:font-size-asian="12pt" style:font-style-asian="normal" style:font-weight-asian="normal" style:font-name-complex="Geneva" style:font-size-complex="12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2pt" fo:font-style="normal" fo:text-shadow="none" style:text-underline-style="none" fo:font-weight="normal" style:font-size-asian="12pt" style:font-style-asian="normal" style:font-weight-asian="normal" style:font-name-complex="Geneva" style:font-size-complex="12pt" style:font-style-complex="normal" style:font-weight-complex="normal"/>
    </style:style>
    <style:style style:name="ce195" style:family="table-cell" style:parent-style-name="Default">
      <style:table-cell-properties style:rotation-align="non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196" style:family="table-cell" style:parent-style-name="Default">
      <style:table-cell-properties fo:background-color="#ffffff"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8" style:family="table-cell" style:parent-style-name="Default" style:data-style-name="N2">
      <style:table-cell-properties fo:background-color="#ffffff"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9"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0" style:family="table-cell" style:parent-style-name="Default" style:data-style-name="N2">
      <style:table-cell-properties fo:background-color="#ffffff"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1" style:family="table-cell" style:parent-style-name="Default">
      <style:table-cell-properties style:rotation-align="none"/>
      <style:text-properties style:use-window-font-color="true" style:text-outline="false" style:text-line-through-style="none" style:text-line-through-type="none" style:font-name="Geneva" fo:font-size="10pt" fo:font-style="italic" fo:text-shadow="none" style:text-underline-style="none" fo:font-weight="normal" style:font-size-asian="10pt" style:font-style-asian="italic" style:font-weight-asian="normal" style:font-name-complex="Geneva" style:font-size-complex="10pt" style:font-style-complex="italic" style:font-weight-complex="normal"/>
    </style:style>
    <style:style style:name="gr1"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1.816cm" loext:decorative="false"/>
      <style:paragraph-properties style:writing-mode="lr-tb" fo:text-align="start"/>
      <style:text-properties fo:color="#000000" loext:opacity="100%" style:text-outline="false" style:text-line-through-style="none" style:text-line-through-type="none" style:text-position="0% 100%" style:font-name="Geneva1" fo:font-size="9pt" fo:font-style="normal" fo:text-shadow="none" style:text-underline-style="none" fo:font-weight="bold" style:font-size-asian="9pt" style:font-style-asian="normal" style:font-weight-asian="bold" style:font-name-complex="Geneva1" style:font-size-complex="9pt" style:font-style-complex="normal" style:font-weight-complex="bold"/>
    </style:style>
    <style:style style:name="gr2"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2.789cm" loext:decorative="false"/>
      <style:paragraph-properties style:writing-mode="lr-tb" fo:text-align="start"/>
      <style:text-properties fo:color="#000000" loext:opacity="100%" style:text-outline="false" style:text-line-through-style="none" style:text-line-through-type="none" style:text-position="0% 100%" style:font-name="Geneva1" fo:font-size="9pt" fo:font-style="normal" fo:text-shadow="none" style:text-underline-style="none" fo:font-weight="bold" style:font-size-asian="9pt" style:font-style-asian="normal" style:font-weight-asian="bold" style:font-name-complex="Geneva1" style:font-size-complex="9pt" style:font-style-complex="normal" style:font-weight-complex="bold"/>
    </style:style>
    <style:style style:name="gr3"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9.086cm" loext:decorative="false"/>
      <style:paragraph-properties style:writing-mode="lr-tb" fo:text-align="start"/>
    </style:style>
    <style:style style:name="gr4"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10.666cm" loext:decorative="false"/>
      <style:paragraph-properties style:writing-mode="lr-tb" fo:text-align="start"/>
    </style:style>
    <style:style style:name="gr5"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9.876cm" loext:decorative="false"/>
      <style:paragraph-properties style:writing-mode="lr-tb" fo:text-align="start"/>
    </style:style>
    <style:style style:name="P1" style:family="paragraph">
      <loext:graphic-properties draw:fill="solid" draw:fill-color="#ffffe1"/>
      <style:paragraph-properties fo:text-align="start"/>
      <style:text-properties fo:color="#000000" loext:opacity="100%" style:text-outline="false" style:text-line-through-style="none" style:text-line-through-type="none" style:text-position="0% 100%" style:font-name="Geneva1" fo:font-size="9pt" fo:font-style="normal" fo:text-shadow="none" style:text-underline-style="none" fo:font-weight="bold" style:font-size-asian="9pt" style:font-style-asian="normal" style:font-weight-asian="bold" style:font-name-complex="Geneva1" style:font-size-complex="9pt" style:font-style-complex="normal" style:font-weight-complex="bold"/>
    </style:style>
    <style:style style:name="P2" style:family="paragraph">
      <loext:graphic-properties draw:fill="solid" draw:fill-color="#ffffe1"/>
      <style:paragraph-properties fo:text-align="start"/>
    </style:style>
    <style:style style:name="T1" style:family="text">
      <style:text-properties fo:color="#000000" loext:opacity="100%" style:text-outline="false" style:text-line-through-style="none" style:text-line-through-type="none" style:text-position="0% 100%" style:font-name="Geneva1" fo:font-size="9pt" fo:font-style="normal" fo:text-shadow="none" style:text-underline-style="none" fo:font-weight="normal" style:font-size-asian="9pt" style:font-style-asian="normal" style:font-weight-asian="normal" style:font-name-complex="Geneva1" style:font-size-complex="9pt" style:font-style-complex="normal" style:font-weight-complex="normal"/>
    </style:style>
  </office:automatic-styles>
  <office:body>
    <office:spreadsheet>
      <table:calculation-settings table:case-sensitive="false" table:automatic-find-labels="false" table:use-regular-expressions="false" table:use-wildcards="true">
        <table:null-date table:date-value="1904-01-01"/>
        <table:iteration table:maximum-difference="0.0001"/>
      </table:calculation-settings>
      <table:table table:name="Explanations and FAQ" table:style-name="ta1">
        <office:forms form:automatic-focus="false" form:apply-design-mode="false"/>
        <table:table-column table:style-name="co1" table:default-cell-style-name="ce2"/>
        <table:table-column table:style-name="co2" table:default-cell-style-name="ce2"/>
        <table:table-column table:style-name="co3" table:number-columns-repeated="16382" table:default-cell-style-name="Default"/>
        <table:table-row table:style-name="ro1">
          <table:table-cell table:style-name="ce1" office:value-type="string" calcext:value-type="string">
            <text:p>End Game</text:p>
          </table:table-cell>
          <table:table-cell table:style-name="ce10" office:value-type="string" calcext:value-type="string">
            <text:p>Mi objetivo en esta hoja de cálculo es calcular los rendimientos anuales que habría obtenido en las principales clases de activos financieros, sobre una base anual, incluido el pago en efectivo durante el año y la apreciación del precio.</text:p>
          </table:table-cell>
          <table:table-cell table:number-columns-repeated="16382"/>
        </table:table-row>
        <table:table-row table:style-name="ro2">
          <table:table-cell table:number-columns-repeated="16384"/>
        </table:table-row>
        <table:table-row table:style-name="ro2">
          <table:table-cell table:style-name="ce3" office:value-type="string" calcext:value-type="string" table:number-columns-spanned="2" table:number-rows-spanned="1">
            <text:p>Explicaciones, por clase de activo</text:p>
          </table:table-cell>
          <table:covered-table-cell table:style-name="ce3"/>
          <table:table-cell table:number-columns-repeated="16382"/>
        </table:table-row>
        <table:table-row table:style-name="ro3">
          <table:table-cell table:style-name="ce4" office:value-type="string" calcext:value-type="string">
            <text:p>Acciones (gran capitalización)</text:p>
          </table:table-cell>
          <table:table-cell table:style-name="ce11" office:value-type="string" calcext:value-type="string">
            <text:p>Utilizo el S&amp;P 500, que se creó en 1957, y luego rellené los datos utilizando otros índices de empresas de gran capitalización bursátil que existían antes. Cada año, calculo el rendimiento de los dividendos dividiendo los dividendos pagados por el índice al final del año anterior y luego agrego el cambio de precio en el índice, como un porcentaje del índice del año anterior.</text:p>
          </table:table-cell>
          <table:table-cell table:number-columns-repeated="16382"/>
        </table:table-row>
        <table:table-row table:style-name="ro4">
          <table:table-cell table:style-name="ce5" office:value-type="string" calcext:value-type="string">
            <text:p>Bono de EE. UU.</text:p>
          </table:table-cell>
          <table:table-cell table:style-name="ce11" office:value-type="string" calcext:value-type="string">
            <text:p>Utilizo el bono del Tesoro de Estados Unidos a 10 años, ya que es el único bono de vencimiento más largo con una historia ininterrumpida que se remonta al pasado. Para los datos, utilizo los rendimientos de un bono de 10 años con vencimiento constante, que se puede encontrar en FRED (el sitio web de la Reserva Federal). Convierto el rendimiento en un rendimiento, modificando el precio del bono, emitido a la par con el rendimiento del año anterior, con el nuevo rendimiento, manteniendo constante el vencimiento a 10 años. Por lo tanto, si el rendimiento va del 2,5% al ​​3%, primero precio un bono con cupón de 10 años al 2,5% con una tasa de interés del 3% y resto este número del valor nominal del bono, que es de $ 1000. Eso me da el cambio de precio. Agregar el cupón del 3% para el año actual me da el rendimiento total.</text:p>
          </table:table-cell>
          <table:table-cell table:number-columns-repeated="16382"/>
        </table:table-row>
        <table:table-row table:style-name="ro5">
          <table:table-cell table:style-name="ce5" office:value-type="string" calcext:value-type="string">
            <text:p>US T.Bill</text:p>
          </table:table-cell>
          <table:table-cell table:style-name="ce11" office:value-type="string" calcext:value-type="string">
            <text:p>I use the 3-month US treasury bill, again choosing it over the 6-month because of longevity. I get the T.Bill rate at the end of each year from FRED and use it as my erturn, since there should be no price change in this security. I use the average T.Bill rate over the course of the year.</text:p>
          </table:table-cell>
          <table:table-cell table:number-columns-repeated="16382"/>
        </table:table-row>
        <table:table-row table:style-name="ro6">
          <table:table-cell table:style-name="ce4" office:value-type="string" calcext:value-type="string">
            <text:p>Baa Corporate Bond</text:p>
          </table:table-cell>
          <table:table-cell table:style-name="ce11" office:value-type="string" calcext:value-type="string">
            <text:p>I obtain the yield on a Moody's Baa corporate bond from FRED and then compute the return on the bond, using the same approach that I use for the US T.Bond.</text:p>
          </table:table-cell>
          <table:table-cell table:number-columns-repeated="16382"/>
        </table:table-row>
        <table:table-row table:style-name="ro2">
          <table:table-cell table:style-name="ce5" office:value-type="string" calcext:value-type="string">
            <text:p>Inflation Rate</text:p>
          </table:table-cell>
          <table:table-cell table:style-name="ce12" office:value-type="string" calcext:value-type="string">
            <text:p>I use the CPI for all urban consumers, reported on FRED.</text:p>
          </table:table-cell>
          <table:table-cell table:number-columns-repeated="16382"/>
        </table:table-row>
        <table:table-row table:style-name="ro6">
          <table:table-cell table:style-name="ce5" office:value-type="string" calcext:value-type="string">
            <text:p>Real Returns</text:p>
          </table:table-cell>
          <table:table-cell table:style-name="ce13" office:value-type="string" calcext:value-type="string">
            <text:p>For each of the data series. I computre a real return by removing the inflatin for the year from the nominal return, using (1+ Nominal Rate)/ (1+Inflation Rate) -1.</text:p>
          </table:table-cell>
          <table:table-cell table:number-columns-repeated="16382"/>
        </table:table-row>
        <table:table-row table:style-name="ro2">
          <table:table-cell table:style-name="ce5" office:value-type="string" calcext:value-type="string">
            <text:p>Arithmetic Average Return</text:p>
          </table:table-cell>
          <table:table-cell table:style-name="ce12" office:value-type="string" calcext:value-type="string">
            <text:p>A simple average of the annual returns over the specified period (10 yrs, 50 yrs etc.)</text:p>
          </table:table-cell>
          <table:table-cell table:number-columns-repeated="16382"/>
        </table:table-row>
        <table:table-row table:style-name="ro3">
          <table:table-cell table:style-name="ce6" office:value-type="string" calcext:value-type="string">
            <text:p>Geometric Average Return</text:p>
          </table:table-cell>
          <table:table-cell table:style-name="ce13" office:value-type="string" calcext:value-type="string">
            <text:p>A compounded average of the returns over the period. This is most simply computed by dividing the value you would have at the end of the period by the value at the beginning and then computing the compouded average. To compute the cumulated value on both stocks and bonds, I assume that dividends/coupons get reinvested back.</text:p>
          </table:table-cell>
          <table:table-cell table:number-columns-repeated="16382"/>
        </table:table-row>
        <table:table-row table:style-name="ro6">
          <table:table-cell table:style-name="ce5" office:value-type="string" calcext:value-type="string">
            <text:p>Risk Premium</text:p>
          </table:table-cell>
          <table:table-cell table:style-name="ce13" office:value-type="string" calcext:value-type="string">
            <text:p>The risk premium is the difference in the annualized return on stocks and the annualized return on T.Bonds and on T.Bills over the specified period.</text:p>
          </table:table-cell>
          <table:table-cell table:number-columns-repeated="16382"/>
        </table:table-row>
        <table:table-row table:style-name="ro2">
          <table:table-cell table:number-columns-repeated="16384"/>
        </table:table-row>
        <table:table-row table:style-name="ro7">
          <table:table-cell table:style-name="ce7" office:value-type="string" calcext:value-type="string" table:number-columns-spanned="2" table:number-rows-spanned="1">
            <text:p>FAQ</text:p>
          </table:table-cell>
          <table:covered-table-cell table:style-name="ce7"/>
          <table:table-cell table:number-columns-repeated="16382"/>
        </table:table-row>
        <table:table-row table:style-name="ro6">
          <table:table-cell table:style-name="ce8" office:value-type="string" calcext:value-type="string">
            <text:p>How precise are the annual numbers?</text:p>
          </table:table-cell>
          <table:table-cell table:style-name="ce13" office:value-type="string" calcext:value-type="string">
            <text:p>Since the S&amp;P and US treasuries are liquid and the underlying data is widely dispersed, the annual numbers are reliable.</text:p>
          </table:table-cell>
          <table:table-cell table:number-columns-repeated="16382"/>
        </table:table-row>
        <table:table-row table:style-name="ro3">
          <table:table-cell table:style-name="ce4" office:value-type="string" calcext:value-type="string">
            <text:p>How good as the averages as predictors?</text:p>
          </table:table-cell>
          <table:table-cell table:style-name="ce13" office:value-type="string" calcext:value-type="string">
            <text:p>The returns, especially on stocks and bonds, are noisy, with up years and down years. The averages that have been computed come with error, and I have computed standard errros in each of the numbers (especially the risk premiums). Note that even with the longest data series, there is substantial standard error and it becomes explosively large for shorter periods.</text:p>
          </table:table-cell>
          <table:table-cell table:number-columns-repeated="16382"/>
        </table:table-row>
        <table:table-row table:style-name="ro8">
          <table:table-cell table:style-name="ce9" office:value-type="string" calcext:value-type="string">
            <text:p>Why do you keep the maturity of the 10-year bond unchanged, when you compute the return on the bond?</text:p>
          </table:table-cell>
          <table:table-cell table:style-name="ce11" office:value-type="string" calcext:value-type="string">
            <text:p>Normally, when you buy a 10-year bond and hold it for a year, you will end up with a 9-year bond. While I could compute the return using a 9-year maturity, and the answer will be fairly close to what I report, I want to keep the 10-year rmaturity going for consistency in my risk premium computation. Put simply, think of the return on the 10-year bond as the one you would have if the coupon changed, but the maturity is reset to 10 year at the end of the year.</text:p>
          </table:table-cell>
          <table:table-cell table:number-columns-repeated="16382"/>
        </table:table-row>
        <table:table-row table:style-name="ro2" table:number-rows-repeated="7">
          <table:table-cell table:number-columns-repeated="16384"/>
        </table:table-row>
        <table:table-row table:style-name="ro2">
          <table:table-cell table:number-columns-repeated="16384"/>
        </table:table-row>
      </table:table>
      <table:table table:name="Retornos x año" table:style-name="ta2">
        <office:forms form:automatic-focus="false" form:apply-design-mode="false"/>
        <table:table-column table:style-name="co4" table:default-cell-style-name="ce18"/>
        <table:table-column table:style-name="co5" table:default-cell-style-name="ce18"/>
        <table:table-column table:style-name="co6" table:default-cell-style-name="ce18"/>
        <table:table-column table:style-name="co7" table:default-cell-style-name="ce18"/>
        <table:table-column table:style-name="co8" table:default-cell-style-name="ce18"/>
        <table:table-column table:style-name="co9" table:default-cell-style-name="ce18"/>
        <table:table-column table:style-name="co10" table:default-cell-style-name="ce18"/>
        <table:table-column table:style-name="co11" table:default-cell-style-name="ce18"/>
        <table:table-column table:style-name="co12" table:default-cell-style-name="ce18"/>
        <table:table-column table:style-name="co11" table:default-cell-style-name="ce18"/>
        <table:table-column table:style-name="co6" table:default-cell-style-name="ce110"/>
        <table:table-column table:style-name="co13" table:default-cell-style-name="ce18"/>
        <table:table-column table:style-name="co14" table:default-cell-style-name="ce18"/>
        <table:table-column table:style-name="co15" table:default-cell-style-name="ce18"/>
        <table:table-column table:style-name="co16" table:default-cell-style-name="ce18"/>
        <table:table-column table:style-name="co17" table:default-cell-style-name="ce139"/>
        <table:table-column table:style-name="co18" table:default-cell-style-name="ce18"/>
        <table:table-column table:style-name="co19" table:default-cell-style-name="ce18"/>
        <table:table-column table:style-name="co20" table:number-columns-repeated="16366" table:default-cell-style-name="ce18"/>
        <table:table-row table:style-name="ro10">
          <table:table-cell table:style-name="ce14" office:value-type="string" calcext:value-type="string">
            <text:p>Date updated:</text:p>
          </table:table-cell>
          <table:table-cell table:style-name="ce34" office:value-type="date" office:date-value="2020-01-01" calcext:value-type="date" table:number-columns-spanned="6" table:number-rows-spanned="1">
            <text:p>01-ene-20</text:p>
          </table:table-cell>
          <table:covered-table-cell table:number-columns-repeated="4" table:style-name="ce50"/>
          <table:covered-table-cell table:style-name="ce78"/>
          <table:table-cell table:number-columns-repeated="16377"/>
        </table:table-row>
        <table:table-row table:style-name="ro10">
          <table:table-cell table:style-name="ce15" office:value-type="string" calcext:value-type="string">
            <text:p>Created by:</text:p>
          </table:table-cell>
          <table:table-cell table:style-name="ce35" office:value-type="string" calcext:value-type="string" table:number-columns-spanned="6" table:number-rows-spanned="1">
            <text:p><text:a xlink:href="mailto:adamodar@stern.nyu.edu?subject=Data%20on%20website" xlink:type="simple">Aswath Damodaran, adamodar@stern.nyu.edu</text:a></text:p>
          </table:table-cell>
          <table:covered-table-cell table:number-columns-repeated="4" table:style-name="ce51"/>
          <table:covered-table-cell table:style-name="ce79"/>
          <table:table-cell table:number-columns-repeated="16377"/>
        </table:table-row>
        <table:table-row table:style-name="ro10">
          <table:table-cell table:style-name="ce15" office:value-type="string" calcext:value-type="string">
            <text:p>What is this data?</text:p>
          </table:table-cell>
          <table:table-cell table:style-name="ce36" office:value-type="string" calcext:value-type="string" table:number-columns-spanned="4" table:number-rows-spanned="1">
            <text:p>Historical returns: Stocks, Bonds &amp; T.Bills with premiums</text:p>
          </table:table-cell>
          <table:covered-table-cell table:number-columns-repeated="2" table:style-name="ce52"/>
          <table:covered-table-cell table:style-name="ce62"/>
          <table:table-cell table:style-name="ce66" office:value-type="string" calcext:value-type="string" table:number-columns-spanned="2" table:number-rows-spanned="1">
            <text:p>US companies</text:p>
          </table:table-cell>
          <table:covered-table-cell table:style-name="ce80"/>
          <table:table-cell table:style-name="ce95" table:number-columns-repeated="3"/>
          <table:table-cell table:number-columns-repeated="16374"/>
        </table:table-row>
        <table:table-row table:style-name="ro10">
          <table:table-cell table:style-name="ce15" office:value-type="string" calcext:value-type="string">
            <text:p>Home Page:</text:p>
          </table:table-cell>
          <table:table-cell table:style-name="ce37" office:value-type="string" calcext:value-type="string" table:number-columns-spanned="6" table:number-rows-spanned="1">
            <text:p><text:a xlink:href="http://www.damodaran.com/" xlink:type="simple">http://www.damodaran.com</text:a></text:p>
          </table:table-cell>
          <table:covered-table-cell table:number-columns-repeated="4" table:style-name="ce53"/>
          <table:covered-table-cell table:style-name="ce81"/>
          <table:table-cell table:number-columns-repeated="16377"/>
        </table:table-row>
        <table:table-row table:style-name="ro10">
          <table:table-cell table:style-name="ce15" office:value-type="string" calcext:value-type="string">
            <text:p>Data website:</text:p>
          </table:table-cell>
          <table:table-cell table:style-name="ce38" office:value-type="string" calcext:value-type="string" table:number-columns-spanned="6" table:number-rows-spanned="1">
            <text:p><text:a xlink:href="http://www.stern.nyu.edu/~adamodar/New_Home_Page/data.html" xlink:type="simple">http://www.stern.nyu.edu/~adamodar/New_Home_Page/data.html</text:a></text:p>
          </table:table-cell>
          <table:covered-table-cell table:number-columns-repeated="4" table:style-name="ce54"/>
          <table:covered-table-cell table:style-name="ce82"/>
          <table:table-cell table:number-columns-repeated="16377"/>
        </table:table-row>
        <table:table-row table:style-name="ro10">
          <table:table-cell table:style-name="ce15" office:value-type="string" calcext:value-type="string">
            <text:p>Companies in each industry:</text:p>
          </table:table-cell>
          <table:table-cell table:style-name="ce35" office:value-type="string" calcext:value-type="string" table:number-columns-spanned="6" table:number-rows-spanned="1">
            <text:p><text:a xlink:href="http://www.stern.nyu.edu/~adamodar/pc/datasets/indname.xls" xlink:type="simple">http://www.stern.nyu.edu/~adamodar/pc/datasets/indname.xls</text:a></text:p>
          </table:table-cell>
          <table:covered-table-cell table:number-columns-repeated="4" table:style-name="ce51"/>
          <table:covered-table-cell table:style-name="ce79"/>
          <table:table-cell table:number-columns-repeated="16377"/>
        </table:table-row>
        <table:table-row table:style-name="ro10">
          <table:table-cell table:style-name="ce16" office:value-type="string" calcext:value-type="string">
            <text:p>Variable definitions:</text:p>
          </table:table-cell>
          <table:table-cell table:style-name="ce39" office:value-type="string" calcext:value-type="string" table:number-columns-spanned="6" table:number-rows-spanned="1">
            <text:p><text:a xlink:href="http://www.stern.nyu.edu/~adamodar/New_Home_Page/datafile/variable.htm" xlink:type="simple">http://www.stern.nyu.edu/~adamodar/New_Home_Page/datafile/variable.htm</text:a></text:p>
          </table:table-cell>
          <table:covered-table-cell table:number-columns-repeated="4" table:style-name="ce55"/>
          <table:covered-table-cell table:style-name="ce83"/>
          <table:table-cell table:number-columns-repeated="16377"/>
        </table:table-row>
        <table:table-row table:style-name="ro11">
          <table:table-cell table:style-name="ce17" office:value-type="string" calcext:value-type="string">
            <text:p>Customized Geometric risk premium estimator</text:p>
          </table:table-cell>
          <table:table-cell table:style-name="ce17" table:number-columns-repeated="6"/>
          <table:table-cell table:style-name="ce96" table:number-columns-repeated="3"/>
          <table:table-cell table:style-name="ce111"/>
          <table:table-cell table:style-name="ce96" table:number-columns-repeated="4"/>
          <table:table-cell table:style-name="ce140"/>
          <table:table-cell table:style-name="ce96" table:number-columns-repeated="16368"/>
        </table:table-row>
        <table:table-row table:style-name="ro10">
          <table:table-cell office:value-type="string" calcext:value-type="string">
            <text:p>What is your riskfree rate?</text:p>
          </table:table-cell>
          <table:table-cell/>
          <table:table-cell table:style-name="ce56" office:value-type="string" calcext:value-type="string">
            <office:annotation draw:style-name="gr1" draw:text-style-name="P1" svg:width="3.765cm" svg:height="2.016cm" svg:x="7.254cm" svg:y="3.946cm" draw:caption-point-x="4.12cm" draw:caption-point-y="0.565cm">
              <dc:creator>Edison Achalma Mendoza</dc:creator>
              <dc:date>2024-07-31T03:25:00</dc:date>
              <text:p>Aswath Damodaran:</text:p>
              <text:p><text:span text:style-name="T1">ST: Short term (Treasury bill)</text:span></text:p>
              <text:p><text:span text:style-name="T1">LT: Long term (Treasury bond)</text:span></text:p>
            </office:annotation>
            <text:p>LT</text:p>
          </table:table-cell>
          <table:table-cell table:number-columns-repeated="2"/>
          <table:table-cell table:style-name="ce67" office:value-type="string" calcext:value-type="string">
            <text:p>Estimates of risk premiums from 1928, over the last 50 years and over the last 10 years</text:p>
          </table:table-cell>
          <table:table-cell table:style-name="ce84" table:number-columns-repeated="4"/>
          <table:table-cell table:style-name="ce112"/>
          <table:table-cell table:style-name="ce120"/>
          <table:table-cell table:number-columns-repeated="16372"/>
        </table:table-row>
        <table:table-row table:style-name="ro10">
          <table:table-cell office:value-type="string" calcext:value-type="string">
            <text:p>Enter your starting year</text:p>
          </table:table-cell>
          <table:table-cell/>
          <table:table-cell table:style-name="ce56" office:value-type="float" office:value="1981" calcext:value-type="float">
            <office:annotation draw:style-name="gr2" draw:text-style-name="P1" svg:width="4.03cm" svg:height="2.989cm" svg:x="6.143cm" svg:y="4.052cm" draw:caption-point-x="5.231cm" draw:caption-point-y="1.015cm">
              <dc:creator>Edison Achalma Mendoza</dc:creator>
              <dc:date>2024-07-31T03:25:00</dc:date>
              <text:p>Aswath Damodaran:</text:p>
              <text:p><text:span text:style-name="T1">The risk premium will be computed from this year to the current year.</text:span></text:p>
            </office:annotation>
            <text:p>1981</text:p>
          </table:table-cell>
          <table:table-cell table:number-columns-repeated="2"/>
          <table:table-cell table:style-name="ce68" office:value-type="string" calcext:value-type="string">
            <text:p>are provided at the bottom of this table.</text:p>
          </table:table-cell>
          <table:table-cell table:style-name="ce85" table:number-columns-repeated="4"/>
          <table:table-cell table:style-name="ce113"/>
          <table:table-cell table:style-name="ce120"/>
          <table:table-cell table:number-columns-repeated="16372"/>
        </table:table-row>
        <table:table-row table:style-name="ro10">
          <table:table-cell table:number-columns-repeated="4"/>
          <table:table-cell table:style-name="ce63"/>
          <table:table-cell table:number-columns-repeated="16379"/>
        </table:table-row>
        <table:table-row table:style-name="ro10">
          <table:table-cell office:value-type="string" calcext:value-type="string">
            <text:p>Value of stocks in starting year:</text:p>
          </table:table-cell>
          <table:table-cell table:number-columns-repeated="3"/>
          <table:table-cell table:style-name="ce64" table:formula="of:=IF([.C10]=1928;100;VLOOKUP([.C10]-1;[.A19:.H111];6))" office:value-type="float" office:value="7934.26377893418" calcext:value-type="float">
            <text:p><text:s/>$7,934.26 </text:p>
          </table:table-cell>
          <table:table-cell table:number-columns-repeated="16379"/>
        </table:table-row>
        <table:table-row table:style-name="ro10">
          <table:table-cell office:value-type="string" calcext:value-type="string">
            <text:p>Value of T.Bills in starting year:</text:p>
          </table:table-cell>
          <table:table-cell table:number-columns-repeated="3"/>
          <table:table-cell table:style-name="ce64" table:formula="of:=IF([.C10]=1928;100;VLOOKUP([.C10]-1;[.A19:.H111];7))" office:value-type="float" office:value="453.463892445614" calcext:value-type="float">
            <text:p><text:s/>$453.46 </text:p>
          </table:table-cell>
          <table:table-cell table:number-columns-repeated="16379"/>
        </table:table-row>
        <table:table-row table:style-name="ro10">
          <table:table-cell office:value-type="string" calcext:value-type="string">
            <text:p>Value of T.bonds in starting year:</text:p>
          </table:table-cell>
          <table:table-cell table:number-columns-repeated="3"/>
          <table:table-cell table:style-name="ce64" table:formula="of:=IF([.C10]=1928;100;VLOOKUP([.C10]-1;[.A18:.H111];8))" office:value-type="float" office:value="448.166993361641" calcext:value-type="float">
            <text:p><text:s/>$448.17 </text:p>
          </table:table-cell>
          <table:table-cell table:number-columns-repeated="16379"/>
        </table:table-row>
        <table:table-row table:style-name="ro10">
          <table:table-cell office:value-type="string" calcext:value-type="string">
            <text:p>Estimate of risk premium based on your inputs:</text:p>
          </table:table-cell>
          <table:table-cell table:number-columns-repeated="3"/>
          <table:table-cell table:style-name="ce65" table:formula="of:=IF([.C9]=&quot;ST&quot;;([.F109]/[.E12])^(1/([.A109]-[.C10]+1))-([.G109]/[.E13])^(1/([.A109]-[.C10]+1));([.F109]/[.E12])^(1/([.A109]-[.C10]+1))-([.H109]/[.E14])^(1/([.A109]-[.C10]+1)))" office:value-type="percentage" office:value="0.0311680004854611" calcext:value-type="percentage">
            <text:p>3.12 %</text:p>
          </table:table-cell>
          <table:table-cell table:number-columns-repeated="16379"/>
        </table:table-row>
        <table:table-row table:style-name="ro10">
          <table:table-cell table:number-columns-repeated="16384"/>
        </table:table-row>
        <table:table-row table:style-name="ro10">
          <table:table-cell/>
          <table:table-cell table:style-name="ce40" office:value-type="string" calcext:value-type="string" table:number-columns-spanned="4" table:number-rows-spanned="1">
            <text:p>Annual Returns on Investments in</text:p>
          </table:table-cell>
          <table:covered-table-cell table:number-columns-repeated="3" table:style-name="ce57"/>
          <table:table-cell table:style-name="ce69" office:value-type="string" calcext:value-type="string" table:number-columns-spanned="4" table:number-rows-spanned="1">
            <text:p>Value of $100 invested at start of 1928 in</text:p>
          </table:table-cell>
          <table:covered-table-cell table:number-columns-repeated="2" table:style-name="ce57"/>
          <table:covered-table-cell table:style-name="ce103"/>
          <table:table-cell table:style-name="ce69" office:value-type="string" calcext:value-type="string" table:number-columns-spanned="4" table:number-rows-spanned="1">
            <text:p>Annual Risk Premium</text:p>
          </table:table-cell>
          <table:covered-table-cell table:number-columns-repeated="2" table:style-name="ce57"/>
          <table:covered-table-cell table:style-name="ce103"/>
          <table:table-cell table:style-name="ce126"/>
          <table:table-cell table:style-name="ce69" office:value-type="string" calcext:value-type="string" table:number-columns-spanned="4" table:number-rows-spanned="1">
            <text:p>Annual Real Returns on</text:p>
          </table:table-cell>
          <table:covered-table-cell table:number-columns-repeated="2" table:style-name="ce57"/>
          <table:covered-table-cell table:style-name="ce103"/>
          <table:table-cell table:style-name="ce74" table:number-columns-repeated="2"/>
          <table:table-cell table:number-columns-repeated="16364"/>
        </table:table-row>
        <table:table-row table:style-name="ro12">
          <table:table-cell table:style-name="ce19" office:value-type="string" calcext:value-type="string">
            <text:p>Year</text:p>
          </table:table-cell>
          <table:table-cell table:style-name="ce19" office:value-type="string" calcext:value-type="string">
            <text:p>S&amp;P 500 (includes dividends)</text:p>
          </table:table-cell>
          <table:table-cell table:style-name="ce19" office:value-type="string" calcext:value-type="string">
            <text:p>3-month T.Bill</text:p>
          </table:table-cell>
          <table:table-cell table:style-name="ce19" office:value-type="string" calcext:value-type="string">
            <text:p>US T. Bond</text:p>
          </table:table-cell>
          <table:table-cell table:style-name="ce19" office:value-type="string" calcext:value-type="string">
            <text:p><text:s/>Baa Corporate Bond</text:p>
          </table:table-cell>
          <table:table-cell table:style-name="ce19" office:value-type="string" calcext:value-type="string">
            <text:p>S&amp;P 500 (includes dividends)3</text:p>
          </table:table-cell>
          <table:table-cell table:style-name="ce19" office:value-type="string" calcext:value-type="string">
            <text:p>3-month T.Bill4</text:p>
          </table:table-cell>
          <table:table-cell table:style-name="ce97" office:value-type="string" calcext:value-type="string">
            <text:p>US T. Bond5</text:p>
          </table:table-cell>
          <table:table-cell table:style-name="ce19" office:value-type="string" calcext:value-type="string">
            <text:p><text:s/>Baa Corporate Bond6</text:p>
          </table:table-cell>
          <table:table-cell table:style-name="ce106" office:value-type="string" calcext:value-type="string">
            <text:p>Stocks - Bills</text:p>
          </table:table-cell>
          <table:table-cell table:style-name="ce114" office:value-type="string" calcext:value-type="string">
            <text:p>Stocks - Bonds</text:p>
          </table:table-cell>
          <table:table-cell table:style-name="ce121" office:value-type="string" calcext:value-type="string">
            <text:p>Stocks - Baa Corp Bond</text:p>
          </table:table-cell>
          <table:table-cell table:style-name="ce121" office:value-type="string" calcext:value-type="string">
            <text:p>Historical risk premium</text:p>
          </table:table-cell>
          <table:table-cell table:style-name="ce106" office:value-type="string" calcext:value-type="string">
            <text:p>Inflation Rate</text:p>
          </table:table-cell>
          <table:table-cell table:style-name="ce106" office:value-type="string" calcext:value-type="string">
            <text:p>S&amp;P 500 (includes dividends)2</text:p>
          </table:table-cell>
          <table:table-cell table:style-name="ce106" office:value-type="string" calcext:value-type="string">
            <text:p>3-month T. Bill (Real)</text:p>
          </table:table-cell>
          <table:table-cell table:style-name="ce106" office:value-type="string" calcext:value-type="string">
            <text:p>!0-year T.Bonds</text:p>
          </table:table-cell>
          <table:table-cell table:style-name="ce106" office:value-type="string" calcext:value-type="string">
            <text:p>Baa Corp Bonds</text:p>
          </table:table-cell>
          <table:table-cell table:style-name="ce143" table:number-columns-repeated="16366"/>
        </table:table-row>
        <table:table-row table:style-name="ro10">
          <table:table-cell table:style-name="ce20" office:value-type="float" office:value="1928" calcext:value-type="float">
            <text:p>1928</text:p>
          </table:table-cell>
          <table:table-cell table:style-name="ce41" table:formula="of:=([$'S&amp;P 500 &amp; Raw Data'.B4]-[$'S&amp;P 500 &amp; Raw Data'.B3]+[$'S&amp;P 500 &amp; Raw Data'.C4])/[$'S&amp;P 500 &amp; Raw Data'.B3]" office:value-type="percentage" office:value="0.438111551528879" calcext:value-type="percentage">
            <text:p>43.81 %</text:p>
          </table:table-cell>
          <table:table-cell table:style-name="ce41" office:value-type="percentage" office:value="0.0308" calcext:value-type="percentage">
            <text:p>3.08 %</text:p>
          </table:table-cell>
          <table:table-cell table:style-name="ce41" table:formula="of:=[$'S&amp;P 500 &amp; Raw Data'.F4]" office:value-type="percentage" office:value="0.0083547085897993" calcext:value-type="percentage">
            <text:p>0.84 %</text:p>
          </table:table-cell>
          <table:table-cell table:style-name="ce41" table:formula="of:=[$'S&amp;P 500 &amp; Raw Data'.J4]" office:value-type="percentage" office:value="0.0321955147023244" calcext:value-type="percentage">
            <text:p>3.22 %</text:p>
          </table:table-cell>
          <table:table-cell table:style-name="ce70" table:formula="of:=100*(1+[.B19])" office:value-type="float" office:value="143.811155152888" calcext:value-type="float">
            <text:p><text:s/>$143.81 </text:p>
          </table:table-cell>
          <table:table-cell table:style-name="ce70" table:formula="of:=100*(1+[.C19])" office:value-type="float" office:value="103.08" calcext:value-type="float">
            <text:p><text:s/>$103.08 </text:p>
          </table:table-cell>
          <table:table-cell table:style-name="ce98" table:formula="of:=100*(1+[.D19])" office:value-type="float" office:value="100.83547085898" calcext:value-type="float">
            <text:p><text:s/>$100.84 </text:p>
          </table:table-cell>
          <table:table-cell table:style-name="ce70" table:formula="of:=100*(1+[.E19])" office:value-type="float" office:value="103.219551470232" calcext:value-type="float">
            <text:p><text:s/>$103.22 </text:p>
          </table:table-cell>
          <table:table-cell table:style-name="ce41" table:formula="of:=[.B19]-[.C19]" office:value-type="percentage" office:value="0.407311551528879" calcext:value-type="percentage">
            <text:p>40.73 %</text:p>
          </table:table-cell>
          <table:table-cell table:style-name="ce115" table:formula="of:=[.B19]-[.D19]" office:value-type="percentage" office:value="0.42975684293908" calcext:value-type="percentage">
            <text:p>42.98 %</text:p>
          </table:table-cell>
          <table:table-cell table:style-name="ce122" table:formula="of:=[.B19]-[.E19]" office:value-type="percentage" office:value="0.405916036826555" calcext:value-type="percentage">
            <text:p>40.59 %</text:p>
          </table:table-cell>
          <table:table-cell table:style-name="ce125"/>
          <table:table-cell table:style-name="ce127" office:value-type="percentage" office:value="-0.0115218" calcext:value-type="percentage">
            <text:p>-1.15 %</text:p>
          </table:table-cell>
          <table:table-cell table:style-name="ce132" table:formula="of:=(1+[.B19])/(1+[.$N19])-1" office:value-type="percentage" office:value="0.454874322497834" calcext:value-type="percentage">
            <text:p>45.49 %</text:p>
          </table:table-cell>
          <table:table-cell table:style-name="ce132" table:formula="of:=(1+[.C19])/(1+[.$N19])-1" office:value-type="percentage" office:value="0.0428151071009961" calcext:value-type="percentage">
            <text:p>4.28 %</text:p>
          </table:table-cell>
          <table:table-cell table:style-name="ce132" table:formula="of:=(1+[.D19])/(1+[.$N19])-1" office:value-type="percentage" office:value="0.0201081911465517" calcext:value-type="percentage">
            <text:p>2.01 %</text:p>
          </table:table-cell>
          <table:table-cell table:style-name="ce132" table:formula="of:=(1+[.E19])/(1+[.$N19])-1" office:value-type="percentage" office:value="0.0442268880611878" calcext:value-type="percentage">
            <text:p>4.42 %</text:p>
          </table:table-cell>
          <table:table-cell table:number-columns-repeated="16366"/>
        </table:table-row>
        <table:table-row table:style-name="ro10">
          <table:table-cell table:style-name="ce20" office:value-type="float" office:value="1929" calcext:value-type="float">
            <text:p>1929</text:p>
          </table:table-cell>
          <table:table-cell table:style-name="ce41" table:formula="of:=([$'S&amp;P 500 &amp; Raw Data'.B5]-[$'S&amp;P 500 &amp; Raw Data'.B4]+[$'S&amp;P 500 &amp; Raw Data'.C5])/[$'S&amp;P 500 &amp; Raw Data'.B4]" office:value-type="percentage" office:value="-0.0829794661190966" calcext:value-type="percentage">
            <text:p>-8.30 %</text:p>
          </table:table-cell>
          <table:table-cell table:style-name="ce41" office:value-type="percentage" office:value="0.0316" calcext:value-type="percentage">
            <text:p>3.16 %</text:p>
          </table:table-cell>
          <table:table-cell table:style-name="ce41" table:formula="of:=[$'S&amp;P 500 &amp; Raw Data'.F5]" office:value-type="percentage" office:value="0.0420380415632043" calcext:value-type="percentage">
            <text:p>4.20 %</text:p>
          </table:table-cell>
          <table:table-cell table:style-name="ce41" table:formula="of:=[$'S&amp;P 500 &amp; Raw Data'.J5]" office:value-type="percentage" office:value="0.0301785623990404" calcext:value-type="percentage">
            <text:p>3.02 %</text:p>
          </table:table-cell>
          <table:table-cell table:style-name="ce70" table:formula="of:=[.F19]*(1+[.B20])" office:value-type="float" office:value="131.877782276331" calcext:value-type="float">
            <text:p><text:s/>$131.88 </text:p>
          </table:table-cell>
          <table:table-cell table:style-name="ce70" table:formula="of:=[.G19]*(1+[.C20])" office:value-type="float" office:value="106.337328" calcext:value-type="float">
            <text:p><text:s/>$106.34 </text:p>
          </table:table-cell>
          <table:table-cell table:style-name="ce98" table:formula="of:=[.H19]*(1+[.D20])" office:value-type="float" office:value="105.074396573995" calcext:value-type="float">
            <text:p><text:s/>$105.07 </text:p>
          </table:table-cell>
          <table:table-cell table:style-name="ce70" table:formula="of:=[.I19]*(1+[.E20])" office:value-type="float" office:value="106.334569145078" calcext:value-type="float">
            <text:p><text:s/>$106.33 </text:p>
          </table:table-cell>
          <table:table-cell table:style-name="ce41" table:formula="of:=[.B20]-[.C20]" office:value-type="percentage" office:value="-0.114579466119097" calcext:value-type="percentage">
            <text:p>-11.46 %</text:p>
          </table:table-cell>
          <table:table-cell table:style-name="ce115" table:formula="of:=[.B20]-[.D20]" office:value-type="percentage" office:value="-0.125017507682301" calcext:value-type="percentage">
            <text:p>-12.50 %</text:p>
          </table:table-cell>
          <table:table-cell table:style-name="ce122" table:formula="of:=[.B20]-[.E20]" office:value-type="percentage" office:value="-0.113158028518137" calcext:value-type="percentage">
            <text:p>-11.32 %</text:p>
          </table:table-cell>
          <table:table-cell table:style-name="ce125"/>
          <table:table-cell table:style-name="ce127" office:value-type="percentage" office:value="0" calcext:value-type="percentage">
            <text:p>0.00 %</text:p>
          </table:table-cell>
          <table:table-cell table:style-name="ce133" table:formula="of:=(1+[.B20])/(1+[.$N20])-1" office:value-type="percentage" office:value="-0.0829794661190966" calcext:value-type="percentage">
            <text:p>-8.30 %</text:p>
          </table:table-cell>
          <table:table-cell table:style-name="ce133" table:formula="of:=(1+[.C20])/(1+[.$N20])-1" office:value-type="percentage" office:value="0.0316000000000001" calcext:value-type="percentage">
            <text:p>3.16 %</text:p>
          </table:table-cell>
          <table:table-cell table:style-name="ce133" table:formula="of:=(1+[.D20])/(1+[.$N20])-1" office:value-type="percentage" office:value="0.0420380415632042" calcext:value-type="percentage">
            <text:p>4.20 %</text:p>
          </table:table-cell>
          <table:table-cell table:style-name="ce133" table:formula="of:=(1+[.E20])/(1+[.$N20])-1" office:value-type="percentage" office:value="0.0301785623990405" calcext:value-type="percentage">
            <text:p>3.02 %</text:p>
          </table:table-cell>
          <table:table-cell table:number-columns-repeated="16366"/>
        </table:table-row>
        <table:table-row table:style-name="ro10">
          <table:table-cell table:style-name="ce20" office:value-type="float" office:value="1930" calcext:value-type="float">
            <text:p>1930</text:p>
          </table:table-cell>
          <table:table-cell table:style-name="ce41" table:formula="of:=([$'S&amp;P 500 &amp; Raw Data'.B6]-[$'S&amp;P 500 &amp; Raw Data'.B5]+[$'S&amp;P 500 &amp; Raw Data'.C6])/[$'S&amp;P 500 &amp; Raw Data'.B5]" office:value-type="percentage" office:value="-0.251236363636364" calcext:value-type="percentage">
            <text:p>-25.12 %</text:p>
          </table:table-cell>
          <table:table-cell table:style-name="ce41" office:value-type="percentage" office:value="0.0455" calcext:value-type="percentage">
            <text:p>4.55 %</text:p>
          </table:table-cell>
          <table:table-cell table:style-name="ce41" table:formula="of:=[$'S&amp;P 500 &amp; Raw Data'.F6]" office:value-type="percentage" office:value="0.0454093143489704" calcext:value-type="percentage">
            <text:p>4.54 %</text:p>
          </table:table-cell>
          <table:table-cell table:style-name="ce41" table:formula="of:=[$'S&amp;P 500 &amp; Raw Data'.J6]" office:value-type="percentage" office:value="0.00539780946482383" calcext:value-type="percentage">
            <text:p>0.54 %</text:p>
          </table:table-cell>
          <table:table-cell table:style-name="ce70" table:formula="of:=[.F20]*(1+[.B21])" office:value-type="float" office:value="98.7452878127973" calcext:value-type="float">
            <text:p><text:s/>$98.75 </text:p>
          </table:table-cell>
          <table:table-cell table:style-name="ce70" table:formula="of:=[.G20]*(1+[.C21])" office:value-type="float" office:value="111.175676424" calcext:value-type="float">
            <text:p><text:s/>$111.18 </text:p>
          </table:table-cell>
          <table:table-cell table:style-name="ce98" table:formula="of:=[.H20]*(1+[.D21])" office:value-type="float" office:value="109.845752878052" calcext:value-type="float">
            <text:p><text:s/>$109.85 </text:p>
          </table:table-cell>
          <table:table-cell table:style-name="ce70" table:formula="of:=[.I20]*(1+[.E21])" office:value-type="float" office:value="106.908542888847" calcext:value-type="float">
            <text:p><text:s/>$106.91 </text:p>
          </table:table-cell>
          <table:table-cell table:style-name="ce41" table:formula="of:=[.B21]-[.C21]" office:value-type="percentage" office:value="-0.296736363636364" calcext:value-type="percentage">
            <text:p>-29.67 %</text:p>
          </table:table-cell>
          <table:table-cell table:style-name="ce115" table:formula="of:=[.B21]-[.D21]" office:value-type="percentage" office:value="-0.296645677985334" calcext:value-type="percentage">
            <text:p>-29.66 %</text:p>
          </table:table-cell>
          <table:table-cell table:style-name="ce122" table:formula="of:=[.B21]-[.E21]" office:value-type="percentage" office:value="-0.256634173101187" calcext:value-type="percentage">
            <text:p>-25.66 %</text:p>
          </table:table-cell>
          <table:table-cell table:style-name="ce125"/>
          <table:table-cell table:style-name="ce127" office:value-type="percentage" office:value="-0.026712" calcext:value-type="percentage">
            <text:p>-2.67 %</text:p>
          </table:table-cell>
          <table:table-cell table:style-name="ce133" table:formula="of:=(1+[.B21])/(1+[.$N21])-1" office:value-type="percentage" office:value="-0.230686460365651" calcext:value-type="percentage">
            <text:p>-23.07 %</text:p>
          </table:table-cell>
          <table:table-cell table:style-name="ce133" table:formula="of:=(1+[.C21])/(1+[.$N21])-1" office:value-type="percentage" office:value="0.0741938665636481" calcext:value-type="percentage">
            <text:p>7.42 %</text:p>
          </table:table-cell>
          <table:table-cell table:style-name="ce133" table:formula="of:=(1+[.D21])/(1+[.$N21])-1" office:value-type="percentage" office:value="0.0741006920345986" calcext:value-type="percentage">
            <text:p>7.41 %</text:p>
          </table:table-cell>
          <table:table-cell table:style-name="ce133" table:formula="of:=(1+[.E21])/(1+[.$N21])-1" office:value-type="percentage" office:value="0.0329910668423159" calcext:value-type="percentage">
            <text:p>3.30 %</text:p>
          </table:table-cell>
          <table:table-cell table:number-columns-repeated="16366"/>
        </table:table-row>
        <table:table-row table:style-name="ro10">
          <table:table-cell table:style-name="ce20" office:value-type="float" office:value="1931" calcext:value-type="float">
            <text:p>1931</text:p>
          </table:table-cell>
          <table:table-cell table:style-name="ce41" table:formula="of:=([$'S&amp;P 500 &amp; Raw Data'.B7]-[$'S&amp;P 500 &amp; Raw Data'.B6]+[$'S&amp;P 500 &amp; Raw Data'.C7])/[$'S&amp;P 500 &amp; Raw Data'.B6]" office:value-type="percentage" office:value="-0.438375488917862" calcext:value-type="percentage">
            <text:p>-43.84 %</text:p>
          </table:table-cell>
          <table:table-cell table:style-name="ce41" office:value-type="percentage" office:value="0.0231" calcext:value-type="percentage">
            <text:p>2.31 %</text:p>
          </table:table-cell>
          <table:table-cell table:style-name="ce41" table:formula="of:=[$'S&amp;P 500 &amp; Raw Data'.F7]" office:value-type="percentage" office:value="-0.0255885596194225" calcext:value-type="percentage">
            <text:p>-2.56 %</text:p>
          </table:table-cell>
          <table:table-cell table:style-name="ce41" table:formula="of:=[$'S&amp;P 500 &amp; Raw Data'.J7]" office:value-type="percentage" office:value="-0.156807750826676" calcext:value-type="percentage">
            <text:p>-15.68 %</text:p>
          </table:table-cell>
          <table:table-cell table:style-name="ce70" table:formula="of:=[.F21]*(1+[.B22])" office:value-type="float" office:value="55.4577739895273" calcext:value-type="float">
            <text:p><text:s/>$55.46 </text:p>
          </table:table-cell>
          <table:table-cell table:style-name="ce70" table:formula="of:=[.G21]*(1+[.C22])" office:value-type="float" office:value="113.743834549394" calcext:value-type="float">
            <text:p><text:s/>$113.74 </text:p>
          </table:table-cell>
          <table:table-cell table:style-name="ce98" table:formula="of:=[.H21]*(1+[.D22])" office:value-type="float" office:value="107.034958281592" calcext:value-type="float">
            <text:p><text:s/>$107.03 </text:p>
          </table:table-cell>
          <table:table-cell table:style-name="ce70" table:formula="of:=[.I21]*(1+[.E22])" office:value-type="float" office:value="90.1444547342898" calcext:value-type="float">
            <text:p><text:s/>$90.14 </text:p>
          </table:table-cell>
          <table:table-cell table:style-name="ce41" table:formula="of:=[.B22]-[.C22]" office:value-type="percentage" office:value="-0.461475488917862" calcext:value-type="percentage">
            <text:p>-46.15 %</text:p>
          </table:table-cell>
          <table:table-cell table:style-name="ce115" table:formula="of:=[.B22]-[.D22]" office:value-type="percentage" office:value="-0.412786929298439" calcext:value-type="percentage">
            <text:p>-41.28 %</text:p>
          </table:table-cell>
          <table:table-cell table:style-name="ce122" table:formula="of:=[.B22]-[.E22]" office:value-type="percentage" office:value="-0.281567738091186" calcext:value-type="percentage">
            <text:p>-28.16 %</text:p>
          </table:table-cell>
          <table:table-cell table:style-name="ce125"/>
          <table:table-cell table:style-name="ce127" office:value-type="percentage" office:value="-0.0893214" calcext:value-type="percentage">
            <text:p>-8.93 %</text:p>
          </table:table-cell>
          <table:table-cell table:style-name="ce133" table:formula="of:=(1+[.B22])/(1+[.$N22])-1" office:value-type="percentage" office:value="-0.383290096986864" calcext:value-type="percentage">
            <text:p>-38.33 %</text:p>
          </table:table-cell>
          <table:table-cell table:style-name="ce133" table:formula="of:=(1+[.C22])/(1+[.$N22])-1" office:value-type="percentage" office:value="0.123447943105284" calcext:value-type="percentage">
            <text:p>12.34 %</text:p>
          </table:table-cell>
          <table:table-cell table:style-name="ce133" table:formula="of:=(1+[.D22])/(1+[.$N22])-1" office:value-type="percentage" office:value="0.0699839003360543" calcext:value-type="percentage">
            <text:p>7.00 %</text:p>
          </table:table-cell>
          <table:table-cell table:style-name="ce133" table:formula="of:=(1+[.E22])/(1+[.$N22])-1" office:value-type="percentage" office:value="-0.0741055635069012" calcext:value-type="percentage">
            <text:p>-7.41 %</text:p>
          </table:table-cell>
          <table:table-cell table:number-columns-repeated="16366"/>
        </table:table-row>
        <table:table-row table:style-name="ro10">
          <table:table-cell table:style-name="ce20" office:value-type="float" office:value="1932" calcext:value-type="float">
            <text:p>1932</text:p>
          </table:table-cell>
          <table:table-cell table:style-name="ce41" table:formula="of:=([$'S&amp;P 500 &amp; Raw Data'.B8]-[$'S&amp;P 500 &amp; Raw Data'.B7]+[$'S&amp;P 500 &amp; Raw Data'.C8])/[$'S&amp;P 500 &amp; Raw Data'.B7]" office:value-type="percentage" office:value="-0.086423645320197" calcext:value-type="percentage">
            <text:p>-8.64 %</text:p>
          </table:table-cell>
          <table:table-cell table:style-name="ce41" office:value-type="percentage" office:value="0.0107" calcext:value-type="percentage">
            <text:p>1.07 %</text:p>
          </table:table-cell>
          <table:table-cell table:style-name="ce41" table:formula="of:=[$'S&amp;P 500 &amp; Raw Data'.F8]" office:value-type="percentage" office:value="0.0879030699047733" calcext:value-type="percentage">
            <text:p>8.79 %</text:p>
          </table:table-cell>
          <table:table-cell table:style-name="ce41" table:formula="of:=[$'S&amp;P 500 &amp; Raw Data'.J8]" office:value-type="percentage" office:value="0.235896016757402" calcext:value-type="percentage">
            <text:p>23.59 %</text:p>
          </table:table-cell>
          <table:table-cell table:style-name="ce70" table:formula="of:=[.F22]*(1+[.B23])" office:value-type="float" office:value="50.6649110000087" calcext:value-type="float">
            <text:p><text:s/>$50.66 </text:p>
          </table:table-cell>
          <table:table-cell table:style-name="ce70" table:formula="of:=[.G22]*(1+[.C23])" office:value-type="float" office:value="114.960893579073" calcext:value-type="float">
            <text:p><text:s/>$114.96 </text:p>
          </table:table-cell>
          <table:table-cell table:style-name="ce98" table:formula="of:=[.H22]*(1+[.D23])" office:value-type="float" office:value="116.443659701673" calcext:value-type="float">
            <text:p><text:s/>$116.44 </text:p>
          </table:table-cell>
          <table:table-cell table:style-name="ce70" table:formula="of:=[.I22]*(1+[.E23])" office:value-type="float" office:value="111.409172538877" calcext:value-type="float">
            <text:p><text:s/>$111.41 </text:p>
          </table:table-cell>
          <table:table-cell table:style-name="ce41" table:formula="of:=[.B23]-[.C23]" office:value-type="percentage" office:value="-0.097123645320197" calcext:value-type="percentage">
            <text:p>-9.71 %</text:p>
          </table:table-cell>
          <table:table-cell table:style-name="ce115" table:formula="of:=[.B23]-[.D23]" office:value-type="percentage" office:value="-0.17432671522497" calcext:value-type="percentage">
            <text:p>-17.43 %</text:p>
          </table:table-cell>
          <table:table-cell table:style-name="ce122" table:formula="of:=[.B23]-[.E23]" office:value-type="percentage" office:value="-0.322319662077599" calcext:value-type="percentage">
            <text:p>-32.23 %</text:p>
          </table:table-cell>
          <table:table-cell table:style-name="ce125"/>
          <table:table-cell table:style-name="ce127" office:value-type="percentage" office:value="-0.1030137" calcext:value-type="percentage">
            <text:p>-10.30 %</text:p>
          </table:table-cell>
          <table:table-cell table:style-name="ce133" table:formula="of:=(1+[.B23])/(1+[.$N23])-1" office:value-type="percentage" office:value="0.0184953267177024" calcext:value-type="percentage">
            <text:p>1.85 %</text:p>
          </table:table-cell>
          <table:table-cell table:style-name="ce133" table:formula="of:=(1+[.C23])/(1+[.$N23])-1" office:value-type="percentage" office:value="0.126773062197271" calcext:value-type="percentage">
            <text:p>12.68 %</text:p>
          </table:table-cell>
          <table:table-cell table:style-name="ce133" table:formula="of:=(1+[.D23])/(1+[.$N23])-1" office:value-type="percentage" office:value="0.212842459137641" calcext:value-type="percentage">
            <text:p>21.28 %</text:p>
          </table:table-cell>
          <table:table-cell table:style-name="ce133" table:formula="of:=(1+[.E23])/(1+[.$N23])-1" office:value-type="percentage" office:value="0.377831541861232" calcext:value-type="percentage">
            <text:p>37.78 %</text:p>
          </table:table-cell>
          <table:table-cell table:number-columns-repeated="16366"/>
        </table:table-row>
        <table:table-row table:style-name="ro10">
          <table:table-cell table:style-name="ce20" office:value-type="float" office:value="1933" calcext:value-type="float">
            <text:p>1933</text:p>
          </table:table-cell>
          <table:table-cell table:style-name="ce41" table:formula="of:=([$'S&amp;P 500 &amp; Raw Data'.B9]-[$'S&amp;P 500 &amp; Raw Data'.B8]+[$'S&amp;P 500 &amp; Raw Data'.C9])/[$'S&amp;P 500 &amp; Raw Data'.B8]" office:value-type="percentage" office:value="0.49982225433526" calcext:value-type="percentage">
            <text:p>49.98 %</text:p>
          </table:table-cell>
          <table:table-cell table:style-name="ce41" office:value-type="percentage" office:value="0.0096" calcext:value-type="percentage">
            <text:p>0.96 %</text:p>
          </table:table-cell>
          <table:table-cell table:style-name="ce41" table:formula="of:=[$'S&amp;P 500 &amp; Raw Data'.F9]" office:value-type="percentage" office:value="0.0185527208918574" calcext:value-type="percentage">
            <text:p>1.86 %</text:p>
          </table:table-cell>
          <table:table-cell table:style-name="ce41" table:formula="of:=[$'S&amp;P 500 &amp; Raw Data'.J9]" office:value-type="percentage" office:value="0.129668936975483" calcext:value-type="percentage">
            <text:p>12.97 %</text:p>
          </table:table-cell>
          <table:table-cell table:style-name="ce70" table:formula="of:=[.F23]*(1+[.B24])" office:value-type="float" office:value="75.9883610317284" calcext:value-type="float">
            <text:p><text:s/>$75.99 </text:p>
          </table:table-cell>
          <table:table-cell table:style-name="ce70" table:formula="of:=[.G23]*(1+[.C24])" office:value-type="float" office:value="116.064518157432" calcext:value-type="float">
            <text:p><text:s/>$116.06 </text:p>
          </table:table-cell>
          <table:table-cell table:style-name="ce98" table:formula="of:=[.H23]*(1+[.D24])" office:value-type="float" office:value="118.604006419744" calcext:value-type="float">
            <text:p><text:s/>$118.60 </text:p>
          </table:table-cell>
          <table:table-cell table:style-name="ce70" table:formula="of:=[.I23]*(1+[.E24])" office:value-type="float" office:value="125.855481511311" calcext:value-type="float">
            <text:p><text:s/>$125.86 </text:p>
          </table:table-cell>
          <table:table-cell table:style-name="ce41" table:formula="of:=[.B24]-[.C24]" office:value-type="percentage" office:value="0.49022225433526" calcext:value-type="percentage">
            <text:p>49.02 %</text:p>
          </table:table-cell>
          <table:table-cell table:style-name="ce115" table:formula="of:=[.B24]-[.D24]" office:value-type="percentage" office:value="0.481269533443403" calcext:value-type="percentage">
            <text:p>48.13 %</text:p>
          </table:table-cell>
          <table:table-cell table:style-name="ce122" table:formula="of:=[.B24]-[.E24]" office:value-type="percentage" office:value="0.370153317359778" calcext:value-type="percentage">
            <text:p>37.02 %</text:p>
          </table:table-cell>
          <table:table-cell table:style-name="ce125"/>
          <table:table-cell table:style-name="ce127" office:value-type="percentage" office:value="-0.0519243" calcext:value-type="percentage">
            <text:p>-5.19 %</text:p>
          </table:table-cell>
          <table:table-cell table:style-name="ce133" table:formula="of:=(1+[.B24])/(1+[.$N24])-1" office:value-type="percentage" office:value="0.581964662036228" calcext:value-type="percentage">
            <text:p>58.20 %</text:p>
          </table:table-cell>
          <table:table-cell table:style-name="ce133" table:formula="of:=(1+[.C24])/(1+[.$N24])-1" office:value-type="percentage" office:value="0.0648938687068976" calcext:value-type="percentage">
            <text:p>6.49 %</text:p>
          </table:table-cell>
          <table:table-cell table:style-name="ce133" table:formula="of:=(1+[.D24])/(1+[.$N24])-1" office:value-type="percentage" office:value="0.0743369130670235" calcext:value-type="percentage">
            <text:p>7.43 %</text:p>
          </table:table-cell>
          <table:table-cell table:style-name="ce133" table:formula="of:=(1+[.E24])/(1+[.$N24])-1" office:value-type="percentage" office:value="0.191538752628596" calcext:value-type="percentage">
            <text:p>19.15 %</text:p>
          </table:table-cell>
          <table:table-cell table:number-columns-repeated="16366"/>
        </table:table-row>
        <table:table-row table:style-name="ro10">
          <table:table-cell table:style-name="ce20" office:value-type="float" office:value="1934" calcext:value-type="float">
            <text:p>1934</text:p>
          </table:table-cell>
          <table:table-cell table:style-name="ce41" table:formula="of:=([$'S&amp;P 500 &amp; Raw Data'.B10]-[$'S&amp;P 500 &amp; Raw Data'.B9]+[$'S&amp;P 500 &amp; Raw Data'.C10])/[$'S&amp;P 500 &amp; Raw Data'.B9]" office:value-type="percentage" office:value="-0.0118856569709128" calcext:value-type="percentage">
            <text:p>-1.19 %</text:p>
          </table:table-cell>
          <table:table-cell table:style-name="ce41" table:formula="of:=[$'T. Bill rates'.C12]" office:value-type="percentage" office:value="0.00278333333333333" calcext:value-type="percentage">
            <text:p>0.28 %</text:p>
          </table:table-cell>
          <table:table-cell table:style-name="ce41" table:formula="of:=[$'S&amp;P 500 &amp; Raw Data'.F10]" office:value-type="percentage" office:value="0.0796344261796561" calcext:value-type="percentage">
            <text:p>7.96 %</text:p>
          </table:table-cell>
          <table:table-cell table:style-name="ce41" table:formula="of:=[$'S&amp;P 500 &amp; Raw Data'.J10]" office:value-type="percentage" office:value="0.188164292684826" calcext:value-type="percentage">
            <text:p>18.82 %</text:p>
          </table:table-cell>
          <table:table-cell table:style-name="ce70" table:formula="of:=[.F24]*(1+[.B25])" office:value-type="float" office:value="75.0851894387234" calcext:value-type="float">
            <text:p><text:s/>$75.09 </text:p>
          </table:table-cell>
          <table:table-cell table:style-name="ce70" table:formula="of:=[.G24]*(1+[.C25])" office:value-type="float" office:value="116.387564399637" calcext:value-type="float">
            <text:p><text:s/>$116.39 </text:p>
          </table:table-cell>
          <table:table-cell table:style-name="ce98" table:formula="of:=[.H24]*(1+[.D25])" office:value-type="float" office:value="128.048968413589" calcext:value-type="float">
            <text:p><text:s/>$128.05 </text:p>
          </table:table-cell>
          <table:table-cell table:style-name="ce70" table:formula="of:=[.I24]*(1+[.E25])" office:value-type="float" office:value="149.536989170395" calcext:value-type="float">
            <text:p><text:s/>$149.54 </text:p>
          </table:table-cell>
          <table:table-cell table:style-name="ce41" table:formula="of:=[.B25]-[.C25]" office:value-type="percentage" office:value="-0.0146689903042461" calcext:value-type="percentage">
            <text:p>-1.47 %</text:p>
          </table:table-cell>
          <table:table-cell table:style-name="ce115" table:formula="of:=[.B25]-[.D25]" office:value-type="percentage" office:value="-0.0915200831505689" calcext:value-type="percentage">
            <text:p>-9.15 %</text:p>
          </table:table-cell>
          <table:table-cell table:style-name="ce122" table:formula="of:=[.B25]-[.E25]" office:value-type="percentage" office:value="-0.200049949655739" calcext:value-type="percentage">
            <text:p>-20.00 %</text:p>
          </table:table-cell>
          <table:table-cell table:style-name="ce125"/>
          <table:table-cell table:style-name="ce127" office:value-type="percentage" office:value="0.0347938" calcext:value-type="percentage">
            <text:p>3.48 %</text:p>
          </table:table-cell>
          <table:table-cell table:style-name="ce133" table:formula="of:=(1+[.B25])/(1+[.$N25])-1" office:value-type="percentage" office:value="-0.045109911724358" calcext:value-type="percentage">
            <text:p>-4.51 %</text:p>
          </table:table-cell>
          <table:table-cell table:style-name="ce133" table:formula="of:=(1+[.C25])/(1+[.$N25])-1" office:value-type="percentage" office:value="-0.0309341500371056" calcext:value-type="percentage">
            <text:p>-3.09 %</text:p>
          </table:table-cell>
          <table:table-cell table:style-name="ce133" table:formula="of:=(1+[.D25])/(1+[.$N25])-1" office:value-type="percentage" office:value="0.0433329095899646" calcext:value-type="percentage">
            <text:p>4.33 %</text:p>
          </table:table-cell>
          <table:table-cell table:style-name="ce133" table:formula="of:=(1+[.E25])/(1+[.$N25])-1" office:value-type="percentage" office:value="0.148213579057805" calcext:value-type="percentage">
            <text:p>14.82 %</text:p>
          </table:table-cell>
          <table:table-cell table:number-columns-repeated="16366"/>
        </table:table-row>
        <table:table-row table:style-name="ro10">
          <table:table-cell table:style-name="ce20" office:value-type="float" office:value="1935" calcext:value-type="float">
            <text:p>1935</text:p>
          </table:table-cell>
          <table:table-cell table:style-name="ce41" table:formula="of:=([$'S&amp;P 500 &amp; Raw Data'.B11]-[$'S&amp;P 500 &amp; Raw Data'.B10]+[$'S&amp;P 500 &amp; Raw Data'.C11])/[$'S&amp;P 500 &amp; Raw Data'.B10]" office:value-type="percentage" office:value="0.467404210526316" calcext:value-type="percentage">
            <text:p>46.74 %</text:p>
          </table:table-cell>
          <table:table-cell table:style-name="ce41" table:formula="of:=[$'T. Bill rates'.C13]" office:value-type="percentage" office:value="0.001675" calcext:value-type="percentage">
            <text:p>0.17 %</text:p>
          </table:table-cell>
          <table:table-cell table:style-name="ce41" table:formula="of:=[$'S&amp;P 500 &amp; Raw Data'.F11]" office:value-type="percentage" office:value="0.0447204772965661" calcext:value-type="percentage">
            <text:p>4.47 %</text:p>
          </table:table-cell>
          <table:table-cell table:style-name="ce41" table:formula="of:=[$'S&amp;P 500 &amp; Raw Data'.J11]" office:value-type="percentage" office:value="0.133077318656792" calcext:value-type="percentage">
            <text:p>13.31 %</text:p>
          </table:table-cell>
          <table:table-cell table:style-name="ce70" table:formula="of:=[.F25]*(1+[.B26])" office:value-type="float" office:value="110.180323130549" calcext:value-type="float">
            <text:p><text:s/>$110.18 </text:p>
          </table:table-cell>
          <table:table-cell table:style-name="ce70" table:formula="of:=[.G25]*(1+[.C26])" office:value-type="float" office:value="116.582513570006" calcext:value-type="float">
            <text:p><text:s/>$116.58 </text:p>
          </table:table-cell>
          <table:table-cell table:style-name="ce98" table:formula="of:=[.H25]*(1+[.D26])" office:value-type="float" office:value="133.775379398378" calcext:value-type="float">
            <text:p><text:s/>$133.78 </text:p>
          </table:table-cell>
          <table:table-cell table:style-name="ce70" table:formula="of:=[.I25]*(1+[.E26])" office:value-type="float" office:value="169.436970729201" calcext:value-type="float">
            <text:p><text:s/>$169.44 </text:p>
          </table:table-cell>
          <table:table-cell table:style-name="ce41" table:formula="of:=[.B26]-[.C26]" office:value-type="percentage" office:value="0.465729210526316" calcext:value-type="percentage">
            <text:p>46.57 %</text:p>
          </table:table-cell>
          <table:table-cell table:style-name="ce115" table:formula="of:=[.B26]-[.D26]" office:value-type="percentage" office:value="0.42268373322975" calcext:value-type="percentage">
            <text:p>42.27 %</text:p>
          </table:table-cell>
          <table:table-cell table:style-name="ce122" table:formula="of:=[.B26]-[.E26]" office:value-type="percentage" office:value="0.334326891869524" calcext:value-type="percentage">
            <text:p>33.43 %</text:p>
          </table:table-cell>
          <table:table-cell table:style-name="ce125"/>
          <table:table-cell table:style-name="ce127" office:value-type="percentage" office:value="0.0255293" calcext:value-type="percentage">
            <text:p>2.55 %</text:p>
          </table:table-cell>
          <table:table-cell table:style-name="ce133" table:formula="of:=(1+[.B26])/(1+[.$N26])-1" office:value-type="percentage" office:value="0.430874974051269" calcext:value-type="percentage">
            <text:p>43.09 %</text:p>
          </table:table-cell>
          <table:table-cell table:style-name="ce133" table:formula="of:=(1+[.C26])/(1+[.$N26])-1" office:value-type="percentage" office:value="-0.0232604763218369" calcext:value-type="percentage">
            <text:p>-2.33 %</text:p>
          </table:table-cell>
          <table:table-cell table:style-name="ce133" table:formula="of:=(1+[.D26])/(1+[.$N26])-1" office:value-type="percentage" office:value="0.0187134363655588" calcext:value-type="percentage">
            <text:p>1.87 %</text:p>
          </table:table-cell>
          <table:table-cell table:style-name="ce133" table:formula="of:=(1+[.E26])/(1+[.$N26])-1" office:value-type="percentage" office:value="0.104870742022477" calcext:value-type="percentage">
            <text:p>10.49 %</text:p>
          </table:table-cell>
          <table:table-cell table:number-columns-repeated="16366"/>
        </table:table-row>
        <table:table-row table:style-name="ro10">
          <table:table-cell table:style-name="ce20" office:value-type="float" office:value="1936" calcext:value-type="float">
            <text:p>1936</text:p>
          </table:table-cell>
          <table:table-cell table:style-name="ce41" table:formula="of:=([$'S&amp;P 500 &amp; Raw Data'.B12]-[$'S&amp;P 500 &amp; Raw Data'.B11]+[$'S&amp;P 500 &amp; Raw Data'.C12])/[$'S&amp;P 500 &amp; Raw Data'.B11]" office:value-type="percentage" office:value="0.319434102755026" calcext:value-type="percentage">
            <text:p>31.94 %</text:p>
          </table:table-cell>
          <table:table-cell table:style-name="ce41" table:formula="of:=[$'T. Bill rates'.C14]" office:value-type="percentage" office:value="0.001725" calcext:value-type="percentage">
            <text:p>0.17 %</text:p>
          </table:table-cell>
          <table:table-cell table:style-name="ce41" table:formula="of:=[$'S&amp;P 500 &amp; Raw Data'.F12]" office:value-type="percentage" office:value="0.0501787540454506" calcext:value-type="percentage">
            <text:p>5.02 %</text:p>
          </table:table-cell>
          <table:table-cell table:style-name="ce41" table:formula="of:=[$'S&amp;P 500 &amp; Raw Data'.J12]" office:value-type="percentage" office:value="0.113838158719227" calcext:value-type="percentage">
            <text:p>11.38 %</text:p>
          </table:table-cell>
          <table:table-cell table:style-name="ce70" table:formula="of:=[.F26]*(1+[.B27])" office:value-type="float" office:value="145.375675791015" calcext:value-type="float">
            <text:p><text:s/>$145.38 </text:p>
          </table:table-cell>
          <table:table-cell table:style-name="ce70" table:formula="of:=[.G26]*(1+[.C27])" office:value-type="float" office:value="116.783618405915" calcext:value-type="float">
            <text:p><text:s/>$116.78 </text:p>
          </table:table-cell>
          <table:table-cell table:style-name="ce98" table:formula="of:=[.H26]*(1+[.D27])" office:value-type="float" office:value="140.488061258546" calcext:value-type="float">
            <text:p><text:s/>$140.49 </text:p>
          </table:table-cell>
          <table:table-cell table:style-name="ce70" table:formula="of:=[.I26]*(1+[.E27])" office:value-type="float" office:value="188.725363495977" calcext:value-type="float">
            <text:p><text:s/>$188.73 </text:p>
          </table:table-cell>
          <table:table-cell table:style-name="ce41" table:formula="of:=[.B27]-[.C27]" office:value-type="percentage" office:value="0.317709102755026" calcext:value-type="percentage">
            <text:p>31.77 %</text:p>
          </table:table-cell>
          <table:table-cell table:style-name="ce115" table:formula="of:=[.B27]-[.D27]" office:value-type="percentage" office:value="0.269255348709576" calcext:value-type="percentage">
            <text:p>26.93 %</text:p>
          </table:table-cell>
          <table:table-cell table:style-name="ce122" table:formula="of:=[.B27]-[.E27]" office:value-type="percentage" office:value="0.205595944035799" calcext:value-type="percentage">
            <text:p>20.56 %</text:p>
          </table:table-cell>
          <table:table-cell table:style-name="ce125"/>
          <table:table-cell table:style-name="ce127" office:value-type="percentage" office:value="0.0103218" calcext:value-type="percentage">
            <text:p>1.03 %</text:p>
          </table:table-cell>
          <table:table-cell table:style-name="ce133" table:formula="of:=(1+[.B27])/(1+[.$N27])-1" office:value-type="percentage" office:value="0.305954303623881" calcext:value-type="percentage">
            <text:p>30.60 %</text:p>
          </table:table-cell>
          <table:table-cell table:style-name="ce133" table:formula="of:=(1+[.C27])/(1+[.$N27])-1" office:value-type="percentage" office:value="-0.0085089720918623" calcext:value-type="percentage">
            <text:p>-0.85 %</text:p>
          </table:table-cell>
          <table:table-cell table:style-name="ce133" table:formula="of:=(1+[.D27])/(1+[.$N27])-1" office:value-type="percentage" office:value="0.0394497614972285" calcext:value-type="percentage">
            <text:p>3.94 %</text:p>
          </table:table-cell>
          <table:table-cell table:style-name="ce133" table:formula="of:=(1+[.E27])/(1+[.$N27])-1" office:value-type="percentage" office:value="0.102458799482726" calcext:value-type="percentage">
            <text:p>10.25 %</text:p>
          </table:table-cell>
          <table:table-cell table:number-columns-repeated="16366"/>
        </table:table-row>
        <table:table-row table:style-name="ro10">
          <table:table-cell table:style-name="ce20" office:value-type="float" office:value="1937" calcext:value-type="float">
            <text:p>1937</text:p>
          </table:table-cell>
          <table:table-cell table:style-name="ce41" table:formula="of:=([$'S&amp;P 500 &amp; Raw Data'.B13]-[$'S&amp;P 500 &amp; Raw Data'.B12]+[$'S&amp;P 500 &amp; Raw Data'.C13])/[$'S&amp;P 500 &amp; Raw Data'.B12]" office:value-type="percentage" office:value="-0.353367287543655" calcext:value-type="percentage">
            <text:p>-35.34 %</text:p>
          </table:table-cell>
          <table:table-cell table:style-name="ce41" table:formula="of:=[$'T. Bill rates'.C15]" office:value-type="percentage" office:value="0.00275833333333333" calcext:value-type="percentage">
            <text:p>0.28 %</text:p>
          </table:table-cell>
          <table:table-cell table:style-name="ce41" table:formula="of:=[$'S&amp;P 500 &amp; Raw Data'.F13]" office:value-type="percentage" office:value="0.0137914605964604" calcext:value-type="percentage">
            <text:p>1.38 %</text:p>
          </table:table-cell>
          <table:table-cell table:style-name="ce41" table:formula="of:=[$'S&amp;P 500 &amp; Raw Data'.J13]" office:value-type="percentage" office:value="-0.0441619168399826" calcext:value-type="percentage">
            <text:p>-4.42 %</text:p>
          </table:table-cell>
          <table:table-cell table:style-name="ce70" table:formula="of:=[.F27]*(1+[.B28])" office:value-type="float" office:value="94.0046675619179" calcext:value-type="float">
            <text:p><text:s/>$94.00 </text:p>
          </table:table-cell>
          <table:table-cell table:style-name="ce70" table:formula="of:=[.G27]*(1+[.C28])" office:value-type="float" office:value="117.105746553351" calcext:value-type="float">
            <text:p><text:s/>$117.11 </text:p>
          </table:table-cell>
          <table:table-cell table:style-name="ce98" table:formula="of:=[.H27]*(1+[.D28])" office:value-type="float" office:value="142.425596819666" calcext:value-type="float">
            <text:p><text:s/>$142.43 </text:p>
          </table:table-cell>
          <table:table-cell table:style-name="ce70" table:formula="of:=[.I27]*(1+[.E28])" office:value-type="float" office:value="180.390889687672" calcext:value-type="float">
            <text:p><text:s/>$180.39 </text:p>
          </table:table-cell>
          <table:table-cell table:style-name="ce41" table:formula="of:=[.B28]-[.C28]" office:value-type="percentage" office:value="-0.356125620876989" calcext:value-type="percentage">
            <text:p>-35.61 %</text:p>
          </table:table-cell>
          <table:table-cell table:style-name="ce115" table:formula="of:=[.B28]-[.D28]" office:value-type="percentage" office:value="-0.367158748140116" calcext:value-type="percentage">
            <text:p>-36.72 %</text:p>
          </table:table-cell>
          <table:table-cell table:style-name="ce122" table:formula="of:=[.B28]-[.E28]" office:value-type="percentage" office:value="-0.309205370703673" calcext:value-type="percentage">
            <text:p>-30.92 %</text:p>
          </table:table-cell>
          <table:table-cell table:style-name="ce125"/>
          <table:table-cell table:style-name="ce127" office:value-type="percentage" office:value="0.0372596" calcext:value-type="percentage">
            <text:p>3.73 %</text:p>
          </table:table-cell>
          <table:table-cell table:style-name="ce133" table:formula="of:=(1+[.B28])/(1+[.$N28])-1" office:value-type="percentage" office:value="-0.376595104584865" calcext:value-type="percentage">
            <text:p>-37.66 %</text:p>
          </table:table-cell>
          <table:table-cell table:style-name="ce133" table:formula="of:=(1+[.C28])/(1+[.$N28])-1" office:value-type="percentage" office:value="-0.0332619400839159" calcext:value-type="percentage">
            <text:p>-3.33 %</text:p>
          </table:table-cell>
          <table:table-cell table:style-name="ce133" table:formula="of:=(1+[.D28])/(1+[.$N28])-1" office:value-type="percentage" office:value="-0.0226251358903207" calcext:value-type="percentage">
            <text:p>-2.26 %</text:p>
          </table:table-cell>
          <table:table-cell table:style-name="ce133" table:formula="of:=(1+[.E28])/(1+[.$N28])-1" office:value-type="percentage" office:value="-0.0784967589984057" calcext:value-type="percentage">
            <text:p>-7.85 %</text:p>
          </table:table-cell>
          <table:table-cell table:number-columns-repeated="16366"/>
        </table:table-row>
        <table:table-row table:style-name="ro10">
          <table:table-cell table:style-name="ce20" office:value-type="float" office:value="1938" calcext:value-type="float">
            <text:p>1938</text:p>
          </table:table-cell>
          <table:table-cell table:style-name="ce41" table:formula="of:=([$'S&amp;P 500 &amp; Raw Data'.B14]-[$'S&amp;P 500 &amp; Raw Data'.B13]+[$'S&amp;P 500 &amp; Raw Data'.C14])/[$'S&amp;P 500 &amp; Raw Data'.B13]" office:value-type="percentage" office:value="0.29282654028436" calcext:value-type="percentage">
            <text:p>29.28 %</text:p>
          </table:table-cell>
          <table:table-cell table:style-name="ce41" table:formula="of:=[$'T. Bill rates'.C16]" office:value-type="percentage" office:value="0.00065" calcext:value-type="percentage">
            <text:p>0.07 %</text:p>
          </table:table-cell>
          <table:table-cell table:style-name="ce41" table:formula="of:=[$'S&amp;P 500 &amp; Raw Data'.F14]" office:value-type="percentage" office:value="0.0421324853220461" calcext:value-type="percentage">
            <text:p>4.21 %</text:p>
          </table:table-cell>
          <table:table-cell table:style-name="ce41" table:formula="of:=[$'S&amp;P 500 &amp; Raw Data'.J14]" office:value-type="percentage" office:value="0.0923588171368742" calcext:value-type="percentage">
            <text:p>9.24 %</text:p>
          </table:table-cell>
          <table:table-cell table:style-name="ce70" table:formula="of:=[.F28]*(1+[.B29])" office:value-type="float" office:value="121.531729134656" calcext:value-type="float">
            <text:p><text:s/>$121.53 </text:p>
          </table:table-cell>
          <table:table-cell table:style-name="ce70" table:formula="of:=[.G28]*(1+[.C29])" office:value-type="float" office:value="117.181865288611" calcext:value-type="float">
            <text:p><text:s/>$117.18 </text:p>
          </table:table-cell>
          <table:table-cell table:style-name="ce98" table:formula="of:=[.H28]*(1+[.D29])" office:value-type="float" office:value="148.426341187154" calcext:value-type="float">
            <text:p><text:s/>$148.43 </text:p>
          </table:table-cell>
          <table:table-cell table:style-name="ce70" table:formula="of:=[.I28]*(1+[.E29])" office:value-type="float" office:value="197.051578881494" calcext:value-type="float">
            <text:p><text:s/>$197.05 </text:p>
          </table:table-cell>
          <table:table-cell table:style-name="ce41" table:formula="of:=[.B29]-[.C29]" office:value-type="percentage" office:value="0.29217654028436" calcext:value-type="percentage">
            <text:p>29.22 %</text:p>
          </table:table-cell>
          <table:table-cell table:style-name="ce115" table:formula="of:=[.B29]-[.D29]" office:value-type="percentage" office:value="0.250694054962314" calcext:value-type="percentage">
            <text:p>25.07 %</text:p>
          </table:table-cell>
          <table:table-cell table:style-name="ce122" table:formula="of:=[.B29]-[.E29]" office:value-type="percentage" office:value="0.200467723147486" calcext:value-type="percentage">
            <text:p>20.05 %</text:p>
          </table:table-cell>
          <table:table-cell table:style-name="ce125"/>
          <table:table-cell table:style-name="ce127" office:value-type="percentage" office:value="-0.0202781" calcext:value-type="percentage">
            <text:p>-2.03 %</text:p>
          </table:table-cell>
          <table:table-cell table:style-name="ce133" table:formula="of:=(1+[.B29])/(1+[.$N29])-1" office:value-type="percentage" office:value="0.319585221361654" calcext:value-type="percentage">
            <text:p>31.96 %</text:p>
          </table:table-cell>
          <table:table-cell table:style-name="ce133" table:formula="of:=(1+[.C29])/(1+[.$N29])-1" office:value-type="percentage" office:value="0.021361265885758" calcext:value-type="percentage">
            <text:p>2.14 %</text:p>
          </table:table-cell>
          <table:table-cell table:style-name="ce133" table:formula="of:=(1+[.D29])/(1+[.$N29])-1" office:value-type="percentage" office:value="0.0637023479030592" calcext:value-type="percentage">
            <text:p>6.37 %</text:p>
          </table:table-cell>
          <table:table-cell table:style-name="ce133" table:formula="of:=(1+[.E29])/(1+[.$N29])-1" office:value-type="percentage" office:value="0.114968254906697" calcext:value-type="percentage">
            <text:p>11.50 %</text:p>
          </table:table-cell>
          <table:table-cell table:number-columns-repeated="16366"/>
        </table:table-row>
        <table:table-row table:style-name="ro10">
          <table:table-cell table:style-name="ce20" office:value-type="float" office:value="1939" calcext:value-type="float">
            <text:p>1939</text:p>
          </table:table-cell>
          <table:table-cell table:style-name="ce41" table:formula="of:=([$'S&amp;P 500 &amp; Raw Data'.B15]-[$'S&amp;P 500 &amp; Raw Data'.B14]+[$'S&amp;P 500 &amp; Raw Data'.C15])/[$'S&amp;P 500 &amp; Raw Data'.B14]" office:value-type="percentage" office:value="-0.0109756468797564" calcext:value-type="percentage">
            <text:p>-1.10 %</text:p>
          </table:table-cell>
          <table:table-cell table:style-name="ce41" table:formula="of:=[$'T. Bill rates'.C17]" office:value-type="percentage" office:value="0.000458333333333333" calcext:value-type="percentage">
            <text:p>0.05 %</text:p>
          </table:table-cell>
          <table:table-cell table:style-name="ce41" table:formula="of:=[$'S&amp;P 500 &amp; Raw Data'.F15]" office:value-type="percentage" office:value="0.0441226139420607" calcext:value-type="percentage">
            <text:p>4.41 %</text:p>
          </table:table-cell>
          <table:table-cell table:style-name="ce41" table:formula="of:=[$'S&amp;P 500 &amp; Raw Data'.J15]" office:value-type="percentage" office:value="0.0798313776534614" calcext:value-type="percentage">
            <text:p>7.98 %</text:p>
          </table:table-cell>
          <table:table-cell table:style-name="ce70" table:formula="of:=[.F29]*(1+[.B30])" office:value-type="float" office:value="120.197839790987" calcext:value-type="float">
            <text:p><text:s/>$120.20 </text:p>
          </table:table-cell>
          <table:table-cell table:style-name="ce70" table:formula="of:=[.G29]*(1+[.C30])" office:value-type="float" office:value="117.235573643534" calcext:value-type="float">
            <text:p><text:s/>$117.24 </text:p>
          </table:table-cell>
          <table:table-cell table:style-name="ce98" table:formula="of:=[.H29]*(1+[.D30])" office:value-type="float" office:value="154.975299338188" calcext:value-type="float">
            <text:p><text:s/>$154.98 </text:p>
          </table:table-cell>
          <table:table-cell table:style-name="ce70" table:formula="of:=[.I29]*(1+[.E30])" office:value-type="float" office:value="212.782477892393" calcext:value-type="float">
            <text:p><text:s/>$212.78 </text:p>
          </table:table-cell>
          <table:table-cell table:style-name="ce41" table:formula="of:=[.B30]-[.C30]" office:value-type="percentage" office:value="-0.0114339802130898" calcext:value-type="percentage">
            <text:p>-1.14 %</text:p>
          </table:table-cell>
          <table:table-cell table:style-name="ce115" table:formula="of:=[.B30]-[.D30]" office:value-type="percentage" office:value="-0.0550982608218171" calcext:value-type="percentage">
            <text:p>-5.51 %</text:p>
          </table:table-cell>
          <table:table-cell table:style-name="ce122" table:formula="of:=[.B30]-[.E30]" office:value-type="percentage" office:value="-0.0908070245332178" calcext:value-type="percentage">
            <text:p>-9.08 %</text:p>
          </table:table-cell>
          <table:table-cell table:style-name="ce125"/>
          <table:table-cell table:style-name="ce127" office:value-type="percentage" office:value="-0.0130101" calcext:value-type="percentage">
            <text:p>-1.30 %</text:p>
          </table:table-cell>
          <table:table-cell table:style-name="ce133" table:formula="of:=(1+[.B30])/(1+[.$N30])-1" office:value-type="percentage" office:value="0.00206127045499005" calcext:value-type="percentage">
            <text:p>0.21 %</text:p>
          </table:table-cell>
          <table:table-cell table:style-name="ce133" table:formula="of:=(1+[.C30])/(1+[.$N30])-1" office:value-type="percentage" office:value="0.0136459687513857" calcext:value-type="percentage">
            <text:p>1.36 %</text:p>
          </table:table-cell>
          <table:table-cell table:style-name="ce133" table:formula="of:=(1+[.D30])/(1+[.$N30])-1" office:value-type="percentage" office:value="0.0578858141730334" calcext:value-type="percentage">
            <text:p>5.79 %</text:p>
          </table:table-cell>
          <table:table-cell table:style-name="ce133" table:formula="of:=(1+[.E30])/(1+[.$N30])-1" office:value-type="percentage" office:value="0.0940652763047134" calcext:value-type="percentage">
            <text:p>9.41 %</text:p>
          </table:table-cell>
          <table:table-cell table:number-columns-repeated="16366"/>
        </table:table-row>
        <table:table-row table:style-name="ro10">
          <table:table-cell table:style-name="ce20" office:value-type="float" office:value="1940" calcext:value-type="float">
            <text:p>1940</text:p>
          </table:table-cell>
          <table:table-cell table:style-name="ce41" table:formula="of:=([$'S&amp;P 500 &amp; Raw Data'.B16]-[$'S&amp;P 500 &amp; Raw Data'.B15]+[$'S&amp;P 500 &amp; Raw Data'.C16])/[$'S&amp;P 500 &amp; Raw Data'.B15]" office:value-type="percentage" office:value="-0.106728731942215" calcext:value-type="percentage">
            <text:p>-10.67 %</text:p>
          </table:table-cell>
          <table:table-cell table:style-name="ce41" table:formula="of:=[$'T. Bill rates'.C18]" office:value-type="percentage" office:value="0.000358333333333333" calcext:value-type="percentage">
            <text:p>0.04 %</text:p>
          </table:table-cell>
          <table:table-cell table:style-name="ce41" table:formula="of:=[$'S&amp;P 500 &amp; Raw Data'.F16]" office:value-type="percentage" office:value="0.0540248159628455" calcext:value-type="percentage">
            <text:p>5.40 %</text:p>
          </table:table-cell>
          <table:table-cell table:style-name="ce41" table:formula="of:=[$'S&amp;P 500 &amp; Raw Data'.J16]" office:value-type="percentage" office:value="0.0864813717758296" calcext:value-type="percentage">
            <text:p>8.65 %</text:p>
          </table:table-cell>
          <table:table-cell table:style-name="ce70" table:formula="of:=[.F30]*(1+[.B31])" office:value-type="float" office:value="107.369276767902" calcext:value-type="float">
            <text:p><text:s/>$107.37 </text:p>
          </table:table-cell>
          <table:table-cell table:style-name="ce70" table:formula="of:=[.G30]*(1+[.C31])" office:value-type="float" office:value="117.277583057423" calcext:value-type="float">
            <text:p><text:s/>$117.28 </text:p>
          </table:table-cell>
          <table:table-cell table:style-name="ce98" table:formula="of:=[.H30]*(1+[.D31])" office:value-type="float" office:value="163.34781136372" calcext:value-type="float">
            <text:p><text:s/>$163.35 </text:p>
          </table:table-cell>
          <table:table-cell table:style-name="ce70" table:formula="of:=[.I30]*(1+[.E31])" office:value-type="float" office:value="231.184198470387" calcext:value-type="float">
            <text:p><text:s/>$231.18 </text:p>
          </table:table-cell>
          <table:table-cell table:style-name="ce41" table:formula="of:=[.B31]-[.C31]" office:value-type="percentage" office:value="-0.107087065275548" calcext:value-type="percentage">
            <text:p>-10.71 %</text:p>
          </table:table-cell>
          <table:table-cell table:style-name="ce115" table:formula="of:=[.B31]-[.D31]" office:value-type="percentage" office:value="-0.160753547905061" calcext:value-type="percentage">
            <text:p>-16.08 %</text:p>
          </table:table-cell>
          <table:table-cell table:style-name="ce122" table:formula="of:=[.B31]-[.E31]" office:value-type="percentage" office:value="-0.193210103718045" calcext:value-type="percentage">
            <text:p>-19.32 %</text:p>
          </table:table-cell>
          <table:table-cell table:style-name="ce125"/>
          <table:table-cell table:style-name="ce127" office:value-type="percentage" office:value="0.0071899" calcext:value-type="percentage">
            <text:p>0.72 %</text:p>
          </table:table-cell>
          <table:table-cell table:style-name="ce133" table:formula="of:=(1+[.B31])/(1+[.$N31])-1" office:value-type="percentage" office:value="-0.11310541531663" calcext:value-type="percentage">
            <text:p>-11.31 %</text:p>
          </table:table-cell>
          <table:table-cell table:style-name="ce133" table:formula="of:=(1+[.C31])/(1+[.$N31])-1" office:value-type="percentage" office:value="-0.0067827990199929" calcext:value-type="percentage">
            <text:p>-0.68 %</text:p>
          </table:table-cell>
          <table:table-cell table:style-name="ce133" table:formula="of:=(1+[.D31])/(1+[.$N31])-1" office:value-type="percentage" office:value="0.0465005814324049" calcext:value-type="percentage">
            <text:p>4.65 %</text:p>
          </table:table-cell>
          <table:table-cell table:style-name="ce133" table:formula="of:=(1+[.E31])/(1+[.$N31])-1" office:value-type="percentage" office:value="0.0787254437081126" calcext:value-type="percentage">
            <text:p>7.87 %</text:p>
          </table:table-cell>
          <table:table-cell table:number-columns-repeated="16366"/>
        </table:table-row>
        <table:table-row table:style-name="ro10">
          <table:table-cell table:style-name="ce20" office:value-type="float" office:value="1941" calcext:value-type="float">
            <text:p>1941</text:p>
          </table:table-cell>
          <table:table-cell table:style-name="ce41" table:formula="of:=([$'S&amp;P 500 &amp; Raw Data'.B17]-[$'S&amp;P 500 &amp; Raw Data'.B16]+[$'S&amp;P 500 &amp; Raw Data'.C17])/[$'S&amp;P 500 &amp; Raw Data'.B16]" office:value-type="percentage" office:value="-0.127714555765596" calcext:value-type="percentage">
            <text:p>-12.77 %</text:p>
          </table:table-cell>
          <table:table-cell table:style-name="ce41" table:formula="of:=[$'T. Bill rates'.C19]" office:value-type="percentage" office:value="0.00129166666666667" calcext:value-type="percentage">
            <text:p>0.13 %</text:p>
          </table:table-cell>
          <table:table-cell table:style-name="ce41" table:formula="of:=[$'S&amp;P 500 &amp; Raw Data'.F17]" office:value-type="percentage" office:value="-0.0202219758485801" calcext:value-type="percentage">
            <text:p>-2.02 %</text:p>
          </table:table-cell>
          <table:table-cell table:style-name="ce41" table:formula="of:=[$'S&amp;P 500 &amp; Raw Data'.J17]" office:value-type="percentage" office:value="0.0500717285727592" calcext:value-type="percentage">
            <text:p>5.01 %</text:p>
          </table:table-cell>
          <table:table-cell table:style-name="ce70" table:formula="of:=[.F31]*(1+[.B32])" office:value-type="float" office:value="93.656657282616" calcext:value-type="float">
            <text:p><text:s/>$93.66 </text:p>
          </table:table-cell>
          <table:table-cell table:style-name="ce70" table:formula="of:=[.G31]*(1+[.C32])" office:value-type="float" office:value="117.429066602206" calcext:value-type="float">
            <text:p><text:s/>$117.43 </text:p>
          </table:table-cell>
          <table:table-cell table:style-name="ce98" table:formula="of:=[.H31]*(1+[.D32])" office:value-type="float" office:value="160.044595867405" calcext:value-type="float">
            <text:p><text:s/>$160.04 </text:p>
          </table:table-cell>
          <table:table-cell table:style-name="ce70" table:formula="of:=[.I31]*(1+[.E32])" office:value-type="float" office:value="242.759990906507" calcext:value-type="float">
            <text:p><text:s/>$242.76 </text:p>
          </table:table-cell>
          <table:table-cell table:style-name="ce41" table:formula="of:=[.B32]-[.C32]" office:value-type="percentage" office:value="-0.129006222432262" calcext:value-type="percentage">
            <text:p>-12.90 %</text:p>
          </table:table-cell>
          <table:table-cell table:style-name="ce115" table:formula="of:=[.B32]-[.D32]" office:value-type="percentage" office:value="-0.107492579917015" calcext:value-type="percentage">
            <text:p>-10.75 %</text:p>
          </table:table-cell>
          <table:table-cell table:style-name="ce122" table:formula="of:=[.B32]-[.E32]" office:value-type="percentage" office:value="-0.177786284338355" calcext:value-type="percentage">
            <text:p>-17.78 %</text:p>
          </table:table-cell>
          <table:table-cell table:style-name="ce125"/>
          <table:table-cell table:style-name="ce127" office:value-type="percentage" office:value="0.05116" calcext:value-type="percentage">
            <text:p>5.12 %</text:p>
          </table:table-cell>
          <table:table-cell table:style-name="ce133" table:formula="of:=(1+[.B32])/(1+[.$N32])-1" office:value-type="percentage" office:value="-0.170168723853263" calcext:value-type="percentage">
            <text:p>-17.02 %</text:p>
          </table:table-cell>
          <table:table-cell table:style-name="ce133" table:formula="of:=(1+[.C32])/(1+[.$N32])-1" office:value-type="percentage" office:value="-0.0474412395195151" calcext:value-type="percentage">
            <text:p>-4.74 %</text:p>
          </table:table-cell>
          <table:table-cell table:style-name="ce133" table:formula="of:=(1+[.D32])/(1+[.$N32])-1" office:value-type="percentage" office:value="-0.0679078121775755" calcext:value-type="percentage">
            <text:p>-6.79 %</text:p>
          </table:table-cell>
          <table:table-cell table:style-name="ce133" table:formula="of:=(1+[.E32])/(1+[.$N32])-1" office:value-type="percentage" office:value="-0.00103530521256601" calcext:value-type="percentage">
            <text:p>-0.10 %</text:p>
          </table:table-cell>
          <table:table-cell table:number-columns-repeated="16366"/>
        </table:table-row>
        <table:table-row table:style-name="ro10">
          <table:table-cell table:style-name="ce20" office:value-type="float" office:value="1942" calcext:value-type="float">
            <text:p>1942</text:p>
          </table:table-cell>
          <table:table-cell table:style-name="ce41" table:formula="of:=([$'S&amp;P 500 &amp; Raw Data'.B18]-[$'S&amp;P 500 &amp; Raw Data'.B17]+[$'S&amp;P 500 &amp; Raw Data'.C18])/[$'S&amp;P 500 &amp; Raw Data'.B17]" office:value-type="percentage" office:value="0.191737629459148" calcext:value-type="percentage">
            <text:p>19.17 %</text:p>
          </table:table-cell>
          <table:table-cell table:style-name="ce41" table:formula="of:=[$'T. Bill rates'.C20]" office:value-type="percentage" office:value="0.003425" calcext:value-type="percentage">
            <text:p>0.34 %</text:p>
          </table:table-cell>
          <table:table-cell table:style-name="ce41" table:formula="of:=[$'S&amp;P 500 &amp; Raw Data'.F18]" office:value-type="percentage" office:value="0.0229486823744842" calcext:value-type="percentage">
            <text:p>2.29 %</text:p>
          </table:table-cell>
          <table:table-cell table:style-name="ce41" table:formula="of:=[$'S&amp;P 500 &amp; Raw Data'.J18]" office:value-type="percentage" office:value="0.051799010426587" calcext:value-type="percentage">
            <text:p>5.18 %</text:p>
          </table:table-cell>
          <table:table-cell table:style-name="ce70" table:formula="of:=[.F32]*(1+[.B33])" office:value-type="float" office:value="111.614162733053" calcext:value-type="float">
            <text:p><text:s/>$111.61 </text:p>
          </table:table-cell>
          <table:table-cell table:style-name="ce70" table:formula="of:=[.G32]*(1+[.C33])" office:value-type="float" office:value="117.831261155318" calcext:value-type="float">
            <text:p><text:s/>$117.83 </text:p>
          </table:table-cell>
          <table:table-cell table:style-name="ce98" table:formula="of:=[.H32]*(1+[.D33])" office:value-type="float" office:value="163.717408463718" calcext:value-type="float">
            <text:p><text:s/>$163.72 </text:p>
          </table:table-cell>
          <table:table-cell table:style-name="ce70" table:formula="of:=[.I32]*(1+[.E33])" office:value-type="float" office:value="255.334718206632" calcext:value-type="float">
            <text:p><text:s/>$255.33 </text:p>
          </table:table-cell>
          <table:table-cell table:style-name="ce41" table:formula="of:=[.B33]-[.C33]" office:value-type="percentage" office:value="0.188312629459148" calcext:value-type="percentage">
            <text:p>18.83 %</text:p>
          </table:table-cell>
          <table:table-cell table:style-name="ce115" table:formula="of:=[.B33]-[.D33]" office:value-type="percentage" office:value="0.168788947084664" calcext:value-type="percentage">
            <text:p>16.88 %</text:p>
          </table:table-cell>
          <table:table-cell table:style-name="ce122" table:formula="of:=[.B33]-[.E33]" office:value-type="percentage" office:value="0.139938619032561" calcext:value-type="percentage">
            <text:p>13.99 %</text:p>
          </table:table-cell>
          <table:table-cell table:style-name="ce125"/>
          <table:table-cell table:style-name="ce127" office:value-type="percentage" office:value="0.1092247" calcext:value-type="percentage">
            <text:p>10.92 %</text:p>
          </table:table-cell>
          <table:table-cell table:style-name="ce133" table:formula="of:=(1+[.B33])/(1+[.$N33])-1" office:value-type="percentage" office:value="0.0743879301093353" calcext:value-type="percentage">
            <text:p>7.44 %</text:p>
          </table:table-cell>
          <table:table-cell table:style-name="ce133" table:formula="of:=(1+[.C33])/(1+[.$N33])-1" office:value-type="percentage" office:value="-0.0953816661313077" calcext:value-type="percentage">
            <text:p>-9.54 %</text:p>
          </table:table-cell>
          <table:table-cell table:style-name="ce133" table:formula="of:=(1+[.D33])/(1+[.$N33])-1" office:value-type="percentage" office:value="-0.0777804692101751" calcext:value-type="percentage">
            <text:p>-7.78 %</text:p>
          </table:table-cell>
          <table:table-cell table:style-name="ce133" table:formula="of:=(1+[.E33])/(1+[.$N33])-1" office:value-type="percentage" office:value="-0.0517710158937255" calcext:value-type="percentage">
            <text:p>-5.18 %</text:p>
          </table:table-cell>
          <table:table-cell table:number-columns-repeated="16366"/>
        </table:table-row>
        <table:table-row table:style-name="ro10">
          <table:table-cell table:style-name="ce20" office:value-type="float" office:value="1943" calcext:value-type="float">
            <text:p>1943</text:p>
          </table:table-cell>
          <table:table-cell table:style-name="ce41" table:formula="of:=([$'S&amp;P 500 &amp; Raw Data'.B19]-[$'S&amp;P 500 &amp; Raw Data'.B18]+[$'S&amp;P 500 &amp; Raw Data'.C19])/[$'S&amp;P 500 &amp; Raw Data'.B18]" office:value-type="percentage" office:value="0.250613101330604" calcext:value-type="percentage">
            <text:p>25.06 %</text:p>
          </table:table-cell>
          <table:table-cell table:style-name="ce41" table:formula="of:=[$'T. Bill rates'.C21]" office:value-type="percentage" office:value="0.0038" calcext:value-type="percentage">
            <text:p>0.38 %</text:p>
          </table:table-cell>
          <table:table-cell table:style-name="ce41" table:formula="of:=[$'S&amp;P 500 &amp; Raw Data'.F19]" office:value-type="percentage" office:value="0.0249" calcext:value-type="percentage">
            <text:p>2.49 %</text:p>
          </table:table-cell>
          <table:table-cell table:style-name="ce41" table:formula="of:=[$'S&amp;P 500 &amp; Raw Data'.J19]" office:value-type="percentage" office:value="0.0804467006010592" calcext:value-type="percentage">
            <text:p>8.04 %</text:p>
          </table:table-cell>
          <table:table-cell table:style-name="ce70" table:formula="of:=[.F33]*(1+[.B34])" office:value-type="float" office:value="139.586134208002" calcext:value-type="float">
            <text:p><text:s/>$139.59 </text:p>
          </table:table-cell>
          <table:table-cell table:style-name="ce70" table:formula="of:=[.G33]*(1+[.C34])" office:value-type="float" office:value="118.279019947709" calcext:value-type="float">
            <text:p><text:s/>$118.28 </text:p>
          </table:table-cell>
          <table:table-cell table:style-name="ce98" table:formula="of:=[.H33]*(1+[.D34])" office:value-type="float" office:value="167.793971934465" calcext:value-type="float">
            <text:p><text:s/>$167.79 </text:p>
          </table:table-cell>
          <table:table-cell table:style-name="ce70" table:formula="of:=[.I33]*(1+[.E34])" office:value-type="float" office:value="275.875553835256" calcext:value-type="float">
            <text:p><text:s/>$275.88 </text:p>
          </table:table-cell>
          <table:table-cell table:style-name="ce41" table:formula="of:=[.B34]-[.C34]" office:value-type="percentage" office:value="0.246813101330604" calcext:value-type="percentage">
            <text:p>24.68 %</text:p>
          </table:table-cell>
          <table:table-cell table:style-name="ce115" table:formula="of:=[.B34]-[.D34]" office:value-type="percentage" office:value="0.225713101330604" calcext:value-type="percentage">
            <text:p>22.57 %</text:p>
          </table:table-cell>
          <table:table-cell table:style-name="ce122" table:formula="of:=[.B34]-[.E34]" office:value-type="percentage" office:value="0.170166400729545" calcext:value-type="percentage">
            <text:p>17.02 %</text:p>
          </table:table-cell>
          <table:table-cell table:style-name="ce125"/>
          <table:table-cell table:style-name="ce127" office:value-type="percentage" office:value="0.0596939" calcext:value-type="percentage">
            <text:p>5.97 %</text:p>
          </table:table-cell>
          <table:table-cell table:style-name="ce133" table:formula="of:=(1+[.B34])/(1+[.$N34])-1" office:value-type="percentage" office:value="0.180164480828477" calcext:value-type="percentage">
            <text:p>18.02 %</text:p>
          </table:table-cell>
          <table:table-cell table:style-name="ce133" table:formula="of:=(1+[.C34])/(1+[.$N34])-1" office:value-type="percentage" office:value="-0.05274532579644" calcext:value-type="percentage">
            <text:p>-5.27 %</text:p>
          </table:table-cell>
          <table:table-cell table:style-name="ce133" table:formula="of:=(1+[.D34])/(1+[.$N34])-1" office:value-type="percentage" office:value="-0.0328339155297583" calcext:value-type="percentage">
            <text:p>-3.28 %</text:p>
          </table:table-cell>
          <table:table-cell table:style-name="ce133" table:formula="of:=(1+[.E34])/(1+[.$N34])-1" office:value-type="percentage" office:value="0.0195837690497784" calcext:value-type="percentage">
            <text:p>1.96 %</text:p>
          </table:table-cell>
          <table:table-cell table:number-columns-repeated="16366"/>
        </table:table-row>
        <table:table-row table:style-name="ro10">
          <table:table-cell table:style-name="ce20" office:value-type="float" office:value="1944" calcext:value-type="float">
            <text:p>1944</text:p>
          </table:table-cell>
          <table:table-cell table:style-name="ce41" table:formula="of:=([$'S&amp;P 500 &amp; Raw Data'.B20]-[$'S&amp;P 500 &amp; Raw Data'.B19]+[$'S&amp;P 500 &amp; Raw Data'.C20])/[$'S&amp;P 500 &amp; Raw Data'.B19]" office:value-type="percentage" office:value="0.19030676949443" calcext:value-type="percentage">
            <text:p>19.03 %</text:p>
          </table:table-cell>
          <table:table-cell table:style-name="ce41" table:formula="of:=[$'T. Bill rates'.C22]" office:value-type="percentage" office:value="0.0038" calcext:value-type="percentage">
            <text:p>0.38 %</text:p>
          </table:table-cell>
          <table:table-cell table:style-name="ce41" table:formula="of:=[$'S&amp;P 500 &amp; Raw Data'.F20]" office:value-type="percentage" office:value="0.0257761115790703" calcext:value-type="percentage">
            <text:p>2.58 %</text:p>
          </table:table-cell>
          <table:table-cell table:style-name="ce41" table:formula="of:=[$'S&amp;P 500 &amp; Raw Data'.J20]" office:value-type="percentage" office:value="0.0656586358825617" calcext:value-type="percentage">
            <text:p>6.57 %</text:p>
          </table:table-cell>
          <table:table-cell table:style-name="ce70" table:formula="of:=[.F34]*(1+[.B35])" office:value-type="float" office:value="166.150320475342" calcext:value-type="float">
            <text:p><text:s/>$166.15 </text:p>
          </table:table-cell>
          <table:table-cell table:style-name="ce70" table:formula="of:=[.G34]*(1+[.C35])" office:value-type="float" office:value="118.72848022351" calcext:value-type="float">
            <text:p><text:s/>$118.73 </text:p>
          </table:table-cell>
          <table:table-cell table:style-name="ce98" table:formula="of:=[.H34]*(1+[.D35])" office:value-type="float" office:value="172.119048077343" calcext:value-type="float">
            <text:p><text:s/>$172.12 </text:p>
          </table:table-cell>
          <table:table-cell table:style-name="ce70" table:formula="of:=[.I34]*(1+[.E35])" office:value-type="float" office:value="293.989166373425" calcext:value-type="float">
            <text:p><text:s/>$293.99 </text:p>
          </table:table-cell>
          <table:table-cell table:style-name="ce41" table:formula="of:=[.B35]-[.C35]" office:value-type="percentage" office:value="0.18650676949443" calcext:value-type="percentage">
            <text:p>18.65 %</text:p>
          </table:table-cell>
          <table:table-cell table:style-name="ce115" table:formula="of:=[.B35]-[.D35]" office:value-type="percentage" office:value="0.16453065791536" calcext:value-type="percentage">
            <text:p>16.45 %</text:p>
          </table:table-cell>
          <table:table-cell table:style-name="ce122" table:formula="of:=[.B35]-[.E35]" office:value-type="percentage" office:value="0.124648133611868" calcext:value-type="percentage">
            <text:p>12.46 %</text:p>
          </table:table-cell>
          <table:table-cell table:style-name="ce125"/>
          <table:table-cell table:style-name="ce127" office:value-type="percentage" office:value="0.0163698" calcext:value-type="percentage">
            <text:p>1.64 %</text:p>
          </table:table-cell>
          <table:table-cell table:style-name="ce133" table:formula="of:=(1+[.B35])/(1+[.$N35])-1" office:value-type="percentage" office:value="0.171135515335491" calcext:value-type="percentage">
            <text:p>17.11 %</text:p>
          </table:table-cell>
          <table:table-cell table:style-name="ce133" table:formula="of:=(1+[.C35])/(1+[.$N35])-1" office:value-type="percentage" office:value="-0.0123673489708176" calcext:value-type="percentage">
            <text:p>-1.24 %</text:p>
          </table:table-cell>
          <table:table-cell table:style-name="ce133" table:formula="of:=(1+[.D35])/(1+[.$N35])-1" office:value-type="percentage" office:value="0.00925481215505442" calcext:value-type="percentage">
            <text:p>0.93 %</text:p>
          </table:table-cell>
          <table:table-cell table:style-name="ce133" table:formula="of:=(1+[.E35])/(1+[.$N35])-1" office:value-type="percentage" office:value="0.0484949827145214" calcext:value-type="percentage">
            <text:p>4.85 %</text:p>
          </table:table-cell>
          <table:table-cell table:number-columns-repeated="16366"/>
        </table:table-row>
        <table:table-row table:style-name="ro10">
          <table:table-cell table:style-name="ce20" office:value-type="float" office:value="1945" calcext:value-type="float">
            <text:p>1945</text:p>
          </table:table-cell>
          <table:table-cell table:style-name="ce41" table:formula="of:=([$'S&amp;P 500 &amp; Raw Data'.B21]-[$'S&amp;P 500 &amp; Raw Data'.B20]+[$'S&amp;P 500 &amp; Raw Data'.C21])/[$'S&amp;P 500 &amp; Raw Data'.B20]" office:value-type="percentage" office:value="0.358210843373494" calcext:value-type="percentage">
            <text:p>35.82 %</text:p>
          </table:table-cell>
          <table:table-cell table:style-name="ce41" table:formula="of:=[$'T. Bill rates'.C23]" office:value-type="percentage" office:value="0.0038" calcext:value-type="percentage">
            <text:p>0.38 %</text:p>
          </table:table-cell>
          <table:table-cell table:style-name="ce41" table:formula="of:=[$'S&amp;P 500 &amp; Raw Data'.F21]" office:value-type="percentage" office:value="0.0380441734192372" calcext:value-type="percentage">
            <text:p>3.80 %</text:p>
          </table:table-cell>
          <table:table-cell table:style-name="ce41" table:formula="of:=[$'S&amp;P 500 &amp; Raw Data'.J21]" office:value-type="percentage" office:value="0.0679986547781789" calcext:value-type="percentage">
            <text:p>6.80 %</text:p>
          </table:table-cell>
          <table:table-cell table:style-name="ce70" table:formula="of:=[.F35]*(1+[.B36])" office:value-type="float" office:value="225.667166899591" calcext:value-type="float">
            <text:p><text:s/>$225.67 </text:p>
          </table:table-cell>
          <table:table-cell table:style-name="ce70" table:formula="of:=[.G35]*(1+[.C36])" office:value-type="float" office:value="119.179648448359" calcext:value-type="float">
            <text:p><text:s/>$119.18 </text:p>
          </table:table-cell>
          <table:table-cell table:style-name="ce98" table:formula="of:=[.H35]*(1+[.D36])" office:value-type="float" office:value="178.667174991151" calcext:value-type="float">
            <text:p><text:s/>$178.67 </text:p>
          </table:table-cell>
          <table:table-cell table:style-name="ce70" table:formula="of:=[.I35]*(1+[.E36])" office:value-type="float" office:value="313.980034206177" calcext:value-type="float">
            <text:p><text:s/>$313.98 </text:p>
          </table:table-cell>
          <table:table-cell table:style-name="ce41" table:formula="of:=[.B36]-[.C36]" office:value-type="percentage" office:value="0.354410843373494" calcext:value-type="percentage">
            <text:p>35.44 %</text:p>
          </table:table-cell>
          <table:table-cell table:style-name="ce115" table:formula="of:=[.B36]-[.D36]" office:value-type="percentage" office:value="0.320166669954257" calcext:value-type="percentage">
            <text:p>32.02 %</text:p>
          </table:table-cell>
          <table:table-cell table:style-name="ce122" table:formula="of:=[.B36]-[.E36]" office:value-type="percentage" office:value="0.290212188595315" calcext:value-type="percentage">
            <text:p>29.02 %</text:p>
          </table:table-cell>
          <table:table-cell table:style-name="ce125"/>
          <table:table-cell table:style-name="ce127" office:value-type="percentage" office:value="0.022738" calcext:value-type="percentage">
            <text:p>2.27 %</text:p>
          </table:table-cell>
          <table:table-cell table:style-name="ce133" table:formula="of:=(1+[.B36])/(1+[.$N36])-1" office:value-type="percentage" office:value="0.328014450791399" calcext:value-type="percentage">
            <text:p>32.80 %</text:p>
          </table:table-cell>
          <table:table-cell table:style-name="ce133" table:formula="of:=(1+[.C36])/(1+[.$N36])-1" office:value-type="percentage" office:value="-0.0185169613332055" calcext:value-type="percentage">
            <text:p>-1.85 %</text:p>
          </table:table-cell>
          <table:table-cell table:style-name="ce133" table:formula="of:=(1+[.D36])/(1+[.$N36])-1" office:value-type="percentage" office:value="0.0149658792566985" calcext:value-type="percentage">
            <text:p>1.50 %</text:p>
          </table:table-cell>
          <table:table-cell table:style-name="ce133" table:formula="of:=(1+[.E36])/(1+[.$N36])-1" office:value-type="percentage" office:value="0.0442543982703085" calcext:value-type="percentage">
            <text:p>4.43 %</text:p>
          </table:table-cell>
          <table:table-cell table:number-columns-repeated="16366"/>
        </table:table-row>
        <table:table-row table:style-name="ro10">
          <table:table-cell table:style-name="ce20" office:value-type="float" office:value="1946" calcext:value-type="float">
            <text:p>1946</text:p>
          </table:table-cell>
          <table:table-cell table:style-name="ce41" table:formula="of:=([$'S&amp;P 500 &amp; Raw Data'.B22]-[$'S&amp;P 500 &amp; Raw Data'.B21]+[$'S&amp;P 500 &amp; Raw Data'.C22])/[$'S&amp;P 500 &amp; Raw Data'.B21]" office:value-type="percentage" office:value="-0.0842914746543778" calcext:value-type="percentage">
            <text:p>-8.43 %</text:p>
          </table:table-cell>
          <table:table-cell table:style-name="ce41" table:formula="of:=[$'T. Bill rates'.C24]" office:value-type="percentage" office:value="0.0038" calcext:value-type="percentage">
            <text:p>0.38 %</text:p>
          </table:table-cell>
          <table:table-cell table:style-name="ce41" table:formula="of:=[$'S&amp;P 500 &amp; Raw Data'.F22]" office:value-type="percentage" office:value="0.0312837453756957" calcext:value-type="percentage">
            <text:p>3.13 %</text:p>
          </table:table-cell>
          <table:table-cell table:style-name="ce41" table:formula="of:=[$'S&amp;P 500 &amp; Raw Data'.J22]" office:value-type="percentage" office:value="0.0250803297731959" calcext:value-type="percentage">
            <text:p>2.51 %</text:p>
          </table:table-cell>
          <table:table-cell table:style-name="ce70" table:formula="of:=[.F36]*(1+[.B37])" office:value-type="float" office:value="206.645348620549" calcext:value-type="float">
            <text:p><text:s/>$206.65 </text:p>
          </table:table-cell>
          <table:table-cell table:style-name="ce70" table:formula="of:=[.G36]*(1+[.C37])" office:value-type="float" office:value="119.632531112463" calcext:value-type="float">
            <text:p><text:s/>$119.63 </text:p>
          </table:table-cell>
          <table:table-cell table:style-name="ce98" table:formula="of:=[.H36]*(1+[.D37])" office:value-type="float" office:value="184.25655340057" calcext:value-type="float">
            <text:p><text:s/>$184.26 </text:p>
          </table:table-cell>
          <table:table-cell table:style-name="ce70" table:formula="of:=[.I36]*(1+[.E37])" office:value-type="float" office:value="321.854757006267" calcext:value-type="float">
            <text:p><text:s/>$321.85 </text:p>
          </table:table-cell>
          <table:table-cell table:style-name="ce41" table:formula="of:=[.B37]-[.C37]" office:value-type="percentage" office:value="-0.0880914746543778" calcext:value-type="percentage">
            <text:p>-8.81 %</text:p>
          </table:table-cell>
          <table:table-cell table:style-name="ce115" table:formula="of:=[.B37]-[.D37]" office:value-type="percentage" office:value="-0.115575220030073" calcext:value-type="percentage">
            <text:p>-11.56 %</text:p>
          </table:table-cell>
          <table:table-cell table:style-name="ce122" table:formula="of:=[.B37]-[.E37]" office:value-type="percentage" office:value="-0.109371804427574" calcext:value-type="percentage">
            <text:p>-10.94 %</text:p>
          </table:table-cell>
          <table:table-cell table:style-name="ce125"/>
          <table:table-cell table:style-name="ce127" office:value-type="percentage" office:value="0.0847615" calcext:value-type="percentage">
            <text:p>8.48 %</text:p>
          </table:table-cell>
          <table:table-cell table:style-name="ce133" table:formula="of:=(1+[.B37])/(1+[.$N37])-1" office:value-type="percentage" office:value="-0.155843450061952" calcext:value-type="percentage">
            <text:p>-15.58 %</text:p>
          </table:table-cell>
          <table:table-cell table:style-name="ce133" table:formula="of:=(1+[.C37])/(1+[.$N37])-1" office:value-type="percentage" office:value="-0.0746353000175614" calcext:value-type="percentage">
            <text:p>-7.46 %</text:p>
          </table:table-cell>
          <table:table-cell table:style-name="ce133" table:formula="of:=(1+[.D37])/(1+[.$N37])-1" office:value-type="percentage" office:value="-0.0492990898223288" calcext:value-type="percentage">
            <text:p>-4.93 %</text:p>
          </table:table-cell>
          <table:table-cell table:style-name="ce133" table:formula="of:=(1+[.E37])/(1+[.$N37])-1" office:value-type="percentage" office:value="-0.0550177806151897" calcext:value-type="percentage">
            <text:p>-5.50 %</text:p>
          </table:table-cell>
          <table:table-cell table:number-columns-repeated="16366"/>
        </table:table-row>
        <table:table-row table:style-name="ro10">
          <table:table-cell table:style-name="ce20" office:value-type="float" office:value="1947" calcext:value-type="float">
            <text:p>1947</text:p>
          </table:table-cell>
          <table:table-cell table:style-name="ce41" table:formula="of:=([$'S&amp;P 500 &amp; Raw Data'.B23]-[$'S&amp;P 500 &amp; Raw Data'.B22]+[$'S&amp;P 500 &amp; Raw Data'.C23])/[$'S&amp;P 500 &amp; Raw Data'.B22]" office:value-type="percentage" office:value="0.052" calcext:value-type="percentage">
            <text:p>5.20 %</text:p>
          </table:table-cell>
          <table:table-cell table:style-name="ce41" table:formula="of:=[$'T. Bill rates'.C25]" office:value-type="percentage" office:value="0.00600833333333333" calcext:value-type="percentage">
            <text:p>0.60 %</text:p>
          </table:table-cell>
          <table:table-cell table:style-name="ce41" table:formula="of:=[$'S&amp;P 500 &amp; Raw Data'.F23]" office:value-type="percentage" office:value="0.00919696806283224" calcext:value-type="percentage">
            <text:p>0.92 %</text:p>
          </table:table-cell>
          <table:table-cell table:style-name="ce41" table:formula="of:=[$'S&amp;P 500 &amp; Raw Data'.J23]" office:value-type="percentage" office:value="0.00262120226656919" calcext:value-type="percentage">
            <text:p>0.26 %</text:p>
          </table:table-cell>
          <table:table-cell table:style-name="ce70" table:formula="of:=[.F37]*(1+[.B38])" office:value-type="float" office:value="217.390906748818" calcext:value-type="float">
            <text:p><text:s/>$217.39 </text:p>
          </table:table-cell>
          <table:table-cell table:style-name="ce70" table:formula="of:=[.G37]*(1+[.C38])" office:value-type="float" office:value="120.351323236897" calcext:value-type="float">
            <text:p><text:s/>$120.35 </text:p>
          </table:table-cell>
          <table:table-cell table:style-name="ce98" table:formula="of:=[.H37]*(1+[.D38])" office:value-type="float" office:value="185.951155037562" calcext:value-type="float">
            <text:p><text:s/>$185.95 </text:p>
          </table:table-cell>
          <table:table-cell table:style-name="ce70" table:formula="of:=[.I37]*(1+[.E38])" office:value-type="float" office:value="322.698403424838" calcext:value-type="float">
            <text:p><text:s/>$322.70 </text:p>
          </table:table-cell>
          <table:table-cell table:style-name="ce41" table:formula="of:=[.B38]-[.C38]" office:value-type="percentage" office:value="0.0459916666666667" calcext:value-type="percentage">
            <text:p>4.60 %</text:p>
          </table:table-cell>
          <table:table-cell table:style-name="ce115" table:formula="of:=[.B38]-[.D38]" office:value-type="percentage" office:value="0.0428030319371678" calcext:value-type="percentage">
            <text:p>4.28 %</text:p>
          </table:table-cell>
          <table:table-cell table:style-name="ce122" table:formula="of:=[.B38]-[.E38]" office:value-type="percentage" office:value="0.0493787977334308" calcext:value-type="percentage">
            <text:p>4.94 %</text:p>
          </table:table-cell>
          <table:table-cell table:style-name="ce125"/>
          <table:table-cell table:style-name="ce127" office:value-type="percentage" office:value="0.1438941" calcext:value-type="percentage">
            <text:p>14.39 %</text:p>
          </table:table-cell>
          <table:table-cell table:style-name="ce133" table:formula="of:=(1+[.B38])/(1+[.$N38])-1" office:value-type="percentage" office:value="-0.0803344470436556" calcext:value-type="percentage">
            <text:p>-8.03 %</text:p>
          </table:table-cell>
          <table:table-cell table:style-name="ce133" table:formula="of:=(1+[.C38])/(1+[.$N38])-1" office:value-type="percentage" office:value="-0.120540674758849" calcext:value-type="percentage">
            <text:p>-12.05 %</text:p>
          </table:table-cell>
          <table:table-cell table:style-name="ce133" table:formula="of:=(1+[.D38])/(1+[.$N38])-1" office:value-type="percentage" office:value="-0.117753148597556" calcext:value-type="percentage">
            <text:p>-11.78 %</text:p>
          </table:table-cell>
          <table:table-cell table:style-name="ce133" table:formula="of:=(1+[.E38])/(1+[.$N38])-1" office:value-type="percentage" office:value="-0.123501727767833" calcext:value-type="percentage">
            <text:p>-12.35 %</text:p>
          </table:table-cell>
          <table:table-cell table:number-columns-repeated="16366"/>
        </table:table-row>
        <table:table-row table:style-name="ro10">
          <table:table-cell table:style-name="ce20" office:value-type="float" office:value="1948" calcext:value-type="float">
            <text:p>1948</text:p>
          </table:table-cell>
          <table:table-cell table:style-name="ce41" table:formula="of:=([$'S&amp;P 500 &amp; Raw Data'.B24]-[$'S&amp;P 500 &amp; Raw Data'.B23]+[$'S&amp;P 500 &amp; Raw Data'.C24])/[$'S&amp;P 500 &amp; Raw Data'.B23]" office:value-type="percentage" office:value="0.0570457516339868" calcext:value-type="percentage">
            <text:p>5.70 %</text:p>
          </table:table-cell>
          <table:table-cell table:style-name="ce41" table:formula="of:=[$'T. Bill rates'.C26]" office:value-type="percentage" office:value="0.01045" calcext:value-type="percentage">
            <text:p>1.05 %</text:p>
          </table:table-cell>
          <table:table-cell table:style-name="ce41" table:formula="of:=[$'S&amp;P 500 &amp; Raw Data'.F24]" office:value-type="percentage" office:value="0.019510369413175" calcext:value-type="percentage">
            <text:p>1.95 %</text:p>
          </table:table-cell>
          <table:table-cell table:style-name="ce41" table:formula="of:=[$'S&amp;P 500 &amp; Raw Data'.J24]" office:value-type="percentage" office:value="0.0343695956051032" calcext:value-type="percentage">
            <text:p>3.44 %</text:p>
          </table:table-cell>
          <table:table-cell table:style-name="ce70" table:formula="of:=[.F38]*(1+[.B39])" office:value-type="float" office:value="229.792134422698" calcext:value-type="float">
            <text:p><text:s/>$229.79 </text:p>
          </table:table-cell>
          <table:table-cell table:style-name="ce70" table:formula="of:=[.G38]*(1+[.C39])" office:value-type="float" office:value="121.608994564723" calcext:value-type="float">
            <text:p><text:s/>$121.61 </text:p>
          </table:table-cell>
          <table:table-cell table:style-name="ce98" table:formula="of:=[.H38]*(1+[.D39])" office:value-type="float" office:value="189.579130765152" calcext:value-type="float">
            <text:p><text:s/>$189.58 </text:p>
          </table:table-cell>
          <table:table-cell table:style-name="ce70" table:formula="of:=[.I38]*(1+[.E39])" office:value-type="float" office:value="333.789417052962" calcext:value-type="float">
            <text:p><text:s/>$333.79 </text:p>
          </table:table-cell>
          <table:table-cell table:style-name="ce41" table:formula="of:=[.B39]-[.C39]" office:value-type="percentage" office:value="0.0465957516339868" calcext:value-type="percentage">
            <text:p>4.66 %</text:p>
          </table:table-cell>
          <table:table-cell table:style-name="ce115" table:formula="of:=[.B39]-[.D39]" office:value-type="percentage" office:value="0.0375353822208118" calcext:value-type="percentage">
            <text:p>3.75 %</text:p>
          </table:table-cell>
          <table:table-cell table:style-name="ce122" table:formula="of:=[.B39]-[.E39]" office:value-type="percentage" office:value="0.0226761560288836" calcext:value-type="percentage">
            <text:p>2.27 %</text:p>
          </table:table-cell>
          <table:table-cell table:style-name="ce125"/>
          <table:table-cell table:style-name="ce127" office:value-type="percentage" office:value="0.0768944" calcext:value-type="percentage">
            <text:p>7.69 %</text:p>
          </table:table-cell>
          <table:table-cell table:style-name="ce133" table:formula="of:=(1+[.B39])/(1+[.$N39])-1" office:value-type="percentage" office:value="-0.0184313785697215" calcext:value-type="percentage">
            <text:p>-1.84 %</text:p>
          </table:table-cell>
          <table:table-cell table:style-name="ce133" table:formula="of:=(1+[.C39])/(1+[.$N39])-1" office:value-type="percentage" office:value="-0.0617000144118123" calcext:value-type="percentage">
            <text:p>-6.17 %</text:p>
          </table:table-cell>
          <table:table-cell table:style-name="ce133" table:formula="of:=(1+[.D39])/(1+[.$N39])-1" office:value-type="percentage" office:value="-0.0532865902049681" calcext:value-type="percentage">
            <text:p>-5.33 %</text:p>
          </table:table-cell>
          <table:table-cell table:style-name="ce133" table:formula="of:=(1+[.E39])/(1+[.$N39])-1" office:value-type="percentage" office:value="-0.0394883698855681" calcext:value-type="percentage">
            <text:p>-3.95 %</text:p>
          </table:table-cell>
          <table:table-cell table:number-columns-repeated="16366"/>
        </table:table-row>
        <table:table-row table:style-name="ro10">
          <table:table-cell table:style-name="ce20" office:value-type="float" office:value="1949" calcext:value-type="float">
            <text:p>1949</text:p>
          </table:table-cell>
          <table:table-cell table:style-name="ce41" table:formula="of:=([$'S&amp;P 500 &amp; Raw Data'.B25]-[$'S&amp;P 500 &amp; Raw Data'.B24]+[$'S&amp;P 500 &amp; Raw Data'.C25])/[$'S&amp;P 500 &amp; Raw Data'.B24]" office:value-type="percentage" office:value="0.183032236842105" calcext:value-type="percentage">
            <text:p>18.30 %</text:p>
          </table:table-cell>
          <table:table-cell table:style-name="ce41" table:formula="of:=[$'T. Bill rates'.C27]" office:value-type="percentage" office:value="0.01115" calcext:value-type="percentage">
            <text:p>1.12 %</text:p>
          </table:table-cell>
          <table:table-cell table:style-name="ce41" table:formula="of:=[$'S&amp;P 500 &amp; Raw Data'.F25]" office:value-type="percentage" office:value="0.0466348518279731" calcext:value-type="percentage">
            <text:p>4.66 %</text:p>
          </table:table-cell>
          <table:table-cell table:style-name="ce41" table:formula="of:=[$'S&amp;P 500 &amp; Raw Data'.J25]" office:value-type="percentage" office:value="0.0537730111796589" calcext:value-type="percentage">
            <text:p>5.38 %</text:p>
          </table:table-cell>
          <table:table-cell table:style-name="ce70" table:formula="of:=[.F39]*(1+[.B40])" office:value-type="float" office:value="271.851502794806" calcext:value-type="float">
            <text:p><text:s/>$271.85 </text:p>
          </table:table-cell>
          <table:table-cell table:style-name="ce70" table:formula="of:=[.G39]*(1+[.C40])" office:value-type="float" office:value="122.964934854119" calcext:value-type="float">
            <text:p><text:s/>$122.96 </text:p>
          </table:table-cell>
          <table:table-cell table:style-name="ce98" table:formula="of:=[.H39]*(1+[.D40])" office:value-type="float" office:value="198.42012543806" calcext:value-type="float">
            <text:p><text:s/>$198.42 </text:p>
          </table:table-cell>
          <table:table-cell table:style-name="ce70" table:formula="of:=[.I39]*(1+[.E40])" office:value-type="float" office:value="351.738279107803" calcext:value-type="float">
            <text:p><text:s/>$351.74 </text:p>
          </table:table-cell>
          <table:table-cell table:style-name="ce41" table:formula="of:=[.B40]-[.C40]" office:value-type="percentage" office:value="0.171882236842105" calcext:value-type="percentage">
            <text:p>17.19 %</text:p>
          </table:table-cell>
          <table:table-cell table:style-name="ce115" table:formula="of:=[.B40]-[.D40]" office:value-type="percentage" office:value="0.136397385014132" calcext:value-type="percentage">
            <text:p>13.64 %</text:p>
          </table:table-cell>
          <table:table-cell table:style-name="ce122" table:formula="of:=[.B40]-[.E40]" office:value-type="percentage" office:value="0.129259225662446" calcext:value-type="percentage">
            <text:p>12.93 %</text:p>
          </table:table-cell>
          <table:table-cell table:style-name="ce125"/>
          <table:table-cell table:style-name="ce127" office:value-type="percentage" office:value="-0.0097054" calcext:value-type="percentage">
            <text:p>-0.97 %</text:p>
          </table:table-cell>
          <table:table-cell table:style-name="ce133" table:formula="of:=(1+[.B40])/(1+[.$N40])-1" office:value-type="percentage" office:value="0.194626565511016" calcext:value-type="percentage">
            <text:p>19.46 %</text:p>
          </table:table-cell>
          <table:table-cell table:style-name="ce133" table:formula="of:=(1+[.C40])/(1+[.$N40])-1" office:value-type="percentage" office:value="0.0210597937219894" calcext:value-type="percentage">
            <text:p>2.11 %</text:p>
          </table:table-cell>
          <table:table-cell table:style-name="ce133" table:formula="of:=(1+[.D40])/(1+[.$N40])-1" office:value-type="percentage" office:value="0.0568924154771451" calcext:value-type="percentage">
            <text:p>5.69 %</text:p>
          </table:table-cell>
          <table:table-cell table:style-name="ce133" table:formula="of:=(1+[.E40])/(1+[.$N40])-1" office:value-type="percentage" office:value="0.0641005324876649" calcext:value-type="percentage">
            <text:p>6.41 %</text:p>
          </table:table-cell>
          <table:table-cell table:number-columns-repeated="16366"/>
        </table:table-row>
        <table:table-row table:style-name="ro10">
          <table:table-cell table:style-name="ce20" office:value-type="float" office:value="1950" calcext:value-type="float">
            <text:p>1950</text:p>
          </table:table-cell>
          <table:table-cell table:style-name="ce41" table:formula="of:=([$'S&amp;P 500 &amp; Raw Data'.B26]-[$'S&amp;P 500 &amp; Raw Data'.B25]+[$'S&amp;P 500 &amp; Raw Data'.C26])/[$'S&amp;P 500 &amp; Raw Data'.B25]" office:value-type="percentage" office:value="0.308055390113163" calcext:value-type="percentage">
            <text:p>30.81 %</text:p>
          </table:table-cell>
          <table:table-cell table:style-name="ce41" table:formula="of:=[$'T. Bill rates'.C28]" office:value-type="percentage" office:value="0.0120333333333333" calcext:value-type="percentage">
            <text:p>1.20 %</text:p>
          </table:table-cell>
          <table:table-cell table:style-name="ce41" table:formula="of:=[$'S&amp;P 500 &amp; Raw Data'.F26]" office:value-type="percentage" office:value="0.00429595741710961" calcext:value-type="percentage">
            <text:p>0.43 %</text:p>
          </table:table-cell>
          <table:table-cell table:style-name="ce41" table:formula="of:=[$'S&amp;P 500 &amp; Raw Data'.J26]" office:value-type="percentage" office:value="0.0423881730567209" calcext:value-type="percentage">
            <text:p>4.24 %</text:p>
          </table:table-cell>
          <table:table-cell table:style-name="ce70" table:formula="of:=[.F40]*(1+[.B41])" office:value-type="float" office:value="355.59682354111" calcext:value-type="float">
            <text:p><text:s/>$355.60 </text:p>
          </table:table-cell>
          <table:table-cell table:style-name="ce70" table:formula="of:=[.G40]*(1+[.C41])" office:value-type="float" office:value="124.444612903531" calcext:value-type="float">
            <text:p><text:s/>$124.44 </text:p>
          </table:table-cell>
          <table:table-cell table:style-name="ce98" table:formula="of:=[.H40]*(1+[.D41])" office:value-type="float" office:value="199.27252984764" calcext:value-type="float">
            <text:p><text:s/>$199.27 </text:p>
          </table:table-cell>
          <table:table-cell table:style-name="ce70" table:formula="of:=[.I40]*(1+[.E41])" office:value-type="float" office:value="366.647822153297" calcext:value-type="float">
            <text:p><text:s/>$366.65 </text:p>
          </table:table-cell>
          <table:table-cell table:style-name="ce41" table:formula="of:=[.B41]-[.C41]" office:value-type="percentage" office:value="0.296022056779829" calcext:value-type="percentage">
            <text:p>29.60 %</text:p>
          </table:table-cell>
          <table:table-cell table:style-name="ce115" table:formula="of:=[.B41]-[.D41]" office:value-type="percentage" office:value="0.303759432696053" calcext:value-type="percentage">
            <text:p>30.38 %</text:p>
          </table:table-cell>
          <table:table-cell table:style-name="ce122" table:formula="of:=[.B41]-[.E41]" office:value-type="percentage" office:value="0.265667217056442" calcext:value-type="percentage">
            <text:p>26.57 %</text:p>
          </table:table-cell>
          <table:table-cell table:style-name="ce125"/>
          <table:table-cell table:style-name="ce127" office:value-type="percentage" office:value="0.0108505" calcext:value-type="percentage">
            <text:p>1.09 %</text:p>
          </table:table-cell>
          <table:table-cell table:style-name="ce133" table:formula="of:=(1+[.B41])/(1+[.$N41])-1" office:value-type="percentage" office:value="0.294014683786735" calcext:value-type="percentage">
            <text:p>29.40 %</text:p>
          </table:table-cell>
          <table:table-cell table:style-name="ce133" table:formula="of:=(1+[.C41])/(1+[.$N41])-1" office:value-type="percentage" office:value="0.0011701367643715" calcext:value-type="percentage">
            <text:p>0.12 %</text:p>
          </table:table-cell>
          <table:table-cell table:style-name="ce133" table:formula="of:=(1+[.D41])/(1+[.$N41])-1" office:value-type="percentage" office:value="-0.00648418592352729" calcext:value-type="percentage">
            <text:p>-0.65 %</text:p>
          </table:table-cell>
          <table:table-cell table:style-name="ce133" table:formula="of:=(1+[.E41])/(1+[.$N41])-1" office:value-type="percentage" office:value="0.0311991467152866" calcext:value-type="percentage">
            <text:p>3.12 %</text:p>
          </table:table-cell>
          <table:table-cell table:number-columns-repeated="16366"/>
        </table:table-row>
        <table:table-row table:style-name="ro10">
          <table:table-cell table:style-name="ce20" office:value-type="float" office:value="1951" calcext:value-type="float">
            <text:p>1951</text:p>
          </table:table-cell>
          <table:table-cell table:style-name="ce41" table:formula="of:=([$'S&amp;P 500 &amp; Raw Data'.B27]-[$'S&amp;P 500 &amp; Raw Data'.B26]+[$'S&amp;P 500 &amp; Raw Data'.C27])/[$'S&amp;P 500 &amp; Raw Data'.B26]" office:value-type="percentage" office:value="0.236784630445423" calcext:value-type="percentage">
            <text:p>23.68 %</text:p>
          </table:table-cell>
          <table:table-cell table:style-name="ce41" table:formula="of:=[$'T. Bill rates'.C29]" office:value-type="percentage" office:value="0.015175" calcext:value-type="percentage">
            <text:p>1.52 %</text:p>
          </table:table-cell>
          <table:table-cell table:style-name="ce41" table:formula="of:=[$'S&amp;P 500 &amp; Raw Data'.F27]" office:value-type="percentage" office:value="-0.00295313922083199" calcext:value-type="percentage">
            <text:p>-0.30 %</text:p>
          </table:table-cell>
          <table:table-cell table:style-name="ce41" table:formula="of:=[$'S&amp;P 500 &amp; Raw Data'.J27]" office:value-type="percentage" office:value="-0.00190980913013697" calcext:value-type="percentage">
            <text:p>-0.19 %</text:p>
          </table:table-cell>
          <table:table-cell table:style-name="ce70" table:formula="of:=[.F41]*(1+[.B42])" office:value-type="float" office:value="439.796685990858" calcext:value-type="float">
            <text:p><text:s/>$439.80 </text:p>
          </table:table-cell>
          <table:table-cell table:style-name="ce70" table:formula="of:=[.G41]*(1+[.C42])" office:value-type="float" office:value="126.333059904342" calcext:value-type="float">
            <text:p><text:s/>$126.33 </text:p>
          </table:table-cell>
          <table:table-cell table:style-name="ce98" table:formula="of:=[.H41]*(1+[.D42])" office:value-type="float" office:value="198.684050324112" calcext:value-type="float">
            <text:p><text:s/>$198.68 </text:p>
          </table:table-cell>
          <table:table-cell table:style-name="ce70" table:formula="of:=[.I41]*(1+[.E42])" office:value-type="float" office:value="365.947594795004" calcext:value-type="float">
            <text:p><text:s/>$365.95 </text:p>
          </table:table-cell>
          <table:table-cell table:style-name="ce41" table:formula="of:=[.B42]-[.C42]" office:value-type="percentage" office:value="0.221609630445423" calcext:value-type="percentage">
            <text:p>22.16 %</text:p>
          </table:table-cell>
          <table:table-cell table:style-name="ce115" table:formula="of:=[.B42]-[.D42]" office:value-type="percentage" office:value="0.239737769666255" calcext:value-type="percentage">
            <text:p>23.97 %</text:p>
          </table:table-cell>
          <table:table-cell table:style-name="ce122" table:formula="of:=[.B42]-[.E42]" office:value-type="percentage" office:value="0.23869443957556" calcext:value-type="percentage">
            <text:p>23.87 %</text:p>
          </table:table-cell>
          <table:table-cell table:style-name="ce125"/>
          <table:table-cell table:style-name="ce127" office:value-type="percentage" office:value="0.0786011" calcext:value-type="percentage">
            <text:p>7.86 %</text:p>
          </table:table-cell>
          <table:table-cell table:style-name="ce133" table:formula="of:=(1+[.B42])/(1+[.$N42])-1" office:value-type="percentage" office:value="0.146656192400901" calcext:value-type="percentage">
            <text:p>14.67 %</text:p>
          </table:table-cell>
          <table:table-cell table:style-name="ce133" table:formula="of:=(1+[.C42])/(1+[.$N42])-1" office:value-type="percentage" office:value="-0.0588040379339498" calcext:value-type="percentage">
            <text:p>-5.88 %</text:p>
          </table:table-cell>
          <table:table-cell table:style-name="ce133" table:formula="of:=(1+[.D42])/(1+[.$N42])-1" office:value-type="percentage" office:value="-0.0756111218696439" calcext:value-type="percentage">
            <text:p>-7.56 %</text:p>
          </table:table-cell>
          <table:table-cell table:style-name="ce133" table:formula="of:=(1+[.E42])/(1+[.$N42])-1" office:value-type="percentage" office:value="-0.0746438225680809" calcext:value-type="percentage">
            <text:p>-7.46 %</text:p>
          </table:table-cell>
          <table:table-cell table:number-columns-repeated="16366"/>
        </table:table-row>
        <table:table-row table:style-name="ro10">
          <table:table-cell table:style-name="ce20" office:value-type="float" office:value="1952" calcext:value-type="float">
            <text:p>1952</text:p>
          </table:table-cell>
          <table:table-cell table:style-name="ce41" table:formula="of:=([$'S&amp;P 500 &amp; Raw Data'.B28]-[$'S&amp;P 500 &amp; Raw Data'.B27]+[$'S&amp;P 500 &amp; Raw Data'.C28])/[$'S&amp;P 500 &amp; Raw Data'.B27]" office:value-type="percentage" office:value="0.181509886411443" calcext:value-type="percentage">
            <text:p>18.15 %</text:p>
          </table:table-cell>
          <table:table-cell table:style-name="ce41" table:formula="of:=[$'T. Bill rates'.C30]" office:value-type="percentage" office:value="0.017225" calcext:value-type="percentage">
            <text:p>1.72 %</text:p>
          </table:table-cell>
          <table:table-cell table:style-name="ce41" table:formula="of:=[$'S&amp;P 500 &amp; Raw Data'.F28]" office:value-type="percentage" office:value="0.0226799619183057" calcext:value-type="percentage">
            <text:p>2.27 %</text:p>
          </table:table-cell>
          <table:table-cell table:style-name="ce41" table:formula="of:=[$'S&amp;P 500 &amp; Raw Data'.J28]" office:value-type="percentage" office:value="0.0444124150474008" calcext:value-type="percentage">
            <text:p>4.44 %</text:p>
          </table:table-cell>
          <table:table-cell table:style-name="ce70" table:formula="of:=[.F42]*(1+[.B43])" office:value-type="float" office:value="519.624132509187" calcext:value-type="float">
            <text:p><text:s/>$519.62 </text:p>
          </table:table-cell>
          <table:table-cell table:style-name="ce70" table:formula="of:=[.G42]*(1+[.C43])" office:value-type="float" office:value="128.509146861194" calcext:value-type="float">
            <text:p><text:s/>$128.51 </text:p>
          </table:table-cell>
          <table:table-cell table:style-name="ce98" table:formula="of:=[.H42]*(1+[.D43])" office:value-type="float" office:value="203.190197019238" calcext:value-type="float">
            <text:p><text:s/>$203.19 </text:p>
          </table:table-cell>
          <table:table-cell table:style-name="ce70" table:formula="of:=[.I42]*(1+[.E43])" office:value-type="float" office:value="382.200211260638" calcext:value-type="float">
            <text:p><text:s/>$382.20 </text:p>
          </table:table-cell>
          <table:table-cell table:style-name="ce41" table:formula="of:=[.B43]-[.C43]" office:value-type="percentage" office:value="0.164284886411443" calcext:value-type="percentage">
            <text:p>16.43 %</text:p>
          </table:table-cell>
          <table:table-cell table:style-name="ce115" table:formula="of:=[.B43]-[.D43]" office:value-type="percentage" office:value="0.158829924493137" calcext:value-type="percentage">
            <text:p>15.88 %</text:p>
          </table:table-cell>
          <table:table-cell table:style-name="ce122" table:formula="of:=[.B43]-[.E43]" office:value-type="percentage" office:value="0.137097471364042" calcext:value-type="percentage">
            <text:p>13.71 %</text:p>
          </table:table-cell>
          <table:table-cell table:style-name="ce125"/>
          <table:table-cell table:style-name="ce127" office:value-type="percentage" office:value="0.0227929" calcext:value-type="percentage">
            <text:p>2.28 %</text:p>
          </table:table-cell>
          <table:table-cell table:style-name="ce133" table:formula="of:=(1+[.B43])/(1+[.$N43])-1" office:value-type="percentage" office:value="0.155179984541781" calcext:value-type="percentage">
            <text:p>15.52 %</text:p>
          </table:table-cell>
          <table:table-cell table:style-name="ce133" table:formula="of:=(1+[.C43])/(1+[.$N43])-1" office:value-type="percentage" office:value="-0.00544381956503603" calcext:value-type="percentage">
            <text:p>-0.54 %</text:p>
          </table:table-cell>
          <table:table-cell table:style-name="ce133" table:formula="of:=(1+[.D43])/(1+[.$N43])-1" office:value-type="percentage" office:value="-0.000110421260936078" calcext:value-type="percentage">
            <text:p>-0.01 %</text:p>
          </table:table-cell>
          <table:table-cell table:style-name="ce133" table:formula="of:=(1+[.E43])/(1+[.$N43])-1" office:value-type="percentage" office:value="0.0211377249953542" calcext:value-type="percentage">
            <text:p>2.11 %</text:p>
          </table:table-cell>
          <table:table-cell table:number-columns-repeated="16366"/>
        </table:table-row>
        <table:table-row table:style-name="ro10">
          <table:table-cell table:style-name="ce20" office:value-type="float" office:value="1953" calcext:value-type="float">
            <text:p>1953</text:p>
          </table:table-cell>
          <table:table-cell table:style-name="ce41" table:formula="of:=([$'S&amp;P 500 &amp; Raw Data'.B29]-[$'S&amp;P 500 &amp; Raw Data'.B28]+[$'S&amp;P 500 &amp; Raw Data'.C29])/[$'S&amp;P 500 &amp; Raw Data'.B28]" office:value-type="percentage" office:value="-0.0120820474219045" calcext:value-type="percentage">
            <text:p>-1.21 %</text:p>
          </table:table-cell>
          <table:table-cell table:style-name="ce41" table:formula="of:=[$'T. Bill rates'.C31]" office:value-type="percentage" office:value="0.0189083333333333" calcext:value-type="percentage">
            <text:p>1.89 %</text:p>
          </table:table-cell>
          <table:table-cell table:style-name="ce41" table:formula="of:=[$'S&amp;P 500 &amp; Raw Data'.F29]" office:value-type="percentage" office:value="0.0414384025890885" calcext:value-type="percentage">
            <text:p>4.14 %</text:p>
          </table:table-cell>
          <table:table-cell table:style-name="ce41" table:formula="of:=[$'S&amp;P 500 &amp; Raw Data'.J29]" office:value-type="percentage" office:value="0.0162011238184433" calcext:value-type="percentage">
            <text:p>1.62 %</text:p>
          </table:table-cell>
          <table:table-cell table:style-name="ce70" table:formula="of:=[.F43]*(1+[.B44])" office:value-type="float" office:value="513.346009098645" calcext:value-type="float">
            <text:p><text:s/>$513.35 </text:p>
          </table:table-cell>
          <table:table-cell table:style-name="ce70" table:formula="of:=[.G43]*(1+[.C44])" office:value-type="float" office:value="130.939040646428" calcext:value-type="float">
            <text:p><text:s/>$130.94 </text:p>
          </table:table-cell>
          <table:table-cell table:style-name="ce98" table:formula="of:=[.H43]*(1+[.D44])" office:value-type="float" office:value="211.610074205477" calcext:value-type="float">
            <text:p><text:s/>$211.61 </text:p>
          </table:table-cell>
          <table:table-cell table:style-name="ce70" table:formula="of:=[.I43]*(1+[.E44])" office:value-type="float" office:value="388.392284206707" calcext:value-type="float">
            <text:p><text:s/>$388.39 </text:p>
          </table:table-cell>
          <table:table-cell table:style-name="ce41" table:formula="of:=[.B44]-[.C44]" office:value-type="percentage" office:value="-0.0309903807552378" calcext:value-type="percentage">
            <text:p>-3.10 %</text:p>
          </table:table-cell>
          <table:table-cell table:style-name="ce115" table:formula="of:=[.B44]-[.D44]" office:value-type="percentage" office:value="-0.053520450010993" calcext:value-type="percentage">
            <text:p>-5.35 %</text:p>
          </table:table-cell>
          <table:table-cell table:style-name="ce122" table:formula="of:=[.B44]-[.E44]" office:value-type="percentage" office:value="-0.0282831712403477" calcext:value-type="percentage">
            <text:p>-2.83 %</text:p>
          </table:table-cell>
          <table:table-cell table:style-name="ce125"/>
          <table:table-cell table:style-name="ce127" office:value-type="percentage" office:value="0.0081607" calcext:value-type="percentage">
            <text:p>0.82 %</text:p>
          </table:table-cell>
          <table:table-cell table:style-name="ce133" table:formula="of:=(1+[.B44])/(1+[.$N44])-1" office:value-type="percentage" office:value="-0.0200788896273226" calcext:value-type="percentage">
            <text:p>-2.01 %</text:p>
          </table:table-cell>
          <table:table-cell table:style-name="ce133" table:formula="of:=(1+[.C44])/(1+[.$N44])-1" office:value-type="percentage" office:value="0.0106606350885661" calcext:value-type="percentage">
            <text:p>1.07 %</text:p>
          </table:table-cell>
          <table:table-cell table:style-name="ce133" table:formula="of:=(1+[.D44])/(1+[.$N44])-1" office:value-type="percentage" office:value="0.033008331498231" calcext:value-type="percentage">
            <text:p>3.30 %</text:p>
          </table:table-cell>
          <table:table-cell table:style-name="ce133" table:formula="of:=(1+[.E44])/(1+[.$N44])-1" office:value-type="percentage" office:value="0.00797533946566587" calcext:value-type="percentage">
            <text:p>0.80 %</text:p>
          </table:table-cell>
          <table:table-cell table:number-columns-repeated="16366"/>
        </table:table-row>
        <table:table-row table:style-name="ro10">
          <table:table-cell table:style-name="ce20" office:value-type="float" office:value="1954" calcext:value-type="float">
            <text:p>1954</text:p>
          </table:table-cell>
          <table:table-cell table:style-name="ce41" table:formula="of:=([$'S&amp;P 500 &amp; Raw Data'.B30]-[$'S&amp;P 500 &amp; Raw Data'.B29]+[$'S&amp;P 500 &amp; Raw Data'.C30])/[$'S&amp;P 500 &amp; Raw Data'.B29]" office:value-type="percentage" office:value="0.525633212414349" calcext:value-type="percentage">
            <text:p>52.56 %</text:p>
          </table:table-cell>
          <table:table-cell table:style-name="ce41" table:formula="of:=[$'T. Bill rates'.C32]" office:value-type="percentage" office:value="0.00938333333333333" calcext:value-type="percentage">
            <text:p>0.94 %</text:p>
          </table:table-cell>
          <table:table-cell table:style-name="ce41" table:formula="of:=[$'S&amp;P 500 &amp; Raw Data'.F30]" office:value-type="percentage" office:value="0.0328980345580956" calcext:value-type="percentage">
            <text:p>3.29 %</text:p>
          </table:table-cell>
          <table:table-cell table:style-name="ce41" table:formula="of:=[$'S&amp;P 500 &amp; Raw Data'.J30]" office:value-type="percentage" office:value="0.0615790518177079" calcext:value-type="percentage">
            <text:p>6.16 %</text:p>
          </table:table-cell>
          <table:table-cell table:style-name="ce70" table:formula="of:=[.F44]*(1+[.B45])" office:value-type="float" office:value="783.177720941252" calcext:value-type="float">
            <text:p><text:s/>$783.18 </text:p>
          </table:table-cell>
          <table:table-cell table:style-name="ce70" table:formula="of:=[.G44]*(1+[.C45])" office:value-type="float" office:value="132.16768531116" calcext:value-type="float">
            <text:p><text:s/>$132.17 </text:p>
          </table:table-cell>
          <table:table-cell table:style-name="ce98" table:formula="of:=[.H44]*(1+[.D45])" office:value-type="float" office:value="218.57162973953" calcext:value-type="float">
            <text:p><text:s/>$218.57 </text:p>
          </table:table-cell>
          <table:table-cell table:style-name="ce70" table:formula="of:=[.I44]*(1+[.E45])" office:value-type="float" office:value="412.309112801469" calcext:value-type="float">
            <text:p><text:s/>$412.31 </text:p>
          </table:table-cell>
          <table:table-cell table:style-name="ce41" table:formula="of:=[.B45]-[.C45]" office:value-type="percentage" office:value="0.516249879081016" calcext:value-type="percentage">
            <text:p>51.62 %</text:p>
          </table:table-cell>
          <table:table-cell table:style-name="ce115" table:formula="of:=[.B45]-[.D45]" office:value-type="percentage" office:value="0.492735177856254" calcext:value-type="percentage">
            <text:p>49.27 %</text:p>
          </table:table-cell>
          <table:table-cell table:style-name="ce122" table:formula="of:=[.B45]-[.E45]" office:value-type="percentage" office:value="0.464054160596641" calcext:value-type="percentage">
            <text:p>46.41 %</text:p>
          </table:table-cell>
          <table:table-cell table:style-name="ce125"/>
          <table:table-cell table:style-name="ce127" office:value-type="percentage" office:value="0.0031133" calcext:value-type="percentage">
            <text:p>0.31 %</text:p>
          </table:table-cell>
          <table:table-cell table:style-name="ce133" table:formula="of:=(1+[.B45])/(1+[.$N45])-1" office:value-type="percentage" office:value="0.520898200048139" calcext:value-type="percentage">
            <text:p>52.09 %</text:p>
          </table:table-cell>
          <table:table-cell table:style-name="ce133" table:formula="of:=(1+[.C45])/(1+[.$N45])-1" office:value-type="percentage" office:value="0.0062505734230951" calcext:value-type="percentage">
            <text:p>0.63 %</text:p>
          </table:table-cell>
          <table:table-cell table:style-name="ce133" table:formula="of:=(1+[.D45])/(1+[.$N45])-1" office:value-type="percentage" office:value="0.0296922935406154" calcext:value-type="percentage">
            <text:p>2.97 %</text:p>
          </table:table-cell>
          <table:table-cell table:style-name="ce133" table:formula="of:=(1+[.E45])/(1+[.$N45])-1" office:value-type="percentage" office:value="0.0582842953210847" calcext:value-type="percentage">
            <text:p>5.83 %</text:p>
          </table:table-cell>
          <table:table-cell table:number-columns-repeated="16366"/>
        </table:table-row>
        <table:table-row table:style-name="ro10">
          <table:table-cell table:style-name="ce20" office:value-type="float" office:value="1955" calcext:value-type="float">
            <text:p>1955</text:p>
          </table:table-cell>
          <table:table-cell table:style-name="ce41" table:formula="of:=([$'S&amp;P 500 &amp; Raw Data'.B31]-[$'S&amp;P 500 &amp; Raw Data'.B30]+[$'S&amp;P 500 &amp; Raw Data'.C31])/[$'S&amp;P 500 &amp; Raw Data'.B30]" office:value-type="percentage" office:value="0.325973318510284" calcext:value-type="percentage">
            <text:p>32.60 %</text:p>
          </table:table-cell>
          <table:table-cell table:style-name="ce41" table:formula="of:=[$'T. Bill rates'.C33]" office:value-type="percentage" office:value="0.01725" calcext:value-type="percentage">
            <text:p>1.73 %</text:p>
          </table:table-cell>
          <table:table-cell table:style-name="ce41" table:formula="of:=[$'S&amp;P 500 &amp; Raw Data'.F31]" office:value-type="percentage" office:value="-0.0133643912886188" calcext:value-type="percentage">
            <text:p>-1.34 %</text:p>
          </table:table-cell>
          <table:table-cell table:style-name="ce41" table:formula="of:=[$'S&amp;P 500 &amp; Raw Data'.J31]" office:value-type="percentage" office:value="0.0204469000434495" calcext:value-type="percentage">
            <text:p>2.04 %</text:p>
          </table:table-cell>
          <table:table-cell table:style-name="ce70" table:formula="of:=[.F45]*(1+[.B46])" office:value-type="float" office:value="1038.47276161979" calcext:value-type="float">
            <text:p><text:s/>$1,038.47 </text:p>
          </table:table-cell>
          <table:table-cell table:style-name="ce70" table:formula="of:=[.G45]*(1+[.C46])" office:value-type="float" office:value="134.447577882778" calcext:value-type="float">
            <text:p><text:s/>$134.45 </text:p>
          </table:table-cell>
          <table:table-cell table:style-name="ce98" table:formula="of:=[.H45]*(1+[.D46])" office:value-type="float" office:value="215.6505529551" calcext:value-type="float">
            <text:p><text:s/>$215.65 </text:p>
          </table:table-cell>
          <table:table-cell table:style-name="ce70" table:formula="of:=[.I45]*(1+[.E46])" office:value-type="float" office:value="420.739556017924" calcext:value-type="float">
            <text:p><text:s/>$420.74 </text:p>
          </table:table-cell>
          <table:table-cell table:style-name="ce41" table:formula="of:=[.B46]-[.C46]" office:value-type="percentage" office:value="0.308723318510284" calcext:value-type="percentage">
            <text:p>30.87 %</text:p>
          </table:table-cell>
          <table:table-cell table:style-name="ce115" table:formula="of:=[.B46]-[.D46]" office:value-type="percentage" office:value="0.339337709798902" calcext:value-type="percentage">
            <text:p>33.93 %</text:p>
          </table:table-cell>
          <table:table-cell table:style-name="ce122" table:formula="of:=[.B46]-[.E46]" office:value-type="percentage" office:value="0.305526418466834" calcext:value-type="percentage">
            <text:p>30.55 %</text:p>
          </table:table-cell>
          <table:table-cell table:style-name="ce125"/>
          <table:table-cell table:style-name="ce127" office:value-type="percentage" office:value="-0.0027933" calcext:value-type="percentage">
            <text:p>-0.28 %</text:p>
          </table:table-cell>
          <table:table-cell table:style-name="ce133" table:formula="of:=(1+[.B46])/(1+[.$N46])-1" office:value-type="percentage" office:value="0.329687534700964" calcext:value-type="percentage">
            <text:p>32.97 %</text:p>
          </table:table-cell>
          <table:table-cell table:style-name="ce133" table:formula="of:=(1+[.C46])/(1+[.$N46])-1" office:value-type="percentage" office:value="0.0200994437763002" calcext:value-type="percentage">
            <text:p>2.01 %</text:p>
          </table:table-cell>
          <table:table-cell table:style-name="ce133" table:formula="of:=(1+[.D46])/(1+[.$N46])-1" office:value-type="percentage" office:value="-0.0106007022301583" calcext:value-type="percentage">
            <text:p>-1.06 %</text:p>
          </table:table-cell>
          <table:table-cell table:style-name="ce133" table:formula="of:=(1+[.E46])/(1+[.$N46])-1" office:value-type="percentage" office:value="0.0233052987344042" calcext:value-type="percentage">
            <text:p>2.33 %</text:p>
          </table:table-cell>
          <table:table-cell table:number-columns-repeated="16366"/>
        </table:table-row>
        <table:table-row table:style-name="ro10">
          <table:table-cell table:style-name="ce20" office:value-type="float" office:value="1956" calcext:value-type="float">
            <text:p>1956</text:p>
          </table:table-cell>
          <table:table-cell table:style-name="ce41" table:formula="of:=([$'S&amp;P 500 &amp; Raw Data'.B32]-[$'S&amp;P 500 &amp; Raw Data'.B31]+[$'S&amp;P 500 &amp; Raw Data'.C32])/[$'S&amp;P 500 &amp; Raw Data'.B31]" office:value-type="percentage" office:value="0.0743951187335094" calcext:value-type="percentage">
            <text:p>7.44 %</text:p>
          </table:table-cell>
          <table:table-cell table:style-name="ce41" table:formula="of:=[$'T. Bill rates'.C34]" office:value-type="percentage" office:value="0.026275" calcext:value-type="percentage">
            <text:p>2.63 %</text:p>
          </table:table-cell>
          <table:table-cell table:style-name="ce41" table:formula="of:=[$'S&amp;P 500 &amp; Raw Data'.F32]" office:value-type="percentage" office:value="-0.0225577381731542" calcext:value-type="percentage">
            <text:p>-2.26 %</text:p>
          </table:table-cell>
          <table:table-cell table:style-name="ce41" table:formula="of:=[$'S&amp;P 500 &amp; Raw Data'.J32]" office:value-type="percentage" office:value="-0.0235265419796209" calcext:value-type="percentage">
            <text:p>-2.35 %</text:p>
          </table:table-cell>
          <table:table-cell table:style-name="ce70" table:formula="of:=[.F46]*(1+[.B47])" office:value-type="float" office:value="1115.73006602201" calcext:value-type="float">
            <text:p><text:s/>$1,115.73 </text:p>
          </table:table-cell>
          <table:table-cell table:style-name="ce70" table:formula="of:=[.G46]*(1+[.C47])" office:value-type="float" office:value="137.980187991647" calcext:value-type="float">
            <text:p><text:s/>$137.98 </text:p>
          </table:table-cell>
          <table:table-cell table:style-name="ce98" table:formula="of:=[.H46]*(1+[.D47])" office:value-type="float" office:value="210.785964244643" calcext:value-type="float">
            <text:p><text:s/>$210.79 </text:p>
          </table:table-cell>
          <table:table-cell table:style-name="ce70" table:formula="of:=[.I46]*(1+[.E47])" office:value-type="float" office:value="410.841009190782" calcext:value-type="float">
            <text:p><text:s/>$410.84 </text:p>
          </table:table-cell>
          <table:table-cell table:style-name="ce41" table:formula="of:=[.B47]-[.C47]" office:value-type="percentage" office:value="0.0481201187335094" calcext:value-type="percentage">
            <text:p>4.81 %</text:p>
          </table:table-cell>
          <table:table-cell table:style-name="ce115" table:formula="of:=[.B47]-[.D47]" office:value-type="percentage" office:value="0.0969528569066635" calcext:value-type="percentage">
            <text:p>9.70 %</text:p>
          </table:table-cell>
          <table:table-cell table:style-name="ce122" table:formula="of:=[.B47]-[.E47]" office:value-type="percentage" office:value="0.0979216607131302" calcext:value-type="percentage">
            <text:p>9.79 %</text:p>
          </table:table-cell>
          <table:table-cell table:style-name="ce125"/>
          <table:table-cell table:style-name="ce127" office:value-type="percentage" office:value="0.0152505" calcext:value-type="percentage">
            <text:p>1.53 %</text:p>
          </table:table-cell>
          <table:table-cell table:style-name="ce133" table:formula="of:=(1+[.B47])/(1+[.$N47])-1" office:value-type="percentage" office:value="0.0582561828174517" calcext:value-type="percentage">
            <text:p>5.83 %</text:p>
          </table:table-cell>
          <table:table-cell table:style-name="ce133" table:formula="of:=(1+[.C47])/(1+[.$N47])-1" office:value-type="percentage" office:value="0.010858896400445" calcext:value-type="percentage">
            <text:p>1.09 %</text:p>
          </table:table-cell>
          <table:table-cell table:style-name="ce133" table:formula="of:=(1+[.D47])/(1+[.$N47])-1" office:value-type="percentage" office:value="-0.0372403049032276" calcext:value-type="percentage">
            <text:p>-3.72 %</text:p>
          </table:table-cell>
          <table:table-cell table:style-name="ce133" table:formula="of:=(1+[.E47])/(1+[.$N47])-1" office:value-type="percentage" office:value="-0.0381945559047949" calcext:value-type="percentage">
            <text:p>-3.82 %</text:p>
          </table:table-cell>
          <table:table-cell table:number-columns-repeated="16366"/>
        </table:table-row>
        <table:table-row table:style-name="ro10">
          <table:table-cell table:style-name="ce20" office:value-type="float" office:value="1957" calcext:value-type="float">
            <text:p>1957</text:p>
          </table:table-cell>
          <table:table-cell table:style-name="ce41" table:formula="of:=([$'S&amp;P 500 &amp; Raw Data'.B33]-[$'S&amp;P 500 &amp; Raw Data'.B32]+[$'S&amp;P 500 &amp; Raw Data'.C33])/[$'S&amp;P 500 &amp; Raw Data'.B32]" office:value-type="percentage" office:value="-0.10457360188558" calcext:value-type="percentage">
            <text:p>-10.46 %</text:p>
          </table:table-cell>
          <table:table-cell table:style-name="ce41" table:formula="of:=[$'T. Bill rates'.C35]" office:value-type="percentage" office:value="0.03225" calcext:value-type="percentage">
            <text:p>3.23 %</text:p>
          </table:table-cell>
          <table:table-cell table:style-name="ce41" table:formula="of:=[$'S&amp;P 500 &amp; Raw Data'.F33]" office:value-type="percentage" office:value="0.0679701284662499" calcext:value-type="percentage">
            <text:p>6.80 %</text:p>
          </table:table-cell>
          <table:table-cell table:style-name="ce41" table:formula="of:=[$'S&amp;P 500 &amp; Raw Data'.J33]" office:value-type="percentage" office:value="-0.00718928440254237" calcext:value-type="percentage">
            <text:p>-0.72 %</text:p>
          </table:table-cell>
          <table:table-cell table:style-name="ce70" table:formula="of:=[.F47]*(1+[.B48])" office:value-type="float" office:value="999.054154286055" calcext:value-type="float">
            <text:p><text:s/>$999.05 </text:p>
          </table:table-cell>
          <table:table-cell table:style-name="ce70" table:formula="of:=[.G47]*(1+[.C48])" office:value-type="float" office:value="142.430049054378" calcext:value-type="float">
            <text:p><text:s/>$142.43 </text:p>
          </table:table-cell>
          <table:table-cell table:style-name="ce98" table:formula="of:=[.H47]*(1+[.D48])" office:value-type="float" office:value="225.113113313234" calcext:value-type="float">
            <text:p><text:s/>$225.11 </text:p>
          </table:table-cell>
          <table:table-cell table:style-name="ce70" table:formula="of:=[.I47]*(1+[.E48])" office:value-type="float" office:value="407.887356331482" calcext:value-type="float">
            <text:p><text:s/>$407.89 </text:p>
          </table:table-cell>
          <table:table-cell table:style-name="ce41" table:formula="of:=[.B48]-[.C48]" office:value-type="percentage" office:value="-0.13682360188558" calcext:value-type="percentage">
            <text:p>-13.68 %</text:p>
          </table:table-cell>
          <table:table-cell table:style-name="ce115" table:formula="of:=[.B48]-[.D48]" office:value-type="percentage" office:value="-0.17254373035183" calcext:value-type="percentage">
            <text:p>-17.25 %</text:p>
          </table:table-cell>
          <table:table-cell table:style-name="ce122" table:formula="of:=[.B48]-[.E48]" office:value-type="percentage" office:value="-0.0973843174830372" calcext:value-type="percentage">
            <text:p>-9.74 %</text:p>
          </table:table-cell>
          <table:table-cell table:style-name="ce125"/>
          <table:table-cell table:style-name="ce127" office:value-type="percentage" office:value="0.0334151" calcext:value-type="percentage">
            <text:p>3.34 %</text:p>
          </table:table-cell>
          <table:table-cell table:style-name="ce133" table:formula="of:=(1+[.B48])/(1+[.$N48])-1" office:value-type="percentage" office:value="-0.133526887584263" calcext:value-type="percentage">
            <text:p>-13.35 %</text:p>
          </table:table-cell>
          <table:table-cell table:style-name="ce133" table:formula="of:=(1+[.C48])/(1+[.$N48])-1" office:value-type="percentage" office:value="-0.00112742691683154" calcext:value-type="percentage">
            <text:p>-0.11 %</text:p>
          </table:table-cell>
          <table:table-cell table:style-name="ce133" table:formula="of:=(1+[.D48])/(1+[.$N48])-1" office:value-type="percentage" office:value="0.0334377042354519" calcext:value-type="percentage">
            <text:p>3.34 %</text:p>
          </table:table-cell>
          <table:table-cell table:style-name="ce133" table:formula="of:=(1+[.E48])/(1+[.$N48])-1" office:value-type="percentage" office:value="-0.0392914564559221" calcext:value-type="percentage">
            <text:p>-3.93 %</text:p>
          </table:table-cell>
          <table:table-cell table:number-columns-repeated="16366"/>
        </table:table-row>
        <table:table-row table:style-name="ro10">
          <table:table-cell table:style-name="ce20" office:value-type="float" office:value="1958" calcext:value-type="float">
            <text:p>1958</text:p>
          </table:table-cell>
          <table:table-cell table:style-name="ce41" table:formula="of:=([$'S&amp;P 500 &amp; Raw Data'.B34]-[$'S&amp;P 500 &amp; Raw Data'.B33]+[$'S&amp;P 500 &amp; Raw Data'.C34])/[$'S&amp;P 500 &amp; Raw Data'.B33]" office:value-type="percentage" office:value="0.437199549887472" calcext:value-type="percentage">
            <text:p>43.72 %</text:p>
          </table:table-cell>
          <table:table-cell table:style-name="ce41" table:formula="of:=[$'T. Bill rates'.C36]" office:value-type="percentage" office:value="0.0177083333333333" calcext:value-type="percentage">
            <text:p>1.77 %</text:p>
          </table:table-cell>
          <table:table-cell table:style-name="ce41" table:formula="of:=[$'S&amp;P 500 &amp; Raw Data'.F34]" office:value-type="percentage" office:value="-0.0209901817552747" calcext:value-type="percentage">
            <text:p>-2.10 %</text:p>
          </table:table-cell>
          <table:table-cell table:style-name="ce41" table:formula="of:=[$'S&amp;P 500 &amp; Raw Data'.J34]" office:value-type="percentage" office:value="0.0643009289733603" calcext:value-type="percentage">
            <text:p>6.43 %</text:p>
          </table:table-cell>
          <table:table-cell table:style-name="ce70" table:formula="of:=[.F48]*(1+[.B49])" office:value-type="float" office:value="1435.84018085313" calcext:value-type="float">
            <text:p><text:s/>$1,435.84 </text:p>
          </table:table-cell>
          <table:table-cell table:style-name="ce70" table:formula="of:=[.G48]*(1+[.C49])" office:value-type="float" office:value="144.952247839716" calcext:value-type="float">
            <text:p><text:s/>$144.95 </text:p>
          </table:table-cell>
          <table:table-cell table:style-name="ce98" table:formula="of:=[.H48]*(1+[.D49])" office:value-type="float" office:value="220.387948149293" calcext:value-type="float">
            <text:p><text:s/>$220.39 </text:p>
          </table:table-cell>
          <table:table-cell table:style-name="ce70" table:formula="of:=[.I48]*(1+[.E49])" office:value-type="float" office:value="434.114892260084" calcext:value-type="float">
            <text:p><text:s/>$434.11 </text:p>
          </table:table-cell>
          <table:table-cell table:style-name="ce41" table:formula="of:=[.B49]-[.C49]" office:value-type="percentage" office:value="0.419491216554139" calcext:value-type="percentage">
            <text:p>41.95 %</text:p>
          </table:table-cell>
          <table:table-cell table:style-name="ce115" table:formula="of:=[.B49]-[.D49]" office:value-type="percentage" office:value="0.458189731642747" calcext:value-type="percentage">
            <text:p>45.82 %</text:p>
          </table:table-cell>
          <table:table-cell table:style-name="ce122" table:formula="of:=[.B49]-[.E49]" office:value-type="percentage" office:value="0.372898620914112" calcext:value-type="percentage">
            <text:p>37.29 %</text:p>
          </table:table-cell>
          <table:table-cell table:style-name="ce125"/>
          <table:table-cell table:style-name="ce127" office:value-type="percentage" office:value="0.0272916" calcext:value-type="percentage">
            <text:p>2.73 %</text:p>
          </table:table-cell>
          <table:table-cell table:style-name="ce133" table:formula="of:=(1+[.B49])/(1+[.$N49])-1" office:value-type="percentage" office:value="0.39901810731001" calcext:value-type="percentage">
            <text:p>39.90 %</text:p>
          </table:table-cell>
          <table:table-cell table:style-name="ce133" table:formula="of:=(1+[.C49])/(1+[.$N49])-1" office:value-type="percentage" office:value="-0.00932867227442202" calcext:value-type="percentage">
            <text:p>-0.93 %</text:p>
          </table:table-cell>
          <table:table-cell table:style-name="ce133" table:formula="of:=(1+[.D49])/(1+[.$N49])-1" office:value-type="percentage" office:value="-0.046999101088021" calcext:value-type="percentage">
            <text:p>-4.70 %</text:p>
          </table:table-cell>
          <table:table-cell table:style-name="ce133" table:formula="of:=(1+[.E49])/(1+[.$N49])-1" office:value-type="percentage" office:value="0.0360261185561726" calcext:value-type="percentage">
            <text:p>3.60 %</text:p>
          </table:table-cell>
          <table:table-cell table:number-columns-repeated="16366"/>
        </table:table-row>
        <table:table-row table:style-name="ro10">
          <table:table-cell table:style-name="ce20" office:value-type="float" office:value="1959" calcext:value-type="float">
            <text:p>1959</text:p>
          </table:table-cell>
          <table:table-cell table:style-name="ce41" table:formula="of:=([$'S&amp;P 500 &amp; Raw Data'.B35]-[$'S&amp;P 500 &amp; Raw Data'.B34]+[$'S&amp;P 500 &amp; Raw Data'.C35])/[$'S&amp;P 500 &amp; Raw Data'.B34]" office:value-type="percentage" office:value="0.120564571635573" calcext:value-type="percentage">
            <text:p>12.06 %</text:p>
          </table:table-cell>
          <table:table-cell table:style-name="ce41" table:formula="of:=[$'T. Bill rates'.C37]" office:value-type="percentage" office:value="0.0338583333333333" calcext:value-type="percentage">
            <text:p>3.39 %</text:p>
          </table:table-cell>
          <table:table-cell table:style-name="ce41" table:formula="of:=[$'S&amp;P 500 &amp; Raw Data'.F35]" office:value-type="percentage" office:value="-0.0264663125913851" calcext:value-type="percentage">
            <text:p>-2.65 %</text:p>
          </table:table-cell>
          <table:table-cell table:style-name="ce41" table:formula="of:=[$'S&amp;P 500 &amp; Raw Data'.J35]" office:value-type="percentage" office:value="0.0157434308950227" calcext:value-type="percentage">
            <text:p>1.57 %</text:p>
          </table:table-cell>
          <table:table-cell table:style-name="ce70" table:formula="of:=[.F49]*(1+[.B50])" office:value-type="float" office:value="1608.95163719483" calcext:value-type="float">
            <text:p><text:s/>$1,608.95 </text:p>
          </table:table-cell>
          <table:table-cell table:style-name="ce70" table:formula="of:=[.G49]*(1+[.C50])" office:value-type="float" office:value="149.860089364489" calcext:value-type="float">
            <text:p><text:s/>$149.86 </text:p>
          </table:table-cell>
          <table:table-cell table:style-name="ce98" table:formula="of:=[.H49]*(1+[.D50])" office:value-type="float" office:value="214.5550918222" calcext:value-type="float">
            <text:p><text:s/>$214.56 </text:p>
          </table:table-cell>
          <table:table-cell table:style-name="ce70" table:formula="of:=[.I49]*(1+[.E50])" office:value-type="float" office:value="440.949350066881" calcext:value-type="float">
            <text:p><text:s/>$440.95 </text:p>
          </table:table-cell>
          <table:table-cell table:style-name="ce41" table:formula="of:=[.B50]-[.C50]" office:value-type="percentage" office:value="0.0867062383022399" calcext:value-type="percentage">
            <text:p>8.67 %</text:p>
          </table:table-cell>
          <table:table-cell table:style-name="ce115" table:formula="of:=[.B50]-[.D50]" office:value-type="percentage" office:value="0.147030884226958" calcext:value-type="percentage">
            <text:p>14.70 %</text:p>
          </table:table-cell>
          <table:table-cell table:style-name="ce122" table:formula="of:=[.B50]-[.E50]" office:value-type="percentage" office:value="0.104821140740551" calcext:value-type="percentage">
            <text:p>10.48 %</text:p>
          </table:table-cell>
          <table:table-cell table:style-name="ce125"/>
          <table:table-cell table:style-name="ce127" office:value-type="percentage" office:value="0.0101068" calcext:value-type="percentage">
            <text:p>1.01 %</text:p>
          </table:table-cell>
          <table:table-cell table:style-name="ce133" table:formula="of:=(1+[.B50])/(1+[.$N50])-1" office:value-type="percentage" office:value="0.109352567110303" calcext:value-type="percentage">
            <text:p>10.94 %</text:p>
          </table:table-cell>
          <table:table-cell table:style-name="ce133" table:formula="of:=(1+[.C50])/(1+[.$N50])-1" office:value-type="percentage" office:value="0.0235138832184214" calcext:value-type="percentage">
            <text:p>2.35 %</text:p>
          </table:table-cell>
          <table:table-cell table:style-name="ce133" table:formula="of:=(1+[.D50])/(1+[.$N50])-1" office:value-type="percentage" office:value="-0.0362071739259503" calcext:value-type="percentage">
            <text:p>-3.62 %</text:p>
          </table:table-cell>
          <table:table-cell table:style-name="ce133" table:formula="of:=(1+[.E50])/(1+[.$N50])-1" office:value-type="percentage" office:value="0.00558023260017948" calcext:value-type="percentage">
            <text:p>0.56 %</text:p>
          </table:table-cell>
          <table:table-cell table:number-columns-repeated="16366"/>
        </table:table-row>
        <table:table-row table:style-name="ro10">
          <table:table-cell table:style-name="ce20" office:value-type="float" office:value="1960" calcext:value-type="float">
            <text:p>1960</text:p>
          </table:table-cell>
          <table:table-cell table:style-name="ce41" table:formula="of:=([$'S&amp;P 500 &amp; Raw Data'.B36]-[$'S&amp;P 500 &amp; Raw Data'.B35]+[$'S&amp;P 500 &amp; Raw Data'.C36])/[$'S&amp;P 500 &amp; Raw Data'.B35]" office:value-type="percentage" office:value="0.00336535314743695" calcext:value-type="percentage">
            <text:p>0.34 %</text:p>
          </table:table-cell>
          <table:table-cell table:style-name="ce41" table:formula="of:=[$'T. Bill rates'.C38]" office:value-type="percentage" office:value="0.0288333333333333" calcext:value-type="percentage">
            <text:p>2.88 %</text:p>
          </table:table-cell>
          <table:table-cell table:style-name="ce41" table:formula="of:=[$'S&amp;P 500 &amp; Raw Data'.F36]" office:value-type="percentage" office:value="0.116395036909634" calcext:value-type="percentage">
            <text:p>11.64 %</text:p>
          </table:table-cell>
          <table:table-cell table:style-name="ce41" table:formula="of:=[$'S&amp;P 500 &amp; Raw Data'.J36]" office:value-type="percentage" office:value="0.0666318716330343" calcext:value-type="percentage">
            <text:p>6.66 %</text:p>
          </table:table-cell>
          <table:table-cell table:style-name="ce70" table:formula="of:=[.F50]*(1+[.B51])" office:value-type="float" office:value="1614.36632765114" calcext:value-type="float">
            <text:p><text:s/>$1,614.37 </text:p>
          </table:table-cell>
          <table:table-cell table:style-name="ce70" table:formula="of:=[.G50]*(1+[.C51])" office:value-type="float" office:value="154.181055274499" calcext:value-type="float">
            <text:p><text:s/>$154.18 </text:p>
          </table:table-cell>
          <table:table-cell table:style-name="ce98" table:formula="of:=[.H50]*(1+[.D51])" office:value-type="float" office:value="239.528239653995" calcext:value-type="float">
            <text:p><text:s/>$239.53 </text:p>
          </table:table-cell>
          <table:table-cell table:style-name="ce70" table:formula="of:=[.I50]*(1+[.E51])" office:value-type="float" office:value="470.330630557207" calcext:value-type="float">
            <text:p><text:s/>$470.33 </text:p>
          </table:table-cell>
          <table:table-cell table:style-name="ce41" table:formula="of:=[.B51]-[.C51]" office:value-type="percentage" office:value="-0.0254679801858964" calcext:value-type="percentage">
            <text:p>-2.55 %</text:p>
          </table:table-cell>
          <table:table-cell table:style-name="ce115" table:formula="of:=[.B51]-[.D51]" office:value-type="percentage" office:value="-0.113029683762197" calcext:value-type="percentage">
            <text:p>-11.30 %</text:p>
          </table:table-cell>
          <table:table-cell table:style-name="ce122" table:formula="of:=[.B51]-[.E51]" office:value-type="percentage" office:value="-0.0632665184855974" calcext:value-type="percentage">
            <text:p>-6.33 %</text:p>
          </table:table-cell>
          <table:table-cell table:style-name="ce122" table:formula="of:=(([.F51]/100)^(1/([.A51]-[.$A$19]+1)))-(([.H51]/100)^(1/([.A51]-[.$A$19]+1)))" office:value-type="percentage" office:value="0.0611197880312173" calcext:value-type="percentage">
            <text:p>6.11 %</text:p>
          </table:table-cell>
          <table:table-cell table:style-name="ce127" office:value-type="percentage" office:value="0.0145798" calcext:value-type="percentage">
            <text:p>1.46 %</text:p>
          </table:table-cell>
          <table:table-cell table:style-name="ce133" table:formula="of:=(1+[.B51])/(1+[.$N51])-1" office:value-type="percentage" office:value="-0.011053292064915" calcext:value-type="percentage">
            <text:p>-1.11 %</text:p>
          </table:table-cell>
          <table:table-cell table:style-name="ce133" table:formula="of:=(1+[.C51])/(1+[.$N51])-1" office:value-type="percentage" office:value="0.0140487060094567" calcext:value-type="percentage">
            <text:p>1.40 %</text:p>
          </table:table-cell>
          <table:table-cell table:style-name="ce133" table:formula="of:=(1+[.D51])/(1+[.$N51])-1" office:value-type="percentage" office:value="0.100352123026334" calcext:value-type="percentage">
            <text:p>10.04 %</text:p>
          </table:table-cell>
          <table:table-cell table:style-name="ce133" table:formula="of:=(1+[.E51])/(1+[.$N51])-1" office:value-type="percentage" office:value="0.0513040685740387" calcext:value-type="percentage">
            <text:p>5.13 %</text:p>
          </table:table-cell>
          <table:table-cell table:number-columns-repeated="16366"/>
        </table:table-row>
        <table:table-row table:style-name="ro10">
          <table:table-cell table:style-name="ce20" office:value-type="float" office:value="1961" calcext:value-type="float">
            <text:p>1961</text:p>
          </table:table-cell>
          <table:table-cell table:style-name="ce41" table:formula="of:=([$'S&amp;P 500 &amp; Raw Data'.B37]-[$'S&amp;P 500 &amp; Raw Data'.B36]+[$'S&amp;P 500 &amp; Raw Data'.C37])/[$'S&amp;P 500 &amp; Raw Data'.B36]" office:value-type="percentage" office:value="0.266377129581828" calcext:value-type="percentage">
            <text:p>26.64 %</text:p>
          </table:table-cell>
          <table:table-cell table:style-name="ce41" table:formula="of:=[$'T. Bill rates'.C39]" office:value-type="percentage" office:value="0.0235416666666667" calcext:value-type="percentage">
            <text:p>2.35 %</text:p>
          </table:table-cell>
          <table:table-cell table:style-name="ce41" table:formula="of:=[$'S&amp;P 500 &amp; Raw Data'.F37]" office:value-type="percentage" office:value="0.0206092080763232" calcext:value-type="percentage">
            <text:p>2.06 %</text:p>
          </table:table-cell>
          <table:table-cell table:style-name="ce41" table:formula="of:=[$'S&amp;P 500 &amp; Raw Data'.J37]" office:value-type="percentage" office:value="0.051" calcext:value-type="percentage">
            <text:p>5.10 %</text:p>
          </table:table-cell>
          <table:table-cell table:style-name="ce70" table:formula="of:=[.F51]*(1+[.B52])" office:value-type="float" office:value="2044.3965961044" calcext:value-type="float">
            <text:p><text:s/>$2,044.40 </text:p>
          </table:table-cell>
          <table:table-cell table:style-name="ce70" table:formula="of:=[.G51]*(1+[.C52])" office:value-type="float" office:value="157.810734284086" calcext:value-type="float">
            <text:p><text:s/>$157.81 </text:p>
          </table:table-cell>
          <table:table-cell table:style-name="ce98" table:formula="of:=[.H51]*(1+[.D52])" office:value-type="float" office:value="244.464726985179" calcext:value-type="float">
            <text:p><text:s/>$244.46 </text:p>
          </table:table-cell>
          <table:table-cell table:style-name="ce70" table:formula="of:=[.I51]*(1+[.E52])" office:value-type="float" office:value="494.317492715625" calcext:value-type="float">
            <text:p><text:s/>$494.32 </text:p>
          </table:table-cell>
          <table:table-cell table:style-name="ce41" table:formula="of:=[.B52]-[.C52]" office:value-type="percentage" office:value="0.242835462915161" calcext:value-type="percentage">
            <text:p>24.28 %</text:p>
          </table:table-cell>
          <table:table-cell table:style-name="ce115" table:formula="of:=[.B52]-[.D52]" office:value-type="percentage" office:value="0.245767921505504" calcext:value-type="percentage">
            <text:p>24.58 %</text:p>
          </table:table-cell>
          <table:table-cell table:style-name="ce122" table:formula="of:=[.B52]-[.E52]" office:value-type="percentage" office:value="0.215377129581828" calcext:value-type="percentage">
            <text:p>21.54 %</text:p>
          </table:table-cell>
          <table:table-cell table:style-name="ce122" table:formula="of:=(([.F52]/100)^(1/([.A52]-[.$A$19]+1)))-(([.H52]/100)^(1/([.A52]-[.$A$19]+1)))" office:value-type="percentage" office:value="0.0661735918299726" calcext:value-type="percentage">
            <text:p>6.62 %</text:p>
          </table:table-cell>
          <table:table-cell table:style-name="ce127" office:value-type="percentage" office:value="0.0107072" calcext:value-type="percentage">
            <text:p>1.07 %</text:p>
          </table:table-cell>
          <table:table-cell table:style-name="ce133" table:formula="of:=(1+[.B52])/(1+[.$N52])-1" office:value-type="percentage" office:value="0.252961421054315" calcext:value-type="percentage">
            <text:p>25.30 %</text:p>
          </table:table-cell>
          <table:table-cell table:style-name="ce133" table:formula="of:=(1+[.C52])/(1+[.$N52])-1" office:value-type="percentage" office:value="0.0126985012738274" calcext:value-type="percentage">
            <text:p>1.27 %</text:p>
          </table:table-cell>
          <table:table-cell table:style-name="ce133" table:formula="of:=(1+[.D52])/(1+[.$N52])-1" office:value-type="percentage" office:value="0.00979710847644433" calcext:value-type="percentage">
            <text:p>0.98 %</text:p>
          </table:table-cell>
          <table:table-cell table:style-name="ce133" table:formula="of:=(1+[.E52])/(1+[.$N52])-1" office:value-type="percentage" office:value="0.0398659473287615" calcext:value-type="percentage">
            <text:p>3.99 %</text:p>
          </table:table-cell>
          <table:table-cell table:number-columns-repeated="16366"/>
        </table:table-row>
        <table:table-row table:style-name="ro10">
          <table:table-cell table:style-name="ce20" office:value-type="float" office:value="1962" calcext:value-type="float">
            <text:p>1962</text:p>
          </table:table-cell>
          <table:table-cell table:style-name="ce41" table:formula="of:=([$'S&amp;P 500 &amp; Raw Data'.B38]-[$'S&amp;P 500 &amp; Raw Data'.B37]+[$'S&amp;P 500 &amp; Raw Data'.C38])/[$'S&amp;P 500 &amp; Raw Data'.B37]" office:value-type="percentage" office:value="-0.0881146051712089" calcext:value-type="percentage">
            <text:p>-8.81 %</text:p>
          </table:table-cell>
          <table:table-cell table:style-name="ce41" table:formula="of:=[$'T. Bill rates'.C40]" office:value-type="percentage" office:value="0.0277333333333333" calcext:value-type="percentage">
            <text:p>2.77 %</text:p>
          </table:table-cell>
          <table:table-cell table:style-name="ce41" table:formula="of:=[$'S&amp;P 500 &amp; Raw Data'.F38]" office:value-type="percentage" office:value="0.0569354405400846" calcext:value-type="percentage">
            <text:p>5.69 %</text:p>
          </table:table-cell>
          <table:table-cell table:style-name="ce41" table:formula="of:=[$'S&amp;P 500 &amp; Raw Data'.J38]" office:value-type="percentage" office:value="0.0649532799360658" calcext:value-type="percentage">
            <text:p>6.50 %</text:p>
          </table:table-cell>
          <table:table-cell table:style-name="ce70" table:formula="of:=[.F52]*(1+[.B53])" office:value-type="float" office:value="1864.2553972253" calcext:value-type="float">
            <text:p><text:s/>$1,864.26 </text:p>
          </table:table-cell>
          <table:table-cell table:style-name="ce70" table:formula="of:=[.G52]*(1+[.C53])" office:value-type="float" office:value="162.187351981564" calcext:value-type="float">
            <text:p><text:s/>$162.19 </text:p>
          </table:table-cell>
          <table:table-cell table:style-name="ce98" table:formula="of:=[.H52]*(1+[.D53])" office:value-type="float" office:value="258.383433912592" calcext:value-type="float">
            <text:p><text:s/>$258.38 </text:p>
          </table:table-cell>
          <table:table-cell table:style-name="ce70" table:formula="of:=[.I52]*(1+[.E53])" office:value-type="float" office:value="526.425035197277" calcext:value-type="float">
            <text:p><text:s/>$526.43 </text:p>
          </table:table-cell>
          <table:table-cell table:style-name="ce41" table:formula="of:=[.B53]-[.C53]" office:value-type="percentage" office:value="-0.115847938504542" calcext:value-type="percentage">
            <text:p>-11.58 %</text:p>
          </table:table-cell>
          <table:table-cell table:style-name="ce115" table:formula="of:=[.B53]-[.D53]" office:value-type="percentage" office:value="-0.145050045711293" calcext:value-type="percentage">
            <text:p>-14.51 %</text:p>
          </table:table-cell>
          <table:table-cell table:style-name="ce122" table:formula="of:=[.B53]-[.E53]" office:value-type="percentage" office:value="-0.153067885107275" calcext:value-type="percentage">
            <text:p>-15.31 %</text:p>
          </table:table-cell>
          <table:table-cell table:style-name="ce122" table:formula="of:=(([.F53]/100)^(1/([.A53]-[.$A$19]+1)))-(([.H53]/100)^(1/([.A53]-[.$A$19]+1)))" office:value-type="percentage" office:value="0.0596834653789899" calcext:value-type="percentage">
            <text:p>5.97 %</text:p>
          </table:table-cell>
          <table:table-cell table:style-name="ce127" office:value-type="percentage" office:value="0.0119877" calcext:value-type="percentage">
            <text:p>1.20 %</text:p>
          </table:table-cell>
          <table:table-cell table:style-name="ce133" table:formula="of:=(1+[.B53])/(1+[.$N53])-1" office:value-type="percentage" office:value="-0.0989165235617081" calcext:value-type="percentage">
            <text:p>-9.89 %</text:p>
          </table:table-cell>
          <table:table-cell table:style-name="ce133" table:formula="of:=(1+[.C53])/(1+[.$N53])-1" office:value-type="percentage" office:value="0.0155591153265335" calcext:value-type="percentage">
            <text:p>1.56 %</text:p>
          </table:table-cell>
          <table:table-cell table:style-name="ce133" table:formula="of:=(1+[.D53])/(1+[.$N53])-1" office:value-type="percentage" office:value="0.0444153032097965" calcext:value-type="percentage">
            <text:p>4.44 %</text:p>
          </table:table-cell>
          <table:table-cell table:style-name="ce133" table:formula="of:=(1+[.E53])/(1+[.$N53])-1" office:value-type="percentage" office:value="0.0523381657070197" calcext:value-type="percentage">
            <text:p>5.23 %</text:p>
          </table:table-cell>
          <table:table-cell table:number-columns-repeated="16366"/>
        </table:table-row>
        <table:table-row table:style-name="ro10">
          <table:table-cell table:style-name="ce20" office:value-type="float" office:value="1963" calcext:value-type="float">
            <text:p>1963</text:p>
          </table:table-cell>
          <table:table-cell table:style-name="ce41" table:formula="of:=([$'S&amp;P 500 &amp; Raw Data'.B39]-[$'S&amp;P 500 &amp; Raw Data'.B38]+[$'S&amp;P 500 &amp; Raw Data'.C39])/[$'S&amp;P 500 &amp; Raw Data'.B38]" office:value-type="percentage" office:value="0.226119270998415" calcext:value-type="percentage">
            <text:p>22.61 %</text:p>
          </table:table-cell>
          <table:table-cell table:style-name="ce41" table:formula="of:=[$'T. Bill rates'.C41]" office:value-type="percentage" office:value="0.0315916666666667" calcext:value-type="percentage">
            <text:p>3.16 %</text:p>
          </table:table-cell>
          <table:table-cell table:style-name="ce41" table:formula="of:=[$'S&amp;P 500 &amp; Raw Data'.F39]" office:value-type="percentage" office:value="0.0168416207395461" calcext:value-type="percentage">
            <text:p>1.68 %</text:p>
          </table:table-cell>
          <table:table-cell table:style-name="ce41" table:formula="of:=[$'S&amp;P 500 &amp; Raw Data'.J39]" office:value-type="percentage" office:value="0.0546448057118623" calcext:value-type="percentage">
            <text:p>5.46 %</text:p>
          </table:table-cell>
          <table:table-cell table:style-name="ce70" table:formula="of:=[.F53]*(1+[.B54])" office:value-type="float" office:value="2285.79946860074" calcext:value-type="float">
            <text:p><text:s/>$2,285.80 </text:p>
          </table:table-cell>
          <table:table-cell table:style-name="ce70" table:formula="of:=[.G53]*(1+[.C54])" office:value-type="float" office:value="167.311120742915" calcext:value-type="float">
            <text:p><text:s/>$167.31 </text:p>
          </table:table-cell>
          <table:table-cell table:style-name="ce98" table:formula="of:=[.H53]*(1+[.D54])" office:value-type="float" office:value="262.73502971193" calcext:value-type="float">
            <text:p><text:s/>$262.74 </text:p>
          </table:table-cell>
          <table:table-cell table:style-name="ce70" table:formula="of:=[.I53]*(1+[.E54])" office:value-type="float" office:value="555.191428967492" calcext:value-type="float">
            <text:p><text:s/>$555.19 </text:p>
          </table:table-cell>
          <table:table-cell table:style-name="ce41" table:formula="of:=[.B54]-[.C54]" office:value-type="percentage" office:value="0.194527604331748" calcext:value-type="percentage">
            <text:p>19.45 %</text:p>
          </table:table-cell>
          <table:table-cell table:style-name="ce115" table:formula="of:=[.B54]-[.D54]" office:value-type="percentage" office:value="0.209277650258869" calcext:value-type="percentage">
            <text:p>20.93 %</text:p>
          </table:table-cell>
          <table:table-cell table:style-name="ce122" table:formula="of:=[.B54]-[.E54]" office:value-type="percentage" office:value="0.171474465286553" calcext:value-type="percentage">
            <text:p>17.15 %</text:p>
          </table:table-cell>
          <table:table-cell table:style-name="ce122" table:formula="of:=(([.F54]/100)^(1/([.A54]-[.$A$19]+1)))-(([.H54]/100)^(1/([.A54]-[.$A$19]+1)))" office:value-type="percentage" office:value="0.0636189939115148" calcext:value-type="percentage">
            <text:p>6.36 %</text:p>
          </table:table-cell>
          <table:table-cell table:style-name="ce127" office:value-type="percentage" office:value="0.0123967" calcext:value-type="percentage">
            <text:p>1.24 %</text:p>
          </table:table-cell>
          <table:table-cell table:style-name="ce133" table:formula="of:=(1+[.B54])/(1+[.$N54])-1" office:value-type="percentage" office:value="0.211105558718648" calcext:value-type="percentage">
            <text:p>21.11 %</text:p>
          </table:table-cell>
          <table:table-cell table:style-name="ce133" table:formula="of:=(1+[.C54])/(1+[.$N54])-1" office:value-type="percentage" office:value="0.018959926150161" calcext:value-type="percentage">
            <text:p>1.90 %</text:p>
          </table:table-cell>
          <table:table-cell table:style-name="ce133" table:formula="of:=(1+[.D54])/(1+[.$N54])-1" office:value-type="percentage" office:value="0.00439049311356521" calcext:value-type="percentage">
            <text:p>0.44 %</text:p>
          </table:table-cell>
          <table:table-cell table:style-name="ce133" table:formula="of:=(1+[.E54])/(1+[.$N54])-1" office:value-type="percentage" office:value="0.0417307817299901" calcext:value-type="percentage">
            <text:p>4.17 %</text:p>
          </table:table-cell>
          <table:table-cell table:number-columns-repeated="16366"/>
        </table:table-row>
        <table:table-row table:style-name="ro10">
          <table:table-cell table:style-name="ce20" office:value-type="float" office:value="1964" calcext:value-type="float">
            <text:p>1964</text:p>
          </table:table-cell>
          <table:table-cell table:style-name="ce41" table:formula="of:=([$'S&amp;P 500 &amp; Raw Data'.B40]-[$'S&amp;P 500 &amp; Raw Data'.B39]+[$'S&amp;P 500 &amp; Raw Data'.C40])/[$'S&amp;P 500 &amp; Raw Data'.B39]" office:value-type="percentage" office:value="0.164154558784324" calcext:value-type="percentage">
            <text:p>16.42 %</text:p>
          </table:table-cell>
          <table:table-cell table:style-name="ce41" table:formula="of:=[$'T. Bill rates'.C42]" office:value-type="percentage" office:value="0.0354666666666667" calcext:value-type="percentage">
            <text:p>3.55 %</text:p>
          </table:table-cell>
          <table:table-cell table:style-name="ce41" table:formula="of:=[$'S&amp;P 500 &amp; Raw Data'.F40]" office:value-type="percentage" office:value="0.0372806489115408" calcext:value-type="percentage">
            <text:p>3.73 %</text:p>
          </table:table-cell>
          <table:table-cell table:style-name="ce41" table:formula="of:=[$'S&amp;P 500 &amp; Raw Data'.J40]" office:value-type="percentage" office:value="0.0516173927228503" calcext:value-type="percentage">
            <text:p>5.16 %</text:p>
          </table:table-cell>
          <table:table-cell table:style-name="ce70" table:formula="of:=[.F54]*(1+[.B55])" office:value-type="float" office:value="2661.02387183834" calcext:value-type="float">
            <text:p><text:s/>$2,661.02 </text:p>
          </table:table-cell>
          <table:table-cell table:style-name="ce70" table:formula="of:=[.G54]*(1+[.C55])" office:value-type="float" office:value="173.245088491931" calcext:value-type="float">
            <text:p><text:s/>$173.25 </text:p>
          </table:table-cell>
          <table:table-cell table:style-name="ce98" table:formula="of:=[.H54]*(1+[.D55])" office:value-type="float" office:value="272.529962111383" calcext:value-type="float">
            <text:p><text:s/>$272.53 </text:p>
          </table:table-cell>
          <table:table-cell table:style-name="ce70" table:formula="of:=[.I54]*(1+[.E55])" office:value-type="float" office:value="583.848962992868" calcext:value-type="float">
            <text:p><text:s/>$583.85 </text:p>
          </table:table-cell>
          <table:table-cell table:style-name="ce41" table:formula="of:=[.B55]-[.C55]" office:value-type="percentage" office:value="0.128687892117658" calcext:value-type="percentage">
            <text:p>12.87 %</text:p>
          </table:table-cell>
          <table:table-cell table:style-name="ce115" table:formula="of:=[.B55]-[.D55]" office:value-type="percentage" office:value="0.126873909872783" calcext:value-type="percentage">
            <text:p>12.69 %</text:p>
          </table:table-cell>
          <table:table-cell table:style-name="ce122" table:formula="of:=[.B55]-[.E55]" office:value-type="percentage" office:value="0.112537166061474" calcext:value-type="percentage">
            <text:p>11.25 %</text:p>
          </table:table-cell>
          <table:table-cell table:style-name="ce122" table:formula="of:=(([.F55]/100)^(1/([.A55]-[.$A$19]+1)))-(([.H55]/100)^(1/([.A55]-[.$A$19]+1)))" office:value-type="percentage" office:value="0.0652677774426582" calcext:value-type="percentage">
            <text:p>6.53 %</text:p>
          </table:table-cell>
          <table:table-cell table:style-name="ce127" office:value-type="percentage" office:value="0.0127891" calcext:value-type="percentage">
            <text:p>1.28 %</text:p>
          </table:table-cell>
          <table:table-cell table:style-name="ce133" table:formula="of:=(1+[.B55])/(1+[.$N55])-1" office:value-type="percentage" office:value="0.149454075665234" calcext:value-type="percentage">
            <text:p>14.95 %</text:p>
          </table:table-cell>
          <table:table-cell table:style-name="ce133" table:formula="of:=(1+[.C55])/(1+[.$N55])-1" office:value-type="percentage" office:value="0.0223912033281823" calcext:value-type="percentage">
            <text:p>2.24 %</text:p>
          </table:table-cell>
          <table:table-cell table:style-name="ce133" table:formula="of:=(1+[.D55])/(1+[.$N55])-1" office:value-type="percentage" office:value="0.0241822793230504" calcext:value-type="percentage">
            <text:p>2.42 %</text:p>
          </table:table-cell>
          <table:table-cell table:style-name="ce133" table:formula="of:=(1+[.E55])/(1+[.$N55])-1" office:value-type="percentage" office:value="0.0383379844064773" calcext:value-type="percentage">
            <text:p>3.83 %</text:p>
          </table:table-cell>
          <table:table-cell table:number-columns-repeated="16366"/>
        </table:table-row>
        <table:table-row table:style-name="ro10">
          <table:table-cell table:style-name="ce20" office:value-type="float" office:value="1965" calcext:value-type="float">
            <text:p>1965</text:p>
          </table:table-cell>
          <table:table-cell table:style-name="ce41" table:formula="of:=([$'S&amp;P 500 &amp; Raw Data'.B41]-[$'S&amp;P 500 &amp; Raw Data'.B40]+[$'S&amp;P 500 &amp; Raw Data'.C41])/[$'S&amp;P 500 &amp; Raw Data'.B40]" office:value-type="percentage" office:value="0.123992424778761" calcext:value-type="percentage">
            <text:p>12.40 %</text:p>
          </table:table-cell>
          <table:table-cell table:style-name="ce41" table:formula="of:=[$'T. Bill rates'.C43]" office:value-type="percentage" office:value="0.0394916666666667" calcext:value-type="percentage">
            <text:p>3.95 %</text:p>
          </table:table-cell>
          <table:table-cell table:style-name="ce41" table:formula="of:=[$'S&amp;P 500 &amp; Raw Data'.F41]" office:value-type="percentage" office:value="0.00718855093592623" calcext:value-type="percentage">
            <text:p>0.72 %</text:p>
          </table:table-cell>
          <table:table-cell table:style-name="ce41" table:formula="of:=[$'S&amp;P 500 &amp; Raw Data'.J41]" office:value-type="percentage" office:value="0.0319000946225388" calcext:value-type="percentage">
            <text:p>3.19 %</text:p>
          </table:table-cell>
          <table:table-cell table:style-name="ce70" table:formula="of:=[.F55]*(1+[.B56])" office:value-type="float" office:value="2990.97067410174" calcext:value-type="float">
            <text:p><text:s/>$2,990.97 </text:p>
          </table:table-cell>
          <table:table-cell table:style-name="ce70" table:formula="of:=[.G55]*(1+[.C56])" office:value-type="float" office:value="180.086825778291" calcext:value-type="float">
            <text:p><text:s/>$180.09 </text:p>
          </table:table-cell>
          <table:table-cell table:style-name="ce98" table:formula="of:=[.H55]*(1+[.D56])" office:value-type="float" office:value="274.489057625587" calcext:value-type="float">
            <text:p><text:s/>$274.49 </text:p>
          </table:table-cell>
          <table:table-cell table:style-name="ce70" table:formula="of:=[.I55]*(1+[.E56])" office:value-type="float" office:value="602.473800157611" calcext:value-type="float">
            <text:p><text:s/>$602.47 </text:p>
          </table:table-cell>
          <table:table-cell table:style-name="ce41" table:formula="of:=[.B56]-[.C56]" office:value-type="percentage" office:value="0.0845007581120945" calcext:value-type="percentage">
            <text:p>8.45 %</text:p>
          </table:table-cell>
          <table:table-cell table:style-name="ce115" table:formula="of:=[.B56]-[.D56]" office:value-type="percentage" office:value="0.116803873842835" calcext:value-type="percentage">
            <text:p>11.68 %</text:p>
          </table:table-cell>
          <table:table-cell table:style-name="ce122" table:formula="of:=[.B56]-[.E56]" office:value-type="percentage" office:value="0.0920923301562223" calcext:value-type="percentage">
            <text:p>9.21 %</text:p>
          </table:table-cell>
          <table:table-cell table:style-name="ce122" table:formula="of:=(([.F56]/100)^(1/([.A56]-[.$A$19]+1)))-(([.H56]/100)^(1/([.A56]-[.$A$19]+1)))" office:value-type="percentage" office:value="0.0666179416898745" calcext:value-type="percentage">
            <text:p>6.66 %</text:p>
          </table:table-cell>
          <table:table-cell table:style-name="ce127" office:value-type="percentage" office:value="0.0158517" calcext:value-type="percentage">
            <text:p>1.59 %</text:p>
          </table:table-cell>
          <table:table-cell table:style-name="ce133" table:formula="of:=(1+[.B56])/(1+[.$N56])-1" office:value-type="percentage" office:value="0.10645325964288" calcext:value-type="percentage">
            <text:p>10.65 %</text:p>
          </table:table-cell>
          <table:table-cell table:style-name="ce133" table:formula="of:=(1+[.C56])/(1+[.$N56])-1" office:value-type="percentage" office:value="0.0232710804802183" calcext:value-type="percentage">
            <text:p>2.33 %</text:p>
          </table:table-cell>
          <table:table-cell table:style-name="ce133" table:formula="of:=(1+[.D56])/(1+[.$N56])-1" office:value-type="percentage" office:value="-0.00852796630066555" calcext:value-type="percentage">
            <text:p>-0.85 %</text:p>
          </table:table-cell>
          <table:table-cell table:style-name="ce133" table:formula="of:=(1+[.E56])/(1+[.$N56])-1" office:value-type="percentage" office:value="0.0157979699424027" calcext:value-type="percentage">
            <text:p>1.58 %</text:p>
          </table:table-cell>
          <table:table-cell table:number-columns-repeated="16366"/>
        </table:table-row>
        <table:table-row table:style-name="ro10">
          <table:table-cell table:style-name="ce20" office:value-type="float" office:value="1966" calcext:value-type="float">
            <text:p>1966</text:p>
          </table:table-cell>
          <table:table-cell table:style-name="ce41" table:formula="of:=([$'S&amp;P 500 &amp; Raw Data'.B42]-[$'S&amp;P 500 &amp; Raw Data'.B41]+[$'S&amp;P 500 &amp; Raw Data'.C42])/[$'S&amp;P 500 &amp; Raw Data'.B41]" office:value-type="percentage" office:value="-0.0997095423563779" calcext:value-type="percentage">
            <text:p>-9.97 %</text:p>
          </table:table-cell>
          <table:table-cell table:style-name="ce41" table:formula="of:=[$'T. Bill rates'.C44]" office:value-type="percentage" office:value="0.048625" calcext:value-type="percentage">
            <text:p>4.86 %</text:p>
          </table:table-cell>
          <table:table-cell table:style-name="ce41" table:formula="of:=[$'S&amp;P 500 &amp; Raw Data'.F42]" office:value-type="percentage" office:value="0.0290794093242996" calcext:value-type="percentage">
            <text:p>2.91 %</text:p>
          </table:table-cell>
          <table:table-cell table:style-name="ce41" table:formula="of:=[$'S&amp;P 500 &amp; Raw Data'.J42]" office:value-type="percentage" office:value="-0.0344536159757764" calcext:value-type="percentage">
            <text:p>-3.45 %</text:p>
          </table:table-cell>
          <table:table-cell table:style-name="ce70" table:formula="of:=[.F56]*(1+[.B57])" office:value-type="float" office:value="2692.74235698571" calcext:value-type="float">
            <text:p><text:s/>$2,692.74 </text:p>
          </table:table-cell>
          <table:table-cell table:style-name="ce70" table:formula="of:=[.G56]*(1+[.C57])" office:value-type="float" office:value="188.843547681761" calcext:value-type="float">
            <text:p><text:s/>$188.84 </text:p>
          </table:table-cell>
          <table:table-cell table:style-name="ce98" table:formula="of:=[.H56]*(1+[.D57])" office:value-type="float" office:value="282.471037287323" calcext:value-type="float">
            <text:p><text:s/>$282.47 </text:p>
          </table:table-cell>
          <table:table-cell table:style-name="ce70" table:formula="of:=[.I56]*(1+[.E57])" office:value-type="float" office:value="581.716399211514" calcext:value-type="float">
            <text:p><text:s/>$581.72 </text:p>
          </table:table-cell>
          <table:table-cell table:style-name="ce41" table:formula="of:=[.B57]-[.C57]" office:value-type="percentage" office:value="-0.148334542356378" calcext:value-type="percentage">
            <text:p>-14.83 %</text:p>
          </table:table-cell>
          <table:table-cell table:style-name="ce115" table:formula="of:=[.B57]-[.D57]" office:value-type="percentage" office:value="-0.128788951680678" calcext:value-type="percentage">
            <text:p>-12.88 %</text:p>
          </table:table-cell>
          <table:table-cell table:style-name="ce122" table:formula="of:=[.B57]-[.E57]" office:value-type="percentage" office:value="-0.0652559263806015" calcext:value-type="percentage">
            <text:p>-6.53 %</text:p>
          </table:table-cell>
          <table:table-cell table:style-name="ce122" table:formula="of:=(([.F57]/100)^(1/([.A57]-[.$A$19]+1)))-(([.H57]/100)^(1/([.A57]-[.$A$19]+1)))" office:value-type="percentage" office:value="0.0611237196798153" calcext:value-type="percentage">
            <text:p>6.11 %</text:p>
          </table:table-cell>
          <table:table-cell table:style-name="ce127" office:value-type="percentage" office:value="0.0301508" calcext:value-type="percentage">
            <text:p>3.02 %</text:p>
          </table:table-cell>
          <table:table-cell table:style-name="ce133" table:formula="of:=(1+[.B57])/(1+[.$N57])-1" office:value-type="percentage" office:value="-0.12605954619108" calcext:value-type="percentage">
            <text:p>-12.61 %</text:p>
          </table:table-cell>
          <table:table-cell table:style-name="ce133" table:formula="of:=(1+[.C57])/(1+[.$N57])-1" office:value-type="percentage" office:value="0.0179334909024971" calcext:value-type="percentage">
            <text:p>1.79 %</text:p>
          </table:table-cell>
          <table:table-cell table:style-name="ce133" table:formula="of:=(1+[.D57])/(1+[.$N57])-1" office:value-type="percentage" office:value="-0.00104003285315146" calcext:value-type="percentage">
            <text:p>-0.10 %</text:p>
          </table:table-cell>
          <table:table-cell table:style-name="ce133" table:formula="of:=(1+[.E57])/(1+[.$N57])-1" office:value-type="percentage" office:value="-0.0627135522059259" calcext:value-type="percentage">
            <text:p>-6.27 %</text:p>
          </table:table-cell>
          <table:table-cell table:number-columns-repeated="16366"/>
        </table:table-row>
        <table:table-row table:style-name="ro10">
          <table:table-cell table:style-name="ce20" office:value-type="float" office:value="1967" calcext:value-type="float">
            <text:p>1967</text:p>
          </table:table-cell>
          <table:table-cell table:style-name="ce41" table:formula="of:=([$'S&amp;P 500 &amp; Raw Data'.B43]-[$'S&amp;P 500 &amp; Raw Data'.B42]+[$'S&amp;P 500 &amp; Raw Data'.C43])/[$'S&amp;P 500 &amp; Raw Data'.B42]" office:value-type="percentage" office:value="0.238029665131333" calcext:value-type="percentage">
            <text:p>23.80 %</text:p>
          </table:table-cell>
          <table:table-cell table:style-name="ce41" table:formula="of:=[$'T. Bill rates'.C45]" office:value-type="percentage" office:value="0.0430666666666667" calcext:value-type="percentage">
            <text:p>4.31 %</text:p>
          </table:table-cell>
          <table:table-cell table:style-name="ce41" table:formula="of:=[$'S&amp;P 500 &amp; Raw Data'.F43]" office:value-type="percentage" office:value="-0.0158062099328247" calcext:value-type="percentage">
            <text:p>-1.58 %</text:p>
          </table:table-cell>
          <table:table-cell table:style-name="ce41" table:formula="of:=[$'S&amp;P 500 &amp; Raw Data'.J43]" office:value-type="percentage" office:value="0.00895226614844683" calcext:value-type="percentage">
            <text:p>0.90 %</text:p>
          </table:table-cell>
          <table:table-cell table:style-name="ce70" table:formula="of:=[.F57]*(1+[.B58])" office:value-type="float" office:value="3333.69491850398" calcext:value-type="float">
            <text:p><text:s/>$3,333.69 </text:p>
          </table:table-cell>
          <table:table-cell table:style-name="ce70" table:formula="of:=[.G57]*(1+[.C58])" office:value-type="float" office:value="196.976409801922" calcext:value-type="float">
            <text:p><text:s/>$196.98 </text:p>
          </table:table-cell>
          <table:table-cell table:style-name="ce98" table:formula="of:=[.H57]*(1+[.D58])" office:value-type="float" office:value="278.006240772017" calcext:value-type="float">
            <text:p><text:s/>$278.01 </text:p>
          </table:table-cell>
          <table:table-cell table:style-name="ce70" table:formula="of:=[.I57]*(1+[.E58])" office:value-type="float" office:value="586.924079240172" calcext:value-type="float">
            <text:p><text:s/>$586.92 </text:p>
          </table:table-cell>
          <table:table-cell table:style-name="ce41" table:formula="of:=[.B58]-[.C58]" office:value-type="percentage" office:value="0.194962998464667" calcext:value-type="percentage">
            <text:p>19.50 %</text:p>
          </table:table-cell>
          <table:table-cell table:style-name="ce115" table:formula="of:=[.B58]-[.D58]" office:value-type="percentage" office:value="0.253835875064158" calcext:value-type="percentage">
            <text:p>25.38 %</text:p>
          </table:table-cell>
          <table:table-cell table:style-name="ce122" table:formula="of:=[.B58]-[.E58]" office:value-type="percentage" office:value="0.229077398982886" calcext:value-type="percentage">
            <text:p>22.91 %</text:p>
          </table:table-cell>
          <table:table-cell table:style-name="ce122" table:formula="of:=(([.F58]/100)^(1/([.A58]-[.$A$19]+1)))-(([.H58]/100)^(1/([.A58]-[.$A$19]+1)))" office:value-type="percentage" office:value="0.0657328387767395" calcext:value-type="percentage">
            <text:p>6.57 %</text:p>
          </table:table-cell>
          <table:table-cell table:style-name="ce127" office:value-type="percentage" office:value="0.0277279" calcext:value-type="percentage">
            <text:p>2.77 %</text:p>
          </table:table-cell>
          <table:table-cell table:style-name="ce133" table:formula="of:=(1+[.B58])/(1+[.$N58])-1" office:value-type="percentage" office:value="0.204627864176241" calcext:value-type="percentage">
            <text:p>20.46 %</text:p>
          </table:table-cell>
          <table:table-cell table:style-name="ce133" table:formula="of:=(1+[.C58])/(1+[.$N58])-1" office:value-type="percentage" office:value="0.0149249297082104" calcext:value-type="percentage">
            <text:p>1.49 %</text:p>
          </table:table-cell>
          <table:table-cell table:style-name="ce133" table:formula="of:=(1+[.D58])/(1+[.$N58])-1" office:value-type="percentage" office:value="-0.0423595680654623" calcext:value-type="percentage">
            <text:p>-4.24 %</text:p>
          </table:table-cell>
          <table:table-cell table:style-name="ce133" table:formula="of:=(1+[.E58])/(1+[.$N58])-1" office:value-type="percentage" office:value="-0.0182690708810698" calcext:value-type="percentage">
            <text:p>-1.83 %</text:p>
          </table:table-cell>
          <table:table-cell table:number-columns-repeated="16366"/>
        </table:table-row>
        <table:table-row table:style-name="ro10">
          <table:table-cell table:style-name="ce20" office:value-type="float" office:value="1968" calcext:value-type="float">
            <text:p>1968</text:p>
          </table:table-cell>
          <table:table-cell table:style-name="ce41" table:formula="of:=([$'S&amp;P 500 &amp; Raw Data'.B44]-[$'S&amp;P 500 &amp; Raw Data'.B43]+[$'S&amp;P 500 &amp; Raw Data'.C44])/[$'S&amp;P 500 &amp; Raw Data'.B43]" office:value-type="percentage" office:value="0.108148626516015" calcext:value-type="percentage">
            <text:p>10.81 %</text:p>
          </table:table-cell>
          <table:table-cell table:style-name="ce41" table:formula="of:=[$'T. Bill rates'.C46]" office:value-type="percentage" office:value="0.0533833333333333" calcext:value-type="percentage">
            <text:p>5.34 %</text:p>
          </table:table-cell>
          <table:table-cell table:style-name="ce41" table:formula="of:=[$'S&amp;P 500 &amp; Raw Data'.F44]" office:value-type="percentage" office:value="0.0327461969507684" calcext:value-type="percentage">
            <text:p>3.27 %</text:p>
          </table:table-cell>
          <table:table-cell table:style-name="ce41" table:formula="of:=[$'S&amp;P 500 &amp; Raw Data'.J44]" office:value-type="percentage" office:value="0.0484514622430975" calcext:value-type="percentage">
            <text:p>4.85 %</text:p>
          </table:table-cell>
          <table:table-cell table:style-name="ce70" table:formula="of:=[.F58]*(1+[.B59])" office:value-type="float" office:value="3694.2294451636" calcext:value-type="float">
            <text:p><text:s/>$3,694.23 </text:p>
          </table:table-cell>
          <table:table-cell table:style-name="ce70" table:formula="of:=[.G58]*(1+[.C59])" office:value-type="float" office:value="207.491667145181" calcext:value-type="float">
            <text:p><text:s/>$207.49 </text:p>
          </table:table-cell>
          <table:table-cell table:style-name="ce98" table:formula="of:=[.H58]*(1+[.D59])" office:value-type="float" office:value="287.10988788588" calcext:value-type="float">
            <text:p><text:s/>$287.11 </text:p>
          </table:table-cell>
          <table:table-cell table:style-name="ce70" table:formula="of:=[.I58]*(1+[.E59])" office:value-type="float" office:value="615.361409105042" calcext:value-type="float">
            <text:p><text:s/>$615.36 </text:p>
          </table:table-cell>
          <table:table-cell table:style-name="ce41" table:formula="of:=[.B59]-[.C59]" office:value-type="percentage" office:value="0.054765293182682" calcext:value-type="percentage">
            <text:p>5.48 %</text:p>
          </table:table-cell>
          <table:table-cell table:style-name="ce115" table:formula="of:=[.B59]-[.D59]" office:value-type="percentage" office:value="0.075402429565247" calcext:value-type="percentage">
            <text:p>7.54 %</text:p>
          </table:table-cell>
          <table:table-cell table:style-name="ce122" table:formula="of:=[.B59]-[.E59]" office:value-type="percentage" office:value="0.0596971642729179" calcext:value-type="percentage">
            <text:p>5.97 %</text:p>
          </table:table-cell>
          <table:table-cell table:style-name="ce122" table:formula="of:=(([.F59]/100)^(1/([.A59]-[.$A$19]+1)))-(([.H59]/100)^(1/([.A59]-[.$A$19]+1)))" office:value-type="percentage" office:value="0.0659662782874877" calcext:value-type="percentage">
            <text:p>6.60 %</text:p>
          </table:table-cell>
          <table:table-cell table:style-name="ce127" office:value-type="percentage" office:value="0.042718" calcext:value-type="percentage">
            <text:p>4.27 %</text:p>
          </table:table-cell>
          <table:table-cell table:style-name="ce133" table:formula="of:=(1+[.B59])/(1+[.$N59])-1" office:value-type="percentage" office:value="0.0627500690656682" calcext:value-type="percentage">
            <text:p>6.28 %</text:p>
          </table:table-cell>
          <table:table-cell table:style-name="ce133" table:formula="of:=(1+[.C59])/(1+[.$N59])-1" office:value-type="percentage" office:value="0.010228396683795" calcext:value-type="percentage">
            <text:p>1.02 %</text:p>
          </table:table-cell>
          <table:table-cell table:style-name="ce133" table:formula="of:=(1+[.D59])/(1+[.$N59])-1" office:value-type="percentage" office:value="-0.00956327890113318" calcext:value-type="percentage">
            <text:p>-0.96 %</text:p>
          </table:table-cell>
          <table:table-cell table:style-name="ce133" table:formula="of:=(1+[.E59])/(1+[.$N59])-1" office:value-type="percentage" office:value="0.00549857415245292" calcext:value-type="percentage">
            <text:p>0.55 %</text:p>
          </table:table-cell>
          <table:table-cell table:number-columns-repeated="16366"/>
        </table:table-row>
        <table:table-row table:style-name="ro10">
          <table:table-cell table:style-name="ce20" office:value-type="float" office:value="1969" calcext:value-type="float">
            <text:p>1969</text:p>
          </table:table-cell>
          <table:table-cell table:style-name="ce41" table:formula="of:=([$'S&amp;P 500 &amp; Raw Data'.B45]-[$'S&amp;P 500 &amp; Raw Data'.B44]+[$'S&amp;P 500 &amp; Raw Data'.C45])/[$'S&amp;P 500 &amp; Raw Data'.B44]" office:value-type="percentage" office:value="-0.0824137107644906" calcext:value-type="percentage">
            <text:p>-8.24 %</text:p>
          </table:table-cell>
          <table:table-cell table:style-name="ce41" table:formula="of:=[$'T. Bill rates'.C47]" office:value-type="percentage" office:value="0.0666666666666667" calcext:value-type="percentage">
            <text:p>6.67 %</text:p>
          </table:table-cell>
          <table:table-cell table:style-name="ce41" table:formula="of:=[$'S&amp;P 500 &amp; Raw Data'.F45]" office:value-type="percentage" office:value="-0.0501404932099261" calcext:value-type="percentage">
            <text:p>-5.01 %</text:p>
          </table:table-cell>
          <table:table-cell table:style-name="ce41" table:formula="of:=[$'S&amp;P 500 &amp; Raw Data'.J45]" office:value-type="percentage" office:value="-0.0202516425079215" calcext:value-type="percentage">
            <text:p>-2.03 %</text:p>
          </table:table-cell>
          <table:table-cell table:style-name="ce70" table:formula="of:=[.F59]*(1+[.B60])" office:value-type="float" office:value="3389.77428817223" calcext:value-type="float">
            <text:p><text:s/>$3,389.77 </text:p>
          </table:table-cell>
          <table:table-cell table:style-name="ce70" table:formula="of:=[.G59]*(1+[.C60])" office:value-type="float" office:value="221.32444495486" calcext:value-type="float">
            <text:p><text:s/>$221.32 </text:p>
          </table:table-cell>
          <table:table-cell table:style-name="ce98" table:formula="of:=[.H59]*(1+[.D60])" office:value-type="float" office:value="272.714056501835" calcext:value-type="float">
            <text:p><text:s/>$272.71 </text:p>
          </table:table-cell>
          <table:table-cell table:style-name="ce70" table:formula="of:=[.I59]*(1+[.E60])" office:value-type="float" office:value="602.899329834676" calcext:value-type="float">
            <text:p><text:s/>$602.90 </text:p>
          </table:table-cell>
          <table:table-cell table:style-name="ce41" table:formula="of:=[.B60]-[.C60]" office:value-type="percentage" office:value="-0.149080377431157" calcext:value-type="percentage">
            <text:p>-14.91 %</text:p>
          </table:table-cell>
          <table:table-cell table:style-name="ce115" table:formula="of:=[.B60]-[.D60]" office:value-type="percentage" office:value="-0.0322732175545645" calcext:value-type="percentage">
            <text:p>-3.23 %</text:p>
          </table:table-cell>
          <table:table-cell table:style-name="ce122" table:formula="of:=[.B60]-[.E60]" office:value-type="percentage" office:value="-0.0621620682565692" calcext:value-type="percentage">
            <text:p>-6.22 %</text:p>
          </table:table-cell>
          <table:table-cell table:style-name="ce122" table:formula="of:=(([.F60]/100)^(1/([.A60]-[.$A$19]+1)))-(([.H60]/100)^(1/([.A60]-[.$A$19]+1)))" office:value-type="percentage" office:value="0.0633338727341988" calcext:value-type="percentage">
            <text:p>6.33 %</text:p>
          </table:table-cell>
          <table:table-cell table:style-name="ce127" office:value-type="percentage" office:value="0.0546239" calcext:value-type="percentage">
            <text:p>5.46 %</text:p>
          </table:table-cell>
          <table:table-cell table:style-name="ce133" table:formula="of:=(1+[.B60])/(1+[.$N60])-1" office:value-type="percentage" office:value="-0.129939792531243" calcext:value-type="percentage">
            <text:p>-12.99 %</text:p>
          </table:table-cell>
          <table:table-cell table:style-name="ce133" table:formula="of:=(1+[.C60])/(1+[.$N60])-1" office:value-type="percentage" office:value="0.0114190155055909" calcext:value-type="percentage">
            <text:p>1.14 %</text:p>
          </table:table-cell>
          <table:table-cell table:style-name="ce133" table:formula="of:=(1+[.D60])/(1+[.$N60])-1" office:value-type="percentage" office:value="-0.0993381557253975" calcext:value-type="percentage">
            <text:p>-9.93 %</text:p>
          </table:table-cell>
          <table:table-cell table:style-name="ce133" table:formula="of:=(1+[.E60])/(1+[.$N60])-1" office:value-type="percentage" office:value="-0.0709973882707583" calcext:value-type="percentage">
            <text:p>-7.10 %</text:p>
          </table:table-cell>
          <table:table-cell table:number-columns-repeated="16366"/>
        </table:table-row>
        <table:table-row table:style-name="ro10">
          <table:table-cell table:style-name="ce20" office:value-type="float" office:value="1970" calcext:value-type="float">
            <text:p>1970</text:p>
          </table:table-cell>
          <table:table-cell table:style-name="ce41" table:formula="of:=([$'S&amp;P 500 &amp; Raw Data'.B46]-[$'S&amp;P 500 &amp; Raw Data'.B45]+[$'S&amp;P 500 &amp; Raw Data'.C46])/[$'S&amp;P 500 &amp; Raw Data'.B45]" office:value-type="percentage" office:value="0.0356114490549642" calcext:value-type="percentage">
            <text:p>3.56 %</text:p>
          </table:table-cell>
          <table:table-cell table:style-name="ce41" table:formula="of:=[$'T. Bill rates'.C48]" office:value-type="percentage" office:value="0.0639166666666667" calcext:value-type="percentage">
            <text:p>6.39 %</text:p>
          </table:table-cell>
          <table:table-cell table:style-name="ce41" table:formula="of:=[$'S&amp;P 500 &amp; Raw Data'.F46]" office:value-type="percentage" office:value="0.167547371834123" calcext:value-type="percentage">
            <text:p>16.75 %</text:p>
          </table:table-cell>
          <table:table-cell table:style-name="ce41" table:formula="of:=[$'S&amp;P 500 &amp; Raw Data'.J46]" office:value-type="percentage" office:value="0.0564956765698887" calcext:value-type="percentage">
            <text:p>5.65 %</text:p>
          </table:table-cell>
          <table:table-cell table:style-name="ce70" table:formula="of:=[.F60]*(1+[.B61])" office:value-type="float" office:value="3510.4890625433" calcext:value-type="float">
            <text:p><text:s/>$3,510.49 </text:p>
          </table:table-cell>
          <table:table-cell table:style-name="ce70" table:formula="of:=[.G60]*(1+[.C61])" office:value-type="float" office:value="235.470765728224" calcext:value-type="float">
            <text:p><text:s/>$235.47 </text:p>
          </table:table-cell>
          <table:table-cell table:style-name="ce98" table:formula="of:=[.H60]*(1+[.D61])" office:value-type="float" office:value="318.40657993094" calcext:value-type="float">
            <text:p><text:s/>$318.41 </text:p>
          </table:table-cell>
          <table:table-cell table:style-name="ce70" table:formula="of:=[.I60]*(1+[.E61])" office:value-type="float" office:value="636.960535377218" calcext:value-type="float">
            <text:p><text:s/>$636.96 </text:p>
          </table:table-cell>
          <table:table-cell table:style-name="ce41" table:formula="of:=[.B61]-[.C61]" office:value-type="percentage" office:value="-0.0283052176117025" calcext:value-type="percentage">
            <text:p>-2.83 %</text:p>
          </table:table-cell>
          <table:table-cell table:style-name="ce115" table:formula="of:=[.B61]-[.D61]" office:value-type="percentage" office:value="-0.131935922779159" calcext:value-type="percentage">
            <text:p>-13.19 %</text:p>
          </table:table-cell>
          <table:table-cell table:style-name="ce122" table:formula="of:=[.B61]-[.E61]" office:value-type="percentage" office:value="-0.0208842275149245" calcext:value-type="percentage">
            <text:p>-2.09 %</text:p>
          </table:table-cell>
          <table:table-cell table:style-name="ce122" table:formula="of:=(([.F61]/100)^(1/([.A61]-[.$A$19]+1)))-(([.H61]/100)^(1/([.A61]-[.$A$19]+1)))" office:value-type="percentage" office:value="0.058972566666315" calcext:value-type="percentage">
            <text:p>5.90 %</text:p>
          </table:table-cell>
          <table:table-cell table:style-name="ce127" office:value-type="percentage" office:value="0.0583826" calcext:value-type="percentage">
            <text:p>5.84 %</text:p>
          </table:table-cell>
          <table:table-cell table:style-name="ce133" table:formula="of:=(1+[.B61])/(1+[.$N61])-1" office:value-type="percentage" office:value="-0.0215150465862117" calcext:value-type="percentage">
            <text:p>-2.15 %</text:p>
          </table:table-cell>
          <table:table-cell table:style-name="ce133" table:formula="of:=(1+[.C61])/(1+[.$N61])-1" office:value-type="percentage" office:value="0.00522879596345072" calcext:value-type="percentage">
            <text:p>0.52 %</text:p>
          </table:table-cell>
          <table:table-cell table:style-name="ce133" table:formula="of:=(1+[.D61])/(1+[.$N61])-1" office:value-type="percentage" office:value="0.103143014477112" calcext:value-type="percentage">
            <text:p>10.31 %</text:p>
          </table:table-cell>
          <table:table-cell table:style-name="ce133" table:formula="of:=(1+[.E61])/(1+[.$N61])-1" office:value-type="percentage" office:value="-0.00178283678332514" calcext:value-type="percentage">
            <text:p>-0.18 %</text:p>
          </table:table-cell>
          <table:table-cell table:number-columns-repeated="16366"/>
        </table:table-row>
        <table:table-row table:style-name="ro10">
          <table:table-cell table:style-name="ce20" office:value-type="float" office:value="1971" calcext:value-type="float">
            <text:p>1971</text:p>
          </table:table-cell>
          <table:table-cell table:style-name="ce41" table:formula="of:=([$'S&amp;P 500 &amp; Raw Data'.B47]-[$'S&amp;P 500 &amp; Raw Data'.B46]+[$'S&amp;P 500 &amp; Raw Data'.C47])/[$'S&amp;P 500 &amp; Raw Data'.B46]" office:value-type="percentage" office:value="0.142211502984265" calcext:value-type="percentage">
            <text:p>14.22 %</text:p>
          </table:table-cell>
          <table:table-cell table:style-name="ce41" table:formula="of:=[$'T. Bill rates'.C49]" office:value-type="percentage" office:value="0.043325" calcext:value-type="percentage">
            <text:p>4.33 %</text:p>
          </table:table-cell>
          <table:table-cell table:style-name="ce41" table:formula="of:=[$'S&amp;P 500 &amp; Raw Data'.F47]" office:value-type="percentage" office:value="0.097868966197123" calcext:value-type="percentage">
            <text:p>9.79 %</text:p>
          </table:table-cell>
          <table:table-cell table:style-name="ce41" table:formula="of:=[$'S&amp;P 500 &amp; Raw Data'.J47]" office:value-type="percentage" office:value="0.140014661742199" calcext:value-type="percentage">
            <text:p>14.00 %</text:p>
          </table:table-cell>
          <table:table-cell table:style-name="ce70" table:formula="of:=[.F61]*(1+[.B62])" office:value-type="float" office:value="4009.7209883374" calcext:value-type="float">
            <text:p><text:s/>$4,009.72 </text:p>
          </table:table-cell>
          <table:table-cell table:style-name="ce70" table:formula="of:=[.G61]*(1+[.C62])" office:value-type="float" office:value="245.6725366534" calcext:value-type="float">
            <text:p><text:s/>$245.67 </text:p>
          </table:table-cell>
          <table:table-cell table:style-name="ce98" table:formula="of:=[.H61]*(1+[.D62])" office:value-type="float" office:value="349.568702739143" calcext:value-type="float">
            <text:p><text:s/>$349.57 </text:p>
          </table:table-cell>
          <table:table-cell table:style-name="ce70" table:formula="of:=[.I61]*(1+[.E62])" office:value-type="float" office:value="726.14434928119" calcext:value-type="float">
            <text:p><text:s/>$726.14 </text:p>
          </table:table-cell>
          <table:table-cell table:style-name="ce41" table:formula="of:=[.B62]-[.C62]" office:value-type="percentage" office:value="0.0988865029842647" calcext:value-type="percentage">
            <text:p>9.89 %</text:p>
          </table:table-cell>
          <table:table-cell table:style-name="ce115" table:formula="of:=[.B62]-[.D62]" office:value-type="percentage" office:value="0.0443425367871418" calcext:value-type="percentage">
            <text:p>4.43 %</text:p>
          </table:table-cell>
          <table:table-cell table:style-name="ce122" table:formula="of:=[.B62]-[.E62]" office:value-type="percentage" office:value="0.00219684124206535" calcext:value-type="percentage">
            <text:p>0.22 %</text:p>
          </table:table-cell>
          <table:table-cell table:style-name="ce122" table:formula="of:=(([.F62]/100)^(1/([.A62]-[.$A$19]+1)))-(([.H62]/100)^(1/([.A62]-[.$A$19]+1)))" office:value-type="percentage" office:value="0.0586606368098785" calcext:value-type="percentage">
            <text:p>5.87 %</text:p>
          </table:table-cell>
          <table:table-cell table:style-name="ce127" office:value-type="percentage" office:value="0.0429277" calcext:value-type="percentage">
            <text:p>4.29 %</text:p>
          </table:table-cell>
          <table:table-cell table:style-name="ce133" table:formula="of:=(1+[.B62])/(1+[.$N62])-1" office:value-type="percentage" office:value="0.0951972058890227" calcext:value-type="percentage">
            <text:p>9.52 %</text:p>
          </table:table-cell>
          <table:table-cell table:style-name="ce133" table:formula="of:=(1+[.C62])/(1+[.$N62])-1" office:value-type="percentage" office:value="0.000380946828816731" calcext:value-type="percentage">
            <text:p>0.04 %</text:p>
          </table:table-cell>
          <table:table-cell table:style-name="ce133" table:formula="of:=(1+[.D62])/(1+[.$N62])-1" office:value-type="percentage" office:value="0.0526798417542493" calcext:value-type="percentage">
            <text:p>5.27 %</text:p>
          </table:table-cell>
          <table:table-cell table:style-name="ce133" table:formula="of:=(1+[.E62])/(1+[.$N62])-1" office:value-type="percentage" office:value="0.0930907883089109" calcext:value-type="percentage">
            <text:p>9.31 %</text:p>
          </table:table-cell>
          <table:table-cell table:number-columns-repeated="16366"/>
        </table:table-row>
        <table:table-row table:style-name="ro10">
          <table:table-cell table:style-name="ce20" office:value-type="float" office:value="1972" calcext:value-type="float">
            <text:p>1972</text:p>
          </table:table-cell>
          <table:table-cell table:style-name="ce41" table:formula="of:=([$'S&amp;P 500 &amp; Raw Data'.B48]-[$'S&amp;P 500 &amp; Raw Data'.B47]+[$'S&amp;P 500 &amp; Raw Data'.C48])/[$'S&amp;P 500 &amp; Raw Data'.B47]" office:value-type="percentage" office:value="0.187553629150749" calcext:value-type="percentage">
            <text:p>18.76 %</text:p>
          </table:table-cell>
          <table:table-cell table:style-name="ce41" table:formula="of:=[$'T. Bill rates'.C50]" office:value-type="percentage" office:value="0.040725" calcext:value-type="percentage">
            <text:p>4.07 %</text:p>
          </table:table-cell>
          <table:table-cell table:style-name="ce41" table:formula="of:=[$'S&amp;P 500 &amp; Raw Data'.F48]" office:value-type="percentage" office:value="0.0281844905044497" calcext:value-type="percentage">
            <text:p>2.82 %</text:p>
          </table:table-cell>
          <table:table-cell table:style-name="ce41" table:formula="of:=[$'S&amp;P 500 &amp; Raw Data'.J48]" office:value-type="percentage" office:value="0.114090935793897" calcext:value-type="percentage">
            <text:p>11.41 %</text:p>
          </table:table-cell>
          <table:table-cell table:style-name="ce70" table:formula="of:=[.F62]*(1+[.B63])" office:value-type="float" office:value="4761.75871158201" calcext:value-type="float">
            <text:p><text:s/>$4,761.76 </text:p>
          </table:table-cell>
          <table:table-cell table:style-name="ce70" table:formula="of:=[.G62]*(1+[.C63])" office:value-type="float" office:value="255.67755070861" calcext:value-type="float">
            <text:p><text:s/>$255.68 </text:p>
          </table:table-cell>
          <table:table-cell table:style-name="ce98" table:formula="of:=[.H62]*(1+[.D63])" office:value-type="float" office:value="359.421118522147" calcext:value-type="float">
            <text:p><text:s/>$359.42 </text:p>
          </table:table-cell>
          <table:table-cell table:style-name="ce70" table:formula="of:=[.I62]*(1+[.E63])" office:value-type="float" office:value="808.990837612131" calcext:value-type="float">
            <text:p><text:s/>$808.99 </text:p>
          </table:table-cell>
          <table:table-cell table:style-name="ce41" table:formula="of:=[.B63]-[.C63]" office:value-type="percentage" office:value="0.146828629150749" calcext:value-type="percentage">
            <text:p>14.68 %</text:p>
          </table:table-cell>
          <table:table-cell table:style-name="ce115" table:formula="of:=[.B63]-[.D63]" office:value-type="percentage" office:value="0.1593691386463" calcext:value-type="percentage">
            <text:p>15.94 %</text:p>
          </table:table-cell>
          <table:table-cell table:style-name="ce122" table:formula="of:=[.B63]-[.E63]" office:value-type="percentage" office:value="0.0734626933568523" calcext:value-type="percentage">
            <text:p>7.35 %</text:p>
          </table:table-cell>
          <table:table-cell table:style-name="ce122" table:formula="of:=(([.F63]/100)^(1/([.A63]-[.$A$19]+1)))-(([.H63]/100)^(1/([.A63]-[.$A$19]+1)))" office:value-type="percentage" office:value="0.0608043037281896" calcext:value-type="percentage">
            <text:p>6.08 %</text:p>
          </table:table-cell>
          <table:table-cell table:style-name="ce127" office:value-type="percentage" office:value="0.0327228" calcext:value-type="percentage">
            <text:p>3.27 %</text:p>
          </table:table-cell>
          <table:table-cell table:style-name="ce133" table:formula="of:=(1+[.B63])/(1+[.$N63])-1" office:value-type="percentage" office:value="0.149924867690293" calcext:value-type="percentage">
            <text:p>14.99 %</text:p>
          </table:table-cell>
          <table:table-cell table:style-name="ce133" table:formula="of:=(1+[.C63])/(1+[.$N63])-1" office:value-type="percentage" office:value="0.00774864271419196" calcext:value-type="percentage">
            <text:p>0.77 %</text:p>
          </table:table-cell>
          <table:table-cell table:style-name="ce133" table:formula="of:=(1+[.D63])/(1+[.$N63])-1" office:value-type="percentage" office:value="-0.00439450886099368" calcext:value-type="percentage">
            <text:p>-0.44 %</text:p>
          </table:table-cell>
          <table:table-cell table:style-name="ce133" table:formula="of:=(1+[.E63])/(1+[.$N63])-1" office:value-type="percentage" office:value="0.0787899093482753" calcext:value-type="percentage">
            <text:p>7.88 %</text:p>
          </table:table-cell>
          <table:table-cell table:number-columns-repeated="16366"/>
        </table:table-row>
        <table:table-row table:style-name="ro10">
          <table:table-cell table:style-name="ce20" office:value-type="float" office:value="1973" calcext:value-type="float">
            <text:p>1973</text:p>
          </table:table-cell>
          <table:table-cell table:style-name="ce41" table:formula="of:=([$'S&amp;P 500 &amp; Raw Data'.B49]-[$'S&amp;P 500 &amp; Raw Data'.B48]+[$'S&amp;P 500 &amp; Raw Data'.C49])/[$'S&amp;P 500 &amp; Raw Data'.B48]" office:value-type="percentage" office:value="-0.143080474375265" calcext:value-type="percentage">
            <text:p>-14.31 %</text:p>
          </table:table-cell>
          <table:table-cell table:style-name="ce41" table:formula="of:=[$'T. Bill rates'.C51]" office:value-type="percentage" office:value="0.0703166666666667" calcext:value-type="percentage">
            <text:p>7.03 %</text:p>
          </table:table-cell>
          <table:table-cell table:style-name="ce41" table:formula="of:=[$'S&amp;P 500 &amp; Raw Data'.F49]" office:value-type="percentage" office:value="0.0365866460241501" calcext:value-type="percentage">
            <text:p>3.66 %</text:p>
          </table:table-cell>
          <table:table-cell table:style-name="ce41" table:formula="of:=[$'S&amp;P 500 &amp; Raw Data'.J49]" office:value-type="percentage" office:value="0.0431804048543236" calcext:value-type="percentage">
            <text:p>4.32 %</text:p>
          </table:table-cell>
          <table:table-cell table:style-name="ce70" table:formula="of:=[.F63]*(1+[.B64])" office:value-type="float" office:value="4080.44401626831" calcext:value-type="float">
            <text:p><text:s/>$4,080.44 </text:p>
          </table:table-cell>
          <table:table-cell table:style-name="ce70" table:formula="of:=[.G63]*(1+[.C64])" office:value-type="float" office:value="273.655943815937" calcext:value-type="float">
            <text:p><text:s/>$273.66 </text:p>
          </table:table-cell>
          <table:table-cell table:style-name="ce98" table:formula="of:=[.H63]*(1+[.D64])" office:value-type="float" office:value="372.571131759121" calcext:value-type="float">
            <text:p><text:s/>$372.57 </text:p>
          </table:table-cell>
          <table:table-cell table:style-name="ce70" table:formula="of:=[.I63]*(1+[.E64])" office:value-type="float" office:value="843.923389503661" calcext:value-type="float">
            <text:p><text:s/>$843.92 </text:p>
          </table:table-cell>
          <table:table-cell table:style-name="ce41" table:formula="of:=[.B64]-[.C64]" office:value-type="percentage" office:value="-0.213397141041931" calcext:value-type="percentage">
            <text:p>-21.34 %</text:p>
          </table:table-cell>
          <table:table-cell table:style-name="ce115" table:formula="of:=[.B64]-[.D64]" office:value-type="percentage" office:value="-0.179667120399415" calcext:value-type="percentage">
            <text:p>-17.97 %</text:p>
          </table:table-cell>
          <table:table-cell table:style-name="ce122" table:formula="of:=[.B64]-[.E64]" office:value-type="percentage" office:value="-0.186260879229588" calcext:value-type="percentage">
            <text:p>-18.63 %</text:p>
          </table:table-cell>
          <table:table-cell table:style-name="ce122" table:formula="of:=(([.F64]/100)^(1/([.A64]-[.$A$19]+1)))-(([.H64]/100)^(1/([.A64]-[.$A$19]+1)))" office:value-type="percentage" office:value="0.0549600457188431" calcext:value-type="percentage">
            <text:p>5.50 %</text:p>
          </table:table-cell>
          <table:table-cell table:style-name="ce127" office:value-type="percentage" office:value="0.0617776" calcext:value-type="percentage">
            <text:p>6.18 %</text:p>
          </table:table-cell>
          <table:table-cell table:style-name="ce133" table:formula="of:=(1+[.B64])/(1+[.$N64])-1" office:value-type="percentage" office:value="-0.192938779623214" calcext:value-type="percentage">
            <text:p>-19.29 %</text:p>
          </table:table-cell>
          <table:table-cell table:style-name="ce133" table:formula="of:=(1+[.C64])/(1+[.$N64])-1" office:value-type="percentage" office:value="0.00804223659141656" calcext:value-type="percentage">
            <text:p>0.80 %</text:p>
          </table:table-cell>
          <table:table-cell table:style-name="ce133" table:formula="of:=(1+[.D64])/(1+[.$N64])-1" office:value-type="percentage" office:value="-0.0237252641003634" calcext:value-type="percentage">
            <text:p>-2.37 %</text:p>
          </table:table-cell>
          <table:table-cell table:style-name="ce133" table:formula="of:=(1+[.E64])/(1+[.$N64])-1" office:value-type="percentage" office:value="-0.0175151511443418" calcext:value-type="percentage">
            <text:p>-1.75 %</text:p>
          </table:table-cell>
          <table:table-cell table:number-columns-repeated="16366"/>
        </table:table-row>
        <table:table-row table:style-name="ro10">
          <table:table-cell table:style-name="ce20" office:value-type="float" office:value="1974" calcext:value-type="float">
            <text:p>1974</text:p>
          </table:table-cell>
          <table:table-cell table:style-name="ce41" table:formula="of:=([$'S&amp;P 500 &amp; Raw Data'.B50]-[$'S&amp;P 500 &amp; Raw Data'.B49]+[$'S&amp;P 500 &amp; Raw Data'.C50])/[$'S&amp;P 500 &amp; Raw Data'.B49]" office:value-type="percentage" office:value="-0.25901785750897" calcext:value-type="percentage">
            <text:p>-25.90 %</text:p>
          </table:table-cell>
          <table:table-cell table:style-name="ce41" table:formula="of:=[$'T. Bill rates'.C52]" office:value-type="percentage" office:value="0.0783" calcext:value-type="percentage">
            <text:p>7.83 %</text:p>
          </table:table-cell>
          <table:table-cell table:style-name="ce41" table:formula="of:=[$'S&amp;P 500 &amp; Raw Data'.F50]" office:value-type="percentage" office:value="0.0198860869323786" calcext:value-type="percentage">
            <text:p>1.99 %</text:p>
          </table:table-cell>
          <table:table-cell table:style-name="ce41" table:formula="of:=[$'S&amp;P 500 &amp; Raw Data'.J50]" office:value-type="percentage" office:value="-0.0438071979771917" calcext:value-type="percentage">
            <text:p>-4.38 %</text:p>
          </table:table-cell>
          <table:table-cell table:style-name="ce70" table:formula="of:=[.F64]*(1+[.B65])" office:value-type="float" office:value="3023.5361494892" calcext:value-type="float">
            <text:p><text:s/>$3,023.54 </text:p>
          </table:table-cell>
          <table:table-cell table:style-name="ce70" table:formula="of:=[.G64]*(1+[.C65])" office:value-type="float" office:value="295.083204216724" calcext:value-type="float">
            <text:p><text:s/>$295.08 </text:p>
          </table:table-cell>
          <table:table-cell table:style-name="ce98" table:formula="of:=[.H64]*(1+[.D65])" office:value-type="float" office:value="379.980113673778" calcext:value-type="float">
            <text:p><text:s/>$379.98 </text:p>
          </table:table-cell>
          <table:table-cell table:style-name="ce70" table:formula="of:=[.I64]*(1+[.E65])" office:value-type="float" office:value="806.953470502092" calcext:value-type="float">
            <text:p><text:s/>$806.95 </text:p>
          </table:table-cell>
          <table:table-cell table:style-name="ce41" table:formula="of:=[.B65]-[.C65]" office:value-type="percentage" office:value="-0.33731785750897" calcext:value-type="percentage">
            <text:p>-33.73 %</text:p>
          </table:table-cell>
          <table:table-cell table:style-name="ce115" table:formula="of:=[.B65]-[.D65]" office:value-type="percentage" office:value="-0.278903944441348" calcext:value-type="percentage">
            <text:p>-27.89 %</text:p>
          </table:table-cell>
          <table:table-cell table:style-name="ce122" table:formula="of:=[.B65]-[.E65]" office:value-type="percentage" office:value="-0.215210659531778" calcext:value-type="percentage">
            <text:p>-21.52 %</text:p>
          </table:table-cell>
          <table:table-cell table:style-name="ce122" table:formula="of:=(([.F65]/100)^(1/([.A65]-[.$A$19]+1)))-(([.H65]/100)^(1/([.A65]-[.$A$19]+1)))" office:value-type="percentage" office:value="0.0464170185811599" calcext:value-type="percentage">
            <text:p>4.64 %</text:p>
          </table:table-cell>
          <table:table-cell table:style-name="ce127" office:value-type="percentage" office:value="0.110548" calcext:value-type="percentage">
            <text:p>11.05 %</text:p>
          </table:table-cell>
          <table:table-cell table:style-name="ce133" table:formula="of:=(1+[.B65])/(1+[.$N65])-1" office:value-type="percentage" office:value="-0.332777923609758" calcext:value-type="percentage">
            <text:p>-33.28 %</text:p>
          </table:table-cell>
          <table:table-cell table:style-name="ce133" table:formula="of:=(1+[.C65])/(1+[.$N65])-1" office:value-type="percentage" office:value="-0.0290379164160397" calcext:value-type="percentage">
            <text:p>-2.90 %</text:p>
          </table:table-cell>
          <table:table-cell table:style-name="ce133" table:formula="of:=(1+[.D65])/(1+[.$N65])-1" office:value-type="percentage" office:value="-0.0816370954408289" calcext:value-type="percentage">
            <text:p>-8.16 %</text:p>
          </table:table-cell>
          <table:table-cell table:style-name="ce133" table:formula="of:=(1+[.E65])/(1+[.$N65])-1" office:value-type="percentage" office:value="-0.138990118371463" calcext:value-type="percentage">
            <text:p>-13.90 %</text:p>
          </table:table-cell>
          <table:table-cell table:number-columns-repeated="16366"/>
        </table:table-row>
        <table:table-row table:style-name="ro10">
          <table:table-cell table:style-name="ce20" office:value-type="float" office:value="1975" calcext:value-type="float">
            <text:p>1975</text:p>
          </table:table-cell>
          <table:table-cell table:style-name="ce41" table:formula="of:=([$'S&amp;P 500 &amp; Raw Data'.B51]-[$'S&amp;P 500 &amp; Raw Data'.B50]+[$'S&amp;P 500 &amp; Raw Data'.C51])/[$'S&amp;P 500 &amp; Raw Data'.B50]" office:value-type="percentage" office:value="0.369951371061844" calcext:value-type="percentage">
            <text:p>37.00 %</text:p>
          </table:table-cell>
          <table:table-cell table:style-name="ce41" table:formula="of:=[$'T. Bill rates'.C53]" office:value-type="percentage" office:value="0.05775" calcext:value-type="percentage">
            <text:p>5.78 %</text:p>
          </table:table-cell>
          <table:table-cell table:style-name="ce41" table:formula="of:=[$'S&amp;P 500 &amp; Raw Data'.F51]" office:value-type="percentage" office:value="0.0360525360260338" calcext:value-type="percentage">
            <text:p>3.61 %</text:p>
          </table:table-cell>
          <table:table-cell table:style-name="ce41" table:formula="of:=[$'S&amp;P 500 &amp; Raw Data'.J51]" office:value-type="percentage" office:value="0.11049964074145" calcext:value-type="percentage">
            <text:p>11.05 %</text:p>
          </table:table-cell>
          <table:table-cell table:style-name="ce70" table:formula="of:=[.F65]*(1+[.B66])" office:value-type="float" office:value="4142.09749344777" calcext:value-type="float">
            <text:p><text:s/>$4,142.10 </text:p>
          </table:table-cell>
          <table:table-cell table:style-name="ce70" table:formula="of:=[.G65]*(1+[.C66])" office:value-type="float" office:value="312.12425926024" calcext:value-type="float">
            <text:p><text:s/>$312.12 </text:p>
          </table:table-cell>
          <table:table-cell table:style-name="ce98" table:formula="of:=[.H65]*(1+[.D66])" office:value-type="float" office:value="393.679360411178" calcext:value-type="float">
            <text:p><text:s/>$393.68 </text:p>
          </table:table-cell>
          <table:table-cell table:style-name="ce70" table:formula="of:=[.I65]*(1+[.E66])" office:value-type="float" office:value="896.121539087639" calcext:value-type="float">
            <text:p><text:s/>$896.12 </text:p>
          </table:table-cell>
          <table:table-cell table:style-name="ce41" table:formula="of:=[.B66]-[.C66]" office:value-type="percentage" office:value="0.312201371061844" calcext:value-type="percentage">
            <text:p>31.22 %</text:p>
          </table:table-cell>
          <table:table-cell table:style-name="ce115" table:formula="of:=[.B66]-[.D66]" office:value-type="percentage" office:value="0.33389883503581" calcext:value-type="percentage">
            <text:p>33.39 %</text:p>
          </table:table-cell>
          <table:table-cell table:style-name="ce122" table:formula="of:=[.B66]-[.E66]" office:value-type="percentage" office:value="0.259451730320394" calcext:value-type="percentage">
            <text:p>25.95 %</text:p>
          </table:table-cell>
          <table:table-cell table:style-name="ce122" table:formula="of:=(([.F66]/100)^(1/([.A66]-[.$A$19]+1)))-(([.H66]/100)^(1/([.A66]-[.$A$19]+1)))" office:value-type="percentage" office:value="0.0517067567816762" calcext:value-type="percentage">
            <text:p>5.17 %</text:p>
          </table:table-cell>
          <table:table-cell table:style-name="ce127" office:value-type="percentage" office:value="0.0914315" calcext:value-type="percentage">
            <text:p>9.14 %</text:p>
          </table:table-cell>
          <table:table-cell table:style-name="ce133" table:formula="of:=(1+[.B66])/(1+[.$N66])-1" office:value-type="percentage" office:value="0.255187678807001" calcext:value-type="percentage">
            <text:p>25.52 %</text:p>
          </table:table-cell>
          <table:table-cell table:style-name="ce133" table:formula="of:=(1+[.C66])/(1+[.$N66])-1" office:value-type="percentage" office:value="-0.0308599302842186" calcext:value-type="percentage">
            <text:p>-3.09 %</text:p>
          </table:table-cell>
          <table:table-cell table:style-name="ce133" table:formula="of:=(1+[.D66])/(1+[.$N66])-1" office:value-type="percentage" office:value="-0.0507397523105815" calcext:value-type="percentage">
            <text:p>-5.07 %</text:p>
          </table:table-cell>
          <table:table-cell table:style-name="ce133" table:formula="of:=(1+[.E66])/(1+[.$N66])-1" office:value-type="percentage" office:value="0.0174707627015067" calcext:value-type="percentage">
            <text:p>1.75 %</text:p>
          </table:table-cell>
          <table:table-cell table:number-columns-repeated="16366"/>
        </table:table-row>
        <table:table-row table:style-name="ro10">
          <table:table-cell table:style-name="ce20" office:value-type="float" office:value="1976" calcext:value-type="float">
            <text:p>1976</text:p>
          </table:table-cell>
          <table:table-cell table:style-name="ce41" table:formula="of:=([$'S&amp;P 500 &amp; Raw Data'.B52]-[$'S&amp;P 500 &amp; Raw Data'.B51]+[$'S&amp;P 500 &amp; Raw Data'.C52])/[$'S&amp;P 500 &amp; Raw Data'.B51]" office:value-type="percentage" office:value="0.238309990021067" calcext:value-type="percentage">
            <text:p>23.83 %</text:p>
          </table:table-cell>
          <table:table-cell table:style-name="ce41" table:formula="of:=[$'T. Bill rates'.C54]" office:value-type="percentage" office:value="0.0497416666666667" calcext:value-type="percentage">
            <text:p>4.97 %</text:p>
          </table:table-cell>
          <table:table-cell table:style-name="ce41" table:formula="of:=[$'S&amp;P 500 &amp; Raw Data'.F52]" office:value-type="percentage" office:value="0.159845607429092" calcext:value-type="percentage">
            <text:p>15.98 %</text:p>
          </table:table-cell>
          <table:table-cell table:style-name="ce41" table:formula="of:=[$'S&amp;P 500 &amp; Raw Data'.J52]" office:value-type="percentage" office:value="0.19752813987098" calcext:value-type="percentage">
            <text:p>19.75 %</text:p>
          </table:table-cell>
          <table:table-cell table:style-name="ce70" table:formula="of:=[.F66]*(1+[.B67])" office:value-type="float" office:value="5129.20070577759" calcext:value-type="float">
            <text:p><text:s/>$5,129.20 </text:p>
          </table:table-cell>
          <table:table-cell table:style-name="ce70" table:formula="of:=[.G66]*(1+[.C67])" office:value-type="float" office:value="327.649840122943" calcext:value-type="float">
            <text:p><text:s/>$327.65 </text:p>
          </table:table-cell>
          <table:table-cell table:style-name="ce98" table:formula="of:=[.H66]*(1+[.D67])" office:value-type="float" office:value="456.607276908399" calcext:value-type="float">
            <text:p><text:s/>$456.61 </text:p>
          </table:table-cell>
          <table:table-cell table:style-name="ce70" table:formula="of:=[.I66]*(1+[.E67])" office:value-type="float" office:value="1073.13075980194" calcext:value-type="float">
            <text:p><text:s/>$1,073.13 </text:p>
          </table:table-cell>
          <table:table-cell table:style-name="ce41" table:formula="of:=[.B67]-[.C67]" office:value-type="percentage" office:value="0.1885683233544" calcext:value-type="percentage">
            <text:p>18.86 %</text:p>
          </table:table-cell>
          <table:table-cell table:style-name="ce115" table:formula="of:=[.B67]-[.D67]" office:value-type="percentage" office:value="0.0784643825919745" calcext:value-type="percentage">
            <text:p>7.85 %</text:p>
          </table:table-cell>
          <table:table-cell table:style-name="ce122" table:formula="of:=[.B67]-[.E67]" office:value-type="percentage" office:value="0.0407818501500865" calcext:value-type="percentage">
            <text:p>4.08 %</text:p>
          </table:table-cell>
          <table:table-cell table:style-name="ce122" table:formula="of:=(([.F67]/100)^(1/([.A67]-[.$A$19]+1)))-(([.H67]/100)^(1/([.A67]-[.$A$19]+1)))" office:value-type="percentage" office:value="0.0521965880389501" calcext:value-type="percentage">
            <text:p>5.22 %</text:p>
          </table:table-cell>
          <table:table-cell table:style-name="ce127" office:value-type="percentage" office:value="0.0574481" calcext:value-type="percentage">
            <text:p>5.74 %</text:p>
          </table:table-cell>
          <table:table-cell table:style-name="ce133" table:formula="of:=(1+[.B67])/(1+[.$N67])-1" office:value-type="percentage" office:value="0.171036186098464" calcext:value-type="percentage">
            <text:p>17.10 %</text:p>
          </table:table-cell>
          <table:table-cell table:style-name="ce133" table:formula="of:=(1+[.C67])/(1+[.$N67])-1" office:value-type="percentage" office:value="-0.00728776507644524" calcext:value-type="percentage">
            <text:p>-0.73 %</text:p>
          </table:table-cell>
          <table:table-cell table:style-name="ce133" table:formula="of:=(1+[.D67])/(1+[.$N67])-1" office:value-type="percentage" office:value="0.0968345467064455" calcext:value-type="percentage">
            <text:p>9.68 %</text:p>
          </table:table-cell>
          <table:table-cell table:style-name="ce133" table:formula="of:=(1+[.E67])/(1+[.$N67])-1" office:value-type="percentage" office:value="0.132469896036486" calcext:value-type="percentage">
            <text:p>13.25 %</text:p>
          </table:table-cell>
          <table:table-cell table:number-columns-repeated="16366"/>
        </table:table-row>
        <table:table-row table:style-name="ro10">
          <table:table-cell table:style-name="ce20" office:value-type="float" office:value="1977" calcext:value-type="float">
            <text:p>1977</text:p>
          </table:table-cell>
          <table:table-cell table:style-name="ce41" table:formula="of:=([$'S&amp;P 500 &amp; Raw Data'.B53]-[$'S&amp;P 500 &amp; Raw Data'.B52]+[$'S&amp;P 500 &amp; Raw Data'.C53])/[$'S&amp;P 500 &amp; Raw Data'.B52]" office:value-type="percentage" office:value="-0.0697970407593523" calcext:value-type="percentage">
            <text:p>-6.98 %</text:p>
          </table:table-cell>
          <table:table-cell table:style-name="ce41" table:formula="of:=[$'T. Bill rates'.C55]" office:value-type="percentage" office:value="0.0526916666666667" calcext:value-type="percentage">
            <text:p>5.27 %</text:p>
          </table:table-cell>
          <table:table-cell table:style-name="ce41" table:formula="of:=[$'S&amp;P 500 &amp; Raw Data'.F53]" office:value-type="percentage" office:value="0.0128996060710704" calcext:value-type="percentage">
            <text:p>1.29 %</text:p>
          </table:table-cell>
          <table:table-cell table:style-name="ce41" table:formula="of:=[$'S&amp;P 500 &amp; Raw Data'.J53]" office:value-type="percentage" office:value="0.0995466285209064" calcext:value-type="percentage">
            <text:p>9.95 %</text:p>
          </table:table-cell>
          <table:table-cell table:style-name="ce70" table:formula="of:=[.F67]*(1+[.B68])" office:value-type="float" office:value="4771.19767505354" calcext:value-type="float">
            <text:p><text:s/>$4,771.20 </text:p>
          </table:table-cell>
          <table:table-cell table:style-name="ce70" table:formula="of:=[.G67]*(1+[.C68])" office:value-type="float" office:value="344.914256282088" calcext:value-type="float">
            <text:p><text:s/>$344.91 </text:p>
          </table:table-cell>
          <table:table-cell table:style-name="ce98" table:formula="of:=[.H67]*(1+[.D68])" office:value-type="float" office:value="462.497330909702" calcext:value-type="float">
            <text:p><text:s/>$462.50 </text:p>
          </table:table-cell>
          <table:table-cell table:style-name="ce70" table:formula="of:=[.I67]*(1+[.E68])" office:value-type="float" office:value="1179.9573089023" calcext:value-type="float">
            <text:p><text:s/>$1,179.96 </text:p>
          </table:table-cell>
          <table:table-cell table:style-name="ce41" table:formula="of:=[.B68]-[.C68]" office:value-type="percentage" office:value="-0.122488707426019" calcext:value-type="percentage">
            <text:p>-12.25 %</text:p>
          </table:table-cell>
          <table:table-cell table:style-name="ce115" table:formula="of:=[.B68]-[.D68]" office:value-type="percentage" office:value="-0.0826966468304228" calcext:value-type="percentage">
            <text:p>-8.27 %</text:p>
          </table:table-cell>
          <table:table-cell table:style-name="ce122" table:formula="of:=[.B68]-[.E68]" office:value-type="percentage" office:value="-0.169343669280259" calcext:value-type="percentage">
            <text:p>-16.93 %</text:p>
          </table:table-cell>
          <table:table-cell table:style-name="ce122" table:formula="of:=(([.F68]/100)^(1/([.A68]-[.$A$19]+1)))-(([.H68]/100)^(1/([.A68]-[.$A$19]+1)))" office:value-type="percentage" office:value="0.0492667613570463" calcext:value-type="percentage">
            <text:p>4.93 %</text:p>
          </table:table-cell>
          <table:table-cell table:style-name="ce127" office:value-type="percentage" office:value="0.0650168" calcext:value-type="percentage">
            <text:p>6.50 %</text:p>
          </table:table-cell>
          <table:table-cell table:style-name="ce133" table:formula="of:=(1+[.B68])/(1+[.$N68])-1" office:value-type="percentage" office:value="-0.126583769156836" calcext:value-type="percentage">
            <text:p>-12.66 %</text:p>
          </table:table-cell>
          <table:table-cell table:style-name="ce133" table:formula="of:=(1+[.C68])/(1+[.$N68])-1" office:value-type="percentage" office:value="-0.0115727125932036" calcext:value-type="percentage">
            <text:p>-1.16 %</text:p>
          </table:table-cell>
          <table:table-cell table:style-name="ce133" table:formula="of:=(1+[.D68])/(1+[.$N68])-1" office:value-type="percentage" office:value="-0.0489355603863991" calcext:value-type="percentage">
            <text:p>-4.89 %</text:p>
          </table:table-cell>
          <table:table-cell table:style-name="ce133" table:formula="of:=(1+[.E68])/(1+[.$N68])-1" office:value-type="percentage" office:value="0.0324218627545654" calcext:value-type="percentage">
            <text:p>3.24 %</text:p>
          </table:table-cell>
          <table:table-cell table:number-columns-repeated="16366"/>
        </table:table-row>
        <table:table-row table:style-name="ro10">
          <table:table-cell table:style-name="ce20" office:value-type="float" office:value="1978" calcext:value-type="float">
            <text:p>1978</text:p>
          </table:table-cell>
          <table:table-cell table:style-name="ce41" table:formula="of:=([$'S&amp;P 500 &amp; Raw Data'.B54]-[$'S&amp;P 500 &amp; Raw Data'.B53]+[$'S&amp;P 500 &amp; Raw Data'.C54])/[$'S&amp;P 500 &amp; Raw Data'.B53]" office:value-type="percentage" office:value="0.0650928391167193" calcext:value-type="percentage">
            <text:p>6.51 %</text:p>
          </table:table-cell>
          <table:table-cell table:style-name="ce41" table:formula="of:=[$'T. Bill rates'.C56]" office:value-type="percentage" office:value="0.0718833333333333" calcext:value-type="percentage">
            <text:p>7.19 %</text:p>
          </table:table-cell>
          <table:table-cell table:style-name="ce41" table:formula="of:=[$'S&amp;P 500 &amp; Raw Data'.F54]" office:value-type="percentage" office:value="-0.00777580690750865" calcext:value-type="percentage">
            <text:p>-0.78 %</text:p>
          </table:table-cell>
          <table:table-cell table:style-name="ce41" table:formula="of:=[$'S&amp;P 500 &amp; Raw Data'.J54]" office:value-type="percentage" office:value="0.0313758497716909" calcext:value-type="percentage">
            <text:p>3.14 %</text:p>
          </table:table-cell>
          <table:table-cell table:style-name="ce70" table:formula="of:=[.F68]*(1+[.B69])" office:value-type="float" office:value="5081.76847770986" calcext:value-type="float">
            <text:p><text:s/>$5,081.77 </text:p>
          </table:table-cell>
          <table:table-cell table:style-name="ce70" table:formula="of:=[.G68]*(1+[.C69])" office:value-type="float" office:value="369.707842737832" calcext:value-type="float">
            <text:p><text:s/>$369.71 </text:p>
          </table:table-cell>
          <table:table-cell table:style-name="ce98" table:formula="of:=[.H68]*(1+[.D69])" office:value-type="float" office:value="458.90104096931" calcext:value-type="float">
            <text:p><text:s/>$458.90 </text:p>
          </table:table-cell>
          <table:table-cell table:style-name="ce70" table:formula="of:=[.I68]*(1+[.E69])" office:value-type="float" office:value="1216.97947216343" calcext:value-type="float">
            <text:p><text:s/>$1,216.98 </text:p>
          </table:table-cell>
          <table:table-cell table:style-name="ce41" table:formula="of:=[.B69]-[.C69]" office:value-type="percentage" office:value="-0.00679049421661404" calcext:value-type="percentage">
            <text:p>-0.68 %</text:p>
          </table:table-cell>
          <table:table-cell table:style-name="ce115" table:formula="of:=[.B69]-[.D69]" office:value-type="percentage" office:value="0.072868646024228" calcext:value-type="percentage">
            <text:p>7.29 %</text:p>
          </table:table-cell>
          <table:table-cell table:style-name="ce122" table:formula="of:=[.B69]-[.E69]" office:value-type="percentage" office:value="0.0337169893450284" calcext:value-type="percentage">
            <text:p>3.37 %</text:p>
          </table:table-cell>
          <table:table-cell table:style-name="ce122" table:formula="of:=(([.F69]/100)^(1/([.A69]-[.$A$19]+1)))-(([.H69]/100)^(1/([.A69]-[.$A$19]+1)))" office:value-type="percentage" office:value="0.0497418989132032" calcext:value-type="percentage">
            <text:p>4.97 %</text:p>
          </table:table-cell>
          <table:table-cell table:style-name="ce127" office:value-type="percentage" office:value="0.0763096" calcext:value-type="percentage">
            <text:p>7.63 %</text:p>
          </table:table-cell>
          <table:table-cell table:style-name="ce133" table:formula="of:=(1+[.B69])/(1+[.$N69])-1" office:value-type="percentage" office:value="-0.0104215003594511" calcext:value-type="percentage">
            <text:p>-1.04 %</text:p>
          </table:table-cell>
          <table:table-cell table:style-name="ce133" table:formula="of:=(1+[.C69])/(1+[.$N69])-1" office:value-type="percentage" office:value="-0.0041124474469677" calcext:value-type="percentage">
            <text:p>-0.41 %</text:p>
          </table:table-cell>
          <table:table-cell table:style-name="ce133" table:formula="of:=(1+[.D69])/(1+[.$N69])-1" office:value-type="percentage" office:value="-0.0781238102006233" calcext:value-type="percentage">
            <text:p>-7.81 %</text:p>
          </table:table-cell>
          <table:table-cell table:style-name="ce133" table:formula="of:=(1+[.E69])/(1+[.$N69])-1" office:value-type="percentage" office:value="-0.0417479786748247" calcext:value-type="percentage">
            <text:p>-4.17 %</text:p>
          </table:table-cell>
          <table:table-cell table:number-columns-repeated="16366"/>
        </table:table-row>
        <table:table-row table:style-name="ro10">
          <table:table-cell table:style-name="ce20" office:value-type="float" office:value="1979" calcext:value-type="float">
            <text:p>1979</text:p>
          </table:table-cell>
          <table:table-cell table:style-name="ce41" table:formula="of:=([$'S&amp;P 500 &amp; Raw Data'.B55]-[$'S&amp;P 500 &amp; Raw Data'.B54]+[$'S&amp;P 500 &amp; Raw Data'.C55])/[$'S&amp;P 500 &amp; Raw Data'.B54]" office:value-type="percentage" office:value="0.185194901675164" calcext:value-type="percentage">
            <text:p>18.52 %</text:p>
          </table:table-cell>
          <table:table-cell table:style-name="ce41" table:formula="of:=[$'T. Bill rates'.C57]" office:value-type="percentage" office:value="0.100691666666667" calcext:value-type="percentage">
            <text:p>10.07 %</text:p>
          </table:table-cell>
          <table:table-cell table:style-name="ce41" table:formula="of:=[$'S&amp;P 500 &amp; Raw Data'.F55]" office:value-type="percentage" office:value="0.00670720312472355" calcext:value-type="percentage">
            <text:p>0.67 %</text:p>
          </table:table-cell>
          <table:table-cell table:style-name="ce41" table:formula="of:=[$'S&amp;P 500 &amp; Raw Data'.J55]" office:value-type="percentage" office:value="-0.0200911014366154" calcext:value-type="percentage">
            <text:p>-2.01 %</text:p>
          </table:table-cell>
          <table:table-cell table:style-name="ce70" table:formula="of:=[.F69]*(1+[.B70])" office:value-type="float" office:value="6022.88609127529" calcext:value-type="float">
            <text:p><text:s/>$6,022.89 </text:p>
          </table:table-cell>
          <table:table-cell table:style-name="ce70" table:formula="of:=[.G69]*(1+[.C70])" office:value-type="float" office:value="406.934341602842" calcext:value-type="float">
            <text:p><text:s/>$406.93 </text:p>
          </table:table-cell>
          <table:table-cell table:style-name="ce98" table:formula="of:=[.H69]*(1+[.D70])" office:value-type="float" office:value="461.978983465238" calcext:value-type="float">
            <text:p><text:s/>$461.98 </text:p>
          </table:table-cell>
          <table:table-cell table:style-name="ce70" table:formula="of:=[.I69]*(1+[.E70])" office:value-type="float" office:value="1192.52901414191" calcext:value-type="float">
            <text:p><text:s/>$1,192.53 </text:p>
          </table:table-cell>
          <table:table-cell table:style-name="ce41" table:formula="of:=[.B70]-[.C70]" office:value-type="percentage" office:value="0.0845032350084972" calcext:value-type="percentage">
            <text:p>8.45 %</text:p>
          </table:table-cell>
          <table:table-cell table:style-name="ce115" table:formula="of:=[.B70]-[.D70]" office:value-type="percentage" office:value="0.17848769855044" calcext:value-type="percentage">
            <text:p>17.85 %</text:p>
          </table:table-cell>
          <table:table-cell table:style-name="ce122" table:formula="of:=[.B70]-[.E70]" office:value-type="percentage" office:value="0.205286003111779" calcext:value-type="percentage">
            <text:p>20.53 %</text:p>
          </table:table-cell>
          <table:table-cell table:style-name="ce122" table:formula="of:=(([.F70]/100)^(1/([.A70]-[.$A$19]+1)))-(([.H70]/100)^(1/([.A70]-[.$A$19]+1)))" office:value-type="percentage" office:value="0.0521322528289867" calcext:value-type="percentage">
            <text:p>5.21 %</text:p>
          </table:table-cell>
          <table:table-cell table:style-name="ce127" office:value-type="percentage" office:value="0.1125447" calcext:value-type="percentage">
            <text:p>11.25 %</text:p>
          </table:table-cell>
          <table:table-cell table:style-name="ce133" table:formula="of:=(1+[.B70])/(1+[.$N70])-1" office:value-type="percentage" office:value="0.0653009282909387" calcext:value-type="percentage">
            <text:p>6.53 %</text:p>
          </table:table-cell>
          <table:table-cell table:style-name="ce133" table:formula="of:=(1+[.C70])/(1+[.$N70])-1" office:value-type="percentage" office:value="-0.0106539839103393" calcext:value-type="percentage">
            <text:p>-1.07 %</text:p>
          </table:table-cell>
          <table:table-cell table:style-name="ce133" table:formula="of:=(1+[.D70])/(1+[.$N70])-1" office:value-type="percentage" office:value="-0.0951310063094781" calcext:value-type="percentage">
            <text:p>-9.51 %</text:p>
          </table:table-cell>
          <table:table-cell table:style-name="ce133" table:formula="of:=(1+[.E70])/(1+[.$N70])-1" office:value-type="percentage" office:value="-0.119218402133969" calcext:value-type="percentage">
            <text:p>-11.92 %</text:p>
          </table:table-cell>
          <table:table-cell table:number-columns-repeated="16366"/>
        </table:table-row>
        <table:table-row table:style-name="ro10">
          <table:table-cell table:style-name="ce20" office:value-type="float" office:value="1980" calcext:value-type="float">
            <text:p>1980</text:p>
          </table:table-cell>
          <table:table-cell table:style-name="ce41" table:formula="of:=([$'S&amp;P 500 &amp; Raw Data'.B56]-[$'S&amp;P 500 &amp; Raw Data'.B55]+[$'S&amp;P 500 &amp; Raw Data'.C56])/[$'S&amp;P 500 &amp; Raw Data'.B55]" office:value-type="percentage" office:value="0.31735245506763" calcext:value-type="percentage">
            <text:p>31.74 %</text:p>
          </table:table-cell>
          <table:table-cell table:style-name="ce41" table:formula="of:=[$'T. Bill rates'.C58]" office:value-type="percentage" office:value="0.114341666666667" calcext:value-type="percentage">
            <text:p>11.43 %</text:p>
          </table:table-cell>
          <table:table-cell table:style-name="ce41" table:formula="of:=[$'S&amp;P 500 &amp; Raw Data'.F56]" office:value-type="percentage" office:value="-0.029897442519994" calcext:value-type="percentage">
            <text:p>-2.99 %</text:p>
          </table:table-cell>
          <table:table-cell table:style-name="ce41" table:formula="of:=[$'S&amp;P 500 &amp; Raw Data'.J56]" office:value-type="percentage" office:value="-0.0331567833719105" calcext:value-type="percentage">
            <text:p>-3.32 %</text:p>
          </table:table-cell>
          <table:table-cell table:style-name="ce70" table:formula="of:=[.F70]*(1+[.B71])" office:value-type="float" office:value="7934.26377893418" calcext:value-type="float">
            <text:p><text:s/>$7,934.26 </text:p>
          </table:table-cell>
          <table:table-cell table:style-name="ce70" table:formula="of:=[.G70]*(1+[.C71])" office:value-type="float" office:value="453.463892445614" calcext:value-type="float">
            <text:p><text:s/>$453.46 </text:p>
          </table:table-cell>
          <table:table-cell table:style-name="ce98" table:formula="of:=[.H70]*(1+[.D71])" office:value-type="float" office:value="448.166993361641" calcext:value-type="float">
            <text:p><text:s/>$448.17 </text:p>
          </table:table-cell>
          <table:table-cell table:style-name="ce70" table:formula="of:=[.I70]*(1+[.E71])" office:value-type="float" office:value="1152.98858795529" calcext:value-type="float">
            <text:p><text:s/>$1,152.99 </text:p>
          </table:table-cell>
          <table:table-cell table:style-name="ce41" table:formula="of:=[.B71]-[.C71]" office:value-type="percentage" office:value="0.203010788400963" calcext:value-type="percentage">
            <text:p>20.30 %</text:p>
          </table:table-cell>
          <table:table-cell table:style-name="ce115" table:formula="of:=[.B71]-[.D71]" office:value-type="percentage" office:value="0.347249897587624" calcext:value-type="percentage">
            <text:p>34.72 %</text:p>
          </table:table-cell>
          <table:table-cell table:style-name="ce122" table:formula="of:=[.B71]-[.E71]" office:value-type="percentage" office:value="0.350509238439541" calcext:value-type="percentage">
            <text:p>35.05 %</text:p>
          </table:table-cell>
          <table:table-cell table:style-name="ce122" table:formula="of:=(([.F71]/100)^(1/([.A71]-[.$A$19]+1)))-(([.H71]/100)^(1/([.A71]-[.$A$19]+1)))" office:value-type="percentage" office:value="0.0573187052575896" calcext:value-type="percentage">
            <text:p>5.73 %</text:p>
          </table:table-cell>
          <table:table-cell table:style-name="ce127" office:value-type="percentage" office:value="0.135492" calcext:value-type="percentage">
            <text:p>13.55 %</text:p>
          </table:table-cell>
          <table:table-cell table:style-name="ce133" table:formula="of:=(1+[.B71])/(1+[.$N71])-1" office:value-type="percentage" office:value="0.160160049623978" calcext:value-type="percentage">
            <text:p>16.02 %</text:p>
          </table:table-cell>
          <table:table-cell table:style-name="ce133" table:formula="of:=(1+[.C71])/(1+[.$N71])-1" office:value-type="percentage" office:value="-0.0186265806657673" calcext:value-type="percentage">
            <text:p>-1.86 %</text:p>
          </table:table-cell>
          <table:table-cell table:style-name="ce133" table:formula="of:=(1+[.D71])/(1+[.$N71])-1" office:value-type="percentage" office:value="-0.145654432193264" calcext:value-type="percentage">
            <text:p>-14.57 %</text:p>
          </table:table-cell>
          <table:table-cell table:style-name="ce133" table:formula="of:=(1+[.E71])/(1+[.$N71])-1" office:value-type="percentage" office:value="-0.148524853871195" calcext:value-type="percentage">
            <text:p>-14.85 %</text:p>
          </table:table-cell>
          <table:table-cell table:number-columns-repeated="16366"/>
        </table:table-row>
        <table:table-row table:style-name="ro10">
          <table:table-cell table:style-name="ce20" office:value-type="float" office:value="1981" calcext:value-type="float">
            <text:p>1981</text:p>
          </table:table-cell>
          <table:table-cell table:style-name="ce41" table:formula="of:=([$'S&amp;P 500 &amp; Raw Data'.B57]-[$'S&amp;P 500 &amp; Raw Data'.B56]+[$'S&amp;P 500 &amp; Raw Data'.C57])/[$'S&amp;P 500 &amp; Raw Data'.B56]" office:value-type="percentage" office:value="-0.0470239024749558" calcext:value-type="percentage">
            <text:p>-4.70 %</text:p>
          </table:table-cell>
          <table:table-cell table:style-name="ce41" table:formula="of:=[$'T. Bill rates'.C59]" office:value-type="percentage" office:value="0.14025" calcext:value-type="percentage">
            <text:p>14.03 %</text:p>
          </table:table-cell>
          <table:table-cell table:style-name="ce41" table:formula="of:=[$'S&amp;P 500 &amp; Raw Data'.F57]" office:value-type="percentage" office:value="0.0819921533589235" calcext:value-type="percentage">
            <text:p>8.20 %</text:p>
          </table:table-cell>
          <table:table-cell table:style-name="ce41" table:formula="of:=[$'S&amp;P 500 &amp; Raw Data'.J57]" office:value-type="percentage" office:value="0.0846239948089121" calcext:value-type="percentage">
            <text:p>8.46 %</text:p>
          </table:table-cell>
          <table:table-cell table:style-name="ce70" table:formula="of:=[.F71]*(1+[.B72])" office:value-type="float" office:value="7561.16373278301" calcext:value-type="float">
            <text:p><text:s/>$7,561.16 </text:p>
          </table:table-cell>
          <table:table-cell table:style-name="ce70" table:formula="of:=[.G71]*(1+[.C72])" office:value-type="float" office:value="517.062203361111" calcext:value-type="float">
            <text:p><text:s/>$517.06 </text:p>
          </table:table-cell>
          <table:table-cell table:style-name="ce98" table:formula="of:=[.H71]*(1+[.D72])" office:value-type="float" office:value="484.913170211756" calcext:value-type="float">
            <text:p><text:s/>$484.91 </text:p>
          </table:table-cell>
          <table:table-cell table:style-name="ce70" table:formula="of:=[.I71]*(1+[.E72])" office:value-type="float" office:value="1250.55908823716" calcext:value-type="float">
            <text:p><text:s/>$1,250.56 </text:p>
          </table:table-cell>
          <table:table-cell table:style-name="ce41" table:formula="of:=[.B72]-[.C72]" office:value-type="percentage" office:value="-0.187273902474956" calcext:value-type="percentage">
            <text:p>-18.73 %</text:p>
          </table:table-cell>
          <table:table-cell table:style-name="ce115" table:formula="of:=[.B72]-[.D72]" office:value-type="percentage" office:value="-0.129016055833879" calcext:value-type="percentage">
            <text:p>-12.90 %</text:p>
          </table:table-cell>
          <table:table-cell table:style-name="ce122" table:formula="of:=[.B72]-[.E72]" office:value-type="percentage" office:value="-0.131647897283868" calcext:value-type="percentage">
            <text:p>-13.16 %</text:p>
          </table:table-cell>
          <table:table-cell table:style-name="ce122" table:formula="of:=(([.F72]/100)^(1/([.A72]-[.$A$19]+1)))-(([.H72]/100)^(1/([.A72]-[.$A$19]+1)))" office:value-type="percentage" office:value="0.0537309904686445" calcext:value-type="percentage">
            <text:p>5.37 %</text:p>
          </table:table-cell>
          <table:table-cell table:style-name="ce127" office:value-type="percentage" office:value="0.1033472" calcext:value-type="percentage">
            <text:p>10.33 %</text:p>
          </table:table-cell>
          <table:table-cell table:style-name="ce133" table:formula="of:=(1+[.B72])/(1+[.$N72])-1" office:value-type="percentage" office:value="-0.136286295442591" calcext:value-type="percentage">
            <text:p>-13.63 %</text:p>
          </table:table-cell>
          <table:table-cell table:style-name="ce133" table:formula="of:=(1+[.C72])/(1+[.$N72])-1" office:value-type="percentage" office:value="0.0334462261743176" calcext:value-type="percentage">
            <text:p>3.34 %</text:p>
          </table:table-cell>
          <table:table-cell table:style-name="ce133" table:formula="of:=(1+[.D72])/(1+[.$N72])-1" office:value-type="percentage" office:value="-0.0193547839166822" calcext:value-type="percentage">
            <text:p>-1.94 %</text:p>
          </table:table-cell>
          <table:table-cell table:style-name="ce133" table:formula="of:=(1+[.E72])/(1+[.$N72])-1" office:value-type="percentage" office:value="-0.0169694591068776" calcext:value-type="percentage">
            <text:p>-1.70 %</text:p>
          </table:table-cell>
          <table:table-cell table:number-columns-repeated="16366"/>
        </table:table-row>
        <table:table-row table:style-name="ro10">
          <table:table-cell table:style-name="ce20" office:value-type="float" office:value="1982" calcext:value-type="float">
            <text:p>1982</text:p>
          </table:table-cell>
          <table:table-cell table:style-name="ce41" table:formula="of:=([$'S&amp;P 500 &amp; Raw Data'.B58]-[$'S&amp;P 500 &amp; Raw Data'.B57]+[$'S&amp;P 500 &amp; Raw Data'.C58])/[$'S&amp;P 500 &amp; Raw Data'.B57]" office:value-type="percentage" office:value="0.204190550795594" calcext:value-type="percentage">
            <text:p>20.42 %</text:p>
          </table:table-cell>
          <table:table-cell table:style-name="ce41" table:formula="of:=[$'T. Bill rates'.C60]" office:value-type="percentage" office:value="0.106141666666667" calcext:value-type="percentage">
            <text:p>10.61 %</text:p>
          </table:table-cell>
          <table:table-cell table:style-name="ce41" table:formula="of:=[$'S&amp;P 500 &amp; Raw Data'.F58]" office:value-type="percentage" office:value="0.328145494862956" calcext:value-type="percentage">
            <text:p>32.81 %</text:p>
          </table:table-cell>
          <table:table-cell table:style-name="ce41" table:formula="of:=[$'S&amp;P 500 &amp; Raw Data'.J58]" office:value-type="percentage" office:value="0.290524556559087" calcext:value-type="percentage">
            <text:p>29.05 %</text:p>
          </table:table-cell>
          <table:table-cell table:style-name="ce70" table:formula="of:=[.F72]*(1+[.B73])" office:value-type="float" office:value="9105.08192003563" calcext:value-type="float">
            <text:p><text:s/>$9,105.08 </text:p>
          </table:table-cell>
          <table:table-cell table:style-name="ce70" table:formula="of:=[.G72]*(1+[.C73])" office:value-type="float" office:value="571.944047396198" calcext:value-type="float">
            <text:p><text:s/>$571.94 </text:p>
          </table:table-cell>
          <table:table-cell table:style-name="ce98" table:formula="of:=[.H72]*(1+[.D73])" office:value-type="float" office:value="644.035242416457" calcext:value-type="float">
            <text:p><text:s/>$644.04 </text:p>
          </table:table-cell>
          <table:table-cell table:style-name="ce70" table:formula="of:=[.I72]*(1+[.E73])" office:value-type="float" office:value="1613.87721279819" calcext:value-type="float">
            <text:p><text:s/>$1,613.88 </text:p>
          </table:table-cell>
          <table:table-cell table:style-name="ce41" table:formula="of:=[.B73]-[.C73]" office:value-type="percentage" office:value="0.0980488841289269" calcext:value-type="percentage">
            <text:p>9.80 %</text:p>
          </table:table-cell>
          <table:table-cell table:style-name="ce115" table:formula="of:=[.B73]-[.D73]" office:value-type="percentage" office:value="-0.123954944067362" calcext:value-type="percentage">
            <text:p>-12.40 %</text:p>
          </table:table-cell>
          <table:table-cell table:style-name="ce122" table:formula="of:=[.B73]-[.E73]" office:value-type="percentage" office:value="-0.0863340057634931" calcext:value-type="percentage">
            <text:p>-8.63 %</text:p>
          </table:table-cell>
          <table:table-cell table:style-name="ce122" table:formula="of:=(([.F73]/100)^(1/([.A73]-[.$A$19]+1)))-(([.H73]/100)^(1/([.A73]-[.$A$19]+1)))" office:value-type="percentage" office:value="0.0510386886921397" calcext:value-type="percentage">
            <text:p>5.10 %</text:p>
          </table:table-cell>
          <table:table-cell table:style-name="ce127" office:value-type="percentage" office:value="0.0613143" calcext:value-type="percentage">
            <text:p>6.13 %</text:p>
          </table:table-cell>
          <table:table-cell table:style-name="ce133" table:formula="of:=(1+[.B73])/(1+[.$N73])-1" office:value-type="percentage" office:value="0.134621997268475" calcext:value-type="percentage">
            <text:p>13.46 %</text:p>
          </table:table-cell>
          <table:table-cell table:style-name="ce133" table:formula="of:=(1+[.C73])/(1+[.$N73])-1" office:value-type="percentage" office:value="0.0422375979167213" calcext:value-type="percentage">
            <text:p>4.22 %</text:p>
          </table:table-cell>
          <table:table-cell table:style-name="ce133" table:formula="of:=(1+[.D73])/(1+[.$N73])-1" office:value-type="percentage" office:value="0.251415810437074" calcext:value-type="percentage">
            <text:p>25.14 %</text:p>
          </table:table-cell>
          <table:table-cell table:style-name="ce133" table:formula="of:=(1+[.E73])/(1+[.$N73])-1" office:value-type="percentage" office:value="0.215968310762501" calcext:value-type="percentage">
            <text:p>21.60 %</text:p>
          </table:table-cell>
          <table:table-cell table:number-columns-repeated="16366"/>
        </table:table-row>
        <table:table-row table:style-name="ro10">
          <table:table-cell table:style-name="ce20" office:value-type="float" office:value="1983" calcext:value-type="float">
            <text:p>1983</text:p>
          </table:table-cell>
          <table:table-cell table:style-name="ce41" table:formula="of:=([$'S&amp;P 500 &amp; Raw Data'.B59]-[$'S&amp;P 500 &amp; Raw Data'.B58]+[$'S&amp;P 500 &amp; Raw Data'.C59])/[$'S&amp;P 500 &amp; Raw Data'.B58]" office:value-type="percentage" office:value="0.223371558589306" calcext:value-type="percentage">
            <text:p>22.34 %</text:p>
          </table:table-cell>
          <table:table-cell table:style-name="ce41" table:formula="of:=[$'T. Bill rates'.C61]" office:value-type="percentage" office:value="0.0861083333333333" calcext:value-type="percentage">
            <text:p>8.61 %</text:p>
          </table:table-cell>
          <table:table-cell table:style-name="ce41" table:formula="of:=[$'S&amp;P 500 &amp; Raw Data'.F59]" office:value-type="percentage" office:value="0.0320020944514293" calcext:value-type="percentage">
            <text:p>3.20 %</text:p>
          </table:table-cell>
          <table:table-cell table:style-name="ce41" table:formula="of:=[$'S&amp;P 500 &amp; Raw Data'.J59]" office:value-type="percentage" office:value="0.161942896227984" calcext:value-type="percentage">
            <text:p>16.19 %</text:p>
          </table:table-cell>
          <table:table-cell table:style-name="ce70" table:formula="of:=[.F73]*(1+[.B74])" office:value-type="float" office:value="11138.8982595973" calcext:value-type="float">
            <text:p><text:s/>$11,138.90 </text:p>
          </table:table-cell>
          <table:table-cell table:style-name="ce70" table:formula="of:=[.G73]*(1+[.C74])" office:value-type="float" office:value="621.193196077406" calcext:value-type="float">
            <text:p><text:s/>$621.19 </text:p>
          </table:table-cell>
          <table:table-cell table:style-name="ce98" table:formula="of:=[.H73]*(1+[.D74])" office:value-type="float" office:value="664.645719074318" calcext:value-type="float">
            <text:p><text:s/>$664.65 </text:p>
          </table:table-cell>
          <table:table-cell table:style-name="ce70" table:formula="of:=[.I73]*(1+[.E74])" office:value-type="float" office:value="1875.23316279508" calcext:value-type="float">
            <text:p><text:s/>$1,875.23 </text:p>
          </table:table-cell>
          <table:table-cell table:style-name="ce41" table:formula="of:=[.B74]-[.C74]" office:value-type="percentage" office:value="0.137263225255973" calcext:value-type="percentage">
            <text:p>13.73 %</text:p>
          </table:table-cell>
          <table:table-cell table:style-name="ce115" table:formula="of:=[.B74]-[.D74]" office:value-type="percentage" office:value="0.191369464137877" calcext:value-type="percentage">
            <text:p>19.14 %</text:p>
          </table:table-cell>
          <table:table-cell table:style-name="ce122" table:formula="of:=[.B74]-[.E74]" office:value-type="percentage" office:value="0.0614286623613225" calcext:value-type="percentage">
            <text:p>6.14 %</text:p>
          </table:table-cell>
          <table:table-cell table:style-name="ce122" table:formula="of:=(([.F74]/100)^(1/([.A74]-[.$A$19]+1)))-(([.H74]/100)^(1/([.A74]-[.$A$19]+1)))" office:value-type="percentage" office:value="0.053402830654564" calcext:value-type="percentage">
            <text:p>5.34 %</text:p>
          </table:table-cell>
          <table:table-cell table:style-name="ce127" office:value-type="percentage" office:value="0.0321244" calcext:value-type="percentage">
            <text:p>3.21 %</text:p>
          </table:table-cell>
          <table:table-cell table:style-name="ce133" table:formula="of:=(1+[.B74])/(1+[.$N74])-1" office:value-type="percentage" office:value="0.185294678228037" calcext:value-type="percentage">
            <text:p>18.53 %</text:p>
          </table:table-cell>
          <table:table-cell table:style-name="ce133" table:formula="of:=(1+[.C74])/(1+[.$N74])-1" office:value-type="percentage" office:value="0.0523037080930682" calcext:value-type="percentage">
            <text:p>5.23 %</text:p>
          </table:table-cell>
          <table:table-cell table:style-name="ce133" table:formula="of:=(1+[.D74])/(1+[.$N74])-1" office:value-type="percentage" office:value="-0.000118498844297155" calcext:value-type="percentage">
            <text:p>-0.01 %</text:p>
          </table:table-cell>
          <table:table-cell table:style-name="ce133" table:formula="of:=(1+[.E74])/(1+[.$N74])-1" office:value-type="percentage" office:value="0.125777954893793" calcext:value-type="percentage">
            <text:p>12.58 %</text:p>
          </table:table-cell>
          <table:table-cell table:number-columns-repeated="16366"/>
        </table:table-row>
        <table:table-row table:style-name="ro10">
          <table:table-cell table:style-name="ce20" office:value-type="float" office:value="1984" calcext:value-type="float">
            <text:p>1984</text:p>
          </table:table-cell>
          <table:table-cell table:style-name="ce41" table:formula="of:=([$'S&amp;P 500 &amp; Raw Data'.B60]-[$'S&amp;P 500 &amp; Raw Data'.B59]+[$'S&amp;P 500 &amp; Raw Data'.C60])/[$'S&amp;P 500 &amp; Raw Data'.B59]" office:value-type="percentage" office:value="0.0614614199963621" calcext:value-type="percentage">
            <text:p>6.15 %</text:p>
          </table:table-cell>
          <table:table-cell table:style-name="ce41" table:formula="of:=[$'T. Bill rates'.C62]" office:value-type="percentage" office:value="0.095225" calcext:value-type="percentage">
            <text:p>9.52 %</text:p>
          </table:table-cell>
          <table:table-cell table:style-name="ce41" table:formula="of:=[$'S&amp;P 500 &amp; Raw Data'.F60]" office:value-type="percentage" office:value="0.137333643441023" calcext:value-type="percentage">
            <text:p>13.73 %</text:p>
          </table:table-cell>
          <table:table-cell table:style-name="ce41" table:formula="of:=[$'S&amp;P 500 &amp; Raw Data'.J60]" office:value-type="percentage" office:value="0.156192073324542" calcext:value-type="percentage">
            <text:p>15.62 %</text:p>
          </table:table-cell>
          <table:table-cell table:style-name="ce70" table:formula="of:=[.F74]*(1+[.B75])" office:value-type="float" office:value="11823.5107638272" calcext:value-type="float">
            <text:p><text:s/>$11,823.51 </text:p>
          </table:table-cell>
          <table:table-cell table:style-name="ce70" table:formula="of:=[.G74]*(1+[.C75])" office:value-type="float" office:value="680.346318173877" calcext:value-type="float">
            <text:p><text:s/>$680.35 </text:p>
          </table:table-cell>
          <table:table-cell table:style-name="ce98" table:formula="of:=[.H74]*(1+[.D75])" office:value-type="float" office:value="755.923937272273" calcext:value-type="float">
            <text:p><text:s/>$755.92 </text:p>
          </table:table-cell>
          <table:table-cell table:style-name="ce70" table:formula="of:=[.I74]*(1+[.E75])" office:value-type="float" office:value="2168.12971845898" calcext:value-type="float">
            <text:p><text:s/>$2,168.13 </text:p>
          </table:table-cell>
          <table:table-cell table:style-name="ce41" table:formula="of:=[.B75]-[.C75]" office:value-type="percentage" office:value="-0.0337635800036379" calcext:value-type="percentage">
            <text:p>-3.38 %</text:p>
          </table:table-cell>
          <table:table-cell table:style-name="ce115" table:formula="of:=[.B75]-[.D75]" office:value-type="percentage" office:value="-0.0758722234446614" calcext:value-type="percentage">
            <text:p>-7.59 %</text:p>
          </table:table-cell>
          <table:table-cell table:style-name="ce122" table:formula="of:=[.B75]-[.E75]" office:value-type="percentage" office:value="-0.0947306533281801" calcext:value-type="percentage">
            <text:p>-9.47 %</text:p>
          </table:table-cell>
          <table:table-cell table:style-name="ce122" table:formula="of:=(([.F75]/100)^(1/([.A75]-[.$A$19]+1)))-(([.H75]/100)^(1/([.A75]-[.$A$19]+1)))" office:value-type="percentage" office:value="0.0512121263180514" calcext:value-type="percentage">
            <text:p>5.12 %</text:p>
          </table:table-cell>
          <table:table-cell table:style-name="ce127" office:value-type="percentage" office:value="0.0430054" calcext:value-type="percentage">
            <text:p>4.30 %</text:p>
          </table:table-cell>
          <table:table-cell table:style-name="ce133" table:formula="of:=(1+[.B75])/(1+[.$N75])-1" office:value-type="percentage" office:value="0.0176950378170258" calcext:value-type="percentage">
            <text:p>1.77 %</text:p>
          </table:table-cell>
          <table:table-cell table:style-name="ce133" table:formula="of:=(1+[.C75])/(1+[.$N75])-1" office:value-type="percentage" office:value="0.0500664713720562" calcext:value-type="percentage">
            <text:p>5.01 %</text:p>
          </table:table-cell>
          <table:table-cell table:style-name="ce133" table:formula="of:=(1+[.D75])/(1+[.$N75])-1" office:value-type="percentage" office:value="0.0904388830978473" calcext:value-type="percentage">
            <text:p>9.04 %</text:p>
          </table:table-cell>
          <table:table-cell table:style-name="ce133" table:formula="of:=(1+[.E75])/(1+[.$N75])-1" office:value-type="percentage" office:value="0.108519738559879" calcext:value-type="percentage">
            <text:p>10.85 %</text:p>
          </table:table-cell>
          <table:table-cell table:number-columns-repeated="16366"/>
        </table:table-row>
        <table:table-row table:style-name="ro10">
          <table:table-cell table:style-name="ce20" office:value-type="float" office:value="1985" calcext:value-type="float">
            <text:p>1985</text:p>
          </table:table-cell>
          <table:table-cell table:style-name="ce41" table:formula="of:=([$'S&amp;P 500 &amp; Raw Data'.B61]-[$'S&amp;P 500 &amp; Raw Data'.B60]+[$'S&amp;P 500 &amp; Raw Data'.C61])/[$'S&amp;P 500 &amp; Raw Data'.B60]" office:value-type="percentage" office:value="0.31235149485769" calcext:value-type="percentage">
            <text:p>31.24 %</text:p>
          </table:table-cell>
          <table:table-cell table:style-name="ce41" table:formula="of:=[$'T. Bill rates'.C63]" office:value-type="percentage" office:value="0.0747916666666667" calcext:value-type="percentage">
            <text:p>7.48 %</text:p>
          </table:table-cell>
          <table:table-cell table:style-name="ce41" table:formula="of:=[$'S&amp;P 500 &amp; Raw Data'.F61]" office:value-type="percentage" office:value="0.257124882126064" calcext:value-type="percentage">
            <text:p>25.71 %</text:p>
          </table:table-cell>
          <table:table-cell table:style-name="ce41" table:formula="of:=[$'S&amp;P 500 &amp; Raw Data'.J61]" office:value-type="percentage" office:value="0.238626418499165" calcext:value-type="percentage">
            <text:p>23.86 %</text:p>
          </table:table-cell>
          <table:table-cell table:style-name="ce70" table:formula="of:=[.F75]*(1+[.B76])" office:value-type="float" office:value="15516.6020253746" calcext:value-type="float">
            <text:p><text:s/>$15,516.60 </text:p>
          </table:table-cell>
          <table:table-cell table:style-name="ce70" table:formula="of:=[.G75]*(1+[.C76])" office:value-type="float" office:value="731.230553220631" calcext:value-type="float">
            <text:p><text:s/>$731.23 </text:p>
          </table:table-cell>
          <table:table-cell table:style-name="ce98" table:formula="of:=[.H75]*(1+[.D76])" office:value-type="float" office:value="950.290790539676" calcext:value-type="float">
            <text:p><text:s/>$950.29 </text:p>
          </table:table-cell>
          <table:table-cell table:style-name="ce70" table:formula="of:=[.I75]*(1+[.E76])" office:value-type="float" office:value="2685.50274801645" calcext:value-type="float">
            <text:p><text:s/>$2,685.50 </text:p>
          </table:table-cell>
          <table:table-cell table:style-name="ce41" table:formula="of:=[.B76]-[.C76]" office:value-type="percentage" office:value="0.237559828191023" calcext:value-type="percentage">
            <text:p>23.76 %</text:p>
          </table:table-cell>
          <table:table-cell table:style-name="ce115" table:formula="of:=[.B76]-[.D76]" office:value-type="percentage" office:value="0.0552266127316254" calcext:value-type="percentage">
            <text:p>5.52 %</text:p>
          </table:table-cell>
          <table:table-cell table:style-name="ce122" table:formula="of:=[.B76]-[.E76]" office:value-type="percentage" office:value="0.0737250763585247" calcext:value-type="percentage">
            <text:p>7.37 %</text:p>
          </table:table-cell>
          <table:table-cell table:style-name="ce122" table:formula="of:=(([.F76]/100)^(1/([.A76]-[.$A$19]+1)))-(([.H76]/100)^(1/([.A76]-[.$A$19]+1)))" office:value-type="percentage" office:value="0.0512843651025816" calcext:value-type="percentage">
            <text:p>5.13 %</text:p>
          </table:table-cell>
          <table:table-cell table:style-name="ce127" office:value-type="percentage" office:value="0.0354564" calcext:value-type="percentage">
            <text:p>3.55 %</text:p>
          </table:table-cell>
          <table:table-cell table:style-name="ce133" table:formula="of:=(1+[.B76])/(1+[.$N76])-1" office:value-type="percentage" office:value="0.267413572273724" calcext:value-type="percentage">
            <text:p>26.74 %</text:p>
          </table:table-cell>
          <table:table-cell table:style-name="ce133" table:formula="of:=(1+[.C76])/(1+[.$N76])-1" office:value-type="percentage" office:value="0.0379883369948426" calcext:value-type="percentage">
            <text:p>3.80 %</text:p>
          </table:table-cell>
          <table:table-cell table:style-name="ce133" table:formula="of:=(1+[.D76])/(1+[.$N76])-1" office:value-type="percentage" office:value="0.214078045319981" calcext:value-type="percentage">
            <text:p>21.41 %</text:p>
          </table:table-cell>
          <table:table-cell table:style-name="ce133" table:formula="of:=(1+[.E76])/(1+[.$N76])-1" office:value-type="percentage" office:value="0.196213011478962" calcext:value-type="percentage">
            <text:p>19.62 %</text:p>
          </table:table-cell>
          <table:table-cell table:number-columns-repeated="16366"/>
        </table:table-row>
        <table:table-row table:style-name="ro10">
          <table:table-cell table:style-name="ce20" office:value-type="float" office:value="1986" calcext:value-type="float">
            <text:p>1986</text:p>
          </table:table-cell>
          <table:table-cell table:style-name="ce41" table:formula="of:=([$'S&amp;P 500 &amp; Raw Data'.B62]-[$'S&amp;P 500 &amp; Raw Data'.B61]+[$'S&amp;P 500 &amp; Raw Data'.C62])/[$'S&amp;P 500 &amp; Raw Data'.B61]" office:value-type="percentage" office:value="0.184945787580462" calcext:value-type="percentage">
            <text:p>18.49 %</text:p>
          </table:table-cell>
          <table:table-cell table:style-name="ce41" table:formula="of:=[$'T. Bill rates'.C64]" office:value-type="percentage" office:value="0.0597833333333333" calcext:value-type="percentage">
            <text:p>5.98 %</text:p>
          </table:table-cell>
          <table:table-cell table:style-name="ce41" table:formula="of:=[$'S&amp;P 500 &amp; Raw Data'.F62]" office:value-type="percentage" office:value="0.242842151417676" calcext:value-type="percentage">
            <text:p>24.28 %</text:p>
          </table:table-cell>
          <table:table-cell table:style-name="ce41" table:formula="of:=[$'S&amp;P 500 &amp; Raw Data'.J62]" office:value-type="percentage" office:value="0.214855153097595" calcext:value-type="percentage">
            <text:p>21.49 %</text:p>
          </table:table-cell>
          <table:table-cell table:style-name="ce70" table:formula="of:=[.F76]*(1+[.B77])" office:value-type="float" office:value="18386.33220753" calcext:value-type="float">
            <text:p><text:s/>$18,386.33 </text:p>
          </table:table-cell>
          <table:table-cell table:style-name="ce70" table:formula="of:=[.G76]*(1+[.C77])" office:value-type="float" office:value="774.945953127338" calcext:value-type="float">
            <text:p><text:s/>$774.95 </text:p>
          </table:table-cell>
          <table:table-cell table:style-name="ce98" table:formula="of:=[.H76]*(1+[.D77])" office:value-type="float" office:value="1181.06145058674" calcext:value-type="float">
            <text:p><text:s/>$1,181.06 </text:p>
          </table:table-cell>
          <table:table-cell table:style-name="ce70" table:formula="of:=[.I76]*(1+[.E77])" office:value-type="float" office:value="3262.49685208554" calcext:value-type="float">
            <text:p><text:s/>$3,262.50 </text:p>
          </table:table-cell>
          <table:table-cell table:style-name="ce41" table:formula="of:=[.B77]-[.C77]" office:value-type="percentage" office:value="0.125162454247129" calcext:value-type="percentage">
            <text:p>12.52 %</text:p>
          </table:table-cell>
          <table:table-cell table:style-name="ce115" table:formula="of:=[.B77]-[.D77]" office:value-type="percentage" office:value="-0.0578963638372143" calcext:value-type="percentage">
            <text:p>-5.79 %</text:p>
          </table:table-cell>
          <table:table-cell table:style-name="ce122" table:formula="of:=[.B77]-[.E77]" office:value-type="percentage" office:value="-0.0299093655171331" calcext:value-type="percentage">
            <text:p>-2.99 %</text:p>
          </table:table-cell>
          <table:table-cell table:style-name="ce122" table:formula="of:=(([.F77]/100)^(1/([.A77]-[.$A$19]+1)))-(([.H77]/100)^(1/([.A77]-[.$A$19]+1)))" office:value-type="percentage" office:value="0.0496635655997391" calcext:value-type="percentage">
            <text:p>4.97 %</text:p>
          </table:table-cell>
          <table:table-cell table:style-name="ce127" office:value-type="percentage" office:value="0.0189805" calcext:value-type="percentage">
            <text:p>1.90 %</text:p>
          </table:table-cell>
          <table:table-cell table:style-name="ce133" table:formula="of:=(1+[.B77])/(1+[.$N77])-1" office:value-type="percentage" office:value="0.162873860275503" calcext:value-type="percentage">
            <text:p>16.29 %</text:p>
          </table:table-cell>
          <table:table-cell table:style-name="ce133" table:formula="of:=(1+[.C77])/(1+[.$N77])-1" office:value-type="percentage" office:value="0.0400428009499036" calcext:value-type="percentage">
            <text:p>4.00 %</text:p>
          </table:table-cell>
          <table:table-cell table:style-name="ce133" table:formula="of:=(1+[.D77])/(1+[.$N77])-1" office:value-type="percentage" office:value="0.219691791371548" calcext:value-type="percentage">
            <text:p>21.97 %</text:p>
          </table:table-cell>
          <table:table-cell table:style-name="ce133" table:formula="of:=(1+[.E77])/(1+[.$N77])-1" office:value-type="percentage" office:value="0.192226105502112" calcext:value-type="percentage">
            <text:p>19.22 %</text:p>
          </table:table-cell>
          <table:table-cell table:number-columns-repeated="16366"/>
        </table:table-row>
        <table:table-row table:style-name="ro10">
          <table:table-cell table:style-name="ce20" office:value-type="float" office:value="1987" calcext:value-type="float">
            <text:p>1987</text:p>
          </table:table-cell>
          <table:table-cell table:style-name="ce41" table:formula="of:=([$'S&amp;P 500 &amp; Raw Data'.B63]-[$'S&amp;P 500 &amp; Raw Data'.B62]+[$'S&amp;P 500 &amp; Raw Data'.C63])/[$'S&amp;P 500 &amp; Raw Data'.B62]" office:value-type="percentage" office:value="0.0581272164182187" calcext:value-type="percentage">
            <text:p>5.81 %</text:p>
          </table:table-cell>
          <table:table-cell table:style-name="ce41" table:formula="of:=[$'T. Bill rates'.C65]" office:value-type="percentage" office:value="0.05775" calcext:value-type="percentage">
            <text:p>5.78 %</text:p>
          </table:table-cell>
          <table:table-cell table:style-name="ce41" table:formula="of:=[$'S&amp;P 500 &amp; Raw Data'.F63]" office:value-type="percentage" office:value="-0.0496050893792623" calcext:value-type="percentage">
            <text:p>-4.96 %</text:p>
          </table:table-cell>
          <table:table-cell table:style-name="ce41" table:formula="of:=[$'S&amp;P 500 &amp; Raw Data'.J63]" office:value-type="percentage" office:value="0.0228984608427668" calcext:value-type="percentage">
            <text:p>2.29 %</text:p>
          </table:table-cell>
          <table:table-cell table:style-name="ce70" table:formula="of:=[.F77]*(1+[.B78])" office:value-type="float" office:value="19455.0785188944" calcext:value-type="float">
            <text:p><text:s/>$19,455.08 </text:p>
          </table:table-cell>
          <table:table-cell table:style-name="ce70" table:formula="of:=[.G77]*(1+[.C78])" office:value-type="float" office:value="819.699081920442" calcext:value-type="float">
            <text:p><text:s/>$819.70 </text:p>
          </table:table-cell>
          <table:table-cell table:style-name="ce98" table:formula="of:=[.H77]*(1+[.D78])" office:value-type="float" office:value="1122.47479176798" calcext:value-type="float">
            <text:p><text:s/>$1,122.47 </text:p>
          </table:table-cell>
          <table:table-cell table:style-name="ce70" table:formula="of:=[.I77]*(1+[.E78])" office:value-type="float" office:value="3337.20300850267" calcext:value-type="float">
            <text:p><text:s/>$3,337.20 </text:p>
          </table:table-cell>
          <table:table-cell table:style-name="ce41" table:formula="of:=[.B78]-[.C78]" office:value-type="percentage" office:value="0.000377216418218709" calcext:value-type="percentage">
            <text:p>0.04 %</text:p>
          </table:table-cell>
          <table:table-cell table:style-name="ce115" table:formula="of:=[.B78]-[.D78]" office:value-type="percentage" office:value="0.107732305797481" calcext:value-type="percentage">
            <text:p>10.77 %</text:p>
          </table:table-cell>
          <table:table-cell table:style-name="ce122" table:formula="of:=[.B78]-[.E78]" office:value-type="percentage" office:value="0.0352287555754519" calcext:value-type="percentage">
            <text:p>3.52 %</text:p>
          </table:table-cell>
          <table:table-cell table:style-name="ce122" table:formula="of:=(([.F78]/100)^(1/([.A78]-[.$A$19]+1)))-(([.H78]/100)^(1/([.A78]-[.$A$19]+1)))" office:value-type="percentage" office:value="0.0506935904375072" calcext:value-type="percentage">
            <text:p>5.07 %</text:p>
          </table:table-cell>
          <table:table-cell table:style-name="ce127" office:value-type="percentage" office:value="0.0366456" calcext:value-type="percentage">
            <text:p>3.66 %</text:p>
          </table:table-cell>
          <table:table-cell table:style-name="ce133" table:formula="of:=(1+[.B78])/(1+[.$N78])-1" office:value-type="percentage" office:value="0.0207222375884475" calcext:value-type="percentage">
            <text:p>2.07 %</text:p>
          </table:table-cell>
          <table:table-cell table:style-name="ce133" table:formula="of:=(1+[.C78])/(1+[.$N78])-1" office:value-type="percentage" office:value="0.0203583558353984" calcext:value-type="percentage">
            <text:p>2.04 %</text:p>
          </table:table-cell>
          <table:table-cell table:style-name="ce133" table:formula="of:=(1+[.D78])/(1+[.$N78])-1" office:value-type="percentage" office:value="-0.0832017126964725" calcext:value-type="percentage">
            <text:p>-8.32 %</text:p>
          </table:table-cell>
          <table:table-cell table:style-name="ce133" table:formula="of:=(1+[.E78])/(1+[.$N78])-1" office:value-type="percentage" office:value="-0.0132611754270053" calcext:value-type="percentage">
            <text:p>-1.33 %</text:p>
          </table:table-cell>
          <table:table-cell table:number-columns-repeated="16366"/>
        </table:table-row>
        <table:table-row table:style-name="ro10">
          <table:table-cell table:style-name="ce20" office:value-type="float" office:value="1988" calcext:value-type="float">
            <text:p>1988</text:p>
          </table:table-cell>
          <table:table-cell table:style-name="ce41" table:formula="of:=([$'S&amp;P 500 &amp; Raw Data'.B64]-[$'S&amp;P 500 &amp; Raw Data'.B63]+[$'S&amp;P 500 &amp; Raw Data'.C64])/[$'S&amp;P 500 &amp; Raw Data'.B63]" office:value-type="percentage" office:value="0.165371928120447" calcext:value-type="percentage">
            <text:p>16.54 %</text:p>
          </table:table-cell>
          <table:table-cell table:style-name="ce41" table:formula="of:=[$'T. Bill rates'.C66]" office:value-type="percentage" office:value="0.066675" calcext:value-type="percentage">
            <text:p>6.67 %</text:p>
          </table:table-cell>
          <table:table-cell table:style-name="ce41" table:formula="of:=[$'S&amp;P 500 &amp; Raw Data'.F64]" office:value-type="percentage" office:value="0.0822359584348417" calcext:value-type="percentage">
            <text:p>8.22 %</text:p>
          </table:table-cell>
          <table:table-cell table:style-name="ce41" table:formula="of:=[$'S&amp;P 500 &amp; Raw Data'.J64]" office:value-type="percentage" office:value="0.1511507006712" calcext:value-type="percentage">
            <text:p>15.12 %</text:p>
          </table:table-cell>
          <table:table-cell table:style-name="ce70" table:formula="of:=[.F78]*(1+[.B79])" office:value-type="float" office:value="22672.4023652987" calcext:value-type="float">
            <text:p><text:s/>$22,672.40 </text:p>
          </table:table-cell>
          <table:table-cell table:style-name="ce70" table:formula="of:=[.G78]*(1+[.C79])" office:value-type="float" office:value="874.352518207487" calcext:value-type="float">
            <text:p><text:s/>$874.35 </text:p>
          </table:table-cell>
          <table:table-cell table:style-name="ce98" table:formula="of:=[.H78]*(1+[.D79])" office:value-type="float" office:value="1214.78258208797" calcext:value-type="float">
            <text:p><text:s/>$1,214.78 </text:p>
          </table:table-cell>
          <table:table-cell table:style-name="ce70" table:formula="of:=[.I78]*(1+[.E79])" office:value-type="float" office:value="3841.62358151988" calcext:value-type="float">
            <text:p><text:s/>$3,841.62 </text:p>
          </table:table-cell>
          <table:table-cell table:style-name="ce41" table:formula="of:=[.B79]-[.C79]" office:value-type="percentage" office:value="0.0986969281204469" calcext:value-type="percentage">
            <text:p>9.87 %</text:p>
          </table:table-cell>
          <table:table-cell table:style-name="ce115" table:formula="of:=[.B79]-[.D79]" office:value-type="percentage" office:value="0.0831359696856052" calcext:value-type="percentage">
            <text:p>8.31 %</text:p>
          </table:table-cell>
          <table:table-cell table:style-name="ce122" table:formula="of:=[.B79]-[.E79]" office:value-type="percentage" office:value="0.0142212274492466" calcext:value-type="percentage">
            <text:p>1.42 %</text:p>
          </table:table-cell>
          <table:table-cell table:style-name="ce122" table:formula="of:=(([.F79]/100)^(1/([.A79]-[.$A$19]+1)))-(([.H79]/100)^(1/([.A79]-[.$A$19]+1)))" office:value-type="percentage" office:value="0.0511999335789939" calcext:value-type="percentage">
            <text:p>5.12 %</text:p>
          </table:table-cell>
          <table:table-cell table:style-name="ce127" office:value-type="percentage" office:value="0.0407774" calcext:value-type="percentage">
            <text:p>4.08 %</text:p>
          </table:table-cell>
          <table:table-cell table:style-name="ce133" table:formula="of:=(1+[.B79])/(1+[.$N79])-1" office:value-type="percentage" office:value="0.119712945458315" calcext:value-type="percentage">
            <text:p>11.97 %</text:p>
          </table:table-cell>
          <table:table-cell table:style-name="ce133" table:formula="of:=(1+[.C79])/(1+[.$N79])-1" office:value-type="percentage" office:value="0.0248829384650358" calcext:value-type="percentage">
            <text:p>2.49 %</text:p>
          </table:table-cell>
          <table:table-cell table:style-name="ce133" table:formula="of:=(1+[.D79])/(1+[.$N79])-1" office:value-type="percentage" office:value="0.0398342224137858" calcext:value-type="percentage">
            <text:p>3.98 %</text:p>
          </table:table-cell>
          <table:table-cell table:style-name="ce133" table:formula="of:=(1+[.E79])/(1+[.$N79])-1" office:value-type="percentage" office:value="0.106048902167937" calcext:value-type="percentage">
            <text:p>10.60 %</text:p>
          </table:table-cell>
          <table:table-cell table:number-columns-repeated="16366"/>
        </table:table-row>
        <table:table-row table:style-name="ro10">
          <table:table-cell table:style-name="ce20" office:value-type="float" office:value="1989" calcext:value-type="float">
            <text:p>1989</text:p>
          </table:table-cell>
          <table:table-cell table:style-name="ce41" table:formula="of:=([$'S&amp;P 500 &amp; Raw Data'.B65]-[$'S&amp;P 500 &amp; Raw Data'.B64]+[$'S&amp;P 500 &amp; Raw Data'.C65])/[$'S&amp;P 500 &amp; Raw Data'.B64]" office:value-type="percentage" office:value="0.314751836381967" calcext:value-type="percentage">
            <text:p>31.48 %</text:p>
          </table:table-cell>
          <table:table-cell table:style-name="ce41" table:formula="of:=[$'T. Bill rates'.C67]" office:value-type="percentage" office:value="0.0811166666666667" calcext:value-type="percentage">
            <text:p>8.11 %</text:p>
          </table:table-cell>
          <table:table-cell table:style-name="ce41" table:formula="of:=[$'S&amp;P 500 &amp; Raw Data'.F65]" office:value-type="percentage" office:value="0.176936471594462" calcext:value-type="percentage">
            <text:p>17.69 %</text:p>
          </table:table-cell>
          <table:table-cell table:style-name="ce41" table:formula="of:=[$'S&amp;P 500 &amp; Raw Data'.J65]" office:value-type="percentage" office:value="0.157896665314373" calcext:value-type="percentage">
            <text:p>15.79 %</text:p>
          </table:table-cell>
          <table:table-cell table:style-name="ce70" table:formula="of:=[.F79]*(1+[.B80])" office:value-type="float" office:value="29808.5826449673" calcext:value-type="float">
            <text:p><text:s/>$29,808.58 </text:p>
          </table:table-cell>
          <table:table-cell table:style-name="ce70" table:formula="of:=[.G79]*(1+[.C80])" office:value-type="float" office:value="945.277079976085" calcext:value-type="float">
            <text:p><text:s/>$945.28 </text:p>
          </table:table-cell>
          <table:table-cell table:style-name="ce98" table:formula="of:=[.H79]*(1+[.D80])" office:value-type="float" office:value="1429.72192591702" calcext:value-type="float">
            <text:p><text:s/>$1,429.72 </text:p>
          </table:table-cell>
          <table:table-cell table:style-name="ce70" table:formula="of:=[.I79]*(1+[.E80])" office:value-type="float" office:value="4448.20313443493" calcext:value-type="float">
            <text:p><text:s/>$4,448.20 </text:p>
          </table:table-cell>
          <table:table-cell table:style-name="ce41" table:formula="of:=[.B80]-[.C80]" office:value-type="percentage" office:value="0.233635169715301" calcext:value-type="percentage">
            <text:p>23.36 %</text:p>
          </table:table-cell>
          <table:table-cell table:style-name="ce115" table:formula="of:=[.B80]-[.D80]" office:value-type="percentage" office:value="0.137815364787505" calcext:value-type="percentage">
            <text:p>13.78 %</text:p>
          </table:table-cell>
          <table:table-cell table:style-name="ce122" table:formula="of:=[.B80]-[.E80]" office:value-type="percentage" office:value="0.156855171067594" calcext:value-type="percentage">
            <text:p>15.69 %</text:p>
          </table:table-cell>
          <table:table-cell table:style-name="ce122" table:formula="of:=(([.F80]/100)^(1/([.A80]-[.$A$19]+1)))-(([.H80]/100)^(1/([.A80]-[.$A$19]+1)))" office:value-type="percentage" office:value="0.0524098216933688" calcext:value-type="percentage">
            <text:p>5.24 %</text:p>
          </table:table-cell>
          <table:table-cell table:style-name="ce127" office:value-type="percentage" office:value="0.04827" calcext:value-type="percentage">
            <text:p>4.83 %</text:p>
          </table:table-cell>
          <table:table-cell table:style-name="ce133" table:formula="of:=(1+[.B80])/(1+[.$N80])-1" office:value-type="percentage" office:value="0.254211068123639" calcext:value-type="percentage">
            <text:p>25.42 %</text:p>
          </table:table-cell>
          <table:table-cell table:style-name="ce133" table:formula="of:=(1+[.C80])/(1+[.$N80])-1" office:value-type="percentage" office:value="0.0313341664520272" calcext:value-type="percentage">
            <text:p>3.13 %</text:p>
          </table:table-cell>
          <table:table-cell table:style-name="ce133" table:formula="of:=(1+[.D80])/(1+[.$N80])-1" office:value-type="percentage" office:value="0.122741728366224" calcext:value-type="percentage">
            <text:p>12.27 %</text:p>
          </table:table-cell>
          <table:table-cell table:style-name="ce133" table:formula="of:=(1+[.E80])/(1+[.$N80])-1" office:value-type="percentage" office:value="0.104578653700262" calcext:value-type="percentage">
            <text:p>10.46 %</text:p>
          </table:table-cell>
          <table:table-cell table:number-columns-repeated="16366"/>
        </table:table-row>
        <table:table-row table:style-name="ro10">
          <table:table-cell table:style-name="ce20" office:value-type="float" office:value="1990" calcext:value-type="float">
            <text:p>1990</text:p>
          </table:table-cell>
          <table:table-cell table:style-name="ce41" table:formula="of:=([$'S&amp;P 500 &amp; Raw Data'.B66]-[$'S&amp;P 500 &amp; Raw Data'.B65]+[$'S&amp;P 500 &amp; Raw Data'.C66])/[$'S&amp;P 500 &amp; Raw Data'.B65]" office:value-type="percentage" office:value="-0.0306445161290321" calcext:value-type="percentage">
            <text:p>-3.06 %</text:p>
          </table:table-cell>
          <table:table-cell table:style-name="ce41" table:formula="of:=[$'T. Bill rates'.C68]" office:value-type="percentage" office:value="0.0749333333333333" calcext:value-type="percentage">
            <text:p>7.49 %</text:p>
          </table:table-cell>
          <table:table-cell table:style-name="ce41" table:formula="of:=[$'S&amp;P 500 &amp; Raw Data'.F66]" office:value-type="percentage" office:value="0.0623537533355334" calcext:value-type="percentage">
            <text:p>6.24 %</text:p>
          </table:table-cell>
          <table:table-cell table:style-name="ce41" table:formula="of:=[$'S&amp;P 500 &amp; Raw Data'.J66]" office:value-type="percentage" office:value="0.061400628860817" calcext:value-type="percentage">
            <text:p>6.14 %</text:p>
          </table:table-cell>
          <table:table-cell table:style-name="ce70" table:formula="of:=[.F80]*(1+[.B81])" office:value-type="float" office:value="28895.11305332" calcext:value-type="float">
            <text:p><text:s/>$28,895.11 </text:p>
          </table:table-cell>
          <table:table-cell table:style-name="ce70" table:formula="of:=[.G80]*(1+[.C81])" office:value-type="float" office:value="1016.10984250229" calcext:value-type="float">
            <text:p><text:s/>$1,016.11 </text:p>
          </table:table-cell>
          <table:table-cell table:style-name="ce98" table:formula="of:=[.H80]*(1+[.D81])" office:value-type="float" office:value="1518.87045422406" calcext:value-type="float">
            <text:p><text:s/>$1,518.87 </text:p>
          </table:table-cell>
          <table:table-cell table:style-name="ce70" table:formula="of:=[.I80]*(1+[.E81])" office:value-type="float" office:value="4721.32560418989" calcext:value-type="float">
            <text:p><text:s/>$4,721.33 </text:p>
          </table:table-cell>
          <table:table-cell table:style-name="ce41" table:formula="of:=[.B81]-[.C81]" office:value-type="percentage" office:value="-0.105577849462365" calcext:value-type="percentage">
            <text:p>-10.56 %</text:p>
          </table:table-cell>
          <table:table-cell table:style-name="ce115" table:formula="of:=[.B81]-[.D81]" office:value-type="percentage" office:value="-0.0929982694645655" calcext:value-type="percentage">
            <text:p>-9.30 %</text:p>
          </table:table-cell>
          <table:table-cell table:style-name="ce122" table:formula="of:=[.B81]-[.E81]" office:value-type="percentage" office:value="-0.0920451449898492" calcext:value-type="percentage">
            <text:p>-9.20 %</text:p>
          </table:table-cell>
          <table:table-cell table:style-name="ce122" table:formula="of:=(([.F81]/100)^(1/([.A81]-[.$A$19]+1)))-(([.H81]/100)^(1/([.A81]-[.$A$19]+1)))" office:value-type="percentage" office:value="0.0499799531373644" calcext:value-type="percentage">
            <text:p>5.00 %</text:p>
          </table:table-cell>
          <table:table-cell table:style-name="ce127" office:value-type="percentage" office:value="0.0539796" calcext:value-type="percentage">
            <text:p>5.40 %</text:p>
          </table:table-cell>
          <table:table-cell table:style-name="ce133" table:formula="of:=(1+[.B81])/(1+[.$N81])-1" office:value-type="percentage" office:value="-0.0802900892285126" calcext:value-type="percentage">
            <text:p>-8.03 %</text:p>
          </table:table-cell>
          <table:table-cell table:style-name="ce133" table:formula="of:=(1+[.C81])/(1+[.$N81])-1" office:value-type="percentage" office:value="0.0198805871891006" calcext:value-type="percentage">
            <text:p>1.99 %</text:p>
          </table:table-cell>
          <table:table-cell table:style-name="ce133" table:formula="of:=(1+[.D81])/(1+[.$N81])-1" office:value-type="percentage" office:value="0.00794527079606988" calcext:value-type="percentage">
            <text:p>0.79 %</text:p>
          </table:table-cell>
          <table:table-cell table:style-name="ce133" table:formula="of:=(1+[.E81])/(1+[.$N81])-1" office:value-type="percentage" office:value="0.00704096062278348" calcext:value-type="percentage">
            <text:p>0.70 %</text:p>
          </table:table-cell>
          <table:table-cell table:number-columns-repeated="16366"/>
        </table:table-row>
        <table:table-row table:style-name="ro10">
          <table:table-cell table:style-name="ce20" office:value-type="float" office:value="1991" calcext:value-type="float">
            <text:p>1991</text:p>
          </table:table-cell>
          <table:table-cell table:style-name="ce41" table:formula="of:=([$'S&amp;P 500 &amp; Raw Data'.B67]-[$'S&amp;P 500 &amp; Raw Data'.B66]+[$'S&amp;P 500 &amp; Raw Data'.C67])/[$'S&amp;P 500 &amp; Raw Data'.B66]" office:value-type="percentage" office:value="0.302348431348798" calcext:value-type="percentage">
            <text:p>30.23 %</text:p>
          </table:table-cell>
          <table:table-cell table:style-name="ce41" table:formula="of:=[$'T. Bill rates'.C69]" office:value-type="percentage" office:value="0.05375" calcext:value-type="percentage">
            <text:p>5.38 %</text:p>
          </table:table-cell>
          <table:table-cell table:style-name="ce41" table:formula="of:=[$'S&amp;P 500 &amp; Raw Data'.F67]" office:value-type="percentage" office:value="0.150045100195173" calcext:value-type="percentage">
            <text:p>15.00 %</text:p>
          </table:table-cell>
          <table:table-cell table:style-name="ce41" table:formula="of:=[$'S&amp;P 500 &amp; Raw Data'.J67]" office:value-type="percentage" office:value="0.178534871467632" calcext:value-type="percentage">
            <text:p>17.85 %</text:p>
          </table:table-cell>
          <table:table-cell table:style-name="ce70" table:formula="of:=[.F81]*(1+[.B82])" office:value-type="float" office:value="37631.5051586375" calcext:value-type="float">
            <text:p><text:s/>$37,631.51 </text:p>
          </table:table-cell>
          <table:table-cell table:style-name="ce70" table:formula="of:=[.G81]*(1+[.C82])" office:value-type="float" office:value="1070.72574653679" calcext:value-type="float">
            <text:p><text:s/>$1,070.73 </text:p>
          </table:table-cell>
          <table:table-cell table:style-name="ce98" table:formula="of:=[.H81]*(1+[.D82])" office:value-type="float" office:value="1746.76952371159" calcext:value-type="float">
            <text:p><text:s/>$1,746.77 </text:p>
          </table:table-cell>
          <table:table-cell table:style-name="ce70" table:formula="of:=[.I81]*(1+[.E82])" office:value-type="float" office:value="5564.24686409077" calcext:value-type="float">
            <text:p><text:s/>$5,564.25 </text:p>
          </table:table-cell>
          <table:table-cell table:style-name="ce41" table:formula="of:=[.B82]-[.C82]" office:value-type="percentage" office:value="0.248598431348798" calcext:value-type="percentage">
            <text:p>24.86 %</text:p>
          </table:table-cell>
          <table:table-cell table:style-name="ce115" table:formula="of:=[.B82]-[.D82]" office:value-type="percentage" office:value="0.152303331153625" calcext:value-type="percentage">
            <text:p>15.23 %</text:p>
          </table:table-cell>
          <table:table-cell table:style-name="ce122" table:formula="of:=[.B82]-[.E82]" office:value-type="percentage" office:value="0.123813559881166" calcext:value-type="percentage">
            <text:p>12.38 %</text:p>
          </table:table-cell>
          <table:table-cell table:style-name="ce122" table:formula="of:=(([.F82]/100)^(1/([.A82]-[.$A$19]+1)))-(([.H82]/100)^(1/([.A82]-[.$A$19]+1)))" office:value-type="percentage" office:value="0.0513850639844049" calcext:value-type="percentage">
            <text:p>5.14 %</text:p>
          </table:table-cell>
          <table:table-cell table:style-name="ce127" office:value-type="percentage" office:value="0.0423496" calcext:value-type="percentage">
            <text:p>4.23 %</text:p>
          </table:table-cell>
          <table:table-cell table:style-name="ce133" table:formula="of:=(1+[.B82])/(1+[.$N82])-1" office:value-type="percentage" office:value="0.249435344292162" calcext:value-type="percentage">
            <text:p>24.94 %</text:p>
          </table:table-cell>
          <table:table-cell table:style-name="ce133" table:formula="of:=(1+[.C82])/(1+[.$N82])-1" office:value-type="percentage" office:value="0.0109372133879073" calcext:value-type="percentage">
            <text:p>1.09 %</text:p>
          </table:table-cell>
          <table:table-cell table:style-name="ce133" table:formula="of:=(1+[.D82])/(1+[.$N82])-1" office:value-type="percentage" office:value="0.103319941980285" calcext:value-type="percentage">
            <text:p>10.33 %</text:p>
          </table:table-cell>
          <table:table-cell table:style-name="ce133" table:formula="of:=(1+[.E82])/(1+[.$N82])-1" office:value-type="percentage" office:value="0.130652202934247" calcext:value-type="percentage">
            <text:p>13.07 %</text:p>
          </table:table-cell>
          <table:table-cell table:number-columns-repeated="16366"/>
        </table:table-row>
        <table:table-row table:style-name="ro10">
          <table:table-cell table:style-name="ce20" office:value-type="float" office:value="1992" calcext:value-type="float">
            <text:p>1992</text:p>
          </table:table-cell>
          <table:table-cell table:style-name="ce41" table:formula="of:=([$'S&amp;P 500 &amp; Raw Data'.B68]-[$'S&amp;P 500 &amp; Raw Data'.B67]+[$'S&amp;P 500 &amp; Raw Data'.C68])/[$'S&amp;P 500 &amp; Raw Data'.B67]" office:value-type="percentage" office:value="0.0749372797238006" calcext:value-type="percentage">
            <text:p>7.49 %</text:p>
          </table:table-cell>
          <table:table-cell table:style-name="ce41" table:formula="of:=[$'T. Bill rates'.C70]" office:value-type="percentage" office:value="0.0343166666666667" calcext:value-type="percentage">
            <text:p>3.43 %</text:p>
          </table:table-cell>
          <table:table-cell table:style-name="ce41" table:formula="of:=[$'S&amp;P 500 &amp; Raw Data'.F68]" office:value-type="percentage" office:value="0.0936163731620794" calcext:value-type="percentage">
            <text:p>9.36 %</text:p>
          </table:table-cell>
          <table:table-cell table:style-name="ce41" table:formula="of:=[$'S&amp;P 500 &amp; Raw Data'.J68]" office:value-type="percentage" office:value="0.121722558698967" calcext:value-type="percentage">
            <text:p>12.17 %</text:p>
          </table:table-cell>
          <table:table-cell table:style-name="ce70" table:formula="of:=[.F82]*(1+[.B83])" office:value-type="float" office:value="40451.5077871379" calcext:value-type="float">
            <text:p><text:s/>$40,451.51 </text:p>
          </table:table-cell>
          <table:table-cell table:style-name="ce70" table:formula="of:=[.G82]*(1+[.C83])" office:value-type="float" office:value="1107.46948507211" calcext:value-type="float">
            <text:p><text:s/>$1,107.47 </text:p>
          </table:table-cell>
          <table:table-cell table:style-name="ce98" table:formula="of:=[.H82]*(1+[.D83])" office:value-type="float" office:value="1910.29575127153" calcext:value-type="float">
            <text:p><text:s/>$1,910.30 </text:p>
          </table:table-cell>
          <table:table-cell table:style-name="ce70" table:formula="of:=[.I82]*(1+[.E83])" office:value-type="float" office:value="6241.5412296206" calcext:value-type="float">
            <text:p><text:s/>$6,241.54 </text:p>
          </table:table-cell>
          <table:table-cell table:style-name="ce41" table:formula="of:=[.B83]-[.C83]" office:value-type="percentage" office:value="0.040620613057134" calcext:value-type="percentage">
            <text:p>4.06 %</text:p>
          </table:table-cell>
          <table:table-cell table:style-name="ce115" table:formula="of:=[.B83]-[.D83]" office:value-type="percentage" office:value="-0.0186790934382788" calcext:value-type="percentage">
            <text:p>-1.87 %</text:p>
          </table:table-cell>
          <table:table-cell table:style-name="ce122" table:formula="of:=[.B83]-[.E83]" office:value-type="percentage" office:value="-0.0467852789751659" calcext:value-type="percentage">
            <text:p>-4.68 %</text:p>
          </table:table-cell>
          <table:table-cell table:style-name="ce122" table:formula="of:=(([.F83]/100)^(1/([.A83]-[.$A$19]+1)))-(([.H83]/100)^(1/([.A83]-[.$A$19]+1)))" office:value-type="percentage" office:value="0.0503198570108696" calcext:value-type="percentage">
            <text:p>5.03 %</text:p>
          </table:table-cell>
          <table:table-cell table:style-name="ce127" office:value-type="percentage" office:value="0.0302882" calcext:value-type="percentage">
            <text:p>3.03 %</text:p>
          </table:table-cell>
          <table:table-cell table:style-name="ce133" table:formula="of:=(1+[.B83])/(1+[.$N83])-1" office:value-type="percentage" office:value="0.0433364952872415" calcext:value-type="percentage">
            <text:p>4.33 %</text:p>
          </table:table-cell>
          <table:table-cell table:style-name="ce133" table:formula="of:=(1+[.C83])/(1+[.$N83])-1" office:value-type="percentage" office:value="0.00391003863449746" calcext:value-type="percentage">
            <text:p>0.39 %</text:p>
          </table:table-cell>
          <table:table-cell table:style-name="ce133" table:formula="of:=(1+[.D83])/(1+[.$N83])-1" office:value-type="percentage" office:value="0.0614664645893055" calcext:value-type="percentage">
            <text:p>6.15 %</text:p>
          </table:table-cell>
          <table:table-cell table:style-name="ce133" table:formula="of:=(1+[.E83])/(1+[.$N83])-1" office:value-type="percentage" office:value="0.0887463902808618" calcext:value-type="percentage">
            <text:p>8.87 %</text:p>
          </table:table-cell>
          <table:table-cell table:number-columns-repeated="16366"/>
        </table:table-row>
        <table:table-row table:style-name="ro10">
          <table:table-cell table:style-name="ce20" office:value-type="float" office:value="1993" calcext:value-type="float">
            <text:p>1993</text:p>
          </table:table-cell>
          <table:table-cell table:style-name="ce41" table:formula="of:=([$'S&amp;P 500 &amp; Raw Data'.B69]-[$'S&amp;P 500 &amp; Raw Data'.B68]+[$'S&amp;P 500 &amp; Raw Data'.C69])/[$'S&amp;P 500 &amp; Raw Data'.B68]" office:value-type="percentage" office:value="0.0996705147919488" calcext:value-type="percentage">
            <text:p>9.97 %</text:p>
          </table:table-cell>
          <table:table-cell table:style-name="ce41" table:formula="of:=[$'T. Bill rates'.C71]" office:value-type="percentage" office:value="0.029975" calcext:value-type="percentage">
            <text:p>3.00 %</text:p>
          </table:table-cell>
          <table:table-cell table:style-name="ce41" table:formula="of:=[$'S&amp;P 500 &amp; Raw Data'.F69]" office:value-type="percentage" office:value="0.142109575892631" calcext:value-type="percentage">
            <text:p>14.21 %</text:p>
          </table:table-cell>
          <table:table-cell table:style-name="ce41" table:formula="of:=[$'S&amp;P 500 &amp; Raw Data'.J69]" office:value-type="percentage" office:value="0.164315172195611" calcext:value-type="percentage">
            <text:p>16.43 %</text:p>
          </table:table-cell>
          <table:table-cell table:style-name="ce70" table:formula="of:=[.F83]*(1+[.B84])" office:value-type="float" office:value="44483.3303923925" calcext:value-type="float">
            <text:p><text:s/>$44,483.33 </text:p>
          </table:table-cell>
          <table:table-cell table:style-name="ce70" table:formula="of:=[.G83]*(1+[.C84])" office:value-type="float" office:value="1140.66588288715" calcext:value-type="float">
            <text:p><text:s/>$1,140.67 </text:p>
          </table:table-cell>
          <table:table-cell table:style-name="ce98" table:formula="of:=[.H83]*(1+[.D84])" office:value-type="float" office:value="2181.76707031422" calcext:value-type="float">
            <text:p><text:s/>$2,181.77 </text:p>
          </table:table-cell>
          <table:table-cell table:style-name="ce70" table:formula="of:=[.I83]*(1+[.E84])" office:value-type="float" office:value="7267.12115153172" calcext:value-type="float">
            <text:p><text:s/>$7,267.12 </text:p>
          </table:table-cell>
          <table:table-cell table:style-name="ce41" table:formula="of:=[.B84]-[.C84]" office:value-type="percentage" office:value="0.0696955147919488" calcext:value-type="percentage">
            <text:p>6.97 %</text:p>
          </table:table-cell>
          <table:table-cell table:style-name="ce115" table:formula="of:=[.B84]-[.D84]" office:value-type="percentage" office:value="-0.0424390611006823" calcext:value-type="percentage">
            <text:p>-4.24 %</text:p>
          </table:table-cell>
          <table:table-cell table:style-name="ce122" table:formula="of:=[.B84]-[.E84]" office:value-type="percentage" office:value="-0.0646446574036622" calcext:value-type="percentage">
            <text:p>-6.46 %</text:p>
          </table:table-cell>
          <table:table-cell table:style-name="ce122" table:formula="of:=(([.F84]/100)^(1/([.A84]-[.$A$19]+1)))-(([.H84]/100)^(1/([.A84]-[.$A$19]+1)))" office:value-type="percentage" office:value="0.0489759379317585" calcext:value-type="percentage">
            <text:p>4.90 %</text:p>
          </table:table-cell>
          <table:table-cell table:style-name="ce127" office:value-type="percentage" office:value="0.0295166" calcext:value-type="percentage">
            <text:p>2.95 %</text:p>
          </table:table-cell>
          <table:table-cell table:style-name="ce133" table:formula="of:=(1+[.B84])/(1+[.$N84])-1" office:value-type="percentage" office:value="0.0681425775863631" calcext:value-type="percentage">
            <text:p>6.81 %</text:p>
          </table:table-cell>
          <table:table-cell table:style-name="ce133" table:formula="of:=(1+[.C84])/(1+[.$N84])-1" office:value-type="percentage" office:value="0.00044525751211788" calcext:value-type="percentage">
            <text:p>0.04 %</text:p>
          </table:table-cell>
          <table:table-cell table:style-name="ce133" table:formula="of:=(1+[.D84])/(1+[.$N84])-1" office:value-type="percentage" office:value="0.109364896003261" calcext:value-type="percentage">
            <text:p>10.94 %</text:p>
          </table:table-cell>
          <table:table-cell table:style-name="ce133" table:formula="of:=(1+[.E84])/(1+[.$N84])-1" office:value-type="percentage" office:value="0.130933850115298" calcext:value-type="percentage">
            <text:p>13.09 %</text:p>
          </table:table-cell>
          <table:table-cell table:number-columns-repeated="16366"/>
        </table:table-row>
        <table:table-row table:style-name="ro10">
          <table:table-cell table:style-name="ce20" office:value-type="float" office:value="1994" calcext:value-type="float">
            <text:p>1994</text:p>
          </table:table-cell>
          <table:table-cell table:style-name="ce41" table:formula="of:=([$'S&amp;P 500 &amp; Raw Data'.B70]-[$'S&amp;P 500 &amp; Raw Data'.B69]+[$'S&amp;P 500 &amp; Raw Data'.C70])/[$'S&amp;P 500 &amp; Raw Data'.B69]" office:value-type="percentage" office:value="0.0132592067745739" calcext:value-type="percentage">
            <text:p>1.33 %</text:p>
          </table:table-cell>
          <table:table-cell table:style-name="ce41" table:formula="of:=[$'T. Bill rates'.C72]" office:value-type="percentage" office:value="0.0424666666666667" calcext:value-type="percentage">
            <text:p>4.25 %</text:p>
          </table:table-cell>
          <table:table-cell table:style-name="ce41" table:formula="of:=[$'S&amp;P 500 &amp; Raw Data'.F70]" office:value-type="percentage" office:value="-0.0803665555099859" calcext:value-type="percentage">
            <text:p>-8.04 %</text:p>
          </table:table-cell>
          <table:table-cell table:style-name="ce41" table:formula="of:=[$'S&amp;P 500 &amp; Raw Data'.J70]" office:value-type="percentage" office:value="-0.0131920334757107" calcext:value-type="percentage">
            <text:p>-1.32 %</text:p>
          </table:table-cell>
          <table:table-cell table:style-name="ce70" table:formula="of:=[.F84]*(1+[.B85])" office:value-type="float" office:value="45073.1440680869" calcext:value-type="float">
            <text:p><text:s/>$45,073.14 </text:p>
          </table:table-cell>
          <table:table-cell table:style-name="ce70" table:formula="of:=[.G84]*(1+[.C85])" office:value-type="float" office:value="1189.10616071376" calcext:value-type="float">
            <text:p><text:s/>$1,189.11 </text:p>
          </table:table-cell>
          <table:table-cell table:style-name="ce98" table:formula="of:=[.H84]*(1+[.D85])" office:value-type="float" office:value="2006.42596594795" calcext:value-type="float">
            <text:p><text:s/>$2,006.43 </text:p>
          </table:table-cell>
          <table:table-cell table:style-name="ce70" table:formula="of:=[.I84]*(1+[.E85])" office:value-type="float" office:value="7171.25304602867" calcext:value-type="float">
            <text:p><text:s/>$7,171.25 </text:p>
          </table:table-cell>
          <table:table-cell table:style-name="ce41" table:formula="of:=[.B85]-[.C85]" office:value-type="percentage" office:value="-0.0292074598920928" calcext:value-type="percentage">
            <text:p>-2.92 %</text:p>
          </table:table-cell>
          <table:table-cell table:style-name="ce115" table:formula="of:=[.B85]-[.D85]" office:value-type="percentage" office:value="0.0936257622845598" calcext:value-type="percentage">
            <text:p>9.36 %</text:p>
          </table:table-cell>
          <table:table-cell table:style-name="ce122" table:formula="of:=[.B85]-[.E85]" office:value-type="percentage" office:value="0.0264512402502846" calcext:value-type="percentage">
            <text:p>2.65 %</text:p>
          </table:table-cell>
          <table:table-cell table:style-name="ce122" table:formula="of:=(([.F85]/100)^(1/([.A85]-[.$A$19]+1)))-(([.H85]/100)^(1/([.A85]-[.$A$19]+1)))" office:value-type="percentage" office:value="0.0497186361717199" calcext:value-type="percentage">
            <text:p>4.97 %</text:p>
          </table:table-cell>
          <table:table-cell table:style-name="ce127" office:value-type="percentage" office:value="0.0260744" calcext:value-type="percentage">
            <text:p>2.61 %</text:p>
          </table:table-cell>
          <table:table-cell table:style-name="ce133" table:formula="of:=(1+[.B85])/(1+[.$N85])-1" office:value-type="percentage" office:value="-0.0124895360662211" calcext:value-type="percentage">
            <text:p>-1.25 %</text:p>
          </table:table-cell>
          <table:table-cell table:style-name="ce133" table:formula="of:=(1+[.C85])/(1+[.$N85])-1" office:value-type="percentage" office:value="0.0159757096236557" calcext:value-type="percentage">
            <text:p>1.60 %</text:p>
          </table:table-cell>
          <table:table-cell table:style-name="ce133" table:formula="of:=(1+[.D85])/(1+[.$N85])-1" office:value-type="percentage" office:value="-0.103736098970977" calcext:value-type="percentage">
            <text:p>-10.37 %</text:p>
          </table:table-cell>
          <table:table-cell table:style-name="ce133" table:formula="of:=(1+[.E85])/(1+[.$N85])-1" office:value-type="percentage" office:value="-0.0382686026234654" calcext:value-type="percentage">
            <text:p>-3.83 %</text:p>
          </table:table-cell>
          <table:table-cell table:number-columns-repeated="16366"/>
        </table:table-row>
        <table:table-row table:style-name="ro10">
          <table:table-cell table:style-name="ce20" office:value-type="float" office:value="1995" calcext:value-type="float">
            <text:p>1995</text:p>
          </table:table-cell>
          <table:table-cell table:style-name="ce41" table:formula="of:=([$'S&amp;P 500 &amp; Raw Data'.B71]-[$'S&amp;P 500 &amp; Raw Data'.B70]+[$'S&amp;P 500 &amp; Raw Data'.C71])/[$'S&amp;P 500 &amp; Raw Data'.B70]" office:value-type="percentage" office:value="0.371951989026063" calcext:value-type="percentage">
            <text:p>37.20 %</text:p>
          </table:table-cell>
          <table:table-cell table:style-name="ce41" table:formula="of:=[$'T. Bill rates'.C73]" office:value-type="percentage" office:value="0.0549" calcext:value-type="percentage">
            <text:p>5.49 %</text:p>
          </table:table-cell>
          <table:table-cell table:style-name="ce41" table:formula="of:=[$'S&amp;P 500 &amp; Raw Data'.F71]" office:value-type="percentage" office:value="0.234807801125389" calcext:value-type="percentage">
            <text:p>23.48 %</text:p>
          </table:table-cell>
          <table:table-cell table:style-name="ce41" table:formula="of:=[$'S&amp;P 500 &amp; Raw Data'.J71]" office:value-type="percentage" office:value="0.201562181706402" calcext:value-type="percentage">
            <text:p>20.16 %</text:p>
          </table:table-cell>
          <table:table-cell table:style-name="ce70" table:formula="of:=[.F85]*(1+[.B86])" office:value-type="float" office:value="61838.1896558701" calcext:value-type="float">
            <text:p><text:s/>$61,838.19 </text:p>
          </table:table-cell>
          <table:table-cell table:style-name="ce70" table:formula="of:=[.G85]*(1+[.C86])" office:value-type="float" office:value="1254.38808893694" calcext:value-type="float">
            <text:p><text:s/>$1,254.39 </text:p>
          </table:table-cell>
          <table:table-cell table:style-name="ce98" table:formula="of:=[.H85]*(1+[.D86])" office:value-type="float" office:value="2477.55043513307" calcext:value-type="float">
            <text:p><text:s/>$2,477.55 </text:p>
          </table:table-cell>
          <table:table-cell table:style-name="ce70" table:formula="of:=[.I85]*(1+[.E86])" office:value-type="float" office:value="8616.70645555489" calcext:value-type="float">
            <text:p><text:s/>$8,616.71 </text:p>
          </table:table-cell>
          <table:table-cell table:style-name="ce41" table:formula="of:=[.B86]-[.C86]" office:value-type="percentage" office:value="0.317051989026063" calcext:value-type="percentage">
            <text:p>31.71 %</text:p>
          </table:table-cell>
          <table:table-cell table:style-name="ce115" table:formula="of:=[.B86]-[.D86]" office:value-type="percentage" office:value="0.137144187900674" calcext:value-type="percentage">
            <text:p>13.71 %</text:p>
          </table:table-cell>
          <table:table-cell table:style-name="ce122" table:formula="of:=[.B86]-[.E86]" office:value-type="percentage" office:value="0.170389807319661" calcext:value-type="percentage">
            <text:p>17.04 %</text:p>
          </table:table-cell>
          <table:table-cell table:style-name="ce122" table:formula="of:=(([.F86]/100)^(1/([.A86]-[.$A$19]+1)))-(([.H86]/100)^(1/([.A86]-[.$A$19]+1)))" office:value-type="percentage" office:value="0.0507914511194136" calcext:value-type="percentage">
            <text:p>5.08 %</text:p>
          </table:table-cell>
          <table:table-cell table:style-name="ce127" office:value-type="percentage" office:value="0.0280542" calcext:value-type="percentage">
            <text:p>2.81 %</text:p>
          </table:table-cell>
          <table:table-cell table:style-name="ce133" table:formula="of:=(1+[.B86])/(1+[.$N86])-1" office:value-type="percentage" office:value="0.334513286387102" calcext:value-type="percentage">
            <text:p>33.45 %</text:p>
          </table:table-cell>
          <table:table-cell table:style-name="ce133" table:formula="of:=(1+[.C86])/(1+[.$N86])-1" office:value-type="percentage" office:value="0.0261132146534686" calcext:value-type="percentage">
            <text:p>2.61 %</text:p>
          </table:table-cell>
          <table:table-cell table:style-name="ce133" table:formula="of:=(1+[.D86])/(1+[.$N86])-1" office:value-type="percentage" office:value="0.201111576729504" calcext:value-type="percentage">
            <text:p>20.11 %</text:p>
          </table:table-cell>
          <table:table-cell table:style-name="ce133" table:formula="of:=(1+[.E86])/(1+[.$N86])-1" office:value-type="percentage" office:value="0.168773185019236" calcext:value-type="percentage">
            <text:p>16.88 %</text:p>
          </table:table-cell>
          <table:table-cell table:number-columns-repeated="16366"/>
        </table:table-row>
        <table:table-row table:style-name="ro10">
          <table:table-cell table:style-name="ce20" office:value-type="float" office:value="1996" calcext:value-type="float">
            <text:p>1996</text:p>
          </table:table-cell>
          <table:table-cell table:style-name="ce41" table:formula="of:=([$'S&amp;P 500 &amp; Raw Data'.B72]-[$'S&amp;P 500 &amp; Raw Data'.B71]+[$'S&amp;P 500 &amp; Raw Data'.C72])/[$'S&amp;P 500 &amp; Raw Data'.B71]" office:value-type="percentage" office:value="0.226809660188658" calcext:value-type="percentage">
            <text:p>22.68 %</text:p>
          </table:table-cell>
          <table:table-cell table:style-name="ce41" table:formula="of:=[$'T. Bill rates'.C74]" office:value-type="percentage" office:value="0.0500583333333333" calcext:value-type="percentage">
            <text:p>5.01 %</text:p>
          </table:table-cell>
          <table:table-cell table:style-name="ce41" table:formula="of:=[$'S&amp;P 500 &amp; Raw Data'.F72]" office:value-type="percentage" office:value="0.0142860779340184" calcext:value-type="percentage">
            <text:p>1.43 %</text:p>
          </table:table-cell>
          <table:table-cell table:style-name="ce41" table:formula="of:=[$'S&amp;P 500 &amp; Raw Data'.J72]" office:value-type="percentage" office:value="0.0479259941944115" calcext:value-type="percentage">
            <text:p>4.79 %</text:p>
          </table:table-cell>
          <table:table-cell table:style-name="ce70" table:formula="of:=[.F86]*(1+[.B87])" office:value-type="float" office:value="75863.6884383998" calcext:value-type="float">
            <text:p><text:s/>$75,863.69 </text:p>
          </table:table-cell>
          <table:table-cell table:style-name="ce70" table:formula="of:=[.G86]*(1+[.C87])" office:value-type="float" office:value="1317.18066602231" calcext:value-type="float">
            <text:p><text:s/>$1,317.18 </text:p>
          </table:table-cell>
          <table:table-cell table:style-name="ce98" table:formula="of:=[.H86]*(1+[.D87])" office:value-type="float" office:value="2512.94491373485" calcext:value-type="float">
            <text:p><text:s/>$2,512.94 </text:p>
          </table:table-cell>
          <table:table-cell table:style-name="ce70" table:formula="of:=[.I86]*(1+[.E87])" office:value-type="float" office:value="9029.67067911876" calcext:value-type="float">
            <text:p><text:s/>$9,029.67 </text:p>
          </table:table-cell>
          <table:table-cell table:style-name="ce41" table:formula="of:=[.B87]-[.C87]" office:value-type="percentage" office:value="0.176751326855325" calcext:value-type="percentage">
            <text:p>17.68 %</text:p>
          </table:table-cell>
          <table:table-cell table:style-name="ce115" table:formula="of:=[.B87]-[.D87]" office:value-type="percentage" office:value="0.212523582254639" calcext:value-type="percentage">
            <text:p>21.25 %</text:p>
          </table:table-cell>
          <table:table-cell table:style-name="ce122" table:formula="of:=[.B87]-[.E87]" office:value-type="percentage" office:value="0.178883665994246" calcext:value-type="percentage">
            <text:p>17.89 %</text:p>
          </table:table-cell>
          <table:table-cell table:style-name="ce122" table:formula="of:=(([.F87]/100)^(1/([.A87]-[.$A$19]+1)))-(([.H87]/100)^(1/([.A87]-[.$A$19]+1)))" office:value-type="percentage" office:value="0.053045039677375" calcext:value-type="percentage">
            <text:p>5.30 %</text:p>
          </table:table-cell>
          <table:table-cell table:style-name="ce127" office:value-type="percentage" office:value="0.029312" calcext:value-type="percentage">
            <text:p>2.93 %</text:p>
          </table:table-cell>
          <table:table-cell table:style-name="ce133" table:formula="of:=(1+[.B87])/(1+[.$N87])-1" office:value-type="percentage" office:value="0.191873465177378" calcext:value-type="percentage">
            <text:p>19.19 %</text:p>
          </table:table-cell>
          <table:table-cell table:style-name="ce133" table:formula="of:=(1+[.C87])/(1+[.$N87])-1" office:value-type="percentage" office:value="0.020155534311592" calcext:value-type="percentage">
            <text:p>2.02 %</text:p>
          </table:table-cell>
          <table:table-cell table:style-name="ce133" table:formula="of:=(1+[.D87])/(1+[.$N87])-1" office:value-type="percentage" office:value="-0.0145980247640964" calcext:value-type="percentage">
            <text:p>-1.46 %</text:p>
          </table:table-cell>
          <table:table-cell table:style-name="ce133" table:formula="of:=(1+[.E87])/(1+[.$N87])-1" office:value-type="percentage" office:value="0.0180839183788895" calcext:value-type="percentage">
            <text:p>1.81 %</text:p>
          </table:table-cell>
          <table:table-cell table:number-columns-repeated="16366"/>
        </table:table-row>
        <table:table-row table:style-name="ro10">
          <table:table-cell table:style-name="ce20" office:value-type="float" office:value="1997" calcext:value-type="float">
            <text:p>1997</text:p>
          </table:table-cell>
          <table:table-cell table:style-name="ce41" table:formula="of:=([$'S&amp;P 500 &amp; Raw Data'.B73]-[$'S&amp;P 500 &amp; Raw Data'.B72]+[$'S&amp;P 500 &amp; Raw Data'.C73])/[$'S&amp;P 500 &amp; Raw Data'.B72]" office:value-type="percentage" office:value="0.331036531036531" calcext:value-type="percentage">
            <text:p>33.10 %</text:p>
          </table:table-cell>
          <table:table-cell table:style-name="ce41" table:formula="of:=[$'T. Bill rates'.C75]" office:value-type="percentage" office:value="0.0506083333333333" calcext:value-type="percentage">
            <text:p>5.06 %</text:p>
          </table:table-cell>
          <table:table-cell table:style-name="ce41" table:formula="of:=[$'S&amp;P 500 &amp; Raw Data'.F73]" office:value-type="percentage" office:value="0.0993913027297753" calcext:value-type="percentage">
            <text:p>9.94 %</text:p>
          </table:table-cell>
          <table:table-cell table:style-name="ce41" table:formula="of:=[$'S&amp;P 500 &amp; Raw Data'.J73]" office:value-type="percentage" office:value="0.118348872444264" calcext:value-type="percentage">
            <text:p>11.83 %</text:p>
          </table:table-cell>
          <table:table-cell table:style-name="ce70" table:formula="of:=[.F87]*(1+[.B88])" office:value-type="float" office:value="100977.340690684" calcext:value-type="float">
            <text:p><text:s/>$100,977.34 </text:p>
          </table:table-cell>
          <table:table-cell table:style-name="ce70" table:formula="of:=[.G87]*(1+[.C88])" office:value-type="float" office:value="1383.84098422859" calcext:value-type="float">
            <text:p><text:s/>$1,383.84 </text:p>
          </table:table-cell>
          <table:table-cell table:style-name="ce98" table:formula="of:=[.H87]*(1+[.D88])" office:value-type="float" office:value="2762.70978239912" calcext:value-type="float">
            <text:p><text:s/>$2,762.71 </text:p>
          </table:table-cell>
          <table:table-cell table:style-name="ce70" table:formula="of:=[.I87]*(1+[.E88])" office:value-type="float" office:value="10098.3220225355" calcext:value-type="float">
            <text:p><text:s/>$10,098.32 </text:p>
          </table:table-cell>
          <table:table-cell table:style-name="ce41" table:formula="of:=[.B88]-[.C88]" office:value-type="percentage" office:value="0.280428197703198" calcext:value-type="percentage">
            <text:p>28.04 %</text:p>
          </table:table-cell>
          <table:table-cell table:style-name="ce115" table:formula="of:=[.B88]-[.D88]" office:value-type="percentage" office:value="0.231645228306756" calcext:value-type="percentage">
            <text:p>23.16 %</text:p>
          </table:table-cell>
          <table:table-cell table:style-name="ce122" table:formula="of:=[.B88]-[.E88]" office:value-type="percentage" office:value="0.212687658592267" calcext:value-type="percentage">
            <text:p>21.27 %</text:p>
          </table:table-cell>
          <table:table-cell table:style-name="ce122" table:formula="of:=(([.F88]/100)^(1/([.A88]-[.$A$19]+1)))-(([.H88]/100)^(1/([.A88]-[.$A$19]+1)))" office:value-type="percentage" office:value="0.0553155849033036" calcext:value-type="percentage">
            <text:p>5.53 %</text:p>
          </table:table-cell>
          <table:table-cell table:style-name="ce127" office:value-type="percentage" office:value="0.0233769" calcext:value-type="percentage">
            <text:p>2.34 %</text:p>
          </table:table-cell>
          <table:table-cell table:style-name="ce133" table:formula="of:=(1+[.B88])/(1+[.$N88])-1" office:value-type="percentage" office:value="0.300631791705022" calcext:value-type="percentage">
            <text:p>30.06 %</text:p>
          </table:table-cell>
          <table:table-cell table:style-name="ce133" table:formula="of:=(1+[.C88])/(1+[.$N88])-1" office:value-type="percentage" office:value="0.0266093883234353" calcext:value-type="percentage">
            <text:p>2.66 %</text:p>
          </table:table-cell>
          <table:table-cell table:style-name="ce133" table:formula="of:=(1+[.D88])/(1+[.$N88])-1" office:value-type="percentage" office:value="0.0742780130465865" calcext:value-type="percentage">
            <text:p>7.43 %</text:p>
          </table:table-cell>
          <table:table-cell table:style-name="ce133" table:formula="of:=(1+[.E88])/(1+[.$N88])-1" office:value-type="percentage" office:value="0.0928025368212471" calcext:value-type="percentage">
            <text:p>9.28 %</text:p>
          </table:table-cell>
          <table:table-cell table:number-columns-repeated="16366"/>
        </table:table-row>
        <table:table-row table:style-name="ro10">
          <table:table-cell table:style-name="ce20" office:value-type="float" office:value="1998" calcext:value-type="float">
            <text:p>1998</text:p>
          </table:table-cell>
          <table:table-cell table:style-name="ce41" table:formula="of:=([$'S&amp;P 500 &amp; Raw Data'.B74]-[$'S&amp;P 500 &amp; Raw Data'.B73]+[$'S&amp;P 500 &amp; Raw Data'.C74])/[$'S&amp;P 500 &amp; Raw Data'.B73]" office:value-type="percentage" office:value="0.283379532784436" calcext:value-type="percentage">
            <text:p>28.34 %</text:p>
          </table:table-cell>
          <table:table-cell table:style-name="ce41" table:formula="of:=[$'T. Bill rates'.C76]" office:value-type="percentage" office:value="0.0477666666666667" calcext:value-type="percentage">
            <text:p>4.78 %</text:p>
          </table:table-cell>
          <table:table-cell table:style-name="ce41" table:formula="of:=[$'S&amp;P 500 &amp; Raw Data'.F74]" office:value-type="percentage" office:value="0.149214319226062" calcext:value-type="percentage">
            <text:p>14.92 %</text:p>
          </table:table-cell>
          <table:table-cell table:style-name="ce41" table:formula="of:=[$'S&amp;P 500 &amp; Raw Data'.J74]" office:value-type="percentage" office:value="0.0794545613270708" calcext:value-type="percentage">
            <text:p>7.95 %</text:p>
          </table:table-cell>
          <table:table-cell table:style-name="ce70" table:formula="of:=[.F88]*(1+[.B89])" office:value-type="float" office:value="129592.252317425" calcext:value-type="float">
            <text:p><text:s/>$129,592.25 </text:p>
          </table:table-cell>
          <table:table-cell table:style-name="ce70" table:formula="of:=[.G88]*(1+[.C89])" office:value-type="float" office:value="1449.94245524191" calcext:value-type="float">
            <text:p><text:s/>$1,449.94 </text:p>
          </table:table-cell>
          <table:table-cell table:style-name="ce98" table:formula="of:=[.H88]*(1+[.D89])" office:value-type="float" office:value="3174.94564179898" calcext:value-type="float">
            <text:p><text:s/>$3,174.95 </text:p>
          </table:table-cell>
          <table:table-cell table:style-name="ce70" table:formula="of:=[.I88]*(1+[.E89])" office:value-type="float" office:value="10900.6797689755" calcext:value-type="float">
            <text:p><text:s/>$10,900.68 </text:p>
          </table:table-cell>
          <table:table-cell table:style-name="ce41" table:formula="of:=[.B89]-[.C89]" office:value-type="percentage" office:value="0.235612866117769" calcext:value-type="percentage">
            <text:p>23.56 %</text:p>
          </table:table-cell>
          <table:table-cell table:style-name="ce115" table:formula="of:=[.B89]-[.D89]" office:value-type="percentage" office:value="0.134165213558374" calcext:value-type="percentage">
            <text:p>13.42 %</text:p>
          </table:table-cell>
          <table:table-cell table:style-name="ce122" table:formula="of:=[.B89]-[.E89]" office:value-type="percentage" office:value="0.203924971457365" calcext:value-type="percentage">
            <text:p>20.39 %</text:p>
          </table:table-cell>
          <table:table-cell table:style-name="ce122" table:formula="of:=(([.F89]/100)^(1/([.A89]-[.$A$19]+1)))-(([.H89]/100)^(1/([.A89]-[.$A$19]+1)))" office:value-type="percentage" office:value="0.0563060481355486" calcext:value-type="percentage">
            <text:p>5.63 %</text:p>
          </table:table-cell>
          <table:table-cell table:style-name="ce127" office:value-type="percentage" office:value="0.0155228" calcext:value-type="percentage">
            <text:p>1.55 %</text:p>
          </table:table-cell>
          <table:table-cell table:style-name="ce133" table:formula="of:=(1+[.B89])/(1+[.$N89])-1" office:value-type="percentage" office:value="0.263762401774176" calcext:value-type="percentage">
            <text:p>26.38 %</text:p>
          </table:table-cell>
          <table:table-cell table:style-name="ce133" table:formula="of:=(1+[.C89])/(1+[.$N89])-1" office:value-type="percentage" office:value="0.031751002209568" calcext:value-type="percentage">
            <text:p>3.18 %</text:p>
          </table:table-cell>
          <table:table-cell table:style-name="ce133" table:formula="of:=(1+[.D89])/(1+[.$N89])-1" office:value-type="percentage" office:value="0.13164797405441" calcext:value-type="percentage">
            <text:p>13.16 %</text:p>
          </table:table-cell>
          <table:table-cell table:style-name="ce133" table:formula="of:=(1+[.E89])/(1+[.$N89])-1" office:value-type="percentage" office:value="0.0629545307373411" calcext:value-type="percentage">
            <text:p>6.30 %</text:p>
          </table:table-cell>
          <table:table-cell table:number-columns-repeated="16366"/>
        </table:table-row>
        <table:table-row table:style-name="ro10">
          <table:table-cell table:style-name="ce20" office:value-type="float" office:value="1999" calcext:value-type="float">
            <text:p>1999</text:p>
          </table:table-cell>
          <table:table-cell table:style-name="ce41" table:formula="of:=([$'S&amp;P 500 &amp; Raw Data'.B75]-[$'S&amp;P 500 &amp; Raw Data'.B74]+[$'S&amp;P 500 &amp; Raw Data'.C75])/[$'S&amp;P 500 &amp; Raw Data'.B74]" office:value-type="percentage" office:value="0.208853509920845" calcext:value-type="percentage">
            <text:p>20.89 %</text:p>
          </table:table-cell>
          <table:table-cell table:style-name="ce41" table:formula="of:=[$'T. Bill rates'.C77]" office:value-type="percentage" office:value="0.0463833333333333" calcext:value-type="percentage">
            <text:p>4.64 %</text:p>
          </table:table-cell>
          <table:table-cell table:style-name="ce41" table:formula="of:=[$'S&amp;P 500 &amp; Raw Data'.F75]" office:value-type="percentage" office:value="-0.0825421479626858" calcext:value-type="percentage">
            <text:p>-8.25 %</text:p>
          </table:table-cell>
          <table:table-cell table:style-name="ce41" table:formula="of:=[$'S&amp;P 500 &amp; Raw Data'.J75]" office:value-type="percentage" office:value="0.00843163475482187" calcext:value-type="percentage">
            <text:p>0.84 %</text:p>
          </table:table-cell>
          <table:table-cell table:style-name="ce70" table:formula="of:=[.F89]*(1+[.B90])" office:value-type="float" office:value="156658.049072467" calcext:value-type="float">
            <text:p><text:s/>$156,658.05 </text:p>
          </table:table-cell>
          <table:table-cell table:style-name="ce70" table:formula="of:=[.G89]*(1+[.C90])" office:value-type="float" office:value="1517.19561945754" calcext:value-type="float">
            <text:p><text:s/>$1,517.20 </text:p>
          </table:table-cell>
          <table:table-cell table:style-name="ce98" table:formula="of:=[.H89]*(1+[.D90])" office:value-type="float" office:value="2912.87880886013" calcext:value-type="float">
            <text:p><text:s/>$2,912.88 </text:p>
          </table:table-cell>
          <table:table-cell table:style-name="ce70" table:formula="of:=[.I89]*(1+[.E90])" office:value-type="float" office:value="10992.5903193668" calcext:value-type="float">
            <text:p><text:s/>$10,992.59 </text:p>
          </table:table-cell>
          <table:table-cell table:style-name="ce41" table:formula="of:=[.B90]-[.C90]" office:value-type="percentage" office:value="0.162470176587511" calcext:value-type="percentage">
            <text:p>16.25 %</text:p>
          </table:table-cell>
          <table:table-cell table:style-name="ce115" table:formula="of:=[.B90]-[.D90]" office:value-type="percentage" office:value="0.291395657883531" calcext:value-type="percentage">
            <text:p>29.14 %</text:p>
          </table:table-cell>
          <table:table-cell table:style-name="ce122" table:formula="of:=[.B90]-[.E90]" office:value-type="percentage" office:value="0.200421875166023" calcext:value-type="percentage">
            <text:p>20.04 %</text:p>
          </table:table-cell>
          <table:table-cell table:style-name="ce122" table:formula="of:=(([.F90]/100)^(1/([.A90]-[.$A$19]+1)))-(([.H90]/100)^(1/([.A90]-[.$A$19]+1)))" office:value-type="percentage" office:value="0.0596346948183202" calcext:value-type="percentage">
            <text:p>5.96 %</text:p>
          </table:table-cell>
          <table:table-cell table:style-name="ce127" office:value-type="percentage" office:value="0.0218803" calcext:value-type="percentage">
            <text:p>2.19 %</text:p>
          </table:table-cell>
          <table:table-cell table:style-name="ce133" table:formula="of:=(1+[.B90])/(1+[.$N90])-1" office:value-type="percentage" office:value="0.182969776323944" calcext:value-type="percentage">
            <text:p>18.30 %</text:p>
          </table:table-cell>
          <table:table-cell table:style-name="ce133" table:formula="of:=(1+[.C90])/(1+[.$N90])-1" office:value-type="percentage" office:value="0.0239783792028609" calcext:value-type="percentage">
            <text:p>2.40 %</text:p>
          </table:table-cell>
          <table:table-cell table:style-name="ce133" table:formula="of:=(1+[.D90])/(1+[.$N90])-1" office:value-type="percentage" office:value="-0.102186575044735" calcext:value-type="percentage">
            <text:p>-10.22 %</text:p>
          </table:table-cell>
          <table:table-cell table:style-name="ce133" table:formula="of:=(1+[.E90])/(1+[.$N90])-1" office:value-type="percentage" office:value="-0.0131607050700343" calcext:value-type="percentage">
            <text:p>-1.32 %</text:p>
          </table:table-cell>
          <table:table-cell table:number-columns-repeated="16366"/>
        </table:table-row>
        <table:table-row table:style-name="ro10">
          <table:table-cell table:style-name="ce20" office:value-type="float" office:value="2000" calcext:value-type="float">
            <text:p>2000</text:p>
          </table:table-cell>
          <table:table-cell table:style-name="ce41" table:formula="of:=([$'S&amp;P 500 &amp; Raw Data'.B76]-[$'S&amp;P 500 &amp; Raw Data'.B75]+[$'S&amp;P 500 &amp; Raw Data'.C76])/[$'S&amp;P 500 &amp; Raw Data'.B75]" office:value-type="percentage" office:value="-0.0903181895524928" calcext:value-type="percentage">
            <text:p>-9.03 %</text:p>
          </table:table-cell>
          <table:table-cell table:style-name="ce41" table:formula="of:=[$'T. Bill rates'.C78]" office:value-type="percentage" office:value="0.0581666666666667" calcext:value-type="percentage">
            <text:p>5.82 %</text:p>
          </table:table-cell>
          <table:table-cell table:style-name="ce41" table:formula="of:=[$'S&amp;P 500 &amp; Raw Data'.F76]" office:value-type="percentage" office:value="0.166552671253975" calcext:value-type="percentage">
            <text:p>16.66 %</text:p>
          </table:table-cell>
          <table:table-cell table:style-name="ce41" table:formula="of:=[$'S&amp;P 500 &amp; Raw Data'.J76]" office:value-type="percentage" office:value="0.093296855210372" calcext:value-type="percentage">
            <text:p>9.33 %</text:p>
          </table:table-cell>
          <table:table-cell table:style-name="ce70" table:formula="of:=[.F90]*(1+[.B91])" office:value-type="float" office:value="142508.977701416" calcext:value-type="float">
            <text:p><text:s/>$142,508.98 </text:p>
          </table:table-cell>
          <table:table-cell table:style-name="ce70" table:formula="of:=[.G90]*(1+[.C91])" office:value-type="float" office:value="1605.44583132266" calcext:value-type="float">
            <text:p><text:s/>$1,605.45 </text:p>
          </table:table-cell>
          <table:table-cell table:style-name="ce98" table:formula="of:=[.H90]*(1+[.D91])" office:value-type="float" office:value="3398.02655551488" calcext:value-type="float">
            <text:p><text:s/>$3,398.03 </text:p>
          </table:table-cell>
          <table:table-cell table:style-name="ce70" table:formula="of:=[.I90]*(1+[.E91])" office:value-type="float" office:value="12018.1644267797" calcext:value-type="float">
            <text:p><text:s/>$12,018.16 </text:p>
          </table:table-cell>
          <table:table-cell table:style-name="ce41" table:formula="of:=[.B91]-[.C91]" office:value-type="percentage" office:value="-0.148484856219159" calcext:value-type="percentage">
            <text:p>-14.85 %</text:p>
          </table:table-cell>
          <table:table-cell table:style-name="ce115" table:formula="of:=[.B91]-[.D91]" office:value-type="percentage" office:value="-0.256870860806468" calcext:value-type="percentage">
            <text:p>-25.69 %</text:p>
          </table:table-cell>
          <table:table-cell table:style-name="ce122" table:formula="of:=[.B91]-[.E91]" office:value-type="percentage" office:value="-0.183615044762865" calcext:value-type="percentage">
            <text:p>-18.36 %</text:p>
          </table:table-cell>
          <table:table-cell table:style-name="ce122" table:formula="of:=(([.F91]/100)^(1/([.A91]-[.$A$19]+1)))-(([.H91]/100)^(1/([.A91]-[.$A$19]+1)))" office:value-type="percentage" office:value="0.0551118958429231" calcext:value-type="percentage">
            <text:p>5.51 %</text:p>
          </table:table-cell>
          <table:table-cell table:style-name="ce127" office:value-type="percentage" office:value="0.0337686" calcext:value-type="percentage">
            <text:p>3.38 %</text:p>
          </table:table-cell>
          <table:table-cell table:style-name="ce133" table:formula="of:=(1+[.B91])/(1+[.$N91])-1" office:value-type="percentage" office:value="-0.120033428711699" calcext:value-type="percentage">
            <text:p>-12.00 %</text:p>
          </table:table-cell>
          <table:table-cell table:style-name="ce133" table:formula="of:=(1+[.C91])/(1+[.$N91])-1" office:value-type="percentage" office:value="0.0236010908695299" calcext:value-type="percentage">
            <text:p>2.36 %</text:p>
          </table:table-cell>
          <table:table-cell table:style-name="ce133" table:formula="of:=(1+[.D91])/(1+[.$N91])-1" office:value-type="percentage" office:value="0.12844660909025" calcext:value-type="percentage">
            <text:p>12.84 %</text:p>
          </table:table-cell>
          <table:table-cell table:style-name="ce133" table:formula="of:=(1+[.E91])/(1+[.$N91])-1" office:value-type="percentage" office:value="0.0575837331588251" calcext:value-type="percentage">
            <text:p>5.76 %</text:p>
          </table:table-cell>
          <table:table-cell table:number-columns-repeated="16366"/>
        </table:table-row>
        <table:table-row table:style-name="ro10">
          <table:table-cell table:style-name="ce20" office:value-type="float" office:value="2001" calcext:value-type="float">
            <text:p>2001</text:p>
          </table:table-cell>
          <table:table-cell table:style-name="ce41" table:formula="of:=([$'S&amp;P 500 &amp; Raw Data'.B77]-[$'S&amp;P 500 &amp; Raw Data'.B76]+[$'S&amp;P 500 &amp; Raw Data'.C77])/[$'S&amp;P 500 &amp; Raw Data'.B76]" office:value-type="percentage" office:value="-0.118497591420002" calcext:value-type="percentage">
            <text:p>-11.85 %</text:p>
          </table:table-cell>
          <table:table-cell table:style-name="ce41" table:formula="of:=[$'T. Bill rates'.C79]" office:value-type="percentage" office:value="0.0338833333333333" calcext:value-type="percentage">
            <text:p>3.39 %</text:p>
          </table:table-cell>
          <table:table-cell table:style-name="ce41" table:formula="of:=[$'S&amp;P 500 &amp; Raw Data'.F77]" office:value-type="percentage" office:value="0.0557218118924926" calcext:value-type="percentage">
            <text:p>5.57 %</text:p>
          </table:table-cell>
          <table:table-cell table:style-name="ce41" table:formula="of:=[$'S&amp;P 500 &amp; Raw Data'.J77]" office:value-type="percentage" office:value="0.0781915075428782" calcext:value-type="percentage">
            <text:p>7.82 %</text:p>
          </table:table-cell>
          <table:table-cell table:style-name="ce70" table:formula="of:=[.F91]*(1+[.B92])" office:value-type="float" office:value="125622.007088071" calcext:value-type="float">
            <text:p><text:s/>$125,622.01 </text:p>
          </table:table-cell>
          <table:table-cell table:style-name="ce70" table:formula="of:=[.G91]*(1+[.C92])" office:value-type="float" office:value="1659.84368757397" calcext:value-type="float">
            <text:p><text:s/>$1,659.84 </text:p>
          </table:table-cell>
          <table:table-cell table:style-name="ce98" table:formula="of:=[.H91]*(1+[.D92])" office:value-type="float" office:value="3587.37075204697" calcext:value-type="float">
            <text:p><text:s/>$3,587.37 </text:p>
          </table:table-cell>
          <table:table-cell table:style-name="ce70" table:formula="of:=[.I91]*(1+[.E92])" office:value-type="float" office:value="12957.8828212078" calcext:value-type="float">
            <text:p><text:s/>$12,957.88 </text:p>
          </table:table-cell>
          <table:table-cell table:style-name="ce41" table:formula="of:=[.B92]-[.C92]" office:value-type="percentage" office:value="-0.152380924753335" calcext:value-type="percentage">
            <text:p>-15.24 %</text:p>
          </table:table-cell>
          <table:table-cell table:style-name="ce115" table:formula="of:=[.B92]-[.D92]" office:value-type="percentage" office:value="-0.174219403312494" calcext:value-type="percentage">
            <text:p>-17.42 %</text:p>
          </table:table-cell>
          <table:table-cell table:style-name="ce122" table:formula="of:=[.B92]-[.E92]" office:value-type="percentage" office:value="-0.19668909896288" calcext:value-type="percentage">
            <text:p>-19.67 %</text:p>
          </table:table-cell>
          <table:table-cell table:style-name="ce122" table:formula="of:=(([.F92]/100)^(1/([.A92]-[.$A$19]+1)))-(([.H92]/100)^(1/([.A92]-[.$A$19]+1)))" office:value-type="percentage" office:value="0.0516653455129084" calcext:value-type="percentage">
            <text:p>5.17 %</text:p>
          </table:table-cell>
          <table:table-cell table:style-name="ce127" office:value-type="percentage" office:value="0.0282617" calcext:value-type="percentage">
            <text:p>2.83 %</text:p>
          </table:table-cell>
          <table:table-cell table:style-name="ce133" table:formula="of:=(1+[.B92])/(1+[.$N92])-1" office:value-type="percentage" office:value="-0.142725622689245" calcext:value-type="percentage">
            <text:p>-14.27 %</text:p>
          </table:table-cell>
          <table:table-cell table:style-name="ce133" table:formula="of:=(1+[.C92])/(1+[.$N92])-1" office:value-type="percentage" office:value="0.00546712313930708" calcext:value-type="percentage">
            <text:p>0.55 %</text:p>
          </table:table-cell>
          <table:table-cell table:style-name="ce133" table:formula="of:=(1+[.D92])/(1+[.$N92])-1" office:value-type="percentage" office:value="0.0267053726619326" calcext:value-type="percentage">
            <text:p>2.67 %</text:p>
          </table:table-cell>
          <table:table-cell table:style-name="ce133" table:formula="of:=(1+[.E92])/(1+[.$N92])-1" office:value-type="percentage" office:value="0.0485574903187371" calcext:value-type="percentage">
            <text:p>4.86 %</text:p>
          </table:table-cell>
          <table:table-cell table:number-columns-repeated="16366"/>
        </table:table-row>
        <table:table-row table:style-name="ro10">
          <table:table-cell table:style-name="ce20" office:value-type="float" office:value="2002" calcext:value-type="float">
            <text:p>2002</text:p>
          </table:table-cell>
          <table:table-cell table:style-name="ce41" table:formula="of:=([$'S&amp;P 500 &amp; Raw Data'.B78]-[$'S&amp;P 500 &amp; Raw Data'.B77]+[$'S&amp;P 500 &amp; Raw Data'.C78])/[$'S&amp;P 500 &amp; Raw Data'.B77]" office:value-type="percentage" office:value="-0.219660479579127" calcext:value-type="percentage">
            <text:p>-21.97 %</text:p>
          </table:table-cell>
          <table:table-cell table:style-name="ce41" table:formula="of:=[$'T. Bill rates'.C80]" office:value-type="percentage" office:value="0.016025" calcext:value-type="percentage">
            <text:p>1.60 %</text:p>
          </table:table-cell>
          <table:table-cell table:style-name="ce41" table:formula="of:=[$'S&amp;P 500 &amp; Raw Data'.F78]" office:value-type="percentage" office:value="0.151164003781093" calcext:value-type="percentage">
            <text:p>15.12 %</text:p>
          </table:table-cell>
          <table:table-cell table:style-name="ce41" table:formula="of:=[$'S&amp;P 500 &amp; Raw Data'.J78]" office:value-type="percentage" office:value="0.121778676939755" calcext:value-type="percentage">
            <text:p>12.18 %</text:p>
          </table:table-cell>
          <table:table-cell table:style-name="ce70" table:formula="of:=[.F92]*(1+[.B93])" office:value-type="float" office:value="98027.816765413" calcext:value-type="float">
            <text:p><text:s/>$98,027.82 </text:p>
          </table:table-cell>
          <table:table-cell table:style-name="ce70" table:formula="of:=[.G92]*(1+[.C93])" office:value-type="float" office:value="1686.44268266735" calcext:value-type="float">
            <text:p><text:s/>$1,686.44 </text:p>
          </table:table-cell>
          <table:table-cell table:style-name="ce98" table:formula="of:=[.H92]*(1+[.D93])" office:value-type="float" office:value="4129.65207797358" calcext:value-type="float">
            <text:p><text:s/>$4,129.65 </text:p>
          </table:table-cell>
          <table:table-cell table:style-name="ce70" table:formula="of:=[.I92]*(1+[.E93])" office:value-type="float" office:value="14535.8766471149" calcext:value-type="float">
            <text:p><text:s/>$14,535.88 </text:p>
          </table:table-cell>
          <table:table-cell table:style-name="ce41" table:formula="of:=[.B93]-[.C93]" office:value-type="percentage" office:value="-0.235685479579127" calcext:value-type="percentage">
            <text:p>-23.57 %</text:p>
          </table:table-cell>
          <table:table-cell table:style-name="ce115" table:formula="of:=[.B93]-[.D93]" office:value-type="percentage" office:value="-0.37082448336022" calcext:value-type="percentage">
            <text:p>-37.08 %</text:p>
          </table:table-cell>
          <table:table-cell table:style-name="ce122" table:formula="of:=[.B93]-[.E93]" office:value-type="percentage" office:value="-0.341439156518882" calcext:value-type="percentage">
            <text:p>-34.14 %</text:p>
          </table:table-cell>
          <table:table-cell table:style-name="ce122" table:formula="of:=(([.F93]/100)^(1/([.A93]-[.$A$19]+1)))-(([.H93]/100)^(1/([.A93]-[.$A$19]+1)))" office:value-type="percentage" office:value="0.0453254497734779" calcext:value-type="percentage">
            <text:p>4.53 %</text:p>
          </table:table-cell>
          <table:table-cell table:style-name="ce127" office:value-type="percentage" office:value="0.0158603" calcext:value-type="percentage">
            <text:p>1.59 %</text:p>
          </table:table-cell>
          <table:table-cell table:style-name="ce133" table:formula="of:=(1+[.B93])/(1+[.$N93])-1" office:value-type="percentage" office:value="-0.231843669428884" calcext:value-type="percentage">
            <text:p>-23.18 %</text:p>
          </table:table-cell>
          <table:table-cell table:style-name="ce133" table:formula="of:=(1+[.C93])/(1+[.$N93])-1" office:value-type="percentage" office:value="0.000162128591894017" calcext:value-type="percentage">
            <text:p>0.02 %</text:p>
          </table:table-cell>
          <table:table-cell table:style-name="ce133" table:formula="of:=(1+[.D93])/(1+[.$N93])-1" office:value-type="percentage" office:value="0.13319125058937" calcext:value-type="percentage">
            <text:p>13.32 %</text:p>
          </table:table-cell>
          <table:table-cell table:style-name="ce133" table:formula="of:=(1+[.E93])/(1+[.$N93])-1" office:value-type="percentage" office:value="0.104264707400964" calcext:value-type="percentage">
            <text:p>10.43 %</text:p>
          </table:table-cell>
          <table:table-cell table:number-columns-repeated="16366"/>
        </table:table-row>
        <table:table-row table:style-name="ro10">
          <table:table-cell table:style-name="ce20" office:value-type="float" office:value="2003" calcext:value-type="float">
            <text:p>2003</text:p>
          </table:table-cell>
          <table:table-cell table:style-name="ce41" table:formula="of:=([$'S&amp;P 500 &amp; Raw Data'.B79]-[$'S&amp;P 500 &amp; Raw Data'.B78]+[$'S&amp;P 500 &amp; Raw Data'.C79])/[$'S&amp;P 500 &amp; Raw Data'.B78]" office:value-type="percentage" office:value="0.283558000500102" calcext:value-type="percentage">
            <text:p>28.36 %</text:p>
          </table:table-cell>
          <table:table-cell table:style-name="ce41" table:formula="of:=[$'T. Bill rates'.C81]" office:value-type="percentage" office:value="0.0101083333333333" calcext:value-type="percentage">
            <text:p>1.01 %</text:p>
          </table:table-cell>
          <table:table-cell table:style-name="ce41" table:formula="of:=[$'S&amp;P 500 &amp; Raw Data'.F79]" office:value-type="percentage" office:value="0.00375318588177585" calcext:value-type="percentage">
            <text:p>0.38 %</text:p>
          </table:table-cell>
          <table:table-cell table:style-name="ce41" table:formula="of:=[$'S&amp;P 500 &amp; Raw Data'.J79]" office:value-type="percentage" office:value="0.135320120968576" calcext:value-type="percentage">
            <text:p>13.53 %</text:p>
          </table:table-cell>
          <table:table-cell table:style-name="ce70" table:formula="of:=[.F93]*(1+[.B94])" office:value-type="float" office:value="125824.388480804" calcext:value-type="float">
            <text:p><text:s/>$125,824.39 </text:p>
          </table:table-cell>
          <table:table-cell table:style-name="ce70" table:formula="of:=[.G93]*(1+[.C94])" office:value-type="float" office:value="1703.48980745131" calcext:value-type="float">
            <text:p><text:s/>$1,703.49 </text:p>
          </table:table-cell>
          <table:table-cell table:style-name="ce98" table:formula="of:=[.H93]*(1+[.D94])" office:value-type="float" office:value="4145.15142984928" calcext:value-type="float">
            <text:p><text:s/>$4,145.15 </text:p>
          </table:table-cell>
          <table:table-cell table:style-name="ce70" table:formula="of:=[.I93]*(1+[.E94])" office:value-type="float" office:value="16502.8732333868" calcext:value-type="float">
            <text:p><text:s/>$16,502.87 </text:p>
          </table:table-cell>
          <table:table-cell table:style-name="ce41" table:formula="of:=[.B94]-[.C94]" office:value-type="percentage" office:value="0.273449667166769" calcext:value-type="percentage">
            <text:p>27.34 %</text:p>
          </table:table-cell>
          <table:table-cell table:style-name="ce115" table:formula="of:=[.B94]-[.D94]" office:value-type="percentage" office:value="0.279804814618326" calcext:value-type="percentage">
            <text:p>27.98 %</text:p>
          </table:table-cell>
          <table:table-cell table:style-name="ce122" table:formula="of:=[.B94]-[.E94]" office:value-type="percentage" office:value="0.148237879531527" calcext:value-type="percentage">
            <text:p>14.82 %</text:p>
          </table:table-cell>
          <table:table-cell table:style-name="ce122" table:formula="of:=(([.F94]/100)^(1/([.A94]-[.$A$19]+1)))-(([.H94]/100)^(1/([.A94]-[.$A$19]+1)))" office:value-type="percentage" office:value="0.0482377961171565" calcext:value-type="percentage">
            <text:p>4.82 %</text:p>
          </table:table-cell>
          <table:table-cell table:style-name="ce127" office:value-type="percentage" office:value="0.0227009" calcext:value-type="percentage">
            <text:p>2.27 %</text:p>
          </table:table-cell>
          <table:table-cell table:style-name="ce133" table:formula="of:=(1+[.B94])/(1+[.$N94])-1" office:value-type="percentage" office:value="0.25506685336847" calcext:value-type="percentage">
            <text:p>25.51 %</text:p>
          </table:table-cell>
          <table:table-cell table:style-name="ce133" table:formula="of:=(1+[.C94])/(1+[.$N94])-1" office:value-type="percentage" office:value="-0.0123130493643514" calcext:value-type="percentage">
            <text:p>-1.23 %</text:p>
          </table:table-cell>
          <table:table-cell table:style-name="ce133" table:formula="of:=(1+[.D94])/(1+[.$N94])-1" office:value-type="percentage" office:value="-0.0185271315574516" calcext:value-type="percentage">
            <text:p>-1.85 %</text:p>
          </table:table-cell>
          <table:table-cell table:style-name="ce133" table:formula="of:=(1+[.E94])/(1+[.$N94])-1" office:value-type="percentage" office:value="0.110119411226269" calcext:value-type="percentage">
            <text:p>11.01 %</text:p>
          </table:table-cell>
          <table:table-cell table:number-columns-repeated="16366"/>
        </table:table-row>
        <table:table-row table:style-name="ro10">
          <table:table-cell table:style-name="ce20" office:value-type="float" office:value="2004" calcext:value-type="float">
            <text:p>2004</text:p>
          </table:table-cell>
          <table:table-cell table:style-name="ce41" table:formula="of:=([$'S&amp;P 500 &amp; Raw Data'.B80]-[$'S&amp;P 500 &amp; Raw Data'.B79]+[$'S&amp;P 500 &amp; Raw Data'.C80])/[$'S&amp;P 500 &amp; Raw Data'.B79]" office:value-type="percentage" office:value="0.107427759440962" calcext:value-type="percentage">
            <text:p>10.74 %</text:p>
          </table:table-cell>
          <table:table-cell table:style-name="ce41" table:formula="of:=[$'T. Bill rates'.C82]" office:value-type="percentage" office:value="0.0137166666666667" calcext:value-type="percentage">
            <text:p>1.37 %</text:p>
          </table:table-cell>
          <table:table-cell table:style-name="ce41" table:formula="of:=[$'S&amp;P 500 &amp; Raw Data'.F80]" office:value-type="percentage" office:value="0.0449068370227455" calcext:value-type="percentage">
            <text:p>4.49 %</text:p>
          </table:table-cell>
          <table:table-cell table:style-name="ce41" table:formula="of:=[$'S&amp;P 500 &amp; Raw Data'.J80]" office:value-type="percentage" office:value="0.0988862840872184" calcext:value-type="percentage">
            <text:p>9.89 %</text:p>
          </table:table-cell>
          <table:table-cell table:style-name="ce70" table:formula="of:=[.F94]*(1+[.B95])" office:value-type="float" office:value="139341.420618326" calcext:value-type="float">
            <text:p><text:s/>$139,341.42 </text:p>
          </table:table-cell>
          <table:table-cell table:style-name="ce70" table:formula="of:=[.G94]*(1+[.C95])" office:value-type="float" office:value="1726.85600931018" calcext:value-type="float">
            <text:p><text:s/>$1,726.86 </text:p>
          </table:table-cell>
          <table:table-cell table:style-name="ce98" table:formula="of:=[.H94]*(1+[.D95])" office:value-type="float" office:value="4331.29706954412" calcext:value-type="float">
            <text:p><text:s/>$4,331.30 </text:p>
          </table:table-cell>
          <table:table-cell table:style-name="ce70" table:formula="of:=[.I94]*(1+[.E95])" office:value-type="float" office:value="18134.7810441988" calcext:value-type="float">
            <text:p><text:s/>$18,134.78 </text:p>
          </table:table-cell>
          <table:table-cell table:style-name="ce41" table:formula="of:=[.B95]-[.C95]" office:value-type="percentage" office:value="0.0937110927742953" calcext:value-type="percentage">
            <text:p>9.37 %</text:p>
          </table:table-cell>
          <table:table-cell table:style-name="ce115" table:formula="of:=[.B95]-[.D95]" office:value-type="percentage" office:value="0.0625209224182165" calcext:value-type="percentage">
            <text:p>6.25 %</text:p>
          </table:table-cell>
          <table:table-cell table:style-name="ce122" table:formula="of:=[.B95]-[.E95]" office:value-type="percentage" office:value="0.00854147535374354" calcext:value-type="percentage">
            <text:p>0.85 %</text:p>
          </table:table-cell>
          <table:table-cell table:style-name="ce122" table:formula="of:=(([.F95]/100)^(1/([.A95]-[.$A$19]+1)))-(([.H95]/100)^(1/([.A95]-[.$A$19]+1)))" office:value-type="percentage" office:value="0.0484229984688545" calcext:value-type="percentage">
            <text:p>4.84 %</text:p>
          </table:table-cell>
          <table:table-cell table:style-name="ce127" office:value-type="percentage" office:value="0.0267724" calcext:value-type="percentage">
            <text:p>2.68 %</text:p>
          </table:table-cell>
          <table:table-cell table:style-name="ce133" table:formula="of:=(1+[.B95])/(1+[.$N95])-1" office:value-type="percentage" office:value="0.0785523251705653" calcext:value-type="percentage">
            <text:p>7.86 %</text:p>
          </table:table-cell>
          <table:table-cell table:style-name="ce133" table:formula="of:=(1+[.C95])/(1+[.$N95])-1" office:value-type="percentage" office:value="-0.0127153138644294" calcext:value-type="percentage">
            <text:p>-1.27 %</text:p>
          </table:table-cell>
          <table:table-cell table:style-name="ce133" table:formula="of:=(1+[.D95])/(1+[.$N95])-1" office:value-type="percentage" office:value="0.0176615937697053" calcext:value-type="percentage">
            <text:p>1.77 %</text:p>
          </table:table-cell>
          <table:table-cell table:style-name="ce133" table:formula="of:=(1+[.E95])/(1+[.$N95])-1" office:value-type="percentage" office:value="0.0702335630439799" calcext:value-type="percentage">
            <text:p>7.02 %</text:p>
          </table:table-cell>
          <table:table-cell table:number-columns-repeated="16366"/>
        </table:table-row>
        <table:table-row table:style-name="ro10">
          <table:table-cell table:style-name="ce20" office:value-type="float" office:value="2005" calcext:value-type="float">
            <text:p>2005</text:p>
          </table:table-cell>
          <table:table-cell table:style-name="ce41" table:formula="of:=([$'S&amp;P 500 &amp; Raw Data'.B81]-[$'S&amp;P 500 &amp; Raw Data'.B80]+[$'S&amp;P 500 &amp; Raw Data'.C81])/[$'S&amp;P 500 &amp; Raw Data'.B80]" office:value-type="percentage" office:value="0.0483447752326885" calcext:value-type="percentage">
            <text:p>4.83 %</text:p>
          </table:table-cell>
          <table:table-cell table:style-name="ce41" table:formula="of:=[$'T. Bill rates'.C83]" office:value-type="percentage" office:value="0.0314666666666667" calcext:value-type="percentage">
            <text:p>3.15 %</text:p>
          </table:table-cell>
          <table:table-cell table:style-name="ce41" table:formula="of:=[$'S&amp;P 500 &amp; Raw Data'.F81]" office:value-type="percentage" office:value="0.0286753295977795" calcext:value-type="percentage">
            <text:p>2.87 %</text:p>
          </table:table-cell>
          <table:table-cell table:style-name="ce41" table:formula="of:=[$'S&amp;P 500 &amp; Raw Data'.J81]" office:value-type="percentage" office:value="0.0491753798716953" calcext:value-type="percentage">
            <text:p>4.92 %</text:p>
          </table:table-cell>
          <table:table-cell table:style-name="ce70" table:formula="of:=[.F95]*(1+[.B96])" office:value-type="float" office:value="146077.850278722" calcext:value-type="float">
            <text:p><text:s/>$146,077.85 </text:p>
          </table:table-cell>
          <table:table-cell table:style-name="ce70" table:formula="of:=[.G95]*(1+[.C96])" office:value-type="float" office:value="1781.19441173648" calcext:value-type="float">
            <text:p><text:s/>$1,781.19 </text:p>
          </table:table-cell>
          <table:table-cell table:style-name="ce98" table:formula="of:=[.H95]*(1+[.D96])" office:value-type="float" office:value="4455.49844059919" calcext:value-type="float">
            <text:p><text:s/>$4,455.50 </text:p>
          </table:table-cell>
          <table:table-cell table:style-name="ce70" table:formula="of:=[.I95]*(1+[.E96])" office:value-type="float" office:value="19026.5657909373" calcext:value-type="float">
            <text:p><text:s/>$19,026.57 </text:p>
          </table:table-cell>
          <table:table-cell table:style-name="ce41" table:formula="of:=[.B96]-[.C96]" office:value-type="percentage" office:value="0.0168781085660219" calcext:value-type="percentage">
            <text:p>1.69 %</text:p>
          </table:table-cell>
          <table:table-cell table:style-name="ce115" table:formula="of:=[.B96]-[.D96]" office:value-type="percentage" office:value="0.019669445634909" calcext:value-type="percentage">
            <text:p>1.97 %</text:p>
          </table:table-cell>
          <table:table-cell table:style-name="ce122" table:formula="of:=[.B96]-[.E96]" office:value-type="percentage" office:value="-0.000830604639006763" calcext:value-type="percentage">
            <text:p>-0.08 %</text:p>
          </table:table-cell>
          <table:table-cell table:style-name="ce122" table:formula="of:=(([.F96]/100)^(1/([.A96]-[.$A$19]+1)))-(([.H96]/100)^(1/([.A96]-[.$A$19]+1)))" office:value-type="percentage" office:value="0.0480421894022551" calcext:value-type="percentage">
            <text:p>4.80 %</text:p>
          </table:table-cell>
          <table:table-cell table:style-name="ce127" office:value-type="percentage" office:value="0.0339275" calcext:value-type="percentage">
            <text:p>3.39 %</text:p>
          </table:table-cell>
          <table:table-cell table:style-name="ce133" table:formula="of:=(1+[.B96])/(1+[.$N96])-1" office:value-type="percentage" office:value="0.0139441839323247" calcext:value-type="percentage">
            <text:p>1.39 %</text:p>
          </table:table-cell>
          <table:table-cell table:style-name="ce133" table:formula="of:=(1+[.C96])/(1+[.$N96])-1" office:value-type="percentage" office:value="-0.00238008306514059" calcext:value-type="percentage">
            <text:p>-0.24 %</text:p>
          </table:table-cell>
          <table:table-cell table:style-name="ce133" table:formula="of:=(1+[.D96])/(1+[.$N96])-1" office:value-type="percentage" office:value="-0.00507982465136125" calcext:value-type="percentage">
            <text:p>-0.51 %</text:p>
          </table:table-cell>
          <table:table-cell table:style-name="ce133" table:formula="of:=(1+[.E96])/(1+[.$N96])-1" office:value-type="percentage" office:value="0.0147475329476152" calcext:value-type="percentage">
            <text:p>1.47 %</text:p>
          </table:table-cell>
          <table:table-cell table:number-columns-repeated="16366"/>
        </table:table-row>
        <table:table-row table:style-name="ro10">
          <table:table-cell table:style-name="ce20" office:value-type="float" office:value="2006" calcext:value-type="float">
            <text:p>2006</text:p>
          </table:table-cell>
          <table:table-cell table:style-name="ce41" table:formula="of:=([$'S&amp;P 500 &amp; Raw Data'.B82]-[$'S&amp;P 500 &amp; Raw Data'.B81]+[$'S&amp;P 500 &amp; Raw Data'.C82])/[$'S&amp;P 500 &amp; Raw Data'.B81]" office:value-type="percentage" office:value="0.156125579793157" calcext:value-type="percentage">
            <text:p>15.61 %</text:p>
          </table:table-cell>
          <table:table-cell table:style-name="ce41" table:formula="of:=[$'T. Bill rates'.C84]" office:value-type="percentage" office:value="0.0472666666666667" calcext:value-type="percentage">
            <text:p>4.73 %</text:p>
          </table:table-cell>
          <table:table-cell table:style-name="ce41" table:formula="of:=[$'S&amp;P 500 &amp; Raw Data'.F82]" office:value-type="percentage" office:value="0.0196100124175684" calcext:value-type="percentage">
            <text:p>1.96 %</text:p>
          </table:table-cell>
          <table:table-cell table:style-name="ce41" table:formula="of:=[$'S&amp;P 500 &amp; Raw Data'.J82]" office:value-type="percentage" office:value="0.0704839766288915" calcext:value-type="percentage">
            <text:p>7.05 %</text:p>
          </table:table-cell>
          <table:table-cell table:style-name="ce70" table:formula="of:=[.F96]*(1+[.B97])" office:value-type="float" office:value="168884.339348426" calcext:value-type="float">
            <text:p><text:s/>$168,884.34 </text:p>
          </table:table-cell>
          <table:table-cell table:style-name="ce70" table:formula="of:=[.G96]*(1+[.C97])" office:value-type="float" office:value="1865.38553426456" calcext:value-type="float">
            <text:p><text:s/>$1,865.39 </text:p>
          </table:table-cell>
          <table:table-cell table:style-name="ce98" table:formula="of:=[.H96]*(1+[.D97])" office:value-type="float" office:value="4542.8708203458" calcext:value-type="float">
            <text:p><text:s/>$4,542.87 </text:p>
          </table:table-cell>
          <table:table-cell table:style-name="ce70" table:formula="of:=[.I96]*(1+[.E97])" office:value-type="float" office:value="20367.6338094738" calcext:value-type="float">
            <text:p><text:s/>$20,367.63 </text:p>
          </table:table-cell>
          <table:table-cell table:style-name="ce41" table:formula="of:=[.B97]-[.C97]" office:value-type="percentage" office:value="0.10885891312649" calcext:value-type="percentage">
            <text:p>10.89 %</text:p>
          </table:table-cell>
          <table:table-cell table:style-name="ce115" table:formula="of:=[.B97]-[.D97]" office:value-type="percentage" office:value="0.136515567375589" calcext:value-type="percentage">
            <text:p>13.65 %</text:p>
          </table:table-cell>
          <table:table-cell table:style-name="ce122" table:formula="of:=[.B97]-[.E97]" office:value-type="percentage" office:value="0.0856416031642656" calcext:value-type="percentage">
            <text:p>8.56 %</text:p>
          </table:table-cell>
          <table:table-cell table:style-name="ce122" table:formula="of:=(([.F97]/100)^(1/([.A97]-[.$A$19]+1)))-(([.H97]/100)^(1/([.A97]-[.$A$19]+1)))" office:value-type="percentage" office:value="0.0491490360048059" calcext:value-type="percentage">
            <text:p>4.91 %</text:p>
          </table:table-cell>
          <table:table-cell table:style-name="ce127" office:value-type="percentage" office:value="0.0322594" calcext:value-type="percentage">
            <text:p>3.23 %</text:p>
          </table:table-cell>
          <table:table-cell table:style-name="ce133" table:formula="of:=(1+[.B97])/(1+[.$N97])-1" office:value-type="percentage" office:value="0.119995206430823" calcext:value-type="percentage">
            <text:p>12.00 %</text:p>
          </table:table-cell>
          <table:table-cell table:style-name="ce133" table:formula="of:=(1+[.C97])/(1+[.$N97])-1" office:value-type="percentage" office:value="0.0145382707744455" calcext:value-type="percentage">
            <text:p>1.45 %</text:p>
          </table:table-cell>
          <table:table-cell table:style-name="ce133" table:formula="of:=(1+[.D97])/(1+[.$N97])-1" office:value-type="percentage" office:value="-0.0122540783667667" calcext:value-type="percentage">
            <text:p>-1.23 %</text:p>
          </table:table-cell>
          <table:table-cell table:style-name="ce133" table:formula="of:=(1+[.E97])/(1+[.$N97])-1" office:value-type="percentage" office:value="0.0370300107016621" calcext:value-type="percentage">
            <text:p>3.70 %</text:p>
          </table:table-cell>
          <table:table-cell table:number-columns-repeated="16366"/>
        </table:table-row>
        <table:table-row table:style-name="ro10">
          <table:table-cell table:style-name="ce20" office:value-type="float" office:value="2007" calcext:value-type="float">
            <text:p>2007</text:p>
          </table:table-cell>
          <table:table-cell table:style-name="ce41" table:formula="of:=([$'S&amp;P 500 &amp; Raw Data'.B83]-[$'S&amp;P 500 &amp; Raw Data'.B82]+[$'S&amp;P 500 &amp; Raw Data'.C83])/[$'S&amp;P 500 &amp; Raw Data'.B82]" office:value-type="percentage" office:value="0.0548473524642177" calcext:value-type="percentage">
            <text:p>5.48 %</text:p>
          </table:table-cell>
          <table:table-cell table:style-name="ce41" table:formula="of:=[$'T. Bill rates'.C85]" office:value-type="percentage" office:value="0.0435333333333333" calcext:value-type="percentage">
            <text:p>4.35 %</text:p>
          </table:table-cell>
          <table:table-cell table:style-name="ce41" table:formula="of:=[$'S&amp;P 500 &amp; Raw Data'.F83]" office:value-type="percentage" office:value="0.102099219300128" calcext:value-type="percentage">
            <text:p>10.21 %</text:p>
          </table:table-cell>
          <table:table-cell table:style-name="ce41" table:formula="of:=[$'S&amp;P 500 &amp; Raw Data'.J83]" office:value-type="percentage" office:value="0.0315038615280556" calcext:value-type="percentage">
            <text:p>3.15 %</text:p>
          </table:table-cell>
          <table:table-cell table:style-name="ce70" table:formula="of:=[.F97]*(1+[.B98])" office:value-type="float" office:value="178147.198234355" calcext:value-type="float">
            <text:p><text:s/>$178,147.20 </text:p>
          </table:table-cell>
          <table:table-cell table:style-name="ce70" table:formula="of:=[.G97]*(1+[.C98])" office:value-type="float" office:value="1946.59198452287" calcext:value-type="float">
            <text:p><text:s/>$1,946.59 </text:p>
          </table:table-cell>
          <table:table-cell table:style-name="ce98" table:formula="of:=[.H97]*(1+[.D98])" office:value-type="float" office:value="5006.69438448444" calcext:value-type="float">
            <text:p><text:s/>$5,006.69 </text:p>
          </table:table-cell>
          <table:table-cell table:style-name="ce70" table:formula="of:=[.I97]*(1+[.E98])" office:value-type="float" office:value="21009.2929246616" calcext:value-type="float">
            <text:p><text:s/>$21,009.29 </text:p>
          </table:table-cell>
          <table:table-cell table:style-name="ce41" table:formula="of:=[.B98]-[.C98]" office:value-type="percentage" office:value="0.0113140191308844" calcext:value-type="percentage">
            <text:p>1.13 %</text:p>
          </table:table-cell>
          <table:table-cell table:style-name="ce115" table:formula="of:=[.B98]-[.D98]" office:value-type="percentage" office:value="-0.0472518668359104" calcext:value-type="percentage">
            <text:p>-4.73 %</text:p>
          </table:table-cell>
          <table:table-cell table:style-name="ce122" table:formula="of:=[.B98]-[.E98]" office:value-type="percentage" office:value="0.0233434909361621" calcext:value-type="percentage">
            <text:p>2.33 %</text:p>
          </table:table-cell>
          <table:table-cell table:style-name="ce122" table:formula="of:=(([.F98]/100)^(1/([.A98]-[.$A$19]+1)))-(([.H98]/100)^(1/([.A98]-[.$A$19]+1)))" office:value-type="percentage" office:value="0.047948712238125" calcext:value-type="percentage">
            <text:p>4.79 %</text:p>
          </table:table-cell>
          <table:table-cell table:style-name="ce127" office:value-type="percentage" office:value="0.0285267" calcext:value-type="percentage">
            <text:p>2.85 %</text:p>
          </table:table-cell>
          <table:table-cell table:style-name="ce133" table:formula="of:=(1+[.B98])/(1+[.$N98])-1" office:value-type="percentage" office:value="0.0255906360663438" calcext:value-type="percentage">
            <text:p>2.56 %</text:p>
          </table:table-cell>
          <table:table-cell table:style-name="ce133" table:formula="of:=(1+[.C98])/(1+[.$N98])-1" office:value-type="percentage" office:value="0.0145904168878974" calcext:value-type="percentage">
            <text:p>1.46 %</text:p>
          </table:table-cell>
          <table:table-cell table:style-name="ce133" table:formula="of:=(1+[.D98])/(1+[.$N98])-1" office:value-type="percentage" office:value="0.0715319488547337" calcext:value-type="percentage">
            <text:p>7.15 %</text:p>
          </table:table-cell>
          <table:table-cell table:style-name="ce133" table:formula="of:=(1+[.E98])/(1+[.$N98])-1" office:value-type="percentage" office:value="0.00289458847111668" calcext:value-type="percentage">
            <text:p>0.29 %</text:p>
          </table:table-cell>
          <table:table-cell table:number-columns-repeated="16366"/>
        </table:table-row>
        <table:table-row table:style-name="ro10">
          <table:table-cell table:style-name="ce20" office:value-type="float" office:value="2008" calcext:value-type="float">
            <text:p>2008</text:p>
          </table:table-cell>
          <table:table-cell table:style-name="ce41" table:formula="of:=([$'S&amp;P 500 &amp; Raw Data'.B84]-[$'S&amp;P 500 &amp; Raw Data'.B83]+[$'S&amp;P 500 &amp; Raw Data'.C84])/[$'S&amp;P 500 &amp; Raw Data'.B83]" office:value-type="percentage" office:value="-0.365523441117982" calcext:value-type="percentage">
            <text:p>-36.55 %</text:p>
          </table:table-cell>
          <table:table-cell table:style-name="ce41" table:formula="of:=[$'T. Bill rates'.C86]" office:value-type="percentage" office:value="0.01365" calcext:value-type="percentage">
            <text:p>1.37 %</text:p>
          </table:table-cell>
          <table:table-cell table:style-name="ce41" table:formula="of:=[$'S&amp;P 500 &amp; Raw Data'.F84]" office:value-type="percentage" office:value="0.20101279926977" calcext:value-type="percentage">
            <text:p>20.10 %</text:p>
          </table:table-cell>
          <table:table-cell table:style-name="ce41" table:formula="of:=[$'S&amp;P 500 &amp; Raw Data'.J84]" office:value-type="percentage" office:value="-0.0506571462874887" calcext:value-type="percentage">
            <text:p>-5.07 %</text:p>
          </table:table-cell>
          <table:table-cell table:style-name="ce70" table:formula="of:=[.F98]*(1+[.B99])" office:value-type="float" office:value="113030.221310207" calcext:value-type="float">
            <text:p><text:s/>$113,030.22 </text:p>
          </table:table-cell>
          <table:table-cell table:style-name="ce70" table:formula="of:=[.G98]*(1+[.C99])" office:value-type="float" office:value="1973.16296511161" calcext:value-type="float">
            <text:p><text:s/>$1,973.16 </text:p>
          </table:table-cell>
          <table:table-cell table:style-name="ce98" table:formula="of:=[.H98]*(1+[.D99])" office:value-type="float" office:value="6013.10403779789" calcext:value-type="float">
            <text:p><text:s/>$6,013.10 </text:p>
          </table:table-cell>
          <table:table-cell table:style-name="ce70" table:formula="of:=[.I98]*(1+[.E99])" office:value-type="float" office:value="19945.0220995803" calcext:value-type="float">
            <text:p><text:s/>$19,945.02 </text:p>
          </table:table-cell>
          <table:table-cell table:style-name="ce41" table:formula="of:=[.B99]-[.C99]" office:value-type="percentage" office:value="-0.379173441117982" calcext:value-type="percentage">
            <text:p>-37.92 %</text:p>
          </table:table-cell>
          <table:table-cell table:style-name="ce115" table:formula="of:=[.B99]-[.D99]" office:value-type="percentage" office:value="-0.566536240387752" calcext:value-type="percentage">
            <text:p>-56.65 %</text:p>
          </table:table-cell>
          <table:table-cell table:style-name="ce122" table:formula="of:=[.B99]-[.E99]" office:value-type="percentage" office:value="-0.314866294830493" calcext:value-type="percentage">
            <text:p>-31.49 %</text:p>
          </table:table-cell>
          <table:table-cell table:style-name="ce122" table:formula="of:=(([.F99]/100)^(1/([.A99]-[.$A$19]+1)))-(([.H99]/100)^(1/([.A99]-[.$A$19]+1)))" office:value-type="percentage" office:value="0.0387958688686898" calcext:value-type="percentage">
            <text:p>3.88 %</text:p>
          </table:table-cell>
          <table:table-cell table:style-name="ce127" office:value-type="percentage" office:value="0.038391" calcext:value-type="percentage">
            <text:p>3.84 %</text:p>
          </table:table-cell>
          <table:table-cell table:style-name="ce133" table:formula="of:=(1+[.B99])/(1+[.$N99])-1" office:value-type="percentage" office:value="-0.388981068901774" calcext:value-type="percentage">
            <text:p>-38.90 %</text:p>
          </table:table-cell>
          <table:table-cell table:style-name="ce133" table:formula="of:=(1+[.C99])/(1+[.$N99])-1" office:value-type="percentage" office:value="-0.0238262850891429" calcext:value-type="percentage">
            <text:p>-2.38 %</text:p>
          </table:table-cell>
          <table:table-cell table:style-name="ce133" table:formula="of:=(1+[.D99])/(1+[.$N99])-1" office:value-type="percentage" office:value="0.156609407506199" calcext:value-type="percentage">
            <text:p>15.66 %</text:p>
          </table:table-cell>
          <table:table-cell table:style-name="ce133" table:formula="of:=(1+[.E99])/(1+[.$N99])-1" office:value-type="percentage" office:value="-0.0857558918437167" calcext:value-type="percentage">
            <text:p>-8.58 %</text:p>
          </table:table-cell>
          <table:table-cell table:number-columns-repeated="16366"/>
        </table:table-row>
        <table:table-row table:style-name="ro10">
          <table:table-cell table:style-name="ce20" office:value-type="float" office:value="2009" calcext:value-type="float">
            <text:p>2009</text:p>
          </table:table-cell>
          <table:table-cell table:style-name="ce41" table:formula="of:=([$'S&amp;P 500 &amp; Raw Data'.B85]-[$'S&amp;P 500 &amp; Raw Data'.B84]+[$'S&amp;P 500 &amp; Raw Data'.C85])/[$'S&amp;P 500 &amp; Raw Data'.B84]" office:value-type="percentage" office:value="0.25935233877664" calcext:value-type="percentage">
            <text:p>25.94 %</text:p>
          </table:table-cell>
          <table:table-cell table:style-name="ce41" table:formula="of:=[$'T. Bill rates'.C87]" office:value-type="percentage" office:value="0.0015" calcext:value-type="percentage">
            <text:p>0.15 %</text:p>
          </table:table-cell>
          <table:table-cell table:style-name="ce41" table:formula="of:=[$'S&amp;P 500 &amp; Raw Data'.F85]" office:value-type="percentage" office:value="-0.111166953132592" calcext:value-type="percentage">
            <text:p>-11.12 %</text:p>
          </table:table-cell>
          <table:table-cell table:style-name="ce41" table:formula="of:=[$'S&amp;P 500 &amp; Raw Data'.J85]" office:value-type="percentage" office:value="0.233295024916619" calcext:value-type="percentage">
            <text:p>23.33 %</text:p>
          </table:table-cell>
          <table:table-cell table:style-name="ce70" table:formula="of:=[.F99]*(1+[.B100])" office:value-type="float" office:value="142344.87355945" calcext:value-type="float">
            <text:p><text:s/>$142,344.87 </text:p>
          </table:table-cell>
          <table:table-cell table:style-name="ce70" table:formula="of:=[.G99]*(1+[.C100])" office:value-type="float" office:value="1976.12270955928" calcext:value-type="float">
            <text:p><text:s/>$1,976.12 </text:p>
          </table:table-cell>
          <table:table-cell table:style-name="ce98" table:formula="of:=[.H99]*(1+[.D100])" office:value-type="float" office:value="5344.64558304662" calcext:value-type="float">
            <text:p><text:s/>$5,344.65 </text:p>
          </table:table-cell>
          <table:table-cell table:style-name="ce70" table:formula="of:=[.I99]*(1+[.E100])" office:value-type="float" office:value="24598.0965272644" calcext:value-type="float">
            <text:p><text:s/>$24,598.10 </text:p>
          </table:table-cell>
          <table:table-cell table:style-name="ce41" table:formula="of:=[.B100]-[.C100]" office:value-type="percentage" office:value="0.25785233877664" calcext:value-type="percentage">
            <text:p>25.79 %</text:p>
          </table:table-cell>
          <table:table-cell table:style-name="ce115" table:formula="of:=[.B100]-[.D100]" office:value-type="percentage" office:value="0.370519291909231" calcext:value-type="percentage">
            <text:p>37.05 %</text:p>
          </table:table-cell>
          <table:table-cell table:style-name="ce122" table:formula="of:=[.B100]-[.E100]" office:value-type="percentage" office:value="0.0260573138600209" calcext:value-type="percentage">
            <text:p>2.61 %</text:p>
          </table:table-cell>
          <table:table-cell table:style-name="ce122" table:formula="of:=(([.F100]/100)^(1/([.A100]-[.$A$19]+1)))-(([.H100]/100)^(1/([.A100]-[.$A$19]+1)))" office:value-type="percentage" office:value="0.0428685061333485" calcext:value-type="percentage">
            <text:p>4.29 %</text:p>
          </table:table-cell>
          <table:table-cell table:style-name="ce127" office:value-type="percentage" office:value="-0.0035555" calcext:value-type="percentage">
            <text:p>-0.36 %</text:p>
          </table:table-cell>
          <table:table-cell table:style-name="ce133" table:formula="of:=(1+[.B100])/(1+[.$N100])-1" office:value-type="percentage" office:value="0.263845943027073" calcext:value-type="percentage">
            <text:p>26.38 %</text:p>
          </table:table-cell>
          <table:table-cell table:style-name="ce133" table:formula="of:=(1+[.C100])/(1+[.$N100])-1" office:value-type="percentage" office:value="0.00507353896780005" calcext:value-type="percentage">
            <text:p>0.51 %</text:p>
          </table:table-cell>
          <table:table-cell table:style-name="ce133" table:formula="of:=(1+[.D100])/(1+[.$N100])-1" office:value-type="percentage" office:value="-0.107995430887111" calcext:value-type="percentage">
            <text:p>-10.80 %</text:p>
          </table:table-cell>
          <table:table-cell table:style-name="ce133" table:formula="of:=(1+[.E100])/(1+[.$N100])-1" office:value-type="percentage" office:value="0.237695651806618" calcext:value-type="percentage">
            <text:p>23.77 %</text:p>
          </table:table-cell>
          <table:table-cell table:number-columns-repeated="16366"/>
        </table:table-row>
        <table:table-row table:style-name="ro10">
          <table:table-cell table:style-name="ce20" office:value-type="float" office:value="2010" calcext:value-type="float">
            <text:p>2010</text:p>
          </table:table-cell>
          <table:table-cell table:style-name="ce41" table:formula="of:=([$'S&amp;P 500 &amp; Raw Data'.B86]-[$'S&amp;P 500 &amp; Raw Data'.B85]+[$'S&amp;P 500 &amp; Raw Data'.C86])/[$'S&amp;P 500 &amp; Raw Data'.B85]" office:value-type="percentage" office:value="0.148210922787194" calcext:value-type="percentage">
            <text:p>14.82 %</text:p>
          </table:table-cell>
          <table:table-cell table:style-name="ce41" table:formula="of:=[$'T. Bill rates'.C88]" office:value-type="percentage" office:value="0.00136666666666667" calcext:value-type="percentage">
            <text:p>0.14 %</text:p>
          </table:table-cell>
          <table:table-cell table:style-name="ce41" table:formula="of:=[$'S&amp;P 500 &amp; Raw Data'.F86]" office:value-type="percentage" office:value="0.0846293388035577" calcext:value-type="percentage">
            <text:p>8.46 %</text:p>
          </table:table-cell>
          <table:table-cell table:style-name="ce41" table:formula="of:=[$'S&amp;P 500 &amp; Raw Data'.J86]" office:value-type="percentage" office:value="0.0834784236590661" calcext:value-type="percentage">
            <text:p>8.35 %</text:p>
          </table:table-cell>
          <table:table-cell table:style-name="ce70" table:formula="of:=[.F100]*(1+[.B101])" office:value-type="float" office:value="163441.938623722" calcext:value-type="float">
            <text:p><text:s/>$163,441.94 </text:p>
          </table:table-cell>
          <table:table-cell table:style-name="ce70" table:formula="of:=[.G100]*(1+[.C101])" office:value-type="float" office:value="1978.82341059567" calcext:value-type="float">
            <text:p><text:s/>$1,978.82 </text:p>
          </table:table-cell>
          <table:table-cell table:style-name="ce98" table:formula="of:=[.H100]*(1+[.D101])" office:value-type="float" office:value="5796.95940487921" calcext:value-type="float">
            <text:p><text:s/>$5,796.96 </text:p>
          </table:table-cell>
          <table:table-cell table:style-name="ce70" table:formula="of:=[.I100]*(1+[.E101])" office:value-type="float" office:value="26651.506850374" calcext:value-type="float">
            <text:p><text:s/>$26,651.51 </text:p>
          </table:table-cell>
          <table:table-cell table:style-name="ce41" table:formula="of:=[.B101]-[.C101]" office:value-type="percentage" office:value="0.146844256120527" calcext:value-type="percentage">
            <text:p>14.68 %</text:p>
          </table:table-cell>
          <table:table-cell table:style-name="ce115" table:formula="of:=[.B101]-[.D101]" office:value-type="percentage" office:value="0.0635815839836364" calcext:value-type="percentage">
            <text:p>6.36 %</text:p>
          </table:table-cell>
          <table:table-cell table:style-name="ce122" table:formula="of:=[.B101]-[.E101]" office:value-type="percentage" office:value="0.064732499128128" calcext:value-type="percentage">
            <text:p>6.47 %</text:p>
          </table:table-cell>
          <table:table-cell table:style-name="ce122" table:formula="of:=(([.F101]/100)^(1/([.A101]-[.$A$19]+1)))-(([.H101]/100)^(1/([.A101]-[.$A$19]+1)))" office:value-type="percentage" office:value="0.0431085164334755" calcext:value-type="percentage">
            <text:p>4.31 %</text:p>
          </table:table-cell>
          <table:table-cell table:style-name="ce127" office:value-type="percentage" office:value="0.0164004" calcext:value-type="percentage">
            <text:p>1.64 %</text:p>
          </table:table-cell>
          <table:table-cell table:style-name="ce133" table:formula="of:=(1+[.B101])/(1+[.$N101])-1" office:value-type="percentage" office:value="0.129683658907645" calcext:value-type="percentage">
            <text:p>12.97 %</text:p>
          </table:table-cell>
          <table:table-cell table:style-name="ce133" table:formula="of:=(1+[.C101])/(1+[.$N101])-1" office:value-type="percentage" office:value="-0.0147911525156161" calcext:value-type="percentage">
            <text:p>-1.48 %</text:p>
          </table:table-cell>
          <table:table-cell table:style-name="ce133" table:formula="of:=(1+[.D101])/(1+[.$N101])-1" office:value-type="percentage" office:value="0.0671280125465887" calcext:value-type="percentage">
            <text:p>6.71 %</text:p>
          </table:table-cell>
          <table:table-cell table:style-name="ce133" table:formula="of:=(1+[.E101])/(1+[.$N101])-1" office:value-type="percentage" office:value="0.0659956683006679" calcext:value-type="percentage">
            <text:p>6.60 %</text:p>
          </table:table-cell>
          <table:table-cell table:number-columns-repeated="16366"/>
        </table:table-row>
        <table:table-row table:style-name="ro10">
          <table:table-cell table:style-name="ce20" office:value-type="float" office:value="2011" calcext:value-type="float">
            <text:p>2011</text:p>
          </table:table-cell>
          <table:table-cell table:style-name="ce41" table:formula="of:=([$'S&amp;P 500 &amp; Raw Data'.B87]-[$'S&amp;P 500 &amp; Raw Data'.B86]+[$'S&amp;P 500 &amp; Raw Data'.C87])/[$'S&amp;P 500 &amp; Raw Data'.B86]" office:value-type="percentage" office:value="0.0209837473362805" calcext:value-type="percentage">
            <text:p>2.10 %</text:p>
          </table:table-cell>
          <table:table-cell table:style-name="ce41" table:formula="of:=[$'T. Bill rates'.C89]" office:value-type="percentage" office:value="0.000525" calcext:value-type="percentage">
            <text:p>0.05 %</text:p>
          </table:table-cell>
          <table:table-cell table:style-name="ce41" table:formula="of:=[$'S&amp;P 500 &amp; Raw Data'.F87]" office:value-type="percentage" office:value="0.160353349994614" calcext:value-type="percentage">
            <text:p>16.04 %</text:p>
          </table:table-cell>
          <table:table-cell table:style-name="ce41" table:formula="of:=[$'S&amp;P 500 &amp; Raw Data'.J87]" office:value-type="percentage" office:value="0.125845144013723" calcext:value-type="percentage">
            <text:p>12.58 %</text:p>
          </table:table-cell>
          <table:table-cell table:style-name="ce70" table:formula="of:=[.F101]*(1+[.B102])" office:value-type="float" office:value="166871.562967955" calcext:value-type="float">
            <text:p><text:s/>$166,871.56 </text:p>
          </table:table-cell>
          <table:table-cell table:style-name="ce70" table:formula="of:=[.G101]*(1+[.C102])" office:value-type="float" office:value="1979.86229288624" calcext:value-type="float">
            <text:p><text:s/>$1,979.86 </text:p>
          </table:table-cell>
          <table:table-cell table:style-name="ce98" table:formula="of:=[.H101]*(1+[.D102])" office:value-type="float" office:value="6726.52126523437" calcext:value-type="float">
            <text:p><text:s/>$6,726.52 </text:p>
          </table:table-cell>
          <table:table-cell table:style-name="ce70" table:formula="of:=[.I101]*(1+[.E102])" office:value-type="float" office:value="30005.4695681421" calcext:value-type="float">
            <text:p><text:s/>$30,005.47 </text:p>
          </table:table-cell>
          <table:table-cell table:style-name="ce41" table:formula="of:=[.B102]-[.C102]" office:value-type="percentage" office:value="0.0204587473362805" calcext:value-type="percentage">
            <text:p>2.05 %</text:p>
          </table:table-cell>
          <table:table-cell table:style-name="ce115" table:formula="of:=[.B102]-[.D102]" office:value-type="percentage" office:value="-0.139369602658333" calcext:value-type="percentage">
            <text:p>-13.94 %</text:p>
          </table:table-cell>
          <table:table-cell table:style-name="ce122" table:formula="of:=[.B102]-[.E102]" office:value-type="percentage" office:value="-0.104861396677442" calcext:value-type="percentage">
            <text:p>-10.49 %</text:p>
          </table:table-cell>
          <table:table-cell table:style-name="ce122" table:formula="of:=(([.F102]/100)^(1/([.A102]-[.$A$19]+1)))-(([.H102]/100)^(1/([.A102]-[.$A$19]+1)))" office:value-type="percentage" office:value="0.0409704290042485" calcext:value-type="percentage">
            <text:p>4.10 %</text:p>
          </table:table-cell>
          <table:table-cell table:style-name="ce127" office:value-type="percentage" office:value="0.0315684" calcext:value-type="percentage">
            <text:p>3.16 %</text:p>
          </table:table-cell>
          <table:table-cell table:style-name="ce133" table:formula="of:=(1+[.B102])/(1+[.$N102])-1" office:value-type="percentage" office:value="-0.0102607375950247" calcext:value-type="percentage">
            <text:p>-1.03 %</text:p>
          </table:table-cell>
          <table:table-cell table:style-name="ce133" table:formula="of:=(1+[.C102])/(1+[.$N102])-1" office:value-type="percentage" office:value="-0.030093399526391" calcext:value-type="percentage">
            <text:p>-3.01 %</text:p>
          </table:table-cell>
          <table:table-cell table:style-name="ce133" table:formula="of:=(1+[.D102])/(1+[.$N102])-1" office:value-type="percentage" office:value="0.124843830030673" calcext:value-type="percentage">
            <text:p>12.48 %</text:p>
          </table:table-cell>
          <table:table-cell table:style-name="ce133" table:formula="of:=(1+[.E102])/(1+[.$N102])-1" office:value-type="percentage" office:value="0.0913916556708434" calcext:value-type="percentage">
            <text:p>9.14 %</text:p>
          </table:table-cell>
          <table:table-cell table:number-columns-repeated="16366"/>
        </table:table-row>
        <table:table-row table:style-name="ro10">
          <table:table-cell table:style-name="ce20" office:value-type="float" office:value="2012" calcext:value-type="float">
            <text:p>2012</text:p>
          </table:table-cell>
          <table:table-cell table:style-name="ce41" table:formula="of:=([$'S&amp;P 500 &amp; Raw Data'.B88]-[$'S&amp;P 500 &amp; Raw Data'.B87]+[$'S&amp;P 500 &amp; Raw Data'.C88])/[$'S&amp;P 500 &amp; Raw Data'.B87]" office:value-type="percentage" office:value="0.158905852417303" calcext:value-type="percentage">
            <text:p>15.89 %</text:p>
          </table:table-cell>
          <table:table-cell table:style-name="ce41" table:formula="of:=[$'T. Bill rates'.C90]" office:value-type="percentage" office:value="0.000858333333333333" calcext:value-type="percentage">
            <text:p>0.09 %</text:p>
          </table:table-cell>
          <table:table-cell table:style-name="ce41" table:formula="of:=[$'S&amp;P 500 &amp; Raw Data'.F88]" office:value-type="percentage" office:value="0.0297157197801895" calcext:value-type="percentage">
            <text:p>2.97 %</text:p>
          </table:table-cell>
          <table:table-cell table:style-name="ce41" table:formula="of:=[$'S&amp;P 500 &amp; Raw Data'.J88]" office:value-type="percentage" office:value="0.101246778758435" calcext:value-type="percentage">
            <text:p>10.12 %</text:p>
          </table:table-cell>
          <table:table-cell table:style-name="ce70" table:formula="of:=[.F102]*(1+[.B103])" office:value-type="float" office:value="193388.430925585" calcext:value-type="float">
            <text:p><text:s/>$193,388.43 </text:p>
          </table:table-cell>
          <table:table-cell table:style-name="ce70" table:formula="of:=[.G102]*(1+[.C103])" office:value-type="float" office:value="1981.56167468763" calcext:value-type="float">
            <text:p><text:s/>$1,981.56 </text:p>
          </table:table-cell>
          <table:table-cell table:style-name="ce98" table:formula="of:=[.H102]*(1+[.D103])" office:value-type="float" office:value="6926.40468624756" calcext:value-type="float">
            <text:p><text:s/>$6,926.40 </text:p>
          </table:table-cell>
          <table:table-cell table:style-name="ce70" table:formula="of:=[.I102]*(1+[.E103])" office:value-type="float" office:value="33043.4267070507" calcext:value-type="float">
            <text:p><text:s/>$33,043.43 </text:p>
          </table:table-cell>
          <table:table-cell table:style-name="ce41" table:formula="of:=[.B103]-[.C103]" office:value-type="percentage" office:value="0.15804751908397" calcext:value-type="percentage">
            <text:p>15.80 %</text:p>
          </table:table-cell>
          <table:table-cell table:style-name="ce115" table:formula="of:=[.B103]-[.D103]" office:value-type="percentage" office:value="0.129190132637113" calcext:value-type="percentage">
            <text:p>12.92 %</text:p>
          </table:table-cell>
          <table:table-cell table:style-name="ce122" table:formula="of:=[.B103]-[.E103]" office:value-type="percentage" office:value="0.0576590736588679" calcext:value-type="percentage">
            <text:p>5.77 %</text:p>
          </table:table-cell>
          <table:table-cell table:style-name="ce122" table:formula="of:=(([.F103]/100)^(1/([.A103]-[.$A$19]+1)))-(([.H103]/100)^(1/([.A103]-[.$A$19]+1)))" office:value-type="percentage" office:value="0.0419882756847274" calcext:value-type="percentage">
            <text:p>4.20 %</text:p>
          </table:table-cell>
          <table:table-cell table:style-name="ce127" office:value-type="percentage" office:value="0.0206934" calcext:value-type="percentage">
            <text:p>2.07 %</text:p>
          </table:table-cell>
          <table:table-cell table:style-name="ce133" table:formula="of:=(1+[.B103])/(1+[.$N103])-1" office:value-type="percentage" office:value="0.135410351842485" calcext:value-type="percentage">
            <text:p>13.54 %</text:p>
          </table:table-cell>
          <table:table-cell table:style-name="ce133" table:formula="of:=(1+[.C103])/(1+[.$N103])-1" office:value-type="percentage" office:value="-0.0194329332066482" calcext:value-type="percentage">
            <text:p>-1.94 %</text:p>
          </table:table-cell>
          <table:table-cell table:style-name="ce133" table:formula="of:=(1+[.D103])/(1+[.$N103])-1" office:value-type="percentage" office:value="0.00883940248872905" calcext:value-type="percentage">
            <text:p>0.88 %</text:p>
          </table:table-cell>
          <table:table-cell table:style-name="ce133" table:formula="of:=(1+[.E103])/(1+[.$N103])-1" office:value-type="percentage" office:value="0.0789202504478181" calcext:value-type="percentage">
            <text:p>7.89 %</text:p>
          </table:table-cell>
          <table:table-cell table:number-columns-repeated="16366"/>
        </table:table-row>
        <table:table-row table:style-name="ro10">
          <table:table-cell table:style-name="ce20" office:value-type="float" office:value="2013" calcext:value-type="float">
            <text:p>2013</text:p>
          </table:table-cell>
          <table:table-cell table:style-name="ce41" table:formula="of:=([$'S&amp;P 500 &amp; Raw Data'.B89]-[$'S&amp;P 500 &amp; Raw Data'.B88]+[$'S&amp;P 500 &amp; Raw Data'.C89])/[$'S&amp;P 500 &amp; Raw Data'.B88]" office:value-type="percentage" office:value="0.321450858581255" calcext:value-type="percentage">
            <text:p>32.15 %</text:p>
          </table:table-cell>
          <table:table-cell table:style-name="ce41" table:formula="of:=[$'T. Bill rates'.C91]" office:value-type="percentage" office:value="0.000583333333333333" calcext:value-type="percentage">
            <text:p>0.06 %</text:p>
          </table:table-cell>
          <table:table-cell table:style-name="ce41" table:formula="of:=[$'S&amp;P 500 &amp; Raw Data'.F89]" office:value-type="percentage" office:value="-0.0910456879434726" calcext:value-type="percentage">
            <text:p>-9.10 %</text:p>
          </table:table-cell>
          <table:table-cell table:style-name="ce41" table:formula="of:=[$'S&amp;P 500 &amp; Raw Data'.J89]" office:value-type="percentage" office:value="-0.0105590120694946" calcext:value-type="percentage">
            <text:p>-1.06 %</text:p>
          </table:table-cell>
          <table:table-cell table:style-name="ce70" table:formula="of:=[.F103]*(1+[.B104])" office:value-type="float" office:value="255553.308086296" calcext:value-type="float">
            <text:p><text:s/>$255,553.31 </text:p>
          </table:table-cell>
          <table:table-cell table:style-name="ce70" table:formula="of:=[.G103]*(1+[.C104])" office:value-type="float" office:value="1982.71758566453" calcext:value-type="float">
            <text:p><text:s/>$1,982.72 </text:p>
          </table:table-cell>
          <table:table-cell table:style-name="ce98" table:formula="of:=[.H103]*(1+[.D104])" office:value-type="float" office:value="6295.78540661326" calcext:value-type="float">
            <text:p><text:s/>$6,295.79 </text:p>
          </table:table-cell>
          <table:table-cell table:style-name="ce70" table:formula="of:=[.I103]*(1+[.E104])" office:value-type="float" office:value="32694.5207656335" calcext:value-type="float">
            <text:p><text:s/>$32,694.52 </text:p>
          </table:table-cell>
          <table:table-cell table:style-name="ce41" table:formula="of:=[.B104]-[.C104]" office:value-type="percentage" office:value="0.320867525247922" calcext:value-type="percentage">
            <text:p>32.09 %</text:p>
          </table:table-cell>
          <table:table-cell table:style-name="ce115" table:formula="of:=[.B104]-[.D104]" office:value-type="percentage" office:value="0.412496546524727" calcext:value-type="percentage">
            <text:p>41.25 %</text:p>
          </table:table-cell>
          <table:table-cell table:style-name="ce122" table:formula="of:=[.B104]-[.E104]" office:value-type="percentage" office:value="0.332009870650749" calcext:value-type="percentage">
            <text:p>33.20 %</text:p>
          </table:table-cell>
          <table:table-cell table:style-name="ce122" table:formula="of:=(([.F104]/100)^(1/([.A104]-[.$A$19]+1)))-(([.H104]/100)^(1/([.A104]-[.$A$19]+1)))" office:value-type="percentage" office:value="0.0461768094187232" calcext:value-type="percentage">
            <text:p>4.62 %</text:p>
          </table:table-cell>
          <table:table-cell table:style-name="ce127" office:value-type="percentage" office:value="0.0146483" calcext:value-type="percentage">
            <text:p>1.46 %</text:p>
          </table:table-cell>
          <table:table-cell table:style-name="ce133" table:formula="of:=(1+[.B104])/(1+[.$N104])-1" office:value-type="percentage" office:value="0.302373303716426" calcext:value-type="percentage">
            <text:p>30.24 %</text:p>
          </table:table-cell>
          <table:table-cell table:style-name="ce133" table:formula="of:=(1+[.C104])/(1+[.$N104])-1" office:value-type="percentage" office:value="-0.013861913203488" calcext:value-type="percentage">
            <text:p>-1.39 %</text:p>
          </table:table-cell>
          <table:table-cell table:style-name="ce133" table:formula="of:=(1+[.D104])/(1+[.$N104])-1" office:value-type="percentage" office:value="-0.10416810233011" calcext:value-type="percentage">
            <text:p>-10.42 %</text:p>
          </table:table-cell>
          <table:table-cell table:style-name="ce133" table:formula="of:=(1+[.E104])/(1+[.$N104])-1" office:value-type="percentage" office:value="-0.0248433985150269" calcext:value-type="percentage">
            <text:p>-2.48 %</text:p>
          </table:table-cell>
          <table:table-cell table:number-columns-repeated="16366"/>
        </table:table-row>
        <table:table-row table:style-name="ro10">
          <table:table-cell table:style-name="ce20" office:value-type="float" office:value="2014" calcext:value-type="float">
            <text:p>2014</text:p>
          </table:table-cell>
          <table:table-cell table:style-name="ce41" table:formula="of:=([$'S&amp;P 500 &amp; Raw Data'.B90]-[$'S&amp;P 500 &amp; Raw Data'.B89]+[$'S&amp;P 500 &amp; Raw Data'.C90])/[$'S&amp;P 500 &amp; Raw Data'.B89]" office:value-type="percentage" office:value="0.135244216494622" calcext:value-type="percentage">
            <text:p>13.52 %</text:p>
          </table:table-cell>
          <table:table-cell table:style-name="ce41" table:formula="of:=[$'T. Bill rates'.C92]" office:value-type="percentage" office:value="0.000325" calcext:value-type="percentage">
            <text:p>0.03 %</text:p>
          </table:table-cell>
          <table:table-cell table:style-name="ce41" table:formula="of:=[$'S&amp;P 500 &amp; Raw Data'.F90]" office:value-type="percentage" office:value="0.107461804520048" calcext:value-type="percentage">
            <text:p>10.75 %</text:p>
          </table:table-cell>
          <table:table-cell table:style-name="ce41" table:formula="of:=[$'S&amp;P 500 &amp; Raw Data'.J90]" office:value-type="percentage" office:value="0.103849078220305" calcext:value-type="percentage">
            <text:p>10.38 %</text:p>
          </table:table-cell>
          <table:table-cell table:style-name="ce70" table:formula="of:=[.F104]*(1+[.B105])" office:value-type="float" office:value="290115.415011036" calcext:value-type="float">
            <text:p><text:s/>$290,115.42 </text:p>
          </table:table-cell>
          <table:table-cell table:style-name="ce70" table:formula="of:=[.G104]*(1+[.C105])" office:value-type="float" office:value="1983.36196887987" calcext:value-type="float">
            <text:p><text:s/>$1,983.36 </text:p>
          </table:table-cell>
          <table:table-cell table:style-name="ce98" table:formula="of:=[.H104]*(1+[.D105])" office:value-type="float" office:value="6972.3418672789" calcext:value-type="float">
            <text:p><text:s/>$6,972.34 </text:p>
          </table:table-cell>
          <table:table-cell table:style-name="ce70" table:formula="of:=[.I104]*(1+[.E105])" office:value-type="float" office:value="36089.8166099991" calcext:value-type="float">
            <text:p><text:s/>$36,089.82 </text:p>
          </table:table-cell>
          <table:table-cell table:style-name="ce41" table:formula="of:=[.B105]-[.C105]" office:value-type="percentage" office:value="0.134919216494622" calcext:value-type="percentage">
            <text:p>13.49 %</text:p>
          </table:table-cell>
          <table:table-cell table:style-name="ce115" table:formula="of:=[.B105]-[.D105]" office:value-type="percentage" office:value="0.0277824119745748" calcext:value-type="percentage">
            <text:p>2.78 %</text:p>
          </table:table-cell>
          <table:table-cell table:style-name="ce122" table:formula="of:=[.B105]-[.E105]" office:value-type="percentage" office:value="0.0313951382743177" calcext:value-type="percentage">
            <text:p>3.14 %</text:p>
          </table:table-cell>
          <table:table-cell table:style-name="ce122" table:formula="of:=(([.F105]/100)^(1/([.A105]-[.$A$19]+1)))-(([.H105]/100)^(1/([.A105]-[.$A$19]+1)))" office:value-type="percentage" office:value="0.0459750293758334" calcext:value-type="percentage">
            <text:p>4.60 %</text:p>
          </table:table-cell>
          <table:table-cell table:style-name="ce127" office:value-type="percentage" office:value="0.0162222" calcext:value-type="percentage">
            <text:p>1.62 %</text:p>
          </table:table-cell>
          <table:table-cell table:style-name="ce133" table:formula="of:=(1+[.B105])/(1+[.$N105])-1" office:value-type="percentage" office:value="0.117122039347913" calcext:value-type="percentage">
            <text:p>11.71 %</text:p>
          </table:table-cell>
          <table:table-cell table:style-name="ce133" table:formula="of:=(1+[.C105])/(1+[.$N105])-1" office:value-type="percentage" office:value="-0.0156434291634252" calcext:value-type="percentage">
            <text:p>-1.56 %</text:p>
          </table:table-cell>
          <table:table-cell table:style-name="ce133" table:formula="of:=(1+[.D105])/(1+[.$N105])-1" office:value-type="percentage" office:value="0.0897831247143071" calcext:value-type="percentage">
            <text:p>8.98 %</text:p>
          </table:table-cell>
          <table:table-cell table:style-name="ce133" table:formula="of:=(1+[.E105])/(1+[.$N105])-1" office:value-type="percentage" office:value="0.0862280692355517" calcext:value-type="percentage">
            <text:p>8.62 %</text:p>
          </table:table-cell>
          <table:table-cell table:number-columns-repeated="16366"/>
        </table:table-row>
        <table:table-row table:style-name="ro10">
          <table:table-cell table:style-name="ce21" office:value-type="float" office:value="2015" calcext:value-type="float">
            <text:p>2015</text:p>
          </table:table-cell>
          <table:table-cell table:style-name="ce41" table:formula="of:=([$'S&amp;P 500 &amp; Raw Data'.B91]-[$'S&amp;P 500 &amp; Raw Data'.B90]+[$'S&amp;P 500 &amp; Raw Data'.C91])/[$'S&amp;P 500 &amp; Raw Data'.B90]" office:value-type="percentage" office:value="0.0137889164116761" calcext:value-type="percentage">
            <text:p>1.38 %</text:p>
          </table:table-cell>
          <table:table-cell table:style-name="ce41" table:formula="of:=[$'T. Bill rates'.C93]" office:value-type="percentage" office:value="0.000525" calcext:value-type="percentage">
            <text:p>0.05 %</text:p>
          </table:table-cell>
          <table:table-cell table:style-name="ce41" table:formula="of:=[$'S&amp;P 500 &amp; Raw Data'.F91]" office:value-type="percentage" office:value="0.0128429967097922" calcext:value-type="percentage">
            <text:p>1.28 %</text:p>
          </table:table-cell>
          <table:table-cell table:style-name="ce41" table:formula="of:=[$'S&amp;P 500 &amp; Raw Data'.J91]" office:value-type="percentage" office:value="-0.00697518367903249" calcext:value-type="percentage">
            <text:p>-0.70 %</text:p>
          </table:table-cell>
          <table:table-cell table:style-name="ce70" table:formula="of:=[.F105]*(1+[.B106])" office:value-type="float" office:value="294115.792218362" calcext:value-type="float">
            <text:p><text:s/>$294,115.79 </text:p>
          </table:table-cell>
          <table:table-cell table:style-name="ce70" table:formula="of:=[.G105]*(1+[.C106])" office:value-type="float" office:value="1984.40323391354" calcext:value-type="float">
            <text:p><text:s/>$1,984.40 </text:p>
          </table:table-cell>
          <table:table-cell table:style-name="ce98" table:formula="of:=[.H105]*(1+[.D106])" office:value-type="float" office:value="7061.88763093991" calcext:value-type="float">
            <text:p><text:s/>$7,061.89 </text:p>
          </table:table-cell>
          <table:table-cell table:style-name="ce70" table:formula="of:=[.I105]*(1+[.E106])" office:value-type="float" office:value="35838.0835102018" calcext:value-type="float">
            <text:p><text:s/>$35,838.08 </text:p>
          </table:table-cell>
          <table:table-cell table:style-name="ce41" table:formula="of:=[.B106]-[.C106]" office:value-type="percentage" office:value="0.0132639164116761" calcext:value-type="percentage">
            <text:p>1.33 %</text:p>
          </table:table-cell>
          <table:table-cell table:style-name="ce115" table:formula="of:=[.B106]-[.D106]" office:value-type="percentage" office:value="0.000945919701883914" calcext:value-type="percentage">
            <text:p>0.09 %</text:p>
          </table:table-cell>
          <table:table-cell table:style-name="ce122" table:formula="of:=[.B106]-[.E106]" office:value-type="percentage" office:value="0.0207641000907086" calcext:value-type="percentage">
            <text:p>2.08 %</text:p>
          </table:table-cell>
          <table:table-cell table:style-name="ce122" table:formula="of:=(([.F106]/100)^(1/([.A106]-[.$A$19]+1)))-(([.H106]/100)^(1/([.A106]-[.$A$19]+1)))" office:value-type="percentage" office:value="0.0454344573137655" calcext:value-type="percentage">
            <text:p>4.54 %</text:p>
          </table:table-cell>
          <table:table-cell table:style-name="ce127" office:value-type="percentage" office:value="0.0011863" calcext:value-type="percentage">
            <text:p>0.12 %</text:p>
          </table:table-cell>
          <table:table-cell table:style-name="ce133" table:formula="of:=(1+[.B106])/(1+[.$N106])-1" office:value-type="percentage" office:value="0.0125876836425709" calcext:value-type="percentage">
            <text:p>1.26 %</text:p>
          </table:table-cell>
          <table:table-cell table:style-name="ce133" table:formula="of:=(1+[.C106])/(1+[.$N106])-1" office:value-type="percentage" office:value="-0.000660516429359825" calcext:value-type="percentage">
            <text:p>-0.07 %</text:p>
          </table:table-cell>
          <table:table-cell table:style-name="ce133" table:formula="of:=(1+[.D106])/(1+[.$N106])-1" office:value-type="percentage" office:value="0.0116428847556067" calcext:value-type="percentage">
            <text:p>1.16 %</text:p>
          </table:table-cell>
          <table:table-cell table:style-name="ce133" table:formula="of:=(1+[.E106])/(1+[.$N106])-1" office:value-type="percentage" office:value="-0.00815181318305347" calcext:value-type="percentage">
            <text:p>-0.82 %</text:p>
          </table:table-cell>
          <table:table-cell table:number-columns-repeated="16366"/>
        </table:table-row>
        <table:table-row table:style-name="ro10">
          <table:table-cell table:style-name="ce22" office:value-type="float" office:value="2016" calcext:value-type="float">
            <text:p>2016</text:p>
          </table:table-cell>
          <table:table-cell table:style-name="ce41" table:formula="of:=([$'S&amp;P 500 &amp; Raw Data'.B92]-[$'S&amp;P 500 &amp; Raw Data'.B91]+[$'S&amp;P 500 &amp; Raw Data'.C92])/[$'S&amp;P 500 &amp; Raw Data'.B91]" office:value-type="percentage" office:value="0.117730808747982" calcext:value-type="percentage">
            <text:p>11.77 %</text:p>
          </table:table-cell>
          <table:table-cell table:style-name="ce41" table:formula="of:=[$'T. Bill rates'.C94]" office:value-type="percentage" office:value="0.003175" calcext:value-type="percentage">
            <text:p>0.32 %</text:p>
          </table:table-cell>
          <table:table-cell table:style-name="ce41" table:formula="of:=[$'S&amp;P 500 &amp; Raw Data'.F92]" office:value-type="percentage" office:value="0.00690550469874779" calcext:value-type="percentage">
            <text:p>0.69 %</text:p>
          </table:table-cell>
          <table:table-cell table:style-name="ce41" table:formula="of:=[$'S&amp;P 500 &amp; Raw Data'.J92]" office:value-type="percentage" office:value="0.103651058217932" calcext:value-type="percentage">
            <text:p>10.37 %</text:p>
          </table:table-cell>
          <table:table-cell table:style-name="ce70" table:formula="of:=[.F106]*(1+[.B107])" office:value-type="float" office:value="328742.282301783" calcext:value-type="float">
            <text:p><text:s/>$328,742.28 </text:p>
          </table:table-cell>
          <table:table-cell table:style-name="ce70" table:formula="of:=[.G106]*(1+[.C107])" office:value-type="float" office:value="1990.70371418121" calcext:value-type="float">
            <text:p><text:s/>$1,990.70 </text:p>
          </table:table-cell>
          <table:table-cell table:style-name="ce98" table:formula="of:=[.H106]*(1+[.D107])" office:value-type="float" office:value="7110.65352915739" calcext:value-type="float">
            <text:p><text:s/>$7,110.65 </text:p>
          </table:table-cell>
          <table:table-cell table:style-name="ce70" table:formula="of:=[.I106]*(1+[.E107])" office:value-type="float" office:value="39552.7387905368" calcext:value-type="float">
            <text:p><text:s/>$39,552.74 </text:p>
          </table:table-cell>
          <table:table-cell table:style-name="ce41" table:formula="of:=[.B107]-[.C107]" office:value-type="percentage" office:value="0.114555808747982" calcext:value-type="percentage">
            <text:p>11.46 %</text:p>
          </table:table-cell>
          <table:table-cell table:style-name="ce115" table:formula="of:=[.B107]-[.D107]" office:value-type="percentage" office:value="0.110825304049234" calcext:value-type="percentage">
            <text:p>11.08 %</text:p>
          </table:table-cell>
          <table:table-cell table:style-name="ce122" table:formula="of:=[.B107]-[.E107]" office:value-type="percentage" office:value="0.0140797505300495" calcext:value-type="percentage">
            <text:p>1.41 %</text:p>
          </table:table-cell>
          <table:table-cell table:style-name="ce122" table:formula="of:=(([.F107]/100)^(1/([.A107]-[.$A$19]+1)))-(([.H107]/100)^(1/([.A107]-[.$A$19]+1)))" office:value-type="percentage" office:value="0.0461765012476878" calcext:value-type="percentage">
            <text:p>4.62 %</text:p>
          </table:table-cell>
          <table:table-cell table:style-name="ce127" office:value-type="percentage" office:value="0.0126158" calcext:value-type="percentage">
            <text:p>1.26 %</text:p>
          </table:table-cell>
          <table:table-cell table:style-name="ce133" table:formula="of:=(1+[.B107])/(1+[.$N107])-1" office:value-type="percentage" office:value="0.10380542032623" calcext:value-type="percentage">
            <text:p>10.38 %</text:p>
          </table:table-cell>
          <table:table-cell table:style-name="ce133" table:formula="of:=(1+[.C107])/(1+[.$N107])-1" office:value-type="percentage" office:value="-0.00932318061796011" calcext:value-type="percentage">
            <text:p>-0.93 %</text:p>
          </table:table-cell>
          <table:table-cell table:style-name="ce133" table:formula="of:=(1+[.D107])/(1+[.$N107])-1" office:value-type="percentage" office:value="-0.00563915287639416" calcext:value-type="percentage">
            <text:p>-0.56 %</text:p>
          </table:table-cell>
          <table:table-cell table:style-name="ce133" table:formula="of:=(1+[.E107])/(1+[.$N107])-1" office:value-type="percentage" office:value="0.0899010841208798" calcext:value-type="percentage">
            <text:p>8.99 %</text:p>
          </table:table-cell>
          <table:table-cell table:number-columns-repeated="16366"/>
        </table:table-row>
        <table:table-row table:style-name="ro10">
          <table:table-cell table:style-name="ce22" office:value-type="float" office:value="2017" calcext:value-type="float">
            <text:p>2017</text:p>
          </table:table-cell>
          <table:table-cell table:style-name="ce41" table:formula="of:=([$'S&amp;P 500 &amp; Raw Data'.B93]-[$'S&amp;P 500 &amp; Raw Data'.B92]+[$'S&amp;P 500 &amp; Raw Data'.C93])/[$'S&amp;P 500 &amp; Raw Data'.B92]" office:value-type="percentage" office:value="0.216054814344993" calcext:value-type="percentage">
            <text:p>21.61 %</text:p>
          </table:table-cell>
          <table:table-cell table:style-name="ce41" table:formula="of:=[$'T. Bill rates'.C95]" office:value-type="percentage" office:value="0.00930833333333333" calcext:value-type="percentage">
            <text:p>0.93 %</text:p>
          </table:table-cell>
          <table:table-cell table:style-name="ce41" table:formula="of:=[$'S&amp;P 500 &amp; Raw Data'.F93]" office:value-type="percentage" office:value="0.0280171627077895" calcext:value-type="percentage">
            <text:p>2.80 %</text:p>
          </table:table-cell>
          <table:table-cell table:style-name="ce41" table:formula="of:=[$'S&amp;P 500 &amp; Raw Data'.J93]" office:value-type="percentage" office:value="0.0972390194624884" calcext:value-type="percentage">
            <text:p>9.72 %</text:p>
          </table:table-cell>
          <table:table-cell table:style-name="ce70" table:formula="of:=[.F107]*(1+[.B108])" office:value-type="float" office:value="399768.635071844" calcext:value-type="float">
            <text:p><text:s/>$399,768.64 </text:p>
          </table:table-cell>
          <table:table-cell table:style-name="ce70" table:formula="of:=[.G107]*(1+[.C108])" office:value-type="float" office:value="2009.23384792071" calcext:value-type="float">
            <text:p><text:s/>$2,009.23 </text:p>
          </table:table-cell>
          <table:table-cell table:style-name="ce98" table:formula="of:=[.H107]*(1+[.D108])" office:value-type="float" office:value="7309.87386604251" calcext:value-type="float">
            <text:p><text:s/>$7,309.87 </text:p>
          </table:table-cell>
          <table:table-cell table:style-name="ce70" table:formula="of:=[.I107]*(1+[.E108])" office:value-type="float" office:value="43398.8083275846" calcext:value-type="float">
            <text:p><text:s/>$43,398.81 </text:p>
          </table:table-cell>
          <table:table-cell table:style-name="ce41" table:formula="of:=[.B108]-[.C108]" office:value-type="percentage" office:value="0.206746481011659" calcext:value-type="percentage">
            <text:p>20.67 %</text:p>
          </table:table-cell>
          <table:table-cell table:style-name="ce115" table:formula="of:=[.B108]-[.D108]" office:value-type="percentage" office:value="0.188037651637203" calcext:value-type="percentage">
            <text:p>18.80 %</text:p>
          </table:table-cell>
          <table:table-cell table:style-name="ce122" table:formula="of:=[.B108]-[.E108]" office:value-type="percentage" office:value="0.118815794882504" calcext:value-type="percentage">
            <text:p>11.88 %</text:p>
          </table:table-cell>
          <table:table-cell table:style-name="ce122" table:formula="of:=(([.F108]/100)^(1/([.A108]-[.$A$19]+1)))-(([.H108]/100)^(1/([.A108]-[.$A$19]+1)))" office:value-type="percentage" office:value="0.047686840373502" calcext:value-type="percentage">
            <text:p>4.77 %</text:p>
          </table:table-cell>
          <table:table-cell table:style-name="ce127" office:value-type="percentage" office:value="0.0213011" calcext:value-type="percentage">
            <text:p>2.13 %</text:p>
          </table:table-cell>
          <table:table-cell table:style-name="ce133" table:formula="of:=(1+[.B108])/(1+[.$N108])-1" office:value-type="percentage" office:value="0.190691769885485" calcext:value-type="percentage">
            <text:p>19.07 %</text:p>
          </table:table-cell>
          <table:table-cell table:style-name="ce133" table:formula="of:=(1+[.C108])/(1+[.$N108])-1" office:value-type="percentage" office:value="-0.0117426356112481" calcext:value-type="percentage">
            <text:p>-1.17 %</text:p>
          </table:table-cell>
          <table:table-cell table:style-name="ce133" table:formula="of:=(1+[.D108])/(1+[.$N108])-1" office:value-type="percentage" office:value="0.00657598695212358" calcext:value-type="percentage">
            <text:p>0.66 %</text:p>
          </table:table-cell>
          <table:table-cell table:style-name="ce133" table:formula="of:=(1+[.E108])/(1+[.$N108])-1" office:value-type="percentage" office:value="0.074354095440109" calcext:value-type="percentage">
            <text:p>7.44 %</text:p>
          </table:table-cell>
          <table:table-cell table:number-columns-repeated="16366"/>
        </table:table-row>
        <table:table-row table:style-name="ro10">
          <table:table-cell table:style-name="ce22" office:value-type="float" office:value="2018" calcext:value-type="float">
            <text:p>2018</text:p>
          </table:table-cell>
          <table:table-cell table:style-name="ce41" table:formula="of:=([$'S&amp;P 500 &amp; Raw Data'.B94]-[$'S&amp;P 500 &amp; Raw Data'.B93]+[$'S&amp;P 500 &amp; Raw Data'.C94])/[$'S&amp;P 500 &amp; Raw Data'.B93]" office:value-type="percentage" office:value="-0.0422686928908854" calcext:value-type="percentage">
            <text:p>-4.23 %</text:p>
          </table:table-cell>
          <table:table-cell table:style-name="ce41" table:formula="of:=[$'T. Bill rates'.C96]" office:value-type="percentage" office:value="0.0193916666666667" calcext:value-type="percentage">
            <text:p>1.94 %</text:p>
          </table:table-cell>
          <table:table-cell table:style-name="ce41" table:formula="of:=[$'S&amp;P 500 &amp; Raw Data'.F94]" office:value-type="percentage" office:value="-0.000166923857134026" calcext:value-type="percentage">
            <text:p>-0.02 %</text:p>
          </table:table-cell>
          <table:table-cell table:style-name="ce41" table:formula="of:=[$'S&amp;P 500 &amp; Raw Data'.J94]" office:value-type="percentage" office:value="-0.0276262822171722" calcext:value-type="percentage">
            <text:p>-2.76 %</text:p>
          </table:table-cell>
          <table:table-cell table:style-name="ce70" table:formula="of:=[.F108]*(1+[.B109])" office:value-type="float" office:value="382870.937408584" calcext:value-type="float">
            <text:p><text:s/>$382,870.94 </text:p>
          </table:table-cell>
          <table:table-cell table:style-name="ce70" table:formula="of:=[.G108]*(1+[.C109])" office:value-type="float" office:value="2048.19624095498" calcext:value-type="float">
            <text:p><text:s/>$2,048.20 </text:p>
          </table:table-cell>
          <table:table-cell table:style-name="ce98" table:formula="of:=[.H108]*(1+[.D109])" office:value-type="float" office:value="7308.65367370163" calcext:value-type="float">
            <text:p><text:s/>$7,308.65 </text:p>
          </table:table-cell>
          <table:table-cell table:style-name="ce70" table:formula="of:=[.I108]*(1+[.E109])" office:value-type="float" office:value="42199.8606008377" calcext:value-type="float">
            <text:p><text:s/>$42,199.86 </text:p>
          </table:table-cell>
          <table:table-cell table:style-name="ce41" table:formula="of:=[.B109]-[.C109]" office:value-type="percentage" office:value="-0.0616603595575521" calcext:value-type="percentage">
            <text:p>-6.17 %</text:p>
          </table:table-cell>
          <table:table-cell table:style-name="ce115" table:formula="of:=[.B109]-[.D109]" office:value-type="percentage" office:value="-0.0421017690337514" calcext:value-type="percentage">
            <text:p>-4.21 %</text:p>
          </table:table-cell>
          <table:table-cell table:style-name="ce122" table:formula="of:=[.B109]-[.E109]" office:value-type="percentage" office:value="-0.0146424106737132" calcext:value-type="percentage">
            <text:p>-1.46 %</text:p>
          </table:table-cell>
          <table:table-cell table:style-name="ce122" table:formula="of:=(([.F109]/100)^(1/([.A109]-[.$A$19]+1)))-(([.H109]/100)^(1/([.A109]-[.$A$19]+1)))" office:value-type="percentage" office:value="0.0466086690946326" calcext:value-type="percentage">
            <text:p>4.66 %</text:p>
          </table:table-cell>
          <table:table-cell table:style-name="ce127" office:value-type="percentage" office:value="0.0244258" calcext:value-type="percentage">
            <text:p>2.44 %</text:p>
          </table:table-cell>
          <table:table-cell table:style-name="ce133" table:formula="of:=(1+[.B109])/(1+[.$N109])-1" office:value-type="percentage" office:value="-0.0651042690362595" calcext:value-type="percentage">
            <text:p>-6.51 %</text:p>
          </table:table-cell>
          <table:table-cell table:style-name="ce133" table:formula="of:=(1+[.C109])/(1+[.$N109])-1" office:value-type="percentage" office:value="-0.00491410244971691" calcext:value-type="percentage">
            <text:p>-0.49 %</text:p>
          </table:table-cell>
          <table:table-cell table:style-name="ce133" table:formula="of:=(1+[.D109])/(1+[.$N109])-1" office:value-type="percentage" office:value="-0.0240063495639548" calcext:value-type="percentage">
            <text:p>-2.40 %</text:p>
          </table:table-cell>
          <table:table-cell table:style-name="ce133" table:formula="of:=(1+[.E109])/(1+[.$N109])-1" office:value-type="percentage" office:value="-0.0508109833012524" calcext:value-type="percentage">
            <text:p>-5.08 %</text:p>
          </table:table-cell>
          <table:table-cell table:number-columns-repeated="16366"/>
        </table:table-row>
        <table:table-row table:style-name="ro10">
          <table:table-cell table:style-name="ce20" office:value-type="float" office:value="2019" calcext:value-type="float">
            <text:p>2019</text:p>
          </table:table-cell>
          <table:table-cell table:style-name="ce41" table:formula="of:=([$'S&amp;P 500 &amp; Raw Data'.B95]-[$'S&amp;P 500 &amp; Raw Data'.B94]+[$'S&amp;P 500 &amp; Raw Data'.C95])/[$'S&amp;P 500 &amp; Raw Data'.B94]" office:value-type="percentage" office:value="0.312236472066538" calcext:value-type="percentage">
            <text:p>31.22 %</text:p>
          </table:table-cell>
          <table:table-cell table:style-name="ce41" office:value-type="percentage" office:value="0.0155" calcext:value-type="percentage">
            <text:p>1.55 %</text:p>
          </table:table-cell>
          <table:table-cell table:style-name="ce41" table:formula="of:=[$'S&amp;P 500 &amp; Raw Data'.F95]" office:value-type="percentage" office:value="0.0963563074154839" calcext:value-type="percentage">
            <text:p>9.64 %</text:p>
          </table:table-cell>
          <table:table-cell table:style-name="ce41" table:formula="of:=[$'S&amp;P 500 &amp; Raw Data'.J95]" office:value-type="percentage" office:value="0.153294575623685" calcext:value-type="percentage">
            <text:p>15.33 %</text:p>
          </table:table-cell>
          <table:table-cell table:style-name="ce70" table:formula="of:=[.F109]*(1+[.B110])" office:value-type="float" office:value="502417.208161848" calcext:value-type="float">
            <text:p><text:s/>$502,417.21 </text:p>
          </table:table-cell>
          <table:table-cell table:style-name="ce70" table:formula="of:=[.G109]*(1+[.C110])" office:value-type="float" office:value="2079.94328268978" calcext:value-type="float">
            <text:p><text:s/>$2,079.94 </text:p>
          </table:table-cell>
          <table:table-cell table:style-name="ce98" table:formula="of:=[.H109]*(1+[.D110])" office:value-type="float" office:value="8012.88855387813" calcext:value-type="float">
            <text:p><text:s/>$8,012.89 </text:p>
          </table:table-cell>
          <table:table-cell table:style-name="ce70" table:formula="of:=[.I109]*(1+[.E110])" office:value-type="float" office:value="48668.8703230218" calcext:value-type="float">
            <text:p><text:s/>$48,668.87 </text:p>
          </table:table-cell>
          <table:table-cell table:style-name="ce41" table:formula="of:=[.B110]-[.C110]" office:value-type="percentage" office:value="0.296736472066538" calcext:value-type="percentage">
            <text:p>29.67 %</text:p>
          </table:table-cell>
          <table:table-cell table:style-name="ce115" table:formula="of:=[.B110]-[.D110]" office:value-type="percentage" office:value="0.215880164651054" calcext:value-type="percentage">
            <text:p>21.59 %</text:p>
          </table:table-cell>
          <table:table-cell table:style-name="ce122" table:formula="of:=[.B110]-[.E110]" office:value-type="percentage" office:value="0.158941896442853" calcext:value-type="percentage">
            <text:p>15.89 %</text:p>
          </table:table-cell>
          <table:table-cell table:style-name="ce122" table:formula="of:=(([.F110]/100)^(1/([.A110]-[.$A$19]+1)))-(([.H110]/100)^(1/([.A110]-[.$A$19]+1)))" office:value-type="percentage" office:value="0.0482547719375044" calcext:value-type="percentage">
            <text:p>4.83 %</text:p>
          </table:table-cell>
          <table:table-cell table:style-name="ce127" office:value-type="percentage" office:value="0.0229" calcext:value-type="percentage">
            <text:p>2.29 %</text:p>
          </table:table-cell>
          <table:table-cell table:style-name="ce133" table:formula="of:=(1+[.B110])/(1+[.$N110])-1" office:value-type="percentage" office:value="0.2828590009449" calcext:value-type="percentage">
            <text:p>28.29 %</text:p>
          </table:table-cell>
          <table:table-cell table:style-name="ce133" table:formula="of:=(1+[.C110])/(1+[.$N110])-1" office:value-type="percentage" office:value="-0.00723433375696536" calcext:value-type="percentage">
            <text:p>-0.72 %</text:p>
          </table:table-cell>
          <table:table-cell table:style-name="ce133" table:formula="of:=(1+[.D110])/(1+[.$N110])-1" office:value-type="percentage" office:value="0.0718118168105228" calcext:value-type="percentage">
            <text:p>7.18 %</text:p>
          </table:table-cell>
          <table:table-cell table:style-name="ce133" table:formula="of:=(1+[.E110])/(1+[.$N110])-1" office:value-type="percentage" office:value="0.127475389210759" calcext:value-type="percentage">
            <text:p>12.75 %</text:p>
          </table:table-cell>
          <table:table-cell table:number-columns-repeated="16366"/>
        </table:table-row>
        <table:table-row table:style-name="ro10">
          <table:table-cell table:style-name="ce22" office:value-type="float" office:value="2020" calcext:value-type="float">
            <text:p>2020</text:p>
          </table:table-cell>
          <table:table-cell table:style-name="ce42" office:value-type="percentage" office:value="0.1801" calcext:value-type="percentage">
            <text:p>18.01 %</text:p>
          </table:table-cell>
          <table:table-cell table:style-name="ce42" office:value-type="percentage" office:value="0.0009" calcext:value-type="percentage">
            <text:p>0.09 %</text:p>
          </table:table-cell>
          <table:table-cell table:style-name="ce42" office:value-type="percentage" office:value="0.1133" calcext:value-type="percentage">
            <text:p>11.33 %</text:p>
          </table:table-cell>
          <table:table-cell table:style-name="ce42" office:value-type="percentage" office:value="0.1041" calcext:value-type="percentage">
            <text:p>10.41 %</text:p>
          </table:table-cell>
          <table:table-cell table:style-name="ce71" table:formula="of:=[.F110]*(1+[.B111])" office:value-type="float" office:value="592902.547351797" calcext:value-type="float">
            <text:p><text:s/>592,902.55 </text:p>
          </table:table-cell>
          <table:table-cell table:style-name="ce71" table:formula="of:=[.G110]*(1+[.C111])" office:value-type="float" office:value="2081.8152316442" calcext:value-type="float">
            <text:p><text:s/>2,081.82 </text:p>
          </table:table-cell>
          <table:table-cell table:style-name="ce99" table:formula="of:=[.H110]*(1+[.D111])" office:value-type="float" office:value="8920.74882703252" calcext:value-type="float">
            <text:p><text:s/>8,920.75 </text:p>
          </table:table-cell>
          <table:table-cell table:style-name="ce71" table:formula="of:=[.I110]*(1+[.E111])" office:value-type="float" office:value="53735.2997236484" calcext:value-type="float">
            <text:p><text:s/>53,735.30 </text:p>
          </table:table-cell>
          <table:table-cell table:style-name="ce107" office:value-type="percentage" office:value="0.1792" calcext:value-type="percentage">
            <text:p>17.92 %</text:p>
          </table:table-cell>
          <table:table-cell table:style-name="ce116" office:value-type="percentage" office:value="0.0668" calcext:value-type="percentage">
            <text:p>6.68 %</text:p>
          </table:table-cell>
          <table:table-cell table:style-name="ce123" office:value-type="percentage" office:value="0.076" calcext:value-type="percentage">
            <text:p>7.60 %</text:p>
          </table:table-cell>
          <table:table-cell table:style-name="ce123" office:value-type="percentage" office:value="0.0484" calcext:value-type="percentage">
            <text:p>4.84 %</text:p>
          </table:table-cell>
          <table:table-cell table:style-name="ce128" office:value-type="percentage" office:value="0.012" calcext:value-type="percentage">
            <text:p>1.20 %</text:p>
          </table:table-cell>
          <table:table-cell table:style-name="ce134" table:formula="of:=(1+[.B111])/(1+[.$N111])-1" office:value-type="percentage" office:value="0.166106719367589" calcext:value-type="percentage">
            <text:p>16.61 %</text:p>
          </table:table-cell>
          <table:table-cell table:style-name="ce141" table:formula="of:=(1+[.C111])/(1+[.$N111])-1" office:value-type="percentage" office:value="-0.0109683794466404" calcext:value-type="percentage">
            <text:p>-1.10 %</text:p>
          </table:table-cell>
          <table:table-cell table:style-name="ce141" table:formula="of:=(1+[.D111])/(1+[.$N111])-1" office:value-type="percentage" office:value="0.100098814229249" calcext:value-type="percentage">
            <text:p>10.01 %</text:p>
          </table:table-cell>
          <table:table-cell table:style-name="ce141" table:formula="of:=(1+[.E111])/(1+[.$N111])-1" office:value-type="percentage" office:value="0.0910079051383399" calcext:value-type="percentage">
            <text:p>9.10 %</text:p>
          </table:table-cell>
          <table:table-cell table:number-columns-repeated="16366"/>
        </table:table-row>
        <table:table-row table:style-name="ro10" table:number-rows-repeated="2">
          <table:table-cell table:style-name="ce23"/>
          <table:table-cell table:style-name="ce43" table:number-columns-repeated="4"/>
          <table:table-cell table:style-name="ce72" table:number-columns-repeated="4"/>
          <table:table-cell table:style-name="ce108" table:number-columns-repeated="4"/>
          <table:table-cell table:style-name="ce129"/>
          <table:table-cell table:style-name="ce135" table:number-columns-repeated="4"/>
          <table:table-cell table:style-name="ce110" table:number-columns-repeated="16366"/>
        </table:table-row>
        <table:table-row table:style-name="ro10">
          <table:table-cell table:style-name="ce24" office:value-type="string" calcext:value-type="string" table:number-columns-spanned="5" table:number-rows-spanned="1">
            <text:p>Tasa libre de riesgo (Rf).</text:p>
          </table:table-cell>
          <table:covered-table-cell table:number-columns-repeated="4" table:style-name="ce24"/>
          <table:table-cell table:style-name="ce72"/>
          <table:table-cell table:style-name="ce86" office:value-type="string" office:string-value="La prima por riesgo de mercado (Rm – Rf)." calcext:value-type="string" table:number-columns-spanned="5" table:number-rows-spanned="1">
            <text:p><text:s/>La prima por riesgo de mercado (Rm – Rf). </text:p>
          </table:table-cell>
          <table:covered-table-cell table:number-columns-repeated="4" table:style-name="ce86"/>
          <table:table-cell table:style-name="ce108" table:number-columns-repeated="2"/>
          <table:table-cell table:style-name="ce129"/>
          <table:table-cell table:style-name="ce135" table:number-columns-repeated="4"/>
          <table:table-cell table:style-name="ce110" table:number-columns-repeated="16366"/>
        </table:table-row>
        <table:table-row table:style-name="ro10">
          <table:table-cell table:style-name="ce23"/>
          <table:table-cell table:style-name="ce43" table:number-columns-repeated="4"/>
          <table:table-cell table:style-name="ce72" table:number-columns-repeated="4"/>
          <table:table-cell table:style-name="ce108" table:number-columns-repeated="4"/>
          <table:table-cell table:style-name="ce129"/>
          <table:table-cell table:style-name="ce135" table:number-columns-repeated="4"/>
          <table:table-cell table:style-name="ce144" table:number-columns-repeated="16366"/>
        </table:table-row>
        <table:table-row table:style-name="ro10">
          <table:table-cell table:style-name="ce25" office:value-type="string" calcext:value-type="string" table:number-columns-spanned="5" table:number-rows-spanned="1">
            <text:p>Tabla </text:p>
          </table:table-cell>
          <table:covered-table-cell table:number-columns-repeated="4" table:style-name="ce25"/>
          <table:table-cell table:style-name="ce73"/>
          <table:table-cell table:style-name="ce87" office:value-type="string" office:string-value="Tabla " calcext:value-type="string" table:number-columns-spanned="5" table:number-rows-spanned="1">
            <text:p><text:s/>Tabla <text:s/></text:p>
          </table:table-cell>
          <table:covered-table-cell table:number-columns-repeated="4" table:style-name="ce87"/>
          <table:table-cell table:style-name="ce124" table:number-columns-repeated="2"/>
          <table:table-cell table:style-name="ce127"/>
          <table:table-cell table:style-name="ce136" table:number-columns-repeated="4"/>
          <table:table-cell table:number-columns-repeated="16366"/>
        </table:table-row>
        <table:table-row table:style-name="ro10">
          <table:table-cell table:style-name="ce26" office:value-type="string" calcext:value-type="string" table:number-columns-spanned="5" table:number-rows-spanned="1">
            <text:p>Retornos historicos Anuales de Bonos del Tesoro EE.UU.</text:p>
          </table:table-cell>
          <table:covered-table-cell table:number-columns-repeated="4" table:style-name="ce26"/>
          <table:table-cell table:style-name="ce73"/>
          <table:table-cell table:style-name="ce88" office:value-type="string" calcext:value-type="string" table:number-columns-spanned="5" table:number-rows-spanned="1">
            <text:p>Prima de Riesgo del Mercado de EE.UU.</text:p>
          </table:table-cell>
          <table:covered-table-cell table:number-columns-repeated="4" table:style-name="ce88"/>
          <table:table-cell table:style-name="ce124" table:number-columns-repeated="2"/>
          <table:table-cell table:style-name="ce127"/>
          <table:table-cell table:style-name="ce136" table:number-columns-repeated="4"/>
          <table:table-cell table:number-columns-repeated="16366"/>
        </table:table-row>
        <table:table-row table:style-name="ro10">
          <table:table-cell table:style-name="ce27" office:value-type="string" calcext:value-type="string" table:number-columns-spanned="1" table:number-rows-spanned="2">
            <text:p>Year</text:p>
          </table:table-cell>
          <table:table-cell table:style-name="ce44" office:value-type="string" calcext:value-type="string" table:number-columns-spanned="4" table:number-rows-spanned="1">
            <text:p>Annual Returns on Investments in</text:p>
          </table:table-cell>
          <table:covered-table-cell table:number-columns-repeated="3" table:style-name="ce44"/>
          <table:table-cell table:style-name="ce73"/>
          <table:table-cell table:style-name="ce89" office:value-type="string" calcext:value-type="string" table:number-columns-spanned="1" table:number-rows-spanned="2">
            <text:p>Year</text:p>
          </table:table-cell>
          <table:table-cell table:style-name="ce44" office:value-type="string" calcext:value-type="string" table:number-columns-spanned="4" table:number-rows-spanned="1">
            <text:p>Annual Risk Premium </text:p>
          </table:table-cell>
          <table:covered-table-cell table:number-columns-repeated="3" table:style-name="ce44"/>
          <table:table-cell table:style-name="ce124" table:number-columns-repeated="2"/>
          <table:table-cell table:style-name="ce127"/>
          <table:table-cell table:style-name="ce136" table:number-columns-repeated="4"/>
          <table:table-cell table:number-columns-repeated="16366"/>
        </table:table-row>
        <table:table-row table:style-name="ro13">
          <table:covered-table-cell table:style-name="ce28"/>
          <table:table-cell table:style-name="ce45" office:value-type="string" calcext:value-type="string">
            <text:p>S&amp;P 500 (Rm)</text:p>
          </table:table-cell>
          <table:table-cell table:style-name="ce58" office:value-type="string" calcext:value-type="string">
            <text:p>3-month T.Bill</text:p>
          </table:table-cell>
          <table:table-cell table:style-name="ce45" office:value-type="string" calcext:value-type="string">
            <text:p>US T. Bond (Rf)</text:p>
          </table:table-cell>
          <table:table-cell table:style-name="ce58" office:value-type="string" calcext:value-type="string">
            <text:p><text:s/>Baa Corporate Bond</text:p>
          </table:table-cell>
          <table:table-cell/>
          <table:covered-table-cell table:style-name="ce90"/>
          <table:table-cell table:style-name="ce100" office:value-type="string" calcext:value-type="string" table:number-columns-spanned="2" table:number-rows-spanned="1">
            <text:p>Risk Premium</text:p>
          </table:table-cell>
          <table:covered-table-cell table:style-name="ce32"/>
          <table:table-cell table:style-name="ce100" office:value-type="string" calcext:value-type="string" table:number-columns-spanned="2" table:number-rows-spanned="1">
            <text:p>Standard Error</text:p>
          </table:table-cell>
          <table:covered-table-cell table:style-name="ce100"/>
          <table:table-cell table:number-columns-repeated="16373"/>
        </table:table-row>
        <table:table-row table:style-name="ro10">
          <table:table-cell table:style-name="ce29" office:value-type="string" calcext:value-type="string" table:number-columns-spanned="5" table:number-rows-spanned="1">
            <text:p>Arithmetic Average Historical Return</text:p>
          </table:table-cell>
          <table:covered-table-cell table:number-columns-repeated="4" table:style-name="ce29"/>
          <table:table-cell table:style-name="ce74"/>
          <table:table-cell table:style-name="ce91"/>
          <table:table-cell table:style-name="ce31" office:value-type="string" calcext:value-type="string">
            <text:p>Stocks - T.Bills</text:p>
          </table:table-cell>
          <table:table-cell table:style-name="ce31" office:value-type="string" calcext:value-type="string">
            <text:p>Stocks - T.Bonds</text:p>
          </table:table-cell>
          <table:table-cell table:style-name="ce31" office:value-type="string" calcext:value-type="string">
            <text:p>Stocks - T.Bills</text:p>
          </table:table-cell>
          <table:table-cell table:style-name="ce117" office:value-type="string" calcext:value-type="string">
            <text:p>Stocks - T.Bonds</text:p>
          </table:table-cell>
          <table:table-cell table:number-columns-repeated="2"/>
          <table:table-cell table:style-name="ce69" office:value-type="string" calcext:value-type="string" table:number-columns-spanned="5" table:number-rows-spanned="1">
            <text:p>Arithmetic Average Annual Real Return</text:p>
          </table:table-cell>
          <table:covered-table-cell table:number-columns-repeated="3" table:style-name="ce57"/>
          <table:covered-table-cell table:style-name="ce142"/>
          <table:table-cell table:number-columns-repeated="16366"/>
        </table:table-row>
        <table:table-row table:style-name="ro10">
          <table:table-cell table:style-name="ce30" office:value-type="string" calcext:value-type="string">
            <text:p>1928-2020</text:p>
          </table:table-cell>
          <table:table-cell table:style-name="ce46" table:formula="of:=AVERAGE([.B19:.B111])" office:value-type="percentage" office:value="0.11641508268128" calcext:value-type="percentage">
            <text:p>11.64 %</text:p>
          </table:table-cell>
          <table:table-cell table:style-name="ce46" table:formula="of:=AVERAGE([.C19:.C111])" office:value-type="percentage" office:value="0.033614605734767" calcext:value-type="percentage">
            <text:p>3.36 %</text:p>
          </table:table-cell>
          <table:table-cell table:style-name="ce46" table:formula="of:=AVERAGE([.D19:.D111])" office:value-type="percentage" office:value="0.0521285430285937" calcext:value-type="percentage">
            <text:p>5.21 %</text:p>
          </table:table-cell>
          <table:table-cell table:style-name="ce46" table:formula="of:=AVERAGE([.E19:.E111])" office:value-type="percentage" office:value="0.0725326885915606" calcext:value-type="percentage">
            <text:p>7.25 %</text:p>
          </table:table-cell>
          <table:table-cell table:style-name="ce75"/>
          <table:table-cell table:style-name="ce92" office:value-type="string" calcext:value-type="string">
            <text:p>1928-2020</text:p>
          </table:table-cell>
          <table:table-cell table:style-name="ce47" table:formula="of:=[.B121]-[.C121]" office:value-type="percentage" office:value="0.0828004769465125" calcext:value-type="percentage">
            <text:p>8.28 %</text:p>
          </table:table-cell>
          <table:table-cell table:style-name="ce47" table:formula="of:=[.B121]-[.D121]" office:value-type="percentage" office:value="0.0642865396526859" calcext:value-type="percentage">
            <text:p>6.43 %</text:p>
          </table:table-cell>
          <table:table-cell table:style-name="ce46" table:formula="of:=STDEV([.J19:.J111])/(([.$A$111]-[.$A$19]+1)^0.5)" office:value-type="percentage" office:value="0.0205594276423397" calcext:value-type="percentage">
            <text:p>2.06 %</text:p>
          </table:table-cell>
          <table:table-cell table:style-name="ce118" table:formula="of:=STDEV([.K19:.K111])/(([.$A$111]-[.$A$19]+1)^0.5)" office:value-type="percentage" office:value="0.0217996092762425" calcext:value-type="percentage">
            <text:p>2.18 %</text:p>
          </table:table-cell>
          <table:table-cell table:number-columns-repeated="2"/>
          <table:table-cell table:style-name="ce130" office:value-type="string" calcext:value-type="string">
            <text:p>1928-2018</text:p>
          </table:table-cell>
          <table:table-cell table:style-name="ce137" table:formula="of:=AVERAGE([.O19:.O111])" office:value-type="percentage" office:value="0.0850089908567674" calcext:value-type="percentage">
            <text:p>8.50 %</text:p>
          </table:table-cell>
          <table:table-cell table:style-name="ce137" table:formula="of:=AVERAGE([.P19:.P111])" office:value-type="percentage" office:value="0.00417415118080925" calcext:value-type="percentage">
            <text:p>0.42 %</text:p>
          </table:table-cell>
          <table:table-cell table:style-name="ce137" table:formula="of:=AVERAGE([.Q19:.Q111])" office:value-type="percentage" office:value="0.0225104354725752" calcext:value-type="percentage">
            <text:p>2.25 %</text:p>
          </table:table-cell>
          <table:table-cell table:style-name="ce137" table:formula="of:=AVERAGE([.R19:.R111])" office:value-type="percentage" office:value="0.0426916212642583" calcext:value-type="percentage">
            <text:p>4.27 %</text:p>
          </table:table-cell>
          <table:table-cell table:number-columns-repeated="16366"/>
        </table:table-row>
        <table:table-row table:style-name="ro10">
          <table:table-cell table:style-name="ce30" office:value-type="string" calcext:value-type="string">
            <text:p>1970-2020</text:p>
          </table:table-cell>
          <table:table-cell table:style-name="ce47" table:formula="of:=AVERAGE([.B61:.B111])" office:value-type="percentage" office:value="0.120129937569719" calcext:value-type="percentage">
            <text:p>12.01 %</text:p>
          </table:table-cell>
          <table:table-cell table:style-name="ce47" table:formula="of:=AVERAGE([.C61:.C111])" office:value-type="percentage" office:value="0.0454599673202615" calcext:value-type="percentage">
            <text:p>4.55 %</text:p>
          </table:table-cell>
          <table:table-cell table:style-name="ce47" table:formula="of:=AVERAGE([.D61:.D111])" office:value-type="percentage" office:value="0.0747162179463941" calcext:value-type="percentage">
            <text:p>7.47 %</text:p>
          </table:table-cell>
          <table:table-cell table:style-name="ce47" table:formula="of:=AVERAGE([.E61:.E111])" office:value-type="percentage" office:value="0.094739418784236" calcext:value-type="percentage">
            <text:p>9.47 %</text:p>
          </table:table-cell>
          <table:table-cell table:style-name="ce76"/>
          <table:table-cell table:style-name="ce92" office:value-type="string" calcext:value-type="string">
            <text:p>1970-2020</text:p>
          </table:table-cell>
          <table:table-cell table:style-name="ce47" table:formula="of:=[.B122]-[.C122]" office:value-type="percentage" office:value="0.0746699702494572" calcext:value-type="percentage">
            <text:p>7.47 %</text:p>
          </table:table-cell>
          <table:table-cell table:style-name="ce47" table:formula="of:=[.B122]-[.D122]" office:value-type="percentage" office:value="0.0454137196233245" calcext:value-type="percentage">
            <text:p>4.54 %</text:p>
          </table:table-cell>
          <table:table-cell table:style-name="ce47" table:formula="of:=STDEV([.J61:.J111])/(([.$A$111]-[.$A$60]+1)^0.5)" office:value-type="percentage" office:value="0.0234707331239517" calcext:value-type="percentage">
            <text:p>2.35 %</text:p>
          </table:table-cell>
          <table:table-cell table:style-name="ce59" table:formula="of:=STDEV([.K61:.K111])/(([.$A$111]-[.$A$61]+1)^0.5)" office:value-type="percentage" office:value="0.0267201253883434" calcext:value-type="percentage">
            <text:p>2.67 %</text:p>
          </table:table-cell>
          <table:table-cell table:number-columns-repeated="2"/>
          <table:table-cell table:style-name="ce131" office:value-type="string" calcext:value-type="string">
            <text:p>1969-2018</text:p>
          </table:table-cell>
          <table:table-cell table:style-name="ce138" table:formula="of:=AVERAGE([.O60:.O109])" office:value-type="percentage" office:value="0.0688099059732736" calcext:value-type="percentage">
            <text:p>6.88 %</text:p>
          </table:table-cell>
          <table:table-cell table:style-name="ce138" table:formula="of:=AVERAGE([.P60:.P109])" office:value-type="percentage" office:value="0.00649639607272033" calcext:value-type="percentage">
            <text:p>0.65 %</text:p>
          </table:table-cell>
          <table:table-cell table:style-name="ce138" table:formula="of:=AVERAGE([.Q60:.Q109])" office:value-type="percentage" office:value="0.0298881219021114" calcext:value-type="percentage">
            <text:p>2.99 %</text:p>
          </table:table-cell>
          <table:table-cell table:style-name="ce138" table:formula="of:=AVERAGE([.R60:.R109])" office:value-type="percentage" office:value="0.0496696445019289" calcext:value-type="percentage">
            <text:p>4.97 %</text:p>
          </table:table-cell>
          <table:table-cell table:number-columns-repeated="16366"/>
        </table:table-row>
        <table:table-row table:style-name="ro10">
          <table:table-cell table:style-name="ce30" office:value-type="string" calcext:value-type="string">
            <text:p>2010-2020</text:p>
          </table:table-cell>
          <table:table-cell table:style-name="ce47" table:formula="of:=AVERAGE([.B101:.B111])" office:value-type="percentage" office:value="0.143857992390633" calcext:value-type="percentage">
            <text:p>14.39 %</text:p>
          </table:table-cell>
          <table:table-cell table:style-name="ce47" table:formula="of:=AVERAGE([.C101:.C111])" office:value-type="percentage" office:value="0.00476893939393939" calcext:value-type="percentage">
            <text:p>0.48 %</text:p>
          </table:table-cell>
          <table:table-cell table:style-name="ce59" table:formula="of:=AVERAGE([.D101:.D111])" office:value-type="percentage" office:value="0.0498517793481468" calcext:value-type="percentage">
            <text:p>4.99 %</text:p>
          </table:table-cell>
          <table:table-cell table:style-name="ce47" table:formula="of:=AVERAGE([.E101:.E111])" office:value-type="percentage" office:value="0.0752312363627214" calcext:value-type="percentage">
            <text:p>7.52 %</text:p>
          </table:table-cell>
          <table:table-cell table:style-name="ce76"/>
          <table:table-cell table:style-name="ce92" office:value-type="string" calcext:value-type="string">
            <text:p>2010-2020</text:p>
          </table:table-cell>
          <table:table-cell table:style-name="ce47" table:formula="of:=[.B123]-[.C123]" office:value-type="percentage" office:value="0.139089052996693" calcext:value-type="percentage">
            <text:p>13.91 %</text:p>
          </table:table-cell>
          <table:table-cell table:style-name="ce59" table:formula="of:=[.B123]-[.D123]" office:value-type="percentage" office:value="0.0940062130424857" calcext:value-type="percentage">
            <text:p>9.40 %</text:p>
          </table:table-cell>
          <table:table-cell table:style-name="ce47" table:formula="of:=STDEV([.J101:.J111])/(([.$A$111]-[.$A$101]+1)^0.5)" office:value-type="percentage" office:value="0.0350748307361648" calcext:value-type="percentage">
            <text:p>3.51 %</text:p>
          </table:table-cell>
          <table:table-cell table:style-name="ce59" table:formula="of:=STDEV([.K101:.K111])/(([.$A$111]-[.$A$101]+1)^0.5)" office:value-type="percentage" office:value="0.0441437068830814" calcext:value-type="percentage">
            <text:p>4.41 %</text:p>
          </table:table-cell>
          <table:table-cell table:number-columns-repeated="2"/>
          <table:table-cell table:style-name="ce131" office:value-type="string" calcext:value-type="string">
            <text:p>2009-2018</text:p>
          </table:table-cell>
          <table:table-cell table:style-name="ce138" table:formula="of:=AVERAGE([.O100:.O109])" office:value-type="percentage" office:value="0.118015516406454" calcext:value-type="percentage">
            <text:p>11.80 %</text:p>
          </table:table-cell>
          <table:table-cell table:style-name="ce138" table:formula="of:=AVERAGE([.P100:.P109])" office:value-type="percentage" office:value="-0.0115389723756053" calcext:value-type="percentage">
            <text:p>-1.15 %</text:p>
          </table:table-cell>
          <table:table-cell table:style-name="ce138" table:formula="of:=AVERAGE([.Q100:.Q109])" office:value-type="percentage" office:value="0.00670042058304582" calcext:value-type="percentage">
            <text:p>0.67 %</text:p>
          </table:table-cell>
          <table:table-cell table:style-name="ce138" table:formula="of:=AVERAGE([.R100:.R109])" office:value-type="percentage" office:value="0.0640680280023155" calcext:value-type="percentage">
            <text:p>6.41 %</text:p>
          </table:table-cell>
          <table:table-cell table:number-columns-repeated="16366"/>
        </table:table-row>
        <table:table-row table:style-name="ro14">
          <table:table-cell table:style-name="ce31" table:number-columns-repeated="5"/>
          <table:table-cell/>
          <table:table-cell table:style-name="ce31"/>
          <table:table-cell table:style-name="ce101" office:value-type="string" calcext:value-type="string" table:number-columns-spanned="2" table:number-rows-spanned="1">
            <text:p>Risk Premium</text:p>
          </table:table-cell>
          <table:covered-table-cell table:style-name="ce101"/>
          <table:table-cell table:style-name="ce31"/>
          <table:table-cell table:style-name="ce117"/>
          <table:table-cell table:number-columns-repeated="4"/>
          <table:table-cell table:style-name="ce18"/>
          <table:table-cell table:number-columns-repeated="16368"/>
        </table:table-row>
        <table:table-row table:style-name="ro10">
          <table:table-cell table:style-name="ce30" office:value-type="string" calcext:value-type="string" table:number-columns-spanned="5" table:number-rows-spanned="1">
            <text:p>Geometric Average Historical Return</text:p>
          </table:table-cell>
          <table:covered-table-cell table:number-columns-repeated="4" table:style-name="ce30"/>
          <table:table-cell table:style-name="ce74"/>
          <table:table-cell table:style-name="ce93"/>
          <table:table-cell table:style-name="ce31" office:value-type="string" calcext:value-type="string">
            <text:p>Stocks - T.Bills</text:p>
          </table:table-cell>
          <table:table-cell table:style-name="ce31" office:value-type="string" calcext:value-type="string">
            <text:p>Stocks - T.Bonds</text:p>
          </table:table-cell>
          <table:table-cell table:style-name="ce31"/>
          <table:table-cell table:style-name="ce117"/>
          <table:table-cell table:number-columns-repeated="16373"/>
        </table:table-row>
        <table:table-row table:style-name="ro10">
          <table:table-cell table:style-name="ce30" office:value-type="string" calcext:value-type="string">
            <text:p>1928-2020</text:p>
          </table:table-cell>
          <table:table-cell table:style-name="ce48" table:formula="of:=([.F110]/101)^(1/([.$A$111]-[.$A$19]+1))-1" office:value-type="percentage" office:value="0.095847007850266" calcext:value-type="percentage">
            <text:p>9.58 %</text:p>
          </table:table-cell>
          <table:table-cell table:style-name="ce48" table:formula="of:=([.G111]/100)^(1/([.$A$111]-[.$A$19]+1))-1" office:value-type="percentage" office:value="0.0331819198843539" calcext:value-type="percentage">
            <text:p>3.32 %</text:p>
          </table:table-cell>
          <table:table-cell table:style-name="ce60" table:formula="of:=([.H111]/100)^(1/([.$A$111]-[.$A$19]+1))-1" office:value-type="percentage" office:value="0.0494749023469268" calcext:value-type="percentage">
            <office:annotation draw:style-name="gr3" draw:text-style-name="P2" svg:width="3.544cm" svg:height="9.286cm" svg:x="14.89cm" svg:y="70.586cm" draw:caption-point-x="-0.327cm" draw:caption-point-y="0.248cm">
              <dc:creator>Edison Achalma Mendoza</dc:creator>
              <dc:date>2024-07-31T03:25:00</dc:date>
              <text:p>[Comentario encadenado]</text:p>
              <text:p/>
              <text:p>Su versión de Excel le permite leer este comentario encadenado; sin embargo, las ediciones que se apliquen se quitarán si el archivo se abre en una versión más reciente de Excel. Más información: https://go.microsoft.com/fwlink/?linkid=870924</text:p>
              <text:p/>
              <text:p>Comentario:</text:p>
              <text:p><text:s text:c="4"/>Rf utilizado para el trabajo de estampado de polos personalizados.</text:p>
            </office:annotation>
            <text:p>4.95 %</text:p>
          </table:table-cell>
          <table:table-cell table:style-name="ce48" table:formula="of:=([.I111]/100)^(1/([.$A$111]-[.$A$19]+1))-1" office:value-type="percentage" office:value="0.0699355824282786" calcext:value-type="percentage">
            <text:p>6.99 %</text:p>
          </table:table-cell>
          <table:table-cell table:style-name="ce77"/>
          <table:table-cell table:style-name="ce92" office:value-type="string" calcext:value-type="string">
            <text:p>1928-2020</text:p>
          </table:table-cell>
          <table:table-cell table:style-name="ce47" table:formula="of:=[.B126]-[.C126]" office:value-type="percentage" office:value="0.0626650879659121" calcext:value-type="percentage">
            <text:p>6.27 %</text:p>
          </table:table-cell>
          <table:table-cell table:style-name="ce104" table:formula="of:=[.B126]-[.D126]" office:value-type="percentage" office:value="0.0463721055033393" calcext:value-type="percentage">
            <text:p>4.64 %</text:p>
          </table:table-cell>
          <table:table-cell table:style-name="ce31"/>
          <table:table-cell table:style-name="ce117"/>
          <table:table-cell table:number-columns-repeated="16373"/>
        </table:table-row>
        <table:table-row table:style-name="ro10">
          <table:table-cell table:style-name="ce30" office:value-type="string" calcext:value-type="string">
            <text:p>1970-2020</text:p>
          </table:table-cell>
          <table:table-cell table:style-name="ce48" table:formula="of:=([.F111]/[.F60])^(1/([.$A$111]-[.$A$60]))-1" office:value-type="percentage" office:value="0.106564456666496" calcext:value-type="percentage">
            <text:p>10.66 %</text:p>
          </table:table-cell>
          <table:table-cell table:style-name="ce48" table:formula="of:=([.G111]/[.G60])^(1/([.$A$111]-[.$A$60]))-1" office:value-type="percentage" office:value="0.0449283818774828" calcext:value-type="percentage">
            <text:p>4.49 %</text:p>
          </table:table-cell>
          <table:table-cell table:style-name="ce48" table:formula="of:=([.H111]/[.H60])^(1/([.$A$111]-[.$A$60]))-1" office:value-type="percentage" office:value="0.0707790812070821" calcext:value-type="percentage">
            <text:p>7.08 %</text:p>
          </table:table-cell>
          <table:table-cell table:style-name="ce48" table:formula="of:=([.I111]/[.I60])^(1/([.$A$111]-[.$A$60]))-1" office:value-type="percentage" office:value="0.0920325557392796" calcext:value-type="percentage">
            <text:p>9.20 %</text:p>
          </table:table-cell>
          <table:table-cell table:style-name="ce77"/>
          <table:table-cell table:style-name="ce92" office:value-type="string" calcext:value-type="string">
            <text:p>1970-2020</text:p>
          </table:table-cell>
          <table:table-cell table:style-name="ce47" table:formula="of:=[.B127]-[.C127]" office:value-type="percentage" office:value="0.0616360747890135" calcext:value-type="percentage">
            <text:p>6.16 %</text:p>
          </table:table-cell>
          <table:table-cell table:style-name="ce47" table:formula="of:=[.B127]-[.D127]" office:value-type="percentage" office:value="0.0357853754594142" calcext:value-type="percentage">
            <text:p>3.58 %</text:p>
          </table:table-cell>
          <table:table-cell table:style-name="ce31"/>
          <table:table-cell table:style-name="ce117"/>
          <table:table-cell table:number-columns-repeated="16373"/>
        </table:table-row>
        <table:table-row table:style-name="ro14">
          <table:table-cell table:style-name="ce32" office:value-type="string" calcext:value-type="string">
            <text:p>2010-2020</text:p>
          </table:table-cell>
          <table:table-cell table:style-name="ce49" table:formula="of:=([.F111]/[.F100])^(1/([.$A$111]-[.$A$100]))-1" office:value-type="percentage" office:value="0.138494781050071" calcext:value-type="percentage">
            <text:p>13.85 %</text:p>
          </table:table-cell>
          <table:table-cell table:style-name="ce49" table:formula="of:=([.G111]/[.G100])^(1/([.$A$111]-[.$A$100]))-1" office:value-type="percentage" office:value="0.00474791975412803" calcext:value-type="percentage">
            <text:p>0.47 %</text:p>
          </table:table-cell>
          <table:table-cell table:style-name="ce61" table:formula="of:=([.H111]/[.H100])^(1/([.$A$111]-[.$A$100]))-1" office:value-type="percentage" office:value="0.0476728095846422" calcext:value-type="percentage">
            <office:annotation draw:style-name="gr4" draw:text-style-name="P2" svg:width="3.544cm" svg:height="10.866cm" svg:x="14.89cm" svg:y="71.617cm" draw:caption-point-x="-0.327cm" draw:caption-point-y="0.328cm">
              <dc:creator>Edison Achalma Mendoza</dc:creator>
              <dc:date>2024-07-31T03:25:00</dc:date>
              <text:p>[Comentario encadenado]</text:p>
              <text:p/>
              <text:p>Su versión de Excel le permite leer este comentario encadenado; sin embargo, las ediciones que se apliquen se quitarán si el archivo se abre en una versión más reciente de Excel. Más información: https://go.microsoft.com/fwlink/?linkid=870924</text:p>
              <text:p/>
              <text:p>Comentario:</text:p>
              <text:p><text:s text:c="4"/>Esta es la tasa libre de riesgo (Rf) cuyo valor para 10 años es de 4.77% para el periodo de 2010-2020, promedio geométrico.</text:p>
            </office:annotation>
            <text:p>4.77 %</text:p>
          </table:table-cell>
          <table:table-cell table:style-name="ce49" table:formula="of:=([.I111]/[.I100])^(1/([.$A$111]-[.$A$100]))-1" office:value-type="percentage" office:value="0.0736203706304552" calcext:value-type="percentage">
            <text:p>7.36 %</text:p>
          </table:table-cell>
          <table:table-cell table:style-name="ce77"/>
          <table:table-cell table:style-name="ce94" office:value-type="string" calcext:value-type="string">
            <text:p>2010-2020</text:p>
          </table:table-cell>
          <table:table-cell table:style-name="ce102" table:formula="of:=[.B128]-[.C128]" office:value-type="percentage" office:value="0.133746861295943" calcext:value-type="percentage">
            <text:p>13.37 %</text:p>
          </table:table-cell>
          <table:table-cell table:style-name="ce105" table:formula="of:=[.B128]-[.D128]" office:value-type="percentage" office:value="0.0908219714654293" calcext:value-type="percentage">
            <office:annotation draw:style-name="gr5" draw:text-style-name="P2" svg:width="3.649cm" svg:height="10.076cm" svg:x="32.035cm" svg:y="71.696cm" draw:caption-point-x="-0.327cm" draw:caption-point-y="0.249cm">
              <dc:creator>Edison Achalma Mendoza</dc:creator>
              <dc:date>2024-07-31T03:25:00</dc:date>
              <text:p>[Comentario encadenado]</text:p>
              <text:p/>
              <text:p>Su versión de Excel le permite leer este comentario encadenado; sin embargo, las ediciones que se apliquen se quitarán si el archivo se abre en una versión más reciente de Excel. Más información: https://go.microsoft.com/fwlink/?linkid=870924</text:p>
              <text:p/>
              <text:p>Comentario:</text:p>
              <text:p><text:s text:c="4"/>En la tabla de la prima de riesgo del mercado de EE.UU. es de 9.08% para el periodo 2010-2020, promedio geométrico.</text:p>
            </office:annotation>
            <text:p>9.08 %</text:p>
          </table:table-cell>
          <table:table-cell table:style-name="ce109"/>
          <table:table-cell table:style-name="ce119"/>
          <table:table-cell table:number-columns-repeated="16373"/>
        </table:table-row>
        <table:table-row table:style-name="ro10">
          <table:table-cell table:style-name="ce33" office:value-type="string" calcext:value-type="string" table:number-columns-spanned="5" table:number-rows-spanned="1">
            <text:p>Fuente: Damodaran (http://people.stern.nyu.edu)</text:p>
          </table:table-cell>
          <table:covered-table-cell table:number-columns-repeated="4" table:style-name="ce33"/>
          <table:table-cell/>
          <table:table-cell table:style-name="ce33" office:value-type="string" calcext:value-type="string" table:number-columns-spanned="5" table:number-rows-spanned="1">
            <text:p>Fuente: Damodaran (http://people.stern.nyu.edu)</text:p>
          </table:table-cell>
          <table:covered-table-cell table:number-columns-repeated="4" table:style-name="ce33"/>
          <table:table-cell table:number-columns-repeated="16373"/>
        </table:table-row>
        <table:table-row table:style-name="ro10" table:number-rows-repeated="1048446">
          <table:table-cell table:number-columns-repeated="16384"/>
        </table:table-row>
        <table:table-row table:style-name="ro10">
          <table:table-cell table:number-columns-repeated="16384"/>
        </table:table-row>
      </table:table>
      <table:table table:name="S&amp;P 500 &amp; Raw Data" table:style-name="ta3">
        <table:table-column table:style-name="co3" table:default-cell-style-name="Default"/>
        <table:table-column table:style-name="co21" table:default-cell-style-name="Default"/>
        <table:table-column table:style-name="co3" table:number-columns-repeated="2" table:default-cell-style-name="Default"/>
        <table:table-column table:style-name="co20" table:default-cell-style-name="ce156"/>
        <table:table-column table:style-name="co22" table:default-cell-style-name="Default"/>
        <table:table-column table:style-name="co22" table:default-cell-style-name="ce156"/>
        <table:table-column table:style-name="co22" table:number-columns-repeated="3" table:default-cell-style-name="Default"/>
        <table:table-column table:style-name="co22" table:default-cell-style-name="ce156"/>
        <table:table-column table:style-name="co22" table:default-cell-style-name="Default"/>
        <table:table-column table:style-name="co3" table:number-columns-repeated="16372" table:default-cell-style-name="Default"/>
        <table:table-row table:style-name="ro2">
          <table:table-cell/>
          <table:table-cell table:style-name="ce139"/>
          <table:table-cell/>
          <table:table-cell table:style-name="ce139" table:number-columns-repeated="2"/>
          <table:table-cell table:style-name="ce18"/>
          <table:table-cell table:style-name="ce139"/>
          <table:table-cell table:style-name="ce18" table:number-columns-repeated="3"/>
          <table:table-cell table:style-name="ce139"/>
          <table:table-cell table:style-name="ce18"/>
          <table:table-cell table:number-columns-repeated="16372"/>
        </table:table-row>
        <table:table-row table:style-name="ro15">
          <table:table-cell table:style-name="ce145" office:value-type="string" calcext:value-type="string">
            <text:p>Year</text:p>
          </table:table-cell>
          <table:table-cell table:style-name="ce148" office:value-type="string" calcext:value-type="string">
            <text:p>S&amp;P 500</text:p>
          </table:table-cell>
          <table:table-cell table:style-name="ce148" office:value-type="string" calcext:value-type="string">
            <text:p>Dividends</text:p>
          </table:table-cell>
          <table:table-cell table:style-name="ce148" office:value-type="string" calcext:value-type="string">
            <text:p>Dividend Yield</text:p>
          </table:table-cell>
          <table:table-cell table:style-name="ce148" office:value-type="string" calcext:value-type="string">
            <text:p>T.Bond rate</text:p>
          </table:table-cell>
          <table:table-cell table:style-name="ce148" office:value-type="string" calcext:value-type="string">
            <text:p>Return on bond</text:p>
          </table:table-cell>
          <table:table-cell table:style-name="ce162" office:value-type="string" calcext:value-type="string">
            <text:p>Aaa Bond Rate</text:p>
          </table:table-cell>
          <table:table-cell table:style-name="ce162" office:value-type="string" calcext:value-type="string">
            <text:p>Return on Aaa </text:p>
          </table:table-cell>
          <table:table-cell table:style-name="ce162" office:value-type="string" calcext:value-type="string">
            <text:p>Baa Bond Rate</text:p>
          </table:table-cell>
          <table:table-cell table:style-name="ce162" office:value-type="string" calcext:value-type="string">
            <text:p>Return on Baa </text:p>
          </table:table-cell>
          <table:table-cell table:style-name="ce162" office:value-type="string" calcext:value-type="string">
            <text:p>Returns on Real Estate</text:p>
          </table:table-cell>
          <table:table-cell table:style-name="ce162"/>
          <table:table-cell table:style-name="ce168" office:value-type="string" calcext:value-type="string">
            <text:p>Jan 1 notes</text:p>
          </table:table-cell>
        </table:table-row>
        <table:table-row table:style-name="ro2">
          <table:table-cell table:style-name="ce131" office:value-type="float" office:value="1927" calcext:value-type="float">
            <text:p>1927</text:p>
          </table:table-cell>
          <table:table-cell table:style-name="ce131" office:value-type="float" office:value="17.66" calcext:value-type="float">
            <text:p>17.66</text:p>
          </table:table-cell>
          <table:table-cell table:style-name="ce151" table:formula="of:=[.D3]*[.B3]" office:value-type="float" office:value="0.6181" calcext:value-type="float">
            <text:p>0.62</text:p>
          </table:table-cell>
          <table:table-cell table:style-name="ce157" office:value-type="percentage" office:value="0.035" calcext:value-type="percentage">
            <text:p>3.50 %</text:p>
          </table:table-cell>
          <table:table-cell table:style-name="ce138" office:value-type="percentage" office:value="0.0317" calcext:value-type="percentage">
            <text:p>3.17 %</text:p>
          </table:table-cell>
          <table:table-cell table:style-name="ce131"/>
          <table:table-cell table:style-name="ce76" table:formula="of:=[$'Moody''s Rates'.C20]" office:value-type="percentage" office:value="0.0446" calcext:value-type="percentage">
            <text:p>4.46 %</text:p>
          </table:table-cell>
          <table:table-cell table:style-name="ce163"/>
          <table:table-cell table:style-name="ce164" table:formula="of:=[$'Moody''s Rates'.K20]" office:value-type="percentage" office:value="0.0532" calcext:value-type="percentage">
            <text:p>5.32 %</text:p>
          </table:table-cell>
          <table:table-cell table:style-name="ce163"/>
          <table:table-cell table:style-name="ce131"/>
          <table:table-cell table:style-name="ce163"/>
          <table:table-cell table:number-columns-repeated="16372"/>
        </table:table-row>
        <table:table-row table:style-name="ro2">
          <table:table-cell table:style-name="ce131" office:value-type="float" office:value="1928" calcext:value-type="float">
            <text:p>1928</text:p>
          </table:table-cell>
          <table:table-cell table:style-name="ce131" office:value-type="float" office:value="24.35" calcext:value-type="float">
            <text:p>24.35</text:p>
          </table:table-cell>
          <table:table-cell table:style-name="ce151" table:formula="of:=[.D4]*[.B4]" office:value-type="float" office:value="1.04705" calcext:value-type="float">
            <text:p>1.05</text:p>
          </table:table-cell>
          <table:table-cell table:style-name="ce157" office:value-type="percentage" office:value="0.043" calcext:value-type="percentage">
            <text:p>4.30 %</text:p>
          </table:table-cell>
          <table:table-cell table:style-name="ce138" office:value-type="percentage" office:value="0.0345" calcext:value-type="percentage">
            <text:p>3.45 %</text:p>
          </table:table-cell>
          <table:table-cell table:style-name="ce157" table:formula="of:=(([.E3]*(1-(1+[.E4])^(-10))/[.E4]+1/(1+[.E4])^10)-1)+[.E3]" office:value-type="percentage" office:value="0.00835470858979919" calcext:value-type="percentage">
            <text:p>0.84 %</text:p>
          </table:table-cell>
          <table:table-cell table:style-name="ce76" table:formula="of:=[$'Moody''s Rates'.C21]" office:value-type="percentage" office:value="0.0461" calcext:value-type="percentage">
            <text:p>4.61 %</text:p>
          </table:table-cell>
          <table:table-cell table:style-name="ce157" table:formula="of:=(([.G3]*(1-(1+[.G4])^(-10))/[.G4]+1/(1+[.G4])^10)-1)+[.G3]" office:value-type="percentage" office:value="0.0327948559663947" calcext:value-type="percentage">
            <text:p>3.28 %</text:p>
          </table:table-cell>
          <table:table-cell table:style-name="ce164" table:formula="of:=[$'Moody''s Rates'.K21]" office:value-type="percentage" office:value="0.056" calcext:value-type="percentage">
            <text:p>5.60 %</text:p>
          </table:table-cell>
          <table:table-cell table:style-name="ce165" table:formula="of:=(([.I3]*(1-(1+[.I4])^(-10))/[.I4]+1/(1+[.I4])^10)-1)+[.I3]" office:value-type="percentage" office:value="0.0321955147023243" calcext:value-type="percentage">
            <text:p>3.22 %</text:p>
          </table:table-cell>
          <table:table-cell table:style-name="ce127" office:value-type="percentage" office:value="0.0149106392833602" calcext:value-type="percentage">
            <text:p>1.49 %</text:p>
          </table:table-cell>
          <table:table-cell table:style-name="ce77"/>
          <table:table-cell table:number-columns-repeated="16372"/>
        </table:table-row>
        <table:table-row table:style-name="ro2">
          <table:table-cell table:style-name="ce131" office:value-type="float" office:value="1929" calcext:value-type="float">
            <text:p>1929</text:p>
          </table:table-cell>
          <table:table-cell table:style-name="ce131" office:value-type="float" office:value="21.45" calcext:value-type="float">
            <text:p>21.45</text:p>
          </table:table-cell>
          <table:table-cell table:style-name="ce151" table:formula="of:=[.D5]*[.B5]" office:value-type="float" office:value="0.87945" calcext:value-type="float">
            <text:p>0.88</text:p>
          </table:table-cell>
          <table:table-cell table:style-name="ce157" office:value-type="percentage" office:value="0.041" calcext:value-type="percentage">
            <text:p>4.10 %</text:p>
          </table:table-cell>
          <table:table-cell table:style-name="ce138" office:value-type="percentage" office:value="0.0336" calcext:value-type="percentage">
            <text:p>3.36 %</text:p>
          </table:table-cell>
          <table:table-cell table:style-name="ce157" table:formula="of:=(([.E4]*(1-(1+[.E5])^(-10))/[.E5]+1/(1+[.E5])^10)-1)+[.E4]" office:value-type="percentage" office:value="0.0420380415632043" calcext:value-type="percentage">
            <text:p>4.20 %</text:p>
          </table:table-cell>
          <table:table-cell table:style-name="ce76" table:formula="of:=[$'Moody''s Rates'.C22]" office:value-type="percentage" office:value="0.0467" calcext:value-type="percentage">
            <text:p>4.67 %</text:p>
          </table:table-cell>
          <table:table-cell table:style-name="ce157" table:formula="of:=(([.G4]*(1-(1+[.G5])^(-10))/[.G5]+1/(1+[.G5])^10)-1)+[.G4]" office:value-type="percentage" office:value="0.0413918041608565" calcext:value-type="percentage">
            <text:p>4.14 %</text:p>
          </table:table-cell>
          <table:table-cell table:style-name="ce164" table:formula="of:=[$'Moody''s Rates'.K22]" office:value-type="percentage" office:value="0.0595" calcext:value-type="percentage">
            <text:p>5.95 %</text:p>
          </table:table-cell>
          <table:table-cell table:style-name="ce165" table:formula="of:=(([.I4]*(1-(1+[.I5])^(-10))/[.I5]+1/(1+[.I5])^10)-1)+[.I4]" office:value-type="percentage" office:value="0.0301785623990404" calcext:value-type="percentage">
            <text:p>3.02 %</text:p>
          </table:table-cell>
          <table:table-cell table:style-name="ce127" office:value-type="percentage" office:value="-0.0205680748170579" calcext:value-type="percentage">
            <text:p>-2.06 %</text:p>
          </table:table-cell>
          <table:table-cell table:style-name="ce77"/>
          <table:table-cell table:number-columns-repeated="16372"/>
        </table:table-row>
        <table:table-row table:style-name="ro2">
          <table:table-cell table:style-name="ce131" office:value-type="float" office:value="1930" calcext:value-type="float">
            <text:p>1930</text:p>
          </table:table-cell>
          <table:table-cell table:style-name="ce131" office:value-type="float" office:value="15.34" calcext:value-type="float">
            <text:p>15.34</text:p>
          </table:table-cell>
          <table:table-cell table:style-name="ce151" table:formula="of:=[.D6]*[.B6]" office:value-type="float" office:value="0.72098" calcext:value-type="float">
            <text:p>0.72</text:p>
          </table:table-cell>
          <table:table-cell table:style-name="ce157" office:value-type="percentage" office:value="0.047" calcext:value-type="percentage">
            <text:p>4.70 %</text:p>
          </table:table-cell>
          <table:table-cell table:style-name="ce138" office:value-type="percentage" office:value="0.0322" calcext:value-type="percentage">
            <text:p>3.22 %</text:p>
          </table:table-cell>
          <table:table-cell table:style-name="ce157" table:formula="of:=(([.E5]*(1-(1+[.E6])^(-10))/[.E6]+1/(1+[.E6])^10)-1)+[.E5]" office:value-type="percentage" office:value="0.0454093143489704" calcext:value-type="percentage">
            <text:p>4.54 %</text:p>
          </table:table-cell>
          <table:table-cell table:style-name="ce76" table:formula="of:=[$'Moody''s Rates'.C23]" office:value-type="percentage" office:value="0.0452" calcext:value-type="percentage">
            <text:p>4.52 %</text:p>
          </table:table-cell>
          <table:table-cell table:style-name="ce157" table:formula="of:=(([.G5]*(1-(1+[.G6])^(-10))/[.G6]+1/(1+[.G6])^10)-1)+[.G5]" office:value-type="percentage" office:value="0.0585574143533028" calcext:value-type="percentage">
            <text:p>5.86 %</text:p>
          </table:table-cell>
          <table:table-cell table:style-name="ce164" table:formula="of:=[$'Moody''s Rates'.K23]" office:value-type="percentage" office:value="0.0671" calcext:value-type="percentage">
            <text:p>6.71 %</text:p>
          </table:table-cell>
          <table:table-cell table:style-name="ce165" table:formula="of:=(([.I5]*(1-(1+[.I6])^(-10))/[.I6]+1/(1+[.I6])^10)-1)+[.I5]" office:value-type="percentage" office:value="0.00539780946482383" calcext:value-type="percentage">
            <text:p>0.54 %</text:p>
          </table:table-cell>
          <table:table-cell table:style-name="ce127" office:value-type="percentage" office:value="-0.0429999927624815" calcext:value-type="percentage">
            <text:p>-4.30 %</text:p>
          </table:table-cell>
          <table:table-cell table:style-name="ce77"/>
          <table:table-cell table:number-columns-repeated="16372"/>
        </table:table-row>
        <table:table-row table:style-name="ro2">
          <table:table-cell table:style-name="ce131" office:value-type="float" office:value="1931" calcext:value-type="float">
            <text:p>1931</text:p>
          </table:table-cell>
          <table:table-cell table:style-name="ce131" office:value-type="float" office:value="8.12" calcext:value-type="float">
            <text:p>8.12</text:p>
          </table:table-cell>
          <table:table-cell table:style-name="ce151" table:formula="of:=[.D7]*[.B7]" office:value-type="float" office:value="0.49532" calcext:value-type="float">
            <text:p>0.50</text:p>
          </table:table-cell>
          <table:table-cell table:style-name="ce157" office:value-type="percentage" office:value="0.061" calcext:value-type="percentage">
            <text:p>6.10 %</text:p>
          </table:table-cell>
          <table:table-cell table:style-name="ce138" office:value-type="percentage" office:value="0.0393" calcext:value-type="percentage">
            <text:p>3.93 %</text:p>
          </table:table-cell>
          <table:table-cell table:style-name="ce157" table:formula="of:=(([.E6]*(1-(1+[.E7])^(-10))/[.E7]+1/(1+[.E7])^10)-1)+[.E6]" office:value-type="percentage" office:value="-0.0255885596194225" calcext:value-type="percentage">
            <text:p>-2.56 %</text:p>
          </table:table-cell>
          <table:table-cell table:style-name="ce76" table:formula="of:=[$'Moody''s Rates'.C24]" office:value-type="percentage" office:value="0.0532" calcext:value-type="percentage">
            <text:p>5.32 %</text:p>
          </table:table-cell>
          <table:table-cell table:style-name="ce157" table:formula="of:=(([.G6]*(1-(1+[.G7])^(-10))/[.G7]+1/(1+[.G7])^10)-1)+[.G6]" office:value-type="percentage" office:value="-0.0156250614128757" calcext:value-type="percentage">
            <text:p>-1.56 %</text:p>
          </table:table-cell>
          <table:table-cell table:style-name="ce164" table:formula="of:=[$'Moody''s Rates'.K24]" office:value-type="percentage" office:value="0.1042" calcext:value-type="percentage">
            <text:p>10.42 %</text:p>
          </table:table-cell>
          <table:table-cell table:style-name="ce165" table:formula="of:=(([.I6]*(1-(1+[.I7])^(-10))/[.I7]+1/(1+[.I7])^10)-1)+[.I6]" office:value-type="percentage" office:value="-0.156807750826676" calcext:value-type="percentage">
            <text:p>-15.68 %</text:p>
          </table:table-cell>
          <table:table-cell table:style-name="ce127" office:value-type="percentage" office:value="-0.0815048218611446" calcext:value-type="percentage">
            <text:p>-8.15 %</text:p>
          </table:table-cell>
          <table:table-cell table:style-name="ce77"/>
          <table:table-cell table:number-columns-repeated="16372"/>
        </table:table-row>
        <table:table-row table:style-name="ro2">
          <table:table-cell table:style-name="ce131" office:value-type="float" office:value="1932" calcext:value-type="float">
            <text:p>1932</text:p>
          </table:table-cell>
          <table:table-cell table:style-name="ce131" office:value-type="float" office:value="6.92" calcext:value-type="float">
            <text:p>6.92</text:p>
          </table:table-cell>
          <table:table-cell table:style-name="ce151" table:formula="of:=[.D8]*[.B8]" office:value-type="float" office:value="0.49824" calcext:value-type="float">
            <text:p>0.50</text:p>
          </table:table-cell>
          <table:table-cell table:style-name="ce157" office:value-type="percentage" office:value="0.072" calcext:value-type="percentage">
            <text:p>7.20 %</text:p>
          </table:table-cell>
          <table:table-cell table:style-name="ce138" office:value-type="percentage" office:value="0.0335" calcext:value-type="percentage">
            <text:p>3.35 %</text:p>
          </table:table-cell>
          <table:table-cell table:style-name="ce157" table:formula="of:=(([.E7]*(1-(1+[.E8])^(-10))/[.E8]+1/(1+[.E8])^10)-1)+[.E7]" office:value-type="percentage" office:value="0.0879030699047733" calcext:value-type="percentage">
            <text:p>8.79 %</text:p>
          </table:table-cell>
          <table:table-cell table:style-name="ce76" table:formula="of:=[$'Moody''s Rates'.C25]" office:value-type="percentage" office:value="0.0459" calcext:value-type="percentage">
            <text:p>4.59 %</text:p>
          </table:table-cell>
          <table:table-cell table:style-name="ce157" table:formula="of:=(([.G7]*(1-(1+[.G8])^(-10))/[.G8]+1/(1+[.G8])^10)-1)+[.G7]" office:value-type="percentage" office:value="0.110708084304464" calcext:value-type="percentage">
            <text:p>11.07 %</text:p>
          </table:table-cell>
          <table:table-cell table:style-name="ce164" table:formula="of:=[$'Moody''s Rates'.K25]" office:value-type="percentage" office:value="0.0842" calcext:value-type="percentage">
            <text:p>8.42 %</text:p>
          </table:table-cell>
          <table:table-cell table:style-name="ce165" table:formula="of:=(([.I7]*(1-(1+[.I8])^(-10))/[.I8]+1/(1+[.I8])^10)-1)+[.I7]" office:value-type="percentage" office:value="0.235896016757402" calcext:value-type="percentage">
            <text:p>23.59 %</text:p>
          </table:table-cell>
          <table:table-cell table:style-name="ce127" office:value-type="percentage" office:value="-0.104664277162606" calcext:value-type="percentage">
            <text:p>-10.47 %</text:p>
          </table:table-cell>
          <table:table-cell table:style-name="ce77"/>
          <table:table-cell table:number-columns-repeated="16372"/>
        </table:table-row>
        <table:table-row table:style-name="ro2">
          <table:table-cell table:style-name="ce131" office:value-type="float" office:value="1933" calcext:value-type="float">
            <text:p>1933</text:p>
          </table:table-cell>
          <table:table-cell table:style-name="ce131" office:value-type="float" office:value="9.97" calcext:value-type="float">
            <text:p>9.97</text:p>
          </table:table-cell>
          <table:table-cell table:style-name="ce151" table:formula="of:=[.D9]*[.B9]" office:value-type="float" office:value="0.40877" calcext:value-type="float">
            <text:p>0.41</text:p>
          </table:table-cell>
          <table:table-cell table:style-name="ce157" office:value-type="percentage" office:value="0.041" calcext:value-type="percentage">
            <text:p>4.10 %</text:p>
          </table:table-cell>
          <table:table-cell table:style-name="ce138" office:value-type="percentage" office:value="0.0353" calcext:value-type="percentage">
            <text:p>3.53 %</text:p>
          </table:table-cell>
          <table:table-cell table:style-name="ce157" table:formula="of:=(([.E8]*(1-(1+[.E9])^(-10))/[.E9]+1/(1+[.E9])^10)-1)+[.E8]" office:value-type="percentage" office:value="0.0185527208918574" calcext:value-type="percentage">
            <text:p>1.86 %</text:p>
          </table:table-cell>
          <table:table-cell table:style-name="ce76" table:formula="of:=[$'Moody''s Rates'.C26]" office:value-type="percentage" office:value="0.045" calcext:value-type="percentage">
            <text:p>4.50 %</text:p>
          </table:table-cell>
          <table:table-cell table:style-name="ce157" table:formula="of:=(([.G8]*(1-(1+[.G9])^(-10))/[.G9]+1/(1+[.G9])^10)-1)+[.G8]" office:value-type="percentage" office:value="0.0530214463593994" calcext:value-type="percentage">
            <text:p>5.30 %</text:p>
          </table:table-cell>
          <table:table-cell table:style-name="ce164" table:formula="of:=[$'Moody''s Rates'.K26]" office:value-type="percentage" office:value="0.0775" calcext:value-type="percentage">
            <text:p>7.75 %</text:p>
          </table:table-cell>
          <table:table-cell table:style-name="ce165" table:formula="of:=(([.I8]*(1-(1+[.I9])^(-10))/[.I9]+1/(1+[.I9])^10)-1)+[.I8]" office:value-type="percentage" office:value="0.129668936975483" calcext:value-type="percentage">
            <text:p>12.97 %</text:p>
          </table:table-cell>
          <table:table-cell table:style-name="ce127" office:value-type="percentage" office:value="-0.0381194801441198" calcext:value-type="percentage">
            <text:p>-3.81 %</text:p>
          </table:table-cell>
          <table:table-cell table:style-name="ce77"/>
          <table:table-cell table:number-columns-repeated="16372"/>
        </table:table-row>
        <table:table-row table:style-name="ro2">
          <table:table-cell table:style-name="ce131" office:value-type="float" office:value="1934" calcext:value-type="float">
            <text:p>1934</text:p>
          </table:table-cell>
          <table:table-cell table:style-name="ce131" office:value-type="float" office:value="9.5" calcext:value-type="float">
            <text:p>9.5</text:p>
          </table:table-cell>
          <table:table-cell table:style-name="ce151" table:formula="of:=[.D10]*[.B10]" office:value-type="float" office:value="0.3515" calcext:value-type="float">
            <text:p>0.35</text:p>
          </table:table-cell>
          <table:table-cell table:style-name="ce157" office:value-type="percentage" office:value="0.037" calcext:value-type="percentage">
            <text:p>3.70 %</text:p>
          </table:table-cell>
          <table:table-cell table:style-name="ce138" office:value-type="percentage" office:value="0.0301" calcext:value-type="percentage">
            <text:p>3.01 %</text:p>
          </table:table-cell>
          <table:table-cell table:style-name="ce157" table:formula="of:=(([.E9]*(1-(1+[.E10])^(-10))/[.E10]+1/(1+[.E10])^10)-1)+[.E9]" office:value-type="percentage" office:value="0.0796344261796561" calcext:value-type="percentage">
            <text:p>7.96 %</text:p>
          </table:table-cell>
          <table:table-cell table:style-name="ce76" table:formula="of:=[$'Moody''s Rates'.C27]" office:value-type="percentage" office:value="0.0381" calcext:value-type="percentage">
            <text:p>3.81 %</text:p>
          </table:table-cell>
          <table:table-cell table:style-name="ce157" table:formula="of:=(([.G9]*(1-(1+[.G10])^(-10))/[.G10]+1/(1+[.G10])^10)-1)+[.G9]" office:value-type="percentage" office:value="0.101498298941355" calcext:value-type="percentage">
            <text:p>10.15 %</text:p>
          </table:table-cell>
          <table:table-cell table:style-name="ce164" table:formula="of:=[$'Moody''s Rates'.K27]" office:value-type="percentage" office:value="0.0623" calcext:value-type="percentage">
            <text:p>6.23 %</text:p>
          </table:table-cell>
          <table:table-cell table:style-name="ce165" table:formula="of:=(([.I9]*(1-(1+[.I10])^(-10))/[.I10]+1/(1+[.I10])^10)-1)+[.I9]" office:value-type="percentage" office:value="0.188164292684826" calcext:value-type="percentage">
            <text:p>18.82 %</text:p>
          </table:table-cell>
          <table:table-cell table:style-name="ce127" office:value-type="percentage" office:value="0.0290620727521556" calcext:value-type="percentage">
            <text:p>2.91 %</text:p>
          </table:table-cell>
          <table:table-cell table:style-name="ce77"/>
          <table:table-cell table:number-columns-repeated="16372"/>
        </table:table-row>
        <table:table-row table:style-name="ro2">
          <table:table-cell table:style-name="ce131" office:value-type="float" office:value="1935" calcext:value-type="float">
            <text:p>1935</text:p>
          </table:table-cell>
          <table:table-cell table:style-name="ce131" office:value-type="float" office:value="13.43" calcext:value-type="float">
            <text:p>13.43</text:p>
          </table:table-cell>
          <table:table-cell table:style-name="ce151" table:formula="of:=[.D11]*[.B11]" office:value-type="float" office:value="0.51034" calcext:value-type="float">
            <text:p>0.51</text:p>
          </table:table-cell>
          <table:table-cell table:style-name="ce157" office:value-type="percentage" office:value="0.038" calcext:value-type="percentage">
            <text:p>3.80 %</text:p>
          </table:table-cell>
          <table:table-cell table:style-name="ce138" office:value-type="percentage" office:value="0.0284" calcext:value-type="percentage">
            <text:p>2.84 %</text:p>
          </table:table-cell>
          <table:table-cell table:style-name="ce157" table:formula="of:=(([.E10]*(1-(1+[.E11])^(-10))/[.E11]+1/(1+[.E11])^10)-1)+[.E10]" office:value-type="percentage" office:value="0.0447204772965661" calcext:value-type="percentage">
            <text:p>4.47 %</text:p>
          </table:table-cell>
          <table:table-cell table:style-name="ce76" table:formula="of:=[$'Moody''s Rates'.C28]" office:value-type="percentage" office:value="0.0344" calcext:value-type="percentage">
            <text:p>3.44 %</text:p>
          </table:table-cell>
          <table:table-cell table:style-name="ce157" table:formula="of:=(([.G10]*(1-(1+[.G11])^(-10))/[.G11]+1/(1+[.G11])^10)-1)+[.G10]" office:value-type="percentage" office:value="0.0689647092892405" calcext:value-type="percentage">
            <text:p>6.90 %</text:p>
          </table:table-cell>
          <table:table-cell table:style-name="ce164" table:formula="of:=[$'Moody''s Rates'.K28]" office:value-type="percentage" office:value="0.053" calcext:value-type="percentage">
            <text:p>5.30 %</text:p>
          </table:table-cell>
          <table:table-cell table:style-name="ce165" table:formula="of:=(([.I10]*(1-(1+[.I11])^(-10))/[.I11]+1/(1+[.I11])^10)-1)+[.I10]" office:value-type="percentage" office:value="0.133077318656792" calcext:value-type="percentage">
            <text:p>13.31 %</text:p>
          </table:table-cell>
          <table:table-cell table:style-name="ce127" office:value-type="percentage" office:value="0.0976582806302691" calcext:value-type="percentage">
            <text:p>9.77 %</text:p>
          </table:table-cell>
          <table:table-cell table:style-name="ce77"/>
          <table:table-cell table:number-columns-repeated="16372"/>
        </table:table-row>
        <table:table-row table:style-name="ro2">
          <table:table-cell table:style-name="ce131" office:value-type="float" office:value="1936" calcext:value-type="float">
            <text:p>1936</text:p>
          </table:table-cell>
          <table:table-cell table:style-name="ce131" office:value-type="float" office:value="17.18" calcext:value-type="float">
            <text:p>17.18</text:p>
          </table:table-cell>
          <table:table-cell table:style-name="ce151" office:value-type="float" office:value="0.54" calcext:value-type="float">
            <text:p>0.54</text:p>
          </table:table-cell>
          <table:table-cell table:style-name="ce157" table:formula="of:=[.C12]/[.B12]" office:value-type="percentage" office:value="0.0314318975552969" calcext:value-type="percentage">
            <text:p>3.14 %</text:p>
          </table:table-cell>
          <table:table-cell table:style-name="ce138" office:value-type="percentage" office:value="0.0259" calcext:value-type="percentage">
            <text:p>2.59 %</text:p>
          </table:table-cell>
          <table:table-cell table:style-name="ce157" table:formula="of:=(([.E11]*(1-(1+[.E12])^(-10))/[.E12]+1/(1+[.E12])^10)-1)+[.E11]" office:value-type="percentage" office:value="0.0501787540454508" calcext:value-type="percentage">
            <text:p>5.02 %</text:p>
          </table:table-cell>
          <table:table-cell table:style-name="ce76" table:formula="of:=[$'Moody''s Rates'.C29]" office:value-type="percentage" office:value="0.031" calcext:value-type="percentage">
            <text:p>3.10 %</text:p>
          </table:table-cell>
          <table:table-cell table:style-name="ce157" table:formula="of:=(([.G11]*(1-(1+[.G12])^(-10))/[.G12]+1/(1+[.G12])^10)-1)+[.G11]" office:value-type="percentage" office:value="0.0632552374989251" calcext:value-type="percentage">
            <text:p>6.33 %</text:p>
          </table:table-cell>
          <table:table-cell table:style-name="ce164" table:formula="of:=[$'Moody''s Rates'.K29]" office:value-type="percentage" office:value="0.0453" calcext:value-type="percentage">
            <text:p>4.53 %</text:p>
          </table:table-cell>
          <table:table-cell table:style-name="ce165" table:formula="of:=(([.I11]*(1-(1+[.I12])^(-10))/[.I12]+1/(1+[.I12])^10)-1)+[.I11]" office:value-type="percentage" office:value="0.113838158719227" calcext:value-type="percentage">
            <text:p>11.38 %</text:p>
          </table:table-cell>
          <table:table-cell table:style-name="ce127" office:value-type="percentage" office:value="0.0321860669456489" calcext:value-type="percentage">
            <text:p>3.22 %</text:p>
          </table:table-cell>
          <table:table-cell table:style-name="ce77"/>
          <table:table-cell table:number-columns-repeated="16372"/>
        </table:table-row>
        <table:table-row table:style-name="ro2">
          <table:table-cell table:style-name="ce131" office:value-type="float" office:value="1937" calcext:value-type="float">
            <text:p>1937</text:p>
          </table:table-cell>
          <table:table-cell table:style-name="ce131" office:value-type="float" office:value="10.55" calcext:value-type="float">
            <text:p>10.55</text:p>
          </table:table-cell>
          <table:table-cell table:style-name="ce151" table:formula="of:=[.D13]*[.B13]" office:value-type="float" office:value="0.55915" calcext:value-type="float">
            <text:p>0.56</text:p>
          </table:table-cell>
          <table:table-cell table:style-name="ce157" office:value-type="percentage" office:value="0.053" calcext:value-type="percentage">
            <text:p>5.30 %</text:p>
          </table:table-cell>
          <table:table-cell table:style-name="ce138" office:value-type="percentage" office:value="0.0273" calcext:value-type="percentage">
            <text:p>2.73 %</text:p>
          </table:table-cell>
          <table:table-cell table:style-name="ce157" table:formula="of:=(([.E12]*(1-(1+[.E13])^(-10))/[.E13]+1/(1+[.E13])^10)-1)+[.E12]" office:value-type="percentage" office:value="0.0137914605964605" calcext:value-type="percentage">
            <text:p>1.38 %</text:p>
          </table:table-cell>
          <table:table-cell table:style-name="ce76" table:formula="of:=[$'Moody''s Rates'.C30]" office:value-type="percentage" office:value="0.0321" calcext:value-type="percentage">
            <text:p>3.21 %</text:p>
          </table:table-cell>
          <table:table-cell table:style-name="ce157" table:formula="of:=(([.G12]*(1-(1+[.G13])^(-10))/[.G13]+1/(1+[.G13])^10)-1)+[.G12]" office:value-type="percentage" office:value="0.0217165417597699" calcext:value-type="percentage">
            <text:p>2.17 %</text:p>
          </table:table-cell>
          <table:table-cell table:style-name="ce164" table:formula="of:=[$'Moody''s Rates'.K30]" office:value-type="percentage" office:value="0.0573" calcext:value-type="percentage">
            <text:p>5.73 %</text:p>
          </table:table-cell>
          <table:table-cell table:style-name="ce165" table:formula="of:=(([.I12]*(1-(1+[.I13])^(-10))/[.I13]+1/(1+[.I13])^10)-1)+[.I12]" office:value-type="percentage" office:value="-0.0441619168399827" calcext:value-type="percentage">
            <text:p>-4.42 %</text:p>
          </table:table-cell>
          <table:table-cell table:style-name="ce127" office:value-type="percentage" office:value="0.0256339818364459" calcext:value-type="percentage">
            <text:p>2.56 %</text:p>
          </table:table-cell>
          <table:table-cell table:style-name="ce77"/>
          <table:table-cell table:number-columns-repeated="16372"/>
        </table:table-row>
        <table:table-row table:style-name="ro2">
          <table:table-cell table:style-name="ce131" office:value-type="float" office:value="1938" calcext:value-type="float">
            <text:p>1938</text:p>
          </table:table-cell>
          <table:table-cell table:style-name="ce131" office:value-type="float" office:value="13.14" calcext:value-type="float">
            <text:p>13.14</text:p>
          </table:table-cell>
          <table:table-cell table:style-name="ce151" table:formula="of:=[.D14]*[.B14]" office:value-type="float" office:value="0.49932" calcext:value-type="float">
            <text:p>0.50</text:p>
          </table:table-cell>
          <table:table-cell table:style-name="ce157" office:value-type="percentage" office:value="0.038" calcext:value-type="percentage">
            <text:p>3.80 %</text:p>
          </table:table-cell>
          <table:table-cell table:style-name="ce138" office:value-type="percentage" office:value="0.0256" calcext:value-type="percentage">
            <text:p>2.56 %</text:p>
          </table:table-cell>
          <table:table-cell table:style-name="ce157" table:formula="of:=(([.E13]*(1-(1+[.E14])^(-10))/[.E14]+1/(1+[.E14])^10)-1)+[.E13]" office:value-type="percentage" office:value="0.0421324853220461" calcext:value-type="percentage">
            <text:p>4.21 %</text:p>
          </table:table-cell>
          <table:table-cell table:style-name="ce76" table:formula="of:=[$'Moody''s Rates'.C31]" office:value-type="percentage" office:value="0.0308" calcext:value-type="percentage">
            <text:p>3.08 %</text:p>
          </table:table-cell>
          <table:table-cell table:style-name="ce157" table:formula="of:=(([.G13]*(1-(1+[.G14])^(-10))/[.G14]+1/(1+[.G14])^10)-1)+[.G13]" office:value-type="percentage" office:value="0.0431441265009569" calcext:value-type="percentage">
            <text:p>4.31 %</text:p>
          </table:table-cell>
          <table:table-cell table:style-name="ce164" table:formula="of:=[$'Moody''s Rates'.K31]" office:value-type="percentage" office:value="0.0527" calcext:value-type="percentage">
            <text:p>5.27 %</text:p>
          </table:table-cell>
          <table:table-cell table:style-name="ce165" table:formula="of:=(([.I13]*(1-(1+[.I14])^(-10))/[.I14]+1/(1+[.I14])^10)-1)+[.I13]" office:value-type="percentage" office:value="0.092358817136874" calcext:value-type="percentage">
            <text:p>9.24 %</text:p>
          </table:table-cell>
          <table:table-cell table:style-name="ce127" office:value-type="percentage" office:value="-0.00873695790684603" calcext:value-type="percentage">
            <text:p>-0.87 %</text:p>
          </table:table-cell>
          <table:table-cell table:style-name="ce77"/>
          <table:table-cell table:number-columns-repeated="16372"/>
        </table:table-row>
        <table:table-row table:style-name="ro2">
          <table:table-cell table:style-name="ce131" office:value-type="float" office:value="1939" calcext:value-type="float">
            <text:p>1939</text:p>
          </table:table-cell>
          <table:table-cell table:style-name="ce131" office:value-type="float" office:value="12.46" calcext:value-type="float">
            <text:p>12.46</text:p>
          </table:table-cell>
          <table:table-cell table:style-name="ce151" table:formula="of:=[.D15]*[.B15]" office:value-type="float" office:value="0.53578" calcext:value-type="float">
            <text:p>0.54</text:p>
          </table:table-cell>
          <table:table-cell table:style-name="ce157" office:value-type="percentage" office:value="0.043" calcext:value-type="percentage">
            <text:p>4.30 %</text:p>
          </table:table-cell>
          <table:table-cell table:style-name="ce138" office:value-type="percentage" office:value="0.0235" calcext:value-type="percentage">
            <text:p>2.35 %</text:p>
          </table:table-cell>
          <table:table-cell table:style-name="ce157" table:formula="of:=(([.E14]*(1-(1+[.E15])^(-10))/[.E15]+1/(1+[.E15])^10)-1)+[.E14]" office:value-type="percentage" office:value="0.0441226139420607" calcext:value-type="percentage">
            <text:p>4.41 %</text:p>
          </table:table-cell>
          <table:table-cell table:style-name="ce76" table:formula="of:=[$'Moody''s Rates'.C32]" office:value-type="percentage" office:value="0.0294" calcext:value-type="percentage">
            <text:p>2.94 %</text:p>
          </table:table-cell>
          <table:table-cell table:style-name="ce157" table:formula="of:=(([.G14]*(1-(1+[.G15])^(-10))/[.G15]+1/(1+[.G15])^10)-1)+[.G14]" office:value-type="percentage" office:value="0.0427789351286612" calcext:value-type="percentage">
            <text:p>4.28 %</text:p>
          </table:table-cell>
          <table:table-cell table:style-name="ce164" table:formula="of:=[$'Moody''s Rates'.K32]" office:value-type="percentage" office:value="0.0492" calcext:value-type="percentage">
            <text:p>4.92 %</text:p>
          </table:table-cell>
          <table:table-cell table:style-name="ce165" table:formula="of:=(([.I14]*(1-(1+[.I15])^(-10))/[.I15]+1/(1+[.I15])^10)-1)+[.I14]" office:value-type="percentage" office:value="0.0798313776534612" calcext:value-type="percentage">
            <text:p>7.98 %</text:p>
          </table:table-cell>
          <table:table-cell table:style-name="ce127" office:value-type="percentage" office:value="-0.0130160387817538" calcext:value-type="percentage">
            <text:p>-1.30 %</text:p>
          </table:table-cell>
          <table:table-cell table:style-name="ce77"/>
          <table:table-cell table:number-columns-repeated="16372"/>
        </table:table-row>
        <table:table-row table:style-name="ro2">
          <table:table-cell table:style-name="ce131" office:value-type="float" office:value="1940" calcext:value-type="float">
            <text:p>1940</text:p>
          </table:table-cell>
          <table:table-cell table:style-name="ce131" office:value-type="float" office:value="10.58" calcext:value-type="float">
            <text:p>10.58</text:p>
          </table:table-cell>
          <table:table-cell table:style-name="ce151" table:formula="of:=[.D16]*[.B16]" office:value-type="float" office:value="0.55016" calcext:value-type="float">
            <text:p>0.55</text:p>
          </table:table-cell>
          <table:table-cell table:style-name="ce157" office:value-type="percentage" office:value="0.052" calcext:value-type="percentage">
            <text:p>5.20 %</text:p>
          </table:table-cell>
          <table:table-cell table:style-name="ce138" office:value-type="percentage" office:value="0.0201" calcext:value-type="percentage">
            <text:p>2.01 %</text:p>
          </table:table-cell>
          <table:table-cell table:style-name="ce157" table:formula="of:=(([.E15]*(1-(1+[.E16])^(-10))/[.E16]+1/(1+[.E16])^10)-1)+[.E15]" office:value-type="percentage" office:value="0.0540248159628455" calcext:value-type="percentage">
            <text:p>5.40 %</text:p>
          </table:table-cell>
          <table:table-cell table:style-name="ce76" table:formula="of:=[$'Moody''s Rates'.C33]" office:value-type="percentage" office:value="0.0271" calcext:value-type="percentage">
            <text:p>2.71 %</text:p>
          </table:table-cell>
          <table:table-cell table:style-name="ce157" table:formula="of:=(([.G15]*(1-(1+[.G16])^(-10))/[.G16]+1/(1+[.G16])^10)-1)+[.G15]" office:value-type="percentage" office:value="0.0493130569028791" calcext:value-type="percentage">
            <text:p>4.93 %</text:p>
          </table:table-cell>
          <table:table-cell table:style-name="ce164" table:formula="of:=[$'Moody''s Rates'.K33]" office:value-type="percentage" office:value="0.0445" calcext:value-type="percentage">
            <text:p>4.45 %</text:p>
          </table:table-cell>
          <table:table-cell table:style-name="ce165" table:formula="of:=(([.I15]*(1-(1+[.I16])^(-10))/[.I16]+1/(1+[.I16])^10)-1)+[.I15]" office:value-type="percentage" office:value="0.0864813717758298" calcext:value-type="percentage">
            <text:p>8.65 %</text:p>
          </table:table-cell>
          <table:table-cell table:style-name="ce127" office:value-type="percentage" office:value="0.0330660265936933" calcext:value-type="percentage">
            <text:p>3.31 %</text:p>
          </table:table-cell>
          <table:table-cell table:style-name="ce77"/>
          <table:table-cell table:number-columns-repeated="16372"/>
        </table:table-row>
        <table:table-row table:style-name="ro2">
          <table:table-cell table:style-name="ce131" office:value-type="float" office:value="1941" calcext:value-type="float">
            <text:p>1941</text:p>
          </table:table-cell>
          <table:table-cell table:style-name="ce131" office:value-type="float" office:value="8.69" calcext:value-type="float">
            <text:p>8.69</text:p>
          </table:table-cell>
          <table:table-cell table:style-name="ce151" table:formula="of:=[.D17]*[.B17]" office:value-type="float" office:value="0.53878" calcext:value-type="float">
            <text:p>0.54</text:p>
          </table:table-cell>
          <table:table-cell table:style-name="ce157" office:value-type="percentage" office:value="0.062" calcext:value-type="percentage">
            <text:p>6.20 %</text:p>
          </table:table-cell>
          <table:table-cell table:style-name="ce138" office:value-type="percentage" office:value="0.0247" calcext:value-type="percentage">
            <text:p>2.47 %</text:p>
          </table:table-cell>
          <table:table-cell table:style-name="ce157" table:formula="of:=(([.E16]*(1-(1+[.E17])^(-10))/[.E17]+1/(1+[.E17])^10)-1)+[.E16]" office:value-type="percentage" office:value="-0.0202219758485802" calcext:value-type="percentage">
            <text:p>-2.02 %</text:p>
          </table:table-cell>
          <table:table-cell table:style-name="ce76" table:formula="of:=[$'Moody''s Rates'.C34]" office:value-type="percentage" office:value="0.028" calcext:value-type="percentage">
            <text:p>2.80 %</text:p>
          </table:table-cell>
          <table:table-cell table:style-name="ce157" table:formula="of:=(([.G16]*(1-(1+[.G17])^(-10))/[.G17]+1/(1+[.G17])^10)-1)+[.G16]" office:value-type="percentage" office:value="0.0193438594668959" calcext:value-type="percentage">
            <text:p>1.93 %</text:p>
          </table:table-cell>
          <table:table-cell table:style-name="ce164" table:formula="of:=[$'Moody''s Rates'.K34]" office:value-type="percentage" office:value="0.0438" calcext:value-type="percentage">
            <text:p>4.38 %</text:p>
          </table:table-cell>
          <table:table-cell table:style-name="ce165" table:formula="of:=(([.I16]*(1-(1+[.I17])^(-10))/[.I17]+1/(1+[.I17])^10)-1)+[.I16]" office:value-type="percentage" office:value="0.050071728572759" calcext:value-type="percentage">
            <text:p>5.01 %</text:p>
          </table:table-cell>
          <table:table-cell table:style-name="ce127" office:value-type="percentage" office:value="-0.0838461703627221" calcext:value-type="percentage">
            <text:p>-8.38 %</text:p>
          </table:table-cell>
          <table:table-cell table:style-name="ce77"/>
          <table:table-cell table:number-columns-repeated="16372"/>
        </table:table-row>
        <table:table-row table:style-name="ro2">
          <table:table-cell table:style-name="ce131" office:value-type="float" office:value="1942" calcext:value-type="float">
            <text:p>1942</text:p>
          </table:table-cell>
          <table:table-cell table:style-name="ce131" office:value-type="float" office:value="9.77" calcext:value-type="float">
            <text:p>9.77</text:p>
          </table:table-cell>
          <table:table-cell table:style-name="ce151" table:formula="of:=[.D18]*[.B18]" office:value-type="float" office:value="0.5862" calcext:value-type="float">
            <text:p>0.59</text:p>
          </table:table-cell>
          <table:table-cell table:style-name="ce157" office:value-type="percentage" office:value="0.06" calcext:value-type="percentage">
            <text:p>6.00 %</text:p>
          </table:table-cell>
          <table:table-cell table:style-name="ce138" office:value-type="percentage" office:value="0.0249" calcext:value-type="percentage">
            <text:p>2.49 %</text:p>
          </table:table-cell>
          <table:table-cell table:style-name="ce157" table:formula="of:=(([.E17]*(1-(1+[.E18])^(-10))/[.E18]+1/(1+[.E18])^10)-1)+[.E17]" office:value-type="percentage" office:value="0.0229486823744842" calcext:value-type="percentage">
            <text:p>2.29 %</text:p>
          </table:table-cell>
          <table:table-cell table:style-name="ce76" table:formula="of:=[$'Moody''s Rates'.C35]" office:value-type="percentage" office:value="0.0281" calcext:value-type="percentage">
            <text:p>2.81 %</text:p>
          </table:table-cell>
          <table:table-cell table:style-name="ce157" table:formula="of:=(([.G17]*(1-(1+[.G18])^(-10))/[.G18]+1/(1+[.G18])^10)-1)+[.G17]" office:value-type="percentage" office:value="0.0271386484407883" calcext:value-type="percentage">
            <text:p>2.71 %</text:p>
          </table:table-cell>
          <table:table-cell table:style-name="ce164" table:formula="of:=[$'Moody''s Rates'.K35]" office:value-type="percentage" office:value="0.0428" calcext:value-type="percentage">
            <text:p>4.28 %</text:p>
          </table:table-cell>
          <table:table-cell table:style-name="ce165" table:formula="of:=(([.I17]*(1-(1+[.I18])^(-10))/[.I18]+1/(1+[.I18])^10)-1)+[.I17]" office:value-type="percentage" office:value="0.051799010426587" calcext:value-type="percentage">
            <text:p>5.18 %</text:p>
          </table:table-cell>
          <table:table-cell table:style-name="ce127" office:value-type="percentage" office:value="0.0333303523611868" calcext:value-type="percentage">
            <text:p>3.33 %</text:p>
          </table:table-cell>
          <table:table-cell table:style-name="ce77"/>
          <table:table-cell table:number-columns-repeated="16372"/>
        </table:table-row>
        <table:table-row table:style-name="ro2">
          <table:table-cell table:style-name="ce131" office:value-type="float" office:value="1943" calcext:value-type="float">
            <text:p>1943</text:p>
          </table:table-cell>
          <table:table-cell table:style-name="ce131" office:value-type="float" office:value="11.67" calcext:value-type="float">
            <text:p>11.67</text:p>
          </table:table-cell>
          <table:table-cell table:style-name="ce151" table:formula="of:=[.D19]*[.B19]" office:value-type="float" office:value="0.54849" calcext:value-type="float">
            <text:p>0.55</text:p>
          </table:table-cell>
          <table:table-cell table:style-name="ce157" office:value-type="percentage" office:value="0.047" calcext:value-type="percentage">
            <text:p>4.70 %</text:p>
          </table:table-cell>
          <table:table-cell table:style-name="ce138" office:value-type="percentage" office:value="0.0249" calcext:value-type="percentage">
            <text:p>2.49 %</text:p>
          </table:table-cell>
          <table:table-cell table:style-name="ce157" table:formula="of:=(([.E18]*(1-(1+[.E19])^(-10))/[.E19]+1/(1+[.E19])^10)-1)+[.E18]" office:value-type="percentage" office:value="0.0249" calcext:value-type="percentage">
            <text:p>2.49 %</text:p>
          </table:table-cell>
          <table:table-cell table:style-name="ce76" table:formula="of:=[$'Moody''s Rates'.C36]" office:value-type="percentage" office:value="0.0274" calcext:value-type="percentage">
            <text:p>2.74 %</text:p>
          </table:table-cell>
          <table:table-cell table:style-name="ce157" table:formula="of:=(([.G18]*(1-(1+[.G19])^(-10))/[.G19]+1/(1+[.G19])^10)-1)+[.G18]" office:value-type="percentage" office:value="0.0341511603229361" calcext:value-type="percentage">
            <text:p>3.42 %</text:p>
          </table:table-cell>
          <table:table-cell table:style-name="ce164" table:formula="of:=[$'Moody''s Rates'.K36]" office:value-type="percentage" office:value="0.0382" calcext:value-type="percentage">
            <text:p>3.82 %</text:p>
          </table:table-cell>
          <table:table-cell table:style-name="ce165" table:formula="of:=(([.I18]*(1-(1+[.I19])^(-10))/[.I19]+1/(1+[.I19])^10)-1)+[.I18]" office:value-type="percentage" office:value="0.080446700601059" calcext:value-type="percentage">
            <text:p>8.04 %</text:p>
          </table:table-cell>
          <table:table-cell table:style-name="ce127" office:value-type="percentage" office:value="0.114462697286877" calcext:value-type="percentage">
            <text:p>11.45 %</text:p>
          </table:table-cell>
          <table:table-cell table:style-name="ce77"/>
          <table:table-cell table:number-columns-repeated="16372"/>
        </table:table-row>
        <table:table-row table:style-name="ro2">
          <table:table-cell table:style-name="ce131" office:value-type="float" office:value="1944" calcext:value-type="float">
            <text:p>1944</text:p>
          </table:table-cell>
          <table:table-cell table:style-name="ce131" office:value-type="float" office:value="13.28" calcext:value-type="float">
            <text:p>13.28</text:p>
          </table:table-cell>
          <table:table-cell table:style-name="ce151" table:formula="of:=[.D20]*[.B20]" office:value-type="float" office:value="0.61088" calcext:value-type="float">
            <text:p>0.61</text:p>
          </table:table-cell>
          <table:table-cell table:style-name="ce157" office:value-type="percentage" office:value="0.046" calcext:value-type="percentage">
            <text:p>4.60 %</text:p>
          </table:table-cell>
          <table:table-cell table:style-name="ce138" office:value-type="percentage" office:value="0.0248" calcext:value-type="percentage">
            <text:p>2.48 %</text:p>
          </table:table-cell>
          <table:table-cell table:style-name="ce157" table:formula="of:=(([.E19]*(1-(1+[.E20])^(-10))/[.E20]+1/(1+[.E20])^10)-1)+[.E19]" office:value-type="percentage" office:value="0.0257761115790703" calcext:value-type="percentage">
            <text:p>2.58 %</text:p>
          </table:table-cell>
          <table:table-cell table:style-name="ce76" table:formula="of:=[$'Moody''s Rates'.C37]" office:value-type="percentage" office:value="0.027" calcext:value-type="percentage">
            <text:p>2.70 %</text:p>
          </table:table-cell>
          <table:table-cell table:style-name="ce157" table:formula="of:=(([.G19]*(1-(1+[.G20])^(-10))/[.G20]+1/(1+[.G20])^10)-1)+[.G19]" office:value-type="percentage" office:value="0.0308649211897848" calcext:value-type="percentage">
            <text:p>3.09 %</text:p>
          </table:table-cell>
          <table:table-cell table:style-name="ce164" table:formula="of:=[$'Moody''s Rates'.K37]" office:value-type="percentage" office:value="0.0349" calcext:value-type="percentage">
            <text:p>3.49 %</text:p>
          </table:table-cell>
          <table:table-cell table:style-name="ce165" table:formula="of:=(([.I19]*(1-(1+[.I20])^(-10))/[.I20]+1/(1+[.I20])^10)-1)+[.I19]" office:value-type="percentage" office:value="0.0656586358825617" calcext:value-type="percentage">
            <text:p>6.57 %</text:p>
          </table:table-cell>
          <table:table-cell table:style-name="ce127" office:value-type="percentage" office:value="0.16584229425873" calcext:value-type="percentage">
            <text:p>16.58 %</text:p>
          </table:table-cell>
          <table:table-cell table:style-name="ce77"/>
          <table:table-cell table:number-columns-repeated="16372"/>
        </table:table-row>
        <table:table-row table:style-name="ro2">
          <table:table-cell table:style-name="ce131" office:value-type="float" office:value="1945" calcext:value-type="float">
            <text:p>1945</text:p>
          </table:table-cell>
          <table:table-cell table:style-name="ce131" office:value-type="float" office:value="17.36" calcext:value-type="float">
            <text:p>17.36</text:p>
          </table:table-cell>
          <table:table-cell table:style-name="ce151" table:formula="of:=[.D21]*[.B21]" office:value-type="float" office:value="0.67704" calcext:value-type="float">
            <text:p>0.68</text:p>
          </table:table-cell>
          <table:table-cell table:style-name="ce157" office:value-type="percentage" office:value="0.039" calcext:value-type="percentage">
            <text:p>3.90 %</text:p>
          </table:table-cell>
          <table:table-cell table:style-name="ce138" office:value-type="percentage" office:value="0.0233" calcext:value-type="percentage">
            <text:p>2.33 %</text:p>
          </table:table-cell>
          <table:table-cell table:style-name="ce157" table:formula="of:=(([.E20]*(1-(1+[.E21])^(-10))/[.E21]+1/(1+[.E21])^10)-1)+[.E20]" office:value-type="percentage" office:value="0.0380441734192372" calcext:value-type="percentage">
            <text:p>3.80 %</text:p>
          </table:table-cell>
          <table:table-cell table:style-name="ce76" table:formula="of:=[$'Moody''s Rates'.C38]" office:value-type="percentage" office:value="0.0261" calcext:value-type="percentage">
            <text:p>2.61 %</text:p>
          </table:table-cell>
          <table:table-cell table:style-name="ce157" table:formula="of:=(([.G20]*(1-(1+[.G21])^(-10))/[.G21]+1/(1+[.G21])^10)-1)+[.G20]" office:value-type="percentage" office:value="0.0348322730659639" calcext:value-type="percentage">
            <text:p>3.48 %</text:p>
          </table:table-cell>
          <table:table-cell table:style-name="ce164" table:formula="of:=[$'Moody''s Rates'.K38]" office:value-type="percentage" office:value="0.031" calcext:value-type="percentage">
            <text:p>3.10 %</text:p>
          </table:table-cell>
          <table:table-cell table:style-name="ce165" table:formula="of:=(([.I20]*(1-(1+[.I21])^(-10))/[.I21]+1/(1+[.I21])^10)-1)+[.I20]" office:value-type="percentage" office:value="0.0679986547781789" calcext:value-type="percentage">
            <text:p>6.80 %</text:p>
          </table:table-cell>
          <table:table-cell table:style-name="ce127" office:value-type="percentage" office:value="0.117773756041345" calcext:value-type="percentage">
            <text:p>11.78 %</text:p>
          </table:table-cell>
          <table:table-cell table:style-name="ce77"/>
          <table:table-cell table:number-columns-repeated="16372"/>
        </table:table-row>
        <table:table-row table:style-name="ro2">
          <table:table-cell table:style-name="ce131" office:value-type="float" office:value="1946" calcext:value-type="float">
            <text:p>1946</text:p>
          </table:table-cell>
          <table:table-cell table:style-name="ce131" office:value-type="float" office:value="15.3" calcext:value-type="float">
            <text:p>15.3</text:p>
          </table:table-cell>
          <table:table-cell table:style-name="ce151" table:formula="of:=[.D22]*[.B22]" office:value-type="float" office:value="0.5967" calcext:value-type="float">
            <text:p>0.60</text:p>
          </table:table-cell>
          <table:table-cell table:style-name="ce157" office:value-type="percentage" office:value="0.039" calcext:value-type="percentage">
            <text:p>3.90 %</text:p>
          </table:table-cell>
          <table:table-cell table:style-name="ce138" office:value-type="percentage" office:value="0.0224" calcext:value-type="percentage">
            <text:p>2.24 %</text:p>
          </table:table-cell>
          <table:table-cell table:style-name="ce157" table:formula="of:=(([.E21]*(1-(1+[.E22])^(-10))/[.E22]+1/(1+[.E22])^10)-1)+[.E21]" office:value-type="percentage" office:value="0.0312837453756957" calcext:value-type="percentage">
            <text:p>3.13 %</text:p>
          </table:table-cell>
          <table:table-cell table:style-name="ce76" table:formula="of:=[$'Moody''s Rates'.C39]" office:value-type="percentage" office:value="0.0261" calcext:value-type="percentage">
            <text:p>2.61 %</text:p>
          </table:table-cell>
          <table:table-cell table:style-name="ce157" table:formula="of:=(([.G21]*(1-(1+[.G22])^(-10))/[.G22]+1/(1+[.G22])^10)-1)+[.G21]" office:value-type="percentage" office:value="0.0261" calcext:value-type="percentage">
            <text:p>2.61 %</text:p>
          </table:table-cell>
          <table:table-cell table:style-name="ce164" table:formula="of:=[$'Moody''s Rates'.K39]" office:value-type="percentage" office:value="0.0317" calcext:value-type="percentage">
            <text:p>3.17 %</text:p>
          </table:table-cell>
          <table:table-cell table:style-name="ce165" table:formula="of:=(([.I21]*(1-(1+[.I22])^(-10))/[.I22]+1/(1+[.I22])^10)-1)+[.I21]" office:value-type="percentage" office:value="0.0250803297731959" calcext:value-type="percentage">
            <text:p>2.51 %</text:p>
          </table:table-cell>
          <table:table-cell table:style-name="ce127" office:value-type="percentage" office:value="0.241016723976778" calcext:value-type="percentage">
            <text:p>24.10 %</text:p>
          </table:table-cell>
          <table:table-cell table:style-name="ce77"/>
          <table:table-cell table:number-columns-repeated="16372"/>
        </table:table-row>
        <table:table-row table:style-name="ro2">
          <table:table-cell table:style-name="ce131" office:value-type="float" office:value="1947" calcext:value-type="float">
            <text:p>1947</text:p>
          </table:table-cell>
          <table:table-cell table:style-name="ce131" office:value-type="float" office:value="15.3" calcext:value-type="float">
            <text:p>15.3</text:p>
          </table:table-cell>
          <table:table-cell table:style-name="ce151" table:formula="of:=[.D23]*[.B23]" office:value-type="float" office:value="0.7956" calcext:value-type="float">
            <text:p>0.80</text:p>
          </table:table-cell>
          <table:table-cell table:style-name="ce157" office:value-type="percentage" office:value="0.052" calcext:value-type="percentage">
            <text:p>5.20 %</text:p>
          </table:table-cell>
          <table:table-cell table:style-name="ce138" office:value-type="percentage" office:value="0.0239" calcext:value-type="percentage">
            <text:p>2.39 %</text:p>
          </table:table-cell>
          <table:table-cell table:style-name="ce157" table:formula="of:=(([.E22]*(1-(1+[.E23])^(-10))/[.E23]+1/(1+[.E23])^10)-1)+[.E22]" office:value-type="percentage" office:value="0.00919696806283213" calcext:value-type="percentage">
            <text:p>0.92 %</text:p>
          </table:table-cell>
          <table:table-cell table:style-name="ce76" table:formula="of:=[$'Moody''s Rates'.C40]" office:value-type="percentage" office:value="0.0286" calcext:value-type="percentage">
            <text:p>2.86 %</text:p>
          </table:table-cell>
          <table:table-cell table:style-name="ce157" table:formula="of:=(([.G22]*(1-(1+[.G23])^(-10))/[.G23]+1/(1+[.G23])^10)-1)+[.G22]" office:value-type="percentage" office:value="0.00462131419753085" calcext:value-type="percentage">
            <text:p>0.46 %</text:p>
          </table:table-cell>
          <table:table-cell table:style-name="ce164" table:formula="of:=[$'Moody''s Rates'.K40]" office:value-type="percentage" office:value="0.0352" calcext:value-type="percentage">
            <text:p>3.52 %</text:p>
          </table:table-cell>
          <table:table-cell table:style-name="ce165" table:formula="of:=(([.I22]*(1-(1+[.I23])^(-10))/[.I23]+1/(1+[.I23])^10)-1)+[.I22]" office:value-type="percentage" office:value="0.00262120226656942" calcext:value-type="percentage">
            <text:p>0.26 %</text:p>
          </table:table-cell>
          <table:table-cell table:style-name="ce127" office:value-type="percentage" office:value="0.212638353624297" calcext:value-type="percentage">
            <text:p>21.26 %</text:p>
          </table:table-cell>
          <table:table-cell table:style-name="ce77"/>
          <table:table-cell table:number-columns-repeated="16372"/>
        </table:table-row>
        <table:table-row table:style-name="ro2">
          <table:table-cell table:style-name="ce131" office:value-type="float" office:value="1948" calcext:value-type="float">
            <text:p>1948</text:p>
          </table:table-cell>
          <table:table-cell table:style-name="ce131" office:value-type="float" office:value="15.2" calcext:value-type="float">
            <text:p>15.2</text:p>
          </table:table-cell>
          <table:table-cell table:style-name="ce151" table:formula="of:=[.D24]*[.B24]" office:value-type="float" office:value="0.9728" calcext:value-type="float">
            <text:p>0.97</text:p>
          </table:table-cell>
          <table:table-cell table:style-name="ce157" office:value-type="percentage" office:value="0.064" calcext:value-type="percentage">
            <text:p>6.40 %</text:p>
          </table:table-cell>
          <table:table-cell table:style-name="ce138" office:value-type="percentage" office:value="0.0244" calcext:value-type="percentage">
            <text:p>2.44 %</text:p>
          </table:table-cell>
          <table:table-cell table:style-name="ce157" table:formula="of:=(([.E23]*(1-(1+[.E24])^(-10))/[.E24]+1/(1+[.E24])^10)-1)+[.E23]" office:value-type="percentage" office:value="0.019510369413175" calcext:value-type="percentage">
            <text:p>1.95 %</text:p>
          </table:table-cell>
          <table:table-cell table:style-name="ce76" table:formula="of:=[$'Moody''s Rates'.C41]" office:value-type="percentage" office:value="0.0279" calcext:value-type="percentage">
            <text:p>2.79 %</text:p>
          </table:table-cell>
          <table:table-cell table:style-name="ce157" table:formula="of:=(([.G23]*(1-(1+[.G24])^(-10))/[.G24]+1/(1+[.G24])^10)-1)+[.G23]" office:value-type="percentage" office:value="0.0346356489384414" calcext:value-type="percentage">
            <text:p>3.46 %</text:p>
          </table:table-cell>
          <table:table-cell table:style-name="ce164" table:formula="of:=[$'Moody''s Rates'.K41]" office:value-type="percentage" office:value="0.0353" calcext:value-type="percentage">
            <text:p>3.53 %</text:p>
          </table:table-cell>
          <table:table-cell table:style-name="ce165" table:formula="of:=(([.I23]*(1-(1+[.I24])^(-10))/[.I24]+1/(1+[.I24])^10)-1)+[.I23]" office:value-type="percentage" office:value="0.0343695956051032" calcext:value-type="percentage">
            <text:p>3.44 %</text:p>
          </table:table-cell>
          <table:table-cell table:style-name="ce127" office:value-type="percentage" office:value="0.0205854294411512" calcext:value-type="percentage">
            <text:p>2.06 %</text:p>
          </table:table-cell>
          <table:table-cell table:style-name="ce77"/>
          <table:table-cell table:number-columns-repeated="16372"/>
        </table:table-row>
        <table:table-row table:style-name="ro2">
          <table:table-cell table:style-name="ce131" office:value-type="float" office:value="1949" calcext:value-type="float">
            <text:p>1949</text:p>
          </table:table-cell>
          <table:table-cell table:style-name="ce131" office:value-type="float" office:value="16.79" calcext:value-type="float">
            <text:p>16.79</text:p>
          </table:table-cell>
          <table:table-cell table:style-name="ce151" table:formula="of:=[.D25]*[.B25]" office:value-type="float" office:value="1.19209" calcext:value-type="float">
            <text:p>1.19</text:p>
          </table:table-cell>
          <table:table-cell table:style-name="ce157" office:value-type="percentage" office:value="0.071" calcext:value-type="percentage">
            <text:p>7.10 %</text:p>
          </table:table-cell>
          <table:table-cell table:style-name="ce138" office:value-type="percentage" office:value="0.0219" calcext:value-type="percentage">
            <text:p>2.19 %</text:p>
          </table:table-cell>
          <table:table-cell table:style-name="ce157" table:formula="of:=(([.E24]*(1-(1+[.E25])^(-10))/[.E25]+1/(1+[.E25])^10)-1)+[.E24]" office:value-type="percentage" office:value="0.0466348518279731" calcext:value-type="percentage">
            <text:p>4.66 %</text:p>
          </table:table-cell>
          <table:table-cell table:style-name="ce76" table:formula="of:=[$'Moody''s Rates'.C42]" office:value-type="percentage" office:value="0.0258" calcext:value-type="percentage">
            <text:p>2.58 %</text:p>
          </table:table-cell>
          <table:table-cell table:style-name="ce157" table:formula="of:=(([.G24]*(1-(1+[.G25])^(-10))/[.G25]+1/(1+[.G25])^10)-1)+[.G24]" office:value-type="percentage" office:value="0.0462035890009673" calcext:value-type="percentage">
            <text:p>4.62 %</text:p>
          </table:table-cell>
          <table:table-cell table:style-name="ce164" table:formula="of:=[$'Moody''s Rates'.K42]" office:value-type="percentage" office:value="0.0331" calcext:value-type="percentage">
            <text:p>3.31 %</text:p>
          </table:table-cell>
          <table:table-cell table:style-name="ce165" table:formula="of:=(([.I24]*(1-(1+[.I25])^(-10))/[.I25]+1/(1+[.I25])^10)-1)+[.I24]" office:value-type="percentage" office:value="0.0537730111796589" calcext:value-type="percentage">
            <text:p>5.38 %</text:p>
          </table:table-cell>
          <table:table-cell table:style-name="ce127" office:value-type="percentage" office:value="0.000893718815724531" calcext:value-type="percentage">
            <text:p>0.09 %</text:p>
          </table:table-cell>
          <table:table-cell table:style-name="ce77"/>
          <table:table-cell table:number-columns-repeated="16372"/>
        </table:table-row>
        <table:table-row table:style-name="ro2">
          <table:table-cell table:style-name="ce131" office:value-type="float" office:value="1950" calcext:value-type="float">
            <text:p>1950</text:p>
          </table:table-cell>
          <table:table-cell table:style-name="ce131" office:value-type="float" office:value="20.43" calcext:value-type="float">
            <text:p>20.43</text:p>
          </table:table-cell>
          <table:table-cell table:style-name="ce151" table:formula="of:=[.D26]*[.B26]" office:value-type="float" office:value="1.53225" calcext:value-type="float">
            <text:p>1.53</text:p>
          </table:table-cell>
          <table:table-cell table:style-name="ce157" office:value-type="percentage" office:value="0.075" calcext:value-type="percentage">
            <text:p>7.50 %</text:p>
          </table:table-cell>
          <table:table-cell table:style-name="ce138" office:value-type="percentage" office:value="0.0239" calcext:value-type="percentage">
            <text:p>2.39 %</text:p>
          </table:table-cell>
          <table:table-cell table:style-name="ce157" table:formula="of:=(([.E25]*(1-(1+[.E26])^(-10))/[.E26]+1/(1+[.E26])^10)-1)+[.E25]" office:value-type="percentage" office:value="0.00429595741710961" calcext:value-type="percentage">
            <text:p>0.43 %</text:p>
          </table:table-cell>
          <table:table-cell table:style-name="ce76" table:formula="of:=[$'Moody''s Rates'.C43]" office:value-type="percentage" office:value="0.0267" calcext:value-type="percentage">
            <text:p>2.67 %</text:p>
          </table:table-cell>
          <table:table-cell table:style-name="ce157" table:formula="of:=(([.G25]*(1-(1+[.G26])^(-10))/[.G26]+1/(1+[.G26])^10)-1)+[.G25]" office:value-type="percentage" office:value="0.0179918881606415" calcext:value-type="percentage">
            <text:p>1.80 %</text:p>
          </table:table-cell>
          <table:table-cell table:style-name="ce164" table:formula="of:=[$'Moody''s Rates'.K43]" office:value-type="percentage" office:value="0.032" calcext:value-type="percentage">
            <text:p>3.20 %</text:p>
          </table:table-cell>
          <table:table-cell table:style-name="ce165" table:formula="of:=(([.I25]*(1-(1+[.I26])^(-10))/[.I26]+1/(1+[.I26])^10)-1)+[.I25]" office:value-type="percentage" office:value="0.0423881730567211" calcext:value-type="percentage">
            <text:p>4.24 %</text:p>
          </table:table-cell>
          <table:table-cell table:style-name="ce127" office:value-type="percentage" office:value="0.0364038996221572" calcext:value-type="percentage">
            <text:p>3.64 %</text:p>
          </table:table-cell>
          <table:table-cell table:style-name="ce77"/>
          <table:table-cell table:number-columns-repeated="16372"/>
        </table:table-row>
        <table:table-row table:style-name="ro2">
          <table:table-cell table:style-name="ce131" office:value-type="float" office:value="1951" calcext:value-type="float">
            <text:p>1951</text:p>
          </table:table-cell>
          <table:table-cell table:style-name="ce131" office:value-type="float" office:value="23.77" calcext:value-type="float">
            <text:p>23.77</text:p>
          </table:table-cell>
          <table:table-cell table:style-name="ce151" table:formula="of:=[.D27]*[.B27]" office:value-type="float" office:value="1.49751" calcext:value-type="float">
            <text:p>1.50</text:p>
          </table:table-cell>
          <table:table-cell table:style-name="ce157" office:value-type="percentage" office:value="0.063" calcext:value-type="percentage">
            <text:p>6.30 %</text:p>
          </table:table-cell>
          <table:table-cell table:style-name="ce138" office:value-type="percentage" office:value="0.027" calcext:value-type="percentage">
            <text:p>2.70 %</text:p>
          </table:table-cell>
          <table:table-cell table:style-name="ce157" table:formula="of:=(([.E26]*(1-(1+[.E27])^(-10))/[.E27]+1/(1+[.E27])^10)-1)+[.E26]" office:value-type="percentage" office:value="-0.00295313922083199" calcext:value-type="percentage">
            <text:p>-0.30 %</text:p>
          </table:table-cell>
          <table:table-cell table:style-name="ce76" table:formula="of:=[$'Moody''s Rates'.C44]" office:value-type="percentage" office:value="0.0301" calcext:value-type="percentage">
            <text:p>3.01 %</text:p>
          </table:table-cell>
          <table:table-cell table:style-name="ce157" table:formula="of:=(([.G26]*(1-(1+[.G27])^(-10))/[.G27]+1/(1+[.G27])^10)-1)+[.G26]" office:value-type="percentage" office:value="-0.00228789404054436" calcext:value-type="percentage">
            <text:p>-0.23 %</text:p>
          </table:table-cell>
          <table:table-cell table:style-name="ce164" table:formula="of:=[$'Moody''s Rates'.K44]" office:value-type="percentage" office:value="0.0361" calcext:value-type="percentage">
            <text:p>3.61 %</text:p>
          </table:table-cell>
          <table:table-cell table:style-name="ce165" table:formula="of:=(([.I26]*(1-(1+[.I27])^(-10))/[.I27]+1/(1+[.I27])^10)-1)+[.I26]" office:value-type="percentage" office:value="-0.00190980913013697" calcext:value-type="percentage">
            <text:p>-0.19 %</text:p>
          </table:table-cell>
          <table:table-cell table:style-name="ce127" office:value-type="percentage" office:value="0.0604766420953886" calcext:value-type="percentage">
            <text:p>6.05 %</text:p>
          </table:table-cell>
          <table:table-cell table:style-name="ce77"/>
          <table:table-cell table:number-columns-repeated="16372"/>
        </table:table-row>
        <table:table-row table:style-name="ro2">
          <table:table-cell table:style-name="ce131" office:value-type="float" office:value="1952" calcext:value-type="float">
            <text:p>1952</text:p>
          </table:table-cell>
          <table:table-cell table:style-name="ce131" office:value-type="float" office:value="26.57" calcext:value-type="float">
            <text:p>26.57</text:p>
          </table:table-cell>
          <table:table-cell table:style-name="ce151" table:formula="of:=[.D28]*[.B28]" office:value-type="float" office:value="1.51449" calcext:value-type="float">
            <text:p>1.51</text:p>
          </table:table-cell>
          <table:table-cell table:style-name="ce157" office:value-type="percentage" office:value="0.057" calcext:value-type="percentage">
            <text:p>5.70 %</text:p>
          </table:table-cell>
          <table:table-cell table:style-name="ce138" office:value-type="percentage" office:value="0.0275" calcext:value-type="percentage">
            <text:p>2.75 %</text:p>
          </table:table-cell>
          <table:table-cell table:style-name="ce157" table:formula="of:=(([.E27]*(1-(1+[.E28])^(-10))/[.E28]+1/(1+[.E28])^10)-1)+[.E27]" office:value-type="percentage" office:value="0.0226799619183057" calcext:value-type="percentage">
            <text:p>2.27 %</text:p>
          </table:table-cell>
          <table:table-cell table:style-name="ce76" table:formula="of:=[$'Moody''s Rates'.C45]" office:value-type="percentage" office:value="0.0297" calcext:value-type="percentage">
            <text:p>2.97 %</text:p>
          </table:table-cell>
          <table:table-cell table:style-name="ce157" table:formula="of:=(([.G27]*(1-(1+[.G28])^(-10))/[.G28]+1/(1+[.G28])^10)-1)+[.G27]" office:value-type="percentage" office:value="0.0335173110490827" calcext:value-type="percentage">
            <text:p>3.35 %</text:p>
          </table:table-cell>
          <table:table-cell table:style-name="ce164" table:formula="of:=[$'Moody''s Rates'.K45]" office:value-type="percentage" office:value="0.0351" calcext:value-type="percentage">
            <text:p>3.51 %</text:p>
          </table:table-cell>
          <table:table-cell table:style-name="ce165" table:formula="of:=(([.I27]*(1-(1+[.I28])^(-10))/[.I28]+1/(1+[.I28])^10)-1)+[.I27]" office:value-type="percentage" office:value="0.0444124150474008" calcext:value-type="percentage">
            <text:p>4.44 %</text:p>
          </table:table-cell>
          <table:table-cell table:style-name="ce127" office:value-type="percentage" office:value="0.0440663041839029" calcext:value-type="percentage">
            <text:p>4.41 %</text:p>
          </table:table-cell>
          <table:table-cell table:style-name="ce77"/>
          <table:table-cell table:number-columns-repeated="16372"/>
        </table:table-row>
        <table:table-row table:style-name="ro2">
          <table:table-cell table:style-name="ce131" office:value-type="float" office:value="1953" calcext:value-type="float">
            <text:p>1953</text:p>
          </table:table-cell>
          <table:table-cell table:style-name="ce131" office:value-type="float" office:value="24.81" calcext:value-type="float">
            <text:p>24.81</text:p>
          </table:table-cell>
          <table:table-cell table:style-name="ce151" table:formula="of:=[.D29]*[.B29]" office:value-type="float" office:value="1.43898" calcext:value-type="float">
            <text:p>1.44</text:p>
          </table:table-cell>
          <table:table-cell table:style-name="ce157" office:value-type="percentage" office:value="0.058" calcext:value-type="percentage">
            <text:p>5.80 %</text:p>
          </table:table-cell>
          <table:table-cell table:style-name="ce138" office:value-type="percentage" office:value="0.0259" calcext:value-type="percentage">
            <text:p>2.59 %</text:p>
          </table:table-cell>
          <table:table-cell table:style-name="ce157" table:formula="of:=(([.E28]*(1-(1+[.E29])^(-10))/[.E29]+1/(1+[.E29])^10)-1)+[.E28]" office:value-type="percentage" office:value="0.0414384025890885" calcext:value-type="percentage">
            <text:p>4.14 %</text:p>
          </table:table-cell>
          <table:table-cell table:style-name="ce76" table:formula="of:=[$'Moody''s Rates'.C46]" office:value-type="percentage" office:value="0.0313" calcext:value-type="percentage">
            <text:p>3.13 %</text:p>
          </table:table-cell>
          <table:table-cell table:style-name="ce157" table:formula="of:=(([.G28]*(1-(1+[.G29])^(-10))/[.G29]+1/(1+[.G29])^10)-1)+[.G28]" office:value-type="percentage" office:value="0.0161417791067144" calcext:value-type="percentage">
            <text:p>1.61 %</text:p>
          </table:table-cell>
          <table:table-cell table:style-name="ce164" table:formula="of:=[$'Moody''s Rates'.K46]" office:value-type="percentage" office:value="0.0374" calcext:value-type="percentage">
            <text:p>3.74 %</text:p>
          </table:table-cell>
          <table:table-cell table:style-name="ce165" table:formula="of:=(([.I28]*(1-(1+[.I29])^(-10))/[.I29]+1/(1+[.I29])^10)-1)+[.I28]" office:value-type="percentage" office:value="0.0162011238184432" calcext:value-type="percentage">
            <text:p>1.62 %</text:p>
          </table:table-cell>
          <table:table-cell table:style-name="ce127" office:value-type="percentage" office:value="0.115166246665553" calcext:value-type="percentage">
            <text:p>11.52 %</text:p>
          </table:table-cell>
          <table:table-cell table:style-name="ce77"/>
          <table:table-cell table:number-columns-repeated="16372"/>
        </table:table-row>
        <table:table-row table:style-name="ro2">
          <table:table-cell table:style-name="ce131" office:value-type="float" office:value="1954" calcext:value-type="float">
            <text:p>1954</text:p>
          </table:table-cell>
          <table:table-cell table:style-name="ce131" office:value-type="float" office:value="35.98" calcext:value-type="float">
            <text:p>35.98</text:p>
          </table:table-cell>
          <table:table-cell table:style-name="ce151" table:formula="of:=[.D30]*[.B30]" office:value-type="float" office:value="1.87096" calcext:value-type="float">
            <text:p>1.87</text:p>
          </table:table-cell>
          <table:table-cell table:style-name="ce157" office:value-type="percentage" office:value="0.052" calcext:value-type="percentage">
            <text:p>5.20 %</text:p>
          </table:table-cell>
          <table:table-cell table:style-name="ce138" office:value-type="percentage" office:value="0.0251" calcext:value-type="percentage">
            <text:p>2.51 %</text:p>
          </table:table-cell>
          <table:table-cell table:style-name="ce157" table:formula="of:=(([.E29]*(1-(1+[.E30])^(-10))/[.E30]+1/(1+[.E30])^10)-1)+[.E29]" office:value-type="percentage" office:value="0.0328980345580956" calcext:value-type="percentage">
            <text:p>3.29 %</text:p>
          </table:table-cell>
          <table:table-cell table:style-name="ce76" table:formula="of:=[$'Moody''s Rates'.C47]" office:value-type="percentage" office:value="0.029" calcext:value-type="percentage">
            <text:p>2.90 %</text:p>
          </table:table-cell>
          <table:table-cell table:style-name="ce157" table:formula="of:=(([.G29]*(1-(1+[.G30])^(-10))/[.G30]+1/(1+[.G30])^10)-1)+[.G29]" office:value-type="percentage" office:value="0.0510199736610125" calcext:value-type="percentage">
            <text:p>5.10 %</text:p>
          </table:table-cell>
          <table:table-cell table:style-name="ce164" table:formula="of:=[$'Moody''s Rates'.K47]" office:value-type="percentage" office:value="0.0345" calcext:value-type="percentage">
            <text:p>3.45 %</text:p>
          </table:table-cell>
          <table:table-cell table:style-name="ce165" table:formula="of:=(([.I29]*(1-(1+[.I30])^(-10))/[.I30]+1/(1+[.I30])^10)-1)+[.I29]" office:value-type="percentage" office:value="0.0615790518177076" calcext:value-type="percentage">
            <text:p>6.16 %</text:p>
          </table:table-cell>
          <table:table-cell table:style-name="ce127" office:value-type="percentage" office:value="0.0092270580517746" calcext:value-type="percentage">
            <text:p>0.92 %</text:p>
          </table:table-cell>
          <table:table-cell table:style-name="ce77"/>
          <table:table-cell table:number-columns-repeated="16372"/>
        </table:table-row>
        <table:table-row table:style-name="ro2">
          <table:table-cell table:style-name="ce131" office:value-type="float" office:value="1955" calcext:value-type="float">
            <text:p>1955</text:p>
          </table:table-cell>
          <table:table-cell table:style-name="ce131" office:value-type="float" office:value="45.48" calcext:value-type="float">
            <text:p>45.48</text:p>
          </table:table-cell>
          <table:table-cell table:style-name="ce151" table:formula="of:=[.D31]*[.B31]" office:value-type="float" office:value="2.22852" calcext:value-type="float">
            <text:p>2.23</text:p>
          </table:table-cell>
          <table:table-cell table:style-name="ce157" office:value-type="percentage" office:value="0.049" calcext:value-type="percentage">
            <text:p>4.90 %</text:p>
          </table:table-cell>
          <table:table-cell table:style-name="ce138" office:value-type="percentage" office:value="0.0296" calcext:value-type="percentage">
            <text:p>2.96 %</text:p>
          </table:table-cell>
          <table:table-cell table:style-name="ce157" table:formula="of:=(([.E30]*(1-(1+[.E31])^(-10))/[.E31]+1/(1+[.E31])^10)-1)+[.E30]" office:value-type="percentage" office:value="-0.0133643912886187" calcext:value-type="percentage">
            <text:p>-1.34 %</text:p>
          </table:table-cell>
          <table:table-cell table:style-name="ce76" table:formula="of:=[$'Moody''s Rates'.C48]" office:value-type="percentage" office:value="0.0315" calcext:value-type="percentage">
            <text:p>3.15 %</text:p>
          </table:table-cell>
          <table:table-cell table:style-name="ce157" table:formula="of:=(([.G30]*(1-(1+[.G31])^(-10))/[.G31]+1/(1+[.G31])^10)-1)+[.G30]" office:value-type="percentage" office:value="0.00783681653054477" calcext:value-type="percentage">
            <text:p>0.78 %</text:p>
          </table:table-cell>
          <table:table-cell table:style-name="ce164" table:formula="of:=[$'Moody''s Rates'.K48]" office:value-type="percentage" office:value="0.0362" calcext:value-type="percentage">
            <text:p>3.62 %</text:p>
          </table:table-cell>
          <table:table-cell table:style-name="ce165" table:formula="of:=(([.I30]*(1-(1+[.I31])^(-10))/[.I31]+1/(1+[.I31])^10)-1)+[.I30]" office:value-type="percentage" office:value="0.0204469000434495" calcext:value-type="percentage">
            <text:p>2.04 %</text:p>
          </table:table-cell>
          <table:table-cell table:style-name="ce127" office:value-type="percentage" office:value="0" calcext:value-type="percentage">
            <text:p>0.00 %</text:p>
          </table:table-cell>
          <table:table-cell table:style-name="ce77"/>
          <table:table-cell table:number-columns-repeated="16372"/>
        </table:table-row>
        <table:table-row table:style-name="ro2">
          <table:table-cell table:style-name="ce131" office:value-type="float" office:value="1956" calcext:value-type="float">
            <text:p>1956</text:p>
          </table:table-cell>
          <table:table-cell table:style-name="ce131" office:value-type="float" office:value="46.67" calcext:value-type="float">
            <text:p>46.67</text:p>
          </table:table-cell>
          <table:table-cell table:style-name="ce151" table:formula="of:=[.D32]*[.B32]" office:value-type="float" office:value="2.19349" calcext:value-type="float">
            <text:p>2.19</text:p>
          </table:table-cell>
          <table:table-cell table:style-name="ce157" office:value-type="percentage" office:value="0.047" calcext:value-type="percentage">
            <text:p>4.70 %</text:p>
          </table:table-cell>
          <table:table-cell table:style-name="ce138" office:value-type="percentage" office:value="0.0359" calcext:value-type="percentage">
            <text:p>3.59 %</text:p>
          </table:table-cell>
          <table:table-cell table:style-name="ce157" table:formula="of:=(([.E31]*(1-(1+[.E32])^(-10))/[.E32]+1/(1+[.E32])^10)-1)+[.E31]" office:value-type="percentage" office:value="-0.0225577381731542" calcext:value-type="percentage">
            <text:p>-2.26 %</text:p>
          </table:table-cell>
          <table:table-cell table:style-name="ce76" table:formula="of:=[$'Moody''s Rates'.C49]" office:value-type="percentage" office:value="0.0375" calcext:value-type="percentage">
            <text:p>3.75 %</text:p>
          </table:table-cell>
          <table:table-cell table:style-name="ce157" table:formula="of:=(([.G31]*(1-(1+[.G32])^(-10))/[.G32]+1/(1+[.G32])^10)-1)+[.G31]" office:value-type="percentage" office:value="-0.0177767235100788" calcext:value-type="percentage">
            <text:p>-1.78 %</text:p>
          </table:table-cell>
          <table:table-cell table:style-name="ce164" table:formula="of:=[$'Moody''s Rates'.K49]" office:value-type="percentage" office:value="0.0437" calcext:value-type="percentage">
            <text:p>4.37 %</text:p>
          </table:table-cell>
          <table:table-cell table:style-name="ce165" table:formula="of:=(([.I31]*(1-(1+[.I32])^(-10))/[.I32]+1/(1+[.I32])^10)-1)+[.I31]" office:value-type="percentage" office:value="-0.0235265419796208" calcext:value-type="percentage">
            <text:p>-2.35 %</text:p>
          </table:table-cell>
          <table:table-cell table:style-name="ce127" office:value-type="percentage" office:value="0.00914269784798139" calcext:value-type="percentage">
            <text:p>0.91 %</text:p>
          </table:table-cell>
          <table:table-cell table:style-name="ce77"/>
          <table:table-cell table:number-columns-repeated="16372"/>
        </table:table-row>
        <table:table-row table:style-name="ro2">
          <table:table-cell table:style-name="ce131" office:value-type="float" office:value="1957" calcext:value-type="float">
            <text:p>1957</text:p>
          </table:table-cell>
          <table:table-cell table:style-name="ce131" office:value-type="float" office:value="39.99" calcext:value-type="float">
            <text:p>39.99</text:p>
          </table:table-cell>
          <table:table-cell table:style-name="ce151" table:formula="of:=[.D33]*[.B33]" office:value-type="float" office:value="1.79955" calcext:value-type="float">
            <text:p>1.80</text:p>
          </table:table-cell>
          <table:table-cell table:style-name="ce157" office:value-type="percentage" office:value="0.045" calcext:value-type="percentage">
            <text:p>4.50 %</text:p>
          </table:table-cell>
          <table:table-cell table:style-name="ce138" office:value-type="percentage" office:value="0.0321" calcext:value-type="percentage">
            <text:p>3.21 %</text:p>
          </table:table-cell>
          <table:table-cell table:style-name="ce157" table:formula="of:=(([.E32]*(1-(1+[.E33])^(-10))/[.E33]+1/(1+[.E33])^10)-1)+[.E32]" office:value-type="percentage" office:value="0.0679701284662501" calcext:value-type="percentage">
            <text:p>6.80 %</text:p>
          </table:table-cell>
          <table:table-cell table:style-name="ce76" table:formula="of:=[$'Moody''s Rates'.C50]" office:value-type="percentage" office:value="0.0381" calcext:value-type="percentage">
            <text:p>3.81 %</text:p>
          </table:table-cell>
          <table:table-cell table:style-name="ce157" table:formula="of:=(([.G32]*(1-(1+[.G33])^(-10))/[.G33]+1/(1+[.G33])^10)-1)+[.G32]" office:value-type="percentage" office:value="0.0325871044398821" calcext:value-type="percentage">
            <text:p>3.26 %</text:p>
          </table:table-cell>
          <table:table-cell table:style-name="ce164" table:formula="of:=[$'Moody''s Rates'.K50]" office:value-type="percentage" office:value="0.0503" calcext:value-type="percentage">
            <text:p>5.03 %</text:p>
          </table:table-cell>
          <table:table-cell table:style-name="ce165" table:formula="of:=(([.I32]*(1-(1+[.I33])^(-10))/[.I33]+1/(1+[.I33])^10)-1)+[.I32]" office:value-type="percentage" office:value="-0.00718928440254237" calcext:value-type="percentage">
            <text:p>-0.72 %</text:p>
          </table:table-cell>
          <table:table-cell table:style-name="ce127" office:value-type="percentage" office:value="0.0271802824490219" calcext:value-type="percentage">
            <text:p>2.72 %</text:p>
          </table:table-cell>
          <table:table-cell table:style-name="ce77"/>
          <table:table-cell table:number-columns-repeated="16372"/>
        </table:table-row>
        <table:table-row table:style-name="ro2">
          <table:table-cell table:style-name="ce131" office:value-type="float" office:value="1958" calcext:value-type="float">
            <text:p>1958</text:p>
          </table:table-cell>
          <table:table-cell table:style-name="ce131" office:value-type="float" office:value="55.21" calcext:value-type="float">
            <text:p>55.21</text:p>
          </table:table-cell>
          <table:table-cell table:style-name="ce151" table:formula="of:=[.D34]*[.B34]" office:value-type="float" office:value="2.26361" calcext:value-type="float">
            <text:p>2.26</text:p>
          </table:table-cell>
          <table:table-cell table:style-name="ce157" office:value-type="percentage" office:value="0.041" calcext:value-type="percentage">
            <text:p>4.10 %</text:p>
          </table:table-cell>
          <table:table-cell table:style-name="ce138" office:value-type="percentage" office:value="0.0386" calcext:value-type="percentage">
            <text:p>3.86 %</text:p>
          </table:table-cell>
          <table:table-cell table:style-name="ce157" table:formula="of:=(([.E33]*(1-(1+[.E34])^(-10))/[.E34]+1/(1+[.E34])^10)-1)+[.E33]" office:value-type="percentage" office:value="-0.0209901817552747" calcext:value-type="percentage">
            <text:p>-2.10 %</text:p>
          </table:table-cell>
          <table:table-cell table:style-name="ce76" table:formula="of:=[$'Moody''s Rates'.C51]" office:value-type="percentage" office:value="0.0408" calcext:value-type="percentage">
            <text:p>4.08 %</text:p>
          </table:table-cell>
          <table:table-cell table:style-name="ce157" table:formula="of:=(([.G33]*(1-(1+[.G34])^(-10))/[.G34]+1/(1+[.G34])^10)-1)+[.G33]" office:value-type="percentage" office:value="0.0162875364513659" calcext:value-type="percentage">
            <text:p>1.63 %</text:p>
          </table:table-cell>
          <table:table-cell table:style-name="ce164" table:formula="of:=[$'Moody''s Rates'.K51]" office:value-type="percentage" office:value="0.0485" calcext:value-type="percentage">
            <text:p>4.85 %</text:p>
          </table:table-cell>
          <table:table-cell table:style-name="ce165" table:formula="of:=(([.I33]*(1-(1+[.I34])^(-10))/[.I34]+1/(1+[.I34])^10)-1)+[.I33]" office:value-type="percentage" office:value="0.0643009289733603" calcext:value-type="percentage">
            <text:p>6.43 %</text:p>
          </table:table-cell>
          <table:table-cell table:style-name="ce127" office:value-type="percentage" office:value="0.00661543223641958" calcext:value-type="percentage">
            <text:p>0.66 %</text:p>
          </table:table-cell>
          <table:table-cell table:style-name="ce77"/>
          <table:table-cell table:number-columns-repeated="16372"/>
        </table:table-row>
        <table:table-row table:style-name="ro2">
          <table:table-cell table:style-name="ce131" office:value-type="float" office:value="1959" calcext:value-type="float">
            <text:p>1959</text:p>
          </table:table-cell>
          <table:table-cell table:style-name="ce131" office:value-type="float" office:value="59.89" calcext:value-type="float">
            <text:p>59.89</text:p>
          </table:table-cell>
          <table:table-cell table:style-name="ce151" table:formula="of:=[.D35]*[.B35]" office:value-type="float" office:value="1.97637" calcext:value-type="float">
            <text:p>1.98</text:p>
          </table:table-cell>
          <table:table-cell table:style-name="ce157" office:value-type="percentage" office:value="0.033" calcext:value-type="percentage">
            <text:p>3.30 %</text:p>
          </table:table-cell>
          <table:table-cell table:style-name="ce138" office:value-type="percentage" office:value="0.0469" calcext:value-type="percentage">
            <text:p>4.69 %</text:p>
          </table:table-cell>
          <table:table-cell table:style-name="ce157" table:formula="of:=(([.E34]*(1-(1+[.E35])^(-10))/[.E35]+1/(1+[.E35])^10)-1)+[.E34]" office:value-type="percentage" office:value="-0.0264663125913851" calcext:value-type="percentage">
            <text:p>-2.65 %</text:p>
          </table:table-cell>
          <table:table-cell table:style-name="ce76" table:formula="of:=[$'Moody''s Rates'.C52]" office:value-type="percentage" office:value="0.0458" calcext:value-type="percentage">
            <text:p>4.58 %</text:p>
          </table:table-cell>
          <table:table-cell table:style-name="ce157" table:formula="of:=(([.G34]*(1-(1+[.G35])^(-10))/[.G35]+1/(1+[.G35])^10)-1)+[.G34]" office:value-type="percentage" office:value="0.00139157040240728" calcext:value-type="percentage">
            <text:p>0.14 %</text:p>
          </table:table-cell>
          <table:table-cell table:style-name="ce164" table:formula="of:=[$'Moody''s Rates'.K52]" office:value-type="percentage" office:value="0.0528" calcext:value-type="percentage">
            <text:p>5.28 %</text:p>
          </table:table-cell>
          <table:table-cell table:style-name="ce165" table:formula="of:=(([.I34]*(1-(1+[.I35])^(-10))/[.I35]+1/(1+[.I35])^10)-1)+[.I34]" office:value-type="percentage" office:value="0.0157434308950228" calcext:value-type="percentage">
            <text:p>1.57 %</text:p>
          </table:table-cell>
          <table:table-cell table:style-name="ce127" office:value-type="percentage" office:value="0.00109510555270087" calcext:value-type="percentage">
            <text:p>0.11 %</text:p>
          </table:table-cell>
          <table:table-cell table:style-name="ce77"/>
          <table:table-cell table:number-columns-repeated="16372"/>
        </table:table-row>
        <table:table-row table:style-name="ro2">
          <table:table-cell table:style-name="ce131" office:value-type="float" office:value="1960" calcext:value-type="float">
            <text:p>1960</text:p>
          </table:table-cell>
          <table:table-cell table:style-name="ce131" office:value-type="float" office:value="58.11" calcext:value-type="float">
            <text:p>58.11</text:p>
          </table:table-cell>
          <table:table-cell table:style-name="ce151" office:value-type="float" office:value="1.981551" calcext:value-type="float">
            <text:p>1.98</text:p>
          </table:table-cell>
          <table:table-cell table:style-name="ce157" table:formula="of:=[.C36]/[.B36]" office:value-type="percentage" office:value="0.0341" calcext:value-type="percentage">
            <text:p>3.41 %</text:p>
          </table:table-cell>
          <table:table-cell table:style-name="ce138" office:value-type="percentage" office:value="0.0384" calcext:value-type="percentage">
            <text:p>3.84 %</text:p>
          </table:table-cell>
          <table:table-cell table:style-name="ce157" table:formula="of:=(([.E35]*(1-(1+[.E36])^(-10))/[.E36]+1/(1+[.E36])^10)-1)+[.E35]" office:value-type="percentage" office:value="0.116395036909634" calcext:value-type="percentage">
            <text:p>11.64 %</text:p>
          </table:table-cell>
          <table:table-cell table:style-name="ce76" table:formula="of:=[$'Moody''s Rates'.C53]" office:value-type="percentage" office:value="0.0435" calcext:value-type="percentage">
            <text:p>4.35 %</text:p>
          </table:table-cell>
          <table:table-cell table:style-name="ce157" table:formula="of:=(([.G35]*(1-(1+[.G36])^(-10))/[.G36]+1/(1+[.G36])^10)-1)+[.G35]" office:value-type="percentage" office:value="0.0641342223819962" calcext:value-type="percentage">
            <text:p>6.41 %</text:p>
          </table:table-cell>
          <table:table-cell table:style-name="ce164" table:formula="of:=[$'Moody''s Rates'.K53]" office:value-type="percentage" office:value="0.051" calcext:value-type="percentage">
            <text:p>5.10 %</text:p>
          </table:table-cell>
          <table:table-cell table:style-name="ce165" table:formula="of:=(([.I35]*(1-(1+[.I36])^(-10))/[.I36]+1/(1+[.I36])^10)-1)+[.I35]" office:value-type="percentage" office:value="0.0666318716330343" calcext:value-type="percentage">
            <text:p>6.66 %</text:p>
          </table:table-cell>
          <table:table-cell table:style-name="ce127" office:value-type="percentage" office:value="0.00765867440328871" calcext:value-type="percentage">
            <text:p>0.77 %</text:p>
          </table:table-cell>
          <table:table-cell table:style-name="ce77"/>
          <table:table-cell table:number-columns-repeated="16372"/>
        </table:table-row>
        <table:table-row table:style-name="ro2">
          <table:table-cell table:style-name="ce131" office:value-type="float" office:value="1961" calcext:value-type="float">
            <text:p>1961</text:p>
          </table:table-cell>
          <table:table-cell table:style-name="ce131" office:value-type="float" office:value="71.55" calcext:value-type="float">
            <text:p>71.55</text:p>
          </table:table-cell>
          <table:table-cell table:style-name="ce151" office:value-type="float" office:value="2.039175" calcext:value-type="float">
            <text:p>2.04</text:p>
          </table:table-cell>
          <table:table-cell table:style-name="ce157" table:formula="of:=[.C37]/[.B37]" office:value-type="percentage" office:value="0.0285" calcext:value-type="percentage">
            <text:p>2.85 %</text:p>
          </table:table-cell>
          <table:table-cell table:style-name="ce138" office:value-type="percentage" office:value="0.0406" calcext:value-type="percentage">
            <text:p>4.06 %</text:p>
          </table:table-cell>
          <table:table-cell table:style-name="ce157" table:formula="of:=(([.E36]*(1-(1+[.E37])^(-10))/[.E37]+1/(1+[.E37])^10)-1)+[.E36]" office:value-type="percentage" office:value="0.0206092080763232" calcext:value-type="percentage">
            <text:p>2.06 %</text:p>
          </table:table-cell>
          <table:table-cell table:style-name="ce76" table:formula="of:=[$'Moody''s Rates'.C54]" office:value-type="percentage" office:value="0.0442" calcext:value-type="percentage">
            <text:p>4.42 %</text:p>
          </table:table-cell>
          <table:table-cell table:style-name="ce157" table:formula="of:=(([.G36]*(1-(1+[.G37])^(-10))/[.G37]+1/(1+[.G37])^10)-1)+[.G36]" office:value-type="percentage" office:value="0.0379392457981557" calcext:value-type="percentage">
            <text:p>3.79 %</text:p>
          </table:table-cell>
          <table:table-cell table:style-name="ce164" table:formula="of:=[$'Moody''s Rates'.K54]" office:value-type="percentage" office:value="0.051" calcext:value-type="percentage">
            <text:p>5.10 %</text:p>
          </table:table-cell>
          <table:table-cell table:style-name="ce165" table:formula="of:=(([.I36]*(1-(1+[.I37])^(-10))/[.I37]+1/(1+[.I37])^10)-1)+[.I36]" office:value-type="percentage" office:value="0.051" calcext:value-type="percentage">
            <text:p>5.10 %</text:p>
          </table:table-cell>
          <table:table-cell table:style-name="ce127" office:value-type="percentage" office:value="0.00977165172118344" calcext:value-type="percentage">
            <text:p>0.98 %</text:p>
          </table:table-cell>
          <table:table-cell table:style-name="ce77"/>
          <table:table-cell table:number-columns-repeated="16372"/>
        </table:table-row>
        <table:table-row table:style-name="ro2">
          <table:table-cell table:style-name="ce131" office:value-type="float" office:value="1962" calcext:value-type="float">
            <text:p>1962</text:p>
          </table:table-cell>
          <table:table-cell table:style-name="ce131" office:value-type="float" office:value="63.1" calcext:value-type="float">
            <text:p>63.1</text:p>
          </table:table-cell>
          <table:table-cell table:style-name="ce151" office:value-type="float" office:value="2.1454" calcext:value-type="float">
            <text:p>2.15</text:p>
          </table:table-cell>
          <table:table-cell table:style-name="ce157" table:formula="of:=[.C38]/[.B38]" office:value-type="percentage" office:value="0.034" calcext:value-type="percentage">
            <text:p>3.40 %</text:p>
          </table:table-cell>
          <table:table-cell table:style-name="ce138" office:value-type="percentage" office:value="0.0386" calcext:value-type="percentage">
            <text:p>3.86 %</text:p>
          </table:table-cell>
          <table:table-cell table:style-name="ce157" table:formula="of:=(([.E37]*(1-(1+[.E38])^(-10))/[.E38]+1/(1+[.E38])^10)-1)+[.E37]" office:value-type="percentage" office:value="0.0569354405400844" calcext:value-type="percentage">
            <text:p>5.69 %</text:p>
          </table:table-cell>
          <table:table-cell table:style-name="ce76" table:formula="of:=[$'Moody''s Rates'.C55]" office:value-type="percentage" office:value="0.0424" calcext:value-type="percentage">
            <text:p>4.24 %</text:p>
          </table:table-cell>
          <table:table-cell table:style-name="ce157" table:formula="of:=(([.G37]*(1-(1+[.G38])^(-10))/[.G38]+1/(1+[.G38])^10)-1)+[.G37]" office:value-type="percentage" office:value="0.0586267331453098" calcext:value-type="percentage">
            <text:p>5.86 %</text:p>
          </table:table-cell>
          <table:table-cell table:style-name="ce164" table:formula="of:=[$'Moody''s Rates'.K55]" office:value-type="percentage" office:value="0.0492" calcext:value-type="percentage">
            <text:p>4.92 %</text:p>
          </table:table-cell>
          <table:table-cell table:style-name="ce165" table:formula="of:=(([.I37]*(1-(1+[.I38])^(-10))/[.I38]+1/(1+[.I38])^10)-1)+[.I37]" office:value-type="percentage" office:value="0.0649532799360658" calcext:value-type="percentage">
            <text:p>6.50 %</text:p>
          </table:table-cell>
          <table:table-cell table:style-name="ce127" office:value-type="percentage" office:value="0.00322591325675714" calcext:value-type="percentage">
            <text:p>0.32 %</text:p>
          </table:table-cell>
          <table:table-cell table:style-name="ce77"/>
          <table:table-cell table:number-columns-repeated="16372"/>
        </table:table-row>
        <table:table-row table:style-name="ro2">
          <table:table-cell table:style-name="ce131" office:value-type="float" office:value="1963" calcext:value-type="float">
            <text:p>1963</text:p>
          </table:table-cell>
          <table:table-cell table:style-name="ce131" office:value-type="float" office:value="75.02" calcext:value-type="float">
            <text:p>75.02</text:p>
          </table:table-cell>
          <table:table-cell table:style-name="ce151" office:value-type="float" office:value="2.348126" calcext:value-type="float">
            <text:p>2.35</text:p>
          </table:table-cell>
          <table:table-cell table:style-name="ce157" table:formula="of:=[.C39]/[.B39]" office:value-type="percentage" office:value="0.0313" calcext:value-type="percentage">
            <text:p>3.13 %</text:p>
          </table:table-cell>
          <table:table-cell table:style-name="ce138" office:value-type="percentage" office:value="0.0413" calcext:value-type="percentage">
            <text:p>4.13 %</text:p>
          </table:table-cell>
          <table:table-cell table:style-name="ce157" table:formula="of:=(([.E38]*(1-(1+[.E39])^(-10))/[.E39]+1/(1+[.E39])^10)-1)+[.E38]" office:value-type="percentage" office:value="0.0168416207395461" calcext:value-type="percentage">
            <text:p>1.68 %</text:p>
          </table:table-cell>
          <table:table-cell table:style-name="ce76" table:formula="of:=[$'Moody''s Rates'.C56]" office:value-type="percentage" office:value="0.0435" calcext:value-type="percentage">
            <text:p>4.35 %</text:p>
          </table:table-cell>
          <table:table-cell table:style-name="ce157" table:formula="of:=(([.G38]*(1-(1+[.G39])^(-10))/[.G39]+1/(1+[.G39])^10)-1)+[.G38]" office:value-type="percentage" office:value="0.0336314588607845" calcext:value-type="percentage">
            <text:p>3.36 %</text:p>
          </table:table-cell>
          <table:table-cell table:style-name="ce164" table:formula="of:=[$'Moody''s Rates'.K56]" office:value-type="percentage" office:value="0.0485" calcext:value-type="percentage">
            <text:p>4.85 %</text:p>
          </table:table-cell>
          <table:table-cell table:style-name="ce165" table:formula="of:=(([.I38]*(1-(1+[.I39])^(-10))/[.I39]+1/(1+[.I39])^10)-1)+[.I38]" office:value-type="percentage" office:value="0.0546448057118623" calcext:value-type="percentage">
            <text:p>5.46 %</text:p>
          </table:table-cell>
          <table:table-cell table:style-name="ce127" office:value-type="percentage" office:value="0.0214365032731338" calcext:value-type="percentage">
            <text:p>2.14 %</text:p>
          </table:table-cell>
          <table:table-cell table:style-name="ce77"/>
          <table:table-cell table:number-columns-repeated="16372"/>
        </table:table-row>
        <table:table-row table:style-name="ro2">
          <table:table-cell table:style-name="ce131" office:value-type="float" office:value="1964" calcext:value-type="float">
            <text:p>1964</text:p>
          </table:table-cell>
          <table:table-cell table:style-name="ce131" office:value-type="float" office:value="84.75" calcext:value-type="float">
            <text:p>84.75</text:p>
          </table:table-cell>
          <table:table-cell table:style-name="ce151" office:value-type="float" office:value="2.584875" calcext:value-type="float">
            <text:p>2.58</text:p>
          </table:table-cell>
          <table:table-cell table:style-name="ce157" table:formula="of:=[.C40]/[.B40]" office:value-type="percentage" office:value="0.0305" calcext:value-type="percentage">
            <text:p>3.05 %</text:p>
          </table:table-cell>
          <table:table-cell table:style-name="ce138" office:value-type="percentage" office:value="0.0418" calcext:value-type="percentage">
            <text:p>4.18 %</text:p>
          </table:table-cell>
          <table:table-cell table:style-name="ce157" table:formula="of:=(([.E39]*(1-(1+[.E40])^(-10))/[.E40]+1/(1+[.E40])^10)-1)+[.E39]" office:value-type="percentage" office:value="0.0372806489115408" calcext:value-type="percentage">
            <text:p>3.73 %</text:p>
          </table:table-cell>
          <table:table-cell table:style-name="ce76" table:formula="of:=[$'Moody''s Rates'.C57]" office:value-type="percentage" office:value="0.0444" calcext:value-type="percentage">
            <text:p>4.44 %</text:p>
          </table:table-cell>
          <table:table-cell table:style-name="ce157" table:formula="of:=(([.G39]*(1-(1+[.G40])^(-10))/[.G40]+1/(1+[.G40])^10)-1)+[.G39]" office:value-type="percentage" office:value="0.0363574981757752" calcext:value-type="percentage">
            <text:p>3.64 %</text:p>
          </table:table-cell>
          <table:table-cell table:style-name="ce164" table:formula="of:=[$'Moody''s Rates'.K57]" office:value-type="percentage" office:value="0.0481" calcext:value-type="percentage">
            <text:p>4.81 %</text:p>
          </table:table-cell>
          <table:table-cell table:style-name="ce165" table:formula="of:=(([.I39]*(1-(1+[.I40])^(-10))/[.I40]+1/(1+[.I40])^10)-1)+[.I39]" office:value-type="percentage" office:value="0.0516173927228503" calcext:value-type="percentage">
            <text:p>5.16 %</text:p>
          </table:table-cell>
          <table:table-cell table:style-name="ce127" office:value-type="percentage" office:value="0.0125915939469119" calcext:value-type="percentage">
            <text:p>1.26 %</text:p>
          </table:table-cell>
          <table:table-cell table:style-name="ce77"/>
          <table:table-cell table:number-columns-repeated="16372"/>
        </table:table-row>
        <table:table-row table:style-name="ro2">
          <table:table-cell table:style-name="ce131" office:value-type="float" office:value="1965" calcext:value-type="float">
            <text:p>1965</text:p>
          </table:table-cell>
          <table:table-cell table:style-name="ce131" office:value-type="float" office:value="92.43" calcext:value-type="float">
            <text:p>92.43</text:p>
          </table:table-cell>
          <table:table-cell table:style-name="ce151" office:value-type="float" office:value="2.828358" calcext:value-type="float">
            <text:p>2.83</text:p>
          </table:table-cell>
          <table:table-cell table:style-name="ce157" table:formula="of:=[.C41]/[.B41]" office:value-type="percentage" office:value="0.0306" calcext:value-type="percentage">
            <text:p>3.06 %</text:p>
          </table:table-cell>
          <table:table-cell table:style-name="ce138" office:value-type="percentage" office:value="0.0462" calcext:value-type="percentage">
            <text:p>4.62 %</text:p>
          </table:table-cell>
          <table:table-cell table:style-name="ce157" table:formula="of:=(([.E40]*(1-(1+[.E41])^(-10))/[.E41]+1/(1+[.E41])^10)-1)+[.E40]" office:value-type="percentage" office:value="0.00718855093592635" calcext:value-type="percentage">
            <text:p>0.72 %</text:p>
          </table:table-cell>
          <table:table-cell table:style-name="ce76" table:formula="of:=[$'Moody''s Rates'.C58]" office:value-type="percentage" office:value="0.0468" calcext:value-type="percentage">
            <text:p>4.68 %</text:p>
          </table:table-cell>
          <table:table-cell table:style-name="ce157" table:formula="of:=(([.G40]*(1-(1+[.G41])^(-10))/[.G41]+1/(1+[.G41])^10)-1)+[.G40]" office:value-type="percentage" office:value="0.0255764339940003" calcext:value-type="percentage">
            <text:p>2.56 %</text:p>
          </table:table-cell>
          <table:table-cell table:style-name="ce164" table:formula="of:=[$'Moody''s Rates'.K58]" office:value-type="percentage" office:value="0.0502" calcext:value-type="percentage">
            <text:p>5.02 %</text:p>
          </table:table-cell>
          <table:table-cell table:style-name="ce165" table:formula="of:=(([.I40]*(1-(1+[.I41])^(-10))/[.I41]+1/(1+[.I41])^10)-1)+[.I40]" office:value-type="percentage" office:value="0.0319000946225388" calcext:value-type="percentage">
            <text:p>3.19 %</text:p>
          </table:table-cell>
          <table:table-cell table:style-name="ce127" office:value-type="percentage" office:value="0.0165800230118207" calcext:value-type="percentage">
            <text:p>1.66 %</text:p>
          </table:table-cell>
          <table:table-cell table:style-name="ce77"/>
          <table:table-cell table:number-columns-repeated="16372"/>
        </table:table-row>
        <table:table-row table:style-name="ro2">
          <table:table-cell table:style-name="ce131" office:value-type="float" office:value="1966" calcext:value-type="float">
            <text:p>1966</text:p>
          </table:table-cell>
          <table:table-cell table:style-name="ce131" office:value-type="float" office:value="80.33" calcext:value-type="float">
            <text:p>80.33</text:p>
          </table:table-cell>
          <table:table-cell table:style-name="ce151" office:value-type="float" office:value="2.883847" calcext:value-type="float">
            <text:p>2.88</text:p>
          </table:table-cell>
          <table:table-cell table:style-name="ce157" table:formula="of:=[.C42]/[.B42]" office:value-type="percentage" office:value="0.0359" calcext:value-type="percentage">
            <text:p>3.59 %</text:p>
          </table:table-cell>
          <table:table-cell table:style-name="ce138" office:value-type="percentage" office:value="0.0484" calcext:value-type="percentage">
            <text:p>4.84 %</text:p>
          </table:table-cell>
          <table:table-cell table:style-name="ce157" table:formula="of:=(([.E41]*(1-(1+[.E42])^(-10))/[.E42]+1/(1+[.E42])^10)-1)+[.E41]" office:value-type="percentage" office:value="0.0290794093242996" calcext:value-type="percentage">
            <text:p>2.91 %</text:p>
          </table:table-cell>
          <table:table-cell table:style-name="ce76" table:formula="of:=[$'Moody''s Rates'.C59]" office:value-type="percentage" office:value="0.0539" calcext:value-type="percentage">
            <text:p>5.39 %</text:p>
          </table:table-cell>
          <table:table-cell table:style-name="ce157" table:formula="of:=(([.G41]*(1-(1+[.G42])^(-10))/[.G42]+1/(1+[.G42])^10)-1)+[.G41]" office:value-type="percentage" office:value="-0.00700064576869593" calcext:value-type="percentage">
            <text:p>-0.70 %</text:p>
          </table:table-cell>
          <table:table-cell table:style-name="ce164" table:formula="of:=[$'Moody''s Rates'.K59]" office:value-type="percentage" office:value="0.0618" calcext:value-type="percentage">
            <text:p>6.18 %</text:p>
          </table:table-cell>
          <table:table-cell table:style-name="ce165" table:formula="of:=(([.I41]*(1-(1+[.I42])^(-10))/[.I42]+1/(1+[.I42])^10)-1)+[.I41]" office:value-type="percentage" office:value="-0.0344536159757764" calcext:value-type="percentage">
            <text:p>-3.45 %</text:p>
          </table:table-cell>
          <table:table-cell table:style-name="ce127" office:value-type="percentage" office:value="0.0122328224425148" calcext:value-type="percentage">
            <text:p>1.22 %</text:p>
          </table:table-cell>
          <table:table-cell table:style-name="ce77"/>
          <table:table-cell table:number-columns-repeated="16372"/>
        </table:table-row>
        <table:table-row table:style-name="ro2">
          <table:table-cell table:style-name="ce131" office:value-type="float" office:value="1967" calcext:value-type="float">
            <text:p>1967</text:p>
          </table:table-cell>
          <table:table-cell table:style-name="ce131" office:value-type="float" office:value="96.47" calcext:value-type="float">
            <text:p>96.47</text:p>
          </table:table-cell>
          <table:table-cell table:style-name="ce151" office:value-type="float" office:value="2.980923" calcext:value-type="float">
            <text:p>2.98</text:p>
          </table:table-cell>
          <table:table-cell table:style-name="ce157" table:formula="of:=[.C43]/[.B43]" office:value-type="percentage" office:value="0.0309" calcext:value-type="percentage">
            <text:p>3.09 %</text:p>
          </table:table-cell>
          <table:table-cell table:style-name="ce138" office:value-type="percentage" office:value="0.057" calcext:value-type="percentage">
            <text:p>5.70 %</text:p>
          </table:table-cell>
          <table:table-cell table:style-name="ce157" table:formula="of:=(([.E42]*(1-(1+[.E43])^(-10))/[.E43]+1/(1+[.E43])^10)-1)+[.E42]" office:value-type="percentage" office:value="-0.0158062099328247" calcext:value-type="percentage">
            <text:p>-1.58 %</text:p>
          </table:table-cell>
          <table:table-cell table:style-name="ce76" table:formula="of:=[$'Moody''s Rates'.C60]" office:value-type="percentage" office:value="0.0619" calcext:value-type="percentage">
            <text:p>6.19 %</text:p>
          </table:table-cell>
          <table:table-cell table:style-name="ce157" table:formula="of:=(([.G42]*(1-(1+[.G43])^(-10))/[.G43]+1/(1+[.G43])^10)-1)+[.G42]" office:value-type="percentage" office:value="-0.00445427672609317" calcext:value-type="percentage">
            <text:p>-0.45 %</text:p>
          </table:table-cell>
          <table:table-cell table:style-name="ce164" table:formula="of:=[$'Moody''s Rates'.K60]" office:value-type="percentage" office:value="0.0693" calcext:value-type="percentage">
            <text:p>6.93 %</text:p>
          </table:table-cell>
          <table:table-cell table:style-name="ce165" table:formula="of:=(([.I42]*(1-(1+[.I43])^(-10))/[.I43]+1/(1+[.I43])^10)-1)+[.I42]" office:value-type="percentage" office:value="0.00895226614844683" calcext:value-type="percentage">
            <text:p>0.90 %</text:p>
          </table:table-cell>
          <table:table-cell table:style-name="ce127" office:value-type="percentage" office:value="0.0231618820625226" calcext:value-type="percentage">
            <text:p>2.32 %</text:p>
          </table:table-cell>
          <table:table-cell table:style-name="ce77"/>
          <table:table-cell table:number-columns-repeated="16372"/>
        </table:table-row>
        <table:table-row table:style-name="ro2">
          <table:table-cell table:style-name="ce131" office:value-type="float" office:value="1968" calcext:value-type="float">
            <text:p>1968</text:p>
          </table:table-cell>
          <table:table-cell table:style-name="ce131" office:value-type="float" office:value="103.86" calcext:value-type="float">
            <text:p>103.86</text:p>
          </table:table-cell>
          <table:table-cell table:style-name="ce151" office:value-type="float" office:value="3.043098" calcext:value-type="float">
            <text:p>3.04</text:p>
          </table:table-cell>
          <table:table-cell table:style-name="ce157" table:formula="of:=[.C44]/[.B44]" office:value-type="percentage" office:value="0.0293" calcext:value-type="percentage">
            <text:p>2.93 %</text:p>
          </table:table-cell>
          <table:table-cell table:style-name="ce138" office:value-type="percentage" office:value="0.0603" calcext:value-type="percentage">
            <text:p>6.03 %</text:p>
          </table:table-cell>
          <table:table-cell table:style-name="ce157" table:formula="of:=(([.E43]*(1-(1+[.E44])^(-10))/[.E44]+1/(1+[.E44])^10)-1)+[.E43]" office:value-type="percentage" office:value="0.0327461969507684" calcext:value-type="percentage">
            <text:p>3.27 %</text:p>
          </table:table-cell>
          <table:table-cell table:style-name="ce76" table:formula="of:=[$'Moody''s Rates'.C61]" office:value-type="percentage" office:value="0.0645" calcext:value-type="percentage">
            <text:p>6.45 %</text:p>
          </table:table-cell>
          <table:table-cell table:style-name="ce157" table:formula="of:=(([.G43]*(1-(1+[.G44])^(-10))/[.G44]+1/(1+[.G44])^10)-1)+[.G43]" office:value-type="percentage" office:value="0.0431652290576019" calcext:value-type="percentage">
            <text:p>4.32 %</text:p>
          </table:table-cell>
          <table:table-cell table:style-name="ce164" table:formula="of:=[$'Moody''s Rates'.K61]" office:value-type="percentage" office:value="0.0723" calcext:value-type="percentage">
            <text:p>7.23 %</text:p>
          </table:table-cell>
          <table:table-cell table:style-name="ce165" table:formula="of:=(([.I43]*(1-(1+[.I44])^(-10))/[.I44]+1/(1+[.I44])^10)-1)+[.I43]" office:value-type="percentage" office:value="0.0484514622430974" calcext:value-type="percentage">
            <text:p>4.85 %</text:p>
          </table:table-cell>
          <table:table-cell table:style-name="ce127" office:value-type="percentage" office:value="0.0413387616555709" calcext:value-type="percentage">
            <text:p>4.13 %</text:p>
          </table:table-cell>
          <table:table-cell table:style-name="ce77"/>
          <table:table-cell table:number-columns-repeated="16372"/>
        </table:table-row>
        <table:table-row table:style-name="ro2">
          <table:table-cell table:style-name="ce131" office:value-type="float" office:value="1969" calcext:value-type="float">
            <text:p>1969</text:p>
          </table:table-cell>
          <table:table-cell table:style-name="ce131" office:value-type="float" office:value="92.06" calcext:value-type="float">
            <text:p>92.06</text:p>
          </table:table-cell>
          <table:table-cell table:style-name="ce151" office:value-type="float" office:value="3.240512" calcext:value-type="float">
            <text:p>3.24</text:p>
          </table:table-cell>
          <table:table-cell table:style-name="ce157" table:formula="of:=[.C45]/[.B45]" office:value-type="percentage" office:value="0.0352" calcext:value-type="percentage">
            <text:p>3.52 %</text:p>
          </table:table-cell>
          <table:table-cell table:style-name="ce138" office:value-type="percentage" office:value="0.0765" calcext:value-type="percentage">
            <text:p>7.65 %</text:p>
          </table:table-cell>
          <table:table-cell table:style-name="ce157" table:formula="of:=(([.E44]*(1-(1+[.E45])^(-10))/[.E45]+1/(1+[.E45])^10)-1)+[.E44]" office:value-type="percentage" office:value="-0.0501404932099261" calcext:value-type="percentage">
            <text:p>-5.01 %</text:p>
          </table:table-cell>
          <table:table-cell table:style-name="ce76" table:formula="of:=[$'Moody''s Rates'.C62]" office:value-type="percentage" office:value="0.0772" calcext:value-type="percentage">
            <text:p>7.72 %</text:p>
          </table:table-cell>
          <table:table-cell table:style-name="ce157" table:formula="of:=(([.G44]*(1-(1+[.G45])^(-10))/[.G45]+1/(1+[.G45])^10)-1)+[.G44]" office:value-type="percentage" office:value="-0.0218048513282155" calcext:value-type="percentage">
            <text:p>-2.18 %</text:p>
          </table:table-cell>
          <table:table-cell table:style-name="ce164" table:formula="of:=[$'Moody''s Rates'.K62]" office:value-type="percentage" office:value="0.0865" calcext:value-type="percentage">
            <text:p>8.65 %</text:p>
          </table:table-cell>
          <table:table-cell table:style-name="ce165" table:formula="of:=(([.I44]*(1-(1+[.I45])^(-10))/[.I45]+1/(1+[.I45])^10)-1)+[.I44]" office:value-type="percentage" office:value="-0.0202516425079215" calcext:value-type="percentage">
            <text:p>-2.03 %</text:p>
          </table:table-cell>
          <table:table-cell table:style-name="ce127" office:value-type="percentage" office:value="0.0699434985045735" calcext:value-type="percentage">
            <text:p>6.99 %</text:p>
          </table:table-cell>
          <table:table-cell table:style-name="ce77"/>
          <table:table-cell table:number-columns-repeated="16372"/>
        </table:table-row>
        <table:table-row table:style-name="ro2">
          <table:table-cell table:style-name="ce131" office:value-type="float" office:value="1970" calcext:value-type="float">
            <text:p>1970</text:p>
          </table:table-cell>
          <table:table-cell table:style-name="ce131" office:value-type="float" office:value="92.15" calcext:value-type="float">
            <text:p>92.15</text:p>
          </table:table-cell>
          <table:table-cell table:style-name="ce151" office:value-type="float" office:value="3.18839" calcext:value-type="float">
            <text:p>3.19</text:p>
          </table:table-cell>
          <table:table-cell table:style-name="ce157" table:formula="of:=[.C46]/[.B46]" office:value-type="percentage" office:value="0.0346" calcext:value-type="percentage">
            <text:p>3.46 %</text:p>
          </table:table-cell>
          <table:table-cell table:style-name="ce138" office:value-type="percentage" office:value="0.0639" calcext:value-type="percentage">
            <text:p>6.39 %</text:p>
          </table:table-cell>
          <table:table-cell table:style-name="ce157" table:formula="of:=(([.E45]*(1-(1+[.E46])^(-10))/[.E46]+1/(1+[.E46])^10)-1)+[.E45]" office:value-type="percentage" office:value="0.167547371834123" calcext:value-type="percentage">
            <text:p>16.75 %</text:p>
          </table:table-cell>
          <table:table-cell table:style-name="ce76" table:formula="of:=[$'Moody''s Rates'.C63]" office:value-type="percentage" office:value="0.0764" calcext:value-type="percentage">
            <text:p>7.64 %</text:p>
          </table:table-cell>
          <table:table-cell table:style-name="ce157" table:formula="of:=(([.G45]*(1-(1+[.G46])^(-10))/[.G46]+1/(1+[.G46])^10)-1)+[.G45]" office:value-type="percentage" office:value="0.0826563335167663" calcext:value-type="percentage">
            <text:p>8.27 %</text:p>
          </table:table-cell>
          <table:table-cell table:style-name="ce164" table:formula="of:=[$'Moody''s Rates'.K63]" office:value-type="percentage" office:value="0.0912" calcext:value-type="percentage">
            <text:p>9.12 %</text:p>
          </table:table-cell>
          <table:table-cell table:style-name="ce165" table:formula="of:=(([.I45]*(1-(1+[.I46])^(-10))/[.I46]+1/(1+[.I46])^10)-1)+[.I45]" office:value-type="percentage" office:value="0.0564956765698885" calcext:value-type="percentage">
            <text:p>5.65 %</text:p>
          </table:table-cell>
          <table:table-cell table:style-name="ce127" office:value-type="percentage" office:value="0.0821549644035868" calcext:value-type="percentage">
            <text:p>8.22 %</text:p>
          </table:table-cell>
          <table:table-cell table:style-name="ce77"/>
          <table:table-cell table:number-columns-repeated="16372"/>
        </table:table-row>
        <table:table-row table:style-name="ro2">
          <table:table-cell table:style-name="ce131" office:value-type="float" office:value="1971" calcext:value-type="float">
            <text:p>1971</text:p>
          </table:table-cell>
          <table:table-cell table:style-name="ce131" office:value-type="float" office:value="102.09" calcext:value-type="float">
            <text:p>102.09</text:p>
          </table:table-cell>
          <table:table-cell table:style-name="ce151" office:value-type="float" office:value="3.16479" calcext:value-type="float">
            <text:p>3.16</text:p>
          </table:table-cell>
          <table:table-cell table:style-name="ce157" table:formula="of:=[.C47]/[.B47]" office:value-type="percentage" office:value="0.031" calcext:value-type="percentage">
            <text:p>3.10 %</text:p>
          </table:table-cell>
          <table:table-cell table:style-name="ce138" office:value-type="percentage" office:value="0.0593" calcext:value-type="percentage">
            <text:p>5.93 %</text:p>
          </table:table-cell>
          <table:table-cell table:style-name="ce157" table:formula="of:=(([.E46]*(1-(1+[.E47])^(-10))/[.E47]+1/(1+[.E47])^10)-1)+[.E46]" office:value-type="percentage" office:value="0.097868966197123" calcext:value-type="percentage">
            <text:p>9.79 %</text:p>
          </table:table-cell>
          <table:table-cell table:style-name="ce76" table:formula="of:=[$'Moody''s Rates'.C64]" office:value-type="percentage" office:value="0.0725" calcext:value-type="percentage">
            <text:p>7.25 %</text:p>
          </table:table-cell>
          <table:table-cell table:style-name="ce157" table:formula="of:=(([.G46]*(1-(1+[.G47])^(-10))/[.G47]+1/(1+[.G47])^10)-1)+[.G46]" office:value-type="percentage" office:value="0.103478201047422" calcext:value-type="percentage">
            <text:p>10.35 %</text:p>
          </table:table-cell>
          <table:table-cell table:style-name="ce164" table:formula="of:=[$'Moody''s Rates'.K64]" office:value-type="percentage" office:value="0.0838" calcext:value-type="percentage">
            <text:p>8.38 %</text:p>
          </table:table-cell>
          <table:table-cell table:style-name="ce165" table:formula="of:=(([.I46]*(1-(1+[.I47])^(-10))/[.I47]+1/(1+[.I47])^10)-1)+[.I46]" office:value-type="percentage" office:value="0.140014661742199" calcext:value-type="percentage">
            <text:p>14.00 %</text:p>
          </table:table-cell>
          <table:table-cell table:style-name="ce127" office:value-type="percentage" office:value="0.0424492382972201" calcext:value-type="percentage">
            <text:p>4.24 %</text:p>
          </table:table-cell>
          <table:table-cell table:style-name="ce77"/>
          <table:table-cell table:number-columns-repeated="16372"/>
        </table:table-row>
        <table:table-row table:style-name="ro2">
          <table:table-cell table:style-name="ce131" office:value-type="float" office:value="1972" calcext:value-type="float">
            <text:p>1972</text:p>
          </table:table-cell>
          <table:table-cell table:style-name="ce131" office:value-type="float" office:value="118.05" calcext:value-type="float">
            <text:p>118.05</text:p>
          </table:table-cell>
          <table:table-cell table:style-name="ce151" office:value-type="float" office:value="3.18735" calcext:value-type="float">
            <text:p>3.19</text:p>
          </table:table-cell>
          <table:table-cell table:style-name="ce157" table:formula="of:=[.C48]/[.B48]" office:value-type="percentage" office:value="0.027" calcext:value-type="percentage">
            <text:p>2.70 %</text:p>
          </table:table-cell>
          <table:table-cell table:style-name="ce138" office:value-type="percentage" office:value="0.0636" calcext:value-type="percentage">
            <text:p>6.36 %</text:p>
          </table:table-cell>
          <table:table-cell table:style-name="ce157" table:formula="of:=(([.E47]*(1-(1+[.E48])^(-10))/[.E48]+1/(1+[.E48])^10)-1)+[.E47]" office:value-type="percentage" office:value="0.0281844905044498" calcext:value-type="percentage">
            <text:p>2.82 %</text:p>
          </table:table-cell>
          <table:table-cell table:style-name="ce76" table:formula="of:=[$'Moody''s Rates'.C65]" office:value-type="percentage" office:value="0.0708" calcext:value-type="percentage">
            <text:p>7.08 %</text:p>
          </table:table-cell>
          <table:table-cell table:style-name="ce157" table:formula="of:=(([.G47]*(1-(1+[.G48])^(-10))/[.G48]+1/(1+[.G48])^10)-1)+[.G47]" office:value-type="percentage" office:value="0.0843960589688453" calcext:value-type="percentage">
            <text:p>8.44 %</text:p>
          </table:table-cell>
          <table:table-cell table:style-name="ce164" table:formula="of:=[$'Moody''s Rates'.K65]" office:value-type="percentage" office:value="0.0793" calcext:value-type="percentage">
            <text:p>7.93 %</text:p>
          </table:table-cell>
          <table:table-cell table:style-name="ce165" table:formula="of:=(([.I47]*(1-(1+[.I48])^(-10))/[.I48]+1/(1+[.I48])^10)-1)+[.I47]" office:value-type="percentage" office:value="0.114090935793897" calcext:value-type="percentage">
            <text:p>11.41 %</text:p>
          </table:table-cell>
          <table:table-cell table:style-name="ce127" office:value-type="percentage" office:value="0.0297574356947388" calcext:value-type="percentage">
            <text:p>2.98 %</text:p>
          </table:table-cell>
          <table:table-cell table:style-name="ce77"/>
          <table:table-cell table:number-columns-repeated="16372"/>
        </table:table-row>
        <table:table-row table:style-name="ro2">
          <table:table-cell table:style-name="ce131" office:value-type="float" office:value="1973" calcext:value-type="float">
            <text:p>1973</text:p>
          </table:table-cell>
          <table:table-cell table:style-name="ce131" office:value-type="float" office:value="97.55" calcext:value-type="float">
            <text:p>97.55</text:p>
          </table:table-cell>
          <table:table-cell table:style-name="ce151" office:value-type="float" office:value="3.60935" calcext:value-type="float">
            <text:p>3.61</text:p>
          </table:table-cell>
          <table:table-cell table:style-name="ce157" table:formula="of:=[.C49]/[.B49]" office:value-type="percentage" office:value="0.037" calcext:value-type="percentage">
            <text:p>3.70 %</text:p>
          </table:table-cell>
          <table:table-cell table:style-name="ce138" office:value-type="percentage" office:value="0.0674" calcext:value-type="percentage">
            <text:p>6.74 %</text:p>
          </table:table-cell>
          <table:table-cell table:style-name="ce157" table:formula="of:=(([.E48]*(1-(1+[.E49])^(-10))/[.E49]+1/(1+[.E49])^10)-1)+[.E48]" office:value-type="percentage" office:value="0.0365866460241501" calcext:value-type="percentage">
            <text:p>3.66 %</text:p>
          </table:table-cell>
          <table:table-cell table:style-name="ce76" table:formula="of:=[$'Moody''s Rates'.C66]" office:value-type="percentage" office:value="0.0768" calcext:value-type="percentage">
            <text:p>7.68 %</text:p>
          </table:table-cell>
          <table:table-cell table:style-name="ce157" table:formula="of:=(([.G48]*(1-(1+[.G49])^(-10))/[.G49]+1/(1+[.G49])^10)-1)+[.G48]" office:value-type="percentage" office:value="0.0299518805086552" calcext:value-type="percentage">
            <text:p>3.00 %</text:p>
          </table:table-cell>
          <table:table-cell table:style-name="ce164" table:formula="of:=[$'Moody''s Rates'.K66]" office:value-type="percentage" office:value="0.0848" calcext:value-type="percentage">
            <text:p>8.48 %</text:p>
          </table:table-cell>
          <table:table-cell table:style-name="ce165" table:formula="of:=(([.I48]*(1-(1+[.I49])^(-10))/[.I49]+1/(1+[.I49])^10)-1)+[.I48]" office:value-type="percentage" office:value="0.0431804048543237" calcext:value-type="percentage">
            <text:p>4.32 %</text:p>
          </table:table-cell>
          <table:table-cell table:style-name="ce127" office:value-type="percentage" office:value="0.0342202756924106" calcext:value-type="percentage">
            <text:p>3.42 %</text:p>
          </table:table-cell>
          <table:table-cell table:style-name="ce77"/>
          <table:table-cell table:number-columns-repeated="16372"/>
        </table:table-row>
        <table:table-row table:style-name="ro2">
          <table:table-cell table:style-name="ce131" office:value-type="float" office:value="1974" calcext:value-type="float">
            <text:p>1974</text:p>
          </table:table-cell>
          <table:table-cell table:style-name="ce131" office:value-type="float" office:value="68.56" calcext:value-type="float">
            <text:p>68.56</text:p>
          </table:table-cell>
          <table:table-cell table:style-name="ce151" office:value-type="float" office:value="3.722808" calcext:value-type="float">
            <text:p>3.72</text:p>
          </table:table-cell>
          <table:table-cell table:style-name="ce157" table:formula="of:=[.C50]/[.B50]" office:value-type="percentage" office:value="0.0543" calcext:value-type="percentage">
            <text:p>5.43 %</text:p>
          </table:table-cell>
          <table:table-cell table:style-name="ce138" office:value-type="percentage" office:value="0.0743" calcext:value-type="percentage">
            <text:p>7.43 %</text:p>
          </table:table-cell>
          <table:table-cell table:style-name="ce157" table:formula="of:=(([.E49]*(1-(1+[.E50])^(-10))/[.E50]+1/(1+[.E50])^10)-1)+[.E49]" office:value-type="percentage" office:value="0.0198860869323786" calcext:value-type="percentage">
            <text:p>1.99 %</text:p>
          </table:table-cell>
          <table:table-cell table:style-name="ce76" table:formula="of:=[$'Moody''s Rates'.C67]" office:value-type="percentage" office:value="0.0889" calcext:value-type="percentage">
            <text:p>8.89 %</text:p>
          </table:table-cell>
          <table:table-cell table:style-name="ce157" table:formula="of:=(([.G49]*(1-(1+[.G50])^(-10))/[.G50]+1/(1+[.G50])^10)-1)+[.G49]" office:value-type="percentage" office:value="-0.00123105915153941" calcext:value-type="percentage">
            <text:p>-0.12 %</text:p>
          </table:table-cell>
          <table:table-cell table:style-name="ce164" table:formula="of:=[$'Moody''s Rates'.K67]" office:value-type="percentage" office:value="0.1063" calcext:value-type="percentage">
            <text:p>10.63 %</text:p>
          </table:table-cell>
          <table:table-cell table:style-name="ce165" table:formula="of:=(([.I49]*(1-(1+[.I50])^(-10))/[.I50]+1/(1+[.I50])^10)-1)+[.I49]" office:value-type="percentage" office:value="-0.0438071979771917" calcext:value-type="percentage">
            <text:p>-4.38 %</text:p>
          </table:table-cell>
          <table:table-cell table:style-name="ce127" office:value-type="percentage" office:value="0.100735214795393" calcext:value-type="percentage">
            <text:p>10.07 %</text:p>
          </table:table-cell>
          <table:table-cell table:style-name="ce77"/>
          <table:table-cell table:number-columns-repeated="16372"/>
        </table:table-row>
        <table:table-row table:style-name="ro2">
          <table:table-cell table:style-name="ce131" office:value-type="float" office:value="1975" calcext:value-type="float">
            <text:p>1975</text:p>
          </table:table-cell>
          <table:table-cell table:style-name="ce131" office:value-type="float" office:value="90.19" calcext:value-type="float">
            <text:p>90.19</text:p>
          </table:table-cell>
          <table:table-cell table:style-name="ce151" office:value-type="float" office:value="3.733866" calcext:value-type="float">
            <text:p>3.73</text:p>
          </table:table-cell>
          <table:table-cell table:style-name="ce157" table:formula="of:=[.C51]/[.B51]" office:value-type="percentage" office:value="0.0414" calcext:value-type="percentage">
            <text:p>4.14 %</text:p>
          </table:table-cell>
          <table:table-cell table:style-name="ce138" office:value-type="percentage" office:value="0.08" calcext:value-type="percentage">
            <text:p>8.00 %</text:p>
          </table:table-cell>
          <table:table-cell table:style-name="ce157" table:formula="of:=(([.E50]*(1-(1+[.E51])^(-10))/[.E51]+1/(1+[.E51])^10)-1)+[.E50]" office:value-type="percentage" office:value="0.0360525360260337" calcext:value-type="percentage">
            <text:p>3.61 %</text:p>
          </table:table-cell>
          <table:table-cell table:style-name="ce76" table:formula="of:=[$'Moody''s Rates'.C68]" office:value-type="percentage" office:value="0.0879" calcext:value-type="percentage">
            <text:p>8.79 %</text:p>
          </table:table-cell>
          <table:table-cell table:style-name="ce157" table:formula="of:=(([.G50]*(1-(1+[.G51])^(-10))/[.G51]+1/(1+[.G51])^10)-1)+[.G50]" office:value-type="percentage" office:value="0.0953774072759104" calcext:value-type="percentage">
            <text:p>9.54 %</text:p>
          </table:table-cell>
          <table:table-cell table:style-name="ce164" table:formula="of:=[$'Moody''s Rates'.K68]" office:value-type="percentage" office:value="0.1056" calcext:value-type="percentage">
            <text:p>10.56 %</text:p>
          </table:table-cell>
          <table:table-cell table:style-name="ce165" table:formula="of:=(([.I50]*(1-(1+[.I51])^(-10))/[.I51]+1/(1+[.I51])^10)-1)+[.I50]" office:value-type="percentage" office:value="0.11049964074145" calcext:value-type="percentage">
            <text:p>11.05 %</text:p>
          </table:table-cell>
          <table:table-cell table:style-name="ce127" office:value-type="percentage" office:value="0.0675759009360548" calcext:value-type="percentage">
            <text:p>6.76 %</text:p>
          </table:table-cell>
          <table:table-cell table:style-name="ce77"/>
          <table:table-cell table:number-columns-repeated="16372"/>
        </table:table-row>
        <table:table-row table:style-name="ro2">
          <table:table-cell table:style-name="ce131" office:value-type="float" office:value="1976" calcext:value-type="float">
            <text:p>1976</text:p>
          </table:table-cell>
          <table:table-cell table:style-name="ce131" office:value-type="float" office:value="107.46" calcext:value-type="float">
            <text:p>107.46</text:p>
          </table:table-cell>
          <table:table-cell table:style-name="ce151" office:value-type="float" office:value="4.223178" calcext:value-type="float">
            <text:p>4.22</text:p>
          </table:table-cell>
          <table:table-cell table:style-name="ce157" table:formula="of:=[.C52]/[.B52]" office:value-type="percentage" office:value="0.0393" calcext:value-type="percentage">
            <text:p>3.93 %</text:p>
          </table:table-cell>
          <table:table-cell table:style-name="ce138" office:value-type="percentage" office:value="0.0687" calcext:value-type="percentage">
            <text:p>6.87 %</text:p>
          </table:table-cell>
          <table:table-cell table:style-name="ce157" table:formula="of:=(([.E51]*(1-(1+[.E52])^(-10))/[.E52]+1/(1+[.E52])^10)-1)+[.E51]" office:value-type="percentage" office:value="0.159845607429092" calcext:value-type="percentage">
            <text:p>15.98 %</text:p>
          </table:table-cell>
          <table:table-cell table:style-name="ce76" table:formula="of:=[$'Moody''s Rates'.C69]" office:value-type="percentage" office:value="0.0798" calcext:value-type="percentage">
            <text:p>7.98 %</text:p>
          </table:table-cell>
          <table:table-cell table:style-name="ce157" table:formula="of:=(([.G51]*(1-(1+[.G52])^(-10))/[.G52]+1/(1+[.G52])^10)-1)+[.G51]" office:value-type="percentage" office:value="0.142300723839355" calcext:value-type="percentage">
            <text:p>14.23 %</text:p>
          </table:table-cell>
          <table:table-cell table:style-name="ce164" table:formula="of:=[$'Moody''s Rates'.K69]" office:value-type="percentage" office:value="0.0912" calcext:value-type="percentage">
            <text:p>9.12 %</text:p>
          </table:table-cell>
          <table:table-cell table:style-name="ce165" table:formula="of:=(([.I51]*(1-(1+[.I52])^(-10))/[.I52]+1/(1+[.I52])^10)-1)+[.I51]" office:value-type="percentage" office:value="0.19752813987098" calcext:value-type="percentage">
            <text:p>19.75 %</text:p>
          </table:table-cell>
          <table:table-cell table:style-name="ce127" office:value-type="percentage" office:value="0.0819795995466566" calcext:value-type="percentage">
            <text:p>8.20 %</text:p>
          </table:table-cell>
          <table:table-cell table:style-name="ce77"/>
          <table:table-cell table:number-columns-repeated="16372"/>
        </table:table-row>
        <table:table-row table:style-name="ro2">
          <table:table-cell table:style-name="ce131" office:value-type="float" office:value="1977" calcext:value-type="float">
            <text:p>1977</text:p>
          </table:table-cell>
          <table:table-cell table:style-name="ce131" office:value-type="float" office:value="95.1" calcext:value-type="float">
            <text:p>95.1</text:p>
          </table:table-cell>
          <table:table-cell table:style-name="ce151" office:value-type="float" office:value="4.85961" calcext:value-type="float">
            <text:p>4.86</text:p>
          </table:table-cell>
          <table:table-cell table:style-name="ce157" table:formula="of:=[.C53]/[.B53]" office:value-type="percentage" office:value="0.0511" calcext:value-type="percentage">
            <text:p>5.11 %</text:p>
          </table:table-cell>
          <table:table-cell table:style-name="ce138" office:value-type="percentage" office:value="0.0769" calcext:value-type="percentage">
            <text:p>7.69 %</text:p>
          </table:table-cell>
          <table:table-cell table:style-name="ce157" table:formula="of:=(([.E52]*(1-(1+[.E53])^(-10))/[.E53]+1/(1+[.E53])^10)-1)+[.E52]" office:value-type="percentage" office:value="0.0128996060710706" calcext:value-type="percentage">
            <text:p>1.29 %</text:p>
          </table:table-cell>
          <table:table-cell table:style-name="ce76" table:formula="of:=[$'Moody''s Rates'.C70]" office:value-type="percentage" office:value="0.0819" calcext:value-type="percentage">
            <text:p>8.19 %</text:p>
          </table:table-cell>
          <table:table-cell table:style-name="ce157" table:formula="of:=(([.G52]*(1-(1+[.G53])^(-10))/[.G53]+1/(1+[.G53])^10)-1)+[.G52]" office:value-type="percentage" office:value="0.0658287951026172" calcext:value-type="percentage">
            <text:p>6.58 %</text:p>
          </table:table-cell>
          <table:table-cell table:style-name="ce164" table:formula="of:=[$'Moody''s Rates'.K70]" office:value-type="percentage" office:value="0.0899" calcext:value-type="percentage">
            <text:p>8.99 %</text:p>
          </table:table-cell>
          <table:table-cell table:style-name="ce165" table:formula="of:=(([.I52]*(1-(1+[.I53])^(-10))/[.I53]+1/(1+[.I53])^10)-1)+[.I52]" office:value-type="percentage" office:value="0.0995466285209064" calcext:value-type="percentage">
            <text:p>9.95 %</text:p>
          </table:table-cell>
          <table:table-cell table:style-name="ce127" office:value-type="percentage" office:value="0.146648044692738" calcext:value-type="percentage">
            <text:p>14.66 %</text:p>
          </table:table-cell>
          <table:table-cell table:style-name="ce77"/>
          <table:table-cell table:number-columns-repeated="16372"/>
        </table:table-row>
        <table:table-row table:style-name="ro2">
          <table:table-cell table:style-name="ce131" office:value-type="float" office:value="1978" calcext:value-type="float">
            <text:p>1978</text:p>
          </table:table-cell>
          <table:table-cell table:style-name="ce131" office:value-type="float" office:value="96.11" calcext:value-type="float">
            <text:p>96.11</text:p>
          </table:table-cell>
          <table:table-cell table:style-name="ce151" office:value-type="float" office:value="5.180329" calcext:value-type="float">
            <text:p>5.18</text:p>
          </table:table-cell>
          <table:table-cell table:style-name="ce157" table:formula="of:=[.C54]/[.B54]" office:value-type="percentage" office:value="0.0539" calcext:value-type="percentage">
            <text:p>5.39 %</text:p>
          </table:table-cell>
          <table:table-cell table:style-name="ce138" office:value-type="percentage" office:value="0.0901" calcext:value-type="percentage">
            <text:p>9.01 %</text:p>
          </table:table-cell>
          <table:table-cell table:style-name="ce157" table:formula="of:=(([.E53]*(1-(1+[.E54])^(-10))/[.E54]+1/(1+[.E54])^10)-1)+[.E53]" office:value-type="percentage" office:value="-0.00777580690750876" calcext:value-type="percentage">
            <text:p>-0.78 %</text:p>
          </table:table-cell>
          <table:table-cell table:style-name="ce76" table:formula="of:=[$'Moody''s Rates'.C71]" office:value-type="percentage" office:value="0.0916" calcext:value-type="percentage">
            <text:p>9.16 %</text:p>
          </table:table-cell>
          <table:table-cell table:style-name="ce157" table:formula="of:=(([.G53]*(1-(1+[.G54])^(-10))/[.G54]+1/(1+[.G54])^10)-1)+[.G53]" office:value-type="percentage" office:value="0.0200847430794826" calcext:value-type="percentage">
            <text:p>2.01 %</text:p>
          </table:table-cell>
          <table:table-cell table:style-name="ce164" table:formula="of:=[$'Moody''s Rates'.K71]" office:value-type="percentage" office:value="0.0994" calcext:value-type="percentage">
            <text:p>9.94 %</text:p>
          </table:table-cell>
          <table:table-cell table:style-name="ce165" table:formula="of:=(([.I53]*(1-(1+[.I54])^(-10))/[.I54]+1/(1+[.I54])^10)-1)+[.I53]" office:value-type="percentage" office:value="0.0313758497716909" calcext:value-type="percentage">
            <text:p>3.14 %</text:p>
          </table:table-cell>
          <table:table-cell table:style-name="ce127" office:value-type="percentage" office:value="0.157125456760049" calcext:value-type="percentage">
            <text:p>15.71 %</text:p>
          </table:table-cell>
          <table:table-cell table:style-name="ce77"/>
          <table:table-cell table:number-columns-repeated="16372"/>
        </table:table-row>
        <table:table-row table:style-name="ro2">
          <table:table-cell table:style-name="ce131" office:value-type="float" office:value="1979" calcext:value-type="float">
            <text:p>1979</text:p>
          </table:table-cell>
          <table:table-cell table:style-name="ce131" office:value-type="float" office:value="107.94" calcext:value-type="float">
            <text:p>107.94</text:p>
          </table:table-cell>
          <table:table-cell table:style-name="ce151" office:value-type="float" office:value="5.969082" calcext:value-type="float">
            <text:p>5.97</text:p>
          </table:table-cell>
          <table:table-cell table:style-name="ce157" table:formula="of:=[.C55]/[.B55]" office:value-type="percentage" office:value="0.0553" calcext:value-type="percentage">
            <text:p>5.53 %</text:p>
          </table:table-cell>
          <table:table-cell table:style-name="ce138" office:value-type="percentage" office:value="0.1039" calcext:value-type="percentage">
            <text:p>10.39 %</text:p>
          </table:table-cell>
          <table:table-cell table:style-name="ce157" table:formula="of:=(([.E54]*(1-(1+[.E55])^(-10))/[.E55]+1/(1+[.E55])^10)-1)+[.E54]" office:value-type="percentage" office:value="0.00670720312472355" calcext:value-type="percentage">
            <text:p>0.67 %</text:p>
          </table:table-cell>
          <table:table-cell table:style-name="ce76" table:formula="of:=[$'Moody''s Rates'.C72]" office:value-type="percentage" office:value="0.1074" calcext:value-type="percentage">
            <text:p>10.74 %</text:p>
          </table:table-cell>
          <table:table-cell table:style-name="ce157" table:formula="of:=(([.G54]*(1-(1+[.G55])^(-10))/[.G55]+1/(1+[.G55])^10)-1)+[.G54]" office:value-type="percentage" office:value="-0.00247309350037107" calcext:value-type="percentage">
            <text:p>-0.25 %</text:p>
          </table:table-cell>
          <table:table-cell table:style-name="ce164" table:formula="of:=[$'Moody''s Rates'.K72]" office:value-type="percentage" office:value="0.1206" calcext:value-type="percentage">
            <text:p>12.06 %</text:p>
          </table:table-cell>
          <table:table-cell table:style-name="ce165" table:formula="of:=(([.I54]*(1-(1+[.I55])^(-10))/[.I55]+1/(1+[.I55])^10)-1)+[.I54]" office:value-type="percentage" office:value="-0.0200911014366154" calcext:value-type="percentage">
            <text:p>-2.01 %</text:p>
          </table:table-cell>
          <table:table-cell table:style-name="ce127" office:value-type="percentage" office:value="0.137368421052632" calcext:value-type="percentage">
            <text:p>13.74 %</text:p>
          </table:table-cell>
          <table:table-cell table:style-name="ce77"/>
          <table:table-cell table:number-columns-repeated="16372"/>
        </table:table-row>
        <table:table-row table:style-name="ro2">
          <table:table-cell table:style-name="ce131" office:value-type="float" office:value="1980" calcext:value-type="float">
            <text:p>1980</text:p>
          </table:table-cell>
          <table:table-cell table:style-name="ce131" office:value-type="float" office:value="135.76" calcext:value-type="float">
            <text:p>135.76</text:p>
          </table:table-cell>
          <table:table-cell table:style-name="ce151" office:value-type="float" office:value="6.435024" calcext:value-type="float">
            <text:p>6.44</text:p>
          </table:table-cell>
          <table:table-cell table:style-name="ce157" table:formula="of:=[.C56]/[.B56]" office:value-type="percentage" office:value="0.0474" calcext:value-type="percentage">
            <text:p>4.74 %</text:p>
          </table:table-cell>
          <table:table-cell table:style-name="ce138" office:value-type="percentage" office:value="0.1284" calcext:value-type="percentage">
            <text:p>12.84 %</text:p>
          </table:table-cell>
          <table:table-cell table:style-name="ce157" table:formula="of:=(([.E55]*(1-(1+[.E56])^(-10))/[.E56]+1/(1+[.E56])^10)-1)+[.E55]" office:value-type="percentage" office:value="-0.0298974425199941" calcext:value-type="percentage">
            <text:p>-2.99 %</text:p>
          </table:table-cell>
          <table:table-cell table:style-name="ce76" table:formula="of:=[$'Moody''s Rates'.C73]" office:value-type="percentage" office:value="0.1321" calcext:value-type="percentage">
            <text:p>13.21 %</text:p>
          </table:table-cell>
          <table:table-cell table:style-name="ce157" table:formula="of:=(([.G55]*(1-(1+[.G56])^(-10))/[.G56]+1/(1+[.G56])^10)-1)+[.G55]" office:value-type="percentage" office:value="-0.0255108230975551" calcext:value-type="percentage">
            <text:p>-2.55 %</text:p>
          </table:table-cell>
          <table:table-cell table:style-name="ce164" table:formula="of:=[$'Moody''s Rates'.K73]" office:value-type="percentage" office:value="0.1514" calcext:value-type="percentage">
            <text:p>15.14 %</text:p>
          </table:table-cell>
          <table:table-cell table:style-name="ce165" table:formula="of:=(([.I55]*(1-(1+[.I56])^(-10))/[.I56]+1/(1+[.I56])^10)-1)+[.I55]" office:value-type="percentage" office:value="-0.0331567833719105" calcext:value-type="percentage">
            <text:p>-3.32 %</text:p>
          </table:table-cell>
          <table:table-cell table:style-name="ce127" office:value-type="percentage" office:value="0.0740397963905599" calcext:value-type="percentage">
            <text:p>7.40 %</text:p>
          </table:table-cell>
          <table:table-cell table:style-name="ce77"/>
          <table:table-cell table:number-columns-repeated="16372"/>
        </table:table-row>
        <table:table-row table:style-name="ro2">
          <table:table-cell table:style-name="ce131" office:value-type="float" office:value="1981" calcext:value-type="float">
            <text:p>1981</text:p>
          </table:table-cell>
          <table:table-cell table:style-name="ce131" office:value-type="float" office:value="122.55" calcext:value-type="float">
            <text:p>122.55</text:p>
          </table:table-cell>
          <table:table-cell table:style-name="ce151" office:value-type="float" office:value="6.826035" calcext:value-type="float">
            <text:p>6.83</text:p>
          </table:table-cell>
          <table:table-cell table:style-name="ce157" table:formula="of:=[.C57]/[.B57]" office:value-type="percentage" office:value="0.0557" calcext:value-type="percentage">
            <text:p>5.57 %</text:p>
          </table:table-cell>
          <table:table-cell table:style-name="ce138" office:value-type="percentage" office:value="0.1372" calcext:value-type="percentage">
            <text:p>13.72 %</text:p>
          </table:table-cell>
          <table:table-cell table:style-name="ce157" table:formula="of:=(([.E56]*(1-(1+[.E57])^(-10))/[.E57]+1/(1+[.E57])^10)-1)+[.E56]" office:value-type="percentage" office:value="0.0819921533589235" calcext:value-type="percentage">
            <text:p>8.20 %</text:p>
          </table:table-cell>
          <table:table-cell table:style-name="ce76" table:formula="of:=[$'Moody''s Rates'.C74]" office:value-type="percentage" office:value="0.1423" calcext:value-type="percentage">
            <text:p>14.23 %</text:p>
          </table:table-cell>
          <table:table-cell table:style-name="ce157" table:formula="of:=(([.G56]*(1-(1+[.G57])^(-10))/[.G57]+1/(1+[.G57])^10)-1)+[.G56]" office:value-type="percentage" office:value="0.0793697642515253" calcext:value-type="percentage">
            <text:p>7.94 %</text:p>
          </table:table-cell>
          <table:table-cell table:style-name="ce164" table:formula="of:=[$'Moody''s Rates'.K74]" office:value-type="percentage" office:value="0.1655" calcext:value-type="percentage">
            <text:p>16.55 %</text:p>
          </table:table-cell>
          <table:table-cell table:style-name="ce165" table:formula="of:=(([.I56]*(1-(1+[.I57])^(-10))/[.I57]+1/(1+[.I57])^10)-1)+[.I56]" office:value-type="percentage" office:value="0.0846239948089121" calcext:value-type="percentage">
            <text:p>8.46 %</text:p>
          </table:table-cell>
          <table:table-cell table:style-name="ce127" office:value-type="percentage" office:value="0.050840155105558" calcext:value-type="percentage">
            <text:p>5.08 %</text:p>
          </table:table-cell>
          <table:table-cell table:style-name="ce77"/>
          <table:table-cell table:number-columns-repeated="16372"/>
        </table:table-row>
        <table:table-row table:style-name="ro2">
          <table:table-cell table:style-name="ce131" office:value-type="float" office:value="1982" calcext:value-type="float">
            <text:p>1982</text:p>
          </table:table-cell>
          <table:table-cell table:style-name="ce131" office:value-type="float" office:value="140.64" calcext:value-type="float">
            <text:p>140.64</text:p>
          </table:table-cell>
          <table:table-cell table:style-name="ce151" office:value-type="float" office:value="6.933552" calcext:value-type="float">
            <text:p>6.93</text:p>
          </table:table-cell>
          <table:table-cell table:style-name="ce157" table:formula="of:=[.C58]/[.B58]" office:value-type="percentage" office:value="0.0493" calcext:value-type="percentage">
            <text:p>4.93 %</text:p>
          </table:table-cell>
          <table:table-cell table:style-name="ce138" office:value-type="percentage" office:value="0.1054" calcext:value-type="percentage">
            <text:p>10.54 %</text:p>
          </table:table-cell>
          <table:table-cell table:style-name="ce157" table:formula="of:=(([.E57]*(1-(1+[.E58])^(-10))/[.E58]+1/(1+[.E58])^10)-1)+[.E57]" office:value-type="percentage" office:value="0.328145494862956" calcext:value-type="percentage">
            <text:p>32.81 %</text:p>
          </table:table-cell>
          <table:table-cell table:style-name="ce76" table:formula="of:=[$'Moody''s Rates'.C75]" office:value-type="percentage" office:value="0.1183" calcext:value-type="percentage">
            <text:p>11.83 %</text:p>
          </table:table-cell>
          <table:table-cell table:style-name="ce157" table:formula="of:=(([.G57]*(1-(1+[.G58])^(-10))/[.G58]+1/(1+[.G58])^10)-1)+[.G57]" office:value-type="percentage" office:value="0.278854242881062" calcext:value-type="percentage">
            <text:p>27.89 %</text:p>
          </table:table-cell>
          <table:table-cell table:style-name="ce164" table:formula="of:=[$'Moody''s Rates'.K75]" office:value-type="percentage" office:value="0.1414" calcext:value-type="percentage">
            <text:p>14.14 %</text:p>
          </table:table-cell>
          <table:table-cell table:style-name="ce165" table:formula="of:=(([.I57]*(1-(1+[.I58])^(-10))/[.I58]+1/(1+[.I58])^10)-1)+[.I57]" office:value-type="percentage" office:value="0.290524556559087" calcext:value-type="percentage">
            <text:p>29.05 %</text:p>
          </table:table-cell>
          <table:table-cell table:style-name="ce127" office:value-type="percentage" office:value="0.00574005740057393" calcext:value-type="percentage">
            <text:p>0.57 %</text:p>
          </table:table-cell>
          <table:table-cell table:style-name="ce77"/>
          <table:table-cell table:number-columns-repeated="16372"/>
        </table:table-row>
        <table:table-row table:style-name="ro2">
          <table:table-cell table:style-name="ce131" office:value-type="float" office:value="1983" calcext:value-type="float">
            <text:p>1983</text:p>
          </table:table-cell>
          <table:table-cell table:style-name="ce131" office:value-type="float" office:value="164.93" calcext:value-type="float">
            <text:p>164.93</text:p>
          </table:table-cell>
          <table:table-cell table:style-name="ce151" office:value-type="float" office:value="7.124976" calcext:value-type="float">
            <text:p>7.12</text:p>
          </table:table-cell>
          <table:table-cell table:style-name="ce157" table:formula="of:=[.C59]/[.B59]" office:value-type="percentage" office:value="0.0432" calcext:value-type="percentage">
            <text:p>4.32 %</text:p>
          </table:table-cell>
          <table:table-cell table:style-name="ce138" office:value-type="percentage" office:value="0.1183" calcext:value-type="percentage">
            <text:p>11.83 %</text:p>
          </table:table-cell>
          <table:table-cell table:style-name="ce157" table:formula="of:=(([.E58]*(1-(1+[.E59])^(-10))/[.E59]+1/(1+[.E59])^10)-1)+[.E58]" office:value-type="percentage" office:value="0.0320020944514293" calcext:value-type="percentage">
            <text:p>3.20 %</text:p>
          </table:table-cell>
          <table:table-cell table:style-name="ce76" table:formula="of:=[$'Moody''s Rates'.C76]" office:value-type="percentage" office:value="0.1257" calcext:value-type="percentage">
            <text:p>12.57 %</text:p>
          </table:table-cell>
          <table:table-cell table:style-name="ce157" table:formula="of:=(([.G58]*(1-(1+[.G59])^(-10))/[.G59]+1/(1+[.G59])^10)-1)+[.G58]" office:value-type="percentage" office:value="0.0774461470744187" calcext:value-type="percentage">
            <text:p>7.74 %</text:p>
          </table:table-cell>
          <table:table-cell table:style-name="ce164" table:formula="of:=[$'Moody''s Rates'.K76]" office:value-type="percentage" office:value="0.1375" calcext:value-type="percentage">
            <text:p>13.75 %</text:p>
          </table:table-cell>
          <table:table-cell table:style-name="ce165" table:formula="of:=(([.I58]*(1-(1+[.I59])^(-10))/[.I59]+1/(1+[.I59])^10)-1)+[.I58]" office:value-type="percentage" office:value="0.161942896227984" calcext:value-type="percentage">
            <text:p>16.19 %</text:p>
          </table:table-cell>
          <table:table-cell table:style-name="ce127" office:value-type="percentage" office:value="0.0474928658785161" calcext:value-type="percentage">
            <text:p>4.75 %</text:p>
          </table:table-cell>
          <table:table-cell table:style-name="ce77"/>
          <table:table-cell table:number-columns-repeated="16372"/>
        </table:table-row>
        <table:table-row table:style-name="ro2">
          <table:table-cell table:style-name="ce131" office:value-type="float" office:value="1984" calcext:value-type="float">
            <text:p>1984</text:p>
          </table:table-cell>
          <table:table-cell table:style-name="ce131" office:value-type="float" office:value="167.24" calcext:value-type="float">
            <text:p>167.24</text:p>
          </table:table-cell>
          <table:table-cell table:style-name="ce151" office:value-type="float" office:value="7.826832" calcext:value-type="float">
            <text:p>7.83</text:p>
          </table:table-cell>
          <table:table-cell table:style-name="ce157" table:formula="of:=[.C60]/[.B60]" office:value-type="percentage" office:value="0.0468" calcext:value-type="percentage">
            <text:p>4.68 %</text:p>
          </table:table-cell>
          <table:table-cell table:style-name="ce138" office:value-type="percentage" office:value="0.115" calcext:value-type="percentage">
            <text:p>11.50 %</text:p>
          </table:table-cell>
          <table:table-cell table:style-name="ce157" table:formula="of:=(([.E59]*(1-(1+[.E60])^(-10))/[.E60]+1/(1+[.E60])^10)-1)+[.E59]" office:value-type="percentage" office:value="0.137333643441024" calcext:value-type="percentage">
            <text:p>13.73 %</text:p>
          </table:table-cell>
          <table:table-cell table:style-name="ce76" table:formula="of:=[$'Moody''s Rates'.C77]" office:value-type="percentage" office:value="0.1213" calcext:value-type="percentage">
            <text:p>12.13 %</text:p>
          </table:table-cell>
          <table:table-cell table:style-name="ce157" table:formula="of:=(([.G59]*(1-(1+[.G60])^(-10))/[.G60]+1/(1+[.G60])^10)-1)+[.G59]" office:value-type="percentage" office:value="0.150429240747956" calcext:value-type="percentage">
            <text:p>15.04 %</text:p>
          </table:table-cell>
          <table:table-cell table:style-name="ce164" table:formula="of:=[$'Moody''s Rates'.K77]" office:value-type="percentage" office:value="0.134" calcext:value-type="percentage">
            <text:p>13.40 %</text:p>
          </table:table-cell>
          <table:table-cell table:style-name="ce165" table:formula="of:=(([.I59]*(1-(1+[.I60])^(-10))/[.I60]+1/(1+[.I60])^10)-1)+[.I59]" office:value-type="percentage" office:value="0.156192073324542" calcext:value-type="percentage">
            <text:p>15.62 %</text:p>
          </table:table-cell>
          <table:table-cell table:style-name="ce127" office:value-type="percentage" office:value="0.0467016929363688" calcext:value-type="percentage">
            <text:p>4.67 %</text:p>
          </table:table-cell>
          <table:table-cell table:style-name="ce77"/>
          <table:table-cell table:number-columns-repeated="16372"/>
        </table:table-row>
        <table:table-row table:style-name="ro2">
          <table:table-cell table:style-name="ce131" office:value-type="float" office:value="1985" calcext:value-type="float">
            <text:p>1985</text:p>
          </table:table-cell>
          <table:table-cell table:style-name="ce131" office:value-type="float" office:value="211.28" calcext:value-type="float">
            <text:p>211.28</text:p>
          </table:table-cell>
          <table:table-cell table:style-name="ce151" office:value-type="float" office:value="8.197664" calcext:value-type="float">
            <text:p>8.20</text:p>
          </table:table-cell>
          <table:table-cell table:style-name="ce157" table:formula="of:=[.C61]/[.B61]" office:value-type="percentage" office:value="0.0388" calcext:value-type="percentage">
            <text:p>3.88 %</text:p>
          </table:table-cell>
          <table:table-cell table:style-name="ce138" office:value-type="percentage" office:value="0.0926" calcext:value-type="percentage">
            <text:p>9.26 %</text:p>
          </table:table-cell>
          <table:table-cell table:style-name="ce157" table:formula="of:=(([.E60]*(1-(1+[.E61])^(-10))/[.E61]+1/(1+[.E61])^10)-1)+[.E60]" office:value-type="percentage" office:value="0.257124882126064" calcext:value-type="percentage">
            <text:p>25.71 %</text:p>
          </table:table-cell>
          <table:table-cell table:style-name="ce76" table:formula="of:=[$'Moody''s Rates'.C78]" office:value-type="percentage" office:value="0.1016" calcext:value-type="percentage">
            <text:p>10.16 %</text:p>
          </table:table-cell>
          <table:table-cell table:style-name="ce157" table:formula="of:=(([.G60]*(1-(1+[.G61])^(-10))/[.G61]+1/(1+[.G61])^10)-1)+[.G60]" office:value-type="percentage" office:value="0.241520415234929" calcext:value-type="percentage">
            <text:p>24.15 %</text:p>
          </table:table-cell>
          <table:table-cell table:style-name="ce164" table:formula="of:=[$'Moody''s Rates'.K78]" office:value-type="percentage" office:value="0.1158" calcext:value-type="percentage">
            <text:p>11.58 %</text:p>
          </table:table-cell>
          <table:table-cell table:style-name="ce165" table:formula="of:=(([.I60]*(1-(1+[.I61])^(-10))/[.I61]+1/(1+[.I61])^10)-1)+[.I60]" office:value-type="percentage" office:value="0.238626418499165" calcext:value-type="percentage">
            <text:p>23.86 %</text:p>
          </table:table-cell>
          <table:table-cell table:style-name="ce127" office:value-type="percentage" office:value="0.0747350808700502" calcext:value-type="percentage">
            <text:p>7.47 %</text:p>
          </table:table-cell>
          <table:table-cell table:style-name="ce77"/>
          <table:table-cell table:number-columns-repeated="16372"/>
        </table:table-row>
        <table:table-row table:style-name="ro2">
          <table:table-cell table:style-name="ce131" office:value-type="float" office:value="1986" calcext:value-type="float">
            <text:p>1986</text:p>
          </table:table-cell>
          <table:table-cell table:style-name="ce131" office:value-type="float" office:value="242.17" calcext:value-type="float">
            <text:p>242.17</text:p>
          </table:table-cell>
          <table:table-cell table:style-name="ce151" office:value-type="float" office:value="8.185346" calcext:value-type="float">
            <text:p>8.19</text:p>
          </table:table-cell>
          <table:table-cell table:style-name="ce157" table:formula="of:=[.C62]/[.B62]" office:value-type="percentage" office:value="0.0338" calcext:value-type="percentage">
            <text:p>3.38 %</text:p>
          </table:table-cell>
          <table:table-cell table:style-name="ce138" office:value-type="percentage" office:value="0.0711" calcext:value-type="percentage">
            <text:p>7.11 %</text:p>
          </table:table-cell>
          <table:table-cell table:style-name="ce157" table:formula="of:=(([.E61]*(1-(1+[.E62])^(-10))/[.E62]+1/(1+[.E62])^10)-1)+[.E61]" office:value-type="percentage" office:value="0.242842151417676" calcext:value-type="percentage">
            <text:p>24.28 %</text:p>
          </table:table-cell>
          <table:table-cell table:style-name="ce76" table:formula="of:=[$'Moody''s Rates'.C79]" office:value-type="percentage" office:value="0.0849" calcext:value-type="percentage">
            <text:p>8.49 %</text:p>
          </table:table-cell>
          <table:table-cell table:style-name="ce157" table:formula="of:=(([.G61]*(1-(1+[.G62])^(-10))/[.G62]+1/(1+[.G62])^10)-1)+[.G61]" office:value-type="percentage" office:value="0.211223352062741" calcext:value-type="percentage">
            <text:p>21.12 %</text:p>
          </table:table-cell>
          <table:table-cell table:style-name="ce164" table:formula="of:=[$'Moody''s Rates'.K79]" office:value-type="percentage" office:value="0.0997" calcext:value-type="percentage">
            <text:p>9.97 %</text:p>
          </table:table-cell>
          <table:table-cell table:style-name="ce165" table:formula="of:=(([.I61]*(1-(1+[.I62])^(-10))/[.I62]+1/(1+[.I62])^10)-1)+[.I61]" office:value-type="percentage" office:value="0.214855153097595" calcext:value-type="percentage">
            <text:p>21.49 %</text:p>
          </table:table-cell>
          <table:table-cell table:style-name="ce127" office:value-type="percentage" office:value="0.0961771319840856" calcext:value-type="percentage">
            <text:p>9.62 %</text:p>
          </table:table-cell>
          <table:table-cell table:style-name="ce77"/>
          <table:table-cell table:number-columns-repeated="16372"/>
        </table:table-row>
        <table:table-row table:style-name="ro2">
          <table:table-cell table:style-name="ce131" office:value-type="float" office:value="1987" calcext:value-type="float">
            <text:p>1987</text:p>
          </table:table-cell>
          <table:table-cell table:style-name="ce131" office:value-type="float" office:value="247.08" calcext:value-type="float">
            <text:p>247.08</text:p>
          </table:table-cell>
          <table:table-cell table:style-name="ce151" office:value-type="float" office:value="9.166668" calcext:value-type="float">
            <text:p>9.17</text:p>
          </table:table-cell>
          <table:table-cell table:style-name="ce157" table:formula="of:=[.C63]/[.B63]" office:value-type="percentage" office:value="0.0371" calcext:value-type="percentage">
            <text:p>3.71 %</text:p>
          </table:table-cell>
          <table:table-cell table:style-name="ce138" office:value-type="percentage" office:value="0.0899" calcext:value-type="percentage">
            <text:p>8.99 %</text:p>
          </table:table-cell>
          <table:table-cell table:style-name="ce157" table:formula="of:=(([.E62]*(1-(1+[.E63])^(-10))/[.E63]+1/(1+[.E63])^10)-1)+[.E62]" office:value-type="percentage" office:value="-0.0496050893792625" calcext:value-type="percentage">
            <text:p>-4.96 %</text:p>
          </table:table-cell>
          <table:table-cell table:style-name="ce76" table:formula="of:=[$'Moody''s Rates'.C80]" office:value-type="percentage" office:value="0.1011" calcext:value-type="percentage">
            <text:p>10.11 %</text:p>
          </table:table-cell>
          <table:table-cell table:style-name="ce157" table:formula="of:=(([.G62]*(1-(1+[.G63])^(-10))/[.G63]+1/(1+[.G63])^10)-1)+[.G62]" office:value-type="percentage" office:value="-0.0141733390176191" calcext:value-type="percentage">
            <text:p>-1.42 %</text:p>
          </table:table-cell>
          <table:table-cell table:style-name="ce164" table:formula="of:=[$'Moody''s Rates'.K80]" office:value-type="percentage" office:value="0.1129" calcext:value-type="percentage">
            <text:p>11.29 %</text:p>
          </table:table-cell>
          <table:table-cell table:style-name="ce165" table:formula="of:=(([.I62]*(1-(1+[.I63])^(-10))/[.I63]+1/(1+[.I63])^10)-1)+[.I62]" office:value-type="percentage" office:value="0.0228984608427666" calcext:value-type="percentage">
            <text:p>2.29 %</text:p>
          </table:table-cell>
          <table:table-cell table:style-name="ce157" office:value-type="percentage" office:value="0.0787" calcext:value-type="percentage">
            <text:p>7.87 %</text:p>
          </table:table-cell>
          <table:table-cell table:style-name="ce77"/>
          <table:table-cell table:number-columns-repeated="16372"/>
        </table:table-row>
        <table:table-row table:style-name="ro2">
          <table:table-cell table:style-name="ce131" office:value-type="float" office:value="1988" calcext:value-type="float">
            <text:p>1988</text:p>
          </table:table-cell>
          <table:table-cell table:style-name="ce131" office:value-type="float" office:value="277.72" calcext:value-type="float">
            <text:p>277.72</text:p>
          </table:table-cell>
          <table:table-cell table:style-name="ce151" office:value-type="float" office:value="10.220096" calcext:value-type="float">
            <text:p>10.22</text:p>
          </table:table-cell>
          <table:table-cell table:style-name="ce157" table:formula="of:=[.C64]/[.B64]" office:value-type="percentage" office:value="0.0368" calcext:value-type="percentage">
            <text:p>3.68 %</text:p>
          </table:table-cell>
          <table:table-cell table:style-name="ce138" office:value-type="percentage" office:value="0.0911" calcext:value-type="percentage">
            <text:p>9.11 %</text:p>
          </table:table-cell>
          <table:table-cell table:style-name="ce157" table:formula="of:=(([.E63]*(1-(1+[.E64])^(-10))/[.E64]+1/(1+[.E64])^10)-1)+[.E63]" office:value-type="percentage" office:value="0.0822359584348417" calcext:value-type="percentage">
            <text:p>8.22 %</text:p>
          </table:table-cell>
          <table:table-cell table:style-name="ce76" table:formula="of:=[$'Moody''s Rates'.C81]" office:value-type="percentage" office:value="0.0957" calcext:value-type="percentage">
            <text:p>9.57 %</text:p>
          </table:table-cell>
          <table:table-cell table:style-name="ce157" table:formula="of:=(([.G63]*(1-(1+[.G64])^(-10))/[.G64]+1/(1+[.G64])^10)-1)+[.G63]" office:value-type="percentage" office:value="0.134902550380737" calcext:value-type="percentage">
            <text:p>13.49 %</text:p>
          </table:table-cell>
          <table:table-cell table:style-name="ce164" table:formula="of:=[$'Moody''s Rates'.K81]" office:value-type="percentage" office:value="0.1065" calcext:value-type="percentage">
            <text:p>10.65 %</text:p>
          </table:table-cell>
          <table:table-cell table:style-name="ce165" table:formula="of:=(([.I63]*(1-(1+[.I64])^(-10))/[.I64]+1/(1+[.I64])^10)-1)+[.I63]" office:value-type="percentage" office:value="0.1511507006712" calcext:value-type="percentage">
            <text:p>15.12 %</text:p>
          </table:table-cell>
          <table:table-cell table:style-name="ce166" office:value-type="percentage" office:value="0.0721046" calcext:value-type="percentage">
            <text:p>7.21 %</text:p>
          </table:table-cell>
          <table:table-cell table:style-name="ce77"/>
          <table:table-cell table:number-columns-repeated="16372"/>
        </table:table-row>
        <table:table-row table:style-name="ro2">
          <table:table-cell table:style-name="ce131" office:value-type="float" office:value="1989" calcext:value-type="float">
            <text:p>1989</text:p>
          </table:table-cell>
          <table:table-cell table:style-name="ce131" office:value-type="float" office:value="353.4" calcext:value-type="float">
            <text:p>353.4</text:p>
          </table:table-cell>
          <table:table-cell table:style-name="ce151" office:value-type="float" office:value="11.73288" calcext:value-type="float">
            <text:p>11.73</text:p>
          </table:table-cell>
          <table:table-cell table:style-name="ce157" table:formula="of:=[.C65]/[.B65]" office:value-type="percentage" office:value="0.0332" calcext:value-type="percentage">
            <text:p>3.32 %</text:p>
          </table:table-cell>
          <table:table-cell table:style-name="ce138" office:value-type="percentage" office:value="0.0784" calcext:value-type="percentage">
            <text:p>7.84 %</text:p>
          </table:table-cell>
          <table:table-cell table:style-name="ce157" table:formula="of:=(([.E64]*(1-(1+[.E65])^(-10))/[.E65]+1/(1+[.E65])^10)-1)+[.E64]" office:value-type="percentage" office:value="0.176936471594462" calcext:value-type="percentage">
            <text:p>17.69 %</text:p>
          </table:table-cell>
          <table:table-cell table:style-name="ce76" table:formula="of:=[$'Moody''s Rates'.C82]" office:value-type="percentage" office:value="0.0886" calcext:value-type="percentage">
            <text:p>8.86 %</text:p>
          </table:table-cell>
          <table:table-cell table:style-name="ce157" table:formula="of:=(([.G64]*(1-(1+[.G65])^(-10))/[.G65]+1/(1+[.G65])^10)-1)+[.G64]" office:value-type="percentage" office:value="0.141547505447475" calcext:value-type="percentage">
            <text:p>14.15 %</text:p>
          </table:table-cell>
          <table:table-cell table:style-name="ce164" table:formula="of:=[$'Moody''s Rates'.K82]" office:value-type="percentage" office:value="0.0982" calcext:value-type="percentage">
            <text:p>9.82 %</text:p>
          </table:table-cell>
          <table:table-cell table:style-name="ce165" table:formula="of:=(([.I64]*(1-(1+[.I65])^(-10))/[.I65]+1/(1+[.I65])^10)-1)+[.I64]" office:value-type="percentage" office:value="0.157896665314373" calcext:value-type="percentage">
            <text:p>15.79 %</text:p>
          </table:table-cell>
          <table:table-cell table:style-name="ce166" office:value-type="percentage" office:value="0.0438134" calcext:value-type="percentage">
            <text:p>4.38 %</text:p>
          </table:table-cell>
          <table:table-cell table:style-name="ce77"/>
          <table:table-cell table:number-columns-repeated="16372"/>
        </table:table-row>
        <table:table-row table:style-name="ro2">
          <table:table-cell table:style-name="ce131" office:value-type="float" office:value="1990" calcext:value-type="float">
            <text:p>1990</text:p>
          </table:table-cell>
          <table:table-cell table:style-name="ce131" office:value-type="float" office:value="330.22" calcext:value-type="float">
            <text:p>330.22</text:p>
          </table:table-cell>
          <table:table-cell table:style-name="ce151" office:value-type="float" office:value="12.350228" calcext:value-type="float">
            <text:p>12.35</text:p>
          </table:table-cell>
          <table:table-cell table:style-name="ce157" table:formula="of:=[.C66]/[.B66]" office:value-type="percentage" office:value="0.0374" calcext:value-type="percentage">
            <text:p>3.74 %</text:p>
          </table:table-cell>
          <table:table-cell table:style-name="ce138" office:value-type="percentage" office:value="0.0808" calcext:value-type="percentage">
            <text:p>8.08 %</text:p>
          </table:table-cell>
          <table:table-cell table:style-name="ce157" table:formula="of:=(([.E65]*(1-(1+[.E66])^(-10))/[.E66]+1/(1+[.E66])^10)-1)+[.E65]" office:value-type="percentage" office:value="0.0623537533355336" calcext:value-type="percentage">
            <text:p>6.24 %</text:p>
          </table:table-cell>
          <table:table-cell table:style-name="ce76" table:formula="of:=[$'Moody''s Rates'.C83]" office:value-type="percentage" office:value="0.0905" calcext:value-type="percentage">
            <text:p>9.05 %</text:p>
          </table:table-cell>
          <table:table-cell table:style-name="ce157" table:formula="of:=(([.G65]*(1-(1+[.G66])^(-10))/[.G66]+1/(1+[.G66])^10)-1)+[.G65]" office:value-type="percentage" office:value="0.0764332402469678" calcext:value-type="percentage">
            <text:p>7.64 %</text:p>
          </table:table-cell>
          <table:table-cell table:style-name="ce164" table:formula="of:=[$'Moody''s Rates'.K83]" office:value-type="percentage" office:value="0.1043" calcext:value-type="percentage">
            <text:p>10.43 %</text:p>
          </table:table-cell>
          <table:table-cell table:style-name="ce165" table:formula="of:=(([.I65]*(1-(1+[.I66])^(-10))/[.I66]+1/(1+[.I66])^10)-1)+[.I65]" office:value-type="percentage" office:value="0.0614006288608169" calcext:value-type="percentage">
            <text:p>6.14 %</text:p>
          </table:table-cell>
          <table:table-cell table:style-name="ce166" office:value-type="percentage" office:value="-0.0069674" calcext:value-type="percentage">
            <text:p>-0.70 %</text:p>
          </table:table-cell>
          <table:table-cell table:style-name="ce77"/>
          <table:table-cell table:number-columns-repeated="16372"/>
        </table:table-row>
        <table:table-row table:style-name="ro2">
          <table:table-cell table:style-name="ce131" office:value-type="float" office:value="1991" calcext:value-type="float">
            <text:p>1991</text:p>
          </table:table-cell>
          <table:table-cell table:style-name="ce131" office:value-type="float" office:value="417.09" calcext:value-type="float">
            <text:p>417.09</text:p>
          </table:table-cell>
          <table:table-cell table:style-name="ce151" office:value-type="float" office:value="12.971499" calcext:value-type="float">
            <text:p>12.97</text:p>
          </table:table-cell>
          <table:table-cell table:style-name="ce157" table:formula="of:=[.C67]/[.B67]" office:value-type="percentage" office:value="0.0311" calcext:value-type="percentage">
            <text:p>3.11 %</text:p>
          </table:table-cell>
          <table:table-cell table:style-name="ce138" office:value-type="percentage" office:value="0.0709" calcext:value-type="percentage">
            <text:p>7.09 %</text:p>
          </table:table-cell>
          <table:table-cell table:style-name="ce157" table:formula="of:=(([.E66]*(1-(1+[.E67])^(-10))/[.E67]+1/(1+[.E67])^10)-1)+[.E66]" office:value-type="percentage" office:value="0.150045100195173" calcext:value-type="percentage">
            <text:p>15.00 %</text:p>
          </table:table-cell>
          <table:table-cell table:style-name="ce76" table:formula="of:=[$'Moody''s Rates'.C84]" office:value-type="percentage" office:value="0.0831" calcext:value-type="percentage">
            <text:p>8.31 %</text:p>
          </table:table-cell>
          <table:table-cell table:style-name="ce157" table:formula="of:=(([.G66]*(1-(1+[.G67])^(-10))/[.G67]+1/(1+[.G67])^10)-1)+[.G66]" office:value-type="percentage" office:value="0.139467730026446" calcext:value-type="percentage">
            <text:p>13.95 %</text:p>
          </table:table-cell>
          <table:table-cell table:style-name="ce164" table:formula="of:=[$'Moody''s Rates'.K84]" office:value-type="percentage" office:value="0.0926" calcext:value-type="percentage">
            <text:p>9.26 %</text:p>
          </table:table-cell>
          <table:table-cell table:style-name="ce165" table:formula="of:=(([.I66]*(1-(1+[.I67])^(-10))/[.I67]+1/(1+[.I67])^10)-1)+[.I66]" office:value-type="percentage" office:value="0.178534871467632" calcext:value-type="percentage">
            <text:p>17.85 %</text:p>
          </table:table-cell>
          <table:table-cell table:style-name="ce166" office:value-type="percentage" office:value="-0.0017639" calcext:value-type="percentage">
            <text:p>-0.18 %</text:p>
          </table:table-cell>
          <table:table-cell table:style-name="ce77"/>
          <table:table-cell table:number-columns-repeated="16372"/>
        </table:table-row>
        <table:table-row table:style-name="ro2">
          <table:table-cell table:style-name="ce131" office:value-type="float" office:value="1992" calcext:value-type="float">
            <text:p>1992</text:p>
          </table:table-cell>
          <table:table-cell table:style-name="ce131" office:value-type="float" office:value="435.71" calcext:value-type="float">
            <text:p>435.71</text:p>
          </table:table-cell>
          <table:table-cell table:style-name="ce151" office:value-type="float" office:value="12.63559" calcext:value-type="float">
            <text:p>12.64</text:p>
          </table:table-cell>
          <table:table-cell table:style-name="ce157" table:formula="of:=[.C68]/[.B68]" office:value-type="percentage" office:value="0.029" calcext:value-type="percentage">
            <text:p>2.90 %</text:p>
          </table:table-cell>
          <table:table-cell table:style-name="ce138" office:value-type="percentage" office:value="0.0677" calcext:value-type="percentage">
            <text:p>6.77 %</text:p>
          </table:table-cell>
          <table:table-cell table:style-name="ce157" table:formula="of:=(([.E67]*(1-(1+[.E68])^(-10))/[.E68]+1/(1+[.E68])^10)-1)+[.E67]" office:value-type="percentage" office:value="0.0936163731620794" calcext:value-type="percentage">
            <text:p>9.36 %</text:p>
          </table:table-cell>
          <table:table-cell table:style-name="ce76" table:formula="of:=[$'Moody''s Rates'.C85]" office:value-type="percentage" office:value="0.0798" calcext:value-type="percentage">
            <text:p>7.98 %</text:p>
          </table:table-cell>
          <table:table-cell table:style-name="ce157" table:formula="of:=(([.G67]*(1-(1+[.G68])^(-10))/[.G68]+1/(1+[.G68])^10)-1)+[.G67]" office:value-type="percentage" office:value="0.105263257860478" calcext:value-type="percentage">
            <text:p>10.53 %</text:p>
          </table:table-cell>
          <table:table-cell table:style-name="ce164" table:formula="of:=[$'Moody''s Rates'.K85]" office:value-type="percentage" office:value="0.0881" calcext:value-type="percentage">
            <text:p>8.81 %</text:p>
          </table:table-cell>
          <table:table-cell table:style-name="ce165" table:formula="of:=(([.I67]*(1-(1+[.I68])^(-10))/[.I68]+1/(1+[.I68])^10)-1)+[.I67]" office:value-type="percentage" office:value="0.121722558698967" calcext:value-type="percentage">
            <text:p>12.17 %</text:p>
          </table:table-cell>
          <table:table-cell table:style-name="ce166" office:value-type="percentage" office:value="0.0083606" calcext:value-type="percentage">
            <text:p>0.84 %</text:p>
          </table:table-cell>
          <table:table-cell table:style-name="ce77"/>
          <table:table-cell table:number-columns-repeated="16372"/>
        </table:table-row>
        <table:table-row table:style-name="ro2">
          <table:table-cell table:style-name="ce131" office:value-type="float" office:value="1993" calcext:value-type="float">
            <text:p>1993</text:p>
          </table:table-cell>
          <table:table-cell table:style-name="ce131" office:value-type="float" office:value="466.45" calcext:value-type="float">
            <text:p>466.45</text:p>
          </table:table-cell>
          <table:table-cell table:style-name="ce151" office:value-type="float" office:value="12.68744" calcext:value-type="float">
            <text:p>12.69</text:p>
          </table:table-cell>
          <table:table-cell table:style-name="ce157" table:formula="of:=[.C69]/[.B69]" office:value-type="percentage" office:value="0.0272" calcext:value-type="percentage">
            <text:p>2.72 %</text:p>
          </table:table-cell>
          <table:table-cell table:style-name="ce138" office:value-type="percentage" office:value="0.0577" calcext:value-type="percentage">
            <text:p>5.77 %</text:p>
          </table:table-cell>
          <table:table-cell table:style-name="ce157" table:formula="of:=(([.E68]*(1-(1+[.E69])^(-10))/[.E69]+1/(1+[.E69])^10)-1)+[.E68]" office:value-type="percentage" office:value="0.142109575892631" calcext:value-type="percentage">
            <text:p>14.21 %</text:p>
          </table:table-cell>
          <table:table-cell table:style-name="ce76" table:formula="of:=[$'Moody''s Rates'.C86]" office:value-type="percentage" office:value="0.0693" calcext:value-type="percentage">
            <text:p>6.93 %</text:p>
          </table:table-cell>
          <table:table-cell table:style-name="ce157" table:formula="of:=(([.G68]*(1-(1+[.G69])^(-10))/[.G69]+1/(1+[.G69])^10)-1)+[.G68]" office:value-type="percentage" office:value="0.153786827392174" calcext:value-type="percentage">
            <text:p>15.38 %</text:p>
          </table:table-cell>
          <table:table-cell table:style-name="ce164" table:formula="of:=[$'Moody''s Rates'.K86]" office:value-type="percentage" office:value="0.0769" calcext:value-type="percentage">
            <text:p>7.69 %</text:p>
          </table:table-cell>
          <table:table-cell table:style-name="ce165" table:formula="of:=(([.I68]*(1-(1+[.I69])^(-10))/[.I69]+1/(1+[.I69])^10)-1)+[.I68]" office:value-type="percentage" office:value="0.164315172195611" calcext:value-type="percentage">
            <text:p>16.43 %</text:p>
          </table:table-cell>
          <table:table-cell table:style-name="ce166" office:value-type="percentage" office:value="0.0216175" calcext:value-type="percentage">
            <text:p>2.16 %</text:p>
          </table:table-cell>
          <table:table-cell table:style-name="ce77"/>
          <table:table-cell table:number-columns-repeated="16372"/>
        </table:table-row>
        <table:table-row table:style-name="ro2">
          <table:table-cell table:style-name="ce131" office:value-type="float" office:value="1994" calcext:value-type="float">
            <text:p>1994</text:p>
          </table:table-cell>
          <table:table-cell table:style-name="ce131" office:value-type="float" office:value="459.27" calcext:value-type="float">
            <text:p>459.27</text:p>
          </table:table-cell>
          <table:table-cell table:style-name="ce151" office:value-type="float" office:value="13.364757" calcext:value-type="float">
            <text:p>13.36</text:p>
          </table:table-cell>
          <table:table-cell table:style-name="ce157" table:formula="of:=[.C70]/[.B70]" office:value-type="percentage" office:value="0.0291" calcext:value-type="percentage">
            <text:p>2.91 %</text:p>
          </table:table-cell>
          <table:table-cell table:style-name="ce138" office:value-type="percentage" office:value="0.0781" calcext:value-type="percentage">
            <text:p>7.81 %</text:p>
          </table:table-cell>
          <table:table-cell table:style-name="ce157" table:formula="of:=(([.E69]*(1-(1+[.E70])^(-10))/[.E70]+1/(1+[.E70])^10)-1)+[.E69]" office:value-type="percentage" office:value="-0.080366555509986" calcext:value-type="percentage">
            <text:p>-8.04 %</text:p>
          </table:table-cell>
          <table:table-cell table:style-name="ce76" table:formula="of:=[$'Moody''s Rates'.C87]" office:value-type="percentage" office:value="0.0846" calcext:value-type="percentage">
            <text:p>8.46 %</text:p>
          </table:table-cell>
          <table:table-cell table:style-name="ce157" table:formula="of:=(([.G69]*(1-(1+[.G70])^(-10))/[.G70]+1/(1+[.G70])^10)-1)+[.G69]" office:value-type="percentage" office:value="-0.0312677913422061" calcext:value-type="percentage">
            <text:p>-3.13 %</text:p>
          </table:table-cell>
          <table:table-cell table:style-name="ce164" table:formula="of:=[$'Moody''s Rates'.K87]" office:value-type="percentage" office:value="0.091" calcext:value-type="percentage">
            <text:p>9.10 %</text:p>
          </table:table-cell>
          <table:table-cell table:style-name="ce165" table:formula="of:=(([.I69]*(1-(1+[.I70])^(-10))/[.I70]+1/(1+[.I70])^10)-1)+[.I69]" office:value-type="percentage" office:value="-0.0131920334757108" calcext:value-type="percentage">
            <text:p>-1.32 %</text:p>
          </table:table-cell>
          <table:table-cell table:style-name="ce166" office:value-type="percentage" office:value="0.0251539" calcext:value-type="percentage">
            <text:p>2.52 %</text:p>
          </table:table-cell>
          <table:table-cell table:style-name="ce77"/>
          <table:table-cell table:number-columns-repeated="16372"/>
        </table:table-row>
        <table:table-row table:style-name="ro2">
          <table:table-cell table:style-name="ce131" office:value-type="float" office:value="1995" calcext:value-type="float">
            <text:p>1995</text:p>
          </table:table-cell>
          <table:table-cell table:style-name="ce131" office:value-type="float" office:value="615.93" calcext:value-type="float">
            <text:p>615.93</text:p>
          </table:table-cell>
          <table:table-cell table:style-name="ce151" office:value-type="float" office:value="14.16639" calcext:value-type="float">
            <text:p>14.17</text:p>
          </table:table-cell>
          <table:table-cell table:style-name="ce157" table:formula="of:=[.C71]/[.B71]" office:value-type="percentage" office:value="0.023" calcext:value-type="percentage">
            <text:p>2.30 %</text:p>
          </table:table-cell>
          <table:table-cell table:style-name="ce138" office:value-type="percentage" office:value="0.0571" calcext:value-type="percentage">
            <text:p>5.71 %</text:p>
          </table:table-cell>
          <table:table-cell table:style-name="ce157" table:formula="of:=(([.E70]*(1-(1+[.E71])^(-10))/[.E71]+1/(1+[.E71])^10)-1)+[.E70]" office:value-type="percentage" office:value="0.234807801125389" calcext:value-type="percentage">
            <text:p>23.48 %</text:p>
          </table:table-cell>
          <table:table-cell table:style-name="ce76" table:formula="of:=[$'Moody''s Rates'.C88]" office:value-type="percentage" office:value="0.0682" calcext:value-type="percentage">
            <text:p>6.82 %</text:p>
          </table:table-cell>
          <table:table-cell table:style-name="ce157" table:formula="of:=(([.G70]*(1-(1+[.G71])^(-10))/[.G71]+1/(1+[.G71])^10)-1)+[.G70]" office:value-type="percentage" office:value="0.20075128768094" calcext:value-type="percentage">
            <text:p>20.08 %</text:p>
          </table:table-cell>
          <table:table-cell table:style-name="ce164" table:formula="of:=[$'Moody''s Rates'.K88]" office:value-type="percentage" office:value="0.0749" calcext:value-type="percentage">
            <text:p>7.49 %</text:p>
          </table:table-cell>
          <table:table-cell table:style-name="ce165" table:formula="of:=(([.I70]*(1-(1+[.I71])^(-10))/[.I71]+1/(1+[.I71])^10)-1)+[.I70]" office:value-type="percentage" office:value="0.201562181706402" calcext:value-type="percentage">
            <text:p>20.16 %</text:p>
          </table:table-cell>
          <table:table-cell table:style-name="ce166" office:value-type="percentage" office:value="0.018081" calcext:value-type="percentage">
            <text:p>1.81 %</text:p>
          </table:table-cell>
          <table:table-cell table:style-name="ce77"/>
          <table:table-cell table:number-columns-repeated="16372"/>
        </table:table-row>
        <table:table-row table:style-name="ro2">
          <table:table-cell table:style-name="ce131" office:value-type="float" office:value="1996" calcext:value-type="float">
            <text:p>1996</text:p>
          </table:table-cell>
          <table:table-cell table:style-name="ce131" office:value-type="float" office:value="740.74" calcext:value-type="float">
            <text:p>740.74</text:p>
          </table:table-cell>
          <table:table-cell table:style-name="ce151" office:value-type="float" office:value="14.888874" calcext:value-type="float">
            <text:p>14.89</text:p>
          </table:table-cell>
          <table:table-cell table:style-name="ce157" table:formula="of:=[.C72]/[.B72]" office:value-type="percentage" office:value="0.0201" calcext:value-type="percentage">
            <text:p>2.01 %</text:p>
          </table:table-cell>
          <table:table-cell table:style-name="ce138" office:value-type="percentage" office:value="0.063" calcext:value-type="percentage">
            <text:p>6.30 %</text:p>
          </table:table-cell>
          <table:table-cell table:style-name="ce157" table:formula="of:=(([.E71]*(1-(1+[.E72])^(-10))/[.E72]+1/(1+[.E72])^10)-1)+[.E71]" office:value-type="percentage" office:value="0.0142860779340184" calcext:value-type="percentage">
            <text:p>1.43 %</text:p>
          </table:table-cell>
          <table:table-cell table:style-name="ce76" table:formula="of:=[$'Moody''s Rates'.C89]" office:value-type="percentage" office:value="0.072" calcext:value-type="percentage">
            <text:p>7.20 %</text:p>
          </table:table-cell>
          <table:table-cell table:style-name="ce157" table:formula="of:=(([.G71]*(1-(1+[.G72])^(-10))/[.G72]+1/(1+[.G72])^10)-1)+[.G71]" office:value-type="percentage" office:value="0.0417553985149101" calcext:value-type="percentage">
            <text:p>4.18 %</text:p>
          </table:table-cell>
          <table:table-cell table:style-name="ce164" table:formula="of:=[$'Moody''s Rates'.K89]" office:value-type="percentage" office:value="0.0789" calcext:value-type="percentage">
            <text:p>7.89 %</text:p>
          </table:table-cell>
          <table:table-cell table:style-name="ce165" table:formula="of:=(([.I71]*(1-(1+[.I72])^(-10))/[.I72]+1/(1+[.I72])^10)-1)+[.I71]" office:value-type="percentage" office:value="0.0479259941944115" calcext:value-type="percentage">
            <text:p>4.79 %</text:p>
          </table:table-cell>
          <table:table-cell table:style-name="ce166" office:value-type="percentage" office:value="0.0243095" calcext:value-type="percentage">
            <text:p>2.43 %</text:p>
          </table:table-cell>
          <table:table-cell table:style-name="ce77"/>
          <table:table-cell table:number-columns-repeated="16372"/>
        </table:table-row>
        <table:table-row table:style-name="ro2">
          <table:table-cell table:style-name="ce131" office:value-type="float" office:value="1997" calcext:value-type="float">
            <text:p>1997</text:p>
          </table:table-cell>
          <table:table-cell table:style-name="ce131" office:value-type="float" office:value="970.43" calcext:value-type="float">
            <text:p>970.43</text:p>
          </table:table-cell>
          <table:table-cell table:style-name="ce151" office:value-type="float" office:value="15.522" calcext:value-type="float">
            <text:p>15.52</text:p>
          </table:table-cell>
          <table:table-cell table:style-name="ce157" table:formula="of:=[.C73]/[.B73]" office:value-type="percentage" office:value="0.0159949713013819" calcext:value-type="percentage">
            <text:p>1.60 %</text:p>
          </table:table-cell>
          <table:table-cell table:style-name="ce138" office:value-type="percentage" office:value="0.0581" calcext:value-type="percentage">
            <text:p>5.81 %</text:p>
          </table:table-cell>
          <table:table-cell table:style-name="ce157" table:formula="of:=(([.E72]*(1-(1+[.E73])^(-10))/[.E73]+1/(1+[.E73])^10)-1)+[.E72]" office:value-type="percentage" office:value="0.0993913027297753" calcext:value-type="percentage">
            <text:p>9.94 %</text:p>
          </table:table-cell>
          <table:table-cell table:style-name="ce76" table:formula="of:=[$'Moody''s Rates'.C90]" office:value-type="percentage" office:value="0.0676" calcext:value-type="percentage">
            <text:p>6.76 %</text:p>
          </table:table-cell>
          <table:table-cell table:style-name="ce157" table:formula="of:=(([.G72]*(1-(1+[.G73])^(-10))/[.G73]+1/(1+[.G73])^10)-1)+[.G72]" office:value-type="percentage" office:value="0.103249538528435" calcext:value-type="percentage">
            <text:p>10.32 %</text:p>
          </table:table-cell>
          <table:table-cell table:style-name="ce164" table:formula="of:=[$'Moody''s Rates'.K90]" office:value-type="percentage" office:value="0.0732" calcext:value-type="percentage">
            <text:p>7.32 %</text:p>
          </table:table-cell>
          <table:table-cell table:style-name="ce165" table:formula="of:=(([.I72]*(1-(1+[.I73])^(-10))/[.I73]+1/(1+[.I73])^10)-1)+[.I72]" office:value-type="percentage" office:value="0.118348872444264" calcext:value-type="percentage">
            <text:p>11.83 %</text:p>
          </table:table-cell>
          <table:table-cell table:style-name="ce166" office:value-type="percentage" office:value="0.0402567" calcext:value-type="percentage">
            <text:p>4.03 %</text:p>
          </table:table-cell>
          <table:table-cell table:style-name="ce77"/>
          <table:table-cell table:number-columns-repeated="16372"/>
        </table:table-row>
        <table:table-row table:style-name="ro2">
          <table:table-cell table:style-name="ce131" office:value-type="float" office:value="1998" calcext:value-type="float">
            <text:p>1998</text:p>
          </table:table-cell>
          <table:table-cell table:style-name="ce131" office:value-type="float" office:value="1229.23" calcext:value-type="float">
            <text:p>1229.23</text:p>
          </table:table-cell>
          <table:table-cell table:style-name="ce151" office:value-type="float" office:value="16.2" calcext:value-type="float">
            <text:p>16.20</text:p>
          </table:table-cell>
          <table:table-cell table:style-name="ce157" table:formula="of:=[.C74]/[.B74]" office:value-type="percentage" office:value="0.0131789819643191" calcext:value-type="percentage">
            <text:p>1.32 %</text:p>
          </table:table-cell>
          <table:table-cell table:style-name="ce138" office:value-type="percentage" office:value="0.0465" calcext:value-type="percentage">
            <text:p>4.65 %</text:p>
          </table:table-cell>
          <table:table-cell table:style-name="ce157" table:formula="of:=(([.E73]*(1-(1+[.E74])^(-10))/[.E74]+1/(1+[.E74])^10)-1)+[.E73]" office:value-type="percentage" office:value="0.149214319226062" calcext:value-type="percentage">
            <text:p>14.92 %</text:p>
          </table:table-cell>
          <table:table-cell table:style-name="ce76" table:formula="of:=[$'Moody''s Rates'.C91]" office:value-type="percentage" office:value="0.0622" calcext:value-type="percentage">
            <text:p>6.22 %</text:p>
          </table:table-cell>
          <table:table-cell table:style-name="ce157" table:formula="of:=(([.G73]*(1-(1+[.G74])^(-10))/[.G74]+1/(1+[.G74])^10)-1)+[.G73]" office:value-type="percentage" office:value="0.106933473796014" calcext:value-type="percentage">
            <text:p>10.69 %</text:p>
          </table:table-cell>
          <table:table-cell table:style-name="ce164" table:formula="of:=[$'Moody''s Rates'.K91]" office:value-type="percentage" office:value="0.0723" calcext:value-type="percentage">
            <text:p>7.23 %</text:p>
          </table:table-cell>
          <table:table-cell table:style-name="ce165" table:formula="of:=(([.I73]*(1-(1+[.I74])^(-10))/[.I74]+1/(1+[.I74])^10)-1)+[.I73]" office:value-type="percentage" office:value="0.0794545613270708" calcext:value-type="percentage">
            <text:p>7.95 %</text:p>
          </table:table-cell>
          <table:table-cell table:style-name="ce166" office:value-type="percentage" office:value="0.0643791" calcext:value-type="percentage">
            <text:p>6.44 %</text:p>
          </table:table-cell>
          <table:table-cell table:style-name="ce77"/>
          <table:table-cell table:number-columns-repeated="16372"/>
        </table:table-row>
        <table:table-row table:style-name="ro2">
          <table:table-cell table:style-name="ce131" office:value-type="float" office:value="1999" calcext:value-type="float">
            <text:p>1999</text:p>
          </table:table-cell>
          <table:table-cell table:style-name="ce131" office:value-type="float" office:value="1469.25" calcext:value-type="float">
            <text:p>1469.25</text:p>
          </table:table-cell>
          <table:table-cell table:style-name="ce151" office:value-type="float" office:value="16.709" calcext:value-type="float">
            <text:p>16.71</text:p>
          </table:table-cell>
          <table:table-cell table:style-name="ce157" table:formula="of:=[.C75]/[.B75]" office:value-type="percentage" office:value="0.0113724689467415" calcext:value-type="percentage">
            <text:p>1.14 %</text:p>
          </table:table-cell>
          <table:table-cell table:style-name="ce138" office:value-type="percentage" office:value="0.0644" calcext:value-type="percentage">
            <text:p>6.44 %</text:p>
          </table:table-cell>
          <table:table-cell table:style-name="ce157" table:formula="of:=(([.E74]*(1-(1+[.E75])^(-10))/[.E75]+1/(1+[.E75])^10)-1)+[.E74]" office:value-type="percentage" office:value="-0.0825421479626858" calcext:value-type="percentage">
            <text:p>-8.25 %</text:p>
          </table:table-cell>
          <table:table-cell table:style-name="ce76" table:formula="of:=[$'Moody''s Rates'.C92]" office:value-type="percentage" office:value="0.0755" calcext:value-type="percentage">
            <text:p>7.55 %</text:p>
          </table:table-cell>
          <table:table-cell table:style-name="ce157" table:formula="of:=(([.G74]*(1-(1+[.G75])^(-10))/[.G75]+1/(1+[.G75])^10)-1)+[.G74]" office:value-type="percentage" office:value="-0.0288842177149049" calcext:value-type="percentage">
            <text:p>-2.89 %</text:p>
          </table:table-cell>
          <table:table-cell table:style-name="ce164" table:formula="of:=[$'Moody''s Rates'.K92]" office:value-type="percentage" office:value="0.0819" calcext:value-type="percentage">
            <text:p>8.19 %</text:p>
          </table:table-cell>
          <table:table-cell table:style-name="ce165" table:formula="of:=(([.I74]*(1-(1+[.I75])^(-10))/[.I75]+1/(1+[.I75])^10)-1)+[.I74]" office:value-type="percentage" office:value="0.00843163475482187" calcext:value-type="percentage">
            <text:p>0.84 %</text:p>
          </table:table-cell>
          <table:table-cell table:style-name="ce166" office:value-type="percentage" office:value="0.076869" calcext:value-type="percentage">
            <text:p>7.69 %</text:p>
          </table:table-cell>
          <table:table-cell table:style-name="ce77"/>
          <table:table-cell table:number-columns-repeated="16372"/>
        </table:table-row>
        <table:table-row table:style-name="ro2">
          <table:table-cell table:style-name="ce131" office:value-type="float" office:value="2000" calcext:value-type="float">
            <text:p>2000</text:p>
          </table:table-cell>
          <table:table-cell table:style-name="ce131" office:value-type="float" office:value="1320.28" calcext:value-type="float">
            <text:p>1320.28</text:p>
          </table:table-cell>
          <table:table-cell table:style-name="ce131" office:value-type="float" office:value="16.27" calcext:value-type="float">
            <text:p>16.27</text:p>
          </table:table-cell>
          <table:table-cell table:style-name="ce138" table:formula="of:=[.C76]/[.B76]" office:value-type="percentage" office:value="0.0123231435756052" calcext:value-type="percentage">
            <text:p>1.23 %</text:p>
          </table:table-cell>
          <table:table-cell table:style-name="ce138" office:value-type="percentage" office:value="0.0511" calcext:value-type="percentage">
            <text:p>5.11 %</text:p>
          </table:table-cell>
          <table:table-cell table:style-name="ce157" table:formula="of:=(([.E75]*(1-(1+[.E76])^(-10))/[.E76]+1/(1+[.E76])^10)-1)+[.E75]" office:value-type="percentage" office:value="0.166552671253975" calcext:value-type="percentage">
            <text:p>16.66 %</text:p>
          </table:table-cell>
          <table:table-cell table:style-name="ce76" table:formula="of:=[$'Moody''s Rates'.C93]" office:value-type="percentage" office:value="0.0721" calcext:value-type="percentage">
            <text:p>7.21 %</text:p>
          </table:table-cell>
          <table:table-cell table:style-name="ce157" table:formula="of:=(([.G75]*(1-(1+[.G76])^(-10))/[.G76]+1/(1+[.G76])^10)-1)+[.G75]" office:value-type="percentage" office:value="0.0991500794088745" calcext:value-type="percentage">
            <text:p>9.92 %</text:p>
          </table:table-cell>
          <table:table-cell table:style-name="ce164" table:formula="of:=[$'Moody''s Rates'.K93]" office:value-type="percentage" office:value="0.0802" calcext:value-type="percentage">
            <text:p>8.02 %</text:p>
          </table:table-cell>
          <table:table-cell table:style-name="ce165" table:formula="of:=(([.I75]*(1-(1+[.I76])^(-10))/[.I76]+1/(1+[.I76])^10)-1)+[.I75]" office:value-type="percentage" office:value="0.0932968552103718" calcext:value-type="percentage">
            <text:p>9.33 %</text:p>
          </table:table-cell>
          <table:table-cell table:style-name="ce166" office:value-type="percentage" office:value="0.0925415" calcext:value-type="percentage">
            <text:p>9.25 %</text:p>
          </table:table-cell>
          <table:table-cell table:style-name="ce77"/>
          <table:table-cell table:style-name="ce18" table:number-columns-repeated="16372"/>
        </table:table-row>
        <table:table-row table:style-name="ro2">
          <table:table-cell table:style-name="ce131" office:value-type="float" office:value="2001" calcext:value-type="float">
            <text:p>2001</text:p>
          </table:table-cell>
          <table:table-cell table:style-name="ce131" office:value-type="float" office:value="1148.09" calcext:value-type="float">
            <text:p>1148.09</text:p>
          </table:table-cell>
          <table:table-cell table:style-name="ce131" office:value-type="float" office:value="15.74" calcext:value-type="float">
            <text:p>15.74</text:p>
          </table:table-cell>
          <table:table-cell table:style-name="ce138" table:formula="of:=[.C77]/[.B77]" office:value-type="percentage" office:value="0.0137097265893789" calcext:value-type="percentage">
            <text:p>1.37 %</text:p>
          </table:table-cell>
          <table:table-cell table:style-name="ce138" office:value-type="percentage" office:value="0.0505" calcext:value-type="percentage">
            <text:p>5.05 %</text:p>
          </table:table-cell>
          <table:table-cell table:style-name="ce157" table:formula="of:=(([.E76]*(1-(1+[.E77])^(-10))/[.E77]+1/(1+[.E77])^10)-1)+[.E76]" office:value-type="percentage" office:value="0.0557218118924926" calcext:value-type="percentage">
            <text:p>5.57 %</text:p>
          </table:table-cell>
          <table:table-cell table:style-name="ce76" table:formula="of:=[$'Moody''s Rates'.C94]" office:value-type="percentage" office:value="0.0677" calcext:value-type="percentage">
            <text:p>6.77 %</text:p>
          </table:table-cell>
          <table:table-cell table:style-name="ce157" table:formula="of:=(([.G76]*(1-(1+[.G77])^(-10))/[.G77]+1/(1+[.G77])^10)-1)+[.G76]" office:value-type="percentage" office:value="0.103335013097859" calcext:value-type="percentage">
            <text:p>10.33 %</text:p>
          </table:table-cell>
          <table:table-cell table:style-name="ce164" table:formula="of:=[$'Moody''s Rates'.K94]" office:value-type="percentage" office:value="0.0805" calcext:value-type="percentage">
            <text:p>8.05 %</text:p>
          </table:table-cell>
          <table:table-cell table:style-name="ce165" table:formula="of:=(([.I76]*(1-(1+[.I77])^(-10))/[.I77]+1/(1+[.I77])^10)-1)+[.I76]" office:value-type="percentage" office:value="0.0781915075428782" calcext:value-type="percentage">
            <text:p>7.82 %</text:p>
          </table:table-cell>
          <table:table-cell table:style-name="ce166" office:value-type="percentage" office:value="0.0667696" calcext:value-type="percentage">
            <text:p>6.68 %</text:p>
          </table:table-cell>
          <table:table-cell table:style-name="ce77"/>
          <table:table-cell table:number-columns-repeated="16372"/>
        </table:table-row>
        <table:table-row table:style-name="ro2">
          <table:table-cell table:style-name="ce131" office:value-type="float" office:value="2002" calcext:value-type="float">
            <text:p>2002</text:p>
          </table:table-cell>
          <table:table-cell table:style-name="ce131" office:value-type="float" office:value="879.82" calcext:value-type="float">
            <text:p>879.82</text:p>
          </table:table-cell>
          <table:table-cell table:style-name="ce131" office:value-type="float" office:value="16.08" calcext:value-type="float">
            <text:p>16.08</text:p>
          </table:table-cell>
          <table:table-cell table:style-name="ce138" table:formula="of:=[.C78]/[.B78]" office:value-type="percentage" office:value="0.0182764656406992" calcext:value-type="percentage">
            <text:p>1.83 %</text:p>
          </table:table-cell>
          <table:table-cell table:style-name="ce138" office:value-type="percentage" office:value="0.0382" calcext:value-type="percentage">
            <text:p>3.82 %</text:p>
          </table:table-cell>
          <table:table-cell table:style-name="ce157" table:formula="of:=(([.E77]*(1-(1+[.E78])^(-10))/[.E78]+1/(1+[.E78])^10)-1)+[.E77]" office:value-type="percentage" office:value="0.151164003781093" calcext:value-type="percentage">
            <text:p>15.12 %</text:p>
          </table:table-cell>
          <table:table-cell table:style-name="ce76" table:formula="of:=[$'Moody''s Rates'.C95]" office:value-type="percentage" office:value="0.0621" calcext:value-type="percentage">
            <text:p>6.21 %</text:p>
          </table:table-cell>
          <table:table-cell table:style-name="ce157" table:formula="of:=(([.G77]*(1-(1+[.G78])^(-10))/[.G78]+1/(1+[.G78])^10)-1)+[.G77]" office:value-type="percentage" office:value="0.108509496839058" calcext:value-type="percentage">
            <text:p>10.85 %</text:p>
          </table:table-cell>
          <table:table-cell table:style-name="ce164" table:formula="of:=[$'Moody''s Rates'.K95]" office:value-type="percentage" office:value="0.0745" calcext:value-type="percentage">
            <text:p>7.45 %</text:p>
          </table:table-cell>
          <table:table-cell table:style-name="ce165" table:formula="of:=(([.I77]*(1-(1+[.I78])^(-10))/[.I78]+1/(1+[.I78])^10)-1)+[.I77]" office:value-type="percentage" office:value="0.121778676939755" calcext:value-type="percentage">
            <text:p>12.18 %</text:p>
          </table:table-cell>
          <table:table-cell table:style-name="ce166" office:value-type="percentage" office:value="0.0955918" calcext:value-type="percentage">
            <text:p>9.56 %</text:p>
          </table:table-cell>
          <table:table-cell table:style-name="ce77"/>
          <table:table-cell table:style-name="ce139" table:number-columns-repeated="16372"/>
        </table:table-row>
        <table:table-row table:style-name="ro2">
          <table:table-cell table:style-name="ce131" office:value-type="float" office:value="2003" calcext:value-type="float">
            <text:p>2003</text:p>
          </table:table-cell>
          <table:table-cell table:style-name="ce131" office:value-type="float" office:value="1111.91" calcext:value-type="float">
            <text:p>1111.91</text:p>
          </table:table-cell>
          <table:table-cell table:style-name="ce131" office:value-type="float" office:value="17.39" calcext:value-type="float">
            <text:p>17.39</text:p>
          </table:table-cell>
          <table:table-cell table:style-name="ce138" table:formula="of:=[.C79]/[.B79]" office:value-type="percentage" office:value="0.0156397550161434" calcext:value-type="percentage">
            <text:p>1.56 %</text:p>
          </table:table-cell>
          <table:table-cell table:style-name="ce138" office:value-type="percentage" office:value="0.0425" calcext:value-type="percentage">
            <text:p>4.25 %</text:p>
          </table:table-cell>
          <table:table-cell table:style-name="ce157" table:formula="of:=(([.E78]*(1-(1+[.E79])^(-10))/[.E79]+1/(1+[.E79])^10)-1)+[.E78]" office:value-type="percentage" office:value="0.00375318588177585" calcext:value-type="percentage">
            <text:p>0.38 %</text:p>
          </table:table-cell>
          <table:table-cell table:style-name="ce76" table:formula="of:=[$'Moody''s Rates'.C96]" office:value-type="percentage" office:value="0.0562" calcext:value-type="percentage">
            <text:p>5.62 %</text:p>
          </table:table-cell>
          <table:table-cell table:style-name="ce157" table:formula="of:=(([.G78]*(1-(1+[.G79])^(-10))/[.G79]+1/(1+[.G79])^10)-1)+[.G78]" office:value-type="percentage" office:value="0.106317127729282" calcext:value-type="percentage">
            <text:p>10.63 %</text:p>
          </table:table-cell>
          <table:table-cell table:style-name="ce164" table:formula="of:=[$'Moody''s Rates'.K96]" office:value-type="percentage" office:value="0.066" calcext:value-type="percentage">
            <text:p>6.60 %</text:p>
          </table:table-cell>
          <table:table-cell table:style-name="ce165" table:formula="of:=(([.I78]*(1-(1+[.I79])^(-10))/[.I79]+1/(1+[.I79])^10)-1)+[.I78]" office:value-type="percentage" office:value="0.135320120968576" calcext:value-type="percentage">
            <text:p>13.53 %</text:p>
          </table:table-cell>
          <table:table-cell table:style-name="ce166" office:value-type="percentage" office:value="0.0981675" calcext:value-type="percentage">
            <text:p>9.82 %</text:p>
          </table:table-cell>
          <table:table-cell table:style-name="ce77"/>
          <table:table-cell table:number-columns-repeated="16372"/>
        </table:table-row>
        <table:table-row table:style-name="ro2">
          <table:table-cell table:style-name="ce131" office:value-type="float" office:value="2004" calcext:value-type="float">
            <text:p>2004</text:p>
          </table:table-cell>
          <table:table-cell table:style-name="ce131" office:value-type="float" office:value="1211.92" calcext:value-type="float">
            <text:p>1211.92</text:p>
          </table:table-cell>
          <table:table-cell table:style-name="ce131" office:value-type="float" office:value="19.44" calcext:value-type="float">
            <text:p>19.44</text:p>
          </table:table-cell>
          <table:table-cell table:style-name="ce138" table:formula="of:=[.C80]/[.B80]" office:value-type="percentage" office:value="0.0160406627500165" calcext:value-type="percentage">
            <text:p>1.60 %</text:p>
          </table:table-cell>
          <table:table-cell table:style-name="ce138" office:value-type="percentage" office:value="0.0422" calcext:value-type="percentage">
            <text:p>4.22 %</text:p>
          </table:table-cell>
          <table:table-cell table:style-name="ce157" table:formula="of:=(([.E79]*(1-(1+[.E80])^(-10))/[.E80]+1/(1+[.E80])^10)-1)+[.E79]" office:value-type="percentage" office:value="0.0449068370227455" calcext:value-type="percentage">
            <text:p>4.49 %</text:p>
          </table:table-cell>
          <table:table-cell table:style-name="ce76" table:formula="of:=[$'Moody''s Rates'.C97]" office:value-type="percentage" office:value="0.0547" calcext:value-type="percentage">
            <text:p>5.47 %</text:p>
          </table:table-cell>
          <table:table-cell table:style-name="ce157" table:formula="of:=(([.G79]*(1-(1+[.G80])^(-10))/[.G80]+1/(1+[.G80])^10)-1)+[.G79]" office:value-type="percentage" office:value="0.067522726210993" calcext:value-type="percentage">
            <text:p>6.75 %</text:p>
          </table:table-cell>
          <table:table-cell table:style-name="ce164" table:formula="of:=[$'Moody''s Rates'.K97]" office:value-type="percentage" office:value="0.0615" calcext:value-type="percentage">
            <text:p>6.15 %</text:p>
          </table:table-cell>
          <table:table-cell table:style-name="ce165" table:formula="of:=(([.I79]*(1-(1+[.I80])^(-10))/[.I80]+1/(1+[.I80])^10)-1)+[.I79]" office:value-type="percentage" office:value="0.0988862840872186" calcext:value-type="percentage">
            <text:p>9.89 %</text:p>
          </table:table-cell>
          <table:table-cell table:style-name="ce166" office:value-type="percentage" office:value="0.1363799" calcext:value-type="percentage">
            <text:p>13.64 %</text:p>
          </table:table-cell>
          <table:table-cell table:style-name="ce77"/>
          <table:table-cell table:style-name="ce169" table:number-columns-repeated="16372"/>
        </table:table-row>
        <table:table-row table:style-name="ro2">
          <table:table-cell table:style-name="ce131" office:value-type="float" office:value="2005" calcext:value-type="float">
            <text:p>2005</text:p>
          </table:table-cell>
          <table:table-cell table:style-name="ce131" office:value-type="float" office:value="1248.29" calcext:value-type="float">
            <text:p>1248.29</text:p>
          </table:table-cell>
          <table:table-cell table:style-name="ce151" office:value-type="float" office:value="22.22" calcext:value-type="float">
            <text:p>22.22</text:p>
          </table:table-cell>
          <table:table-cell table:style-name="ce138" table:formula="of:=[.C81]/[.B81]" office:value-type="percentage" office:value="0.0178003508800038" calcext:value-type="percentage">
            <text:p>1.78 %</text:p>
          </table:table-cell>
          <table:table-cell table:style-name="ce138" office:value-type="percentage" office:value="0.0439" calcext:value-type="percentage">
            <text:p>4.39 %</text:p>
          </table:table-cell>
          <table:table-cell table:style-name="ce157" table:formula="of:=(([.E80]*(1-(1+[.E81])^(-10))/[.E81]+1/(1+[.E81])^10)-1)+[.E80]" office:value-type="percentage" office:value="0.0286753295977795" calcext:value-type="percentage">
            <text:p>2.87 %</text:p>
          </table:table-cell>
          <table:table-cell table:style-name="ce76" table:formula="of:=[$'Moody''s Rates'.C98]" office:value-type="percentage" office:value="0.0537" calcext:value-type="percentage">
            <text:p>5.37 %</text:p>
          </table:table-cell>
          <table:table-cell table:style-name="ce157" table:formula="of:=(([.G80]*(1-(1+[.G81])^(-10))/[.G81]+1/(1+[.G81])^10)-1)+[.G80]" office:value-type="percentage" office:value="0.0622848501326594" calcext:value-type="percentage">
            <text:p>6.23 %</text:p>
          </table:table-cell>
          <table:table-cell table:style-name="ce164" table:formula="of:=[$'Moody''s Rates'.K98]" office:value-type="percentage" office:value="0.0632" calcext:value-type="percentage">
            <text:p>6.32 %</text:p>
          </table:table-cell>
          <table:table-cell table:style-name="ce165" table:formula="of:=(([.I80]*(1-(1+[.I81])^(-10))/[.I81]+1/(1+[.I81])^10)-1)+[.I80]" office:value-type="percentage" office:value="0.0491753798716953" calcext:value-type="percentage">
            <text:p>4.92 %</text:p>
          </table:table-cell>
          <table:table-cell table:style-name="ce166" office:value-type="percentage" office:value="0.1351063" calcext:value-type="percentage">
            <text:p>13.51 %</text:p>
          </table:table-cell>
          <table:table-cell table:style-name="ce77"/>
          <table:table-cell table:style-name="ce156" table:number-columns-repeated="16372"/>
        </table:table-row>
        <table:table-row table:style-name="ro2">
          <table:table-cell table:style-name="ce131" office:value-type="float" office:value="2006" calcext:value-type="float">
            <text:p>2006</text:p>
          </table:table-cell>
          <table:table-cell table:style-name="ce131" office:value-type="float" office:value="1418.3" calcext:value-type="float">
            <text:p>1418.3</text:p>
          </table:table-cell>
          <table:table-cell table:style-name="ce131" office:value-type="float" office:value="24.88" calcext:value-type="float">
            <text:p>24.88</text:p>
          </table:table-cell>
          <table:table-cell table:style-name="ce138" table:formula="of:=[.C82]/[.B82]" office:value-type="percentage" office:value="0.0175421278995981" calcext:value-type="percentage">
            <text:p>1.75 %</text:p>
          </table:table-cell>
          <table:table-cell table:style-name="ce138" office:value-type="percentage" office:value="0.047" calcext:value-type="percentage">
            <text:p>4.70 %</text:p>
          </table:table-cell>
          <table:table-cell table:style-name="ce157" table:formula="of:=(([.E81]*(1-(1+[.E82])^(-10))/[.E82]+1/(1+[.E82])^10)-1)+[.E81]" office:value-type="percentage" office:value="0.0196100124175684" calcext:value-type="percentage">
            <text:p>1.96 %</text:p>
          </table:table-cell>
          <table:table-cell table:style-name="ce76" table:formula="of:=[$'Moody''s Rates'.C99]" office:value-type="percentage" office:value="0.0532" calcext:value-type="percentage">
            <text:p>5.32 %</text:p>
          </table:table-cell>
          <table:table-cell table:style-name="ce157" table:formula="of:=(([.G81]*(1-(1+[.G82])^(-10))/[.G82]+1/(1+[.G82])^10)-1)+[.G81]" office:value-type="percentage" office:value="0.0575015663383046" calcext:value-type="percentage">
            <text:p>5.75 %</text:p>
          </table:table-cell>
          <table:table-cell table:style-name="ce164" table:formula="of:=[$'Moody''s Rates'.K99]" office:value-type="percentage" office:value="0.0622" calcext:value-type="percentage">
            <text:p>6.22 %</text:p>
          </table:table-cell>
          <table:table-cell table:style-name="ce165" table:formula="of:=(([.I81]*(1-(1+[.I82])^(-10))/[.I82]+1/(1+[.I82])^10)-1)+[.I81]" office:value-type="percentage" office:value="0.0704839766288915" calcext:value-type="percentage">
            <text:p>7.05 %</text:p>
          </table:table-cell>
          <table:table-cell table:style-name="ce166" office:value-type="percentage" office:value="0.0173391" calcext:value-type="percentage">
            <text:p>1.73 %</text:p>
          </table:table-cell>
          <table:table-cell table:style-name="ce77"/>
          <table:table-cell table:number-columns-repeated="16372"/>
        </table:table-row>
        <table:table-row table:style-name="ro2">
          <table:table-cell table:style-name="ce131" office:value-type="float" office:value="2007" calcext:value-type="float">
            <text:p>2007</text:p>
          </table:table-cell>
          <table:table-cell table:style-name="ce149" office:value-type="float" office:value="1468.36" calcext:value-type="float">
            <text:p>1468.36</text:p>
          </table:table-cell>
          <table:table-cell table:style-name="ce131" office:value-type="float" office:value="27.73" calcext:value-type="float">
            <text:p>27.73</text:p>
          </table:table-cell>
          <table:table-cell table:style-name="ce158" table:formula="of:=[.C83]/[.B83]" office:value-type="percentage" office:value="0.0188850145740827" calcext:value-type="percentage">
            <text:p>1.89 %</text:p>
          </table:table-cell>
          <table:table-cell table:style-name="ce158" office:value-type="percentage" office:value="0.0402" calcext:value-type="percentage">
            <text:p>4.02 %</text:p>
          </table:table-cell>
          <table:table-cell table:style-name="ce157" table:formula="of:=(([.E82]*(1-(1+[.E83])^(-10))/[.E83]+1/(1+[.E83])^10)-1)+[.E82]" office:value-type="percentage" office:value="0.102099219300128" calcext:value-type="percentage">
            <text:p>10.21 %</text:p>
          </table:table-cell>
          <table:table-cell table:style-name="ce76" table:formula="of:=[$'Moody''s Rates'.C100]" office:value-type="percentage" office:value="0.0549" calcext:value-type="percentage">
            <text:p>5.49 %</text:p>
          </table:table-cell>
          <table:table-cell table:style-name="ce157" table:formula="of:=(([.G82]*(1-(1+[.G83])^(-10))/[.G83]+1/(1+[.G83])^10)-1)+[.G82]" office:value-type="percentage" office:value="0.0403798875202054" calcext:value-type="percentage">
            <text:p>4.04 %</text:p>
          </table:table-cell>
          <table:table-cell table:style-name="ce164" table:formula="of:=[$'Moody''s Rates'.K100]" office:value-type="percentage" office:value="0.0665" calcext:value-type="percentage">
            <text:p>6.65 %</text:p>
          </table:table-cell>
          <table:table-cell table:style-name="ce165" table:formula="of:=(([.I82]*(1-(1+[.I83])^(-10))/[.I83]+1/(1+[.I83])^10)-1)+[.I82]" office:value-type="percentage" office:value="0.0315038615280556" calcext:value-type="percentage">
            <text:p>3.15 %</text:p>
          </table:table-cell>
          <table:table-cell table:style-name="ce166" office:value-type="percentage" office:value="-0.0539741" calcext:value-type="percentage">
            <text:p>-5.40 %</text:p>
          </table:table-cell>
          <table:table-cell table:style-name="ce77"/>
          <table:table-cell table:number-columns-repeated="16372"/>
        </table:table-row>
        <table:table-row table:style-name="ro2">
          <table:table-cell table:style-name="ce146" office:value-type="float" office:value="2008" calcext:value-type="float">
            <text:p>2008</text:p>
          </table:table-cell>
          <table:table-cell table:style-name="ce146" office:value-type="float" office:value="903.25" calcext:value-type="float">
            <text:p>903.25</text:p>
          </table:table-cell>
          <table:table-cell table:style-name="ce146" office:value-type="float" office:value="28.39" calcext:value-type="float">
            <text:p>28.39</text:p>
          </table:table-cell>
          <table:table-cell table:style-name="ce159" table:formula="of:=[.C84]/[.B84]" office:value-type="percentage" office:value="0.031430943814005" calcext:value-type="percentage">
            <text:p>3.14 %</text:p>
          </table:table-cell>
          <table:table-cell table:style-name="ce158" office:value-type="percentage" office:value="0.0221" calcext:value-type="percentage">
            <text:p>2.21 %</text:p>
          </table:table-cell>
          <table:table-cell table:style-name="ce157" table:formula="of:=(([.E83]*(1-(1+[.E84])^(-10))/[.E84]+1/(1+[.E84])^10)-1)+[.E83]" office:value-type="percentage" office:value="0.20101279926977" calcext:value-type="percentage">
            <text:p>20.10 %</text:p>
          </table:table-cell>
          <table:table-cell table:style-name="ce76" table:formula="of:=[$'Moody''s Rates'.C101]" office:value-type="percentage" office:value="0.0505" calcext:value-type="percentage">
            <text:p>5.05 %</text:p>
          </table:table-cell>
          <table:table-cell table:style-name="ce157" table:formula="of:=(([.G83]*(1-(1+[.G84])^(-10))/[.G84]+1/(1+[.G84])^10)-1)+[.G83]" office:value-type="percentage" office:value="0.0887932872116133" calcext:value-type="percentage">
            <text:p>8.88 %</text:p>
          </table:table-cell>
          <table:table-cell table:style-name="ce164" table:formula="of:=[$'Moody''s Rates'.K101]" office:value-type="percentage" office:value="0.0843" calcext:value-type="percentage">
            <text:p>8.43 %</text:p>
          </table:table-cell>
          <table:table-cell table:style-name="ce165" table:formula="of:=(([.I83]*(1-(1+[.I84])^(-10))/[.I84]+1/(1+[.I84])^10)-1)+[.I83]" office:value-type="percentage" office:value="-0.0506571462874887" calcext:value-type="percentage">
            <text:p>-5.07 %</text:p>
          </table:table-cell>
          <table:table-cell table:style-name="ce166" office:value-type="percentage" office:value="-0.1199508" calcext:value-type="percentage">
            <text:p>-12.00 %</text:p>
          </table:table-cell>
          <table:table-cell table:style-name="ce77"/>
          <table:table-cell table:number-columns-repeated="16372"/>
        </table:table-row>
        <table:table-row table:style-name="ro2">
          <table:table-cell table:style-name="ce146" office:value-type="float" office:value="2009" calcext:value-type="float">
            <text:p>2009</text:p>
          </table:table-cell>
          <table:table-cell table:style-name="ce146" office:value-type="float" office:value="1115.1" calcext:value-type="float">
            <text:p>1115.1</text:p>
          </table:table-cell>
          <table:table-cell table:style-name="ce146" office:value-type="float" office:value="22.41" calcext:value-type="float">
            <text:p>22.41</text:p>
          </table:table-cell>
          <table:table-cell table:style-name="ce159" table:formula="of:=[.C85]/[.B85]" office:value-type="percentage" office:value="0.0200968523002421" calcext:value-type="percentage">
            <text:p>2.01 %</text:p>
          </table:table-cell>
          <table:table-cell table:style-name="ce158" office:value-type="percentage" office:value="0.0384" calcext:value-type="percentage">
            <text:p>3.84 %</text:p>
          </table:table-cell>
          <table:table-cell table:style-name="ce157" table:formula="of:=(([.E84]*(1-(1+[.E85])^(-10))/[.E85]+1/(1+[.E85])^10)-1)+[.E84]" office:value-type="percentage" office:value="-0.111166953132592" calcext:value-type="percentage">
            <text:p>-11.12 %</text:p>
          </table:table-cell>
          <table:table-cell table:style-name="ce76" table:formula="of:=[$'Moody''s Rates'.C102]" office:value-type="percentage" office:value="0.0526" calcext:value-type="percentage">
            <text:p>5.26 %</text:p>
          </table:table-cell>
          <table:table-cell table:style-name="ce157" table:formula="of:=(([.G84]*(1-(1+[.G85])^(-10))/[.G85]+1/(1+[.G85])^10)-1)+[.G84]" office:value-type="percentage" office:value="0.034487164237994" calcext:value-type="percentage">
            <text:p>3.45 %</text:p>
          </table:table-cell>
          <table:table-cell table:style-name="ce164" table:formula="of:=[$'Moody''s Rates'.K102]" office:value-type="percentage" office:value="0.0637" calcext:value-type="percentage">
            <text:p>6.37 %</text:p>
          </table:table-cell>
          <table:table-cell table:style-name="ce165" table:formula="of:=(([.I84]*(1-(1+[.I85])^(-10))/[.I85]+1/(1+[.I85])^10)-1)+[.I84]" office:value-type="percentage" office:value="0.233295024916619" calcext:value-type="percentage">
            <text:p>23.33 %</text:p>
          </table:table-cell>
          <table:table-cell table:style-name="ce166" office:value-type="percentage" office:value="-0.0385374" calcext:value-type="percentage">
            <text:p>-3.85 %</text:p>
          </table:table-cell>
          <table:table-cell table:style-name="ce77"/>
          <table:table-cell table:number-columns-repeated="16372"/>
        </table:table-row>
        <table:table-row table:style-name="ro2">
          <table:table-cell table:style-name="ce146" office:value-type="float" office:value="2010" calcext:value-type="float">
            <text:p>2010</text:p>
          </table:table-cell>
          <table:table-cell table:style-name="ce146" office:value-type="float" office:value="1257.64" calcext:value-type="float">
            <text:p>1257.64</text:p>
          </table:table-cell>
          <table:table-cell table:style-name="ce146" office:value-type="float" office:value="22.73" calcext:value-type="float">
            <text:p>22.73</text:p>
          </table:table-cell>
          <table:table-cell table:style-name="ce159" table:formula="of:=[.C86]/[.B86]" office:value-type="percentage" office:value="0.0180735345567889" calcext:value-type="percentage">
            <text:p>1.81 %</text:p>
          </table:table-cell>
          <table:table-cell table:style-name="ce158" office:value-type="percentage" office:value="0.0329" calcext:value-type="percentage">
            <text:p>3.29 %</text:p>
          </table:table-cell>
          <table:table-cell table:style-name="ce157" table:formula="of:=(([.E85]*(1-(1+[.E86])^(-10))/[.E86]+1/(1+[.E86])^10)-1)+[.E85]" office:value-type="percentage" office:value="0.0846293388035575" calcext:value-type="percentage">
            <text:p>8.46 %</text:p>
          </table:table-cell>
          <table:table-cell table:style-name="ce76" table:formula="of:=[$'Moody''s Rates'.C103]" office:value-type="percentage" office:value="0.0502" calcext:value-type="percentage">
            <text:p>5.02 %</text:p>
          </table:table-cell>
          <table:table-cell table:style-name="ce157" table:formula="of:=(([.G85]*(1-(1+[.G86])^(-10))/[.G86]+1/(1+[.G86])^10)-1)+[.G85]" office:value-type="percentage" office:value="0.0711141775742415" calcext:value-type="percentage">
            <text:p>7.11 %</text:p>
          </table:table-cell>
          <table:table-cell table:style-name="ce164" table:formula="of:=[$'Moody''s Rates'.K103]" office:value-type="percentage" office:value="0.061" calcext:value-type="percentage">
            <text:p>6.10 %</text:p>
          </table:table-cell>
          <table:table-cell table:style-name="ce165" table:formula="of:=(([.I85]*(1-(1+[.I86])^(-10))/[.I86]+1/(1+[.I86])^10)-1)+[.I85]" office:value-type="percentage" office:value="0.0834784236590661" calcext:value-type="percentage">
            <text:p>8.35 %</text:p>
          </table:table-cell>
          <table:table-cell table:style-name="ce166" office:value-type="percentage" office:value="-0.0411661" calcext:value-type="percentage">
            <text:p>-4.12 %</text:p>
          </table:table-cell>
          <table:table-cell table:style-name="ce77"/>
          <table:table-cell table:number-columns-repeated="16372"/>
        </table:table-row>
        <table:table-row table:style-name="ro2">
          <table:table-cell table:style-name="ce146" office:value-type="float" office:value="2011" calcext:value-type="float">
            <text:p>2011</text:p>
          </table:table-cell>
          <table:table-cell table:style-name="ce146" office:value-type="float" office:value="1257.6" calcext:value-type="float">
            <text:p>1257.6</text:p>
          </table:table-cell>
          <table:table-cell table:style-name="ce146" office:value-type="float" office:value="26.43" calcext:value-type="float">
            <text:p>26.43</text:p>
          </table:table-cell>
          <table:table-cell table:style-name="ce159" table:formula="of:=[.C87]/[.B87]" office:value-type="percentage" office:value="0.0210162213740458" calcext:value-type="percentage">
            <text:p>2.10 %</text:p>
          </table:table-cell>
          <table:table-cell table:style-name="ce158" office:value-type="percentage" office:value="0.0188" calcext:value-type="percentage">
            <text:p>1.88 %</text:p>
          </table:table-cell>
          <table:table-cell table:style-name="ce157" table:formula="of:=(([.E86]*(1-(1+[.E87])^(-10))/[.E87]+1/(1+[.E87])^10)-1)+[.E86]" office:value-type="percentage" office:value="0.160353349994613" calcext:value-type="percentage">
            <text:p>16.04 %</text:p>
          </table:table-cell>
          <table:table-cell table:style-name="ce76" table:formula="of:=[$'Moody''s Rates'.C104]" office:value-type="percentage" office:value="0.0393" calcext:value-type="percentage">
            <text:p>3.93 %</text:p>
          </table:table-cell>
          <table:table-cell table:style-name="ce157" table:formula="of:=(([.G86]*(1-(1+[.G87])^(-10))/[.G87]+1/(1+[.G87])^10)-1)+[.G86]" office:value-type="percentage" office:value="0.138917647866437" calcext:value-type="percentage">
            <text:p>13.89 %</text:p>
          </table:table-cell>
          <table:table-cell table:style-name="ce164" table:formula="of:=[$'Moody''s Rates'.K104]" office:value-type="percentage" office:value="0.0525" calcext:value-type="percentage">
            <text:p>5.25 %</text:p>
          </table:table-cell>
          <table:table-cell table:style-name="ce165" table:formula="of:=(([.I86]*(1-(1+[.I87])^(-10))/[.I87]+1/(1+[.I87])^10)-1)+[.I86]" office:value-type="percentage" office:value="0.125845144013723" calcext:value-type="percentage">
            <text:p>12.58 %</text:p>
          </table:table-cell>
          <table:table-cell table:style-name="ce166" office:value-type="percentage" office:value="-0.0389587" calcext:value-type="percentage">
            <text:p>-3.90 %</text:p>
          </table:table-cell>
          <table:table-cell table:style-name="ce77"/>
          <table:table-cell table:number-columns-repeated="16372"/>
        </table:table-row>
        <table:table-row table:style-name="ro2">
          <table:table-cell table:style-name="ce146" office:value-type="float" office:value="2012" calcext:value-type="float">
            <text:p>2012</text:p>
          </table:table-cell>
          <table:table-cell table:style-name="ce146" office:value-type="float" office:value="1426.19" calcext:value-type="float">
            <text:p>1426.19</text:p>
          </table:table-cell>
          <table:table-cell table:style-name="ce146" office:value-type="float" office:value="31.25" calcext:value-type="float">
            <text:p>31.25</text:p>
          </table:table-cell>
          <table:table-cell table:style-name="ce159" table:formula="of:=[.C88]/[.B88]" office:value-type="percentage" office:value="0.0219115265147" calcext:value-type="percentage">
            <text:p>2.19 %</text:p>
          </table:table-cell>
          <table:table-cell table:style-name="ce158" office:value-type="percentage" office:value="0.0176" calcext:value-type="percentage">
            <text:p>1.76 %</text:p>
          </table:table-cell>
          <table:table-cell table:style-name="ce157" table:formula="of:=(([.E87]*(1-(1+[.E88])^(-10))/[.E88]+1/(1+[.E88])^10)-1)+[.E87]" office:value-type="percentage" office:value="0.0297157197801895" calcext:value-type="percentage">
            <text:p>2.97 %</text:p>
          </table:table-cell>
          <table:table-cell table:style-name="ce76" table:formula="of:=[$'Moody''s Rates'.C105]" office:value-type="percentage" office:value="0.0365" calcext:value-type="percentage">
            <text:p>3.65 %</text:p>
          </table:table-cell>
          <table:table-cell table:style-name="ce157" table:formula="of:=(([.G87]*(1-(1+[.G88])^(-10))/[.G88]+1/(1+[.G88])^10)-1)+[.G87]" office:value-type="percentage" office:value="0.0624114262126484" calcext:value-type="percentage">
            <text:p>6.24 %</text:p>
          </table:table-cell>
          <table:table-cell table:style-name="ce164" table:formula="of:=[$'Moody''s Rates'.K105]" office:value-type="percentage" office:value="0.0463" calcext:value-type="percentage">
            <text:p>4.63 %</text:p>
          </table:table-cell>
          <table:table-cell table:style-name="ce165" table:formula="of:=(([.I87]*(1-(1+[.I88])^(-10))/[.I88]+1/(1+[.I88])^10)-1)+[.I87]" office:value-type="percentage" office:value="0.101246778758435" calcext:value-type="percentage">
            <text:p>10.12 %</text:p>
          </table:table-cell>
          <table:table-cell table:style-name="ce166" office:value-type="percentage" office:value="0.0645028" calcext:value-type="percentage">
            <text:p>6.45 %</text:p>
          </table:table-cell>
          <table:table-cell table:style-name="ce77"/>
          <table:table-cell table:number-columns-repeated="16372"/>
        </table:table-row>
        <table:table-row table:style-name="ro2">
          <table:table-cell table:style-name="ce146" office:value-type="float" office:value="2013" calcext:value-type="float">
            <text:p>2013</text:p>
          </table:table-cell>
          <table:table-cell table:style-name="ce146" office:value-type="float" office:value="1848.36" calcext:value-type="float">
            <text:p>1848.36</text:p>
          </table:table-cell>
          <table:table-cell table:style-name="ce146" office:value-type="float" office:value="36.28" calcext:value-type="float">
            <text:p>36.28</text:p>
          </table:table-cell>
          <table:table-cell table:style-name="ce159" table:formula="of:=[.C89]/[.B89]" office:value-type="percentage" office:value="0.019628210954576" calcext:value-type="percentage">
            <text:p>1.96 %</text:p>
          </table:table-cell>
          <table:table-cell table:style-name="ce158" office:value-type="percentage" office:value="0.03036" calcext:value-type="percentage">
            <text:p>3.04 %</text:p>
          </table:table-cell>
          <table:table-cell table:style-name="ce157" table:formula="of:=(([.E88]*(1-(1+[.E89])^(-10))/[.E89]+1/(1+[.E89])^10)-1)+[.E88]" office:value-type="percentage" office:value="-0.0910456879434727" calcext:value-type="percentage">
            <text:p>-9.10 %</text:p>
          </table:table-cell>
          <table:table-cell table:style-name="ce76" table:formula="of:=[$'Moody''s Rates'.C106]" office:value-type="percentage" office:value="0.0462" calcext:value-type="percentage">
            <text:p>4.62 %</text:p>
          </table:table-cell>
          <table:table-cell table:style-name="ce157" table:formula="of:=(([.G88]*(1-(1+[.G89])^(-10))/[.G89]+1/(1+[.G89])^10)-1)+[.G88]" office:value-type="percentage" office:value="-0.0398025127094352" calcext:value-type="percentage">
            <text:p>-3.98 %</text:p>
          </table:table-cell>
          <table:table-cell table:style-name="ce164" table:formula="of:=[$'Moody''s Rates'.K106]" office:value-type="percentage" office:value="0.0538" calcext:value-type="percentage">
            <text:p>5.38 %</text:p>
          </table:table-cell>
          <table:table-cell table:style-name="ce165" table:formula="of:=(([.I88]*(1-(1+[.I89])^(-10))/[.I89]+1/(1+[.I89])^10)-1)+[.I88]" office:value-type="percentage" office:value="-0.0105590120694947" calcext:value-type="percentage">
            <text:p>-1.06 %</text:p>
          </table:table-cell>
          <table:table-cell table:style-name="ce166" office:value-type="percentage" office:value="0.1071347" calcext:value-type="percentage">
            <text:p>10.71 %</text:p>
          </table:table-cell>
          <table:table-cell table:style-name="ce77"/>
          <table:table-cell table:number-columns-repeated="16372"/>
        </table:table-row>
        <table:table-row table:style-name="ro2">
          <table:table-cell table:style-name="ce146" office:value-type="float" office:value="2014" calcext:value-type="float">
            <text:p>2014</text:p>
          </table:table-cell>
          <table:table-cell table:style-name="ce150" office:value-type="float" office:value="2058.9" calcext:value-type="float">
            <text:p>2058.9</text:p>
          </table:table-cell>
          <table:table-cell table:style-name="ce152" office:value-type="float" office:value="39.44" calcext:value-type="float">
            <text:p>39.44</text:p>
          </table:table-cell>
          <table:table-cell table:style-name="ce159" table:formula="of:=[.C90]/[.B90]" office:value-type="percentage" office:value="0.0191558599252028" calcext:value-type="percentage">
            <text:p>1.92 %</text:p>
          </table:table-cell>
          <table:table-cell table:style-name="ce160" office:value-type="percentage" office:value="0.0217" calcext:value-type="percentage">
            <text:p>2.17 %</text:p>
          </table:table-cell>
          <table:table-cell table:style-name="ce157" table:formula="of:=(([.E89]*(1-(1+[.E90])^(-10))/[.E90]+1/(1+[.E90])^10)-1)+[.E89]" office:value-type="percentage" office:value="0.107461804520048" calcext:value-type="percentage">
            <text:p>10.75 %</text:p>
          </table:table-cell>
          <table:table-cell table:style-name="ce76" table:formula="of:=[$'Moody''s Rates'.C107]" office:value-type="percentage" office:value="0.0379" calcext:value-type="percentage">
            <text:p>3.79 %</text:p>
          </table:table-cell>
          <table:table-cell table:style-name="ce157" table:formula="of:=(([.G89]*(1-(1+[.G90])^(-10))/[.G90]+1/(1+[.G90])^10)-1)+[.G89]" office:value-type="percentage" office:value="0.114229757318403" calcext:value-type="percentage">
            <text:p>11.42 %</text:p>
          </table:table-cell>
          <table:table-cell table:style-name="ce164" table:formula="of:=[$'Moody''s Rates'.K107]" office:value-type="percentage" office:value="0.0474" calcext:value-type="percentage">
            <text:p>4.74 %</text:p>
          </table:table-cell>
          <table:table-cell table:style-name="ce165" table:formula="of:=(([.I89]*(1-(1+[.I90])^(-10))/[.I90]+1/(1+[.I90])^10)-1)+[.I89]" office:value-type="percentage" office:value="0.103849078220305" calcext:value-type="percentage">
            <text:p>10.38 %</text:p>
          </table:table-cell>
          <table:table-cell table:style-name="ce166" office:value-type="percentage" office:value="0.0452071" calcext:value-type="percentage">
            <text:p>4.52 %</text:p>
          </table:table-cell>
          <table:table-cell table:style-name="ce77"/>
          <table:table-cell table:number-columns-repeated="16372"/>
        </table:table-row>
        <table:table-row table:style-name="ro2">
          <table:table-cell table:style-name="ce146" office:value-type="float" office:value="2015" calcext:value-type="float">
            <text:p>2015</text:p>
          </table:table-cell>
          <table:table-cell table:style-name="ce146" office:value-type="float" office:value="2043.9" calcext:value-type="float">
            <text:p>2043.9</text:p>
          </table:table-cell>
          <table:table-cell table:style-name="ce153" office:value-type="float" office:value="43.39" calcext:value-type="float">
            <text:p>43.39</text:p>
          </table:table-cell>
          <table:table-cell table:style-name="ce159" table:formula="of:=[.C91]/[.B91]" office:value-type="percentage" office:value="0.0212290229463281" calcext:value-type="percentage">
            <text:p>2.12 %</text:p>
          </table:table-cell>
          <table:table-cell table:style-name="ce158" office:value-type="percentage" office:value="0.0227" calcext:value-type="percentage">
            <text:p>2.27 %</text:p>
          </table:table-cell>
          <table:table-cell table:style-name="ce157" table:formula="of:=(([.E90]*(1-(1+[.E91])^(-10))/[.E91]+1/(1+[.E91])^10)-1)+[.E90]" office:value-type="percentage" office:value="0.0128429967097922" calcext:value-type="percentage">
            <text:p>1.28 %</text:p>
          </table:table-cell>
          <table:table-cell table:style-name="ce76" table:formula="of:=[$'Moody''s Rates'.C108]" office:value-type="percentage" office:value="0.0397" calcext:value-type="percentage">
            <text:p>3.97 %</text:p>
          </table:table-cell>
          <table:table-cell table:style-name="ce157" table:formula="of:=(([.G90]*(1-(1+[.G91])^(-10))/[.G91]+1/(1+[.G91])^10)-1)+[.G90]" office:value-type="percentage" office:value="0.0232785595089157" calcext:value-type="percentage">
            <text:p>2.33 %</text:p>
          </table:table-cell>
          <table:table-cell table:style-name="ce164" table:formula="of:=[$'Moody''s Rates'.K108]" office:value-type="percentage" office:value="0.0546" calcext:value-type="percentage">
            <text:p>5.46 %</text:p>
          </table:table-cell>
          <table:table-cell table:style-name="ce165" table:formula="of:=(([.I90]*(1-(1+[.I91])^(-10))/[.I91]+1/(1+[.I91])^10)-1)+[.I90]" office:value-type="percentage" office:value="-0.00697518367903238" calcext:value-type="percentage">
            <text:p>-0.70 %</text:p>
          </table:table-cell>
          <table:table-cell table:style-name="ce166" office:value-type="percentage" office:value="0.0521893" calcext:value-type="percentage">
            <text:p>5.22 %</text:p>
          </table:table-cell>
          <table:table-cell table:style-name="ce77"/>
          <table:table-cell table:number-columns-repeated="16372"/>
        </table:table-row>
        <table:table-row table:style-name="ro2">
          <table:table-cell table:style-name="ce146" office:value-type="float" office:value="2016" calcext:value-type="float">
            <text:p>2016</text:p>
          </table:table-cell>
          <table:table-cell table:style-name="ce146" office:value-type="float" office:value="2238.83" calcext:value-type="float">
            <text:p>2238.83</text:p>
          </table:table-cell>
          <table:table-cell table:style-name="ce153" office:value-type="float" office:value="45.7" calcext:value-type="float">
            <text:p>45.70</text:p>
          </table:table-cell>
          <table:table-cell table:style-name="ce159" table:formula="of:=[.C92]/[.B92]" office:value-type="percentage" office:value="0.0204124475730627" calcext:value-type="percentage">
            <text:p>2.04 %</text:p>
          </table:table-cell>
          <table:table-cell table:style-name="ce158" office:value-type="percentage" office:value="0.0245" calcext:value-type="percentage">
            <text:p>2.45 %</text:p>
          </table:table-cell>
          <table:table-cell table:style-name="ce157" table:formula="of:=(([.E91]*(1-(1+[.E92])^(-10))/[.E92]+1/(1+[.E92])^10)-1)+[.E91]" office:value-type="percentage" office:value="0.00690550469874779" calcext:value-type="percentage">
            <text:p>0.69 %</text:p>
          </table:table-cell>
          <table:table-cell table:style-name="ce76" table:formula="of:=[$'Moody''s Rates'.C109]" office:value-type="percentage" office:value="0.0406" calcext:value-type="percentage">
            <text:p>4.06 %</text:p>
          </table:table-cell>
          <table:table-cell table:style-name="ce157" table:formula="of:=(([.G91]*(1-(1+[.G92])^(-10))/[.G92]+1/(1+[.G92])^10)-1)+[.G91]" office:value-type="percentage" office:value="0.0324219487584958" calcext:value-type="percentage">
            <text:p>3.24 %</text:p>
          </table:table-cell>
          <table:table-cell table:style-name="ce164" table:formula="of:=[$'Moody''s Rates'.K109]" office:value-type="percentage" office:value="0.0483" calcext:value-type="percentage">
            <text:p>4.83 %</text:p>
          </table:table-cell>
          <table:table-cell table:style-name="ce165" table:formula="of:=(([.I91]*(1-(1+[.I92])^(-10))/[.I92]+1/(1+[.I92])^10)-1)+[.I91]" office:value-type="percentage" office:value="0.103651058217932" calcext:value-type="percentage">
            <text:p>10.37 %</text:p>
          </table:table-cell>
          <table:table-cell table:style-name="ce166" office:value-type="percentage" office:value="0.0533055" calcext:value-type="percentage">
            <text:p>5.33 %</text:p>
          </table:table-cell>
          <table:table-cell table:style-name="ce77"/>
          <table:table-cell table:number-columns-repeated="16372"/>
        </table:table-row>
        <table:table-row table:style-name="ro2">
          <table:table-cell table:style-name="ce146" office:value-type="float" office:value="2017" calcext:value-type="float">
            <text:p>2017</text:p>
          </table:table-cell>
          <table:table-cell table:style-name="ce146" office:value-type="float" office:value="2673.61" calcext:value-type="float">
            <text:p>2673.61</text:p>
          </table:table-cell>
          <table:table-cell table:style-name="ce154" office:value-type="float" office:value="48.93" calcext:value-type="float">
            <text:p>48.93</text:p>
          </table:table-cell>
          <table:table-cell table:style-name="ce159" table:formula="of:=[.C93]/[.B93]" office:value-type="percentage" office:value="0.0183010985147422" calcext:value-type="percentage">
            <text:p>1.83 %</text:p>
          </table:table-cell>
          <table:table-cell table:style-name="ce158" office:value-type="percentage" office:value="0.0241" calcext:value-type="percentage">
            <text:p>2.41 %</text:p>
          </table:table-cell>
          <table:table-cell table:style-name="ce158" table:formula="of:=[$'T. Bond yield &amp; return'.C98]" office:value-type="percentage" office:value="0.0280171627077895" calcext:value-type="percentage">
            <text:p>2.80 %</text:p>
          </table:table-cell>
          <table:table-cell table:style-name="ce76" table:formula="of:=[$'Moody''s Rates'.C110]" office:value-type="percentage" office:value="0.0351" calcext:value-type="percentage">
            <text:p>3.51 %</text:p>
          </table:table-cell>
          <table:table-cell table:style-name="ce157" table:formula="of:=(([.G92]*(1-(1+[.G93])^(-10))/[.G93]+1/(1+[.G93])^10)-1)+[.G92]" office:value-type="percentage" office:value="0.0863182827607043" calcext:value-type="percentage">
            <text:p>8.63 %</text:p>
          </table:table-cell>
          <table:table-cell table:style-name="ce164" table:formula="of:=[$'Moody''s Rates'.K110]" office:value-type="percentage" office:value="0.0422" calcext:value-type="percentage">
            <text:p>4.22 %</text:p>
          </table:table-cell>
          <table:table-cell table:style-name="ce165" table:formula="of:=(([.I92]*(1-(1+[.I93])^(-10))/[.I93]+1/(1+[.I93])^10)-1)+[.I92]" office:value-type="percentage" office:value="0.0972390194624884" calcext:value-type="percentage">
            <text:p>9.72 %</text:p>
          </table:table-cell>
          <table:table-cell table:style-name="ce166" office:value-type="percentage" office:value="0.0623032" calcext:value-type="percentage">
            <text:p>6.23 %</text:p>
          </table:table-cell>
          <table:table-cell table:style-name="ce167"/>
          <table:table-cell table:number-columns-repeated="16372"/>
        </table:table-row>
        <table:table-row table:style-name="ro2">
          <table:table-cell table:style-name="ce147" office:value-type="float" office:value="2018" calcext:value-type="float">
            <text:p>2018</text:p>
          </table:table-cell>
          <table:table-cell table:style-name="ce147" office:value-type="float" office:value="2506.85" calcext:value-type="float">
            <text:p>2506.85</text:p>
          </table:table-cell>
          <table:table-cell table:style-name="ce155" office:value-type="float" office:value="53.75" calcext:value-type="float">
            <text:p>53.75</text:p>
          </table:table-cell>
          <table:table-cell table:style-name="ce159" table:formula="of:=[.C94]/[.B94]" office:value-type="percentage" office:value="0.0214412509723358" calcext:value-type="percentage">
            <text:p>2.14 %</text:p>
          </table:table-cell>
          <table:table-cell table:style-name="ce161" table:formula="of:=[$'T. Bond yield &amp; return'.B99]" office:value-type="percentage" office:value="0.0269" calcext:value-type="percentage">
            <text:p>2.69 %</text:p>
          </table:table-cell>
          <table:table-cell table:style-name="ce158" table:formula="of:=[$'T. Bond yield &amp; return'.C99]" office:value-type="percentage" office:value="-0.000166923857134026" calcext:value-type="percentage">
            <text:p>-0.02 %</text:p>
          </table:table-cell>
          <table:table-cell table:style-name="ce76" table:formula="of:=[$'Moody''s Rates'.C111]" office:value-type="percentage" office:value="0.0402" calcext:value-type="percentage">
            <text:p>4.02 %</text:p>
          </table:table-cell>
          <table:table-cell table:style-name="ce157" table:formula="of:=(([.G93]*(1-(1+[.G94])^(-10))/[.G94]+1/(1+[.G94])^10)-1)+[.G93]" office:value-type="percentage" office:value="-0.00622441447509594" calcext:value-type="percentage">
            <text:p>-0.62 %</text:p>
          </table:table-cell>
          <table:table-cell table:style-name="ce164" table:formula="of:=[$'Moody''s Rates'.K111]" office:value-type="percentage" office:value="0.0513" calcext:value-type="percentage">
            <text:p>5.13 %</text:p>
          </table:table-cell>
          <table:table-cell table:style-name="ce165" table:formula="of:=(([.I93]*(1-(1+[.I94])^(-10))/[.I94]+1/(1+[.I94])^10)-1)+[.I93]" office:value-type="percentage" office:value="-0.0276262822171721" calcext:value-type="percentage">
            <text:p>-2.76 %</text:p>
          </table:table-cell>
          <table:table-cell table:style-name="ce166" office:value-type="percentage" office:value="0.0454613" calcext:value-type="percentage">
            <text:p>4.55 %</text:p>
          </table:table-cell>
          <table:table-cell table:style-name="ce167"/>
          <table:table-cell table:number-columns-repeated="16372"/>
        </table:table-row>
        <table:table-row table:style-name="ro2">
          <table:table-cell table:style-name="ce147" office:value-type="float" office:value="2019" calcext:value-type="float">
            <text:p>2019</text:p>
          </table:table-cell>
          <table:table-cell table:style-name="ce147" office:value-type="float" office:value="3230.78" calcext:value-type="float">
            <text:p>3230.78</text:p>
          </table:table-cell>
          <table:table-cell table:style-name="ce156" office:value-type="float" office:value="58.8" calcext:value-type="float">
            <text:p>58.8</text:p>
          </table:table-cell>
          <table:table-cell table:style-name="ce159" table:formula="of:=[.C95]/[.B95]" office:value-type="percentage" office:value="0.0181999393335356" calcext:value-type="percentage">
            <text:p>1.82 %</text:p>
          </table:table-cell>
          <table:table-cell table:style-name="ce161" office:value-type="percentage" office:value="0.0192" calcext:value-type="percentage">
            <text:p>1.92 %</text:p>
          </table:table-cell>
          <table:table-cell table:style-name="ce158" table:formula="of:=[$'T. Bond yield &amp; return'.C100]" office:value-type="percentage" office:value="0.0963563074154839" calcext:value-type="percentage">
            <text:p>9.64 %</text:p>
          </table:table-cell>
          <table:table-cell table:style-name="ce76" table:formula="of:=[$'Moody''s Rates'.C112]" office:value-type="percentage" office:value="0.0301" calcext:value-type="percentage">
            <text:p>3.01 %</text:p>
          </table:table-cell>
          <table:table-cell table:style-name="ce157" table:formula="of:=(([.G94]*(1-(1+[.G95])^(-10))/[.G95]+1/(1+[.G95])^10)-1)+[.G94]" office:value-type="percentage" office:value="0.126311097002794" calcext:value-type="percentage">
            <text:p>12.63 %</text:p>
          </table:table-cell>
          <table:table-cell table:style-name="ce164" table:formula="of:=[$'Moody''s Rates'.K112]" office:value-type="percentage" office:value="0.0388" calcext:value-type="percentage">
            <text:p>3.88 %</text:p>
          </table:table-cell>
          <table:table-cell table:style-name="ce165" table:formula="of:=(([.I94]*(1-(1+[.I95])^(-10))/[.I95]+1/(1+[.I95])^10)-1)+[.I94]" office:value-type="percentage" office:value="0.153294575623685" calcext:value-type="percentage">
            <text:p>15.33 %</text:p>
          </table:table-cell>
          <table:table-cell table:style-name="ce166" office:value-type="percentage" office:value="0.0454613" calcext:value-type="percentage">
            <text:p>4.55 %</text:p>
          </table:table-cell>
          <table:table-cell/>
          <table:table-cell office:value-type="string" calcext:value-type="string">
            <text:p>Used indicated dividend</text:p>
          </table:table-cell>
          <table:table-cell table:number-columns-repeated="16371"/>
        </table:table-row>
        <table:table-row table:style-name="ro9" table:number-rows-repeated="1048480">
          <table:table-cell table:number-columns-repeated="16384"/>
        </table:table-row>
        <table:table-row table:style-name="ro9">
          <table:table-cell table:number-columns-repeated="16384"/>
        </table:table-row>
      </table:table>
      <table:table table:name="T. Bond yield &amp; return" table:style-name="ta4">
        <table:table-column table:style-name="co3" table:default-cell-style-name="Default"/>
        <table:table-column table:style-name="co23" table:default-cell-style-name="ce156"/>
        <table:table-column table:style-name="co24" table:default-cell-style-name="Default"/>
        <table:table-column table:style-name="co3" table:number-columns-repeated="16381" table:default-cell-style-name="Default"/>
        <table:table-row table:style-name="ro2">
          <table:table-cell office:value-type="string" calcext:value-type="string">
            <text:p>Bond used: </text:p>
          </table:table-cell>
          <table:table-cell table:style-name="ce172" office:value-type="string" calcext:value-type="string">
            <text:p>US treasury 10-year bond at end of each year</text:p>
          </table:table-cell>
          <table:table-cell table:style-name="ce18"/>
          <table:table-cell table:number-columns-repeated="16381"/>
        </table:table-row>
        <table:table-row table:style-name="ro2">
          <table:table-cell office:value-type="string" calcext:value-type="string">
            <text:p>Source:</text:p>
          </table:table-cell>
          <table:table-cell table:style-name="ce172" office:value-type="string" calcext:value-type="string">
            <text:p>Federal Reserve of St. Louis (FRED)</text:p>
          </table:table-cell>
          <table:table-cell table:style-name="ce18"/>
          <table:table-cell table:number-columns-repeated="16381"/>
        </table:table-row>
        <table:table-row table:style-name="ro2">
          <table:table-cell office:value-type="string" calcext:value-type="string">
            <text:p>Computation</text:p>
          </table:table-cell>
          <table:table-cell table:style-name="ce172" office:value-type="string" calcext:value-type="string">
            <text:p>To compute the return on a constant maturity bond, I add two components - the promised coupon at the start of the year and the price change due to interest rate changes.</text:p>
          </table:table-cell>
          <table:table-cell table:style-name="ce18"/>
          <table:table-cell table:number-columns-repeated="16381"/>
        </table:table-row>
        <table:table-row table:style-name="ro2">
          <table:table-cell table:style-name="ce170"/>
          <table:table-cell table:style-name="ce172" office:value-type="string" calcext:value-type="string">
            <text:p>The return on the 10-year bond for 1928 = 3.17% (Coupon rate promised at the end of 1927) - Price change on a bond with a coupon rate of 3.17%, when the interest rate goes to 3.45%.</text:p>
          </table:table-cell>
          <table:table-cell table:style-name="ce18"/>
          <table:table-cell table:number-columns-repeated="16381"/>
        </table:table-row>
        <table:table-row table:style-name="ro2" table:number-rows-repeated="2">
          <table:table-cell/>
          <table:table-cell table:style-name="ce139"/>
          <table:table-cell table:style-name="ce18"/>
          <table:table-cell table:number-columns-repeated="16381"/>
        </table:table-row>
        <table:table-row table:style-name="ro2">
          <table:table-cell table:style-name="ce171" office:value-type="string" calcext:value-type="string">
            <text:p>Year</text:p>
          </table:table-cell>
          <table:table-cell table:style-name="ce131" office:value-type="string" calcext:value-type="string">
            <text:p>T.Bond rate</text:p>
          </table:table-cell>
          <table:table-cell table:style-name="ce131" office:value-type="string" calcext:value-type="string">
            <text:p>Return on bond</text:p>
          </table:table-cell>
          <table:table-cell table:number-columns-repeated="16381"/>
        </table:table-row>
        <table:table-row table:style-name="ro2">
          <table:table-cell table:style-name="ce131" office:value-type="float" office:value="1927" calcext:value-type="float">
            <text:p>1927</text:p>
          </table:table-cell>
          <table:table-cell table:style-name="ce138" office:value-type="percentage" office:value="0.0317" calcext:value-type="percentage">
            <text:p>3.17 %</text:p>
          </table:table-cell>
          <table:table-cell table:style-name="ce131"/>
          <table:table-cell table:number-columns-repeated="16381"/>
        </table:table-row>
        <table:table-row table:style-name="ro2">
          <table:table-cell table:style-name="ce131" office:value-type="float" office:value="1928" calcext:value-type="float">
            <text:p>1928</text:p>
          </table:table-cell>
          <table:table-cell table:style-name="ce138" office:value-type="percentage" office:value="0.0345" calcext:value-type="percentage">
            <text:p>3.45 %</text:p>
          </table:table-cell>
          <table:table-cell table:style-name="ce157" table:formula="of:=(([.B8]*(1-(1+[.B9])^(-10))/[.B9]+1/(1+[.B9])^10)-1)+[.B8]" office:value-type="percentage" office:value="0.00835470858979919" calcext:value-type="percentage">
            <text:p>0.84 %</text:p>
          </table:table-cell>
          <table:table-cell table:number-columns-repeated="16381"/>
        </table:table-row>
        <table:table-row table:style-name="ro2">
          <table:table-cell table:style-name="ce131" office:value-type="float" office:value="1929" calcext:value-type="float">
            <text:p>1929</text:p>
          </table:table-cell>
          <table:table-cell table:style-name="ce138" office:value-type="percentage" office:value="0.0336" calcext:value-type="percentage">
            <text:p>3.36 %</text:p>
          </table:table-cell>
          <table:table-cell table:style-name="ce157" table:formula="of:=(([.B9]*(1-(1+[.B10])^(-10))/[.B10]+1/(1+[.B10])^10)-1)+[.B9]" office:value-type="percentage" office:value="0.0420380415632043" calcext:value-type="percentage">
            <text:p>4.20 %</text:p>
          </table:table-cell>
          <table:table-cell table:number-columns-repeated="16381"/>
        </table:table-row>
        <table:table-row table:style-name="ro2">
          <table:table-cell table:style-name="ce131" office:value-type="float" office:value="1930" calcext:value-type="float">
            <text:p>1930</text:p>
          </table:table-cell>
          <table:table-cell table:style-name="ce138" office:value-type="percentage" office:value="0.0322" calcext:value-type="percentage">
            <text:p>3.22 %</text:p>
          </table:table-cell>
          <table:table-cell table:style-name="ce157" table:formula="of:=(([.B10]*(1-(1+[.B11])^(-10))/[.B11]+1/(1+[.B11])^10)-1)+[.B10]" office:value-type="percentage" office:value="0.0454093143489704" calcext:value-type="percentage">
            <text:p>4.54 %</text:p>
          </table:table-cell>
          <table:table-cell table:number-columns-repeated="16381"/>
        </table:table-row>
        <table:table-row table:style-name="ro2">
          <table:table-cell table:style-name="ce131" office:value-type="float" office:value="1931" calcext:value-type="float">
            <text:p>1931</text:p>
          </table:table-cell>
          <table:table-cell table:style-name="ce138" office:value-type="percentage" office:value="0.0393" calcext:value-type="percentage">
            <text:p>3.93 %</text:p>
          </table:table-cell>
          <table:table-cell table:style-name="ce157" table:formula="of:=(([.B11]*(1-(1+[.B12])^(-10))/[.B12]+1/(1+[.B12])^10)-1)+[.B11]" office:value-type="percentage" office:value="-0.0255885596194225" calcext:value-type="percentage">
            <text:p>-2.56 %</text:p>
          </table:table-cell>
          <table:table-cell table:number-columns-repeated="16381"/>
        </table:table-row>
        <table:table-row table:style-name="ro2">
          <table:table-cell table:style-name="ce131" office:value-type="float" office:value="1932" calcext:value-type="float">
            <text:p>1932</text:p>
          </table:table-cell>
          <table:table-cell table:style-name="ce138" office:value-type="percentage" office:value="0.0335" calcext:value-type="percentage">
            <text:p>3.35 %</text:p>
          </table:table-cell>
          <table:table-cell table:style-name="ce157" table:formula="of:=(([.B12]*(1-(1+[.B13])^(-10))/[.B13]+1/(1+[.B13])^10)-1)+[.B12]" office:value-type="percentage" office:value="0.0879030699047733" calcext:value-type="percentage">
            <text:p>8.79 %</text:p>
          </table:table-cell>
          <table:table-cell table:number-columns-repeated="16381"/>
        </table:table-row>
        <table:table-row table:style-name="ro2">
          <table:table-cell table:style-name="ce131" office:value-type="float" office:value="1933" calcext:value-type="float">
            <text:p>1933</text:p>
          </table:table-cell>
          <table:table-cell table:style-name="ce138" office:value-type="percentage" office:value="0.0353" calcext:value-type="percentage">
            <text:p>3.53 %</text:p>
          </table:table-cell>
          <table:table-cell table:style-name="ce157" table:formula="of:=(([.B13]*(1-(1+[.B14])^(-10))/[.B14]+1/(1+[.B14])^10)-1)+[.B13]" office:value-type="percentage" office:value="0.0185527208918574" calcext:value-type="percentage">
            <text:p>1.86 %</text:p>
          </table:table-cell>
          <table:table-cell table:number-columns-repeated="16381"/>
        </table:table-row>
        <table:table-row table:style-name="ro2">
          <table:table-cell table:style-name="ce131" office:value-type="float" office:value="1934" calcext:value-type="float">
            <text:p>1934</text:p>
          </table:table-cell>
          <table:table-cell table:style-name="ce138" office:value-type="percentage" office:value="0.0301" calcext:value-type="percentage">
            <text:p>3.01 %</text:p>
          </table:table-cell>
          <table:table-cell table:style-name="ce157" table:formula="of:=(([.B14]*(1-(1+[.B15])^(-10))/[.B15]+1/(1+[.B15])^10)-1)+[.B14]" office:value-type="percentage" office:value="0.0796344261796561" calcext:value-type="percentage">
            <text:p>7.96 %</text:p>
          </table:table-cell>
          <table:table-cell table:number-columns-repeated="16381"/>
        </table:table-row>
        <table:table-row table:style-name="ro2">
          <table:table-cell table:style-name="ce131" office:value-type="float" office:value="1935" calcext:value-type="float">
            <text:p>1935</text:p>
          </table:table-cell>
          <table:table-cell table:style-name="ce138" office:value-type="percentage" office:value="0.0284" calcext:value-type="percentage">
            <text:p>2.84 %</text:p>
          </table:table-cell>
          <table:table-cell table:style-name="ce157" table:formula="of:=(([.B15]*(1-(1+[.B16])^(-10))/[.B16]+1/(1+[.B16])^10)-1)+[.B15]" office:value-type="percentage" office:value="0.0447204772965661" calcext:value-type="percentage">
            <text:p>4.47 %</text:p>
          </table:table-cell>
          <table:table-cell table:number-columns-repeated="16381"/>
        </table:table-row>
        <table:table-row table:style-name="ro2">
          <table:table-cell table:style-name="ce131" office:value-type="float" office:value="1936" calcext:value-type="float">
            <text:p>1936</text:p>
          </table:table-cell>
          <table:table-cell table:style-name="ce138" office:value-type="percentage" office:value="0.0259" calcext:value-type="percentage">
            <text:p>2.59 %</text:p>
          </table:table-cell>
          <table:table-cell table:style-name="ce157" table:formula="of:=(([.B16]*(1-(1+[.B17])^(-10))/[.B17]+1/(1+[.B17])^10)-1)+[.B16]" office:value-type="percentage" office:value="0.0501787540454508" calcext:value-type="percentage">
            <text:p>5.02 %</text:p>
          </table:table-cell>
          <table:table-cell table:number-columns-repeated="16381"/>
        </table:table-row>
        <table:table-row table:style-name="ro2">
          <table:table-cell table:style-name="ce131" office:value-type="float" office:value="1937" calcext:value-type="float">
            <text:p>1937</text:p>
          </table:table-cell>
          <table:table-cell table:style-name="ce138" office:value-type="percentage" office:value="0.0273" calcext:value-type="percentage">
            <text:p>2.73 %</text:p>
          </table:table-cell>
          <table:table-cell table:style-name="ce157" table:formula="of:=(([.B17]*(1-(1+[.B18])^(-10))/[.B18]+1/(1+[.B18])^10)-1)+[.B17]" office:value-type="percentage" office:value="0.0137914605964605" calcext:value-type="percentage">
            <text:p>1.38 %</text:p>
          </table:table-cell>
          <table:table-cell table:number-columns-repeated="16381"/>
        </table:table-row>
        <table:table-row table:style-name="ro2">
          <table:table-cell table:style-name="ce131" office:value-type="float" office:value="1938" calcext:value-type="float">
            <text:p>1938</text:p>
          </table:table-cell>
          <table:table-cell table:style-name="ce138" office:value-type="percentage" office:value="0.0256" calcext:value-type="percentage">
            <text:p>2.56 %</text:p>
          </table:table-cell>
          <table:table-cell table:style-name="ce157" table:formula="of:=(([.B18]*(1-(1+[.B19])^(-10))/[.B19]+1/(1+[.B19])^10)-1)+[.B18]" office:value-type="percentage" office:value="0.0421324853220461" calcext:value-type="percentage">
            <text:p>4.21 %</text:p>
          </table:table-cell>
          <table:table-cell table:number-columns-repeated="16381"/>
        </table:table-row>
        <table:table-row table:style-name="ro2">
          <table:table-cell table:style-name="ce131" office:value-type="float" office:value="1939" calcext:value-type="float">
            <text:p>1939</text:p>
          </table:table-cell>
          <table:table-cell table:style-name="ce138" office:value-type="percentage" office:value="0.0235" calcext:value-type="percentage">
            <text:p>2.35 %</text:p>
          </table:table-cell>
          <table:table-cell table:style-name="ce157" table:formula="of:=(([.B19]*(1-(1+[.B20])^(-10))/[.B20]+1/(1+[.B20])^10)-1)+[.B19]" office:value-type="percentage" office:value="0.0441226139420607" calcext:value-type="percentage">
            <text:p>4.41 %</text:p>
          </table:table-cell>
          <table:table-cell table:number-columns-repeated="16381"/>
        </table:table-row>
        <table:table-row table:style-name="ro2">
          <table:table-cell table:style-name="ce131" office:value-type="float" office:value="1940" calcext:value-type="float">
            <text:p>1940</text:p>
          </table:table-cell>
          <table:table-cell table:style-name="ce138" office:value-type="percentage" office:value="0.0201" calcext:value-type="percentage">
            <text:p>2.01 %</text:p>
          </table:table-cell>
          <table:table-cell table:style-name="ce157" table:formula="of:=(([.B20]*(1-(1+[.B21])^(-10))/[.B21]+1/(1+[.B21])^10)-1)+[.B20]" office:value-type="percentage" office:value="0.0540248159628455" calcext:value-type="percentage">
            <text:p>5.40 %</text:p>
          </table:table-cell>
          <table:table-cell table:number-columns-repeated="16381"/>
        </table:table-row>
        <table:table-row table:style-name="ro2">
          <table:table-cell table:style-name="ce131" office:value-type="float" office:value="1941" calcext:value-type="float">
            <text:p>1941</text:p>
          </table:table-cell>
          <table:table-cell table:style-name="ce138" office:value-type="percentage" office:value="0.0247" calcext:value-type="percentage">
            <text:p>2.47 %</text:p>
          </table:table-cell>
          <table:table-cell table:style-name="ce157" table:formula="of:=(([.B21]*(1-(1+[.B22])^(-10))/[.B22]+1/(1+[.B22])^10)-1)+[.B21]" office:value-type="percentage" office:value="-0.0202219758485802" calcext:value-type="percentage">
            <text:p>-2.02 %</text:p>
          </table:table-cell>
          <table:table-cell table:number-columns-repeated="16381"/>
        </table:table-row>
        <table:table-row table:style-name="ro2">
          <table:table-cell table:style-name="ce131" office:value-type="float" office:value="1942" calcext:value-type="float">
            <text:p>1942</text:p>
          </table:table-cell>
          <table:table-cell table:style-name="ce138" office:value-type="percentage" office:value="0.0249" calcext:value-type="percentage">
            <text:p>2.49 %</text:p>
          </table:table-cell>
          <table:table-cell table:style-name="ce157" table:formula="of:=(([.B22]*(1-(1+[.B23])^(-10))/[.B23]+1/(1+[.B23])^10)-1)+[.B22]" office:value-type="percentage" office:value="0.0229486823744842" calcext:value-type="percentage">
            <text:p>2.29 %</text:p>
          </table:table-cell>
          <table:table-cell table:number-columns-repeated="16381"/>
        </table:table-row>
        <table:table-row table:style-name="ro2">
          <table:table-cell table:style-name="ce131" office:value-type="float" office:value="1943" calcext:value-type="float">
            <text:p>1943</text:p>
          </table:table-cell>
          <table:table-cell table:style-name="ce138" office:value-type="percentage" office:value="0.0249" calcext:value-type="percentage">
            <text:p>2.49 %</text:p>
          </table:table-cell>
          <table:table-cell table:style-name="ce157" table:formula="of:=(([.B23]*(1-(1+[.B24])^(-10))/[.B24]+1/(1+[.B24])^10)-1)+[.B23]" office:value-type="percentage" office:value="0.0249" calcext:value-type="percentage">
            <text:p>2.49 %</text:p>
          </table:table-cell>
          <table:table-cell table:number-columns-repeated="16381"/>
        </table:table-row>
        <table:table-row table:style-name="ro2">
          <table:table-cell table:style-name="ce131" office:value-type="float" office:value="1944" calcext:value-type="float">
            <text:p>1944</text:p>
          </table:table-cell>
          <table:table-cell table:style-name="ce138" office:value-type="percentage" office:value="0.0248" calcext:value-type="percentage">
            <text:p>2.48 %</text:p>
          </table:table-cell>
          <table:table-cell table:style-name="ce157" table:formula="of:=(([.B24]*(1-(1+[.B25])^(-10))/[.B25]+1/(1+[.B25])^10)-1)+[.B24]" office:value-type="percentage" office:value="0.0257761115790703" calcext:value-type="percentage">
            <text:p>2.58 %</text:p>
          </table:table-cell>
          <table:table-cell table:number-columns-repeated="16381"/>
        </table:table-row>
        <table:table-row table:style-name="ro2">
          <table:table-cell table:style-name="ce131" office:value-type="float" office:value="1945" calcext:value-type="float">
            <text:p>1945</text:p>
          </table:table-cell>
          <table:table-cell table:style-name="ce138" office:value-type="percentage" office:value="0.0233" calcext:value-type="percentage">
            <text:p>2.33 %</text:p>
          </table:table-cell>
          <table:table-cell table:style-name="ce157" table:formula="of:=(([.B25]*(1-(1+[.B26])^(-10))/[.B26]+1/(1+[.B26])^10)-1)+[.B25]" office:value-type="percentage" office:value="0.0380441734192372" calcext:value-type="percentage">
            <text:p>3.80 %</text:p>
          </table:table-cell>
          <table:table-cell table:number-columns-repeated="16381"/>
        </table:table-row>
        <table:table-row table:style-name="ro2">
          <table:table-cell table:style-name="ce131" office:value-type="float" office:value="1946" calcext:value-type="float">
            <text:p>1946</text:p>
          </table:table-cell>
          <table:table-cell table:style-name="ce138" office:value-type="percentage" office:value="0.0224" calcext:value-type="percentage">
            <text:p>2.24 %</text:p>
          </table:table-cell>
          <table:table-cell table:style-name="ce157" table:formula="of:=(([.B26]*(1-(1+[.B27])^(-10))/[.B27]+1/(1+[.B27])^10)-1)+[.B26]" office:value-type="percentage" office:value="0.0312837453756957" calcext:value-type="percentage">
            <text:p>3.13 %</text:p>
          </table:table-cell>
          <table:table-cell table:number-columns-repeated="16381"/>
        </table:table-row>
        <table:table-row table:style-name="ro2">
          <table:table-cell table:style-name="ce131" office:value-type="float" office:value="1947" calcext:value-type="float">
            <text:p>1947</text:p>
          </table:table-cell>
          <table:table-cell table:style-name="ce138" office:value-type="percentage" office:value="0.0239" calcext:value-type="percentage">
            <text:p>2.39 %</text:p>
          </table:table-cell>
          <table:table-cell table:style-name="ce157" table:formula="of:=(([.B27]*(1-(1+[.B28])^(-10))/[.B28]+1/(1+[.B28])^10)-1)+[.B27]" office:value-type="percentage" office:value="0.00919696806283213" calcext:value-type="percentage">
            <text:p>0.92 %</text:p>
          </table:table-cell>
          <table:table-cell table:number-columns-repeated="16381"/>
        </table:table-row>
        <table:table-row table:style-name="ro2">
          <table:table-cell table:style-name="ce131" office:value-type="float" office:value="1948" calcext:value-type="float">
            <text:p>1948</text:p>
          </table:table-cell>
          <table:table-cell table:style-name="ce138" office:value-type="percentage" office:value="0.0244" calcext:value-type="percentage">
            <text:p>2.44 %</text:p>
          </table:table-cell>
          <table:table-cell table:style-name="ce157" table:formula="of:=(([.B28]*(1-(1+[.B29])^(-10))/[.B29]+1/(1+[.B29])^10)-1)+[.B28]" office:value-type="percentage" office:value="0.019510369413175" calcext:value-type="percentage">
            <text:p>1.95 %</text:p>
          </table:table-cell>
          <table:table-cell table:number-columns-repeated="16381"/>
        </table:table-row>
        <table:table-row table:style-name="ro2">
          <table:table-cell table:style-name="ce131" office:value-type="float" office:value="1949" calcext:value-type="float">
            <text:p>1949</text:p>
          </table:table-cell>
          <table:table-cell table:style-name="ce138" office:value-type="percentage" office:value="0.0219" calcext:value-type="percentage">
            <text:p>2.19 %</text:p>
          </table:table-cell>
          <table:table-cell table:style-name="ce157" table:formula="of:=(([.B29]*(1-(1+[.B30])^(-10))/[.B30]+1/(1+[.B30])^10)-1)+[.B29]" office:value-type="percentage" office:value="0.0466348518279731" calcext:value-type="percentage">
            <text:p>4.66 %</text:p>
          </table:table-cell>
          <table:table-cell table:number-columns-repeated="16381"/>
        </table:table-row>
        <table:table-row table:style-name="ro2">
          <table:table-cell table:style-name="ce131" office:value-type="float" office:value="1950" calcext:value-type="float">
            <text:p>1950</text:p>
          </table:table-cell>
          <table:table-cell table:style-name="ce138" office:value-type="percentage" office:value="0.0239" calcext:value-type="percentage">
            <text:p>2.39 %</text:p>
          </table:table-cell>
          <table:table-cell table:style-name="ce157" table:formula="of:=(([.B30]*(1-(1+[.B31])^(-10))/[.B31]+1/(1+[.B31])^10)-1)+[.B30]" office:value-type="percentage" office:value="0.00429595741710961" calcext:value-type="percentage">
            <text:p>0.43 %</text:p>
          </table:table-cell>
          <table:table-cell table:number-columns-repeated="16381"/>
        </table:table-row>
        <table:table-row table:style-name="ro2">
          <table:table-cell table:style-name="ce131" office:value-type="float" office:value="1951" calcext:value-type="float">
            <text:p>1951</text:p>
          </table:table-cell>
          <table:table-cell table:style-name="ce138" office:value-type="percentage" office:value="0.027" calcext:value-type="percentage">
            <text:p>2.70 %</text:p>
          </table:table-cell>
          <table:table-cell table:style-name="ce157" table:formula="of:=(([.B31]*(1-(1+[.B32])^(-10))/[.B32]+1/(1+[.B32])^10)-1)+[.B31]" office:value-type="percentage" office:value="-0.00295313922083199" calcext:value-type="percentage">
            <text:p>-0.30 %</text:p>
          </table:table-cell>
          <table:table-cell table:number-columns-repeated="16381"/>
        </table:table-row>
        <table:table-row table:style-name="ro2">
          <table:table-cell table:style-name="ce131" office:value-type="float" office:value="1952" calcext:value-type="float">
            <text:p>1952</text:p>
          </table:table-cell>
          <table:table-cell table:style-name="ce138" office:value-type="percentage" office:value="0.0275" calcext:value-type="percentage">
            <text:p>2.75 %</text:p>
          </table:table-cell>
          <table:table-cell table:style-name="ce157" table:formula="of:=(([.B32]*(1-(1+[.B33])^(-10))/[.B33]+1/(1+[.B33])^10)-1)+[.B32]" office:value-type="percentage" office:value="0.0226799619183057" calcext:value-type="percentage">
            <text:p>2.27 %</text:p>
          </table:table-cell>
          <table:table-cell table:number-columns-repeated="16381"/>
        </table:table-row>
        <table:table-row table:style-name="ro2">
          <table:table-cell table:style-name="ce131" office:value-type="float" office:value="1953" calcext:value-type="float">
            <text:p>1953</text:p>
          </table:table-cell>
          <table:table-cell table:style-name="ce138" office:value-type="percentage" office:value="0.0259" calcext:value-type="percentage">
            <text:p>2.59 %</text:p>
          </table:table-cell>
          <table:table-cell table:style-name="ce157" table:formula="of:=(([.B33]*(1-(1+[.B34])^(-10))/[.B34]+1/(1+[.B34])^10)-1)+[.B33]" office:value-type="percentage" office:value="0.0414384025890885" calcext:value-type="percentage">
            <text:p>4.14 %</text:p>
          </table:table-cell>
          <table:table-cell table:number-columns-repeated="16381"/>
        </table:table-row>
        <table:table-row table:style-name="ro2">
          <table:table-cell table:style-name="ce131" office:value-type="float" office:value="1954" calcext:value-type="float">
            <text:p>1954</text:p>
          </table:table-cell>
          <table:table-cell table:style-name="ce138" office:value-type="percentage" office:value="0.0251" calcext:value-type="percentage">
            <text:p>2.51 %</text:p>
          </table:table-cell>
          <table:table-cell table:style-name="ce157" table:formula="of:=(([.B34]*(1-(1+[.B35])^(-10))/[.B35]+1/(1+[.B35])^10)-1)+[.B34]" office:value-type="percentage" office:value="0.0328980345580956" calcext:value-type="percentage">
            <text:p>3.29 %</text:p>
          </table:table-cell>
          <table:table-cell table:number-columns-repeated="16381"/>
        </table:table-row>
        <table:table-row table:style-name="ro2">
          <table:table-cell table:style-name="ce131" office:value-type="float" office:value="1955" calcext:value-type="float">
            <text:p>1955</text:p>
          </table:table-cell>
          <table:table-cell table:style-name="ce138" office:value-type="percentage" office:value="0.0296" calcext:value-type="percentage">
            <text:p>2.96 %</text:p>
          </table:table-cell>
          <table:table-cell table:style-name="ce157" table:formula="of:=(([.B35]*(1-(1+[.B36])^(-10))/[.B36]+1/(1+[.B36])^10)-1)+[.B35]" office:value-type="percentage" office:value="-0.0133643912886187" calcext:value-type="percentage">
            <text:p>-1.34 %</text:p>
          </table:table-cell>
          <table:table-cell table:number-columns-repeated="16381"/>
        </table:table-row>
        <table:table-row table:style-name="ro2">
          <table:table-cell table:style-name="ce131" office:value-type="float" office:value="1956" calcext:value-type="float">
            <text:p>1956</text:p>
          </table:table-cell>
          <table:table-cell table:style-name="ce138" office:value-type="percentage" office:value="0.0359" calcext:value-type="percentage">
            <text:p>3.59 %</text:p>
          </table:table-cell>
          <table:table-cell table:style-name="ce157" table:formula="of:=(([.B36]*(1-(1+[.B37])^(-10))/[.B37]+1/(1+[.B37])^10)-1)+[.B36]" office:value-type="percentage" office:value="-0.0225577381731542" calcext:value-type="percentage">
            <text:p>-2.26 %</text:p>
          </table:table-cell>
          <table:table-cell table:number-columns-repeated="16381"/>
        </table:table-row>
        <table:table-row table:style-name="ro2">
          <table:table-cell table:style-name="ce131" office:value-type="float" office:value="1957" calcext:value-type="float">
            <text:p>1957</text:p>
          </table:table-cell>
          <table:table-cell table:style-name="ce138" office:value-type="percentage" office:value="0.0321" calcext:value-type="percentage">
            <text:p>3.21 %</text:p>
          </table:table-cell>
          <table:table-cell table:style-name="ce157" table:formula="of:=(([.B37]*(1-(1+[.B38])^(-10))/[.B38]+1/(1+[.B38])^10)-1)+[.B37]" office:value-type="percentage" office:value="0.0679701284662501" calcext:value-type="percentage">
            <text:p>6.80 %</text:p>
          </table:table-cell>
          <table:table-cell table:number-columns-repeated="16381"/>
        </table:table-row>
        <table:table-row table:style-name="ro2">
          <table:table-cell table:style-name="ce131" office:value-type="float" office:value="1958" calcext:value-type="float">
            <text:p>1958</text:p>
          </table:table-cell>
          <table:table-cell table:style-name="ce138" office:value-type="percentage" office:value="0.0386" calcext:value-type="percentage">
            <text:p>3.86 %</text:p>
          </table:table-cell>
          <table:table-cell table:style-name="ce157" table:formula="of:=(([.B38]*(1-(1+[.B39])^(-10))/[.B39]+1/(1+[.B39])^10)-1)+[.B38]" office:value-type="percentage" office:value="-0.0209901817552747" calcext:value-type="percentage">
            <text:p>-2.10 %</text:p>
          </table:table-cell>
          <table:table-cell table:number-columns-repeated="16381"/>
        </table:table-row>
        <table:table-row table:style-name="ro2">
          <table:table-cell table:style-name="ce131" office:value-type="float" office:value="1959" calcext:value-type="float">
            <text:p>1959</text:p>
          </table:table-cell>
          <table:table-cell table:style-name="ce138" office:value-type="percentage" office:value="0.0469" calcext:value-type="percentage">
            <text:p>4.69 %</text:p>
          </table:table-cell>
          <table:table-cell table:style-name="ce157" table:formula="of:=(([.B39]*(1-(1+[.B40])^(-10))/[.B40]+1/(1+[.B40])^10)-1)+[.B39]" office:value-type="percentage" office:value="-0.0264663125913851" calcext:value-type="percentage">
            <text:p>-2.65 %</text:p>
          </table:table-cell>
          <table:table-cell table:number-columns-repeated="16381"/>
        </table:table-row>
        <table:table-row table:style-name="ro2">
          <table:table-cell table:style-name="ce131" office:value-type="float" office:value="1960" calcext:value-type="float">
            <text:p>1960</text:p>
          </table:table-cell>
          <table:table-cell table:style-name="ce138" office:value-type="percentage" office:value="0.0384" calcext:value-type="percentage">
            <text:p>3.84 %</text:p>
          </table:table-cell>
          <table:table-cell table:style-name="ce157" table:formula="of:=(([.B40]*(1-(1+[.B41])^(-10))/[.B41]+1/(1+[.B41])^10)-1)+[.B40]" office:value-type="percentage" office:value="0.116395036909634" calcext:value-type="percentage">
            <text:p>11.64 %</text:p>
          </table:table-cell>
          <table:table-cell table:number-columns-repeated="16381"/>
        </table:table-row>
        <table:table-row table:style-name="ro2">
          <table:table-cell table:style-name="ce131" office:value-type="float" office:value="1961" calcext:value-type="float">
            <text:p>1961</text:p>
          </table:table-cell>
          <table:table-cell table:style-name="ce138" office:value-type="percentage" office:value="0.0406" calcext:value-type="percentage">
            <text:p>4.06 %</text:p>
          </table:table-cell>
          <table:table-cell table:style-name="ce157" table:formula="of:=(([.B41]*(1-(1+[.B42])^(-10))/[.B42]+1/(1+[.B42])^10)-1)+[.B41]" office:value-type="percentage" office:value="0.0206092080763232" calcext:value-type="percentage">
            <text:p>2.06 %</text:p>
          </table:table-cell>
          <table:table-cell table:number-columns-repeated="16381"/>
        </table:table-row>
        <table:table-row table:style-name="ro2">
          <table:table-cell table:style-name="ce131" office:value-type="float" office:value="1962" calcext:value-type="float">
            <text:p>1962</text:p>
          </table:table-cell>
          <table:table-cell table:style-name="ce138" office:value-type="percentage" office:value="0.0386" calcext:value-type="percentage">
            <text:p>3.86 %</text:p>
          </table:table-cell>
          <table:table-cell table:style-name="ce157" table:formula="of:=(([.B42]*(1-(1+[.B43])^(-10))/[.B43]+1/(1+[.B43])^10)-1)+[.B42]" office:value-type="percentage" office:value="0.0569354405400844" calcext:value-type="percentage">
            <text:p>5.69 %</text:p>
          </table:table-cell>
          <table:table-cell table:number-columns-repeated="16381"/>
        </table:table-row>
        <table:table-row table:style-name="ro2">
          <table:table-cell table:style-name="ce131" office:value-type="float" office:value="1963" calcext:value-type="float">
            <text:p>1963</text:p>
          </table:table-cell>
          <table:table-cell table:style-name="ce138" office:value-type="percentage" office:value="0.0413" calcext:value-type="percentage">
            <text:p>4.13 %</text:p>
          </table:table-cell>
          <table:table-cell table:style-name="ce157" table:formula="of:=(([.B43]*(1-(1+[.B44])^(-10))/[.B44]+1/(1+[.B44])^10)-1)+[.B43]" office:value-type="percentage" office:value="0.0168416207395461" calcext:value-type="percentage">
            <text:p>1.68 %</text:p>
          </table:table-cell>
          <table:table-cell table:number-columns-repeated="16381"/>
        </table:table-row>
        <table:table-row table:style-name="ro2">
          <table:table-cell table:style-name="ce131" office:value-type="float" office:value="1964" calcext:value-type="float">
            <text:p>1964</text:p>
          </table:table-cell>
          <table:table-cell table:style-name="ce138" office:value-type="percentage" office:value="0.0418" calcext:value-type="percentage">
            <text:p>4.18 %</text:p>
          </table:table-cell>
          <table:table-cell table:style-name="ce157" table:formula="of:=(([.B44]*(1-(1+[.B45])^(-10))/[.B45]+1/(1+[.B45])^10)-1)+[.B44]" office:value-type="percentage" office:value="0.0372806489115408" calcext:value-type="percentage">
            <text:p>3.73 %</text:p>
          </table:table-cell>
          <table:table-cell table:number-columns-repeated="16381"/>
        </table:table-row>
        <table:table-row table:style-name="ro2">
          <table:table-cell table:style-name="ce131" office:value-type="float" office:value="1965" calcext:value-type="float">
            <text:p>1965</text:p>
          </table:table-cell>
          <table:table-cell table:style-name="ce138" office:value-type="percentage" office:value="0.0462" calcext:value-type="percentage">
            <text:p>4.62 %</text:p>
          </table:table-cell>
          <table:table-cell table:style-name="ce157" table:formula="of:=(([.B45]*(1-(1+[.B46])^(-10))/[.B46]+1/(1+[.B46])^10)-1)+[.B45]" office:value-type="percentage" office:value="0.00718855093592635" calcext:value-type="percentage">
            <text:p>0.72 %</text:p>
          </table:table-cell>
          <table:table-cell table:number-columns-repeated="16381"/>
        </table:table-row>
        <table:table-row table:style-name="ro2">
          <table:table-cell table:style-name="ce131" office:value-type="float" office:value="1966" calcext:value-type="float">
            <text:p>1966</text:p>
          </table:table-cell>
          <table:table-cell table:style-name="ce138" office:value-type="percentage" office:value="0.0484" calcext:value-type="percentage">
            <text:p>4.84 %</text:p>
          </table:table-cell>
          <table:table-cell table:style-name="ce157" table:formula="of:=(([.B46]*(1-(1+[.B47])^(-10))/[.B47]+1/(1+[.B47])^10)-1)+[.B46]" office:value-type="percentage" office:value="0.0290794093242996" calcext:value-type="percentage">
            <text:p>2.91 %</text:p>
          </table:table-cell>
          <table:table-cell table:number-columns-repeated="16381"/>
        </table:table-row>
        <table:table-row table:style-name="ro2">
          <table:table-cell table:style-name="ce131" office:value-type="float" office:value="1967" calcext:value-type="float">
            <text:p>1967</text:p>
          </table:table-cell>
          <table:table-cell table:style-name="ce138" office:value-type="percentage" office:value="0.057" calcext:value-type="percentage">
            <text:p>5.70 %</text:p>
          </table:table-cell>
          <table:table-cell table:style-name="ce157" table:formula="of:=(([.B47]*(1-(1+[.B48])^(-10))/[.B48]+1/(1+[.B48])^10)-1)+[.B47]" office:value-type="percentage" office:value="-0.0158062099328247" calcext:value-type="percentage">
            <text:p>-1.58 %</text:p>
          </table:table-cell>
          <table:table-cell table:number-columns-repeated="16381"/>
        </table:table-row>
        <table:table-row table:style-name="ro2">
          <table:table-cell table:style-name="ce131" office:value-type="float" office:value="1968" calcext:value-type="float">
            <text:p>1968</text:p>
          </table:table-cell>
          <table:table-cell table:style-name="ce138" office:value-type="percentage" office:value="0.0603" calcext:value-type="percentage">
            <text:p>6.03 %</text:p>
          </table:table-cell>
          <table:table-cell table:style-name="ce157" table:formula="of:=(([.B48]*(1-(1+[.B49])^(-10))/[.B49]+1/(1+[.B49])^10)-1)+[.B48]" office:value-type="percentage" office:value="0.0327461969507684" calcext:value-type="percentage">
            <text:p>3.27 %</text:p>
          </table:table-cell>
          <table:table-cell table:number-columns-repeated="16381"/>
        </table:table-row>
        <table:table-row table:style-name="ro2">
          <table:table-cell table:style-name="ce131" office:value-type="float" office:value="1969" calcext:value-type="float">
            <text:p>1969</text:p>
          </table:table-cell>
          <table:table-cell table:style-name="ce138" office:value-type="percentage" office:value="0.0765" calcext:value-type="percentage">
            <text:p>7.65 %</text:p>
          </table:table-cell>
          <table:table-cell table:style-name="ce157" table:formula="of:=(([.B49]*(1-(1+[.B50])^(-10))/[.B50]+1/(1+[.B50])^10)-1)+[.B49]" office:value-type="percentage" office:value="-0.0501404932099261" calcext:value-type="percentage">
            <text:p>-5.01 %</text:p>
          </table:table-cell>
          <table:table-cell table:number-columns-repeated="16381"/>
        </table:table-row>
        <table:table-row table:style-name="ro2">
          <table:table-cell table:style-name="ce131" office:value-type="float" office:value="1970" calcext:value-type="float">
            <text:p>1970</text:p>
          </table:table-cell>
          <table:table-cell table:style-name="ce138" office:value-type="percentage" office:value="0.0639" calcext:value-type="percentage">
            <text:p>6.39 %</text:p>
          </table:table-cell>
          <table:table-cell table:style-name="ce157" table:formula="of:=(([.B50]*(1-(1+[.B51])^(-10))/[.B51]+1/(1+[.B51])^10)-1)+[.B50]" office:value-type="percentage" office:value="0.167547371834123" calcext:value-type="percentage">
            <text:p>16.75 %</text:p>
          </table:table-cell>
          <table:table-cell table:number-columns-repeated="16381"/>
        </table:table-row>
        <table:table-row table:style-name="ro2">
          <table:table-cell table:style-name="ce131" office:value-type="float" office:value="1971" calcext:value-type="float">
            <text:p>1971</text:p>
          </table:table-cell>
          <table:table-cell table:style-name="ce138" office:value-type="percentage" office:value="0.0593" calcext:value-type="percentage">
            <text:p>5.93 %</text:p>
          </table:table-cell>
          <table:table-cell table:style-name="ce157" table:formula="of:=(([.B51]*(1-(1+[.B52])^(-10))/[.B52]+1/(1+[.B52])^10)-1)+[.B51]" office:value-type="percentage" office:value="0.097868966197123" calcext:value-type="percentage">
            <text:p>9.79 %</text:p>
          </table:table-cell>
          <table:table-cell table:number-columns-repeated="16381"/>
        </table:table-row>
        <table:table-row table:style-name="ro2">
          <table:table-cell table:style-name="ce131" office:value-type="float" office:value="1972" calcext:value-type="float">
            <text:p>1972</text:p>
          </table:table-cell>
          <table:table-cell table:style-name="ce138" office:value-type="percentage" office:value="0.0636" calcext:value-type="percentage">
            <text:p>6.36 %</text:p>
          </table:table-cell>
          <table:table-cell table:style-name="ce157" table:formula="of:=(([.B52]*(1-(1+[.B53])^(-10))/[.B53]+1/(1+[.B53])^10)-1)+[.B52]" office:value-type="percentage" office:value="0.0281844905044498" calcext:value-type="percentage">
            <text:p>2.82 %</text:p>
          </table:table-cell>
          <table:table-cell table:number-columns-repeated="16381"/>
        </table:table-row>
        <table:table-row table:style-name="ro2">
          <table:table-cell table:style-name="ce131" office:value-type="float" office:value="1973" calcext:value-type="float">
            <text:p>1973</text:p>
          </table:table-cell>
          <table:table-cell table:style-name="ce138" office:value-type="percentage" office:value="0.0674" calcext:value-type="percentage">
            <text:p>6.74 %</text:p>
          </table:table-cell>
          <table:table-cell table:style-name="ce157" table:formula="of:=(([.B53]*(1-(1+[.B54])^(-10))/[.B54]+1/(1+[.B54])^10)-1)+[.B53]" office:value-type="percentage" office:value="0.0365866460241501" calcext:value-type="percentage">
            <text:p>3.66 %</text:p>
          </table:table-cell>
          <table:table-cell table:number-columns-repeated="16381"/>
        </table:table-row>
        <table:table-row table:style-name="ro2">
          <table:table-cell table:style-name="ce131" office:value-type="float" office:value="1974" calcext:value-type="float">
            <text:p>1974</text:p>
          </table:table-cell>
          <table:table-cell table:style-name="ce138" office:value-type="percentage" office:value="0.0743" calcext:value-type="percentage">
            <text:p>7.43 %</text:p>
          </table:table-cell>
          <table:table-cell table:style-name="ce157" table:formula="of:=(([.B54]*(1-(1+[.B55])^(-10))/[.B55]+1/(1+[.B55])^10)-1)+[.B54]" office:value-type="percentage" office:value="0.0198860869323786" calcext:value-type="percentage">
            <text:p>1.99 %</text:p>
          </table:table-cell>
          <table:table-cell table:number-columns-repeated="16381"/>
        </table:table-row>
        <table:table-row table:style-name="ro2">
          <table:table-cell table:style-name="ce131" office:value-type="float" office:value="1975" calcext:value-type="float">
            <text:p>1975</text:p>
          </table:table-cell>
          <table:table-cell table:style-name="ce138" office:value-type="percentage" office:value="0.08" calcext:value-type="percentage">
            <text:p>8.00 %</text:p>
          </table:table-cell>
          <table:table-cell table:style-name="ce157" table:formula="of:=(([.B55]*(1-(1+[.B56])^(-10))/[.B56]+1/(1+[.B56])^10)-1)+[.B55]" office:value-type="percentage" office:value="0.0360525360260337" calcext:value-type="percentage">
            <text:p>3.61 %</text:p>
          </table:table-cell>
          <table:table-cell table:number-columns-repeated="16381"/>
        </table:table-row>
        <table:table-row table:style-name="ro2">
          <table:table-cell table:style-name="ce131" office:value-type="float" office:value="1976" calcext:value-type="float">
            <text:p>1976</text:p>
          </table:table-cell>
          <table:table-cell table:style-name="ce138" office:value-type="percentage" office:value="0.0687" calcext:value-type="percentage">
            <text:p>6.87 %</text:p>
          </table:table-cell>
          <table:table-cell table:style-name="ce157" table:formula="of:=(([.B56]*(1-(1+[.B57])^(-10))/[.B57]+1/(1+[.B57])^10)-1)+[.B56]" office:value-type="percentage" office:value="0.159845607429092" calcext:value-type="percentage">
            <text:p>15.98 %</text:p>
          </table:table-cell>
          <table:table-cell table:number-columns-repeated="16381"/>
        </table:table-row>
        <table:table-row table:style-name="ro2">
          <table:table-cell table:style-name="ce131" office:value-type="float" office:value="1977" calcext:value-type="float">
            <text:p>1977</text:p>
          </table:table-cell>
          <table:table-cell table:style-name="ce138" office:value-type="percentage" office:value="0.0769" calcext:value-type="percentage">
            <text:p>7.69 %</text:p>
          </table:table-cell>
          <table:table-cell table:style-name="ce157" table:formula="of:=(([.B57]*(1-(1+[.B58])^(-10))/[.B58]+1/(1+[.B58])^10)-1)+[.B57]" office:value-type="percentage" office:value="0.0128996060710706" calcext:value-type="percentage">
            <text:p>1.29 %</text:p>
          </table:table-cell>
          <table:table-cell table:number-columns-repeated="16381"/>
        </table:table-row>
        <table:table-row table:style-name="ro2">
          <table:table-cell table:style-name="ce131" office:value-type="float" office:value="1978" calcext:value-type="float">
            <text:p>1978</text:p>
          </table:table-cell>
          <table:table-cell table:style-name="ce138" office:value-type="percentage" office:value="0.0901" calcext:value-type="percentage">
            <text:p>9.01 %</text:p>
          </table:table-cell>
          <table:table-cell table:style-name="ce157" table:formula="of:=(([.B58]*(1-(1+[.B59])^(-10))/[.B59]+1/(1+[.B59])^10)-1)+[.B58]" office:value-type="percentage" office:value="-0.00777580690750876" calcext:value-type="percentage">
            <text:p>-0.78 %</text:p>
          </table:table-cell>
          <table:table-cell table:number-columns-repeated="16381"/>
        </table:table-row>
        <table:table-row table:style-name="ro2">
          <table:table-cell table:style-name="ce131" office:value-type="float" office:value="1979" calcext:value-type="float">
            <text:p>1979</text:p>
          </table:table-cell>
          <table:table-cell table:style-name="ce138" office:value-type="percentage" office:value="0.1039" calcext:value-type="percentage">
            <text:p>10.39 %</text:p>
          </table:table-cell>
          <table:table-cell table:style-name="ce157" table:formula="of:=(([.B59]*(1-(1+[.B60])^(-10))/[.B60]+1/(1+[.B60])^10)-1)+[.B59]" office:value-type="percentage" office:value="0.00670720312472355" calcext:value-type="percentage">
            <text:p>0.67 %</text:p>
          </table:table-cell>
          <table:table-cell table:number-columns-repeated="16381"/>
        </table:table-row>
        <table:table-row table:style-name="ro2">
          <table:table-cell table:style-name="ce131" office:value-type="float" office:value="1980" calcext:value-type="float">
            <text:p>1980</text:p>
          </table:table-cell>
          <table:table-cell table:style-name="ce138" office:value-type="percentage" office:value="0.1284" calcext:value-type="percentage">
            <text:p>12.84 %</text:p>
          </table:table-cell>
          <table:table-cell table:style-name="ce157" table:formula="of:=(([.B60]*(1-(1+[.B61])^(-10))/[.B61]+1/(1+[.B61])^10)-1)+[.B60]" office:value-type="percentage" office:value="-0.0298974425199941" calcext:value-type="percentage">
            <text:p>-2.99 %</text:p>
          </table:table-cell>
          <table:table-cell table:number-columns-repeated="16381"/>
        </table:table-row>
        <table:table-row table:style-name="ro2">
          <table:table-cell table:style-name="ce131" office:value-type="float" office:value="1981" calcext:value-type="float">
            <text:p>1981</text:p>
          </table:table-cell>
          <table:table-cell table:style-name="ce138" office:value-type="percentage" office:value="0.1372" calcext:value-type="percentage">
            <text:p>13.72 %</text:p>
          </table:table-cell>
          <table:table-cell table:style-name="ce157" table:formula="of:=(([.B61]*(1-(1+[.B62])^(-10))/[.B62]+1/(1+[.B62])^10)-1)+[.B61]" office:value-type="percentage" office:value="0.0819921533589235" calcext:value-type="percentage">
            <text:p>8.20 %</text:p>
          </table:table-cell>
          <table:table-cell table:number-columns-repeated="16381"/>
        </table:table-row>
        <table:table-row table:style-name="ro2">
          <table:table-cell table:style-name="ce131" office:value-type="float" office:value="1982" calcext:value-type="float">
            <text:p>1982</text:p>
          </table:table-cell>
          <table:table-cell table:style-name="ce138" office:value-type="percentage" office:value="0.1054" calcext:value-type="percentage">
            <text:p>10.54 %</text:p>
          </table:table-cell>
          <table:table-cell table:style-name="ce157" table:formula="of:=(([.B62]*(1-(1+[.B63])^(-10))/[.B63]+1/(1+[.B63])^10)-1)+[.B62]" office:value-type="percentage" office:value="0.328145494862956" calcext:value-type="percentage">
            <text:p>32.81 %</text:p>
          </table:table-cell>
          <table:table-cell table:number-columns-repeated="16381"/>
        </table:table-row>
        <table:table-row table:style-name="ro2">
          <table:table-cell table:style-name="ce131" office:value-type="float" office:value="1983" calcext:value-type="float">
            <text:p>1983</text:p>
          </table:table-cell>
          <table:table-cell table:style-name="ce138" office:value-type="percentage" office:value="0.1183" calcext:value-type="percentage">
            <text:p>11.83 %</text:p>
          </table:table-cell>
          <table:table-cell table:style-name="ce157" table:formula="of:=(([.B63]*(1-(1+[.B64])^(-10))/[.B64]+1/(1+[.B64])^10)-1)+[.B63]" office:value-type="percentage" office:value="0.0320020944514293" calcext:value-type="percentage">
            <text:p>3.20 %</text:p>
          </table:table-cell>
          <table:table-cell table:number-columns-repeated="16381"/>
        </table:table-row>
        <table:table-row table:style-name="ro2">
          <table:table-cell table:style-name="ce131" office:value-type="float" office:value="1984" calcext:value-type="float">
            <text:p>1984</text:p>
          </table:table-cell>
          <table:table-cell table:style-name="ce138" office:value-type="percentage" office:value="0.115" calcext:value-type="percentage">
            <text:p>11.50 %</text:p>
          </table:table-cell>
          <table:table-cell table:style-name="ce157" table:formula="of:=(([.B64]*(1-(1+[.B65])^(-10))/[.B65]+1/(1+[.B65])^10)-1)+[.B64]" office:value-type="percentage" office:value="0.137333643441024" calcext:value-type="percentage">
            <text:p>13.73 %</text:p>
          </table:table-cell>
          <table:table-cell table:number-columns-repeated="16381"/>
        </table:table-row>
        <table:table-row table:style-name="ro2">
          <table:table-cell table:style-name="ce131" office:value-type="float" office:value="1985" calcext:value-type="float">
            <text:p>1985</text:p>
          </table:table-cell>
          <table:table-cell table:style-name="ce138" office:value-type="percentage" office:value="0.0926" calcext:value-type="percentage">
            <text:p>9.26 %</text:p>
          </table:table-cell>
          <table:table-cell table:style-name="ce157" table:formula="of:=(([.B65]*(1-(1+[.B66])^(-10))/[.B66]+1/(1+[.B66])^10)-1)+[.B65]" office:value-type="percentage" office:value="0.257124882126064" calcext:value-type="percentage">
            <text:p>25.71 %</text:p>
          </table:table-cell>
          <table:table-cell table:number-columns-repeated="16381"/>
        </table:table-row>
        <table:table-row table:style-name="ro2">
          <table:table-cell table:style-name="ce131" office:value-type="float" office:value="1986" calcext:value-type="float">
            <text:p>1986</text:p>
          </table:table-cell>
          <table:table-cell table:style-name="ce138" office:value-type="percentage" office:value="0.0711" calcext:value-type="percentage">
            <text:p>7.11 %</text:p>
          </table:table-cell>
          <table:table-cell table:style-name="ce157" table:formula="of:=(([.B66]*(1-(1+[.B67])^(-10))/[.B67]+1/(1+[.B67])^10)-1)+[.B66]" office:value-type="percentage" office:value="0.242842151417676" calcext:value-type="percentage">
            <text:p>24.28 %</text:p>
          </table:table-cell>
          <table:table-cell table:number-columns-repeated="16381"/>
        </table:table-row>
        <table:table-row table:style-name="ro2">
          <table:table-cell table:style-name="ce131" office:value-type="float" office:value="1987" calcext:value-type="float">
            <text:p>1987</text:p>
          </table:table-cell>
          <table:table-cell table:style-name="ce138" office:value-type="percentage" office:value="0.0899" calcext:value-type="percentage">
            <text:p>8.99 %</text:p>
          </table:table-cell>
          <table:table-cell table:style-name="ce157" table:formula="of:=(([.B67]*(1-(1+[.B68])^(-10))/[.B68]+1/(1+[.B68])^10)-1)+[.B67]" office:value-type="percentage" office:value="-0.0496050893792625" calcext:value-type="percentage">
            <text:p>-4.96 %</text:p>
          </table:table-cell>
          <table:table-cell table:number-columns-repeated="16381"/>
        </table:table-row>
        <table:table-row table:style-name="ro2">
          <table:table-cell table:style-name="ce131" office:value-type="float" office:value="1988" calcext:value-type="float">
            <text:p>1988</text:p>
          </table:table-cell>
          <table:table-cell table:style-name="ce138" office:value-type="percentage" office:value="0.0911" calcext:value-type="percentage">
            <text:p>9.11 %</text:p>
          </table:table-cell>
          <table:table-cell table:style-name="ce157" table:formula="of:=(([.B68]*(1-(1+[.B69])^(-10))/[.B69]+1/(1+[.B69])^10)-1)+[.B68]" office:value-type="percentage" office:value="0.0822359584348417" calcext:value-type="percentage">
            <text:p>8.22 %</text:p>
          </table:table-cell>
          <table:table-cell table:number-columns-repeated="16381"/>
        </table:table-row>
        <table:table-row table:style-name="ro2">
          <table:table-cell table:style-name="ce131" office:value-type="float" office:value="1989" calcext:value-type="float">
            <text:p>1989</text:p>
          </table:table-cell>
          <table:table-cell table:style-name="ce138" office:value-type="percentage" office:value="0.0784" calcext:value-type="percentage">
            <text:p>7.84 %</text:p>
          </table:table-cell>
          <table:table-cell table:style-name="ce157" table:formula="of:=(([.B69]*(1-(1+[.B70])^(-10))/[.B70]+1/(1+[.B70])^10)-1)+[.B69]" office:value-type="percentage" office:value="0.176936471594462" calcext:value-type="percentage">
            <text:p>17.69 %</text:p>
          </table:table-cell>
          <table:table-cell table:number-columns-repeated="16381"/>
        </table:table-row>
        <table:table-row table:style-name="ro2">
          <table:table-cell table:style-name="ce131" office:value-type="float" office:value="1990" calcext:value-type="float">
            <text:p>1990</text:p>
          </table:table-cell>
          <table:table-cell table:style-name="ce138" office:value-type="percentage" office:value="0.0808" calcext:value-type="percentage">
            <text:p>8.08 %</text:p>
          </table:table-cell>
          <table:table-cell table:style-name="ce157" table:formula="of:=(([.B70]*(1-(1+[.B71])^(-10))/[.B71]+1/(1+[.B71])^10)-1)+[.B70]" office:value-type="percentage" office:value="0.0623537533355336" calcext:value-type="percentage">
            <text:p>6.24 %</text:p>
          </table:table-cell>
          <table:table-cell table:number-columns-repeated="16381"/>
        </table:table-row>
        <table:table-row table:style-name="ro2">
          <table:table-cell table:style-name="ce131" office:value-type="float" office:value="1991" calcext:value-type="float">
            <text:p>1991</text:p>
          </table:table-cell>
          <table:table-cell table:style-name="ce138" office:value-type="percentage" office:value="0.0709" calcext:value-type="percentage">
            <text:p>7.09 %</text:p>
          </table:table-cell>
          <table:table-cell table:style-name="ce157" table:formula="of:=(([.B71]*(1-(1+[.B72])^(-10))/[.B72]+1/(1+[.B72])^10)-1)+[.B71]" office:value-type="percentage" office:value="0.150045100195173" calcext:value-type="percentage">
            <text:p>15.00 %</text:p>
          </table:table-cell>
          <table:table-cell table:number-columns-repeated="16381"/>
        </table:table-row>
        <table:table-row table:style-name="ro2">
          <table:table-cell table:style-name="ce131" office:value-type="float" office:value="1992" calcext:value-type="float">
            <text:p>1992</text:p>
          </table:table-cell>
          <table:table-cell table:style-name="ce138" office:value-type="percentage" office:value="0.0677" calcext:value-type="percentage">
            <text:p>6.77 %</text:p>
          </table:table-cell>
          <table:table-cell table:style-name="ce157" table:formula="of:=(([.B72]*(1-(1+[.B73])^(-10))/[.B73]+1/(1+[.B73])^10)-1)+[.B72]" office:value-type="percentage" office:value="0.0936163731620794" calcext:value-type="percentage">
            <text:p>9.36 %</text:p>
          </table:table-cell>
          <table:table-cell table:number-columns-repeated="16381"/>
        </table:table-row>
        <table:table-row table:style-name="ro2">
          <table:table-cell table:style-name="ce131" office:value-type="float" office:value="1993" calcext:value-type="float">
            <text:p>1993</text:p>
          </table:table-cell>
          <table:table-cell table:style-name="ce138" office:value-type="percentage" office:value="0.0577" calcext:value-type="percentage">
            <text:p>5.77 %</text:p>
          </table:table-cell>
          <table:table-cell table:style-name="ce157" table:formula="of:=(([.B73]*(1-(1+[.B74])^(-10))/[.B74]+1/(1+[.B74])^10)-1)+[.B73]" office:value-type="percentage" office:value="0.142109575892631" calcext:value-type="percentage">
            <text:p>14.21 %</text:p>
          </table:table-cell>
          <table:table-cell table:number-columns-repeated="16381"/>
        </table:table-row>
        <table:table-row table:style-name="ro2">
          <table:table-cell table:style-name="ce131" office:value-type="float" office:value="1994" calcext:value-type="float">
            <text:p>1994</text:p>
          </table:table-cell>
          <table:table-cell table:style-name="ce138" office:value-type="percentage" office:value="0.0781" calcext:value-type="percentage">
            <text:p>7.81 %</text:p>
          </table:table-cell>
          <table:table-cell table:style-name="ce157" table:formula="of:=(([.B74]*(1-(1+[.B75])^(-10))/[.B75]+1/(1+[.B75])^10)-1)+[.B74]" office:value-type="percentage" office:value="-0.080366555509986" calcext:value-type="percentage">
            <text:p>-8.04 %</text:p>
          </table:table-cell>
          <table:table-cell table:number-columns-repeated="16381"/>
        </table:table-row>
        <table:table-row table:style-name="ro2">
          <table:table-cell table:style-name="ce131" office:value-type="float" office:value="1995" calcext:value-type="float">
            <text:p>1995</text:p>
          </table:table-cell>
          <table:table-cell table:style-name="ce138" office:value-type="percentage" office:value="0.0571" calcext:value-type="percentage">
            <text:p>5.71 %</text:p>
          </table:table-cell>
          <table:table-cell table:style-name="ce157" table:formula="of:=(([.B75]*(1-(1+[.B76])^(-10))/[.B76]+1/(1+[.B76])^10)-1)+[.B75]" office:value-type="percentage" office:value="0.234807801125389" calcext:value-type="percentage">
            <text:p>23.48 %</text:p>
          </table:table-cell>
          <table:table-cell table:number-columns-repeated="16381"/>
        </table:table-row>
        <table:table-row table:style-name="ro2">
          <table:table-cell table:style-name="ce131" office:value-type="float" office:value="1996" calcext:value-type="float">
            <text:p>1996</text:p>
          </table:table-cell>
          <table:table-cell table:style-name="ce138" office:value-type="percentage" office:value="0.063" calcext:value-type="percentage">
            <text:p>6.30 %</text:p>
          </table:table-cell>
          <table:table-cell table:style-name="ce157" table:formula="of:=(([.B76]*(1-(1+[.B77])^(-10))/[.B77]+1/(1+[.B77])^10)-1)+[.B76]" office:value-type="percentage" office:value="0.0142860779340184" calcext:value-type="percentage">
            <text:p>1.43 %</text:p>
          </table:table-cell>
          <table:table-cell table:number-columns-repeated="16381"/>
        </table:table-row>
        <table:table-row table:style-name="ro2">
          <table:table-cell table:style-name="ce131" office:value-type="float" office:value="1997" calcext:value-type="float">
            <text:p>1997</text:p>
          </table:table-cell>
          <table:table-cell table:style-name="ce138" office:value-type="percentage" office:value="0.0581" calcext:value-type="percentage">
            <text:p>5.81 %</text:p>
          </table:table-cell>
          <table:table-cell table:style-name="ce157" table:formula="of:=(([.B77]*(1-(1+[.B78])^(-10))/[.B78]+1/(1+[.B78])^10)-1)+[.B77]" office:value-type="percentage" office:value="0.0993913027297753" calcext:value-type="percentage">
            <text:p>9.94 %</text:p>
          </table:table-cell>
          <table:table-cell table:number-columns-repeated="16381"/>
        </table:table-row>
        <table:table-row table:style-name="ro2">
          <table:table-cell table:style-name="ce131" office:value-type="float" office:value="1998" calcext:value-type="float">
            <text:p>1998</text:p>
          </table:table-cell>
          <table:table-cell table:style-name="ce138" office:value-type="percentage" office:value="0.0465" calcext:value-type="percentage">
            <text:p>4.65 %</text:p>
          </table:table-cell>
          <table:table-cell table:style-name="ce157" table:formula="of:=(([.B78]*(1-(1+[.B79])^(-10))/[.B79]+1/(1+[.B79])^10)-1)+[.B78]" office:value-type="percentage" office:value="0.149214319226062" calcext:value-type="percentage">
            <text:p>14.92 %</text:p>
          </table:table-cell>
          <table:table-cell table:number-columns-repeated="16381"/>
        </table:table-row>
        <table:table-row table:style-name="ro2">
          <table:table-cell table:style-name="ce131" office:value-type="float" office:value="1999" calcext:value-type="float">
            <text:p>1999</text:p>
          </table:table-cell>
          <table:table-cell table:style-name="ce138" office:value-type="percentage" office:value="0.0644" calcext:value-type="percentage">
            <text:p>6.44 %</text:p>
          </table:table-cell>
          <table:table-cell table:style-name="ce157" table:formula="of:=(([.B79]*(1-(1+[.B80])^(-10))/[.B80]+1/(1+[.B80])^10)-1)+[.B79]" office:value-type="percentage" office:value="-0.0825421479626858" calcext:value-type="percentage">
            <text:p>-8.25 %</text:p>
          </table:table-cell>
          <table:table-cell table:number-columns-repeated="16381"/>
        </table:table-row>
        <table:table-row table:style-name="ro2">
          <table:table-cell table:style-name="ce131" office:value-type="float" office:value="2000" calcext:value-type="float">
            <text:p>2000</text:p>
          </table:table-cell>
          <table:table-cell table:style-name="ce138" office:value-type="percentage" office:value="0.0511" calcext:value-type="percentage">
            <text:p>5.11 %</text:p>
          </table:table-cell>
          <table:table-cell table:style-name="ce157" table:formula="of:=(([.B80]*(1-(1+[.B81])^(-10))/[.B81]+1/(1+[.B81])^10)-1)+[.B80]" office:value-type="percentage" office:value="0.166552671253975" calcext:value-type="percentage">
            <text:p>16.66 %</text:p>
          </table:table-cell>
          <table:table-cell table:number-columns-repeated="16381"/>
        </table:table-row>
        <table:table-row table:style-name="ro2">
          <table:table-cell table:style-name="ce131" office:value-type="float" office:value="2001" calcext:value-type="float">
            <text:p>2001</text:p>
          </table:table-cell>
          <table:table-cell table:style-name="ce138" office:value-type="percentage" office:value="0.0505" calcext:value-type="percentage">
            <text:p>5.05 %</text:p>
          </table:table-cell>
          <table:table-cell table:style-name="ce157" table:formula="of:=(([.B81]*(1-(1+[.B82])^(-10))/[.B82]+1/(1+[.B82])^10)-1)+[.B81]" office:value-type="percentage" office:value="0.0557218118924926" calcext:value-type="percentage">
            <text:p>5.57 %</text:p>
          </table:table-cell>
          <table:table-cell table:number-columns-repeated="16381"/>
        </table:table-row>
        <table:table-row table:style-name="ro2">
          <table:table-cell table:style-name="ce131" office:value-type="float" office:value="2002" calcext:value-type="float">
            <text:p>2002</text:p>
          </table:table-cell>
          <table:table-cell table:style-name="ce138" office:value-type="percentage" office:value="0.0382" calcext:value-type="percentage">
            <text:p>3.82 %</text:p>
          </table:table-cell>
          <table:table-cell table:style-name="ce157" table:formula="of:=(([.B82]*(1-(1+[.B83])^(-10))/[.B83]+1/(1+[.B83])^10)-1)+[.B82]" office:value-type="percentage" office:value="0.151164003781093" calcext:value-type="percentage">
            <text:p>15.12 %</text:p>
          </table:table-cell>
          <table:table-cell table:number-columns-repeated="16381"/>
        </table:table-row>
        <table:table-row table:style-name="ro2">
          <table:table-cell table:style-name="ce131" office:value-type="float" office:value="2003" calcext:value-type="float">
            <text:p>2003</text:p>
          </table:table-cell>
          <table:table-cell table:style-name="ce138" office:value-type="percentage" office:value="0.0425" calcext:value-type="percentage">
            <text:p>4.25 %</text:p>
          </table:table-cell>
          <table:table-cell table:style-name="ce157" table:formula="of:=(([.B83]*(1-(1+[.B84])^(-10))/[.B84]+1/(1+[.B84])^10)-1)+[.B83]" office:value-type="percentage" office:value="0.00375318588177585" calcext:value-type="percentage">
            <text:p>0.38 %</text:p>
          </table:table-cell>
          <table:table-cell table:number-columns-repeated="16381"/>
        </table:table-row>
        <table:table-row table:style-name="ro2">
          <table:table-cell table:style-name="ce131" office:value-type="float" office:value="2004" calcext:value-type="float">
            <text:p>2004</text:p>
          </table:table-cell>
          <table:table-cell table:style-name="ce138" office:value-type="percentage" office:value="0.0422" calcext:value-type="percentage">
            <text:p>4.22 %</text:p>
          </table:table-cell>
          <table:table-cell table:style-name="ce157" table:formula="of:=(([.B84]*(1-(1+[.B85])^(-10))/[.B85]+1/(1+[.B85])^10)-1)+[.B84]" office:value-type="percentage" office:value="0.0449068370227455" calcext:value-type="percentage">
            <text:p>4.49 %</text:p>
          </table:table-cell>
          <table:table-cell table:number-columns-repeated="16381"/>
        </table:table-row>
        <table:table-row table:style-name="ro2">
          <table:table-cell table:style-name="ce131" office:value-type="float" office:value="2005" calcext:value-type="float">
            <text:p>2005</text:p>
          </table:table-cell>
          <table:table-cell table:style-name="ce138" office:value-type="percentage" office:value="0.0439" calcext:value-type="percentage">
            <text:p>4.39 %</text:p>
          </table:table-cell>
          <table:table-cell table:style-name="ce157" table:formula="of:=(([.B85]*(1-(1+[.B86])^(-10))/[.B86]+1/(1+[.B86])^10)-1)+[.B85]" office:value-type="percentage" office:value="0.0286753295977795" calcext:value-type="percentage">
            <text:p>2.87 %</text:p>
          </table:table-cell>
          <table:table-cell table:number-columns-repeated="16381"/>
        </table:table-row>
        <table:table-row table:style-name="ro2">
          <table:table-cell table:style-name="ce131" office:value-type="float" office:value="2006" calcext:value-type="float">
            <text:p>2006</text:p>
          </table:table-cell>
          <table:table-cell table:style-name="ce138" office:value-type="percentage" office:value="0.047" calcext:value-type="percentage">
            <text:p>4.70 %</text:p>
          </table:table-cell>
          <table:table-cell table:style-name="ce157" table:formula="of:=(([.B86]*(1-(1+[.B87])^(-10))/[.B87]+1/(1+[.B87])^10)-1)+[.B86]" office:value-type="percentage" office:value="0.0196100124175684" calcext:value-type="percentage">
            <text:p>1.96 %</text:p>
          </table:table-cell>
          <table:table-cell table:number-columns-repeated="16381"/>
        </table:table-row>
        <table:table-row table:style-name="ro2">
          <table:table-cell table:style-name="ce131" office:value-type="float" office:value="2007" calcext:value-type="float">
            <text:p>2007</text:p>
          </table:table-cell>
          <table:table-cell table:style-name="ce158" office:value-type="percentage" office:value="0.0402" calcext:value-type="percentage">
            <text:p>4.02 %</text:p>
          </table:table-cell>
          <table:table-cell table:style-name="ce157" table:formula="of:=(([.B87]*(1-(1+[.B88])^(-10))/[.B88]+1/(1+[.B88])^10)-1)+[.B87]" office:value-type="percentage" office:value="0.102099219300128" calcext:value-type="percentage">
            <text:p>10.21 %</text:p>
          </table:table-cell>
          <table:table-cell table:number-columns-repeated="16381"/>
        </table:table-row>
        <table:table-row table:style-name="ro2">
          <table:table-cell table:style-name="ce146" office:value-type="float" office:value="2008" calcext:value-type="float">
            <text:p>2008</text:p>
          </table:table-cell>
          <table:table-cell table:style-name="ce158" office:value-type="percentage" office:value="0.0221" calcext:value-type="percentage">
            <text:p>2.21 %</text:p>
          </table:table-cell>
          <table:table-cell table:style-name="ce157" table:formula="of:=(([.B88]*(1-(1+[.B89])^(-10))/[.B89]+1/(1+[.B89])^10)-1)+[.B88]" office:value-type="percentage" office:value="0.20101279926977" calcext:value-type="percentage">
            <text:p>20.10 %</text:p>
          </table:table-cell>
          <table:table-cell table:number-columns-repeated="16381"/>
        </table:table-row>
        <table:table-row table:style-name="ro2">
          <table:table-cell table:style-name="ce146" office:value-type="float" office:value="2009" calcext:value-type="float">
            <text:p>2009</text:p>
          </table:table-cell>
          <table:table-cell table:style-name="ce158" table:formula="of:=[$'S&amp;P 500 &amp; Raw Data'.E85]" office:value-type="percentage" office:value="0.0384" calcext:value-type="percentage">
            <text:p>3.84 %</text:p>
          </table:table-cell>
          <table:table-cell table:style-name="ce157" table:formula="of:=(([.B89]*(1-(1+[.B90])^(-10))/[.B90]+1/(1+[.B90])^10)-1)+[.B89]" office:value-type="percentage" office:value="-0.111166953132592" calcext:value-type="percentage">
            <text:p>-11.12 %</text:p>
          </table:table-cell>
          <table:table-cell table:number-columns-repeated="16381"/>
        </table:table-row>
        <table:table-row table:style-name="ro2">
          <table:table-cell table:style-name="ce146" office:value-type="float" office:value="2010" calcext:value-type="float">
            <text:p>2010</text:p>
          </table:table-cell>
          <table:table-cell table:style-name="ce158" table:formula="of:=[$'S&amp;P 500 &amp; Raw Data'.E86]" office:value-type="percentage" office:value="0.0329" calcext:value-type="percentage">
            <text:p>3.29 %</text:p>
          </table:table-cell>
          <table:table-cell table:style-name="ce157" table:formula="of:=(([.B90]*(1-(1+[.B91])^(-10))/[.B91]+1/(1+[.B91])^10)-1)+[.B90]" office:value-type="percentage" office:value="0.0846293388035575" calcext:value-type="percentage">
            <text:p>8.46 %</text:p>
          </table:table-cell>
          <table:table-cell table:number-columns-repeated="16381"/>
        </table:table-row>
        <table:table-row table:style-name="ro2">
          <table:table-cell table:style-name="ce146" office:value-type="float" office:value="2011" calcext:value-type="float">
            <text:p>2011</text:p>
          </table:table-cell>
          <table:table-cell table:style-name="ce158" office:value-type="percentage" office:value="0.0188" calcext:value-type="percentage">
            <text:p>1.88 %</text:p>
          </table:table-cell>
          <table:table-cell table:style-name="ce157" table:formula="of:=(([.B91]*(1-(1+[.B92])^(-10))/[.B92]+1/(1+[.B92])^10)-1)+[.B91]" office:value-type="percentage" office:value="0.160353349994613" calcext:value-type="percentage">
            <text:p>16.04 %</text:p>
          </table:table-cell>
          <table:table-cell table:number-columns-repeated="16381"/>
        </table:table-row>
        <table:table-row table:style-name="ro2">
          <table:table-cell table:style-name="ce146" office:value-type="float" office:value="2012" calcext:value-type="float">
            <text:p>2012</text:p>
          </table:table-cell>
          <table:table-cell table:style-name="ce158" office:value-type="percentage" office:value="0.0176" calcext:value-type="percentage">
            <text:p>1.76 %</text:p>
          </table:table-cell>
          <table:table-cell table:style-name="ce157" table:formula="of:=(([.B92]*(1-(1+[.B93])^(-10))/[.B93]+1/(1+[.B93])^10)-1)+[.B92]" office:value-type="percentage" office:value="0.0297157197801895" calcext:value-type="percentage">
            <text:p>2.97 %</text:p>
          </table:table-cell>
          <table:table-cell table:number-columns-repeated="16381"/>
        </table:table-row>
        <table:table-row table:style-name="ro2">
          <table:table-cell table:style-name="ce146" office:value-type="float" office:value="2013" calcext:value-type="float">
            <text:p>2013</text:p>
          </table:table-cell>
          <table:table-cell table:style-name="ce158" office:value-type="percentage" office:value="0.03036" calcext:value-type="percentage">
            <text:p>3.04 %</text:p>
          </table:table-cell>
          <table:table-cell table:style-name="ce157" table:formula="of:=(([.B93]*(1-(1+[.B94])^(-10))/[.B94]+1/(1+[.B94])^10)-1)+[.B93]" office:value-type="percentage" office:value="-0.0910456879434727" calcext:value-type="percentage">
            <text:p>-9.10 %</text:p>
          </table:table-cell>
          <table:table-cell table:number-columns-repeated="16381"/>
        </table:table-row>
        <table:table-row table:style-name="ro2">
          <table:table-cell table:style-name="ce146" office:value-type="float" office:value="2014" calcext:value-type="float">
            <text:p>2014</text:p>
          </table:table-cell>
          <table:table-cell table:style-name="ce160" office:value-type="percentage" office:value="0.0217" calcext:value-type="percentage">
            <text:p>2.17 %</text:p>
          </table:table-cell>
          <table:table-cell table:style-name="ce157" table:formula="of:=(([.B94]*(1-(1+[.B95])^(-10))/[.B95]+1/(1+[.B95])^10)-1)+[.B94]" office:value-type="percentage" office:value="0.107461804520047" calcext:value-type="percentage">
            <text:p>10.75 %</text:p>
          </table:table-cell>
          <table:table-cell table:number-columns-repeated="16381"/>
        </table:table-row>
        <table:table-row table:style-name="ro2">
          <table:table-cell table:style-name="ce146" office:value-type="float" office:value="2015" calcext:value-type="float">
            <text:p>2015</text:p>
          </table:table-cell>
          <table:table-cell table:style-name="ce158" office:value-type="percentage" office:value="0.0227" calcext:value-type="percentage">
            <text:p>2.27 %</text:p>
          </table:table-cell>
          <table:table-cell table:style-name="ce157" table:formula="of:=(([.B95]*(1-(1+[.B96])^(-10))/[.B96]+1/(1+[.B96])^10)-1)+[.B95]" office:value-type="percentage" office:value="0.0128429967097922" calcext:value-type="percentage">
            <text:p>1.28 %</text:p>
          </table:table-cell>
          <table:table-cell table:number-columns-repeated="16381"/>
        </table:table-row>
        <table:table-row table:style-name="ro2">
          <table:table-cell table:style-name="ce146" office:value-type="float" office:value="2016" calcext:value-type="float">
            <text:p>2016</text:p>
          </table:table-cell>
          <table:table-cell table:style-name="ce158" office:value-type="percentage" office:value="0.0245" calcext:value-type="percentage">
            <text:p>2.45 %</text:p>
          </table:table-cell>
          <table:table-cell table:style-name="ce157" table:formula="of:=(([.B96]*(1-(1+[.B97])^(-10))/[.B97]+1/(1+[.B97])^10)-1)+[.B96]" office:value-type="percentage" office:value="0.00690550469874779" calcext:value-type="percentage">
            <text:p>0.69 %</text:p>
          </table:table-cell>
          <table:table-cell table:number-columns-repeated="16381"/>
        </table:table-row>
        <table:table-row table:style-name="ro2">
          <table:table-cell table:style-name="ce146" office:value-type="float" office:value="2017" calcext:value-type="float">
            <text:p>2017</text:p>
          </table:table-cell>
          <table:table-cell table:style-name="ce158" office:value-type="percentage" office:value="0.0241" calcext:value-type="percentage">
            <text:p>2.41 %</text:p>
          </table:table-cell>
          <table:table-cell table:style-name="ce157" table:formula="of:=(([.B97]*(1-(1+[.B98])^(-10))/[.B98]+1/(1+[.B98])^10)-1)+[.B97]" office:value-type="percentage" office:value="0.0280171627077895" calcext:value-type="percentage">
            <text:p>2.80 %</text:p>
          </table:table-cell>
          <table:table-cell table:number-columns-repeated="16381"/>
        </table:table-row>
        <table:table-row table:style-name="ro2">
          <table:table-cell table:style-name="ce146" office:value-type="float" office:value="2018" calcext:value-type="float">
            <text:p>2018</text:p>
          </table:table-cell>
          <table:table-cell table:style-name="ce158" office:value-type="percentage" office:value="0.0269" calcext:value-type="percentage">
            <text:p>2.69 %</text:p>
          </table:table-cell>
          <table:table-cell table:style-name="ce157" table:formula="of:=(([.B98]*(1-(1+[.B99])^(-10))/[.B99]+1/(1+[.B99])^10)-1)+[.B98]" office:value-type="percentage" office:value="-0.000166923857134026" calcext:value-type="percentage">
            <text:p>-0.02 %</text:p>
          </table:table-cell>
          <table:table-cell table:number-columns-repeated="16381"/>
        </table:table-row>
        <table:table-row table:style-name="ro2">
          <table:table-cell table:style-name="ce146" office:value-type="float" office:value="2019" calcext:value-type="float">
            <text:p>2019</text:p>
          </table:table-cell>
          <table:table-cell table:style-name="ce173" office:value-type="percentage" office:value="0.0192" calcext:value-type="percentage">
            <text:p>1.92 %</text:p>
          </table:table-cell>
          <table:table-cell table:style-name="ce157" table:formula="of:=(([.B99]*(1-(1+[.B100])^(-10))/[.B100]+1/(1+[.B100])^10)-1)+[.B99]" office:value-type="percentage" office:value="0.0963563074154839" calcext:value-type="percentage">
            <text:p>9.64 %</text:p>
          </table:table-cell>
          <table:table-cell table:number-columns-repeated="16381"/>
        </table:table-row>
        <table:table-row table:style-name="ro9" table:number-rows-repeated="1048475">
          <table:table-cell table:number-columns-repeated="16384"/>
        </table:table-row>
        <table:table-row table:style-name="ro9">
          <table:table-cell table:number-columns-repeated="16384"/>
        </table:table-row>
      </table:table>
      <table:table table:name="T. Bill rates" table:style-name="ta5">
        <table:table-column table:style-name="co23" table:number-columns-repeated="2" table:default-cell-style-name="ce174"/>
        <table:table-column table:style-name="co25" table:default-cell-style-name="ce174"/>
        <table:table-column table:style-name="co3" table:number-columns-repeated="16381" table:default-cell-style-name="ce174"/>
        <table:table-row table:style-name="ro9">
          <table:table-cell office:value-type="string" calcext:value-type="string">
            <text:p>FRED Graph Observations</text:p>
          </table:table-cell>
          <table:table-cell table:number-columns-repeated="16383"/>
        </table:table-row>
        <table:table-row table:style-name="ro9">
          <table:table-cell office:value-type="string" calcext:value-type="string">
            <text:p>Federal Reserve Economic Data</text:p>
          </table:table-cell>
          <table:table-cell table:number-columns-repeated="16383"/>
        </table:table-row>
        <table:table-row table:style-name="ro9">
          <table:table-cell office:value-type="string" calcext:value-type="string">
            <text:p>Link: https://fred.stlouisfed.org</text:p>
          </table:table-cell>
          <table:table-cell table:number-columns-repeated="16383"/>
        </table:table-row>
        <table:table-row table:style-name="ro9">
          <table:table-cell office:value-type="string" calcext:value-type="string">
            <text:p>Help: https://fred.stlouisfed.org/help-faq</text:p>
          </table:table-cell>
          <table:table-cell table:number-columns-repeated="16383"/>
        </table:table-row>
        <table:table-row table:style-name="ro9">
          <table:table-cell office:value-type="string" calcext:value-type="string">
            <text:p>Economic Research Division</text:p>
          </table:table-cell>
          <table:table-cell table:number-columns-repeated="16383"/>
        </table:table-row>
        <table:table-row table:style-name="ro9">
          <table:table-cell office:value-type="string" calcext:value-type="string">
            <text:p>Federal Reserve Bank of St. Louis</text:p>
          </table:table-cell>
          <table:table-cell table:number-columns-repeated="16383"/>
        </table:table-row>
        <table:table-row table:style-name="ro9">
          <table:table-cell table:number-columns-repeated="16384"/>
        </table:table-row>
        <table:table-row table:style-name="ro9">
          <table:table-cell office:value-type="string" calcext:value-type="string">
            <text:p>TB3MS</text:p>
          </table:table-cell>
          <table:table-cell office:value-type="string" calcext:value-type="string">
            <text:p>3-Month Treasury Bill: Secondary Market Rate, Percent, Annual, Not Seasonally Adjusted</text:p>
          </table:table-cell>
          <table:table-cell table:number-columns-repeated="16382"/>
        </table:table-row>
        <table:table-row table:style-name="ro9">
          <table:table-cell table:number-columns-repeated="16384"/>
        </table:table-row>
        <table:table-row table:style-name="ro9">
          <table:table-cell office:value-type="string" calcext:value-type="string">
            <text:p>Frequency: Annual</text:p>
          </table:table-cell>
          <table:table-cell table:number-columns-repeated="16383"/>
        </table:table-row>
        <table:table-row table:style-name="ro9">
          <table:table-cell office:value-type="string" calcext:value-type="string">
            <text:p>observation_date</text:p>
          </table:table-cell>
          <table:table-cell office:value-type="string" calcext:value-type="string">
            <text:p>TB3MS</text:p>
          </table:table-cell>
          <table:table-cell table:number-columns-repeated="16382"/>
        </table:table-row>
        <table:table-row table:style-name="ro9">
          <table:table-cell table:style-name="ce175" office:value-type="date" office:date-value="1934-01-01" calcext:value-type="date">
            <text:p>1934-01-01</text:p>
          </table:table-cell>
          <table:table-cell table:style-name="ce177" office:value-type="float" office:value="0.278333333333333" calcext:value-type="float">
            <text:p>0.28</text:p>
          </table:table-cell>
          <table:table-cell table:style-name="ce179" table:formula="of:=[.B12]/100" office:value-type="percentage" office:value="0.00278333333333333" calcext:value-type="percentage">
            <text:p>0.28 %</text:p>
          </table:table-cell>
          <table:table-cell table:number-columns-repeated="16381"/>
        </table:table-row>
        <table:table-row table:style-name="ro9">
          <table:table-cell table:style-name="ce175" office:value-type="date" office:date-value="1935-01-01" calcext:value-type="date">
            <text:p>1935-01-01</text:p>
          </table:table-cell>
          <table:table-cell table:style-name="ce177" office:value-type="float" office:value="0.1675" calcext:value-type="float">
            <text:p>0.17</text:p>
          </table:table-cell>
          <table:table-cell table:style-name="ce179" table:formula="of:=[.B13]/100" office:value-type="percentage" office:value="0.001675" calcext:value-type="percentage">
            <text:p>0.17 %</text:p>
          </table:table-cell>
          <table:table-cell table:number-columns-repeated="16381"/>
        </table:table-row>
        <table:table-row table:style-name="ro9">
          <table:table-cell table:style-name="ce175" office:value-type="date" office:date-value="1936-01-01" calcext:value-type="date">
            <text:p>1936-01-01</text:p>
          </table:table-cell>
          <table:table-cell table:style-name="ce177" office:value-type="float" office:value="0.1725" calcext:value-type="float">
            <text:p>0.17</text:p>
          </table:table-cell>
          <table:table-cell table:style-name="ce179" table:formula="of:=[.B14]/100" office:value-type="percentage" office:value="0.001725" calcext:value-type="percentage">
            <text:p>0.17 %</text:p>
          </table:table-cell>
          <table:table-cell table:number-columns-repeated="16381"/>
        </table:table-row>
        <table:table-row table:style-name="ro9">
          <table:table-cell table:style-name="ce175" office:value-type="date" office:date-value="1937-01-01" calcext:value-type="date">
            <text:p>1937-01-01</text:p>
          </table:table-cell>
          <table:table-cell table:style-name="ce177" office:value-type="float" office:value="0.275833333333333" calcext:value-type="float">
            <text:p>0.28</text:p>
          </table:table-cell>
          <table:table-cell table:style-name="ce179" table:formula="of:=[.B15]/100" office:value-type="percentage" office:value="0.00275833333333333" calcext:value-type="percentage">
            <text:p>0.28 %</text:p>
          </table:table-cell>
          <table:table-cell table:number-columns-repeated="16381"/>
        </table:table-row>
        <table:table-row table:style-name="ro9">
          <table:table-cell table:style-name="ce175" office:value-type="date" office:date-value="1938-01-01" calcext:value-type="date">
            <text:p>1938-01-01</text:p>
          </table:table-cell>
          <table:table-cell table:style-name="ce177" office:value-type="float" office:value="0.065" calcext:value-type="float">
            <text:p>0.07</text:p>
          </table:table-cell>
          <table:table-cell table:style-name="ce179" table:formula="of:=[.B16]/100" office:value-type="percentage" office:value="0.00065" calcext:value-type="percentage">
            <text:p>0.07 %</text:p>
          </table:table-cell>
          <table:table-cell table:number-columns-repeated="16381"/>
        </table:table-row>
        <table:table-row table:style-name="ro9">
          <table:table-cell table:style-name="ce175" office:value-type="date" office:date-value="1939-01-01" calcext:value-type="date">
            <text:p>1939-01-01</text:p>
          </table:table-cell>
          <table:table-cell table:style-name="ce177" office:value-type="float" office:value="0.0458333333333333" calcext:value-type="float">
            <text:p>0.05</text:p>
          </table:table-cell>
          <table:table-cell table:style-name="ce179" table:formula="of:=[.B17]/100" office:value-type="percentage" office:value="0.000458333333333333" calcext:value-type="percentage">
            <text:p>0.05 %</text:p>
          </table:table-cell>
          <table:table-cell table:number-columns-repeated="16381"/>
        </table:table-row>
        <table:table-row table:style-name="ro9">
          <table:table-cell table:style-name="ce175" office:value-type="date" office:date-value="1940-01-01" calcext:value-type="date">
            <text:p>1940-01-01</text:p>
          </table:table-cell>
          <table:table-cell table:style-name="ce177" office:value-type="float" office:value="0.0358333333333333" calcext:value-type="float">
            <text:p>0.04</text:p>
          </table:table-cell>
          <table:table-cell table:style-name="ce179" table:formula="of:=[.B18]/100" office:value-type="percentage" office:value="0.000358333333333333" calcext:value-type="percentage">
            <text:p>0.04 %</text:p>
          </table:table-cell>
          <table:table-cell table:number-columns-repeated="16381"/>
        </table:table-row>
        <table:table-row table:style-name="ro9">
          <table:table-cell table:style-name="ce175" office:value-type="date" office:date-value="1941-01-01" calcext:value-type="date">
            <text:p>1941-01-01</text:p>
          </table:table-cell>
          <table:table-cell table:style-name="ce177" office:value-type="float" office:value="0.129166666666667" calcext:value-type="float">
            <text:p>0.13</text:p>
          </table:table-cell>
          <table:table-cell table:style-name="ce179" table:formula="of:=[.B19]/100" office:value-type="percentage" office:value="0.00129166666666667" calcext:value-type="percentage">
            <text:p>0.13 %</text:p>
          </table:table-cell>
          <table:table-cell table:number-columns-repeated="16381"/>
        </table:table-row>
        <table:table-row table:style-name="ro9">
          <table:table-cell table:style-name="ce175" office:value-type="date" office:date-value="1942-01-01" calcext:value-type="date">
            <text:p>1942-01-01</text:p>
          </table:table-cell>
          <table:table-cell table:style-name="ce177" office:value-type="float" office:value="0.3425" calcext:value-type="float">
            <text:p>0.34</text:p>
          </table:table-cell>
          <table:table-cell table:style-name="ce179" table:formula="of:=[.B20]/100" office:value-type="percentage" office:value="0.003425" calcext:value-type="percentage">
            <text:p>0.34 %</text:p>
          </table:table-cell>
          <table:table-cell table:number-columns-repeated="16381"/>
        </table:table-row>
        <table:table-row table:style-name="ro9">
          <table:table-cell table:style-name="ce175" office:value-type="date" office:date-value="1943-01-01" calcext:value-type="date">
            <text:p>1943-01-01</text:p>
          </table:table-cell>
          <table:table-cell table:style-name="ce177" office:value-type="float" office:value="0.38" calcext:value-type="float">
            <text:p>0.38</text:p>
          </table:table-cell>
          <table:table-cell table:style-name="ce179" table:formula="of:=[.B21]/100" office:value-type="percentage" office:value="0.0038" calcext:value-type="percentage">
            <text:p>0.38 %</text:p>
          </table:table-cell>
          <table:table-cell table:number-columns-repeated="16381"/>
        </table:table-row>
        <table:table-row table:style-name="ro9">
          <table:table-cell table:style-name="ce175" office:value-type="date" office:date-value="1944-01-01" calcext:value-type="date">
            <text:p>1944-01-01</text:p>
          </table:table-cell>
          <table:table-cell table:style-name="ce177" office:value-type="float" office:value="0.38" calcext:value-type="float">
            <text:p>0.38</text:p>
          </table:table-cell>
          <table:table-cell table:style-name="ce179" table:formula="of:=[.B22]/100" office:value-type="percentage" office:value="0.0038" calcext:value-type="percentage">
            <text:p>0.38 %</text:p>
          </table:table-cell>
          <table:table-cell table:number-columns-repeated="16381"/>
        </table:table-row>
        <table:table-row table:style-name="ro9">
          <table:table-cell table:style-name="ce175" office:value-type="date" office:date-value="1945-01-01" calcext:value-type="date">
            <text:p>1945-01-01</text:p>
          </table:table-cell>
          <table:table-cell table:style-name="ce177" office:value-type="float" office:value="0.38" calcext:value-type="float">
            <text:p>0.38</text:p>
          </table:table-cell>
          <table:table-cell table:style-name="ce179" table:formula="of:=[.B23]/100" office:value-type="percentage" office:value="0.0038" calcext:value-type="percentage">
            <text:p>0.38 %</text:p>
          </table:table-cell>
          <table:table-cell table:number-columns-repeated="16381"/>
        </table:table-row>
        <table:table-row table:style-name="ro9">
          <table:table-cell table:style-name="ce175" office:value-type="date" office:date-value="1946-01-01" calcext:value-type="date">
            <text:p>1946-01-01</text:p>
          </table:table-cell>
          <table:table-cell table:style-name="ce177" office:value-type="float" office:value="0.38" calcext:value-type="float">
            <text:p>0.38</text:p>
          </table:table-cell>
          <table:table-cell table:style-name="ce179" table:formula="of:=[.B24]/100" office:value-type="percentage" office:value="0.0038" calcext:value-type="percentage">
            <text:p>0.38 %</text:p>
          </table:table-cell>
          <table:table-cell table:number-columns-repeated="16381"/>
        </table:table-row>
        <table:table-row table:style-name="ro9">
          <table:table-cell table:style-name="ce175" office:value-type="date" office:date-value="1947-01-01" calcext:value-type="date">
            <text:p>1947-01-01</text:p>
          </table:table-cell>
          <table:table-cell table:style-name="ce177" office:value-type="float" office:value="0.600833333333333" calcext:value-type="float">
            <text:p>0.60</text:p>
          </table:table-cell>
          <table:table-cell table:style-name="ce179" table:formula="of:=[.B25]/100" office:value-type="percentage" office:value="0.00600833333333333" calcext:value-type="percentage">
            <text:p>0.60 %</text:p>
          </table:table-cell>
          <table:table-cell table:number-columns-repeated="16381"/>
        </table:table-row>
        <table:table-row table:style-name="ro9">
          <table:table-cell table:style-name="ce175" office:value-type="date" office:date-value="1948-01-01" calcext:value-type="date">
            <text:p>1948-01-01</text:p>
          </table:table-cell>
          <table:table-cell table:style-name="ce177" office:value-type="float" office:value="1.045" calcext:value-type="float">
            <text:p>1.05</text:p>
          </table:table-cell>
          <table:table-cell table:style-name="ce179" table:formula="of:=[.B26]/100" office:value-type="percentage" office:value="0.01045" calcext:value-type="percentage">
            <text:p>1.05 %</text:p>
          </table:table-cell>
          <table:table-cell table:number-columns-repeated="16381"/>
        </table:table-row>
        <table:table-row table:style-name="ro9">
          <table:table-cell table:style-name="ce175" office:value-type="date" office:date-value="1949-01-01" calcext:value-type="date">
            <text:p>1949-01-01</text:p>
          </table:table-cell>
          <table:table-cell table:style-name="ce177" office:value-type="float" office:value="1.115" calcext:value-type="float">
            <text:p>1.12</text:p>
          </table:table-cell>
          <table:table-cell table:style-name="ce179" table:formula="of:=[.B27]/100" office:value-type="percentage" office:value="0.01115" calcext:value-type="percentage">
            <text:p>1.12 %</text:p>
          </table:table-cell>
          <table:table-cell table:number-columns-repeated="16381"/>
        </table:table-row>
        <table:table-row table:style-name="ro9">
          <table:table-cell table:style-name="ce175" office:value-type="date" office:date-value="1950-01-01" calcext:value-type="date">
            <text:p>1950-01-01</text:p>
          </table:table-cell>
          <table:table-cell table:style-name="ce177" office:value-type="float" office:value="1.20333333333333" calcext:value-type="float">
            <text:p>1.20</text:p>
          </table:table-cell>
          <table:table-cell table:style-name="ce179" table:formula="of:=[.B28]/100" office:value-type="percentage" office:value="0.0120333333333333" calcext:value-type="percentage">
            <text:p>1.20 %</text:p>
          </table:table-cell>
          <table:table-cell table:number-columns-repeated="16381"/>
        </table:table-row>
        <table:table-row table:style-name="ro9">
          <table:table-cell table:style-name="ce175" office:value-type="date" office:date-value="1951-01-01" calcext:value-type="date">
            <text:p>1951-01-01</text:p>
          </table:table-cell>
          <table:table-cell table:style-name="ce177" office:value-type="float" office:value="1.5175" calcext:value-type="float">
            <text:p>1.52</text:p>
          </table:table-cell>
          <table:table-cell table:style-name="ce179" table:formula="of:=[.B29]/100" office:value-type="percentage" office:value="0.015175" calcext:value-type="percentage">
            <text:p>1.52 %</text:p>
          </table:table-cell>
          <table:table-cell table:number-columns-repeated="16381"/>
        </table:table-row>
        <table:table-row table:style-name="ro9">
          <table:table-cell table:style-name="ce175" office:value-type="date" office:date-value="1952-01-01" calcext:value-type="date">
            <text:p>1952-01-01</text:p>
          </table:table-cell>
          <table:table-cell table:style-name="ce177" office:value-type="float" office:value="1.7225" calcext:value-type="float">
            <text:p>1.72</text:p>
          </table:table-cell>
          <table:table-cell table:style-name="ce179" table:formula="of:=[.B30]/100" office:value-type="percentage" office:value="0.017225" calcext:value-type="percentage">
            <text:p>1.72 %</text:p>
          </table:table-cell>
          <table:table-cell table:number-columns-repeated="16381"/>
        </table:table-row>
        <table:table-row table:style-name="ro9">
          <table:table-cell table:style-name="ce175" office:value-type="date" office:date-value="1953-01-01" calcext:value-type="date">
            <text:p>1953-01-01</text:p>
          </table:table-cell>
          <table:table-cell table:style-name="ce177" office:value-type="float" office:value="1.89083333333333" calcext:value-type="float">
            <text:p>1.89</text:p>
          </table:table-cell>
          <table:table-cell table:style-name="ce179" table:formula="of:=[.B31]/100" office:value-type="percentage" office:value="0.0189083333333333" calcext:value-type="percentage">
            <text:p>1.89 %</text:p>
          </table:table-cell>
          <table:table-cell table:number-columns-repeated="16381"/>
        </table:table-row>
        <table:table-row table:style-name="ro9">
          <table:table-cell table:style-name="ce175" office:value-type="date" office:date-value="1954-01-01" calcext:value-type="date">
            <text:p>1954-01-01</text:p>
          </table:table-cell>
          <table:table-cell table:style-name="ce177" office:value-type="float" office:value="0.938333333333333" calcext:value-type="float">
            <text:p>0.94</text:p>
          </table:table-cell>
          <table:table-cell table:style-name="ce179" table:formula="of:=[.B32]/100" office:value-type="percentage" office:value="0.00938333333333333" calcext:value-type="percentage">
            <text:p>0.94 %</text:p>
          </table:table-cell>
          <table:table-cell table:number-columns-repeated="16381"/>
        </table:table-row>
        <table:table-row table:style-name="ro9">
          <table:table-cell table:style-name="ce175" office:value-type="date" office:date-value="1955-01-01" calcext:value-type="date">
            <text:p>1955-01-01</text:p>
          </table:table-cell>
          <table:table-cell table:style-name="ce177" office:value-type="float" office:value="1.725" calcext:value-type="float">
            <text:p>1.73</text:p>
          </table:table-cell>
          <table:table-cell table:style-name="ce179" table:formula="of:=[.B33]/100" office:value-type="percentage" office:value="0.01725" calcext:value-type="percentage">
            <text:p>1.73 %</text:p>
          </table:table-cell>
          <table:table-cell table:number-columns-repeated="16381"/>
        </table:table-row>
        <table:table-row table:style-name="ro9">
          <table:table-cell table:style-name="ce175" office:value-type="date" office:date-value="1956-01-01" calcext:value-type="date">
            <text:p>1956-01-01</text:p>
          </table:table-cell>
          <table:table-cell table:style-name="ce177" office:value-type="float" office:value="2.6275" calcext:value-type="float">
            <text:p>2.63</text:p>
          </table:table-cell>
          <table:table-cell table:style-name="ce179" table:formula="of:=[.B34]/100" office:value-type="percentage" office:value="0.026275" calcext:value-type="percentage">
            <text:p>2.63 %</text:p>
          </table:table-cell>
          <table:table-cell table:number-columns-repeated="16381"/>
        </table:table-row>
        <table:table-row table:style-name="ro9">
          <table:table-cell table:style-name="ce175" office:value-type="date" office:date-value="1957-01-01" calcext:value-type="date">
            <text:p>1957-01-01</text:p>
          </table:table-cell>
          <table:table-cell table:style-name="ce177" office:value-type="float" office:value="3.225" calcext:value-type="float">
            <text:p>3.23</text:p>
          </table:table-cell>
          <table:table-cell table:style-name="ce179" table:formula="of:=[.B35]/100" office:value-type="percentage" office:value="0.03225" calcext:value-type="percentage">
            <text:p>3.23 %</text:p>
          </table:table-cell>
          <table:table-cell table:number-columns-repeated="16381"/>
        </table:table-row>
        <table:table-row table:style-name="ro9">
          <table:table-cell table:style-name="ce175" office:value-type="date" office:date-value="1958-01-01" calcext:value-type="date">
            <text:p>1958-01-01</text:p>
          </table:table-cell>
          <table:table-cell table:style-name="ce177" office:value-type="float" office:value="1.77083333333333" calcext:value-type="float">
            <text:p>1.77</text:p>
          </table:table-cell>
          <table:table-cell table:style-name="ce179" table:formula="of:=[.B36]/100" office:value-type="percentage" office:value="0.0177083333333333" calcext:value-type="percentage">
            <text:p>1.77 %</text:p>
          </table:table-cell>
          <table:table-cell table:number-columns-repeated="16381"/>
        </table:table-row>
        <table:table-row table:style-name="ro9">
          <table:table-cell table:style-name="ce175" office:value-type="date" office:date-value="1959-01-01" calcext:value-type="date">
            <text:p>1959-01-01</text:p>
          </table:table-cell>
          <table:table-cell table:style-name="ce177" office:value-type="float" office:value="3.38583333333333" calcext:value-type="float">
            <text:p>3.39</text:p>
          </table:table-cell>
          <table:table-cell table:style-name="ce179" table:formula="of:=[.B37]/100" office:value-type="percentage" office:value="0.0338583333333333" calcext:value-type="percentage">
            <text:p>3.39 %</text:p>
          </table:table-cell>
          <table:table-cell table:number-columns-repeated="16381"/>
        </table:table-row>
        <table:table-row table:style-name="ro9">
          <table:table-cell table:style-name="ce175" office:value-type="date" office:date-value="1960-01-01" calcext:value-type="date">
            <text:p>1960-01-01</text:p>
          </table:table-cell>
          <table:table-cell table:style-name="ce177" office:value-type="float" office:value="2.88333333333333" calcext:value-type="float">
            <text:p>2.88</text:p>
          </table:table-cell>
          <table:table-cell table:style-name="ce179" table:formula="of:=[.B38]/100" office:value-type="percentage" office:value="0.0288333333333333" calcext:value-type="percentage">
            <text:p>2.88 %</text:p>
          </table:table-cell>
          <table:table-cell table:number-columns-repeated="16381"/>
        </table:table-row>
        <table:table-row table:style-name="ro9">
          <table:table-cell table:style-name="ce175" office:value-type="date" office:date-value="1961-01-01" calcext:value-type="date">
            <text:p>1961-01-01</text:p>
          </table:table-cell>
          <table:table-cell table:style-name="ce177" office:value-type="float" office:value="2.35416666666667" calcext:value-type="float">
            <text:p>2.35</text:p>
          </table:table-cell>
          <table:table-cell table:style-name="ce179" table:formula="of:=[.B39]/100" office:value-type="percentage" office:value="0.0235416666666667" calcext:value-type="percentage">
            <text:p>2.35 %</text:p>
          </table:table-cell>
          <table:table-cell table:number-columns-repeated="16381"/>
        </table:table-row>
        <table:table-row table:style-name="ro9">
          <table:table-cell table:style-name="ce175" office:value-type="date" office:date-value="1962-01-01" calcext:value-type="date">
            <text:p>1962-01-01</text:p>
          </table:table-cell>
          <table:table-cell table:style-name="ce177" office:value-type="float" office:value="2.77333333333333" calcext:value-type="float">
            <text:p>2.77</text:p>
          </table:table-cell>
          <table:table-cell table:style-name="ce179" table:formula="of:=[.B40]/100" office:value-type="percentage" office:value="0.0277333333333333" calcext:value-type="percentage">
            <text:p>2.77 %</text:p>
          </table:table-cell>
          <table:table-cell table:number-columns-repeated="16381"/>
        </table:table-row>
        <table:table-row table:style-name="ro9">
          <table:table-cell table:style-name="ce175" office:value-type="date" office:date-value="1963-01-01" calcext:value-type="date">
            <text:p>1963-01-01</text:p>
          </table:table-cell>
          <table:table-cell table:style-name="ce177" office:value-type="float" office:value="3.15916666666667" calcext:value-type="float">
            <text:p>3.16</text:p>
          </table:table-cell>
          <table:table-cell table:style-name="ce179" table:formula="of:=[.B41]/100" office:value-type="percentage" office:value="0.0315916666666667" calcext:value-type="percentage">
            <text:p>3.16 %</text:p>
          </table:table-cell>
          <table:table-cell table:number-columns-repeated="16381"/>
        </table:table-row>
        <table:table-row table:style-name="ro9">
          <table:table-cell table:style-name="ce175" office:value-type="date" office:date-value="1964-01-01" calcext:value-type="date">
            <text:p>1964-01-01</text:p>
          </table:table-cell>
          <table:table-cell table:style-name="ce177" office:value-type="float" office:value="3.54666666666667" calcext:value-type="float">
            <text:p>3.55</text:p>
          </table:table-cell>
          <table:table-cell table:style-name="ce179" table:formula="of:=[.B42]/100" office:value-type="percentage" office:value="0.0354666666666667" calcext:value-type="percentage">
            <text:p>3.55 %</text:p>
          </table:table-cell>
          <table:table-cell table:number-columns-repeated="16381"/>
        </table:table-row>
        <table:table-row table:style-name="ro9">
          <table:table-cell table:style-name="ce175" office:value-type="date" office:date-value="1965-01-01" calcext:value-type="date">
            <text:p>1965-01-01</text:p>
          </table:table-cell>
          <table:table-cell table:style-name="ce177" office:value-type="float" office:value="3.94916666666667" calcext:value-type="float">
            <text:p>3.95</text:p>
          </table:table-cell>
          <table:table-cell table:style-name="ce179" table:formula="of:=[.B43]/100" office:value-type="percentage" office:value="0.0394916666666667" calcext:value-type="percentage">
            <text:p>3.95 %</text:p>
          </table:table-cell>
          <table:table-cell table:number-columns-repeated="16381"/>
        </table:table-row>
        <table:table-row table:style-name="ro9">
          <table:table-cell table:style-name="ce175" office:value-type="date" office:date-value="1966-01-01" calcext:value-type="date">
            <text:p>1966-01-01</text:p>
          </table:table-cell>
          <table:table-cell table:style-name="ce177" office:value-type="float" office:value="4.8625" calcext:value-type="float">
            <text:p>4.86</text:p>
          </table:table-cell>
          <table:table-cell table:style-name="ce179" table:formula="of:=[.B44]/100" office:value-type="percentage" office:value="0.048625" calcext:value-type="percentage">
            <text:p>4.86 %</text:p>
          </table:table-cell>
          <table:table-cell table:number-columns-repeated="16381"/>
        </table:table-row>
        <table:table-row table:style-name="ro9">
          <table:table-cell table:style-name="ce175" office:value-type="date" office:date-value="1967-01-01" calcext:value-type="date">
            <text:p>1967-01-01</text:p>
          </table:table-cell>
          <table:table-cell table:style-name="ce177" office:value-type="float" office:value="4.30666666666667" calcext:value-type="float">
            <text:p>4.31</text:p>
          </table:table-cell>
          <table:table-cell table:style-name="ce179" table:formula="of:=[.B45]/100" office:value-type="percentage" office:value="0.0430666666666667" calcext:value-type="percentage">
            <text:p>4.31 %</text:p>
          </table:table-cell>
          <table:table-cell table:number-columns-repeated="16381"/>
        </table:table-row>
        <table:table-row table:style-name="ro9">
          <table:table-cell table:style-name="ce175" office:value-type="date" office:date-value="1968-01-01" calcext:value-type="date">
            <text:p>1968-01-01</text:p>
          </table:table-cell>
          <table:table-cell table:style-name="ce177" office:value-type="float" office:value="5.33833333333333" calcext:value-type="float">
            <text:p>5.34</text:p>
          </table:table-cell>
          <table:table-cell table:style-name="ce179" table:formula="of:=[.B46]/100" office:value-type="percentage" office:value="0.0533833333333333" calcext:value-type="percentage">
            <text:p>5.34 %</text:p>
          </table:table-cell>
          <table:table-cell table:number-columns-repeated="16381"/>
        </table:table-row>
        <table:table-row table:style-name="ro9">
          <table:table-cell table:style-name="ce175" office:value-type="date" office:date-value="1969-01-01" calcext:value-type="date">
            <text:p>1969-01-01</text:p>
          </table:table-cell>
          <table:table-cell table:style-name="ce177" office:value-type="float" office:value="6.66666666666667" calcext:value-type="float">
            <text:p>6.67</text:p>
          </table:table-cell>
          <table:table-cell table:style-name="ce179" table:formula="of:=[.B47]/100" office:value-type="percentage" office:value="0.0666666666666667" calcext:value-type="percentage">
            <text:p>6.67 %</text:p>
          </table:table-cell>
          <table:table-cell table:number-columns-repeated="16381"/>
        </table:table-row>
        <table:table-row table:style-name="ro9">
          <table:table-cell table:style-name="ce175" office:value-type="date" office:date-value="1970-01-01" calcext:value-type="date">
            <text:p>1970-01-01</text:p>
          </table:table-cell>
          <table:table-cell table:style-name="ce177" office:value-type="float" office:value="6.39166666666667" calcext:value-type="float">
            <text:p>6.39</text:p>
          </table:table-cell>
          <table:table-cell table:style-name="ce179" table:formula="of:=[.B48]/100" office:value-type="percentage" office:value="0.0639166666666667" calcext:value-type="percentage">
            <text:p>6.39 %</text:p>
          </table:table-cell>
          <table:table-cell table:number-columns-repeated="16381"/>
        </table:table-row>
        <table:table-row table:style-name="ro9">
          <table:table-cell table:style-name="ce175" office:value-type="date" office:date-value="1971-01-01" calcext:value-type="date">
            <text:p>1971-01-01</text:p>
          </table:table-cell>
          <table:table-cell table:style-name="ce177" office:value-type="float" office:value="4.3325" calcext:value-type="float">
            <text:p>4.33</text:p>
          </table:table-cell>
          <table:table-cell table:style-name="ce179" table:formula="of:=[.B49]/100" office:value-type="percentage" office:value="0.043325" calcext:value-type="percentage">
            <text:p>4.33 %</text:p>
          </table:table-cell>
          <table:table-cell table:number-columns-repeated="16381"/>
        </table:table-row>
        <table:table-row table:style-name="ro9">
          <table:table-cell table:style-name="ce175" office:value-type="date" office:date-value="1972-01-01" calcext:value-type="date">
            <text:p>1972-01-01</text:p>
          </table:table-cell>
          <table:table-cell table:style-name="ce177" office:value-type="float" office:value="4.0725" calcext:value-type="float">
            <text:p>4.07</text:p>
          </table:table-cell>
          <table:table-cell table:style-name="ce179" table:formula="of:=[.B50]/100" office:value-type="percentage" office:value="0.040725" calcext:value-type="percentage">
            <text:p>4.07 %</text:p>
          </table:table-cell>
          <table:table-cell table:number-columns-repeated="16381"/>
        </table:table-row>
        <table:table-row table:style-name="ro9">
          <table:table-cell table:style-name="ce175" office:value-type="date" office:date-value="1973-01-01" calcext:value-type="date">
            <text:p>1973-01-01</text:p>
          </table:table-cell>
          <table:table-cell table:style-name="ce177" office:value-type="float" office:value="7.03166666666667" calcext:value-type="float">
            <text:p>7.03</text:p>
          </table:table-cell>
          <table:table-cell table:style-name="ce179" table:formula="of:=[.B51]/100" office:value-type="percentage" office:value="0.0703166666666667" calcext:value-type="percentage">
            <text:p>7.03 %</text:p>
          </table:table-cell>
          <table:table-cell table:number-columns-repeated="16381"/>
        </table:table-row>
        <table:table-row table:style-name="ro9">
          <table:table-cell table:style-name="ce175" office:value-type="date" office:date-value="1974-01-01" calcext:value-type="date">
            <text:p>1974-01-01</text:p>
          </table:table-cell>
          <table:table-cell table:style-name="ce177" office:value-type="float" office:value="7.83" calcext:value-type="float">
            <text:p>7.83</text:p>
          </table:table-cell>
          <table:table-cell table:style-name="ce179" table:formula="of:=[.B52]/100" office:value-type="percentage" office:value="0.0783" calcext:value-type="percentage">
            <text:p>7.83 %</text:p>
          </table:table-cell>
          <table:table-cell table:number-columns-repeated="16381"/>
        </table:table-row>
        <table:table-row table:style-name="ro9">
          <table:table-cell table:style-name="ce175" office:value-type="date" office:date-value="1975-01-01" calcext:value-type="date">
            <text:p>1975-01-01</text:p>
          </table:table-cell>
          <table:table-cell table:style-name="ce177" office:value-type="float" office:value="5.775" calcext:value-type="float">
            <text:p>5.78</text:p>
          </table:table-cell>
          <table:table-cell table:style-name="ce179" table:formula="of:=[.B53]/100" office:value-type="percentage" office:value="0.05775" calcext:value-type="percentage">
            <text:p>5.78 %</text:p>
          </table:table-cell>
          <table:table-cell table:number-columns-repeated="16381"/>
        </table:table-row>
        <table:table-row table:style-name="ro9">
          <table:table-cell table:style-name="ce175" office:value-type="date" office:date-value="1976-01-01" calcext:value-type="date">
            <text:p>1976-01-01</text:p>
          </table:table-cell>
          <table:table-cell table:style-name="ce177" office:value-type="float" office:value="4.97416666666667" calcext:value-type="float">
            <text:p>4.97</text:p>
          </table:table-cell>
          <table:table-cell table:style-name="ce179" table:formula="of:=[.B54]/100" office:value-type="percentage" office:value="0.0497416666666667" calcext:value-type="percentage">
            <text:p>4.97 %</text:p>
          </table:table-cell>
          <table:table-cell table:number-columns-repeated="16381"/>
        </table:table-row>
        <table:table-row table:style-name="ro9">
          <table:table-cell table:style-name="ce175" office:value-type="date" office:date-value="1977-01-01" calcext:value-type="date">
            <text:p>1977-01-01</text:p>
          </table:table-cell>
          <table:table-cell table:style-name="ce177" office:value-type="float" office:value="5.26916666666667" calcext:value-type="float">
            <text:p>5.27</text:p>
          </table:table-cell>
          <table:table-cell table:style-name="ce179" table:formula="of:=[.B55]/100" office:value-type="percentage" office:value="0.0526916666666667" calcext:value-type="percentage">
            <text:p>5.27 %</text:p>
          </table:table-cell>
          <table:table-cell table:number-columns-repeated="16381"/>
        </table:table-row>
        <table:table-row table:style-name="ro9">
          <table:table-cell table:style-name="ce175" office:value-type="date" office:date-value="1978-01-01" calcext:value-type="date">
            <text:p>1978-01-01</text:p>
          </table:table-cell>
          <table:table-cell table:style-name="ce177" office:value-type="float" office:value="7.18833333333333" calcext:value-type="float">
            <text:p>7.19</text:p>
          </table:table-cell>
          <table:table-cell table:style-name="ce179" table:formula="of:=[.B56]/100" office:value-type="percentage" office:value="0.0718833333333333" calcext:value-type="percentage">
            <text:p>7.19 %</text:p>
          </table:table-cell>
          <table:table-cell table:number-columns-repeated="16381"/>
        </table:table-row>
        <table:table-row table:style-name="ro9">
          <table:table-cell table:style-name="ce175" office:value-type="date" office:date-value="1979-01-01" calcext:value-type="date">
            <text:p>1979-01-01</text:p>
          </table:table-cell>
          <table:table-cell table:style-name="ce177" office:value-type="float" office:value="10.0691666666667" calcext:value-type="float">
            <text:p>10.07</text:p>
          </table:table-cell>
          <table:table-cell table:style-name="ce179" table:formula="of:=[.B57]/100" office:value-type="percentage" office:value="0.100691666666667" calcext:value-type="percentage">
            <text:p>10.07 %</text:p>
          </table:table-cell>
          <table:table-cell table:number-columns-repeated="16381"/>
        </table:table-row>
        <table:table-row table:style-name="ro9">
          <table:table-cell table:style-name="ce175" office:value-type="date" office:date-value="1980-01-01" calcext:value-type="date">
            <text:p>1980-01-01</text:p>
          </table:table-cell>
          <table:table-cell table:style-name="ce177" office:value-type="float" office:value="11.4341666666667" calcext:value-type="float">
            <text:p>11.43</text:p>
          </table:table-cell>
          <table:table-cell table:style-name="ce179" table:formula="of:=[.B58]/100" office:value-type="percentage" office:value="0.114341666666667" calcext:value-type="percentage">
            <text:p>11.43 %</text:p>
          </table:table-cell>
          <table:table-cell table:number-columns-repeated="16381"/>
        </table:table-row>
        <table:table-row table:style-name="ro9">
          <table:table-cell table:style-name="ce175" office:value-type="date" office:date-value="1981-01-01" calcext:value-type="date">
            <text:p>1981-01-01</text:p>
          </table:table-cell>
          <table:table-cell table:style-name="ce177" office:value-type="float" office:value="14.025" calcext:value-type="float">
            <text:p>14.03</text:p>
          </table:table-cell>
          <table:table-cell table:style-name="ce179" table:formula="of:=[.B59]/100" office:value-type="percentage" office:value="0.14025" calcext:value-type="percentage">
            <text:p>14.03 %</text:p>
          </table:table-cell>
          <table:table-cell table:number-columns-repeated="16381"/>
        </table:table-row>
        <table:table-row table:style-name="ro9">
          <table:table-cell table:style-name="ce175" office:value-type="date" office:date-value="1982-01-01" calcext:value-type="date">
            <text:p>1982-01-01</text:p>
          </table:table-cell>
          <table:table-cell table:style-name="ce177" office:value-type="float" office:value="10.6141666666667" calcext:value-type="float">
            <text:p>10.61</text:p>
          </table:table-cell>
          <table:table-cell table:style-name="ce179" table:formula="of:=[.B60]/100" office:value-type="percentage" office:value="0.106141666666667" calcext:value-type="percentage">
            <text:p>10.61 %</text:p>
          </table:table-cell>
          <table:table-cell table:number-columns-repeated="16381"/>
        </table:table-row>
        <table:table-row table:style-name="ro9">
          <table:table-cell table:style-name="ce175" office:value-type="date" office:date-value="1983-01-01" calcext:value-type="date">
            <text:p>1983-01-01</text:p>
          </table:table-cell>
          <table:table-cell table:style-name="ce177" office:value-type="float" office:value="8.61083333333333" calcext:value-type="float">
            <text:p>8.61</text:p>
          </table:table-cell>
          <table:table-cell table:style-name="ce179" table:formula="of:=[.B61]/100" office:value-type="percentage" office:value="0.0861083333333333" calcext:value-type="percentage">
            <text:p>8.61 %</text:p>
          </table:table-cell>
          <table:table-cell table:number-columns-repeated="16381"/>
        </table:table-row>
        <table:table-row table:style-name="ro9">
          <table:table-cell table:style-name="ce175" office:value-type="date" office:date-value="1984-01-01" calcext:value-type="date">
            <text:p>1984-01-01</text:p>
          </table:table-cell>
          <table:table-cell table:style-name="ce177" office:value-type="float" office:value="9.5225" calcext:value-type="float">
            <text:p>9.52</text:p>
          </table:table-cell>
          <table:table-cell table:style-name="ce179" table:formula="of:=[.B62]/100" office:value-type="percentage" office:value="0.095225" calcext:value-type="percentage">
            <text:p>9.52 %</text:p>
          </table:table-cell>
          <table:table-cell table:number-columns-repeated="16381"/>
        </table:table-row>
        <table:table-row table:style-name="ro9">
          <table:table-cell table:style-name="ce175" office:value-type="date" office:date-value="1985-01-01" calcext:value-type="date">
            <text:p>1985-01-01</text:p>
          </table:table-cell>
          <table:table-cell table:style-name="ce177" office:value-type="float" office:value="7.47916666666667" calcext:value-type="float">
            <text:p>7.48</text:p>
          </table:table-cell>
          <table:table-cell table:style-name="ce179" table:formula="of:=[.B63]/100" office:value-type="percentage" office:value="0.0747916666666667" calcext:value-type="percentage">
            <text:p>7.48 %</text:p>
          </table:table-cell>
          <table:table-cell table:number-columns-repeated="16381"/>
        </table:table-row>
        <table:table-row table:style-name="ro9">
          <table:table-cell table:style-name="ce175" office:value-type="date" office:date-value="1986-01-01" calcext:value-type="date">
            <text:p>1986-01-01</text:p>
          </table:table-cell>
          <table:table-cell table:style-name="ce177" office:value-type="float" office:value="5.97833333333333" calcext:value-type="float">
            <text:p>5.98</text:p>
          </table:table-cell>
          <table:table-cell table:style-name="ce179" table:formula="of:=[.B64]/100" office:value-type="percentage" office:value="0.0597833333333333" calcext:value-type="percentage">
            <text:p>5.98 %</text:p>
          </table:table-cell>
          <table:table-cell table:number-columns-repeated="16381"/>
        </table:table-row>
        <table:table-row table:style-name="ro9">
          <table:table-cell table:style-name="ce175" office:value-type="date" office:date-value="1987-01-01" calcext:value-type="date">
            <text:p>1987-01-01</text:p>
          </table:table-cell>
          <table:table-cell table:style-name="ce177" office:value-type="float" office:value="5.775" calcext:value-type="float">
            <text:p>5.78</text:p>
          </table:table-cell>
          <table:table-cell table:style-name="ce179" table:formula="of:=[.B65]/100" office:value-type="percentage" office:value="0.05775" calcext:value-type="percentage">
            <text:p>5.78 %</text:p>
          </table:table-cell>
          <table:table-cell table:number-columns-repeated="16381"/>
        </table:table-row>
        <table:table-row table:style-name="ro9">
          <table:table-cell table:style-name="ce175" office:value-type="date" office:date-value="1988-01-01" calcext:value-type="date">
            <text:p>1988-01-01</text:p>
          </table:table-cell>
          <table:table-cell table:style-name="ce177" office:value-type="float" office:value="6.6675" calcext:value-type="float">
            <text:p>6.67</text:p>
          </table:table-cell>
          <table:table-cell table:style-name="ce179" table:formula="of:=[.B66]/100" office:value-type="percentage" office:value="0.066675" calcext:value-type="percentage">
            <text:p>6.67 %</text:p>
          </table:table-cell>
          <table:table-cell table:number-columns-repeated="16381"/>
        </table:table-row>
        <table:table-row table:style-name="ro9">
          <table:table-cell table:style-name="ce175" office:value-type="date" office:date-value="1989-01-01" calcext:value-type="date">
            <text:p>1989-01-01</text:p>
          </table:table-cell>
          <table:table-cell table:style-name="ce177" office:value-type="float" office:value="8.11166666666667" calcext:value-type="float">
            <text:p>8.11</text:p>
          </table:table-cell>
          <table:table-cell table:style-name="ce179" table:formula="of:=[.B67]/100" office:value-type="percentage" office:value="0.0811166666666667" calcext:value-type="percentage">
            <text:p>8.11 %</text:p>
          </table:table-cell>
          <table:table-cell table:number-columns-repeated="16381"/>
        </table:table-row>
        <table:table-row table:style-name="ro9">
          <table:table-cell table:style-name="ce175" office:value-type="date" office:date-value="1990-01-01" calcext:value-type="date">
            <text:p>1990-01-01</text:p>
          </table:table-cell>
          <table:table-cell table:style-name="ce177" office:value-type="float" office:value="7.49333333333333" calcext:value-type="float">
            <text:p>7.49</text:p>
          </table:table-cell>
          <table:table-cell table:style-name="ce179" table:formula="of:=[.B68]/100" office:value-type="percentage" office:value="0.0749333333333333" calcext:value-type="percentage">
            <text:p>7.49 %</text:p>
          </table:table-cell>
          <table:table-cell table:number-columns-repeated="16381"/>
        </table:table-row>
        <table:table-row table:style-name="ro9">
          <table:table-cell table:style-name="ce175" office:value-type="date" office:date-value="1991-01-01" calcext:value-type="date">
            <text:p>1991-01-01</text:p>
          </table:table-cell>
          <table:table-cell table:style-name="ce177" office:value-type="float" office:value="5.375" calcext:value-type="float">
            <text:p>5.38</text:p>
          </table:table-cell>
          <table:table-cell table:style-name="ce179" table:formula="of:=[.B69]/100" office:value-type="percentage" office:value="0.05375" calcext:value-type="percentage">
            <text:p>5.38 %</text:p>
          </table:table-cell>
          <table:table-cell table:number-columns-repeated="16381"/>
        </table:table-row>
        <table:table-row table:style-name="ro9">
          <table:table-cell table:style-name="ce175" office:value-type="date" office:date-value="1992-01-01" calcext:value-type="date">
            <text:p>1992-01-01</text:p>
          </table:table-cell>
          <table:table-cell table:style-name="ce177" office:value-type="float" office:value="3.43166666666667" calcext:value-type="float">
            <text:p>3.43</text:p>
          </table:table-cell>
          <table:table-cell table:style-name="ce179" table:formula="of:=[.B70]/100" office:value-type="percentage" office:value="0.0343166666666667" calcext:value-type="percentage">
            <text:p>3.43 %</text:p>
          </table:table-cell>
          <table:table-cell table:number-columns-repeated="16381"/>
        </table:table-row>
        <table:table-row table:style-name="ro9">
          <table:table-cell table:style-name="ce175" office:value-type="date" office:date-value="1993-01-01" calcext:value-type="date">
            <text:p>1993-01-01</text:p>
          </table:table-cell>
          <table:table-cell table:style-name="ce177" office:value-type="float" office:value="2.9975" calcext:value-type="float">
            <text:p>3.00</text:p>
          </table:table-cell>
          <table:table-cell table:style-name="ce179" table:formula="of:=[.B71]/100" office:value-type="percentage" office:value="0.029975" calcext:value-type="percentage">
            <text:p>3.00 %</text:p>
          </table:table-cell>
          <table:table-cell table:number-columns-repeated="16381"/>
        </table:table-row>
        <table:table-row table:style-name="ro9">
          <table:table-cell table:style-name="ce175" office:value-type="date" office:date-value="1994-01-01" calcext:value-type="date">
            <text:p>1994-01-01</text:p>
          </table:table-cell>
          <table:table-cell table:style-name="ce177" office:value-type="float" office:value="4.24666666666667" calcext:value-type="float">
            <text:p>4.25</text:p>
          </table:table-cell>
          <table:table-cell table:style-name="ce179" table:formula="of:=[.B72]/100" office:value-type="percentage" office:value="0.0424666666666667" calcext:value-type="percentage">
            <text:p>4.25 %</text:p>
          </table:table-cell>
          <table:table-cell table:number-columns-repeated="16381"/>
        </table:table-row>
        <table:table-row table:style-name="ro9">
          <table:table-cell table:style-name="ce175" office:value-type="date" office:date-value="1995-01-01" calcext:value-type="date">
            <text:p>1995-01-01</text:p>
          </table:table-cell>
          <table:table-cell table:style-name="ce177" office:value-type="float" office:value="5.49" calcext:value-type="float">
            <text:p>5.49</text:p>
          </table:table-cell>
          <table:table-cell table:style-name="ce179" table:formula="of:=[.B73]/100" office:value-type="percentage" office:value="0.0549" calcext:value-type="percentage">
            <text:p>5.49 %</text:p>
          </table:table-cell>
          <table:table-cell table:number-columns-repeated="16381"/>
        </table:table-row>
        <table:table-row table:style-name="ro9">
          <table:table-cell table:style-name="ce175" office:value-type="date" office:date-value="1996-01-01" calcext:value-type="date">
            <text:p>1996-01-01</text:p>
          </table:table-cell>
          <table:table-cell table:style-name="ce177" office:value-type="float" office:value="5.00583333333333" calcext:value-type="float">
            <text:p>5.01</text:p>
          </table:table-cell>
          <table:table-cell table:style-name="ce179" table:formula="of:=[.B74]/100" office:value-type="percentage" office:value="0.0500583333333333" calcext:value-type="percentage">
            <text:p>5.01 %</text:p>
          </table:table-cell>
          <table:table-cell table:number-columns-repeated="16381"/>
        </table:table-row>
        <table:table-row table:style-name="ro9">
          <table:table-cell table:style-name="ce175" office:value-type="date" office:date-value="1997-01-01" calcext:value-type="date">
            <text:p>1997-01-01</text:p>
          </table:table-cell>
          <table:table-cell table:style-name="ce177" office:value-type="float" office:value="5.06083333333333" calcext:value-type="float">
            <text:p>5.06</text:p>
          </table:table-cell>
          <table:table-cell table:style-name="ce179" table:formula="of:=[.B75]/100" office:value-type="percentage" office:value="0.0506083333333333" calcext:value-type="percentage">
            <text:p>5.06 %</text:p>
          </table:table-cell>
          <table:table-cell table:number-columns-repeated="16381"/>
        </table:table-row>
        <table:table-row table:style-name="ro9">
          <table:table-cell table:style-name="ce175" office:value-type="date" office:date-value="1998-01-01" calcext:value-type="date">
            <text:p>1998-01-01</text:p>
          </table:table-cell>
          <table:table-cell table:style-name="ce177" office:value-type="float" office:value="4.77666666666667" calcext:value-type="float">
            <text:p>4.78</text:p>
          </table:table-cell>
          <table:table-cell table:style-name="ce179" table:formula="of:=[.B76]/100" office:value-type="percentage" office:value="0.0477666666666667" calcext:value-type="percentage">
            <text:p>4.78 %</text:p>
          </table:table-cell>
          <table:table-cell table:number-columns-repeated="16381"/>
        </table:table-row>
        <table:table-row table:style-name="ro9">
          <table:table-cell table:style-name="ce175" office:value-type="date" office:date-value="1999-01-01" calcext:value-type="date">
            <text:p>1999-01-01</text:p>
          </table:table-cell>
          <table:table-cell table:style-name="ce177" office:value-type="float" office:value="4.63833333333333" calcext:value-type="float">
            <text:p>4.64</text:p>
          </table:table-cell>
          <table:table-cell table:style-name="ce179" table:formula="of:=[.B77]/100" office:value-type="percentage" office:value="0.0463833333333333" calcext:value-type="percentage">
            <text:p>4.64 %</text:p>
          </table:table-cell>
          <table:table-cell table:number-columns-repeated="16381"/>
        </table:table-row>
        <table:table-row table:style-name="ro9">
          <table:table-cell table:style-name="ce175" office:value-type="date" office:date-value="2000-01-01" calcext:value-type="date">
            <text:p>2000-01-01</text:p>
          </table:table-cell>
          <table:table-cell table:style-name="ce177" office:value-type="float" office:value="5.81666666666667" calcext:value-type="float">
            <text:p>5.82</text:p>
          </table:table-cell>
          <table:table-cell table:style-name="ce179" table:formula="of:=[.B78]/100" office:value-type="percentage" office:value="0.0581666666666667" calcext:value-type="percentage">
            <text:p>5.82 %</text:p>
          </table:table-cell>
          <table:table-cell table:number-columns-repeated="16381"/>
        </table:table-row>
        <table:table-row table:style-name="ro9">
          <table:table-cell table:style-name="ce175" office:value-type="date" office:date-value="2001-01-01" calcext:value-type="date">
            <text:p>2001-01-01</text:p>
          </table:table-cell>
          <table:table-cell table:style-name="ce177" office:value-type="float" office:value="3.38833333333333" calcext:value-type="float">
            <text:p>3.39</text:p>
          </table:table-cell>
          <table:table-cell table:style-name="ce179" table:formula="of:=[.B79]/100" office:value-type="percentage" office:value="0.0338833333333333" calcext:value-type="percentage">
            <text:p>3.39 %</text:p>
          </table:table-cell>
          <table:table-cell table:number-columns-repeated="16381"/>
        </table:table-row>
        <table:table-row table:style-name="ro9">
          <table:table-cell table:style-name="ce175" office:value-type="date" office:date-value="2002-01-01" calcext:value-type="date">
            <text:p>2002-01-01</text:p>
          </table:table-cell>
          <table:table-cell table:style-name="ce177" office:value-type="float" office:value="1.6025" calcext:value-type="float">
            <text:p>1.60</text:p>
          </table:table-cell>
          <table:table-cell table:style-name="ce179" table:formula="of:=[.B80]/100" office:value-type="percentage" office:value="0.016025" calcext:value-type="percentage">
            <text:p>1.60 %</text:p>
          </table:table-cell>
          <table:table-cell table:number-columns-repeated="16381"/>
        </table:table-row>
        <table:table-row table:style-name="ro9">
          <table:table-cell table:style-name="ce175" office:value-type="date" office:date-value="2003-01-01" calcext:value-type="date">
            <text:p>2003-01-01</text:p>
          </table:table-cell>
          <table:table-cell table:style-name="ce177" office:value-type="float" office:value="1.01083333333333" calcext:value-type="float">
            <text:p>1.01</text:p>
          </table:table-cell>
          <table:table-cell table:style-name="ce179" table:formula="of:=[.B81]/100" office:value-type="percentage" office:value="0.0101083333333333" calcext:value-type="percentage">
            <text:p>1.01 %</text:p>
          </table:table-cell>
          <table:table-cell table:number-columns-repeated="16381"/>
        </table:table-row>
        <table:table-row table:style-name="ro9">
          <table:table-cell table:style-name="ce175" office:value-type="date" office:date-value="2004-01-01" calcext:value-type="date">
            <text:p>2004-01-01</text:p>
          </table:table-cell>
          <table:table-cell table:style-name="ce177" office:value-type="float" office:value="1.37166666666667" calcext:value-type="float">
            <text:p>1.37</text:p>
          </table:table-cell>
          <table:table-cell table:style-name="ce179" table:formula="of:=[.B82]/100" office:value-type="percentage" office:value="0.0137166666666667" calcext:value-type="percentage">
            <text:p>1.37 %</text:p>
          </table:table-cell>
          <table:table-cell table:number-columns-repeated="16381"/>
        </table:table-row>
        <table:table-row table:style-name="ro9">
          <table:table-cell table:style-name="ce175" office:value-type="date" office:date-value="2005-01-01" calcext:value-type="date">
            <text:p>2005-01-01</text:p>
          </table:table-cell>
          <table:table-cell table:style-name="ce177" office:value-type="float" office:value="3.14666666666667" calcext:value-type="float">
            <text:p>3.15</text:p>
          </table:table-cell>
          <table:table-cell table:style-name="ce179" table:formula="of:=[.B83]/100" office:value-type="percentage" office:value="0.0314666666666667" calcext:value-type="percentage">
            <text:p>3.15 %</text:p>
          </table:table-cell>
          <table:table-cell table:number-columns-repeated="16381"/>
        </table:table-row>
        <table:table-row table:style-name="ro9">
          <table:table-cell table:style-name="ce175" office:value-type="date" office:date-value="2006-01-01" calcext:value-type="date">
            <text:p>2006-01-01</text:p>
          </table:table-cell>
          <table:table-cell table:style-name="ce177" office:value-type="float" office:value="4.72666666666667" calcext:value-type="float">
            <text:p>4.73</text:p>
          </table:table-cell>
          <table:table-cell table:style-name="ce179" table:formula="of:=[.B84]/100" office:value-type="percentage" office:value="0.0472666666666667" calcext:value-type="percentage">
            <text:p>4.73 %</text:p>
          </table:table-cell>
          <table:table-cell table:number-columns-repeated="16381"/>
        </table:table-row>
        <table:table-row table:style-name="ro9">
          <table:table-cell table:style-name="ce175" office:value-type="date" office:date-value="2007-01-01" calcext:value-type="date">
            <text:p>2007-01-01</text:p>
          </table:table-cell>
          <table:table-cell table:style-name="ce177" office:value-type="float" office:value="4.35333333333333" calcext:value-type="float">
            <text:p>4.35</text:p>
          </table:table-cell>
          <table:table-cell table:style-name="ce179" table:formula="of:=[.B85]/100" office:value-type="percentage" office:value="0.0435333333333333" calcext:value-type="percentage">
            <text:p>4.35 %</text:p>
          </table:table-cell>
          <table:table-cell table:number-columns-repeated="16381"/>
        </table:table-row>
        <table:table-row table:style-name="ro9">
          <table:table-cell table:style-name="ce175" office:value-type="date" office:date-value="2008-01-01" calcext:value-type="date">
            <text:p>2008-01-01</text:p>
          </table:table-cell>
          <table:table-cell table:style-name="ce177" office:value-type="float" office:value="1.365" calcext:value-type="float">
            <text:p>1.37</text:p>
          </table:table-cell>
          <table:table-cell table:style-name="ce179" table:formula="of:=[.B86]/100" office:value-type="percentage" office:value="0.01365" calcext:value-type="percentage">
            <text:p>1.37 %</text:p>
          </table:table-cell>
          <table:table-cell table:number-columns-repeated="16381"/>
        </table:table-row>
        <table:table-row table:style-name="ro9">
          <table:table-cell table:style-name="ce175" office:value-type="date" office:date-value="2009-01-01" calcext:value-type="date">
            <text:p>2009-01-01</text:p>
          </table:table-cell>
          <table:table-cell table:style-name="ce177" office:value-type="float" office:value="0.15" calcext:value-type="float">
            <text:p>0.15</text:p>
          </table:table-cell>
          <table:table-cell table:style-name="ce179" table:formula="of:=[.B87]/100" office:value-type="percentage" office:value="0.0015" calcext:value-type="percentage">
            <text:p>0.15 %</text:p>
          </table:table-cell>
          <table:table-cell table:number-columns-repeated="16381"/>
        </table:table-row>
        <table:table-row table:style-name="ro9">
          <table:table-cell table:style-name="ce175" office:value-type="date" office:date-value="2010-01-01" calcext:value-type="date">
            <text:p>2010-01-01</text:p>
          </table:table-cell>
          <table:table-cell table:style-name="ce177" office:value-type="float" office:value="0.136666666666667" calcext:value-type="float">
            <text:p>0.14</text:p>
          </table:table-cell>
          <table:table-cell table:style-name="ce179" table:formula="of:=[.B88]/100" office:value-type="percentage" office:value="0.00136666666666667" calcext:value-type="percentage">
            <text:p>0.14 %</text:p>
          </table:table-cell>
          <table:table-cell table:number-columns-repeated="16381"/>
        </table:table-row>
        <table:table-row table:style-name="ro9">
          <table:table-cell table:style-name="ce175" office:value-type="date" office:date-value="2011-01-01" calcext:value-type="date">
            <text:p>2011-01-01</text:p>
          </table:table-cell>
          <table:table-cell table:style-name="ce177" office:value-type="float" office:value="0.0525" calcext:value-type="float">
            <text:p>0.05</text:p>
          </table:table-cell>
          <table:table-cell table:style-name="ce179" table:formula="of:=[.B89]/100" office:value-type="percentage" office:value="0.000525" calcext:value-type="percentage">
            <text:p>0.05 %</text:p>
          </table:table-cell>
          <table:table-cell table:number-columns-repeated="16381"/>
        </table:table-row>
        <table:table-row table:style-name="ro9">
          <table:table-cell table:style-name="ce175" office:value-type="date" office:date-value="2012-01-01" calcext:value-type="date">
            <text:p>2012-01-01</text:p>
          </table:table-cell>
          <table:table-cell table:style-name="ce177" office:value-type="float" office:value="0.0858333333333333" calcext:value-type="float">
            <text:p>0.09</text:p>
          </table:table-cell>
          <table:table-cell table:style-name="ce179" table:formula="of:=[.B90]/100" office:value-type="percentage" office:value="0.000858333333333333" calcext:value-type="percentage">
            <text:p>0.09 %</text:p>
          </table:table-cell>
          <table:table-cell table:number-columns-repeated="16381"/>
        </table:table-row>
        <table:table-row table:style-name="ro9">
          <table:table-cell table:style-name="ce175" office:value-type="date" office:date-value="2013-01-01" calcext:value-type="date">
            <text:p>2013-01-01</text:p>
          </table:table-cell>
          <table:table-cell table:style-name="ce177" office:value-type="float" office:value="0.0583333333333333" calcext:value-type="float">
            <text:p>0.06</text:p>
          </table:table-cell>
          <table:table-cell table:style-name="ce179" table:formula="of:=[.B91]/100" office:value-type="percentage" office:value="0.000583333333333333" calcext:value-type="percentage">
            <text:p>0.06 %</text:p>
          </table:table-cell>
          <table:table-cell table:number-columns-repeated="16381"/>
        </table:table-row>
        <table:table-row table:style-name="ro9">
          <table:table-cell table:style-name="ce175" office:value-type="date" office:date-value="2014-01-01" calcext:value-type="date">
            <text:p>2014-01-01</text:p>
          </table:table-cell>
          <table:table-cell table:style-name="ce177" office:value-type="float" office:value="0.0325" calcext:value-type="float">
            <text:p>0.03</text:p>
          </table:table-cell>
          <table:table-cell table:style-name="ce179" table:formula="of:=[.B92]/100" office:value-type="percentage" office:value="0.000325" calcext:value-type="percentage">
            <text:p>0.03 %</text:p>
          </table:table-cell>
          <table:table-cell table:number-columns-repeated="16381"/>
        </table:table-row>
        <table:table-row table:style-name="ro9">
          <table:table-cell table:style-name="ce175" office:value-type="date" office:date-value="2015-01-01" calcext:value-type="date">
            <text:p>2015-01-01</text:p>
          </table:table-cell>
          <table:table-cell table:style-name="ce177" office:value-type="float" office:value="0.0525" calcext:value-type="float">
            <text:p>0.05</text:p>
          </table:table-cell>
          <table:table-cell table:style-name="ce179" table:formula="of:=[.B93]/100" office:value-type="percentage" office:value="0.000525" calcext:value-type="percentage">
            <text:p>0.05 %</text:p>
          </table:table-cell>
          <table:table-cell table:number-columns-repeated="16381"/>
        </table:table-row>
        <table:table-row table:style-name="ro9">
          <table:table-cell table:style-name="ce175" office:value-type="date" office:date-value="2016-01-01" calcext:value-type="date">
            <text:p>2016-01-01</text:p>
          </table:table-cell>
          <table:table-cell table:style-name="ce177" office:value-type="float" office:value="0.3175" calcext:value-type="float">
            <text:p>0.32</text:p>
          </table:table-cell>
          <table:table-cell table:style-name="ce179" table:formula="of:=[.B94]/100" office:value-type="percentage" office:value="0.003175" calcext:value-type="percentage">
            <text:p>0.32 %</text:p>
          </table:table-cell>
          <table:table-cell table:number-columns-repeated="16381"/>
        </table:table-row>
        <table:table-row table:style-name="ro9">
          <table:table-cell table:style-name="ce175" office:value-type="date" office:date-value="2017-01-01" calcext:value-type="date">
            <text:p>2017-01-01</text:p>
          </table:table-cell>
          <table:table-cell table:style-name="ce177" office:value-type="float" office:value="0.930833333333333" calcext:value-type="float">
            <text:p>0.93</text:p>
          </table:table-cell>
          <table:table-cell table:style-name="ce179" table:formula="of:=[.B95]/100" office:value-type="percentage" office:value="0.00930833333333333" calcext:value-type="percentage">
            <text:p>0.93 %</text:p>
          </table:table-cell>
          <table:table-cell table:number-columns-repeated="16381"/>
        </table:table-row>
        <table:table-row table:style-name="ro9">
          <table:table-cell table:style-name="ce175" office:value-type="date" office:date-value="2018-01-01" calcext:value-type="date">
            <text:p>2018-01-01</text:p>
          </table:table-cell>
          <table:table-cell table:style-name="ce177" office:value-type="float" office:value="1.93916666666667" calcext:value-type="float">
            <text:p>1.94</text:p>
          </table:table-cell>
          <table:table-cell table:style-name="ce179" table:formula="of:=[.B96]/100" office:value-type="percentage" office:value="0.0193916666666667" calcext:value-type="percentage">
            <text:p>1.94 %</text:p>
          </table:table-cell>
          <table:table-cell table:number-columns-repeated="16381"/>
        </table:table-row>
        <table:table-row table:style-name="ro9">
          <table:table-cell table:style-name="ce175" office:value-type="date" office:date-value="2019-01-01" calcext:value-type="date">
            <text:p>2019-01-01</text:p>
          </table:table-cell>
          <table:table-cell table:style-name="ce178" office:value-type="float" office:value="2.06" calcext:value-type="float">
            <text:p>2.06</text:p>
          </table:table-cell>
          <table:table-cell table:style-name="ce179" table:formula="of:=[.B97]/100" office:value-type="percentage" office:value="0.0206" calcext:value-type="percentage">
            <text:p>2.06 %</text:p>
          </table:table-cell>
          <table:table-cell table:number-columns-repeated="16381"/>
        </table:table-row>
        <table:table-row table:style-name="ro9">
          <table:table-cell table:style-name="ce176" office:value-type="date" office:date-value="2020-01-01" calcext:value-type="date">
            <text:p>01/01/2020</text:p>
          </table:table-cell>
          <table:table-cell table:style-name="ce177" office:value-type="float" office:value="1.52" calcext:value-type="float">
            <text:p>1.52</text:p>
          </table:table-cell>
          <table:table-cell table:style-name="ce179" table:formula="of:=[.B98]/100" office:value-type="percentage" office:value="0.0152" calcext:value-type="percentage">
            <text:p>1.52 %</text:p>
          </table:table-cell>
          <table:table-cell table:number-columns-repeated="16381"/>
        </table:table-row>
        <table:table-row table:style-name="ro9" table:number-rows-repeated="812">
          <table:table-cell table:number-columns-repeated="16384"/>
        </table:table-row>
        <table:table-row table:style-name="ro9">
          <table:table-cell table:number-columns-repeated="16384"/>
        </table:table-row>
      </table:table>
      <table:table table:name="Inflation Rate" table:style-name="ta6">
        <table:table-column table:style-name="co3" table:default-cell-style-name="ce175"/>
        <table:table-column table:style-name="co3" table:default-cell-style-name="ce180"/>
        <table:table-column table:style-name="co3" table:default-cell-style-name="ce164"/>
        <table:table-column table:style-name="co3" table:number-columns-repeated="16381" table:default-cell-style-name="Default"/>
        <table:table-row table:style-name="ro9">
          <table:table-cell table:style-name="Default" office:value-type="string" calcext:value-type="string">
            <text:p>FRED Graph Observations</text:p>
          </table:table-cell>
          <table:table-cell table:style-name="Default" table:number-columns-repeated="2"/>
          <table:table-cell table:number-columns-repeated="16381"/>
        </table:table-row>
        <table:table-row table:style-name="ro9">
          <table:table-cell table:style-name="Default" office:value-type="string" calcext:value-type="string">
            <text:p>Federal Reserve Economic Data</text:p>
          </table:table-cell>
          <table:table-cell table:style-name="Default" table:number-columns-repeated="2"/>
          <table:table-cell table:number-columns-repeated="16381"/>
        </table:table-row>
        <table:table-row table:style-name="ro9">
          <table:table-cell table:style-name="Default" office:value-type="string" calcext:value-type="string">
            <text:p>Link: https://fred.stlouisfed.org</text:p>
          </table:table-cell>
          <table:table-cell table:style-name="Default" table:number-columns-repeated="2"/>
          <table:table-cell table:number-columns-repeated="16381"/>
        </table:table-row>
        <table:table-row table:style-name="ro9">
          <table:table-cell table:style-name="Default" office:value-type="string" calcext:value-type="string">
            <text:p>Help: https://fred.stlouisfed.org/help-faq</text:p>
          </table:table-cell>
          <table:table-cell table:style-name="Default" table:number-columns-repeated="2"/>
          <table:table-cell table:number-columns-repeated="16381"/>
        </table:table-row>
        <table:table-row table:style-name="ro9">
          <table:table-cell table:style-name="Default" office:value-type="string" calcext:value-type="string">
            <text:p>Economic Research Division</text:p>
          </table:table-cell>
          <table:table-cell table:style-name="Default" table:number-columns-repeated="2"/>
          <table:table-cell table:number-columns-repeated="16381"/>
        </table:table-row>
        <table:table-row table:style-name="ro9">
          <table:table-cell table:style-name="Default" office:value-type="string" calcext:value-type="string">
            <text:p>Federal Reserve Bank of St. Louis</text:p>
          </table:table-cell>
          <table:table-cell table:style-name="Default" table:number-columns-repeated="2"/>
          <table:table-cell table:number-columns-repeated="16381"/>
        </table:table-row>
        <table:table-row table:style-name="ro9">
          <table:table-cell table:style-name="Default" table:number-columns-repeated="3"/>
          <table:table-cell table:number-columns-repeated="16381"/>
        </table:table-row>
        <table:table-row table:style-name="ro9">
          <table:table-cell table:style-name="Default" office:value-type="string" calcext:value-type="string">
            <text:p>CPIAUCNS</text:p>
          </table:table-cell>
          <table:table-cell table:style-name="Default" office:value-type="string" calcext:value-type="string">
            <text:p>Consumer Price Index for All Urban Consumers: All Items in U.S. City Average, Percent Change from Year Ago of (Index 1982-1984=100), Annual, Not Seasonally Adjusted</text:p>
          </table:table-cell>
          <table:table-cell table:style-name="Default"/>
          <table:table-cell table:number-columns-repeated="16381"/>
        </table:table-row>
        <table:table-row table:style-name="ro9">
          <table:table-cell table:style-name="Default" table:number-columns-repeated="3"/>
          <table:table-cell table:number-columns-repeated="16381"/>
        </table:table-row>
        <table:table-row table:style-name="ro9">
          <table:table-cell table:style-name="Default" office:value-type="string" calcext:value-type="string">
            <text:p>Frequency: Annual</text:p>
          </table:table-cell>
          <table:table-cell table:style-name="Default" table:number-columns-repeated="2"/>
          <table:table-cell table:number-columns-repeated="16381"/>
        </table:table-row>
        <table:table-row table:style-name="ro9">
          <table:table-cell table:style-name="Default" office:value-type="string" calcext:value-type="string">
            <text:p>observation_date</text:p>
          </table:table-cell>
          <table:table-cell table:style-name="Default" office:value-type="string" calcext:value-type="string">
            <text:p>CPIAUCNS</text:p>
          </table:table-cell>
          <table:table-cell table:style-name="Default"/>
          <table:table-cell table:number-columns-repeated="16381"/>
        </table:table-row>
        <table:table-row table:style-name="ro9">
          <table:table-cell office:value-type="date" office:date-value="1914-01-01" calcext:value-type="date">
            <text:p>1914-01-01</text:p>
          </table:table-cell>
          <table:table-cell office:value-type="float" office:value="1.34907" calcext:value-type="float">
            <text:p>1.3</text:p>
          </table:table-cell>
          <table:table-cell table:formula="of:=[.B12]/100" office:value-type="percentage" office:value="0.0134907" calcext:value-type="percentage">
            <text:p>1.35 %</text:p>
          </table:table-cell>
          <table:table-cell table:number-columns-repeated="16381"/>
        </table:table-row>
        <table:table-row table:style-name="ro9">
          <table:table-cell office:value-type="date" office:date-value="1915-01-01" calcext:value-type="date">
            <text:p>1915-01-01</text:p>
          </table:table-cell>
          <table:table-cell office:value-type="float" office:value="0.91514" calcext:value-type="float">
            <text:p>0.9</text:p>
          </table:table-cell>
          <table:table-cell table:formula="of:=[.B13]/100" office:value-type="percentage" office:value="0.0091514" calcext:value-type="percentage">
            <text:p>0.92 %</text:p>
          </table:table-cell>
          <table:table-cell table:number-columns-repeated="16381"/>
        </table:table-row>
        <table:table-row table:style-name="ro9">
          <table:table-cell office:value-type="date" office:date-value="1916-01-01" calcext:value-type="date">
            <text:p>1916-01-01</text:p>
          </table:table-cell>
          <table:table-cell office:value-type="float" office:value="7.66694" calcext:value-type="float">
            <text:p>7.7</text:p>
          </table:table-cell>
          <table:table-cell table:formula="of:=[.B14]/100" office:value-type="percentage" office:value="0.0766694" calcext:value-type="percentage">
            <text:p>7.67 %</text:p>
          </table:table-cell>
          <table:table-cell table:number-columns-repeated="16381"/>
        </table:table-row>
        <table:table-row table:style-name="ro9">
          <table:table-cell office:value-type="date" office:date-value="1917-01-01" calcext:value-type="date">
            <text:p>1917-01-01</text:p>
          </table:table-cell>
          <table:table-cell office:value-type="float" office:value="17.84074" calcext:value-type="float">
            <text:p>17.8</text:p>
          </table:table-cell>
          <table:table-cell table:formula="of:=[.B15]/100" office:value-type="percentage" office:value="0.1784074" calcext:value-type="percentage">
            <text:p>17.84 %</text:p>
          </table:table-cell>
          <table:table-cell table:number-columns-repeated="16381"/>
        </table:table-row>
        <table:table-row table:style-name="ro9">
          <table:table-cell office:value-type="date" office:date-value="1918-01-01" calcext:value-type="date">
            <text:p>1918-01-01</text:p>
          </table:table-cell>
          <table:table-cell office:value-type="float" office:value="17.28395" calcext:value-type="float">
            <text:p>17.3</text:p>
          </table:table-cell>
          <table:table-cell table:formula="of:=[.B16]/100" office:value-type="percentage" office:value="0.1728395" calcext:value-type="percentage">
            <text:p>17.28 %</text:p>
          </table:table-cell>
          <table:table-cell table:number-columns-repeated="16381"/>
        </table:table-row>
        <table:table-row table:style-name="ro9">
          <table:table-cell office:value-type="date" office:date-value="1919-01-01" calcext:value-type="date">
            <text:p>1919-01-01</text:p>
          </table:table-cell>
          <table:table-cell office:value-type="float" office:value="15.23546" calcext:value-type="float">
            <text:p>15.2</text:p>
          </table:table-cell>
          <table:table-cell table:formula="of:=[.B17]/100" office:value-type="percentage" office:value="0.1523546" calcext:value-type="percentage">
            <text:p>15.24 %</text:p>
          </table:table-cell>
          <table:table-cell table:number-columns-repeated="16381"/>
        </table:table-row>
        <table:table-row table:style-name="ro9">
          <table:table-cell office:value-type="date" office:date-value="1920-01-01" calcext:value-type="date">
            <text:p>1920-01-01</text:p>
          </table:table-cell>
          <table:table-cell office:value-type="float" office:value="15.625" calcext:value-type="float">
            <text:p>15.6</text:p>
          </table:table-cell>
          <table:table-cell table:formula="of:=[.B18]/100" office:value-type="percentage" office:value="0.15625" calcext:value-type="percentage">
            <text:p>15.63 %</text:p>
          </table:table-cell>
          <table:table-cell table:number-columns-repeated="16381"/>
        </table:table-row>
        <table:table-row table:style-name="ro9">
          <table:table-cell office:value-type="date" office:date-value="1921-01-01" calcext:value-type="date">
            <text:p>1921-01-01</text:p>
          </table:table-cell>
          <table:table-cell office:value-type="float" office:value="-10.93555" calcext:value-type="float">
            <text:p>-10.9</text:p>
          </table:table-cell>
          <table:table-cell table:formula="of:=[.B19]/100" office:value-type="percentage" office:value="-0.1093555" calcext:value-type="percentage">
            <text:p>-10.94 %</text:p>
          </table:table-cell>
          <table:table-cell table:number-columns-repeated="16381"/>
        </table:table-row>
        <table:table-row table:style-name="ro9">
          <table:table-cell office:value-type="date" office:date-value="1922-01-01" calcext:value-type="date">
            <text:p>1922-01-01</text:p>
          </table:table-cell>
          <table:table-cell office:value-type="float" office:value="-6.16246" calcext:value-type="float">
            <text:p>-6.2</text:p>
          </table:table-cell>
          <table:table-cell table:formula="of:=[.B20]/100" office:value-type="percentage" office:value="-0.0616246" calcext:value-type="percentage">
            <text:p>-6.16 %</text:p>
          </table:table-cell>
          <table:table-cell table:number-columns-repeated="16381"/>
        </table:table-row>
        <table:table-row table:style-name="ro9">
          <table:table-cell office:value-type="date" office:date-value="1923-01-01" calcext:value-type="date">
            <text:p>1923-01-01</text:p>
          </table:table-cell>
          <table:table-cell office:value-type="float" office:value="1.79104" calcext:value-type="float">
            <text:p>1.8</text:p>
          </table:table-cell>
          <table:table-cell table:formula="of:=[.B21]/100" office:value-type="percentage" office:value="0.0179104" calcext:value-type="percentage">
            <text:p>1.79 %</text:p>
          </table:table-cell>
          <table:table-cell table:number-columns-repeated="16381"/>
        </table:table-row>
        <table:table-row table:style-name="ro9">
          <table:table-cell office:value-type="date" office:date-value="1924-01-01" calcext:value-type="date">
            <text:p>1924-01-01</text:p>
          </table:table-cell>
          <table:table-cell office:value-type="float" office:value="0.43988" calcext:value-type="float">
            <text:p>0.4</text:p>
          </table:table-cell>
          <table:table-cell table:formula="of:=[.B22]/100" office:value-type="percentage" office:value="0.0043988" calcext:value-type="percentage">
            <text:p>0.44 %</text:p>
          </table:table-cell>
          <table:table-cell table:number-columns-repeated="16381"/>
        </table:table-row>
        <table:table-row table:style-name="ro9">
          <table:table-cell office:value-type="date" office:date-value="1925-01-01" calcext:value-type="date">
            <text:p>1925-01-01</text:p>
          </table:table-cell>
          <table:table-cell office:value-type="float" office:value="2.43309" calcext:value-type="float">
            <text:p>2.4</text:p>
          </table:table-cell>
          <table:table-cell table:formula="of:=[.B23]/100" office:value-type="percentage" office:value="0.0243309" calcext:value-type="percentage">
            <text:p>2.43 %</text:p>
          </table:table-cell>
          <table:table-cell table:number-columns-repeated="16381"/>
        </table:table-row>
        <table:table-row table:style-name="ro9">
          <table:table-cell office:value-type="date" office:date-value="1926-01-01" calcext:value-type="date">
            <text:p>1926-01-01</text:p>
          </table:table-cell>
          <table:table-cell office:value-type="float" office:value="0.90261" calcext:value-type="float">
            <text:p>0.9</text:p>
          </table:table-cell>
          <table:table-cell table:formula="of:=[.B24]/100" office:value-type="percentage" office:value="0.0090261" calcext:value-type="percentage">
            <text:p>0.90 %</text:p>
          </table:table-cell>
          <table:table-cell table:number-columns-repeated="16381"/>
        </table:table-row>
        <table:table-row table:style-name="ro9">
          <table:table-cell office:value-type="date" office:date-value="1927-01-01" calcext:value-type="date">
            <text:p>1927-01-01</text:p>
          </table:table-cell>
          <table:table-cell office:value-type="float" office:value="-1.93032" calcext:value-type="float">
            <text:p>-1.9</text:p>
          </table:table-cell>
          <table:table-cell table:formula="of:=[.B25]/100" office:value-type="percentage" office:value="-0.0193032" calcext:value-type="percentage">
            <text:p>-1.93 %</text:p>
          </table:table-cell>
          <table:table-cell table:number-columns-repeated="16381"/>
        </table:table-row>
        <table:table-row table:style-name="ro9">
          <table:table-cell office:value-type="date" office:date-value="1928-01-01" calcext:value-type="date">
            <text:p>1928-01-01</text:p>
          </table:table-cell>
          <table:table-cell office:value-type="float" office:value="-1.15218" calcext:value-type="float">
            <text:p>-1.2</text:p>
          </table:table-cell>
          <table:table-cell table:formula="of:=[.B26]/100" office:value-type="percentage" office:value="-0.0115218" calcext:value-type="percentage">
            <text:p>-1.15 %</text:p>
          </table:table-cell>
          <table:table-cell table:number-columns-repeated="16381"/>
        </table:table-row>
        <table:table-row table:style-name="ro9">
          <table:table-cell office:value-type="date" office:date-value="1929-01-01" calcext:value-type="date">
            <text:p>1929-01-01</text:p>
          </table:table-cell>
          <table:table-cell office:value-type="float" office:value="0" calcext:value-type="float">
            <text:p>0.0</text:p>
          </table:table-cell>
          <table:table-cell table:formula="of:=[.B27]/100" office:value-type="percentage" office:value="0" calcext:value-type="percentage">
            <text:p>0.00 %</text:p>
          </table:table-cell>
          <table:table-cell table:number-columns-repeated="16381"/>
        </table:table-row>
        <table:table-row table:style-name="ro9">
          <table:table-cell office:value-type="date" office:date-value="1930-01-01" calcext:value-type="date">
            <text:p>1930-01-01</text:p>
          </table:table-cell>
          <table:table-cell office:value-type="float" office:value="-2.6712" calcext:value-type="float">
            <text:p>-2.7</text:p>
          </table:table-cell>
          <table:table-cell table:formula="of:=[.B28]/100" office:value-type="percentage" office:value="-0.026712" calcext:value-type="percentage">
            <text:p>-2.67 %</text:p>
          </table:table-cell>
          <table:table-cell table:number-columns-repeated="16381"/>
        </table:table-row>
        <table:table-row table:style-name="ro9">
          <table:table-cell office:value-type="date" office:date-value="1931-01-01" calcext:value-type="date">
            <text:p>1931-01-01</text:p>
          </table:table-cell>
          <table:table-cell office:value-type="float" office:value="-8.93214" calcext:value-type="float">
            <text:p>-8.9</text:p>
          </table:table-cell>
          <table:table-cell table:formula="of:=[.B29]/100" office:value-type="percentage" office:value="-0.0893214" calcext:value-type="percentage">
            <text:p>-8.93 %</text:p>
          </table:table-cell>
          <table:table-cell table:number-columns-repeated="16381"/>
        </table:table-row>
        <table:table-row table:style-name="ro9">
          <table:table-cell office:value-type="date" office:date-value="1932-01-01" calcext:value-type="date">
            <text:p>1932-01-01</text:p>
          </table:table-cell>
          <table:table-cell office:value-type="float" office:value="-10.30137" calcext:value-type="float">
            <text:p>-10.3</text:p>
          </table:table-cell>
          <table:table-cell table:formula="of:=[.B30]/100" office:value-type="percentage" office:value="-0.1030137" calcext:value-type="percentage">
            <text:p>-10.30 %</text:p>
          </table:table-cell>
          <table:table-cell table:number-columns-repeated="16381"/>
        </table:table-row>
        <table:table-row table:style-name="ro9">
          <table:table-cell office:value-type="date" office:date-value="1933-01-01" calcext:value-type="date">
            <text:p>1933-01-01</text:p>
          </table:table-cell>
          <table:table-cell office:value-type="float" office:value="-5.19243" calcext:value-type="float">
            <text:p>-5.2</text:p>
          </table:table-cell>
          <table:table-cell table:formula="of:=[.B31]/100" office:value-type="percentage" office:value="-0.0519243" calcext:value-type="percentage">
            <text:p>-5.19 %</text:p>
          </table:table-cell>
          <table:table-cell table:number-columns-repeated="16381"/>
        </table:table-row>
        <table:table-row table:style-name="ro9">
          <table:table-cell office:value-type="date" office:date-value="1934-01-01" calcext:value-type="date">
            <text:p>1934-01-01</text:p>
          </table:table-cell>
          <table:table-cell office:value-type="float" office:value="3.47938" calcext:value-type="float">
            <text:p>3.5</text:p>
          </table:table-cell>
          <table:table-cell table:formula="of:=[.B32]/100" office:value-type="percentage" office:value="0.0347938" calcext:value-type="percentage">
            <text:p>3.48 %</text:p>
          </table:table-cell>
          <table:table-cell table:number-columns-repeated="16381"/>
        </table:table-row>
        <table:table-row table:style-name="ro9">
          <table:table-cell office:value-type="date" office:date-value="1935-01-01" calcext:value-type="date">
            <text:p>1935-01-01</text:p>
          </table:table-cell>
          <table:table-cell office:value-type="float" office:value="2.55293" calcext:value-type="float">
            <text:p>2.6</text:p>
          </table:table-cell>
          <table:table-cell table:formula="of:=[.B33]/100" office:value-type="percentage" office:value="0.0255293" calcext:value-type="percentage">
            <text:p>2.55 %</text:p>
          </table:table-cell>
          <table:table-cell table:number-columns-repeated="16381"/>
        </table:table-row>
        <table:table-row table:style-name="ro9">
          <table:table-cell office:value-type="date" office:date-value="1936-01-01" calcext:value-type="date">
            <text:p>1936-01-01</text:p>
          </table:table-cell>
          <table:table-cell office:value-type="float" office:value="1.03218" calcext:value-type="float">
            <text:p>1.0</text:p>
          </table:table-cell>
          <table:table-cell table:formula="of:=[.B34]/100" office:value-type="percentage" office:value="0.0103218" calcext:value-type="percentage">
            <text:p>1.03 %</text:p>
          </table:table-cell>
          <table:table-cell table:number-columns-repeated="16381"/>
        </table:table-row>
        <table:table-row table:style-name="ro9">
          <table:table-cell office:value-type="date" office:date-value="1937-01-01" calcext:value-type="date">
            <text:p>1937-01-01</text:p>
          </table:table-cell>
          <table:table-cell office:value-type="float" office:value="3.72596" calcext:value-type="float">
            <text:p>3.7</text:p>
          </table:table-cell>
          <table:table-cell table:formula="of:=[.B35]/100" office:value-type="percentage" office:value="0.0372596" calcext:value-type="percentage">
            <text:p>3.73 %</text:p>
          </table:table-cell>
          <table:table-cell table:number-columns-repeated="16381"/>
        </table:table-row>
        <table:table-row table:style-name="ro9">
          <table:table-cell office:value-type="date" office:date-value="1938-01-01" calcext:value-type="date">
            <text:p>1938-01-01</text:p>
          </table:table-cell>
          <table:table-cell office:value-type="float" office:value="-2.02781" calcext:value-type="float">
            <text:p>-2.0</text:p>
          </table:table-cell>
          <table:table-cell table:formula="of:=[.B36]/100" office:value-type="percentage" office:value="-0.0202781" calcext:value-type="percentage">
            <text:p>-2.03 %</text:p>
          </table:table-cell>
          <table:table-cell table:number-columns-repeated="16381"/>
        </table:table-row>
        <table:table-row table:style-name="ro9">
          <table:table-cell office:value-type="date" office:date-value="1939-01-01" calcext:value-type="date">
            <text:p>1939-01-01</text:p>
          </table:table-cell>
          <table:table-cell office:value-type="float" office:value="-1.30101" calcext:value-type="float">
            <text:p>-1.3</text:p>
          </table:table-cell>
          <table:table-cell table:formula="of:=[.B37]/100" office:value-type="percentage" office:value="-0.0130101" calcext:value-type="percentage">
            <text:p>-1.30 %</text:p>
          </table:table-cell>
          <table:table-cell table:number-columns-repeated="16381"/>
        </table:table-row>
        <table:table-row table:style-name="ro9">
          <table:table-cell office:value-type="date" office:date-value="1940-01-01" calcext:value-type="date">
            <text:p>1940-01-01</text:p>
          </table:table-cell>
          <table:table-cell office:value-type="float" office:value="0.71899" calcext:value-type="float">
            <text:p>0.7</text:p>
          </table:table-cell>
          <table:table-cell table:formula="of:=[.B38]/100" office:value-type="percentage" office:value="0.0071899" calcext:value-type="percentage">
            <text:p>0.72 %</text:p>
          </table:table-cell>
          <table:table-cell table:number-columns-repeated="16381"/>
        </table:table-row>
        <table:table-row table:style-name="ro9">
          <table:table-cell office:value-type="date" office:date-value="1941-01-01" calcext:value-type="date">
            <text:p>1941-01-01</text:p>
          </table:table-cell>
          <table:table-cell office:value-type="float" office:value="5.116" calcext:value-type="float">
            <text:p>5.1</text:p>
          </table:table-cell>
          <table:table-cell table:formula="of:=[.B39]/100" office:value-type="percentage" office:value="0.05116" calcext:value-type="percentage">
            <text:p>5.12 %</text:p>
          </table:table-cell>
          <table:table-cell table:number-columns-repeated="16381"/>
        </table:table-row>
        <table:table-row table:style-name="ro9">
          <table:table-cell office:value-type="date" office:date-value="1942-01-01" calcext:value-type="date">
            <text:p>1942-01-01</text:p>
          </table:table-cell>
          <table:table-cell office:value-type="float" office:value="10.92247" calcext:value-type="float">
            <text:p>10.9</text:p>
          </table:table-cell>
          <table:table-cell table:formula="of:=[.B40]/100" office:value-type="percentage" office:value="0.1092247" calcext:value-type="percentage">
            <text:p>10.92 %</text:p>
          </table:table-cell>
          <table:table-cell table:number-columns-repeated="16381"/>
        </table:table-row>
        <table:table-row table:style-name="ro9">
          <table:table-cell office:value-type="date" office:date-value="1943-01-01" calcext:value-type="date">
            <text:p>1943-01-01</text:p>
          </table:table-cell>
          <table:table-cell office:value-type="float" office:value="5.96939" calcext:value-type="float">
            <text:p>6.0</text:p>
          </table:table-cell>
          <table:table-cell table:formula="of:=[.B41]/100" office:value-type="percentage" office:value="0.0596939" calcext:value-type="percentage">
            <text:p>5.97 %</text:p>
          </table:table-cell>
          <table:table-cell table:number-columns-repeated="16381"/>
        </table:table-row>
        <table:table-row table:style-name="ro9">
          <table:table-cell office:value-type="date" office:date-value="1944-01-01" calcext:value-type="date">
            <text:p>1944-01-01</text:p>
          </table:table-cell>
          <table:table-cell office:value-type="float" office:value="1.63698" calcext:value-type="float">
            <text:p>1.6</text:p>
          </table:table-cell>
          <table:table-cell table:formula="of:=[.B42]/100" office:value-type="percentage" office:value="0.0163698" calcext:value-type="percentage">
            <text:p>1.64 %</text:p>
          </table:table-cell>
          <table:table-cell table:number-columns-repeated="16381"/>
        </table:table-row>
        <table:table-row table:style-name="ro9">
          <table:table-cell office:value-type="date" office:date-value="1945-01-01" calcext:value-type="date">
            <text:p>1945-01-01</text:p>
          </table:table-cell>
          <table:table-cell office:value-type="float" office:value="2.2738" calcext:value-type="float">
            <text:p>2.3</text:p>
          </table:table-cell>
          <table:table-cell table:formula="of:=[.B43]/100" office:value-type="percentage" office:value="0.022738" calcext:value-type="percentage">
            <text:p>2.27 %</text:p>
          </table:table-cell>
          <table:table-cell table:number-columns-repeated="16381"/>
        </table:table-row>
        <table:table-row table:style-name="ro9">
          <table:table-cell office:value-type="date" office:date-value="1946-01-01" calcext:value-type="date">
            <text:p>1946-01-01</text:p>
          </table:table-cell>
          <table:table-cell office:value-type="float" office:value="8.47615" calcext:value-type="float">
            <text:p>8.5</text:p>
          </table:table-cell>
          <table:table-cell table:formula="of:=[.B44]/100" office:value-type="percentage" office:value="0.0847615" calcext:value-type="percentage">
            <text:p>8.48 %</text:p>
          </table:table-cell>
          <table:table-cell table:number-columns-repeated="16381"/>
        </table:table-row>
        <table:table-row table:style-name="ro9">
          <table:table-cell office:value-type="date" office:date-value="1947-01-01" calcext:value-type="date">
            <text:p>1947-01-01</text:p>
          </table:table-cell>
          <table:table-cell office:value-type="float" office:value="14.38941" calcext:value-type="float">
            <text:p>14.4</text:p>
          </table:table-cell>
          <table:table-cell table:formula="of:=[.B45]/100" office:value-type="percentage" office:value="0.1438941" calcext:value-type="percentage">
            <text:p>14.39 %</text:p>
          </table:table-cell>
          <table:table-cell table:number-columns-repeated="16381"/>
        </table:table-row>
        <table:table-row table:style-name="ro9">
          <table:table-cell office:value-type="date" office:date-value="1948-01-01" calcext:value-type="date">
            <text:p>1948-01-01</text:p>
          </table:table-cell>
          <table:table-cell office:value-type="float" office:value="7.68944" calcext:value-type="float">
            <text:p>7.7</text:p>
          </table:table-cell>
          <table:table-cell table:formula="of:=[.B46]/100" office:value-type="percentage" office:value="0.0768944" calcext:value-type="percentage">
            <text:p>7.69 %</text:p>
          </table:table-cell>
          <table:table-cell table:number-columns-repeated="16381"/>
        </table:table-row>
        <table:table-row table:style-name="ro9">
          <table:table-cell office:value-type="date" office:date-value="1949-01-01" calcext:value-type="date">
            <text:p>1949-01-01</text:p>
          </table:table-cell>
          <table:table-cell office:value-type="float" office:value="-0.97054" calcext:value-type="float">
            <text:p>-1.0</text:p>
          </table:table-cell>
          <table:table-cell table:formula="of:=[.B47]/100" office:value-type="percentage" office:value="-0.0097054" calcext:value-type="percentage">
            <text:p>-0.97 %</text:p>
          </table:table-cell>
          <table:table-cell table:number-columns-repeated="16381"/>
        </table:table-row>
        <table:table-row table:style-name="ro9">
          <table:table-cell office:value-type="date" office:date-value="1950-01-01" calcext:value-type="date">
            <text:p>1950-01-01</text:p>
          </table:table-cell>
          <table:table-cell office:value-type="float" office:value="1.08505" calcext:value-type="float">
            <text:p>1.1</text:p>
          </table:table-cell>
          <table:table-cell table:formula="of:=[.B48]/100" office:value-type="percentage" office:value="0.0108505" calcext:value-type="percentage">
            <text:p>1.09 %</text:p>
          </table:table-cell>
          <table:table-cell table:number-columns-repeated="16381"/>
        </table:table-row>
        <table:table-row table:style-name="ro9">
          <table:table-cell office:value-type="date" office:date-value="1951-01-01" calcext:value-type="date">
            <text:p>1951-01-01</text:p>
          </table:table-cell>
          <table:table-cell office:value-type="float" office:value="7.86011" calcext:value-type="float">
            <text:p>7.9</text:p>
          </table:table-cell>
          <table:table-cell table:formula="of:=[.B49]/100" office:value-type="percentage" office:value="0.0786011" calcext:value-type="percentage">
            <text:p>7.86 %</text:p>
          </table:table-cell>
          <table:table-cell table:number-columns-repeated="16381"/>
        </table:table-row>
        <table:table-row table:style-name="ro9">
          <table:table-cell office:value-type="date" office:date-value="1952-01-01" calcext:value-type="date">
            <text:p>1952-01-01</text:p>
          </table:table-cell>
          <table:table-cell office:value-type="float" office:value="2.27929" calcext:value-type="float">
            <text:p>2.3</text:p>
          </table:table-cell>
          <table:table-cell table:formula="of:=[.B50]/100" office:value-type="percentage" office:value="0.0227929" calcext:value-type="percentage">
            <text:p>2.28 %</text:p>
          </table:table-cell>
          <table:table-cell table:number-columns-repeated="16381"/>
        </table:table-row>
        <table:table-row table:style-name="ro9">
          <table:table-cell office:value-type="date" office:date-value="1953-01-01" calcext:value-type="date">
            <text:p>1953-01-01</text:p>
          </table:table-cell>
          <table:table-cell office:value-type="float" office:value="0.81607" calcext:value-type="float">
            <text:p>0.8</text:p>
          </table:table-cell>
          <table:table-cell table:formula="of:=[.B51]/100" office:value-type="percentage" office:value="0.0081607" calcext:value-type="percentage">
            <text:p>0.82 %</text:p>
          </table:table-cell>
          <table:table-cell table:number-columns-repeated="16381"/>
        </table:table-row>
        <table:table-row table:style-name="ro9">
          <table:table-cell office:value-type="date" office:date-value="1954-01-01" calcext:value-type="date">
            <text:p>1954-01-01</text:p>
          </table:table-cell>
          <table:table-cell office:value-type="float" office:value="0.31133" calcext:value-type="float">
            <text:p>0.3</text:p>
          </table:table-cell>
          <table:table-cell table:formula="of:=[.B52]/100" office:value-type="percentage" office:value="0.0031133" calcext:value-type="percentage">
            <text:p>0.31 %</text:p>
          </table:table-cell>
          <table:table-cell table:number-columns-repeated="16381"/>
        </table:table-row>
        <table:table-row table:style-name="ro9">
          <table:table-cell office:value-type="date" office:date-value="1955-01-01" calcext:value-type="date">
            <text:p>1955-01-01</text:p>
          </table:table-cell>
          <table:table-cell office:value-type="float" office:value="-0.27933" calcext:value-type="float">
            <text:p>-0.3</text:p>
          </table:table-cell>
          <table:table-cell table:formula="of:=[.B53]/100" office:value-type="percentage" office:value="-0.0027933" calcext:value-type="percentage">
            <text:p>-0.28 %</text:p>
          </table:table-cell>
          <table:table-cell table:number-columns-repeated="16381"/>
        </table:table-row>
        <table:table-row table:style-name="ro9">
          <table:table-cell office:value-type="date" office:date-value="1956-01-01" calcext:value-type="date">
            <text:p>1956-01-01</text:p>
          </table:table-cell>
          <table:table-cell office:value-type="float" office:value="1.52505" calcext:value-type="float">
            <text:p>1.5</text:p>
          </table:table-cell>
          <table:table-cell table:formula="of:=[.B54]/100" office:value-type="percentage" office:value="0.0152505" calcext:value-type="percentage">
            <text:p>1.53 %</text:p>
          </table:table-cell>
          <table:table-cell table:number-columns-repeated="16381"/>
        </table:table-row>
        <table:table-row table:style-name="ro9">
          <table:table-cell office:value-type="date" office:date-value="1957-01-01" calcext:value-type="date">
            <text:p>1957-01-01</text:p>
          </table:table-cell>
          <table:table-cell office:value-type="float" office:value="3.34151" calcext:value-type="float">
            <text:p>3.3</text:p>
          </table:table-cell>
          <table:table-cell table:formula="of:=[.B55]/100" office:value-type="percentage" office:value="0.0334151" calcext:value-type="percentage">
            <text:p>3.34 %</text:p>
          </table:table-cell>
          <table:table-cell table:number-columns-repeated="16381"/>
        </table:table-row>
        <table:table-row table:style-name="ro9">
          <table:table-cell office:value-type="date" office:date-value="1958-01-01" calcext:value-type="date">
            <text:p>1958-01-01</text:p>
          </table:table-cell>
          <table:table-cell office:value-type="float" office:value="2.72916" calcext:value-type="float">
            <text:p>2.7</text:p>
          </table:table-cell>
          <table:table-cell table:formula="of:=[.B56]/100" office:value-type="percentage" office:value="0.0272916" calcext:value-type="percentage">
            <text:p>2.73 %</text:p>
          </table:table-cell>
          <table:table-cell table:number-columns-repeated="16381"/>
        </table:table-row>
        <table:table-row table:style-name="ro9">
          <table:table-cell office:value-type="date" office:date-value="1959-01-01" calcext:value-type="date">
            <text:p>1959-01-01</text:p>
          </table:table-cell>
          <table:table-cell office:value-type="float" office:value="1.01068" calcext:value-type="float">
            <text:p>1.0</text:p>
          </table:table-cell>
          <table:table-cell table:formula="of:=[.B57]/100" office:value-type="percentage" office:value="0.0101068" calcext:value-type="percentage">
            <text:p>1.01 %</text:p>
          </table:table-cell>
          <table:table-cell table:number-columns-repeated="16381"/>
        </table:table-row>
        <table:table-row table:style-name="ro9">
          <table:table-cell office:value-type="date" office:date-value="1960-01-01" calcext:value-type="date">
            <text:p>1960-01-01</text:p>
          </table:table-cell>
          <table:table-cell office:value-type="float" office:value="1.45798" calcext:value-type="float">
            <text:p>1.5</text:p>
          </table:table-cell>
          <table:table-cell table:formula="of:=[.B58]/100" office:value-type="percentage" office:value="0.0145798" calcext:value-type="percentage">
            <text:p>1.46 %</text:p>
          </table:table-cell>
          <table:table-cell table:number-columns-repeated="16381"/>
        </table:table-row>
        <table:table-row table:style-name="ro9">
          <table:table-cell office:value-type="date" office:date-value="1961-01-01" calcext:value-type="date">
            <text:p>1961-01-01</text:p>
          </table:table-cell>
          <table:table-cell office:value-type="float" office:value="1.07072" calcext:value-type="float">
            <text:p>1.1</text:p>
          </table:table-cell>
          <table:table-cell table:formula="of:=[.B59]/100" office:value-type="percentage" office:value="0.0107072" calcext:value-type="percentage">
            <text:p>1.07 %</text:p>
          </table:table-cell>
          <table:table-cell table:number-columns-repeated="16381"/>
        </table:table-row>
        <table:table-row table:style-name="ro9">
          <table:table-cell office:value-type="date" office:date-value="1962-01-01" calcext:value-type="date">
            <text:p>1962-01-01</text:p>
          </table:table-cell>
          <table:table-cell office:value-type="float" office:value="1.19877" calcext:value-type="float">
            <text:p>1.2</text:p>
          </table:table-cell>
          <table:table-cell table:formula="of:=[.B60]/100" office:value-type="percentage" office:value="0.0119877" calcext:value-type="percentage">
            <text:p>1.20 %</text:p>
          </table:table-cell>
          <table:table-cell table:number-columns-repeated="16381"/>
        </table:table-row>
        <table:table-row table:style-name="ro9">
          <table:table-cell office:value-type="date" office:date-value="1963-01-01" calcext:value-type="date">
            <text:p>1963-01-01</text:p>
          </table:table-cell>
          <table:table-cell office:value-type="float" office:value="1.23967" calcext:value-type="float">
            <text:p>1.2</text:p>
          </table:table-cell>
          <table:table-cell table:formula="of:=[.B61]/100" office:value-type="percentage" office:value="0.0123967" calcext:value-type="percentage">
            <text:p>1.24 %</text:p>
          </table:table-cell>
          <table:table-cell table:number-columns-repeated="16381"/>
        </table:table-row>
        <table:table-row table:style-name="ro9">
          <table:table-cell office:value-type="date" office:date-value="1964-01-01" calcext:value-type="date">
            <text:p>1964-01-01</text:p>
          </table:table-cell>
          <table:table-cell office:value-type="float" office:value="1.27891" calcext:value-type="float">
            <text:p>1.3</text:p>
          </table:table-cell>
          <table:table-cell table:formula="of:=[.B62]/100" office:value-type="percentage" office:value="0.0127891" calcext:value-type="percentage">
            <text:p>1.28 %</text:p>
          </table:table-cell>
          <table:table-cell table:number-columns-repeated="16381"/>
        </table:table-row>
        <table:table-row table:style-name="ro9">
          <table:table-cell office:value-type="date" office:date-value="1965-01-01" calcext:value-type="date">
            <text:p>1965-01-01</text:p>
          </table:table-cell>
          <table:table-cell office:value-type="float" office:value="1.58517" calcext:value-type="float">
            <text:p>1.6</text:p>
          </table:table-cell>
          <table:table-cell table:formula="of:=[.B63]/100" office:value-type="percentage" office:value="0.0158517" calcext:value-type="percentage">
            <text:p>1.59 %</text:p>
          </table:table-cell>
          <table:table-cell table:number-columns-repeated="16381"/>
        </table:table-row>
        <table:table-row table:style-name="ro9">
          <table:table-cell office:value-type="date" office:date-value="1966-01-01" calcext:value-type="date">
            <text:p>1966-01-01</text:p>
          </table:table-cell>
          <table:table-cell office:value-type="float" office:value="3.01508" calcext:value-type="float">
            <text:p>3.0</text:p>
          </table:table-cell>
          <table:table-cell table:formula="of:=[.B64]/100" office:value-type="percentage" office:value="0.0301508" calcext:value-type="percentage">
            <text:p>3.02 %</text:p>
          </table:table-cell>
          <table:table-cell table:number-columns-repeated="16381"/>
        </table:table-row>
        <table:table-row table:style-name="ro9">
          <table:table-cell office:value-type="date" office:date-value="1967-01-01" calcext:value-type="date">
            <text:p>1967-01-01</text:p>
          </table:table-cell>
          <table:table-cell office:value-type="float" office:value="2.77279" calcext:value-type="float">
            <text:p>2.8</text:p>
          </table:table-cell>
          <table:table-cell table:formula="of:=[.B65]/100" office:value-type="percentage" office:value="0.0277279" calcext:value-type="percentage">
            <text:p>2.77 %</text:p>
          </table:table-cell>
          <table:table-cell table:number-columns-repeated="16381"/>
        </table:table-row>
        <table:table-row table:style-name="ro9">
          <table:table-cell office:value-type="date" office:date-value="1968-01-01" calcext:value-type="date">
            <text:p>1968-01-01</text:p>
          </table:table-cell>
          <table:table-cell office:value-type="float" office:value="4.2718" calcext:value-type="float">
            <text:p>4.3</text:p>
          </table:table-cell>
          <table:table-cell table:formula="of:=[.B66]/100" office:value-type="percentage" office:value="0.042718" calcext:value-type="percentage">
            <text:p>4.27 %</text:p>
          </table:table-cell>
          <table:table-cell table:number-columns-repeated="16381"/>
        </table:table-row>
        <table:table-row table:style-name="ro9">
          <table:table-cell office:value-type="date" office:date-value="1969-01-01" calcext:value-type="date">
            <text:p>1969-01-01</text:p>
          </table:table-cell>
          <table:table-cell office:value-type="float" office:value="5.46239" calcext:value-type="float">
            <text:p>5.5</text:p>
          </table:table-cell>
          <table:table-cell table:formula="of:=[.B67]/100" office:value-type="percentage" office:value="0.0546239" calcext:value-type="percentage">
            <text:p>5.46 %</text:p>
          </table:table-cell>
          <table:table-cell table:number-columns-repeated="16381"/>
        </table:table-row>
        <table:table-row table:style-name="ro9">
          <table:table-cell office:value-type="date" office:date-value="1970-01-01" calcext:value-type="date">
            <text:p>1970-01-01</text:p>
          </table:table-cell>
          <table:table-cell office:value-type="float" office:value="5.83826" calcext:value-type="float">
            <text:p>5.8</text:p>
          </table:table-cell>
          <table:table-cell table:formula="of:=[.B68]/100" office:value-type="percentage" office:value="0.0583826" calcext:value-type="percentage">
            <text:p>5.84 %</text:p>
          </table:table-cell>
          <table:table-cell table:number-columns-repeated="16381"/>
        </table:table-row>
        <table:table-row table:style-name="ro9">
          <table:table-cell office:value-type="date" office:date-value="1971-01-01" calcext:value-type="date">
            <text:p>1971-01-01</text:p>
          </table:table-cell>
          <table:table-cell office:value-type="float" office:value="4.29277" calcext:value-type="float">
            <text:p>4.3</text:p>
          </table:table-cell>
          <table:table-cell table:formula="of:=[.B69]/100" office:value-type="percentage" office:value="0.0429277" calcext:value-type="percentage">
            <text:p>4.29 %</text:p>
          </table:table-cell>
          <table:table-cell table:number-columns-repeated="16381"/>
        </table:table-row>
        <table:table-row table:style-name="ro9">
          <table:table-cell office:value-type="date" office:date-value="1972-01-01" calcext:value-type="date">
            <text:p>1972-01-01</text:p>
          </table:table-cell>
          <table:table-cell office:value-type="float" office:value="3.27228" calcext:value-type="float">
            <text:p>3.3</text:p>
          </table:table-cell>
          <table:table-cell table:formula="of:=[.B70]/100" office:value-type="percentage" office:value="0.0327228" calcext:value-type="percentage">
            <text:p>3.27 %</text:p>
          </table:table-cell>
          <table:table-cell table:number-columns-repeated="16381"/>
        </table:table-row>
        <table:table-row table:style-name="ro9">
          <table:table-cell office:value-type="date" office:date-value="1973-01-01" calcext:value-type="date">
            <text:p>1973-01-01</text:p>
          </table:table-cell>
          <table:table-cell office:value-type="float" office:value="6.17776" calcext:value-type="float">
            <text:p>6.2</text:p>
          </table:table-cell>
          <table:table-cell table:formula="of:=[.B71]/100" office:value-type="percentage" office:value="0.0617776" calcext:value-type="percentage">
            <text:p>6.18 %</text:p>
          </table:table-cell>
          <table:table-cell table:number-columns-repeated="16381"/>
        </table:table-row>
        <table:table-row table:style-name="ro9">
          <table:table-cell office:value-type="date" office:date-value="1974-01-01" calcext:value-type="date">
            <text:p>1974-01-01</text:p>
          </table:table-cell>
          <table:table-cell office:value-type="float" office:value="11.0548" calcext:value-type="float">
            <text:p>11.1</text:p>
          </table:table-cell>
          <table:table-cell table:formula="of:=[.B72]/100" office:value-type="percentage" office:value="0.110548" calcext:value-type="percentage">
            <text:p>11.05 %</text:p>
          </table:table-cell>
          <table:table-cell table:number-columns-repeated="16381"/>
        </table:table-row>
        <table:table-row table:style-name="ro9">
          <table:table-cell office:value-type="date" office:date-value="1975-01-01" calcext:value-type="date">
            <text:p>1975-01-01</text:p>
          </table:table-cell>
          <table:table-cell office:value-type="float" office:value="9.14315" calcext:value-type="float">
            <text:p>9.1</text:p>
          </table:table-cell>
          <table:table-cell table:formula="of:=[.B73]/100" office:value-type="percentage" office:value="0.0914315" calcext:value-type="percentage">
            <text:p>9.14 %</text:p>
          </table:table-cell>
          <table:table-cell table:number-columns-repeated="16381"/>
        </table:table-row>
        <table:table-row table:style-name="ro9">
          <table:table-cell office:value-type="date" office:date-value="1976-01-01" calcext:value-type="date">
            <text:p>1976-01-01</text:p>
          </table:table-cell>
          <table:table-cell office:value-type="float" office:value="5.74481" calcext:value-type="float">
            <text:p>5.7</text:p>
          </table:table-cell>
          <table:table-cell table:formula="of:=[.B74]/100" office:value-type="percentage" office:value="0.0574481" calcext:value-type="percentage">
            <text:p>5.74 %</text:p>
          </table:table-cell>
          <table:table-cell table:number-columns-repeated="16381"/>
        </table:table-row>
        <table:table-row table:style-name="ro9">
          <table:table-cell office:value-type="date" office:date-value="1977-01-01" calcext:value-type="date">
            <text:p>1977-01-01</text:p>
          </table:table-cell>
          <table:table-cell office:value-type="float" office:value="6.50168" calcext:value-type="float">
            <text:p>6.5</text:p>
          </table:table-cell>
          <table:table-cell table:formula="of:=[.B75]/100" office:value-type="percentage" office:value="0.0650168" calcext:value-type="percentage">
            <text:p>6.50 %</text:p>
          </table:table-cell>
          <table:table-cell table:number-columns-repeated="16381"/>
        </table:table-row>
        <table:table-row table:style-name="ro9">
          <table:table-cell office:value-type="date" office:date-value="1978-01-01" calcext:value-type="date">
            <text:p>1978-01-01</text:p>
          </table:table-cell>
          <table:table-cell office:value-type="float" office:value="7.63096" calcext:value-type="float">
            <text:p>7.6</text:p>
          </table:table-cell>
          <table:table-cell table:formula="of:=[.B76]/100" office:value-type="percentage" office:value="0.0763096" calcext:value-type="percentage">
            <text:p>7.63 %</text:p>
          </table:table-cell>
          <table:table-cell table:number-columns-repeated="16381"/>
        </table:table-row>
        <table:table-row table:style-name="ro9">
          <table:table-cell office:value-type="date" office:date-value="1979-01-01" calcext:value-type="date">
            <text:p>1979-01-01</text:p>
          </table:table-cell>
          <table:table-cell office:value-type="float" office:value="11.25447" calcext:value-type="float">
            <text:p>11.3</text:p>
          </table:table-cell>
          <table:table-cell table:formula="of:=[.B77]/100" office:value-type="percentage" office:value="0.1125447" calcext:value-type="percentage">
            <text:p>11.25 %</text:p>
          </table:table-cell>
          <table:table-cell table:number-columns-repeated="16381"/>
        </table:table-row>
        <table:table-row table:style-name="ro9">
          <table:table-cell office:value-type="date" office:date-value="1980-01-01" calcext:value-type="date">
            <text:p>1980-01-01</text:p>
          </table:table-cell>
          <table:table-cell office:value-type="float" office:value="13.5492" calcext:value-type="float">
            <text:p>13.5</text:p>
          </table:table-cell>
          <table:table-cell table:formula="of:=[.B78]/100" office:value-type="percentage" office:value="0.135492" calcext:value-type="percentage">
            <text:p>13.55 %</text:p>
          </table:table-cell>
          <table:table-cell table:number-columns-repeated="16381"/>
        </table:table-row>
        <table:table-row table:style-name="ro9">
          <table:table-cell office:value-type="date" office:date-value="1981-01-01" calcext:value-type="date">
            <text:p>1981-01-01</text:p>
          </table:table-cell>
          <table:table-cell office:value-type="float" office:value="10.33472" calcext:value-type="float">
            <text:p>10.3</text:p>
          </table:table-cell>
          <table:table-cell table:formula="of:=[.B79]/100" office:value-type="percentage" office:value="0.1033472" calcext:value-type="percentage">
            <text:p>10.33 %</text:p>
          </table:table-cell>
          <table:table-cell table:number-columns-repeated="16381"/>
        </table:table-row>
        <table:table-row table:style-name="ro9">
          <table:table-cell office:value-type="date" office:date-value="1982-01-01" calcext:value-type="date">
            <text:p>1982-01-01</text:p>
          </table:table-cell>
          <table:table-cell office:value-type="float" office:value="6.13143" calcext:value-type="float">
            <text:p>6.1</text:p>
          </table:table-cell>
          <table:table-cell table:formula="of:=[.B80]/100" office:value-type="percentage" office:value="0.0613143" calcext:value-type="percentage">
            <text:p>6.13 %</text:p>
          </table:table-cell>
          <table:table-cell table:number-columns-repeated="16381"/>
        </table:table-row>
        <table:table-row table:style-name="ro9">
          <table:table-cell office:value-type="date" office:date-value="1983-01-01" calcext:value-type="date">
            <text:p>1983-01-01</text:p>
          </table:table-cell>
          <table:table-cell office:value-type="float" office:value="3.21244" calcext:value-type="float">
            <text:p>3.2</text:p>
          </table:table-cell>
          <table:table-cell table:formula="of:=[.B81]/100" office:value-type="percentage" office:value="0.0321244" calcext:value-type="percentage">
            <text:p>3.21 %</text:p>
          </table:table-cell>
          <table:table-cell table:number-columns-repeated="16381"/>
        </table:table-row>
        <table:table-row table:style-name="ro9">
          <table:table-cell office:value-type="date" office:date-value="1984-01-01" calcext:value-type="date">
            <text:p>1984-01-01</text:p>
          </table:table-cell>
          <table:table-cell office:value-type="float" office:value="4.30054" calcext:value-type="float">
            <text:p>4.3</text:p>
          </table:table-cell>
          <table:table-cell table:formula="of:=[.B82]/100" office:value-type="percentage" office:value="0.0430054" calcext:value-type="percentage">
            <text:p>4.30 %</text:p>
          </table:table-cell>
          <table:table-cell table:number-columns-repeated="16381"/>
        </table:table-row>
        <table:table-row table:style-name="ro9">
          <table:table-cell office:value-type="date" office:date-value="1985-01-01" calcext:value-type="date">
            <text:p>1985-01-01</text:p>
          </table:table-cell>
          <table:table-cell office:value-type="float" office:value="3.54564" calcext:value-type="float">
            <text:p>3.5</text:p>
          </table:table-cell>
          <table:table-cell table:formula="of:=[.B83]/100" office:value-type="percentage" office:value="0.0354564" calcext:value-type="percentage">
            <text:p>3.55 %</text:p>
          </table:table-cell>
          <table:table-cell table:number-columns-repeated="16381"/>
        </table:table-row>
        <table:table-row table:style-name="ro9">
          <table:table-cell office:value-type="date" office:date-value="1986-01-01" calcext:value-type="date">
            <text:p>1986-01-01</text:p>
          </table:table-cell>
          <table:table-cell office:value-type="float" office:value="1.89805" calcext:value-type="float">
            <text:p>1.9</text:p>
          </table:table-cell>
          <table:table-cell table:formula="of:=[.B84]/100" office:value-type="percentage" office:value="0.0189805" calcext:value-type="percentage">
            <text:p>1.90 %</text:p>
          </table:table-cell>
          <table:table-cell table:number-columns-repeated="16381"/>
        </table:table-row>
        <table:table-row table:style-name="ro9">
          <table:table-cell office:value-type="date" office:date-value="1987-01-01" calcext:value-type="date">
            <text:p>1987-01-01</text:p>
          </table:table-cell>
          <table:table-cell office:value-type="float" office:value="3.66456" calcext:value-type="float">
            <text:p>3.7</text:p>
          </table:table-cell>
          <table:table-cell table:formula="of:=[.B85]/100" office:value-type="percentage" office:value="0.0366456" calcext:value-type="percentage">
            <text:p>3.66 %</text:p>
          </table:table-cell>
          <table:table-cell table:number-columns-repeated="16381"/>
        </table:table-row>
        <table:table-row table:style-name="ro9">
          <table:table-cell office:value-type="date" office:date-value="1988-01-01" calcext:value-type="date">
            <text:p>1988-01-01</text:p>
          </table:table-cell>
          <table:table-cell office:value-type="float" office:value="4.07774" calcext:value-type="float">
            <text:p>4.1</text:p>
          </table:table-cell>
          <table:table-cell table:formula="of:=[.B86]/100" office:value-type="percentage" office:value="0.0407774" calcext:value-type="percentage">
            <text:p>4.08 %</text:p>
          </table:table-cell>
          <table:table-cell table:number-columns-repeated="16381"/>
        </table:table-row>
        <table:table-row table:style-name="ro9">
          <table:table-cell office:value-type="date" office:date-value="1989-01-01" calcext:value-type="date">
            <text:p>1989-01-01</text:p>
          </table:table-cell>
          <table:table-cell office:value-type="float" office:value="4.827" calcext:value-type="float">
            <text:p>4.8</text:p>
          </table:table-cell>
          <table:table-cell table:formula="of:=[.B87]/100" office:value-type="percentage" office:value="0.04827" calcext:value-type="percentage">
            <text:p>4.83 %</text:p>
          </table:table-cell>
          <table:table-cell table:number-columns-repeated="16381"/>
        </table:table-row>
        <table:table-row table:style-name="ro9">
          <table:table-cell office:value-type="date" office:date-value="1990-01-01" calcext:value-type="date">
            <text:p>1990-01-01</text:p>
          </table:table-cell>
          <table:table-cell office:value-type="float" office:value="5.39796" calcext:value-type="float">
            <text:p>5.4</text:p>
          </table:table-cell>
          <table:table-cell table:formula="of:=[.B88]/100" office:value-type="percentage" office:value="0.0539796" calcext:value-type="percentage">
            <text:p>5.40 %</text:p>
          </table:table-cell>
          <table:table-cell table:number-columns-repeated="16381"/>
        </table:table-row>
        <table:table-row table:style-name="ro9">
          <table:table-cell office:value-type="date" office:date-value="1991-01-01" calcext:value-type="date">
            <text:p>1991-01-01</text:p>
          </table:table-cell>
          <table:table-cell office:value-type="float" office:value="4.23496" calcext:value-type="float">
            <text:p>4.2</text:p>
          </table:table-cell>
          <table:table-cell table:formula="of:=[.B89]/100" office:value-type="percentage" office:value="0.0423496" calcext:value-type="percentage">
            <text:p>4.23 %</text:p>
          </table:table-cell>
          <table:table-cell table:number-columns-repeated="16381"/>
        </table:table-row>
        <table:table-row table:style-name="ro9">
          <table:table-cell office:value-type="date" office:date-value="1992-01-01" calcext:value-type="date">
            <text:p>1992-01-01</text:p>
          </table:table-cell>
          <table:table-cell office:value-type="float" office:value="3.02882" calcext:value-type="float">
            <text:p>3.0</text:p>
          </table:table-cell>
          <table:table-cell table:formula="of:=[.B90]/100" office:value-type="percentage" office:value="0.0302882" calcext:value-type="percentage">
            <text:p>3.03 %</text:p>
          </table:table-cell>
          <table:table-cell table:number-columns-repeated="16381"/>
        </table:table-row>
        <table:table-row table:style-name="ro9">
          <table:table-cell office:value-type="date" office:date-value="1993-01-01" calcext:value-type="date">
            <text:p>1993-01-01</text:p>
          </table:table-cell>
          <table:table-cell office:value-type="float" office:value="2.95166" calcext:value-type="float">
            <text:p>3.0</text:p>
          </table:table-cell>
          <table:table-cell table:formula="of:=[.B91]/100" office:value-type="percentage" office:value="0.0295166" calcext:value-type="percentage">
            <text:p>2.95 %</text:p>
          </table:table-cell>
          <table:table-cell table:number-columns-repeated="16381"/>
        </table:table-row>
        <table:table-row table:style-name="ro9">
          <table:table-cell office:value-type="date" office:date-value="1994-01-01" calcext:value-type="date">
            <text:p>1994-01-01</text:p>
          </table:table-cell>
          <table:table-cell office:value-type="float" office:value="2.60744" calcext:value-type="float">
            <text:p>2.6</text:p>
          </table:table-cell>
          <table:table-cell table:formula="of:=[.B92]/100" office:value-type="percentage" office:value="0.0260744" calcext:value-type="percentage">
            <text:p>2.61 %</text:p>
          </table:table-cell>
          <table:table-cell table:number-columns-repeated="16381"/>
        </table:table-row>
        <table:table-row table:style-name="ro9">
          <table:table-cell office:value-type="date" office:date-value="1995-01-01" calcext:value-type="date">
            <text:p>1995-01-01</text:p>
          </table:table-cell>
          <table:table-cell office:value-type="float" office:value="2.80542" calcext:value-type="float">
            <text:p>2.8</text:p>
          </table:table-cell>
          <table:table-cell table:formula="of:=[.B93]/100" office:value-type="percentage" office:value="0.0280542" calcext:value-type="percentage">
            <text:p>2.81 %</text:p>
          </table:table-cell>
          <table:table-cell table:number-columns-repeated="16381"/>
        </table:table-row>
        <table:table-row table:style-name="ro9">
          <table:table-cell office:value-type="date" office:date-value="1996-01-01" calcext:value-type="date">
            <text:p>1996-01-01</text:p>
          </table:table-cell>
          <table:table-cell office:value-type="float" office:value="2.9312" calcext:value-type="float">
            <text:p>2.9</text:p>
          </table:table-cell>
          <table:table-cell table:formula="of:=[.B94]/100" office:value-type="percentage" office:value="0.029312" calcext:value-type="percentage">
            <text:p>2.93 %</text:p>
          </table:table-cell>
          <table:table-cell table:number-columns-repeated="16381"/>
        </table:table-row>
        <table:table-row table:style-name="ro9">
          <table:table-cell office:value-type="date" office:date-value="1997-01-01" calcext:value-type="date">
            <text:p>1997-01-01</text:p>
          </table:table-cell>
          <table:table-cell office:value-type="float" office:value="2.33769" calcext:value-type="float">
            <text:p>2.3</text:p>
          </table:table-cell>
          <table:table-cell table:formula="of:=[.B95]/100" office:value-type="percentage" office:value="0.0233769" calcext:value-type="percentage">
            <text:p>2.34 %</text:p>
          </table:table-cell>
          <table:table-cell table:number-columns-repeated="16381"/>
        </table:table-row>
        <table:table-row table:style-name="ro9">
          <table:table-cell office:value-type="date" office:date-value="1998-01-01" calcext:value-type="date">
            <text:p>1998-01-01</text:p>
          </table:table-cell>
          <table:table-cell office:value-type="float" office:value="1.55228" calcext:value-type="float">
            <text:p>1.6</text:p>
          </table:table-cell>
          <table:table-cell table:formula="of:=[.B96]/100" office:value-type="percentage" office:value="0.0155228" calcext:value-type="percentage">
            <text:p>1.55 %</text:p>
          </table:table-cell>
          <table:table-cell table:number-columns-repeated="16381"/>
        </table:table-row>
        <table:table-row table:style-name="ro9">
          <table:table-cell office:value-type="date" office:date-value="1999-01-01" calcext:value-type="date">
            <text:p>1999-01-01</text:p>
          </table:table-cell>
          <table:table-cell office:value-type="float" office:value="2.18803" calcext:value-type="float">
            <text:p>2.2</text:p>
          </table:table-cell>
          <table:table-cell table:formula="of:=[.B97]/100" office:value-type="percentage" office:value="0.0218803" calcext:value-type="percentage">
            <text:p>2.19 %</text:p>
          </table:table-cell>
          <table:table-cell table:number-columns-repeated="16381"/>
        </table:table-row>
        <table:table-row table:style-name="ro9">
          <table:table-cell office:value-type="date" office:date-value="2000-01-01" calcext:value-type="date">
            <text:p>2000-01-01</text:p>
          </table:table-cell>
          <table:table-cell office:value-type="float" office:value="3.37686" calcext:value-type="float">
            <text:p>3.4</text:p>
          </table:table-cell>
          <table:table-cell table:formula="of:=[.B98]/100" office:value-type="percentage" office:value="0.0337686" calcext:value-type="percentage">
            <text:p>3.38 %</text:p>
          </table:table-cell>
          <table:table-cell table:number-columns-repeated="16381"/>
        </table:table-row>
        <table:table-row table:style-name="ro9">
          <table:table-cell office:value-type="date" office:date-value="2001-01-01" calcext:value-type="date">
            <text:p>2001-01-01</text:p>
          </table:table-cell>
          <table:table-cell office:value-type="float" office:value="2.82617" calcext:value-type="float">
            <text:p>2.8</text:p>
          </table:table-cell>
          <table:table-cell table:formula="of:=[.B99]/100" office:value-type="percentage" office:value="0.0282617" calcext:value-type="percentage">
            <text:p>2.83 %</text:p>
          </table:table-cell>
          <table:table-cell table:number-columns-repeated="16381"/>
        </table:table-row>
        <table:table-row table:style-name="ro9">
          <table:table-cell office:value-type="date" office:date-value="2002-01-01" calcext:value-type="date">
            <text:p>2002-01-01</text:p>
          </table:table-cell>
          <table:table-cell office:value-type="float" office:value="1.58603" calcext:value-type="float">
            <text:p>1.6</text:p>
          </table:table-cell>
          <table:table-cell table:formula="of:=[.B100]/100" office:value-type="percentage" office:value="0.0158603" calcext:value-type="percentage">
            <text:p>1.59 %</text:p>
          </table:table-cell>
          <table:table-cell table:number-columns-repeated="16381"/>
        </table:table-row>
        <table:table-row table:style-name="ro9">
          <table:table-cell office:value-type="date" office:date-value="2003-01-01" calcext:value-type="date">
            <text:p>2003-01-01</text:p>
          </table:table-cell>
          <table:table-cell office:value-type="float" office:value="2.27009" calcext:value-type="float">
            <text:p>2.3</text:p>
          </table:table-cell>
          <table:table-cell table:formula="of:=[.B101]/100" office:value-type="percentage" office:value="0.0227009" calcext:value-type="percentage">
            <text:p>2.27 %</text:p>
          </table:table-cell>
          <table:table-cell table:number-columns-repeated="16381"/>
        </table:table-row>
        <table:table-row table:style-name="ro9">
          <table:table-cell office:value-type="date" office:date-value="2004-01-01" calcext:value-type="date">
            <text:p>2004-01-01</text:p>
          </table:table-cell>
          <table:table-cell office:value-type="float" office:value="2.67724" calcext:value-type="float">
            <text:p>2.7</text:p>
          </table:table-cell>
          <table:table-cell table:formula="of:=[.B102]/100" office:value-type="percentage" office:value="0.0267724" calcext:value-type="percentage">
            <text:p>2.68 %</text:p>
          </table:table-cell>
          <table:table-cell table:number-columns-repeated="16381"/>
        </table:table-row>
        <table:table-row table:style-name="ro9">
          <table:table-cell office:value-type="date" office:date-value="2005-01-01" calcext:value-type="date">
            <text:p>2005-01-01</text:p>
          </table:table-cell>
          <table:table-cell office:value-type="float" office:value="3.39275" calcext:value-type="float">
            <text:p>3.4</text:p>
          </table:table-cell>
          <table:table-cell table:formula="of:=[.B103]/100" office:value-type="percentage" office:value="0.0339275" calcext:value-type="percentage">
            <text:p>3.39 %</text:p>
          </table:table-cell>
          <table:table-cell table:number-columns-repeated="16381"/>
        </table:table-row>
        <table:table-row table:style-name="ro9">
          <table:table-cell office:value-type="date" office:date-value="2006-01-01" calcext:value-type="date">
            <text:p>2006-01-01</text:p>
          </table:table-cell>
          <table:table-cell office:value-type="float" office:value="3.22594" calcext:value-type="float">
            <text:p>3.2</text:p>
          </table:table-cell>
          <table:table-cell table:formula="of:=[.B104]/100" office:value-type="percentage" office:value="0.0322594" calcext:value-type="percentage">
            <text:p>3.23 %</text:p>
          </table:table-cell>
          <table:table-cell table:number-columns-repeated="16381"/>
        </table:table-row>
        <table:table-row table:style-name="ro9">
          <table:table-cell office:value-type="date" office:date-value="2007-01-01" calcext:value-type="date">
            <text:p>2007-01-01</text:p>
          </table:table-cell>
          <table:table-cell office:value-type="float" office:value="2.85267" calcext:value-type="float">
            <text:p>2.9</text:p>
          </table:table-cell>
          <table:table-cell table:formula="of:=[.B105]/100" office:value-type="percentage" office:value="0.0285267" calcext:value-type="percentage">
            <text:p>2.85 %</text:p>
          </table:table-cell>
          <table:table-cell table:number-columns-repeated="16381"/>
        </table:table-row>
        <table:table-row table:style-name="ro9">
          <table:table-cell office:value-type="date" office:date-value="2008-01-01" calcext:value-type="date">
            <text:p>2008-01-01</text:p>
          </table:table-cell>
          <table:table-cell office:value-type="float" office:value="3.8391" calcext:value-type="float">
            <text:p>3.8</text:p>
          </table:table-cell>
          <table:table-cell table:formula="of:=[.B106]/100" office:value-type="percentage" office:value="0.038391" calcext:value-type="percentage">
            <text:p>3.84 %</text:p>
          </table:table-cell>
          <table:table-cell table:number-columns-repeated="16381"/>
        </table:table-row>
        <table:table-row table:style-name="ro9">
          <table:table-cell office:value-type="date" office:date-value="2009-01-01" calcext:value-type="date">
            <text:p>2009-01-01</text:p>
          </table:table-cell>
          <table:table-cell office:value-type="float" office:value="-0.35555" calcext:value-type="float">
            <text:p>-0.4</text:p>
          </table:table-cell>
          <table:table-cell table:formula="of:=[.B107]/100" office:value-type="percentage" office:value="-0.0035555" calcext:value-type="percentage">
            <text:p>-0.36 %</text:p>
          </table:table-cell>
          <table:table-cell table:number-columns-repeated="16381"/>
        </table:table-row>
        <table:table-row table:style-name="ro9">
          <table:table-cell office:value-type="date" office:date-value="2010-01-01" calcext:value-type="date">
            <text:p>2010-01-01</text:p>
          </table:table-cell>
          <table:table-cell office:value-type="float" office:value="1.64004" calcext:value-type="float">
            <text:p>1.6</text:p>
          </table:table-cell>
          <table:table-cell table:formula="of:=[.B108]/100" office:value-type="percentage" office:value="0.0164004" calcext:value-type="percentage">
            <text:p>1.64 %</text:p>
          </table:table-cell>
          <table:table-cell table:number-columns-repeated="16381"/>
        </table:table-row>
        <table:table-row table:style-name="ro9">
          <table:table-cell office:value-type="date" office:date-value="2011-01-01" calcext:value-type="date">
            <text:p>2011-01-01</text:p>
          </table:table-cell>
          <table:table-cell office:value-type="float" office:value="3.15684" calcext:value-type="float">
            <text:p>3.2</text:p>
          </table:table-cell>
          <table:table-cell table:formula="of:=[.B109]/100" office:value-type="percentage" office:value="0.0315684" calcext:value-type="percentage">
            <text:p>3.16 %</text:p>
          </table:table-cell>
          <table:table-cell table:number-columns-repeated="16381"/>
        </table:table-row>
        <table:table-row table:style-name="ro9">
          <table:table-cell office:value-type="date" office:date-value="2012-01-01" calcext:value-type="date">
            <text:p>2012-01-01</text:p>
          </table:table-cell>
          <table:table-cell office:value-type="float" office:value="2.06934" calcext:value-type="float">
            <text:p>2.1</text:p>
          </table:table-cell>
          <table:table-cell table:formula="of:=[.B110]/100" office:value-type="percentage" office:value="0.0206934" calcext:value-type="percentage">
            <text:p>2.07 %</text:p>
          </table:table-cell>
          <table:table-cell table:number-columns-repeated="16381"/>
        </table:table-row>
        <table:table-row table:style-name="ro9">
          <table:table-cell office:value-type="date" office:date-value="2013-01-01" calcext:value-type="date">
            <text:p>2013-01-01</text:p>
          </table:table-cell>
          <table:table-cell office:value-type="float" office:value="1.46483" calcext:value-type="float">
            <text:p>1.5</text:p>
          </table:table-cell>
          <table:table-cell table:formula="of:=[.B111]/100" office:value-type="percentage" office:value="0.0146483" calcext:value-type="percentage">
            <text:p>1.46 %</text:p>
          </table:table-cell>
          <table:table-cell table:number-columns-repeated="16381"/>
        </table:table-row>
        <table:table-row table:style-name="ro9">
          <table:table-cell office:value-type="date" office:date-value="2014-01-01" calcext:value-type="date">
            <text:p>2014-01-01</text:p>
          </table:table-cell>
          <table:table-cell office:value-type="float" office:value="1.62222" calcext:value-type="float">
            <text:p>1.6</text:p>
          </table:table-cell>
          <table:table-cell table:formula="of:=[.B112]/100" office:value-type="percentage" office:value="0.0162222" calcext:value-type="percentage">
            <text:p>1.62 %</text:p>
          </table:table-cell>
          <table:table-cell table:number-columns-repeated="16381"/>
        </table:table-row>
        <table:table-row table:style-name="ro9">
          <table:table-cell office:value-type="date" office:date-value="2015-01-01" calcext:value-type="date">
            <text:p>2015-01-01</text:p>
          </table:table-cell>
          <table:table-cell office:value-type="float" office:value="0.11863" calcext:value-type="float">
            <text:p>0.1</text:p>
          </table:table-cell>
          <table:table-cell table:formula="of:=[.B113]/100" office:value-type="percentage" office:value="0.0011863" calcext:value-type="percentage">
            <text:p>0.12 %</text:p>
          </table:table-cell>
          <table:table-cell table:number-columns-repeated="16381"/>
        </table:table-row>
        <table:table-row table:style-name="ro9">
          <table:table-cell office:value-type="date" office:date-value="2016-01-01" calcext:value-type="date">
            <text:p>2016-01-01</text:p>
          </table:table-cell>
          <table:table-cell office:value-type="float" office:value="1.26158" calcext:value-type="float">
            <text:p>1.3</text:p>
          </table:table-cell>
          <table:table-cell table:formula="of:=[.B114]/100" office:value-type="percentage" office:value="0.0126158" calcext:value-type="percentage">
            <text:p>1.26 %</text:p>
          </table:table-cell>
          <table:table-cell table:number-columns-repeated="16381"/>
        </table:table-row>
        <table:table-row table:style-name="ro9">
          <table:table-cell office:value-type="date" office:date-value="2017-01-01" calcext:value-type="date">
            <text:p>2017-01-01</text:p>
          </table:table-cell>
          <table:table-cell office:value-type="float" office:value="2.13011" calcext:value-type="float">
            <text:p>2.1</text:p>
          </table:table-cell>
          <table:table-cell table:formula="of:=[.B115]/100" office:value-type="percentage" office:value="0.0213011" calcext:value-type="percentage">
            <text:p>2.13 %</text:p>
          </table:table-cell>
          <table:table-cell table:number-columns-repeated="16381"/>
        </table:table-row>
        <table:table-row table:style-name="ro9">
          <table:table-cell office:value-type="date" office:date-value="2018-01-01" calcext:value-type="date">
            <text:p>2018-01-01</text:p>
          </table:table-cell>
          <table:table-cell office:value-type="float" office:value="2.44258" calcext:value-type="float">
            <text:p>2.4</text:p>
          </table:table-cell>
          <table:table-cell table:formula="of:=[.B116]/100" office:value-type="percentage" office:value="0.0244258" calcext:value-type="percentage">
            <text:p>2.44 %</text:p>
          </table:table-cell>
          <table:table-cell table:number-columns-repeated="16381"/>
        </table:table-row>
        <table:table-row table:style-name="ro9">
          <table:table-cell office:value-type="date" office:date-value="2019-01-01" calcext:value-type="date">
            <text:p>2019-01-01</text:p>
          </table:table-cell>
          <table:table-cell table:style-name="ce178"/>
          <table:table-cell table:style-name="Default"/>
          <table:table-cell table:number-columns-repeated="16381"/>
        </table:table-row>
      </table:table>
      <table:table table:name="Summary for ppt" table:style-name="ta7">
        <table:table-column table:style-name="co26" table:default-cell-style-name="ce182"/>
        <table:table-column table:style-name="co27" table:default-cell-style-name="ce187"/>
        <table:table-column table:style-name="co9" table:default-cell-style-name="ce187"/>
        <table:table-column table:style-name="co27" table:default-cell-style-name="ce187"/>
        <table:table-column table:style-name="co9" table:default-cell-style-name="ce193"/>
        <table:table-column table:style-name="co3" table:number-columns-repeated="16379" table:default-cell-style-name="Default"/>
        <table:table-row table:style-name="ro2">
          <table:table-cell table:style-name="ce181"/>
          <table:table-cell table:style-name="ce185" office:value-type="string" calcext:value-type="string" table:number-columns-spanned="2" table:number-rows-spanned="1">
            <text:p>Arithmetic Average</text:p>
          </table:table-cell>
          <table:covered-table-cell table:style-name="ce185"/>
          <table:table-cell table:style-name="ce190" office:value-type="string" calcext:value-type="string" table:number-columns-spanned="2" table:number-rows-spanned="1">
            <text:p>Geometric Average</text:p>
          </table:table-cell>
          <table:covered-table-cell table:style-name="ce190"/>
          <table:table-cell table:number-columns-repeated="16379"/>
        </table:table-row>
        <table:table-row table:style-name="ro2">
          <table:table-cell/>
          <table:table-cell table:style-name="ce186" office:value-type="string" calcext:value-type="string">
            <text:p>Stocks - T. Bills</text:p>
          </table:table-cell>
          <table:table-cell table:style-name="ce186" office:value-type="string" calcext:value-type="string">
            <text:p>Stocks - T. Bonds</text:p>
          </table:table-cell>
          <table:table-cell table:style-name="ce186" office:value-type="string" calcext:value-type="string">
            <text:p>Stocks - T. Bills</text:p>
          </table:table-cell>
          <table:table-cell table:style-name="ce192" office:value-type="string" calcext:value-type="string">
            <text:p>Stocks - T. Bonds</text:p>
          </table:table-cell>
          <table:table-cell table:number-columns-repeated="16379"/>
        </table:table-row>
        <table:table-row table:style-name="ro2">
          <table:table-cell table:formula="of:=[$'Retornos x año'.A126]" office:value-type="string" office:string-value="1928-2020" calcext:value-type="string">
            <text:p>1928-2020</text:p>
          </table:table-cell>
          <table:table-cell table:formula="of:=[$'Retornos x año'.H121]" office:value-type="percentage" office:value="0.0828004769465125" calcext:value-type="percentage">
            <text:p>8.28 %</text:p>
          </table:table-cell>
          <table:table-cell table:formula="of:=[$'Retornos x año'.I121]" office:value-type="percentage" office:value="0.0642865396526859" calcext:value-type="percentage">
            <text:p>6.43 %</text:p>
          </table:table-cell>
          <table:table-cell table:formula="of:=[$'Retornos x año'.H126]" office:value-type="percentage" office:value="0.0626650879659121" calcext:value-type="percentage">
            <text:p>6.27 %</text:p>
          </table:table-cell>
          <table:table-cell table:formula="of:=[$'Retornos x año'.I126]" office:value-type="percentage" office:value="0.0463721055033393" calcext:value-type="percentage">
            <text:p>4.64 %</text:p>
          </table:table-cell>
          <table:table-cell table:number-columns-repeated="16379"/>
        </table:table-row>
        <table:table-row table:style-name="ro2">
          <table:table-cell table:style-name="ce183" office:value-type="string" calcext:value-type="string">
            <text:p>Std Error</text:p>
          </table:table-cell>
          <table:table-cell table:style-name="ce188" table:formula="of:=[$'Retornos x año'.J121]" office:value-type="percentage" office:value="0.0205594276423397" calcext:value-type="percentage">
            <text:p>2.06 %</text:p>
          </table:table-cell>
          <table:table-cell table:style-name="ce188" table:formula="of:=[$'Retornos x año'.K121]" office:value-type="percentage" office:value="0.0217996092762425" calcext:value-type="percentage">
            <text:p>2.18 %</text:p>
          </table:table-cell>
          <table:table-cell table:number-columns-repeated="16381"/>
        </table:table-row>
        <table:table-row table:style-name="ro2">
          <table:table-cell table:formula="of:=[$'Retornos x año'.A127]" office:value-type="string" office:string-value="1970-2020" calcext:value-type="string">
            <text:p>1970-2020</text:p>
          </table:table-cell>
          <table:table-cell table:formula="of:=[$'Retornos x año'.H122]" office:value-type="percentage" office:value="0.0746699702494572" calcext:value-type="percentage">
            <text:p>7.47 %</text:p>
          </table:table-cell>
          <table:table-cell table:formula="of:=[$'Retornos x año'.I122]" office:value-type="percentage" office:value="0.0454137196233245" calcext:value-type="percentage">
            <text:p>4.54 %</text:p>
          </table:table-cell>
          <table:table-cell table:formula="of:=[$'Retornos x año'.H127]" office:value-type="percentage" office:value="0.0616360747890135" calcext:value-type="percentage">
            <text:p>6.16 %</text:p>
          </table:table-cell>
          <table:table-cell table:formula="of:=[$'Retornos x año'.I127]" office:value-type="percentage" office:value="0.0357853754594142" calcext:value-type="percentage">
            <text:p>3.58 %</text:p>
          </table:table-cell>
          <table:table-cell table:number-columns-repeated="16379"/>
        </table:table-row>
        <table:table-row table:style-name="ro2">
          <table:table-cell table:style-name="ce183" office:value-type="string" calcext:value-type="string">
            <text:p>Std Error</text:p>
          </table:table-cell>
          <table:table-cell table:style-name="ce188" table:formula="of:=[$'Retornos x año'.J122]" office:value-type="percentage" office:value="0.0234707331239517" calcext:value-type="percentage">
            <text:p>2.35 %</text:p>
          </table:table-cell>
          <table:table-cell table:style-name="ce188" table:formula="of:=[$'Retornos x año'.K122]" office:value-type="percentage" office:value="0.0267201253883434" calcext:value-type="percentage">
            <text:p>2.67 %</text:p>
          </table:table-cell>
          <table:table-cell table:number-columns-repeated="16381"/>
        </table:table-row>
        <table:table-row table:style-name="ro2">
          <table:table-cell table:formula="of:=[$'Retornos x año'.A128]" office:value-type="string" office:string-value="2010-2020" calcext:value-type="string">
            <text:p>2010-2020</text:p>
          </table:table-cell>
          <table:table-cell table:formula="of:=[$'Retornos x año'.H123]" office:value-type="percentage" office:value="0.139089052996693" calcext:value-type="percentage">
            <text:p>13.91 %</text:p>
          </table:table-cell>
          <table:table-cell table:formula="of:=[$'Retornos x año'.I123]" office:value-type="percentage" office:value="0.0940062130424857" calcext:value-type="percentage">
            <text:p>9.40 %</text:p>
          </table:table-cell>
          <table:table-cell table:formula="of:=[$'Retornos x año'.H128]" office:value-type="percentage" office:value="0.133746861295943" calcext:value-type="percentage">
            <text:p>13.37 %</text:p>
          </table:table-cell>
          <table:table-cell table:formula="of:=[$'Retornos x año'.I128]" office:value-type="percentage" office:value="0.0908219714654293" calcext:value-type="percentage">
            <text:p>9.08 %</text:p>
          </table:table-cell>
          <table:table-cell table:number-columns-repeated="16379"/>
        </table:table-row>
        <table:table-row table:style-name="ro2">
          <table:table-cell table:style-name="ce184" office:value-type="string" calcext:value-type="string">
            <text:p>Std Error</text:p>
          </table:table-cell>
          <table:table-cell table:style-name="ce189" table:formula="of:=[$'Retornos x año'.J123]" office:value-type="percentage" office:value="0.0350748307361648" calcext:value-type="percentage">
            <text:p>3.51 %</text:p>
          </table:table-cell>
          <table:table-cell table:style-name="ce189" table:formula="of:=[$'Retornos x año'.K123]" office:value-type="percentage" office:value="0.0441437068830814" calcext:value-type="percentage">
            <text:p>4.41 %</text:p>
          </table:table-cell>
          <table:table-cell table:style-name="ce191"/>
          <table:table-cell table:style-name="ce194"/>
          <table:table-cell table:number-columns-repeated="16379"/>
        </table:table-row>
      </table:table>
      <table:table table:name="Home Prices (Raw Data)" table:style-name="ta8">
        <table:table-column table:style-name="co3" table:default-cell-style-name="ce196"/>
        <table:table-column table:style-name="co3" table:default-cell-style-name="ce198"/>
        <table:table-column table:style-name="co3" table:default-cell-style-name="ce164"/>
        <table:table-column table:style-name="co3" table:number-columns-repeated="16381" table:default-cell-style-name="Default"/>
        <table:table-row table:style-name="ro9">
          <table:table-cell table:style-name="ce195" office:value-type="string" calcext:value-type="string">
            <text:p>Home Price data from Robert Shiller's website.</text:p>
          </table:table-cell>
          <table:table-cell table:style-name="Default" table:number-columns-repeated="2"/>
          <table:table-cell table:number-columns-repeated="2"/>
          <table:table-cell table:style-name="ce195" office:value-type="string" calcext:value-type="string">
            <text:p>FRED Graph Observations</text:p>
          </table:table-cell>
          <table:table-cell table:number-columns-repeated="16378"/>
        </table:table-row>
        <table:table-row table:style-name="ro9">
          <table:table-cell table:style-name="Default" table:number-columns-repeated="3"/>
          <table:table-cell table:number-columns-repeated="2"/>
          <table:table-cell office:value-type="string" calcext:value-type="string">
            <text:p>Federal Reserve Economic Data</text:p>
          </table:table-cell>
          <table:table-cell table:number-columns-repeated="16378"/>
        </table:table-row>
        <table:table-row table:style-name="ro9">
          <table:table-cell table:style-name="Default" table:number-columns-repeated="3"/>
          <table:table-cell table:number-columns-repeated="2"/>
          <table:table-cell office:value-type="string" calcext:value-type="string">
            <text:p>Link: https://fred.stlouisfed.org</text:p>
          </table:table-cell>
          <table:table-cell table:number-columns-repeated="16378"/>
        </table:table-row>
        <table:table-row table:style-name="ro9">
          <table:table-cell table:style-name="Default" table:number-columns-repeated="3"/>
          <table:table-cell table:number-columns-repeated="2"/>
          <table:table-cell office:value-type="string" calcext:value-type="string">
            <text:p>Help: https://fred.stlouisfed.org/help-faq</text:p>
          </table:table-cell>
          <table:table-cell table:number-columns-repeated="16378"/>
        </table:table-row>
        <table:table-row table:style-name="ro9">
          <table:table-cell table:style-name="Default" table:number-columns-repeated="3"/>
          <table:table-cell table:number-columns-repeated="2"/>
          <table:table-cell office:value-type="string" calcext:value-type="string">
            <text:p>Economic Research Division</text:p>
          </table:table-cell>
          <table:table-cell table:number-columns-repeated="16378"/>
        </table:table-row>
        <table:table-row table:style-name="ro9">
          <table:table-cell table:style-name="Default" table:number-columns-repeated="3"/>
          <table:table-cell table:number-columns-repeated="2"/>
          <table:table-cell office:value-type="string" calcext:value-type="string">
            <text:p>Federal Reserve Bank of St. Louis</text:p>
          </table:table-cell>
          <table:table-cell table:number-columns-repeated="16378"/>
        </table:table-row>
        <table:table-row table:style-name="ro9">
          <table:table-cell table:style-name="Default" table:number-columns-repeated="3"/>
          <table:table-cell table:number-columns-repeated="16381"/>
        </table:table-row>
        <table:table-row table:style-name="ro9">
          <table:table-cell table:style-name="Default" table:number-columns-repeated="3"/>
          <table:table-cell table:number-columns-repeated="2"/>
          <table:table-cell office:value-type="string" calcext:value-type="string">
            <text:p>CSUSHPINSA</text:p>
          </table:table-cell>
          <table:table-cell office:value-type="string" calcext:value-type="string">
            <text:p>S&amp;P/Case-Shiller U.S. National Home Price Index, Percent Change from Year Ago of (Index Jan 2000=100), Annual, Not Seasonally Adjusted</text:p>
          </table:table-cell>
          <table:table-cell table:number-columns-repeated="16377"/>
        </table:table-row>
        <table:table-row table:style-name="ro9">
          <table:table-cell office:value-type="string" calcext:value-type="string">
            <text:p>Date</text:p>
          </table:table-cell>
          <table:table-cell table:style-name="ce197" office:value-type="string" calcext:value-type="string">
            <text:p>From fig2.1Revised2011.xls</text:p>
          </table:table-cell>
          <table:table-cell table:style-name="Default" office:value-type="string" calcext:value-type="string">
            <text:p>Chg in House Price</text:p>
          </table:table-cell>
          <table:table-cell table:number-columns-repeated="16381"/>
        </table:table-row>
        <table:table-row table:style-name="ro9">
          <table:table-cell office:value-type="float" office:value="1890" calcext:value-type="float">
            <text:p>1890</text:p>
          </table:table-cell>
          <table:table-cell office:value-type="float" office:value="3.557296" calcext:value-type="float">
            <text:p>3.56</text:p>
          </table:table-cell>
          <table:table-cell table:style-name="Default"/>
          <table:table-cell table:number-columns-repeated="2"/>
          <table:table-cell office:value-type="string" calcext:value-type="string">
            <text:p>Frequency: Annual</text:p>
          </table:table-cell>
          <table:table-cell table:number-columns-repeated="16378"/>
        </table:table-row>
        <table:table-row table:style-name="ro9">
          <table:table-cell office:value-type="float" office:value="1891" calcext:value-type="float">
            <text:p>1891</text:p>
          </table:table-cell>
          <table:table-cell office:value-type="float" office:value="3.209111" calcext:value-type="float">
            <text:p>3.21</text:p>
          </table:table-cell>
          <table:table-cell table:formula="of:=[.B11]/[.B10]-1" office:value-type="percentage" office:value="-0.0978791194210434" calcext:value-type="percentage">
            <text:p>-9.79 %</text:p>
          </table:table-cell>
          <table:table-cell table:number-columns-repeated="2"/>
          <table:table-cell office:value-type="string" calcext:value-type="string">
            <text:p>observation_date</text:p>
          </table:table-cell>
          <table:table-cell office:value-type="string" calcext:value-type="string">
            <text:p>CSUSHPINSA</text:p>
          </table:table-cell>
          <table:table-cell table:number-columns-repeated="16377"/>
        </table:table-row>
        <table:table-row table:style-name="ro9">
          <table:table-cell office:value-type="float" office:value="1892" calcext:value-type="float">
            <text:p>1892</text:p>
          </table:table-cell>
          <table:table-cell office:value-type="float" office:value="3.267142" calcext:value-type="float">
            <text:p>3.27</text:p>
          </table:table-cell>
          <table:table-cell table:formula="of:=[.B12]/[.B11]-1" office:value-type="percentage" office:value="0.0180832012354824" calcext:value-type="percentage">
            <text:p>1.81 %</text:p>
          </table:table-cell>
          <table:table-cell table:number-columns-repeated="2"/>
          <table:table-cell table:style-name="ce175" office:value-type="date" office:date-value="1988-01-01" calcext:value-type="date">
            <text:p>1988-01-01</text:p>
          </table:table-cell>
          <table:table-cell table:style-name="ce180" office:value-type="float" office:value="7.21046" calcext:value-type="float">
            <text:p>7.2</text:p>
          </table:table-cell>
          <table:table-cell table:style-name="ce164" table:formula="of:=[.G12]/100" office:value-type="percentage" office:value="0.0721046" calcext:value-type="percentage">
            <text:p>7.21 %</text:p>
          </table:table-cell>
          <table:table-cell table:number-columns-repeated="16376"/>
        </table:table-row>
        <table:table-row table:style-name="ro9">
          <table:table-cell office:value-type="float" office:value="1893" calcext:value-type="float">
            <text:p>1893</text:p>
          </table:table-cell>
          <table:table-cell office:value-type="float" office:value="3.406416" calcext:value-type="float">
            <text:p>3.41</text:p>
          </table:table-cell>
          <table:table-cell table:formula="of:=[.B13]/[.B12]-1" office:value-type="percentage" office:value="0.0426286950490673" calcext:value-type="percentage">
            <text:p>4.26 %</text:p>
          </table:table-cell>
          <table:table-cell table:number-columns-repeated="2"/>
          <table:table-cell table:style-name="ce175" office:value-type="date" office:date-value="1989-01-01" calcext:value-type="date">
            <text:p>1989-01-01</text:p>
          </table:table-cell>
          <table:table-cell table:style-name="ce180" office:value-type="float" office:value="4.38134" calcext:value-type="float">
            <text:p>4.4</text:p>
          </table:table-cell>
          <table:table-cell table:style-name="ce164" table:formula="of:=[.G13]/100" office:value-type="percentage" office:value="0.0438134" calcext:value-type="percentage">
            <text:p>4.38 %</text:p>
          </table:table-cell>
          <table:table-cell table:number-columns-repeated="16376"/>
        </table:table-row>
        <table:table-row table:style-name="ro9">
          <table:table-cell office:value-type="float" office:value="1894" calcext:value-type="float">
            <text:p>1894</text:p>
          </table:table-cell>
          <table:table-cell office:value-type="float" office:value="3.969316" calcext:value-type="float">
            <text:p>3.97</text:p>
          </table:table-cell>
          <table:table-cell table:formula="of:=[.B14]/[.B13]-1" office:value-type="percentage" office:value="0.165246992733712" calcext:value-type="percentage">
            <text:p>16.52 %</text:p>
          </table:table-cell>
          <table:table-cell table:number-columns-repeated="2"/>
          <table:table-cell table:style-name="ce175" office:value-type="date" office:date-value="1990-01-01" calcext:value-type="date">
            <text:p>1990-01-01</text:p>
          </table:table-cell>
          <table:table-cell table:style-name="ce180" office:value-type="float" office:value="-0.69674" calcext:value-type="float">
            <text:p>-0.7</text:p>
          </table:table-cell>
          <table:table-cell table:style-name="ce164" table:formula="of:=[.G14]/100" office:value-type="percentage" office:value="-0.0069674" calcext:value-type="percentage">
            <text:p>-0.70 %</text:p>
          </table:table-cell>
          <table:table-cell table:number-columns-repeated="16376"/>
        </table:table-row>
        <table:table-row table:style-name="ro9">
          <table:table-cell office:value-type="float" office:value="1895" calcext:value-type="float">
            <text:p>1895</text:p>
          </table:table-cell>
          <table:table-cell office:value-type="float" office:value="3.603721" calcext:value-type="float">
            <text:p>3.60</text:p>
          </table:table-cell>
          <table:table-cell table:formula="of:=[.B15]/[.B14]-1" office:value-type="percentage" office:value="-0.0921052896771131" calcext:value-type="percentage">
            <text:p>-9.21 %</text:p>
          </table:table-cell>
          <table:table-cell table:number-columns-repeated="2"/>
          <table:table-cell table:style-name="ce175" office:value-type="date" office:date-value="1991-01-01" calcext:value-type="date">
            <text:p>1991-01-01</text:p>
          </table:table-cell>
          <table:table-cell table:style-name="ce180" office:value-type="float" office:value="-0.17639" calcext:value-type="float">
            <text:p>-0.2</text:p>
          </table:table-cell>
          <table:table-cell table:style-name="ce164" table:formula="of:=[.G15]/100" office:value-type="percentage" office:value="-0.0017639" calcext:value-type="percentage">
            <text:p>-0.18 %</text:p>
          </table:table-cell>
          <table:table-cell table:number-columns-repeated="16376"/>
        </table:table-row>
        <table:table-row table:style-name="ro9">
          <table:table-cell office:value-type="float" office:value="1896" calcext:value-type="float">
            <text:p>1896</text:p>
          </table:table-cell>
          <table:table-cell office:value-type="float" office:value="3.122064" calcext:value-type="float">
            <text:p>3.12</text:p>
          </table:table-cell>
          <table:table-cell table:formula="of:=[.B16]/[.B15]-1" office:value-type="percentage" office:value="-0.133655463339143" calcext:value-type="percentage">
            <text:p>-13.37 %</text:p>
          </table:table-cell>
          <table:table-cell table:number-columns-repeated="2"/>
          <table:table-cell table:style-name="ce175" office:value-type="date" office:date-value="1992-01-01" calcext:value-type="date">
            <text:p>1992-01-01</text:p>
          </table:table-cell>
          <table:table-cell table:style-name="ce180" office:value-type="float" office:value="0.83606" calcext:value-type="float">
            <text:p>0.8</text:p>
          </table:table-cell>
          <table:table-cell table:style-name="ce164" table:formula="of:=[.G16]/100" office:value-type="percentage" office:value="0.0083606" calcext:value-type="percentage">
            <text:p>0.84 %</text:p>
          </table:table-cell>
          <table:table-cell table:number-columns-repeated="16376"/>
        </table:table-row>
        <table:table-row table:style-name="ro9">
          <table:table-cell office:value-type="float" office:value="1897" calcext:value-type="float">
            <text:p>1897</text:p>
          </table:table-cell>
          <table:table-cell office:value-type="float" office:value="3.220717" calcext:value-type="float">
            <text:p>3.22</text:p>
          </table:table-cell>
          <table:table-cell table:formula="of:=[.B17]/[.B16]-1" office:value-type="percentage" office:value="0.0315986475613568" calcext:value-type="percentage">
            <text:p>3.16 %</text:p>
          </table:table-cell>
          <table:table-cell table:number-columns-repeated="2"/>
          <table:table-cell table:style-name="ce175" office:value-type="date" office:date-value="1993-01-01" calcext:value-type="date">
            <text:p>1993-01-01</text:p>
          </table:table-cell>
          <table:table-cell table:style-name="ce180" office:value-type="float" office:value="2.16175" calcext:value-type="float">
            <text:p>2.2</text:p>
          </table:table-cell>
          <table:table-cell table:style-name="ce164" table:formula="of:=[.G17]/100" office:value-type="percentage" office:value="0.0216175" calcext:value-type="percentage">
            <text:p>2.16 %</text:p>
          </table:table-cell>
          <table:table-cell table:number-columns-repeated="16376"/>
        </table:table-row>
        <table:table-row table:style-name="ro9">
          <table:table-cell office:value-type="float" office:value="1898" calcext:value-type="float">
            <text:p>1898</text:p>
          </table:table-cell>
          <table:table-cell office:value-type="float" office:value="3.429628" calcext:value-type="float">
            <text:p>3.43</text:p>
          </table:table-cell>
          <table:table-cell table:formula="of:=[.B18]/[.B17]-1" office:value-type="percentage" office:value="0.0648647490605354" calcext:value-type="percentage">
            <text:p>6.49 %</text:p>
          </table:table-cell>
          <table:table-cell table:number-columns-repeated="2"/>
          <table:table-cell table:style-name="ce175" office:value-type="date" office:date-value="1994-01-01" calcext:value-type="date">
            <text:p>1994-01-01</text:p>
          </table:table-cell>
          <table:table-cell table:style-name="ce180" office:value-type="float" office:value="2.51539" calcext:value-type="float">
            <text:p>2.5</text:p>
          </table:table-cell>
          <table:table-cell table:style-name="ce164" table:formula="of:=[.G18]/100" office:value-type="percentage" office:value="0.0251539" calcext:value-type="percentage">
            <text:p>2.52 %</text:p>
          </table:table-cell>
          <table:table-cell table:number-columns-repeated="16376"/>
        </table:table-row>
        <table:table-row table:style-name="ro9">
          <table:table-cell office:value-type="float" office:value="1899" calcext:value-type="float">
            <text:p>1899</text:p>
          </table:table-cell>
          <table:table-cell office:value-type="float" office:value="3.278748" calcext:value-type="float">
            <text:p>3.28</text:p>
          </table:table-cell>
          <table:table-cell table:formula="of:=[.B19]/[.B18]-1" office:value-type="percentage" office:value="-0.043993109456769" calcext:value-type="percentage">
            <text:p>-4.40 %</text:p>
          </table:table-cell>
          <table:table-cell table:number-columns-repeated="2"/>
          <table:table-cell table:style-name="ce175" office:value-type="date" office:date-value="1995-01-01" calcext:value-type="date">
            <text:p>1995-01-01</text:p>
          </table:table-cell>
          <table:table-cell table:style-name="ce180" office:value-type="float" office:value="1.8081" calcext:value-type="float">
            <text:p>1.8</text:p>
          </table:table-cell>
          <table:table-cell table:style-name="ce164" table:formula="of:=[.G19]/100" office:value-type="percentage" office:value="0.018081" calcext:value-type="percentage">
            <text:p>1.81 %</text:p>
          </table:table-cell>
          <table:table-cell table:number-columns-repeated="16376"/>
        </table:table-row>
        <table:table-row table:style-name="ro9">
          <table:table-cell office:value-type="float" office:value="1900" calcext:value-type="float">
            <text:p>1900</text:p>
          </table:table-cell>
          <table:table-cell office:value-type="float" office:value="3.748799" calcext:value-type="float">
            <text:p>3.75</text:p>
          </table:table-cell>
          <table:table-cell table:formula="of:=[.B20]/[.B19]-1" office:value-type="percentage" office:value="0.143362954396007" calcext:value-type="percentage">
            <text:p>14.34 %</text:p>
          </table:table-cell>
          <table:table-cell table:number-columns-repeated="2"/>
          <table:table-cell table:style-name="ce175" office:value-type="date" office:date-value="1996-01-01" calcext:value-type="date">
            <text:p>1996-01-01</text:p>
          </table:table-cell>
          <table:table-cell table:style-name="ce180" office:value-type="float" office:value="2.43095" calcext:value-type="float">
            <text:p>2.4</text:p>
          </table:table-cell>
          <table:table-cell table:style-name="ce164" table:formula="of:=[.G20]/100" office:value-type="percentage" office:value="0.0243095" calcext:value-type="percentage">
            <text:p>2.43 %</text:p>
          </table:table-cell>
          <table:table-cell table:number-columns-repeated="16376"/>
        </table:table-row>
        <table:table-row table:style-name="ro9">
          <table:table-cell office:value-type="float" office:value="1901" calcext:value-type="float">
            <text:p>1901</text:p>
          </table:table-cell>
          <table:table-cell office:value-type="float" office:value="3.145277" calcext:value-type="float">
            <text:p>3.15</text:p>
          </table:table-cell>
          <table:table-cell table:formula="of:=[.B21]/[.B20]-1" office:value-type="percentage" office:value="-0.160990759974061" calcext:value-type="percentage">
            <text:p>-16.10 %</text:p>
          </table:table-cell>
          <table:table-cell table:number-columns-repeated="2"/>
          <table:table-cell table:style-name="ce175" office:value-type="date" office:date-value="1997-01-01" calcext:value-type="date">
            <text:p>1997-01-01</text:p>
          </table:table-cell>
          <table:table-cell table:style-name="ce180" office:value-type="float" office:value="4.02567" calcext:value-type="float">
            <text:p>4.0</text:p>
          </table:table-cell>
          <table:table-cell table:style-name="ce164" table:formula="of:=[.G21]/100" office:value-type="percentage" office:value="0.0402567" calcext:value-type="percentage">
            <text:p>4.03 %</text:p>
          </table:table-cell>
          <table:table-cell table:number-columns-repeated="16376"/>
        </table:table-row>
        <table:table-row table:style-name="ro9">
          <table:table-cell office:value-type="float" office:value="1902" calcext:value-type="float">
            <text:p>1902</text:p>
          </table:table-cell>
          <table:table-cell office:value-type="float" office:value="3.708177" calcext:value-type="float">
            <text:p>3.71</text:p>
          </table:table-cell>
          <table:table-cell table:formula="of:=[.B22]/[.B21]-1" office:value-type="percentage" office:value="0.17896674919252" calcext:value-type="percentage">
            <text:p>17.90 %</text:p>
          </table:table-cell>
          <table:table-cell table:number-columns-repeated="2"/>
          <table:table-cell table:style-name="ce175" office:value-type="date" office:date-value="1998-01-01" calcext:value-type="date">
            <text:p>1998-01-01</text:p>
          </table:table-cell>
          <table:table-cell table:style-name="ce180" office:value-type="float" office:value="6.43791" calcext:value-type="float">
            <text:p>6.4</text:p>
          </table:table-cell>
          <table:table-cell table:style-name="ce164" table:formula="of:=[.G22]/100" office:value-type="percentage" office:value="0.0643791" calcext:value-type="percentage">
            <text:p>6.44 %</text:p>
          </table:table-cell>
          <table:table-cell table:number-columns-repeated="16376"/>
        </table:table-row>
        <table:table-row table:style-name="ro9">
          <table:table-cell office:value-type="float" office:value="1903" calcext:value-type="float">
            <text:p>1903</text:p>
          </table:table-cell>
          <table:table-cell office:value-type="float" office:value="3.766208" calcext:value-type="float">
            <text:p>3.77</text:p>
          </table:table-cell>
          <table:table-cell table:formula="of:=[.B23]/[.B22]-1" office:value-type="percentage" office:value="0.0156494687281648" calcext:value-type="percentage">
            <text:p>1.56 %</text:p>
          </table:table-cell>
          <table:table-cell table:number-columns-repeated="2"/>
          <table:table-cell table:style-name="ce175" office:value-type="date" office:date-value="1999-01-01" calcext:value-type="date">
            <text:p>1999-01-01</text:p>
          </table:table-cell>
          <table:table-cell table:style-name="ce180" office:value-type="float" office:value="7.6869" calcext:value-type="float">
            <text:p>7.7</text:p>
          </table:table-cell>
          <table:table-cell table:style-name="ce164" table:formula="of:=[.G23]/100" office:value-type="percentage" office:value="0.076869" calcext:value-type="percentage">
            <text:p>7.69 %</text:p>
          </table:table-cell>
          <table:table-cell table:number-columns-repeated="16376"/>
        </table:table-row>
        <table:table-row table:style-name="ro9">
          <table:table-cell office:value-type="float" office:value="1904" calcext:value-type="float">
            <text:p>1904</text:p>
          </table:table-cell>
          <table:table-cell office:value-type="float" office:value="3.940301" calcext:value-type="float">
            <text:p>3.94</text:p>
          </table:table-cell>
          <table:table-cell table:formula="of:=[.B24]/[.B23]-1" office:value-type="percentage" office:value="0.0462250093462708" calcext:value-type="percentage">
            <text:p>4.62 %</text:p>
          </table:table-cell>
          <table:table-cell table:number-columns-repeated="2"/>
          <table:table-cell table:style-name="ce175" office:value-type="date" office:date-value="2000-01-01" calcext:value-type="date">
            <text:p>2000-01-01</text:p>
          </table:table-cell>
          <table:table-cell table:style-name="ce180" office:value-type="float" office:value="9.25415" calcext:value-type="float">
            <text:p>9.3</text:p>
          </table:table-cell>
          <table:table-cell table:style-name="ce164" table:formula="of:=[.G24]/100" office:value-type="percentage" office:value="0.0925415" calcext:value-type="percentage">
            <text:p>9.25 %</text:p>
          </table:table-cell>
          <table:table-cell table:number-columns-repeated="16376"/>
        </table:table-row>
        <table:table-row table:style-name="ro9">
          <table:table-cell office:value-type="float" office:value="1905" calcext:value-type="float">
            <text:p>1905</text:p>
          </table:table-cell>
          <table:table-cell office:value-type="float" office:value="3.452841" calcext:value-type="float">
            <text:p>3.45</text:p>
          </table:table-cell>
          <table:table-cell table:formula="of:=[.B25]/[.B24]-1" office:value-type="percentage" office:value="-0.123711361137131" calcext:value-type="percentage">
            <text:p>-12.37 %</text:p>
          </table:table-cell>
          <table:table-cell table:number-columns-repeated="2"/>
          <table:table-cell table:style-name="ce175" office:value-type="date" office:date-value="2001-01-01" calcext:value-type="date">
            <text:p>2001-01-01</text:p>
          </table:table-cell>
          <table:table-cell table:style-name="ce180" office:value-type="float" office:value="6.67696" calcext:value-type="float">
            <text:p>6.7</text:p>
          </table:table-cell>
          <table:table-cell table:style-name="ce164" table:formula="of:=[.G25]/100" office:value-type="percentage" office:value="0.0667696" calcext:value-type="percentage">
            <text:p>6.68 %</text:p>
          </table:table-cell>
          <table:table-cell table:number-columns-repeated="16376"/>
        </table:table-row>
        <table:table-row table:style-name="ro9">
          <table:table-cell office:value-type="float" office:value="1906" calcext:value-type="float">
            <text:p>1906</text:p>
          </table:table-cell>
          <table:table-cell office:value-type="float" office:value="4.096984" calcext:value-type="float">
            <text:p>4.10</text:p>
          </table:table-cell>
          <table:table-cell table:formula="of:=[.B26]/[.B25]-1" office:value-type="percentage" office:value="0.186554492373092" calcext:value-type="percentage">
            <text:p>18.66 %</text:p>
          </table:table-cell>
          <table:table-cell table:number-columns-repeated="2"/>
          <table:table-cell table:style-name="ce175" office:value-type="date" office:date-value="2002-01-01" calcext:value-type="date">
            <text:p>2002-01-01</text:p>
          </table:table-cell>
          <table:table-cell table:style-name="ce180" office:value-type="float" office:value="9.55918" calcext:value-type="float">
            <text:p>9.6</text:p>
          </table:table-cell>
          <table:table-cell table:style-name="ce164" table:formula="of:=[.G26]/100" office:value-type="percentage" office:value="0.0955918" calcext:value-type="percentage">
            <text:p>9.56 %</text:p>
          </table:table-cell>
          <table:table-cell table:number-columns-repeated="16376"/>
        </table:table-row>
        <table:table-row table:style-name="ro9">
          <table:table-cell office:value-type="float" office:value="1907" calcext:value-type="float">
            <text:p>1907</text:p>
          </table:table-cell>
          <table:table-cell office:value-type="float" office:value="4.52061" calcext:value-type="float">
            <text:p>4.52</text:p>
          </table:table-cell>
          <table:table-cell table:formula="of:=[.B27]/[.B26]-1" office:value-type="percentage" office:value="0.103399476297686" calcext:value-type="percentage">
            <text:p>10.34 %</text:p>
          </table:table-cell>
          <table:table-cell table:number-columns-repeated="2"/>
          <table:table-cell table:style-name="ce175" office:value-type="date" office:date-value="2003-01-01" calcext:value-type="date">
            <text:p>2003-01-01</text:p>
          </table:table-cell>
          <table:table-cell table:style-name="ce180" office:value-type="float" office:value="9.81675" calcext:value-type="float">
            <text:p>9.8</text:p>
          </table:table-cell>
          <table:table-cell table:style-name="ce164" table:formula="of:=[.G27]/100" office:value-type="percentage" office:value="0.0981675" calcext:value-type="percentage">
            <text:p>9.82 %</text:p>
          </table:table-cell>
          <table:table-cell table:number-columns-repeated="16376"/>
        </table:table-row>
        <table:table-row table:style-name="ro9">
          <table:table-cell office:value-type="float" office:value="1908" calcext:value-type="float">
            <text:p>1908</text:p>
          </table:table-cell>
          <table:table-cell office:value-type="float" office:value="4.079575" calcext:value-type="float">
            <text:p>4.08</text:p>
          </table:table-cell>
          <table:table-cell table:formula="of:=[.B28]/[.B27]-1" office:value-type="percentage" office:value="-0.0975609486330383" calcext:value-type="percentage">
            <text:p>-9.76 %</text:p>
          </table:table-cell>
          <table:table-cell table:number-columns-repeated="2"/>
          <table:table-cell table:style-name="ce175" office:value-type="date" office:date-value="2004-01-01" calcext:value-type="date">
            <text:p>2004-01-01</text:p>
          </table:table-cell>
          <table:table-cell table:style-name="ce180" office:value-type="float" office:value="13.63799" calcext:value-type="float">
            <text:p>13.6</text:p>
          </table:table-cell>
          <table:table-cell table:style-name="ce164" table:formula="of:=[.G28]/100" office:value-type="percentage" office:value="0.1363799" calcext:value-type="percentage">
            <text:p>13.64 %</text:p>
          </table:table-cell>
          <table:table-cell table:number-columns-repeated="16376"/>
        </table:table-row>
        <table:table-row table:style-name="ro9">
          <table:table-cell office:value-type="float" office:value="1909" calcext:value-type="float">
            <text:p>1909</text:p>
          </table:table-cell>
          <table:table-cell office:value-type="float" office:value="3.986725" calcext:value-type="float">
            <text:p>3.99</text:p>
          </table:table-cell>
          <table:table-cell table:formula="of:=[.B29]/[.B28]-1" office:value-type="percentage" office:value="-0.0227597237457334" calcext:value-type="percentage">
            <text:p>-2.28 %</text:p>
          </table:table-cell>
          <table:table-cell table:number-columns-repeated="2"/>
          <table:table-cell table:style-name="ce175" office:value-type="date" office:date-value="2005-01-01" calcext:value-type="date">
            <text:p>2005-01-01</text:p>
          </table:table-cell>
          <table:table-cell table:style-name="ce180" office:value-type="float" office:value="13.51063" calcext:value-type="float">
            <text:p>13.5</text:p>
          </table:table-cell>
          <table:table-cell table:style-name="ce164" table:formula="of:=[.G29]/100" office:value-type="percentage" office:value="0.1351063" calcext:value-type="percentage">
            <text:p>13.51 %</text:p>
          </table:table-cell>
          <table:table-cell table:number-columns-repeated="16376"/>
        </table:table-row>
        <table:table-row table:style-name="ro9">
          <table:table-cell office:value-type="float" office:value="1910" calcext:value-type="float">
            <text:p>1910</text:p>
          </table:table-cell>
          <table:table-cell office:value-type="float" office:value="4.305896" calcext:value-type="float">
            <text:p>4.31</text:p>
          </table:table-cell>
          <table:table-cell table:formula="of:=[.B30]/[.B29]-1" office:value-type="percentage" office:value="0.0800584439608951" calcext:value-type="percentage">
            <text:p>8.01 %</text:p>
          </table:table-cell>
          <table:table-cell table:number-columns-repeated="2"/>
          <table:table-cell table:style-name="ce175" office:value-type="date" office:date-value="2006-01-01" calcext:value-type="date">
            <text:p>2006-01-01</text:p>
          </table:table-cell>
          <table:table-cell table:style-name="ce180" office:value-type="float" office:value="1.73391" calcext:value-type="float">
            <text:p>1.7</text:p>
          </table:table-cell>
          <table:table-cell table:style-name="ce164" table:formula="of:=[.G30]/100" office:value-type="percentage" office:value="0.0173391" calcext:value-type="percentage">
            <text:p>1.73 %</text:p>
          </table:table-cell>
          <table:table-cell table:number-columns-repeated="16376"/>
        </table:table-row>
        <table:table-row table:style-name="ro9">
          <table:table-cell office:value-type="float" office:value="1911" calcext:value-type="float">
            <text:p>1911</text:p>
          </table:table-cell>
          <table:table-cell office:value-type="float" office:value="4.207243" calcext:value-type="float">
            <text:p>4.21</text:p>
          </table:table-cell>
          <table:table-cell table:formula="of:=[.B31]/[.B30]-1" office:value-type="percentage" office:value="-0.0229111432324421" calcext:value-type="percentage">
            <text:p>-2.29 %</text:p>
          </table:table-cell>
          <table:table-cell table:number-columns-repeated="2"/>
          <table:table-cell table:style-name="ce175" office:value-type="date" office:date-value="2007-01-01" calcext:value-type="date">
            <text:p>2007-01-01</text:p>
          </table:table-cell>
          <table:table-cell table:style-name="ce180" office:value-type="float" office:value="-5.39741" calcext:value-type="float">
            <text:p>-5.4</text:p>
          </table:table-cell>
          <table:table-cell table:style-name="ce164" table:formula="of:=[.G31]/100" office:value-type="percentage" office:value="-0.0539741" calcext:value-type="percentage">
            <text:p>-5.40 %</text:p>
          </table:table-cell>
          <table:table-cell table:number-columns-repeated="16376"/>
        </table:table-row>
        <table:table-row table:style-name="ro9">
          <table:table-cell office:value-type="float" office:value="1912" calcext:value-type="float">
            <text:p>1912</text:p>
          </table:table-cell>
          <table:table-cell office:value-type="float" office:value="4.36973" calcext:value-type="float">
            <text:p>4.37</text:p>
          </table:table-cell>
          <table:table-cell table:formula="of:=[.B32]/[.B31]-1" office:value-type="percentage" office:value="0.0386207785003148" calcext:value-type="percentage">
            <text:p>3.86 %</text:p>
          </table:table-cell>
          <table:table-cell table:number-columns-repeated="2"/>
          <table:table-cell table:style-name="ce175" office:value-type="date" office:date-value="2008-01-01" calcext:value-type="date">
            <text:p>2008-01-01</text:p>
          </table:table-cell>
          <table:table-cell table:style-name="ce180" office:value-type="float" office:value="-11.99508" calcext:value-type="float">
            <text:p>-12.0</text:p>
          </table:table-cell>
          <table:table-cell table:style-name="ce164" table:formula="of:=[.G32]/100" office:value-type="percentage" office:value="-0.1199508" calcext:value-type="percentage">
            <text:p>-12.00 %</text:p>
          </table:table-cell>
          <table:table-cell table:number-columns-repeated="16376"/>
        </table:table-row>
        <table:table-row table:style-name="ro9">
          <table:table-cell office:value-type="float" office:value="1913" calcext:value-type="float">
            <text:p>1913</text:p>
          </table:table-cell>
          <table:table-cell office:value-type="float" office:value="4.36973" calcext:value-type="float">
            <text:p>4.37</text:p>
          </table:table-cell>
          <table:table-cell table:formula="of:=[.B33]/[.B32]-1" office:value-type="percentage" office:value="0" calcext:value-type="percentage">
            <text:p>0.00 %</text:p>
          </table:table-cell>
          <table:table-cell table:number-columns-repeated="2"/>
          <table:table-cell table:style-name="ce175" office:value-type="date" office:date-value="2009-01-01" calcext:value-type="date">
            <text:p>2009-01-01</text:p>
          </table:table-cell>
          <table:table-cell table:style-name="ce180" office:value-type="float" office:value="-3.85374" calcext:value-type="float">
            <text:p>-3.9</text:p>
          </table:table-cell>
          <table:table-cell table:style-name="ce164" table:formula="of:=[.G33]/100" office:value-type="percentage" office:value="-0.0385374" calcext:value-type="percentage">
            <text:p>-3.85 %</text:p>
          </table:table-cell>
          <table:table-cell table:number-columns-repeated="16376"/>
        </table:table-row>
        <table:table-row table:style-name="ro9">
          <table:table-cell office:value-type="float" office:value="1914" calcext:value-type="float">
            <text:p>1914</text:p>
          </table:table-cell>
          <table:table-cell office:value-type="float" office:value="4.532216" calcext:value-type="float">
            <text:p>4.53</text:p>
          </table:table-cell>
          <table:table-cell table:formula="of:=[.B34]/[.B33]-1" office:value-type="percentage" office:value="0.0371844484670678" calcext:value-type="percentage">
            <text:p>3.72 %</text:p>
          </table:table-cell>
          <table:table-cell table:number-columns-repeated="2"/>
          <table:table-cell table:style-name="ce175" office:value-type="date" office:date-value="2010-01-01" calcext:value-type="date">
            <text:p>2010-01-01</text:p>
          </table:table-cell>
          <table:table-cell table:style-name="ce180" office:value-type="float" office:value="-4.11661" calcext:value-type="float">
            <text:p>-4.1</text:p>
          </table:table-cell>
          <table:table-cell table:style-name="ce164" table:formula="of:=[.G34]/100" office:value-type="percentage" office:value="-0.0411661" calcext:value-type="percentage">
            <text:p>-4.12 %</text:p>
          </table:table-cell>
          <table:table-cell table:number-columns-repeated="16376"/>
        </table:table-row>
        <table:table-row table:style-name="ro9">
          <table:table-cell office:value-type="float" office:value="1915" calcext:value-type="float">
            <text:p>1915</text:p>
          </table:table-cell>
          <table:table-cell office:value-type="float" office:value="4.160818" calcext:value-type="float">
            <text:p>4.16</text:p>
          </table:table-cell>
          <table:table-cell table:formula="of:=[.B35]/[.B34]-1" office:value-type="percentage" office:value="-0.0819462267464746" calcext:value-type="percentage">
            <text:p>-8.19 %</text:p>
          </table:table-cell>
          <table:table-cell table:number-columns-repeated="2"/>
          <table:table-cell table:style-name="ce175" office:value-type="date" office:date-value="2011-01-01" calcext:value-type="date">
            <text:p>2011-01-01</text:p>
          </table:table-cell>
          <table:table-cell table:style-name="ce180" office:value-type="float" office:value="-3.89587" calcext:value-type="float">
            <text:p>-3.9</text:p>
          </table:table-cell>
          <table:table-cell table:style-name="ce164" table:formula="of:=[.G35]/100" office:value-type="percentage" office:value="-0.0389587" calcext:value-type="percentage">
            <text:p>-3.90 %</text:p>
          </table:table-cell>
          <table:table-cell table:number-columns-repeated="16376"/>
        </table:table-row>
        <table:table-row table:style-name="ro9">
          <table:table-cell office:value-type="float" office:value="1916" calcext:value-type="float">
            <text:p>1916</text:p>
          </table:table-cell>
          <table:table-cell office:value-type="float" office:value="4.555429" calcext:value-type="float">
            <text:p>4.56</text:p>
          </table:table-cell>
          <table:table-cell table:formula="of:=[.B36]/[.B35]-1" office:value-type="percentage" office:value="0.0948397646808874" calcext:value-type="percentage">
            <text:p>9.48 %</text:p>
          </table:table-cell>
          <table:table-cell table:number-columns-repeated="2"/>
          <table:table-cell table:style-name="ce175" office:value-type="date" office:date-value="2012-01-01" calcext:value-type="date">
            <text:p>2012-01-01</text:p>
          </table:table-cell>
          <table:table-cell table:style-name="ce180" office:value-type="float" office:value="6.45028" calcext:value-type="float">
            <text:p>6.5</text:p>
          </table:table-cell>
          <table:table-cell table:style-name="ce164" table:formula="of:=[.G36]/100" office:value-type="percentage" office:value="0.0645028" calcext:value-type="percentage">
            <text:p>6.45 %</text:p>
          </table:table-cell>
          <table:table-cell table:number-columns-repeated="16376"/>
        </table:table-row>
        <table:table-row table:style-name="ro9">
          <table:table-cell office:value-type="float" office:value="1917" calcext:value-type="float">
            <text:p>1917</text:p>
          </table:table-cell>
          <table:table-cell office:value-type="float" office:value="4.648278" calcext:value-type="float">
            <text:p>4.65</text:p>
          </table:table-cell>
          <table:table-cell table:formula="of:=[.B37]/[.B36]-1" office:value-type="percentage" office:value="0.0203820540282815" calcext:value-type="percentage">
            <text:p>2.04 %</text:p>
          </table:table-cell>
          <table:table-cell table:number-columns-repeated="2"/>
          <table:table-cell table:style-name="ce175" office:value-type="date" office:date-value="2013-01-01" calcext:value-type="date">
            <text:p>2013-01-01</text:p>
          </table:table-cell>
          <table:table-cell table:style-name="ce180" office:value-type="float" office:value="10.71347" calcext:value-type="float">
            <text:p>10.7</text:p>
          </table:table-cell>
          <table:table-cell table:style-name="ce164" table:formula="of:=[.G37]/100" office:value-type="percentage" office:value="0.1071347" calcext:value-type="percentage">
            <text:p>10.71 %</text:p>
          </table:table-cell>
          <table:table-cell table:number-columns-repeated="16376"/>
        </table:table-row>
        <table:table-row table:style-name="ro9">
          <table:table-cell office:value-type="float" office:value="1918" calcext:value-type="float">
            <text:p>1918</text:p>
          </table:table-cell>
          <table:table-cell office:value-type="float" office:value="4.944236" calcext:value-type="float">
            <text:p>4.94</text:p>
          </table:table-cell>
          <table:table-cell table:formula="of:=[.B38]/[.B37]-1" office:value-type="percentage" office:value="0.0636704603296101" calcext:value-type="percentage">
            <text:p>6.37 %</text:p>
          </table:table-cell>
          <table:table-cell table:number-columns-repeated="2"/>
          <table:table-cell table:style-name="ce175" office:value-type="date" office:date-value="2014-01-01" calcext:value-type="date">
            <text:p>2014-01-01</text:p>
          </table:table-cell>
          <table:table-cell table:style-name="ce180" office:value-type="float" office:value="4.52071" calcext:value-type="float">
            <text:p>4.5</text:p>
          </table:table-cell>
          <table:table-cell table:style-name="ce164" table:formula="of:=[.G38]/100" office:value-type="percentage" office:value="0.0452071" calcext:value-type="percentage">
            <text:p>4.52 %</text:p>
          </table:table-cell>
          <table:table-cell table:number-columns-repeated="16376"/>
        </table:table-row>
        <table:table-row table:style-name="ro9">
          <table:table-cell office:value-type="float" office:value="1919" calcext:value-type="float">
            <text:p>1919</text:p>
          </table:table-cell>
          <table:table-cell office:value-type="float" office:value="5.437499" calcext:value-type="float">
            <text:p>5.44</text:p>
          </table:table-cell>
          <table:table-cell table:formula="of:=[.B39]/[.B38]-1" office:value-type="percentage" office:value="0.0997652620141918" calcext:value-type="percentage">
            <text:p>9.98 %</text:p>
          </table:table-cell>
          <table:table-cell table:number-columns-repeated="2"/>
          <table:table-cell table:style-name="ce175" office:value-type="date" office:date-value="2015-01-01" calcext:value-type="date">
            <text:p>2015-01-01</text:p>
          </table:table-cell>
          <table:table-cell table:style-name="ce180" office:value-type="float" office:value="5.21893" calcext:value-type="float">
            <text:p>5.2</text:p>
          </table:table-cell>
          <table:table-cell table:style-name="ce164" table:formula="of:=[.G39]/100" office:value-type="percentage" office:value="0.0521893" calcext:value-type="percentage">
            <text:p>5.22 %</text:p>
          </table:table-cell>
          <table:table-cell table:number-columns-repeated="16376"/>
        </table:table-row>
        <table:table-row table:style-name="ro9">
          <table:table-cell office:value-type="float" office:value="1920" calcext:value-type="float">
            <text:p>1920</text:p>
          </table:table-cell>
          <table:table-cell office:value-type="float" office:value="5.959777" calcext:value-type="float">
            <text:p>5.96</text:p>
          </table:table-cell>
          <table:table-cell table:formula="of:=[.B40]/[.B39]-1" office:value-type="percentage" office:value="0.0960511441013598" calcext:value-type="percentage">
            <text:p>9.61 %</text:p>
          </table:table-cell>
          <table:table-cell table:number-columns-repeated="2"/>
          <table:table-cell table:style-name="ce175" office:value-type="date" office:date-value="2016-01-01" calcext:value-type="date">
            <text:p>2016-01-01</text:p>
          </table:table-cell>
          <table:table-cell table:style-name="ce180" office:value-type="float" office:value="5.33055" calcext:value-type="float">
            <text:p>5.3</text:p>
          </table:table-cell>
          <table:table-cell table:style-name="ce164" table:formula="of:=[.G40]/100" office:value-type="percentage" office:value="0.0533055" calcext:value-type="percentage">
            <text:p>5.33 %</text:p>
          </table:table-cell>
          <table:table-cell table:number-columns-repeated="16376"/>
        </table:table-row>
        <table:table-row table:style-name="ro9">
          <table:table-cell office:value-type="float" office:value="1921" calcext:value-type="float">
            <text:p>1921</text:p>
          </table:table-cell>
          <table:table-cell office:value-type="float" office:value="5.826306" calcext:value-type="float">
            <text:p>5.83</text:p>
          </table:table-cell>
          <table:table-cell table:formula="of:=[.B41]/[.B40]-1" office:value-type="percentage" office:value="-0.0223953010322366" calcext:value-type="percentage">
            <text:p>-2.24 %</text:p>
          </table:table-cell>
          <table:table-cell table:number-columns-repeated="2"/>
          <table:table-cell table:style-name="ce175" office:value-type="date" office:date-value="2017-01-01" calcext:value-type="date">
            <text:p>2017-01-01</text:p>
          </table:table-cell>
          <table:table-cell table:style-name="ce180" office:value-type="float" office:value="6.23032" calcext:value-type="float">
            <text:p>6.2</text:p>
          </table:table-cell>
          <table:table-cell table:style-name="ce164" table:formula="of:=[.G41]/100" office:value-type="percentage" office:value="0.0623032" calcext:value-type="percentage">
            <text:p>6.23 %</text:p>
          </table:table-cell>
          <table:table-cell table:number-columns-repeated="16376"/>
        </table:table-row>
        <table:table-row table:style-name="ro9">
          <table:table-cell office:value-type="float" office:value="1922" calcext:value-type="float">
            <text:p>1922</text:p>
          </table:table-cell>
          <table:table-cell office:value-type="float" office:value="5.907549" calcext:value-type="float">
            <text:p>5.91</text:p>
          </table:table-cell>
          <table:table-cell table:formula="of:=[.B42]/[.B41]-1" office:value-type="percentage" office:value="0.0139441697706919" calcext:value-type="percentage">
            <text:p>1.39 %</text:p>
          </table:table-cell>
          <table:table-cell table:number-columns-repeated="2"/>
          <table:table-cell table:style-name="ce175" office:value-type="date" office:date-value="2018-01-01" calcext:value-type="date">
            <text:p>2018-01-01</text:p>
          </table:table-cell>
          <table:table-cell table:style-name="ce180" office:value-type="float" office:value="4.54613" calcext:value-type="float">
            <text:p>4.5</text:p>
          </table:table-cell>
          <table:table-cell table:style-name="ce164" table:formula="of:=[.G42]/100" office:value-type="percentage" office:value="0.0454613" calcext:value-type="percentage">
            <text:p>4.55 %</text:p>
          </table:table-cell>
          <table:table-cell table:number-columns-repeated="16376"/>
        </table:table-row>
        <table:table-row table:style-name="ro9">
          <table:table-cell office:value-type="float" office:value="1923" calcext:value-type="float">
            <text:p>1923</text:p>
          </table:table-cell>
          <table:table-cell office:value-type="float" office:value="5.994596" calcext:value-type="float">
            <text:p>5.99</text:p>
          </table:table-cell>
          <table:table-cell table:formula="of:=[.B43]/[.B42]-1" office:value-type="percentage" office:value="0.0147348756650176" calcext:value-type="percentage">
            <text:p>1.47 %</text:p>
          </table:table-cell>
          <table:table-cell table:number-columns-repeated="2"/>
          <table:table-cell table:style-name="ce175" office:value-type="date" office:date-value="2019-01-01" calcext:value-type="date">
            <text:p>2019-01-01</text:p>
          </table:table-cell>
          <table:table-cell table:style-name="ce178" table:formula="of:=NA()" office:value-type="string" office:string-value="" calcext:value-type="error">
            <text:p>#N/D</text:p>
          </table:table-cell>
          <table:table-cell table:number-columns-repeated="16377"/>
        </table:table-row>
        <table:table-row table:style-name="ro9">
          <table:table-cell office:value-type="float" office:value="1924" calcext:value-type="float">
            <text:p>1924</text:p>
          </table:table-cell>
          <table:table-cell office:value-type="float" office:value="6.006202" calcext:value-type="float">
            <text:p>6.01</text:p>
          </table:table-cell>
          <table:table-cell table:formula="of:=[.B44]/[.B43]-1" office:value-type="percentage" office:value="0.00193607709343557" calcext:value-type="percentage">
            <text:p>0.19 %</text:p>
          </table:table-cell>
          <table:table-cell table:number-columns-repeated="16381"/>
        </table:table-row>
        <table:table-row table:style-name="ro9">
          <table:table-cell office:value-type="float" office:value="1925" calcext:value-type="float">
            <text:p>1925</text:p>
          </table:table-cell>
          <table:table-cell office:value-type="float" office:value="6.319569" calcext:value-type="float">
            <text:p>6.32</text:p>
          </table:table-cell>
          <table:table-cell table:formula="of:=[.B45]/[.B44]-1" office:value-type="percentage" office:value="0.0521739029090265" calcext:value-type="percentage">
            <text:p>5.22 %</text:p>
          </table:table-cell>
          <table:table-cell table:number-columns-repeated="16381"/>
        </table:table-row>
        <table:table-row table:style-name="ro9">
          <table:table-cell office:value-type="float" office:value="1926" calcext:value-type="float">
            <text:p>1926</text:p>
          </table:table-cell>
          <table:table-cell office:value-type="float" office:value="6.064233" calcext:value-type="float">
            <text:p>6.06</text:p>
          </table:table-cell>
          <table:table-cell table:formula="of:=[.B46]/[.B45]-1" office:value-type="percentage" office:value="-0.0404040212235993" calcext:value-type="percentage">
            <text:p>-4.04 %</text:p>
          </table:table-cell>
          <table:table-cell table:number-columns-repeated="16381"/>
        </table:table-row>
        <table:table-row table:style-name="ro9">
          <table:table-cell office:value-type="float" office:value="1927" calcext:value-type="float">
            <text:p>1927</text:p>
          </table:table-cell>
          <table:table-cell office:value-type="float" office:value="5.837912" calcext:value-type="float">
            <text:p>5.84</text:p>
          </table:table-cell>
          <table:table-cell table:formula="of:=[.B47]/[.B46]-1" office:value-type="percentage" office:value="-0.0373206306551875" calcext:value-type="percentage">
            <text:p>-3.73 %</text:p>
          </table:table-cell>
          <table:table-cell table:number-columns-repeated="16381"/>
        </table:table-row>
        <table:table-row table:style-name="ro9">
          <table:table-cell office:value-type="float" office:value="1928" calcext:value-type="float">
            <text:p>1928</text:p>
          </table:table-cell>
          <table:table-cell office:value-type="float" office:value="5.924959" calcext:value-type="float">
            <text:p>5.92</text:p>
          </table:table-cell>
          <table:table-cell table:formula="of:=[.B48]/[.B47]-1" office:value-type="percentage" office:value="0.0149106392833602" calcext:value-type="percentage">
            <text:p>1.49 %</text:p>
          </table:table-cell>
          <table:table-cell table:number-columns-repeated="16381"/>
        </table:table-row>
        <table:table-row table:style-name="ro9">
          <table:table-cell office:value-type="float" office:value="1929" calcext:value-type="float">
            <text:p>1929</text:p>
          </table:table-cell>
          <table:table-cell office:value-type="float" office:value="5.803094" calcext:value-type="float">
            <text:p>5.80</text:p>
          </table:table-cell>
          <table:table-cell table:formula="of:=[.B49]/[.B48]-1" office:value-type="percentage" office:value="-0.0205680748170579" calcext:value-type="percentage">
            <text:p>-2.06 %</text:p>
          </table:table-cell>
          <table:table-cell table:number-columns-repeated="16381"/>
        </table:table-row>
        <table:table-row table:style-name="ro9">
          <table:table-cell office:value-type="float" office:value="1930" calcext:value-type="float">
            <text:p>1930</text:p>
          </table:table-cell>
          <table:table-cell office:value-type="float" office:value="5.553561" calcext:value-type="float">
            <text:p>5.55</text:p>
          </table:table-cell>
          <table:table-cell table:formula="of:=[.B50]/[.B49]-1" office:value-type="percentage" office:value="-0.0429999927624815" calcext:value-type="percentage">
            <text:p>-4.30 %</text:p>
          </table:table-cell>
          <table:table-cell table:number-columns-repeated="16381"/>
        </table:table-row>
        <table:table-row table:style-name="ro9">
          <table:table-cell office:value-type="float" office:value="1931" calcext:value-type="float">
            <text:p>1931</text:p>
          </table:table-cell>
          <table:table-cell office:value-type="float" office:value="5.100919" calcext:value-type="float">
            <text:p>5.10</text:p>
          </table:table-cell>
          <table:table-cell table:formula="of:=[.B51]/[.B50]-1" office:value-type="percentage" office:value="-0.0815048218611446" calcext:value-type="percentage">
            <text:p>-8.15 %</text:p>
          </table:table-cell>
          <table:table-cell table:number-columns-repeated="16381"/>
        </table:table-row>
        <table:table-row table:style-name="ro9">
          <table:table-cell office:value-type="float" office:value="1932" calcext:value-type="float">
            <text:p>1932</text:p>
          </table:table-cell>
          <table:table-cell office:value-type="float" office:value="4.567035" calcext:value-type="float">
            <text:p>4.57</text:p>
          </table:table-cell>
          <table:table-cell table:formula="of:=[.B52]/[.B51]-1" office:value-type="percentage" office:value="-0.104664277162606" calcext:value-type="percentage">
            <text:p>-10.47 %</text:p>
          </table:table-cell>
          <table:table-cell table:number-columns-repeated="16381"/>
        </table:table-row>
        <table:table-row table:style-name="ro9">
          <table:table-cell office:value-type="float" office:value="1933" calcext:value-type="float">
            <text:p>1933</text:p>
          </table:table-cell>
          <table:table-cell office:value-type="float" office:value="4.392942" calcext:value-type="float">
            <text:p>4.39</text:p>
          </table:table-cell>
          <table:table-cell table:formula="of:=[.B53]/[.B52]-1" office:value-type="percentage" office:value="-0.0381194801441198" calcext:value-type="percentage">
            <text:p>-3.81 %</text:p>
          </table:table-cell>
          <table:table-cell table:number-columns-repeated="16381"/>
        </table:table-row>
        <table:table-row table:style-name="ro9">
          <table:table-cell office:value-type="float" office:value="1934" calcext:value-type="float">
            <text:p>1934</text:p>
          </table:table-cell>
          <table:table-cell office:value-type="float" office:value="4.52061" calcext:value-type="float">
            <text:p>4.52</text:p>
          </table:table-cell>
          <table:table-cell table:formula="of:=[.B54]/[.B53]-1" office:value-type="percentage" office:value="0.0290620727521556" calcext:value-type="percentage">
            <text:p>2.91 %</text:p>
          </table:table-cell>
          <table:table-cell table:number-columns-repeated="16381"/>
        </table:table-row>
        <table:table-row table:style-name="ro9">
          <table:table-cell office:value-type="float" office:value="1935" calcext:value-type="float">
            <text:p>1935</text:p>
          </table:table-cell>
          <table:table-cell office:value-type="float" office:value="4.962085" calcext:value-type="float">
            <text:p>4.96</text:p>
          </table:table-cell>
          <table:table-cell table:formula="of:=[.B55]/[.B54]-1" office:value-type="percentage" office:value="0.0976582806302691" calcext:value-type="percentage">
            <text:p>9.77 %</text:p>
          </table:table-cell>
          <table:table-cell table:number-columns-repeated="16381"/>
        </table:table-row>
        <table:table-row table:style-name="ro9">
          <table:table-cell office:value-type="float" office:value="1936" calcext:value-type="float">
            <text:p>1936</text:p>
          </table:table-cell>
          <table:table-cell office:value-type="float" office:value="5.121795" calcext:value-type="float">
            <text:p>5.12</text:p>
          </table:table-cell>
          <table:table-cell table:formula="of:=[.B56]/[.B55]-1" office:value-type="percentage" office:value="0.0321860669456489" calcext:value-type="percentage">
            <text:p>3.22 %</text:p>
          </table:table-cell>
          <table:table-cell table:number-columns-repeated="16381"/>
        </table:table-row>
        <table:table-row table:style-name="ro9">
          <table:table-cell office:value-type="float" office:value="1937" calcext:value-type="float">
            <text:p>1937</text:p>
          </table:table-cell>
          <table:table-cell office:value-type="float" office:value="5.253087" calcext:value-type="float">
            <text:p>5.25</text:p>
          </table:table-cell>
          <table:table-cell table:formula="of:=[.B57]/[.B56]-1" office:value-type="percentage" office:value="0.0256339818364459" calcext:value-type="percentage">
            <text:p>2.56 %</text:p>
          </table:table-cell>
          <table:table-cell table:number-columns-repeated="16381"/>
        </table:table-row>
        <table:table-row table:style-name="ro9">
          <table:table-cell office:value-type="float" office:value="1938" calcext:value-type="float">
            <text:p>1938</text:p>
          </table:table-cell>
          <table:table-cell office:value-type="float" office:value="5.207191" calcext:value-type="float">
            <text:p>5.21</text:p>
          </table:table-cell>
          <table:table-cell table:formula="of:=[.B58]/[.B57]-1" office:value-type="percentage" office:value="-0.00873695790684603" calcext:value-type="percentage">
            <text:p>-0.87 %</text:p>
          </table:table-cell>
          <table:table-cell table:number-columns-repeated="16381"/>
        </table:table-row>
        <table:table-row table:style-name="ro9">
          <table:table-cell office:value-type="float" office:value="1939" calcext:value-type="float">
            <text:p>1939</text:p>
          </table:table-cell>
          <table:table-cell office:value-type="float" office:value="5.139414" calcext:value-type="float">
            <text:p>5.14</text:p>
          </table:table-cell>
          <table:table-cell table:formula="of:=[.B59]/[.B58]-1" office:value-type="percentage" office:value="-0.0130160387817538" calcext:value-type="percentage">
            <text:p>-1.30 %</text:p>
          </table:table-cell>
          <table:table-cell table:number-columns-repeated="16381"/>
        </table:table-row>
        <table:table-row table:style-name="ro9">
          <table:table-cell office:value-type="float" office:value="1940" calcext:value-type="float">
            <text:p>1940</text:p>
          </table:table-cell>
          <table:table-cell office:value-type="float" office:value="5.309354" calcext:value-type="float">
            <text:p>5.31</text:p>
          </table:table-cell>
          <table:table-cell table:formula="of:=[.B60]/[.B59]-1" office:value-type="percentage" office:value="0.0330660265936933" calcext:value-type="percentage">
            <text:p>3.31 %</text:p>
          </table:table-cell>
          <table:table-cell table:number-columns-repeated="16381"/>
        </table:table-row>
        <table:table-row table:style-name="ro9">
          <table:table-cell office:value-type="float" office:value="1941" calcext:value-type="float">
            <text:p>1941</text:p>
          </table:table-cell>
          <table:table-cell office:value-type="float" office:value="4.864185" calcext:value-type="float">
            <text:p>4.86</text:p>
          </table:table-cell>
          <table:table-cell table:formula="of:=[.B61]/[.B60]-1" office:value-type="percentage" office:value="-0.0838461703627221" calcext:value-type="percentage">
            <text:p>-8.38 %</text:p>
          </table:table-cell>
          <table:table-cell table:number-columns-repeated="16381"/>
        </table:table-row>
        <table:table-row table:style-name="ro9">
          <table:table-cell office:value-type="float" office:value="1942" calcext:value-type="float">
            <text:p>1942</text:p>
          </table:table-cell>
          <table:table-cell office:value-type="float" office:value="5.02631" calcext:value-type="float">
            <text:p>5.03</text:p>
          </table:table-cell>
          <table:table-cell table:formula="of:=[.B62]/[.B61]-1" office:value-type="percentage" office:value="0.0333303523611868" calcext:value-type="percentage">
            <text:p>3.33 %</text:p>
          </table:table-cell>
          <table:table-cell table:number-columns-repeated="16381"/>
        </table:table-row>
        <table:table-row table:style-name="ro9">
          <table:table-cell office:value-type="float" office:value="1943" calcext:value-type="float">
            <text:p>1943</text:p>
          </table:table-cell>
          <table:table-cell office:value-type="float" office:value="5.601635" calcext:value-type="float">
            <text:p>5.60</text:p>
          </table:table-cell>
          <table:table-cell table:formula="of:=[.B63]/[.B62]-1" office:value-type="percentage" office:value="0.114462697286877" calcext:value-type="percentage">
            <text:p>11.45 %</text:p>
          </table:table-cell>
          <table:table-cell table:number-columns-repeated="16381"/>
        </table:table-row>
        <table:table-row table:style-name="ro9">
          <table:table-cell office:value-type="float" office:value="1944" calcext:value-type="float">
            <text:p>1944</text:p>
          </table:table-cell>
          <table:table-cell office:value-type="float" office:value="6.530623" calcext:value-type="float">
            <text:p>6.53</text:p>
          </table:table-cell>
          <table:table-cell table:formula="of:=[.B64]/[.B63]-1" office:value-type="percentage" office:value="0.16584229425873" calcext:value-type="percentage">
            <text:p>16.58 %</text:p>
          </table:table-cell>
          <table:table-cell table:number-columns-repeated="16381"/>
        </table:table-row>
        <table:table-row table:style-name="ro9">
          <table:table-cell office:value-type="float" office:value="1945" calcext:value-type="float">
            <text:p>1945</text:p>
          </table:table-cell>
          <table:table-cell office:value-type="float" office:value="7.299759" calcext:value-type="float">
            <text:p>7.30</text:p>
          </table:table-cell>
          <table:table-cell table:formula="of:=[.B65]/[.B64]-1" office:value-type="percentage" office:value="0.117773756041345" calcext:value-type="percentage">
            <text:p>11.78 %</text:p>
          </table:table-cell>
          <table:table-cell table:number-columns-repeated="16381"/>
        </table:table-row>
        <table:table-row table:style-name="ro9">
          <table:table-cell office:value-type="float" office:value="1946" calcext:value-type="float">
            <text:p>1946</text:p>
          </table:table-cell>
          <table:table-cell office:value-type="float" office:value="9.059123" calcext:value-type="float">
            <text:p>9.06</text:p>
          </table:table-cell>
          <table:table-cell table:formula="of:=[.B66]/[.B65]-1" office:value-type="percentage" office:value="0.241016723976778" calcext:value-type="percentage">
            <text:p>24.10 %</text:p>
          </table:table-cell>
          <table:table-cell table:number-columns-repeated="16381"/>
        </table:table-row>
        <table:table-row table:style-name="ro9">
          <table:table-cell office:value-type="float" office:value="1947" calcext:value-type="float">
            <text:p>1947</text:p>
          </table:table-cell>
          <table:table-cell office:value-type="float" office:value="10.98544" calcext:value-type="float">
            <text:p>10.99</text:p>
          </table:table-cell>
          <table:table-cell table:formula="of:=[.B67]/[.B66]-1" office:value-type="percentage" office:value="0.212638353624297" calcext:value-type="percentage">
            <text:p>21.26 %</text:p>
          </table:table-cell>
          <table:table-cell table:number-columns-repeated="16381"/>
        </table:table-row>
        <table:table-row table:style-name="ro9">
          <table:table-cell office:value-type="float" office:value="1948" calcext:value-type="float">
            <text:p>1948</text:p>
          </table:table-cell>
          <table:table-cell office:value-type="float" office:value="11.21158" calcext:value-type="float">
            <text:p>11.21</text:p>
          </table:table-cell>
          <table:table-cell table:formula="of:=[.B68]/[.B67]-1" office:value-type="percentage" office:value="0.0205854294411512" calcext:value-type="percentage">
            <text:p>2.06 %</text:p>
          </table:table-cell>
          <table:table-cell table:number-columns-repeated="16381"/>
        </table:table-row>
        <table:table-row table:style-name="ro9">
          <table:table-cell office:value-type="float" office:value="1949" calcext:value-type="float">
            <text:p>1949</text:p>
          </table:table-cell>
          <table:table-cell office:value-type="float" office:value="11.2216" calcext:value-type="float">
            <text:p>11.22</text:p>
          </table:table-cell>
          <table:table-cell table:formula="of:=[.B69]/[.B68]-1" office:value-type="percentage" office:value="0.000893718815724531" calcext:value-type="percentage">
            <text:p>0.09 %</text:p>
          </table:table-cell>
          <table:table-cell table:number-columns-repeated="16381"/>
        </table:table-row>
        <table:table-row table:style-name="ro9">
          <table:table-cell office:value-type="float" office:value="1950" calcext:value-type="float">
            <text:p>1950</text:p>
          </table:table-cell>
          <table:table-cell office:value-type="float" office:value="11.63011" calcext:value-type="float">
            <text:p>11.63</text:p>
          </table:table-cell>
          <table:table-cell table:formula="of:=[.B70]/[.B69]-1" office:value-type="percentage" office:value="0.0364038996221572" calcext:value-type="percentage">
            <text:p>3.64 %</text:p>
          </table:table-cell>
          <table:table-cell table:number-columns-repeated="16381"/>
        </table:table-row>
        <table:table-row table:style-name="ro9">
          <table:table-cell office:value-type="float" office:value="1951" calcext:value-type="float">
            <text:p>1951</text:p>
          </table:table-cell>
          <table:table-cell office:value-type="float" office:value="12.33346" calcext:value-type="float">
            <text:p>12.33</text:p>
          </table:table-cell>
          <table:table-cell table:formula="of:=[.B71]/[.B70]-1" office:value-type="percentage" office:value="0.0604766420953886" calcext:value-type="percentage">
            <text:p>6.05 %</text:p>
          </table:table-cell>
          <table:table-cell table:number-columns-repeated="16381"/>
        </table:table-row>
        <table:table-row table:style-name="ro9">
          <table:table-cell office:value-type="float" office:value="1952" calcext:value-type="float">
            <text:p>1952</text:p>
          </table:table-cell>
          <table:table-cell office:value-type="float" office:value="12.87695" calcext:value-type="float">
            <text:p>12.88</text:p>
          </table:table-cell>
          <table:table-cell table:formula="of:=[.B72]/[.B71]-1" office:value-type="percentage" office:value="0.0440663041839029" calcext:value-type="percentage">
            <text:p>4.41 %</text:p>
          </table:table-cell>
          <table:table-cell table:number-columns-repeated="16381"/>
        </table:table-row>
        <table:table-row table:style-name="ro9">
          <table:table-cell table:formula="of:=[.A72]+1" office:value-type="float" office:value="1953" calcext:value-type="float">
            <text:p>1953</text:p>
          </table:table-cell>
          <table:table-cell office:value-type="float" office:value="14.35994" calcext:value-type="float">
            <text:p>14.36</text:p>
          </table:table-cell>
          <table:table-cell table:formula="of:=[.B73]/[.B72]-1" office:value-type="percentage" office:value="0.115166246665553" calcext:value-type="percentage">
            <text:p>11.52 %</text:p>
          </table:table-cell>
          <table:table-cell table:number-columns-repeated="16381"/>
        </table:table-row>
        <table:table-row table:style-name="ro9">
          <table:table-cell table:formula="of:=[.A73]+1" office:value-type="float" office:value="1954" calcext:value-type="float">
            <text:p>1954</text:p>
          </table:table-cell>
          <table:table-cell office:value-type="float" office:value="14.49244" calcext:value-type="float">
            <text:p>14.49</text:p>
          </table:table-cell>
          <table:table-cell table:formula="of:=[.B74]/[.B73]-1" office:value-type="percentage" office:value="0.0092270580517746" calcext:value-type="percentage">
            <text:p>0.92 %</text:p>
          </table:table-cell>
          <table:table-cell table:number-columns-repeated="16381"/>
        </table:table-row>
        <table:table-row table:style-name="ro9">
          <table:table-cell table:formula="of:=[.A74]+1" office:value-type="float" office:value="1955" calcext:value-type="float">
            <text:p>1955</text:p>
          </table:table-cell>
          <table:table-cell office:value-type="float" office:value="14.49244" calcext:value-type="float">
            <text:p>14.49</text:p>
          </table:table-cell>
          <table:table-cell table:formula="of:=[.B75]/[.B74]-1" office:value-type="percentage" office:value="0" calcext:value-type="percentage">
            <text:p>0.00 %</text:p>
          </table:table-cell>
          <table:table-cell table:number-columns-repeated="16381"/>
        </table:table-row>
        <table:table-row table:style-name="ro9">
          <table:table-cell table:formula="of:=[.A75]+1" office:value-type="float" office:value="1956" calcext:value-type="float">
            <text:p>1956</text:p>
          </table:table-cell>
          <table:table-cell office:value-type="float" office:value="14.62494" calcext:value-type="float">
            <text:p>14.62</text:p>
          </table:table-cell>
          <table:table-cell table:formula="of:=[.B76]/[.B75]-1" office:value-type="percentage" office:value="0.00914269784798139" calcext:value-type="percentage">
            <text:p>0.91 %</text:p>
          </table:table-cell>
          <table:table-cell table:number-columns-repeated="16381"/>
        </table:table-row>
        <table:table-row table:style-name="ro9">
          <table:table-cell table:formula="of:=[.A76]+1" office:value-type="float" office:value="1957" calcext:value-type="float">
            <text:p>1957</text:p>
          </table:table-cell>
          <table:table-cell office:value-type="float" office:value="15.02245" calcext:value-type="float">
            <text:p>15.02</text:p>
          </table:table-cell>
          <table:table-cell table:formula="of:=[.B77]/[.B76]-1" office:value-type="percentage" office:value="0.0271802824490219" calcext:value-type="percentage">
            <text:p>2.72 %</text:p>
          </table:table-cell>
          <table:table-cell table:number-columns-repeated="16381"/>
        </table:table-row>
        <table:table-row table:style-name="ro9">
          <table:table-cell office:value-type="float" office:value="1958" calcext:value-type="float">
            <text:p>1958</text:p>
          </table:table-cell>
          <table:table-cell office:value-type="float" office:value="15.12183" calcext:value-type="float">
            <text:p>15.12</text:p>
          </table:table-cell>
          <table:table-cell table:formula="of:=[.B78]/[.B77]-1" office:value-type="percentage" office:value="0.00661543223641958" calcext:value-type="percentage">
            <text:p>0.66 %</text:p>
          </table:table-cell>
          <table:table-cell table:number-columns-repeated="16381"/>
        </table:table-row>
        <table:table-row table:style-name="ro9">
          <table:table-cell office:value-type="float" office:value="1959" calcext:value-type="float">
            <text:p>1959</text:p>
          </table:table-cell>
          <table:table-cell office:value-type="float" office:value="15.13839" calcext:value-type="float">
            <text:p>15.14</text:p>
          </table:table-cell>
          <table:table-cell table:formula="of:=[.B79]/[.B78]-1" office:value-type="percentage" office:value="0.00109510555270087" calcext:value-type="percentage">
            <text:p>0.11 %</text:p>
          </table:table-cell>
          <table:table-cell table:number-columns-repeated="16381"/>
        </table:table-row>
        <table:table-row table:style-name="ro9">
          <table:table-cell office:value-type="float" office:value="1960" calcext:value-type="float">
            <text:p>1960</text:p>
          </table:table-cell>
          <table:table-cell office:value-type="float" office:value="15.25433" calcext:value-type="float">
            <text:p>15.25</text:p>
          </table:table-cell>
          <table:table-cell table:formula="of:=[.B80]/[.B79]-1" office:value-type="percentage" office:value="0.00765867440328871" calcext:value-type="percentage">
            <text:p>0.77 %</text:p>
          </table:table-cell>
          <table:table-cell table:number-columns-repeated="16381"/>
        </table:table-row>
        <table:table-row table:style-name="ro9">
          <table:table-cell office:value-type="float" office:value="1961" calcext:value-type="float">
            <text:p>1961</text:p>
          </table:table-cell>
          <table:table-cell office:value-type="float" office:value="15.40339" calcext:value-type="float">
            <text:p>15.40</text:p>
          </table:table-cell>
          <table:table-cell table:formula="of:=[.B81]/[.B80]-1" office:value-type="percentage" office:value="0.00977165172118344" calcext:value-type="percentage">
            <text:p>0.98 %</text:p>
          </table:table-cell>
          <table:table-cell table:number-columns-repeated="16381"/>
        </table:table-row>
        <table:table-row table:style-name="ro9">
          <table:table-cell table:formula="of:=[.A81]+1" office:value-type="float" office:value="1962" calcext:value-type="float">
            <text:p>1962</text:p>
          </table:table-cell>
          <table:table-cell office:value-type="float" office:value="15.45308" calcext:value-type="float">
            <text:p>15.45</text:p>
          </table:table-cell>
          <table:table-cell table:formula="of:=[.B82]/[.B81]-1" office:value-type="percentage" office:value="0.00322591325675714" calcext:value-type="percentage">
            <text:p>0.32 %</text:p>
          </table:table-cell>
          <table:table-cell table:number-columns-repeated="16381"/>
        </table:table-row>
        <table:table-row table:style-name="ro9">
          <table:table-cell table:formula="of:=[.A82]+1" office:value-type="float" office:value="1963" calcext:value-type="float">
            <text:p>1963</text:p>
          </table:table-cell>
          <table:table-cell office:value-type="float" office:value="15.78434" calcext:value-type="float">
            <text:p>15.78</text:p>
          </table:table-cell>
          <table:table-cell table:formula="of:=[.B83]/[.B82]-1" office:value-type="percentage" office:value="0.0214365032731338" calcext:value-type="percentage">
            <text:p>2.14 %</text:p>
          </table:table-cell>
          <table:table-cell table:number-columns-repeated="16381"/>
        </table:table-row>
        <table:table-row table:style-name="ro9">
          <table:table-cell table:formula="of:=[.A83]+1" office:value-type="float" office:value="1964" calcext:value-type="float">
            <text:p>1964</text:p>
          </table:table-cell>
          <table:table-cell office:value-type="float" office:value="15.98309" calcext:value-type="float">
            <text:p>15.98</text:p>
          </table:table-cell>
          <table:table-cell table:formula="of:=[.B84]/[.B83]-1" office:value-type="percentage" office:value="0.0125915939469119" calcext:value-type="percentage">
            <text:p>1.26 %</text:p>
          </table:table-cell>
          <table:table-cell table:number-columns-repeated="16381"/>
        </table:table-row>
        <table:table-row table:style-name="ro9">
          <table:table-cell table:formula="of:=[.A84]+1" office:value-type="float" office:value="1965" calcext:value-type="float">
            <text:p>1965</text:p>
          </table:table-cell>
          <table:table-cell office:value-type="float" office:value="16.24809" calcext:value-type="float">
            <text:p>16.25</text:p>
          </table:table-cell>
          <table:table-cell table:formula="of:=[.B85]/[.B84]-1" office:value-type="percentage" office:value="0.0165800230118207" calcext:value-type="percentage">
            <text:p>1.66 %</text:p>
          </table:table-cell>
          <table:table-cell table:number-columns-repeated="16381"/>
        </table:table-row>
        <table:table-row table:style-name="ro9">
          <table:table-cell table:formula="of:=[.A85]+1" office:value-type="float" office:value="1966" calcext:value-type="float">
            <text:p>1966</text:p>
          </table:table-cell>
          <table:table-cell office:value-type="float" office:value="16.44685" calcext:value-type="float">
            <text:p>16.45</text:p>
          </table:table-cell>
          <table:table-cell table:formula="of:=[.B86]/[.B85]-1" office:value-type="percentage" office:value="0.0122328224425148" calcext:value-type="percentage">
            <text:p>1.22 %</text:p>
          </table:table-cell>
          <table:table-cell table:number-columns-repeated="16381"/>
        </table:table-row>
        <table:table-row table:style-name="ro9">
          <table:table-cell table:formula="of:=[.A86]+1" office:value-type="float" office:value="1967" calcext:value-type="float">
            <text:p>1967</text:p>
          </table:table-cell>
          <table:table-cell office:value-type="float" office:value="16.82779" calcext:value-type="float">
            <text:p>16.83</text:p>
          </table:table-cell>
          <table:table-cell table:formula="of:=[.B87]/[.B86]-1" office:value-type="percentage" office:value="0.0231618820625226" calcext:value-type="percentage">
            <text:p>2.32 %</text:p>
          </table:table-cell>
          <table:table-cell table:number-columns-repeated="16381"/>
        </table:table-row>
        <table:table-row table:style-name="ro9">
          <table:table-cell table:formula="of:=[.A87]+1" office:value-type="float" office:value="1968" calcext:value-type="float">
            <text:p>1968</text:p>
          </table:table-cell>
          <table:table-cell office:value-type="float" office:value="17.52343" calcext:value-type="float">
            <text:p>17.52</text:p>
          </table:table-cell>
          <table:table-cell table:formula="of:=[.B88]/[.B87]-1" office:value-type="percentage" office:value="0.0413387616555709" calcext:value-type="percentage">
            <text:p>4.13 %</text:p>
          </table:table-cell>
          <table:table-cell table:number-columns-repeated="16381"/>
        </table:table-row>
        <table:table-row table:style-name="ro9">
          <table:table-cell table:formula="of:=[.A88]+1" office:value-type="float" office:value="1969" calcext:value-type="float">
            <text:p>1969</text:p>
          </table:table-cell>
          <table:table-cell office:value-type="float" office:value="18.74908" calcext:value-type="float">
            <text:p>18.75</text:p>
          </table:table-cell>
          <table:table-cell table:formula="of:=[.B89]/[.B88]-1" office:value-type="percentage" office:value="0.0699434985045735" calcext:value-type="percentage">
            <text:p>6.99 %</text:p>
          </table:table-cell>
          <table:table-cell table:number-columns-repeated="16381"/>
        </table:table-row>
        <table:table-row table:style-name="ro9">
          <table:table-cell table:formula="of:=[.A89]+1" office:value-type="float" office:value="1970" calcext:value-type="float">
            <text:p>1970</text:p>
          </table:table-cell>
          <table:table-cell office:value-type="float" office:value="20.28941" calcext:value-type="float">
            <text:p>20.29</text:p>
          </table:table-cell>
          <table:table-cell table:formula="of:=[.B90]/[.B89]-1" office:value-type="percentage" office:value="0.0821549644035868" calcext:value-type="percentage">
            <text:p>8.22 %</text:p>
          </table:table-cell>
          <table:table-cell table:number-columns-repeated="16381"/>
        </table:table-row>
        <table:table-row table:style-name="ro9">
          <table:table-cell table:formula="of:=[.A90]+1" office:value-type="float" office:value="1971" calcext:value-type="float">
            <text:p>1971</text:p>
          </table:table-cell>
          <table:table-cell office:value-type="float" office:value="21.15068" calcext:value-type="float">
            <text:p>21.15</text:p>
          </table:table-cell>
          <table:table-cell table:formula="of:=[.B91]/[.B90]-1" office:value-type="percentage" office:value="0.0424492382972201" calcext:value-type="percentage">
            <text:p>4.24 %</text:p>
          </table:table-cell>
          <table:table-cell table:number-columns-repeated="16381"/>
        </table:table-row>
        <table:table-row table:style-name="ro9">
          <table:table-cell table:formula="of:=[.A91]+1" office:value-type="float" office:value="1972" calcext:value-type="float">
            <text:p>1972</text:p>
          </table:table-cell>
          <table:table-cell office:value-type="float" office:value="21.78007" calcext:value-type="float">
            <text:p>21.78</text:p>
          </table:table-cell>
          <table:table-cell table:formula="of:=[.B92]/[.B91]-1" office:value-type="percentage" office:value="0.0297574356947388" calcext:value-type="percentage">
            <text:p>2.98 %</text:p>
          </table:table-cell>
          <table:table-cell table:number-columns-repeated="16381"/>
        </table:table-row>
        <table:table-row table:style-name="ro9">
          <table:table-cell table:formula="of:=[.A92]+1" office:value-type="float" office:value="1973" calcext:value-type="float">
            <text:p>1973</text:p>
          </table:table-cell>
          <table:table-cell office:value-type="float" office:value="22.52539" calcext:value-type="float">
            <text:p>22.53</text:p>
          </table:table-cell>
          <table:table-cell table:formula="of:=[.B93]/[.B92]-1" office:value-type="percentage" office:value="0.0342202756924106" calcext:value-type="percentage">
            <text:p>3.42 %</text:p>
          </table:table-cell>
          <table:table-cell table:number-columns-repeated="16381"/>
        </table:table-row>
        <table:table-row table:style-name="ro9">
          <table:table-cell table:formula="of:=[.A93]+1" office:value-type="float" office:value="1974" calcext:value-type="float">
            <text:p>1974</text:p>
          </table:table-cell>
          <table:table-cell office:value-type="float" office:value="24.79449" calcext:value-type="float">
            <text:p>24.79</text:p>
          </table:table-cell>
          <table:table-cell table:formula="of:=[.B94]/[.B93]-1" office:value-type="percentage" office:value="0.100735214795393" calcext:value-type="percentage">
            <text:p>10.07 %</text:p>
          </table:table-cell>
          <table:table-cell table:number-columns-repeated="16381"/>
        </table:table-row>
        <table:table-row table:style-name="ro9">
          <table:table-cell office:value-type="float" office:value="1975" calcext:value-type="float">
            <text:p>1975</text:p>
          </table:table-cell>
          <table:table-cell table:style-name="ce199" office:value-type="float" office:value="26.47" calcext:value-type="float">
            <text:p>26.47</text:p>
          </table:table-cell>
          <table:table-cell table:formula="of:=[.B95]/[.B94]-1" office:value-type="percentage" office:value="0.0675759009360548" calcext:value-type="percentage">
            <text:p>6.76 %</text:p>
          </table:table-cell>
          <table:table-cell table:number-columns-repeated="16381"/>
        </table:table-row>
        <table:table-row table:style-name="ro9">
          <table:table-cell office:value-type="float" office:value="1976" calcext:value-type="float">
            <text:p>1976</text:p>
          </table:table-cell>
          <table:table-cell table:style-name="ce199" office:value-type="float" office:value="28.64" calcext:value-type="float">
            <text:p>28.64</text:p>
          </table:table-cell>
          <table:table-cell table:formula="of:=[.B96]/[.B95]-1" office:value-type="percentage" office:value="0.0819795995466566" calcext:value-type="percentage">
            <text:p>8.20 %</text:p>
          </table:table-cell>
          <table:table-cell table:number-columns-repeated="16381"/>
        </table:table-row>
        <table:table-row table:style-name="ro9">
          <table:table-cell office:value-type="float" office:value="1977" calcext:value-type="float">
            <text:p>1977</text:p>
          </table:table-cell>
          <table:table-cell table:style-name="ce199" office:value-type="float" office:value="32.84" calcext:value-type="float">
            <text:p>32.84</text:p>
          </table:table-cell>
          <table:table-cell table:formula="of:=[.B97]/[.B96]-1" office:value-type="percentage" office:value="0.146648044692738" calcext:value-type="percentage">
            <text:p>14.66 %</text:p>
          </table:table-cell>
          <table:table-cell table:number-columns-repeated="16381"/>
        </table:table-row>
        <table:table-row table:style-name="ro9">
          <table:table-cell office:value-type="float" office:value="1978" calcext:value-type="float">
            <text:p>1978</text:p>
          </table:table-cell>
          <table:table-cell table:style-name="ce199" office:value-type="float" office:value="38" calcext:value-type="float">
            <text:p>38.00</text:p>
          </table:table-cell>
          <table:table-cell table:formula="of:=[.B98]/[.B97]-1" office:value-type="percentage" office:value="0.157125456760049" calcext:value-type="percentage">
            <text:p>15.71 %</text:p>
          </table:table-cell>
          <table:table-cell table:number-columns-repeated="16381"/>
        </table:table-row>
        <table:table-row table:style-name="ro9">
          <table:table-cell office:value-type="float" office:value="1979" calcext:value-type="float">
            <text:p>1979</text:p>
          </table:table-cell>
          <table:table-cell table:style-name="ce199" office:value-type="float" office:value="43.22" calcext:value-type="float">
            <text:p>43.22</text:p>
          </table:table-cell>
          <table:table-cell table:formula="of:=[.B99]/[.B98]-1" office:value-type="percentage" office:value="0.137368421052632" calcext:value-type="percentage">
            <text:p>13.74 %</text:p>
          </table:table-cell>
          <table:table-cell table:number-columns-repeated="16381"/>
        </table:table-row>
        <table:table-row table:style-name="ro9">
          <table:table-cell office:value-type="float" office:value="1980" calcext:value-type="float">
            <text:p>1980</text:p>
          </table:table-cell>
          <table:table-cell table:style-name="ce199" office:value-type="float" office:value="46.42" calcext:value-type="float">
            <text:p>46.42</text:p>
          </table:table-cell>
          <table:table-cell table:formula="of:=[.B100]/[.B99]-1" office:value-type="percentage" office:value="0.0740397963905599" calcext:value-type="percentage">
            <text:p>7.40 %</text:p>
          </table:table-cell>
          <table:table-cell table:number-columns-repeated="16381"/>
        </table:table-row>
        <table:table-row table:style-name="ro9">
          <table:table-cell office:value-type="float" office:value="1981" calcext:value-type="float">
            <text:p>1981</text:p>
          </table:table-cell>
          <table:table-cell table:style-name="ce199" office:value-type="float" office:value="48.78" calcext:value-type="float">
            <text:p>48.78</text:p>
          </table:table-cell>
          <table:table-cell table:formula="of:=[.B101]/[.B100]-1" office:value-type="percentage" office:value="0.050840155105558" calcext:value-type="percentage">
            <text:p>5.08 %</text:p>
          </table:table-cell>
          <table:table-cell table:number-columns-repeated="16381"/>
        </table:table-row>
        <table:table-row table:style-name="ro9">
          <table:table-cell office:value-type="float" office:value="1982" calcext:value-type="float">
            <text:p>1982</text:p>
          </table:table-cell>
          <table:table-cell table:style-name="ce199" office:value-type="float" office:value="49.06" calcext:value-type="float">
            <text:p>49.06</text:p>
          </table:table-cell>
          <table:table-cell table:formula="of:=[.B102]/[.B101]-1" office:value-type="percentage" office:value="0.00574005740057393" calcext:value-type="percentage">
            <text:p>0.57 %</text:p>
          </table:table-cell>
          <table:table-cell table:number-columns-repeated="16381"/>
        </table:table-row>
        <table:table-row table:style-name="ro9">
          <table:table-cell office:value-type="float" office:value="1983" calcext:value-type="float">
            <text:p>1983</text:p>
          </table:table-cell>
          <table:table-cell table:style-name="ce199" office:value-type="float" office:value="51.39" calcext:value-type="float">
            <text:p>51.39</text:p>
          </table:table-cell>
          <table:table-cell table:formula="of:=[.B103]/[.B102]-1" office:value-type="percentage" office:value="0.0474928658785161" calcext:value-type="percentage">
            <text:p>4.75 %</text:p>
          </table:table-cell>
          <table:table-cell table:number-columns-repeated="16381"/>
        </table:table-row>
        <table:table-row table:style-name="ro9">
          <table:table-cell office:value-type="float" office:value="1984" calcext:value-type="float">
            <text:p>1984</text:p>
          </table:table-cell>
          <table:table-cell table:style-name="ce199" office:value-type="float" office:value="53.79" calcext:value-type="float">
            <text:p>53.79</text:p>
          </table:table-cell>
          <table:table-cell table:formula="of:=[.B104]/[.B103]-1" office:value-type="percentage" office:value="0.0467016929363688" calcext:value-type="percentage">
            <text:p>4.67 %</text:p>
          </table:table-cell>
          <table:table-cell table:number-columns-repeated="16381"/>
        </table:table-row>
        <table:table-row table:style-name="ro9">
          <table:table-cell office:value-type="float" office:value="1985" calcext:value-type="float">
            <text:p>1985</text:p>
          </table:table-cell>
          <table:table-cell table:style-name="ce199" office:value-type="float" office:value="57.81" calcext:value-type="float">
            <text:p>57.81</text:p>
          </table:table-cell>
          <table:table-cell table:formula="of:=[.B105]/[.B104]-1" office:value-type="percentage" office:value="0.0747350808700502" calcext:value-type="percentage">
            <text:p>7.47 %</text:p>
          </table:table-cell>
          <table:table-cell table:number-columns-repeated="16381"/>
        </table:table-row>
        <table:table-row table:style-name="ro9">
          <table:table-cell office:value-type="float" office:value="1986" calcext:value-type="float">
            <text:p>1986</text:p>
          </table:table-cell>
          <table:table-cell table:style-name="ce199" office:value-type="float" office:value="63.37" calcext:value-type="float">
            <text:p>63.37</text:p>
          </table:table-cell>
          <table:table-cell table:formula="of:=[.B106]/[.B105]-1" office:value-type="percentage" office:value="0.0961771319840856" calcext:value-type="percentage">
            <text:p>9.62 %</text:p>
          </table:table-cell>
          <table:table-cell table:number-columns-repeated="16381"/>
        </table:table-row>
        <table:table-row table:style-name="ro9">
          <table:table-cell office:value-type="float" office:value="1987" calcext:value-type="float">
            <text:p>1987</text:p>
          </table:table-cell>
          <table:table-cell table:style-name="ce200" office:value-type="float" office:value="68.36" calcext:value-type="float">
            <text:p>68.36</text:p>
          </table:table-cell>
          <table:table-cell table:formula="of:=[.B107]/[.B106]-1" office:value-type="percentage" office:value="0.0787438851191415" calcext:value-type="percentage">
            <text:p>7.87 %</text:p>
          </table:table-cell>
          <table:table-cell table:number-columns-repeated="16381"/>
        </table:table-row>
        <table:table-row table:style-name="ro9">
          <table:table-cell office:value-type="float" office:value="1988" calcext:value-type="float">
            <text:p>1988</text:p>
          </table:table-cell>
          <table:table-cell table:style-name="ce200" office:value-type="float" office:value="73.29" calcext:value-type="float">
            <text:p>73.29</text:p>
          </table:table-cell>
          <table:table-cell table:formula="of:=[.B108]/[.B107]-1" office:value-type="percentage" office:value="0.0721181977764775" calcext:value-type="percentage">
            <text:p>7.21 %</text:p>
          </table:table-cell>
          <table:table-cell table:number-columns-repeated="16381"/>
        </table:table-row>
        <table:table-row table:style-name="ro9">
          <table:table-cell table:formula="of:=[.A108]+1" office:value-type="float" office:value="1989" calcext:value-type="float">
            <text:p>1989</text:p>
          </table:table-cell>
          <table:table-cell table:style-name="ce200" office:value-type="float" office:value="76.5" calcext:value-type="float">
            <text:p>76.50</text:p>
          </table:table-cell>
          <table:table-cell table:formula="of:=[.B109]/[.B108]-1" office:value-type="percentage" office:value="0.0437986082685222" calcext:value-type="percentage">
            <text:p>4.38 %</text:p>
          </table:table-cell>
          <table:table-cell table:number-columns-repeated="16381"/>
        </table:table-row>
        <table:table-row table:style-name="ro9">
          <table:table-cell table:formula="of:=[.A109]+1" office:value-type="float" office:value="1990" calcext:value-type="float">
            <text:p>1990</text:p>
          </table:table-cell>
          <table:table-cell table:style-name="ce200" office:value-type="float" office:value="75.97" calcext:value-type="float">
            <text:p>75.97</text:p>
          </table:table-cell>
          <table:table-cell table:formula="of:=[.B110]/[.B109]-1" office:value-type="percentage" office:value="-0.00692810457516346" calcext:value-type="percentage">
            <text:p>-0.69 %</text:p>
          </table:table-cell>
          <table:table-cell table:number-columns-repeated="16381"/>
        </table:table-row>
        <table:table-row table:style-name="ro9">
          <table:table-cell table:formula="of:=[.A110]+1" office:value-type="float" office:value="1991" calcext:value-type="float">
            <text:p>1991</text:p>
          </table:table-cell>
          <table:table-cell table:style-name="ce200" office:value-type="float" office:value="75.83" calcext:value-type="float">
            <text:p>75.83</text:p>
          </table:table-cell>
          <table:table-cell table:formula="of:=[.B111]/[.B110]-1" office:value-type="percentage" office:value="-0.00184283269711727" calcext:value-type="percentage">
            <text:p>-0.18 %</text:p>
          </table:table-cell>
          <table:table-cell table:number-columns-repeated="16381"/>
        </table:table-row>
        <table:table-row table:style-name="ro9">
          <table:table-cell table:formula="of:=[.A111]+1" office:value-type="float" office:value="1992" calcext:value-type="float">
            <text:p>1992</text:p>
          </table:table-cell>
          <table:table-cell table:style-name="ce200" office:value-type="float" office:value="76.47" calcext:value-type="float">
            <text:p>76.47</text:p>
          </table:table-cell>
          <table:table-cell table:formula="of:=[.B112]/[.B111]-1" office:value-type="percentage" office:value="0.00843993142555721" calcext:value-type="percentage">
            <text:p>0.84 %</text:p>
          </table:table-cell>
          <table:table-cell table:number-columns-repeated="16381"/>
        </table:table-row>
        <table:table-row table:style-name="ro9">
          <table:table-cell table:formula="of:=[.A112]+1" office:value-type="float" office:value="1993" calcext:value-type="float">
            <text:p>1993</text:p>
          </table:table-cell>
          <table:table-cell table:style-name="ce200" office:value-type="float" office:value="78.12" calcext:value-type="float">
            <text:p>78.12</text:p>
          </table:table-cell>
          <table:table-cell table:formula="of:=[.B113]/[.B112]-1" office:value-type="percentage" office:value="0.0215770890545313" calcext:value-type="percentage">
            <text:p>2.16 %</text:p>
          </table:table-cell>
          <table:table-cell table:number-columns-repeated="16381"/>
        </table:table-row>
        <table:table-row table:style-name="ro9">
          <table:table-cell table:formula="of:=[.A113]+1" office:value-type="float" office:value="1994" calcext:value-type="float">
            <text:p>1994</text:p>
          </table:table-cell>
          <table:table-cell table:style-name="ce200" office:value-type="float" office:value="80.08" calcext:value-type="float">
            <text:p>80.08</text:p>
          </table:table-cell>
          <table:table-cell table:formula="of:=[.B114]/[.B113]-1" office:value-type="percentage" office:value="0.0250896057347669" calcext:value-type="percentage">
            <text:p>2.51 %</text:p>
          </table:table-cell>
          <table:table-cell table:number-columns-repeated="16381"/>
        </table:table-row>
        <table:table-row table:style-name="ro9">
          <table:table-cell table:formula="of:=[.A114]+1" office:value-type="float" office:value="1995" calcext:value-type="float">
            <text:p>1995</text:p>
          </table:table-cell>
          <table:table-cell table:style-name="ce200" office:value-type="float" office:value="81.53" calcext:value-type="float">
            <text:p>81.53</text:p>
          </table:table-cell>
          <table:table-cell table:formula="of:=[.B115]/[.B114]-1" office:value-type="percentage" office:value="0.0181068931068931" calcext:value-type="percentage">
            <text:p>1.81 %</text:p>
          </table:table-cell>
          <table:table-cell table:number-columns-repeated="16381"/>
        </table:table-row>
        <table:table-row table:style-name="ro9">
          <table:table-cell table:formula="of:=[.A115]+1" office:value-type="float" office:value="1996" calcext:value-type="float">
            <text:p>1996</text:p>
          </table:table-cell>
          <table:table-cell table:style-name="ce200" office:value-type="float" office:value="83.51" calcext:value-type="float">
            <text:p>83.51</text:p>
          </table:table-cell>
          <table:table-cell table:formula="of:=[.B116]/[.B115]-1" office:value-type="percentage" office:value="0.0242855390653747" calcext:value-type="percentage">
            <text:p>2.43 %</text:p>
          </table:table-cell>
          <table:table-cell table:number-columns-repeated="16381"/>
        </table:table-row>
        <table:table-row table:style-name="ro9">
          <table:table-cell table:formula="of:=[.A116]+1" office:value-type="float" office:value="1997" calcext:value-type="float">
            <text:p>1997</text:p>
          </table:table-cell>
          <table:table-cell table:style-name="ce200" office:value-type="float" office:value="86.88" calcext:value-type="float">
            <text:p>86.88</text:p>
          </table:table-cell>
          <table:table-cell table:formula="of:=[.B117]/[.B116]-1" office:value-type="percentage" office:value="0.0403544485690335" calcext:value-type="percentage">
            <text:p>4.04 %</text:p>
          </table:table-cell>
          <table:table-cell table:number-columns-repeated="16381"/>
        </table:table-row>
        <table:table-row table:style-name="ro9">
          <table:table-cell table:formula="of:=[.A117]+1" office:value-type="float" office:value="1998" calcext:value-type="float">
            <text:p>1998</text:p>
          </table:table-cell>
          <table:table-cell table:style-name="ce200" office:value-type="float" office:value="92.47" calcext:value-type="float">
            <text:p>92.47</text:p>
          </table:table-cell>
          <table:table-cell table:formula="of:=[.B118]/[.B117]-1" office:value-type="percentage" office:value="0.0643416206261511" calcext:value-type="percentage">
            <text:p>6.43 %</text:p>
          </table:table-cell>
          <table:table-cell table:number-columns-repeated="16381"/>
        </table:table-row>
        <table:table-row table:style-name="ro9">
          <table:table-cell table:formula="of:=[.A118]+1" office:value-type="float" office:value="1999" calcext:value-type="float">
            <text:p>1999</text:p>
          </table:table-cell>
          <table:table-cell table:style-name="ce200" office:value-type="float" office:value="99.58" calcext:value-type="float">
            <text:p>99.58</text:p>
          </table:table-cell>
          <table:table-cell table:formula="of:=[.B119]/[.B118]-1" office:value-type="percentage" office:value="0.0768898020979778" calcext:value-type="percentage">
            <text:p>7.69 %</text:p>
          </table:table-cell>
          <table:table-cell table:number-columns-repeated="16381"/>
        </table:table-row>
        <table:table-row table:style-name="ro9">
          <table:table-cell table:formula="of:=[.A119]+1" office:value-type="float" office:value="2000" calcext:value-type="float">
            <text:p>2000</text:p>
          </table:table-cell>
          <table:table-cell table:style-name="ce200" office:value-type="float" office:value="108.79" calcext:value-type="float">
            <text:p>108.79</text:p>
          </table:table-cell>
          <table:table-cell table:formula="of:=[.B120]/[.B119]-1" office:value-type="percentage" office:value="0.0924884514962845" calcext:value-type="percentage">
            <text:p>9.25 %</text:p>
          </table:table-cell>
          <table:table-cell table:number-columns-repeated="16381"/>
        </table:table-row>
        <table:table-row table:style-name="ro9">
          <table:table-cell table:formula="of:=[.A120]+1" office:value-type="float" office:value="2001" calcext:value-type="float">
            <text:p>2001</text:p>
          </table:table-cell>
          <table:table-cell table:style-name="ce200" office:value-type="float" office:value="116.06" calcext:value-type="float">
            <text:p>116.06</text:p>
          </table:table-cell>
          <table:table-cell table:formula="of:=[.B121]/[.B120]-1" office:value-type="percentage" office:value="0.0668259950363084" calcext:value-type="percentage">
            <text:p>6.68 %</text:p>
          </table:table-cell>
          <table:table-cell table:number-columns-repeated="16381"/>
        </table:table-row>
        <table:table-row table:style-name="ro9">
          <table:table-cell table:formula="of:=[.A121]+1" office:value-type="float" office:value="2002" calcext:value-type="float">
            <text:p>2002</text:p>
          </table:table-cell>
          <table:table-cell table:style-name="ce200" office:value-type="float" office:value="127.15" calcext:value-type="float">
            <text:p>127.15</text:p>
          </table:table-cell>
          <table:table-cell table:formula="of:=[.B122]/[.B121]-1" office:value-type="percentage" office:value="0.095554023780803" calcext:value-type="percentage">
            <text:p>9.56 %</text:p>
          </table:table-cell>
          <table:table-cell table:number-columns-repeated="16381"/>
        </table:table-row>
        <table:table-row table:style-name="ro9">
          <table:table-cell office:value-type="float" office:value="2003" calcext:value-type="float">
            <text:p>2003</text:p>
          </table:table-cell>
          <table:table-cell table:style-name="ce200" office:value-type="float" office:value="139.63" calcext:value-type="float">
            <text:p>139.63</text:p>
          </table:table-cell>
          <table:table-cell table:formula="of:=[.B123]/[.B122]-1" office:value-type="percentage" office:value="0.0981517892253243" calcext:value-type="percentage">
            <text:p>9.82 %</text:p>
          </table:table-cell>
          <table:table-cell table:number-columns-repeated="16381"/>
        </table:table-row>
        <table:table-row table:style-name="ro9">
          <table:table-cell table:formula="of:=[.A123]+1" office:value-type="float" office:value="2004" calcext:value-type="float">
            <text:p>2004</text:p>
          </table:table-cell>
          <table:table-cell table:style-name="ce200" office:value-type="float" office:value="158.68" calcext:value-type="float">
            <text:p>158.68</text:p>
          </table:table-cell>
          <table:table-cell table:formula="of:=[.B124]/[.B123]-1" office:value-type="percentage" office:value="0.136431998854115" calcext:value-type="percentage">
            <text:p>13.64 %</text:p>
          </table:table-cell>
          <table:table-cell table:number-columns-repeated="16381"/>
        </table:table-row>
        <table:table-row table:style-name="ro9">
          <table:table-cell table:formula="of:=[.A124]+1" office:value-type="float" office:value="2005" calcext:value-type="float">
            <text:p>2005</text:p>
          </table:table-cell>
          <table:table-cell table:style-name="ce200" office:value-type="float" office:value="180.11" calcext:value-type="float">
            <text:p>180.11</text:p>
          </table:table-cell>
          <table:table-cell table:formula="of:=[.B125]/[.B124]-1" office:value-type="percentage" office:value="0.13505167632972" calcext:value-type="percentage">
            <text:p>13.51 %</text:p>
          </table:table-cell>
          <table:table-cell table:number-columns-repeated="16381"/>
        </table:table-row>
        <table:table-row table:style-name="ro9">
          <table:table-cell table:formula="of:=[.A125]+1" office:value-type="float" office:value="2006" calcext:value-type="float">
            <text:p>2006</text:p>
          </table:table-cell>
          <table:table-cell table:style-name="ce200" office:value-type="float" office:value="183.24" calcext:value-type="float">
            <text:p>183.24</text:p>
          </table:table-cell>
          <table:table-cell table:formula="of:=[.B126]/[.B125]-1" office:value-type="percentage" office:value="0.0173782688357116" calcext:value-type="percentage">
            <text:p>1.74 %</text:p>
          </table:table-cell>
          <table:table-cell table:number-columns-repeated="16381"/>
        </table:table-row>
        <table:table-row table:style-name="ro9">
          <table:table-cell table:formula="of:=[.A126]+1" office:value-type="float" office:value="2007" calcext:value-type="float">
            <text:p>2007</text:p>
          </table:table-cell>
          <table:table-cell table:style-name="ce200" office:value-type="float" office:value="173.35" calcext:value-type="float">
            <text:p>173.35</text:p>
          </table:table-cell>
          <table:table-cell table:formula="of:=[.B127]/[.B126]-1" office:value-type="percentage" office:value="-0.0539729316743069" calcext:value-type="percentage">
            <text:p>-5.40 %</text:p>
          </table:table-cell>
          <table:table-cell table:number-columns-repeated="16381"/>
        </table:table-row>
        <table:table-row table:style-name="ro9">
          <table:table-cell table:formula="of:=[.A127]+1" office:value-type="float" office:value="2008" calcext:value-type="float">
            <text:p>2008</text:p>
          </table:table-cell>
          <table:table-cell table:style-name="ce200" office:value-type="float" office:value="152.55" calcext:value-type="float">
            <text:p>152.55</text:p>
          </table:table-cell>
          <table:table-cell table:formula="of:=[.B128]/[.B127]-1" office:value-type="percentage" office:value="-0.119988462647822" calcext:value-type="percentage">
            <text:p>-12.00 %</text:p>
          </table:table-cell>
          <table:table-cell table:number-columns-repeated="16381"/>
        </table:table-row>
        <table:table-row table:style-name="ro9">
          <table:table-cell table:formula="of:=[.A128]+1" office:value-type="float" office:value="2009" calcext:value-type="float">
            <text:p>2009</text:p>
          </table:table-cell>
          <table:table-cell table:style-name="ce200" office:value-type="float" office:value="146.67" calcext:value-type="float">
            <text:p>146.67</text:p>
          </table:table-cell>
          <table:table-cell table:formula="of:=[.B129]/[.B128]-1" office:value-type="percentage" office:value="-0.0385447394296954" calcext:value-type="percentage">
            <text:p>-3.85 %</text:p>
          </table:table-cell>
          <table:table-cell table:number-columns-repeated="16381"/>
        </table:table-row>
        <table:table-row table:style-name="ro9">
          <table:table-cell table:formula="of:=[.A129]+1" office:value-type="float" office:value="2010" calcext:value-type="float">
            <text:p>2010</text:p>
          </table:table-cell>
          <table:table-cell table:style-name="ce200" office:value-type="float" office:value="140.64" calcext:value-type="float">
            <text:p>140.64</text:p>
          </table:table-cell>
          <table:table-cell table:formula="of:=[.B130]/[.B129]-1" office:value-type="percentage" office:value="-0.0411127019840458" calcext:value-type="percentage">
            <text:p>-4.11 %</text:p>
          </table:table-cell>
          <table:table-cell table:number-columns-repeated="16381"/>
        </table:table-row>
        <table:table-row table:style-name="ro9">
          <table:table-cell table:formula="of:=[.A130]+1" office:value-type="float" office:value="2011" calcext:value-type="float">
            <text:p>2011</text:p>
          </table:table-cell>
          <table:table-cell table:style-name="ce200" office:value-type="float" office:value="135.16" calcext:value-type="float">
            <text:p>135.16</text:p>
          </table:table-cell>
          <table:table-cell table:formula="of:=[.B131]/[.B130]-1" office:value-type="percentage" office:value="-0.0389647326507394" calcext:value-type="percentage">
            <text:p>-3.90 %</text:p>
          </table:table-cell>
          <table:table-cell table:number-columns-repeated="16381"/>
        </table:table-row>
        <table:table-row table:style-name="ro9">
          <table:table-cell table:formula="of:=[.A131]+1" office:value-type="float" office:value="2012" calcext:value-type="float">
            <text:p>2012</text:p>
          </table:table-cell>
          <table:table-cell table:style-name="ce200" office:value-type="float" office:value="143.88" calcext:value-type="float">
            <text:p>143.88</text:p>
          </table:table-cell>
          <table:table-cell table:formula="of:=[.B132]/[.B131]-1" office:value-type="percentage" office:value="0.064516129032258" calcext:value-type="percentage">
            <text:p>6.45 %</text:p>
          </table:table-cell>
          <table:table-cell table:number-columns-repeated="16381"/>
        </table:table-row>
        <table:table-row table:style-name="ro9">
          <table:table-cell table:formula="of:=[.A132]+1" office:value-type="float" office:value="2013" calcext:value-type="float">
            <text:p>2013</text:p>
          </table:table-cell>
          <table:table-cell table:style-name="ce200" office:value-type="float" office:value="159.29" calcext:value-type="float">
            <text:p>159.29</text:p>
          </table:table-cell>
          <table:table-cell table:formula="of:=[.B133]/[.B132]-1" office:value-type="percentage" office:value="0.107103141506811" calcext:value-type="percentage">
            <text:p>10.71 %</text:p>
          </table:table-cell>
          <table:table-cell table:number-columns-repeated="16381"/>
        </table:table-row>
        <table:table-row table:style-name="ro9">
          <table:table-cell table:formula="of:=[.A133]+1" office:value-type="float" office:value="2014" calcext:value-type="float">
            <text:p>2014</text:p>
          </table:table-cell>
          <table:table-cell table:style-name="ce200" office:value-type="float" office:value="166.49" calcext:value-type="float">
            <text:p>166.49</text:p>
          </table:table-cell>
          <table:table-cell table:formula="of:=[.B134]/[.B133]-1" office:value-type="percentage" office:value="0.0452005775629356" calcext:value-type="percentage">
            <text:p>4.52 %</text:p>
          </table:table-cell>
          <table:table-cell table:number-columns-repeated="16381"/>
        </table:table-row>
        <table:table-row table:style-name="ro9">
          <table:table-cell table:formula="of:=[.A134]+1" office:value-type="float" office:value="2015" calcext:value-type="float">
            <text:p>2015</text:p>
          </table:table-cell>
          <table:table-cell table:style-name="ce200" office:value-type="float" office:value="175.18" calcext:value-type="float">
            <text:p>175.18</text:p>
          </table:table-cell>
          <table:table-cell table:formula="of:=[.B135]/[.B134]-1" office:value-type="percentage" office:value="0.0521953270466695" calcext:value-type="percentage">
            <text:p>5.22 %</text:p>
          </table:table-cell>
          <table:table-cell table:number-columns-repeated="16381"/>
        </table:table-row>
        <table:table-row table:style-name="ro9">
          <table:table-cell table:formula="of:=[.A135]+1" office:value-type="float" office:value="2016" calcext:value-type="float">
            <text:p>2016</text:p>
          </table:table-cell>
          <table:table-cell table:style-name="ce200" office:value-type="float" office:value="184.52" calcext:value-type="float">
            <text:p>184.52</text:p>
          </table:table-cell>
          <table:table-cell table:formula="of:=[.B136]/[.B135]-1" office:value-type="percentage" office:value="0.0533165886516727" calcext:value-type="percentage">
            <text:p>5.33 %</text:p>
          </table:table-cell>
          <table:table-cell table:number-columns-repeated="16381"/>
        </table:table-row>
        <table:table-row table:style-name="ro9">
          <table:table-cell table:formula="of:=[.A136]+1" office:value-type="float" office:value="2017" calcext:value-type="float">
            <text:p>2017</text:p>
          </table:table-cell>
          <table:table-cell table:style-name="ce200" office:value-type="float" office:value="196.01" calcext:value-type="float">
            <text:p>196.01</text:p>
          </table:table-cell>
          <table:table-cell table:formula="of:=[.B137]/[.B136]-1" office:value-type="percentage" office:value="0.0622696726642098" calcext:value-type="percentage">
            <text:p>6.23 %</text:p>
          </table:table-cell>
          <table:table-cell table:number-columns-repeated="16381"/>
        </table:table-row>
        <table:table-row table:style-name="ro9">
          <table:table-cell table:formula="of:=[.A137]+1" office:value-type="float" office:value="2018" calcext:value-type="float">
            <text:p>2018</text:p>
          </table:table-cell>
          <table:table-cell table:style-name="ce200" office:value-type="float" office:value="204.92" calcext:value-type="float">
            <text:p>204.92</text:p>
          </table:table-cell>
          <table:table-cell table:formula="of:=[.B138]/[.B137]-1" office:value-type="percentage" office:value="0.0454568644456916" calcext:value-type="percentage">
            <text:p>4.55 %</text:p>
          </table:table-cell>
          <table:table-cell table:number-columns-repeated="16381"/>
        </table:table-row>
        <table:table-row table:style-name="ro9">
          <table:table-cell table:style-name="Default" office:value-type="float" office:value="2019" calcext:value-type="float">
            <text:p>2019</text:p>
          </table:table-cell>
          <table:table-cell table:style-name="ce200" office:value-type="float" office:value="211.96" calcext:value-type="float">
            <text:p>211.96</text:p>
          </table:table-cell>
          <table:table-cell table:formula="of:=[.B139]/[.B138]-1" office:value-type="percentage" office:value="0.0343548701932463" calcext:value-type="percentage">
            <text:p>3.44 %</text:p>
          </table:table-cell>
          <table:table-cell table:style-name="ce201" office:value-type="string" calcext:value-type="string">
            <text:p>End of October 2019</text:p>
          </table:table-cell>
          <table:table-cell table:number-columns-repeated="16380"/>
        </table:table-row>
      </table:table>
      <table:table table:name="Moody's Rates" table:style-name="ta9">
        <table:table-column table:style-name="co3" table:default-cell-style-name="ce175"/>
        <table:table-column table:style-name="co3" table:default-cell-style-name="ce177"/>
        <table:table-column table:style-name="co3" table:default-cell-style-name="ce164"/>
        <table:table-column table:style-name="co3" table:number-columns-repeated="5" table:default-cell-style-name="Default"/>
        <table:table-column table:style-name="co23" table:default-cell-style-name="ce175"/>
        <table:table-column table:style-name="co23" table:default-cell-style-name="ce177"/>
        <table:table-column table:style-name="co23" table:default-cell-style-name="ce164"/>
        <table:table-column table:style-name="co3" table:number-columns-repeated="16373" table:default-cell-style-name="Default"/>
        <table:table-row table:style-name="ro9">
          <table:table-cell table:style-name="Default" office:value-type="string" calcext:value-type="string">
            <text:p>FRED Graph Observations</text:p>
          </table:table-cell>
          <table:table-cell table:style-name="Default" table:number-columns-repeated="2"/>
          <table:table-cell table:number-columns-repeated="5"/>
          <table:table-cell table:style-name="Default" office:value-type="string" calcext:value-type="string">
            <text:p>FRED Graph Observations</text:p>
          </table:table-cell>
          <table:table-cell table:style-name="Default" table:number-columns-repeated="2"/>
          <table:table-cell table:number-columns-repeated="16373"/>
        </table:table-row>
        <table:table-row table:style-name="ro9">
          <table:table-cell table:style-name="Default" office:value-type="string" calcext:value-type="string">
            <text:p>Federal Reserve Economic Data</text:p>
          </table:table-cell>
          <table:table-cell table:style-name="Default" table:number-columns-repeated="2"/>
          <table:table-cell table:number-columns-repeated="5"/>
          <table:table-cell table:style-name="Default" office:value-type="string" calcext:value-type="string">
            <text:p>Federal Reserve Economic Data</text:p>
          </table:table-cell>
          <table:table-cell table:style-name="Default" table:number-columns-repeated="2"/>
          <table:table-cell table:number-columns-repeated="16373"/>
        </table:table-row>
        <table:table-row table:style-name="ro9">
          <table:table-cell table:style-name="Default" office:value-type="string" calcext:value-type="string">
            <text:p>Link: https://fred.stlouisfed.org</text:p>
          </table:table-cell>
          <table:table-cell table:style-name="Default" table:number-columns-repeated="2"/>
          <table:table-cell table:number-columns-repeated="5"/>
          <table:table-cell table:style-name="Default" office:value-type="string" calcext:value-type="string">
            <text:p>Link: https://fred.stlouisfed.org</text:p>
          </table:table-cell>
          <table:table-cell table:style-name="Default" table:number-columns-repeated="2"/>
          <table:table-cell table:number-columns-repeated="16373"/>
        </table:table-row>
        <table:table-row table:style-name="ro9">
          <table:table-cell table:style-name="Default" office:value-type="string" calcext:value-type="string">
            <text:p>Help: https://fred.stlouisfed.org/help-faq</text:p>
          </table:table-cell>
          <table:table-cell table:style-name="Default" table:number-columns-repeated="2"/>
          <table:table-cell table:number-columns-repeated="5"/>
          <table:table-cell table:style-name="Default" office:value-type="string" calcext:value-type="string">
            <text:p>Help: https://fred.stlouisfed.org/help-faq</text:p>
          </table:table-cell>
          <table:table-cell table:style-name="Default" table:number-columns-repeated="2"/>
          <table:table-cell table:number-columns-repeated="16373"/>
        </table:table-row>
        <table:table-row table:style-name="ro9">
          <table:table-cell table:style-name="Default" office:value-type="string" calcext:value-type="string">
            <text:p>Economic Research Division</text:p>
          </table:table-cell>
          <table:table-cell table:style-name="Default" table:number-columns-repeated="2"/>
          <table:table-cell table:number-columns-repeated="5"/>
          <table:table-cell table:style-name="Default" office:value-type="string" calcext:value-type="string">
            <text:p>Economic Research Division</text:p>
          </table:table-cell>
          <table:table-cell table:style-name="Default" table:number-columns-repeated="2"/>
          <table:table-cell table:number-columns-repeated="16373"/>
        </table:table-row>
        <table:table-row table:style-name="ro9">
          <table:table-cell table:style-name="Default" office:value-type="string" calcext:value-type="string">
            <text:p>Federal Reserve Bank of St. Louis</text:p>
          </table:table-cell>
          <table:table-cell table:style-name="Default" table:number-columns-repeated="2"/>
          <table:table-cell table:number-columns-repeated="5"/>
          <table:table-cell table:style-name="Default" office:value-type="string" calcext:value-type="string">
            <text:p>Federal Reserve Bank of St. Louis</text:p>
          </table:table-cell>
          <table:table-cell table:style-name="Default" table:number-columns-repeated="2"/>
          <table:table-cell table:number-columns-repeated="16373"/>
        </table:table-row>
        <table:table-row table:style-name="ro9">
          <table:table-cell table:style-name="Default" table:number-columns-repeated="3"/>
          <table:table-cell table:number-columns-repeated="5"/>
          <table:table-cell table:style-name="Default" table:number-columns-repeated="3"/>
          <table:table-cell table:number-columns-repeated="16373"/>
        </table:table-row>
        <table:table-row table:style-name="ro9">
          <table:table-cell table:style-name="Default" office:value-type="string" calcext:value-type="string">
            <text:p>AAA</text:p>
          </table:table-cell>
          <table:table-cell table:style-name="Default" office:value-type="string" calcext:value-type="string">
            <text:p>Moody's Seasoned Aaa Corporate Bond Yield, Percent, Annual, Not Seasonally Adjusted</text:p>
          </table:table-cell>
          <table:table-cell table:style-name="Default"/>
          <table:table-cell table:number-columns-repeated="5"/>
          <table:table-cell table:style-name="Default" office:value-type="string" calcext:value-type="string">
            <text:p>BAA</text:p>
          </table:table-cell>
          <table:table-cell table:style-name="Default" office:value-type="string" calcext:value-type="string">
            <text:p>Moody's Seasoned Baa Corporate Bond Yield, Percent, Annual, Not Seasonally Adjusted</text:p>
          </table:table-cell>
          <table:table-cell table:style-name="Default"/>
          <table:table-cell table:number-columns-repeated="16373"/>
        </table:table-row>
        <table:table-row table:style-name="ro9">
          <table:table-cell table:style-name="Default" table:number-columns-repeated="3"/>
          <table:table-cell table:number-columns-repeated="5"/>
          <table:table-cell table:style-name="Default" table:number-columns-repeated="3"/>
          <table:table-cell table:number-columns-repeated="16373"/>
        </table:table-row>
        <table:table-row table:style-name="ro9">
          <table:table-cell table:style-name="Default" office:value-type="string" calcext:value-type="string">
            <text:p>Frequency: Annual</text:p>
          </table:table-cell>
          <table:table-cell table:style-name="Default" table:number-columns-repeated="2"/>
          <table:table-cell table:number-columns-repeated="5"/>
          <table:table-cell table:style-name="Default" office:value-type="string" calcext:value-type="string">
            <text:p>Frequency: Annual</text:p>
          </table:table-cell>
          <table:table-cell table:style-name="Default" table:number-columns-repeated="2"/>
          <table:table-cell table:number-columns-repeated="16373"/>
        </table:table-row>
        <table:table-row table:style-name="ro9">
          <table:table-cell table:style-name="Default" office:value-type="string" calcext:value-type="string">
            <text:p>observation_date</text:p>
          </table:table-cell>
          <table:table-cell table:style-name="Default" office:value-type="string" calcext:value-type="string">
            <text:p>AAA</text:p>
          </table:table-cell>
          <table:table-cell table:style-name="Default" office:value-type="string" calcext:value-type="string">
            <text:p>% Rate</text:p>
          </table:table-cell>
          <table:table-cell table:number-columns-repeated="5"/>
          <table:table-cell table:style-name="Default" office:value-type="string" calcext:value-type="string">
            <text:p>observation_date</text:p>
          </table:table-cell>
          <table:table-cell table:style-name="Default" office:value-type="string" calcext:value-type="string">
            <text:p>BAA</text:p>
          </table:table-cell>
          <table:table-cell table:style-name="Default"/>
          <table:table-cell table:number-columns-repeated="16373"/>
        </table:table-row>
        <table:table-row table:style-name="ro9">
          <table:table-cell office:value-type="date" office:date-value="1919-01-01" calcext:value-type="date">
            <text:p>1919-01-01</text:p>
          </table:table-cell>
          <table:table-cell office:value-type="float" office:value="5.73" calcext:value-type="float">
            <text:p>5.73</text:p>
          </table:table-cell>
          <table:table-cell table:formula="of:=[.B12]/100" office:value-type="percentage" office:value="0.0573" calcext:value-type="percentage">
            <text:p>5.73 %</text:p>
          </table:table-cell>
          <table:table-cell table:number-columns-repeated="5"/>
          <table:table-cell office:value-type="date" office:date-value="1919-01-01" calcext:value-type="date">
            <text:p>1919-01-01</text:p>
          </table:table-cell>
          <table:table-cell office:value-type="float" office:value="7.77" calcext:value-type="float">
            <text:p>7.77</text:p>
          </table:table-cell>
          <table:table-cell table:formula="of:=[.J12]/100" office:value-type="percentage" office:value="0.0777" calcext:value-type="percentage">
            <text:p>7.77 %</text:p>
          </table:table-cell>
          <table:table-cell table:number-columns-repeated="16373"/>
        </table:table-row>
        <table:table-row table:style-name="ro9">
          <table:table-cell office:value-type="date" office:date-value="1920-01-01" calcext:value-type="date">
            <text:p>1920-01-01</text:p>
          </table:table-cell>
          <table:table-cell office:value-type="float" office:value="6.26" calcext:value-type="float">
            <text:p>6.26</text:p>
          </table:table-cell>
          <table:table-cell table:formula="of:=[.B13]/100" office:value-type="percentage" office:value="0.0626" calcext:value-type="percentage">
            <text:p>6.26 %</text:p>
          </table:table-cell>
          <table:table-cell table:number-columns-repeated="5"/>
          <table:table-cell office:value-type="date" office:date-value="1920-01-01" calcext:value-type="date">
            <text:p>1920-01-01</text:p>
          </table:table-cell>
          <table:table-cell office:value-type="float" office:value="8.56" calcext:value-type="float">
            <text:p>8.56</text:p>
          </table:table-cell>
          <table:table-cell table:formula="of:=[.J13]/100" office:value-type="percentage" office:value="0.0856" calcext:value-type="percentage">
            <text:p>8.56 %</text:p>
          </table:table-cell>
          <table:table-cell table:number-columns-repeated="16373"/>
        </table:table-row>
        <table:table-row table:style-name="ro9">
          <table:table-cell office:value-type="date" office:date-value="1921-01-01" calcext:value-type="date">
            <text:p>1921-01-01</text:p>
          </table:table-cell>
          <table:table-cell office:value-type="float" office:value="5.5" calcext:value-type="float">
            <text:p>5.50</text:p>
          </table:table-cell>
          <table:table-cell table:formula="of:=[.B14]/100" office:value-type="percentage" office:value="0.055" calcext:value-type="percentage">
            <text:p>5.50 %</text:p>
          </table:table-cell>
          <table:table-cell table:number-columns-repeated="5"/>
          <table:table-cell office:value-type="date" office:date-value="1921-01-01" calcext:value-type="date">
            <text:p>1921-01-01</text:p>
          </table:table-cell>
          <table:table-cell office:value-type="float" office:value="7.61" calcext:value-type="float">
            <text:p>7.61</text:p>
          </table:table-cell>
          <table:table-cell table:formula="of:=[.J14]/100" office:value-type="percentage" office:value="0.0761" calcext:value-type="percentage">
            <text:p>7.61 %</text:p>
          </table:table-cell>
          <table:table-cell table:number-columns-repeated="16373"/>
        </table:table-row>
        <table:table-row table:style-name="ro9">
          <table:table-cell office:value-type="date" office:date-value="1922-01-01" calcext:value-type="date">
            <text:p>1922-01-01</text:p>
          </table:table-cell>
          <table:table-cell office:value-type="float" office:value="5.08" calcext:value-type="float">
            <text:p>5.08</text:p>
          </table:table-cell>
          <table:table-cell table:formula="of:=[.B15]/100" office:value-type="percentage" office:value="0.0508" calcext:value-type="percentage">
            <text:p>5.08 %</text:p>
          </table:table-cell>
          <table:table-cell table:number-columns-repeated="5"/>
          <table:table-cell office:value-type="date" office:date-value="1922-01-01" calcext:value-type="date">
            <text:p>1922-01-01</text:p>
          </table:table-cell>
          <table:table-cell office:value-type="float" office:value="7.02" calcext:value-type="float">
            <text:p>7.02</text:p>
          </table:table-cell>
          <table:table-cell table:formula="of:=[.J15]/100" office:value-type="percentage" office:value="0.0702" calcext:value-type="percentage">
            <text:p>7.02 %</text:p>
          </table:table-cell>
          <table:table-cell table:number-columns-repeated="16373"/>
        </table:table-row>
        <table:table-row table:style-name="ro9">
          <table:table-cell office:value-type="date" office:date-value="1923-01-01" calcext:value-type="date">
            <text:p>1923-01-01</text:p>
          </table:table-cell>
          <table:table-cell office:value-type="float" office:value="5.09" calcext:value-type="float">
            <text:p>5.09</text:p>
          </table:table-cell>
          <table:table-cell table:formula="of:=[.B16]/100" office:value-type="percentage" office:value="0.0509" calcext:value-type="percentage">
            <text:p>5.09 %</text:p>
          </table:table-cell>
          <table:table-cell table:number-columns-repeated="5"/>
          <table:table-cell office:value-type="date" office:date-value="1923-01-01" calcext:value-type="date">
            <text:p>1923-01-01</text:p>
          </table:table-cell>
          <table:table-cell office:value-type="float" office:value="7.38" calcext:value-type="float">
            <text:p>7.38</text:p>
          </table:table-cell>
          <table:table-cell table:formula="of:=[.J16]/100" office:value-type="percentage" office:value="0.0738" calcext:value-type="percentage">
            <text:p>7.38 %</text:p>
          </table:table-cell>
          <table:table-cell table:number-columns-repeated="16373"/>
        </table:table-row>
        <table:table-row table:style-name="ro9">
          <table:table-cell office:value-type="date" office:date-value="1924-01-01" calcext:value-type="date">
            <text:p>1924-01-01</text:p>
          </table:table-cell>
          <table:table-cell office:value-type="float" office:value="4.95" calcext:value-type="float">
            <text:p>4.95</text:p>
          </table:table-cell>
          <table:table-cell table:formula="of:=[.B17]/100" office:value-type="percentage" office:value="0.0495" calcext:value-type="percentage">
            <text:p>4.95 %</text:p>
          </table:table-cell>
          <table:table-cell table:number-columns-repeated="5"/>
          <table:table-cell office:value-type="date" office:date-value="1924-01-01" calcext:value-type="date">
            <text:p>1924-01-01</text:p>
          </table:table-cell>
          <table:table-cell office:value-type="float" office:value="6.46" calcext:value-type="float">
            <text:p>6.46</text:p>
          </table:table-cell>
          <table:table-cell table:formula="of:=[.J17]/100" office:value-type="percentage" office:value="0.0646" calcext:value-type="percentage">
            <text:p>6.46 %</text:p>
          </table:table-cell>
          <table:table-cell table:number-columns-repeated="16373"/>
        </table:table-row>
        <table:table-row table:style-name="ro9">
          <table:table-cell office:value-type="date" office:date-value="1925-01-01" calcext:value-type="date">
            <text:p>1925-01-01</text:p>
          </table:table-cell>
          <table:table-cell office:value-type="float" office:value="4.85" calcext:value-type="float">
            <text:p>4.85</text:p>
          </table:table-cell>
          <table:table-cell table:formula="of:=[.B18]/100" office:value-type="percentage" office:value="0.0485" calcext:value-type="percentage">
            <text:p>4.85 %</text:p>
          </table:table-cell>
          <table:table-cell table:number-columns-repeated="5"/>
          <table:table-cell office:value-type="date" office:date-value="1925-01-01" calcext:value-type="date">
            <text:p>1925-01-01</text:p>
          </table:table-cell>
          <table:table-cell office:value-type="float" office:value="6.15" calcext:value-type="float">
            <text:p>6.15</text:p>
          </table:table-cell>
          <table:table-cell table:formula="of:=[.J18]/100" office:value-type="percentage" office:value="0.0615" calcext:value-type="percentage">
            <text:p>6.15 %</text:p>
          </table:table-cell>
          <table:table-cell table:number-columns-repeated="16373"/>
        </table:table-row>
        <table:table-row table:style-name="ro9">
          <table:table-cell office:value-type="date" office:date-value="1926-01-01" calcext:value-type="date">
            <text:p>1926-01-01</text:p>
          </table:table-cell>
          <table:table-cell office:value-type="float" office:value="4.68" calcext:value-type="float">
            <text:p>4.68</text:p>
          </table:table-cell>
          <table:table-cell table:formula="of:=[.B19]/100" office:value-type="percentage" office:value="0.0468" calcext:value-type="percentage">
            <text:p>4.68 %</text:p>
          </table:table-cell>
          <table:table-cell table:number-columns-repeated="5"/>
          <table:table-cell office:value-type="date" office:date-value="1926-01-01" calcext:value-type="date">
            <text:p>1926-01-01</text:p>
          </table:table-cell>
          <table:table-cell office:value-type="float" office:value="5.68" calcext:value-type="float">
            <text:p>5.68</text:p>
          </table:table-cell>
          <table:table-cell table:formula="of:=[.J19]/100" office:value-type="percentage" office:value="0.0568" calcext:value-type="percentage">
            <text:p>5.68 %</text:p>
          </table:table-cell>
          <table:table-cell table:number-columns-repeated="16373"/>
        </table:table-row>
        <table:table-row table:style-name="ro9">
          <table:table-cell office:value-type="date" office:date-value="1927-01-01" calcext:value-type="date">
            <text:p>1927-01-01</text:p>
          </table:table-cell>
          <table:table-cell office:value-type="float" office:value="4.46" calcext:value-type="float">
            <text:p>4.46</text:p>
          </table:table-cell>
          <table:table-cell table:formula="of:=[.B20]/100" office:value-type="percentage" office:value="0.0446" calcext:value-type="percentage">
            <text:p>4.46 %</text:p>
          </table:table-cell>
          <table:table-cell table:number-columns-repeated="5"/>
          <table:table-cell office:value-type="date" office:date-value="1927-01-01" calcext:value-type="date">
            <text:p>1927-01-01</text:p>
          </table:table-cell>
          <table:table-cell office:value-type="float" office:value="5.32" calcext:value-type="float">
            <text:p>5.32</text:p>
          </table:table-cell>
          <table:table-cell table:formula="of:=[.J20]/100" office:value-type="percentage" office:value="0.0532" calcext:value-type="percentage">
            <text:p>5.32 %</text:p>
          </table:table-cell>
          <table:table-cell table:number-columns-repeated="16373"/>
        </table:table-row>
        <table:table-row table:style-name="ro9">
          <table:table-cell office:value-type="date" office:date-value="1928-01-01" calcext:value-type="date">
            <text:p>1928-01-01</text:p>
          </table:table-cell>
          <table:table-cell office:value-type="float" office:value="4.61" calcext:value-type="float">
            <text:p>4.61</text:p>
          </table:table-cell>
          <table:table-cell table:formula="of:=[.B21]/100" office:value-type="percentage" office:value="0.0461" calcext:value-type="percentage">
            <text:p>4.61 %</text:p>
          </table:table-cell>
          <table:table-cell table:number-columns-repeated="5"/>
          <table:table-cell office:value-type="date" office:date-value="1928-01-01" calcext:value-type="date">
            <text:p>1928-01-01</text:p>
          </table:table-cell>
          <table:table-cell office:value-type="float" office:value="5.6" calcext:value-type="float">
            <text:p>5.60</text:p>
          </table:table-cell>
          <table:table-cell table:formula="of:=[.J21]/100" office:value-type="percentage" office:value="0.056" calcext:value-type="percentage">
            <text:p>5.60 %</text:p>
          </table:table-cell>
          <table:table-cell table:number-columns-repeated="16373"/>
        </table:table-row>
        <table:table-row table:style-name="ro9">
          <table:table-cell office:value-type="date" office:date-value="1929-01-01" calcext:value-type="date">
            <text:p>1929-01-01</text:p>
          </table:table-cell>
          <table:table-cell office:value-type="float" office:value="4.67" calcext:value-type="float">
            <text:p>4.67</text:p>
          </table:table-cell>
          <table:table-cell table:formula="of:=[.B22]/100" office:value-type="percentage" office:value="0.0467" calcext:value-type="percentage">
            <text:p>4.67 %</text:p>
          </table:table-cell>
          <table:table-cell table:number-columns-repeated="5"/>
          <table:table-cell office:value-type="date" office:date-value="1929-01-01" calcext:value-type="date">
            <text:p>1929-01-01</text:p>
          </table:table-cell>
          <table:table-cell office:value-type="float" office:value="5.95" calcext:value-type="float">
            <text:p>5.95</text:p>
          </table:table-cell>
          <table:table-cell table:formula="of:=[.J22]/100" office:value-type="percentage" office:value="0.0595" calcext:value-type="percentage">
            <text:p>5.95 %</text:p>
          </table:table-cell>
          <table:table-cell table:number-columns-repeated="16373"/>
        </table:table-row>
        <table:table-row table:style-name="ro9">
          <table:table-cell office:value-type="date" office:date-value="1930-01-01" calcext:value-type="date">
            <text:p>1930-01-01</text:p>
          </table:table-cell>
          <table:table-cell office:value-type="float" office:value="4.52" calcext:value-type="float">
            <text:p>4.52</text:p>
          </table:table-cell>
          <table:table-cell table:formula="of:=[.B23]/100" office:value-type="percentage" office:value="0.0452" calcext:value-type="percentage">
            <text:p>4.52 %</text:p>
          </table:table-cell>
          <table:table-cell table:number-columns-repeated="5"/>
          <table:table-cell office:value-type="date" office:date-value="1930-01-01" calcext:value-type="date">
            <text:p>1930-01-01</text:p>
          </table:table-cell>
          <table:table-cell office:value-type="float" office:value="6.71" calcext:value-type="float">
            <text:p>6.71</text:p>
          </table:table-cell>
          <table:table-cell table:formula="of:=[.J23]/100" office:value-type="percentage" office:value="0.0671" calcext:value-type="percentage">
            <text:p>6.71 %</text:p>
          </table:table-cell>
          <table:table-cell table:number-columns-repeated="16373"/>
        </table:table-row>
        <table:table-row table:style-name="ro9">
          <table:table-cell office:value-type="date" office:date-value="1931-01-01" calcext:value-type="date">
            <text:p>1931-01-01</text:p>
          </table:table-cell>
          <table:table-cell office:value-type="float" office:value="5.32" calcext:value-type="float">
            <text:p>5.32</text:p>
          </table:table-cell>
          <table:table-cell table:formula="of:=[.B24]/100" office:value-type="percentage" office:value="0.0532" calcext:value-type="percentage">
            <text:p>5.32 %</text:p>
          </table:table-cell>
          <table:table-cell table:number-columns-repeated="5"/>
          <table:table-cell office:value-type="date" office:date-value="1931-01-01" calcext:value-type="date">
            <text:p>1931-01-01</text:p>
          </table:table-cell>
          <table:table-cell office:value-type="float" office:value="10.42" calcext:value-type="float">
            <text:p>10.42</text:p>
          </table:table-cell>
          <table:table-cell table:formula="of:=[.J24]/100" office:value-type="percentage" office:value="0.1042" calcext:value-type="percentage">
            <text:p>10.42 %</text:p>
          </table:table-cell>
          <table:table-cell table:number-columns-repeated="16373"/>
        </table:table-row>
        <table:table-row table:style-name="ro9">
          <table:table-cell office:value-type="date" office:date-value="1932-01-01" calcext:value-type="date">
            <text:p>1932-01-01</text:p>
          </table:table-cell>
          <table:table-cell office:value-type="float" office:value="4.59" calcext:value-type="float">
            <text:p>4.59</text:p>
          </table:table-cell>
          <table:table-cell table:formula="of:=[.B25]/100" office:value-type="percentage" office:value="0.0459" calcext:value-type="percentage">
            <text:p>4.59 %</text:p>
          </table:table-cell>
          <table:table-cell table:number-columns-repeated="5"/>
          <table:table-cell office:value-type="date" office:date-value="1932-01-01" calcext:value-type="date">
            <text:p>1932-01-01</text:p>
          </table:table-cell>
          <table:table-cell office:value-type="float" office:value="8.42" calcext:value-type="float">
            <text:p>8.42</text:p>
          </table:table-cell>
          <table:table-cell table:formula="of:=[.J25]/100" office:value-type="percentage" office:value="0.0842" calcext:value-type="percentage">
            <text:p>8.42 %</text:p>
          </table:table-cell>
          <table:table-cell table:number-columns-repeated="16373"/>
        </table:table-row>
        <table:table-row table:style-name="ro9">
          <table:table-cell office:value-type="date" office:date-value="1933-01-01" calcext:value-type="date">
            <text:p>1933-01-01</text:p>
          </table:table-cell>
          <table:table-cell office:value-type="float" office:value="4.5" calcext:value-type="float">
            <text:p>4.50</text:p>
          </table:table-cell>
          <table:table-cell table:formula="of:=[.B26]/100" office:value-type="percentage" office:value="0.045" calcext:value-type="percentage">
            <text:p>4.50 %</text:p>
          </table:table-cell>
          <table:table-cell table:number-columns-repeated="5"/>
          <table:table-cell office:value-type="date" office:date-value="1933-01-01" calcext:value-type="date">
            <text:p>1933-01-01</text:p>
          </table:table-cell>
          <table:table-cell office:value-type="float" office:value="7.75" calcext:value-type="float">
            <text:p>7.75</text:p>
          </table:table-cell>
          <table:table-cell table:formula="of:=[.J26]/100" office:value-type="percentage" office:value="0.0775" calcext:value-type="percentage">
            <text:p>7.75 %</text:p>
          </table:table-cell>
          <table:table-cell table:number-columns-repeated="16373"/>
        </table:table-row>
        <table:table-row table:style-name="ro9">
          <table:table-cell office:value-type="date" office:date-value="1934-01-01" calcext:value-type="date">
            <text:p>1934-01-01</text:p>
          </table:table-cell>
          <table:table-cell office:value-type="float" office:value="3.81" calcext:value-type="float">
            <text:p>3.81</text:p>
          </table:table-cell>
          <table:table-cell table:formula="of:=[.B27]/100" office:value-type="percentage" office:value="0.0381" calcext:value-type="percentage">
            <text:p>3.81 %</text:p>
          </table:table-cell>
          <table:table-cell table:number-columns-repeated="5"/>
          <table:table-cell office:value-type="date" office:date-value="1934-01-01" calcext:value-type="date">
            <text:p>1934-01-01</text:p>
          </table:table-cell>
          <table:table-cell office:value-type="float" office:value="6.23" calcext:value-type="float">
            <text:p>6.23</text:p>
          </table:table-cell>
          <table:table-cell table:formula="of:=[.J27]/100" office:value-type="percentage" office:value="0.0623" calcext:value-type="percentage">
            <text:p>6.23 %</text:p>
          </table:table-cell>
          <table:table-cell table:number-columns-repeated="16373"/>
        </table:table-row>
        <table:table-row table:style-name="ro9">
          <table:table-cell office:value-type="date" office:date-value="1935-01-01" calcext:value-type="date">
            <text:p>1935-01-01</text:p>
          </table:table-cell>
          <table:table-cell office:value-type="float" office:value="3.44" calcext:value-type="float">
            <text:p>3.44</text:p>
          </table:table-cell>
          <table:table-cell table:formula="of:=[.B28]/100" office:value-type="percentage" office:value="0.0344" calcext:value-type="percentage">
            <text:p>3.44 %</text:p>
          </table:table-cell>
          <table:table-cell table:number-columns-repeated="5"/>
          <table:table-cell office:value-type="date" office:date-value="1935-01-01" calcext:value-type="date">
            <text:p>1935-01-01</text:p>
          </table:table-cell>
          <table:table-cell office:value-type="float" office:value="5.3" calcext:value-type="float">
            <text:p>5.30</text:p>
          </table:table-cell>
          <table:table-cell table:formula="of:=[.J28]/100" office:value-type="percentage" office:value="0.053" calcext:value-type="percentage">
            <text:p>5.30 %</text:p>
          </table:table-cell>
          <table:table-cell table:number-columns-repeated="16373"/>
        </table:table-row>
        <table:table-row table:style-name="ro9">
          <table:table-cell office:value-type="date" office:date-value="1936-01-01" calcext:value-type="date">
            <text:p>1936-01-01</text:p>
          </table:table-cell>
          <table:table-cell office:value-type="float" office:value="3.1" calcext:value-type="float">
            <text:p>3.10</text:p>
          </table:table-cell>
          <table:table-cell table:formula="of:=[.B29]/100" office:value-type="percentage" office:value="0.031" calcext:value-type="percentage">
            <text:p>3.10 %</text:p>
          </table:table-cell>
          <table:table-cell table:number-columns-repeated="5"/>
          <table:table-cell office:value-type="date" office:date-value="1936-01-01" calcext:value-type="date">
            <text:p>1936-01-01</text:p>
          </table:table-cell>
          <table:table-cell office:value-type="float" office:value="4.53" calcext:value-type="float">
            <text:p>4.53</text:p>
          </table:table-cell>
          <table:table-cell table:formula="of:=[.J29]/100" office:value-type="percentage" office:value="0.0453" calcext:value-type="percentage">
            <text:p>4.53 %</text:p>
          </table:table-cell>
          <table:table-cell table:number-columns-repeated="16373"/>
        </table:table-row>
        <table:table-row table:style-name="ro9">
          <table:table-cell office:value-type="date" office:date-value="1937-01-01" calcext:value-type="date">
            <text:p>1937-01-01</text:p>
          </table:table-cell>
          <table:table-cell office:value-type="float" office:value="3.21" calcext:value-type="float">
            <text:p>3.21</text:p>
          </table:table-cell>
          <table:table-cell table:formula="of:=[.B30]/100" office:value-type="percentage" office:value="0.0321" calcext:value-type="percentage">
            <text:p>3.21 %</text:p>
          </table:table-cell>
          <table:table-cell table:number-columns-repeated="5"/>
          <table:table-cell office:value-type="date" office:date-value="1937-01-01" calcext:value-type="date">
            <text:p>1937-01-01</text:p>
          </table:table-cell>
          <table:table-cell office:value-type="float" office:value="5.73" calcext:value-type="float">
            <text:p>5.73</text:p>
          </table:table-cell>
          <table:table-cell table:formula="of:=[.J30]/100" office:value-type="percentage" office:value="0.0573" calcext:value-type="percentage">
            <text:p>5.73 %</text:p>
          </table:table-cell>
          <table:table-cell table:number-columns-repeated="16373"/>
        </table:table-row>
        <table:table-row table:style-name="ro9">
          <table:table-cell office:value-type="date" office:date-value="1938-01-01" calcext:value-type="date">
            <text:p>1938-01-01</text:p>
          </table:table-cell>
          <table:table-cell office:value-type="float" office:value="3.08" calcext:value-type="float">
            <text:p>3.08</text:p>
          </table:table-cell>
          <table:table-cell table:formula="of:=[.B31]/100" office:value-type="percentage" office:value="0.0308" calcext:value-type="percentage">
            <text:p>3.08 %</text:p>
          </table:table-cell>
          <table:table-cell table:number-columns-repeated="5"/>
          <table:table-cell office:value-type="date" office:date-value="1938-01-01" calcext:value-type="date">
            <text:p>1938-01-01</text:p>
          </table:table-cell>
          <table:table-cell office:value-type="float" office:value="5.27" calcext:value-type="float">
            <text:p>5.27</text:p>
          </table:table-cell>
          <table:table-cell table:formula="of:=[.J31]/100" office:value-type="percentage" office:value="0.0527" calcext:value-type="percentage">
            <text:p>5.27 %</text:p>
          </table:table-cell>
          <table:table-cell table:number-columns-repeated="16373"/>
        </table:table-row>
        <table:table-row table:style-name="ro9">
          <table:table-cell office:value-type="date" office:date-value="1939-01-01" calcext:value-type="date">
            <text:p>1939-01-01</text:p>
          </table:table-cell>
          <table:table-cell office:value-type="float" office:value="2.94" calcext:value-type="float">
            <text:p>2.94</text:p>
          </table:table-cell>
          <table:table-cell table:formula="of:=[.B32]/100" office:value-type="percentage" office:value="0.0294" calcext:value-type="percentage">
            <text:p>2.94 %</text:p>
          </table:table-cell>
          <table:table-cell table:number-columns-repeated="5"/>
          <table:table-cell office:value-type="date" office:date-value="1939-01-01" calcext:value-type="date">
            <text:p>1939-01-01</text:p>
          </table:table-cell>
          <table:table-cell office:value-type="float" office:value="4.92" calcext:value-type="float">
            <text:p>4.92</text:p>
          </table:table-cell>
          <table:table-cell table:formula="of:=[.J32]/100" office:value-type="percentage" office:value="0.0492" calcext:value-type="percentage">
            <text:p>4.92 %</text:p>
          </table:table-cell>
          <table:table-cell table:number-columns-repeated="16373"/>
        </table:table-row>
        <table:table-row table:style-name="ro9">
          <table:table-cell office:value-type="date" office:date-value="1940-01-01" calcext:value-type="date">
            <text:p>1940-01-01</text:p>
          </table:table-cell>
          <table:table-cell office:value-type="float" office:value="2.71" calcext:value-type="float">
            <text:p>2.71</text:p>
          </table:table-cell>
          <table:table-cell table:formula="of:=[.B33]/100" office:value-type="percentage" office:value="0.0271" calcext:value-type="percentage">
            <text:p>2.71 %</text:p>
          </table:table-cell>
          <table:table-cell table:number-columns-repeated="5"/>
          <table:table-cell office:value-type="date" office:date-value="1940-01-01" calcext:value-type="date">
            <text:p>1940-01-01</text:p>
          </table:table-cell>
          <table:table-cell office:value-type="float" office:value="4.45" calcext:value-type="float">
            <text:p>4.45</text:p>
          </table:table-cell>
          <table:table-cell table:formula="of:=[.J33]/100" office:value-type="percentage" office:value="0.0445" calcext:value-type="percentage">
            <text:p>4.45 %</text:p>
          </table:table-cell>
          <table:table-cell table:number-columns-repeated="16373"/>
        </table:table-row>
        <table:table-row table:style-name="ro9">
          <table:table-cell office:value-type="date" office:date-value="1941-01-01" calcext:value-type="date">
            <text:p>1941-01-01</text:p>
          </table:table-cell>
          <table:table-cell office:value-type="float" office:value="2.8" calcext:value-type="float">
            <text:p>2.80</text:p>
          </table:table-cell>
          <table:table-cell table:formula="of:=[.B34]/100" office:value-type="percentage" office:value="0.028" calcext:value-type="percentage">
            <text:p>2.80 %</text:p>
          </table:table-cell>
          <table:table-cell table:number-columns-repeated="5"/>
          <table:table-cell office:value-type="date" office:date-value="1941-01-01" calcext:value-type="date">
            <text:p>1941-01-01</text:p>
          </table:table-cell>
          <table:table-cell office:value-type="float" office:value="4.38" calcext:value-type="float">
            <text:p>4.38</text:p>
          </table:table-cell>
          <table:table-cell table:formula="of:=[.J34]/100" office:value-type="percentage" office:value="0.0438" calcext:value-type="percentage">
            <text:p>4.38 %</text:p>
          </table:table-cell>
          <table:table-cell table:number-columns-repeated="16373"/>
        </table:table-row>
        <table:table-row table:style-name="ro9">
          <table:table-cell office:value-type="date" office:date-value="1942-01-01" calcext:value-type="date">
            <text:p>1942-01-01</text:p>
          </table:table-cell>
          <table:table-cell office:value-type="float" office:value="2.81" calcext:value-type="float">
            <text:p>2.81</text:p>
          </table:table-cell>
          <table:table-cell table:formula="of:=[.B35]/100" office:value-type="percentage" office:value="0.0281" calcext:value-type="percentage">
            <text:p>2.81 %</text:p>
          </table:table-cell>
          <table:table-cell table:number-columns-repeated="5"/>
          <table:table-cell office:value-type="date" office:date-value="1942-01-01" calcext:value-type="date">
            <text:p>1942-01-01</text:p>
          </table:table-cell>
          <table:table-cell office:value-type="float" office:value="4.28" calcext:value-type="float">
            <text:p>4.28</text:p>
          </table:table-cell>
          <table:table-cell table:formula="of:=[.J35]/100" office:value-type="percentage" office:value="0.0428" calcext:value-type="percentage">
            <text:p>4.28 %</text:p>
          </table:table-cell>
          <table:table-cell table:number-columns-repeated="16373"/>
        </table:table-row>
        <table:table-row table:style-name="ro9">
          <table:table-cell office:value-type="date" office:date-value="1943-01-01" calcext:value-type="date">
            <text:p>1943-01-01</text:p>
          </table:table-cell>
          <table:table-cell office:value-type="float" office:value="2.74" calcext:value-type="float">
            <text:p>2.74</text:p>
          </table:table-cell>
          <table:table-cell table:formula="of:=[.B36]/100" office:value-type="percentage" office:value="0.0274" calcext:value-type="percentage">
            <text:p>2.74 %</text:p>
          </table:table-cell>
          <table:table-cell table:number-columns-repeated="5"/>
          <table:table-cell office:value-type="date" office:date-value="1943-01-01" calcext:value-type="date">
            <text:p>1943-01-01</text:p>
          </table:table-cell>
          <table:table-cell office:value-type="float" office:value="3.82" calcext:value-type="float">
            <text:p>3.82</text:p>
          </table:table-cell>
          <table:table-cell table:formula="of:=[.J36]/100" office:value-type="percentage" office:value="0.0382" calcext:value-type="percentage">
            <text:p>3.82 %</text:p>
          </table:table-cell>
          <table:table-cell table:number-columns-repeated="16373"/>
        </table:table-row>
        <table:table-row table:style-name="ro9">
          <table:table-cell office:value-type="date" office:date-value="1944-01-01" calcext:value-type="date">
            <text:p>1944-01-01</text:p>
          </table:table-cell>
          <table:table-cell office:value-type="float" office:value="2.7" calcext:value-type="float">
            <text:p>2.70</text:p>
          </table:table-cell>
          <table:table-cell table:formula="of:=[.B37]/100" office:value-type="percentage" office:value="0.027" calcext:value-type="percentage">
            <text:p>2.70 %</text:p>
          </table:table-cell>
          <table:table-cell table:number-columns-repeated="5"/>
          <table:table-cell office:value-type="date" office:date-value="1944-01-01" calcext:value-type="date">
            <text:p>1944-01-01</text:p>
          </table:table-cell>
          <table:table-cell office:value-type="float" office:value="3.49" calcext:value-type="float">
            <text:p>3.49</text:p>
          </table:table-cell>
          <table:table-cell table:formula="of:=[.J37]/100" office:value-type="percentage" office:value="0.0349" calcext:value-type="percentage">
            <text:p>3.49 %</text:p>
          </table:table-cell>
          <table:table-cell table:number-columns-repeated="16373"/>
        </table:table-row>
        <table:table-row table:style-name="ro9">
          <table:table-cell office:value-type="date" office:date-value="1945-01-01" calcext:value-type="date">
            <text:p>1945-01-01</text:p>
          </table:table-cell>
          <table:table-cell office:value-type="float" office:value="2.61" calcext:value-type="float">
            <text:p>2.61</text:p>
          </table:table-cell>
          <table:table-cell table:formula="of:=[.B38]/100" office:value-type="percentage" office:value="0.0261" calcext:value-type="percentage">
            <text:p>2.61 %</text:p>
          </table:table-cell>
          <table:table-cell table:number-columns-repeated="5"/>
          <table:table-cell office:value-type="date" office:date-value="1945-01-01" calcext:value-type="date">
            <text:p>1945-01-01</text:p>
          </table:table-cell>
          <table:table-cell office:value-type="float" office:value="3.1" calcext:value-type="float">
            <text:p>3.10</text:p>
          </table:table-cell>
          <table:table-cell table:formula="of:=[.J38]/100" office:value-type="percentage" office:value="0.031" calcext:value-type="percentage">
            <text:p>3.10 %</text:p>
          </table:table-cell>
          <table:table-cell table:number-columns-repeated="16373"/>
        </table:table-row>
        <table:table-row table:style-name="ro9">
          <table:table-cell office:value-type="date" office:date-value="1946-01-01" calcext:value-type="date">
            <text:p>1946-01-01</text:p>
          </table:table-cell>
          <table:table-cell office:value-type="float" office:value="2.61" calcext:value-type="float">
            <text:p>2.61</text:p>
          </table:table-cell>
          <table:table-cell table:formula="of:=[.B39]/100" office:value-type="percentage" office:value="0.0261" calcext:value-type="percentage">
            <text:p>2.61 %</text:p>
          </table:table-cell>
          <table:table-cell table:number-columns-repeated="5"/>
          <table:table-cell office:value-type="date" office:date-value="1946-01-01" calcext:value-type="date">
            <text:p>1946-01-01</text:p>
          </table:table-cell>
          <table:table-cell office:value-type="float" office:value="3.17" calcext:value-type="float">
            <text:p>3.17</text:p>
          </table:table-cell>
          <table:table-cell table:formula="of:=[.J39]/100" office:value-type="percentage" office:value="0.0317" calcext:value-type="percentage">
            <text:p>3.17 %</text:p>
          </table:table-cell>
          <table:table-cell table:number-columns-repeated="16373"/>
        </table:table-row>
        <table:table-row table:style-name="ro9">
          <table:table-cell office:value-type="date" office:date-value="1947-01-01" calcext:value-type="date">
            <text:p>1947-01-01</text:p>
          </table:table-cell>
          <table:table-cell office:value-type="float" office:value="2.86" calcext:value-type="float">
            <text:p>2.86</text:p>
          </table:table-cell>
          <table:table-cell table:formula="of:=[.B40]/100" office:value-type="percentage" office:value="0.0286" calcext:value-type="percentage">
            <text:p>2.86 %</text:p>
          </table:table-cell>
          <table:table-cell table:number-columns-repeated="5"/>
          <table:table-cell office:value-type="date" office:date-value="1947-01-01" calcext:value-type="date">
            <text:p>1947-01-01</text:p>
          </table:table-cell>
          <table:table-cell office:value-type="float" office:value="3.52" calcext:value-type="float">
            <text:p>3.52</text:p>
          </table:table-cell>
          <table:table-cell table:formula="of:=[.J40]/100" office:value-type="percentage" office:value="0.0352" calcext:value-type="percentage">
            <text:p>3.52 %</text:p>
          </table:table-cell>
          <table:table-cell table:number-columns-repeated="16373"/>
        </table:table-row>
        <table:table-row table:style-name="ro9">
          <table:table-cell office:value-type="date" office:date-value="1948-01-01" calcext:value-type="date">
            <text:p>1948-01-01</text:p>
          </table:table-cell>
          <table:table-cell office:value-type="float" office:value="2.79" calcext:value-type="float">
            <text:p>2.79</text:p>
          </table:table-cell>
          <table:table-cell table:formula="of:=[.B41]/100" office:value-type="percentage" office:value="0.0279" calcext:value-type="percentage">
            <text:p>2.79 %</text:p>
          </table:table-cell>
          <table:table-cell table:number-columns-repeated="5"/>
          <table:table-cell office:value-type="date" office:date-value="1948-01-01" calcext:value-type="date">
            <text:p>1948-01-01</text:p>
          </table:table-cell>
          <table:table-cell office:value-type="float" office:value="3.53" calcext:value-type="float">
            <text:p>3.53</text:p>
          </table:table-cell>
          <table:table-cell table:formula="of:=[.J41]/100" office:value-type="percentage" office:value="0.0353" calcext:value-type="percentage">
            <text:p>3.53 %</text:p>
          </table:table-cell>
          <table:table-cell table:number-columns-repeated="16373"/>
        </table:table-row>
        <table:table-row table:style-name="ro9">
          <table:table-cell office:value-type="date" office:date-value="1949-01-01" calcext:value-type="date">
            <text:p>1949-01-01</text:p>
          </table:table-cell>
          <table:table-cell office:value-type="float" office:value="2.58" calcext:value-type="float">
            <text:p>2.58</text:p>
          </table:table-cell>
          <table:table-cell table:formula="of:=[.B42]/100" office:value-type="percentage" office:value="0.0258" calcext:value-type="percentage">
            <text:p>2.58 %</text:p>
          </table:table-cell>
          <table:table-cell table:number-columns-repeated="5"/>
          <table:table-cell office:value-type="date" office:date-value="1949-01-01" calcext:value-type="date">
            <text:p>1949-01-01</text:p>
          </table:table-cell>
          <table:table-cell office:value-type="float" office:value="3.31" calcext:value-type="float">
            <text:p>3.31</text:p>
          </table:table-cell>
          <table:table-cell table:formula="of:=[.J42]/100" office:value-type="percentage" office:value="0.0331" calcext:value-type="percentage">
            <text:p>3.31 %</text:p>
          </table:table-cell>
          <table:table-cell table:number-columns-repeated="16373"/>
        </table:table-row>
        <table:table-row table:style-name="ro9">
          <table:table-cell office:value-type="date" office:date-value="1950-01-01" calcext:value-type="date">
            <text:p>1950-01-01</text:p>
          </table:table-cell>
          <table:table-cell office:value-type="float" office:value="2.67" calcext:value-type="float">
            <text:p>2.67</text:p>
          </table:table-cell>
          <table:table-cell table:formula="of:=[.B43]/100" office:value-type="percentage" office:value="0.0267" calcext:value-type="percentage">
            <text:p>2.67 %</text:p>
          </table:table-cell>
          <table:table-cell table:number-columns-repeated="5"/>
          <table:table-cell office:value-type="date" office:date-value="1950-01-01" calcext:value-type="date">
            <text:p>1950-01-01</text:p>
          </table:table-cell>
          <table:table-cell office:value-type="float" office:value="3.2" calcext:value-type="float">
            <text:p>3.20</text:p>
          </table:table-cell>
          <table:table-cell table:formula="of:=[.J43]/100" office:value-type="percentage" office:value="0.032" calcext:value-type="percentage">
            <text:p>3.20 %</text:p>
          </table:table-cell>
          <table:table-cell table:number-columns-repeated="16373"/>
        </table:table-row>
        <table:table-row table:style-name="ro9">
          <table:table-cell office:value-type="date" office:date-value="1951-01-01" calcext:value-type="date">
            <text:p>1951-01-01</text:p>
          </table:table-cell>
          <table:table-cell office:value-type="float" office:value="3.01" calcext:value-type="float">
            <text:p>3.01</text:p>
          </table:table-cell>
          <table:table-cell table:formula="of:=[.B44]/100" office:value-type="percentage" office:value="0.0301" calcext:value-type="percentage">
            <text:p>3.01 %</text:p>
          </table:table-cell>
          <table:table-cell table:number-columns-repeated="5"/>
          <table:table-cell office:value-type="date" office:date-value="1951-01-01" calcext:value-type="date">
            <text:p>1951-01-01</text:p>
          </table:table-cell>
          <table:table-cell office:value-type="float" office:value="3.61" calcext:value-type="float">
            <text:p>3.61</text:p>
          </table:table-cell>
          <table:table-cell table:formula="of:=[.J44]/100" office:value-type="percentage" office:value="0.0361" calcext:value-type="percentage">
            <text:p>3.61 %</text:p>
          </table:table-cell>
          <table:table-cell table:number-columns-repeated="16373"/>
        </table:table-row>
        <table:table-row table:style-name="ro9">
          <table:table-cell office:value-type="date" office:date-value="1952-01-01" calcext:value-type="date">
            <text:p>1952-01-01</text:p>
          </table:table-cell>
          <table:table-cell office:value-type="float" office:value="2.97" calcext:value-type="float">
            <text:p>2.97</text:p>
          </table:table-cell>
          <table:table-cell table:formula="of:=[.B45]/100" office:value-type="percentage" office:value="0.0297" calcext:value-type="percentage">
            <text:p>2.97 %</text:p>
          </table:table-cell>
          <table:table-cell table:number-columns-repeated="5"/>
          <table:table-cell office:value-type="date" office:date-value="1952-01-01" calcext:value-type="date">
            <text:p>1952-01-01</text:p>
          </table:table-cell>
          <table:table-cell office:value-type="float" office:value="3.51" calcext:value-type="float">
            <text:p>3.51</text:p>
          </table:table-cell>
          <table:table-cell table:formula="of:=[.J45]/100" office:value-type="percentage" office:value="0.0351" calcext:value-type="percentage">
            <text:p>3.51 %</text:p>
          </table:table-cell>
          <table:table-cell table:number-columns-repeated="16373"/>
        </table:table-row>
        <table:table-row table:style-name="ro9">
          <table:table-cell office:value-type="date" office:date-value="1953-01-01" calcext:value-type="date">
            <text:p>1953-01-01</text:p>
          </table:table-cell>
          <table:table-cell office:value-type="float" office:value="3.13" calcext:value-type="float">
            <text:p>3.13</text:p>
          </table:table-cell>
          <table:table-cell table:formula="of:=[.B46]/100" office:value-type="percentage" office:value="0.0313" calcext:value-type="percentage">
            <text:p>3.13 %</text:p>
          </table:table-cell>
          <table:table-cell table:number-columns-repeated="5"/>
          <table:table-cell office:value-type="date" office:date-value="1953-01-01" calcext:value-type="date">
            <text:p>1953-01-01</text:p>
          </table:table-cell>
          <table:table-cell office:value-type="float" office:value="3.74" calcext:value-type="float">
            <text:p>3.74</text:p>
          </table:table-cell>
          <table:table-cell table:formula="of:=[.J46]/100" office:value-type="percentage" office:value="0.0374" calcext:value-type="percentage">
            <text:p>3.74 %</text:p>
          </table:table-cell>
          <table:table-cell table:number-columns-repeated="16373"/>
        </table:table-row>
        <table:table-row table:style-name="ro9">
          <table:table-cell office:value-type="date" office:date-value="1954-01-01" calcext:value-type="date">
            <text:p>1954-01-01</text:p>
          </table:table-cell>
          <table:table-cell office:value-type="float" office:value="2.9" calcext:value-type="float">
            <text:p>2.90</text:p>
          </table:table-cell>
          <table:table-cell table:formula="of:=[.B47]/100" office:value-type="percentage" office:value="0.029" calcext:value-type="percentage">
            <text:p>2.90 %</text:p>
          </table:table-cell>
          <table:table-cell table:number-columns-repeated="5"/>
          <table:table-cell office:value-type="date" office:date-value="1954-01-01" calcext:value-type="date">
            <text:p>1954-01-01</text:p>
          </table:table-cell>
          <table:table-cell office:value-type="float" office:value="3.45" calcext:value-type="float">
            <text:p>3.45</text:p>
          </table:table-cell>
          <table:table-cell table:formula="of:=[.J47]/100" office:value-type="percentage" office:value="0.0345" calcext:value-type="percentage">
            <text:p>3.45 %</text:p>
          </table:table-cell>
          <table:table-cell table:number-columns-repeated="16373"/>
        </table:table-row>
        <table:table-row table:style-name="ro9">
          <table:table-cell office:value-type="date" office:date-value="1955-01-01" calcext:value-type="date">
            <text:p>1955-01-01</text:p>
          </table:table-cell>
          <table:table-cell office:value-type="float" office:value="3.15" calcext:value-type="float">
            <text:p>3.15</text:p>
          </table:table-cell>
          <table:table-cell table:formula="of:=[.B48]/100" office:value-type="percentage" office:value="0.0315" calcext:value-type="percentage">
            <text:p>3.15 %</text:p>
          </table:table-cell>
          <table:table-cell table:number-columns-repeated="5"/>
          <table:table-cell office:value-type="date" office:date-value="1955-01-01" calcext:value-type="date">
            <text:p>1955-01-01</text:p>
          </table:table-cell>
          <table:table-cell office:value-type="float" office:value="3.62" calcext:value-type="float">
            <text:p>3.62</text:p>
          </table:table-cell>
          <table:table-cell table:formula="of:=[.J48]/100" office:value-type="percentage" office:value="0.0362" calcext:value-type="percentage">
            <text:p>3.62 %</text:p>
          </table:table-cell>
          <table:table-cell table:number-columns-repeated="16373"/>
        </table:table-row>
        <table:table-row table:style-name="ro9">
          <table:table-cell office:value-type="date" office:date-value="1956-01-01" calcext:value-type="date">
            <text:p>1956-01-01</text:p>
          </table:table-cell>
          <table:table-cell office:value-type="float" office:value="3.75" calcext:value-type="float">
            <text:p>3.75</text:p>
          </table:table-cell>
          <table:table-cell table:formula="of:=[.B49]/100" office:value-type="percentage" office:value="0.0375" calcext:value-type="percentage">
            <text:p>3.75 %</text:p>
          </table:table-cell>
          <table:table-cell table:number-columns-repeated="5"/>
          <table:table-cell office:value-type="date" office:date-value="1956-01-01" calcext:value-type="date">
            <text:p>1956-01-01</text:p>
          </table:table-cell>
          <table:table-cell office:value-type="float" office:value="4.37" calcext:value-type="float">
            <text:p>4.37</text:p>
          </table:table-cell>
          <table:table-cell table:formula="of:=[.J49]/100" office:value-type="percentage" office:value="0.0437" calcext:value-type="percentage">
            <text:p>4.37 %</text:p>
          </table:table-cell>
          <table:table-cell table:number-columns-repeated="16373"/>
        </table:table-row>
        <table:table-row table:style-name="ro9">
          <table:table-cell office:value-type="date" office:date-value="1957-01-01" calcext:value-type="date">
            <text:p>1957-01-01</text:p>
          </table:table-cell>
          <table:table-cell office:value-type="float" office:value="3.81" calcext:value-type="float">
            <text:p>3.81</text:p>
          </table:table-cell>
          <table:table-cell table:formula="of:=[.B50]/100" office:value-type="percentage" office:value="0.0381" calcext:value-type="percentage">
            <text:p>3.81 %</text:p>
          </table:table-cell>
          <table:table-cell table:number-columns-repeated="5"/>
          <table:table-cell office:value-type="date" office:date-value="1957-01-01" calcext:value-type="date">
            <text:p>1957-01-01</text:p>
          </table:table-cell>
          <table:table-cell office:value-type="float" office:value="5.03" calcext:value-type="float">
            <text:p>5.03</text:p>
          </table:table-cell>
          <table:table-cell table:formula="of:=[.J50]/100" office:value-type="percentage" office:value="0.0503" calcext:value-type="percentage">
            <text:p>5.03 %</text:p>
          </table:table-cell>
          <table:table-cell table:number-columns-repeated="16373"/>
        </table:table-row>
        <table:table-row table:style-name="ro9">
          <table:table-cell office:value-type="date" office:date-value="1958-01-01" calcext:value-type="date">
            <text:p>1958-01-01</text:p>
          </table:table-cell>
          <table:table-cell office:value-type="float" office:value="4.08" calcext:value-type="float">
            <text:p>4.08</text:p>
          </table:table-cell>
          <table:table-cell table:formula="of:=[.B51]/100" office:value-type="percentage" office:value="0.0408" calcext:value-type="percentage">
            <text:p>4.08 %</text:p>
          </table:table-cell>
          <table:table-cell table:number-columns-repeated="5"/>
          <table:table-cell office:value-type="date" office:date-value="1958-01-01" calcext:value-type="date">
            <text:p>1958-01-01</text:p>
          </table:table-cell>
          <table:table-cell office:value-type="float" office:value="4.85" calcext:value-type="float">
            <text:p>4.85</text:p>
          </table:table-cell>
          <table:table-cell table:formula="of:=[.J51]/100" office:value-type="percentage" office:value="0.0485" calcext:value-type="percentage">
            <text:p>4.85 %</text:p>
          </table:table-cell>
          <table:table-cell table:number-columns-repeated="16373"/>
        </table:table-row>
        <table:table-row table:style-name="ro9">
          <table:table-cell office:value-type="date" office:date-value="1959-01-01" calcext:value-type="date">
            <text:p>1959-01-01</text:p>
          </table:table-cell>
          <table:table-cell office:value-type="float" office:value="4.58" calcext:value-type="float">
            <text:p>4.58</text:p>
          </table:table-cell>
          <table:table-cell table:formula="of:=[.B52]/100" office:value-type="percentage" office:value="0.0458" calcext:value-type="percentage">
            <text:p>4.58 %</text:p>
          </table:table-cell>
          <table:table-cell table:number-columns-repeated="5"/>
          <table:table-cell office:value-type="date" office:date-value="1959-01-01" calcext:value-type="date">
            <text:p>1959-01-01</text:p>
          </table:table-cell>
          <table:table-cell office:value-type="float" office:value="5.28" calcext:value-type="float">
            <text:p>5.28</text:p>
          </table:table-cell>
          <table:table-cell table:formula="of:=[.J52]/100" office:value-type="percentage" office:value="0.0528" calcext:value-type="percentage">
            <text:p>5.28 %</text:p>
          </table:table-cell>
          <table:table-cell table:number-columns-repeated="16373"/>
        </table:table-row>
        <table:table-row table:style-name="ro9">
          <table:table-cell office:value-type="date" office:date-value="1960-01-01" calcext:value-type="date">
            <text:p>1960-01-01</text:p>
          </table:table-cell>
          <table:table-cell office:value-type="float" office:value="4.35" calcext:value-type="float">
            <text:p>4.35</text:p>
          </table:table-cell>
          <table:table-cell table:formula="of:=[.B53]/100" office:value-type="percentage" office:value="0.0435" calcext:value-type="percentage">
            <text:p>4.35 %</text:p>
          </table:table-cell>
          <table:table-cell table:number-columns-repeated="5"/>
          <table:table-cell office:value-type="date" office:date-value="1960-01-01" calcext:value-type="date">
            <text:p>1960-01-01</text:p>
          </table:table-cell>
          <table:table-cell office:value-type="float" office:value="5.1" calcext:value-type="float">
            <text:p>5.10</text:p>
          </table:table-cell>
          <table:table-cell table:formula="of:=[.J53]/100" office:value-type="percentage" office:value="0.051" calcext:value-type="percentage">
            <text:p>5.10 %</text:p>
          </table:table-cell>
          <table:table-cell table:number-columns-repeated="16373"/>
        </table:table-row>
        <table:table-row table:style-name="ro9">
          <table:table-cell office:value-type="date" office:date-value="1961-01-01" calcext:value-type="date">
            <text:p>1961-01-01</text:p>
          </table:table-cell>
          <table:table-cell office:value-type="float" office:value="4.42" calcext:value-type="float">
            <text:p>4.42</text:p>
          </table:table-cell>
          <table:table-cell table:formula="of:=[.B54]/100" office:value-type="percentage" office:value="0.0442" calcext:value-type="percentage">
            <text:p>4.42 %</text:p>
          </table:table-cell>
          <table:table-cell table:number-columns-repeated="5"/>
          <table:table-cell office:value-type="date" office:date-value="1961-01-01" calcext:value-type="date">
            <text:p>1961-01-01</text:p>
          </table:table-cell>
          <table:table-cell office:value-type="float" office:value="5.1" calcext:value-type="float">
            <text:p>5.10</text:p>
          </table:table-cell>
          <table:table-cell table:formula="of:=[.J54]/100" office:value-type="percentage" office:value="0.051" calcext:value-type="percentage">
            <text:p>5.10 %</text:p>
          </table:table-cell>
          <table:table-cell table:number-columns-repeated="16373"/>
        </table:table-row>
        <table:table-row table:style-name="ro9">
          <table:table-cell office:value-type="date" office:date-value="1962-01-01" calcext:value-type="date">
            <text:p>1962-01-01</text:p>
          </table:table-cell>
          <table:table-cell office:value-type="float" office:value="4.24" calcext:value-type="float">
            <text:p>4.24</text:p>
          </table:table-cell>
          <table:table-cell table:formula="of:=[.B55]/100" office:value-type="percentage" office:value="0.0424" calcext:value-type="percentage">
            <text:p>4.24 %</text:p>
          </table:table-cell>
          <table:table-cell table:number-columns-repeated="5"/>
          <table:table-cell office:value-type="date" office:date-value="1962-01-01" calcext:value-type="date">
            <text:p>1962-01-01</text:p>
          </table:table-cell>
          <table:table-cell office:value-type="float" office:value="4.92" calcext:value-type="float">
            <text:p>4.92</text:p>
          </table:table-cell>
          <table:table-cell table:formula="of:=[.J55]/100" office:value-type="percentage" office:value="0.0492" calcext:value-type="percentage">
            <text:p>4.92 %</text:p>
          </table:table-cell>
          <table:table-cell table:number-columns-repeated="16373"/>
        </table:table-row>
        <table:table-row table:style-name="ro9">
          <table:table-cell office:value-type="date" office:date-value="1963-01-01" calcext:value-type="date">
            <text:p>1963-01-01</text:p>
          </table:table-cell>
          <table:table-cell office:value-type="float" office:value="4.35" calcext:value-type="float">
            <text:p>4.35</text:p>
          </table:table-cell>
          <table:table-cell table:formula="of:=[.B56]/100" office:value-type="percentage" office:value="0.0435" calcext:value-type="percentage">
            <text:p>4.35 %</text:p>
          </table:table-cell>
          <table:table-cell table:number-columns-repeated="5"/>
          <table:table-cell office:value-type="date" office:date-value="1963-01-01" calcext:value-type="date">
            <text:p>1963-01-01</text:p>
          </table:table-cell>
          <table:table-cell office:value-type="float" office:value="4.85" calcext:value-type="float">
            <text:p>4.85</text:p>
          </table:table-cell>
          <table:table-cell table:formula="of:=[.J56]/100" office:value-type="percentage" office:value="0.0485" calcext:value-type="percentage">
            <text:p>4.85 %</text:p>
          </table:table-cell>
          <table:table-cell table:number-columns-repeated="16373"/>
        </table:table-row>
        <table:table-row table:style-name="ro9">
          <table:table-cell office:value-type="date" office:date-value="1964-01-01" calcext:value-type="date">
            <text:p>1964-01-01</text:p>
          </table:table-cell>
          <table:table-cell office:value-type="float" office:value="4.44" calcext:value-type="float">
            <text:p>4.44</text:p>
          </table:table-cell>
          <table:table-cell table:formula="of:=[.B57]/100" office:value-type="percentage" office:value="0.0444" calcext:value-type="percentage">
            <text:p>4.44 %</text:p>
          </table:table-cell>
          <table:table-cell table:number-columns-repeated="5"/>
          <table:table-cell office:value-type="date" office:date-value="1964-01-01" calcext:value-type="date">
            <text:p>1964-01-01</text:p>
          </table:table-cell>
          <table:table-cell office:value-type="float" office:value="4.81" calcext:value-type="float">
            <text:p>4.81</text:p>
          </table:table-cell>
          <table:table-cell table:formula="of:=[.J57]/100" office:value-type="percentage" office:value="0.0481" calcext:value-type="percentage">
            <text:p>4.81 %</text:p>
          </table:table-cell>
          <table:table-cell table:number-columns-repeated="16373"/>
        </table:table-row>
        <table:table-row table:style-name="ro9">
          <table:table-cell office:value-type="date" office:date-value="1965-01-01" calcext:value-type="date">
            <text:p>1965-01-01</text:p>
          </table:table-cell>
          <table:table-cell office:value-type="float" office:value="4.68" calcext:value-type="float">
            <text:p>4.68</text:p>
          </table:table-cell>
          <table:table-cell table:formula="of:=[.B58]/100" office:value-type="percentage" office:value="0.0468" calcext:value-type="percentage">
            <text:p>4.68 %</text:p>
          </table:table-cell>
          <table:table-cell table:number-columns-repeated="5"/>
          <table:table-cell office:value-type="date" office:date-value="1965-01-01" calcext:value-type="date">
            <text:p>1965-01-01</text:p>
          </table:table-cell>
          <table:table-cell office:value-type="float" office:value="5.02" calcext:value-type="float">
            <text:p>5.02</text:p>
          </table:table-cell>
          <table:table-cell table:formula="of:=[.J58]/100" office:value-type="percentage" office:value="0.0502" calcext:value-type="percentage">
            <text:p>5.02 %</text:p>
          </table:table-cell>
          <table:table-cell table:number-columns-repeated="16373"/>
        </table:table-row>
        <table:table-row table:style-name="ro9">
          <table:table-cell office:value-type="date" office:date-value="1966-01-01" calcext:value-type="date">
            <text:p>1966-01-01</text:p>
          </table:table-cell>
          <table:table-cell office:value-type="float" office:value="5.39" calcext:value-type="float">
            <text:p>5.39</text:p>
          </table:table-cell>
          <table:table-cell table:formula="of:=[.B59]/100" office:value-type="percentage" office:value="0.0539" calcext:value-type="percentage">
            <text:p>5.39 %</text:p>
          </table:table-cell>
          <table:table-cell table:number-columns-repeated="5"/>
          <table:table-cell office:value-type="date" office:date-value="1966-01-01" calcext:value-type="date">
            <text:p>1966-01-01</text:p>
          </table:table-cell>
          <table:table-cell office:value-type="float" office:value="6.18" calcext:value-type="float">
            <text:p>6.18</text:p>
          </table:table-cell>
          <table:table-cell table:formula="of:=[.J59]/100" office:value-type="percentage" office:value="0.0618" calcext:value-type="percentage">
            <text:p>6.18 %</text:p>
          </table:table-cell>
          <table:table-cell table:number-columns-repeated="16373"/>
        </table:table-row>
        <table:table-row table:style-name="ro9">
          <table:table-cell office:value-type="date" office:date-value="1967-01-01" calcext:value-type="date">
            <text:p>1967-01-01</text:p>
          </table:table-cell>
          <table:table-cell office:value-type="float" office:value="6.19" calcext:value-type="float">
            <text:p>6.19</text:p>
          </table:table-cell>
          <table:table-cell table:formula="of:=[.B60]/100" office:value-type="percentage" office:value="0.0619" calcext:value-type="percentage">
            <text:p>6.19 %</text:p>
          </table:table-cell>
          <table:table-cell table:number-columns-repeated="5"/>
          <table:table-cell office:value-type="date" office:date-value="1967-01-01" calcext:value-type="date">
            <text:p>1967-01-01</text:p>
          </table:table-cell>
          <table:table-cell office:value-type="float" office:value="6.93" calcext:value-type="float">
            <text:p>6.93</text:p>
          </table:table-cell>
          <table:table-cell table:formula="of:=[.J60]/100" office:value-type="percentage" office:value="0.0693" calcext:value-type="percentage">
            <text:p>6.93 %</text:p>
          </table:table-cell>
          <table:table-cell table:number-columns-repeated="16373"/>
        </table:table-row>
        <table:table-row table:style-name="ro9">
          <table:table-cell office:value-type="date" office:date-value="1968-01-01" calcext:value-type="date">
            <text:p>1968-01-01</text:p>
          </table:table-cell>
          <table:table-cell office:value-type="float" office:value="6.45" calcext:value-type="float">
            <text:p>6.45</text:p>
          </table:table-cell>
          <table:table-cell table:formula="of:=[.B61]/100" office:value-type="percentage" office:value="0.0645" calcext:value-type="percentage">
            <text:p>6.45 %</text:p>
          </table:table-cell>
          <table:table-cell table:number-columns-repeated="5"/>
          <table:table-cell office:value-type="date" office:date-value="1968-01-01" calcext:value-type="date">
            <text:p>1968-01-01</text:p>
          </table:table-cell>
          <table:table-cell office:value-type="float" office:value="7.23" calcext:value-type="float">
            <text:p>7.23</text:p>
          </table:table-cell>
          <table:table-cell table:formula="of:=[.J61]/100" office:value-type="percentage" office:value="0.0723" calcext:value-type="percentage">
            <text:p>7.23 %</text:p>
          </table:table-cell>
          <table:table-cell table:number-columns-repeated="16373"/>
        </table:table-row>
        <table:table-row table:style-name="ro9">
          <table:table-cell office:value-type="date" office:date-value="1969-01-01" calcext:value-type="date">
            <text:p>1969-01-01</text:p>
          </table:table-cell>
          <table:table-cell office:value-type="float" office:value="7.72" calcext:value-type="float">
            <text:p>7.72</text:p>
          </table:table-cell>
          <table:table-cell table:formula="of:=[.B62]/100" office:value-type="percentage" office:value="0.0772" calcext:value-type="percentage">
            <text:p>7.72 %</text:p>
          </table:table-cell>
          <table:table-cell table:number-columns-repeated="5"/>
          <table:table-cell office:value-type="date" office:date-value="1969-01-01" calcext:value-type="date">
            <text:p>1969-01-01</text:p>
          </table:table-cell>
          <table:table-cell office:value-type="float" office:value="8.65" calcext:value-type="float">
            <text:p>8.65</text:p>
          </table:table-cell>
          <table:table-cell table:formula="of:=[.J62]/100" office:value-type="percentage" office:value="0.0865" calcext:value-type="percentage">
            <text:p>8.65 %</text:p>
          </table:table-cell>
          <table:table-cell table:number-columns-repeated="16373"/>
        </table:table-row>
        <table:table-row table:style-name="ro9">
          <table:table-cell office:value-type="date" office:date-value="1970-01-01" calcext:value-type="date">
            <text:p>1970-01-01</text:p>
          </table:table-cell>
          <table:table-cell office:value-type="float" office:value="7.64" calcext:value-type="float">
            <text:p>7.64</text:p>
          </table:table-cell>
          <table:table-cell table:formula="of:=[.B63]/100" office:value-type="percentage" office:value="0.0764" calcext:value-type="percentage">
            <text:p>7.64 %</text:p>
          </table:table-cell>
          <table:table-cell table:number-columns-repeated="5"/>
          <table:table-cell office:value-type="date" office:date-value="1970-01-01" calcext:value-type="date">
            <text:p>1970-01-01</text:p>
          </table:table-cell>
          <table:table-cell office:value-type="float" office:value="9.12" calcext:value-type="float">
            <text:p>9.12</text:p>
          </table:table-cell>
          <table:table-cell table:formula="of:=[.J63]/100" office:value-type="percentage" office:value="0.0912" calcext:value-type="percentage">
            <text:p>9.12 %</text:p>
          </table:table-cell>
          <table:table-cell table:number-columns-repeated="16373"/>
        </table:table-row>
        <table:table-row table:style-name="ro9">
          <table:table-cell office:value-type="date" office:date-value="1971-01-01" calcext:value-type="date">
            <text:p>1971-01-01</text:p>
          </table:table-cell>
          <table:table-cell office:value-type="float" office:value="7.25" calcext:value-type="float">
            <text:p>7.25</text:p>
          </table:table-cell>
          <table:table-cell table:formula="of:=[.B64]/100" office:value-type="percentage" office:value="0.0725" calcext:value-type="percentage">
            <text:p>7.25 %</text:p>
          </table:table-cell>
          <table:table-cell table:number-columns-repeated="5"/>
          <table:table-cell office:value-type="date" office:date-value="1971-01-01" calcext:value-type="date">
            <text:p>1971-01-01</text:p>
          </table:table-cell>
          <table:table-cell office:value-type="float" office:value="8.38" calcext:value-type="float">
            <text:p>8.38</text:p>
          </table:table-cell>
          <table:table-cell table:formula="of:=[.J64]/100" office:value-type="percentage" office:value="0.0838" calcext:value-type="percentage">
            <text:p>8.38 %</text:p>
          </table:table-cell>
          <table:table-cell table:number-columns-repeated="16373"/>
        </table:table-row>
        <table:table-row table:style-name="ro9">
          <table:table-cell office:value-type="date" office:date-value="1972-01-01" calcext:value-type="date">
            <text:p>1972-01-01</text:p>
          </table:table-cell>
          <table:table-cell office:value-type="float" office:value="7.08" calcext:value-type="float">
            <text:p>7.08</text:p>
          </table:table-cell>
          <table:table-cell table:formula="of:=[.B65]/100" office:value-type="percentage" office:value="0.0708" calcext:value-type="percentage">
            <text:p>7.08 %</text:p>
          </table:table-cell>
          <table:table-cell table:number-columns-repeated="5"/>
          <table:table-cell office:value-type="date" office:date-value="1972-01-01" calcext:value-type="date">
            <text:p>1972-01-01</text:p>
          </table:table-cell>
          <table:table-cell office:value-type="float" office:value="7.93" calcext:value-type="float">
            <text:p>7.93</text:p>
          </table:table-cell>
          <table:table-cell table:formula="of:=[.J65]/100" office:value-type="percentage" office:value="0.0793" calcext:value-type="percentage">
            <text:p>7.93 %</text:p>
          </table:table-cell>
          <table:table-cell table:number-columns-repeated="16373"/>
        </table:table-row>
        <table:table-row table:style-name="ro9">
          <table:table-cell office:value-type="date" office:date-value="1973-01-01" calcext:value-type="date">
            <text:p>1973-01-01</text:p>
          </table:table-cell>
          <table:table-cell office:value-type="float" office:value="7.68" calcext:value-type="float">
            <text:p>7.68</text:p>
          </table:table-cell>
          <table:table-cell table:formula="of:=[.B66]/100" office:value-type="percentage" office:value="0.0768" calcext:value-type="percentage">
            <text:p>7.68 %</text:p>
          </table:table-cell>
          <table:table-cell table:number-columns-repeated="5"/>
          <table:table-cell office:value-type="date" office:date-value="1973-01-01" calcext:value-type="date">
            <text:p>1973-01-01</text:p>
          </table:table-cell>
          <table:table-cell office:value-type="float" office:value="8.48" calcext:value-type="float">
            <text:p>8.48</text:p>
          </table:table-cell>
          <table:table-cell table:formula="of:=[.J66]/100" office:value-type="percentage" office:value="0.0848" calcext:value-type="percentage">
            <text:p>8.48 %</text:p>
          </table:table-cell>
          <table:table-cell table:number-columns-repeated="16373"/>
        </table:table-row>
        <table:table-row table:style-name="ro9">
          <table:table-cell office:value-type="date" office:date-value="1974-01-01" calcext:value-type="date">
            <text:p>1974-01-01</text:p>
          </table:table-cell>
          <table:table-cell office:value-type="float" office:value="8.89" calcext:value-type="float">
            <text:p>8.89</text:p>
          </table:table-cell>
          <table:table-cell table:formula="of:=[.B67]/100" office:value-type="percentage" office:value="0.0889" calcext:value-type="percentage">
            <text:p>8.89 %</text:p>
          </table:table-cell>
          <table:table-cell table:number-columns-repeated="5"/>
          <table:table-cell office:value-type="date" office:date-value="1974-01-01" calcext:value-type="date">
            <text:p>1974-01-01</text:p>
          </table:table-cell>
          <table:table-cell office:value-type="float" office:value="10.63" calcext:value-type="float">
            <text:p>10.63</text:p>
          </table:table-cell>
          <table:table-cell table:formula="of:=[.J67]/100" office:value-type="percentage" office:value="0.1063" calcext:value-type="percentage">
            <text:p>10.63 %</text:p>
          </table:table-cell>
          <table:table-cell table:number-columns-repeated="16373"/>
        </table:table-row>
        <table:table-row table:style-name="ro9">
          <table:table-cell office:value-type="date" office:date-value="1975-01-01" calcext:value-type="date">
            <text:p>1975-01-01</text:p>
          </table:table-cell>
          <table:table-cell office:value-type="float" office:value="8.79" calcext:value-type="float">
            <text:p>8.79</text:p>
          </table:table-cell>
          <table:table-cell table:formula="of:=[.B68]/100" office:value-type="percentage" office:value="0.0879" calcext:value-type="percentage">
            <text:p>8.79 %</text:p>
          </table:table-cell>
          <table:table-cell table:number-columns-repeated="5"/>
          <table:table-cell office:value-type="date" office:date-value="1975-01-01" calcext:value-type="date">
            <text:p>1975-01-01</text:p>
          </table:table-cell>
          <table:table-cell office:value-type="float" office:value="10.56" calcext:value-type="float">
            <text:p>10.56</text:p>
          </table:table-cell>
          <table:table-cell table:formula="of:=[.J68]/100" office:value-type="percentage" office:value="0.1056" calcext:value-type="percentage">
            <text:p>10.56 %</text:p>
          </table:table-cell>
          <table:table-cell table:number-columns-repeated="16373"/>
        </table:table-row>
        <table:table-row table:style-name="ro9">
          <table:table-cell office:value-type="date" office:date-value="1976-01-01" calcext:value-type="date">
            <text:p>1976-01-01</text:p>
          </table:table-cell>
          <table:table-cell office:value-type="float" office:value="7.98" calcext:value-type="float">
            <text:p>7.98</text:p>
          </table:table-cell>
          <table:table-cell table:formula="of:=[.B69]/100" office:value-type="percentage" office:value="0.0798" calcext:value-type="percentage">
            <text:p>7.98 %</text:p>
          </table:table-cell>
          <table:table-cell table:number-columns-repeated="5"/>
          <table:table-cell office:value-type="date" office:date-value="1976-01-01" calcext:value-type="date">
            <text:p>1976-01-01</text:p>
          </table:table-cell>
          <table:table-cell office:value-type="float" office:value="9.12" calcext:value-type="float">
            <text:p>9.12</text:p>
          </table:table-cell>
          <table:table-cell table:formula="of:=[.J69]/100" office:value-type="percentage" office:value="0.0912" calcext:value-type="percentage">
            <text:p>9.12 %</text:p>
          </table:table-cell>
          <table:table-cell table:number-columns-repeated="16373"/>
        </table:table-row>
        <table:table-row table:style-name="ro9">
          <table:table-cell office:value-type="date" office:date-value="1977-01-01" calcext:value-type="date">
            <text:p>1977-01-01</text:p>
          </table:table-cell>
          <table:table-cell office:value-type="float" office:value="8.19" calcext:value-type="float">
            <text:p>8.19</text:p>
          </table:table-cell>
          <table:table-cell table:formula="of:=[.B70]/100" office:value-type="percentage" office:value="0.0819" calcext:value-type="percentage">
            <text:p>8.19 %</text:p>
          </table:table-cell>
          <table:table-cell table:number-columns-repeated="5"/>
          <table:table-cell office:value-type="date" office:date-value="1977-01-01" calcext:value-type="date">
            <text:p>1977-01-01</text:p>
          </table:table-cell>
          <table:table-cell office:value-type="float" office:value="8.99" calcext:value-type="float">
            <text:p>8.99</text:p>
          </table:table-cell>
          <table:table-cell table:formula="of:=[.J70]/100" office:value-type="percentage" office:value="0.0899" calcext:value-type="percentage">
            <text:p>8.99 %</text:p>
          </table:table-cell>
          <table:table-cell table:number-columns-repeated="16373"/>
        </table:table-row>
        <table:table-row table:style-name="ro9">
          <table:table-cell office:value-type="date" office:date-value="1978-01-01" calcext:value-type="date">
            <text:p>1978-01-01</text:p>
          </table:table-cell>
          <table:table-cell office:value-type="float" office:value="9.16" calcext:value-type="float">
            <text:p>9.16</text:p>
          </table:table-cell>
          <table:table-cell table:formula="of:=[.B71]/100" office:value-type="percentage" office:value="0.0916" calcext:value-type="percentage">
            <text:p>9.16 %</text:p>
          </table:table-cell>
          <table:table-cell table:number-columns-repeated="5"/>
          <table:table-cell office:value-type="date" office:date-value="1978-01-01" calcext:value-type="date">
            <text:p>1978-01-01</text:p>
          </table:table-cell>
          <table:table-cell office:value-type="float" office:value="9.94" calcext:value-type="float">
            <text:p>9.94</text:p>
          </table:table-cell>
          <table:table-cell table:formula="of:=[.J71]/100" office:value-type="percentage" office:value="0.0994" calcext:value-type="percentage">
            <text:p>9.94 %</text:p>
          </table:table-cell>
          <table:table-cell table:number-columns-repeated="16373"/>
        </table:table-row>
        <table:table-row table:style-name="ro9">
          <table:table-cell office:value-type="date" office:date-value="1979-01-01" calcext:value-type="date">
            <text:p>1979-01-01</text:p>
          </table:table-cell>
          <table:table-cell office:value-type="float" office:value="10.74" calcext:value-type="float">
            <text:p>10.74</text:p>
          </table:table-cell>
          <table:table-cell table:formula="of:=[.B72]/100" office:value-type="percentage" office:value="0.1074" calcext:value-type="percentage">
            <text:p>10.74 %</text:p>
          </table:table-cell>
          <table:table-cell table:number-columns-repeated="5"/>
          <table:table-cell office:value-type="date" office:date-value="1979-01-01" calcext:value-type="date">
            <text:p>1979-01-01</text:p>
          </table:table-cell>
          <table:table-cell office:value-type="float" office:value="12.06" calcext:value-type="float">
            <text:p>12.06</text:p>
          </table:table-cell>
          <table:table-cell table:formula="of:=[.J72]/100" office:value-type="percentage" office:value="0.1206" calcext:value-type="percentage">
            <text:p>12.06 %</text:p>
          </table:table-cell>
          <table:table-cell table:number-columns-repeated="16373"/>
        </table:table-row>
        <table:table-row table:style-name="ro9">
          <table:table-cell office:value-type="date" office:date-value="1980-01-01" calcext:value-type="date">
            <text:p>1980-01-01</text:p>
          </table:table-cell>
          <table:table-cell office:value-type="float" office:value="13.21" calcext:value-type="float">
            <text:p>13.21</text:p>
          </table:table-cell>
          <table:table-cell table:formula="of:=[.B73]/100" office:value-type="percentage" office:value="0.1321" calcext:value-type="percentage">
            <text:p>13.21 %</text:p>
          </table:table-cell>
          <table:table-cell table:number-columns-repeated="5"/>
          <table:table-cell office:value-type="date" office:date-value="1980-01-01" calcext:value-type="date">
            <text:p>1980-01-01</text:p>
          </table:table-cell>
          <table:table-cell office:value-type="float" office:value="15.14" calcext:value-type="float">
            <text:p>15.14</text:p>
          </table:table-cell>
          <table:table-cell table:formula="of:=[.J73]/100" office:value-type="percentage" office:value="0.1514" calcext:value-type="percentage">
            <text:p>15.14 %</text:p>
          </table:table-cell>
          <table:table-cell table:number-columns-repeated="16373"/>
        </table:table-row>
        <table:table-row table:style-name="ro9">
          <table:table-cell office:value-type="date" office:date-value="1981-01-01" calcext:value-type="date">
            <text:p>1981-01-01</text:p>
          </table:table-cell>
          <table:table-cell office:value-type="float" office:value="14.23" calcext:value-type="float">
            <text:p>14.23</text:p>
          </table:table-cell>
          <table:table-cell table:formula="of:=[.B74]/100" office:value-type="percentage" office:value="0.1423" calcext:value-type="percentage">
            <text:p>14.23 %</text:p>
          </table:table-cell>
          <table:table-cell table:number-columns-repeated="5"/>
          <table:table-cell office:value-type="date" office:date-value="1981-01-01" calcext:value-type="date">
            <text:p>1981-01-01</text:p>
          </table:table-cell>
          <table:table-cell office:value-type="float" office:value="16.55" calcext:value-type="float">
            <text:p>16.55</text:p>
          </table:table-cell>
          <table:table-cell table:formula="of:=[.J74]/100" office:value-type="percentage" office:value="0.1655" calcext:value-type="percentage">
            <text:p>16.55 %</text:p>
          </table:table-cell>
          <table:table-cell table:number-columns-repeated="16373"/>
        </table:table-row>
        <table:table-row table:style-name="ro9">
          <table:table-cell office:value-type="date" office:date-value="1982-01-01" calcext:value-type="date">
            <text:p>1982-01-01</text:p>
          </table:table-cell>
          <table:table-cell office:value-type="float" office:value="11.83" calcext:value-type="float">
            <text:p>11.83</text:p>
          </table:table-cell>
          <table:table-cell table:formula="of:=[.B75]/100" office:value-type="percentage" office:value="0.1183" calcext:value-type="percentage">
            <text:p>11.83 %</text:p>
          </table:table-cell>
          <table:table-cell table:number-columns-repeated="5"/>
          <table:table-cell office:value-type="date" office:date-value="1982-01-01" calcext:value-type="date">
            <text:p>1982-01-01</text:p>
          </table:table-cell>
          <table:table-cell office:value-type="float" office:value="14.14" calcext:value-type="float">
            <text:p>14.14</text:p>
          </table:table-cell>
          <table:table-cell table:formula="of:=[.J75]/100" office:value-type="percentage" office:value="0.1414" calcext:value-type="percentage">
            <text:p>14.14 %</text:p>
          </table:table-cell>
          <table:table-cell table:number-columns-repeated="16373"/>
        </table:table-row>
        <table:table-row table:style-name="ro9">
          <table:table-cell office:value-type="date" office:date-value="1983-01-01" calcext:value-type="date">
            <text:p>1983-01-01</text:p>
          </table:table-cell>
          <table:table-cell office:value-type="float" office:value="12.57" calcext:value-type="float">
            <text:p>12.57</text:p>
          </table:table-cell>
          <table:table-cell table:formula="of:=[.B76]/100" office:value-type="percentage" office:value="0.1257" calcext:value-type="percentage">
            <text:p>12.57 %</text:p>
          </table:table-cell>
          <table:table-cell table:number-columns-repeated="5"/>
          <table:table-cell office:value-type="date" office:date-value="1983-01-01" calcext:value-type="date">
            <text:p>1983-01-01</text:p>
          </table:table-cell>
          <table:table-cell office:value-type="float" office:value="13.75" calcext:value-type="float">
            <text:p>13.75</text:p>
          </table:table-cell>
          <table:table-cell table:formula="of:=[.J76]/100" office:value-type="percentage" office:value="0.1375" calcext:value-type="percentage">
            <text:p>13.75 %</text:p>
          </table:table-cell>
          <table:table-cell table:number-columns-repeated="16373"/>
        </table:table-row>
        <table:table-row table:style-name="ro9">
          <table:table-cell office:value-type="date" office:date-value="1984-01-01" calcext:value-type="date">
            <text:p>1984-01-01</text:p>
          </table:table-cell>
          <table:table-cell office:value-type="float" office:value="12.13" calcext:value-type="float">
            <text:p>12.13</text:p>
          </table:table-cell>
          <table:table-cell table:formula="of:=[.B77]/100" office:value-type="percentage" office:value="0.1213" calcext:value-type="percentage">
            <text:p>12.13 %</text:p>
          </table:table-cell>
          <table:table-cell table:number-columns-repeated="5"/>
          <table:table-cell office:value-type="date" office:date-value="1984-01-01" calcext:value-type="date">
            <text:p>1984-01-01</text:p>
          </table:table-cell>
          <table:table-cell office:value-type="float" office:value="13.4" calcext:value-type="float">
            <text:p>13.40</text:p>
          </table:table-cell>
          <table:table-cell table:formula="of:=[.J77]/100" office:value-type="percentage" office:value="0.134" calcext:value-type="percentage">
            <text:p>13.40 %</text:p>
          </table:table-cell>
          <table:table-cell table:number-columns-repeated="16373"/>
        </table:table-row>
        <table:table-row table:style-name="ro9">
          <table:table-cell office:value-type="date" office:date-value="1985-01-01" calcext:value-type="date">
            <text:p>1985-01-01</text:p>
          </table:table-cell>
          <table:table-cell office:value-type="float" office:value="10.16" calcext:value-type="float">
            <text:p>10.16</text:p>
          </table:table-cell>
          <table:table-cell table:formula="of:=[.B78]/100" office:value-type="percentage" office:value="0.1016" calcext:value-type="percentage">
            <text:p>10.16 %</text:p>
          </table:table-cell>
          <table:table-cell table:number-columns-repeated="5"/>
          <table:table-cell office:value-type="date" office:date-value="1985-01-01" calcext:value-type="date">
            <text:p>1985-01-01</text:p>
          </table:table-cell>
          <table:table-cell office:value-type="float" office:value="11.58" calcext:value-type="float">
            <text:p>11.58</text:p>
          </table:table-cell>
          <table:table-cell table:formula="of:=[.J78]/100" office:value-type="percentage" office:value="0.1158" calcext:value-type="percentage">
            <text:p>11.58 %</text:p>
          </table:table-cell>
          <table:table-cell table:number-columns-repeated="16373"/>
        </table:table-row>
        <table:table-row table:style-name="ro9">
          <table:table-cell office:value-type="date" office:date-value="1986-01-01" calcext:value-type="date">
            <text:p>1986-01-01</text:p>
          </table:table-cell>
          <table:table-cell office:value-type="float" office:value="8.49" calcext:value-type="float">
            <text:p>8.49</text:p>
          </table:table-cell>
          <table:table-cell table:formula="of:=[.B79]/100" office:value-type="percentage" office:value="0.0849" calcext:value-type="percentage">
            <text:p>8.49 %</text:p>
          </table:table-cell>
          <table:table-cell table:number-columns-repeated="5"/>
          <table:table-cell office:value-type="date" office:date-value="1986-01-01" calcext:value-type="date">
            <text:p>1986-01-01</text:p>
          </table:table-cell>
          <table:table-cell office:value-type="float" office:value="9.97" calcext:value-type="float">
            <text:p>9.97</text:p>
          </table:table-cell>
          <table:table-cell table:formula="of:=[.J79]/100" office:value-type="percentage" office:value="0.0997" calcext:value-type="percentage">
            <text:p>9.97 %</text:p>
          </table:table-cell>
          <table:table-cell table:number-columns-repeated="16373"/>
        </table:table-row>
        <table:table-row table:style-name="ro9">
          <table:table-cell office:value-type="date" office:date-value="1987-01-01" calcext:value-type="date">
            <text:p>1987-01-01</text:p>
          </table:table-cell>
          <table:table-cell office:value-type="float" office:value="10.11" calcext:value-type="float">
            <text:p>10.11</text:p>
          </table:table-cell>
          <table:table-cell table:formula="of:=[.B80]/100" office:value-type="percentage" office:value="0.1011" calcext:value-type="percentage">
            <text:p>10.11 %</text:p>
          </table:table-cell>
          <table:table-cell table:number-columns-repeated="5"/>
          <table:table-cell office:value-type="date" office:date-value="1987-01-01" calcext:value-type="date">
            <text:p>1987-01-01</text:p>
          </table:table-cell>
          <table:table-cell office:value-type="float" office:value="11.29" calcext:value-type="float">
            <text:p>11.29</text:p>
          </table:table-cell>
          <table:table-cell table:formula="of:=[.J80]/100" office:value-type="percentage" office:value="0.1129" calcext:value-type="percentage">
            <text:p>11.29 %</text:p>
          </table:table-cell>
          <table:table-cell table:number-columns-repeated="16373"/>
        </table:table-row>
        <table:table-row table:style-name="ro9">
          <table:table-cell office:value-type="date" office:date-value="1988-01-01" calcext:value-type="date">
            <text:p>1988-01-01</text:p>
          </table:table-cell>
          <table:table-cell office:value-type="float" office:value="9.57" calcext:value-type="float">
            <text:p>9.57</text:p>
          </table:table-cell>
          <table:table-cell table:formula="of:=[.B81]/100" office:value-type="percentage" office:value="0.0957" calcext:value-type="percentage">
            <text:p>9.57 %</text:p>
          </table:table-cell>
          <table:table-cell table:number-columns-repeated="5"/>
          <table:table-cell office:value-type="date" office:date-value="1988-01-01" calcext:value-type="date">
            <text:p>1988-01-01</text:p>
          </table:table-cell>
          <table:table-cell office:value-type="float" office:value="10.65" calcext:value-type="float">
            <text:p>10.65</text:p>
          </table:table-cell>
          <table:table-cell table:formula="of:=[.J81]/100" office:value-type="percentage" office:value="0.1065" calcext:value-type="percentage">
            <text:p>10.65 %</text:p>
          </table:table-cell>
          <table:table-cell table:number-columns-repeated="16373"/>
        </table:table-row>
        <table:table-row table:style-name="ro9">
          <table:table-cell office:value-type="date" office:date-value="1989-01-01" calcext:value-type="date">
            <text:p>1989-01-01</text:p>
          </table:table-cell>
          <table:table-cell office:value-type="float" office:value="8.86" calcext:value-type="float">
            <text:p>8.86</text:p>
          </table:table-cell>
          <table:table-cell table:formula="of:=[.B82]/100" office:value-type="percentage" office:value="0.0886" calcext:value-type="percentage">
            <text:p>8.86 %</text:p>
          </table:table-cell>
          <table:table-cell table:number-columns-repeated="5"/>
          <table:table-cell office:value-type="date" office:date-value="1989-01-01" calcext:value-type="date">
            <text:p>1989-01-01</text:p>
          </table:table-cell>
          <table:table-cell office:value-type="float" office:value="9.82" calcext:value-type="float">
            <text:p>9.82</text:p>
          </table:table-cell>
          <table:table-cell table:formula="of:=[.J82]/100" office:value-type="percentage" office:value="0.0982" calcext:value-type="percentage">
            <text:p>9.82 %</text:p>
          </table:table-cell>
          <table:table-cell table:number-columns-repeated="16373"/>
        </table:table-row>
        <table:table-row table:style-name="ro9">
          <table:table-cell office:value-type="date" office:date-value="1990-01-01" calcext:value-type="date">
            <text:p>1990-01-01</text:p>
          </table:table-cell>
          <table:table-cell office:value-type="float" office:value="9.05" calcext:value-type="float">
            <text:p>9.05</text:p>
          </table:table-cell>
          <table:table-cell table:formula="of:=[.B83]/100" office:value-type="percentage" office:value="0.0905" calcext:value-type="percentage">
            <text:p>9.05 %</text:p>
          </table:table-cell>
          <table:table-cell table:number-columns-repeated="5"/>
          <table:table-cell office:value-type="date" office:date-value="1990-01-01" calcext:value-type="date">
            <text:p>1990-01-01</text:p>
          </table:table-cell>
          <table:table-cell office:value-type="float" office:value="10.43" calcext:value-type="float">
            <text:p>10.43</text:p>
          </table:table-cell>
          <table:table-cell table:formula="of:=[.J83]/100" office:value-type="percentage" office:value="0.1043" calcext:value-type="percentage">
            <text:p>10.43 %</text:p>
          </table:table-cell>
          <table:table-cell table:number-columns-repeated="16373"/>
        </table:table-row>
        <table:table-row table:style-name="ro9">
          <table:table-cell office:value-type="date" office:date-value="1991-01-01" calcext:value-type="date">
            <text:p>1991-01-01</text:p>
          </table:table-cell>
          <table:table-cell office:value-type="float" office:value="8.31" calcext:value-type="float">
            <text:p>8.31</text:p>
          </table:table-cell>
          <table:table-cell table:formula="of:=[.B84]/100" office:value-type="percentage" office:value="0.0831" calcext:value-type="percentage">
            <text:p>8.31 %</text:p>
          </table:table-cell>
          <table:table-cell table:number-columns-repeated="5"/>
          <table:table-cell office:value-type="date" office:date-value="1991-01-01" calcext:value-type="date">
            <text:p>1991-01-01</text:p>
          </table:table-cell>
          <table:table-cell office:value-type="float" office:value="9.26" calcext:value-type="float">
            <text:p>9.26</text:p>
          </table:table-cell>
          <table:table-cell table:formula="of:=[.J84]/100" office:value-type="percentage" office:value="0.0926" calcext:value-type="percentage">
            <text:p>9.26 %</text:p>
          </table:table-cell>
          <table:table-cell table:number-columns-repeated="16373"/>
        </table:table-row>
        <table:table-row table:style-name="ro9">
          <table:table-cell office:value-type="date" office:date-value="1992-01-01" calcext:value-type="date">
            <text:p>1992-01-01</text:p>
          </table:table-cell>
          <table:table-cell office:value-type="float" office:value="7.98" calcext:value-type="float">
            <text:p>7.98</text:p>
          </table:table-cell>
          <table:table-cell table:formula="of:=[.B85]/100" office:value-type="percentage" office:value="0.0798" calcext:value-type="percentage">
            <text:p>7.98 %</text:p>
          </table:table-cell>
          <table:table-cell table:number-columns-repeated="5"/>
          <table:table-cell office:value-type="date" office:date-value="1992-01-01" calcext:value-type="date">
            <text:p>1992-01-01</text:p>
          </table:table-cell>
          <table:table-cell office:value-type="float" office:value="8.81" calcext:value-type="float">
            <text:p>8.81</text:p>
          </table:table-cell>
          <table:table-cell table:formula="of:=[.J85]/100" office:value-type="percentage" office:value="0.0881" calcext:value-type="percentage">
            <text:p>8.81 %</text:p>
          </table:table-cell>
          <table:table-cell table:number-columns-repeated="16373"/>
        </table:table-row>
        <table:table-row table:style-name="ro9">
          <table:table-cell office:value-type="date" office:date-value="1993-01-01" calcext:value-type="date">
            <text:p>1993-01-01</text:p>
          </table:table-cell>
          <table:table-cell office:value-type="float" office:value="6.93" calcext:value-type="float">
            <text:p>6.93</text:p>
          </table:table-cell>
          <table:table-cell table:formula="of:=[.B86]/100" office:value-type="percentage" office:value="0.0693" calcext:value-type="percentage">
            <text:p>6.93 %</text:p>
          </table:table-cell>
          <table:table-cell table:number-columns-repeated="5"/>
          <table:table-cell office:value-type="date" office:date-value="1993-01-01" calcext:value-type="date">
            <text:p>1993-01-01</text:p>
          </table:table-cell>
          <table:table-cell office:value-type="float" office:value="7.69" calcext:value-type="float">
            <text:p>7.69</text:p>
          </table:table-cell>
          <table:table-cell table:formula="of:=[.J86]/100" office:value-type="percentage" office:value="0.0769" calcext:value-type="percentage">
            <text:p>7.69 %</text:p>
          </table:table-cell>
          <table:table-cell table:number-columns-repeated="16373"/>
        </table:table-row>
        <table:table-row table:style-name="ro9">
          <table:table-cell office:value-type="date" office:date-value="1994-01-01" calcext:value-type="date">
            <text:p>1994-01-01</text:p>
          </table:table-cell>
          <table:table-cell office:value-type="float" office:value="8.46" calcext:value-type="float">
            <text:p>8.46</text:p>
          </table:table-cell>
          <table:table-cell table:formula="of:=[.B87]/100" office:value-type="percentage" office:value="0.0846" calcext:value-type="percentage">
            <text:p>8.46 %</text:p>
          </table:table-cell>
          <table:table-cell table:number-columns-repeated="5"/>
          <table:table-cell office:value-type="date" office:date-value="1994-01-01" calcext:value-type="date">
            <text:p>1994-01-01</text:p>
          </table:table-cell>
          <table:table-cell office:value-type="float" office:value="9.1" calcext:value-type="float">
            <text:p>9.10</text:p>
          </table:table-cell>
          <table:table-cell table:formula="of:=[.J87]/100" office:value-type="percentage" office:value="0.091" calcext:value-type="percentage">
            <text:p>9.10 %</text:p>
          </table:table-cell>
          <table:table-cell table:number-columns-repeated="16373"/>
        </table:table-row>
        <table:table-row table:style-name="ro9">
          <table:table-cell office:value-type="date" office:date-value="1995-01-01" calcext:value-type="date">
            <text:p>1995-01-01</text:p>
          </table:table-cell>
          <table:table-cell office:value-type="float" office:value="6.82" calcext:value-type="float">
            <text:p>6.82</text:p>
          </table:table-cell>
          <table:table-cell table:formula="of:=[.B88]/100" office:value-type="percentage" office:value="0.0682" calcext:value-type="percentage">
            <text:p>6.82 %</text:p>
          </table:table-cell>
          <table:table-cell table:number-columns-repeated="5"/>
          <table:table-cell office:value-type="date" office:date-value="1995-01-01" calcext:value-type="date">
            <text:p>1995-01-01</text:p>
          </table:table-cell>
          <table:table-cell office:value-type="float" office:value="7.49" calcext:value-type="float">
            <text:p>7.49</text:p>
          </table:table-cell>
          <table:table-cell table:formula="of:=[.J88]/100" office:value-type="percentage" office:value="0.0749" calcext:value-type="percentage">
            <text:p>7.49 %</text:p>
          </table:table-cell>
          <table:table-cell table:number-columns-repeated="16373"/>
        </table:table-row>
        <table:table-row table:style-name="ro9">
          <table:table-cell office:value-type="date" office:date-value="1996-01-01" calcext:value-type="date">
            <text:p>1996-01-01</text:p>
          </table:table-cell>
          <table:table-cell office:value-type="float" office:value="7.2" calcext:value-type="float">
            <text:p>7.20</text:p>
          </table:table-cell>
          <table:table-cell table:formula="of:=[.B89]/100" office:value-type="percentage" office:value="0.072" calcext:value-type="percentage">
            <text:p>7.20 %</text:p>
          </table:table-cell>
          <table:table-cell table:number-columns-repeated="5"/>
          <table:table-cell office:value-type="date" office:date-value="1996-01-01" calcext:value-type="date">
            <text:p>1996-01-01</text:p>
          </table:table-cell>
          <table:table-cell office:value-type="float" office:value="7.89" calcext:value-type="float">
            <text:p>7.89</text:p>
          </table:table-cell>
          <table:table-cell table:formula="of:=[.J89]/100" office:value-type="percentage" office:value="0.0789" calcext:value-type="percentage">
            <text:p>7.89 %</text:p>
          </table:table-cell>
          <table:table-cell table:number-columns-repeated="16373"/>
        </table:table-row>
        <table:table-row table:style-name="ro9">
          <table:table-cell office:value-type="date" office:date-value="1997-01-01" calcext:value-type="date">
            <text:p>1997-01-01</text:p>
          </table:table-cell>
          <table:table-cell office:value-type="float" office:value="6.76" calcext:value-type="float">
            <text:p>6.76</text:p>
          </table:table-cell>
          <table:table-cell table:formula="of:=[.B90]/100" office:value-type="percentage" office:value="0.0676" calcext:value-type="percentage">
            <text:p>6.76 %</text:p>
          </table:table-cell>
          <table:table-cell table:number-columns-repeated="5"/>
          <table:table-cell office:value-type="date" office:date-value="1997-01-01" calcext:value-type="date">
            <text:p>1997-01-01</text:p>
          </table:table-cell>
          <table:table-cell office:value-type="float" office:value="7.32" calcext:value-type="float">
            <text:p>7.32</text:p>
          </table:table-cell>
          <table:table-cell table:formula="of:=[.J90]/100" office:value-type="percentage" office:value="0.0732" calcext:value-type="percentage">
            <text:p>7.32 %</text:p>
          </table:table-cell>
          <table:table-cell table:number-columns-repeated="16373"/>
        </table:table-row>
        <table:table-row table:style-name="ro9">
          <table:table-cell office:value-type="date" office:date-value="1998-01-01" calcext:value-type="date">
            <text:p>1998-01-01</text:p>
          </table:table-cell>
          <table:table-cell office:value-type="float" office:value="6.22" calcext:value-type="float">
            <text:p>6.22</text:p>
          </table:table-cell>
          <table:table-cell table:formula="of:=[.B91]/100" office:value-type="percentage" office:value="0.0622" calcext:value-type="percentage">
            <text:p>6.22 %</text:p>
          </table:table-cell>
          <table:table-cell table:number-columns-repeated="5"/>
          <table:table-cell office:value-type="date" office:date-value="1998-01-01" calcext:value-type="date">
            <text:p>1998-01-01</text:p>
          </table:table-cell>
          <table:table-cell office:value-type="float" office:value="7.23" calcext:value-type="float">
            <text:p>7.23</text:p>
          </table:table-cell>
          <table:table-cell table:formula="of:=[.J91]/100" office:value-type="percentage" office:value="0.0723" calcext:value-type="percentage">
            <text:p>7.23 %</text:p>
          </table:table-cell>
          <table:table-cell table:number-columns-repeated="16373"/>
        </table:table-row>
        <table:table-row table:style-name="ro9">
          <table:table-cell office:value-type="date" office:date-value="1999-01-01" calcext:value-type="date">
            <text:p>1999-01-01</text:p>
          </table:table-cell>
          <table:table-cell office:value-type="float" office:value="7.55" calcext:value-type="float">
            <text:p>7.55</text:p>
          </table:table-cell>
          <table:table-cell table:formula="of:=[.B92]/100" office:value-type="percentage" office:value="0.0755" calcext:value-type="percentage">
            <text:p>7.55 %</text:p>
          </table:table-cell>
          <table:table-cell table:number-columns-repeated="5"/>
          <table:table-cell office:value-type="date" office:date-value="1999-01-01" calcext:value-type="date">
            <text:p>1999-01-01</text:p>
          </table:table-cell>
          <table:table-cell office:value-type="float" office:value="8.19" calcext:value-type="float">
            <text:p>8.19</text:p>
          </table:table-cell>
          <table:table-cell table:formula="of:=[.J92]/100" office:value-type="percentage" office:value="0.0819" calcext:value-type="percentage">
            <text:p>8.19 %</text:p>
          </table:table-cell>
          <table:table-cell table:number-columns-repeated="16373"/>
        </table:table-row>
        <table:table-row table:style-name="ro9">
          <table:table-cell office:value-type="date" office:date-value="2000-01-01" calcext:value-type="date">
            <text:p>2000-01-01</text:p>
          </table:table-cell>
          <table:table-cell office:value-type="float" office:value="7.21" calcext:value-type="float">
            <text:p>7.21</text:p>
          </table:table-cell>
          <table:table-cell table:formula="of:=[.B93]/100" office:value-type="percentage" office:value="0.0721" calcext:value-type="percentage">
            <text:p>7.21 %</text:p>
          </table:table-cell>
          <table:table-cell table:number-columns-repeated="5"/>
          <table:table-cell office:value-type="date" office:date-value="2000-01-01" calcext:value-type="date">
            <text:p>2000-01-01</text:p>
          </table:table-cell>
          <table:table-cell office:value-type="float" office:value="8.02" calcext:value-type="float">
            <text:p>8.02</text:p>
          </table:table-cell>
          <table:table-cell table:formula="of:=[.J93]/100" office:value-type="percentage" office:value="0.0802" calcext:value-type="percentage">
            <text:p>8.02 %</text:p>
          </table:table-cell>
          <table:table-cell table:number-columns-repeated="16373"/>
        </table:table-row>
        <table:table-row table:style-name="ro9">
          <table:table-cell office:value-type="date" office:date-value="2001-01-01" calcext:value-type="date">
            <text:p>2001-01-01</text:p>
          </table:table-cell>
          <table:table-cell office:value-type="float" office:value="6.77" calcext:value-type="float">
            <text:p>6.77</text:p>
          </table:table-cell>
          <table:table-cell table:formula="of:=[.B94]/100" office:value-type="percentage" office:value="0.0677" calcext:value-type="percentage">
            <text:p>6.77 %</text:p>
          </table:table-cell>
          <table:table-cell table:number-columns-repeated="5"/>
          <table:table-cell office:value-type="date" office:date-value="2001-01-01" calcext:value-type="date">
            <text:p>2001-01-01</text:p>
          </table:table-cell>
          <table:table-cell office:value-type="float" office:value="8.05" calcext:value-type="float">
            <text:p>8.05</text:p>
          </table:table-cell>
          <table:table-cell table:formula="of:=[.J94]/100" office:value-type="percentage" office:value="0.0805" calcext:value-type="percentage">
            <text:p>8.05 %</text:p>
          </table:table-cell>
          <table:table-cell table:number-columns-repeated="16373"/>
        </table:table-row>
        <table:table-row table:style-name="ro9">
          <table:table-cell office:value-type="date" office:date-value="2002-01-01" calcext:value-type="date">
            <text:p>2002-01-01</text:p>
          </table:table-cell>
          <table:table-cell office:value-type="float" office:value="6.21" calcext:value-type="float">
            <text:p>6.21</text:p>
          </table:table-cell>
          <table:table-cell table:formula="of:=[.B95]/100" office:value-type="percentage" office:value="0.0621" calcext:value-type="percentage">
            <text:p>6.21 %</text:p>
          </table:table-cell>
          <table:table-cell table:number-columns-repeated="5"/>
          <table:table-cell office:value-type="date" office:date-value="2002-01-01" calcext:value-type="date">
            <text:p>2002-01-01</text:p>
          </table:table-cell>
          <table:table-cell office:value-type="float" office:value="7.45" calcext:value-type="float">
            <text:p>7.45</text:p>
          </table:table-cell>
          <table:table-cell table:formula="of:=[.J95]/100" office:value-type="percentage" office:value="0.0745" calcext:value-type="percentage">
            <text:p>7.45 %</text:p>
          </table:table-cell>
          <table:table-cell table:number-columns-repeated="16373"/>
        </table:table-row>
        <table:table-row table:style-name="ro9">
          <table:table-cell office:value-type="date" office:date-value="2003-01-01" calcext:value-type="date">
            <text:p>2003-01-01</text:p>
          </table:table-cell>
          <table:table-cell office:value-type="float" office:value="5.62" calcext:value-type="float">
            <text:p>5.62</text:p>
          </table:table-cell>
          <table:table-cell table:formula="of:=[.B96]/100" office:value-type="percentage" office:value="0.0562" calcext:value-type="percentage">
            <text:p>5.62 %</text:p>
          </table:table-cell>
          <table:table-cell table:number-columns-repeated="5"/>
          <table:table-cell office:value-type="date" office:date-value="2003-01-01" calcext:value-type="date">
            <text:p>2003-01-01</text:p>
          </table:table-cell>
          <table:table-cell office:value-type="float" office:value="6.6" calcext:value-type="float">
            <text:p>6.60</text:p>
          </table:table-cell>
          <table:table-cell table:formula="of:=[.J96]/100" office:value-type="percentage" office:value="0.066" calcext:value-type="percentage">
            <text:p>6.60 %</text:p>
          </table:table-cell>
          <table:table-cell table:number-columns-repeated="16373"/>
        </table:table-row>
        <table:table-row table:style-name="ro9">
          <table:table-cell office:value-type="date" office:date-value="2004-01-01" calcext:value-type="date">
            <text:p>2004-01-01</text:p>
          </table:table-cell>
          <table:table-cell office:value-type="float" office:value="5.47" calcext:value-type="float">
            <text:p>5.47</text:p>
          </table:table-cell>
          <table:table-cell table:formula="of:=[.B97]/100" office:value-type="percentage" office:value="0.0547" calcext:value-type="percentage">
            <text:p>5.47 %</text:p>
          </table:table-cell>
          <table:table-cell table:number-columns-repeated="5"/>
          <table:table-cell office:value-type="date" office:date-value="2004-01-01" calcext:value-type="date">
            <text:p>2004-01-01</text:p>
          </table:table-cell>
          <table:table-cell office:value-type="float" office:value="6.15" calcext:value-type="float">
            <text:p>6.15</text:p>
          </table:table-cell>
          <table:table-cell table:formula="of:=[.J97]/100" office:value-type="percentage" office:value="0.0615" calcext:value-type="percentage">
            <text:p>6.15 %</text:p>
          </table:table-cell>
          <table:table-cell table:number-columns-repeated="16373"/>
        </table:table-row>
        <table:table-row table:style-name="ro9">
          <table:table-cell office:value-type="date" office:date-value="2005-01-01" calcext:value-type="date">
            <text:p>2005-01-01</text:p>
          </table:table-cell>
          <table:table-cell office:value-type="float" office:value="5.37" calcext:value-type="float">
            <text:p>5.37</text:p>
          </table:table-cell>
          <table:table-cell table:formula="of:=[.B98]/100" office:value-type="percentage" office:value="0.0537" calcext:value-type="percentage">
            <text:p>5.37 %</text:p>
          </table:table-cell>
          <table:table-cell table:number-columns-repeated="5"/>
          <table:table-cell office:value-type="date" office:date-value="2005-01-01" calcext:value-type="date">
            <text:p>2005-01-01</text:p>
          </table:table-cell>
          <table:table-cell office:value-type="float" office:value="6.32" calcext:value-type="float">
            <text:p>6.32</text:p>
          </table:table-cell>
          <table:table-cell table:formula="of:=[.J98]/100" office:value-type="percentage" office:value="0.0632" calcext:value-type="percentage">
            <text:p>6.32 %</text:p>
          </table:table-cell>
          <table:table-cell table:number-columns-repeated="16373"/>
        </table:table-row>
        <table:table-row table:style-name="ro9">
          <table:table-cell office:value-type="date" office:date-value="2006-01-01" calcext:value-type="date">
            <text:p>2006-01-01</text:p>
          </table:table-cell>
          <table:table-cell office:value-type="float" office:value="5.32" calcext:value-type="float">
            <text:p>5.32</text:p>
          </table:table-cell>
          <table:table-cell table:formula="of:=[.B99]/100" office:value-type="percentage" office:value="0.0532" calcext:value-type="percentage">
            <text:p>5.32 %</text:p>
          </table:table-cell>
          <table:table-cell table:number-columns-repeated="5"/>
          <table:table-cell office:value-type="date" office:date-value="2006-01-01" calcext:value-type="date">
            <text:p>2006-01-01</text:p>
          </table:table-cell>
          <table:table-cell office:value-type="float" office:value="6.22" calcext:value-type="float">
            <text:p>6.22</text:p>
          </table:table-cell>
          <table:table-cell table:formula="of:=[.J99]/100" office:value-type="percentage" office:value="0.0622" calcext:value-type="percentage">
            <text:p>6.22 %</text:p>
          </table:table-cell>
          <table:table-cell table:number-columns-repeated="16373"/>
        </table:table-row>
        <table:table-row table:style-name="ro9">
          <table:table-cell office:value-type="date" office:date-value="2007-01-01" calcext:value-type="date">
            <text:p>2007-01-01</text:p>
          </table:table-cell>
          <table:table-cell office:value-type="float" office:value="5.49" calcext:value-type="float">
            <text:p>5.49</text:p>
          </table:table-cell>
          <table:table-cell table:formula="of:=[.B100]/100" office:value-type="percentage" office:value="0.0549" calcext:value-type="percentage">
            <text:p>5.49 %</text:p>
          </table:table-cell>
          <table:table-cell table:number-columns-repeated="5"/>
          <table:table-cell office:value-type="date" office:date-value="2007-01-01" calcext:value-type="date">
            <text:p>2007-01-01</text:p>
          </table:table-cell>
          <table:table-cell office:value-type="float" office:value="6.65" calcext:value-type="float">
            <text:p>6.65</text:p>
          </table:table-cell>
          <table:table-cell table:formula="of:=[.J100]/100" office:value-type="percentage" office:value="0.0665" calcext:value-type="percentage">
            <text:p>6.65 %</text:p>
          </table:table-cell>
          <table:table-cell table:number-columns-repeated="16373"/>
        </table:table-row>
        <table:table-row table:style-name="ro9">
          <table:table-cell office:value-type="date" office:date-value="2008-01-01" calcext:value-type="date">
            <text:p>2008-01-01</text:p>
          </table:table-cell>
          <table:table-cell office:value-type="float" office:value="5.05" calcext:value-type="float">
            <text:p>5.05</text:p>
          </table:table-cell>
          <table:table-cell table:formula="of:=[.B101]/100" office:value-type="percentage" office:value="0.0505" calcext:value-type="percentage">
            <text:p>5.05 %</text:p>
          </table:table-cell>
          <table:table-cell table:number-columns-repeated="5"/>
          <table:table-cell office:value-type="date" office:date-value="2008-01-01" calcext:value-type="date">
            <text:p>2008-01-01</text:p>
          </table:table-cell>
          <table:table-cell office:value-type="float" office:value="8.43" calcext:value-type="float">
            <text:p>8.43</text:p>
          </table:table-cell>
          <table:table-cell table:formula="of:=[.J101]/100" office:value-type="percentage" office:value="0.0843" calcext:value-type="percentage">
            <text:p>8.43 %</text:p>
          </table:table-cell>
          <table:table-cell table:number-columns-repeated="16373"/>
        </table:table-row>
        <table:table-row table:style-name="ro9">
          <table:table-cell office:value-type="date" office:date-value="2009-01-01" calcext:value-type="date">
            <text:p>2009-01-01</text:p>
          </table:table-cell>
          <table:table-cell office:value-type="float" office:value="5.26" calcext:value-type="float">
            <text:p>5.26</text:p>
          </table:table-cell>
          <table:table-cell table:formula="of:=[.B102]/100" office:value-type="percentage" office:value="0.0526" calcext:value-type="percentage">
            <text:p>5.26 %</text:p>
          </table:table-cell>
          <table:table-cell table:number-columns-repeated="5"/>
          <table:table-cell office:value-type="date" office:date-value="2009-01-01" calcext:value-type="date">
            <text:p>2009-01-01</text:p>
          </table:table-cell>
          <table:table-cell office:value-type="float" office:value="6.37" calcext:value-type="float">
            <text:p>6.37</text:p>
          </table:table-cell>
          <table:table-cell table:formula="of:=[.J102]/100" office:value-type="percentage" office:value="0.0637" calcext:value-type="percentage">
            <text:p>6.37 %</text:p>
          </table:table-cell>
          <table:table-cell table:number-columns-repeated="16373"/>
        </table:table-row>
        <table:table-row table:style-name="ro9">
          <table:table-cell office:value-type="date" office:date-value="2010-01-01" calcext:value-type="date">
            <text:p>2010-01-01</text:p>
          </table:table-cell>
          <table:table-cell office:value-type="float" office:value="5.02" calcext:value-type="float">
            <text:p>5.02</text:p>
          </table:table-cell>
          <table:table-cell table:formula="of:=[.B103]/100" office:value-type="percentage" office:value="0.0502" calcext:value-type="percentage">
            <text:p>5.02 %</text:p>
          </table:table-cell>
          <table:table-cell table:number-columns-repeated="5"/>
          <table:table-cell office:value-type="date" office:date-value="2010-01-01" calcext:value-type="date">
            <text:p>2010-01-01</text:p>
          </table:table-cell>
          <table:table-cell office:value-type="float" office:value="6.1" calcext:value-type="float">
            <text:p>6.10</text:p>
          </table:table-cell>
          <table:table-cell table:formula="of:=[.J103]/100" office:value-type="percentage" office:value="0.061" calcext:value-type="percentage">
            <text:p>6.10 %</text:p>
          </table:table-cell>
          <table:table-cell table:number-columns-repeated="16373"/>
        </table:table-row>
        <table:table-row table:style-name="ro9">
          <table:table-cell office:value-type="date" office:date-value="2011-01-01" calcext:value-type="date">
            <text:p>2011-01-01</text:p>
          </table:table-cell>
          <table:table-cell office:value-type="float" office:value="3.93" calcext:value-type="float">
            <text:p>3.93</text:p>
          </table:table-cell>
          <table:table-cell table:formula="of:=[.B104]/100" office:value-type="percentage" office:value="0.0393" calcext:value-type="percentage">
            <text:p>3.93 %</text:p>
          </table:table-cell>
          <table:table-cell table:number-columns-repeated="5"/>
          <table:table-cell office:value-type="date" office:date-value="2011-01-01" calcext:value-type="date">
            <text:p>2011-01-01</text:p>
          </table:table-cell>
          <table:table-cell office:value-type="float" office:value="5.25" calcext:value-type="float">
            <text:p>5.25</text:p>
          </table:table-cell>
          <table:table-cell table:formula="of:=[.J104]/100" office:value-type="percentage" office:value="0.0525" calcext:value-type="percentage">
            <text:p>5.25 %</text:p>
          </table:table-cell>
          <table:table-cell table:number-columns-repeated="16373"/>
        </table:table-row>
        <table:table-row table:style-name="ro9">
          <table:table-cell office:value-type="date" office:date-value="2012-01-01" calcext:value-type="date">
            <text:p>2012-01-01</text:p>
          </table:table-cell>
          <table:table-cell office:value-type="float" office:value="3.65" calcext:value-type="float">
            <text:p>3.65</text:p>
          </table:table-cell>
          <table:table-cell table:formula="of:=[.B105]/100" office:value-type="percentage" office:value="0.0365" calcext:value-type="percentage">
            <text:p>3.65 %</text:p>
          </table:table-cell>
          <table:table-cell table:number-columns-repeated="5"/>
          <table:table-cell office:value-type="date" office:date-value="2012-01-01" calcext:value-type="date">
            <text:p>2012-01-01</text:p>
          </table:table-cell>
          <table:table-cell office:value-type="float" office:value="4.63" calcext:value-type="float">
            <text:p>4.63</text:p>
          </table:table-cell>
          <table:table-cell table:formula="of:=[.J105]/100" office:value-type="percentage" office:value="0.0463" calcext:value-type="percentage">
            <text:p>4.63 %</text:p>
          </table:table-cell>
          <table:table-cell table:number-columns-repeated="16373"/>
        </table:table-row>
        <table:table-row table:style-name="ro9">
          <table:table-cell office:value-type="date" office:date-value="2013-01-01" calcext:value-type="date">
            <text:p>2013-01-01</text:p>
          </table:table-cell>
          <table:table-cell office:value-type="float" office:value="4.62" calcext:value-type="float">
            <text:p>4.62</text:p>
          </table:table-cell>
          <table:table-cell table:formula="of:=[.B106]/100" office:value-type="percentage" office:value="0.0462" calcext:value-type="percentage">
            <text:p>4.62 %</text:p>
          </table:table-cell>
          <table:table-cell table:number-columns-repeated="5"/>
          <table:table-cell office:value-type="date" office:date-value="2013-01-01" calcext:value-type="date">
            <text:p>2013-01-01</text:p>
          </table:table-cell>
          <table:table-cell office:value-type="float" office:value="5.38" calcext:value-type="float">
            <text:p>5.38</text:p>
          </table:table-cell>
          <table:table-cell table:formula="of:=[.J106]/100" office:value-type="percentage" office:value="0.0538" calcext:value-type="percentage">
            <text:p>5.38 %</text:p>
          </table:table-cell>
          <table:table-cell table:number-columns-repeated="16373"/>
        </table:table-row>
        <table:table-row table:style-name="ro9">
          <table:table-cell office:value-type="date" office:date-value="2014-01-01" calcext:value-type="date">
            <text:p>2014-01-01</text:p>
          </table:table-cell>
          <table:table-cell office:value-type="float" office:value="3.79" calcext:value-type="float">
            <text:p>3.79</text:p>
          </table:table-cell>
          <table:table-cell table:formula="of:=[.B107]/100" office:value-type="percentage" office:value="0.0379" calcext:value-type="percentage">
            <text:p>3.79 %</text:p>
          </table:table-cell>
          <table:table-cell table:number-columns-repeated="5"/>
          <table:table-cell office:value-type="date" office:date-value="2014-01-01" calcext:value-type="date">
            <text:p>2014-01-01</text:p>
          </table:table-cell>
          <table:table-cell office:value-type="float" office:value="4.74" calcext:value-type="float">
            <text:p>4.74</text:p>
          </table:table-cell>
          <table:table-cell table:formula="of:=[.J107]/100" office:value-type="percentage" office:value="0.0474" calcext:value-type="percentage">
            <text:p>4.74 %</text:p>
          </table:table-cell>
          <table:table-cell table:number-columns-repeated="16373"/>
        </table:table-row>
        <table:table-row table:style-name="ro9">
          <table:table-cell office:value-type="date" office:date-value="2015-01-01" calcext:value-type="date">
            <text:p>2015-01-01</text:p>
          </table:table-cell>
          <table:table-cell office:value-type="float" office:value="3.97" calcext:value-type="float">
            <text:p>3.97</text:p>
          </table:table-cell>
          <table:table-cell table:formula="of:=[.B108]/100" office:value-type="percentage" office:value="0.0397" calcext:value-type="percentage">
            <text:p>3.97 %</text:p>
          </table:table-cell>
          <table:table-cell table:number-columns-repeated="5"/>
          <table:table-cell office:value-type="date" office:date-value="2015-01-01" calcext:value-type="date">
            <text:p>2015-01-01</text:p>
          </table:table-cell>
          <table:table-cell office:value-type="float" office:value="5.46" calcext:value-type="float">
            <text:p>5.46</text:p>
          </table:table-cell>
          <table:table-cell table:formula="of:=[.J108]/100" office:value-type="percentage" office:value="0.0546" calcext:value-type="percentage">
            <text:p>5.46 %</text:p>
          </table:table-cell>
          <table:table-cell table:number-columns-repeated="16373"/>
        </table:table-row>
        <table:table-row table:style-name="ro9">
          <table:table-cell office:value-type="date" office:date-value="2016-01-01" calcext:value-type="date">
            <text:p>2016-01-01</text:p>
          </table:table-cell>
          <table:table-cell office:value-type="float" office:value="4.06" calcext:value-type="float">
            <text:p>4.06</text:p>
          </table:table-cell>
          <table:table-cell table:formula="of:=[.B109]/100" office:value-type="percentage" office:value="0.0406" calcext:value-type="percentage">
            <text:p>4.06 %</text:p>
          </table:table-cell>
          <table:table-cell table:number-columns-repeated="5"/>
          <table:table-cell office:value-type="date" office:date-value="2016-01-01" calcext:value-type="date">
            <text:p>2016-01-01</text:p>
          </table:table-cell>
          <table:table-cell office:value-type="float" office:value="4.83" calcext:value-type="float">
            <text:p>4.83</text:p>
          </table:table-cell>
          <table:table-cell table:formula="of:=[.J109]/100" office:value-type="percentage" office:value="0.0483" calcext:value-type="percentage">
            <text:p>4.83 %</text:p>
          </table:table-cell>
          <table:table-cell table:number-columns-repeated="16373"/>
        </table:table-row>
        <table:table-row table:style-name="ro9">
          <table:table-cell office:value-type="date" office:date-value="2017-01-01" calcext:value-type="date">
            <text:p>2017-01-01</text:p>
          </table:table-cell>
          <table:table-cell office:value-type="float" office:value="3.51" calcext:value-type="float">
            <text:p>3.51</text:p>
          </table:table-cell>
          <table:table-cell table:formula="of:=[.B110]/100" office:value-type="percentage" office:value="0.0351" calcext:value-type="percentage">
            <text:p>3.51 %</text:p>
          </table:table-cell>
          <table:table-cell table:number-columns-repeated="5"/>
          <table:table-cell office:value-type="date" office:date-value="2017-01-01" calcext:value-type="date">
            <text:p>2017-01-01</text:p>
          </table:table-cell>
          <table:table-cell office:value-type="float" office:value="4.22" calcext:value-type="float">
            <text:p>4.22</text:p>
          </table:table-cell>
          <table:table-cell table:formula="of:=[.J110]/100" office:value-type="percentage" office:value="0.0422" calcext:value-type="percentage">
            <text:p>4.22 %</text:p>
          </table:table-cell>
          <table:table-cell table:number-columns-repeated="16373"/>
        </table:table-row>
        <table:table-row table:style-name="ro9">
          <table:table-cell office:value-type="date" office:date-value="2018-01-01" calcext:value-type="date">
            <text:p>2018-01-01</text:p>
          </table:table-cell>
          <table:table-cell office:value-type="float" office:value="4.02" calcext:value-type="float">
            <text:p>4.02</text:p>
          </table:table-cell>
          <table:table-cell table:formula="of:=[.B111]/100" office:value-type="percentage" office:value="0.0402" calcext:value-type="percentage">
            <text:p>4.02 %</text:p>
          </table:table-cell>
          <table:table-cell table:number-columns-repeated="5"/>
          <table:table-cell office:value-type="date" office:date-value="2018-01-01" calcext:value-type="date">
            <text:p>2018-01-01</text:p>
          </table:table-cell>
          <table:table-cell office:value-type="float" office:value="5.13" calcext:value-type="float">
            <text:p>5.13</text:p>
          </table:table-cell>
          <table:table-cell table:formula="of:=[.J111]/100" office:value-type="percentage" office:value="0.0513" calcext:value-type="percentage">
            <text:p>5.13 %</text:p>
          </table:table-cell>
          <table:table-cell table:number-columns-repeated="16373"/>
        </table:table-row>
        <table:table-row table:style-name="ro9">
          <table:table-cell office:value-type="date" office:date-value="2019-01-01" calcext:value-type="date">
            <text:p>2019-01-01</text:p>
          </table:table-cell>
          <table:table-cell office:value-type="float" office:value="3.01" calcext:value-type="float">
            <text:p>3.01</text:p>
          </table:table-cell>
          <table:table-cell table:formula="of:=[.B112]/100" office:value-type="percentage" office:value="0.0301" calcext:value-type="percentage">
            <text:p>3.01 %</text:p>
          </table:table-cell>
          <table:table-cell table:number-columns-repeated="5"/>
          <table:table-cell office:value-type="date" office:date-value="2019-01-01" calcext:value-type="date">
            <text:p>2019-01-01</text:p>
          </table:table-cell>
          <table:table-cell office:value-type="float" office:value="3.88" calcext:value-type="float">
            <text:p>3.88</text:p>
          </table:table-cell>
          <table:table-cell table:formula="of:=[.J112]/100" office:value-type="percentage" office:value="0.0388" calcext:value-type="percentage">
            <text:p>3.88 %</text:p>
          </table:table-cell>
          <table:table-cell table:number-columns-repeated="16373"/>
        </table:table-row>
      </table:table>
      <table:named-expressions>
        <table:named-expression table:name="HTML1_1" table:base-cell-address="$'Explanations and FAQ'.$A$1" table:expression="&quot;[ReturnsHistorical]Sheet1!$A$1:$D$77&quot;"/>
        <table:named-expression table:name="HTML1_10" table:base-cell-address="$'Explanations and FAQ'.$A$1" table:expression="&quot;&quot;"/>
        <table:named-expression table:name="HTML1_11" table:base-cell-address="$'Explanations and FAQ'.$A$1" table:expression="1"/>
        <table:named-expression table:name="HTML1_12" table:base-cell-address="$'Explanations and FAQ'.$A$1" table:expression="&quot;Zip 100:New_Home_Page:datafile:histret.html&quot;"/>
        <table:named-expression table:name="HTML1_2" table:base-cell-address="$'Explanations and FAQ'.$A$1" table:expression="1"/>
        <table:named-expression table:name="HTML1_3" table:base-cell-address="$'Explanations and FAQ'.$A$1" table:expression="&quot;ReturnsHistorical&quot;"/>
        <table:named-expression table:name="HTML1_4" table:base-cell-address="$'Explanations and FAQ'.$A$1" table:expression="&quot;Historical Returns on Stocks, Bonds and Bills&quot;"/>
        <table:named-expression table:name="HTML1_5" table:base-cell-address="$'Explanations and FAQ'.$A$1" table:expression="&quot;Ibbotson Data&quot;"/>
        <table:named-expression table:name="HTML1_6" table:base-cell-address="$'Explanations and FAQ'.$A$1" table:expression="-4146"/>
        <table:named-expression table:name="HTML1_7" table:base-cell-address="$'Explanations and FAQ'.$A$1" table:expression="-4146"/>
        <table:named-expression table:name="HTML1_8" table:base-cell-address="$'Explanations and FAQ'.$A$1" table:expression="&quot;3/17/97&quot;"/>
        <table:named-expression table:name="HTML1_9" table:base-cell-address="$'Explanations and FAQ'.$A$1" table:expression="&quot;Aswath Damodaran&quot;"/>
        <table:named-expression table:name="HTML2_1" table:base-cell-address="$'Explanations and FAQ'.$A$1" table:expression="&quot;[histret.xls]Sheet1!$A$1:$G$85&quot;"/>
        <table:named-expression table:name="HTML2_10" table:base-cell-address="$'Explanations and FAQ'.$A$1" table:expression="&quot;&quot;"/>
        <table:named-expression table:name="HTML2_11" table:base-cell-address="$'Explanations and FAQ'.$A$1" table:expression="1"/>
        <table:named-expression table:name="HTML2_12" table:base-cell-address="$'Explanations and FAQ'.$A$1" table:expression="&quot;Macintosh HD:New_Home_Page:datafile:histret.html&quot;"/>
        <table:named-expression table:name="HTML2_2" table:base-cell-address="$'Explanations and FAQ'.$A$1" table:expression="1"/>
        <table:named-expression table:name="HTML2_3" table:base-cell-address="$'Explanations and FAQ'.$A$1" table:expression="&quot;Historical Returns&quot;"/>
        <table:named-expression table:name="HTML2_4" table:base-cell-address="$'Explanations and FAQ'.$A$1" table:expression="&quot;Historical Returns on Stocks, Bonds and Bills&quot;"/>
        <table:named-expression table:name="HTML2_5" table:base-cell-address="$'Explanations and FAQ'.$A$1" table:expression="&quot;&quot;"/>
        <table:named-expression table:name="HTML2_6" table:base-cell-address="$'Explanations and FAQ'.$A$1" table:expression="1"/>
        <table:named-expression table:name="HTML2_7" table:base-cell-address="$'Explanations and FAQ'.$A$1" table:expression="1"/>
        <table:named-expression table:name="HTML2_8" table:base-cell-address="$'Explanations and FAQ'.$A$1" table:expression="&quot;2/3/98&quot;"/>
        <table:named-expression table:name="HTML2_9" table:base-cell-address="$'Explanations and FAQ'.$A$1" table:expression="&quot;Aswath Damodaran&quot;"/>
        <table:named-expression table:name="HTMLCount" table:base-cell-address="$'Explanations and FAQ'.$A$1" table:expression="2"/>
        <table:named-expression table:name="HTML_CodePage" table:base-cell-address="$'Explanations and FAQ'.$A$1" table:expression="1252"/>
        <table:named-expression table:name="HTML_Control" table:base-cell-address="$'Explanations and FAQ'.$A$1" table:expression="{&quot;'Sheet1'!$A$1:$G$85&quot;}"/>
        <table:named-expression table:name="HTML_Description" table:base-cell-address="$'Explanations and FAQ'.$A$1" table:expression="&quot;&quot;"/>
        <table:named-expression table:name="HTML_Email" table:base-cell-address="$'Explanations and FAQ'.$A$1" table:expression="&quot;&quot;"/>
        <table:named-expression table:name="HTML_Header" table:base-cell-address="$'Explanations and FAQ'.$A$1" table:expression="&quot;Sheet1&quot;"/>
        <table:named-expression table:name="HTML_LastUpdate" table:base-cell-address="$'Explanations and FAQ'.$A$1" table:expression="&quot;2/24/99&quot;"/>
        <table:named-expression table:name="HTML_LineAfter" table:base-cell-address="$'Explanations and FAQ'.$A$1" table:expression="TRUE()"/>
        <table:named-expression table:name="HTML_LineBefore" table:base-cell-address="$'Explanations and FAQ'.$A$1" table:expression="TRUE()"/>
        <table:named-expression table:name="HTML_Name" table:base-cell-address="$'Explanations and FAQ'.$A$1" table:expression="&quot;Aswath Damodaran&quot;"/>
        <table:named-expression table:name="HTML_OBDlg2" table:base-cell-address="$'Explanations and FAQ'.$A$1" table:expression="TRUE()"/>
        <table:named-expression table:name="HTML_OBDlg4" table:base-cell-address="$'Explanations and FAQ'.$A$1" table:expression="TRUE()"/>
        <table:named-expression table:name="HTML_OS" table:base-cell-address="$'Explanations and FAQ'.$A$1" table:expression="1"/>
        <table:named-expression table:name="HTML_PathFileMac" table:base-cell-address="$'Explanations and FAQ'.$A$1" table:expression="&quot;Macintosh HD:HomePageStuff:New_Home_Page:datafile:histret.html&quot;"/>
        <table:named-expression table:name="HTML_Title" table:base-cell-address="$'Explanations and FAQ'.$A$1" table:expression="&quot;Historical Returns on Stocks, Bonds and Bills&quot;"/>
      </table:named-expressions>
      <table:database-ranges>
        <table:database-range table:name="Table1" table:target-range-address="'Retornos x año'.A18:'Retornos x año'.R111"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Calibri" svg:font-family="Calibri" style:font-family-generic="swiss"/>
    <style:font-face style:name="Geneva" svg:font-family="Geneva" style:font-family-generic="swiss"/>
    <style:font-face style:name="Geneva1" svg:font-family="Geneva"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svg:font-family="Times" style:font-family-generic="roman"/>
    <style:font-face style:name="Times New Roman" svg:font-family="'Times New Roman'" style:font-family-generic="roman"/>
  </office:font-face-decls>
  <office:styles>
    <style:default-style style:family="table-cell">
      <style:paragraph-properties style:tab-stop-distance="1.25cm"/>
      <style:text-properties style:font-name="Liberation Sans" fo:font-size="10pt" fo:language="es" fo:country="PE"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PE" style:letter-kerning="true" style:font-family-asian="'DejaVu Sans'" style:font-family-generic-asian="system" style:font-pitch-asian="variable" style:font-size-asian="12pt" style:language-asian="zh" style:country-asian="CN" style:font-family-complex="Arimo"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 %</number:text>
    </number:percentage-style>
    <number:number-style style:name="N128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28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28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28">
      <number:text loext:blank-width-char="("> </number:text>
      <number:text-content/>
      <number:text loext:blank-width-char=")"> </number:text>
      <style:map style:condition="value()&gt;0" style:apply-style-name="N128P0"/>
      <style:map style:condition="value()&lt;0" style:apply-style-name="N128P1"/>
      <style:map style:condition="value()=0" style:apply-style-name="N128P2"/>
    </number:text-style>
    <number:number-style style:name="N114P0" style:volatile="true">
      <number:text>S/. </number:text>
      <number:number number:decimal-places="0" number:min-decimal-places="0" number:min-integer-digits="1" number:grouping="true"/>
    </number:number-style>
    <number:number-style style:name="N114">
      <number:text>S/. -</number:text>
      <number:number number:decimal-places="0" number:min-decimal-places="0" number:min-integer-digits="1" number:grouping="true"/>
      <style:map style:condition="value()&gt;=0" style:apply-style-name="N114P0"/>
    </number:number-style>
    <number:number-style style:name="N115P0" style:volatile="true">
      <number:text>S/. </number:text>
      <number:number number:decimal-places="0" number:min-decimal-places="0" number:min-integer-digits="1" number:grouping="true"/>
    </number:number-style>
    <number:number-style style:name="N115">
      <style:text-properties fo:color="#ff0000"/>
      <number:text>S/. -</number:text>
      <number:number number:decimal-places="0" number:min-decimal-places="0" number:min-integer-digits="1" number:grouping="true"/>
      <style:map style:condition="value()&gt;=0" style:apply-style-name="N115P0"/>
    </number:number-style>
    <number:number-style style:name="N116P0" style:volatile="true">
      <number:text>S/. </number:text>
      <number:number number:decimal-places="2" number:min-decimal-places="2" number:min-integer-digits="1" number:grouping="true"/>
    </number:number-style>
    <number:number-style style:name="N116">
      <number:text>S/. -</number:text>
      <number:number number:decimal-places="2" number:min-decimal-places="2" number:min-integer-digits="1" number:grouping="true"/>
      <style:map style:condition="value()&gt;=0" style:apply-style-name="N116P0"/>
    </number:number-style>
    <number:number-style style:name="N117P0" style:volatile="true">
      <number:text>S/. </number:text>
      <number:number number:decimal-places="2" number:min-decimal-places="2" number:min-integer-digits="1" number:grouping="true"/>
    </number:number-style>
    <number:number-style style:name="N117">
      <style:text-properties fo:color="#ff0000"/>
      <number:text>S/. -</number:text>
      <number:number number:decimal-places="2" number:min-decimal-places="2" number:min-integer-digits="1" number:grouping="true"/>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number-style style:name="N121P0" style:volatile="true">
      <number:number number:decimal-places="0" number:min-decimal-places="0" number:min-integer-digits="1" number:grouping="true"/>
    </number:number-style>
    <number:number-style style:name="N121">
      <number:text>-</number:text>
      <number:number number:decimal-places="0" number:min-decimal-places="0" number:min-integer-digits="1" number:grouping="true"/>
      <style:map style:condition="value()&gt;=0" style:apply-style-name="N121P0"/>
    </number:number-style>
    <number:number-style style:name="N122P0" style:volatile="true">
      <number:number number:decimal-places="0" number:min-decimal-places="0" number:min-integer-digits="1" number:grouping="true"/>
    </number:number-style>
    <number:number-style style:name="N122">
      <style:text-properties fo:color="#ff0000"/>
      <number:text>-</number:text>
      <number:number number:decimal-places="0" number:min-decimal-places="0" number:min-integer-digits="1" number:grouping="true"/>
      <style:map style:condition="value()&gt;=0" style:apply-style-name="N122P0"/>
    </number:number-style>
    <number:number-style style:name="N123P0" style:volatile="true">
      <number:number number:decimal-places="2" number:min-decimal-places="2" number:min-integer-digits="1" number:grouping="true"/>
    </number:number-style>
    <number:number-style style:name="N123">
      <number:text>-</number:text>
      <number:number number:decimal-places="2" number:min-decimal-places="2" number:min-integer-digits="1" number:grouping="true"/>
      <style:map style:condition="value()&gt;=0" style:apply-style-name="N123P0"/>
    </number:number-style>
    <number:number-style style:name="N124P0" style:volatile="true">
      <number:number number:decimal-places="2" number:min-decimal-places="2" number:min-integer-digits="1" number:grouping="true"/>
    </number:number-style>
    <number:number-style style:name="N124">
      <style:text-properties fo:color="#ff0000"/>
      <number:text>-</number:text>
      <number:number number:decimal-places="2" number:min-decimal-places="2" number:min-integer-digits="1" number:grouping="true"/>
      <style:map style:condition="value()&gt;=0" style:apply-style-name="N124P0"/>
    </number:number-style>
    <number:number-style style:name="N125P0" style:volatile="true">
      <number:text loext:blank-width-char=" "> </number:text>
      <number:fill-character> </number:fill-character>
      <number:number number:decimal-places="0" number:min-decimal-places="0" number:min-integer-digits="1" number:grouping="true"/>
      <number:text loext:blank-width-char=" "> </number:text>
    </number:number-style>
    <number:number-style style:name="N125P1" style:volatile="true">
      <number:text loext:blank-width-char=" "> </number:text>
      <number:fill-character> </number:fill-character>
      <number:text>-</number:text>
      <number:number number:decimal-places="0" number:min-decimal-places="0" number:min-integer-digits="1" number:grouping="true"/>
      <number:text loext:blank-width-char=" "> </number:text>
    </number:number-style>
    <number:number-style style:name="N125P2" style:volatile="true">
      <number:text loext:blank-width-char=" "> </number:text>
      <number:fill-character> </number:fill-character>
      <number:text loext:blank-width-char=" 1">- </number:text>
    </number:number-style>
    <number:text-style style:name="N125">
      <number:text loext:blank-width-char=" "> </number:text>
      <number:text-content/>
      <number:text loext:blank-width-char=" "> </number:text>
      <style:map style:condition="value()&gt;0" style:apply-style-name="N125P0"/>
      <style:map style:condition="value()&lt;0" style:apply-style-name="N125P1"/>
      <style:map style:condition="value()=0" style:apply-style-name="N125P2"/>
    </number:text-style>
    <number:number-style style:name="N126P0" style:volatile="true">
      <number:text loext:blank-width-char=" "> S/. </number:text>
      <number:fill-character> </number:fill-character>
      <number:number number:decimal-places="0" number:min-decimal-places="0" number:min-integer-digits="1" number:grouping="true"/>
      <number:text loext:blank-width-char=" "> </number:text>
    </number:number-style>
    <number:number-style style:name="N126P1" style:volatile="true">
      <number:text loext:blank-width-char=" "> S/. </number:text>
      <number:fill-character> </number:fill-character>
      <number:text>-</number:text>
      <number:number number:decimal-places="0" number:min-decimal-places="0" number:min-integer-digits="1" number:grouping="true"/>
      <number:text loext:blank-width-char=" "> </number:text>
    </number:number-style>
    <number:number-style style:name="N126P2" style:volatile="true">
      <number:text loext:blank-width-char=" "> S/. </number:text>
      <number:fill-character> </number:fill-character>
      <number:text loext:blank-width-char=" 1">- </number:text>
    </number:number-style>
    <number:text-style style:name="N126">
      <number:text loext:blank-width-char=" "> </number:text>
      <number:text-content/>
      <number:text loext:blank-width-char=" "> </number:text>
      <style:map style:condition="value()&gt;0" style:apply-style-name="N126P0"/>
      <style:map style:condition="value()&lt;0" style:apply-style-name="N126P1"/>
      <style:map style:condition="value()=0" style:apply-style-name="N126P2"/>
    </number:text-style>
    <number:number-style style:name="N127P0" style:volatile="true">
      <number:text loext:blank-width-char=" "> </number:text>
      <number:fill-character> </number:fill-character>
      <number:number number:decimal-places="2" number:min-decimal-places="2" number:min-integer-digits="1" number:grouping="true"/>
      <number:text loext:blank-width-char=" "> </number:text>
    </number:number-style>
    <number:number-style style:name="N127P1" style:volatile="true">
      <number:text loext:blank-width-char=" "> </number:text>
      <number:fill-character> </number:fill-character>
      <number:text>-</number:text>
      <number:number number:decimal-places="2" number:min-decimal-places="2" number:min-integer-digits="1" number:grouping="true"/>
      <number:text loext:blank-width-char=" "> </number:text>
    </number:number-style>
    <number:number-style style:name="N127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27">
      <number:text loext:blank-width-char=" "> </number:text>
      <number:text-content/>
      <number:text loext:blank-width-char=" "> </number:text>
      <style:map style:condition="value()&gt;0" style:apply-style-name="N127P0"/>
      <style:map style:condition="value()&lt;0" style:apply-style-name="N127P1"/>
      <style:map style:condition="value()=0" style:apply-style-name="N127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number-style style:name="N133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3P1" style:volatile="true">
      <number:text>-</number:text>
      <number:fill-character> </number:fill-character>
      <number:number number:decimal-places="2" number:min-decimal-places="2" number:min-integer-digits="1" number:grouping="true"/>
      <number:text loext:blank-width-char="-"> </number:text>
    </number:number-style>
    <number:number-style style:name="N133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3">
      <number:text loext:blank-width-char="-"> </number:text>
      <number:text-content/>
      <number:text loext:blank-width-char="-"> </number:text>
      <style:map style:condition="value()&gt;0" style:apply-style-name="N133P0"/>
      <style:map style:condition="value()&lt;0" style:apply-style-name="N133P1"/>
      <style:map style:condition="value()=0" style:apply-style-name="N133P2"/>
    </number:text-style>
    <number:number-style style:name="N134">
      <number:number number:decimal-places="1" number:min-decimal-places="1" number:min-integer-digits="1"/>
    </number:number-style>
    <number:percentage-style style:name="N135">
      <number:number number:decimal-places="2" number:min-decimal-places="2" number:min-integer-digits="1"/>
      <number:text>%</number:text>
    </number:percentage-style>
    <style:style style:name="Default" style:family="table-cell">
      <style:table-cell-properties style:rotation-align="none" style:vertical-align="bottom"/>
      <style:text-properties style:font-name="Geneva" fo:font-family="Geneva" style:font-family-generic="swiss" style:font-name-complex="Geneva" style:font-family-complex="Geneva" style:font-family-generic-complex="swis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Percent" style:display-name="Excel Built-in Percent" style:family="table-cell" style:parent-style-name="Default" style:data-style-name="N10"/>
    <style:style style:name="Excel_20_Built-in_20_Hyperlink" style:display-name="Excel Built-in Hyperlink" style:family="table-cell" style:parent-style-name="Default">
      <style:text-properties fo:color="#0000d4" style:text-outline="false" style:text-line-through-style="none" style:text-line-through-type="none" style:font-name="Geneva" fo:font-family="Geneva"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Geneva" style:font-family-complex="Geneva" style:font-family-generic-complex="swiss" style:font-size-complex="10pt" style:font-style-complex="normal" style:font-weight-complex="normal"/>
    </style:style>
    <style:style style:name="Excel_20_Built-in_20_Currency" style:display-name="Excel Built-in Currency" style:family="table-cell" style:parent-style-name="Default" style:data-style-name="N128"/>
    <draw:marker draw:name="Puntas_20_de_20_flecha_20_1" draw:display-name="Puntas de flecha 1" svg:viewBox="0 0 20 30" svg:d="M10 0l-10 30h20z"/>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27cm" fo:margin-bottom="1.27cm" fo:margin-left="1.905cm" fo:margin-right="1.905cm" style:print-page-order="ttb" style:first-page-number="continue" style:scale-to="100%" style:writing-mode="lr-tb" style:print="charts drawings grid objects zero-values"/>
      <style:header-style>
        <style:header-footer-properties fo:min-height="1.27cm" fo:margin-left="0cm" fo:margin-right="0cm" fo:margin-bottom="0.917cm"/>
      </style:header-style>
      <style:footer-style>
        <style:header-footer-properties fo:min-height="1.27cm" fo:margin-left="0cm" fo:margin-right="0cm" fo:margin-top="0.917cm"/>
      </style:footer-style>
    </style:page-layout>
    <style:page-layout style:name="Mpm4">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style:num-format="1" style:print-orientation="portrait" fo:margin-top="1.27cm" fo:margin-bottom="1.27cm" fo:margin-left="1.905cm" fo:margin-right="1.905cm" style:print-page-order="ttb" style:first-page-number="continue" style:scale-to="100%" style:writing-mode="lr-tb" style:print="charts drawings grid objects zero-values"/>
      <style:header-style>
        <style:header-footer-properties fo:min-height="1.27cm" fo:margin-left="0cm" fo:margin-right="0cm" fo:margin-bottom="0.917cm"/>
      </style:header-style>
      <style:footer-style>
        <style:header-footer-properties fo:min-height="1.27cm" fo:margin-left="0cm" fo:margin-right="0cm" fo:margin-top="0.917cm"/>
      </style:footer-style>
    </style:page-layout>
    <style:style style:name="MT1" style:family="text">
      <style:text-properties style:use-window-font-color="true" loext:opacity="0%" style:text-outline="false" style:text-line-through-style="none" style:text-line-through-type="none" style:text-position="0% 100%" style:font-name="Geneva1" fo:font-size="10pt" fo:font-style="normal" fo:text-shadow="none" style:text-underline-style="none" fo:font-weight="normal" style:font-size-asian="10pt" style:font-style-asian="normal" style:font-weight-asian="normal" style:font-name-complex="Geneva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31">00/00/0000</text:date>, <text:time>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T._20_Bond_20_yield_20__26__20_return" style:display-name="PageStyle_T. Bond yield &amp; return"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Summary_20_for_20_ppt" style:display-name="PageStyle_Summary for pp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Explanations_20_and_20_FAQ" style:display-name="PageStyle_Explanations and FAQ" style:page-layout-name="Mpm4">
      <style:header style:display="false"/>
      <style:header-left style:display="false"/>
      <style:header-first style:display="false"/>
      <style:footer style:display="false"/>
      <style:footer-left style:display="false"/>
      <style:footer-first style:display="false"/>
    </style:master-page>
    <style:master-page style:name="PageStyle_5f_Inflation_20_Rate" style:display-name="PageStyle_Inflation Rate" style:page-layout-name="Mpm5">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T._20_Bill_20_rates" style:display-name="PageStyle_T. Bill rate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Home_20_Prices_20__28_Raw_20_Data_29_" style:display-name="PageStyle_Home Prices (Raw Data)" style:page-layout-name="Mpm5">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Retornos_20_x_20_año" style:display-name="PageStyle_Retornos x año"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S_26_P_20_500_20__26__20_Raw_20_Data" style:display-name="PageStyle_S&amp;P 500 &amp; Raw Data"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Moody_27_s_20_Rates" style:display-name="PageStyle_Moody's Rates" style:page-layout-name="Mpm5">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Historical Returns</dc:title>
    <meta:initial-creator>Aswath Damodaran</meta:initial-creator>
    <dc:creator>E. Edison Achalma Mendoza</dc:creator>
    <meta:print-date>2021-02-12T14:40:26</meta:print-date>
    <meta:creation-date>1999-02-15T16:07:18</meta:creation-date>
    <dc:date>2022-07-08T21:20:14</dc:date>
    <meta:generator>LibreOffice/24.2.4.2$Linux_X86_64 LibreOffice_project/420$Build-2</meta:generator>
    <meta:document-statistic meta:table-count="9" meta:cell-count="4897" meta:object-count="0"/>
    <meta:user-defined meta:name="AppVersion">16.0300</meta:user-defined>
  </office:meta>
</office:document-meta>
</file>