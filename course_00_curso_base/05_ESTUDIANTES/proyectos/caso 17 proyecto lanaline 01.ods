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2.656cm"/>
    </style:style>
    <style:style style:name="co3" style:family="table-column">
      <style:table-column-properties fo:break-before="auto" style:column-width="0.531cm"/>
    </style:style>
    <style:style style:name="co4" style:family="table-column">
      <style:table-column-properties fo:break-before="auto" style:column-width="7.327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3.888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824cm"/>
    </style:style>
    <style:style style:name="co9" style:family="table-column">
      <style:table-column-properties fo:break-before="auto" style:column-width="1.147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3.803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3.104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1.93cm"/>
    </style:style>
    <style:style style:name="co16" style:family="table-column">
      <style:table-column-properties fo:break-before="auto" style:column-width="1.706cm"/>
    </style:style>
    <style:style style:name="co17" style:family="table-column">
      <style:table-column-properties fo:break-before="auto" style:column-width="6.237cm"/>
    </style:style>
    <style:style style:name="co18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1.873cm"/>
    </style:style>
    <style:style style:name="co20" style:family="table-column">
      <style:table-column-properties fo:break-before="auto" style:column-width="2.014cm"/>
    </style:style>
    <style:style style:name="co21" style:family="table-column">
      <style:table-column-properties fo:break-before="auto" style:column-width="2.798cm"/>
    </style:style>
    <style:style style:name="co22" style:family="table-column">
      <style:table-column-properties fo:break-before="auto" style:column-width="2.769cm"/>
    </style:style>
    <style:style style:name="co23" style:family="table-column">
      <style:table-column-properties fo:break-before="auto" style:column-width="2.069cm"/>
    </style:style>
    <style:style style:name="co24" style:family="table-column">
      <style:table-column-properties fo:break-before="auto" style:column-width="1.958cm"/>
    </style:style>
    <style:style style:name="co25" style:family="table-column">
      <style:table-column-properties fo:break-before="auto" style:column-width="4.083cm"/>
    </style:style>
    <style:style style:name="co26" style:family="table-column">
      <style:table-column-properties fo:break-before="auto" style:column-width="4.279cm"/>
    </style:style>
    <style:style style:name="co27" style:family="table-column">
      <style:table-column-properties fo:break-before="auto" style:column-width="2.713cm"/>
    </style:style>
    <style:style style:name="co28" style:family="table-column">
      <style:table-column-properties fo:break-before="auto" style:column-width="3.664cm"/>
    </style:style>
    <style:style style:name="co29" style:family="table-column">
      <style:table-column-properties fo:break-before="auto" style:column-width="3.3cm"/>
    </style:style>
    <style:style style:name="co30" style:family="table-column">
      <style:table-column-properties fo:break-before="auto" style:column-width="2.21cm"/>
    </style:style>
    <style:style style:name="co31" style:family="table-column">
      <style:table-column-properties fo:break-before="auto" style:column-width="1.007cm"/>
    </style:style>
    <style:style style:name="co32" style:family="table-column">
      <style:table-column-properties fo:break-before="auto" style:column-width="2.993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1.79cm"/>
    </style:style>
    <style:style style:name="co35" style:family="table-column">
      <style:table-column-properties fo:break-before="auto" style:column-width="2.489cm"/>
    </style:style>
    <style:style style:name="co36" style:family="table-column">
      <style:table-column-properties fo:break-before="auto" style:column-width="7.105cm"/>
    </style:style>
    <style:style style:name="co37" style:family="table-column">
      <style:table-column-properties fo:break-before="auto" style:column-width="3.385cm"/>
    </style:style>
    <style:style style:name="co38" style:family="table-column">
      <style:table-column-properties fo:break-before="auto" style:column-width="2.741cm"/>
    </style:style>
    <style:style style:name="co39" style:family="table-column">
      <style:table-column-properties fo:break-before="auto" style:column-width="3.02cm"/>
    </style:style>
    <style:style style:name="co40" style:family="table-column">
      <style:table-column-properties fo:break-before="auto" style:column-width="1.734cm"/>
    </style:style>
    <style:style style:name="co41" style:family="table-column">
      <style:table-column-properties fo:break-before="auto" style:column-width="2.852cm"/>
    </style:style>
    <style:style style:name="co42" style:family="table-column">
      <style:table-column-properties fo:break-before="auto" style:column-width="1.203cm"/>
    </style:style>
    <style:style style:name="co43" style:family="table-column">
      <style:table-column-properties fo:break-before="auto" style:column-width="4.307cm"/>
    </style:style>
    <style:style style:name="co44" style:family="table-column">
      <style:table-column-properties fo:break-before="auto" style:column-width="2.432cm"/>
    </style:style>
    <style:style style:name="co45" style:family="table-column">
      <style:table-column-properties fo:break-before="auto" style:column-width="2.321cm"/>
    </style:style>
    <style:style style:name="co46" style:family="table-column">
      <style:table-column-properties fo:break-before="auto" style:column-width="3.607cm"/>
    </style:style>
    <style:style style:name="co47" style:family="table-column">
      <style:table-column-properties fo:break-before="auto" style:column-width="2.265cm"/>
    </style:style>
    <style:style style:name="co48" style:family="table-column">
      <style:table-column-properties fo:break-before="auto" style:column-width="3.524cm"/>
    </style:style>
    <style:style style:name="co49" style:family="table-column">
      <style:table-column-properties fo:break-before="auto" style:column-width="3.328cm"/>
    </style:style>
    <style:style style:name="co50" style:family="table-column">
      <style:table-column-properties fo:break-before="auto" style:column-width="2.406cm"/>
    </style:style>
    <style:style style:name="co51" style:family="table-column">
      <style:table-column-properties fo:break-before="auto" style:column-width="2.574cm"/>
    </style:style>
    <style:style style:name="co52" style:family="table-column">
      <style:table-column-properties fo:break-before="auto" style:column-width="7.384cm"/>
    </style:style>
    <style:style style:name="co53" style:family="table-column">
      <style:table-column-properties fo:break-before="auto" style:column-width="2.461cm"/>
    </style:style>
    <style:style style:name="co54" style:family="table-column">
      <style:table-column-properties fo:break-before="auto" style:column-width="3.859cm"/>
    </style:style>
    <style:style style:name="co55" style:family="table-column">
      <style:table-column-properties fo:break-before="auto" style:column-width="3.133cm"/>
    </style:style>
    <style:style style:name="co56" style:family="table-column">
      <style:table-column-properties fo:break-before="auto" style:column-width="0.866cm"/>
    </style:style>
    <style:style style:name="co57" style:family="table-column">
      <style:table-column-properties fo:break-before="auto" style:column-width="5.286cm"/>
    </style:style>
    <style:style style:name="co58" style:family="table-column">
      <style:table-column-properties fo:break-before="auto" style:column-width="3.216cm"/>
    </style:style>
    <style:style style:name="co59" style:family="table-column">
      <style:table-column-properties fo:break-before="auto" style:column-width="3.244cm"/>
    </style:style>
    <style:style style:name="co60" style:family="table-column">
      <style:table-column-properties fo:break-before="auto" style:column-width="2.965cm"/>
    </style:style>
    <style:style style:name="co61" style:family="table-column">
      <style:table-column-properties fo:break-before="auto" style:column-width="3.272cm"/>
    </style:style>
    <style:style style:name="co62" style:family="table-column">
      <style:table-column-properties fo:break-before="auto" style:column-width="3.161cm"/>
    </style:style>
    <style:style style:name="co63" style:family="table-column">
      <style:table-column-properties fo:break-before="auto" style:column-width="6.126cm"/>
    </style:style>
    <style:style style:name="co64" style:family="table-column">
      <style:table-column-properties fo:break-before="auto" style:column-width="2.685cm"/>
    </style:style>
    <style:style style:name="co65" style:family="table-column">
      <style:table-column-properties fo:break-before="auto" style:column-width="2.628cm"/>
    </style:style>
    <style:style style:name="co66" style:family="table-column">
      <style:table-column-properties fo:break-before="auto" style:column-width="0.727cm"/>
    </style:style>
    <style:style style:name="co67" style:family="table-column">
      <style:table-column-properties fo:break-before="auto" style:column-width="1.09cm"/>
    </style:style>
    <style:style style:name="co68" style:family="table-column">
      <style:table-column-properties fo:break-before="auto" style:column-width="5.957cm"/>
    </style:style>
    <style:style style:name="co69" style:family="table-column">
      <style:table-column-properties fo:break-before="auto" style:column-width="3.72cm"/>
    </style:style>
    <style:style style:name="co70" style:family="table-column">
      <style:table-column-properties fo:break-before="auto" style:column-width="4.168cm"/>
    </style:style>
    <style:style style:name="co71" style:family="table-column">
      <style:table-column-properties fo:break-before="auto" style:column-width="0.699cm"/>
    </style:style>
    <style:style style:name="co72" style:family="table-column">
      <style:table-column-properties fo:break-before="auto" style:column-width="0.644cm"/>
    </style:style>
    <style:style style:name="co73" style:family="table-column">
      <style:table-column-properties fo:break-before="auto" style:column-width="4.56cm"/>
    </style:style>
    <style:style style:name="co74" style:family="table-column">
      <style:table-column-properties fo:break-before="auto" style:column-width="2.545cm"/>
    </style:style>
    <style:style style:name="co75" style:family="table-column">
      <style:table-column-properties fo:break-before="auto" style:column-width="1.453cm"/>
    </style:style>
    <style:style style:name="co76" style:family="table-column">
      <style:table-column-properties fo:break-before="auto" style:column-width="4.447cm"/>
    </style:style>
    <style:style style:name="co77" style:family="table-column">
      <style:table-column-properties fo:break-before="auto" style:column-width="2.517cm"/>
    </style:style>
    <style:style style:name="co78" style:family="table-column">
      <style:table-column-properties fo:break-before="auto" style:column-width="1.538cm"/>
    </style:style>
    <style:style style:name="co79" style:family="table-column">
      <style:table-column-properties fo:break-before="auto" style:column-width="4.727cm"/>
    </style:style>
    <style:style style:name="co80" style:family="table-column">
      <style:table-column-properties fo:break-before="auto" style:column-width="0.979cm"/>
    </style:style>
    <style:style style:name="co81" style:family="table-column">
      <style:table-column-properties fo:break-before="auto" style:column-width="5.34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212cm" fo:break-before="auto" style:use-optimal-row-height="false"/>
    </style:style>
    <style:style style:name="ro4" style:family="table-row">
      <style:table-row-properties style:row-height="0.159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185cm" fo:break-before="auto" style:use-optimal-row-height="false"/>
    </style:style>
    <style:style style:name="ro10" style:family="table-row">
      <style:table-row-properties style:row-height="0.265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0.132cm" fo:break-before="auto" style:use-optimal-row-height="false"/>
    </style:style>
    <style:style style:name="ro13" style:family="table-row">
      <style:table-row-properties style:row-height="0.794cm" fo:break-before="auto" style:use-optimal-row-height="false"/>
    </style:style>
    <style:style style:name="ro14" style:family="table-row">
      <style:table-row-properties style:row-height="0.106cm" fo:break-before="auto" style:use-optimal-row-height="false"/>
    </style:style>
    <style:style style:name="ro15" style:family="table-row">
      <style:table-row-properties style:row-height="0.953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714cm" fo:break-before="auto" style:use-optimal-row-height="false"/>
    </style:style>
    <style:style style:name="ro18" style:family="table-row">
      <style:table-row-properties style:row-height="0.661cm" fo:break-before="auto" style:use-optimal-row-height="false"/>
    </style:style>
    <style:style style:name="ro19" style:family="table-row">
      <style:table-row-properties style:row-height="0.503cm" fo:break-before="auto" style:use-optimal-row-height="false"/>
    </style:style>
    <style:style style:name="ro20" style:family="table-row">
      <style:table-row-properties style:row-height="0.609cm" fo:break-before="auto" style:use-optimal-row-height="false"/>
    </style:style>
    <style:style style:name="ro21" style:family="table-row">
      <style:table-row-properties style:row-height="0.37cm" fo:break-before="auto" style:use-optimal-row-height="false"/>
    </style:style>
    <style:style style:name="ro22" style:family="table-row">
      <style:table-row-properties style:row-height="0.926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0.695cm" fo:break-before="auto" style:use-optimal-row-height="true"/>
    </style:style>
    <style:style style:name="ro25" style:family="table-row">
      <style:table-row-properties style:row-height="1.27cm" fo:break-before="auto" style:use-optimal-row-height="false"/>
    </style:style>
    <style:style style:name="ro26" style:family="table-row">
      <style:table-row-properties style:row-height="1.614cm" fo:break-before="auto" style:use-optimal-row-height="false"/>
    </style:style>
    <style:style style:name="ro27" style:family="table-row">
      <style:table-row-properties style:row-height="0.635cm" fo:break-before="auto" style:use-optimal-row-height="false"/>
    </style:style>
    <style:style style:name="ta1" style:family="table" style:master-page-name="PageStyle_5f_Resumen">
      <style:table-properties table:display="true" style:writing-mode="lr-tb"/>
    </style:style>
    <style:style style:name="ta2" style:family="table" style:master-page-name="PageStyle_5f_Presupuesto_5f_Ventas">
      <style:table-properties table:display="true" style:writing-mode="lr-tb"/>
    </style:style>
    <style:style style:name="ta3" style:family="table" style:master-page-name="PageStyle_5f_Inversion_5f_Inicial">
      <style:table-properties table:display="true" style:writing-mode="lr-tb"/>
    </style:style>
    <style:style style:name="ta4" style:family="table" style:master-page-name="PageStyle_5f_Deprecion_5f_VR">
      <style:table-properties table:display="true" style:writing-mode="lr-tb"/>
    </style:style>
    <style:style style:name="ta5" style:family="table" style:master-page-name="PageStyle_5f_Capital_5f_Trabajo">
      <style:table-properties table:display="true" style:writing-mode="lr-tb"/>
    </style:style>
    <style:style style:name="ta6" style:family="table" style:master-page-name="PageStyle_5f_Costos_5f_Ventas">
      <style:table-properties table:display="true" style:writing-mode="lr-tb"/>
    </style:style>
    <style:style style:name="ta7" style:family="table" style:master-page-name="PageStyle_5f_Sueldos">
      <style:table-properties table:display="true" style:writing-mode="lr-tb"/>
    </style:style>
    <style:style style:name="ta8" style:family="table" style:master-page-name="PageStyle_5f_Gastos_5f_Operativos">
      <style:table-properties table:display="true" style:writing-mode="lr-tb"/>
    </style:style>
    <style:style style:name="ta9" style:family="table" style:master-page-name="PageStyle_5f_Costos_5f_Unitario">
      <style:table-properties table:display="true" style:writing-mode="lr-tb"/>
    </style:style>
    <style:style style:name="ta10" style:family="table" style:master-page-name="PageStyle_5f_Punto_5f_Equilibrio">
      <style:table-properties table:display="true" style:writing-mode="lr-tb"/>
    </style:style>
    <style:style style:name="ta11" style:family="table" style:master-page-name="PageStyle_5f_Flujo_5f_Deuda">
      <style:table-properties table:display="true" style:writing-mode="lr-tb"/>
    </style:style>
    <style:style style:name="ta12" style:family="table" style:master-page-name="PageStyle_5f_Estado_5f_Resultados">
      <style:table-properties table:display="true" style:writing-mode="lr-tb"/>
    </style:style>
    <style:style style:name="ta13" style:family="table" style:master-page-name="PageStyle_5f_Ku">
      <style:table-properties table:display="true" style:writing-mode="lr-tb"/>
    </style:style>
    <style:style style:name="ta14" style:family="table" style:master-page-name="PageStyle_5f_Ke_5f_Kwacc">
      <style:table-properties table:display="true" style:writing-mode="lr-tb"/>
    </style:style>
    <style:style style:name="ta15" style:family="table" style:master-page-name="PageStyle_5f_Flujo_5f_Caja">
      <style:table-properties table:display="true" style:writing-mode="lr-tb"/>
    </style:style>
    <style:style style:name="ta16" style:family="table" style:master-page-name="PageStyle_5f_IGV">
      <style:table-properties table:display="true" style:writing-mode="lr-tb"/>
    </style:style>
    <style:style style:name="ta17" style:family="table" style:master-page-name="PageStyle_5f_Rentabilidad">
      <style:table-properties table:display="true" style:writing-mode="lr-tb"/>
    </style:style>
    <style:style style:name="ta18" style:family="table" style:master-page-name="PageStyle_5f_Sensibilidad">
      <style:table-properties table:display="true" style:writing-mode="lr-tb"/>
    </style:style>
    <style:style style:name="ta19" style:family="table" style:master-page-name="PageStyle_5f_Resumen_20_del_20_escenario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fo:background-color="#366092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36609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5" style:family="table-cell" style:parent-style-name="Default">
      <style:table-cell-properties fo:border-bottom="none" fo:background-color="#36609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6" style:family="table-cell" style:parent-style-name="Default">
      <style:table-cell-properties fo:border-bottom="none" fo:background-color="#366092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366092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36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135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366092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366092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35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light1" loext:color-type="theme"/>
      </style:text-properties>
    </style:style>
    <style:style style:name="ce32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3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3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36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41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ackground-color="#000000" style:diagonal-bl-tr="none" style:diagonal-tl-br="none" fo:border="none" style:rotation-align="none">
        <loext:background-complex-color loext:theme-type="dark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13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137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 style:data-style-name="N135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135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.873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5" style:family="table-cell" style:parent-style-name="Default">
      <style:table-cell-properties fo:background-color="#b8c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Default">
      <style:table-cell-properties fo:background-color="#b4c6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ackground-color="#b4c6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ackground-color="#b8c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Default">
      <style:table-cell-properties fo:background-color="#b8cce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 style:data-style-name="N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fo:background-color="#b8cce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>
        <loext:char-complex-color loext:theme-type="dark1" loext:color-type="theme"/>
      </style:text-properties>
    </style:style>
    <style:style style:name="ce9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ackground-color="#b8c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>
        <loext:char-complex-color loext:theme-type="dark1" loext:color-type="theme"/>
      </style:text-properties>
    </style:style>
    <style:style style:name="ce9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8" style:family="table-cell" style:parent-style-name="Default" style:data-style-name="N135">
      <style:table-cell-properties fo:background-color="#b4c6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Default" style:data-style-name="N135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135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135">
      <style:table-cell-properties fo:background-color="#b4c6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 style:data-style-name="N135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 style:data-style-name="N135">
      <style:table-cell-properties fo:background-color="#b8cce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 style:data-style-name="N135">
      <style:table-cell-properties fo:background-color="#b8cce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135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13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8" style:family="table-cell" style:parent-style-name="Default" style:data-style-name="N135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9" style:family="table-cell" style:parent-style-name="Default" style:data-style-name="N127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 style:data-style-name="N136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 style:data-style-name="N135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 style:data-style-name="N135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b8c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 style:data-style-name="N4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 style:data-style-name="N4">
      <style:table-cell-properties fo:background-color="#b8c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 style:data-style-name="N4">
      <style:table-cell-properties fo:background-color="#b8c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27" style:family="table-cell" style:parent-style-name="Default" style:data-style-name="N10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9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132" style:family="table-cell" style:parent-style-name="Default">
      <style:table-cell-properties fo:background-color="#b8cce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>
        <loext:char-complex-color loext:theme-type="dark1" loext:color-type="theme"/>
      </style:text-properties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ackground-color="#b8cce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3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7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8" style:family="table-cell" style:parent-style-name="Default" style:data-style-name="N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 style:data-style-name="N4">
      <style:table-cell-properties fo:background-color="#b8cce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4">
      <style:table-cell-properties fo:background-color="#b8cce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Default" style:data-style-name="N4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5" style:family="table-cell" style:parent-style-name="Default" style:data-style-name="N4">
      <style:table-cell-properties fo:background-color="#9fc5e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6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8" style:family="table-cell" style:parent-style-name="Default" style:data-style-name="N4">
      <style:table-cell-properties fo:background-color="#9fc5e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9" style:family="table-cell" style:parent-style-name="Default" style:data-style-name="N4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0" style:family="table-cell" style:parent-style-name="Default" style:data-style-name="N4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1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1.76pt solid #000000" fo:background-color="#d8d8d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6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 style:data-style-name="N4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1.76pt solid #000000" fo:background-color="#d8d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0" style:family="table-cell" style:parent-style-name="Default" style:data-style-name="N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1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3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 style:data-style-name="N4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5" style:family="table-cell" style:parent-style-name="Default" style:data-style-name="N4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>
        <loext:char-complex-color loext:theme-type="dark1" loext:color-type="theme"/>
      </style:text-properties>
    </style:style>
    <style:style style:name="ce166" style:family="table-cell" style:parent-style-name="Default" style:data-style-name="N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7" style:family="table-cell" style:parent-style-name="Default">
      <style:table-cell-properties fo:border-bottom="1.76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8" style:family="table-cell" style:parent-style-name="Default" style:data-style-name="N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9" style:family="table-cell" style:parent-style-name="Default" style:data-style-name="N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d6e3b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>
      <style:table-cell-properties fo:background-color="#d6e3b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 style:data-style-name="N4">
      <style:table-cell-properties fo:background-color="#d6e3b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1.76pt solid #000000" fo:background-color="#b8cce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 style:data-style-name="N3">
      <style:table-cell-properties fo:border-bottom="0.74pt solid #000000" fo:background-color="#e7e6e6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Default" style:data-style-name="N3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 style:data-style-name="N3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Default" style:data-style-name="N3">
      <style:table-cell-properties fo:border-bottom="1.76pt solid #000000" fo:background-color="#d9e1f2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>
      <style:table-cell-properties fo:border-bottom="1.76pt solid #000000" fo:background-color="#b8cce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 style:data-style-name="N3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8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>
      <style:table-cell-properties fo:border-bottom="1.76pt solid #000000" fo:background-color="#b8cce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 style:data-style-name="N4">
      <style:table-cell-properties fo:background-color="#e7e6e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 style:data-style-name="N4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 style:data-style-name="N4">
      <style:table-cell-properties fo:border-bottom="1.76pt solid #000000" fo:background-color="#d9e1f2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fo:border-bottom="1.76pt solid #000000" fo:background-color="#b8cce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 style:data-style-name="N135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 style:data-style-name="N135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8" style:family="table-cell" style:parent-style-name="Default" style:data-style-name="N3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4">
      <style:table-cell-properties fo:background-color="#e7e6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 style:data-style-name="N3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Default">
      <style:table-cell-properties fo:border-bottom="1.76pt solid #000000" fo:background-color="#b8cce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Default" style:data-style-name="N4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fo:border-bottom="1.76pt solid #000000" fo:background-color="#b8cce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Default" style:data-style-name="N138">
      <style:table-cell-properties fo:border-bottom="0.74pt solid #000000" fo:background-color="#e7e6e6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Default" style:data-style-name="N138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Default" style:data-style-name="N138">
      <style:table-cell-properties fo:border-bottom="0.74pt solid #000000" fo:background-color="#d9e1f2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Default">
      <style:table-cell-properties fo:border-bottom="1.76pt solid #000000" fo:background-color="#b8cce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13" style:family="table-cell" style:parent-style-name="Default" style:data-style-name="N4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Default" style:data-style-name="N135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Default" style:data-style-name="N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Default" style:data-style-name="N3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Default" style:data-style-name="N138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Default">
      <style:table-cell-properties fo:background-color="#d8d8d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0.74pt solid #000000" fo:background-color="#b4c6e7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Default">
      <style:table-cell-properties fo:border-bottom="0.74pt solid #000000" fo:background-color="#b4c6e7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fo:background-color="#d8d8d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29" style:family="table-cell" style:parent-style-name="Default" style:data-style-name="N147">
      <style:table-cell-properties fo:background-color="#b4c6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30" style:family="table-cell" style:parent-style-name="Default" style:data-style-name="N147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Default" style:data-style-name="N147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147">
      <style:table-cell-properties fo:background-color="#b4c6e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33" style:family="table-cell" style:parent-style-name="Default" style:data-style-name="N147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34" style:family="table-cell" style:parent-style-name="Default" style:data-style-name="N147">
      <style:table-cell-properties fo:background-color="#d8d8d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Default" style:data-style-name="N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Default" style:data-style-name="N133">
      <style:table-cell-properties fo:background-color="#b4c6e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Default" style:data-style-name="N0">
      <style:table-cell-properties fo:background-color="#b4c6e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2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3" style:family="table-cell" style:parent-style-name="Default" style:data-style-name="N14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4" style:family="table-cell" style:parent-style-name="Default" style:data-style-name="N147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5" style:family="table-cell" style:parent-style-name="Default" style:data-style-name="N147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6" style:family="table-cell" style:parent-style-name="Default">
      <style:table-cell-properties fo:border-bottom="none" fo:background-color="#b8cce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7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8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Default" style:data-style-name="N3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1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2" style:family="table-cell" style:parent-style-name="Default" style:data-style-name="N3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 style:data-style-name="N3">
      <style:table-cell-properties fo:border-bottom="none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Default" style:data-style-name="N3">
      <style:table-cell-properties fo:border-bottom="1.76pt solid #000000" fo:background-color="#b8cce4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Default">
      <style:table-cell-properties fo:border-bottom="1.76pt solid #000000" fo:background-color="#b8cce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8" style:family="table-cell" style:parent-style-name="Default">
      <style:table-cell-properties fo:border-bottom="none" fo:background-color="#b8cce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9" style:family="table-cell" style:parent-style-name="Default" style:data-style-name="N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Default" style:data-style-name="N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 style:data-style-name="N4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Default" style:data-style-name="N4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3" style:family="table-cell" style:parent-style-name="Default" style:data-style-name="N4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 style:data-style-name="N4">
      <style:table-cell-properties fo:border-bottom="1.76pt solid #000000" fo:background-color="#b8cce4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Default">
      <style:table-cell-properties fo:border-bottom="1.76pt solid #000000" fo:background-color="#b8cce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7" style:family="table-cell" style:parent-style-name="Default" style:data-style-name="N127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Default">
      <style:table-cell-properties fo:border-bottom="none" fo:background-color="#b8cce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 style:data-style-name="N3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Default" style:data-style-name="N3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 style:data-style-name="N3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75" style:family="table-cell" style:parent-style-name="Default">
      <style:table-cell-properties fo:border-bottom="1.76pt solid #000000" fo:background-color="#b8cce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76" style:family="table-cell" style:parent-style-name="Default" style:data-style-name="N4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 style:data-style-name="N4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 style:data-style-name="N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79" style:family="table-cell" style:parent-style-name="Default" style:data-style-name="N4">
      <style:table-cell-properties fo:border-bottom="1.76pt solid #000000" fo:background-color="#b4c6e7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order-bottom="1.76pt solid #000000" fo:background-color="#b8cce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 style:data-style-name="N4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 style:data-style-name="N140">
      <style:table-cell-properties fo:border-bottom="none" fo:background-color="#b8cce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83" style:family="table-cell" style:parent-style-name="Default" style:data-style-name="N14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Default" style:data-style-name="N140">
      <style:table-cell-properties fo:background-color="#b8cce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85" style:family="table-cell" style:parent-style-name="Default">
      <style:table-cell-properties fo:border-bottom="none" fo:background-color="#b8cce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 style:data-style-name="N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 style:data-style-name="N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Default" style:data-style-name="N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90" style:family="table-cell" style:parent-style-name="Default" style:data-style-name="N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91" style:family="table-cell" style:parent-style-name="Default" style:data-style-name="N4">
      <style:table-cell-properties fo:border-bottom="0.74pt solid #000000" fo:background-color="#b4c6e7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 style:data-style-name="N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>
      <style:table-cell-properties fo:background-color="#99cc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Default">
      <style:table-cell-properties fo:border-bottom="0.74pt solid #000000" fo:background-color="#d8d8d8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9" style:family="table-cell" style:parent-style-name="Default">
      <style:table-cell-properties fo:border-bottom="0.74pt solid #000000" fo:background-color="#d8d8d8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0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Default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fo:border-bottom="1.76pt solid #000000" fo:background-color="#d8d8d8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Default" style:data-style-name="N135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7" style:family="table-cell" style:parent-style-name="Default" style:data-style-name="N135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Default" style:data-style-name="N135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Default" style:data-style-name="N135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Default" style:data-style-name="N135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11" style:family="table-cell" style:parent-style-name="Default" style:data-style-name="N2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12" style:family="table-cell" style:parent-style-name="Default" style:data-style-name="N135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13" style:family="table-cell" style:parent-style-name="Default" style:data-style-name="N2">
      <style:table-cell-properties fo:border-bottom="1.76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14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Default" style:data-style-name="N138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Default" style:data-style-name="N138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8" style:family="table-cell" style:parent-style-name="Default" style:data-style-name="N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20" style:family="table-cell" style:parent-style-name="Default">
      <style:table-cell-properties fo:background-color="#fbd4b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2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29" style:family="table-cell" style:parent-style-name="Default" style:data-style-name="N137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Default" style:data-style-name="N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34" style:family="table-cell" style:parent-style-name="Default" style:data-style-name="N2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Default" style:data-style-name="N137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37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Default" style:data-style-name="N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Default" style:data-style-name="N2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42" style:family="table-cell" style:parent-style-name="Default" style:data-style-name="N2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Default" style:data-style-name="N139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Default" style:data-style-name="N13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Default" style:data-style-name="N13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48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9" style:family="table-cell" style:parent-style-name="Default" style:data-style-name="N2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52" style:family="table-cell" style:parent-style-name="Default">
      <style:table-cell-properties fo:background-color="#b8c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3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358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9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1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Default" style:data-style-name="N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Default" style:data-style-name="N13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 style:data-style-name="N1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 style:data-style-name="N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Default">
      <style:table-cell-properties fo:background-color="#b8cce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67" style:family="table-cell" style:parent-style-name="Default">
      <style:table-cell-properties fo:border-bottom="none" fo:background-color="#b8cce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70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72" style:family="table-cell" style:parent-style-name="Default">
      <style:table-cell-properties fo:border-bottom="none" fo:background-color="#b8cce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73" style:family="table-cell" style:parent-style-name="Default" style:data-style-name="N148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74" style:family="table-cell" style:parent-style-name="Default" style:data-style-name="N14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 style:data-style-name="N14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Default" style:data-style-name="N14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77" style:family="table-cell" style:parent-style-name="Default" style:data-style-name="N148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 style:data-style-name="N148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79" style:family="table-cell" style:parent-style-name="Default" style:data-style-name="N148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80" style:family="table-cell" style:parent-style-name="Default" style:data-style-name="N148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 style:data-style-name="N148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8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139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 style:data-style-name="N139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fo:background-color="#95b3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7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Default" style:data-style-name="N1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Default" style:data-style-name="N1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90" style:family="table-cell" style:parent-style-name="Default">
      <style:table-cell-properties fo:background-color="#b8cce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91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94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95" style:family="table-cell" style:parent-style-name="Default" style:data-style-name="N1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Default" style:data-style-name="N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Default" style:data-style-name="N11">
      <style:table-cell-properties fo:border-bottom="1.76pt double-thin #000000" style:border-line-width-bottom="0.018cm 0.026cm 0.018cm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Default" style:data-style-name="N2">
      <style:table-cell-properties fo:border-bottom="1.76pt double-thin #000000" style:border-line-width-bottom="0.018cm 0.026cm 0.018cm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Default" style:data-style-name="N10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Default" style:data-style-name="N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05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07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08" style:family="table-cell" style:parent-style-name="Default" style:data-style-name="N14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Default" style:data-style-name="N14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Default" style:data-style-name="N14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11" style:family="table-cell" style:parent-style-name="Default" style:data-style-name="N14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Default" style:data-style-name="N141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13" style:family="table-cell" style:parent-style-name="Default" style:data-style-name="N135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Default" style:data-style-name="N135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17" style:family="table-cell" style:parent-style-name="Default">
      <style:table-cell-properties fo:border-bottom="1.76pt solid #000000" fo:background-color="#b8cce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18" style:family="table-cell" style:parent-style-name="Default" style:data-style-name="N139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19" style:family="table-cell" style:parent-style-name="Default" style:data-style-name="N139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Default" style:data-style-name="N139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21" style:family="table-cell" style:parent-style-name="Default" style:data-style-name="N139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22" style:family="table-cell" style:parent-style-name="Default" style:data-style-name="N139">
      <style:table-cell-properties fo:border-bottom="1.76pt solid #000000" fo:background-color="#b8cce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23" style:family="table-cell" style:parent-style-name="Default" style:data-style-name="N139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24" style:family="table-cell" style:parent-style-name="Default" style:data-style-name="N139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25" style:family="table-cell" style:parent-style-name="Default" style:data-style-name="N139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26" style:family="table-cell" style:parent-style-name="Default" style:data-style-name="N139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27" style:family="table-cell" style:parent-style-name="Default" style:data-style-name="N139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28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29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0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3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4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34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Default" style:data-style-name="N1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6" style:family="table-cell" style:parent-style-name="Default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Default" style:data-style-name="N143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Default" style:data-style-name="N13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2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Default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Default" style:data-style-name="N14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448" style:family="table-cell" style:parent-style-name="Default" style:data-style-name="N13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4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1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52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3" style:family="table-cell" style:parent-style-name="Default" style:data-style-name="N14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54" style:family="table-cell" style:parent-style-name="Default" style:data-style-name="N13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55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5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57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8" style:family="table-cell" style:parent-style-name="Default" style:data-style-name="N14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59" style:family="table-cell" style:parent-style-name="Default" style:data-style-name="N14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6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61" style:family="table-cell" style:parent-style-name="Default" style:data-style-name="N3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63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64" style:family="table-cell" style:parent-style-name="Default">
      <style:table-cell-properties fo:background-color="#b8cce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65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Default">
      <style:table-cell-properties fo:background-color="#e5dfe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67" style:family="table-cell" style:parent-style-name="Default" style:data-style-name="N145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Default" style:data-style-name="N145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69" style:family="table-cell" style:parent-style-name="Default" style:data-style-name="N145">
      <style:table-cell-properties fo:border-bottom="0.74pt solid #000000" fo:background-color="#fbd4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70" style:family="table-cell" style:parent-style-name="Default" style:data-style-name="N145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1" style:family="table-cell" style:parent-style-name="Default">
      <style:table-cell-properties fo:border-bottom="1.76pt solid #000000" fo:background-color="#e5df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72" style:family="table-cell" style:parent-style-name="Default" style:data-style-name="N145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Default" style:data-style-name="N145">
      <style:table-cell-properties fo:background-color="#fbd4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74" style:family="table-cell" style:parent-style-name="Default">
      <style:table-cell-properties fo:background-color="#b8c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75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Default">
      <style:table-cell-properties fo:border-bottom="1.76pt solid #000000" fo:background-color="#b8cce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77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Default" style:data-style-name="N135">
      <style:table-cell-properties fo:background-color="#fbd4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9" style:family="table-cell" style:parent-style-name="Default" style:data-style-name="N135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135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83" style:family="table-cell" style:parent-style-name="Default" style:data-style-name="N1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84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Default" style:data-style-name="N11">
      <style:table-cell-properties fo:background-color="#fbd4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86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13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89" style:family="table-cell" style:parent-style-name="Default" style:data-style-name="N14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90" style:family="table-cell" style:parent-style-name="Default">
      <style:table-cell-properties fo:border-bottom="1.76pt solid #000000" fo:background-color="#b8cce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91" style:family="table-cell" style:parent-style-name="Default" style:data-style-name="N1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92" style:family="table-cell" style:parent-style-name="Default" style:data-style-name="N1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93" style:family="table-cell" style:parent-style-name="Default" style:data-style-name="N11">
      <style:table-cell-properties fo:border-bottom="0.74pt solid #000000" fo:background-color="#fbd4b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94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9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9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9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9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0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50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50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503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 style:data-style-name="N14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07" style:family="table-cell" style:parent-style-name="Default" style:data-style-name="N14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508" style:family="table-cell" style:parent-style-name="Default" style:data-style-name="N14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09" style:family="table-cell" style:parent-style-name="Default" style:data-style-name="N14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510" style:family="table-cell" style:parent-style-name="Default" style:data-style-name="N13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11" style:family="table-cell" style:parent-style-name="Default">
      <style:table-cell-properties fo:border-bottom="none" fo:background-color="#b8cce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12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1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15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9" style:family="table-cell" style:parent-style-name="Default">
      <style:table-cell-properties fo:border-bottom="none" fo:background-color="#b8cce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20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5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2" style:family="table-cell" style:parent-style-name="Default" style:data-style-name="N135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3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4" style:family="table-cell" style:parent-style-name="Default" style:data-style-name="N11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6" style:family="table-cell" style:parent-style-name="Default" style:data-style-name="N135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Symbol"/>
    </style:style>
    <style:style style:name="T3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Times New Roman" style:font-name-complex="Times New Roman" style:text-position="sub 58%"/>
    </style:style>
    <style:style style:name="T5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999999999999945"/>
      </table:calculation-settings>
      <table:table table:name="Resum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column table:style-name="co8" table:number-columns-repeated="16358" table:default-cell-style-name="Default"/>
        <table:table-row table:style-name="ro1" table:number-rows-repeated="13">
          <table:table-cell table:style-name="ce1" table:number-columns-repeated="26"/>
          <table:table-cell table:number-columns-repeated="16358"/>
        </table:table-row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MODELO FINANCIERO</text:p>
          </table:table-cell>
          <table:covered-table-cell table:number-columns-repeated="2" table:style-name="ce10"/>
          <table:covered-table-cell table:style-name="ce20"/>
          <table:table-cell table:style-name="ce1"/>
          <table:table-cell table:style-name="ce29" office:value-type="string" calcext:value-type="string">
            <text:p>Inflacion USA</text:p>
          </table:table-cell>
          <table:table-cell table:style-name="ce32" office:value-type="percentage" office:value="0.02" calcext:value-type="percentage">
            <text:p>2 %</text:p>
          </table:table-cell>
          <table:table-cell table:style-name="ce37" office:value-type="string" calcext:value-type="string">
            <text:p>Nominal anual</text:p>
          </table:table-cell>
          <table:table-cell table:style-name="ce1" table:number-columns-repeated="17"/>
          <table:table-cell table:number-columns-repeated="16358"/>
        </table:table-row>
        <table:table-row table:style-name="ro1">
          <table:table-cell table:style-name="ce1"/>
          <table:table-cell table:style-name="ce3"/>
          <table:table-cell table:style-name="ce11" table:number-columns-repeated="2"/>
          <table:table-cell table:style-name="ce21"/>
          <table:table-cell table:style-name="ce1"/>
          <table:table-cell table:style-name="ce29" office:value-type="string" calcext:value-type="string">
            <text:p>Inflacion Peru</text:p>
          </table:table-cell>
          <table:table-cell table:style-name="ce33" office:value-type="percentage" office:value="0.029" calcext:value-type="percentage">
            <text:p>2.9%</text:p>
          </table:table-cell>
          <table:table-cell table:style-name="ce37" office:value-type="string" calcext:value-type="string">
            <text:p>Nominal anual</text:p>
          </table:table-cell>
          <table:table-cell table:style-name="ce1" table:number-columns-repeated="17"/>
          <table:table-cell table:number-columns-repeated="16358"/>
        </table:table-row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EVALUACION ECONOMICA</text:p>
          </table:table-cell>
          <table:covered-table-cell table:number-columns-repeated="2" table:style-name="ce12"/>
          <table:covered-table-cell table:style-name="ce22"/>
          <table:table-cell table:style-name="ce1"/>
          <table:table-cell table:style-name="ce29" office:value-type="string" calcext:value-type="string">
            <text:p>Horizonte Evaluación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string" calcext:value-type="string">
            <text:p>Años</text:p>
          </table:table-cell>
          <table:table-cell table:style-name="ce1" table:number-columns-repeated="17"/>
          <table:table-cell table:number-columns-repeated="16358"/>
        </table:table-row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Y FINANCIERA DE INVERSIONES</text:p>
          </table:table-cell>
          <table:covered-table-cell table:number-columns-repeated="2" table:style-name="ce12"/>
          <table:covered-table-cell table:style-name="ce22"/>
          <table:table-cell table:style-name="ce1"/>
          <table:table-cell table:style-name="ce29" office:value-type="string" calcext:value-type="string">
            <text:p>TEA</text:p>
          </table:table-cell>
          <table:table-cell table:style-name="ce32" office:value-type="percentage" office:value="0.22" calcext:value-type="percentage">
            <text:p>22 %</text:p>
          </table:table-cell>
          <table:table-cell table:style-name="ce38"/>
          <table:table-cell table:style-name="ce1" table:number-columns-repeated="17"/>
          <table:table-cell table:number-columns-repeated="16358"/>
        </table:table-row>
        <table:table-row table:style-name="ro1">
          <table:table-cell table:style-name="ce1"/>
          <table:table-cell table:style-name="ce4" table:number-columns-spanned="4" table:number-rows-spanned="1"/>
          <table:covered-table-cell table:number-columns-repeated="2" table:style-name="ce12"/>
          <table:covered-table-cell table:style-name="ce22"/>
          <table:table-cell table:style-name="ce1"/>
          <table:table-cell table:style-name="ce29" office:value-type="string" calcext:value-type="string">
            <text:p>Impuesto</text:p>
          </table:table-cell>
          <table:table-cell table:style-name="ce33" office:value-type="percentage" office:value="0.015" calcext:value-type="percentage">
            <text:p>1.5%</text:p>
          </table:table-cell>
          <table:table-cell table:style-name="ce37" office:value-type="string" calcext:value-type="string">
            <text:p>Régimen Especial</text:p>
          </table:table-cell>
          <table:table-cell table:style-name="ce1" table:number-columns-repeated="17"/>
          <table:table-cell table:number-columns-repeated="16358"/>
        </table:table-row>
        <table:table-row table:style-name="ro1">
          <table:table-cell table:style-name="ce1"/>
          <table:table-cell table:style-name="ce6"/>
          <table:table-cell table:style-name="ce13" table:number-columns-repeated="2"/>
          <table:table-cell table:style-name="ce23"/>
          <table:table-cell table:style-name="ce1"/>
          <table:table-cell table:style-name="ce30" office:value-type="string" calcext:value-type="string">
            <text:p>SIS</text:p>
          </table:table-cell>
          <table:table-cell table:style-name="ce34" office:value-type="float" office:value="15" calcext:value-type="float">
            <text:p>S/15.00</text:p>
          </table:table-cell>
          <table:table-cell table:style-name="ce37"/>
          <table:table-cell table:style-name="ce1" table:number-columns-repeated="17"/>
          <table:table-cell table:number-columns-repeated="16358"/>
        </table:table-row>
        <table:table-row table:style-name="ro1">
          <table:table-cell table:style-name="ce1"/>
          <table:table-cell table:style-name="ce7" office:value-type="string" calcext:value-type="string">
            <text:p>VANE</text:p>
          </table:table-cell>
          <table:table-cell table:style-name="ce14" table:formula="of:=[$Rentabilidad.D13]" office:value-type="float" office:value="-425149.614516734" calcext:value-type="float">
            <text:p>-S/425,149.61</text:p>
          </table:table-cell>
          <table:table-cell table:style-name="ce17" office:value-type="string" calcext:value-type="string">
            <text:p>VANF</text:p>
          </table:table-cell>
          <table:table-cell table:style-name="ce24" table:formula="of:=[$Rentabilidad.D26]" office:value-type="float" office:value="-420352.233799845" calcext:value-type="float">
            <text:p>-S/420,352.23</text:p>
          </table:table-cell>
          <table:table-cell table:style-name="ce27"/>
          <table:table-cell table:style-name="ce29" office:value-type="string" calcext:value-type="string">
            <text:p>Precio venta ovillo</text:p>
          </table:table-cell>
          <table:table-cell table:style-name="ce34" office:value-type="float" office:value="6" calcext:value-type="float">
            <text:p>S/6.00</text:p>
          </table:table-cell>
          <table:table-cell table:style-name="ce37"/>
          <table:table-cell table:style-name="ce1" table:number-columns-repeated="17"/>
          <table:table-cell table:number-columns-repeated="16358"/>
        </table:table-row>
        <table:table-row table:style-name="ro1">
          <table:table-cell table:style-name="ce1"/>
          <table:table-cell table:style-name="ce8"/>
          <table:table-cell table:style-name="ce15"/>
          <table:table-cell table:style-name="ce18"/>
          <table:table-cell table:style-name="ce25"/>
          <table:table-cell table:style-name="ce1"/>
          <table:table-cell table:style-name="ce29" office:value-type="string" calcext:value-type="string">
            <text:p>Precio compra ovillo</text:p>
          </table:table-cell>
          <table:table-cell table:style-name="ce34" office:value-type="float" office:value="4" calcext:value-type="float">
            <text:p>S/4.00</text:p>
          </table:table-cell>
          <table:table-cell table:style-name="ce39"/>
          <table:table-cell table:style-name="ce1" table:number-columns-repeated="17"/>
          <table:table-cell table:number-columns-repeated="16358"/>
        </table:table-row>
        <table:table-row table:style-name="ro1">
          <table:table-cell table:style-name="ce1"/>
          <table:table-cell table:style-name="ce9" office:value-type="string" calcext:value-type="string">
            <text:p>TIRE</text:p>
          </table:table-cell>
          <table:table-cell table:style-name="ce16" table:formula="of:=[$Rentabilidad.D15]" office:value-type="percentage" office:value="-0.645513633860833" calcext:value-type="percentage">
            <text:p>-64.55 %</text:p>
          </table:table-cell>
          <table:table-cell table:style-name="ce19" office:value-type="string" calcext:value-type="string">
            <text:p>TIRF</text:p>
          </table:table-cell>
          <table:table-cell table:style-name="ce26" table:formula="of:=[$Rentabilidad.D28]" office:value-type="percentage" office:value="-0.678907716542367" calcext:value-type="percentage">
            <text:p>-67.89 %</text:p>
          </table:table-cell>
          <table:table-cell table:style-name="ce28"/>
          <table:table-cell table:style-name="ce15"/>
          <table:table-cell table:style-name="ce35"/>
          <table:table-cell table:style-name="ce37"/>
          <table:table-cell table:style-name="ce1" table:number-columns-repeated="17"/>
          <table:table-cell table:number-columns-repeated="16358"/>
        </table:table-row>
        <table:table-row table:style-name="ro1">
          <table:table-cell table:style-name="ce1" table:number-columns-repeated="6"/>
          <table:table-cell table:style-name="ce31" office:value-type="string" calcext:value-type="string">
            <text:p>(*) Variable tentativa para hacer pruebas</text:p>
          </table:table-cell>
          <table:table-cell table:style-name="ce36"/>
          <table:table-cell table:style-name="ce40"/>
          <table:table-cell table:style-name="ce1" table:number-columns-repeated="17"/>
          <table:table-cell table:number-columns-repeated="16358"/>
        </table:table-row>
        <table:table-row table:style-name="ro1">
          <table:table-cell table:style-name="ce1" table:number-columns-repeated="26"/>
          <table:table-cell table:number-columns-repeated="16358"/>
        </table:table-row>
        <table:table-row table:style-name="ro1" table:number-rows-repeated="976">
          <table:table-cell table:style-name="ce1" table:number-columns-repeated="26"/>
          <table:table-cell table:number-columns-repeated="16358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Cantidad_porcentual_de_ovillos_vendidos" table:base-cell-address="$Resumen.$A$1" table:cell-range-address="$Resumen.$H$22"/>
          <table:named-range table:name="Precio_compra_ovillo" table:base-cell-address="$Resumen.$A$1" table:cell-range-address="$Resumen.$H$21"/>
          <table:named-range table:name="Precio_venta_ovillo" table:base-cell-address="$Resumen.$A$1" table:cell-range-address="$Resumen.$H$20"/>
          <table:named-range table:name="TIRE" table:base-cell-address="$Resumen.$A$1" table:cell-range-address="$Resumen.$C$22"/>
          <table:named-range table:name="TIRF" table:base-cell-address="$Resumen.$A$1" table:cell-range-address="$Resumen.$E$22"/>
          <table:named-range table:name="VANE" table:base-cell-address="$Resumen.$A$1" table:cell-range-address="$Resumen.$C$20"/>
          <table:named-range table:name="VANF" table:base-cell-address="$Resumen.$A$1" table:cell-range-address="$Resumen.$E$20"/>
        </table:named-expressions>
      </table:table>
      <table:table table:name="Presupuesto_Venta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number-columns-repeated="13" table:default-cell-style-name="Default"/>
        <table:table-column table:style-name="co8" table:number-columns-repeated="16352" table:default-cell-style-name="Default"/>
        <table:table-row table:style-name="ro1">
          <table:table-cell table:style-name="ce41" table:number-columns-repeated="3"/>
          <table:table-cell table:style-name="ce56" table:number-columns-repeated="13"/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2"/>
          <table:table-cell table:style-name="ce45" office:value-type="string" calcext:value-type="string" table:number-columns-spanned="14" table:number-rows-spanned="1">
            <text:p>CUADRO N° 01</text:p>
          </table:table-cell>
          <table:covered-table-cell table:number-columns-repeated="13" table:style-name="ce12"/>
          <table:table-cell table:style-name="ce41" table:number-columns-repeated="16"/>
          <table:table-cell table:style-name="ce45"/>
          <table:table-cell table:number-columns-repeated="16351"/>
        </table:table-row>
        <table:table-row table:style-name="ro3">
          <table:table-cell table:style-name="ce41" table:number-columns-repeated="2"/>
          <table:table-cell table:style-name="ce50"/>
          <table:table-cell table:style-name="ce56" table:number-columns-repeated="13"/>
          <table:table-cell table:style-name="ce41" table:number-columns-repeated="16"/>
          <table:table-cell table:style-name="ce50"/>
          <table:table-cell table:number-columns-repeated="16351"/>
        </table:table-row>
        <table:table-row table:style-name="ro1">
          <table:table-cell table:style-name="ce41" table:number-columns-repeated="2"/>
          <table:table-cell table:style-name="ce46" office:value-type="string" calcext:value-type="string" table:number-columns-spanned="14" table:number-rows-spanned="1">
            <text:p>PROYECCIÓN DE VENTAS EN UNIDADES</text:p>
          </table:table-cell>
          <table:covered-table-cell table:number-columns-repeated="13" table:style-name="ce12"/>
          <table:table-cell table:style-name="ce41" table:number-columns-repeated="16"/>
          <table:table-cell table:style-name="ce45"/>
          <table:table-cell table:number-columns-repeated="16351"/>
        </table:table-row>
        <table:table-row table:style-name="ro4">
          <table:table-cell table:style-name="ce41" table:number-columns-repeated="2"/>
          <table:table-cell table:style-name="ce50"/>
          <table:table-cell table:style-name="ce56" table:number-columns-repeated="13"/>
          <table:table-cell table:style-name="ce41" table:number-columns-repeated="16"/>
          <table:table-cell table:style-name="ce50"/>
          <table:table-cell table:number-columns-repeated="16351"/>
        </table:table-row>
        <table:table-row table:style-name="ro5">
          <table:table-cell table:style-name="ce41"/>
          <table:table-cell table:style-name="ce42" office:value-type="string" calcext:value-type="string">
            <text:p>Año</text:p>
          </table:table-cell>
          <table:table-cell table:style-name="ce51" office:value-type="string" calcext:value-type="string">
            <text:p>Productos</text:p>
          </table:table-cell>
          <table:table-cell table:style-name="ce42" office:value-type="string" calcext:value-type="string">
            <text:p>Mes 1</text:p>
          </table:table-cell>
          <table:table-cell table:style-name="ce42" office:value-type="string" calcext:value-type="string">
            <text:p>Mes 2</text:p>
          </table:table-cell>
          <table:table-cell table:style-name="ce42" office:value-type="string" calcext:value-type="string">
            <text:p>Mes 3</text:p>
          </table:table-cell>
          <table:table-cell table:style-name="ce42" office:value-type="string" calcext:value-type="string">
            <text:p>Mes 4</text:p>
          </table:table-cell>
          <table:table-cell table:style-name="ce42" office:value-type="string" calcext:value-type="string">
            <text:p>Mes 5</text:p>
          </table:table-cell>
          <table:table-cell table:style-name="ce42" office:value-type="string" calcext:value-type="string">
            <text:p>Mes 6</text:p>
          </table:table-cell>
          <table:table-cell table:style-name="ce42" office:value-type="string" calcext:value-type="string">
            <text:p>Mes 7</text:p>
          </table:table-cell>
          <table:table-cell table:style-name="ce42" office:value-type="string" calcext:value-type="string">
            <text:p>Mes 8</text:p>
          </table:table-cell>
          <table:table-cell table:style-name="ce42" office:value-type="string" calcext:value-type="string">
            <text:p>Mes 9</text:p>
          </table:table-cell>
          <table:table-cell table:style-name="ce42" office:value-type="string" calcext:value-type="string">
            <text:p>Mes 10</text:p>
          </table:table-cell>
          <table:table-cell table:style-name="ce42" office:value-type="string" calcext:value-type="string">
            <text:p>Mes 11</text:p>
          </table:table-cell>
          <table:table-cell table:style-name="ce42" office:value-type="string" calcext:value-type="string">
            <text:p>Mes 12</text:p>
          </table:table-cell>
          <table:table-cell table:style-name="ce42" office:value-type="string" calcext:value-type="string">
            <text:p>TOTAL</text:p>
          </table:table-cell>
          <table:table-cell table:style-name="ce68"/>
          <table:table-cell table:style-name="ce41" table:number-columns-repeated="16"/>
          <table:table-cell table:number-columns-repeated="16351"/>
        </table:table-row>
        <table:table-row table:style-name="ro2"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52" office:value-type="string" calcext:value-type="string">
            <text:p>Ovillo de fibra sintética</text:p>
          </table:table-cell>
          <table:table-cell table:style-name="ce57" table:formula="of:=[.D29]+[.D29]*[$Resumen.$H$20]" office:value-type="float" office:value="24500" calcext:value-type="float">
            <text:p>24,500</text:p>
          </table:table-cell>
          <table:table-cell table:style-name="ce57" table:formula="of:=[.E29]+[.E29]*[$Resumen.$H$20]" office:value-type="float" office:value="24500" calcext:value-type="float">
            <text:p>24,500</text:p>
          </table:table-cell>
          <table:table-cell table:style-name="ce57" table:formula="of:=[.F29]+[.F29]*[$Resumen.$H$20]" office:value-type="float" office:value="24500" calcext:value-type="float">
            <text:p>24,500</text:p>
          </table:table-cell>
          <table:table-cell table:style-name="ce57" table:formula="of:=[.G29]+[.G29]*[$Resumen.$H$20]" office:value-type="float" office:value="28000" calcext:value-type="float">
            <text:p>28,000</text:p>
          </table:table-cell>
          <table:table-cell table:style-name="ce57" table:formula="of:=[.H29]+[.H29]*[$Resumen.$H$20]" office:value-type="float" office:value="28000" calcext:value-type="float">
            <text:p>28,000</text:p>
          </table:table-cell>
          <table:table-cell table:style-name="ce57" table:formula="of:=[.I29]+[.I29]*[$Resumen.$H$20]" office:value-type="float" office:value="28000" calcext:value-type="float">
            <text:p>28,000</text:p>
          </table:table-cell>
          <table:table-cell table:style-name="ce57" table:formula="of:=[.J29]+[.J29]*[$Resumen.$H$20]" office:value-type="float" office:value="31500" calcext:value-type="float">
            <text:p>31,500</text:p>
          </table:table-cell>
          <table:table-cell table:style-name="ce57" table:formula="of:=[.K29]+[.K29]*[$Resumen.$H$20]" office:value-type="float" office:value="31500" calcext:value-type="float">
            <text:p>31,500</text:p>
          </table:table-cell>
          <table:table-cell table:style-name="ce57" table:formula="of:=[.L29]+[.L29]*[$Resumen.$H$20]" office:value-type="float" office:value="31500" calcext:value-type="float">
            <text:p>31,500</text:p>
          </table:table-cell>
          <table:table-cell table:style-name="ce57" table:formula="of:=[.M29]+[.M29]*[$Resumen.$H$20]" office:value-type="float" office:value="31500" calcext:value-type="float">
            <text:p>31,500</text:p>
          </table:table-cell>
          <table:table-cell table:style-name="ce57" table:formula="of:=[.N29]+[.N29]*[$Resumen.$H$20]" office:value-type="float" office:value="24500" calcext:value-type="float">
            <text:p>24,500</text:p>
          </table:table-cell>
          <table:table-cell table:style-name="ce57" table:formula="of:=[.O29]+[.O29]*[$Resumen.$H$20]" office:value-type="float" office:value="24500" calcext:value-type="float">
            <text:p>24,500</text:p>
          </table:table-cell>
          <table:table-cell table:style-name="ce57" table:formula="of:=SUM([.D7:.O7])" office:value-type="float" office:value="332500" calcext:value-type="float">
            <text:p>332,500</text:p>
          </table:table-cell>
          <table:table-cell table:style-name="ce68"/>
          <table:table-cell table:style-name="ce41" table:number-columns-repeated="16"/>
          <table:table-cell table:number-columns-repeated="16351"/>
        </table:table-row>
        <table:table-row table:style-name="ro6">
          <table:table-cell table:style-name="ce41"/>
          <table:table-cell table:style-name="ce43" office:value-type="float" office:value="2" calcext:value-type="float">
            <text:p>2</text:p>
          </table:table-cell>
          <table:table-cell table:style-name="ce52" office:value-type="string" calcext:value-type="string">
            <text:p>Ovillos de fibra sintética</text:p>
          </table:table-cell>
          <table:table-cell table:style-name="ce57" table:formula="of:=[.D30]+[.D30]*[$Resumen.$H$20]" office:value-type="float" office:value="25725" calcext:value-type="float">
            <text:p>25,725</text:p>
          </table:table-cell>
          <table:table-cell table:style-name="ce57" table:formula="of:=[.E30]+[.E30]*[$Resumen.$H$20]" office:value-type="float" office:value="25725" calcext:value-type="float">
            <text:p>25,725</text:p>
          </table:table-cell>
          <table:table-cell table:style-name="ce57" table:formula="of:=[.F30]+[.F30]*[$Resumen.$H$20]" office:value-type="float" office:value="25725" calcext:value-type="float">
            <text:p>25,725</text:p>
          </table:table-cell>
          <table:table-cell table:style-name="ce57" table:formula="of:=[.G30]+[.G30]*[$Resumen.$H$20]" office:value-type="float" office:value="29400" calcext:value-type="float">
            <text:p>29,400</text:p>
          </table:table-cell>
          <table:table-cell table:style-name="ce57" table:formula="of:=[.H30]+[.H30]*[$Resumen.$H$20]" office:value-type="float" office:value="29400" calcext:value-type="float">
            <text:p>29,400</text:p>
          </table:table-cell>
          <table:table-cell table:style-name="ce57" table:formula="of:=[.I30]+[.I30]*[$Resumen.$H$20]" office:value-type="float" office:value="29400" calcext:value-type="float">
            <text:p>29,400</text:p>
          </table:table-cell>
          <table:table-cell table:style-name="ce57" table:formula="of:=[.J30]+[.J30]*[$Resumen.$H$20]" office:value-type="float" office:value="33075" calcext:value-type="float">
            <text:p>33,075</text:p>
          </table:table-cell>
          <table:table-cell table:style-name="ce57" table:formula="of:=[.K30]+[.K30]*[$Resumen.$H$20]" office:value-type="float" office:value="33075" calcext:value-type="float">
            <text:p>33,075</text:p>
          </table:table-cell>
          <table:table-cell table:style-name="ce57" table:formula="of:=[.L30]+[.L30]*[$Resumen.$H$20]" office:value-type="float" office:value="33075" calcext:value-type="float">
            <text:p>33,075</text:p>
          </table:table-cell>
          <table:table-cell table:style-name="ce57" table:formula="of:=[.M30]+[.M30]*[$Resumen.$H$20]" office:value-type="float" office:value="33075" calcext:value-type="float">
            <text:p>33,075</text:p>
          </table:table-cell>
          <table:table-cell table:style-name="ce57" table:formula="of:=[.N30]+[.N30]*[$Resumen.$H$20]" office:value-type="float" office:value="25725" calcext:value-type="float">
            <text:p>25,725</text:p>
          </table:table-cell>
          <table:table-cell table:style-name="ce57" table:formula="of:=[.O30]+[.O30]*[$Resumen.$H$20]" office:value-type="float" office:value="25725" calcext:value-type="float">
            <text:p>25,725</text:p>
          </table:table-cell>
          <table:table-cell table:style-name="ce57" table:formula="of:=SUM([.D8:.O8])" office:value-type="float" office:value="349125" calcext:value-type="float">
            <text:p>349,125</text:p>
          </table:table-cell>
          <table:table-cell table:style-name="ce41" table:number-columns-repeated="17"/>
          <table:table-cell table:number-columns-repeated="16351"/>
        </table:table-row>
        <table:table-row table:style-name="ro7">
          <table:table-cell table:style-name="ce41"/>
          <table:table-cell table:style-name="ce43" office:value-type="float" office:value="3" calcext:value-type="float">
            <text:p>3</text:p>
          </table:table-cell>
          <table:table-cell table:style-name="ce52" office:value-type="string" calcext:value-type="string">
            <text:p>Ovillo de fibra sintética</text:p>
          </table:table-cell>
          <table:table-cell table:style-name="ce57" table:formula="of:=[.D31]+[.D31]*[$Resumen.$H$20]" office:value-type="float" office:value="27011.25" calcext:value-type="float">
            <text:p>27,011</text:p>
          </table:table-cell>
          <table:table-cell table:style-name="ce57" table:formula="of:=[.E31]+[.E31]*[$Resumen.$H$20]" office:value-type="float" office:value="27011.25" calcext:value-type="float">
            <text:p>27,011</text:p>
          </table:table-cell>
          <table:table-cell table:style-name="ce57" table:formula="of:=[.F31]+[.F31]*[$Resumen.$H$20]" office:value-type="float" office:value="27011.25" calcext:value-type="float">
            <text:p>27,011</text:p>
          </table:table-cell>
          <table:table-cell table:style-name="ce57" table:formula="of:=[.G31]+[.G31]*[$Resumen.$H$20]" office:value-type="float" office:value="30870" calcext:value-type="float">
            <text:p>30,870</text:p>
          </table:table-cell>
          <table:table-cell table:style-name="ce57" table:formula="of:=[.H31]+[.H31]*[$Resumen.$H$20]" office:value-type="float" office:value="30870" calcext:value-type="float">
            <text:p>30,870</text:p>
          </table:table-cell>
          <table:table-cell table:style-name="ce57" table:formula="of:=[.I31]+[.I31]*[$Resumen.$H$20]" office:value-type="float" office:value="30870" calcext:value-type="float">
            <text:p>30,870</text:p>
          </table:table-cell>
          <table:table-cell table:style-name="ce57" table:formula="of:=[.J31]+[.J31]*[$Resumen.$H$20]" office:value-type="float" office:value="34728.75" calcext:value-type="float">
            <text:p>34,729</text:p>
          </table:table-cell>
          <table:table-cell table:style-name="ce57" table:formula="of:=[.K31]+[.K31]*[$Resumen.$H$20]" office:value-type="float" office:value="34728.75" calcext:value-type="float">
            <text:p>34,729</text:p>
          </table:table-cell>
          <table:table-cell table:style-name="ce57" table:formula="of:=[.L31]+[.L31]*[$Resumen.$H$20]" office:value-type="float" office:value="34728.75" calcext:value-type="float">
            <text:p>34,729</text:p>
          </table:table-cell>
          <table:table-cell table:style-name="ce57" table:formula="of:=[.M31]+[.M31]*[$Resumen.$H$20]" office:value-type="float" office:value="34728.75" calcext:value-type="float">
            <text:p>34,729</text:p>
          </table:table-cell>
          <table:table-cell table:style-name="ce57" table:formula="of:=[.N31]+[.N31]*[$Resumen.$H$20]" office:value-type="float" office:value="27011.25" calcext:value-type="float">
            <text:p>27,011</text:p>
          </table:table-cell>
          <table:table-cell table:style-name="ce57" table:formula="of:=[.O31]+[.O31]*[$Resumen.$H$20]" office:value-type="float" office:value="27011.25" calcext:value-type="float">
            <text:p>27,011</text:p>
          </table:table-cell>
          <table:table-cell table:style-name="ce57" table:formula="of:=SUM([.D9:.O9])" office:value-type="float" office:value="366581.25" calcext:value-type="float">
            <text:p>366,581</text:p>
          </table:table-cell>
          <table:table-cell table:style-name="ce41" table:number-columns-repeated="17"/>
          <table:table-cell table:number-columns-repeated="16351"/>
        </table:table-row>
        <table:table-row table:style-name="ro7">
          <table:table-cell table:style-name="ce41"/>
          <table:table-cell table:style-name="ce44" office:value-type="float" office:value="4" calcext:value-type="float">
            <text:p>4</text:p>
          </table:table-cell>
          <table:table-cell table:style-name="ce52" office:value-type="string" calcext:value-type="string">
            <text:p>Ovillo de fibra sintética</text:p>
          </table:table-cell>
          <table:table-cell table:style-name="ce57" table:formula="of:=[.D32]+[.D32]*[$Resumen.$H$20]" office:value-type="float" office:value="28361.8125" calcext:value-type="float">
            <text:p>28,362</text:p>
          </table:table-cell>
          <table:table-cell table:style-name="ce57" table:formula="of:=[.E32]+[.E32]*[$Resumen.$H$20]" office:value-type="float" office:value="28361.8125" calcext:value-type="float">
            <text:p>28,362</text:p>
          </table:table-cell>
          <table:table-cell table:style-name="ce57" table:formula="of:=[.F32]+[.F32]*[$Resumen.$H$20]" office:value-type="float" office:value="28361.8125" calcext:value-type="float">
            <text:p>28,362</text:p>
          </table:table-cell>
          <table:table-cell table:style-name="ce57" table:formula="of:=[.G32]+[.G32]*[$Resumen.$H$20]" office:value-type="float" office:value="32413.5" calcext:value-type="float">
            <text:p>32,414</text:p>
          </table:table-cell>
          <table:table-cell table:style-name="ce57" table:formula="of:=[.H32]+[.H32]*[$Resumen.$H$20]" office:value-type="float" office:value="32413.5" calcext:value-type="float">
            <text:p>32,414</text:p>
          </table:table-cell>
          <table:table-cell table:style-name="ce57" table:formula="of:=[.I32]+[.I32]*[$Resumen.$H$20]" office:value-type="float" office:value="32413.5" calcext:value-type="float">
            <text:p>32,414</text:p>
          </table:table-cell>
          <table:table-cell table:style-name="ce57" table:formula="of:=[.J32]+[.J32]*[$Resumen.$H$20]" office:value-type="float" office:value="36465.1875" calcext:value-type="float">
            <text:p>36,465</text:p>
          </table:table-cell>
          <table:table-cell table:style-name="ce57" table:formula="of:=[.K32]+[.K32]*[$Resumen.$H$20]" office:value-type="float" office:value="36465.1875" calcext:value-type="float">
            <text:p>36,465</text:p>
          </table:table-cell>
          <table:table-cell table:style-name="ce57" table:formula="of:=[.L32]+[.L32]*[$Resumen.$H$20]" office:value-type="float" office:value="36465.1875" calcext:value-type="float">
            <text:p>36,465</text:p>
          </table:table-cell>
          <table:table-cell table:style-name="ce57" table:formula="of:=[.M32]+[.M32]*[$Resumen.$H$20]" office:value-type="float" office:value="36465.1875" calcext:value-type="float">
            <text:p>36,465</text:p>
          </table:table-cell>
          <table:table-cell table:style-name="ce57" table:formula="of:=[.N32]+[.N32]*[$Resumen.$H$20]" office:value-type="float" office:value="28361.8125" calcext:value-type="float">
            <text:p>28,362</text:p>
          </table:table-cell>
          <table:table-cell table:style-name="ce57" table:formula="of:=[.O32]+[.O32]*[$Resumen.$H$20]" office:value-type="float" office:value="28361.8125" calcext:value-type="float">
            <text:p>28,362</text:p>
          </table:table-cell>
          <table:table-cell table:style-name="ce57" table:formula="of:=SUM([.D10:.O10])" office:value-type="float" office:value="384910.3125" calcext:value-type="float">
            <text:p>384,910</text:p>
          </table:table-cell>
          <table:table-cell table:style-name="ce41" table:number-columns-repeated="17"/>
          <table:table-cell table:number-columns-repeated="16351"/>
        </table:table-row>
        <table:table-row table:style-name="ro7">
          <table:table-cell table:style-name="ce41"/>
          <table:table-cell table:style-name="ce44" office:value-type="float" office:value="5" calcext:value-type="float">
            <text:p>5</text:p>
          </table:table-cell>
          <table:table-cell table:style-name="ce52" office:value-type="string" calcext:value-type="string">
            <text:p>Ovillo de fibra sintética</text:p>
          </table:table-cell>
          <table:table-cell table:style-name="ce57" table:formula="of:=[.D33]+[.D33]*[$Resumen.$H$20]" office:value-type="float" office:value="29779.903125" calcext:value-type="float">
            <text:p>29,780</text:p>
          </table:table-cell>
          <table:table-cell table:style-name="ce57" table:formula="of:=[.E33]+[.E33]*[$Resumen.$H$20]" office:value-type="float" office:value="29779.903125" calcext:value-type="float">
            <text:p>29,780</text:p>
          </table:table-cell>
          <table:table-cell table:style-name="ce57" table:formula="of:=[.F33]+[.F33]*[$Resumen.$H$20]" office:value-type="float" office:value="29779.903125" calcext:value-type="float">
            <text:p>29,780</text:p>
          </table:table-cell>
          <table:table-cell table:style-name="ce57" table:formula="of:=[.G33]+[.G33]*[$Resumen.$H$20]" office:value-type="float" office:value="34034.175" calcext:value-type="float">
            <text:p>34,034</text:p>
          </table:table-cell>
          <table:table-cell table:style-name="ce57" table:formula="of:=[.H33]+[.H33]*[$Resumen.$H$20]" office:value-type="float" office:value="34034.175" calcext:value-type="float">
            <text:p>34,034</text:p>
          </table:table-cell>
          <table:table-cell table:style-name="ce57" table:formula="of:=[.I33]+[.I33]*[$Resumen.$H$20]" office:value-type="float" office:value="34034.175" calcext:value-type="float">
            <text:p>34,034</text:p>
          </table:table-cell>
          <table:table-cell table:style-name="ce57" table:formula="of:=[.J33]+[.J33]*[$Resumen.$H$20]" office:value-type="float" office:value="38288.446875" calcext:value-type="float">
            <text:p>38,288</text:p>
          </table:table-cell>
          <table:table-cell table:style-name="ce57" table:formula="of:=[.K33]+[.K33]*[$Resumen.$H$20]" office:value-type="float" office:value="38288.446875" calcext:value-type="float">
            <text:p>38,288</text:p>
          </table:table-cell>
          <table:table-cell table:style-name="ce57" table:formula="of:=[.L33]+[.L33]*[$Resumen.$H$20]" office:value-type="float" office:value="38288.446875" calcext:value-type="float">
            <text:p>38,288</text:p>
          </table:table-cell>
          <table:table-cell table:style-name="ce57" table:formula="of:=[.M33]+[.M33]*[$Resumen.$H$20]" office:value-type="float" office:value="38288.446875" calcext:value-type="float">
            <text:p>38,288</text:p>
          </table:table-cell>
          <table:table-cell table:style-name="ce57" table:formula="of:=[.N33]+[.N33]*[$Resumen.$H$20]" office:value-type="float" office:value="29779.903125" calcext:value-type="float">
            <text:p>29,780</text:p>
          </table:table-cell>
          <table:table-cell table:style-name="ce57" table:formula="of:=[.O33]+[.O33]*[$Resumen.$H$20]" office:value-type="float" office:value="29779.903125" calcext:value-type="float">
            <text:p>29,780</text:p>
          </table:table-cell>
          <table:table-cell table:style-name="ce57" table:formula="of:=SUM([.D11:.O11])" office:value-type="float" office:value="404155.828125" calcext:value-type="float">
            <text:p>404,156</text:p>
          </table:table-cell>
          <table:table-cell table:style-name="ce41" table:number-columns-repeated="17"/>
          <table:table-cell table:number-columns-repeated="16351"/>
        </table:table-row>
        <table:table-row table:style-name="ro7">
          <table:table-cell table:style-name="ce41" table:number-columns-repeated="2"/>
          <table:table-cell table:style-name="ce53"/>
          <table:table-cell table:style-name="ce58" table:number-columns-repeated="13"/>
          <table:table-cell table:style-name="ce41" table:number-columns-repeated="3"/>
          <table:table-cell table:style-name="ce56" table:number-columns-repeated="13"/>
          <table:table-cell table:style-name="ce41"/>
          <table:table-cell table:number-columns-repeated="16351"/>
        </table:table-row>
        <table:table-row table:style-name="ro1">
          <table:table-cell table:style-name="ce41" table:number-columns-repeated="3"/>
          <table:table-cell table:style-name="ce59" table:number-columns-repeated="12"/>
          <table:table-cell table:style-name="ce41" table:number-columns-repeated="18"/>
          <table:table-cell table:number-columns-repeated="16351"/>
        </table:table-row>
        <table:table-row table:style-name="ro1">
          <table:table-cell table:style-name="ce41"/>
          <table:table-cell table:style-name="ce45" office:value-type="string" calcext:value-type="string" table:number-columns-spanned="15" table:number-rows-spanned="1">
            <text:p>CUADRO N° 02</text:p>
          </table:table-cell>
          <table:covered-table-cell table:number-columns-repeated="14" table:style-name="ce12"/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2"/>
          <table:table-cell table:style-name="ce50"/>
          <table:table-cell table:style-name="ce56" table:number-columns-repeated="13"/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/>
          <table:table-cell table:style-name="ce46" office:value-type="string" calcext:value-type="string" table:number-columns-spanned="14" table:number-rows-spanned="1">
            <text:p>PROYECCIÓN DE VENTAS EN NUEVOS SOLES</text:p>
          </table:table-cell>
          <table:covered-table-cell table:number-columns-repeated="13" table:style-name="ce12"/>
          <table:table-cell table:style-name="ce66"/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2"/>
          <table:table-cell table:style-name="ce50"/>
          <table:table-cell table:style-name="ce56" table:number-columns-repeated="13"/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/>
          <table:table-cell table:style-name="ce42" office:value-type="string" calcext:value-type="string">
            <text:p>Año</text:p>
          </table:table-cell>
          <table:table-cell table:style-name="ce42" office:value-type="string" calcext:value-type="string">
            <text:p>Valor Unitario</text:p>
          </table:table-cell>
          <table:table-cell table:style-name="ce42" office:value-type="string" calcext:value-type="string">
            <text:p>Mes 1</text:p>
          </table:table-cell>
          <table:table-cell table:style-name="ce42" office:value-type="string" calcext:value-type="string">
            <text:p>Mes 2</text:p>
          </table:table-cell>
          <table:table-cell table:style-name="ce42" office:value-type="string" calcext:value-type="string">
            <text:p>Mes 3</text:p>
          </table:table-cell>
          <table:table-cell table:style-name="ce42" office:value-type="string" calcext:value-type="string">
            <text:p>Mes 4</text:p>
          </table:table-cell>
          <table:table-cell table:style-name="ce42" office:value-type="string" calcext:value-type="string">
            <text:p>Mes 5</text:p>
          </table:table-cell>
          <table:table-cell table:style-name="ce42" office:value-type="string" calcext:value-type="string">
            <text:p>Mes 6</text:p>
          </table:table-cell>
          <table:table-cell table:style-name="ce42" office:value-type="string" calcext:value-type="string">
            <text:p>Mes 7</text:p>
          </table:table-cell>
          <table:table-cell table:style-name="ce42" office:value-type="string" calcext:value-type="string">
            <text:p>Mes 8</text:p>
          </table:table-cell>
          <table:table-cell table:style-name="ce42" office:value-type="string" calcext:value-type="string">
            <text:p>Mes 9</text:p>
          </table:table-cell>
          <table:table-cell table:style-name="ce42" office:value-type="string" calcext:value-type="string">
            <text:p>Mes 10</text:p>
          </table:table-cell>
          <table:table-cell table:style-name="ce42" office:value-type="string" calcext:value-type="string">
            <text:p>Mes 11</text:p>
          </table:table-cell>
          <table:table-cell table:style-name="ce42" office:value-type="string" calcext:value-type="string">
            <text:p>Mes 12</text:p>
          </table:table-cell>
          <table:table-cell table:style-name="ce42" office:value-type="string" calcext:value-type="string">
            <text:p>TOTAL</text:p>
          </table:table-cell>
          <table:table-cell table:style-name="ce41" table:number-columns-repeated="17"/>
          <table:table-cell table:number-columns-repeated="16351"/>
        </table:table-row>
        <table:table-row table:style-name="ro8"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54" table:formula="of:=[$Resumen.$H$20]" office:value-type="float" office:value="6" calcext:value-type="float">
            <text:p>6.0</text:p>
          </table:table-cell>
          <table:table-cell table:style-name="ce60" table:formula="of:=[.$C19]*[.D7]" office:value-type="float" office:value="147000" calcext:value-type="float">
            <text:p>S/147,000.00</text:p>
          </table:table-cell>
          <table:table-cell table:style-name="ce60" table:formula="of:=[.$C19]*[.E7]" office:value-type="float" office:value="147000" calcext:value-type="float">
            <text:p>S/147,000.00</text:p>
          </table:table-cell>
          <table:table-cell table:style-name="ce60" table:formula="of:=[.$C19]*[.F7]" office:value-type="float" office:value="147000" calcext:value-type="float">
            <text:p>S/147,000.00</text:p>
          </table:table-cell>
          <table:table-cell table:style-name="ce60" table:formula="of:=[.$C19]*[.G7]" office:value-type="float" office:value="168000" calcext:value-type="float">
            <text:p>S/168,000.00</text:p>
          </table:table-cell>
          <table:table-cell table:style-name="ce60" table:formula="of:=[.$C19]*[.H7]" office:value-type="float" office:value="168000" calcext:value-type="float">
            <text:p>S/168,000.00</text:p>
          </table:table-cell>
          <table:table-cell table:style-name="ce60" table:formula="of:=[.$C19]*[.I7]" office:value-type="float" office:value="168000" calcext:value-type="float">
            <text:p>S/168,000.00</text:p>
          </table:table-cell>
          <table:table-cell table:style-name="ce60" table:formula="of:=[.$C19]*[.J7]" office:value-type="float" office:value="189000" calcext:value-type="float">
            <text:p>S/189,000.00</text:p>
          </table:table-cell>
          <table:table-cell table:style-name="ce60" table:formula="of:=[.$C19]*[.K7]" office:value-type="float" office:value="189000" calcext:value-type="float">
            <text:p>S/189,000.00</text:p>
          </table:table-cell>
          <table:table-cell table:style-name="ce60" table:formula="of:=[.$C19]*[.L7]" office:value-type="float" office:value="189000" calcext:value-type="float">
            <text:p>S/189,000.00</text:p>
          </table:table-cell>
          <table:table-cell table:style-name="ce60" table:formula="of:=[.$C19]*[.M7]" office:value-type="float" office:value="189000" calcext:value-type="float">
            <text:p>S/189,000.00</text:p>
          </table:table-cell>
          <table:table-cell table:style-name="ce60" table:formula="of:=[.$C19]*[.N7]" office:value-type="float" office:value="147000" calcext:value-type="float">
            <text:p>S/147,000.00</text:p>
          </table:table-cell>
          <table:table-cell table:style-name="ce60" table:formula="of:=[.$C19]*[.O7]" office:value-type="float" office:value="147000" calcext:value-type="float">
            <text:p>S/147,000.00</text:p>
          </table:table-cell>
          <table:table-cell table:style-name="ce60" table:formula="of:=[.$C19]*[.P7]" office:value-type="float" office:value="1995000" calcext:value-type="float">
            <text:p>S/1,995,000.00</text:p>
          </table:table-cell>
          <table:table-cell table:style-name="ce69" table:formula="of:=[.P19]/4400" office:value-type="float" office:value="453.409090909091" calcext:value-type="float">
            <text:p>453.409090909091</text:p>
          </table:table-cell>
          <table:table-cell table:style-name="ce41" table:number-columns-repeated="16"/>
          <table:table-cell table:number-columns-repeated="16351"/>
        </table:table-row>
        <table:table-row table:style-name="ro8">
          <table:table-cell table:style-name="ce41"/>
          <table:table-cell table:style-name="ce47" office:value-type="float" office:value="2" calcext:value-type="float">
            <text:p>2</text:p>
          </table:table-cell>
          <table:table-cell table:style-name="ce54" table:formula="of:=[$Resumen.$H$20]" office:value-type="float" office:value="6" calcext:value-type="float">
            <text:p>6.0</text:p>
          </table:table-cell>
          <table:table-cell table:style-name="ce60" table:formula="of:=[.$C20]*[.D8]" office:value-type="float" office:value="154350" calcext:value-type="float">
            <text:p>S/154,350.00</text:p>
          </table:table-cell>
          <table:table-cell table:style-name="ce60" table:formula="of:=[.$C20]*[.E8]" office:value-type="float" office:value="154350" calcext:value-type="float">
            <text:p>S/154,350.00</text:p>
          </table:table-cell>
          <table:table-cell table:style-name="ce60" table:formula="of:=[.$C20]*[.F8]" office:value-type="float" office:value="154350" calcext:value-type="float">
            <text:p>S/154,350.00</text:p>
          </table:table-cell>
          <table:table-cell table:style-name="ce60" table:formula="of:=[.$C20]*[.G8]" office:value-type="float" office:value="176400" calcext:value-type="float">
            <text:p>S/176,400.00</text:p>
          </table:table-cell>
          <table:table-cell table:style-name="ce60" table:formula="of:=[.$C20]*[.H8]" office:value-type="float" office:value="176400" calcext:value-type="float">
            <text:p>S/176,400.00</text:p>
          </table:table-cell>
          <table:table-cell table:style-name="ce60" table:formula="of:=[.$C20]*[.I8]" office:value-type="float" office:value="176400" calcext:value-type="float">
            <text:p>S/176,400.00</text:p>
          </table:table-cell>
          <table:table-cell table:style-name="ce60" table:formula="of:=[.$C20]*[.J8]" office:value-type="float" office:value="198450" calcext:value-type="float">
            <text:p>S/198,450.00</text:p>
          </table:table-cell>
          <table:table-cell table:style-name="ce60" table:formula="of:=[.$C20]*[.K8]" office:value-type="float" office:value="198450" calcext:value-type="float">
            <text:p>S/198,450.00</text:p>
          </table:table-cell>
          <table:table-cell table:style-name="ce60" table:formula="of:=[.$C20]*[.L8]" office:value-type="float" office:value="198450" calcext:value-type="float">
            <text:p>S/198,450.00</text:p>
          </table:table-cell>
          <table:table-cell table:style-name="ce60" table:formula="of:=[.$C20]*[.M8]" office:value-type="float" office:value="198450" calcext:value-type="float">
            <text:p>S/198,450.00</text:p>
          </table:table-cell>
          <table:table-cell table:style-name="ce60" table:formula="of:=[.$C20]*[.N8]" office:value-type="float" office:value="154350" calcext:value-type="float">
            <text:p>S/154,350.00</text:p>
          </table:table-cell>
          <table:table-cell table:style-name="ce60" table:formula="of:=[.$C20]*[.O8]" office:value-type="float" office:value="154350" calcext:value-type="float">
            <text:p>S/154,350.00</text:p>
          </table:table-cell>
          <table:table-cell table:style-name="ce60" table:formula="of:=SUM([.B20:.O20])" office:value-type="float" office:value="2094758" calcext:value-type="float">
            <text:p>S/2,094,758.00</text:p>
          </table:table-cell>
          <table:table-cell table:style-name="ce41" table:number-columns-repeated="17"/>
          <table:table-cell table:number-columns-repeated="16351"/>
        </table:table-row>
        <table:table-row table:style-name="ro8">
          <table:table-cell table:style-name="ce41"/>
          <table:table-cell table:style-name="ce47" office:value-type="float" office:value="3" calcext:value-type="float">
            <text:p>3</text:p>
          </table:table-cell>
          <table:table-cell table:style-name="ce54" table:formula="of:=[$Resumen.$H$20]" office:value-type="float" office:value="6" calcext:value-type="float">
            <text:p>6.0</text:p>
          </table:table-cell>
          <table:table-cell table:style-name="ce60" table:formula="of:=[.$C21]*[.D9]" office:value-type="float" office:value="162067.5" calcext:value-type="float">
            <text:p>S/162,067.50</text:p>
          </table:table-cell>
          <table:table-cell table:style-name="ce60" table:formula="of:=[.$C21]*[.E9]" office:value-type="float" office:value="162067.5" calcext:value-type="float">
            <text:p>S/162,067.50</text:p>
          </table:table-cell>
          <table:table-cell table:style-name="ce60" table:formula="of:=[.$C21]*[.F9]" office:value-type="float" office:value="162067.5" calcext:value-type="float">
            <text:p>S/162,067.50</text:p>
          </table:table-cell>
          <table:table-cell table:style-name="ce60" table:formula="of:=[.$C21]*[.G9]" office:value-type="float" office:value="185220" calcext:value-type="float">
            <text:p>S/185,220.00</text:p>
          </table:table-cell>
          <table:table-cell table:style-name="ce60" table:formula="of:=[.$C21]*[.H9]" office:value-type="float" office:value="185220" calcext:value-type="float">
            <text:p>S/185,220.00</text:p>
          </table:table-cell>
          <table:table-cell table:style-name="ce60" table:formula="of:=[.$C21]*[.I9]" office:value-type="float" office:value="185220" calcext:value-type="float">
            <text:p>S/185,220.00</text:p>
          </table:table-cell>
          <table:table-cell table:style-name="ce60" table:formula="of:=[.$C21]*[.J9]" office:value-type="float" office:value="208372.5" calcext:value-type="float">
            <text:p>S/208,372.50</text:p>
          </table:table-cell>
          <table:table-cell table:style-name="ce60" table:formula="of:=[.$C21]*[.K9]" office:value-type="float" office:value="208372.5" calcext:value-type="float">
            <text:p>S/208,372.50</text:p>
          </table:table-cell>
          <table:table-cell table:style-name="ce60" table:formula="of:=[.$C21]*[.L9]" office:value-type="float" office:value="208372.5" calcext:value-type="float">
            <text:p>S/208,372.50</text:p>
          </table:table-cell>
          <table:table-cell table:style-name="ce60" table:formula="of:=[.$C21]*[.M9]" office:value-type="float" office:value="208372.5" calcext:value-type="float">
            <text:p>S/208,372.50</text:p>
          </table:table-cell>
          <table:table-cell table:style-name="ce60" table:formula="of:=[.$C21]*[.N9]" office:value-type="float" office:value="162067.5" calcext:value-type="float">
            <text:p>S/162,067.50</text:p>
          </table:table-cell>
          <table:table-cell table:style-name="ce60" table:formula="of:=[.$C21]*[.O9]" office:value-type="float" office:value="162067.5" calcext:value-type="float">
            <text:p>S/162,067.50</text:p>
          </table:table-cell>
          <table:table-cell table:style-name="ce60" table:formula="of:=SUM([.B21:.O21])" office:value-type="float" office:value="2199496.5" calcext:value-type="float">
            <text:p>S/2,199,496.50</text:p>
          </table:table-cell>
          <table:table-cell table:style-name="ce41" table:number-columns-repeated="17"/>
          <table:table-cell table:number-columns-repeated="16351"/>
        </table:table-row>
        <table:table-row table:style-name="ro8">
          <table:table-cell table:style-name="ce41"/>
          <table:table-cell table:style-name="ce47" office:value-type="float" office:value="4" calcext:value-type="float">
            <text:p>4</text:p>
          </table:table-cell>
          <table:table-cell table:style-name="ce54" table:formula="of:=[$Resumen.$H$20]" office:value-type="float" office:value="6" calcext:value-type="float">
            <text:p>6.0</text:p>
          </table:table-cell>
          <table:table-cell table:style-name="ce60" table:formula="of:=[.$C22]*[.D10]" office:value-type="float" office:value="170170.875" calcext:value-type="float">
            <text:p>S/170,170.88</text:p>
          </table:table-cell>
          <table:table-cell table:style-name="ce60" table:formula="of:=[.$C22]*[.E10]" office:value-type="float" office:value="170170.875" calcext:value-type="float">
            <text:p>S/170,170.88</text:p>
          </table:table-cell>
          <table:table-cell table:style-name="ce60" table:formula="of:=[.$C22]*[.F10]" office:value-type="float" office:value="170170.875" calcext:value-type="float">
            <text:p>S/170,170.88</text:p>
          </table:table-cell>
          <table:table-cell table:style-name="ce60" table:formula="of:=[.$C22]*[.G10]" office:value-type="float" office:value="194481" calcext:value-type="float">
            <text:p>S/194,481.00</text:p>
          </table:table-cell>
          <table:table-cell table:style-name="ce60" table:formula="of:=[.$C22]*[.H10]" office:value-type="float" office:value="194481" calcext:value-type="float">
            <text:p>S/194,481.00</text:p>
          </table:table-cell>
          <table:table-cell table:style-name="ce60" table:formula="of:=[.$C22]*[.I10]" office:value-type="float" office:value="194481" calcext:value-type="float">
            <text:p>S/194,481.00</text:p>
          </table:table-cell>
          <table:table-cell table:style-name="ce60" table:formula="of:=[.$C22]*[.J10]" office:value-type="float" office:value="218791.125" calcext:value-type="float">
            <text:p>S/218,791.13</text:p>
          </table:table-cell>
          <table:table-cell table:style-name="ce60" table:formula="of:=[.$C22]*[.K10]" office:value-type="float" office:value="218791.125" calcext:value-type="float">
            <text:p>S/218,791.13</text:p>
          </table:table-cell>
          <table:table-cell table:style-name="ce60" table:formula="of:=[.$C22]*[.L10]" office:value-type="float" office:value="218791.125" calcext:value-type="float">
            <text:p>S/218,791.13</text:p>
          </table:table-cell>
          <table:table-cell table:style-name="ce60" table:formula="of:=[.$C22]*[.M10]" office:value-type="float" office:value="218791.125" calcext:value-type="float">
            <text:p>S/218,791.13</text:p>
          </table:table-cell>
          <table:table-cell table:style-name="ce60" table:formula="of:=[.$C22]*[.N10]" office:value-type="float" office:value="170170.875" calcext:value-type="float">
            <text:p>S/170,170.88</text:p>
          </table:table-cell>
          <table:table-cell table:style-name="ce60" table:formula="of:=[.$C22]*[.O10]" office:value-type="float" office:value="170170.875" calcext:value-type="float">
            <text:p>S/170,170.88</text:p>
          </table:table-cell>
          <table:table-cell table:style-name="ce60" table:formula="of:=SUM([.B22:.O22])" office:value-type="float" office:value="2309471.875" calcext:value-type="float">
            <text:p>S/2,309,471.88</text:p>
          </table:table-cell>
          <table:table-cell table:style-name="ce41" table:number-columns-repeated="17"/>
          <table:table-cell table:number-columns-repeated="16351"/>
        </table:table-row>
        <table:table-row table:style-name="ro8">
          <table:table-cell table:style-name="ce41"/>
          <table:table-cell table:style-name="ce47" office:value-type="float" office:value="5" calcext:value-type="float">
            <text:p>5</text:p>
          </table:table-cell>
          <table:table-cell table:style-name="ce54" table:formula="of:=[$Resumen.$H$20]" office:value-type="float" office:value="6" calcext:value-type="float">
            <text:p>6.0</text:p>
          </table:table-cell>
          <table:table-cell table:style-name="ce60" table:formula="of:=[.$C23]*[.D11]" office:value-type="float" office:value="178679.41875" calcext:value-type="float">
            <text:p>S/178,679.42</text:p>
          </table:table-cell>
          <table:table-cell table:style-name="ce60" table:formula="of:=[.$C23]*[.E11]" office:value-type="float" office:value="178679.41875" calcext:value-type="float">
            <text:p>S/178,679.42</text:p>
          </table:table-cell>
          <table:table-cell table:style-name="ce60" table:formula="of:=[.$C23]*[.F11]" office:value-type="float" office:value="178679.41875" calcext:value-type="float">
            <text:p>S/178,679.42</text:p>
          </table:table-cell>
          <table:table-cell table:style-name="ce60" table:formula="of:=[.$C23]*[.G11]" office:value-type="float" office:value="204205.05" calcext:value-type="float">
            <text:p>S/204,205.05</text:p>
          </table:table-cell>
          <table:table-cell table:style-name="ce60" table:formula="of:=[.$C23]*[.H11]" office:value-type="float" office:value="204205.05" calcext:value-type="float">
            <text:p>S/204,205.05</text:p>
          </table:table-cell>
          <table:table-cell table:style-name="ce60" table:formula="of:=[.$C23]*[.I11]" office:value-type="float" office:value="204205.05" calcext:value-type="float">
            <text:p>S/204,205.05</text:p>
          </table:table-cell>
          <table:table-cell table:style-name="ce60" table:formula="of:=[.$C23]*[.J11]" office:value-type="float" office:value="229730.68125" calcext:value-type="float">
            <text:p>S/229,730.68</text:p>
          </table:table-cell>
          <table:table-cell table:style-name="ce60" table:formula="of:=[.$C23]*[.K11]" office:value-type="float" office:value="229730.68125" calcext:value-type="float">
            <text:p>S/229,730.68</text:p>
          </table:table-cell>
          <table:table-cell table:style-name="ce60" table:formula="of:=[.$C23]*[.L11]" office:value-type="float" office:value="229730.68125" calcext:value-type="float">
            <text:p>S/229,730.68</text:p>
          </table:table-cell>
          <table:table-cell table:style-name="ce60" table:formula="of:=[.$C23]*[.M11]" office:value-type="float" office:value="229730.68125" calcext:value-type="float">
            <text:p>S/229,730.68</text:p>
          </table:table-cell>
          <table:table-cell table:style-name="ce60" table:formula="of:=[.$C23]*[.N11]" office:value-type="float" office:value="178679.41875" calcext:value-type="float">
            <text:p>S/178,679.42</text:p>
          </table:table-cell>
          <table:table-cell table:style-name="ce60" table:formula="of:=[.$C23]*[.O11]" office:value-type="float" office:value="178679.41875" calcext:value-type="float">
            <text:p>S/178,679.42</text:p>
          </table:table-cell>
          <table:table-cell table:style-name="ce60" table:formula="of:=SUM([.B23:.O23])" office:value-type="float" office:value="2424945.96875" calcext:value-type="float">
            <text:p>S/2,424,945.97</text:p>
          </table:table-cell>
          <table:table-cell table:style-name="ce41" table:number-columns-repeated="17"/>
          <table:table-cell table:number-columns-repeated="16351"/>
        </table:table-row>
        <table:table-row table:style-name="ro8">
          <table:table-cell table:style-name="ce41"/>
          <table:table-cell table:style-name="ce48"/>
          <table:table-cell table:style-name="ce55"/>
          <table:table-cell table:style-name="ce61" table:number-columns-repeated="13"/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3"/>
          <table:table-cell table:style-name="ce56" table:number-columns-repeated="13"/>
          <table:table-cell table:style-name="ce41" table:number-columns-repeated="17"/>
          <table:table-cell table:number-columns-repeated="16351"/>
        </table:table-row>
        <table:table-row table:style-name="ro9">
          <table:table-cell table:style-name="ce41"/>
          <table:table-cell table:style-name="ce49" table:number-columns-repeated="2"/>
          <table:table-cell table:style-name="ce62" table:number-columns-repeated="13"/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3"/>
          <table:table-cell table:style-name="ce56" table:number-columns-repeated="13"/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3"/>
          <table:table-cell table:style-name="ce45" office:value-type="string" calcext:value-type="string" table:number-columns-spanned="12" table:number-rows-spanned="1">
            <text:p>CANTIDADES REFERENCIALES</text:p>
          </table:table-cell>
          <table:covered-table-cell table:number-columns-repeated="11" table:style-name="ce12"/>
          <table:table-cell table:style-name="ce56"/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3"/>
          <table:table-cell table:number-columns-repeated="3" table:style-name="ce57" office:value-type="float" office:value="3500" calcext:value-type="float">
            <text:p>3,500</text:p>
          </table:table-cell>
          <table:table-cell table:number-columns-repeated="3" table:style-name="ce57" office:value-type="float" office:value="4000" calcext:value-type="float">
            <text:p>4,000</text:p>
          </table:table-cell>
          <table:table-cell table:number-columns-repeated="4" table:style-name="ce57" office:value-type="float" office:value="4500" calcext:value-type="float">
            <text:p>4,500</text:p>
          </table:table-cell>
          <table:table-cell table:number-columns-repeated="2" table:style-name="ce57" office:value-type="float" office:value="3500" calcext:value-type="float">
            <text:p>3,500</text:p>
          </table:table-cell>
          <table:table-cell table:style-name="ce67" table:formula="of:=SUM([.D29:.O29])" office:value-type="float" office:value="47500" calcext:value-type="float">
            <text:p>47,500</text:p>
          </table:table-cell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3"/>
          <table:table-cell table:number-columns-repeated="3" table:style-name="ce57" office:value-type="float" office:value="3675" calcext:value-type="float">
            <text:p>3,675</text:p>
          </table:table-cell>
          <table:table-cell table:number-columns-repeated="3" table:style-name="ce57" office:value-type="float" office:value="4200" calcext:value-type="float">
            <text:p>4,200</text:p>
          </table:table-cell>
          <table:table-cell table:number-columns-repeated="4" table:style-name="ce57" office:value-type="float" office:value="4725" calcext:value-type="float">
            <text:p>4,725</text:p>
          </table:table-cell>
          <table:table-cell table:number-columns-repeated="2" table:style-name="ce57" office:value-type="float" office:value="3675" calcext:value-type="float">
            <text:p>3,675</text:p>
          </table:table-cell>
          <table:table-cell table:style-name="ce67" table:formula="of:=SUM([.D30:.O30])" office:value-type="float" office:value="49875" calcext:value-type="float">
            <text:p>49,875</text:p>
          </table:table-cell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3"/>
          <table:table-cell table:number-columns-repeated="3" table:style-name="ce57" office:value-type="float" office:value="3858.75" calcext:value-type="float">
            <text:p>3,859</text:p>
          </table:table-cell>
          <table:table-cell table:number-columns-repeated="3" table:style-name="ce57" office:value-type="float" office:value="4410" calcext:value-type="float">
            <text:p>4,410</text:p>
          </table:table-cell>
          <table:table-cell table:number-columns-repeated="4" table:style-name="ce57" office:value-type="float" office:value="4961.25" calcext:value-type="float">
            <text:p>4,961</text:p>
          </table:table-cell>
          <table:table-cell table:number-columns-repeated="2" table:style-name="ce57" office:value-type="float" office:value="3858.75" calcext:value-type="float">
            <text:p>3,859</text:p>
          </table:table-cell>
          <table:table-cell table:style-name="ce67" table:formula="of:=SUM([.D31:.O31])" office:value-type="float" office:value="52368.75" calcext:value-type="float">
            <text:p>52,369</text:p>
          </table:table-cell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3"/>
          <table:table-cell table:number-columns-repeated="3" table:style-name="ce57" office:value-type="float" office:value="4051.6875" calcext:value-type="float">
            <text:p>4,052</text:p>
          </table:table-cell>
          <table:table-cell table:number-columns-repeated="3" table:style-name="ce57" office:value-type="float" office:value="4630.5" calcext:value-type="float">
            <text:p>4,631</text:p>
          </table:table-cell>
          <table:table-cell table:number-columns-repeated="4" table:style-name="ce57" office:value-type="float" office:value="5209.3125" calcext:value-type="float">
            <text:p>5,209</text:p>
          </table:table-cell>
          <table:table-cell table:number-columns-repeated="2" table:style-name="ce57" office:value-type="float" office:value="4051.6875" calcext:value-type="float">
            <text:p>4,052</text:p>
          </table:table-cell>
          <table:table-cell table:style-name="ce67" table:formula="of:=SUM([.D32:.O32])" office:value-type="float" office:value="54987.1875" calcext:value-type="float">
            <text:p>54,987</text:p>
          </table:table-cell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3"/>
          <table:table-cell table:number-columns-repeated="3" table:style-name="ce57" office:value-type="float" office:value="4254.271875" calcext:value-type="float">
            <text:p>4,254</text:p>
          </table:table-cell>
          <table:table-cell table:number-columns-repeated="3" table:style-name="ce57" office:value-type="float" office:value="4862.025" calcext:value-type="float">
            <text:p>4,862</text:p>
          </table:table-cell>
          <table:table-cell table:number-columns-repeated="4" table:style-name="ce57" office:value-type="float" office:value="5469.778125" calcext:value-type="float">
            <text:p>5,470</text:p>
          </table:table-cell>
          <table:table-cell table:number-columns-repeated="2" table:style-name="ce57" office:value-type="float" office:value="4254.271875" calcext:value-type="float">
            <text:p>4,254</text:p>
          </table:table-cell>
          <table:table-cell table:style-name="ce67" table:formula="of:=SUM([.D33:.O33])" office:value-type="float" office:value="57736.546875" calcext:value-type="float">
            <text:p>57,737</text:p>
          </table:table-cell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3"/>
          <table:table-cell table:style-name="ce56" table:number-columns-repeated="13"/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3"/>
          <table:table-cell table:style-name="ce63" office:value-type="string" calcext:value-type="string" table:number-columns-spanned="12" table:number-rows-spanned="1">
            <text:p>INCREMENTO</text:p>
          </table:table-cell>
          <table:covered-table-cell table:number-columns-repeated="11" table:style-name="ce64"/>
          <table:table-cell table:style-name="ce56"/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3"/>
          <table:table-cell table:style-name="ce57" table:formula="of:=[.D29]*[$Resumen.$H$22]" office:value-type="float" office:value="0" calcext:value-type="float">
            <text:p>0</text:p>
          </table:table-cell>
          <table:table-cell table:style-name="ce65" table:formula="of:=([.E7]-[.D7])/[.E7]" office:value-type="percentage" office:value="0" calcext:value-type="percentage">
            <text:p>0.00 %</text:p>
          </table:table-cell>
          <table:table-cell table:style-name="ce65" table:formula="of:=([.G7]-[.F7])/[.G7]" office:value-type="percentage" office:value="0.125" calcext:value-type="percentage">
            <text:p>12.50 %</text:p>
          </table:table-cell>
          <table:table-cell table:style-name="ce65" table:formula="of:=([.G7]-[.F7])/[.G7]" office:value-type="percentage" office:value="0.125" calcext:value-type="percentage">
            <text:p>12.50 %</text:p>
          </table:table-cell>
          <table:table-cell table:style-name="ce65" table:formula="of:=([.H7]-[.G7])/[.H7]" office:value-type="percentage" office:value="0" calcext:value-type="percentage">
            <text:p>0.00 %</text:p>
          </table:table-cell>
          <table:table-cell table:style-name="ce65" table:formula="of:=([.I7]-[.H7])/[.I7]" office:value-type="percentage" office:value="0" calcext:value-type="percentage">
            <text:p>0.00 %</text:p>
          </table:table-cell>
          <table:table-cell table:style-name="ce65" table:formula="of:=([.J7]-[.I7])/[.J7]" office:value-type="percentage" office:value="0.111111111111111" calcext:value-type="percentage">
            <text:p>11.11 %</text:p>
          </table:table-cell>
          <table:table-cell table:style-name="ce65" table:formula="of:=([.K7]-[.J7])/[.K7]" office:value-type="percentage" office:value="0" calcext:value-type="percentage">
            <text:p>0.00 %</text:p>
          </table:table-cell>
          <table:table-cell table:style-name="ce65" table:formula="of:=([.L7]-[.K7])/[.L7]" office:value-type="percentage" office:value="0" calcext:value-type="percentage">
            <text:p>0.00 %</text:p>
          </table:table-cell>
          <table:table-cell table:style-name="ce65" table:formula="of:=([.M7]-[.L7])/[.M7]" office:value-type="percentage" office:value="0" calcext:value-type="percentage">
            <text:p>0.00 %</text:p>
          </table:table-cell>
          <table:table-cell table:style-name="ce65" table:formula="of:=([.N7]-[.M7])/[.N7]" office:value-type="percentage" office:value="-0.285714285714286" calcext:value-type="percentage">
            <text:p>-28.57 %</text:p>
          </table:table-cell>
          <table:table-cell table:style-name="ce65" table:formula="of:=([.O7]-[.N7])/[.O7]" office:value-type="percentage" office:value="0" calcext:value-type="percentage">
            <text:p>0.00 %</text:p>
          </table:table-cell>
          <table:table-cell table:style-name="ce56"/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3"/>
          <table:table-cell table:style-name="ce57" table:formula="of:=[.D30]*[$Resumen.$H$22]" office:value-type="float" office:value="0" calcext:value-type="float">
            <text:p>0</text:p>
          </table:table-cell>
          <table:table-cell table:style-name="ce65" table:formula="of:=([.E8]-[.D8])/[.E8]" office:value-type="percentage" office:value="0" calcext:value-type="percentage">
            <text:p>0.00 %</text:p>
          </table:table-cell>
          <table:table-cell table:style-name="ce65" table:formula="of:=([.G8]-[.F8])/[.G8]" office:value-type="percentage" office:value="0.125" calcext:value-type="percentage">
            <text:p>12.50 %</text:p>
          </table:table-cell>
          <table:table-cell table:style-name="ce65" table:formula="of:=([.G8]-[.F8])/[.G8]" office:value-type="percentage" office:value="0.125" calcext:value-type="percentage">
            <text:p>12.50 %</text:p>
          </table:table-cell>
          <table:table-cell table:style-name="ce65" table:formula="of:=([.H8]-[.G8])/[.H8]" office:value-type="percentage" office:value="0" calcext:value-type="percentage">
            <text:p>0.00 %</text:p>
          </table:table-cell>
          <table:table-cell table:style-name="ce65" table:formula="of:=([.I8]-[.H8])/[.I8]" office:value-type="percentage" office:value="0" calcext:value-type="percentage">
            <text:p>0.00 %</text:p>
          </table:table-cell>
          <table:table-cell table:style-name="ce65" table:formula="of:=([.J8]-[.I8])/[.J8]" office:value-type="percentage" office:value="0.111111111111111" calcext:value-type="percentage">
            <text:p>11.11 %</text:p>
          </table:table-cell>
          <table:table-cell table:style-name="ce65" table:formula="of:=([.K8]-[.J8])/[.K8]" office:value-type="percentage" office:value="0" calcext:value-type="percentage">
            <text:p>0.00 %</text:p>
          </table:table-cell>
          <table:table-cell table:style-name="ce65" table:formula="of:=([.L8]-[.K8])/[.L8]" office:value-type="percentage" office:value="0" calcext:value-type="percentage">
            <text:p>0.00 %</text:p>
          </table:table-cell>
          <table:table-cell table:style-name="ce65" table:formula="of:=([.M8]-[.L8])/[.M8]" office:value-type="percentage" office:value="0" calcext:value-type="percentage">
            <text:p>0.00 %</text:p>
          </table:table-cell>
          <table:table-cell table:style-name="ce65" table:formula="of:=([.N8]-[.M8])/[.N8]" office:value-type="percentage" office:value="-0.285714285714286" calcext:value-type="percentage">
            <text:p>-28.57 %</text:p>
          </table:table-cell>
          <table:table-cell table:style-name="ce65" table:formula="of:=([.O8]-[.N8])/[.O8]" office:value-type="percentage" office:value="0" calcext:value-type="percentage">
            <text:p>0.00 %</text:p>
          </table:table-cell>
          <table:table-cell table:style-name="ce56"/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3"/>
          <table:table-cell table:style-name="ce57" table:formula="of:=[.D31]*[$Resumen.$H$22]" office:value-type="float" office:value="0" calcext:value-type="float">
            <text:p>0</text:p>
          </table:table-cell>
          <table:table-cell table:style-name="ce65" table:formula="of:=([.E9]-[.D9])/[.E9]" office:value-type="percentage" office:value="0" calcext:value-type="percentage">
            <text:p>0.00 %</text:p>
          </table:table-cell>
          <table:table-cell table:style-name="ce65" table:formula="of:=([.G9]-[.F9])/[.G9]" office:value-type="percentage" office:value="0.125" calcext:value-type="percentage">
            <text:p>12.50 %</text:p>
          </table:table-cell>
          <table:table-cell table:style-name="ce65" table:formula="of:=([.G9]-[.F9])/[.G9]" office:value-type="percentage" office:value="0.125" calcext:value-type="percentage">
            <text:p>12.50 %</text:p>
          </table:table-cell>
          <table:table-cell table:style-name="ce65" table:formula="of:=([.H9]-[.G9])/[.H9]" office:value-type="percentage" office:value="0" calcext:value-type="percentage">
            <text:p>0.00 %</text:p>
          </table:table-cell>
          <table:table-cell table:style-name="ce65" table:formula="of:=([.I9]-[.H9])/[.I9]" office:value-type="percentage" office:value="0" calcext:value-type="percentage">
            <text:p>0.00 %</text:p>
          </table:table-cell>
          <table:table-cell table:style-name="ce65" table:formula="of:=([.J9]-[.I9])/[.J9]" office:value-type="percentage" office:value="0.111111111111111" calcext:value-type="percentage">
            <text:p>11.11 %</text:p>
          </table:table-cell>
          <table:table-cell table:style-name="ce65" table:formula="of:=([.K9]-[.J9])/[.K9]" office:value-type="percentage" office:value="0" calcext:value-type="percentage">
            <text:p>0.00 %</text:p>
          </table:table-cell>
          <table:table-cell table:style-name="ce65" table:formula="of:=([.L9]-[.K9])/[.L9]" office:value-type="percentage" office:value="0" calcext:value-type="percentage">
            <text:p>0.00 %</text:p>
          </table:table-cell>
          <table:table-cell table:style-name="ce65" table:formula="of:=([.M9]-[.L9])/[.M9]" office:value-type="percentage" office:value="0" calcext:value-type="percentage">
            <text:p>0.00 %</text:p>
          </table:table-cell>
          <table:table-cell table:style-name="ce65" table:formula="of:=([.N9]-[.M9])/[.N9]" office:value-type="percentage" office:value="-0.285714285714286" calcext:value-type="percentage">
            <text:p>-28.57 %</text:p>
          </table:table-cell>
          <table:table-cell table:style-name="ce65" table:formula="of:=([.O9]-[.N9])/[.O9]" office:value-type="percentage" office:value="0" calcext:value-type="percentage">
            <text:p>0.00 %</text:p>
          </table:table-cell>
          <table:table-cell table:style-name="ce56"/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3"/>
          <table:table-cell table:style-name="ce57" table:formula="of:=[.D32]*[$Resumen.$H$22]" office:value-type="float" office:value="0" calcext:value-type="float">
            <text:p>0</text:p>
          </table:table-cell>
          <table:table-cell table:style-name="ce65" table:formula="of:=([.E10]-[.D10])/[.E10]" office:value-type="percentage" office:value="0" calcext:value-type="percentage">
            <text:p>0.00 %</text:p>
          </table:table-cell>
          <table:table-cell table:style-name="ce65" table:formula="of:=([.G10]-[.F10])/[.G10]" office:value-type="percentage" office:value="0.125" calcext:value-type="percentage">
            <text:p>12.50 %</text:p>
          </table:table-cell>
          <table:table-cell table:style-name="ce65" table:formula="of:=([.G10]-[.F10])/[.G10]" office:value-type="percentage" office:value="0.125" calcext:value-type="percentage">
            <text:p>12.50 %</text:p>
          </table:table-cell>
          <table:table-cell table:style-name="ce65" table:formula="of:=([.H10]-[.G10])/[.H10]" office:value-type="percentage" office:value="0" calcext:value-type="percentage">
            <text:p>0.00 %</text:p>
          </table:table-cell>
          <table:table-cell table:style-name="ce65" table:formula="of:=([.I10]-[.H10])/[.I10]" office:value-type="percentage" office:value="0" calcext:value-type="percentage">
            <text:p>0.00 %</text:p>
          </table:table-cell>
          <table:table-cell table:style-name="ce65" table:formula="of:=([.J10]-[.I10])/[.J10]" office:value-type="percentage" office:value="0.111111111111111" calcext:value-type="percentage">
            <text:p>11.11 %</text:p>
          </table:table-cell>
          <table:table-cell table:style-name="ce65" table:formula="of:=([.K10]-[.J10])/[.K10]" office:value-type="percentage" office:value="0" calcext:value-type="percentage">
            <text:p>0.00 %</text:p>
          </table:table-cell>
          <table:table-cell table:style-name="ce65" table:formula="of:=([.L10]-[.K10])/[.L10]" office:value-type="percentage" office:value="0" calcext:value-type="percentage">
            <text:p>0.00 %</text:p>
          </table:table-cell>
          <table:table-cell table:style-name="ce65" table:formula="of:=([.M10]-[.L10])/[.M10]" office:value-type="percentage" office:value="0" calcext:value-type="percentage">
            <text:p>0.00 %</text:p>
          </table:table-cell>
          <table:table-cell table:style-name="ce65" table:formula="of:=([.N10]-[.M10])/[.N10]" office:value-type="percentage" office:value="-0.285714285714286" calcext:value-type="percentage">
            <text:p>-28.57 %</text:p>
          </table:table-cell>
          <table:table-cell table:style-name="ce65" table:formula="of:=([.O10]-[.N10])/[.O10]" office:value-type="percentage" office:value="0" calcext:value-type="percentage">
            <text:p>0.00 %</text:p>
          </table:table-cell>
          <table:table-cell table:style-name="ce56"/>
          <table:table-cell table:style-name="ce41" table:number-columns-repeated="17"/>
          <table:table-cell table:number-columns-repeated="16351"/>
        </table:table-row>
        <table:table-row table:style-name="ro1">
          <table:table-cell table:style-name="ce41" table:number-columns-repeated="3"/>
          <table:table-cell table:style-name="ce57" table:formula="of:=[.D33]*[$Resumen.$H$22]" office:value-type="float" office:value="0" calcext:value-type="float">
            <text:p>0</text:p>
          </table:table-cell>
          <table:table-cell table:style-name="ce65" table:formula="of:=([.E11]-[.D11])/[.E11]" office:value-type="percentage" office:value="0" calcext:value-type="percentage">
            <text:p>0.00 %</text:p>
          </table:table-cell>
          <table:table-cell table:style-name="ce65" table:formula="of:=([.G11]-[.F11])/[.G11]" office:value-type="percentage" office:value="0.125" calcext:value-type="percentage">
            <text:p>12.50 %</text:p>
          </table:table-cell>
          <table:table-cell table:style-name="ce65" table:formula="of:=([.G11]-[.F11])/[.G11]" office:value-type="percentage" office:value="0.125" calcext:value-type="percentage">
            <text:p>12.50 %</text:p>
          </table:table-cell>
          <table:table-cell table:style-name="ce65" table:formula="of:=([.H11]-[.G11])/[.H11]" office:value-type="percentage" office:value="0" calcext:value-type="percentage">
            <text:p>0.00 %</text:p>
          </table:table-cell>
          <table:table-cell table:style-name="ce65" table:formula="of:=([.I11]-[.H11])/[.I11]" office:value-type="percentage" office:value="0" calcext:value-type="percentage">
            <text:p>0.00 %</text:p>
          </table:table-cell>
          <table:table-cell table:style-name="ce65" table:formula="of:=([.J11]-[.I11])/[.J11]" office:value-type="percentage" office:value="0.111111111111111" calcext:value-type="percentage">
            <text:p>11.11 %</text:p>
          </table:table-cell>
          <table:table-cell table:style-name="ce65" table:formula="of:=([.K11]-[.J11])/[.K11]" office:value-type="percentage" office:value="0" calcext:value-type="percentage">
            <text:p>0.00 %</text:p>
          </table:table-cell>
          <table:table-cell table:style-name="ce65" table:formula="of:=([.L11]-[.K11])/[.L11]" office:value-type="percentage" office:value="0" calcext:value-type="percentage">
            <text:p>0.00 %</text:p>
          </table:table-cell>
          <table:table-cell table:style-name="ce65" table:formula="of:=([.M11]-[.L11])/[.M11]" office:value-type="percentage" office:value="0" calcext:value-type="percentage">
            <text:p>0.00 %</text:p>
          </table:table-cell>
          <table:table-cell table:style-name="ce65" table:formula="of:=([.N11]-[.M11])/[.N11]" office:value-type="percentage" office:value="-0.285714285714286" calcext:value-type="percentage">
            <text:p>-28.57 %</text:p>
          </table:table-cell>
          <table:table-cell table:style-name="ce65" table:formula="of:=([.O11]-[.N11])/[.O11]" office:value-type="percentage" office:value="0" calcext:value-type="percentage">
            <text:p>0.00 %</text:p>
          </table:table-cell>
          <table:table-cell table:style-name="ce56"/>
          <table:table-cell table:style-name="ce41" table:number-columns-repeated="17"/>
          <table:table-cell table:number-columns-repeated="16351"/>
        </table:table-row>
        <table:table-row table:style-name="ro1" table:number-rows-repeated="200">
          <table:table-cell table:style-name="ce41" table:number-columns-repeated="3"/>
          <table:table-cell table:style-name="ce56" table:number-columns-repeated="13"/>
          <table:table-cell table:style-name="ce41" table:number-columns-repeated="17"/>
          <table:table-cell table:number-columns-repeated="16351"/>
        </table:table-row>
        <table:table-row table:style-name="ro7">
          <table:table-cell table:style-name="ce41" table:number-columns-repeated="33"/>
          <table:table-cell table:number-columns-repeated="16351"/>
        </table:table-row>
        <table:table-row table:style-name="ro7" table:number-rows-repeated="759">
          <table:table-cell table:style-name="ce41" table:number-columns-repeated="33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version_Inicial" table:style-name="ta3"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number-columns-repeated="7" table:default-cell-style-name="Default"/>
        <table:table-column table:style-name="co8" table:number-columns-repeated="16367" table:default-cell-style-name="Default"/>
        <table:table-row table:style-name="ro1">
          <table:table-cell table:style-name="ce70" table:number-columns-repeated="3"/>
          <table:table-cell table:style-name="ce95"/>
          <table:table-cell table:style-name="ce70" table:number-columns-repeated="13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73" office:value-type="string" calcext:value-type="string" table:number-columns-spanned="7" table:number-rows-spanned="1">
            <text:p>CUADRO N°03</text:p>
          </table:table-cell>
          <table:covered-table-cell table:number-columns-repeated="6" table:style-name="ce12"/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0">
          <table:table-cell table:style-name="ce50"/>
          <table:table-cell table:style-name="ce45"/>
          <table:table-cell table:style-name="ce50" table:number-columns-repeated="15"/>
          <table:table-cell table:style-name="ce41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74" office:value-type="string" calcext:value-type="string" table:number-columns-spanned="7" table:number-rows-spanned="1">
            <text:p>PRESUPUESTO DE INVERSIÓN Y FINANCIAMIENTO</text:p>
          </table:table-cell>
          <table:covered-table-cell table:number-columns-repeated="6" table:style-name="ce12"/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1">
          <table:table-cell table:style-name="ce70" table:number-columns-repeated="3"/>
          <table:table-cell table:style-name="ce95"/>
          <table:table-cell table:style-name="ce70" table:number-columns-repeated="13"/>
          <table:table-cell table:style-name="ce72" table:number-columns-repeated="9"/>
          <table:table-cell table:number-columns-repeated="16358"/>
        </table:table-row>
        <table:table-row table:style-name="ro11">
          <table:table-cell table:style-name="ce70"/>
          <table:table-cell table:style-name="ce75" office:value-type="string" calcext:value-type="string" table:number-columns-spanned="1" table:number-rows-spanned="2">
            <text:p>RUBRO</text:p>
          </table:table-cell>
          <table:table-cell table:style-name="ce75" office:value-type="string" calcext:value-type="string" table:number-columns-spanned="4" table:number-rows-spanned="1">
            <text:p>INVERSIÓN INICIAL</text:p>
          </table:table-cell>
          <table:covered-table-cell table:number-columns-repeated="2" table:style-name="ce96"/>
          <table:covered-table-cell table:style-name="ce115"/>
          <table:table-cell table:style-name="ce75" office:value-type="string" calcext:value-type="string" table:number-columns-spanned="2" table:number-rows-spanned="1">
            <text:p>FINANCIAMIENTO</text:p>
          </table:table-cell>
          <table:covered-table-cell table:style-name="ce115"/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5">
          <table:table-cell table:style-name="ce70"/>
          <table:covered-table-cell table:style-name="ce76"/>
          <table:table-cell table:style-name="ce89" office:value-type="string" calcext:value-type="string">
            <text:p>Unidad de Medida</text:p>
          </table:table-cell>
          <table:table-cell table:style-name="ce89" office:value-type="string" calcext:value-type="string">
            <text:p>Unidad Requerida</text:p>
          </table:table-cell>
          <table:table-cell table:style-name="ce89" office:value-type="string" calcext:value-type="string">
            <text:p>Valor Unitario</text:p>
          </table:table-cell>
          <table:table-cell table:style-name="ce75" office:value-type="string" calcext:value-type="string">
            <text:p>Total</text:p>
          </table:table-cell>
          <table:table-cell table:style-name="ce89" office:value-type="string" calcext:value-type="string">
            <text:p>Capital Propio</text:p>
          </table:table-cell>
          <table:table-cell table:style-name="ce89" office:value-type="string" calcext:value-type="string">
            <text:p>Préstamo</text:p>
          </table:table-cell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77" office:value-type="string" calcext:value-type="string">
            <text:p>ACTIVO FIJO</text:p>
          </table:table-cell>
          <table:table-cell table:style-name="ce90" table:number-columns-repeated="3"/>
          <table:table-cell table:style-name="ce82" table:number-columns-repeated="3"/>
          <table:table-cell table:style-name="ce70"/>
          <table:table-cell table:style-name="ce123" office:value-type="string" calcext:value-type="string">
            <text:p>INVERSION</text:p>
          </table:table-cell>
          <table:table-cell table:style-name="ce123" office:value-type="string" calcext:value-type="string">
            <text:p>S/</text:p>
          </table:table-cell>
          <table:table-cell table:style-name="ce123" office:value-type="string" calcext:value-type="string">
            <text:p>%</text:p>
          </table:table-cell>
          <table:table-cell table:style-name="ce70" table:number-columns-repeated="5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78" office:value-type="string" calcext:value-type="string">
            <text:p>A. TANGIBLES</text:p>
          </table:table-cell>
          <table:table-cell table:style-name="ce78"/>
          <table:table-cell table:style-name="ce97"/>
          <table:table-cell table:style-name="ce108"/>
          <table:table-cell table:style-name="ce108" table:formula="of:=[.F14]+[.F18]+[.F11]+[.F13]" office:value-type="float" office:value="11772" calcext:value-type="float">
            <text:p>S/11,772.00</text:p>
          </table:table-cell>
          <table:table-cell table:style-name="ce108" table:number-columns-repeated="2"/>
          <table:table-cell table:style-name="ce70"/>
          <table:table-cell table:style-name="ce82" office:value-type="string" calcext:value-type="string">
            <text:p>ACTIVO</text:p>
          </table:table-cell>
          <table:table-cell table:style-name="ce124" table:formula="of:=[.F27]" office:value-type="float" office:value="13442" calcext:value-type="float">
            <text:p>13,442.00</text:p>
          </table:table-cell>
          <table:table-cell table:style-name="ce127" table:formula="of:=[.K9]/[.K11]" office:value-type="percentage" office:value="0.119850921930169" calcext:value-type="percentage">
            <text:p>12 %</text:p>
          </table:table-cell>
          <table:table-cell table:style-name="ce70" table:number-columns-repeated="5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79" office:value-type="string" calcext:value-type="string">
            <text:p>Terreno</text:p>
          </table:table-cell>
          <table:table-cell table:style-name="ce79"/>
          <table:table-cell table:style-name="ce98"/>
          <table:table-cell table:style-name="ce109"/>
          <table:table-cell table:style-name="ce116" table:number-columns-repeated="3"/>
          <table:table-cell table:style-name="ce70"/>
          <table:table-cell table:style-name="ce82" office:value-type="string" calcext:value-type="string">
            <text:p>CAPITAL DE TRABAJO</text:p>
          </table:table-cell>
          <table:table-cell table:style-name="ce124" table:formula="of:=[.F36]" office:value-type="float" office:value="98714" calcext:value-type="float">
            <text:p>98,714.00</text:p>
          </table:table-cell>
          <table:table-cell table:style-name="ce127" table:formula="of:=[.K10]/[.K11]" office:value-type="percentage" office:value="0.880149078069831" calcext:value-type="percentage">
            <text:p>88 %</text:p>
          </table:table-cell>
          <table:table-cell table:style-name="ce70" table:number-columns-repeated="5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79" office:value-type="string" calcext:value-type="string">
            <text:p>Construccion y edificaciones</text:p>
          </table:table-cell>
          <table:table-cell table:style-name="ce79" office:value-type="string" calcext:value-type="string">
            <text:p>Unidad</text:p>
          </table:table-cell>
          <table:table-cell table:style-name="ce98" office:value-type="float" office:value="1" calcext:value-type="float">
            <text:p>1</text:p>
          </table:table-cell>
          <table:table-cell table:style-name="ce109" office:value-type="float" office:value="3000" calcext:value-type="float">
            <text:p>S/3,000.00</text:p>
          </table:table-cell>
          <table:table-cell table:style-name="ce110" table:formula="of:=[.E11]" office:value-type="float" office:value="3000" calcext:value-type="float">
            <text:p>S/3,000.00</text:p>
          </table:table-cell>
          <table:table-cell table:style-name="ce110"/>
          <table:table-cell table:style-name="ce109"/>
          <table:table-cell table:style-name="ce70"/>
          <table:table-cell table:style-name="ce84" office:value-type="string" calcext:value-type="string">
            <text:p>TOTAL</text:p>
          </table:table-cell>
          <table:table-cell table:style-name="ce125" table:formula="of:=SUM([.K9:.K10])" office:value-type="float" office:value="112156" calcext:value-type="float">
            <text:p>112,156.00</text:p>
          </table:table-cell>
          <table:table-cell table:style-name="ce84"/>
          <table:table-cell table:style-name="ce70" table:number-columns-repeated="5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79" office:value-type="string" calcext:value-type="string">
            <text:p>Maquinarias y equipos </text:p>
          </table:table-cell>
          <table:table-cell table:style-name="ce79" office:value-type="string" calcext:value-type="string">
            <text:p>Unidad</text:p>
          </table:table-cell>
          <table:table-cell table:style-name="ce98" office:value-type="float" office:value="1" calcext:value-type="float">
            <text:p>1</text:p>
          </table:table-cell>
          <table:table-cell table:style-name="ce109" office:value-type="float" office:value="3000" calcext:value-type="float">
            <text:p>S/3,000.00</text:p>
          </table:table-cell>
          <table:table-cell table:style-name="ce117" table:formula="of:=[.E12]*[.D12]" office:value-type="float" office:value="3000" calcext:value-type="float">
            <text:p>S/3,000.00</text:p>
          </table:table-cell>
          <table:table-cell table:style-name="ce110" table:number-columns-repeated="2"/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79" office:value-type="string" calcext:value-type="string">
            <text:p>Herramientas y utensilios</text:p>
          </table:table-cell>
          <table:table-cell table:style-name="ce79" office:value-type="string" calcext:value-type="string">
            <text:p>Unidad</text:p>
          </table:table-cell>
          <table:table-cell table:style-name="ce98" office:value-type="float" office:value="1" calcext:value-type="float">
            <text:p>1</text:p>
          </table:table-cell>
          <table:table-cell table:style-name="ce110" office:value-type="float" office:value="45" calcext:value-type="float">
            <text:p>S/45.00</text:p>
          </table:table-cell>
          <table:table-cell table:style-name="ce110" table:formula="of:=[.E13]*[.D13]" office:value-type="float" office:value="45" calcext:value-type="float">
            <text:p>S/45.00</text:p>
          </table:table-cell>
          <table:table-cell table:style-name="ce110" table:number-columns-repeated="2"/>
          <table:table-cell table:style-name="ce70"/>
          <table:table-cell table:style-name="ce123" office:value-type="string" calcext:value-type="string">
            <text:p>FINANCIMIENTO</text:p>
          </table:table-cell>
          <table:table-cell table:style-name="ce123" office:value-type="string" calcext:value-type="string">
            <text:p>S/</text:p>
          </table:table-cell>
          <table:table-cell table:style-name="ce123" office:value-type="string" calcext:value-type="string">
            <text:p>%</text:p>
          </table:table-cell>
          <table:table-cell table:style-name="ce70" table:number-columns-repeated="5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0" office:value-type="string" calcext:value-type="string">
            <text:p>Muebles y <text:s/>enseres</text:p>
          </table:table-cell>
          <table:table-cell table:style-name="ce80"/>
          <table:table-cell table:style-name="ce99"/>
          <table:table-cell table:style-name="ce111"/>
          <table:table-cell table:style-name="ce108" table:formula="of:=SUM([.F15:.F17])" office:value-type="float" office:value="4227" calcext:value-type="float">
            <text:p>S/4,227.00</text:p>
          </table:table-cell>
          <table:table-cell table:style-name="ce108"/>
          <table:table-cell table:style-name="ce111"/>
          <table:table-cell table:style-name="ce70"/>
          <table:table-cell table:style-name="ce82" office:value-type="string" calcext:value-type="string">
            <text:p>PATRIMONIO</text:p>
          </table:table-cell>
          <table:table-cell table:style-name="ce124" table:formula="of:=[.G37]" office:value-type="float" office:value="104089" calcext:value-type="float">
            <text:p>104,089.00</text:p>
          </table:table-cell>
          <table:table-cell table:style-name="ce127" table:formula="of:=[.K14]/[.K16]" office:value-type="percentage" office:value="0.928073397767395" calcext:value-type="percentage">
            <text:p>93 %</text:p>
          </table:table-cell>
          <table:table-cell table:style-name="ce70" table:number-columns-repeated="5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1" office:value-type="string" calcext:value-type="string">
            <text:p>Estantes</text:p>
          </table:table-cell>
          <table:table-cell table:style-name="ce79" office:value-type="string" calcext:value-type="string">
            <text:p>Unidad</text:p>
          </table:table-cell>
          <table:table-cell table:style-name="ce98" office:value-type="float" office:value="20" calcext:value-type="float">
            <text:p>20</text:p>
          </table:table-cell>
          <table:table-cell table:style-name="ce110" office:value-type="float" office:value="200" calcext:value-type="float">
            <text:p>S/200.00</text:p>
          </table:table-cell>
          <table:table-cell table:style-name="ce110" table:formula="of:=[.E15]*[.D15]" office:value-type="float" office:value="4000" calcext:value-type="float">
            <text:p>S/4,000.00</text:p>
          </table:table-cell>
          <table:table-cell table:style-name="ce110" table:number-columns-repeated="2"/>
          <table:table-cell table:style-name="ce70"/>
          <table:table-cell table:style-name="ce82" office:value-type="string" calcext:value-type="string">
            <text:p>DEUDA</text:p>
          </table:table-cell>
          <table:table-cell table:style-name="ce124" table:formula="of:=[.H37]" office:value-type="float" office:value="8067" calcext:value-type="float">
            <text:p>8,067.00</text:p>
          </table:table-cell>
          <table:table-cell table:style-name="ce127" table:formula="of:=[.K15]/[.K16]" office:value-type="percentage" office:value="0.0719266022326046" calcext:value-type="percentage">
            <text:p>7 %</text:p>
          </table:table-cell>
          <table:table-cell table:style-name="ce70" table:number-columns-repeated="5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1" office:value-type="string" calcext:value-type="string">
            <text:p>Escritorio</text:p>
          </table:table-cell>
          <table:table-cell table:style-name="ce79" office:value-type="string" calcext:value-type="string">
            <text:p>Unidad</text:p>
          </table:table-cell>
          <table:table-cell table:style-name="ce98" office:value-type="float" office:value="1" calcext:value-type="float">
            <text:p>1</text:p>
          </table:table-cell>
          <table:table-cell table:style-name="ce110" office:value-type="float" office:value="200" calcext:value-type="float">
            <text:p>S/200.00</text:p>
          </table:table-cell>
          <table:table-cell table:style-name="ce110" table:formula="of:=[.E16]*[.D16]" office:value-type="float" office:value="200" calcext:value-type="float">
            <text:p>S/200.00</text:p>
          </table:table-cell>
          <table:table-cell table:style-name="ce110" table:number-columns-repeated="2"/>
          <table:table-cell table:style-name="ce70"/>
          <table:table-cell table:style-name="ce123" office:value-type="string" calcext:value-type="string">
            <text:p>TOTAL</text:p>
          </table:table-cell>
          <table:table-cell table:style-name="ce126" table:formula="of:=SUM([.K14:.K15])" office:value-type="float" office:value="112156" calcext:value-type="float">
            <text:p>112,156.00</text:p>
          </table:table-cell>
          <table:table-cell table:style-name="ce123"/>
          <table:table-cell table:style-name="ce70" table:number-columns-repeated="5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1" office:value-type="string" calcext:value-type="string">
            <text:p>Silla</text:p>
          </table:table-cell>
          <table:table-cell table:style-name="ce79" office:value-type="string" calcext:value-type="string">
            <text:p>Unidad</text:p>
          </table:table-cell>
          <table:table-cell table:style-name="ce98" office:value-type="float" office:value="1" calcext:value-type="float">
            <text:p>1</text:p>
          </table:table-cell>
          <table:table-cell table:style-name="ce110" office:value-type="float" office:value="27" calcext:value-type="float">
            <text:p>S/27.00</text:p>
          </table:table-cell>
          <table:table-cell table:style-name="ce110" table:formula="of:=[.E17]*[.D17]" office:value-type="float" office:value="27" calcext:value-type="float">
            <text:p>S/27.00</text:p>
          </table:table-cell>
          <table:table-cell table:style-name="ce110" table:number-columns-repeated="2"/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0" office:value-type="string" calcext:value-type="string">
            <text:p>Equipo informático</text:p>
          </table:table-cell>
          <table:table-cell table:style-name="ce80"/>
          <table:table-cell table:style-name="ce99"/>
          <table:table-cell table:style-name="ce111"/>
          <table:table-cell table:style-name="ce108" table:formula="of:=SUM([.F19:.F21])" office:value-type="float" office:value="4500" calcext:value-type="float">
            <text:p>S/4,500.00</text:p>
          </table:table-cell>
          <table:table-cell table:style-name="ce108"/>
          <table:table-cell table:style-name="ce111"/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1" office:value-type="string" calcext:value-type="string">
            <text:p>Computadora</text:p>
          </table:table-cell>
          <table:table-cell table:style-name="ce79" office:value-type="string" calcext:value-type="string">
            <text:p>Unidad</text:p>
          </table:table-cell>
          <table:table-cell table:style-name="ce98" office:value-type="float" office:value="1" calcext:value-type="float">
            <text:p>1</text:p>
          </table:table-cell>
          <table:table-cell table:style-name="ce110" office:value-type="float" office:value="2500" calcext:value-type="float">
            <text:p>S/2,500.00</text:p>
          </table:table-cell>
          <table:table-cell table:style-name="ce110" table:formula="of:=[.E19]*[.D19]" office:value-type="float" office:value="2500" calcext:value-type="float">
            <text:p>S/2,500.00</text:p>
          </table:table-cell>
          <table:table-cell table:style-name="ce110" table:number-columns-repeated="2"/>
          <table:table-cell table:style-name="ce70"/>
          <table:table-cell table:style-name="ce70" office:value-type="string" calcext:value-type="string">
            <text:p>gastos de administración</text:p>
          </table:table-cell>
          <table:table-cell table:style-name="ce70" table:formula="of:=[.K21]+[.K22]" office:value-type="float" office:value="230" calcext:value-type="float">
            <text:p>230</text:p>
          </table:table-cell>
          <table:table-cell table:style-name="ce70" table:number-columns-repeated="6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1" office:value-type="string" calcext:value-type="string">
            <text:p>Ticketera</text:p>
          </table:table-cell>
          <table:table-cell table:style-name="ce79" office:value-type="string" calcext:value-type="string">
            <text:p>Unidad</text:p>
          </table:table-cell>
          <table:table-cell table:style-name="ce98" office:value-type="float" office:value="1" calcext:value-type="float">
            <text:p>1</text:p>
          </table:table-cell>
          <table:table-cell table:style-name="ce110" office:value-type="float" office:value="1500" calcext:value-type="float">
            <text:p>S/1,500.00</text:p>
          </table:table-cell>
          <table:table-cell table:style-name="ce110" table:formula="of:=[.E20]*[.D20]" office:value-type="float" office:value="1500" calcext:value-type="float">
            <text:p>S/1,500.00</text:p>
          </table:table-cell>
          <table:table-cell table:style-name="ce110" table:number-columns-repeated="2"/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1" office:value-type="string" calcext:value-type="string">
            <text:p>Accesorios</text:p>
          </table:table-cell>
          <table:table-cell table:style-name="ce79" office:value-type="string" calcext:value-type="string">
            <text:p>Unidad</text:p>
          </table:table-cell>
          <table:table-cell table:style-name="ce98" office:value-type="float" office:value="1" calcext:value-type="float">
            <text:p>1</text:p>
          </table:table-cell>
          <table:table-cell table:style-name="ce110" office:value-type="float" office:value="500" calcext:value-type="float">
            <text:p>S/500.00</text:p>
          </table:table-cell>
          <table:table-cell table:style-name="ce110" table:formula="of:=[.E21]*[.D21]" office:value-type="float" office:value="500" calcext:value-type="float">
            <text:p>S/500.00</text:p>
          </table:table-cell>
          <table:table-cell table:style-name="ce110" table:number-columns-repeated="2"/>
          <table:table-cell table:style-name="ce70"/>
          <table:table-cell table:style-name="ce70" office:value-type="string" calcext:value-type="string">
            <text:p>agua, luz y teléfono </text:p>
          </table:table-cell>
          <table:table-cell table:style-name="ce70" office:value-type="float" office:value="180" calcext:value-type="float">
            <text:p>180</text:p>
          </table:table-cell>
          <table:table-cell table:style-name="ce70" table:number-columns-repeated="6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1" office:value-type="string" calcext:value-type="string">
            <text:p>Vehículos</text:p>
          </table:table-cell>
          <table:table-cell table:style-name="ce91" office:value-type="string" calcext:value-type="string">
            <text:p>Unidad 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float" office:value="24000" calcext:value-type="float">
            <text:p>S/24,000.00</text:p>
          </table:table-cell>
          <table:table-cell table:style-name="ce110" table:formula="of:=[.E22]*[.D22]" office:value-type="float" office:value="24000" calcext:value-type="float">
            <text:p>S/24,000.00</text:p>
          </table:table-cell>
          <table:table-cell table:style-name="ce110"/>
          <table:table-cell table:style-name="ce109"/>
          <table:table-cell table:style-name="ce70"/>
          <table:table-cell table:style-name="ce70" office:value-type="string" calcext:value-type="string">
            <text:p>utiles de oficina </text:p>
          </table:table-cell>
          <table:table-cell table:style-name="ce70" office:value-type="float" office:value="50" calcext:value-type="float">
            <text:p>50</text:p>
          </table:table-cell>
          <table:table-cell table:style-name="ce70" table:number-columns-repeated="6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78" office:value-type="string" calcext:value-type="string">
            <text:p>B. INTANGIBLES</text:p>
          </table:table-cell>
          <table:table-cell table:style-name="ce78"/>
          <table:table-cell table:style-name="ce97"/>
          <table:table-cell table:style-name="ce111"/>
          <table:table-cell table:style-name="ce108" table:formula="of:=SUM([.F24:.F26])" office:value-type="float" office:value="1670" calcext:value-type="float">
            <text:p>S/1,670.00</text:p>
          </table:table-cell>
          <table:table-cell table:style-name="ce108" table:number-columns-repeated="2"/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2" office:value-type="string" calcext:value-type="string">
            <text:p>Constitución y formalizacion</text:p>
          </table:table-cell>
          <table:table-cell table:style-name="ce82" office:value-type="string" calcext:value-type="string">
            <text:p>Documento</text:p>
          </table:table-cell>
          <table:table-cell table:style-name="ce101" office:value-type="float" office:value="1" calcext:value-type="float">
            <text:p>1</text:p>
          </table:table-cell>
          <table:table-cell table:style-name="ce110" office:value-type="float" office:value="1020" calcext:value-type="float">
            <text:p>S/1,020.00</text:p>
          </table:table-cell>
          <table:table-cell table:style-name="ce118" table:formula="of:=[.E24]*[.D24]" office:value-type="float" office:value="1020" calcext:value-type="float">
            <text:p>S/1,020.00</text:p>
          </table:table-cell>
          <table:table-cell table:style-name="ce110"/>
          <table:table-cell table:style-name="ce109"/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2" office:value-type="string" calcext:value-type="string">
            <text:p>Licencias de funcionamiento</text:p>
          </table:table-cell>
          <table:table-cell table:style-name="ce82" office:value-type="string" calcext:value-type="string">
            <text:p>Documento</text:p>
          </table:table-cell>
          <table:table-cell table:style-name="ce101" office:value-type="float" office:value="1" calcext:value-type="float">
            <text:p>1</text:p>
          </table:table-cell>
          <table:table-cell table:style-name="ce110" office:value-type="float" office:value="150" calcext:value-type="float">
            <text:p>S/150.00</text:p>
          </table:table-cell>
          <table:table-cell table:style-name="ce118" table:formula="of:=[.E25]*[.D25]" office:value-type="float" office:value="150" calcext:value-type="float">
            <text:p>S/150.00</text:p>
          </table:table-cell>
          <table:table-cell table:style-name="ce110"/>
          <table:table-cell table:style-name="ce109"/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1"/>
          <table:table-cell table:style-name="ce83" office:value-type="string" calcext:value-type="string">
            <text:p>Promoción</text:p>
          </table:table-cell>
          <table:table-cell table:style-name="ce83" office:value-type="string" calcext:value-type="string">
            <text:p>Unidad</text:p>
          </table:table-cell>
          <table:table-cell table:style-name="ce98" office:value-type="float" office:value="1" calcext:value-type="float">
            <text:p>1</text:p>
          </table:table-cell>
          <table:table-cell table:style-name="ce112" office:value-type="float" office:value="500" calcext:value-type="float">
            <text:p>S/500.00</text:p>
          </table:table-cell>
          <table:table-cell table:style-name="ce118" table:formula="of:=[.E26]*[.D26]" office:value-type="float" office:value="500" calcext:value-type="float">
            <text:p>S/500.00</text:p>
          </table:table-cell>
          <table:table-cell table:style-name="ce112"/>
          <table:table-cell table:style-name="ce121"/>
          <table:table-cell table:style-name="ce71" table:number-columns-repeated="9"/>
          <table:table-cell table:style-name="ce128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4" office:value-type="string" calcext:value-type="string">
            <text:p>TOTAL DE ACTIVO FIJO</text:p>
          </table:table-cell>
          <table:table-cell table:style-name="ce92" table:number-columns-repeated="2"/>
          <table:table-cell table:style-name="ce113"/>
          <table:table-cell table:style-name="ce114" table:formula="of:=[.F23]+[.F9]" office:value-type="float" office:value="13442" calcext:value-type="float">
            <text:p>S/13,442.00</text:p>
          </table:table-cell>
          <table:table-cell table:style-name="ce114" table:formula="of:=[.F27]" office:value-type="float" office:value="13442" calcext:value-type="float">
            <text:p>S/13,442.00</text:p>
          </table:table-cell>
          <table:table-cell table:style-name="ce114" office:value-type="float" office:value="0" calcext:value-type="float">
            <text:p>S/0.00</text:p>
          </table:table-cell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5" office:value-type="string" calcext:value-type="string">
            <text:p>CAPITAL DE TRABAJO</text:p>
          </table:table-cell>
          <table:table-cell table:style-name="ce85"/>
          <table:table-cell table:style-name="ce102"/>
          <table:table-cell table:style-name="ce110"/>
          <table:table-cell table:style-name="ce116" table:number-columns-repeated="2"/>
          <table:table-cell table:style-name="ce122" table:formula="of:=SUM([.H29:.H35])" office:value-type="float" office:value="8067" calcext:value-type="float">
            <text:p>S/8,067.00</text:p>
          </table:table-cell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7">
          <table:table-cell table:style-name="ce70"/>
          <table:table-cell table:style-name="ce82" office:value-type="string" calcext:value-type="string">
            <text:p>Materia prima</text:p>
          </table:table-cell>
          <table:table-cell table:style-name="ce93" office:value-type="string" calcext:value-type="string">
            <text:p>Ovillos</text:p>
          </table:table-cell>
          <table:table-cell table:style-name="ce103" table:formula="of:=[$Presupuesto_Ventas.$D$7]" office:value-type="float" office:value="24500" calcext:value-type="float">
            <text:p>24500</text:p>
          </table:table-cell>
          <table:table-cell table:style-name="ce110" table:formula="of:=[$Resumen.$H$21]" office:value-type="float" office:value="4" calcext:value-type="float">
            <text:p>S/4.00</text:p>
          </table:table-cell>
          <table:table-cell table:style-name="ce110" table:formula="of:=[.E29]*[.D29]" office:value-type="float" office:value="98000" calcext:value-type="float">
            <text:p>S/98,000.00</text:p>
          </table:table-cell>
          <table:table-cell table:style-name="ce110" table:formula="of:=[.F29]-[.H29]" office:value-type="float" office:value="89933" calcext:value-type="float">
            <text:p>S/89,933.00</text:p>
          </table:table-cell>
          <table:table-cell table:style-name="ce110" office:value-type="float" office:value="8067" calcext:value-type="float">
            <text:p>S/8,067.00</text:p>
          </table:table-cell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2" office:value-type="string" calcext:value-type="string">
            <text:p>Mano de obra</text:p>
          </table:table-cell>
          <table:table-cell table:style-name="ce82"/>
          <table:table-cell table:style-name="ce101" office:value-type="float" office:value="3" calcext:value-type="float">
            <text:p>3</text:p>
          </table:table-cell>
          <table:table-cell table:style-name="ce110" table:formula="of:=930" office:value-type="float" office:value="930" calcext:value-type="float">
            <text:p>S/930.00</text:p>
          </table:table-cell>
          <table:table-cell table:style-name="ce110" table:formula="of:=[.D30]*[.E30]" office:value-type="float" office:value="2790" calcext:value-type="float">
            <text:p>S/2,790.00</text:p>
          </table:table-cell>
          <table:table-cell table:style-name="ce110"/>
          <table:table-cell table:style-name="ce109"/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5" office:value-type="string" calcext:value-type="string">
            <text:p>Costos Indirectos de Producción</text:p>
          </table:table-cell>
          <table:table-cell table:style-name="ce85"/>
          <table:table-cell table:style-name="ce104" table:formula="of:=[.D32]+[.D33]" office:value-type="float" office:value="24514" calcext:value-type="float">
            <text:p>24514</text:p>
          </table:table-cell>
          <table:table-cell table:style-name="ce104" table:formula="of:=[.E32]+[.E33]" office:value-type="float" office:value="2.028" calcext:value-type="float">
            <text:p>2</text:p>
          </table:table-cell>
          <table:table-cell table:style-name="ce104" table:formula="of:=[.F32]+[.F33]" office:value-type="float" office:value="714" calcext:value-type="float">
            <text:p>714</text:p>
          </table:table-cell>
          <table:table-cell table:style-name="ce116" table:number-columns-repeated="2"/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1" office:value-type="string" calcext:value-type="string">
            <text:p>Flete</text:p>
          </table:table-cell>
          <table:table-cell table:style-name="ce82" office:value-type="string" calcext:value-type="string">
            <text:p>Paquete de ovillos</text:p>
          </table:table-cell>
          <table:table-cell table:style-name="ce105" table:formula="of:=[$Presupuesto_Ventas.$D$7]" office:value-type="float" office:value="24500" calcext:value-type="float">
            <text:p>24500</text:p>
          </table:table-cell>
          <table:table-cell table:style-name="ce110" office:value-type="float" office:value="0.028" calcext:value-type="float">
            <text:p>S/0.03</text:p>
          </table:table-cell>
          <table:table-cell table:style-name="ce110" table:formula="of:=[.E32]*[.D32]" office:value-type="float" office:value="686" calcext:value-type="float">
            <text:p>S/686.00</text:p>
          </table:table-cell>
          <table:table-cell table:style-name="ce110" table:formula="of:=[.F32]" office:value-type="float" office:value="686" calcext:value-type="float">
            <text:p>S/686.00</text:p>
          </table:table-cell>
          <table:table-cell table:style-name="ce109" table:formula="of:=[.F32]-[.G32]" office:value-type="float" office:value="0" calcext:value-type="float">
            <text:p>S/0.00</text:p>
          </table:table-cell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1" office:value-type="string" calcext:value-type="string">
            <text:p>Bolsas de despacho</text:p>
          </table:table-cell>
          <table:table-cell table:style-name="ce79" office:value-type="string" calcext:value-type="string">
            <text:p>Paquete x 50</text:p>
          </table:table-cell>
          <table:table-cell table:style-name="ce98" office:value-type="float" office:value="14" calcext:value-type="float">
            <text:p>14</text:p>
          </table:table-cell>
          <table:table-cell table:style-name="ce110" office:value-type="float" office:value="2" calcext:value-type="float">
            <text:p>S/2.00</text:p>
          </table:table-cell>
          <table:table-cell table:style-name="ce110" table:formula="of:=[.E33]*[.D33]" office:value-type="float" office:value="28" calcext:value-type="float">
            <text:p>S/28.00</text:p>
          </table:table-cell>
          <table:table-cell table:style-name="ce110" table:formula="of:=[.F33]" office:value-type="float" office:value="28" calcext:value-type="float">
            <text:p>S/28.00</text:p>
          </table:table-cell>
          <table:table-cell table:style-name="ce109" table:formula="of:=[.F33]-[.G33]" office:value-type="float" office:value="0" calcext:value-type="float">
            <text:p>S/0.00</text:p>
          </table:table-cell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79" office:value-type="string" calcext:value-type="string">
            <text:p>Gastos de Administración</text:p>
          </table:table-cell>
          <table:table-cell table:style-name="ce79"/>
          <table:table-cell table:style-name="ce98"/>
          <table:table-cell table:style-name="ce110" table:number-columns-repeated="3"/>
          <table:table-cell table:style-name="ce109"/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79" office:value-type="string" calcext:value-type="string">
            <text:p>Gastos de Ventas</text:p>
          </table:table-cell>
          <table:table-cell table:style-name="ce82"/>
          <table:table-cell table:style-name="ce101"/>
          <table:table-cell table:style-name="ce110" table:number-columns-repeated="3"/>
          <table:table-cell table:style-name="ce109"/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1">
          <table:table-cell table:style-name="ce70"/>
          <table:table-cell table:style-name="ce77" office:value-type="string" calcext:value-type="string">
            <text:p>TOTAL DE CAPITAL DE TRABAJO</text:p>
          </table:table-cell>
          <table:table-cell table:style-name="ce90" table:number-columns-repeated="2"/>
          <table:table-cell table:style-name="ce110"/>
          <table:table-cell table:style-name="ce116" table:formula="of:=[.F29]+[.F32]+[.F33]" office:value-type="float" office:value="98714" calcext:value-type="float">
            <text:p>S/98,714.00</text:p>
          </table:table-cell>
          <table:table-cell table:style-name="ce116" table:formula="of:=[.G29]+[.G32]+[.G33]" office:value-type="float" office:value="90647" calcext:value-type="float">
            <text:p>S/90,647.00</text:p>
          </table:table-cell>
          <table:table-cell table:style-name="ce116" table:formula="of:=[.H29]+[.H32]+[.H33]" office:value-type="float" office:value="8067" calcext:value-type="float">
            <text:p>S/8,067.00</text:p>
          </table:table-cell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6" office:value-type="string" calcext:value-type="string">
            <text:p>TOTAL DE INVERSIÓN</text:p>
          </table:table-cell>
          <table:table-cell table:style-name="ce86"/>
          <table:table-cell table:style-name="ce84"/>
          <table:table-cell table:style-name="ce114"/>
          <table:table-cell table:style-name="ce114" table:formula="of:=[.F36]+[.F27]" office:value-type="float" office:value="112156" calcext:value-type="float">
            <text:p>S/112,156.00</text:p>
          </table:table-cell>
          <table:table-cell table:style-name="ce114" table:formula="of:=[.G27]+[.G36]" office:value-type="float" office:value="104089" calcext:value-type="float">
            <text:p>S/104,089.00</text:p>
          </table:table-cell>
          <table:table-cell table:style-name="ce114" table:formula="of:=[.H27]+[.H36]" office:value-type="float" office:value="8067" calcext:value-type="float">
            <text:p>S/8,067.00</text:p>
          </table:table-cell>
          <table:table-cell table:style-name="ce70"/>
          <table:table-cell table:style-name="ce70" table:formula="of:=[.G37]/[.F37]" office:value-type="float" office:value="0.928073397767395" calcext:value-type="float">
            <text:p>0.928073397767395</text:p>
          </table:table-cell>
          <table:table-cell table:style-name="ce70" table:number-columns-repeated="7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/>
          <table:table-cell table:style-name="ce87" table:number-columns-spanned="7" table:number-rows-spanned="1"/>
          <table:covered-table-cell table:number-columns-repeated="6" table:style-name="ce94"/>
          <table:table-cell table:style-name="ce70"/>
          <table:table-cell table:style-name="ce70" table:formula="of:=[.H37]/[.F37]" office:value-type="float" office:value="0.0719266022326046" calcext:value-type="float">
            <text:p>0.0719266022326046</text:p>
          </table:table-cell>
          <table:table-cell table:style-name="ce70" table:number-columns-repeated="7"/>
          <table:table-cell table:style-name="ce72" table:number-columns-repeated="9"/>
          <table:table-cell table:number-columns-repeated="16358"/>
        </table:table-row>
        <table:table-row table:style-name="ro11">
          <table:table-cell table:style-name="ce70"/>
          <table:table-cell table:style-name="ce88" table:number-columns-repeated="2"/>
          <table:table-cell table:style-name="ce106"/>
          <table:table-cell table:style-name="ce88"/>
          <table:table-cell table:style-name="ce119"/>
          <table:table-cell table:style-name="ce120" table:number-columns-repeated="2"/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7"/>
          <table:table-cell table:style-name="ce72" table:number-columns-repeated="9"/>
          <table:table-cell table:number-columns-repeated="16358"/>
        </table:table-row>
        <table:table-row table:style-name="ro1">
          <table:table-cell table:style-name="ce70" table:number-columns-repeated="3"/>
          <table:table-cell table:style-name="ce95"/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 table:number-columns-repeated="9"/>
          <table:table-cell table:style-name="ce72" table:number-columns-repeated="9"/>
          <table:table-cell table:number-columns-repeated="16358"/>
        </table:table-row>
        <table:table-row table:style-name="ro1" table:number-rows-repeated="200">
          <table:table-cell table:style-name="ce70" table:number-columns-repeated="3"/>
          <table:table-cell table:style-name="ce95"/>
          <table:table-cell table:style-name="ce70" table:number-columns-repeated="13"/>
          <table:table-cell table:style-name="ce72" table:number-columns-repeated="9"/>
          <table:table-cell table:number-columns-repeated="16358"/>
        </table:table-row>
        <table:table-row table:style-name="ro7" table:number-rows-repeated="757">
          <table:table-cell table:style-name="ce72" table:number-columns-repeated="3"/>
          <table:table-cell table:style-name="ce107"/>
          <table:table-cell table:style-name="ce72" table:number-columns-repeated="22"/>
          <table:table-cell table:number-columns-repeated="16358"/>
        </table:table-row>
        <table:table-row table:style-name="ro2" table:number-rows-repeated="104757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precion_VR" table:style-name="ta4">
        <office:forms form:automatic-focus="false" form:apply-design-mode="false"/>
        <table:table-column table:style-name="co24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24" table:number-columns-repeated="18" table:default-cell-style-name="Default"/>
        <table:table-column table:style-name="co8" table:number-columns-repeated="16358" table:default-cell-style-name="Default"/>
        <table:table-row table:style-name="ro1">
          <table:table-cell table:style-name="ce1"/>
          <table:table-cell table:style-name="ce41"/>
          <table:table-cell table:style-name="ce138" table:number-columns-repeated="6"/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/>
          <table:table-cell table:style-name="ce45" office:value-type="string" calcext:value-type="string" table:number-columns-spanned="7" table:number-rows-spanned="1">
            <text:p>CUADRO N° 04</text:p>
          </table:table-cell>
          <table:covered-table-cell table:number-columns-repeated="6" table:style-name="ce12"/>
          <table:table-cell table:style-name="ce1" table:number-columns-repeated="18"/>
          <table:table-cell table:number-columns-repeated="16358"/>
        </table:table-row>
        <table:table-row table:style-name="ro12">
          <table:table-cell table:style-name="ce1"/>
          <table:table-cell table:style-name="ce45"/>
          <table:table-cell table:style-name="ce50" table:number-columns-repeated="6"/>
          <table:table-cell table:style-name="ce1" table:number-columns-repeated="18"/>
          <table:table-cell table:number-columns-repeated="16358"/>
        </table:table-row>
        <table:table-row table:style-name="ro13">
          <table:table-cell table:style-name="ce1"/>
          <table:table-cell table:style-name="ce130" office:value-type="string" calcext:value-type="string" table:number-columns-spanned="7" table:number-rows-spanned="1">
            <text:p>TABLA DE DEPRECIACIONES Y VALOR DE RECUPERO</text:p>
          </table:table-cell>
          <table:covered-table-cell table:number-columns-repeated="6" table:style-name="ce12"/>
          <table:table-cell table:style-name="ce1" table:number-columns-repeated="18"/>
          <table:table-cell table:number-columns-repeated="16358"/>
        </table:table-row>
        <table:table-row table:style-name="ro14">
          <table:table-cell table:style-name="ce1"/>
          <table:table-cell table:style-name="ce131"/>
          <table:table-cell table:style-name="ce139" table:number-columns-repeated="6"/>
          <table:table-cell table:style-name="ce1" table:number-columns-repeated="18"/>
          <table:table-cell table:number-columns-repeated="16358"/>
        </table:table-row>
        <table:table-row table:style-name="ro15">
          <table:table-cell table:style-name="ce129"/>
          <table:table-cell table:style-name="ce132" office:value-type="string" calcext:value-type="string">
            <text:p>ACTIVO FIJO</text:p>
          </table:table-cell>
          <table:table-cell table:style-name="ce140" office:value-type="string" calcext:value-type="string">
            <text:p>Valor de compra</text:p>
          </table:table-cell>
          <table:table-cell table:style-name="ce140" office:value-type="string" calcext:value-type="string">
            <text:p>Vida útil (años)</text:p>
          </table:table-cell>
          <table:table-cell table:style-name="ce140" office:value-type="string" calcext:value-type="string">
            <text:p>Tasa de Depreciación</text:p>
          </table:table-cell>
          <table:table-cell table:style-name="ce140" office:value-type="string" calcext:value-type="string">
            <text:p>Depreciación Anual</text:p>
          </table:table-cell>
          <table:table-cell table:style-name="ce140" office:value-type="string" calcext:value-type="string">
            <text:p>Depreciación Acumulada</text:p>
          </table:table-cell>
          <table:table-cell table:style-name="ce140" office:value-type="string" calcext:value-type="string">
            <text:p>Valor de Recupero</text:p>
          </table:table-cell>
          <table:table-cell table:style-name="ce129" table:number-columns-repeated="18"/>
          <table:table-cell table:number-columns-repeated="16358"/>
        </table:table-row>
        <table:table-row table:style-name="ro1">
          <table:table-cell table:style-name="ce1"/>
          <table:table-cell table:style-name="ce133" office:value-type="string" calcext:value-type="string">
            <text:p>Infraestructura</text:p>
          </table:table-cell>
          <table:table-cell table:style-name="ce141" table:formula="of:=[$Inversion_Inicial.F11]" office:value-type="float" office:value="3000" calcext:value-type="float">
            <text:p>3,000.00</text:p>
          </table:table-cell>
          <table:table-cell table:style-name="ce146" office:value-type="float" office:value="5" calcext:value-type="float">
            <text:p>5.00</text:p>
          </table:table-cell>
          <table:table-cell table:style-name="ce142" table:formula="of:=1/[.D7]" office:value-type="float" office:value="0.2" calcext:value-type="float">
            <text:p>0.20</text:p>
          </table:table-cell>
          <table:table-cell table:style-name="ce142" table:formula="of:=[.E7]*[.C7]" office:value-type="float" office:value="600" calcext:value-type="float">
            <text:p>600.00</text:p>
          </table:table-cell>
          <table:table-cell table:style-name="ce141" table:formula="of:=[.F7]*[$Resumen.$H$16]" office:value-type="float" office:value="3000" calcext:value-type="float">
            <text:p>3,000.00</text:p>
          </table:table-cell>
          <table:table-cell table:style-name="ce142" table:formula="of:=[.C7]-[.G7]" office:value-type="float" office:value="0" calcext:value-type="float">
            <text:p>0.00</text:p>
          </table:table-cell>
          <table:table-cell table:style-name="ce1" table:number-columns-repeated="18"/>
          <table:table-cell table:number-columns-repeated="16358"/>
        </table:table-row>
        <table:table-row table:style-name="ro11">
          <table:table-cell table:style-name="ce1"/>
          <table:table-cell table:style-name="ce133" office:value-type="string" calcext:value-type="string">
            <text:p>Maquinaria y equipos</text:p>
          </table:table-cell>
          <table:table-cell table:style-name="ce141" table:formula="of:=[$Inversion_Inicial.F12]" office:value-type="float" office:value="3000" calcext:value-type="float">
            <text:p>3,000.00</text:p>
          </table:table-cell>
          <table:table-cell table:style-name="ce142" office:value-type="float" office:value="5" calcext:value-type="float">
            <text:p>5.00</text:p>
          </table:table-cell>
          <table:table-cell table:style-name="ce142" table:formula="of:=1/[.D8]" office:value-type="float" office:value="0.2" calcext:value-type="float">
            <text:p>0.20</text:p>
          </table:table-cell>
          <table:table-cell table:style-name="ce142" table:formula="of:=[.E8]*[.C8]" office:value-type="float" office:value="600" calcext:value-type="float">
            <text:p>600.00</text:p>
          </table:table-cell>
          <table:table-cell table:style-name="ce141" table:formula="of:=[.F8]*[$Resumen.$H$16]" office:value-type="float" office:value="3000" calcext:value-type="float">
            <text:p>3,000.00</text:p>
          </table:table-cell>
          <table:table-cell table:style-name="ce142" table:formula="of:=[.C8]-[.G8]" office:value-type="float" office:value="0" calcext:value-type="float">
            <text:p>0.00</text:p>
          </table:table-cell>
          <table:table-cell table:style-name="ce1" table:number-columns-repeated="18"/>
          <table:table-cell table:number-columns-repeated="16358"/>
        </table:table-row>
        <table:table-row table:style-name="ro11">
          <table:table-cell table:style-name="ce1"/>
          <table:table-cell table:style-name="ce133" office:value-type="string" calcext:value-type="string">
            <text:p>Herramientas y utensilios</text:p>
          </table:table-cell>
          <table:table-cell table:style-name="ce141" table:formula="of:=[$Inversion_Inicial.F13]" office:value-type="float" office:value="45" calcext:value-type="float">
            <text:p>45.00</text:p>
          </table:table-cell>
          <table:table-cell table:style-name="ce142" office:value-type="float" office:value="5" calcext:value-type="float">
            <text:p>5.00</text:p>
          </table:table-cell>
          <table:table-cell table:style-name="ce142" table:formula="of:=1/[.D9]" office:value-type="float" office:value="0.2" calcext:value-type="float">
            <text:p>0.20</text:p>
          </table:table-cell>
          <table:table-cell table:style-name="ce142" table:formula="of:=[.E9]*[.C9]" office:value-type="float" office:value="9" calcext:value-type="float">
            <text:p>9.00</text:p>
          </table:table-cell>
          <table:table-cell table:style-name="ce141" table:formula="of:=[.F9]*[$Resumen.$H$16]" office:value-type="float" office:value="45" calcext:value-type="float">
            <text:p>45.00</text:p>
          </table:table-cell>
          <table:table-cell table:style-name="ce142" table:formula="of:=[.C9]-[.G9]" office:value-type="float" office:value="0" calcext:value-type="float">
            <text:p>0.00</text:p>
          </table:table-cell>
          <table:table-cell table:style-name="ce1" table:number-columns-repeated="18"/>
          <table:table-cell table:number-columns-repeated="16358"/>
        </table:table-row>
        <table:table-row table:style-name="ro11">
          <table:table-cell table:style-name="ce1"/>
          <table:table-cell table:style-name="ce133" office:value-type="string" calcext:value-type="string">
            <text:p>Equipos informáticos</text:p>
          </table:table-cell>
          <table:table-cell table:style-name="ce141" table:formula="of:=[$Inversion_Inicial.F18]" office:value-type="float" office:value="4500" calcext:value-type="float">
            <text:p>4,500.00</text:p>
          </table:table-cell>
          <table:table-cell table:style-name="ce142" office:value-type="float" office:value="3" calcext:value-type="float">
            <text:p>3.00</text:p>
          </table:table-cell>
          <table:table-cell table:style-name="ce142" table:formula="of:=1/[.D10]" office:value-type="float" office:value="0.333333333333333" calcext:value-type="float">
            <text:p>0.33</text:p>
          </table:table-cell>
          <table:table-cell table:style-name="ce142" table:formula="of:=[.E10]*[.C10]" office:value-type="float" office:value="1500" calcext:value-type="float">
            <text:p>1,500.00</text:p>
          </table:table-cell>
          <table:table-cell table:style-name="ce141" table:formula="of:=[.F10]*2" office:value-type="float" office:value="3000" calcext:value-type="float">
            <text:p>3,000.00</text:p>
          </table:table-cell>
          <table:table-cell table:style-name="ce142" table:formula="of:=[.C10]-[.G10]" office:value-type="float" office:value="1500" calcext:value-type="float">
            <text:p>1,500.00</text:p>
          </table:table-cell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/>
          <table:table-cell table:style-name="ce133" office:value-type="string" calcext:value-type="string">
            <text:p>Muebles y enseres</text:p>
          </table:table-cell>
          <table:table-cell table:style-name="ce142" table:formula="of:=[$Inversion_Inicial.F14]" office:value-type="float" office:value="4227" calcext:value-type="float">
            <text:p>4,227.00</text:p>
          </table:table-cell>
          <table:table-cell table:style-name="ce142" office:value-type="float" office:value="5" calcext:value-type="float">
            <text:p>5.00</text:p>
          </table:table-cell>
          <table:table-cell table:style-name="ce142" table:formula="of:=1/[.D11]" office:value-type="float" office:value="0.2" calcext:value-type="float">
            <text:p>0.20</text:p>
          </table:table-cell>
          <table:table-cell table:style-name="ce142" table:formula="of:=[.E11]*[.C11]" office:value-type="float" office:value="845.4" calcext:value-type="float">
            <text:p>845.40</text:p>
          </table:table-cell>
          <table:table-cell table:style-name="ce141" table:formula="of:=[.F11]*[$Resumen.$H$16]" office:value-type="float" office:value="4227" calcext:value-type="float">
            <text:p>4,227.00</text:p>
          </table:table-cell>
          <table:table-cell table:style-name="ce142" table:formula="of:=[.C11]-[.G11]" office:value-type="float" office:value="0" calcext:value-type="float">
            <text:p>0.00</text:p>
          </table:table-cell>
          <table:table-cell table:style-name="ce1" table:number-columns-repeated="18"/>
          <table:table-cell table:number-columns-repeated="16358"/>
        </table:table-row>
        <table:table-row table:style-name="ro11">
          <table:table-cell table:style-name="ce1"/>
          <table:table-cell table:style-name="ce133" office:value-type="string" calcext:value-type="string">
            <text:p>Vehículos</text:p>
          </table:table-cell>
          <table:table-cell table:style-name="ce142" table:formula="of:=[$Inversion_Inicial.F22]" office:value-type="float" office:value="24000" calcext:value-type="float">
            <text:p>24,000.00</text:p>
          </table:table-cell>
          <table:table-cell table:style-name="ce142" office:value-type="float" office:value="10" calcext:value-type="float">
            <text:p>10.00</text:p>
          </table:table-cell>
          <table:table-cell table:style-name="ce142" table:formula="of:=1/[.D12]" office:value-type="float" office:value="0.1" calcext:value-type="float">
            <text:p>0.10</text:p>
          </table:table-cell>
          <table:table-cell table:style-name="ce142" table:formula="of:=[.E12]*[.C12]" office:value-type="float" office:value="2400" calcext:value-type="float">
            <text:p>2,400.00</text:p>
          </table:table-cell>
          <table:table-cell table:style-name="ce141" table:formula="of:=[.F12]*[$Resumen.$H$16]" office:value-type="float" office:value="12000" calcext:value-type="float">
            <text:p>12,000.00</text:p>
          </table:table-cell>
          <table:table-cell table:style-name="ce142" table:formula="of:=[.C12]-[.G12]" office:value-type="float" office:value="12000" calcext:value-type="float">
            <text:p>12,000.00</text:p>
          </table:table-cell>
          <table:table-cell table:style-name="ce1" table:number-columns-repeated="18"/>
          <table:table-cell table:number-columns-repeated="16358"/>
        </table:table-row>
        <table:table-row table:style-name="ro11">
          <table:table-cell table:style-name="ce1"/>
          <table:table-cell table:style-name="ce134" office:value-type="string" calcext:value-type="string">
            <text:p>Total</text:p>
          </table:table-cell>
          <table:table-cell table:style-name="ce143" table:number-columns-repeated="3"/>
          <table:table-cell table:style-name="ce143" table:formula="of:=[.F7]+[.F9]+[.F10]+[.F11]" office:value-type="float" office:value="2954.4" calcext:value-type="float">
            <text:p>2,954.40</text:p>
          </table:table-cell>
          <table:table-cell table:style-name="ce143"/>
          <table:table-cell table:style-name="ce143" table:formula="of:=SUM([.H9:.H12])" office:value-type="float" office:value="13500" calcext:value-type="float">
            <text:p>13,500.00</text:p>
          </table:table-cell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/>
          <table:table-cell table:style-name="ce135"/>
          <table:table-cell table:style-name="ce138" table:number-columns-repeated="6"/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/>
          <table:table-cell table:style-name="ce41"/>
          <table:table-cell table:style-name="ce138" table:number-columns-repeated="3"/>
          <table:table-cell table:style-name="ce138" table:formula="of:=[.F13]/12" office:value-type="float" office:value="246.2" calcext:value-type="float">
            <text:p>246.20</text:p>
          </table:table-cell>
          <table:table-cell table:style-name="ce138" table:number-columns-repeated="2"/>
          <table:table-cell table:style-name="ce1" table:number-columns-repeated="18"/>
          <table:table-cell table:number-columns-repeated="16358"/>
        </table:table-row>
        <table:table-row table:style-name="ro1" table:number-rows-repeated="2">
          <table:table-cell table:style-name="ce1"/>
          <table:table-cell table:style-name="ce41"/>
          <table:table-cell table:style-name="ce138" table:number-columns-repeated="6"/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/>
          <table:table-cell table:style-name="ce136" office:value-type="string" calcext:value-type="string">
            <text:p>AMORTIZACIONES </text:p>
          </table:table-cell>
          <table:table-cell table:style-name="ce138" table:number-columns-repeated="6"/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/>
          <table:table-cell table:style-name="ce41"/>
          <table:table-cell table:style-name="ce138" table:number-columns-repeated="6"/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/>
          <table:table-cell table:style-name="ce137" office:value-type="string" calcext:value-type="string">
            <text:p>Intangibles</text:p>
          </table:table-cell>
          <table:table-cell table:style-name="ce144" office:value-type="string" calcext:value-type="string">
            <text:p>Valor de Compra</text:p>
          </table:table-cell>
          <table:table-cell table:style-name="ce144" office:value-type="string" calcext:value-type="string">
            <text:p>Vida Útil (años) </text:p>
          </table:table-cell>
          <table:table-cell table:style-name="ce144" office:value-type="string" calcext:value-type="string">
            <text:p>Tasa de Amortización</text:p>
          </table:table-cell>
          <table:table-cell table:style-name="ce144" office:value-type="string" calcext:value-type="string">
            <text:p>Amortización Anual</text:p>
          </table:table-cell>
          <table:table-cell table:style-name="ce138" table:number-columns-repeated="2"/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/>
          <table:table-cell table:style-name="ce82" office:value-type="string" calcext:value-type="string">
            <text:p>Constitución y formalizacion</text:p>
          </table:table-cell>
          <table:table-cell table:style-name="ce118" table:formula="of:=[$Inversion_Inicial.F24]" office:value-type="float" office:value="1020" calcext:value-type="float">
            <text:p>S/1,020.00</text:p>
          </table:table-cell>
          <table:table-cell table:style-name="ce147" office:value-type="float" office:value="5" calcext:value-type="float">
            <text:p>5.00</text:p>
          </table:table-cell>
          <table:table-cell table:style-name="ce149" table:formula="of:=1/[.D21]" office:value-type="float" office:value="0.2" calcext:value-type="float">
            <text:p>0.20</text:p>
          </table:table-cell>
          <table:table-cell table:style-name="ce149" table:formula="of:=[.E21]*[.C21]" office:value-type="float" office:value="204" calcext:value-type="float">
            <text:p>204.00</text:p>
          </table:table-cell>
          <table:table-cell table:style-name="ce138" table:number-columns-repeated="2"/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/>
          <table:table-cell table:style-name="ce82" office:value-type="string" calcext:value-type="string">
            <text:p>Licencias</text:p>
          </table:table-cell>
          <table:table-cell table:style-name="ce118" table:formula="of:=[$Inversion_Inicial.F25]" office:value-type="float" office:value="150" calcext:value-type="float">
            <text:p>S/150.00</text:p>
          </table:table-cell>
          <table:table-cell table:style-name="ce147" office:value-type="float" office:value="5" calcext:value-type="float">
            <text:p>5.00</text:p>
          </table:table-cell>
          <table:table-cell table:style-name="ce149" table:formula="of:=1/[.D22]" office:value-type="float" office:value="0.2" calcext:value-type="float">
            <text:p>0.20</text:p>
          </table:table-cell>
          <table:table-cell table:style-name="ce149" table:formula="of:=[.E22]*[.C22]" office:value-type="float" office:value="30" calcext:value-type="float">
            <text:p>30.00</text:p>
          </table:table-cell>
          <table:table-cell table:style-name="ce138" table:number-columns-repeated="2"/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/>
          <table:table-cell table:style-name="ce82" table:formula="of:=[$Inversion_Inicial.B26]" office:value-type="string" office:string-value="Promoción" calcext:value-type="string">
            <text:p>Promoción</text:p>
          </table:table-cell>
          <table:table-cell table:style-name="ce118" table:formula="of:=[$Inversion_Inicial.F26]" office:value-type="float" office:value="500" calcext:value-type="float">
            <text:p>S/500.00</text:p>
          </table:table-cell>
          <table:table-cell table:style-name="ce147" office:value-type="float" office:value="5" calcext:value-type="float">
            <text:p>5.00</text:p>
          </table:table-cell>
          <table:table-cell table:style-name="ce149" table:formula="of:=1/[.D23]" office:value-type="float" office:value="0.2" calcext:value-type="float">
            <text:p>0.20</text:p>
          </table:table-cell>
          <table:table-cell table:style-name="ce149" table:formula="of:=[.E23]*[.C23]" office:value-type="float" office:value="100" calcext:value-type="float">
            <text:p>100.00</text:p>
          </table:table-cell>
          <table:table-cell table:style-name="ce138" table:number-columns-repeated="2"/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/>
          <table:table-cell table:style-name="ce137" office:value-type="string" calcext:value-type="string">
            <text:p>Total</text:p>
          </table:table-cell>
          <table:table-cell table:style-name="ce145" table:formula="of:=[.C21]+[.C22]" office:value-type="float" office:value="1170" calcext:value-type="float">
            <text:p>1,170.00</text:p>
          </table:table-cell>
          <table:table-cell table:style-name="ce148"/>
          <table:table-cell table:style-name="ce150"/>
          <table:table-cell table:style-name="ce145" table:formula="of:=[.F21]+[.F22]+[.F23]" office:value-type="float" office:value="334" calcext:value-type="float">
            <text:p>334.00</text:p>
          </table:table-cell>
          <table:table-cell table:style-name="ce138" table:number-columns-repeated="2"/>
          <table:table-cell table:style-name="ce1" table:number-columns-repeated="18"/>
          <table:table-cell table:number-columns-repeated="16358"/>
        </table:table-row>
        <table:table-row table:style-name="ro1" table:number-rows-repeated="197">
          <table:table-cell table:style-name="ce1"/>
          <table:table-cell table:style-name="ce41"/>
          <table:table-cell table:style-name="ce138" table:number-columns-repeated="6"/>
          <table:table-cell table:style-name="ce1" table:number-columns-repeated="18"/>
          <table:table-cell table:number-columns-repeated="16358"/>
        </table:table-row>
        <table:table-row table:style-name="ro7" table:number-rows-repeated="780">
          <table:table-cell table:style-name="ce1"/>
          <table:table-cell table:style-name="ce41"/>
          <table:table-cell table:style-name="ce138" table:number-columns-repeated="6"/>
          <table:table-cell table:style-name="ce1" table:number-columns-repeated="18"/>
          <table:table-cell table:number-columns-repeated="16358"/>
        </table:table-row>
        <table:table-row table:style-name="ro2" table:number-rows-repeated="104757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apital_Trabajo" table:style-name="ta5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60" table:default-cell-style-name="Default"/>
        <table:table-column table:style-name="co8" table:number-columns-repeated="16321" table:default-cell-style-name="Default"/>
        <table:table-row table:style-name="ro1" table:number-rows-repeated="2">
          <table:table-cell table:style-name="ce41" table:number-columns-repeated="63"/>
          <table:table-cell table:number-columns-repeated="16321"/>
        </table:table-row>
        <table:table-row table:style-name="ro1">
          <table:table-cell table:style-name="ce41"/>
          <table:table-cell table:style-name="ce45" office:value-type="string" calcext:value-type="string" table:number-columns-spanned="14" table:number-rows-spanned="1">
            <text:p>CUADRO N° 05</text:p>
          </table:table-cell>
          <table:covered-table-cell table:number-columns-repeated="13" table:style-name="ce12"/>
          <table:table-cell table:style-name="ce41" table:number-columns-repeated="48"/>
          <table:table-cell table:number-columns-repeated="16321"/>
        </table:table-row>
        <table:table-row table:style-name="ro9">
          <table:table-cell table:style-name="ce41"/>
          <table:table-cell table:style-name="ce50" table:number-columns-repeated="14"/>
          <table:table-cell table:style-name="ce41" table:number-columns-repeated="48"/>
          <table:table-cell table:number-columns-repeated="16321"/>
        </table:table-row>
        <table:table-row table:style-name="ro1">
          <table:table-cell table:style-name="ce41"/>
          <table:table-cell table:style-name="ce46" office:value-type="string" calcext:value-type="string" table:number-columns-spanned="14" table:number-rows-spanned="1">
            <text:p>VARIACION DE CAPITAL DE TRABAJO AÑO 1</text:p>
          </table:table-cell>
          <table:covered-table-cell table:number-columns-repeated="13" table:style-name="ce12"/>
          <table:table-cell table:style-name="ce46" office:value-type="string" calcext:value-type="string" table:number-columns-spanned="12" table:number-rows-spanned="1">
            <text:p>VARIACION DE CAPITAL DE TRABAJO AÑO 2</text:p>
          </table:table-cell>
          <table:covered-table-cell table:number-columns-repeated="11" table:style-name="ce12"/>
          <table:table-cell table:style-name="ce46" office:value-type="string" calcext:value-type="string" table:number-columns-spanned="12" table:number-rows-spanned="1">
            <text:p>VARIACION DE CAPITAL DE TRABAJO AÑO 3</text:p>
          </table:table-cell>
          <table:covered-table-cell table:number-columns-repeated="11" table:style-name="ce12"/>
          <table:table-cell table:style-name="ce46" office:value-type="string" calcext:value-type="string" table:number-columns-spanned="12" table:number-rows-spanned="1">
            <text:p>VARIACION DE CAPITAL DE TRABAJO AÑO 4</text:p>
          </table:table-cell>
          <table:covered-table-cell table:number-columns-repeated="11" table:style-name="ce12"/>
          <table:table-cell table:style-name="ce46" office:value-type="string" calcext:value-type="string" table:number-columns-spanned="12" table:number-rows-spanned="1">
            <text:p>VARIACION DE CAPITAL DE TRABAJO AÑO 5</text:p>
          </table:table-cell>
          <table:covered-table-cell table:number-columns-repeated="11" table:style-name="ce12"/>
          <table:table-cell table:number-columns-repeated="16321"/>
        </table:table-row>
        <table:table-row table:style-name="ro9">
          <table:table-cell table:style-name="ce50" table:number-columns-repeated="15"/>
          <table:table-cell table:style-name="ce41" table:number-columns-repeated="48"/>
          <table:table-cell table:number-columns-repeated="16321"/>
        </table:table-row>
        <table:table-row table:style-name="ro1">
          <table:table-cell table:style-name="ce50"/>
          <table:table-cell table:style-name="ce151" office:value-type="string" calcext:value-type="string" table:number-columns-spanned="1" table:number-rows-spanned="2">
            <text:p>RUBRO</text:p>
          </table:table-cell>
          <table:table-cell table:style-name="ce151" office:value-type="float" office:value="0" calcext:value-type="float" table:number-columns-spanned="1" table:number-rows-spanned="2">
            <text:p>0</text:p>
          </table:table-cell>
          <table:table-cell table:style-name="ce151" office:value-type="string" calcext:value-type="string" table:number-columns-spanned="12" table:number-rows-spanned="1">
            <text:p>MES</text:p>
          </table:table-cell>
          <table:covered-table-cell table:number-columns-repeated="10" table:style-name="ce96"/>
          <table:covered-table-cell table:style-name="ce115"/>
          <table:table-cell table:style-name="ce170" office:value-type="string" calcext:value-type="string" table:number-columns-spanned="12" table:number-rows-spanned="1">
            <text:p>MES</text:p>
          </table:table-cell>
          <table:covered-table-cell table:number-columns-repeated="10" table:style-name="ce96"/>
          <table:covered-table-cell table:style-name="ce115"/>
          <table:table-cell table:style-name="ce151" office:value-type="string" calcext:value-type="string" table:number-columns-spanned="12" table:number-rows-spanned="1">
            <text:p>MES</text:p>
          </table:table-cell>
          <table:covered-table-cell table:number-columns-repeated="10" table:style-name="ce96"/>
          <table:covered-table-cell table:style-name="ce115"/>
          <table:table-cell table:style-name="ce170" office:value-type="string" calcext:value-type="string" table:number-columns-spanned="12" table:number-rows-spanned="1">
            <text:p>MES</text:p>
          </table:table-cell>
          <table:covered-table-cell table:number-columns-repeated="10" table:style-name="ce96"/>
          <table:covered-table-cell table:style-name="ce115"/>
          <table:table-cell table:style-name="ce151" office:value-type="string" calcext:value-type="string" table:number-columns-spanned="12" table:number-rows-spanned="1">
            <text:p>MES</text:p>
          </table:table-cell>
          <table:covered-table-cell table:number-columns-repeated="10" table:style-name="ce96"/>
          <table:covered-table-cell table:style-name="ce115"/>
          <table:table-cell table:number-columns-repeated="16321"/>
        </table:table-row>
        <table:table-row table:style-name="ro1">
          <table:table-cell table:style-name="ce50"/>
          <table:covered-table-cell table:number-columns-repeated="2" table:style-name="ce76"/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12" calcext:value-type="float">
            <text:p>1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12" calcext:value-type="float">
            <text:p>1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table:number-columns-repeated="16321"/>
        </table:table-row>
        <table:table-row table:style-name="ro16">
          <table:table-cell table:style-name="ce50"/>
          <table:table-cell table:style-name="ce152" office:value-type="string" calcext:value-type="string">
            <text:p>Unidades</text:p>
          </table:table-cell>
          <table:table-cell table:style-name="ce157"/>
          <table:table-cell table:style-name="ce162" table:formula="of:=[$Presupuesto_Ventas.D7]" office:value-type="float" office:value="24500" calcext:value-type="float">
            <text:p>24,500.00</text:p>
          </table:table-cell>
          <table:table-cell table:style-name="ce162" table:formula="of:=[$Presupuesto_Ventas.E7]" office:value-type="float" office:value="24500" calcext:value-type="float">
            <text:p>24,500.00</text:p>
          </table:table-cell>
          <table:table-cell table:style-name="ce162" table:formula="of:=[$Presupuesto_Ventas.F7]" office:value-type="float" office:value="24500" calcext:value-type="float">
            <text:p>24,500.00</text:p>
          </table:table-cell>
          <table:table-cell table:style-name="ce162" table:formula="of:=[$Presupuesto_Ventas.G7]" office:value-type="float" office:value="28000" calcext:value-type="float">
            <text:p>28,000.00</text:p>
          </table:table-cell>
          <table:table-cell table:style-name="ce162" table:formula="of:=[$Presupuesto_Ventas.H7]" office:value-type="float" office:value="28000" calcext:value-type="float">
            <text:p>28,000.00</text:p>
          </table:table-cell>
          <table:table-cell table:style-name="ce162" table:formula="of:=[$Presupuesto_Ventas.I7]" office:value-type="float" office:value="28000" calcext:value-type="float">
            <text:p>28,000.00</text:p>
          </table:table-cell>
          <table:table-cell table:style-name="ce162" table:formula="of:=[$Presupuesto_Ventas.J7]" office:value-type="float" office:value="31500" calcext:value-type="float">
            <text:p>31,500.00</text:p>
          </table:table-cell>
          <table:table-cell table:style-name="ce162" table:formula="of:=[$Presupuesto_Ventas.K7]" office:value-type="float" office:value="31500" calcext:value-type="float">
            <text:p>31,500.00</text:p>
          </table:table-cell>
          <table:table-cell table:style-name="ce162" table:formula="of:=[$Presupuesto_Ventas.L7]" office:value-type="float" office:value="31500" calcext:value-type="float">
            <text:p>31,500.00</text:p>
          </table:table-cell>
          <table:table-cell table:style-name="ce162" table:formula="of:=[$Presupuesto_Ventas.M7]" office:value-type="float" office:value="31500" calcext:value-type="float">
            <text:p>31,500.00</text:p>
          </table:table-cell>
          <table:table-cell table:style-name="ce162" table:formula="of:=[$Presupuesto_Ventas.N7]" office:value-type="float" office:value="24500" calcext:value-type="float">
            <text:p>24,500.00</text:p>
          </table:table-cell>
          <table:table-cell table:style-name="ce162" table:formula="of:=[$Presupuesto_Ventas.O7]" office:value-type="float" office:value="24500" calcext:value-type="float">
            <text:p>24,500.00</text:p>
          </table:table-cell>
          <table:table-cell table:style-name="ce162" table:formula="of:=[$Presupuesto_Ventas.D8]" office:value-type="float" office:value="25725" calcext:value-type="float">
            <text:p>25,725.00</text:p>
          </table:table-cell>
          <table:table-cell table:style-name="ce162" table:formula="of:=[$Presupuesto_Ventas.E8]" office:value-type="float" office:value="25725" calcext:value-type="float">
            <text:p>25,725.00</text:p>
          </table:table-cell>
          <table:table-cell table:style-name="ce162" table:formula="of:=[$Presupuesto_Ventas.F8]" office:value-type="float" office:value="25725" calcext:value-type="float">
            <text:p>25,725.00</text:p>
          </table:table-cell>
          <table:table-cell table:style-name="ce162" table:formula="of:=[$Presupuesto_Ventas.G8]" office:value-type="float" office:value="29400" calcext:value-type="float">
            <text:p>29,400.00</text:p>
          </table:table-cell>
          <table:table-cell table:style-name="ce162" table:formula="of:=[$Presupuesto_Ventas.H8]" office:value-type="float" office:value="29400" calcext:value-type="float">
            <text:p>29,400.00</text:p>
          </table:table-cell>
          <table:table-cell table:style-name="ce162" table:formula="of:=[$Presupuesto_Ventas.I8]" office:value-type="float" office:value="29400" calcext:value-type="float">
            <text:p>29,400.00</text:p>
          </table:table-cell>
          <table:table-cell table:style-name="ce162" table:formula="of:=[$Presupuesto_Ventas.J8]" office:value-type="float" office:value="33075" calcext:value-type="float">
            <text:p>33,075.00</text:p>
          </table:table-cell>
          <table:table-cell table:style-name="ce162" table:formula="of:=[$Presupuesto_Ventas.K8]" office:value-type="float" office:value="33075" calcext:value-type="float">
            <text:p>33,075.00</text:p>
          </table:table-cell>
          <table:table-cell table:style-name="ce162" table:formula="of:=[$Presupuesto_Ventas.L8]" office:value-type="float" office:value="33075" calcext:value-type="float">
            <text:p>33,075.00</text:p>
          </table:table-cell>
          <table:table-cell table:style-name="ce162" table:formula="of:=[$Presupuesto_Ventas.M8]" office:value-type="float" office:value="33075" calcext:value-type="float">
            <text:p>33,075.00</text:p>
          </table:table-cell>
          <table:table-cell table:style-name="ce162" table:formula="of:=[$Presupuesto_Ventas.N8]" office:value-type="float" office:value="25725" calcext:value-type="float">
            <text:p>25,725.00</text:p>
          </table:table-cell>
          <table:table-cell table:style-name="ce162" table:formula="of:=[$Presupuesto_Ventas.O8]" office:value-type="float" office:value="25725" calcext:value-type="float">
            <text:p>25,725.00</text:p>
          </table:table-cell>
          <table:table-cell table:style-name="ce162" table:formula="of:=[$Presupuesto_Ventas.D9]" office:value-type="float" office:value="27011.25" calcext:value-type="float">
            <text:p>27,011.25</text:p>
          </table:table-cell>
          <table:table-cell table:style-name="ce162" table:formula="of:=[$Presupuesto_Ventas.E9]" office:value-type="float" office:value="27011.25" calcext:value-type="float">
            <text:p>27,011.25</text:p>
          </table:table-cell>
          <table:table-cell table:style-name="ce162" table:formula="of:=[$Presupuesto_Ventas.F9]" office:value-type="float" office:value="27011.25" calcext:value-type="float">
            <text:p>27,011.25</text:p>
          </table:table-cell>
          <table:table-cell table:style-name="ce162" table:formula="of:=[$Presupuesto_Ventas.G9]" office:value-type="float" office:value="30870" calcext:value-type="float">
            <text:p>30,870.00</text:p>
          </table:table-cell>
          <table:table-cell table:style-name="ce162" table:formula="of:=[$Presupuesto_Ventas.H9]" office:value-type="float" office:value="30870" calcext:value-type="float">
            <text:p>30,870.00</text:p>
          </table:table-cell>
          <table:table-cell table:style-name="ce162" table:formula="of:=[$Presupuesto_Ventas.I9]" office:value-type="float" office:value="30870" calcext:value-type="float">
            <text:p>30,870.00</text:p>
          </table:table-cell>
          <table:table-cell table:style-name="ce162" table:formula="of:=[$Presupuesto_Ventas.J9]" office:value-type="float" office:value="34728.75" calcext:value-type="float">
            <text:p>34,728.75</text:p>
          </table:table-cell>
          <table:table-cell table:style-name="ce162" table:formula="of:=[$Presupuesto_Ventas.K9]" office:value-type="float" office:value="34728.75" calcext:value-type="float">
            <text:p>34,728.75</text:p>
          </table:table-cell>
          <table:table-cell table:style-name="ce162" table:formula="of:=[$Presupuesto_Ventas.L9]" office:value-type="float" office:value="34728.75" calcext:value-type="float">
            <text:p>34,728.75</text:p>
          </table:table-cell>
          <table:table-cell table:style-name="ce162" table:formula="of:=[$Presupuesto_Ventas.M9]" office:value-type="float" office:value="34728.75" calcext:value-type="float">
            <text:p>34,728.75</text:p>
          </table:table-cell>
          <table:table-cell table:style-name="ce162" table:formula="of:=[$Presupuesto_Ventas.N9]" office:value-type="float" office:value="27011.25" calcext:value-type="float">
            <text:p>27,011.25</text:p>
          </table:table-cell>
          <table:table-cell table:style-name="ce162" table:formula="of:=[$Presupuesto_Ventas.O9]" office:value-type="float" office:value="27011.25" calcext:value-type="float">
            <text:p>27,011.25</text:p>
          </table:table-cell>
          <table:table-cell table:style-name="ce162" table:formula="of:=[$Presupuesto_Ventas.D10]" office:value-type="float" office:value="28361.8125" calcext:value-type="float">
            <text:p>28,361.81</text:p>
          </table:table-cell>
          <table:table-cell table:style-name="ce162" table:formula="of:=[$Presupuesto_Ventas.E10]" office:value-type="float" office:value="28361.8125" calcext:value-type="float">
            <text:p>28,361.81</text:p>
          </table:table-cell>
          <table:table-cell table:style-name="ce162" table:formula="of:=[$Presupuesto_Ventas.F10]" office:value-type="float" office:value="28361.8125" calcext:value-type="float">
            <text:p>28,361.81</text:p>
          </table:table-cell>
          <table:table-cell table:style-name="ce162" table:formula="of:=[$Presupuesto_Ventas.G10]" office:value-type="float" office:value="32413.5" calcext:value-type="float">
            <text:p>32,413.50</text:p>
          </table:table-cell>
          <table:table-cell table:style-name="ce162" table:formula="of:=[$Presupuesto_Ventas.H10]" office:value-type="float" office:value="32413.5" calcext:value-type="float">
            <text:p>32,413.50</text:p>
          </table:table-cell>
          <table:table-cell table:style-name="ce162" table:formula="of:=[$Presupuesto_Ventas.I10]" office:value-type="float" office:value="32413.5" calcext:value-type="float">
            <text:p>32,413.50</text:p>
          </table:table-cell>
          <table:table-cell table:style-name="ce162" table:formula="of:=[$Presupuesto_Ventas.J10]" office:value-type="float" office:value="36465.1875" calcext:value-type="float">
            <text:p>36,465.19</text:p>
          </table:table-cell>
          <table:table-cell table:style-name="ce162" table:formula="of:=[$Presupuesto_Ventas.K10]" office:value-type="float" office:value="36465.1875" calcext:value-type="float">
            <text:p>36,465.19</text:p>
          </table:table-cell>
          <table:table-cell table:style-name="ce162" table:formula="of:=[$Presupuesto_Ventas.L10]" office:value-type="float" office:value="36465.1875" calcext:value-type="float">
            <text:p>36,465.19</text:p>
          </table:table-cell>
          <table:table-cell table:style-name="ce162" table:formula="of:=[$Presupuesto_Ventas.M10]" office:value-type="float" office:value="36465.1875" calcext:value-type="float">
            <text:p>36,465.19</text:p>
          </table:table-cell>
          <table:table-cell table:style-name="ce162" table:formula="of:=[$Presupuesto_Ventas.N10]" office:value-type="float" office:value="28361.8125" calcext:value-type="float">
            <text:p>28,361.81</text:p>
          </table:table-cell>
          <table:table-cell table:style-name="ce162" table:formula="of:=[$Presupuesto_Ventas.O10]" office:value-type="float" office:value="28361.8125" calcext:value-type="float">
            <text:p>28,361.81</text:p>
          </table:table-cell>
          <table:table-cell table:style-name="ce162" table:formula="of:=[$Presupuesto_Ventas.D11]" office:value-type="float" office:value="29779.903125" calcext:value-type="float">
            <text:p>29,779.90</text:p>
          </table:table-cell>
          <table:table-cell table:style-name="ce162" table:formula="of:=[$Presupuesto_Ventas.E11]" office:value-type="float" office:value="29779.903125" calcext:value-type="float">
            <text:p>29,779.90</text:p>
          </table:table-cell>
          <table:table-cell table:style-name="ce162" table:formula="of:=[$Presupuesto_Ventas.F11]" office:value-type="float" office:value="29779.903125" calcext:value-type="float">
            <text:p>29,779.90</text:p>
          </table:table-cell>
          <table:table-cell table:style-name="ce162" table:formula="of:=[$Presupuesto_Ventas.G11]" office:value-type="float" office:value="34034.175" calcext:value-type="float">
            <text:p>34,034.18</text:p>
          </table:table-cell>
          <table:table-cell table:style-name="ce162" table:formula="of:=[$Presupuesto_Ventas.H11]" office:value-type="float" office:value="34034.175" calcext:value-type="float">
            <text:p>34,034.18</text:p>
          </table:table-cell>
          <table:table-cell table:style-name="ce162" table:formula="of:=[$Presupuesto_Ventas.I11]" office:value-type="float" office:value="34034.175" calcext:value-type="float">
            <text:p>34,034.18</text:p>
          </table:table-cell>
          <table:table-cell table:style-name="ce162" table:formula="of:=[$Presupuesto_Ventas.J11]" office:value-type="float" office:value="38288.446875" calcext:value-type="float">
            <text:p>38,288.45</text:p>
          </table:table-cell>
          <table:table-cell table:style-name="ce162" table:formula="of:=[$Presupuesto_Ventas.K11]" office:value-type="float" office:value="38288.446875" calcext:value-type="float">
            <text:p>38,288.45</text:p>
          </table:table-cell>
          <table:table-cell table:style-name="ce162" table:formula="of:=[$Presupuesto_Ventas.L11]" office:value-type="float" office:value="38288.446875" calcext:value-type="float">
            <text:p>38,288.45</text:p>
          </table:table-cell>
          <table:table-cell table:style-name="ce162" table:formula="of:=[$Presupuesto_Ventas.M11]" office:value-type="float" office:value="38288.446875" calcext:value-type="float">
            <text:p>38,288.45</text:p>
          </table:table-cell>
          <table:table-cell table:style-name="ce162" table:formula="of:=[$Presupuesto_Ventas.N11]" office:value-type="float" office:value="29779.903125" calcext:value-type="float">
            <text:p>29,779.90</text:p>
          </table:table-cell>
          <table:table-cell table:style-name="ce162" table:formula="of:=[$Presupuesto_Ventas.O11]" office:value-type="float" office:value="29779.903125" calcext:value-type="float">
            <text:p>29,779.90</text:p>
          </table:table-cell>
          <table:table-cell table:number-columns-repeated="16321"/>
        </table:table-row>
        <table:table-row table:style-name="ro16">
          <table:table-cell table:style-name="ce50"/>
          <table:table-cell table:style-name="ce152" office:value-type="string" calcext:value-type="string">
            <text:p>CV Unitario</text:p>
          </table:table-cell>
          <table:table-cell table:style-name="ce157"/>
          <table:table-cell table:style-name="ce163" table:formula="of:=[$Costos_Unitario.$C$20]" office:value-type="float" office:value="5.61768979591837" calcext:value-type="float">
            <text:p>5.62</text:p>
          </table:table-cell>
          <table:table-cell table:style-name="ce163" table:formula="of:=[.D10]" office:value-type="float" office:value="5.61768979591837" calcext:value-type="float">
            <text:p>5.62</text:p>
          </table:table-cell>
          <table:table-cell table:style-name="ce163" table:formula="of:=[.E10]" office:value-type="float" office:value="5.61768979591837" calcext:value-type="float">
            <text:p>5.62</text:p>
          </table:table-cell>
          <table:table-cell table:style-name="ce163" table:formula="of:=[.F10]" office:value-type="float" office:value="5.61768979591837" calcext:value-type="float">
            <text:p>5.62</text:p>
          </table:table-cell>
          <table:table-cell table:style-name="ce163" table:formula="of:=[.G10]" office:value-type="float" office:value="5.61768979591837" calcext:value-type="float">
            <text:p>5.62</text:p>
          </table:table-cell>
          <table:table-cell table:style-name="ce163" table:formula="of:=[.H10]" office:value-type="float" office:value="5.61768979591837" calcext:value-type="float">
            <text:p>5.62</text:p>
          </table:table-cell>
          <table:table-cell table:style-name="ce163" table:formula="of:=[.I10]" office:value-type="float" office:value="5.61768979591837" calcext:value-type="float">
            <text:p>5.62</text:p>
          </table:table-cell>
          <table:table-cell table:style-name="ce163" table:formula="of:=[.J10]" office:value-type="float" office:value="5.61768979591837" calcext:value-type="float">
            <text:p>5.62</text:p>
          </table:table-cell>
          <table:table-cell table:style-name="ce163" table:formula="of:=[.K10]" office:value-type="float" office:value="5.61768979591837" calcext:value-type="float">
            <text:p>5.62</text:p>
          </table:table-cell>
          <table:table-cell table:style-name="ce163" table:formula="of:=[.L10]" office:value-type="float" office:value="5.61768979591837" calcext:value-type="float">
            <text:p>5.62</text:p>
          </table:table-cell>
          <table:table-cell table:style-name="ce163" table:formula="of:=[.M10]" office:value-type="float" office:value="5.61768979591837" calcext:value-type="float">
            <text:p>5.62</text:p>
          </table:table-cell>
          <table:table-cell table:style-name="ce163" table:formula="of:=[.N10]" office:value-type="float" office:value="5.61768979591837" calcext:value-type="float">
            <text:p>5.62</text:p>
          </table:table-cell>
          <table:table-cell table:style-name="ce163" table:formula="of:=[.O10]" office:value-type="float" office:value="5.61768979591837" calcext:value-type="float">
            <text:p>5.62</text:p>
          </table:table-cell>
          <table:table-cell table:style-name="ce163" table:formula="of:=[.P10]" office:value-type="float" office:value="5.61768979591837" calcext:value-type="float">
            <text:p>5.62</text:p>
          </table:table-cell>
          <table:table-cell table:style-name="ce163" table:formula="of:=[.Q10]" office:value-type="float" office:value="5.61768979591837" calcext:value-type="float">
            <text:p>5.62</text:p>
          </table:table-cell>
          <table:table-cell table:style-name="ce163" table:formula="of:=[.R10]" office:value-type="float" office:value="5.61768979591837" calcext:value-type="float">
            <text:p>5.62</text:p>
          </table:table-cell>
          <table:table-cell table:style-name="ce163" table:formula="of:=[.S10]" office:value-type="float" office:value="5.61768979591837" calcext:value-type="float">
            <text:p>5.62</text:p>
          </table:table-cell>
          <table:table-cell table:style-name="ce163" table:formula="of:=[.T10]" office:value-type="float" office:value="5.61768979591837" calcext:value-type="float">
            <text:p>5.62</text:p>
          </table:table-cell>
          <table:table-cell table:style-name="ce163" table:formula="of:=[.U10]" office:value-type="float" office:value="5.61768979591837" calcext:value-type="float">
            <text:p>5.62</text:p>
          </table:table-cell>
          <table:table-cell table:style-name="ce163" table:formula="of:=[.V10]" office:value-type="float" office:value="5.61768979591837" calcext:value-type="float">
            <text:p>5.62</text:p>
          </table:table-cell>
          <table:table-cell table:style-name="ce163" table:formula="of:=[.W10]" office:value-type="float" office:value="5.61768979591837" calcext:value-type="float">
            <text:p>5.62</text:p>
          </table:table-cell>
          <table:table-cell table:style-name="ce163" table:formula="of:=[.X10]" office:value-type="float" office:value="5.61768979591837" calcext:value-type="float">
            <text:p>5.62</text:p>
          </table:table-cell>
          <table:table-cell table:style-name="ce163" table:formula="of:=[.Y10]" office:value-type="float" office:value="5.61768979591837" calcext:value-type="float">
            <text:p>5.62</text:p>
          </table:table-cell>
          <table:table-cell table:style-name="ce163" table:formula="of:=[.Z10]" office:value-type="float" office:value="5.61768979591837" calcext:value-type="float">
            <text:p>5.62</text:p>
          </table:table-cell>
          <table:table-cell table:style-name="ce163" table:formula="of:=[.AA10]" office:value-type="float" office:value="5.61768979591837" calcext:value-type="float">
            <text:p>5.62</text:p>
          </table:table-cell>
          <table:table-cell table:style-name="ce163" table:formula="of:=[.AB10]" office:value-type="float" office:value="5.61768979591837" calcext:value-type="float">
            <text:p>5.62</text:p>
          </table:table-cell>
          <table:table-cell table:style-name="ce163" table:formula="of:=[.AC10]" office:value-type="float" office:value="5.61768979591837" calcext:value-type="float">
            <text:p>5.62</text:p>
          </table:table-cell>
          <table:table-cell table:style-name="ce163" table:formula="of:=[.AD10]" office:value-type="float" office:value="5.61768979591837" calcext:value-type="float">
            <text:p>5.62</text:p>
          </table:table-cell>
          <table:table-cell table:style-name="ce163" table:formula="of:=[.AE10]" office:value-type="float" office:value="5.61768979591837" calcext:value-type="float">
            <text:p>5.62</text:p>
          </table:table-cell>
          <table:table-cell table:style-name="ce163" table:formula="of:=[.AF10]" office:value-type="float" office:value="5.61768979591837" calcext:value-type="float">
            <text:p>5.62</text:p>
          </table:table-cell>
          <table:table-cell table:style-name="ce163" table:formula="of:=[.AG10]" office:value-type="float" office:value="5.61768979591837" calcext:value-type="float">
            <text:p>5.62</text:p>
          </table:table-cell>
          <table:table-cell table:style-name="ce163" table:formula="of:=[.AH10]" office:value-type="float" office:value="5.61768979591837" calcext:value-type="float">
            <text:p>5.62</text:p>
          </table:table-cell>
          <table:table-cell table:style-name="ce163" table:formula="of:=[.AI10]" office:value-type="float" office:value="5.61768979591837" calcext:value-type="float">
            <text:p>5.62</text:p>
          </table:table-cell>
          <table:table-cell table:style-name="ce163" table:formula="of:=[.AJ10]" office:value-type="float" office:value="5.61768979591837" calcext:value-type="float">
            <text:p>5.62</text:p>
          </table:table-cell>
          <table:table-cell table:style-name="ce163" table:formula="of:=[.AK10]" office:value-type="float" office:value="5.61768979591837" calcext:value-type="float">
            <text:p>5.62</text:p>
          </table:table-cell>
          <table:table-cell table:style-name="ce163" table:formula="of:=[.AL10]" office:value-type="float" office:value="5.61768979591837" calcext:value-type="float">
            <text:p>5.62</text:p>
          </table:table-cell>
          <table:table-cell table:style-name="ce163" table:formula="of:=[.AM10]" office:value-type="float" office:value="5.61768979591837" calcext:value-type="float">
            <text:p>5.62</text:p>
          </table:table-cell>
          <table:table-cell table:style-name="ce163" table:formula="of:=[.AN10]" office:value-type="float" office:value="5.61768979591837" calcext:value-type="float">
            <text:p>5.62</text:p>
          </table:table-cell>
          <table:table-cell table:style-name="ce163" table:formula="of:=[.AO10]" office:value-type="float" office:value="5.61768979591837" calcext:value-type="float">
            <text:p>5.62</text:p>
          </table:table-cell>
          <table:table-cell table:style-name="ce163" table:formula="of:=[.AP10]" office:value-type="float" office:value="5.61768979591837" calcext:value-type="float">
            <text:p>5.62</text:p>
          </table:table-cell>
          <table:table-cell table:style-name="ce163" table:formula="of:=[.AQ10]" office:value-type="float" office:value="5.61768979591837" calcext:value-type="float">
            <text:p>5.62</text:p>
          </table:table-cell>
          <table:table-cell table:style-name="ce163" table:formula="of:=[.AR10]" office:value-type="float" office:value="5.61768979591837" calcext:value-type="float">
            <text:p>5.62</text:p>
          </table:table-cell>
          <table:table-cell table:style-name="ce163" table:formula="of:=[.AS10]" office:value-type="float" office:value="5.61768979591837" calcext:value-type="float">
            <text:p>5.62</text:p>
          </table:table-cell>
          <table:table-cell table:style-name="ce163" table:formula="of:=[.AT10]" office:value-type="float" office:value="5.61768979591837" calcext:value-type="float">
            <text:p>5.62</text:p>
          </table:table-cell>
          <table:table-cell table:style-name="ce163" table:formula="of:=[.AU10]" office:value-type="float" office:value="5.61768979591837" calcext:value-type="float">
            <text:p>5.62</text:p>
          </table:table-cell>
          <table:table-cell table:style-name="ce163" table:formula="of:=[.AV10]" office:value-type="float" office:value="5.61768979591837" calcext:value-type="float">
            <text:p>5.62</text:p>
          </table:table-cell>
          <table:table-cell table:style-name="ce163" table:formula="of:=[.AW10]" office:value-type="float" office:value="5.61768979591837" calcext:value-type="float">
            <text:p>5.62</text:p>
          </table:table-cell>
          <table:table-cell table:style-name="ce163" table:formula="of:=[.AX10]" office:value-type="float" office:value="5.61768979591837" calcext:value-type="float">
            <text:p>5.62</text:p>
          </table:table-cell>
          <table:table-cell table:style-name="ce163" table:formula="of:=[.AY10]" office:value-type="float" office:value="5.61768979591837" calcext:value-type="float">
            <text:p>5.62</text:p>
          </table:table-cell>
          <table:table-cell table:style-name="ce163" table:formula="of:=[.AZ10]" office:value-type="float" office:value="5.61768979591837" calcext:value-type="float">
            <text:p>5.62</text:p>
          </table:table-cell>
          <table:table-cell table:style-name="ce163" table:formula="of:=[.BA10]" office:value-type="float" office:value="5.61768979591837" calcext:value-type="float">
            <text:p>5.62</text:p>
          </table:table-cell>
          <table:table-cell table:style-name="ce163" table:formula="of:=[.BB10]" office:value-type="float" office:value="5.61768979591837" calcext:value-type="float">
            <text:p>5.62</text:p>
          </table:table-cell>
          <table:table-cell table:style-name="ce163" table:formula="of:=[.BC10]" office:value-type="float" office:value="5.61768979591837" calcext:value-type="float">
            <text:p>5.62</text:p>
          </table:table-cell>
          <table:table-cell table:style-name="ce163" table:formula="of:=[.BD10]" office:value-type="float" office:value="5.61768979591837" calcext:value-type="float">
            <text:p>5.62</text:p>
          </table:table-cell>
          <table:table-cell table:style-name="ce163" table:formula="of:=[.BE10]" office:value-type="float" office:value="5.61768979591837" calcext:value-type="float">
            <text:p>5.62</text:p>
          </table:table-cell>
          <table:table-cell table:style-name="ce163" table:formula="of:=[.BF10]" office:value-type="float" office:value="5.61768979591837" calcext:value-type="float">
            <text:p>5.62</text:p>
          </table:table-cell>
          <table:table-cell table:style-name="ce163" table:formula="of:=[.BG10]" office:value-type="float" office:value="5.61768979591837" calcext:value-type="float">
            <text:p>5.62</text:p>
          </table:table-cell>
          <table:table-cell table:style-name="ce163" table:formula="of:=[.BH10]" office:value-type="float" office:value="5.61768979591837" calcext:value-type="float">
            <text:p>5.62</text:p>
          </table:table-cell>
          <table:table-cell table:style-name="ce163" table:formula="of:=[.BI10]" office:value-type="float" office:value="5.61768979591837" calcext:value-type="float">
            <text:p>5.62</text:p>
          </table:table-cell>
          <table:table-cell table:style-name="ce163" table:formula="of:=[.BJ10]" office:value-type="float" office:value="5.61768979591837" calcext:value-type="float">
            <text:p>5.62</text:p>
          </table:table-cell>
          <table:table-cell table:number-columns-repeated="16321"/>
        </table:table-row>
        <table:table-row table:style-name="ro16">
          <table:table-cell table:style-name="ce50"/>
          <table:table-cell table:style-name="ce152" office:value-type="string" calcext:value-type="string">
            <text:p>CF Operativo</text:p>
          </table:table-cell>
          <table:table-cell table:style-name="ce157"/>
          <table:table-cell table:style-name="ce164" table:formula="of:=[$Gastos_Operativos.F18]" office:value-type="float" office:value="5094" calcext:value-type="float">
            <text:p>5,094.00</text:p>
          </table:table-cell>
          <table:table-cell table:style-name="ce162" table:formula="of:=[.D11]" office:value-type="float" office:value="5094" calcext:value-type="float">
            <text:p>5,094.00</text:p>
          </table:table-cell>
          <table:table-cell table:style-name="ce162" table:formula="of:=[.E11]" office:value-type="float" office:value="5094" calcext:value-type="float">
            <text:p>5,094.00</text:p>
          </table:table-cell>
          <table:table-cell table:style-name="ce162" table:formula="of:=[.F11]" office:value-type="float" office:value="5094" calcext:value-type="float">
            <text:p>5,094.00</text:p>
          </table:table-cell>
          <table:table-cell table:style-name="ce162" table:formula="of:=[.G11]" office:value-type="float" office:value="5094" calcext:value-type="float">
            <text:p>5,094.00</text:p>
          </table:table-cell>
          <table:table-cell table:style-name="ce162" table:formula="of:=[.H11]" office:value-type="float" office:value="5094" calcext:value-type="float">
            <text:p>5,094.00</text:p>
          </table:table-cell>
          <table:table-cell table:style-name="ce162" table:formula="of:=[.I11]" office:value-type="float" office:value="5094" calcext:value-type="float">
            <text:p>5,094.00</text:p>
          </table:table-cell>
          <table:table-cell table:style-name="ce162" table:formula="of:=[.J11]" office:value-type="float" office:value="5094" calcext:value-type="float">
            <text:p>5,094.00</text:p>
          </table:table-cell>
          <table:table-cell table:style-name="ce162" table:formula="of:=[.K11]" office:value-type="float" office:value="5094" calcext:value-type="float">
            <text:p>5,094.00</text:p>
          </table:table-cell>
          <table:table-cell table:style-name="ce162" table:formula="of:=[.L11]" office:value-type="float" office:value="5094" calcext:value-type="float">
            <text:p>5,094.00</text:p>
          </table:table-cell>
          <table:table-cell table:style-name="ce162" table:formula="of:=[.M11]" office:value-type="float" office:value="5094" calcext:value-type="float">
            <text:p>5,094.00</text:p>
          </table:table-cell>
          <table:table-cell table:style-name="ce162" table:formula="of:=[.N11]" office:value-type="float" office:value="5094" calcext:value-type="float">
            <text:p>5,094.00</text:p>
          </table:table-cell>
          <table:table-cell table:style-name="ce162" table:formula="of:=[.O11]" office:value-type="float" office:value="5094" calcext:value-type="float">
            <text:p>5,094.00</text:p>
          </table:table-cell>
          <table:table-cell table:style-name="ce162" table:formula="of:=[.P11]" office:value-type="float" office:value="5094" calcext:value-type="float">
            <text:p>5,094.00</text:p>
          </table:table-cell>
          <table:table-cell table:style-name="ce162" table:formula="of:=[.Q11]" office:value-type="float" office:value="5094" calcext:value-type="float">
            <text:p>5,094.00</text:p>
          </table:table-cell>
          <table:table-cell table:style-name="ce162" table:formula="of:=[.R11]" office:value-type="float" office:value="5094" calcext:value-type="float">
            <text:p>5,094.00</text:p>
          </table:table-cell>
          <table:table-cell table:style-name="ce162" table:formula="of:=[.S11]" office:value-type="float" office:value="5094" calcext:value-type="float">
            <text:p>5,094.00</text:p>
          </table:table-cell>
          <table:table-cell table:style-name="ce162" table:formula="of:=[.T11]" office:value-type="float" office:value="5094" calcext:value-type="float">
            <text:p>5,094.00</text:p>
          </table:table-cell>
          <table:table-cell table:style-name="ce162" table:formula="of:=[.U11]" office:value-type="float" office:value="5094" calcext:value-type="float">
            <text:p>5,094.00</text:p>
          </table:table-cell>
          <table:table-cell table:style-name="ce162" table:formula="of:=[.V11]" office:value-type="float" office:value="5094" calcext:value-type="float">
            <text:p>5,094.00</text:p>
          </table:table-cell>
          <table:table-cell table:style-name="ce162" table:formula="of:=[.W11]" office:value-type="float" office:value="5094" calcext:value-type="float">
            <text:p>5,094.00</text:p>
          </table:table-cell>
          <table:table-cell table:style-name="ce162" table:formula="of:=[.X11]" office:value-type="float" office:value="5094" calcext:value-type="float">
            <text:p>5,094.00</text:p>
          </table:table-cell>
          <table:table-cell table:style-name="ce162" table:formula="of:=[.Y11]" office:value-type="float" office:value="5094" calcext:value-type="float">
            <text:p>5,094.00</text:p>
          </table:table-cell>
          <table:table-cell table:style-name="ce162" table:formula="of:=[.Z11]" office:value-type="float" office:value="5094" calcext:value-type="float">
            <text:p>5,094.00</text:p>
          </table:table-cell>
          <table:table-cell table:style-name="ce162" table:formula="of:=[.AA11]" office:value-type="float" office:value="5094" calcext:value-type="float">
            <text:p>5,094.00</text:p>
          </table:table-cell>
          <table:table-cell table:style-name="ce162" table:formula="of:=[.AB11]" office:value-type="float" office:value="5094" calcext:value-type="float">
            <text:p>5,094.00</text:p>
          </table:table-cell>
          <table:table-cell table:style-name="ce162" table:formula="of:=[.AC11]" office:value-type="float" office:value="5094" calcext:value-type="float">
            <text:p>5,094.00</text:p>
          </table:table-cell>
          <table:table-cell table:style-name="ce162" table:formula="of:=[.AD11]" office:value-type="float" office:value="5094" calcext:value-type="float">
            <text:p>5,094.00</text:p>
          </table:table-cell>
          <table:table-cell table:style-name="ce162" table:formula="of:=[.AE11]" office:value-type="float" office:value="5094" calcext:value-type="float">
            <text:p>5,094.00</text:p>
          </table:table-cell>
          <table:table-cell table:style-name="ce162" table:formula="of:=[.AF11]" office:value-type="float" office:value="5094" calcext:value-type="float">
            <text:p>5,094.00</text:p>
          </table:table-cell>
          <table:table-cell table:style-name="ce162" table:formula="of:=[.AG11]" office:value-type="float" office:value="5094" calcext:value-type="float">
            <text:p>5,094.00</text:p>
          </table:table-cell>
          <table:table-cell table:style-name="ce162" table:formula="of:=[.AH11]" office:value-type="float" office:value="5094" calcext:value-type="float">
            <text:p>5,094.00</text:p>
          </table:table-cell>
          <table:table-cell table:style-name="ce162" table:formula="of:=[.AI11]" office:value-type="float" office:value="5094" calcext:value-type="float">
            <text:p>5,094.00</text:p>
          </table:table-cell>
          <table:table-cell table:style-name="ce162" table:formula="of:=[.AJ11]" office:value-type="float" office:value="5094" calcext:value-type="float">
            <text:p>5,094.00</text:p>
          </table:table-cell>
          <table:table-cell table:style-name="ce162" table:formula="of:=[.AK11]" office:value-type="float" office:value="5094" calcext:value-type="float">
            <text:p>5,094.00</text:p>
          </table:table-cell>
          <table:table-cell table:style-name="ce162" table:formula="of:=[.AL11]" office:value-type="float" office:value="5094" calcext:value-type="float">
            <text:p>5,094.00</text:p>
          </table:table-cell>
          <table:table-cell table:style-name="ce162" table:formula="of:=[.AM11]" office:value-type="float" office:value="5094" calcext:value-type="float">
            <text:p>5,094.00</text:p>
          </table:table-cell>
          <table:table-cell table:style-name="ce162" table:formula="of:=[.AN11]" office:value-type="float" office:value="5094" calcext:value-type="float">
            <text:p>5,094.00</text:p>
          </table:table-cell>
          <table:table-cell table:style-name="ce162" table:formula="of:=[.AO11]" office:value-type="float" office:value="5094" calcext:value-type="float">
            <text:p>5,094.00</text:p>
          </table:table-cell>
          <table:table-cell table:style-name="ce162" table:formula="of:=[.AP11]" office:value-type="float" office:value="5094" calcext:value-type="float">
            <text:p>5,094.00</text:p>
          </table:table-cell>
          <table:table-cell table:style-name="ce162" table:formula="of:=[.AQ11]" office:value-type="float" office:value="5094" calcext:value-type="float">
            <text:p>5,094.00</text:p>
          </table:table-cell>
          <table:table-cell table:style-name="ce162" table:formula="of:=[.AR11]" office:value-type="float" office:value="5094" calcext:value-type="float">
            <text:p>5,094.00</text:p>
          </table:table-cell>
          <table:table-cell table:style-name="ce162" table:formula="of:=[.AS11]" office:value-type="float" office:value="5094" calcext:value-type="float">
            <text:p>5,094.00</text:p>
          </table:table-cell>
          <table:table-cell table:style-name="ce162" table:formula="of:=[.AT11]" office:value-type="float" office:value="5094" calcext:value-type="float">
            <text:p>5,094.00</text:p>
          </table:table-cell>
          <table:table-cell table:style-name="ce162" table:formula="of:=[.AU11]" office:value-type="float" office:value="5094" calcext:value-type="float">
            <text:p>5,094.00</text:p>
          </table:table-cell>
          <table:table-cell table:style-name="ce162" table:formula="of:=[.AV11]" office:value-type="float" office:value="5094" calcext:value-type="float">
            <text:p>5,094.00</text:p>
          </table:table-cell>
          <table:table-cell table:style-name="ce162" table:formula="of:=[.AW11]" office:value-type="float" office:value="5094" calcext:value-type="float">
            <text:p>5,094.00</text:p>
          </table:table-cell>
          <table:table-cell table:style-name="ce162" table:formula="of:=[.AX11]" office:value-type="float" office:value="5094" calcext:value-type="float">
            <text:p>5,094.00</text:p>
          </table:table-cell>
          <table:table-cell table:style-name="ce162" table:formula="of:=[.AY11]" office:value-type="float" office:value="5094" calcext:value-type="float">
            <text:p>5,094.00</text:p>
          </table:table-cell>
          <table:table-cell table:style-name="ce162" table:formula="of:=[.AZ11]" office:value-type="float" office:value="5094" calcext:value-type="float">
            <text:p>5,094.00</text:p>
          </table:table-cell>
          <table:table-cell table:style-name="ce162" table:formula="of:=[.BA11]" office:value-type="float" office:value="5094" calcext:value-type="float">
            <text:p>5,094.00</text:p>
          </table:table-cell>
          <table:table-cell table:style-name="ce162" table:formula="of:=[.BB11]" office:value-type="float" office:value="5094" calcext:value-type="float">
            <text:p>5,094.00</text:p>
          </table:table-cell>
          <table:table-cell table:style-name="ce162" table:formula="of:=[.BC11]" office:value-type="float" office:value="5094" calcext:value-type="float">
            <text:p>5,094.00</text:p>
          </table:table-cell>
          <table:table-cell table:style-name="ce162" table:formula="of:=[.BD11]" office:value-type="float" office:value="5094" calcext:value-type="float">
            <text:p>5,094.00</text:p>
          </table:table-cell>
          <table:table-cell table:style-name="ce162" table:formula="of:=[.BE11]" office:value-type="float" office:value="5094" calcext:value-type="float">
            <text:p>5,094.00</text:p>
          </table:table-cell>
          <table:table-cell table:style-name="ce162" table:formula="of:=[.BF11]" office:value-type="float" office:value="5094" calcext:value-type="float">
            <text:p>5,094.00</text:p>
          </table:table-cell>
          <table:table-cell table:style-name="ce162" table:formula="of:=[.BG11]" office:value-type="float" office:value="5094" calcext:value-type="float">
            <text:p>5,094.00</text:p>
          </table:table-cell>
          <table:table-cell table:style-name="ce162" table:formula="of:=[.BH11]" office:value-type="float" office:value="5094" calcext:value-type="float">
            <text:p>5,094.00</text:p>
          </table:table-cell>
          <table:table-cell table:style-name="ce162" table:formula="of:=[.BI11]" office:value-type="float" office:value="5094" calcext:value-type="float">
            <text:p>5,094.00</text:p>
          </table:table-cell>
          <table:table-cell table:style-name="ce162" table:formula="of:=[.BJ11]" office:value-type="float" office:value="5094" calcext:value-type="float">
            <text:p>5,094.00</text:p>
          </table:table-cell>
          <table:table-cell table:number-columns-repeated="16321"/>
        </table:table-row>
        <table:table-row table:style-name="ro16">
          <table:table-cell table:style-name="ce50"/>
          <table:table-cell table:style-name="ce153" office:value-type="string" calcext:value-type="string">
            <text:p>CV Total</text:p>
          </table:table-cell>
          <table:table-cell table:style-name="ce157"/>
          <table:table-cell table:style-name="ce163" table:formula="of:=[.D9]*[.D10]" office:value-type="float" office:value="137633.4" calcext:value-type="float">
            <text:p>137,633.40</text:p>
          </table:table-cell>
          <table:table-cell table:style-name="ce163" table:formula="of:=[.E9]*[.E10]" office:value-type="float" office:value="137633.4" calcext:value-type="float">
            <text:p>137,633.40</text:p>
          </table:table-cell>
          <table:table-cell table:style-name="ce163" table:formula="of:=[.F9]*[.F10]" office:value-type="float" office:value="137633.4" calcext:value-type="float">
            <text:p>137,633.40</text:p>
          </table:table-cell>
          <table:table-cell table:style-name="ce163" table:formula="of:=[.G9]*[.G10]" office:value-type="float" office:value="157295.314285714" calcext:value-type="float">
            <text:p>157,295.31</text:p>
          </table:table-cell>
          <table:table-cell table:style-name="ce163" table:formula="of:=[.H9]*[.H10]" office:value-type="float" office:value="157295.314285714" calcext:value-type="float">
            <text:p>157,295.31</text:p>
          </table:table-cell>
          <table:table-cell table:style-name="ce163" table:formula="of:=[.I9]*[.I10]" office:value-type="float" office:value="157295.314285714" calcext:value-type="float">
            <text:p>157,295.31</text:p>
          </table:table-cell>
          <table:table-cell table:style-name="ce163" table:formula="of:=[.J9]*[.J10]" office:value-type="float" office:value="176957.228571429" calcext:value-type="float">
            <text:p>176,957.23</text:p>
          </table:table-cell>
          <table:table-cell table:style-name="ce163" table:formula="of:=[.K9]*[.K10]" office:value-type="float" office:value="176957.228571429" calcext:value-type="float">
            <text:p>176,957.23</text:p>
          </table:table-cell>
          <table:table-cell table:style-name="ce163" table:formula="of:=[.L9]*[.L10]" office:value-type="float" office:value="176957.228571429" calcext:value-type="float">
            <text:p>176,957.23</text:p>
          </table:table-cell>
          <table:table-cell table:style-name="ce163" table:formula="of:=[.M9]*[.M10]" office:value-type="float" office:value="176957.228571429" calcext:value-type="float">
            <text:p>176,957.23</text:p>
          </table:table-cell>
          <table:table-cell table:style-name="ce163" table:formula="of:=[.N9]*[.N10]" office:value-type="float" office:value="137633.4" calcext:value-type="float">
            <text:p>137,633.40</text:p>
          </table:table-cell>
          <table:table-cell table:style-name="ce163" table:formula="of:=[.O9]*[.O10]" office:value-type="float" office:value="137633.4" calcext:value-type="float">
            <text:p>137,633.40</text:p>
          </table:table-cell>
          <table:table-cell table:style-name="ce163" table:formula="of:=[.P9]*[.P10]" office:value-type="float" office:value="144515.07" calcext:value-type="float">
            <text:p>144,515.07</text:p>
          </table:table-cell>
          <table:table-cell table:style-name="ce163" table:formula="of:=[.Q9]*[.Q10]" office:value-type="float" office:value="144515.07" calcext:value-type="float">
            <text:p>144,515.07</text:p>
          </table:table-cell>
          <table:table-cell table:style-name="ce163" table:formula="of:=[.R9]*[.R10]" office:value-type="float" office:value="144515.07" calcext:value-type="float">
            <text:p>144,515.07</text:p>
          </table:table-cell>
          <table:table-cell table:style-name="ce163" table:formula="of:=[.S9]*[.S10]" office:value-type="float" office:value="165160.08" calcext:value-type="float">
            <text:p>165,160.08</text:p>
          </table:table-cell>
          <table:table-cell table:style-name="ce163" table:formula="of:=[.T9]*[.T10]" office:value-type="float" office:value="165160.08" calcext:value-type="float">
            <text:p>165,160.08</text:p>
          </table:table-cell>
          <table:table-cell table:style-name="ce163" table:formula="of:=[.U9]*[.U10]" office:value-type="float" office:value="165160.08" calcext:value-type="float">
            <text:p>165,160.08</text:p>
          </table:table-cell>
          <table:table-cell table:style-name="ce163" table:formula="of:=[.V9]*[.V10]" office:value-type="float" office:value="185805.09" calcext:value-type="float">
            <text:p>185,805.09</text:p>
          </table:table-cell>
          <table:table-cell table:style-name="ce163" table:formula="of:=[.W9]*[.W10]" office:value-type="float" office:value="185805.09" calcext:value-type="float">
            <text:p>185,805.09</text:p>
          </table:table-cell>
          <table:table-cell table:style-name="ce163" table:formula="of:=[.X9]*[.X10]" office:value-type="float" office:value="185805.09" calcext:value-type="float">
            <text:p>185,805.09</text:p>
          </table:table-cell>
          <table:table-cell table:style-name="ce163" table:formula="of:=[.Y9]*[.Y10]" office:value-type="float" office:value="185805.09" calcext:value-type="float">
            <text:p>185,805.09</text:p>
          </table:table-cell>
          <table:table-cell table:style-name="ce163" table:formula="of:=[.Z9]*[.Z10]" office:value-type="float" office:value="144515.07" calcext:value-type="float">
            <text:p>144,515.07</text:p>
          </table:table-cell>
          <table:table-cell table:style-name="ce163" table:formula="of:=[.AA9]*[.AA10]" office:value-type="float" office:value="144515.07" calcext:value-type="float">
            <text:p>144,515.07</text:p>
          </table:table-cell>
          <table:table-cell table:style-name="ce163" table:formula="of:=[.AB9]*[.AB10]" office:value-type="float" office:value="151740.8235" calcext:value-type="float">
            <text:p>151,740.82</text:p>
          </table:table-cell>
          <table:table-cell table:style-name="ce163" table:formula="of:=[.AC9]*[.AC10]" office:value-type="float" office:value="151740.8235" calcext:value-type="float">
            <text:p>151,740.82</text:p>
          </table:table-cell>
          <table:table-cell table:style-name="ce163" table:formula="of:=[.AD9]*[.AD10]" office:value-type="float" office:value="151740.8235" calcext:value-type="float">
            <text:p>151,740.82</text:p>
          </table:table-cell>
          <table:table-cell table:style-name="ce163" table:formula="of:=[.AE9]*[.AE10]" office:value-type="float" office:value="173418.084" calcext:value-type="float">
            <text:p>173,418.08</text:p>
          </table:table-cell>
          <table:table-cell table:style-name="ce163" table:formula="of:=[.AF9]*[.AF10]" office:value-type="float" office:value="173418.084" calcext:value-type="float">
            <text:p>173,418.08</text:p>
          </table:table-cell>
          <table:table-cell table:style-name="ce163" table:formula="of:=[.AG9]*[.AG10]" office:value-type="float" office:value="173418.084" calcext:value-type="float">
            <text:p>173,418.08</text:p>
          </table:table-cell>
          <table:table-cell table:style-name="ce163" table:formula="of:=[.AH9]*[.AH10]" office:value-type="float" office:value="195095.3445" calcext:value-type="float">
            <text:p>195,095.34</text:p>
          </table:table-cell>
          <table:table-cell table:style-name="ce163" table:formula="of:=[.AI9]*[.AI10]" office:value-type="float" office:value="195095.3445" calcext:value-type="float">
            <text:p>195,095.34</text:p>
          </table:table-cell>
          <table:table-cell table:style-name="ce163" table:formula="of:=[.AJ9]*[.AJ10]" office:value-type="float" office:value="195095.3445" calcext:value-type="float">
            <text:p>195,095.34</text:p>
          </table:table-cell>
          <table:table-cell table:style-name="ce163" table:formula="of:=[.AK9]*[.AK10]" office:value-type="float" office:value="195095.3445" calcext:value-type="float">
            <text:p>195,095.34</text:p>
          </table:table-cell>
          <table:table-cell table:style-name="ce163" table:formula="of:=[.AL9]*[.AL10]" office:value-type="float" office:value="151740.8235" calcext:value-type="float">
            <text:p>151,740.82</text:p>
          </table:table-cell>
          <table:table-cell table:style-name="ce163" table:formula="of:=[.AM9]*[.AM10]" office:value-type="float" office:value="151740.8235" calcext:value-type="float">
            <text:p>151,740.82</text:p>
          </table:table-cell>
          <table:table-cell table:style-name="ce163" table:formula="of:=[.AN9]*[.AN10]" office:value-type="float" office:value="159327.864675" calcext:value-type="float">
            <text:p>159,327.86</text:p>
          </table:table-cell>
          <table:table-cell table:style-name="ce163" table:formula="of:=[.AO9]*[.AO10]" office:value-type="float" office:value="159327.864675" calcext:value-type="float">
            <text:p>159,327.86</text:p>
          </table:table-cell>
          <table:table-cell table:style-name="ce163" table:formula="of:=[.AP9]*[.AP10]" office:value-type="float" office:value="159327.864675" calcext:value-type="float">
            <text:p>159,327.86</text:p>
          </table:table-cell>
          <table:table-cell table:style-name="ce163" table:formula="of:=[.AQ9]*[.AQ10]" office:value-type="float" office:value="182088.9882" calcext:value-type="float">
            <text:p>182,088.99</text:p>
          </table:table-cell>
          <table:table-cell table:style-name="ce163" table:formula="of:=[.AR9]*[.AR10]" office:value-type="float" office:value="182088.9882" calcext:value-type="float">
            <text:p>182,088.99</text:p>
          </table:table-cell>
          <table:table-cell table:style-name="ce163" table:formula="of:=[.AS9]*[.AS10]" office:value-type="float" office:value="182088.9882" calcext:value-type="float">
            <text:p>182,088.99</text:p>
          </table:table-cell>
          <table:table-cell table:style-name="ce163" table:formula="of:=[.AT9]*[.AT10]" office:value-type="float" office:value="204850.111725" calcext:value-type="float">
            <text:p>204,850.11</text:p>
          </table:table-cell>
          <table:table-cell table:style-name="ce163" table:formula="of:=[.AU9]*[.AU10]" office:value-type="float" office:value="204850.111725" calcext:value-type="float">
            <text:p>204,850.11</text:p>
          </table:table-cell>
          <table:table-cell table:style-name="ce163" table:formula="of:=[.AV9]*[.AV10]" office:value-type="float" office:value="204850.111725" calcext:value-type="float">
            <text:p>204,850.11</text:p>
          </table:table-cell>
          <table:table-cell table:style-name="ce163" table:formula="of:=[.AW9]*[.AW10]" office:value-type="float" office:value="204850.111725" calcext:value-type="float">
            <text:p>204,850.11</text:p>
          </table:table-cell>
          <table:table-cell table:style-name="ce163" table:formula="of:=[.AX9]*[.AX10]" office:value-type="float" office:value="159327.864675" calcext:value-type="float">
            <text:p>159,327.86</text:p>
          </table:table-cell>
          <table:table-cell table:style-name="ce163" table:formula="of:=[.AY9]*[.AY10]" office:value-type="float" office:value="159327.864675" calcext:value-type="float">
            <text:p>159,327.86</text:p>
          </table:table-cell>
          <table:table-cell table:style-name="ce163" table:formula="of:=[.AZ9]*[.AZ10]" office:value-type="float" office:value="167294.25790875" calcext:value-type="float">
            <text:p>167,294.26</text:p>
          </table:table-cell>
          <table:table-cell table:style-name="ce163" table:formula="of:=[.BA9]*[.BA10]" office:value-type="float" office:value="167294.25790875" calcext:value-type="float">
            <text:p>167,294.26</text:p>
          </table:table-cell>
          <table:table-cell table:style-name="ce163" table:formula="of:=[.BB9]*[.BB10]" office:value-type="float" office:value="167294.25790875" calcext:value-type="float">
            <text:p>167,294.26</text:p>
          </table:table-cell>
          <table:table-cell table:style-name="ce163" table:formula="of:=[.BC9]*[.BC10]" office:value-type="float" office:value="191193.43761" calcext:value-type="float">
            <text:p>191,193.44</text:p>
          </table:table-cell>
          <table:table-cell table:style-name="ce163" table:formula="of:=[.BD9]*[.BD10]" office:value-type="float" office:value="191193.43761" calcext:value-type="float">
            <text:p>191,193.44</text:p>
          </table:table-cell>
          <table:table-cell table:style-name="ce163" table:formula="of:=[.BE9]*[.BE10]" office:value-type="float" office:value="191193.43761" calcext:value-type="float">
            <text:p>191,193.44</text:p>
          </table:table-cell>
          <table:table-cell table:style-name="ce163" table:formula="of:=[.BF9]*[.BF10]" office:value-type="float" office:value="215092.61731125" calcext:value-type="float">
            <text:p>215,092.62</text:p>
          </table:table-cell>
          <table:table-cell table:style-name="ce163" table:formula="of:=[.BG9]*[.BG10]" office:value-type="float" office:value="215092.61731125" calcext:value-type="float">
            <text:p>215,092.62</text:p>
          </table:table-cell>
          <table:table-cell table:style-name="ce163" table:formula="of:=[.BH9]*[.BH10]" office:value-type="float" office:value="215092.61731125" calcext:value-type="float">
            <text:p>215,092.62</text:p>
          </table:table-cell>
          <table:table-cell table:style-name="ce163" table:formula="of:=[.BI9]*[.BI10]" office:value-type="float" office:value="215092.61731125" calcext:value-type="float">
            <text:p>215,092.62</text:p>
          </table:table-cell>
          <table:table-cell table:style-name="ce163" table:formula="of:=[.BJ9]*[.BJ10]" office:value-type="float" office:value="167294.25790875" calcext:value-type="float">
            <text:p>167,294.26</text:p>
          </table:table-cell>
          <table:table-cell table:style-name="ce163" table:formula="of:=[.BK9]*[.BK10]" office:value-type="float" office:value="167294.25790875" calcext:value-type="float">
            <text:p>167,294.26</text:p>
          </table:table-cell>
          <table:table-cell table:number-columns-repeated="16321"/>
        </table:table-row>
        <table:table-row table:style-name="ro16">
          <table:table-cell table:style-name="ce50"/>
          <table:table-cell table:style-name="ce152" office:value-type="string" calcext:value-type="string">
            <text:p>Capital de Trabajo</text:p>
          </table:table-cell>
          <table:table-cell table:style-name="ce157"/>
          <table:table-cell table:style-name="ce163" table:formula="of:=([.D10]+[.D12])" office:value-type="float" office:value="137639.017689796" calcext:value-type="float">
            <text:p>137,639.02</text:p>
          </table:table-cell>
          <table:table-cell table:style-name="ce163" table:formula="of:=([.E10]+[.E12])" office:value-type="float" office:value="137639.017689796" calcext:value-type="float">
            <text:p>137,639.02</text:p>
          </table:table-cell>
          <table:table-cell table:style-name="ce163" table:formula="of:=([.F10]+[.F12])" office:value-type="float" office:value="137639.017689796" calcext:value-type="float">
            <text:p>137,639.02</text:p>
          </table:table-cell>
          <table:table-cell table:style-name="ce163" table:formula="of:=([.G10]+[.G12])" office:value-type="float" office:value="157300.93197551" calcext:value-type="float">
            <text:p>157,300.93</text:p>
          </table:table-cell>
          <table:table-cell table:style-name="ce163" table:formula="of:=([.H10]+[.H12])" office:value-type="float" office:value="157300.93197551" calcext:value-type="float">
            <text:p>157,300.93</text:p>
          </table:table-cell>
          <table:table-cell table:style-name="ce163" table:formula="of:=([.I10]+[.I12])" office:value-type="float" office:value="157300.93197551" calcext:value-type="float">
            <text:p>157,300.93</text:p>
          </table:table-cell>
          <table:table-cell table:style-name="ce163" table:formula="of:=([.J10]+[.J12])" office:value-type="float" office:value="176962.846261224" calcext:value-type="float">
            <text:p>176,962.85</text:p>
          </table:table-cell>
          <table:table-cell table:style-name="ce163" table:formula="of:=([.K10]+[.K12])" office:value-type="float" office:value="176962.846261224" calcext:value-type="float">
            <text:p>176,962.85</text:p>
          </table:table-cell>
          <table:table-cell table:style-name="ce163" table:formula="of:=([.L11]+[.L12])" office:value-type="float" office:value="182051.228571429" calcext:value-type="float">
            <text:p>182,051.23</text:p>
          </table:table-cell>
          <table:table-cell table:style-name="ce163" table:formula="of:=([.M11]+[.M12])" office:value-type="float" office:value="182051.228571429" calcext:value-type="float">
            <text:p>182,051.23</text:p>
          </table:table-cell>
          <table:table-cell table:style-name="ce163" table:formula="of:=([.N11]+[.N12])" office:value-type="float" office:value="142727.4" calcext:value-type="float">
            <text:p>142,727.40</text:p>
          </table:table-cell>
          <table:table-cell table:style-name="ce163" table:formula="of:=([.O11]+[.O12])" office:value-type="float" office:value="142727.4" calcext:value-type="float">
            <text:p>142,727.40</text:p>
          </table:table-cell>
          <table:table-cell table:style-name="ce163" table:formula="of:=([.P11]+[.P12])" office:value-type="float" office:value="149609.07" calcext:value-type="float">
            <text:p>149,609.07</text:p>
          </table:table-cell>
          <table:table-cell table:style-name="ce163" table:formula="of:=([.Q11]+[.Q12])" office:value-type="float" office:value="149609.07" calcext:value-type="float">
            <text:p>149,609.07</text:p>
          </table:table-cell>
          <table:table-cell table:style-name="ce163" table:formula="of:=([.R11]+[.R12])" office:value-type="float" office:value="149609.07" calcext:value-type="float">
            <text:p>149,609.07</text:p>
          </table:table-cell>
          <table:table-cell table:style-name="ce163" table:formula="of:=([.S11]+[.S12])" office:value-type="float" office:value="170254.08" calcext:value-type="float">
            <text:p>170,254.08</text:p>
          </table:table-cell>
          <table:table-cell table:style-name="ce163" table:formula="of:=([.T11]+[.T12])" office:value-type="float" office:value="170254.08" calcext:value-type="float">
            <text:p>170,254.08</text:p>
          </table:table-cell>
          <table:table-cell table:style-name="ce163" table:formula="of:=([.U11]+[.U12])" office:value-type="float" office:value="170254.08" calcext:value-type="float">
            <text:p>170,254.08</text:p>
          </table:table-cell>
          <table:table-cell table:style-name="ce163" table:formula="of:=([.V11]+[.V12])" office:value-type="float" office:value="190899.09" calcext:value-type="float">
            <text:p>190,899.09</text:p>
          </table:table-cell>
          <table:table-cell table:style-name="ce163" table:formula="of:=([.W11]+[.W12])" office:value-type="float" office:value="190899.09" calcext:value-type="float">
            <text:p>190,899.09</text:p>
          </table:table-cell>
          <table:table-cell table:style-name="ce163" table:formula="of:=([.X11]+[.X12])" office:value-type="float" office:value="190899.09" calcext:value-type="float">
            <text:p>190,899.09</text:p>
          </table:table-cell>
          <table:table-cell table:style-name="ce163" table:formula="of:=([.Y11]+[.Y12])" office:value-type="float" office:value="190899.09" calcext:value-type="float">
            <text:p>190,899.09</text:p>
          </table:table-cell>
          <table:table-cell table:style-name="ce163" table:formula="of:=([.Z11]+[.Z12])" office:value-type="float" office:value="149609.07" calcext:value-type="float">
            <text:p>149,609.07</text:p>
          </table:table-cell>
          <table:table-cell table:style-name="ce163" table:formula="of:=([.AA11]+[.AA12])" office:value-type="float" office:value="149609.07" calcext:value-type="float">
            <text:p>149,609.07</text:p>
          </table:table-cell>
          <table:table-cell table:style-name="ce163" table:formula="of:=([.AB10]+[.AB12])" office:value-type="float" office:value="151746.441189796" calcext:value-type="float">
            <text:p>151,746.44</text:p>
          </table:table-cell>
          <table:table-cell table:style-name="ce163" table:formula="of:=([.AC10]+[.AC12])" office:value-type="float" office:value="151746.441189796" calcext:value-type="float">
            <text:p>151,746.44</text:p>
          </table:table-cell>
          <table:table-cell table:style-name="ce163" table:formula="of:=([.AD10]+[.AD12])" office:value-type="float" office:value="151746.441189796" calcext:value-type="float">
            <text:p>151,746.44</text:p>
          </table:table-cell>
          <table:table-cell table:style-name="ce163" table:formula="of:=([.AE10]+[.AE12])" office:value-type="float" office:value="173423.701689796" calcext:value-type="float">
            <text:p>173,423.70</text:p>
          </table:table-cell>
          <table:table-cell table:style-name="ce163" table:formula="of:=([.AF10]+[.AF12])" office:value-type="float" office:value="173423.701689796" calcext:value-type="float">
            <text:p>173,423.70</text:p>
          </table:table-cell>
          <table:table-cell table:style-name="ce163" table:formula="of:=([.AG10]+[.AG12])" office:value-type="float" office:value="173423.701689796" calcext:value-type="float">
            <text:p>173,423.70</text:p>
          </table:table-cell>
          <table:table-cell table:style-name="ce163" table:formula="of:=([.AH10]+[.AH12])" office:value-type="float" office:value="195100.962189796" calcext:value-type="float">
            <text:p>195,100.96</text:p>
          </table:table-cell>
          <table:table-cell table:style-name="ce163" table:formula="of:=([.AI10]+[.AI12])" office:value-type="float" office:value="195100.962189796" calcext:value-type="float">
            <text:p>195,100.96</text:p>
          </table:table-cell>
          <table:table-cell table:style-name="ce163" table:formula="of:=([.AJ10]+[.AJ12])" office:value-type="float" office:value="195100.962189796" calcext:value-type="float">
            <text:p>195,100.96</text:p>
          </table:table-cell>
          <table:table-cell table:style-name="ce163" table:formula="of:=([.AK10]+[.AK12])" office:value-type="float" office:value="195100.962189796" calcext:value-type="float">
            <text:p>195,100.96</text:p>
          </table:table-cell>
          <table:table-cell table:style-name="ce163" table:formula="of:=([.AL10]+[.AL12])" office:value-type="float" office:value="151746.441189796" calcext:value-type="float">
            <text:p>151,746.44</text:p>
          </table:table-cell>
          <table:table-cell table:style-name="ce163" table:formula="of:=([.AM10]+[.AM12])" office:value-type="float" office:value="151746.441189796" calcext:value-type="float">
            <text:p>151,746.44</text:p>
          </table:table-cell>
          <table:table-cell table:style-name="ce163" table:formula="of:=([.AN10]+[.AN12])" office:value-type="float" office:value="159333.482364796" calcext:value-type="float">
            <text:p>159,333.48</text:p>
          </table:table-cell>
          <table:table-cell table:style-name="ce163" table:formula="of:=([.AO10]+[.AO12])" office:value-type="float" office:value="159333.482364796" calcext:value-type="float">
            <text:p>159,333.48</text:p>
          </table:table-cell>
          <table:table-cell table:style-name="ce163" table:formula="of:=([.AP10]+[.AP12])" office:value-type="float" office:value="159333.482364796" calcext:value-type="float">
            <text:p>159,333.48</text:p>
          </table:table-cell>
          <table:table-cell table:style-name="ce163" table:formula="of:=([.AQ10]+[.AQ12])" office:value-type="float" office:value="182094.605889796" calcext:value-type="float">
            <text:p>182,094.61</text:p>
          </table:table-cell>
          <table:table-cell table:style-name="ce163" table:formula="of:=([.AR10]+[.AR12])" office:value-type="float" office:value="182094.605889796" calcext:value-type="float">
            <text:p>182,094.61</text:p>
          </table:table-cell>
          <table:table-cell table:style-name="ce163" table:formula="of:=([.AS10]+[.AS12])" office:value-type="float" office:value="182094.605889796" calcext:value-type="float">
            <text:p>182,094.61</text:p>
          </table:table-cell>
          <table:table-cell table:style-name="ce163" table:formula="of:=([.AT10]+[.AT12])" office:value-type="float" office:value="204855.729414796" calcext:value-type="float">
            <text:p>204,855.73</text:p>
          </table:table-cell>
          <table:table-cell table:style-name="ce163" table:formula="of:=([.AU10]+[.AU12])" office:value-type="float" office:value="204855.729414796" calcext:value-type="float">
            <text:p>204,855.73</text:p>
          </table:table-cell>
          <table:table-cell table:style-name="ce163" table:formula="of:=([.AV10]+[.AV12])" office:value-type="float" office:value="204855.729414796" calcext:value-type="float">
            <text:p>204,855.73</text:p>
          </table:table-cell>
          <table:table-cell table:style-name="ce163" table:formula="of:=([.AW10]+[.AW12])" office:value-type="float" office:value="204855.729414796" calcext:value-type="float">
            <text:p>204,855.73</text:p>
          </table:table-cell>
          <table:table-cell table:style-name="ce163" table:formula="of:=([.AX10]+[.AX12])" office:value-type="float" office:value="159333.482364796" calcext:value-type="float">
            <text:p>159,333.48</text:p>
          </table:table-cell>
          <table:table-cell table:style-name="ce163" table:formula="of:=([.AY10]+[.AY12])" office:value-type="float" office:value="159333.482364796" calcext:value-type="float">
            <text:p>159,333.48</text:p>
          </table:table-cell>
          <table:table-cell table:style-name="ce163" table:formula="of:=([.AZ10]+[.AZ12])" office:value-type="float" office:value="167299.875598546" calcext:value-type="float">
            <text:p>167,299.88</text:p>
          </table:table-cell>
          <table:table-cell table:style-name="ce163" table:formula="of:=([.BA10]+[.BA12])" office:value-type="float" office:value="167299.875598546" calcext:value-type="float">
            <text:p>167,299.88</text:p>
          </table:table-cell>
          <table:table-cell table:style-name="ce163" table:formula="of:=([.BB10]+[.BB12])" office:value-type="float" office:value="167299.875598546" calcext:value-type="float">
            <text:p>167,299.88</text:p>
          </table:table-cell>
          <table:table-cell table:style-name="ce163" table:formula="of:=([.BC10]+[.BC12])" office:value-type="float" office:value="191199.055299796" calcext:value-type="float">
            <text:p>191,199.06</text:p>
          </table:table-cell>
          <table:table-cell table:style-name="ce163" table:formula="of:=([.BD10]+[.BD12])" office:value-type="float" office:value="191199.055299796" calcext:value-type="float">
            <text:p>191,199.06</text:p>
          </table:table-cell>
          <table:table-cell table:style-name="ce163" table:formula="of:=([.BE10]+[.BE12])" office:value-type="float" office:value="191199.055299796" calcext:value-type="float">
            <text:p>191,199.06</text:p>
          </table:table-cell>
          <table:table-cell table:style-name="ce163" table:formula="of:=([.BF10]+[.BF12])" office:value-type="float" office:value="215098.235001046" calcext:value-type="float">
            <text:p>215,098.24</text:p>
          </table:table-cell>
          <table:table-cell table:style-name="ce163" table:formula="of:=([.BG10]+[.BG12])" office:value-type="float" office:value="215098.235001046" calcext:value-type="float">
            <text:p>215,098.24</text:p>
          </table:table-cell>
          <table:table-cell table:style-name="ce163" table:formula="of:=([.BH10]+[.BH12])" office:value-type="float" office:value="215098.235001046" calcext:value-type="float">
            <text:p>215,098.24</text:p>
          </table:table-cell>
          <table:table-cell table:style-name="ce163" table:formula="of:=([.BI10]+[.BI12])" office:value-type="float" office:value="215098.235001046" calcext:value-type="float">
            <text:p>215,098.24</text:p>
          </table:table-cell>
          <table:table-cell table:style-name="ce163" table:formula="of:=([.BJ10]+[.BJ12])" office:value-type="float" office:value="167299.875598546" calcext:value-type="float">
            <text:p>167,299.88</text:p>
          </table:table-cell>
          <table:table-cell table:style-name="ce163" table:formula="of:=([.BK10]+[.BK12])" office:value-type="float" office:value="167299.875598546" calcext:value-type="float">
            <text:p>167,299.88</text:p>
          </table:table-cell>
          <table:table-cell table:number-columns-repeated="16321"/>
        </table:table-row>
        <table:table-row table:style-name="ro16">
          <table:table-cell table:style-name="ce50"/>
          <table:table-cell table:style-name="ce152" office:value-type="string" calcext:value-type="string">
            <text:p>Variacion KW</text:p>
          </table:table-cell>
          <table:table-cell table:style-name="ce157" table:formula="of:=[.D13]" office:value-type="float" office:value="137639.017689796" calcext:value-type="float">
            <text:p>137,639.02</text:p>
          </table:table-cell>
          <table:table-cell table:style-name="ce163" table:formula="of:=[.E13]-[.D13]" office:value-type="float" office:value="0" calcext:value-type="float">
            <text:p>0.00</text:p>
          </table:table-cell>
          <table:table-cell table:style-name="ce163" table:formula="of:=[.F13]-[.E13]" office:value-type="float" office:value="0" calcext:value-type="float">
            <text:p>0.00</text:p>
          </table:table-cell>
          <table:table-cell table:style-name="ce163" table:formula="of:=[.G13]-[.F13]" office:value-type="float" office:value="19661.9142857143" calcext:value-type="float">
            <text:p>19,661.91</text:p>
          </table:table-cell>
          <table:table-cell table:style-name="ce163" table:formula="of:=[.H13]-[.G13]" office:value-type="float" office:value="0" calcext:value-type="float">
            <text:p>0.00</text:p>
          </table:table-cell>
          <table:table-cell table:style-name="ce163" table:formula="of:=[.I13]-[.H13]" office:value-type="float" office:value="0" calcext:value-type="float">
            <text:p>0.00</text:p>
          </table:table-cell>
          <table:table-cell table:style-name="ce163" table:formula="of:=[.J13]-[.I13]" office:value-type="float" office:value="19661.9142857143" calcext:value-type="float">
            <text:p>19,661.91</text:p>
          </table:table-cell>
          <table:table-cell table:style-name="ce163" table:formula="of:=[.K13]-[.J13]" office:value-type="float" office:value="0" calcext:value-type="float">
            <text:p>0.00</text:p>
          </table:table-cell>
          <table:table-cell table:style-name="ce163" table:formula="of:=[.L13]-[.K13]" office:value-type="float" office:value="5088.38231020409" calcext:value-type="float">
            <text:p>5,088.38</text:p>
          </table:table-cell>
          <table:table-cell table:style-name="ce163" table:formula="of:=[.M13]-[.L13]" office:value-type="float" office:value="0" calcext:value-type="float">
            <text:p>0.00</text:p>
          </table:table-cell>
          <table:table-cell table:style-name="ce163" table:formula="of:=[.N13]-[.M13]" office:value-type="float" office:value="-39323.8285714286" calcext:value-type="float">
            <text:p>-39,323.83</text:p>
          </table:table-cell>
          <table:table-cell table:style-name="ce163" table:formula="of:=[.O13]-[.N13]" office:value-type="float" office:value="0" calcext:value-type="float">
            <text:p>0.00</text:p>
          </table:table-cell>
          <table:table-cell table:style-name="ce169" table:formula="of:=[.P13]-[.O13]" office:value-type="float" office:value="6881.66999999998" calcext:value-type="float">
            <text:p>6,881.67</text:p>
          </table:table-cell>
          <table:table-cell table:style-name="ce163" table:formula="of:=[.Q13]-[.P13]" office:value-type="float" office:value="0" calcext:value-type="float">
            <text:p>0.00</text:p>
          </table:table-cell>
          <table:table-cell table:style-name="ce163" table:formula="of:=[.R13]-[.Q13]" office:value-type="float" office:value="0" calcext:value-type="float">
            <text:p>0.00</text:p>
          </table:table-cell>
          <table:table-cell table:style-name="ce163" table:formula="of:=[.S13]-[.R13]" office:value-type="float" office:value="20645.01" calcext:value-type="float">
            <text:p>20,645.01</text:p>
          </table:table-cell>
          <table:table-cell table:style-name="ce163" table:formula="of:=[.T13]-[.S13]" office:value-type="float" office:value="0" calcext:value-type="float">
            <text:p>0.00</text:p>
          </table:table-cell>
          <table:table-cell table:style-name="ce163" table:formula="of:=[.U13]-[.T13]" office:value-type="float" office:value="0" calcext:value-type="float">
            <text:p>0.00</text:p>
          </table:table-cell>
          <table:table-cell table:style-name="ce163" table:formula="of:=[.V13]-[.U13]" office:value-type="float" office:value="20645.01" calcext:value-type="float">
            <text:p>20,645.01</text:p>
          </table:table-cell>
          <table:table-cell table:style-name="ce163" table:formula="of:=[.W13]-[.V13]" office:value-type="float" office:value="0" calcext:value-type="float">
            <text:p>0.00</text:p>
          </table:table-cell>
          <table:table-cell table:style-name="ce163" table:formula="of:=[.X13]-[.W13]" office:value-type="float" office:value="0" calcext:value-type="float">
            <text:p>0.00</text:p>
          </table:table-cell>
          <table:table-cell table:style-name="ce163" table:formula="of:=[.Y13]-[.X13]" office:value-type="float" office:value="0" calcext:value-type="float">
            <text:p>0.00</text:p>
          </table:table-cell>
          <table:table-cell table:style-name="ce163" table:formula="of:=[.Z13]-[.Y13]" office:value-type="float" office:value="-41290.02" calcext:value-type="float">
            <text:p>-41,290.02</text:p>
          </table:table-cell>
          <table:table-cell table:style-name="ce163" table:formula="of:=[.AA13]-[.Z13]" office:value-type="float" office:value="0" calcext:value-type="float">
            <text:p>0.00</text:p>
          </table:table-cell>
          <table:table-cell table:style-name="ce169" table:formula="of:=[.AB13]-[.AA13]" office:value-type="float" office:value="2137.3711897959" calcext:value-type="float">
            <text:p>2,137.37</text:p>
          </table:table-cell>
          <table:table-cell table:style-name="ce163" table:formula="of:=[.AC13]-[.AB13]" office:value-type="float" office:value="0" calcext:value-type="float">
            <text:p>0.00</text:p>
          </table:table-cell>
          <table:table-cell table:style-name="ce163" table:formula="of:=[.AD13]-[.AC13]" office:value-type="float" office:value="0" calcext:value-type="float">
            <text:p>0.00</text:p>
          </table:table-cell>
          <table:table-cell table:style-name="ce163" table:formula="of:=[.AE13]-[.AD13]" office:value-type="float" office:value="21677.2605" calcext:value-type="float">
            <text:p>21,677.26</text:p>
          </table:table-cell>
          <table:table-cell table:style-name="ce163" table:formula="of:=[.AF13]-[.AE13]" office:value-type="float" office:value="0" calcext:value-type="float">
            <text:p>0.00</text:p>
          </table:table-cell>
          <table:table-cell table:style-name="ce163" table:formula="of:=[.AG13]-[.AF13]" office:value-type="float" office:value="0" calcext:value-type="float">
            <text:p>0.00</text:p>
          </table:table-cell>
          <table:table-cell table:style-name="ce163" table:formula="of:=[.AH13]-[.AG13]" office:value-type="float" office:value="21677.2605" calcext:value-type="float">
            <text:p>21,677.26</text:p>
          </table:table-cell>
          <table:table-cell table:style-name="ce163" table:formula="of:=[.AI13]-[.AH13]" office:value-type="float" office:value="0" calcext:value-type="float">
            <text:p>0.00</text:p>
          </table:table-cell>
          <table:table-cell table:style-name="ce163" table:formula="of:=[.AJ13]-[.AI13]" office:value-type="float" office:value="0" calcext:value-type="float">
            <text:p>0.00</text:p>
          </table:table-cell>
          <table:table-cell table:style-name="ce163" table:formula="of:=[.AK13]-[.AJ13]" office:value-type="float" office:value="0" calcext:value-type="float">
            <text:p>0.00</text:p>
          </table:table-cell>
          <table:table-cell table:style-name="ce163" table:formula="of:=[.AL13]-[.AK13]" office:value-type="float" office:value="-43354.521" calcext:value-type="float">
            <text:p>-43,354.52</text:p>
          </table:table-cell>
          <table:table-cell table:style-name="ce163" table:formula="of:=[.AM13]-[.AL13]" office:value-type="float" office:value="0" calcext:value-type="float">
            <text:p>0.00</text:p>
          </table:table-cell>
          <table:table-cell table:style-name="ce169" table:formula="of:=[.AN13]-[.AM13]" office:value-type="float" office:value="7587.04117500002" calcext:value-type="float">
            <text:p>7,587.04</text:p>
          </table:table-cell>
          <table:table-cell table:style-name="ce163" table:formula="of:=[.AO13]-[.AN13]" office:value-type="float" office:value="0" calcext:value-type="float">
            <text:p>0.00</text:p>
          </table:table-cell>
          <table:table-cell table:style-name="ce163" table:formula="of:=[.AP13]-[.AO13]" office:value-type="float" office:value="0" calcext:value-type="float">
            <text:p>0.00</text:p>
          </table:table-cell>
          <table:table-cell table:style-name="ce163" table:formula="of:=[.AQ13]-[.AP13]" office:value-type="float" office:value="22761.123525" calcext:value-type="float">
            <text:p>22,761.12</text:p>
          </table:table-cell>
          <table:table-cell table:style-name="ce163" table:formula="of:=[.AR13]-[.AQ13]" office:value-type="float" office:value="0" calcext:value-type="float">
            <text:p>0.00</text:p>
          </table:table-cell>
          <table:table-cell table:style-name="ce163" table:formula="of:=[.AS13]-[.AR13]" office:value-type="float" office:value="0" calcext:value-type="float">
            <text:p>0.00</text:p>
          </table:table-cell>
          <table:table-cell table:style-name="ce163" table:formula="of:=[.AT13]-[.AS13]" office:value-type="float" office:value="22761.123525" calcext:value-type="float">
            <text:p>22,761.12</text:p>
          </table:table-cell>
          <table:table-cell table:style-name="ce163" table:formula="of:=[.AU13]-[.AT13]" office:value-type="float" office:value="0" calcext:value-type="float">
            <text:p>0.00</text:p>
          </table:table-cell>
          <table:table-cell table:style-name="ce163" table:formula="of:=[.AV13]-[.AU13]" office:value-type="float" office:value="0" calcext:value-type="float">
            <text:p>0.00</text:p>
          </table:table-cell>
          <table:table-cell table:style-name="ce163" table:formula="of:=[.AW13]-[.AV13]" office:value-type="float" office:value="0" calcext:value-type="float">
            <text:p>0.00</text:p>
          </table:table-cell>
          <table:table-cell table:style-name="ce163" table:formula="of:=[.AX13]-[.AW13]" office:value-type="float" office:value="-45522.24705" calcext:value-type="float">
            <text:p>-45,522.25</text:p>
          </table:table-cell>
          <table:table-cell table:style-name="ce163" table:formula="of:=[.AY13]-[.AX13]" office:value-type="float" office:value="0" calcext:value-type="float">
            <text:p>0.00</text:p>
          </table:table-cell>
          <table:table-cell table:style-name="ce169" table:formula="of:=[.AZ13]-[.AY13]" office:value-type="float" office:value="7966.39323375002" calcext:value-type="float">
            <text:p>7,966.39</text:p>
          </table:table-cell>
          <table:table-cell table:style-name="ce163" table:formula="of:=[.BA13]-[.AZ13]" office:value-type="float" office:value="0" calcext:value-type="float">
            <text:p>0.00</text:p>
          </table:table-cell>
          <table:table-cell table:style-name="ce163" table:formula="of:=[.BB13]-[.BA13]" office:value-type="float" office:value="0" calcext:value-type="float">
            <text:p>0.00</text:p>
          </table:table-cell>
          <table:table-cell table:style-name="ce163" table:formula="of:=[.BC13]-[.BB13]" office:value-type="float" office:value="23899.17970125" calcext:value-type="float">
            <text:p>23,899.18</text:p>
          </table:table-cell>
          <table:table-cell table:style-name="ce163" table:formula="of:=[.BD13]-[.BC13]" office:value-type="float" office:value="0" calcext:value-type="float">
            <text:p>0.00</text:p>
          </table:table-cell>
          <table:table-cell table:style-name="ce163" table:formula="of:=[.BE13]-[.BD13]" office:value-type="float" office:value="0" calcext:value-type="float">
            <text:p>0.00</text:p>
          </table:table-cell>
          <table:table-cell table:style-name="ce163" table:formula="of:=[.BF13]-[.BE13]" office:value-type="float" office:value="23899.17970125" calcext:value-type="float">
            <text:p>23,899.18</text:p>
          </table:table-cell>
          <table:table-cell table:style-name="ce163" table:formula="of:=[.BG13]-[.BF13]" office:value-type="float" office:value="0" calcext:value-type="float">
            <text:p>0.00</text:p>
          </table:table-cell>
          <table:table-cell table:style-name="ce163" table:formula="of:=[.BH13]-[.BG13]" office:value-type="float" office:value="0" calcext:value-type="float">
            <text:p>0.00</text:p>
          </table:table-cell>
          <table:table-cell table:style-name="ce163" table:formula="of:=[.BI13]-[.BH13]" office:value-type="float" office:value="0" calcext:value-type="float">
            <text:p>0.00</text:p>
          </table:table-cell>
          <table:table-cell table:style-name="ce163" table:formula="of:=[.BJ13]-[.BI13]" office:value-type="float" office:value="-47798.3594025" calcext:value-type="float">
            <text:p>-47,798.36</text:p>
          </table:table-cell>
          <table:table-cell table:style-name="ce163" table:formula="of:=[.BK13]-[.BJ13]" office:value-type="float" office:value="0" calcext:value-type="float">
            <text:p>0.00</text:p>
          </table:table-cell>
          <table:table-cell table:style-name="ce163"/>
          <table:table-cell table:number-columns-repeated="16321"/>
        </table:table-row>
        <table:table-row table:style-name="ro17">
          <table:table-cell table:style-name="ce50"/>
          <table:table-cell table:style-name="ce154" office:value-type="string" calcext:value-type="string">
            <text:p>TOTAL</text:p>
          </table:table-cell>
          <table:table-cell table:style-name="ce158"/>
          <table:table-cell table:style-name="ce165" table:formula="of:=SUM([.D13:.D14])" office:value-type="float" office:value="137639.017689796" calcext:value-type="float">
            <text:p>137,639.02</text:p>
          </table:table-cell>
          <table:table-cell table:style-name="ce165" table:formula="of:=SUM([.E13:.E14])" office:value-type="float" office:value="137639.017689796" calcext:value-type="float">
            <text:p>137,639.02</text:p>
          </table:table-cell>
          <table:table-cell table:style-name="ce165" table:formula="of:=SUM([.F13:.F14])" office:value-type="float" office:value="157300.93197551" calcext:value-type="float">
            <text:p>157,300.93</text:p>
          </table:table-cell>
          <table:table-cell table:style-name="ce165" table:formula="of:=SUM([.G13:.G14])" office:value-type="float" office:value="157300.93197551" calcext:value-type="float">
            <text:p>157,300.93</text:p>
          </table:table-cell>
          <table:table-cell table:style-name="ce165" table:formula="of:=SUM([.H13:.H14])" office:value-type="float" office:value="157300.93197551" calcext:value-type="float">
            <text:p>157,300.93</text:p>
          </table:table-cell>
          <table:table-cell table:style-name="ce165" table:formula="of:=SUM([.I13:.I14])" office:value-type="float" office:value="176962.846261224" calcext:value-type="float">
            <text:p>176,962.85</text:p>
          </table:table-cell>
          <table:table-cell table:style-name="ce165" table:formula="of:=SUM([.J13:.J14])" office:value-type="float" office:value="176962.846261224" calcext:value-type="float">
            <text:p>176,962.85</text:p>
          </table:table-cell>
          <table:table-cell table:style-name="ce165" table:formula="of:=SUM([.K13:.K14])" office:value-type="float" office:value="182051.228571429" calcext:value-type="float">
            <text:p>182,051.23</text:p>
          </table:table-cell>
          <table:table-cell table:style-name="ce165" table:formula="of:=SUM([.L13:.L14])" office:value-type="float" office:value="182051.228571429" calcext:value-type="float">
            <text:p>182,051.23</text:p>
          </table:table-cell>
          <table:table-cell table:style-name="ce165" table:formula="of:=SUM([.M13:.M14])" office:value-type="float" office:value="142727.4" calcext:value-type="float">
            <text:p>142,727.40</text:p>
          </table:table-cell>
          <table:table-cell table:style-name="ce165" table:formula="of:=SUM([.N13:.N14])" office:value-type="float" office:value="142727.4" calcext:value-type="float">
            <text:p>142,727.40</text:p>
          </table:table-cell>
          <table:table-cell table:style-name="ce165" table:formula="of:=SUM([.O13:.O14])" office:value-type="float" office:value="149609.07" calcext:value-type="float">
            <text:p>149,609.07</text:p>
          </table:table-cell>
          <table:table-cell table:style-name="ce172" table:formula="of:=SUM([.P13:.P14])" office:value-type="float" office:value="149609.07" calcext:value-type="float">
            <text:p>149,609.07</text:p>
          </table:table-cell>
          <table:table-cell table:style-name="ce172" table:formula="of:=SUM([.Q13:.Q14])" office:value-type="float" office:value="149609.07" calcext:value-type="float">
            <text:p>149,609.07</text:p>
          </table:table-cell>
          <table:table-cell table:style-name="ce172" table:formula="of:=SUM([.R13:.R14])" office:value-type="float" office:value="170254.08" calcext:value-type="float">
            <text:p>170,254.08</text:p>
          </table:table-cell>
          <table:table-cell table:style-name="ce172" table:formula="of:=SUM([.S13:.S14])" office:value-type="float" office:value="170254.08" calcext:value-type="float">
            <text:p>170,254.08</text:p>
          </table:table-cell>
          <table:table-cell table:style-name="ce172" table:formula="of:=SUM([.T13:.T14])" office:value-type="float" office:value="170254.08" calcext:value-type="float">
            <text:p>170,254.08</text:p>
          </table:table-cell>
          <table:table-cell table:style-name="ce172" table:formula="of:=SUM([.U13:.U14])" office:value-type="float" office:value="190899.09" calcext:value-type="float">
            <text:p>190,899.09</text:p>
          </table:table-cell>
          <table:table-cell table:style-name="ce172" table:formula="of:=SUM([.V13:.V14])" office:value-type="float" office:value="190899.09" calcext:value-type="float">
            <text:p>190,899.09</text:p>
          </table:table-cell>
          <table:table-cell table:style-name="ce172" table:formula="of:=SUM([.W13:.W14])" office:value-type="float" office:value="190899.09" calcext:value-type="float">
            <text:p>190,899.09</text:p>
          </table:table-cell>
          <table:table-cell table:style-name="ce172" table:formula="of:=SUM([.X13:.X14])" office:value-type="float" office:value="190899.09" calcext:value-type="float">
            <text:p>190,899.09</text:p>
          </table:table-cell>
          <table:table-cell table:style-name="ce172" table:formula="of:=SUM([.Y13:.Y14])" office:value-type="float" office:value="149609.07" calcext:value-type="float">
            <text:p>149,609.07</text:p>
          </table:table-cell>
          <table:table-cell table:style-name="ce172" table:formula="of:=SUM([.Z13:.Z14])" office:value-type="float" office:value="149609.07" calcext:value-type="float">
            <text:p>149,609.07</text:p>
          </table:table-cell>
          <table:table-cell table:style-name="ce172" table:formula="of:=SUM([.AA13:.AA14])" office:value-type="float" office:value="151746.441189796" calcext:value-type="float">
            <text:p>151,746.44</text:p>
          </table:table-cell>
          <table:table-cell table:style-name="ce165" table:formula="of:=SUM([.AB13:.AB14])" office:value-type="float" office:value="151746.441189796" calcext:value-type="float">
            <text:p>151,746.44</text:p>
          </table:table-cell>
          <table:table-cell table:style-name="ce165" table:formula="of:=SUM([.AC13:.AC14])" office:value-type="float" office:value="151746.441189796" calcext:value-type="float">
            <text:p>151,746.44</text:p>
          </table:table-cell>
          <table:table-cell table:style-name="ce165" table:formula="of:=SUM([.AD13:.AD14])" office:value-type="float" office:value="173423.701689796" calcext:value-type="float">
            <text:p>173,423.70</text:p>
          </table:table-cell>
          <table:table-cell table:style-name="ce165" table:formula="of:=SUM([.AE13:.AE14])" office:value-type="float" office:value="173423.701689796" calcext:value-type="float">
            <text:p>173,423.70</text:p>
          </table:table-cell>
          <table:table-cell table:style-name="ce165" table:formula="of:=SUM([.AF13:.AF14])" office:value-type="float" office:value="173423.701689796" calcext:value-type="float">
            <text:p>173,423.70</text:p>
          </table:table-cell>
          <table:table-cell table:style-name="ce165" table:formula="of:=SUM([.AG13:.AG14])" office:value-type="float" office:value="195100.962189796" calcext:value-type="float">
            <text:p>195,100.96</text:p>
          </table:table-cell>
          <table:table-cell table:style-name="ce165" table:formula="of:=SUM([.AH13:.AH14])" office:value-type="float" office:value="195100.962189796" calcext:value-type="float">
            <text:p>195,100.96</text:p>
          </table:table-cell>
          <table:table-cell table:style-name="ce165" table:formula="of:=SUM([.AI13:.AI14])" office:value-type="float" office:value="195100.962189796" calcext:value-type="float">
            <text:p>195,100.96</text:p>
          </table:table-cell>
          <table:table-cell table:style-name="ce165" table:formula="of:=SUM([.AJ13:.AJ14])" office:value-type="float" office:value="195100.962189796" calcext:value-type="float">
            <text:p>195,100.96</text:p>
          </table:table-cell>
          <table:table-cell table:style-name="ce165" table:formula="of:=SUM([.AK13:.AK14])" office:value-type="float" office:value="151746.441189796" calcext:value-type="float">
            <text:p>151,746.44</text:p>
          </table:table-cell>
          <table:table-cell table:style-name="ce165" table:formula="of:=SUM([.AL13:.AL14])" office:value-type="float" office:value="151746.441189796" calcext:value-type="float">
            <text:p>151,746.44</text:p>
          </table:table-cell>
          <table:table-cell table:style-name="ce165" table:formula="of:=SUM([.AM13:.AM14])" office:value-type="float" office:value="159333.482364796" calcext:value-type="float">
            <text:p>159,333.48</text:p>
          </table:table-cell>
          <table:table-cell table:style-name="ce172" table:formula="of:=SUM([.AN13:.AN14])" office:value-type="float" office:value="159333.482364796" calcext:value-type="float">
            <text:p>159,333.48</text:p>
          </table:table-cell>
          <table:table-cell table:style-name="ce172" table:formula="of:=SUM([.AO13:.AO14])" office:value-type="float" office:value="159333.482364796" calcext:value-type="float">
            <text:p>159,333.48</text:p>
          </table:table-cell>
          <table:table-cell table:style-name="ce172" table:formula="of:=SUM([.AP13:.AP14])" office:value-type="float" office:value="182094.605889796" calcext:value-type="float">
            <text:p>182,094.61</text:p>
          </table:table-cell>
          <table:table-cell table:style-name="ce172" table:formula="of:=SUM([.AQ13:.AQ14])" office:value-type="float" office:value="182094.605889796" calcext:value-type="float">
            <text:p>182,094.61</text:p>
          </table:table-cell>
          <table:table-cell table:style-name="ce172" table:formula="of:=SUM([.AR13:.AR14])" office:value-type="float" office:value="182094.605889796" calcext:value-type="float">
            <text:p>182,094.61</text:p>
          </table:table-cell>
          <table:table-cell table:style-name="ce172" table:formula="of:=SUM([.AS13:.AS14])" office:value-type="float" office:value="204855.729414796" calcext:value-type="float">
            <text:p>204,855.73</text:p>
          </table:table-cell>
          <table:table-cell table:style-name="ce172" table:formula="of:=SUM([.AT13:.AT14])" office:value-type="float" office:value="204855.729414796" calcext:value-type="float">
            <text:p>204,855.73</text:p>
          </table:table-cell>
          <table:table-cell table:style-name="ce172" table:formula="of:=SUM([.AU13:.AU14])" office:value-type="float" office:value="204855.729414796" calcext:value-type="float">
            <text:p>204,855.73</text:p>
          </table:table-cell>
          <table:table-cell table:style-name="ce172" table:formula="of:=SUM([.AV13:.AV14])" office:value-type="float" office:value="204855.729414796" calcext:value-type="float">
            <text:p>204,855.73</text:p>
          </table:table-cell>
          <table:table-cell table:style-name="ce172" table:formula="of:=SUM([.AW13:.AW14])" office:value-type="float" office:value="159333.482364796" calcext:value-type="float">
            <text:p>159,333.48</text:p>
          </table:table-cell>
          <table:table-cell table:style-name="ce172" table:formula="of:=SUM([.AX13:.AX14])" office:value-type="float" office:value="159333.482364796" calcext:value-type="float">
            <text:p>159,333.48</text:p>
          </table:table-cell>
          <table:table-cell table:style-name="ce172" table:formula="of:=SUM([.AY13:.AY14])" office:value-type="float" office:value="167299.875598546" calcext:value-type="float">
            <text:p>167,299.88</text:p>
          </table:table-cell>
          <table:table-cell table:style-name="ce165" table:formula="of:=SUM([.AZ13:.AZ14])" office:value-type="float" office:value="167299.875598546" calcext:value-type="float">
            <text:p>167,299.88</text:p>
          </table:table-cell>
          <table:table-cell table:style-name="ce165" table:formula="of:=SUM([.BA13:.BA14])" office:value-type="float" office:value="167299.875598546" calcext:value-type="float">
            <text:p>167,299.88</text:p>
          </table:table-cell>
          <table:table-cell table:style-name="ce165" table:formula="of:=SUM([.BB13:.BB14])" office:value-type="float" office:value="191199.055299796" calcext:value-type="float">
            <text:p>191,199.06</text:p>
          </table:table-cell>
          <table:table-cell table:style-name="ce165" table:formula="of:=SUM([.BC13:.BC14])" office:value-type="float" office:value="191199.055299796" calcext:value-type="float">
            <text:p>191,199.06</text:p>
          </table:table-cell>
          <table:table-cell table:style-name="ce165" table:formula="of:=SUM([.BD13:.BD14])" office:value-type="float" office:value="191199.055299796" calcext:value-type="float">
            <text:p>191,199.06</text:p>
          </table:table-cell>
          <table:table-cell table:style-name="ce165" table:formula="of:=SUM([.BE13:.BE14])" office:value-type="float" office:value="215098.235001046" calcext:value-type="float">
            <text:p>215,098.24</text:p>
          </table:table-cell>
          <table:table-cell table:style-name="ce165" table:formula="of:=SUM([.BF13:.BF14])" office:value-type="float" office:value="215098.235001046" calcext:value-type="float">
            <text:p>215,098.24</text:p>
          </table:table-cell>
          <table:table-cell table:style-name="ce165" table:formula="of:=SUM([.BG13:.BG14])" office:value-type="float" office:value="215098.235001046" calcext:value-type="float">
            <text:p>215,098.24</text:p>
          </table:table-cell>
          <table:table-cell table:style-name="ce165" table:formula="of:=SUM([.BH13:.BH14])" office:value-type="float" office:value="215098.235001046" calcext:value-type="float">
            <text:p>215,098.24</text:p>
          </table:table-cell>
          <table:table-cell table:style-name="ce165" table:formula="of:=SUM([.BI13:.BI14])" office:value-type="float" office:value="167299.875598546" calcext:value-type="float">
            <text:p>167,299.88</text:p>
          </table:table-cell>
          <table:table-cell table:style-name="ce165" table:formula="of:=SUM([.BJ13:.BJ14])" office:value-type="float" office:value="167299.875598546" calcext:value-type="float">
            <text:p>167,299.88</text:p>
          </table:table-cell>
          <table:table-cell table:style-name="ce165" table:formula="of:=SUM([.BK13:.BK14])" office:value-type="float" office:value="167299.875598546" calcext:value-type="float">
            <text:p>167,299.88</text:p>
          </table:table-cell>
          <table:table-cell table:number-columns-repeated="16321"/>
        </table:table-row>
        <table:table-row table:style-name="ro1">
          <table:table-cell table:style-name="ce50"/>
          <table:table-cell table:style-name="ce41" table:number-columns-repeated="62"/>
          <table:table-cell table:number-columns-repeated="16321"/>
        </table:table-row>
        <table:table-row table:style-name="ro1">
          <table:table-cell table:style-name="ce50"/>
          <table:table-cell table:style-name="ce41"/>
          <table:table-cell table:style-name="ce138"/>
          <table:table-cell table:style-name="ce166"/>
          <table:table-cell table:style-name="ce138" table:number-columns-repeated="5"/>
          <table:table-cell table:style-name="ce138" table:formula="of:=[.F14]+[.I14]" office:value-type="float" office:value="39323.8285714286" calcext:value-type="float">
            <text:p>39,323.83</text:p>
          </table:table-cell>
          <table:table-cell table:style-name="ce138" table:number-columns-repeated="4"/>
          <table:table-cell table:style-name="ce138" table:formula="of:=SUM([.D14:.O14])" office:value-type="float" office:value="11970.0523102041" calcext:value-type="float">
            <text:p>11,970.05</text:p>
          </table:table-cell>
          <table:table-cell table:style-name="ce41" table:number-columns-repeated="48"/>
          <table:table-cell table:number-columns-repeated="16321"/>
        </table:table-row>
        <table:table-row table:style-name="ro1">
          <table:table-cell table:style-name="ce41"/>
          <table:table-cell table:style-name="ce155" office:value-type="string" calcext:value-type="string">
            <text:p>año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style-name="ce167" office:value-type="float" office:value="5" calcext:value-type="float">
            <text:p>5</text:p>
          </table:table-cell>
          <table:table-cell table:style-name="ce41" table:number-columns-repeated="55"/>
          <table:table-cell table:number-columns-repeated="16321"/>
        </table:table-row>
        <table:table-row table:style-name="ro1">
          <table:table-cell table:style-name="ce41"/>
          <table:table-cell table:style-name="ce156" office:value-type="string" calcext:value-type="string">
            <text:p>variacion kw</text:p>
          </table:table-cell>
          <table:table-cell table:style-name="ce160" table:formula="of:=SUM([.C14:.N14])" office:value-type="float" office:value="142727.4" calcext:value-type="float">
            <text:p>142,727.40</text:p>
          </table:table-cell>
          <table:table-cell table:style-name="ce160" table:formula="of:=SUM([.O14:.Z14])" office:value-type="float" office:value="6881.66999999998" calcext:value-type="float">
            <text:p>6,881.67</text:p>
          </table:table-cell>
          <table:table-cell table:style-name="ce160" table:formula="of:=SUM([.AA14:.AL14])" office:value-type="float" office:value="2137.3711897959" calcext:value-type="float">
            <text:p>2,137.37</text:p>
          </table:table-cell>
          <table:table-cell table:style-name="ce160" table:formula="of:=SUM([.AM14:.AX14])" office:value-type="float" office:value="7587.04117500002" calcext:value-type="float">
            <text:p>7,587.04</text:p>
          </table:table-cell>
          <table:table-cell table:style-name="ce160" table:formula="of:=SUM([.AY14:.BJ14])" office:value-type="float" office:value="7966.39323375002" calcext:value-type="float">
            <text:p>7,966.39</text:p>
          </table:table-cell>
          <table:table-cell table:style-name="ce168" table:formula="of:=SUM([.AZ14:.BK14])" office:value-type="float" office:value="0" calcext:value-type="float">
            <text:p>0.00</text:p>
          </table:table-cell>
          <table:table-cell table:style-name="ce41" table:number-columns-repeated="55"/>
          <table:table-cell table:number-columns-repeated="16321"/>
        </table:table-row>
        <table:table-row table:style-name="ro1">
          <table:table-cell table:style-name="ce41" table:number-columns-repeated="63"/>
          <table:table-cell table:number-columns-repeated="16321"/>
        </table:table-row>
        <table:table-row table:style-name="ro1">
          <table:table-cell table:style-name="ce41" table:number-columns-repeated="8"/>
          <table:table-cell table:style-name="ce138"/>
          <table:table-cell table:style-name="ce41" table:number-columns-repeated="54"/>
          <table:table-cell table:number-columns-repeated="16321"/>
        </table:table-row>
        <table:table-row table:style-name="ro1">
          <table:table-cell table:style-name="ce41" table:number-columns-repeated="63"/>
          <table:table-cell table:number-columns-repeated="16321"/>
        </table:table-row>
        <table:table-row table:style-name="ro1" table:number-rows-repeated="11">
          <table:table-cell table:style-name="ce41" table:number-columns-repeated="63"/>
          <table:table-cell table:number-columns-repeated="16321"/>
        </table:table-row>
        <table:table-row table:style-name="ro1" table:number-rows-repeated="2">
          <table:table-cell table:style-name="ce41" table:number-columns-repeated="5"/>
          <table:table-cell table:number-columns-repeated="2"/>
          <table:table-cell table:style-name="ce41" table:number-columns-repeated="56"/>
          <table:table-cell table:number-columns-repeated="16321"/>
        </table:table-row>
        <table:table-row table:style-name="ro1">
          <table:table-cell table:style-name="ce41" table:number-columns-repeated="63"/>
          <table:table-cell table:number-columns-repeated="16321"/>
        </table:table-row>
        <table:table-row table:style-name="ro1" table:number-rows-repeated="185">
          <table:table-cell table:style-name="ce41" table:number-columns-repeated="63"/>
          <table:table-cell table:number-columns-repeated="16321"/>
        </table:table-row>
        <table:table-row table:style-name="ro7" table:number-rows-repeated="780">
          <table:table-cell table:style-name="ce41" table:number-columns-repeated="63"/>
          <table:table-cell table:number-columns-repeated="16321"/>
        </table:table-row>
        <table:table-row table:style-name="ro2" table:number-rows-repeated="104757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stos_Ventas" table:style-name="ta6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4" table:number-columns-repeated="14" table:default-cell-style-name="Default"/>
        <table:table-column table:style-name="co8" table:number-columns-repeated="16358" table:default-cell-style-name="Default"/>
        <table:table-row table:style-name="ro1">
          <table:table-cell table:style-name="ce173" table:number-columns-repeated="26"/>
          <table:table-cell table:number-columns-repeated="16358"/>
        </table:table-row>
        <table:table-row table:style-name="ro2">
          <table:table-cell table:style-name="ce173" table:number-columns-repeated="2"/>
          <table:table-cell table:style-name="ce175" table:number-columns-spanned="6" table:number-rows-spanned="1"/>
          <table:covered-table-cell table:number-columns-repeated="5" table:style-name="ce12"/>
          <table:table-cell table:style-name="ce173" table:number-columns-repeated="18"/>
          <table:table-cell table:number-columns-repeated="16358"/>
        </table:table-row>
        <table:table-row table:style-name="ro2">
          <table:table-cell table:style-name="ce173" table:number-columns-repeated="2"/>
          <table:table-cell table:style-name="ce175" office:value-type="string" calcext:value-type="string" table:number-columns-spanned="6" table:number-rows-spanned="1">
            <text:p>COSTOS DE PRODUCCIÓN O DE VENTAS (3500 unidades)</text:p>
          </table:table-cell>
          <table:covered-table-cell table:number-columns-repeated="5" table:style-name="ce12"/>
          <table:table-cell table:style-name="ce173" table:number-columns-repeated="18"/>
          <table:table-cell table:number-columns-repeated="16358"/>
        </table:table-row>
        <table:table-row table:style-name="ro11">
          <table:table-cell table:style-name="ce173" table:number-columns-repeated="26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76" office:value-type="string" calcext:value-type="string" table:number-columns-spanned="1" table:number-rows-spanned="2">
            <text:p>RUBRO</text:p>
          </table:table-cell>
          <table:table-cell table:style-name="ce189" office:value-type="string" calcext:value-type="string" table:number-columns-spanned="1" table:number-rows-spanned="2">
            <text:p>COSTO UNITARIO</text:p>
          </table:table-cell>
          <table:table-cell table:style-name="ce189" office:value-type="string" calcext:value-type="string" table:number-columns-spanned="1" table:number-rows-spanned="2">
            <text:p>UNIDADES REQUERIDAS</text:p>
          </table:table-cell>
          <table:table-cell table:style-name="ce202" office:value-type="string" calcext:value-type="string" table:number-columns-spanned="2" table:number-rows-spanned="1">
            <text:p>COSTO </text:p>
          </table:table-cell>
          <table:covered-table-cell table:style-name="ce205"/>
          <table:table-cell table:style-name="ce206" office:value-type="string" calcext:value-type="string" table:number-columns-spanned="1" table:number-rows-spanned="2">
            <text:p>TOTAL</text:p>
          </table:table-cell>
          <table:table-cell table:style-name="ce173" table:number-columns-repeated="18"/>
          <table:table-cell table:number-columns-repeated="16358"/>
        </table:table-row>
        <table:table-row table:style-name="ro11">
          <table:table-cell table:style-name="ce173" table:number-columns-repeated="2"/>
          <table:covered-table-cell table:style-name="ce177"/>
          <table:covered-table-cell table:number-columns-repeated="2" table:style-name="ce190"/>
          <table:table-cell table:style-name="ce203" office:value-type="string" calcext:value-type="string">
            <text:p>FIJO</text:p>
          </table:table-cell>
          <table:table-cell table:style-name="ce203" office:value-type="string" calcext:value-type="string">
            <text:p>VARIABLE</text:p>
          </table:table-cell>
          <table:covered-table-cell table:style-name="ce207"/>
          <table:table-cell table:style-name="ce173" table:number-columns-repeated="18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78" office:value-type="string" calcext:value-type="string">
            <text:p>COSTOS DE VENTAS</text:p>
          </table:table-cell>
          <table:table-cell table:style-name="ce191" table:number-columns-repeated="4"/>
          <table:table-cell table:style-name="ce208"/>
          <table:table-cell table:style-name="ce173" table:number-columns-repeated="18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79" office:value-type="string" calcext:value-type="string">
            <text:p><text:s/>Materia Prima Directa</text:p>
          </table:table-cell>
          <table:table-cell table:style-name="ce192" table:formula="of:=SUM([.D9])" office:value-type="float" office:value="4" calcext:value-type="float">
            <text:p>4.00</text:p>
          </table:table-cell>
          <table:table-cell table:style-name="ce192" table:formula="of:=SUM([.E9])" office:value-type="float" office:value="24500" calcext:value-type="float">
            <text:p>24,500.00</text:p>
          </table:table-cell>
          <table:table-cell table:style-name="ce192"/>
          <table:table-cell table:style-name="ce192" table:formula="of:=SUM([.G9])" office:value-type="float" office:value="98000" calcext:value-type="float">
            <text:p>98,000.00</text:p>
          </table:table-cell>
          <table:table-cell table:style-name="ce209" table:formula="of:=[.H9]" office:value-type="float" office:value="98000" calcext:value-type="float">
            <text:p><text:s/>S/98,000.00 </text:p>
          </table:table-cell>
          <table:table-cell table:style-name="ce173" table:number-columns-repeated="18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80" office:value-type="string" calcext:value-type="string">
            <text:p>Fibra acrilica</text:p>
          </table:table-cell>
          <table:table-cell table:style-name="ce193" table:formula="of:=[$Inversion_Inicial.E29]" office:value-type="float" office:value="4" calcext:value-type="float">
            <text:p>4.00</text:p>
          </table:table-cell>
          <table:table-cell table:style-name="ce198" table:formula="of:=[$Presupuesto_Ventas.$D$7]" office:value-type="float" office:value="24500" calcext:value-type="float">
            <text:p>24,500</text:p>
          </table:table-cell>
          <table:table-cell table:style-name="ce193"/>
          <table:table-cell table:style-name="ce193" table:formula="of:=[.D9]*[.E9]" office:value-type="float" office:value="98000" calcext:value-type="float">
            <text:p>98,000.00</text:p>
          </table:table-cell>
          <table:table-cell table:style-name="ce210" table:formula="of:=[.F9]+[.G9]" office:value-type="float" office:value="98000" calcext:value-type="float">
            <text:p><text:s/>S/98,000.00 </text:p>
          </table:table-cell>
          <table:table-cell table:style-name="ce173" table:number-columns-repeated="18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79" office:value-type="string" calcext:value-type="string">
            <text:p><text:s/>Mano de Obra Directa</text:p>
          </table:table-cell>
          <table:table-cell table:style-name="ce192" table:formula="of:=[.D11]" office:value-type="float" office:value="930" calcext:value-type="float">
            <text:p>930.00</text:p>
          </table:table-cell>
          <table:table-cell table:style-name="ce199" table:formula="of:=[.E11]" office:value-type="float" office:value="3" calcext:value-type="float">
            <text:p>3.00</text:p>
          </table:table-cell>
          <table:table-cell table:style-name="ce192" table:formula="of:=[.F11]" office:value-type="float" office:value="38669.4" calcext:value-type="float">
            <text:p>38,669.40</text:p>
          </table:table-cell>
          <table:table-cell table:style-name="ce192"/>
          <table:table-cell table:style-name="ce209" table:formula="of:=[.H11]" office:value-type="float" office:value="38669.4" calcext:value-type="float">
            <text:p><text:s/>S/38,669.40 </text:p>
          </table:table-cell>
          <table:table-cell table:style-name="ce173" table:number-columns-repeated="18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80" office:value-type="string" calcext:value-type="string">
            <text:p>Empleados(*)</text:p>
          </table:table-cell>
          <table:table-cell table:style-name="ce193" office:value-type="float" office:value="930" calcext:value-type="float">
            <text:p>930.00</text:p>
          </table:table-cell>
          <table:table-cell table:style-name="ce198" office:value-type="float" office:value="3" calcext:value-type="float">
            <text:p>3</text:p>
          </table:table-cell>
          <table:table-cell table:style-name="ce193" table:formula="of:=[$Sueldos.I10]" office:value-type="float" office:value="38669.4" calcext:value-type="float">
            <text:p>38,669.40</text:p>
          </table:table-cell>
          <table:table-cell table:style-name="ce193"/>
          <table:table-cell table:style-name="ce210" table:formula="of:=[.F11]+[.G11]" office:value-type="float" office:value="38669.4" calcext:value-type="float">
            <text:p><text:s/>S/38,669.40 </text:p>
          </table:table-cell>
          <table:table-cell table:style-name="ce173" table:number-columns-repeated="18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79" office:value-type="string" calcext:value-type="string">
            <text:p>Costos Indirectos de Fabricacion</text:p>
          </table:table-cell>
          <table:table-cell table:style-name="ce192" table:formula="of:=[.D13]+[.D14]+[.D15]" office:value-type="float" office:value="2.028" calcext:value-type="float">
            <text:p>2.03</text:p>
          </table:table-cell>
          <table:table-cell table:style-name="ce199" table:formula="of:=[.E13]+[.E14]+[.E15]" office:value-type="float" office:value="24514" calcext:value-type="float">
            <text:p>24,514.00</text:p>
          </table:table-cell>
          <table:table-cell table:style-name="ce192" table:formula="of:=[.F13]+[.F14]+[.F15]" office:value-type="float" office:value="246.2" calcext:value-type="float">
            <text:p>246.20</text:p>
          </table:table-cell>
          <table:table-cell table:style-name="ce192" table:formula="of:=[.G13]+[.G14]+[.G15]" office:value-type="float" office:value="714" calcext:value-type="float">
            <text:p>714.00</text:p>
          </table:table-cell>
          <table:table-cell table:style-name="ce209" table:formula="of:=[.H13]+[.H14]+[.H15]" office:value-type="float" office:value="960.2" calcext:value-type="float">
            <text:p><text:s/>S/960.20 </text:p>
          </table:table-cell>
          <table:table-cell table:style-name="ce173" table:number-columns-repeated="18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80" office:value-type="string" calcext:value-type="string">
            <text:p>Flete</text:p>
          </table:table-cell>
          <table:table-cell table:style-name="ce193" table:formula="of:=[$Inversion_Inicial.E32]" office:value-type="float" office:value="0.028" calcext:value-type="float">
            <text:p>0.03</text:p>
          </table:table-cell>
          <table:table-cell table:style-name="ce200" table:formula="of:=[$Inversion_Inicial.D29]" office:value-type="float" office:value="24500" calcext:value-type="float">
            <text:p>24,500</text:p>
          </table:table-cell>
          <table:table-cell table:style-name="ce193"/>
          <table:table-cell table:style-name="ce193" table:formula="of:=[.D13]*[.E13]" office:value-type="float" office:value="686" calcext:value-type="float">
            <text:p>686.00</text:p>
          </table:table-cell>
          <table:table-cell table:style-name="ce210" table:formula="of:=[.F13]+[.G13]" office:value-type="float" office:value="686" calcext:value-type="float">
            <text:p><text:s/>S/686.00 </text:p>
          </table:table-cell>
          <table:table-cell table:style-name="ce173" table:number-columns-repeated="18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80" office:value-type="string" calcext:value-type="string">
            <text:p>Bolsas de despacho</text:p>
          </table:table-cell>
          <table:table-cell table:style-name="ce193" table:formula="of:=[$Inversion_Inicial.E33]" office:value-type="float" office:value="2" calcext:value-type="float">
            <text:p>2.00</text:p>
          </table:table-cell>
          <table:table-cell table:style-name="ce200" table:formula="of:=[$Inversion_Inicial.D33]" office:value-type="float" office:value="14" calcext:value-type="float">
            <text:p>14</text:p>
          </table:table-cell>
          <table:table-cell table:style-name="ce193"/>
          <table:table-cell table:style-name="ce193" table:formula="of:=[.D14]*[.E14]" office:value-type="float" office:value="28" calcext:value-type="float">
            <text:p>28.00</text:p>
          </table:table-cell>
          <table:table-cell table:style-name="ce210" table:formula="of:=[.F14]+[.G14]" office:value-type="float" office:value="28" calcext:value-type="float">
            <text:p><text:s/>S/28.00 </text:p>
          </table:table-cell>
          <table:table-cell table:style-name="ce173" table:number-columns-repeated="18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81" office:value-type="string" calcext:value-type="string">
            <text:p>Depreciaciones</text:p>
          </table:table-cell>
          <table:table-cell table:style-name="ce193" office:value-type="float" office:value="0" calcext:value-type="float">
            <text:p>0.00</text:p>
          </table:table-cell>
          <table:table-cell table:style-name="ce198" office:value-type="float" office:value="0" calcext:value-type="float">
            <text:p>0</text:p>
          </table:table-cell>
          <table:table-cell table:style-name="ce204" table:formula="of:=[$Deprecion_VR.F13]/12" office:value-type="float" office:value="246.2" calcext:value-type="float">
            <text:p>246.20</text:p>
          </table:table-cell>
          <table:table-cell table:style-name="ce193"/>
          <table:table-cell table:style-name="ce210" table:formula="of:=[.F15]+[.G15]" office:value-type="float" office:value="246.2" calcext:value-type="float">
            <text:p><text:s/>S/246.20 </text:p>
          </table:table-cell>
          <table:table-cell table:style-name="ce173" table:number-columns-repeated="18"/>
          <table:table-cell table:number-columns-repeated="16358"/>
        </table:table-row>
        <table:table-row table:style-name="ro11">
          <table:table-cell table:style-name="ce173" table:number-columns-repeated="2"/>
          <table:table-cell table:style-name="ce182" office:value-type="string" calcext:value-type="string">
            <text:p>TOTAL COSTOS DE PRODUCCION</text:p>
          </table:table-cell>
          <table:table-cell table:style-name="ce194" table:number-columns-repeated="2"/>
          <table:table-cell table:style-name="ce194" table:formula="of:=SUM([.F8:.F15])" office:value-type="float" office:value="77831.2" calcext:value-type="float">
            <text:p>77,831.20</text:p>
          </table:table-cell>
          <table:table-cell table:style-name="ce194" table:formula="of:=SUM([.G8:.G15])" office:value-type="float" office:value="197428" calcext:value-type="float">
            <text:p>197,428.00</text:p>
          </table:table-cell>
          <table:table-cell table:style-name="ce211" table:formula="of:=[.H8]+[.H10]+[.H12]" office:value-type="float" office:value="137629.6" calcext:value-type="float">
            <text:p><text:s/>S/137,629.60 </text:p>
          </table:table-cell>
          <table:table-cell table:style-name="ce173"/>
          <table:table-cell table:style-name="ce218"/>
          <table:table-cell table:style-name="ce173"/>
          <table:table-cell table:style-name="ce218"/>
          <table:table-cell table:style-name="ce173" table:number-columns-repeated="14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83" office:value-type="string" calcext:value-type="string" table:number-columns-spanned="2" table:number-rows-spanned="1">
            <text:p>*Se ha considerado a los empleados en gastos administrativos</text:p>
          </table:table-cell>
          <table:covered-table-cell table:style-name="ce12"/>
          <table:table-cell table:style-name="ce201" table:number-columns-repeated="3"/>
          <table:table-cell table:style-name="ce173" table:number-columns-repeated="19"/>
          <table:table-cell table:number-columns-repeated="16358"/>
        </table:table-row>
        <table:table-row table:style-name="ro1">
          <table:table-cell table:style-name="ce173" table:number-columns-repeated="26"/>
          <table:table-cell table:number-columns-repeated="16358"/>
        </table:table-row>
        <table:table-row table:style-name="ro2">
          <table:table-cell table:style-name="ce173" table:number-columns-repeated="2"/>
          <table:table-cell table:style-name="ce175" office:value-type="string" calcext:value-type="string" table:number-columns-spanned="6" table:number-rows-spanned="1">
            <text:p>PROYECCION DE COSTOS DE PRODUCCIÓN</text:p>
          </table:table-cell>
          <table:covered-table-cell table:number-columns-repeated="5" table:style-name="ce12"/>
          <table:table-cell table:style-name="ce173" table:number-columns-repeated="18"/>
          <table:table-cell table:number-columns-repeated="16358"/>
        </table:table-row>
        <table:table-row table:style-name="ro18">
          <table:table-cell table:style-name="ce173" table:number-columns-repeated="2"/>
          <table:table-cell table:style-name="ce184" table:number-columns-repeated="5"/>
          <table:table-cell table:style-name="ce173" table:number-columns-repeated="19"/>
          <table:table-cell table:number-columns-repeated="16358"/>
        </table:table-row>
        <table:table-row table:style-name="ro11">
          <table:table-cell table:style-name="ce173" table:number-columns-repeated="2"/>
          <table:table-cell table:style-name="ce185" office:value-type="string" calcext:value-type="string">
            <text:p>DESCRIPCIO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12" office:value-type="float" office:value="5" calcext:value-type="float">
            <text:p>5</text:p>
          </table:table-cell>
          <table:table-cell table:style-name="ce215" table:number-columns-repeated="2"/>
          <table:table-cell table:style-name="ce173" table:number-columns-repeated="16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78" office:value-type="string" calcext:value-type="string">
            <text:p>A. COSTOS DE PRODUCCION</text:p>
          </table:table-cell>
          <table:table-cell table:style-name="ce191" table:number-columns-repeated="4"/>
          <table:table-cell table:style-name="ce213"/>
          <table:table-cell table:style-name="ce216" table:number-columns-repeated="2"/>
          <table:table-cell table:style-name="ce173" table:number-columns-repeated="16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86" office:value-type="string" calcext:value-type="string">
            <text:p><text:s/>Materia prima <text:s/>e insumos</text:p>
          </table:table-cell>
          <table:table-cell table:style-name="ce196" table:formula="of:=[$Resumen.$H$21]*[$Presupuesto_Ventas.$P7]" office:value-type="float" office:value="1330000" calcext:value-type="float">
            <text:p>S/1,330,000.00</text:p>
          </table:table-cell>
          <table:table-cell table:style-name="ce196" table:formula="of:=[.D9]*[$Presupuesto_Ventas.P8]" office:value-type="float" office:value="1396500" calcext:value-type="float">
            <text:p>S/1,396,500.00</text:p>
          </table:table-cell>
          <table:table-cell table:style-name="ce196" table:formula="of:=[$Presupuesto_Ventas.P9]*4" office:value-type="float" office:value="1466325" calcext:value-type="float">
            <text:p>S/1,466,325.00</text:p>
          </table:table-cell>
          <table:table-cell table:style-name="ce196" table:formula="of:=Resumen.Precio_compra_ovillo*[$Presupuesto_Ventas.P9]" office:value-type="float" office:value="1466325" calcext:value-type="float">
            <text:p>S/1,466,325.00</text:p>
          </table:table-cell>
          <table:table-cell table:style-name="ce196" table:formula="of:=Resumen.Precio_compra_ovillo*[$Presupuesto_Ventas.P11]" office:value-type="float" office:value="1616623.3125" calcext:value-type="float">
            <text:p>S/1,616,623.31</text:p>
          </table:table-cell>
          <table:table-cell table:style-name="ce217" table:number-columns-repeated="2"/>
          <table:table-cell table:style-name="ce219" table:number-columns-repeated="4"/>
          <table:table-cell table:style-name="ce173" table:number-columns-repeated="12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80" office:value-type="string" calcext:value-type="string">
            <text:p><text:s/>Mano de Obra</text:p>
          </table:table-cell>
          <table:table-cell table:style-name="ce196" table:formula="of:=[.H11]" office:value-type="float" office:value="38669.4" calcext:value-type="float">
            <text:p>S/38,669.40</text:p>
          </table:table-cell>
          <table:table-cell table:style-name="ce196" table:formula="of:=[.D24]" office:value-type="float" office:value="38669.4" calcext:value-type="float">
            <text:p>S/38,669.40</text:p>
          </table:table-cell>
          <table:table-cell table:style-name="ce196" table:formula="of:=[.E24]" office:value-type="float" office:value="38669.4" calcext:value-type="float">
            <text:p>S/38,669.40</text:p>
          </table:table-cell>
          <table:table-cell table:style-name="ce196" table:formula="of:=[.F24]" office:value-type="float" office:value="38669.4" calcext:value-type="float">
            <text:p>S/38,669.40</text:p>
          </table:table-cell>
          <table:table-cell table:style-name="ce214" table:formula="of:=[.G24]" office:value-type="float" office:value="38669.4" calcext:value-type="float">
            <text:p>S/38,669.40</text:p>
          </table:table-cell>
          <table:table-cell table:style-name="ce217" table:number-columns-repeated="2"/>
          <table:table-cell table:style-name="ce173" table:number-columns-repeated="16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80" office:value-type="string" calcext:value-type="string">
            <text:p>Costos Indirectos de Fabricacion</text:p>
          </table:table-cell>
          <table:table-cell table:style-name="ce196" table:formula="of:=[.D12]*[$Presupuesto_Ventas.P7]" office:value-type="float" office:value="674310" calcext:value-type="float">
            <text:p>S/674,310.00</text:p>
          </table:table-cell>
          <table:table-cell table:style-name="ce196" table:formula="of:=[.D12]*[$Presupuesto_Ventas.P8]" office:value-type="float" office:value="708025.5" calcext:value-type="float">
            <text:p>S/708,025.50</text:p>
          </table:table-cell>
          <table:table-cell table:style-name="ce196" table:formula="of:=[.D12]*[$Presupuesto_Ventas.P9]" office:value-type="float" office:value="743426.775" calcext:value-type="float">
            <text:p>S/743,426.78</text:p>
          </table:table-cell>
          <table:table-cell table:style-name="ce196" table:formula="of:=[.D12]*[$Presupuesto_Ventas.P10]" office:value-type="float" office:value="780598.11375" calcext:value-type="float">
            <text:p>S/780,598.11</text:p>
          </table:table-cell>
          <table:table-cell table:style-name="ce196" table:formula="of:=[.D12]*[$Presupuesto_Ventas.P11]" office:value-type="float" office:value="819628.0194375" calcext:value-type="float">
            <text:p>S/819,628.02</text:p>
          </table:table-cell>
          <table:table-cell table:style-name="ce217" table:number-columns-repeated="2"/>
          <table:table-cell table:style-name="ce173" table:number-columns-repeated="16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80" office:value-type="string" calcext:value-type="string">
            <text:p>Depreciaciones</text:p>
          </table:table-cell>
          <table:table-cell table:style-name="ce196" table:formula="of:=[$Deprecion_VR.F13]" office:value-type="float" office:value="2954.4" calcext:value-type="float">
            <text:p>S/2,954.40</text:p>
          </table:table-cell>
          <table:table-cell table:style-name="ce196" table:formula="of:=[.D26]" office:value-type="float" office:value="2954.4" calcext:value-type="float">
            <text:p>S/2,954.40</text:p>
          </table:table-cell>
          <table:table-cell table:style-name="ce196" table:formula="of:=[.E26]" office:value-type="float" office:value="2954.4" calcext:value-type="float">
            <text:p>S/2,954.40</text:p>
          </table:table-cell>
          <table:table-cell table:style-name="ce196" table:formula="of:=[.F26]" office:value-type="float" office:value="2954.4" calcext:value-type="float">
            <text:p>S/2,954.40</text:p>
          </table:table-cell>
          <table:table-cell table:style-name="ce214" table:formula="of:=[.G26]" office:value-type="float" office:value="2954.4" calcext:value-type="float">
            <text:p>S/2,954.40</text:p>
          </table:table-cell>
          <table:table-cell table:style-name="ce217" table:number-columns-repeated="2"/>
          <table:table-cell table:style-name="ce173" table:number-columns-repeated="16"/>
          <table:table-cell table:number-columns-repeated="16358"/>
        </table:table-row>
        <table:table-row table:style-name="ro11">
          <table:table-cell table:style-name="ce173" table:number-columns-repeated="2"/>
          <table:table-cell table:style-name="ce187" office:value-type="string" calcext:value-type="string">
            <text:p>TOTAL COSTOS DE PRODUCCION</text:p>
          </table:table-cell>
          <table:table-cell table:style-name="ce197" table:formula="of:=SUM([.D23:.D26])" office:value-type="float" office:value="2045933.8" calcext:value-type="float">
            <text:p>S/2,045,933.80</text:p>
          </table:table-cell>
          <table:table-cell table:style-name="ce197" table:formula="of:=SUM([.E23:.E26])" office:value-type="float" office:value="2146149.3" calcext:value-type="float">
            <text:p>S/2,146,149.30</text:p>
          </table:table-cell>
          <table:table-cell table:style-name="ce197" table:formula="of:=SUM([.F23:.F26])" office:value-type="float" office:value="2251375.575" calcext:value-type="float">
            <text:p>S/2,251,375.58</text:p>
          </table:table-cell>
          <table:table-cell table:style-name="ce197" table:formula="of:=SUM([.G23:.G26])" office:value-type="float" office:value="2288546.91375" calcext:value-type="float">
            <text:p>S/2,288,546.91</text:p>
          </table:table-cell>
          <table:table-cell table:style-name="ce197" table:formula="of:=SUM([.H23:.H26])" office:value-type="float" office:value="2477875.1319375" calcext:value-type="float">
            <text:p>S/2,477,875.13</text:p>
          </table:table-cell>
          <table:table-cell table:style-name="ce217" table:number-columns-repeated="2"/>
          <table:table-cell table:style-name="ce173" table:number-columns-repeated="16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88" table:number-columns-spanned="2" table:number-rows-spanned="1"/>
          <table:covered-table-cell table:style-name="ce12"/>
          <table:table-cell table:style-name="ce201" table:number-columns-repeated="4"/>
          <table:table-cell table:style-name="ce217" table:number-columns-repeated="2"/>
          <table:table-cell table:style-name="ce173" table:number-columns-repeated="16"/>
          <table:table-cell table:number-columns-repeated="16358"/>
        </table:table-row>
        <table:table-row table:style-name="ro1">
          <table:table-cell table:style-name="ce173" table:number-columns-repeated="26"/>
          <table:table-cell table:number-columns-repeated="16358"/>
        </table:table-row>
        <table:table-row table:style-name="ro1" table:number-rows-repeated="198">
          <table:table-cell table:style-name="ce173" table:number-columns-repeated="26"/>
          <table:table-cell table:number-columns-repeated="16358"/>
        </table:table-row>
        <table:table-row table:style-name="ro7" table:number-rows-repeated="768">
          <table:table-cell table:style-name="ce174" table:number-columns-repeated="26"/>
          <table:table-cell table:number-columns-repeated="16358"/>
        </table:table-row>
        <table:table-row table:style-name="ro2" table:number-rows-repeated="104758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eldos" table:style-name="ta7">
        <table:table-column table:style-name="co42" table:default-cell-style-name="Default"/>
        <table:table-column table:style-name="co43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24" table:number-columns-repeated="15" table:default-cell-style-name="Default"/>
        <table:table-column table:style-name="co8" table:number-columns-repeated="16358" table:default-cell-style-name="Default"/>
        <table:table-row table:style-name="ro1">
          <table:table-cell table:style-name="ce173" table:number-columns-repeated="5"/>
          <table:table-cell table:style-name="ce238"/>
          <table:table-cell table:style-name="ce173" table:number-columns-repeated="20"/>
          <table:table-cell table:number-columns-repeated="16358"/>
        </table:table-row>
        <table:table-row table:style-name="ro2">
          <table:table-cell table:style-name="ce173"/>
          <table:table-cell table:style-name="ce220" office:value-type="string" calcext:value-type="string" table:number-columns-spanned="8" table:number-rows-spanned="1">
            <text:p>PRESUPUESTO ANUAL DE REMUNERACIONES</text:p>
          </table:table-cell>
          <table:covered-table-cell table:number-columns-repeated="7" table:style-name="ce12"/>
          <table:table-cell table:style-name="ce173" table:number-columns-repeated="17"/>
          <table:table-cell table:number-columns-repeated="16358"/>
        </table:table-row>
        <table:table-row table:style-name="ro1" table:number-rows-repeated="2">
          <table:table-cell table:style-name="ce173"/>
          <table:table-cell table:style-name="ce221" table:number-columns-repeated="8"/>
          <table:table-cell table:style-name="ce173" table:number-columns-repeated="17"/>
          <table:table-cell table:number-columns-repeated="16358"/>
        </table:table-row>
        <table:table-row table:style-name="ro1">
          <table:table-cell table:style-name="ce173"/>
          <table:table-cell table:style-name="ce215" office:value-type="string" calcext:value-type="string" table:number-columns-spanned="8" table:number-rows-spanned="1">
            <text:p>REGIMEN LABORAL PEQUEÑA EMPRESA</text:p>
          </table:table-cell>
          <table:covered-table-cell table:number-columns-repeated="7" table:style-name="ce12"/>
          <table:table-cell table:style-name="ce173" table:number-columns-repeated="17"/>
          <table:table-cell table:number-columns-repeated="16358"/>
        </table:table-row>
        <table:table-row table:style-name="ro1">
          <table:table-cell table:style-name="ce173"/>
          <table:table-cell table:style-name="ce221" table:number-columns-repeated="8"/>
          <table:table-cell table:style-name="ce173" table:number-columns-repeated="17"/>
          <table:table-cell table:number-columns-repeated="16358"/>
        </table:table-row>
        <table:table-row table:style-name="ro11">
          <table:table-cell table:style-name="ce173"/>
          <table:table-cell table:style-name="ce222" office:value-type="string" calcext:value-type="string">
            <text:p>Cargo</text:p>
          </table:table-cell>
          <table:table-cell table:style-name="ce222" office:value-type="string" calcext:value-type="string">
            <text:p>Básico mes</text:p>
          </table:table-cell>
          <table:table-cell table:style-name="ce222" office:value-type="string" calcext:value-type="string">
            <text:p>Anual</text:p>
          </table:table-cell>
          <table:table-cell table:style-name="ce222" office:value-type="string" calcext:value-type="string">
            <text:p>Beneficion(*)</text:p>
          </table:table-cell>
          <table:table-cell table:style-name="ce222" office:value-type="string" calcext:value-type="string">
            <text:p>N° Trab.</text:p>
          </table:table-cell>
          <table:table-cell table:style-name="ce222" office:value-type="string" calcext:value-type="string">
            <text:p>Sub Total</text:p>
          </table:table-cell>
          <table:table-cell table:style-name="ce222" office:value-type="string" calcext:value-type="string">
            <text:p>Essalud (***)</text:p>
          </table:table-cell>
          <table:table-cell table:style-name="ce242" office:value-type="string" calcext:value-type="string">
            <text:p>TOTAL</text:p>
          </table:table-cell>
          <table:table-cell table:style-name="ce173" table:number-columns-repeated="17"/>
          <table:table-cell table:number-columns-repeated="16358"/>
        </table:table-row>
        <table:table-row table:style-name="ro1">
          <table:table-cell table:style-name="ce173"/>
          <table:table-cell table:style-name="ce223" office:value-type="string" calcext:value-type="string">
            <text:p>Area de producción</text:p>
          </table:table-cell>
          <table:table-cell table:style-name="ce229" table:formula="of:=[.C9]+[.C10]+[.C11]" office:value-type="float" office:value="3060" calcext:value-type="float">
            <text:p>$ 3,060.00</text:p>
          </table:table-cell>
          <table:table-cell table:style-name="ce232" table:formula="of:=[.D9]+[.D10]+[.D11]" office:value-type="float" office:value="36720" calcext:value-type="float">
            <text:p>$ 36,720.00</text:p>
          </table:table-cell>
          <table:table-cell table:style-name="ce232" table:formula="of:=[.E9]+[.E10]+[.E11]" office:value-type="float" office:value="4590" calcext:value-type="float">
            <text:p>$ 4,590.00</text:p>
          </table:table-cell>
          <table:table-cell table:style-name="ce239" table:formula="of:=[.F9]+[.F10]+[.F11]" office:value-type="float" office:value="5" calcext:value-type="float">
            <text:p><text:s/>5.00 </text:p>
          </table:table-cell>
          <table:table-cell table:style-name="ce232" table:formula="of:=[.G9]+[.G10]+[.G11]" office:value-type="float" office:value="66420" calcext:value-type="float">
            <text:p>$ 66,420.00</text:p>
          </table:table-cell>
          <table:table-cell table:style-name="ce232" table:formula="of:=[.H9]+[.H10]+[.H11]" office:value-type="float" office:value="3304.8" calcext:value-type="float">
            <text:p>$ 3,304.80</text:p>
          </table:table-cell>
          <table:table-cell table:style-name="ce232" table:formula="of:=SUM([.I9:.I11])" office:value-type="float" office:value="69724.8" calcext:value-type="float">
            <text:p>$ 69,724.80</text:p>
          </table:table-cell>
          <table:table-cell table:style-name="ce173" table:number-columns-repeated="17"/>
          <table:table-cell table:number-columns-repeated="16358"/>
        </table:table-row>
        <table:table-row table:style-name="ro1">
          <table:table-cell table:style-name="ce173"/>
          <table:table-cell table:style-name="ce224" office:value-type="string" calcext:value-type="string">
            <text:p>Jefe de Producción</text:p>
          </table:table-cell>
          <table:table-cell table:style-name="ce230" office:value-type="float" office:value="1200" calcext:value-type="float">
            <text:p>$ 1,200.00</text:p>
          </table:table-cell>
          <table:table-cell table:style-name="ce231" table:formula="of:=[.C9]*12" office:value-type="float" office:value="14400" calcext:value-type="float">
            <text:p>$ 14,400.00</text:p>
          </table:table-cell>
          <table:table-cell table:style-name="ce231" table:formula="of:=[.C9]+([.C9]/2)" office:value-type="float" office:value="1800" calcext:value-type="float">
            <text:p>$ 1,800.00</text:p>
          </table:table-cell>
          <table:table-cell table:style-name="ce240" office:value-type="float" office:value="1" calcext:value-type="float">
            <text:p>1</text:p>
          </table:table-cell>
          <table:table-cell table:style-name="ce231" table:formula="of:=[.D9]+[.E9]" office:value-type="float" office:value="16200" calcext:value-type="float">
            <text:p>$ 16,200.00</text:p>
          </table:table-cell>
          <table:table-cell table:style-name="ce231" table:formula="of:=9%*[.D9]" office:value-type="float" office:value="1296" calcext:value-type="float">
            <text:p>$ 1,296.00</text:p>
          </table:table-cell>
          <table:table-cell table:style-name="ce243" table:formula="of:=[.G9]+[.H9]" office:value-type="float" office:value="17496" calcext:value-type="float">
            <text:p>$ 17,496.00</text:p>
          </table:table-cell>
          <table:table-cell table:style-name="ce173" table:number-columns-repeated="17"/>
          <table:table-cell table:number-columns-repeated="16358"/>
        </table:table-row>
        <table:table-row table:style-name="ro1">
          <table:table-cell table:style-name="ce173"/>
          <table:table-cell table:style-name="ce225" office:value-type="string" calcext:value-type="string">
            <text:p>Obreros</text:p>
          </table:table-cell>
          <table:table-cell table:style-name="ce230" office:value-type="float" office:value="930" calcext:value-type="float">
            <text:p>$ 930.00</text:p>
          </table:table-cell>
          <table:table-cell table:style-name="ce231" table:formula="of:=[.C10]*12" office:value-type="float" office:value="11160" calcext:value-type="float">
            <text:p>$ 11,160.00</text:p>
          </table:table-cell>
          <table:table-cell table:style-name="ce231" table:formula="of:=[.C10]+[.C10]/2" office:value-type="float" office:value="1395" calcext:value-type="float">
            <text:p>$ 1,395.00</text:p>
          </table:table-cell>
          <table:table-cell table:style-name="ce240" office:value-type="float" office:value="3" calcext:value-type="float">
            <text:p>3</text:p>
          </table:table-cell>
          <table:table-cell table:style-name="ce231" table:formula="of:=([.D10]+[.E10])*3" office:value-type="float" office:value="37665" calcext:value-type="float">
            <text:p>$ 37,665.00</text:p>
          </table:table-cell>
          <table:table-cell table:style-name="ce233" table:formula="of:=9%*[.D10]" office:value-type="float" office:value="1004.4" calcext:value-type="float">
            <text:p>$ 1,004.40</text:p>
          </table:table-cell>
          <table:table-cell table:style-name="ce243" table:formula="of:=[.G10]+[.H10]" office:value-type="float" office:value="38669.4" calcext:value-type="float">
            <text:p>$ 38,669.40</text:p>
          </table:table-cell>
          <table:table-cell table:style-name="ce173" table:number-columns-repeated="17"/>
          <table:table-cell table:number-columns-repeated="16358"/>
        </table:table-row>
        <table:table-row table:style-name="ro1">
          <table:table-cell table:style-name="ce173"/>
          <table:table-cell table:style-name="ce225" office:value-type="string" calcext:value-type="string">
            <text:p>Guardían</text:p>
          </table:table-cell>
          <table:table-cell table:style-name="ce230" office:value-type="float" office:value="930" calcext:value-type="float">
            <text:p>$ 930.00</text:p>
          </table:table-cell>
          <table:table-cell table:style-name="ce231" table:formula="of:=[.C11]*12" office:value-type="float" office:value="11160" calcext:value-type="float">
            <text:p>$ 11,160.00</text:p>
          </table:table-cell>
          <table:table-cell table:style-name="ce231" table:formula="of:=[.C11]+[.C11]/2" office:value-type="float" office:value="1395" calcext:value-type="float">
            <text:p>$ 1,395.00</text:p>
          </table:table-cell>
          <table:table-cell table:style-name="ce240" office:value-type="float" office:value="1" calcext:value-type="float">
            <text:p>1</text:p>
          </table:table-cell>
          <table:table-cell table:style-name="ce231" table:formula="of:=[.D11]+[.E11]" office:value-type="float" office:value="12555" calcext:value-type="float">
            <text:p>$ 12,555.00</text:p>
          </table:table-cell>
          <table:table-cell table:style-name="ce233" table:formula="of:=9%*[.D11]" office:value-type="float" office:value="1004.4" calcext:value-type="float">
            <text:p>$ 1,004.40</text:p>
          </table:table-cell>
          <table:table-cell table:style-name="ce243" table:formula="of:=[.G11]+[.H11]" office:value-type="float" office:value="13559.4" calcext:value-type="float">
            <text:p>$ 13,559.40</text:p>
          </table:table-cell>
          <table:table-cell table:style-name="ce173" table:number-columns-repeated="17"/>
          <table:table-cell table:number-columns-repeated="16358"/>
        </table:table-row>
        <table:table-row table:style-name="ro1">
          <table:table-cell table:style-name="ce173"/>
          <table:table-cell table:style-name="ce226" office:value-type="string" calcext:value-type="string">
            <text:p>Area de Administración</text:p>
          </table:table-cell>
          <table:table-cell table:style-name="ce229" table:formula="of:=[.C13]+[.C14]" office:value-type="float" office:value="2430" calcext:value-type="float">
            <text:p>$ 2,430.00</text:p>
          </table:table-cell>
          <table:table-cell table:style-name="ce232" table:formula="of:=[.D13]+[.D14]" office:value-type="float" office:value="29160" calcext:value-type="float">
            <text:p>$ 29,160.00</text:p>
          </table:table-cell>
          <table:table-cell table:style-name="ce232" table:formula="of:=[.E13]+[.E14]" office:value-type="float" office:value="3645" calcext:value-type="float">
            <text:p>$ 3,645.00</text:p>
          </table:table-cell>
          <table:table-cell table:style-name="ce241" table:formula="of:=[.F13]+[.F14]" office:value-type="float" office:value="2" calcext:value-type="float">
            <text:p>2</text:p>
          </table:table-cell>
          <table:table-cell table:style-name="ce232" table:formula="of:=[.G13]+[.G14]" office:value-type="float" office:value="32805" calcext:value-type="float">
            <text:p>$ 32,805.00</text:p>
          </table:table-cell>
          <table:table-cell table:style-name="ce232" table:formula="of:=[.H13]+[.H14]" office:value-type="float" office:value="2624.4" calcext:value-type="float">
            <text:p>$ 2,624.40</text:p>
          </table:table-cell>
          <table:table-cell table:style-name="ce244" table:formula="of:=SUM([.I13:.I14])" office:value-type="float" office:value="35429.4" calcext:value-type="float">
            <text:p>$ 35,429.40</text:p>
          </table:table-cell>
          <table:table-cell table:style-name="ce173" table:number-columns-repeated="17"/>
          <table:table-cell table:number-columns-repeated="16358"/>
        </table:table-row>
        <table:table-row table:style-name="ro1">
          <table:table-cell table:style-name="ce173"/>
          <table:table-cell table:style-name="ce225" office:value-type="string" calcext:value-type="string">
            <text:p>Gerente</text:p>
          </table:table-cell>
          <table:table-cell table:style-name="ce231" office:value-type="float" office:value="1500" calcext:value-type="float">
            <text:p>$ 1,500.00</text:p>
          </table:table-cell>
          <table:table-cell table:style-name="ce231" table:formula="of:=[.C13]*12" office:value-type="float" office:value="18000" calcext:value-type="float">
            <text:p>$ 18,000.00</text:p>
          </table:table-cell>
          <table:table-cell table:style-name="ce231" table:formula="of:=[.C13]+([.C13]/2)" office:value-type="float" office:value="2250" calcext:value-type="float">
            <text:p>$ 2,250.00</text:p>
          </table:table-cell>
          <table:table-cell table:style-name="ce240" office:value-type="float" office:value="1" calcext:value-type="float">
            <text:p>1</text:p>
          </table:table-cell>
          <table:table-cell table:style-name="ce231" table:formula="of:=[.D13]+[.E13]" office:value-type="float" office:value="20250" calcext:value-type="float">
            <text:p>$ 20,250.00</text:p>
          </table:table-cell>
          <table:table-cell table:style-name="ce231" table:formula="of:=[.D13]*9%" office:value-type="float" office:value="1620" calcext:value-type="float">
            <text:p>$ 1,620.00</text:p>
          </table:table-cell>
          <table:table-cell table:style-name="ce243" table:formula="of:=[.G13]+[.H13]" office:value-type="float" office:value="21870" calcext:value-type="float">
            <text:p>$ 21,870.00</text:p>
          </table:table-cell>
          <table:table-cell table:style-name="ce173" table:number-columns-repeated="17"/>
          <table:table-cell table:number-columns-repeated="16358"/>
        </table:table-row>
        <table:table-row table:style-name="ro1">
          <table:table-cell table:style-name="ce173"/>
          <table:table-cell table:style-name="ce225" office:value-type="string" calcext:value-type="string">
            <text:p>Secretaria</text:p>
          </table:table-cell>
          <table:table-cell table:style-name="ce231" office:value-type="float" office:value="930" calcext:value-type="float">
            <text:p>$ 930.00</text:p>
          </table:table-cell>
          <table:table-cell table:style-name="ce233" table:formula="of:=[.C14]*12" office:value-type="float" office:value="11160" calcext:value-type="float">
            <text:p>$ 11,160.00</text:p>
          </table:table-cell>
          <table:table-cell table:style-name="ce233" table:formula="of:=[.C14]+([.C14]/2)" office:value-type="float" office:value="1395" calcext:value-type="float">
            <text:p>$ 1,395.00</text:p>
          </table:table-cell>
          <table:table-cell table:style-name="ce240" office:value-type="float" office:value="1" calcext:value-type="float">
            <text:p>1</text:p>
          </table:table-cell>
          <table:table-cell table:style-name="ce231" table:formula="of:=[.D14]+[.E14]" office:value-type="float" office:value="12555" calcext:value-type="float">
            <text:p>$ 12,555.00</text:p>
          </table:table-cell>
          <table:table-cell table:style-name="ce233" table:formula="of:=[.D14]*9%" office:value-type="float" office:value="1004.4" calcext:value-type="float">
            <text:p>$ 1,004.40</text:p>
          </table:table-cell>
          <table:table-cell table:style-name="ce243" table:formula="of:=[.G14]+[.H14]" office:value-type="float" office:value="13559.4" calcext:value-type="float">
            <text:p>$ 13,559.40</text:p>
          </table:table-cell>
          <table:table-cell table:style-name="ce173" table:number-columns-repeated="17"/>
          <table:table-cell table:number-columns-repeated="16358"/>
        </table:table-row>
        <table:table-row table:style-name="ro1">
          <table:table-cell table:style-name="ce173"/>
          <table:table-cell table:style-name="ce226" office:value-type="string" calcext:value-type="string">
            <text:p>Area de Ventas</text:p>
          </table:table-cell>
          <table:table-cell table:style-name="ce232" table:formula="of:=[.C16]+[.C17]" office:value-type="float" office:value="2130" calcext:value-type="float">
            <text:p>$ 2,130.00</text:p>
          </table:table-cell>
          <table:table-cell table:style-name="ce232" table:formula="of:=[.D16]+[.D17]" office:value-type="float" office:value="25560" calcext:value-type="float">
            <text:p>$ 25,560.00</text:p>
          </table:table-cell>
          <table:table-cell table:style-name="ce232" table:formula="of:=[.E16]+[.E17]" office:value-type="float" office:value="3195" calcext:value-type="float">
            <text:p>$ 3,195.00</text:p>
          </table:table-cell>
          <table:table-cell table:style-name="ce241" table:formula="of:=[.F16]+[.F17]" office:value-type="float" office:value="2" calcext:value-type="float">
            <text:p>2</text:p>
          </table:table-cell>
          <table:table-cell table:style-name="ce232" table:formula="of:=[.G16]+[.G17]" office:value-type="float" office:value="28755" calcext:value-type="float">
            <text:p>$ 28,755.00</text:p>
          </table:table-cell>
          <table:table-cell table:style-name="ce232" table:formula="of:=[.H16]+[.H17]" office:value-type="float" office:value="2300.4" calcext:value-type="float">
            <text:p>$ 2,300.40</text:p>
          </table:table-cell>
          <table:table-cell table:style-name="ce244" table:formula="of:=SUM([.I16:.I17])" office:value-type="float" office:value="31055.4" calcext:value-type="float">
            <text:p>$ 31,055.40</text:p>
          </table:table-cell>
          <table:table-cell table:style-name="ce173" table:number-columns-repeated="17"/>
          <table:table-cell table:number-columns-repeated="16358"/>
        </table:table-row>
        <table:table-row table:style-name="ro1">
          <table:table-cell table:style-name="ce173"/>
          <table:table-cell table:style-name="ce225" office:value-type="string" calcext:value-type="string">
            <text:p>Jefe de Ventas</text:p>
          </table:table-cell>
          <table:table-cell table:style-name="ce233" office:value-type="float" office:value="1200" calcext:value-type="float">
            <text:p>$ 1,200.00</text:p>
          </table:table-cell>
          <table:table-cell table:style-name="ce231" table:formula="of:=[.C16]*12" office:value-type="float" office:value="14400" calcext:value-type="float">
            <text:p>$ 14,400.00</text:p>
          </table:table-cell>
          <table:table-cell table:style-name="ce231" table:formula="of:=[.C16]+[.C16]/2" office:value-type="float" office:value="1800" calcext:value-type="float">
            <text:p>$ 1,800.00</text:p>
          </table:table-cell>
          <table:table-cell table:style-name="ce240" office:value-type="float" office:value="1" calcext:value-type="float">
            <text:p>1</text:p>
          </table:table-cell>
          <table:table-cell table:style-name="ce231" table:formula="of:=[.D16]+[.E16]" office:value-type="float" office:value="16200" calcext:value-type="float">
            <text:p>$ 16,200.00</text:p>
          </table:table-cell>
          <table:table-cell table:style-name="ce231" table:formula="of:=9%*[.D16]" office:value-type="float" office:value="1296" calcext:value-type="float">
            <text:p>$ 1,296.00</text:p>
          </table:table-cell>
          <table:table-cell table:style-name="ce243" table:formula="of:=[.G16]+[.H16]" office:value-type="float" office:value="17496" calcext:value-type="float">
            <text:p>$ 17,496.00</text:p>
          </table:table-cell>
          <table:table-cell table:style-name="ce173" table:number-columns-repeated="17"/>
          <table:table-cell table:number-columns-repeated="16358"/>
        </table:table-row>
        <table:table-row table:style-name="ro1">
          <table:table-cell table:style-name="ce173"/>
          <table:table-cell table:style-name="ce225" office:value-type="string" calcext:value-type="string">
            <text:p>Vendedor</text:p>
          </table:table-cell>
          <table:table-cell table:style-name="ce233" office:value-type="float" office:value="930" calcext:value-type="float">
            <text:p>$ 930.00</text:p>
          </table:table-cell>
          <table:table-cell table:style-name="ce231" table:formula="of:=[.C17]*12" office:value-type="float" office:value="11160" calcext:value-type="float">
            <text:p>$ 11,160.00</text:p>
          </table:table-cell>
          <table:table-cell table:style-name="ce231" table:formula="of:=[.C17]+[.C17]/2" office:value-type="float" office:value="1395" calcext:value-type="float">
            <text:p>$ 1,395.00</text:p>
          </table:table-cell>
          <table:table-cell table:style-name="ce240" office:value-type="float" office:value="1" calcext:value-type="float">
            <text:p>1</text:p>
          </table:table-cell>
          <table:table-cell table:style-name="ce231" table:formula="of:=[.D17]+[.E17]" office:value-type="float" office:value="12555" calcext:value-type="float">
            <text:p>$ 12,555.00</text:p>
          </table:table-cell>
          <table:table-cell table:style-name="ce231" table:formula="of:=9%*[.D17]" office:value-type="float" office:value="1004.4" calcext:value-type="float">
            <text:p>$ 1,004.40</text:p>
          </table:table-cell>
          <table:table-cell table:style-name="ce243" table:formula="of:=[.G17]+[.H17]" office:value-type="float" office:value="13559.4" calcext:value-type="float">
            <text:p>$ 13,559.40</text:p>
          </table:table-cell>
          <table:table-cell table:style-name="ce173" table:number-columns-repeated="17"/>
          <table:table-cell table:number-columns-repeated="16358"/>
        </table:table-row>
        <table:table-row table:style-name="ro1">
          <table:table-cell table:style-name="ce173"/>
          <table:table-cell table:style-name="ce227" office:value-type="string" calcext:value-type="string">
            <text:p>TOTAL</text:p>
          </table:table-cell>
          <table:table-cell table:style-name="ce234" table:formula="of:=[.C8]+[.C12]+[.C15]" office:value-type="float" office:value="7620" calcext:value-type="float">
            <text:p>$ 7,620.00</text:p>
          </table:table-cell>
          <table:table-cell table:style-name="ce234" table:formula="of:=[.D8]+[.D12]+[.D15]" office:value-type="float" office:value="91440" calcext:value-type="float">
            <text:p>$ 91,440.00</text:p>
          </table:table-cell>
          <table:table-cell table:style-name="ce234" table:formula="of:=[.E8]+[.E12]+[.E15]" office:value-type="float" office:value="11430" calcext:value-type="float">
            <text:p>$ 11,430.00</text:p>
          </table:table-cell>
          <table:table-cell table:style-name="ce234" table:formula="of:=[.F8]+[.F12]+[.F15]" office:value-type="float" office:value="9" calcext:value-type="float">
            <text:p>$ 9.00</text:p>
          </table:table-cell>
          <table:table-cell table:style-name="ce234" table:formula="of:=[.G8]+[.G12]+[.G15]" office:value-type="float" office:value="127980" calcext:value-type="float">
            <text:p>$ 127,980.00</text:p>
          </table:table-cell>
          <table:table-cell table:style-name="ce234" table:formula="of:=[.H8]+[.H12]+[.H15]" office:value-type="float" office:value="8229.6" calcext:value-type="float">
            <text:p>$ 8,229.60</text:p>
          </table:table-cell>
          <table:table-cell table:style-name="ce245" table:formula="of:=SUM([.I8]+[.I12]+[.I15])" office:value-type="float" office:value="136209.6" calcext:value-type="float">
            <text:p>$ 136,209.60</text:p>
          </table:table-cell>
          <table:table-cell table:style-name="ce173" table:number-columns-repeated="17"/>
          <table:table-cell table:number-columns-repeated="16358"/>
        </table:table-row>
        <table:table-row table:style-name="ro1">
          <table:table-cell table:style-name="ce173"/>
          <table:table-cell table:style-name="ce221" office:value-type="string" calcext:value-type="string">
            <text:p>(*) Gratificación Medio sueldo en julio y diciembre + Medio sueldo CTS (1.5 sueldo)</text:p>
          </table:table-cell>
          <table:table-cell table:style-name="ce221" table:number-columns-repeated="7"/>
          <table:table-cell table:style-name="ce173" table:number-columns-repeated="17"/>
          <table:table-cell table:number-columns-repeated="16358"/>
        </table:table-row>
        <table:table-row table:style-name="ro1">
          <table:table-cell table:style-name="ce173"/>
          <table:table-cell table:style-name="ce221" office:value-type="string" calcext:value-type="string">
            <text:p>(***) Aporte patronal 9%</text:p>
          </table:table-cell>
          <table:table-cell table:style-name="ce221" table:number-columns-repeated="7"/>
          <table:table-cell table:style-name="ce173" table:number-columns-repeated="17"/>
          <table:table-cell table:number-columns-repeated="16358"/>
        </table:table-row>
        <table:table-row table:style-name="ro6">
          <table:table-cell table:style-name="ce173"/>
          <table:table-cell table:style-name="ce228"/>
          <table:table-cell table:style-name="ce235" table:number-columns-spanned="9" table:number-rows-spanned="1"/>
          <table:covered-table-cell table:number-columns-repeated="8" table:style-name="ce12"/>
          <table:table-cell table:style-name="ce173" table:number-columns-repeated="15"/>
          <table:table-cell table:number-columns-repeated="16358"/>
        </table:table-row>
        <table:table-row table:style-name="ro1">
          <table:table-cell table:style-name="ce173"/>
          <table:table-cell table:style-name="ce228"/>
          <table:table-cell table:style-name="ce236"/>
          <table:table-cell table:style-name="ce237" table:number-columns-repeated="6"/>
          <table:table-cell table:style-name="ce173" table:number-columns-repeated="17"/>
          <table:table-cell table:number-columns-repeated="16358"/>
        </table:table-row>
        <table:table-row table:style-name="ro1">
          <table:table-cell table:style-name="ce173" table:number-columns-repeated="5"/>
          <table:table-cell table:style-name="ce238"/>
          <table:table-cell table:style-name="ce173" table:number-columns-repeated="20"/>
          <table:table-cell table:number-columns-repeated="16358"/>
        </table:table-row>
        <table:table-row table:style-name="ro1" table:number-rows-repeated="198">
          <table:table-cell table:style-name="ce173" table:number-columns-repeated="5"/>
          <table:table-cell table:style-name="ce238"/>
          <table:table-cell table:style-name="ce173" table:number-columns-repeated="20"/>
          <table:table-cell table:number-columns-repeated="16358"/>
        </table:table-row>
        <table:table-row table:style-name="ro7" table:number-rows-repeated="737">
          <table:table-cell table:style-name="ce174" table:number-columns-repeated="26"/>
          <table:table-cell table:number-columns-repeated="16358"/>
        </table:table-row>
        <table:table-row table:style-name="ro2" table:number-rows-repeated="104761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astos_Operativos" table:style-name="ta8">
        <table:table-column table:style-name="co34" table:default-cell-style-name="Default"/>
        <table:table-column table:style-name="co48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0" table:default-cell-style-name="Default"/>
        <table:table-column table:style-name="co24" table:number-columns-repeated="18" table:default-cell-style-name="Default"/>
        <table:table-column table:style-name="co8" table:number-columns-repeated="16358" table:default-cell-style-name="Default"/>
        <table:table-row table:style-name="ro1">
          <table:table-cell table:style-name="ce173" table:number-columns-repeated="26"/>
          <table:table-cell table:number-columns-repeated="16358"/>
        </table:table-row>
        <table:table-row table:style-name="ro2">
          <table:table-cell table:style-name="ce173" table:number-columns-repeated="2"/>
          <table:table-cell table:style-name="ce175" table:number-columns-spanned="6" table:number-rows-spanned="1"/>
          <table:covered-table-cell table:number-columns-repeated="5" table:style-name="ce175"/>
          <table:table-cell table:style-name="ce173" table:number-columns-repeated="18"/>
          <table:table-cell table:number-columns-repeated="16358"/>
        </table:table-row>
        <table:table-row table:style-name="ro2">
          <table:table-cell table:style-name="ce173" table:number-columns-repeated="2"/>
          <table:table-cell table:style-name="ce175" office:value-type="string" calcext:value-type="string" table:number-columns-spanned="6" table:number-rows-spanned="1">
            <text:p>GASTOS OPERATIVOS PRIMER MES</text:p>
          </table:table-cell>
          <table:covered-table-cell table:number-columns-repeated="5" table:style-name="ce175"/>
          <table:table-cell table:style-name="ce173" table:number-columns-repeated="18"/>
          <table:table-cell table:number-columns-repeated="16358"/>
        </table:table-row>
        <table:table-row table:style-name="ro11">
          <table:table-cell table:style-name="ce173" table:number-columns-repeated="26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246" office:value-type="string" calcext:value-type="string" table:number-columns-spanned="1" table:number-rows-spanned="2">
            <text:p>RUBRO</text:p>
          </table:table-cell>
          <table:table-cell table:style-name="ce258" office:value-type="string" calcext:value-type="string" table:number-columns-spanned="1" table:number-rows-spanned="2">
            <text:p>COSTO UNITARIO</text:p>
          </table:table-cell>
          <table:table-cell table:style-name="ce268" office:value-type="string" calcext:value-type="string" table:number-columns-spanned="1" table:number-rows-spanned="2">
            <text:p>UNIDADES REQUERIDAS</text:p>
          </table:table-cell>
          <table:table-cell table:style-name="ce274" office:value-type="string" calcext:value-type="string" table:number-columns-spanned="2" table:number-rows-spanned="1">
            <text:p>COSTO </text:p>
          </table:table-cell>
          <table:covered-table-cell table:style-name="ce274"/>
          <table:table-cell table:style-name="ce285" office:value-type="string" calcext:value-type="string" table:number-columns-spanned="1" table:number-rows-spanned="2">
            <text:p>TOTAL</text:p>
          </table:table-cell>
          <table:table-cell table:style-name="ce173" table:number-columns-repeated="18"/>
          <table:table-cell table:number-columns-repeated="16358"/>
        </table:table-row>
        <table:table-row table:style-name="ro11">
          <table:table-cell table:style-name="ce173" table:number-columns-repeated="2"/>
          <table:covered-table-cell table:style-name="ce246"/>
          <table:covered-table-cell table:style-name="ce258"/>
          <table:covered-table-cell table:style-name="ce268"/>
          <table:table-cell table:style-name="ce275" office:value-type="string" calcext:value-type="string">
            <text:p>FIJO</text:p>
          </table:table-cell>
          <table:table-cell table:style-name="ce275" office:value-type="string" calcext:value-type="string">
            <text:p>VARIABLE</text:p>
          </table:table-cell>
          <table:covered-table-cell table:style-name="ce285"/>
          <table:table-cell table:style-name="ce173" table:number-columns-repeated="18"/>
          <table:table-cell table:number-columns-repeated="16358"/>
        </table:table-row>
        <table:table-row table:style-name="ro11">
          <table:table-cell table:style-name="ce173" table:number-columns-repeated="2"/>
          <table:table-cell table:style-name="ce247" office:value-type="string" calcext:value-type="string">
            <text:p>GASTOS DE ADMINISTRACION</text:p>
          </table:table-cell>
          <table:table-cell table:style-name="ce259" table:number-columns-repeated="4"/>
          <table:table-cell table:style-name="ce286"/>
          <table:table-cell table:style-name="ce173" table:number-columns-repeated="18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248" office:value-type="string" calcext:value-type="string">
            <text:p>Sueldos del personal</text:p>
          </table:table-cell>
          <table:table-cell table:style-name="ce260"/>
          <table:table-cell table:style-name="ce269" office:value-type="float" office:value="3" calcext:value-type="float">
            <text:p>3</text:p>
          </table:table-cell>
          <table:table-cell table:style-name="ce276" table:formula="of:=[$Sueldos.C12]" office:value-type="float" office:value="2430" calcext:value-type="float">
            <text:p>2,430.00</text:p>
          </table:table-cell>
          <table:table-cell table:style-name="ce276"/>
          <table:table-cell table:style-name="ce287" table:formula="of:=[.F8]+[.G8]" office:value-type="float" office:value="2430" calcext:value-type="float">
            <text:p>2,430.00</text:p>
          </table:table-cell>
          <table:table-cell table:style-name="ce173"/>
          <table:table-cell table:style-name="ce237"/>
          <table:table-cell table:style-name="ce173" table:number-columns-repeated="16"/>
          <table:table-cell table:number-columns-repeated="16358"/>
        </table:table-row>
        <table:table-row table:style-name="ro1">
          <table:table-cell table:style-name="ce173"/>
          <table:table-cell table:style-name="ce173" office:value-type="string" calcext:value-type="string">
            <text:p>INV INICIAL PONER </text:p>
          </table:table-cell>
          <table:table-cell table:style-name="ce186" office:value-type="string" calcext:value-type="string">
            <text:p>Servicios: Agua, luz, telefono e internet</text:p>
          </table:table-cell>
          <table:table-cell table:style-name="ce193" office:value-type="float" office:value="180" calcext:value-type="float">
            <text:p>180.00</text:p>
          </table:table-cell>
          <table:table-cell table:style-name="ce198" office:value-type="float" office:value="1" calcext:value-type="float">
            <text:p>1</text:p>
          </table:table-cell>
          <table:table-cell table:style-name="ce277" table:formula="of:=[.D9]*[.E9]" office:value-type="float" office:value="180" calcext:value-type="float">
            <text:p>180.00</text:p>
          </table:table-cell>
          <table:table-cell table:style-name="ce193"/>
          <table:table-cell table:style-name="ce288" table:formula="of:=[.F9]+[.G9]" office:value-type="float" office:value="180" calcext:value-type="float">
            <text:p>180.00</text:p>
          </table:table-cell>
          <table:table-cell table:style-name="ce173" table:number-columns-repeated="18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86" office:value-type="string" calcext:value-type="string">
            <text:p>Mantenimiento y reparaciones.</text:p>
          </table:table-cell>
          <table:table-cell table:style-name="ce193" office:value-type="float" office:value="20" calcext:value-type="float">
            <text:p>20.00</text:p>
          </table:table-cell>
          <table:table-cell table:style-name="ce198"/>
          <table:table-cell table:style-name="ce193" table:formula="of:=[.D10]" office:value-type="float" office:value="20" calcext:value-type="float">
            <text:p>20.00</text:p>
          </table:table-cell>
          <table:table-cell table:style-name="ce193"/>
          <table:table-cell table:style-name="ce288" table:formula="of:=[.F10]+[.G10]" office:value-type="float" office:value="20" calcext:value-type="float">
            <text:p>20.00</text:p>
          </table:table-cell>
          <table:table-cell table:style-name="ce173" table:number-columns-repeated="18"/>
          <table:table-cell table:number-columns-repeated="16358"/>
        </table:table-row>
        <table:table-row table:style-name="ro1">
          <table:table-cell table:style-name="ce173"/>
          <table:table-cell table:style-name="ce173" office:value-type="string" calcext:value-type="string">
            <text:p>INV PONER</text:p>
          </table:table-cell>
          <table:table-cell table:style-name="ce186" office:value-type="string" calcext:value-type="string">
            <text:p>Utiles de oficina</text:p>
          </table:table-cell>
          <table:table-cell table:style-name="ce193" office:value-type="float" office:value="50" calcext:value-type="float">
            <text:p>50.00</text:p>
          </table:table-cell>
          <table:table-cell table:style-name="ce198" office:value-type="float" office:value="1" calcext:value-type="float">
            <text:p>1</text:p>
          </table:table-cell>
          <table:table-cell table:style-name="ce193"/>
          <table:table-cell table:style-name="ce193" table:formula="of:=[.E11]*[.D11]" office:value-type="float" office:value="50" calcext:value-type="float">
            <text:p>50.00</text:p>
          </table:table-cell>
          <table:table-cell table:style-name="ce288" table:formula="of:=[.F11]+[.G11]" office:value-type="float" office:value="50" calcext:value-type="float">
            <text:p>50.00</text:p>
          </table:table-cell>
          <table:table-cell table:style-name="ce173" table:number-columns-repeated="18"/>
          <table:table-cell table:number-columns-repeated="16358"/>
        </table:table-row>
        <table:table-row table:style-name="ro11">
          <table:table-cell table:style-name="ce173"/>
          <table:table-cell table:style-name="ce173" office:value-type="string" calcext:value-type="string">
            <text:p>F</text:p>
          </table:table-cell>
          <table:table-cell table:style-name="ce249" office:value-type="string" calcext:value-type="string">
            <text:p>Amortizacion de Intangibles</text:p>
          </table:table-cell>
          <table:table-cell table:style-name="ce261" table:formula="of:=[$Deprecion_VR.F24]" office:value-type="float" office:value="334" calcext:value-type="float">
            <text:p>334.00</text:p>
          </table:table-cell>
          <table:table-cell table:style-name="ce270" office:value-type="float" office:value="1" calcext:value-type="float">
            <text:p>1</text:p>
          </table:table-cell>
          <table:table-cell table:style-name="ce277" table:formula="of:=[.D12]*[.E12]" office:value-type="float" office:value="334" calcext:value-type="float">
            <text:p>334.00</text:p>
          </table:table-cell>
          <table:table-cell table:style-name="ce261"/>
          <table:table-cell table:style-name="ce288" table:formula="of:=[.F12]+[.G12]" office:value-type="float" office:value="334" calcext:value-type="float">
            <text:p>334.00</text:p>
          </table:table-cell>
          <table:table-cell table:style-name="ce173" table:number-columns-repeated="18"/>
          <table:table-cell table:number-columns-repeated="16358"/>
        </table:table-row>
        <table:table-row table:style-name="ro11">
          <table:table-cell table:style-name="ce173" table:number-columns-repeated="2"/>
          <table:table-cell table:style-name="ce250" office:value-type="string" calcext:value-type="string">
            <text:p>TOTAL GASTOS DE ADMINISTRACION</text:p>
          </table:table-cell>
          <table:table-cell table:style-name="ce259"/>
          <table:table-cell table:style-name="ce271"/>
          <table:table-cell table:style-name="ce278" table:formula="of:=SUM([.F8:.F12])" office:value-type="float" office:value="2964" calcext:value-type="float">
            <text:p>2,964.00</text:p>
          </table:table-cell>
          <table:table-cell table:style-name="ce278" table:formula="of:=SUM([.G8:.G12])" office:value-type="float" office:value="50" calcext:value-type="float">
            <text:p>50.00</text:p>
          </table:table-cell>
          <table:table-cell table:style-name="ce289" table:formula="of:=SUM([.H8:.H12])" office:value-type="float" office:value="3014" calcext:value-type="float">
            <text:p>3,014.00</text:p>
          </table:table-cell>
          <table:table-cell table:style-name="ce173" table:number-columns-repeated="18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251" office:value-type="string" calcext:value-type="string">
            <text:p>GASTOS DE VENTAS</text:p>
          </table:table-cell>
          <table:table-cell table:style-name="ce262"/>
          <table:table-cell table:style-name="ce272"/>
          <table:table-cell table:style-name="ce262" table:number-columns-repeated="2"/>
          <table:table-cell table:style-name="ce290"/>
          <table:table-cell table:style-name="ce173" table:number-columns-repeated="18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252" office:value-type="string" calcext:value-type="string">
            <text:p>Sueldos del personal</text:p>
          </table:table-cell>
          <table:table-cell table:style-name="ce263"/>
          <table:table-cell table:style-name="ce273" office:value-type="float" office:value="2" calcext:value-type="float">
            <text:p>2</text:p>
          </table:table-cell>
          <table:table-cell table:style-name="ce276" table:formula="of:=[$Sueldos.C15]" office:value-type="float" office:value="2130" calcext:value-type="float">
            <text:p>2,130.00</text:p>
          </table:table-cell>
          <table:table-cell table:style-name="ce281"/>
          <table:table-cell table:style-name="ce291" table:formula="of:=[.G15]+[.F15]" office:value-type="float" office:value="2130" calcext:value-type="float">
            <text:p>2,130.00</text:p>
          </table:table-cell>
          <table:table-cell table:style-name="ce173" table:number-columns-repeated="18"/>
          <table:table-cell table:number-columns-repeated="16358"/>
        </table:table-row>
        <table:table-row table:style-name="ro11">
          <table:table-cell table:style-name="ce173" table:number-columns-repeated="2"/>
          <table:table-cell table:style-name="ce253" office:value-type="string" calcext:value-type="string">
            <text:p>Promoción</text:p>
          </table:table-cell>
          <table:table-cell table:style-name="ce261" table:formula="of:=[.G27]/12" office:value-type="float" office:value="200" calcext:value-type="float">
            <text:p>200.00</text:p>
          </table:table-cell>
          <table:table-cell table:style-name="ce270" office:value-type="float" office:value="1" calcext:value-type="float">
            <text:p>1</text:p>
          </table:table-cell>
          <table:table-cell table:style-name="ce261"/>
          <table:table-cell table:style-name="ce261" table:formula="of:=[.E16]*[.D16]" office:value-type="float" office:value="200" calcext:value-type="float">
            <text:p>200.00</text:p>
          </table:table-cell>
          <table:table-cell table:style-name="ce292" table:formula="of:=[.G16]+[.F16]" office:value-type="float" office:value="200" calcext:value-type="float">
            <text:p>200.00</text:p>
          </table:table-cell>
          <table:table-cell table:style-name="ce173" table:number-columns-repeated="18"/>
          <table:table-cell table:number-columns-repeated="16358"/>
        </table:table-row>
        <table:table-row table:style-name="ro11">
          <table:table-cell table:style-name="ce173" table:number-columns-repeated="2"/>
          <table:table-cell table:style-name="ce250" office:value-type="string" calcext:value-type="string">
            <text:p>TOTAL GASTOS DE VENTAS</text:p>
          </table:table-cell>
          <table:table-cell table:style-name="ce259" table:number-columns-repeated="2"/>
          <table:table-cell table:style-name="ce278" table:formula="of:=SUM([.F14:.F16])" office:value-type="float" office:value="2130" calcext:value-type="float">
            <text:p>2,130.00</text:p>
          </table:table-cell>
          <table:table-cell table:style-name="ce278" table:formula="of:=SUM([.G14:.G16])" office:value-type="float" office:value="200" calcext:value-type="float">
            <text:p>200.00</text:p>
          </table:table-cell>
          <table:table-cell table:style-name="ce289" table:formula="of:=SUM([.H15:.H16])" office:value-type="float" office:value="2330" calcext:value-type="float">
            <text:p>2,330.00</text:p>
          </table:table-cell>
          <table:table-cell table:style-name="ce173" table:number-columns-repeated="18"/>
          <table:table-cell table:number-columns-repeated="16358"/>
        </table:table-row>
        <table:table-row table:style-name="ro11">
          <table:table-cell table:style-name="ce173" table:number-columns-repeated="2"/>
          <table:table-cell table:style-name="ce254" office:value-type="string" calcext:value-type="string">
            <text:p>TOTAL GASTOS OPERATIVOS</text:p>
          </table:table-cell>
          <table:table-cell table:style-name="ce264" table:number-columns-repeated="2"/>
          <table:table-cell table:style-name="ce279" table:formula="of:=[.F17]+[.F13]" office:value-type="float" office:value="5094" calcext:value-type="float">
            <text:p>5,094.00</text:p>
          </table:table-cell>
          <table:table-cell table:style-name="ce264" table:formula="of:=[.G17]+[.G13]" office:value-type="float" office:value="250" calcext:value-type="float">
            <text:p>250.00</text:p>
          </table:table-cell>
          <table:table-cell table:style-name="ce264" table:formula="of:=[.H17]+[.H13]" office:value-type="float" office:value="5344" calcext:value-type="float">
            <text:p>5,344.00</text:p>
          </table:table-cell>
          <table:table-cell table:style-name="ce173" table:number-columns-repeated="18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188" table:number-columns-spanned="2" table:number-rows-spanned="1"/>
          <table:covered-table-cell table:style-name="ce188"/>
          <table:table-cell table:style-name="ce201" table:number-columns-repeated="3"/>
          <table:table-cell table:style-name="ce173" table:number-columns-repeated="19"/>
          <table:table-cell table:number-columns-repeated="16358"/>
        </table:table-row>
        <table:table-row table:style-name="ro2">
          <table:table-cell table:style-name="ce173" table:number-columns-repeated="2"/>
          <table:table-cell table:style-name="ce175" office:value-type="string" calcext:value-type="string" table:number-columns-spanned="5" table:number-rows-spanned="1">
            <text:p>PRESUPUESTO ANUAL DE PROMOCION</text:p>
          </table:table-cell>
          <table:covered-table-cell table:number-columns-repeated="4" table:style-name="ce175"/>
          <table:table-cell table:style-name="ce173" table:number-columns-repeated="19"/>
          <table:table-cell table:number-columns-repeated="16358"/>
        </table:table-row>
        <table:table-row table:style-name="ro11">
          <table:table-cell table:style-name="ce173" table:number-columns-repeated="26"/>
          <table:table-cell table:number-columns-repeated="16358"/>
        </table:table-row>
        <table:table-row table:style-name="ro18">
          <table:table-cell table:style-name="ce173" table:number-columns-repeated="2"/>
          <table:table-cell table:style-name="ce246" office:value-type="string" calcext:value-type="string" table:number-columns-spanned="1" table:number-rows-spanned="3">
            <text:p>RUBROS</text:p>
          </table:table-cell>
          <table:table-cell table:style-name="ce258" office:value-type="string" calcext:value-type="string" table:number-columns-spanned="1" table:number-rows-spanned="3">
            <text:p>Unidad Medida</text:p>
          </table:table-cell>
          <table:table-cell table:style-name="ce258" office:value-type="string" calcext:value-type="string" table:number-columns-spanned="1" table:number-rows-spanned="3">
            <text:p>Cantidad</text:p>
          </table:table-cell>
          <table:table-cell table:style-name="ce268" office:value-type="string" calcext:value-type="string" table:number-columns-spanned="1" table:number-rows-spanned="3">
            <text:p>N° veces</text:p>
          </table:table-cell>
          <table:table-cell table:style-name="ce282" office:value-type="string" calcext:value-type="string" table:number-columns-spanned="1" table:number-rows-spanned="3">
            <text:p>COSTO</text:p>
            <text:p> ANUAL</text:p>
            <text:p> </text:p>
          </table:table-cell>
          <table:table-cell table:style-name="ce173" table:number-columns-repeated="19"/>
          <table:table-cell table:number-columns-repeated="16358"/>
        </table:table-row>
        <table:table-row table:style-name="ro1">
          <table:table-cell table:style-name="ce173" table:number-columns-repeated="2"/>
          <table:covered-table-cell table:style-name="ce246"/>
          <table:covered-table-cell table:number-columns-repeated="2" table:style-name="ce258"/>
          <table:covered-table-cell table:style-name="ce268"/>
          <table:covered-table-cell table:style-name="ce282"/>
          <table:table-cell table:style-name="ce173" table:number-columns-repeated="19"/>
          <table:table-cell table:number-columns-repeated="16358"/>
        </table:table-row>
        <table:table-row table:style-name="ro9">
          <table:table-cell table:style-name="ce173" table:number-columns-repeated="2"/>
          <table:covered-table-cell table:style-name="ce246"/>
          <table:covered-table-cell table:number-columns-repeated="2" table:style-name="ce258"/>
          <table:covered-table-cell table:style-name="ce268"/>
          <table:covered-table-cell table:style-name="ce282"/>
          <table:table-cell table:style-name="ce173" table:number-columns-repeated="19"/>
          <table:table-cell table:number-columns-repeated="16358"/>
        </table:table-row>
        <table:table-row table:style-name="ro19">
          <table:table-cell table:style-name="ce173" table:number-columns-repeated="2"/>
          <table:table-cell table:style-name="ce255" office:value-type="string" calcext:value-type="string">
            <text:p>• Mandiles</text:p>
          </table:table-cell>
          <table:table-cell table:style-name="ce265" office:value-type="string" calcext:value-type="string">
            <text:p>Unidades</text:p>
          </table:table-cell>
          <table:table-cell table:style-name="ce265" office:value-type="float" office:value="30" calcext:value-type="float">
            <text:p>30</text:p>
          </table:table-cell>
          <table:table-cell table:style-name="ce265" office:value-type="float" office:value="2" calcext:value-type="float">
            <text:p>2</text:p>
          </table:table-cell>
          <table:table-cell table:style-name="ce283" table:formula="of:=[.F25]*[.E25]*10" office:value-type="currency" office:currency="S/." office:value="600" calcext:value-type="currency">
            <text:p>S/. 600.00</text:p>
          </table:table-cell>
          <table:table-cell table:style-name="ce173" table:number-columns-repeated="19"/>
          <table:table-cell table:number-columns-repeated="16358"/>
        </table:table-row>
        <table:table-row table:style-name="ro19">
          <table:table-cell table:style-name="ce173" table:number-columns-repeated="2"/>
          <table:table-cell table:style-name="ce256" office:value-type="string" calcext:value-type="string">
            <text:p>• Mantenimiento de la pagina Web.</text:p>
          </table:table-cell>
          <table:table-cell table:style-name="ce265" office:value-type="string" calcext:value-type="string">
            <text:p>Servicio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float" office:value="12" calcext:value-type="float">
            <text:p>12</text:p>
          </table:table-cell>
          <table:table-cell table:style-name="ce283" table:formula="of:=[.F26]*150" office:value-type="currency" office:currency="S/." office:value="1800" calcext:value-type="currency">
            <text:p>S/. 1,800.00</text:p>
          </table:table-cell>
          <table:table-cell table:style-name="ce173" table:number-columns-repeated="19"/>
          <table:table-cell table:number-columns-repeated="16358"/>
        </table:table-row>
        <table:table-row table:style-name="ro11">
          <table:table-cell table:style-name="ce173" table:number-columns-repeated="2"/>
          <table:table-cell table:style-name="ce257" office:value-type="string" calcext:value-type="string">
            <text:p>TOTAL</text:p>
          </table:table-cell>
          <table:table-cell table:style-name="ce266" table:number-columns-repeated="2"/>
          <table:table-cell table:style-name="ce280"/>
          <table:table-cell table:style-name="ce284" table:formula="of:=SUM([.G25:.G26])" office:value-type="currency" office:currency="S/." office:value="2400" calcext:value-type="currency">
            <text:p>S/. 2,400.00</text:p>
          </table:table-cell>
          <table:table-cell table:style-name="ce173" table:number-columns-repeated="19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236"/>
          <table:table-cell table:style-name="ce267" table:number-columns-repeated="2"/>
          <table:table-cell table:style-name="ce173" table:number-columns-repeated="21"/>
          <table:table-cell table:number-columns-repeated="16358"/>
        </table:table-row>
        <table:table-row table:style-name="ro1" table:number-rows-repeated="199">
          <table:table-cell table:style-name="ce173" table:number-columns-repeated="26"/>
          <table:table-cell table:number-columns-repeated="16358"/>
        </table:table-row>
        <table:table-row table:style-name="ro7" table:number-rows-repeated="762">
          <table:table-cell table:style-name="ce174" table:number-columns-repeated="26"/>
          <table:table-cell table:number-columns-repeated="16358"/>
        </table:table-row>
        <table:table-row table:style-name="ro2" table:number-rows-repeated="104758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stos_Unitario" table:style-name="ta9">
        <table:table-column table:style-name="co34" table:default-cell-style-name="Default"/>
        <table:table-column table:style-name="co52" table:default-cell-style-name="Default"/>
        <table:table-column table:style-name="co45" table:default-cell-style-name="Default"/>
        <table:table-column table:style-name="co24" table:number-columns-repeated="3" table:default-cell-style-name="Default"/>
        <table:table-column table:style-name="co8" table:number-columns-repeated="16378" table:default-cell-style-name="Default"/>
        <table:table-row table:style-name="ro20">
          <table:table-cell table:style-name="ce293" table:number-columns-repeated="26"/>
          <table:table-cell table:number-columns-repeated="16358"/>
        </table:table-row>
        <table:table-row table:style-name="ro11">
          <table:table-cell table:style-name="ce293"/>
          <table:table-cell table:style-name="ce294" office:value-type="string" calcext:value-type="string" table:number-columns-spanned="2" table:number-rows-spanned="1">
            <text:p>COSTO UNITARIO: LOTE DE 3500 UNIDADES/MES</text:p>
          </table:table-cell>
          <table:covered-table-cell table:style-name="ce20"/>
          <table:table-cell table:style-name="ce293" table:number-columns-repeated="23"/>
          <table:table-cell table:number-columns-repeated="16358"/>
        </table:table-row>
        <table:table-row table:style-name="ro11">
          <table:table-cell table:style-name="ce293"/>
          <table:table-cell table:style-name="ce295"/>
          <table:table-cell table:style-name="ce305"/>
          <table:table-cell table:style-name="ce293" table:number-columns-repeated="23"/>
          <table:table-cell table:number-columns-repeated="16358"/>
        </table:table-row>
        <table:table-row table:style-name="ro8">
          <table:table-cell table:style-name="ce293"/>
          <table:table-cell table:style-name="ce296" office:value-type="string" calcext:value-type="string">
            <text:p>Costo fijo mes</text:p>
          </table:table-cell>
          <table:table-cell table:style-name="ce306" office:value-type="string" calcext:value-type="string">
            <text:p>soles</text:p>
          </table:table-cell>
          <table:table-cell table:style-name="ce293" table:number-columns-repeated="23"/>
          <table:table-cell table:number-columns-repeated="16358"/>
        </table:table-row>
        <table:table-row table:style-name="ro8">
          <table:table-cell table:style-name="ce293"/>
          <table:table-cell table:style-name="ce297" office:value-type="string" calcext:value-type="string">
            <text:p>Gastos administrativos fijos</text:p>
          </table:table-cell>
          <table:table-cell table:style-name="ce307" table:formula="of:=[$Gastos_Operativos.F13]" office:value-type="float" office:value="2964" calcext:value-type="float">
            <text:p>S/2,964.00</text:p>
          </table:table-cell>
          <table:table-cell table:style-name="ce293" table:number-columns-repeated="23"/>
          <table:table-cell table:number-columns-repeated="16358"/>
        </table:table-row>
        <table:table-row table:style-name="ro8">
          <table:table-cell table:style-name="ce293"/>
          <table:table-cell table:style-name="ce297" office:value-type="string" calcext:value-type="string">
            <text:p>Depreciación activo fijo</text:p>
          </table:table-cell>
          <table:table-cell table:style-name="ce308" table:formula="of:=[$Deprecion_VR.F13]/12" office:value-type="float" office:value="246.2" calcext:value-type="float">
            <text:p>S/246.20</text:p>
          </table:table-cell>
          <table:table-cell table:style-name="ce293" table:number-columns-repeated="23"/>
          <table:table-cell table:number-columns-repeated="16358"/>
        </table:table-row>
        <table:table-row table:style-name="ro8">
          <table:table-cell table:style-name="ce293"/>
          <table:table-cell table:style-name="ce297" office:value-type="string" calcext:value-type="string">
            <text:p>Amortización de intangibles</text:p>
          </table:table-cell>
          <table:table-cell table:style-name="ce309" table:formula="of:=[$Inversion_Inicial.F23]/12" office:value-type="float" office:value="139.166666666667" calcext:value-type="float">
            <text:p>S/139.17</text:p>
          </table:table-cell>
          <table:table-cell table:style-name="ce293" table:number-columns-repeated="23"/>
          <table:table-cell table:number-columns-repeated="16358"/>
        </table:table-row>
        <table:table-row table:style-name="ro8">
          <table:table-cell table:style-name="ce293"/>
          <table:table-cell table:style-name="ce297" office:value-type="string" calcext:value-type="string">
            <text:p>Gastos de ventas variables</text:p>
          </table:table-cell>
          <table:table-cell table:style-name="ce307" table:formula="of:=[$Gastos_Operativos.G17]" office:value-type="float" office:value="200" calcext:value-type="float">
            <text:p>S/200.00</text:p>
          </table:table-cell>
          <table:table-cell table:style-name="ce293" table:number-columns-repeated="23"/>
          <table:table-cell table:number-columns-repeated="16358"/>
        </table:table-row>
        <table:table-row table:style-name="ro8">
          <table:table-cell table:style-name="ce293"/>
          <table:table-cell table:style-name="ce298" office:value-type="string" calcext:value-type="string">
            <text:p>Total Costo Fijo</text:p>
          </table:table-cell>
          <table:table-cell table:style-name="ce310" table:formula="of:=SUM([.C5:.C8])" office:value-type="float" office:value="3549.36666666667" calcext:value-type="float">
            <text:p>S/3,549.37</text:p>
          </table:table-cell>
          <table:table-cell table:style-name="ce293" table:number-columns-repeated="23"/>
          <table:table-cell table:number-columns-repeated="16358"/>
        </table:table-row>
        <table:table-row table:style-name="ro8">
          <table:table-cell table:style-name="ce293"/>
          <table:table-cell table:style-name="ce299" office:value-type="string" calcext:value-type="string">
            <text:p>Costo variable mes</text:p>
          </table:table-cell>
          <table:table-cell table:style-name="ce311" office:value-type="string" calcext:value-type="string">
            <text:p>soles</text:p>
          </table:table-cell>
          <table:table-cell table:style-name="ce293" table:number-columns-repeated="23"/>
          <table:table-cell table:number-columns-repeated="16358"/>
        </table:table-row>
        <table:table-row table:style-name="ro8">
          <table:table-cell table:style-name="ce293"/>
          <table:table-cell table:style-name="ce297" office:value-type="string" calcext:value-type="string">
            <text:p>Materia prima directa</text:p>
          </table:table-cell>
          <table:table-cell table:style-name="ce307" table:formula="of:=[$Costos_Ventas.H9]" office:value-type="float" office:value="98000" calcext:value-type="float">
            <text:p>S/98,000.00</text:p>
          </table:table-cell>
          <table:table-cell table:style-name="ce293" table:number-columns-repeated="23"/>
          <table:table-cell table:number-columns-repeated="16358"/>
        </table:table-row>
        <table:table-row table:style-name="ro8">
          <table:table-cell table:style-name="ce293"/>
          <table:table-cell table:style-name="ce297" office:value-type="string" calcext:value-type="string">
            <text:p>Mano de obra directa</text:p>
          </table:table-cell>
          <table:table-cell table:style-name="ce307" table:formula="of:=[$Costos_Ventas.F11]" office:value-type="float" office:value="38669.4" calcext:value-type="float">
            <text:p>S/38,669.40</text:p>
          </table:table-cell>
          <table:table-cell table:style-name="ce293" table:number-columns-repeated="23"/>
          <table:table-cell table:number-columns-repeated="16358"/>
        </table:table-row>
        <table:table-row table:style-name="ro8">
          <table:table-cell table:style-name="ce293"/>
          <table:table-cell table:style-name="ce297" office:value-type="string" calcext:value-type="string">
            <text:p>CIF variables</text:p>
          </table:table-cell>
          <table:table-cell table:style-name="ce307" table:formula="of:=[$Costos_Ventas.G12]" office:value-type="float" office:value="714" calcext:value-type="float">
            <text:p>S/714.00</text:p>
          </table:table-cell>
          <table:table-cell table:style-name="ce293" table:number-columns-repeated="23"/>
          <table:table-cell table:number-columns-repeated="16358"/>
        </table:table-row>
        <table:table-row table:style-name="ro8">
          <table:table-cell table:style-name="ce293"/>
          <table:table-cell table:style-name="ce300" office:value-type="string" calcext:value-type="string">
            <text:p>Gastos operativos variables</text:p>
          </table:table-cell>
          <table:table-cell table:style-name="ce309" table:formula="of:=[$Gastos_Operativos.G18]" office:value-type="float" office:value="250" calcext:value-type="float">
            <text:p>S/250.00</text:p>
          </table:table-cell>
          <table:table-cell table:style-name="ce293" table:number-columns-repeated="23"/>
          <table:table-cell table:number-columns-repeated="16358"/>
        </table:table-row>
        <table:table-row table:style-name="ro8">
          <table:table-cell table:style-name="ce293"/>
          <table:table-cell table:style-name="ce301" office:value-type="string" calcext:value-type="string">
            <text:p>Total Costo Variable</text:p>
          </table:table-cell>
          <table:table-cell table:style-name="ce312" table:formula="of:=SUM([.C11:.C14])" office:value-type="float" office:value="137633.4" calcext:value-type="float">
            <text:p>S/137,633.40</text:p>
          </table:table-cell>
          <table:table-cell table:style-name="ce293" table:number-columns-repeated="23"/>
          <table:table-cell table:number-columns-repeated="16358"/>
        </table:table-row>
        <table:table-row table:style-name="ro21">
          <table:table-cell table:style-name="ce293" table:number-columns-repeated="26"/>
          <table:table-cell table:number-columns-repeated="16358"/>
        </table:table-row>
        <table:table-row table:style-name="ro8">
          <table:table-cell table:style-name="ce293"/>
          <table:table-cell table:style-name="ce302" office:value-type="string" calcext:value-type="string">
            <text:p>Costos Unitarios</text:p>
          </table:table-cell>
          <table:table-cell table:style-name="ce313" office:value-type="string" calcext:value-type="string">
            <text:p>soles</text:p>
          </table:table-cell>
          <table:table-cell table:style-name="ce293" table:number-columns-repeated="5"/>
          <table:table-cell table:style-name="ce317"/>
          <table:table-cell table:style-name="ce293" table:number-columns-repeated="17"/>
          <table:table-cell table:number-columns-repeated="16358"/>
        </table:table-row>
        <table:table-row table:style-name="ro8">
          <table:table-cell table:style-name="ce293"/>
          <table:table-cell table:style-name="ce303" office:value-type="string" calcext:value-type="string">
            <text:p>Nº de Unidades</text:p>
          </table:table-cell>
          <table:table-cell table:style-name="ce314" table:formula="of:=[$Presupuesto_Ventas.D7]" office:value-type="float" office:value="24500" calcext:value-type="float">
            <text:p>24500.00</text:p>
          </table:table-cell>
          <table:table-cell table:style-name="ce293" table:number-columns-repeated="23"/>
          <table:table-cell table:number-columns-repeated="16358"/>
        </table:table-row>
        <table:table-row table:style-name="ro8">
          <table:table-cell table:style-name="ce293"/>
          <table:table-cell table:style-name="ce297" office:value-type="string" calcext:value-type="string">
            <text:p>Costo fijo unitario,CFU</text:p>
          </table:table-cell>
          <table:table-cell table:style-name="ce315" table:formula="of:=[.C9]/[.C18]" office:value-type="float" office:value="0.144872108843537" calcext:value-type="float">
            <text:p><text:s/>S/0.14 </text:p>
          </table:table-cell>
          <table:table-cell table:style-name="ce293" table:number-columns-repeated="23"/>
          <table:table-cell table:number-columns-repeated="16358"/>
        </table:table-row>
        <table:table-row table:style-name="ro8">
          <table:table-cell table:style-name="ce293"/>
          <table:table-cell table:style-name="ce297" office:value-type="string" calcext:value-type="string">
            <text:p>Costo variable unitario, CVU</text:p>
          </table:table-cell>
          <table:table-cell table:style-name="ce315" table:formula="of:=[.C15]/[.C18]" office:value-type="float" office:value="5.61768979591837" calcext:value-type="float">
            <text:p><text:s/>S/5.62 </text:p>
          </table:table-cell>
          <table:table-cell table:style-name="ce293" table:number-columns-repeated="23"/>
          <table:table-cell table:number-columns-repeated="16358"/>
        </table:table-row>
        <table:table-row table:style-name="ro8">
          <table:table-cell table:style-name="ce293"/>
          <table:table-cell table:style-name="ce304" office:value-type="string" calcext:value-type="string">
            <text:p>Costo total unitario, CTU</text:p>
          </table:table-cell>
          <table:table-cell table:style-name="ce316" table:formula="of:=SUM([.C19:.C20])" office:value-type="float" office:value="5.7625619047619" calcext:value-type="float">
            <text:p><text:s/>S/5.76 </text:p>
          </table:table-cell>
          <table:table-cell table:style-name="ce293" table:number-columns-repeated="23"/>
          <table:table-cell table:number-columns-repeated="16358"/>
        </table:table-row>
        <table:table-row table:style-name="ro1">
          <table:table-cell table:style-name="ce293" table:number-columns-repeated="26"/>
          <table:table-cell table:number-columns-repeated="16358"/>
        </table:table-row>
        <table:table-row table:style-name="ro1" table:number-rows-repeated="199">
          <table:table-cell table:style-name="ce293" table:number-columns-repeated="26"/>
          <table:table-cell table:number-columns-repeated="16358"/>
        </table:table-row>
        <table:table-row table:style-name="ro7" table:number-rows-repeated="778">
          <table:table-cell table:style-name="ce293" table:number-columns-repeated="26"/>
          <table:table-cell table:number-columns-repeated="16358"/>
        </table:table-row>
        <table:table-row table:style-name="ro2" table:number-rows-repeated="104757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unto_Equilibrio" table:style-name="ta10">
        <table:table-column table:style-name="co2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41" table:number-columns-repeated="2" table:default-cell-style-name="Default"/>
        <table:table-column table:style-name="co30" table:default-cell-style-name="Default"/>
        <table:table-column table:style-name="co8" table:number-columns-repeated="16378" table:default-cell-style-name="Default"/>
        <table:table-row table:style-name="ro1">
          <table:table-cell table:style-name="ce173"/>
          <table:table-cell table:style-name="ce174" table:number-columns-repeated="25"/>
          <table:table-cell table:number-columns-repeated="16358"/>
        </table:table-row>
        <table:table-row table:style-name="ro11">
          <table:table-cell table:style-name="ce173"/>
          <table:table-cell table:style-name="ce319"/>
          <table:table-cell table:style-name="ce174" table:number-columns-repeated="24"/>
          <table:table-cell table:number-columns-repeated="16358"/>
        </table:table-row>
        <table:table-row table:style-name="ro11">
          <table:table-cell table:style-name="ce173"/>
          <table:table-cell table:style-name="ce320" office:value-type="string" calcext:value-type="string" table:number-columns-spanned="5" table:number-rows-spanned="1">
            <text:p>PUNTO DE EQUILIBRIO PARA UN PRODUCTO</text:p>
          </table:table-cell>
          <table:covered-table-cell table:number-columns-repeated="3" table:style-name="ce10"/>
          <table:covered-table-cell table:style-name="ce20"/>
          <table:table-cell table:style-name="ce174" table:number-columns-repeated="20"/>
          <table:table-cell table:number-columns-repeated="16358"/>
        </table:table-row>
        <table:table-row table:style-name="ro11">
          <table:table-cell table:style-name="ce173"/>
          <table:table-cell table:style-name="ce174" table:number-columns-repeated="25"/>
          <table:table-cell table:number-columns-repeated="16358"/>
        </table:table-row>
        <table:table-row table:style-name="ro11">
          <table:table-cell table:style-name="ce173"/>
          <table:table-cell table:style-name="ce321" office:value-type="string" calcext:value-type="string">
            <text:p>PRODUCTO</text:p>
          </table:table-cell>
          <table:table-cell table:style-name="ce328" office:value-type="string" calcext:value-type="string">
            <text:p>PRECIO</text:p>
          </table:table-cell>
          <table:table-cell table:style-name="ce336" office:value-type="string" calcext:value-type="string">
            <text:p>CVU</text:p>
          </table:table-cell>
          <table:table-cell table:style-name="ce341" office:value-type="string" calcext:value-type="string">
            <text:p>MgCU</text:p>
          </table:table-cell>
          <table:table-cell table:style-name="ce344"/>
          <table:table-cell table:style-name="ce174" table:number-columns-repeated="20"/>
          <table:table-cell table:number-columns-repeated="16358"/>
        </table:table-row>
        <table:table-row table:style-name="ro11">
          <table:table-cell table:style-name="ce173"/>
          <table:table-cell table:style-name="ce322" office:value-type="string" calcext:value-type="string">
            <text:p>A</text:p>
          </table:table-cell>
          <table:table-cell table:style-name="ce329" table:formula="of:=[$Presupuesto_Ventas.$C$19]" office:value-type="float" office:value="6" calcext:value-type="float">
            <text:p>6.0</text:p>
          </table:table-cell>
          <table:table-cell table:style-name="ce337" table:formula="of:=[$Costos_Unitario.C20]" office:value-type="float" office:value="5.61768979591837" calcext:value-type="float">
            <text:p>5.62</text:p>
          </table:table-cell>
          <table:table-cell table:style-name="ce342" table:formula="of:=[.C6]-[.D6]" office:value-type="float" office:value="0.382310204081633" calcext:value-type="float">
            <text:p>0.38</text:p>
          </table:table-cell>
          <table:table-cell table:style-name="ce345"/>
          <table:table-cell table:style-name="ce174" table:number-columns-repeated="20"/>
          <table:table-cell table:number-columns-repeated="16358"/>
        </table:table-row>
        <table:table-row table:style-name="ro1">
          <table:table-cell table:style-name="ce173"/>
          <table:table-cell table:style-name="ce323" office:value-type="string" calcext:value-type="string">
            <text:p>CVU = Costo variable Unitario</text:p>
          </table:table-cell>
          <table:table-cell table:style-name="ce221"/>
          <table:table-cell table:style-name="ce338" table:number-columns-repeated="2"/>
          <table:table-cell table:style-name="ce346"/>
          <table:table-cell table:style-name="ce174" table:number-columns-repeated="20"/>
          <table:table-cell table:number-columns-repeated="16358"/>
        </table:table-row>
        <table:table-row table:style-name="ro1">
          <table:table-cell table:style-name="ce173"/>
          <table:table-cell table:style-name="ce323" office:value-type="string" calcext:value-type="string">
            <text:p>MgCU = Margen de Contribución Unitario</text:p>
          </table:table-cell>
          <table:table-cell table:style-name="ce221"/>
          <table:table-cell table:style-name="ce338" table:number-columns-repeated="2"/>
          <table:table-cell table:style-name="ce346"/>
          <table:table-cell table:style-name="ce174" table:number-columns-repeated="20"/>
          <table:table-cell table:number-columns-repeated="16358"/>
        </table:table-row>
        <table:table-row table:style-name="ro11">
          <table:table-cell table:style-name="ce237"/>
          <table:table-cell table:style-name="ce221" table:number-columns-repeated="5"/>
          <table:table-cell table:style-name="ce174" table:number-columns-repeated="20"/>
          <table:table-cell table:number-columns-repeated="16358"/>
        </table:table-row>
        <table:table-row table:style-name="ro11">
          <table:table-cell table:style-name="ce237"/>
          <table:table-cell table:style-name="ce324" office:value-type="string" calcext:value-type="string">
            <text:p><text:s text:c="3"/>PE =</text:p>
          </table:table-cell>
          <table:table-cell table:style-name="ce330" office:value-type="string" calcext:value-type="string">
            <text:p>CF</text:p>
          </table:table-cell>
          <table:table-cell table:style-name="ce174"/>
          <table:table-cell table:style-name="ce221" table:number-columns-repeated="2"/>
          <table:table-cell table:style-name="ce174" table:number-columns-repeated="20"/>
          <table:table-cell table:number-columns-repeated="16358"/>
        </table:table-row>
        <table:table-row table:style-name="ro11">
          <table:table-cell table:style-name="ce237"/>
          <table:table-cell table:style-name="ce325"/>
          <table:table-cell table:style-name="ce331" office:value-type="string" calcext:value-type="string">
            <text:p>MgCU</text:p>
          </table:table-cell>
          <table:table-cell table:style-name="ce221" table:number-columns-repeated="3"/>
          <table:table-cell table:style-name="ce174" table:number-columns-repeated="20"/>
          <table:table-cell table:number-columns-repeated="16358"/>
        </table:table-row>
        <table:table-row table:style-name="ro1">
          <table:table-cell table:style-name="ce173"/>
          <table:table-cell table:style-name="ce221" table:number-columns-repeated="5"/>
          <table:table-cell table:style-name="ce174" table:number-columns-repeated="20"/>
          <table:table-cell table:number-columns-repeated="16358"/>
        </table:table-row>
        <table:table-row table:style-name="ro1">
          <table:table-cell table:style-name="ce318"/>
          <table:table-cell table:style-name="ce221" office:value-type="string" calcext:value-type="string">
            <text:p>PE =</text:p>
          </table:table-cell>
          <table:table-cell table:style-name="ce332" table:formula="of:=[$Costos_Unitario.C9]/[$Punto_Equilibrio.E6]" office:value-type="float" office:value="9283.99668325041" calcext:value-type="float">
            <text:p>9284</text:p>
          </table:table-cell>
          <table:table-cell table:style-name="ce332" office:value-type="string" calcext:value-type="string">
            <text:p>Unidades/Mes</text:p>
          </table:table-cell>
          <table:table-cell table:style-name="ce343" table:formula="of:=[.C13]*[.C6]" office:value-type="currency" office:currency="PEN" office:value="55703.9800995025" calcext:value-type="currency">
            <text:p><text:s/>S/ 55,703.98 </text:p>
          </table:table-cell>
          <table:table-cell table:style-name="ce221" office:value-type="string" calcext:value-type="string">
            <text:p>Soles/Mes</text:p>
          </table:table-cell>
          <table:table-cell table:style-name="ce174" table:number-columns-repeated="20"/>
          <table:table-cell table:number-columns-repeated="16358"/>
        </table:table-row>
        <table:table-row table:style-name="ro1">
          <table:table-cell table:style-name="ce173"/>
          <table:table-cell table:style-name="ce221" table:number-columns-repeated="5"/>
          <table:table-cell table:style-name="ce174" table:number-columns-repeated="20"/>
          <table:table-cell table:number-columns-repeated="16358"/>
        </table:table-row>
        <table:table-row table:style-name="ro1">
          <table:table-cell table:style-name="ce173"/>
          <table:table-cell table:style-name="ce215" office:value-type="string" calcext:value-type="string" table:number-columns-spanned="5" table:number-rows-spanned="1">
            <text:p>PUNTO DE EQUILIBRIO EN UNIDADES POR PRODUCTO</text:p>
          </table:table-cell>
          <table:covered-table-cell table:number-columns-repeated="4" table:style-name="ce12"/>
          <table:table-cell table:style-name="ce174" table:number-columns-repeated="20"/>
          <table:table-cell table:number-columns-repeated="16358"/>
        </table:table-row>
        <table:table-row table:style-name="ro11">
          <table:table-cell table:style-name="ce173"/>
          <table:table-cell table:style-name="ce174" table:number-columns-repeated="25"/>
          <table:table-cell table:number-columns-repeated="16358"/>
        </table:table-row>
        <table:table-row table:style-name="ro22">
          <table:table-cell table:style-name="ce173"/>
          <table:table-cell table:style-name="ce321" office:value-type="string" calcext:value-type="string">
            <text:p>PRODUCTOS</text:p>
          </table:table-cell>
          <table:table-cell table:style-name="ce333" office:value-type="string" calcext:value-type="string">
            <text:p>UNIDAD</text:p>
            <text:p>DE MEDIDA</text:p>
          </table:table-cell>
          <table:table-cell table:style-name="ce333" office:value-type="string" calcext:value-type="string">
            <text:p>CANTIDAD</text:p>
            <text:p>ANUAL</text:p>
          </table:table-cell>
          <table:table-cell table:style-name="ce333" office:value-type="string" calcext:value-type="string">
            <text:p>CANTIDAD</text:p>
            <text:p>MENSUAL</text:p>
          </table:table-cell>
          <table:table-cell table:style-name="ce347" office:value-type="string" calcext:value-type="string">
            <text:p>CANTIDAD</text:p>
            <text:p>DIARIA</text:p>
          </table:table-cell>
          <table:table-cell table:style-name="ce174" table:number-columns-repeated="20"/>
          <table:table-cell table:number-columns-repeated="16358"/>
        </table:table-row>
        <table:table-row table:style-name="ro23">
          <table:table-cell table:style-name="ce173"/>
          <table:table-cell table:style-name="ce326" table:formula="of:=[.B24]" office:value-type="string" office:string-value="A" calcext:value-type="string">
            <text:p>A</text:p>
          </table:table-cell>
          <table:table-cell table:style-name="ce334" office:value-type="string" calcext:value-type="string">
            <text:p>unidad</text:p>
            <text:p/>
          </table:table-cell>
          <table:table-cell table:style-name="ce339" table:formula="of:=[.C13]*12" office:value-type="float" office:value="111407.960199005" calcext:value-type="float">
            <text:p>111408</text:p>
          </table:table-cell>
          <table:table-cell table:style-name="ce339" table:formula="of:=[.C13]" office:value-type="float" office:value="9283.99668325041" calcext:value-type="float">
            <text:p>9284</text:p>
          </table:table-cell>
          <table:table-cell table:style-name="ce348" table:formula="of:=[.C13]/30" office:value-type="float" office:value="309.466556108347" calcext:value-type="float">
            <text:p>309</text:p>
          </table:table-cell>
          <table:table-cell table:style-name="ce174" table:number-columns-repeated="20"/>
          <table:table-cell table:number-columns-repeated="16358"/>
        </table:table-row>
        <table:table-row table:style-name="ro1">
          <table:table-cell table:style-name="ce173" table:number-columns-repeated="6"/>
          <table:table-cell table:style-name="ce174" table:number-columns-repeated="20"/>
          <table:table-cell table:number-columns-repeated="16358"/>
        </table:table-row>
        <table:table-row table:style-name="ro1">
          <table:table-cell table:style-name="ce173"/>
          <table:table-cell table:style-name="ce129"/>
          <table:table-cell table:style-name="ce221" table:number-columns-repeated="4"/>
          <table:table-cell table:style-name="ce174" table:number-columns-repeated="20"/>
          <table:table-cell table:number-columns-repeated="16358"/>
        </table:table-row>
        <table:table-row table:style-name="ro1">
          <table:table-cell table:style-name="ce173"/>
          <table:table-cell table:style-name="ce215" office:value-type="string" calcext:value-type="string" table:number-columns-spanned="5" table:number-rows-spanned="1">
            <text:p>PUNTO DE EQUILIBRIO EN SOLES POR PRODUCTO</text:p>
          </table:table-cell>
          <table:covered-table-cell table:number-columns-repeated="4" table:style-name="ce12"/>
          <table:table-cell table:style-name="ce174" table:number-columns-repeated="20"/>
          <table:table-cell table:number-columns-repeated="16358"/>
        </table:table-row>
        <table:table-row table:style-name="ro11">
          <table:table-cell table:style-name="ce173"/>
          <table:table-cell table:style-name="ce221" table:number-columns-repeated="5"/>
          <table:table-cell table:style-name="ce174" table:number-columns-repeated="20"/>
          <table:table-cell table:number-columns-repeated="16358"/>
        </table:table-row>
        <table:table-row table:style-name="ro22">
          <table:table-cell table:style-name="ce173"/>
          <table:table-cell table:style-name="ce321" office:value-type="string" calcext:value-type="string">
            <text:p>PRODUCTOS</text:p>
          </table:table-cell>
          <table:table-cell table:style-name="ce333" office:value-type="string" calcext:value-type="string">
            <text:p>PRECIO S/.</text:p>
          </table:table-cell>
          <table:table-cell table:style-name="ce333" office:value-type="string" calcext:value-type="string">
            <text:p>TOTAL</text:p>
            <text:p>ANUALS/.</text:p>
          </table:table-cell>
          <table:table-cell table:style-name="ce333" office:value-type="string" calcext:value-type="string">
            <text:p>TOTAL</text:p>
            <text:p>MES S/.</text:p>
          </table:table-cell>
          <table:table-cell table:style-name="ce347" office:value-type="string" calcext:value-type="string">
            <text:p>TOTAL</text:p>
            <text:p>DIARIO S/.</text:p>
          </table:table-cell>
          <table:table-cell table:style-name="ce174" table:number-columns-repeated="20"/>
          <table:table-cell table:number-columns-repeated="16358"/>
        </table:table-row>
        <table:table-row table:style-name="ro11">
          <table:table-cell table:style-name="ce173"/>
          <table:table-cell table:style-name="ce327" office:value-type="string" calcext:value-type="string">
            <text:p>A</text:p>
          </table:table-cell>
          <table:table-cell table:style-name="ce335" table:formula="of:=[$Presupuesto_Ventas.$C$19]" office:value-type="float" office:value="6" calcext:value-type="float">
            <text:p>6.0</text:p>
          </table:table-cell>
          <table:table-cell table:style-name="ce340" table:formula="of:=+[.E13]*12" office:value-type="float" office:value="668447.76119403" calcext:value-type="float">
            <text:p>668447.76</text:p>
          </table:table-cell>
          <table:table-cell table:style-name="ce340" table:formula="of:=[.E13]" office:value-type="float" office:value="55703.9800995025" calcext:value-type="float">
            <text:p>55703.98</text:p>
          </table:table-cell>
          <table:table-cell table:style-name="ce349" table:formula="of:=[.E13]/30" office:value-type="float" office:value="1856.79933665008" calcext:value-type="float">
            <text:p>1856.80</text:p>
          </table:table-cell>
          <table:table-cell table:style-name="ce174" table:number-columns-repeated="20"/>
          <table:table-cell table:number-columns-repeated="16358"/>
        </table:table-row>
        <table:table-row table:style-name="ro1">
          <table:table-cell table:style-name="ce173" table:number-columns-repeated="2"/>
          <table:table-cell table:style-name="ce221" table:number-columns-repeated="4"/>
          <table:table-cell table:style-name="ce174" table:number-columns-repeated="20"/>
          <table:table-cell table:number-columns-repeated="16358"/>
        </table:table-row>
        <table:table-row table:style-name="ro11">
          <table:table-cell table:style-name="ce173"/>
          <table:table-cell table:style-name="ce174"/>
          <table:table-cell table:style-name="ce221" table:number-columns-repeated="4"/>
          <table:table-cell table:style-name="ce174" table:number-columns-repeated="20"/>
          <table:table-cell table:number-columns-repeated="16358"/>
        </table:table-row>
        <table:table-row table:style-name="ro1" table:number-rows-repeated="200">
          <table:table-cell table:style-name="ce173"/>
          <table:table-cell table:style-name="ce174" table:number-columns-repeated="25"/>
          <table:table-cell table:number-columns-repeated="16358"/>
        </table:table-row>
        <table:table-row table:style-name="ro7" table:number-rows-repeated="729">
          <table:table-cell table:style-name="ce174" table:number-columns-repeated="26"/>
          <table:table-cell table:number-columns-repeated="16358"/>
        </table:table-row>
        <table:table-row table:style-name="ro2" table:number-rows-repeated="104762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lujo_Deuda" table:style-name="ta11">
        <table:table-column table:style-name="co1" table:number-columns-repeated="2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1" table:default-cell-style-name="Default"/>
        <table:table-column table:style-name="co55" table:default-cell-style-name="Default"/>
        <table:table-column table:style-name="co1" table:default-cell-style-name="Default"/>
        <table:table-column table:style-name="co7" table:number-columns-repeated="19" table:default-cell-style-name="Default"/>
        <table:table-column table:style-name="co8" table:number-columns-repeated="16358" table:default-cell-style-name="Default"/>
        <table:table-row table:style-name="ro16">
          <table:table-cell table:style-name="ce350" table:number-columns-repeated="26"/>
          <table:table-cell table:number-columns-repeated="16358"/>
        </table:table-row>
        <table:table-row table:style-name="ro24">
          <table:table-cell table:style-name="ce350"/>
          <table:table-cell table:style-name="ce351" office:value-type="string" calcext:value-type="string" table:number-columns-spanned="6" table:number-rows-spanned="1">
            <text:p>Tabla de Amortización de Deuda</text:p>
          </table:table-cell>
          <table:covered-table-cell table:number-columns-repeated="5" table:style-name="ce12"/>
          <table:table-cell table:style-name="ce350" table:number-columns-repeated="19"/>
          <table:table-cell table:number-columns-repeated="16358"/>
        </table:table-row>
        <table:table-row table:style-name="ro16">
          <table:table-cell table:style-name="ce350" table:number-columns-repeated="2"/>
          <table:table-cell table:style-name="ce357" office:value-type="string" calcext:value-type="string">
            <text:p>Préstamo</text:p>
          </table:table-cell>
          <table:table-cell table:style-name="ce362" table:formula="of:=[$Inversion_Inicial.H37]" office:value-type="float" office:value="8067" calcext:value-type="float">
            <text:p>8,067.00</text:p>
          </table:table-cell>
          <table:table-cell table:style-name="ce350" table:number-columns-repeated="22"/>
          <table:table-cell table:number-columns-repeated="16358"/>
        </table:table-row>
        <table:table-row table:style-name="ro16">
          <table:table-cell table:style-name="ce350" table:number-columns-repeated="2"/>
          <table:table-cell table:style-name="ce357" office:value-type="string" calcext:value-type="string">
            <text:p>TEA Nominal</text:p>
          </table:table-cell>
          <table:table-cell table:style-name="ce28" table:formula="of:=[$Resumen.H17]" office:value-type="percentage" office:value="0.22" calcext:value-type="percentage">
            <text:p>22 %</text:p>
          </table:table-cell>
          <table:table-cell table:style-name="ce350" table:number-columns-repeated="22"/>
          <table:table-cell table:number-columns-repeated="16358"/>
        </table:table-row>
        <table:table-row table:style-name="ro16">
          <table:table-cell table:style-name="ce350" table:number-columns-repeated="2"/>
          <table:table-cell table:style-name="ce357" office:value-type="string" calcext:value-type="string">
            <text:p>TEM Nominal</text:p>
          </table:table-cell>
          <table:table-cell table:style-name="ce363" table:formula="of:=POWER((1+[.D4]);(1/[.D9]))-1" office:value-type="percentage" office:value="0.0167089638731281" calcext:value-type="percentage">
            <text:p>1.7%</text:p>
          </table:table-cell>
          <table:table-cell table:style-name="ce350" table:number-columns-repeated="22"/>
          <table:table-cell table:number-columns-repeated="16358"/>
        </table:table-row>
        <table:table-row table:style-name="ro16">
          <table:table-cell table:style-name="ce350" table:number-columns-repeated="2"/>
          <table:table-cell table:style-name="ce357" office:value-type="string" calcext:value-type="string">
            <text:p>Inflación Anual</text:p>
          </table:table-cell>
          <table:table-cell table:style-name="ce363" office:value-type="percentage" office:value="0.029" calcext:value-type="percentage">
            <text:p>2.9%</text:p>
          </table:table-cell>
          <table:table-cell table:style-name="ce350" table:number-columns-repeated="22"/>
          <table:table-cell table:number-columns-repeated="16358"/>
        </table:table-row>
        <table:table-row table:style-name="ro16">
          <table:table-cell table:style-name="ce350" table:number-columns-repeated="2"/>
          <table:table-cell table:style-name="ce357" office:value-type="string" calcext:value-type="string">
            <text:p>Inflación del mes</text:p>
          </table:table-cell>
          <table:table-cell table:style-name="ce364" table:formula="of:=POWER((1+[.D6]);(1/[.D9]))-1" office:value-type="percentage" office:value="0.00238512797392709" calcext:value-type="percentage">
            <text:p>0.24 %</text:p>
          </table:table-cell>
          <table:table-cell table:style-name="ce350" table:number-columns-repeated="22"/>
          <table:table-cell table:number-columns-repeated="16358"/>
        </table:table-row>
        <table:table-row table:style-name="ro16">
          <table:table-cell table:style-name="ce350" table:number-columns-repeated="2"/>
          <table:table-cell table:style-name="ce357" office:value-type="string" calcext:value-type="string">
            <text:p>TEM Real</text:p>
          </table:table-cell>
          <table:table-cell table:style-name="ce364" table:formula="of:=((1+[.D5])/(1+[.D7]))-1" office:value-type="percentage" office:value="0.0142897530095574" calcext:value-type="percentage">
            <text:p>1.43 %</text:p>
          </table:table-cell>
          <table:table-cell table:style-name="ce350" table:number-columns-repeated="22"/>
          <table:table-cell table:number-columns-repeated="16358"/>
        </table:table-row>
        <table:table-row table:style-name="ro16">
          <table:table-cell table:style-name="ce350" table:number-columns-repeated="2"/>
          <table:table-cell table:style-name="ce357" office:value-type="string" calcext:value-type="string">
            <text:p>n</text:p>
          </table:table-cell>
          <table:table-cell table:style-name="ce350" office:value-type="float" office:value="12" calcext:value-type="float">
            <text:p>12</text:p>
          </table:table-cell>
          <table:table-cell table:style-name="ce350" table:number-columns-repeated="22"/>
          <table:table-cell table:number-columns-repeated="16358"/>
        </table:table-row>
        <table:table-row table:style-name="ro16">
          <table:table-cell table:style-name="ce350" table:number-columns-repeated="2"/>
          <table:table-cell table:style-name="ce357" office:value-type="string" calcext:value-type="string">
            <text:p>Cuota Capital</text:p>
          </table:table-cell>
          <table:table-cell table:style-name="ce365" table:formula="of:=[.D3]/[.D9]" office:value-type="float" office:value="672.25" calcext:value-type="float">
            <text:p>672.25</text:p>
          </table:table-cell>
          <table:table-cell table:style-name="ce350" table:number-columns-repeated="22"/>
          <table:table-cell table:number-columns-repeated="16358"/>
        </table:table-row>
        <table:table-row table:style-name="ro16">
          <table:table-cell table:style-name="ce350" table:number-columns-repeated="26"/>
          <table:table-cell table:number-columns-repeated="16358"/>
        </table:table-row>
        <table:table-row table:style-name="ro16">
          <table:table-cell table:style-name="ce350"/>
          <table:table-cell table:style-name="ce352" office:value-type="string" calcext:value-type="string">
            <text:p>Trimestres</text:p>
          </table:table-cell>
          <table:table-cell table:style-name="ce352" office:value-type="string" calcext:value-type="string">
            <text:p>Saldo Inicial</text:p>
          </table:table-cell>
          <table:table-cell table:style-name="ce352" office:value-type="string" calcext:value-type="string">
            <text:p>Interes</text:p>
          </table:table-cell>
          <table:table-cell table:style-name="ce352" office:value-type="string" calcext:value-type="string">
            <text:p>Cuota</text:p>
          </table:table-cell>
          <table:table-cell table:style-name="ce352" office:value-type="string" calcext:value-type="string">
            <text:p>Amortizacion</text:p>
          </table:table-cell>
          <table:table-cell table:style-name="ce352" office:value-type="string" calcext:value-type="string">
            <text:p>Saldo Final</text:p>
          </table:table-cell>
          <table:table-cell table:style-name="ce350" table:number-columns-repeated="19"/>
          <table:table-cell table:number-columns-repeated="16358"/>
        </table:table-row>
        <table:table-row table:style-name="ro16">
          <table:table-cell table:style-name="ce350"/>
          <table:table-cell table:style-name="ce353" office:value-type="string" calcext:value-type="string">
            <text:p>Todo Año 1</text:p>
          </table:table-cell>
          <table:table-cell table:style-name="ce358"/>
          <table:table-cell table:style-name="ce358" table:formula="of:=SUM([.D14:.D25])" office:value-type="float" office:value="749.290343932646" calcext:value-type="float">
            <text:p>749.29</text:p>
          </table:table-cell>
          <table:table-cell table:style-name="ce358" table:formula="of:=SUM([.E14:.E25])" office:value-type="float" office:value="8067" calcext:value-type="float">
            <text:p>8,067.00</text:p>
          </table:table-cell>
          <table:table-cell table:style-name="ce358" table:formula="of:=SUM([.F14:.F25])" office:value-type="float" office:value="8816.29034393265" calcext:value-type="float">
            <text:p>8,816.29</text:p>
          </table:table-cell>
          <table:table-cell table:style-name="ce358"/>
          <table:table-cell table:style-name="ce350" table:number-columns-repeated="19"/>
          <table:table-cell table:number-columns-repeated="16358"/>
        </table:table-row>
        <table:table-row table:style-name="ro16">
          <table:table-cell table:style-name="ce350"/>
          <table:table-cell table:style-name="ce354" office:value-type="float" office:value="1" calcext:value-type="float">
            <text:p>1</text:p>
          </table:table-cell>
          <table:table-cell table:style-name="ce359" table:formula="of:=[.D3]" office:value-type="float" office:value="8067" calcext:value-type="float">
            <text:p>8,067.00</text:p>
          </table:table-cell>
          <table:table-cell table:style-name="ce359" table:formula="of:=[.C14]*[.$D$8]" office:value-type="float" office:value="115.275437528099" calcext:value-type="float">
            <text:p>115.28</text:p>
          </table:table-cell>
          <table:table-cell table:style-name="ce359" table:formula="of:=[.$D$10]" office:value-type="float" office:value="672.25" calcext:value-type="float">
            <text:p>672.25</text:p>
          </table:table-cell>
          <table:table-cell table:style-name="ce359" table:formula="of:=[.D14]+[.E14]" office:value-type="float" office:value="787.525437528099" calcext:value-type="float">
            <text:p>787.53</text:p>
          </table:table-cell>
          <table:table-cell table:style-name="ce359" table:formula="of:=[.C14]-[.E14]" office:value-type="float" office:value="7394.75" calcext:value-type="float">
            <text:p>7,394.75</text:p>
          </table:table-cell>
          <table:table-cell table:style-name="ce350" table:number-columns-repeated="19"/>
          <table:table-cell table:number-columns-repeated="16358"/>
        </table:table-row>
        <table:table-row table:style-name="ro16">
          <table:table-cell table:style-name="ce350"/>
          <table:table-cell table:style-name="ce354" office:value-type="float" office:value="2" calcext:value-type="float">
            <text:p>2</text:p>
          </table:table-cell>
          <table:table-cell table:style-name="ce359" table:formula="of:=[.G14]" office:value-type="float" office:value="7394.75" calcext:value-type="float">
            <text:p>7,394.75</text:p>
          </table:table-cell>
          <table:table-cell table:style-name="ce359" table:formula="of:=[.C15]*[.$D$8]" office:value-type="float" office:value="105.669151067424" calcext:value-type="float">
            <text:p>105.67</text:p>
          </table:table-cell>
          <table:table-cell table:style-name="ce359" table:formula="of:=[.$D$10]" office:value-type="float" office:value="672.25" calcext:value-type="float">
            <text:p>672.25</text:p>
          </table:table-cell>
          <table:table-cell table:style-name="ce359" table:formula="of:=[.D15]+[.E15]" office:value-type="float" office:value="777.919151067424" calcext:value-type="float">
            <text:p>777.92</text:p>
          </table:table-cell>
          <table:table-cell table:style-name="ce359" table:formula="of:=[.C15]-[.E15]" office:value-type="float" office:value="6722.5" calcext:value-type="float">
            <text:p>6,722.50</text:p>
          </table:table-cell>
          <table:table-cell table:style-name="ce350" table:number-columns-repeated="19"/>
          <table:table-cell table:number-columns-repeated="16358"/>
        </table:table-row>
        <table:table-row table:style-name="ro16">
          <table:table-cell table:style-name="ce350"/>
          <table:table-cell table:style-name="ce354" office:value-type="float" office:value="3" calcext:value-type="float">
            <text:p>3</text:p>
          </table:table-cell>
          <table:table-cell table:style-name="ce359" table:formula="of:=[.G15]" office:value-type="float" office:value="6722.5" calcext:value-type="float">
            <text:p>6,722.50</text:p>
          </table:table-cell>
          <table:table-cell table:style-name="ce359" table:formula="of:=[.C16]*[.$D$8]" office:value-type="float" office:value="96.0628646067494" calcext:value-type="float">
            <text:p>96.06</text:p>
          </table:table-cell>
          <table:table-cell table:style-name="ce359" table:formula="of:=[.$D$10]" office:value-type="float" office:value="672.25" calcext:value-type="float">
            <text:p>672.25</text:p>
          </table:table-cell>
          <table:table-cell table:style-name="ce359" table:formula="of:=[.D16]+[.E16]" office:value-type="float" office:value="768.312864606749" calcext:value-type="float">
            <text:p>768.31</text:p>
          </table:table-cell>
          <table:table-cell table:style-name="ce359" table:formula="of:=[.C16]-[.E16]" office:value-type="float" office:value="6050.25" calcext:value-type="float">
            <text:p>6,050.25</text:p>
          </table:table-cell>
          <table:table-cell table:style-name="ce350" table:number-columns-repeated="19"/>
          <table:table-cell table:number-columns-repeated="16358"/>
        </table:table-row>
        <table:table-row table:style-name="ro16">
          <table:table-cell table:style-name="ce350"/>
          <table:table-cell table:style-name="ce354" office:value-type="float" office:value="4" calcext:value-type="float">
            <text:p>4</text:p>
          </table:table-cell>
          <table:table-cell table:style-name="ce359" table:formula="of:=[.G16]" office:value-type="float" office:value="6050.25" calcext:value-type="float">
            <text:p>6,050.25</text:p>
          </table:table-cell>
          <table:table-cell table:style-name="ce359" table:formula="of:=[.C17]*[.$D$8]" office:value-type="float" office:value="86.4565781460745" calcext:value-type="float">
            <text:p>86.46</text:p>
          </table:table-cell>
          <table:table-cell table:style-name="ce359" table:formula="of:=[.$D$10]" office:value-type="float" office:value="672.25" calcext:value-type="float">
            <text:p>672.25</text:p>
          </table:table-cell>
          <table:table-cell table:style-name="ce359" table:formula="of:=[.D17]+[.E17]" office:value-type="float" office:value="758.706578146074" calcext:value-type="float">
            <text:p>758.71</text:p>
          </table:table-cell>
          <table:table-cell table:style-name="ce359" table:formula="of:=[.C17]-[.E17]" office:value-type="float" office:value="5378" calcext:value-type="float">
            <text:p>5,378.00</text:p>
          </table:table-cell>
          <table:table-cell table:style-name="ce350" table:number-columns-repeated="19"/>
          <table:table-cell table:number-columns-repeated="16358"/>
        </table:table-row>
        <table:table-row table:style-name="ro16">
          <table:table-cell table:style-name="ce350"/>
          <table:table-cell table:style-name="ce354" office:value-type="float" office:value="5" calcext:value-type="float">
            <text:p>5</text:p>
          </table:table-cell>
          <table:table-cell table:style-name="ce359" table:formula="of:=[.G17]" office:value-type="float" office:value="5378" calcext:value-type="float">
            <text:p>5,378.00</text:p>
          </table:table-cell>
          <table:table-cell table:style-name="ce359" table:formula="of:=[.C18]*[.$D$8]" office:value-type="float" office:value="76.8502916853995" calcext:value-type="float">
            <text:p>76.85</text:p>
          </table:table-cell>
          <table:table-cell table:style-name="ce359" table:formula="of:=[.$D$10]" office:value-type="float" office:value="672.25" calcext:value-type="float">
            <text:p>672.25</text:p>
          </table:table-cell>
          <table:table-cell table:style-name="ce359" table:formula="of:=[.D18]+[.E18]" office:value-type="float" office:value="749.1002916854" calcext:value-type="float">
            <text:p>749.10</text:p>
          </table:table-cell>
          <table:table-cell table:style-name="ce359" table:formula="of:=[.C18]-[.E18]" office:value-type="float" office:value="4705.75" calcext:value-type="float">
            <text:p>4,705.75</text:p>
          </table:table-cell>
          <table:table-cell table:style-name="ce350" table:number-columns-repeated="19"/>
          <table:table-cell table:number-columns-repeated="16358"/>
        </table:table-row>
        <table:table-row table:style-name="ro16">
          <table:table-cell table:style-name="ce350"/>
          <table:table-cell table:style-name="ce354" office:value-type="float" office:value="6" calcext:value-type="float">
            <text:p>6</text:p>
          </table:table-cell>
          <table:table-cell table:style-name="ce359" table:formula="of:=[.G18]" office:value-type="float" office:value="4705.75" calcext:value-type="float">
            <text:p>4,705.75</text:p>
          </table:table-cell>
          <table:table-cell table:style-name="ce359" table:formula="of:=[.C19]*[.$D$8]" office:value-type="float" office:value="67.2440052247246" calcext:value-type="float">
            <text:p>67.24</text:p>
          </table:table-cell>
          <table:table-cell table:style-name="ce359" table:formula="of:=[.$D$10]" office:value-type="float" office:value="672.25" calcext:value-type="float">
            <text:p>672.25</text:p>
          </table:table-cell>
          <table:table-cell table:style-name="ce359" table:formula="of:=[.D19]+[.E19]" office:value-type="float" office:value="739.494005224725" calcext:value-type="float">
            <text:p>739.49</text:p>
          </table:table-cell>
          <table:table-cell table:style-name="ce359" table:formula="of:=[.C19]-[.E19]" office:value-type="float" office:value="4033.5" calcext:value-type="float">
            <text:p>4,033.50</text:p>
          </table:table-cell>
          <table:table-cell table:style-name="ce350" table:number-columns-repeated="19"/>
          <table:table-cell table:number-columns-repeated="16358"/>
        </table:table-row>
        <table:table-row table:style-name="ro16">
          <table:table-cell table:style-name="ce350"/>
          <table:table-cell table:style-name="ce354" office:value-type="float" office:value="7" calcext:value-type="float">
            <text:p>7</text:p>
          </table:table-cell>
          <table:table-cell table:style-name="ce359" table:formula="of:=[.G19]" office:value-type="float" office:value="4033.5" calcext:value-type="float">
            <text:p>4,033.50</text:p>
          </table:table-cell>
          <table:table-cell table:style-name="ce359" table:formula="of:=[.C20]*[.$D$8]" office:value-type="float" office:value="57.6377187640497" calcext:value-type="float">
            <text:p>57.64</text:p>
          </table:table-cell>
          <table:table-cell table:style-name="ce359" table:formula="of:=[.$D$10]" office:value-type="float" office:value="672.25" calcext:value-type="float">
            <text:p>672.25</text:p>
          </table:table-cell>
          <table:table-cell table:style-name="ce359" table:formula="of:=[.D20]+[.E20]" office:value-type="float" office:value="729.88771876405" calcext:value-type="float">
            <text:p>729.89</text:p>
          </table:table-cell>
          <table:table-cell table:style-name="ce359" table:formula="of:=[.C20]-[.E20]" office:value-type="float" office:value="3361.25" calcext:value-type="float">
            <text:p>3,361.25</text:p>
          </table:table-cell>
          <table:table-cell table:style-name="ce350" table:number-columns-repeated="19"/>
          <table:table-cell table:number-columns-repeated="16358"/>
        </table:table-row>
        <table:table-row table:style-name="ro7">
          <table:table-cell table:style-name="ce350"/>
          <table:table-cell table:style-name="ce354" office:value-type="float" office:value="8" calcext:value-type="float">
            <text:p>8</text:p>
          </table:table-cell>
          <table:table-cell table:style-name="ce359" table:formula="of:=[.G20]" office:value-type="float" office:value="3361.25" calcext:value-type="float">
            <text:p>3,361.25</text:p>
          </table:table-cell>
          <table:table-cell table:style-name="ce359" table:formula="of:=[.C21]*[.$D$8]" office:value-type="float" office:value="48.0314323033747" calcext:value-type="float">
            <text:p>48.03</text:p>
          </table:table-cell>
          <table:table-cell table:style-name="ce359" table:formula="of:=[.$D$10]" office:value-type="float" office:value="672.25" calcext:value-type="float">
            <text:p>672.25</text:p>
          </table:table-cell>
          <table:table-cell table:style-name="ce359" table:formula="of:=[.D21]+[.E21]" office:value-type="float" office:value="720.281432303375" calcext:value-type="float">
            <text:p>720.28</text:p>
          </table:table-cell>
          <table:table-cell table:style-name="ce359" table:formula="of:=[.C21]-[.E21]" office:value-type="float" office:value="2689" calcext:value-type="float">
            <text:p>2,689.00</text:p>
          </table:table-cell>
          <table:table-cell table:style-name="ce350" table:number-columns-repeated="19"/>
          <table:table-cell table:number-columns-repeated="16358"/>
        </table:table-row>
        <table:table-row table:style-name="ro7">
          <table:table-cell table:style-name="ce350"/>
          <table:table-cell table:style-name="ce354" office:value-type="float" office:value="9" calcext:value-type="float">
            <text:p>9</text:p>
          </table:table-cell>
          <table:table-cell table:style-name="ce359" table:formula="of:=[.G21]" office:value-type="float" office:value="2689" calcext:value-type="float">
            <text:p>2,689.00</text:p>
          </table:table-cell>
          <table:table-cell table:style-name="ce359" table:formula="of:=[.C22]*[.$D$8]" office:value-type="float" office:value="38.4251458426998" calcext:value-type="float">
            <text:p>38.43</text:p>
          </table:table-cell>
          <table:table-cell table:style-name="ce359" table:formula="of:=[.$D$10]" office:value-type="float" office:value="672.25" calcext:value-type="float">
            <text:p>672.25</text:p>
          </table:table-cell>
          <table:table-cell table:style-name="ce359" table:formula="of:=[.D22]+[.E22]" office:value-type="float" office:value="710.6751458427" calcext:value-type="float">
            <text:p>710.68</text:p>
          </table:table-cell>
          <table:table-cell table:style-name="ce359" table:formula="of:=[.C22]-[.E22]" office:value-type="float" office:value="2016.75" calcext:value-type="float">
            <text:p>2,016.75</text:p>
          </table:table-cell>
          <table:table-cell table:style-name="ce350" table:number-columns-repeated="19"/>
          <table:table-cell table:number-columns-repeated="16358"/>
        </table:table-row>
        <table:table-row table:style-name="ro7">
          <table:table-cell table:style-name="ce350"/>
          <table:table-cell table:style-name="ce354" office:value-type="float" office:value="10" calcext:value-type="float">
            <text:p>10</text:p>
          </table:table-cell>
          <table:table-cell table:style-name="ce359" table:formula="of:=[.G22]" office:value-type="float" office:value="2016.75" calcext:value-type="float">
            <text:p>2,016.75</text:p>
          </table:table-cell>
          <table:table-cell table:style-name="ce359" table:formula="of:=[.C23]*[.$D$8]" office:value-type="float" office:value="28.8188593820248" calcext:value-type="float">
            <text:p>28.82</text:p>
          </table:table-cell>
          <table:table-cell table:style-name="ce359" table:formula="of:=[.$D$10]" office:value-type="float" office:value="672.25" calcext:value-type="float">
            <text:p>672.25</text:p>
          </table:table-cell>
          <table:table-cell table:style-name="ce359" table:formula="of:=[.D23]+[.E23]" office:value-type="float" office:value="701.068859382025" calcext:value-type="float">
            <text:p>701.07</text:p>
          </table:table-cell>
          <table:table-cell table:style-name="ce359" table:formula="of:=[.C23]-[.E23]" office:value-type="float" office:value="1344.5" calcext:value-type="float">
            <text:p>1,344.50</text:p>
          </table:table-cell>
          <table:table-cell table:style-name="ce350" table:number-columns-repeated="19"/>
          <table:table-cell table:number-columns-repeated="16358"/>
        </table:table-row>
        <table:table-row table:style-name="ro7">
          <table:table-cell table:style-name="ce350"/>
          <table:table-cell table:style-name="ce354" office:value-type="float" office:value="11" calcext:value-type="float">
            <text:p>11</text:p>
          </table:table-cell>
          <table:table-cell table:style-name="ce359" table:formula="of:=[.G23]" office:value-type="float" office:value="1344.5" calcext:value-type="float">
            <text:p>1,344.50</text:p>
          </table:table-cell>
          <table:table-cell table:style-name="ce359" table:formula="of:=[.C24]*[.$D$8]" office:value-type="float" office:value="19.2125729213499" calcext:value-type="float">
            <text:p>19.21</text:p>
          </table:table-cell>
          <table:table-cell table:style-name="ce359" table:formula="of:=[.$D$10]" office:value-type="float" office:value="672.25" calcext:value-type="float">
            <text:p>672.25</text:p>
          </table:table-cell>
          <table:table-cell table:style-name="ce359" table:formula="of:=[.D24]+[.E24]" office:value-type="float" office:value="691.46257292135" calcext:value-type="float">
            <text:p>691.46</text:p>
          </table:table-cell>
          <table:table-cell table:style-name="ce359" table:formula="of:=[.C24]-[.E24]" office:value-type="float" office:value="672.25" calcext:value-type="float">
            <text:p>672.25</text:p>
          </table:table-cell>
          <table:table-cell table:style-name="ce350" table:number-columns-repeated="19"/>
          <table:table-cell table:number-columns-repeated="16358"/>
        </table:table-row>
        <table:table-row table:style-name="ro7">
          <table:table-cell table:style-name="ce350"/>
          <table:table-cell table:style-name="ce354" office:value-type="float" office:value="12" calcext:value-type="float">
            <text:p>12</text:p>
          </table:table-cell>
          <table:table-cell table:style-name="ce359" table:formula="of:=[.G24]" office:value-type="float" office:value="672.25" calcext:value-type="float">
            <text:p>672.25</text:p>
          </table:table-cell>
          <table:table-cell table:style-name="ce359" table:formula="of:=[.C25]*[.$D$8]" office:value-type="float" office:value="9.60628646067494" calcext:value-type="float">
            <text:p>9.61</text:p>
          </table:table-cell>
          <table:table-cell table:style-name="ce359" table:formula="of:=[.$D$10]" office:value-type="float" office:value="672.25" calcext:value-type="float">
            <text:p>672.25</text:p>
          </table:table-cell>
          <table:table-cell table:style-name="ce359" table:formula="of:=[.D25]+[.E25]" office:value-type="float" office:value="681.856286460675" calcext:value-type="float">
            <text:p>681.86</text:p>
          </table:table-cell>
          <table:table-cell table:style-name="ce359" table:formula="of:=[.C25]-[.E25]" office:value-type="float" office:value="0" calcext:value-type="float">
            <text:p>0.00</text:p>
          </table:table-cell>
          <table:table-cell table:style-name="ce350" table:number-columns-repeated="19"/>
          <table:table-cell table:number-columns-repeated="16358"/>
        </table:table-row>
        <table:table-row table:style-name="ro7">
          <table:table-cell table:style-name="ce350"/>
          <table:table-cell table:style-name="ce355" office:value-type="string" calcext:value-type="string">
            <text:p>TOTAL</text:p>
          </table:table-cell>
          <table:table-cell table:style-name="ce360"/>
          <table:table-cell table:style-name="ce360" table:formula="of:=SUM([.D14:.D25])" office:value-type="float" office:value="749.290343932646" calcext:value-type="float">
            <text:p>749.29</text:p>
          </table:table-cell>
          <table:table-cell table:style-name="ce360" table:formula="of:=SUM([.E14:.E25])" office:value-type="float" office:value="8067" calcext:value-type="float">
            <text:p>8,067.00</text:p>
          </table:table-cell>
          <table:table-cell table:style-name="ce360" table:formula="of:=[.D26]+[.E26]" office:value-type="float" office:value="8816.29034393265" calcext:value-type="float">
            <text:p>8,816.29</text:p>
          </table:table-cell>
          <table:table-cell table:style-name="ce360"/>
          <table:table-cell table:style-name="ce350" table:number-columns-repeated="19"/>
          <table:table-cell table:number-columns-repeated="16358"/>
        </table:table-row>
        <table:table-row table:style-name="ro7" table:number-rows-repeated="47">
          <table:table-cell table:style-name="ce350"/>
          <table:table-cell table:style-name="ce356"/>
          <table:table-cell table:style-name="ce361" table:number-columns-repeated="5"/>
          <table:table-cell table:style-name="ce350" table:number-columns-repeated="19"/>
          <table:table-cell table:number-columns-repeated="16358"/>
        </table:table-row>
        <table:table-row table:style-name="ro7">
          <table:table-cell table:style-name="ce350" table:number-columns-repeated="26"/>
          <table:table-cell table:number-columns-repeated="16358"/>
        </table:table-row>
        <table:table-row table:style-name="ro7" table:number-rows-repeated="926">
          <table:table-cell table:style-name="ce350" table:number-columns-repeated="26"/>
          <table:table-cell table:number-columns-repeated="16358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stado_Resultados" table:style-name="ta12">
        <table:table-column table:style-name="co24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49" table:default-cell-style-name="Default"/>
        <table:table-column table:style-name="co24" table:default-cell-style-name="Default"/>
        <table:table-column table:style-name="co62" table:default-cell-style-name="Default"/>
        <table:table-column table:style-name="co12" table:number-columns-repeated="4" table:default-cell-style-name="Default"/>
        <table:table-column table:style-name="co8" table:number-columns-repeated="16370" table:default-cell-style-name="Default"/>
        <table:table-row table:style-name="ro11">
          <table:table-cell table:style-name="ce1"/>
          <table:table-cell table:style-name="ce129"/>
          <table:table-cell table:style-name="ce215" table:number-columns-spanned="6" table:number-rows-spanned="1"/>
          <table:covered-table-cell table:number-columns-repeated="5" table:style-name="ce12"/>
          <table:table-cell table:style-name="ce1" table:number-columns-repeated="18"/>
          <table:table-cell table:number-columns-repeated="16358"/>
        </table:table-row>
        <table:table-row table:style-name="ro11">
          <table:table-cell table:style-name="ce1"/>
          <table:table-cell table:style-name="ce221"/>
          <table:table-cell table:style-name="ce366" office:value-type="string" calcext:value-type="string" table:number-columns-spanned="6" table:number-rows-spanned="1">
            <text:p>ESTADO DE RESULTADOS</text:p>
          </table:table-cell>
          <table:covered-table-cell table:number-columns-repeated="4" table:style-name="ce10"/>
          <table:covered-table-cell table:style-name="ce20"/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/>
          <table:table-cell table:style-name="ce221" table:number-columns-repeated="7"/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/>
          <table:table-cell table:style-name="ce221"/>
          <table:table-cell table:style-name="ce215" office:value-type="string" calcext:value-type="string" table:number-columns-spanned="6" table:number-rows-spanned="1">
            <text:p>REGIMEN ESPECIAL</text:p>
          </table:table-cell>
          <table:covered-table-cell table:number-columns-repeated="5" table:style-name="ce12"/>
          <table:table-cell table:style-name="ce1" table:number-columns-repeated="18"/>
          <table:table-cell table:number-columns-repeated="16358"/>
        </table:table-row>
        <table:table-row table:style-name="ro11">
          <table:table-cell table:style-name="ce1" table:number-columns-repeated="2"/>
          <table:table-cell table:style-name="ce221" table:number-columns-repeated="6"/>
          <table:table-cell table:style-name="ce1" table:number-columns-repeated="18"/>
          <table:table-cell table:number-columns-repeated="16358"/>
        </table:table-row>
        <table:table-row table:style-name="ro11">
          <table:table-cell table:style-name="ce1" table:number-columns-repeated="2"/>
          <table:table-cell table:style-name="ce367" office:value-type="string" calcext:value-type="string">
            <text:p>RUBRO</text:p>
          </table:table-cell>
          <table:table-cell table:style-name="ce372" office:value-type="float" office:value="1" calcext:value-type="float">
            <text:p>1</text:p>
          </table:table-cell>
          <table:table-cell table:style-name="ce372" table:formula="of:=1+[.D6]" office:value-type="float" office:value="2" calcext:value-type="float">
            <text:p>2</text:p>
          </table:table-cell>
          <table:table-cell table:style-name="ce372" table:formula="of:=1+[.E6]" office:value-type="float" office:value="3" calcext:value-type="float">
            <text:p>3</text:p>
          </table:table-cell>
          <table:table-cell table:style-name="ce372" table:formula="of:=1+[.F6]" office:value-type="float" office:value="4" calcext:value-type="float">
            <text:p>4</text:p>
          </table:table-cell>
          <table:table-cell table:style-name="ce372" table:formula="of:=1+[.G6]" office:value-type="float" office:value="5" calcext:value-type="float">
            <text:p>5</text:p>
          </table:table-cell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 table:number-columns-repeated="2"/>
          <table:table-cell table:style-name="ce368" office:value-type="string" calcext:value-type="string">
            <text:p>Ventas con IGV</text:p>
          </table:table-cell>
          <table:table-cell table:style-name="ce373" table:formula="of:=[$Presupuesto_Ventas.P19]" office:value-type="currency" office:currency="PEN" office:value="1995000" calcext:value-type="currency">
            <text:p><text:s/>S/ 1,995,000.00 </text:p>
          </table:table-cell>
          <table:table-cell table:style-name="ce373" table:formula="of:=[$Presupuesto_Ventas.P20]" office:value-type="currency" office:currency="PEN" office:value="2094758" calcext:value-type="currency">
            <text:p><text:s/>S/ 2,094,758.00 </text:p>
          </table:table-cell>
          <table:table-cell table:style-name="ce373" table:formula="of:=[$Presupuesto_Ventas.P21]" office:value-type="currency" office:currency="PEN" office:value="2199496.5" calcext:value-type="currency">
            <text:p><text:s/>S/ 2,199,496.50 </text:p>
          </table:table-cell>
          <table:table-cell table:style-name="ce373" table:formula="of:=[$Presupuesto_Ventas.P22]" office:value-type="currency" office:currency="PEN" office:value="2309471.875" calcext:value-type="currency">
            <text:p><text:s/>S/ 2,309,471.88 </text:p>
          </table:table-cell>
          <table:table-cell table:style-name="ce381" table:formula="of:=[$Presupuesto_Ventas.P23]" office:value-type="currency" office:currency="PEN" office:value="2424945.96875" calcext:value-type="currency">
            <text:p><text:s/>S/ 2,424,945.97 </text:p>
          </table:table-cell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 table:number-columns-repeated="2"/>
          <table:table-cell table:style-name="ce225" office:value-type="string" calcext:value-type="string">
            <text:p>Ventas Netas (sin IGV)</text:p>
          </table:table-cell>
          <table:table-cell table:style-name="ce374" office:value-type="string" office:string-value=" S/     1,690,678" calcext:value-type="string">
            <text:p><text:s text:c="2"/>S/ <text:s text:c="4"/>1,690,678 </text:p>
          </table:table-cell>
          <table:table-cell table:style-name="ce380" office:value-type="string" office:string-value=" S/    1,775,219" calcext:value-type="string">
            <text:p><text:s text:c="2"/>S/ <text:s text:c="3"/>1,775,219 </text:p>
          </table:table-cell>
          <table:table-cell table:style-name="ce380" office:value-type="string" office:string-value=" S/     1,863,980" calcext:value-type="string">
            <text:p><text:s text:c="2"/>S/ <text:s text:c="4"/>1,863,980 </text:p>
          </table:table-cell>
          <table:table-cell table:style-name="ce380" office:value-type="string" office:string-value=" S/    1,957,180" calcext:value-type="string">
            <text:p><text:s text:c="2"/>S/ <text:s text:c="3"/>1,957,180 </text:p>
          </table:table-cell>
          <table:table-cell table:style-name="ce380" office:value-type="string" office:string-value=" S/    2,055,039" calcext:value-type="string">
            <text:p><text:s text:c="2"/>S/ <text:s text:c="3"/>2,055,039 </text:p>
          </table:table-cell>
          <table:table-cell table:style-name="ce1"/>
          <table:table-cell table:style-name="ce383"/>
          <table:table-cell table:style-name="ce1" table:number-columns-repeated="16"/>
          <table:table-cell table:number-columns-repeated="16358"/>
        </table:table-row>
        <table:table-row table:style-name="ro1">
          <table:table-cell table:style-name="ce1" table:number-columns-repeated="2"/>
          <table:table-cell table:style-name="ce225" office:value-type="string" calcext:value-type="string">
            <text:p>(-) Costo de ventas</text:p>
          </table:table-cell>
          <table:table-cell table:style-name="ce375" table:formula="of:=[$Costos_Unitario.C21]*[$Presupuesto_Ventas.P7]" office:value-type="currency" office:currency="PEN" office:value="1916051.83333333" calcext:value-type="currency">
            <text:p><text:s/>S/ 1,916,051.83 </text:p>
          </table:table-cell>
          <table:table-cell table:style-name="ce375" table:formula="of:=[$Costos_Unitario.C21]*[$Presupuesto_Ventas.P8]" office:value-type="currency" office:currency="PEN" office:value="2011854.425" calcext:value-type="currency">
            <text:p><text:s/>S/ 2,011,854.43 </text:p>
          </table:table-cell>
          <table:table-cell table:style-name="ce375" table:formula="of:=[$Costos_Unitario.C21]*[$Presupuesto_Ventas.P9]" office:value-type="currency" office:currency="PEN" office:value="2112447.14625" calcext:value-type="currency">
            <text:p><text:s/>S/ 2,112,447.15 </text:p>
          </table:table-cell>
          <table:table-cell table:style-name="ce375" table:formula="of:=[$Costos_Unitario.C21]*[$Presupuesto_Ventas.P10]" office:value-type="currency" office:currency="PEN" office:value="2218069.5035625" calcext:value-type="currency">
            <text:p><text:s/>S/ 2,218,069.50 </text:p>
          </table:table-cell>
          <table:table-cell table:style-name="ce375" table:formula="of:=[$Costos_Unitario.C21]*[$Presupuesto_Ventas.P11]" office:value-type="currency" office:currency="PEN" office:value="2328972.97874063" calcext:value-type="currency">
            <text:p><text:s/>S/ 2,328,972.98 </text:p>
          </table:table-cell>
          <table:table-cell table:style-name="ce1"/>
          <table:table-cell table:style-name="ce384"/>
          <table:table-cell table:style-name="ce385" table:number-columns-repeated="4"/>
          <table:table-cell table:style-name="ce1" table:number-columns-repeated="12"/>
          <table:table-cell table:number-columns-repeated="16358"/>
        </table:table-row>
        <table:table-row table:style-name="ro1">
          <table:table-cell table:style-name="ce1" table:number-columns-repeated="2"/>
          <table:table-cell table:style-name="ce225" office:value-type="string" calcext:value-type="string">
            <text:p>Depreciacion Activo Fijo</text:p>
          </table:table-cell>
          <table:table-cell table:style-name="ce375" table:formula="of:=[$Deprecion_VR.F13]" office:value-type="currency" office:currency="PEN" office:value="2954.4" calcext:value-type="currency">
            <text:p><text:s/>S/ 2,954.40 </text:p>
          </table:table-cell>
          <table:table-cell table:style-name="ce375" table:formula="of:=[$Deprecion_VR.$F$13]" office:value-type="currency" office:currency="PEN" office:value="2954.4" calcext:value-type="currency">
            <text:p><text:s/>S/ 2,954.40 </text:p>
          </table:table-cell>
          <table:table-cell table:style-name="ce375" table:formula="of:=[$Deprecion_VR.$F$13]" office:value-type="currency" office:currency="PEN" office:value="2954.4" calcext:value-type="currency">
            <text:p><text:s/>S/ 2,954.40 </text:p>
          </table:table-cell>
          <table:table-cell table:style-name="ce375" table:formula="of:=[$Deprecion_VR.$F$13]" office:value-type="currency" office:currency="PEN" office:value="2954.4" calcext:value-type="currency">
            <text:p><text:s/>S/ 2,954.40 </text:p>
          </table:table-cell>
          <table:table-cell table:style-name="ce375" table:formula="of:=[$Deprecion_VR.$F$13]" office:value-type="currency" office:currency="PEN" office:value="2954.4" calcext:value-type="currency">
            <text:p><text:s/>S/ 2,954.40 </text:p>
          </table:table-cell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 table:number-columns-repeated="2"/>
          <table:table-cell table:style-name="ce369" office:value-type="string" calcext:value-type="string">
            <text:p>Utilidad Bruta</text:p>
          </table:table-cell>
          <table:table-cell table:style-name="ce376" table:formula="of:=[.D7]-[.D9]-[.D10]" office:value-type="currency" office:currency="PEN" office:value="75993.7666666668" calcext:value-type="currency">
            <text:p><text:s/>S/ 75,993.77 </text:p>
          </table:table-cell>
          <table:table-cell table:style-name="ce376" table:formula="of:=[.E7]-[.E9]-[.E10]" office:value-type="currency" office:currency="PEN" office:value="79949.1750000002" calcext:value-type="currency">
            <text:p><text:s/>S/ 79,949.18 </text:p>
          </table:table-cell>
          <table:table-cell table:style-name="ce376" table:formula="of:=[.F7]-[.F9]-[.F10]" office:value-type="currency" office:currency="PEN" office:value="84094.9537500003" calcext:value-type="currency">
            <text:p><text:s/>S/ 84,094.95 </text:p>
          </table:table-cell>
          <table:table-cell table:style-name="ce376" table:formula="of:=[.G7]-[.G9]-[.G10]" office:value-type="currency" office:currency="PEN" office:value="88447.9714375002" calcext:value-type="currency">
            <text:p><text:s/>S/ 88,447.97 </text:p>
          </table:table-cell>
          <table:table-cell table:style-name="ce376" table:formula="of:=[.H7]-[.H9]-[.H10]" office:value-type="currency" office:currency="PEN" office:value="93018.5900093749" calcext:value-type="currency">
            <text:p><text:s/>S/ 93,018.59 </text:p>
          </table:table-cell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 table:number-columns-repeated="2"/>
          <table:table-cell table:style-name="ce225" office:value-type="string" calcext:value-type="string">
            <text:p>(-) Gastos operativos</text:p>
          </table:table-cell>
          <table:table-cell table:style-name="ce375" table:formula="of:=[$Gastos_Operativos.$H$18]*12" office:value-type="currency" office:currency="PEN" office:value="64128" calcext:value-type="currency">
            <text:p><text:s/>S/ 64,128.00 </text:p>
          </table:table-cell>
          <table:table-cell table:style-name="ce375" table:formula="of:=[$Gastos_Operativos.$H$18]*12" office:value-type="currency" office:currency="PEN" office:value="64128" calcext:value-type="currency">
            <text:p><text:s/>S/ 64,128.00 </text:p>
          </table:table-cell>
          <table:table-cell table:style-name="ce375" table:formula="of:=[$Gastos_Operativos.$H$18]*12" office:value-type="currency" office:currency="PEN" office:value="64128" calcext:value-type="currency">
            <text:p><text:s/>S/ 64,128.00 </text:p>
          </table:table-cell>
          <table:table-cell table:style-name="ce375" table:formula="of:=[$Gastos_Operativos.$H$18]*12" office:value-type="currency" office:currency="PEN" office:value="64128" calcext:value-type="currency">
            <text:p><text:s/>S/ 64,128.00 </text:p>
          </table:table-cell>
          <table:table-cell table:style-name="ce375" table:formula="of:=[$Gastos_Operativos.$H$18]*12" office:value-type="currency" office:currency="PEN" office:value="64128" calcext:value-type="currency">
            <text:p><text:s/>S/ 64,128.00 </text:p>
          </table:table-cell>
          <table:table-cell table:style-name="ce1" table:number-columns-repeated="2"/>
          <table:table-cell table:style-name="ce129"/>
          <table:table-cell table:style-name="ce1" table:number-columns-repeated="15"/>
          <table:table-cell table:number-columns-repeated="16358"/>
        </table:table-row>
        <table:table-row table:style-name="ro1">
          <table:table-cell table:style-name="ce1" table:number-columns-repeated="2"/>
          <table:table-cell table:style-name="ce225" office:value-type="string" calcext:value-type="string">
            <text:p>Gastos administrativos</text:p>
          </table:table-cell>
          <table:table-cell table:style-name="ce377" table:formula="of:=[$Gastos_Operativos.$H$13]*12" office:value-type="currency" office:currency="PEN" office:value="36168" calcext:value-type="currency">
            <text:p><text:s/>S/ 36,168.00 </text:p>
          </table:table-cell>
          <table:table-cell table:style-name="ce377" table:formula="of:=[$Gastos_Operativos.$H$13]*12" office:value-type="currency" office:currency="PEN" office:value="36168" calcext:value-type="currency">
            <text:p><text:s/>S/ 36,168.00 </text:p>
          </table:table-cell>
          <table:table-cell table:style-name="ce377" table:formula="of:=[$Gastos_Operativos.$H$13]*12" office:value-type="currency" office:currency="PEN" office:value="36168" calcext:value-type="currency">
            <text:p><text:s/>S/ 36,168.00 </text:p>
          </table:table-cell>
          <table:table-cell table:style-name="ce377" table:formula="of:=[$Gastos_Operativos.$H$13]*12" office:value-type="currency" office:currency="PEN" office:value="36168" calcext:value-type="currency">
            <text:p><text:s/>S/ 36,168.00 </text:p>
          </table:table-cell>
          <table:table-cell table:style-name="ce377" table:formula="of:=[$Gastos_Operativos.$H$13]*12" office:value-type="currency" office:currency="PEN" office:value="36168" calcext:value-type="currency">
            <text:p><text:s/>S/ 36,168.00 </text:p>
          </table:table-cell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 table:number-columns-repeated="2"/>
          <table:table-cell table:style-name="ce225" office:value-type="string" calcext:value-type="string">
            <text:p>Gastos de ventas</text:p>
          </table:table-cell>
          <table:table-cell table:style-name="ce375" table:formula="of:=[$Gastos_Operativos.$H$17]*12" office:value-type="currency" office:currency="PEN" office:value="27960" calcext:value-type="currency">
            <text:p><text:s/>S/ 27,960.00 </text:p>
          </table:table-cell>
          <table:table-cell table:style-name="ce375" table:formula="of:=[$Gastos_Operativos.$H$17]*12" office:value-type="currency" office:currency="PEN" office:value="27960" calcext:value-type="currency">
            <text:p><text:s/>S/ 27,960.00 </text:p>
          </table:table-cell>
          <table:table-cell table:style-name="ce375" table:formula="of:=[$Gastos_Operativos.$H$17]*12" office:value-type="currency" office:currency="PEN" office:value="27960" calcext:value-type="currency">
            <text:p><text:s/>S/ 27,960.00 </text:p>
          </table:table-cell>
          <table:table-cell table:style-name="ce375" table:formula="of:=[$Gastos_Operativos.$H$17]*12" office:value-type="currency" office:currency="PEN" office:value="27960" calcext:value-type="currency">
            <text:p><text:s/>S/ 27,960.00 </text:p>
          </table:table-cell>
          <table:table-cell table:style-name="ce375" table:formula="of:=[$Gastos_Operativos.$H$17]*12" office:value-type="currency" office:currency="PEN" office:value="27960" calcext:value-type="currency">
            <text:p><text:s/>S/ 27,960.00 </text:p>
          </table:table-cell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 table:number-columns-repeated="2"/>
          <table:table-cell table:style-name="ce225" office:value-type="string" calcext:value-type="string">
            <text:p>Amortizacion de intangibles</text:p>
          </table:table-cell>
          <table:table-cell table:style-name="ce375" table:formula="of:=[$Inversion_Inicial.$F$23]/5" office:value-type="currency" office:currency="PEN" office:value="334" calcext:value-type="currency">
            <text:p><text:s/>S/ 334.00 </text:p>
          </table:table-cell>
          <table:table-cell table:style-name="ce375" table:formula="of:=[$Inversion_Inicial.$F$23]/5" office:value-type="currency" office:currency="PEN" office:value="334" calcext:value-type="currency">
            <text:p><text:s/>S/ 334.00 </text:p>
          </table:table-cell>
          <table:table-cell table:style-name="ce375" table:formula="of:=[$Inversion_Inicial.$F$23]/5" office:value-type="currency" office:currency="PEN" office:value="334" calcext:value-type="currency">
            <text:p><text:s/>S/ 334.00 </text:p>
          </table:table-cell>
          <table:table-cell table:style-name="ce375" table:formula="of:=[$Inversion_Inicial.$F$23]/5" office:value-type="currency" office:currency="PEN" office:value="334" calcext:value-type="currency">
            <text:p><text:s/>S/ 334.00 </text:p>
          </table:table-cell>
          <table:table-cell table:style-name="ce375" table:formula="of:=[$Inversion_Inicial.$F$23]/5" office:value-type="currency" office:currency="PEN" office:value="334" calcext:value-type="currency">
            <text:p><text:s/>S/ 334.00 </text:p>
          </table:table-cell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 table:number-columns-repeated="2"/>
          <table:table-cell table:style-name="ce369" office:value-type="string" calcext:value-type="string">
            <text:p>Utilidad Operativa</text:p>
          </table:table-cell>
          <table:table-cell table:style-name="ce376" table:formula="of:=[.D11]-[.D12]-[.D15]" office:value-type="currency" office:currency="PEN" office:value="11531.7666666668" calcext:value-type="currency">
            <text:p><text:s/>S/ 11,531.77 </text:p>
          </table:table-cell>
          <table:table-cell table:style-name="ce376" table:formula="of:=[.E11]-[.E12]-[.E15]" office:value-type="currency" office:currency="PEN" office:value="15487.1750000002" calcext:value-type="currency">
            <text:p><text:s/>S/ 15,487.18 </text:p>
          </table:table-cell>
          <table:table-cell table:style-name="ce376" table:formula="of:=[.F11]-[.F12]-[.F15]" office:value-type="currency" office:currency="PEN" office:value="19632.9537500002" calcext:value-type="currency">
            <text:p><text:s/>S/ 19,632.95 </text:p>
          </table:table-cell>
          <table:table-cell table:style-name="ce376" table:formula="of:=[.G11]-[.G12]-[.G15]" office:value-type="currency" office:currency="PEN" office:value="23985.9714375002" calcext:value-type="currency">
            <text:p><text:s/>S/ 23,985.97 </text:p>
          </table:table-cell>
          <table:table-cell table:style-name="ce376" table:formula="of:=[.H11]-[.H12]-[.H15]" office:value-type="currency" office:currency="PEN" office:value="28556.5900093749" calcext:value-type="currency">
            <text:p><text:s/>S/ 28,556.59 </text:p>
          </table:table-cell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 table:number-columns-repeated="2"/>
          <table:table-cell table:style-name="ce369" office:value-type="string" calcext:value-type="string">
            <text:p>Utilidad antes de impuestos</text:p>
          </table:table-cell>
          <table:table-cell table:style-name="ce376" table:formula="of:=[.D16]" office:value-type="currency" office:currency="PEN" office:value="11531.7666666668" calcext:value-type="currency">
            <text:p><text:s/>S/ 11,531.77 </text:p>
          </table:table-cell>
          <table:table-cell table:style-name="ce376" table:formula="of:=[.E16]" office:value-type="currency" office:currency="PEN" office:value="15487.1750000002" calcext:value-type="currency">
            <text:p><text:s/>S/ 15,487.18 </text:p>
          </table:table-cell>
          <table:table-cell table:style-name="ce376" table:formula="of:=[.F16]" office:value-type="currency" office:currency="PEN" office:value="19632.9537500002" calcext:value-type="currency">
            <text:p><text:s/>S/ 19,632.95 </text:p>
          </table:table-cell>
          <table:table-cell table:style-name="ce376" table:formula="of:=[.G16]" office:value-type="currency" office:currency="PEN" office:value="23985.9714375002" calcext:value-type="currency">
            <text:p><text:s/>S/ 23,985.97 </text:p>
          </table:table-cell>
          <table:table-cell table:style-name="ce376" table:formula="of:=[.H16]" office:value-type="currency" office:currency="PEN" office:value="28556.5900093749" calcext:value-type="currency">
            <text:p><text:s/>S/ 28,556.59 </text:p>
          </table:table-cell>
          <table:table-cell table:style-name="ce1" table:number-columns-repeated="18"/>
          <table:table-cell table:number-columns-repeated="16358"/>
        </table:table-row>
        <table:table-row table:style-name="ro11">
          <table:table-cell table:style-name="ce1" table:number-columns-repeated="2"/>
          <table:table-cell table:style-name="ce370" office:value-type="string" calcext:value-type="string">
            <text:p>Impuesto a la renta (*)</text:p>
          </table:table-cell>
          <table:table-cell table:style-name="ce378" table:formula="of:=(15/100)* [.D17]" office:value-type="currency" office:currency="PEN" office:value="1729.76500000001" calcext:value-type="currency">
            <text:p><text:s/>S/ 1,729.77 </text:p>
          </table:table-cell>
          <table:table-cell table:style-name="ce378" table:formula="of:=(15/100)*[.E17]" office:value-type="currency" office:currency="PEN" office:value="2323.07625000003" calcext:value-type="currency">
            <text:p><text:s/>S/ 2,323.08 </text:p>
          </table:table-cell>
          <table:table-cell table:style-name="ce378" table:formula="of:=(15/100)*[.F17]" office:value-type="currency" office:currency="PEN" office:value="2944.94306250004" calcext:value-type="currency">
            <text:p><text:s/>S/ 2,944.94 </text:p>
          </table:table-cell>
          <table:table-cell table:style-name="ce378" table:formula="of:=(15/100)*[.G17]" office:value-type="currency" office:currency="PEN" office:value="3597.89571562504" calcext:value-type="currency">
            <text:p><text:s/>S/ 3,597.90 </text:p>
          </table:table-cell>
          <table:table-cell table:style-name="ce378" table:formula="of:=(15/100)*[.H17]" office:value-type="currency" office:currency="PEN" office:value="4283.48850140624" calcext:value-type="currency">
            <text:p><text:s/>S/ 4,283.49 </text:p>
          </table:table-cell>
          <table:table-cell table:style-name="ce382"/>
          <table:table-cell table:style-name="ce1" table:number-columns-repeated="17"/>
          <table:table-cell table:number-columns-repeated="16358"/>
        </table:table-row>
        <table:table-row table:style-name="ro11">
          <table:table-cell table:style-name="ce1" table:number-columns-repeated="2"/>
          <table:table-cell table:style-name="ce371" office:value-type="string" calcext:value-type="string">
            <text:p>Utilidad Neta</text:p>
          </table:table-cell>
          <table:table-cell table:style-name="ce379" table:formula="of:=[.D17]-[.D18]" office:value-type="currency" office:currency="PEN" office:value="9802.00166666674" calcext:value-type="currency">
            <text:p><text:s/>S/ 9,802.00 </text:p>
          </table:table-cell>
          <table:table-cell table:style-name="ce379" table:formula="of:=[.E17]-[.E18]" office:value-type="currency" office:currency="PEN" office:value="13164.0987500002" calcext:value-type="currency">
            <text:p><text:s/>S/ 13,164.10 </text:p>
          </table:table-cell>
          <table:table-cell table:style-name="ce379" table:formula="of:=[.F17]-[.F18]" office:value-type="currency" office:currency="PEN" office:value="16688.0106875002" calcext:value-type="currency">
            <text:p><text:s/>S/ 16,688.01 </text:p>
          </table:table-cell>
          <table:table-cell table:style-name="ce379" table:formula="of:=[.G17]-[.G18]" office:value-type="currency" office:currency="PEN" office:value="20388.0757218752" calcext:value-type="currency">
            <text:p><text:s/>S/ 20,388.08 </text:p>
          </table:table-cell>
          <table:table-cell table:style-name="ce379" table:formula="of:=[.H17]-[.H18]" office:value-type="currency" office:currency="PEN" office:value="24273.1015079687" calcext:value-type="currency">
            <text:p><text:s/>S/ 24,273.10 </text:p>
          </table:table-cell>
          <table:table-cell table:style-name="ce1"/>
          <table:table-cell table:style-name="ce383" table:number-columns-repeated="5"/>
          <table:table-cell table:style-name="ce1" table:number-columns-repeated="12"/>
          <table:table-cell table:number-columns-repeated="16358"/>
        </table:table-row>
        <table:table-row table:style-name="ro1">
          <table:table-cell table:style-name="ce1" table:number-columns-repeated="2"/>
          <table:table-cell table:style-name="ce221" office:value-type="string" calcext:value-type="string">
            <text:p><text:s text:c="5"/>(*) Con RER se aplica1.5% sobre las ventas netas.</text:p>
          </table:table-cell>
          <table:table-cell table:style-name="ce221" table:number-columns-repeated="5"/>
          <table:table-cell table:style-name="ce1" table:number-columns-repeated="18"/>
          <table:table-cell table:number-columns-repeated="16358"/>
        </table:table-row>
        <table:table-row table:style-name="ro1" table:number-rows-repeated="200">
          <table:table-cell table:style-name="ce1" table:number-columns-repeated="26"/>
          <table:table-cell table:number-columns-repeated="16358"/>
        </table:table-row>
        <table:table-row table:style-name="ro7" table:number-rows-repeated="779">
          <table:table-cell table:style-name="ce1" table:number-columns-repeated="26"/>
          <table:table-cell table:number-columns-repeated="16358"/>
        </table:table-row>
        <table:table-row table:style-name="ro2" table:number-rows-repeated="104757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u" table:style-name="ta13">
        <table:table-column table:style-name="co24" table:number-columns-repeated="8" table:default-cell-style-name="Default"/>
        <table:table-column table:style-name="co8" table:number-columns-repeated="16376" table:default-cell-style-name="Default"/>
        <table:table-row table:style-name="ro1" table:number-rows-repeated="3">
          <table:table-cell table:style-name="ce1" table:number-columns-repeated="26"/>
          <table:table-cell table:number-columns-repeated="16358"/>
        </table:table-row>
        <table:table-row table:style-name="ro18">
          <table:table-cell table:style-name="ce1"/>
          <table:table-cell table:style-name="ce386" office:value-type="string" calcext:value-type="string" table:number-columns-spanned="7" table:number-rows-spanned="1">
            <text:p><text:span text:style-name="T1">Kurt = Rf usa+ </text:span><text:span text:style-name="T2">b</text:span><text:span text:style-name="T3">u total </text:span><text:span text:style-name="T4">ME</text:span><text:span text:style-name="T5">* (Rm- Rf)</text:span><text:span text:style-name="T4"> </text:span><text:span text:style-name="T5">usa+ Rp </text:span><text:span text:style-name="T4">PERU</text:span><text:span text:style-name="T5"> </text:span></text:p>
          </table:table-cell>
          <table:covered-table-cell table:number-columns-repeated="6" table:style-name="ce12"/>
          <table:table-cell table:style-name="ce1" table:number-columns-repeated="18"/>
          <table:table-cell table:number-columns-repeated="16358"/>
        </table:table-row>
        <table:table-row table:style-name="ro1">
          <table:table-cell table:style-name="ce1" table:number-columns-repeated="26"/>
          <table:table-cell table:number-columns-repeated="16358"/>
        </table:table-row>
        <table:table-row table:style-name="ro1">
          <table:table-cell table:style-name="ce1"/>
          <table:table-cell table:style-name="ce129" office:value-type="string" calcext:value-type="string">
            <text:p>Donde</text:p>
          </table:table-cell>
          <table:table-cell table:style-name="ce1" table:number-columns-repeated="24"/>
          <table:table-cell table:number-columns-repeated="16358"/>
        </table:table-row>
        <table:table-row table:style-name="ro1">
          <table:table-cell table:style-name="ce1"/>
          <table:table-cell table:style-name="ce221" office:value-type="string" calcext:value-type="string">
            <text:p>Rf usa =</text:p>
          </table:table-cell>
          <table:table-cell table:style-name="ce388" office:value-type="percentage" office:value="0.0495" calcext:value-type="percentage">
            <text:p>4.95 %</text:p>
          </table:table-cell>
          <table:table-cell table:style-name="ce221" office:value-type="string" calcext:value-type="string">
            <text:p>promedio geometrico 1928-2020</text:p>
          </table:table-cell>
          <table:table-cell table:style-name="ce1" table:number-columns-repeated="22"/>
          <table:table-cell table:number-columns-repeated="16358"/>
        </table:table-row>
        <table:table-row table:style-name="ro1">
          <table:table-cell table:style-name="ce1"/>
          <table:table-cell table:style-name="ce387" office:value-type="string" calcext:value-type="string">
            <text:p>βu total ME =</text:p>
          </table:table-cell>
          <table:table-cell table:style-name="ce221" office:value-type="float" office:value="3.5" calcext:value-type="float">
            <text:p>3.5</text:p>
          </table:table-cell>
          <table:table-cell table:style-name="ce221" office:value-type="string" calcext:value-type="string">
            <text:p>Beta total desapalancado para vestidos</text:p>
          </table:table-cell>
          <table:table-cell table:style-name="ce1" table:number-columns-repeated="22"/>
          <table:table-cell table:number-columns-repeated="16358"/>
        </table:table-row>
        <table:table-row table:style-name="ro1">
          <table:table-cell table:style-name="ce1"/>
          <table:table-cell table:style-name="ce221" office:value-type="string" calcext:value-type="string">
            <text:p>(Rm-Rf) =</text:p>
          </table:table-cell>
          <table:table-cell table:style-name="ce388" office:value-type="percentage" office:value="0.0464" calcext:value-type="percentage">
            <text:p>4.64 %</text:p>
          </table:table-cell>
          <table:table-cell table:style-name="ce221" office:value-type="string" calcext:value-type="string">
            <text:p>promedio geometrico 2010-2020</text:p>
          </table:table-cell>
          <table:table-cell table:style-name="ce1" table:number-columns-repeated="22"/>
          <table:table-cell table:number-columns-repeated="16358"/>
        </table:table-row>
        <table:table-row table:style-name="ro1">
          <table:table-cell table:style-name="ce1"/>
          <table:table-cell table:style-name="ce221" office:value-type="string" calcext:value-type="string">
            <text:p>Rp =</text:p>
          </table:table-cell>
          <table:table-cell table:style-name="ce388" office:value-type="percentage" office:value="0.0174" calcext:value-type="percentage">
            <text:p>1.74 %</text:p>
          </table:table-cell>
          <table:table-cell table:style-name="ce221" office:value-type="string" calcext:value-type="string">
            <text:p>Promedio 2020</text:p>
          </table:table-cell>
          <table:table-cell table:style-name="ce1" table:number-columns-repeated="22"/>
          <table:table-cell table:number-columns-repeated="16358"/>
        </table:table-row>
        <table:table-row table:style-name="ro1">
          <table:table-cell table:style-name="ce1" table:number-columns-repeated="26"/>
          <table:table-cell table:number-columns-repeated="16358"/>
        </table:table-row>
        <table:table-row table:style-name="ro1">
          <table:table-cell table:style-name="ce1"/>
          <table:table-cell table:style-name="ce129" office:value-type="string" calcext:value-type="string">
            <text:p>Kurt =</text:p>
          </table:table-cell>
          <table:table-cell table:style-name="ce389" table:formula="of:=[.C7]+[.C8]*[.C9]+[.C10]" office:value-type="percentage" office:value="0.2293" calcext:value-type="percentage">
            <text:p>22.93 %</text:p>
          </table:table-cell>
          <table:table-cell table:style-name="ce221" office:value-type="string" calcext:value-type="string">
            <text:p>COK desapalancado con Riesgo Total</text:p>
          </table:table-cell>
          <table:table-cell table:style-name="ce1" table:number-columns-repeated="22"/>
          <table:table-cell table:number-columns-repeated="16358"/>
        </table:table-row>
        <table:table-row table:style-name="ro1" table:number-rows-repeated="208">
          <table:table-cell table:style-name="ce1" table:number-columns-repeated="26"/>
          <table:table-cell table:number-columns-repeated="16358"/>
        </table:table-row>
        <table:table-row table:style-name="ro7" table:number-rows-repeated="780">
          <table:table-cell table:style-name="ce1" table:number-columns-repeated="26"/>
          <table:table-cell table:number-columns-repeated="16358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e_Kwacc" table:style-name="ta14">
        <table:table-column table:style-name="co1" table:default-cell-style-name="Default"/>
        <table:table-column table:style-name="co62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45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default-cell-style-name="Default"/>
        <table:table-column table:style-name="co7" table:number-columns-repeated="14" table:default-cell-style-name="Default"/>
        <table:table-column table:style-name="co8" table:number-columns-repeated="16358" table:default-cell-style-name="Default"/>
        <table:table-row table:style-name="ro16">
          <table:table-cell table:style-name="ce350" table:number-columns-repeated="26"/>
          <table:table-cell table:number-columns-repeated="16358"/>
        </table:table-row>
        <table:table-row table:style-name="ro16">
          <table:table-cell table:style-name="ce350"/>
          <table:table-cell table:style-name="ce390" office:value-type="string" calcext:value-type="string" table:number-columns-spanned="4" table:number-rows-spanned="1">
            <text:p>COK APALANCADO CON RIESGO TOTAL</text:p>
          </table:table-cell>
          <table:covered-table-cell table:number-columns-repeated="3" table:style-name="ce12"/>
          <table:table-cell table:style-name="ce391"/>
          <table:table-cell table:style-name="ce390" office:value-type="string" calcext:value-type="string" table:number-columns-spanned="5" table:number-rows-spanned="1">
            <text:p>COSTO PROMEDIO PONDERADO DE CAPITAL CON RIESGO TOTAL</text:p>
          </table:table-cell>
          <table:covered-table-cell table:number-columns-repeated="4" table:style-name="ce12"/>
          <table:table-cell table:style-name="ce391"/>
          <table:table-cell table:style-name="ce350" table:number-columns-repeated="14"/>
          <table:table-cell table:number-columns-repeated="16358"/>
        </table:table-row>
        <table:table-row table:style-name="ro16">
          <table:table-cell table:style-name="ce350"/>
          <table:table-cell table:style-name="ce391" table:number-columns-repeated="11"/>
          <table:table-cell table:style-name="ce350" table:number-columns-repeated="14"/>
          <table:table-cell table:number-columns-repeated="16358"/>
        </table:table-row>
        <table:table-row table:style-name="ro16">
          <table:table-cell table:style-name="ce350"/>
          <table:table-cell table:style-name="ce392" office:value-type="string" calcext:value-type="string" table:number-columns-spanned="4" table:number-rows-spanned="1">
            <text:p>Kert= Rfusa+Brl total Peru*(Rm-Rf)usa + Rp peru</text:p>
          </table:table-cell>
          <table:covered-table-cell table:number-columns-repeated="2" table:style-name="ce96"/>
          <table:covered-table-cell table:style-name="ce115"/>
          <table:table-cell table:style-name="ce391"/>
          <table:table-cell table:style-name="ce392" office:value-type="string" calcext:value-type="string" table:number-columns-spanned="5" table:number-rows-spanned="1">
            <text:p>Kwacc= E/V * Kert + D/V * Kd</text:p>
          </table:table-cell>
          <table:covered-table-cell table:number-columns-repeated="3" table:style-name="ce96"/>
          <table:covered-table-cell table:style-name="ce115"/>
          <table:table-cell table:style-name="ce391"/>
          <table:table-cell table:style-name="ce350" table:number-columns-repeated="14"/>
          <table:table-cell table:number-columns-repeated="16358"/>
        </table:table-row>
        <table:table-row table:style-name="ro16">
          <table:table-cell table:style-name="ce350"/>
          <table:table-cell table:style-name="ce391" table:number-columns-repeated="11"/>
          <table:table-cell table:style-name="ce350" table:number-columns-repeated="14"/>
          <table:table-cell table:number-columns-repeated="16358"/>
        </table:table-row>
        <table:table-row table:style-name="ro16">
          <table:table-cell table:style-name="ce350"/>
          <table:table-cell table:style-name="ce393" office:value-type="string" calcext:value-type="string">
            <text:p>Donde:</text:p>
          </table:table-cell>
          <table:table-cell table:style-name="ce391" table:number-columns-repeated="4"/>
          <table:table-cell table:style-name="ce393" office:value-type="string" calcext:value-type="string">
            <text:p>Donde:</text:p>
          </table:table-cell>
          <table:table-cell table:style-name="ce391" table:number-columns-repeated="5"/>
          <table:table-cell table:style-name="ce350" table:number-columns-repeated="14"/>
          <table:table-cell table:number-columns-repeated="16358"/>
        </table:table-row>
        <table:table-row table:style-name="ro16">
          <table:table-cell table:style-name="ce350"/>
          <table:table-cell table:style-name="ce391" office:value-type="string" calcext:value-type="string">
            <text:p>Rf usa</text:p>
          </table:table-cell>
          <table:table-cell table:style-name="ce395" table:formula="of:=[$Ku.C7]" office:value-type="percentage" office:value="0.0495" calcext:value-type="percentage">
            <text:p>4.95 %</text:p>
          </table:table-cell>
          <table:table-cell table:style-name="ce391" table:number-columns-repeated="2"/>
          <table:table-cell table:style-name="ce393"/>
          <table:table-cell table:style-name="ce391" office:value-type="string" calcext:value-type="string">
            <text:p>E/V</text:p>
          </table:table-cell>
          <table:table-cell table:style-name="ce396" table:formula="of:=[$Inversion_Inicial.K14]/[$Inversion_Inicial.K16]" office:value-type="float" office:value="0.928073397767395" calcext:value-type="float">
            <text:p>0.93</text:p>
          </table:table-cell>
          <table:table-cell table:style-name="ce391" table:number-columns-repeated="4"/>
          <table:table-cell table:style-name="ce350" table:number-columns-repeated="14"/>
          <table:table-cell table:number-columns-repeated="16358"/>
        </table:table-row>
        <table:table-row table:style-name="ro16">
          <table:table-cell table:style-name="ce350"/>
          <table:table-cell table:style-name="ce391" office:value-type="string" calcext:value-type="string">
            <text:p>Brl total Peru</text:p>
          </table:table-cell>
          <table:table-cell table:style-name="ce396" table:formula="of:=[.E24]" office:value-type="float" office:value="3.76718464487122" calcext:value-type="float">
            <text:p>3.77</text:p>
          </table:table-cell>
          <table:table-cell table:style-name="ce391" table:number-columns-repeated="2"/>
          <table:table-cell table:style-name="ce393"/>
          <table:table-cell table:style-name="ce391" office:value-type="string" calcext:value-type="string">
            <text:p>Kert</text:p>
          </table:table-cell>
          <table:table-cell table:style-name="ce395" table:formula="of:=[.E13]" office:value-type="percentage" office:value="0.241697367522024" calcext:value-type="percentage">
            <text:p>24.17 %</text:p>
          </table:table-cell>
          <table:table-cell table:style-name="ce391" table:number-columns-repeated="4"/>
          <table:table-cell table:style-name="ce350" table:number-columns-repeated="14"/>
          <table:table-cell table:number-columns-repeated="16358"/>
        </table:table-row>
        <table:table-row table:style-name="ro16">
          <table:table-cell table:style-name="ce350"/>
          <table:table-cell table:style-name="ce391" office:value-type="string" calcext:value-type="string">
            <text:p>(Rm-Rf) usa</text:p>
          </table:table-cell>
          <table:table-cell table:style-name="ce395" table:formula="of:=[$Ku.C9]" office:value-type="percentage" office:value="0.0464" calcext:value-type="percentage">
            <text:p>4.64 %</text:p>
          </table:table-cell>
          <table:table-cell table:style-name="ce391" table:number-columns-repeated="2"/>
          <table:table-cell table:style-name="ce393"/>
          <table:table-cell table:style-name="ce391" office:value-type="string" calcext:value-type="string">
            <text:p>D/V</text:p>
          </table:table-cell>
          <table:table-cell table:style-name="ce396" table:formula="of:=[$Inversion_Inicial.K15]/[$Inversion_Inicial.K16]" office:value-type="float" office:value="0.0719266022326046" calcext:value-type="float">
            <text:p>0.07</text:p>
          </table:table-cell>
          <table:table-cell table:style-name="ce403"/>
          <table:table-cell table:style-name="ce391" table:number-columns-repeated="3"/>
          <table:table-cell table:style-name="ce350" table:number-columns-repeated="14"/>
          <table:table-cell table:number-columns-repeated="16358"/>
        </table:table-row>
        <table:table-row table:style-name="ro16">
          <table:table-cell table:style-name="ce350"/>
          <table:table-cell table:style-name="ce391" office:value-type="string" calcext:value-type="string">
            <text:p>Rp</text:p>
          </table:table-cell>
          <table:table-cell table:style-name="ce395" table:formula="of:=[$Ku.C10]" office:value-type="percentage" office:value="0.0174" calcext:value-type="percentage">
            <text:p>1.74 %</text:p>
          </table:table-cell>
          <table:table-cell table:style-name="ce391" table:number-columns-repeated="2"/>
          <table:table-cell table:style-name="ce393"/>
          <table:table-cell table:style-name="ce391" office:value-type="string" calcext:value-type="string">
            <text:p>Kd</text:p>
          </table:table-cell>
          <table:table-cell table:style-name="ce402" table:formula="of:=[$Resumen.H17]" office:value-type="percentage" office:value="0.22" calcext:value-type="percentage">
            <text:p>22 %</text:p>
          </table:table-cell>
          <table:table-cell table:style-name="ce391" table:number-columns-repeated="4"/>
          <table:table-cell table:style-name="ce350" table:number-columns-repeated="14"/>
          <table:table-cell table:number-columns-repeated="16358"/>
        </table:table-row>
        <table:table-row table:style-name="ro16">
          <table:table-cell table:style-name="ce350" table:number-columns-repeated="3"/>
          <table:table-cell table:style-name="ce391" table:number-columns-repeated="2"/>
          <table:table-cell table:style-name="ce393"/>
          <table:table-cell table:style-name="ce391" office:value-type="string" calcext:value-type="string">
            <text:p>t</text:p>
          </table:table-cell>
          <table:table-cell table:style-name="ce395" table:formula="of:=[.C22]" office:value-type="percentage" office:value="0.015" calcext:value-type="percentage">
            <text:p>1.50 %</text:p>
          </table:table-cell>
          <table:table-cell table:style-name="ce391" table:number-columns-repeated="4"/>
          <table:table-cell table:style-name="ce350" table:number-columns-repeated="14"/>
          <table:table-cell table:number-columns-repeated="16358"/>
        </table:table-row>
        <table:table-row table:style-name="ro16">
          <table:table-cell table:style-name="ce350"/>
          <table:table-cell table:style-name="ce393"/>
          <table:table-cell table:style-name="ce391" table:number-columns-repeated="3"/>
          <table:table-cell table:style-name="ce393" table:number-columns-repeated="2"/>
          <table:table-cell table:style-name="ce391" table:number-columns-repeated="5"/>
          <table:table-cell table:style-name="ce350" table:number-columns-repeated="14"/>
          <table:table-cell table:number-columns-repeated="16358"/>
        </table:table-row>
        <table:table-row table:style-name="ro24">
          <table:table-cell table:style-name="ce350"/>
          <table:table-cell table:style-name="ce394" office:value-type="string" calcext:value-type="string">
            <text:p>Kert</text:p>
          </table:table-cell>
          <table:table-cell table:style-name="ce397"/>
          <table:table-cell table:style-name="ce399"/>
          <table:table-cell table:style-name="ce400" table:formula="of:=[.C7]+([.C8]*([.C9]))+[.C10]" office:value-type="percentage" office:value="0.241697367522024" calcext:value-type="percentage">
            <text:p>24.17 %</text:p>
          </table:table-cell>
          <table:table-cell table:style-name="ce393"/>
          <table:table-cell table:style-name="ce394" office:value-type="string" calcext:value-type="string">
            <text:p>Kwacc</text:p>
          </table:table-cell>
          <table:table-cell table:style-name="ce397"/>
          <table:table-cell table:style-name="ce399" table:number-columns-repeated="2"/>
          <table:table-cell table:style-name="ce400" table:formula="of:=([.H7]*[.H8])+(([.H9]*[.H10])*(1-[.H11]))" office:value-type="percentage" office:value="0.239899391811406" calcext:value-type="percentage">
            <text:p>23.99 %</text:p>
          </table:table-cell>
          <table:table-cell table:style-name="ce391"/>
          <table:table-cell table:style-name="ce350" table:number-columns-repeated="14"/>
          <table:table-cell table:number-columns-repeated="16358"/>
        </table:table-row>
        <table:table-row table:style-name="ro16">
          <table:table-cell table:style-name="ce350"/>
          <table:table-cell table:style-name="ce391" table:number-columns-repeated="11"/>
          <table:table-cell table:style-name="ce350" table:number-columns-repeated="14"/>
          <table:table-cell table:number-columns-repeated="16358"/>
        </table:table-row>
        <table:table-row table:style-name="ro16">
          <table:table-cell table:style-name="ce350"/>
          <table:table-cell table:style-name="ce390" office:value-type="string" calcext:value-type="string" table:number-columns-spanned="4" table:number-rows-spanned="1">
            <text:p>BETA REAPALANCADO CON RIESGO TOTAL</text:p>
          </table:table-cell>
          <table:covered-table-cell table:number-columns-repeated="3" table:style-name="ce12"/>
          <table:table-cell table:style-name="ce391" table:number-columns-repeated="7"/>
          <table:table-cell table:style-name="ce350" table:number-columns-repeated="14"/>
          <table:table-cell table:number-columns-repeated="16358"/>
        </table:table-row>
        <table:table-row table:style-name="ro16">
          <table:table-cell table:style-name="ce350"/>
          <table:table-cell table:style-name="ce391" table:number-columns-repeated="11"/>
          <table:table-cell table:style-name="ce350" table:number-columns-repeated="14"/>
          <table:table-cell table:number-columns-repeated="16358"/>
        </table:table-row>
        <table:table-row table:style-name="ro16">
          <table:table-cell table:style-name="ce350"/>
          <table:table-cell table:style-name="ce392" office:value-type="string" calcext:value-type="string" table:number-columns-spanned="4" table:number-rows-spanned="1">
            <text:p>Brl total= Bu total ME*(1+(D/E))*(1-tr)</text:p>
          </table:table-cell>
          <table:covered-table-cell table:number-columns-repeated="2" table:style-name="ce96"/>
          <table:covered-table-cell table:style-name="ce115"/>
          <table:table-cell table:style-name="ce391" table:number-columns-repeated="7"/>
          <table:table-cell table:style-name="ce350" table:number-columns-repeated="14"/>
          <table:table-cell table:number-columns-repeated="16358"/>
        </table:table-row>
        <table:table-row table:style-name="ro16">
          <table:table-cell table:style-name="ce350"/>
          <table:table-cell table:style-name="ce391" table:number-columns-repeated="11"/>
          <table:table-cell table:style-name="ce350" table:number-columns-repeated="14"/>
          <table:table-cell table:number-columns-repeated="16358"/>
        </table:table-row>
        <table:table-row table:style-name="ro16">
          <table:table-cell table:style-name="ce350"/>
          <table:table-cell table:style-name="ce393" office:value-type="string" calcext:value-type="string">
            <text:p>Donde:</text:p>
          </table:table-cell>
          <table:table-cell table:style-name="ce391" table:number-columns-repeated="10"/>
          <table:table-cell table:style-name="ce350" table:number-columns-repeated="14"/>
          <table:table-cell table:number-columns-repeated="16358"/>
        </table:table-row>
        <table:table-row table:style-name="ro16">
          <table:table-cell table:style-name="ce350"/>
          <table:table-cell table:style-name="ce391" office:value-type="string" calcext:value-type="string">
            <text:p>Bu total ME</text:p>
          </table:table-cell>
          <table:table-cell table:style-name="ce391" office:value-type="float" office:value="3.5" calcext:value-type="float">
            <text:p>3.5</text:p>
          </table:table-cell>
          <table:table-cell table:style-name="ce391" table:number-columns-repeated="9"/>
          <table:table-cell table:style-name="ce350" table:number-columns-repeated="14"/>
          <table:table-cell table:number-columns-repeated="16358"/>
        </table:table-row>
        <table:table-row table:style-name="ro7">
          <table:table-cell table:style-name="ce350"/>
          <table:table-cell table:style-name="ce391" office:value-type="string" calcext:value-type="string">
            <text:p>D/E Peru</text:p>
          </table:table-cell>
          <table:table-cell table:style-name="ce398" table:formula="of:=[$Inversion_Inicial.H37]/[$Inversion_Inicial.G37]" office:value-type="float" office:value="0.0775009847342178" calcext:value-type="float">
            <text:p>0.08</text:p>
          </table:table-cell>
          <table:table-cell table:style-name="ce391" table:number-columns-repeated="9"/>
          <table:table-cell table:style-name="ce350" table:number-columns-repeated="14"/>
          <table:table-cell table:number-columns-repeated="16358"/>
        </table:table-row>
        <table:table-row table:style-name="ro7">
          <table:table-cell table:style-name="ce350"/>
          <table:table-cell table:style-name="ce391" office:value-type="string" calcext:value-type="string">
            <text:p>t</text:p>
          </table:table-cell>
          <table:table-cell table:style-name="ce391" table:formula="of:=1.5/100" office:value-type="float" office:value="0.015" calcext:value-type="float">
            <text:p>0.015</text:p>
          </table:table-cell>
          <table:table-cell table:style-name="ce391" table:number-columns-repeated="9"/>
          <table:table-cell table:style-name="ce350" table:number-columns-repeated="14"/>
          <table:table-cell table:number-columns-repeated="16358"/>
        </table:table-row>
        <table:table-row table:style-name="ro7">
          <table:table-cell table:style-name="ce350"/>
          <table:table-cell table:style-name="ce391" table:number-columns-repeated="11"/>
          <table:table-cell table:style-name="ce350" table:number-columns-repeated="14"/>
          <table:table-cell table:number-columns-repeated="16358"/>
        </table:table-row>
        <table:table-row table:style-name="ro7">
          <table:table-cell table:style-name="ce350"/>
          <table:table-cell table:style-name="ce394" office:value-type="string" calcext:value-type="string">
            <text:p>Brl total Peru</text:p>
          </table:table-cell>
          <table:table-cell table:style-name="ce397"/>
          <table:table-cell table:style-name="ce399"/>
          <table:table-cell table:style-name="ce401" table:formula="of:=[.C20]*(1+([.C21])*(1-[.C22]))" office:value-type="float" office:value="3.76718464487122" calcext:value-type="float">
            <text:p>3.77</text:p>
          </table:table-cell>
          <table:table-cell table:style-name="ce391" table:number-columns-repeated="7"/>
          <table:table-cell table:style-name="ce350" table:number-columns-repeated="14"/>
          <table:table-cell table:number-columns-repeated="16358"/>
        </table:table-row>
        <table:table-row table:style-name="ro7">
          <table:table-cell table:style-name="ce350"/>
          <table:table-cell table:style-name="ce391" table:number-columns-repeated="11"/>
          <table:table-cell table:style-name="ce350" table:number-columns-repeated="14"/>
          <table:table-cell table:number-columns-repeated="16358"/>
        </table:table-row>
        <table:table-row table:style-name="ro7">
          <table:table-cell table:style-name="ce350" table:number-columns-repeated="26"/>
          <table:table-cell table:number-columns-repeated="16358"/>
        </table:table-row>
        <table:table-row table:style-name="ro7" table:number-rows-repeated="974">
          <table:table-cell table:style-name="ce350" table:number-columns-repeated="26"/>
          <table:table-cell table:number-columns-repeated="16358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lujo_Caja" table:style-name="ta15">
        <table:table-column table:style-name="co1" table:number-columns-repeated="2" table:default-cell-style-name="Default"/>
        <table:table-column table:style-name="co63" table:default-cell-style-name="Default"/>
        <table:table-column table:style-name="co35" table:number-columns-repeated="2" table:default-cell-style-name="Default"/>
        <table:table-column table:style-name="co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3" table:default-cell-style-name="Default"/>
        <table:table-column table:style-name="co1" table:number-columns-repeated="6" table:default-cell-style-name="Default"/>
        <table:table-column table:style-name="co7" table:number-columns-repeated="11" table:default-cell-style-name="Default"/>
        <table:table-column table:style-name="co8" table:number-columns-repeated="16358" table:default-cell-style-name="Default"/>
        <table:table-row table:style-name="ro1" table:number-rows-repeated="2">
          <table:table-cell table:style-name="ce221"/>
          <table:table-cell table:style-name="ce129"/>
          <table:table-cell table:style-name="ce221" table:number-columns-repeated="24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215" office:value-type="string" calcext:value-type="string" table:number-columns-spanned="7" table:number-rows-spanned="1">
            <text:p>FLUJOS DE CAJA ECONOMICO Y FINANCIERO</text:p>
          </table:table-cell>
          <table:covered-table-cell table:number-columns-repeated="6" table:style-name="ce12"/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6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4" office:value-type="string" calcext:value-type="string">
            <text:p>RUBRO</text:p>
          </table:table-cell>
          <table:table-cell table:style-name="ce404" office:value-type="string" calcext:value-type="string">
            <text:p>Año 0</text:p>
          </table:table-cell>
          <table:table-cell table:style-name="ce404" office:value-type="string" calcext:value-type="string">
            <text:p>Año 1</text:p>
          </table:table-cell>
          <table:table-cell table:style-name="ce404" office:value-type="string" calcext:value-type="string">
            <text:p>Año 2</text:p>
          </table:table-cell>
          <table:table-cell table:style-name="ce404" office:value-type="string" calcext:value-type="string">
            <text:p>Año 3</text:p>
          </table:table-cell>
          <table:table-cell table:style-name="ce404" office:value-type="string" calcext:value-type="string">
            <text:p>Año 4</text:p>
          </table:table-cell>
          <table:table-cell table:style-name="ce404" office:value-type="string" calcext:value-type="string">
            <text:p>Año 5</text:p>
          </table:table-cell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5" office:value-type="string" calcext:value-type="string">
            <text:p>Activo fijo tangible</text:p>
          </table:table-cell>
          <table:table-cell table:style-name="ce408" table:formula="of:=-[$Inversion_Inicial.F9]" office:value-type="float" office:value="-11772" calcext:value-type="float">
            <text:p>-11,772 </text:p>
          </table:table-cell>
          <table:table-cell table:style-name="ce408" table:number-columns-repeated="2"/>
          <table:table-cell table:style-name="ce408" table:formula="of:=-[$Inversion_Inicial.F18]" office:value-type="float" office:value="-4500" calcext:value-type="float">
            <text:p>-4,500 </text:p>
          </table:table-cell>
          <table:table-cell table:style-name="ce408"/>
          <table:table-cell table:style-name="ce409"/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5" office:value-type="string" calcext:value-type="string">
            <text:p>Activo fijo intangible</text:p>
          </table:table-cell>
          <table:table-cell table:style-name="ce408" table:formula="of:=-[$Inversion_Inicial.F23]" office:value-type="float" office:value="-1670" calcext:value-type="float">
            <text:p>-1,670 </text:p>
          </table:table-cell>
          <table:table-cell table:style-name="ce408" table:number-columns-repeated="4"/>
          <table:table-cell table:style-name="ce409"/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5" office:value-type="string" calcext:value-type="string">
            <text:p>Capital de trabajo</text:p>
          </table:table-cell>
          <table:table-cell table:style-name="ce408" table:formula="of:=-[$Capital_Trabajo.C19]" office:value-type="float" office:value="-142727.4" calcext:value-type="float">
            <text:p>-142,727 </text:p>
          </table:table-cell>
          <table:table-cell table:style-name="ce408" table:formula="of:=-[$Capital_Trabajo.D19]" office:value-type="float" office:value="-6881.66999999998" calcext:value-type="float">
            <text:p>-6,882 </text:p>
          </table:table-cell>
          <table:table-cell table:style-name="ce408" table:formula="of:=-[$Capital_Trabajo.E19]" office:value-type="float" office:value="-2137.3711897959" calcext:value-type="float">
            <text:p>-2,137 </text:p>
          </table:table-cell>
          <table:table-cell table:style-name="ce408" table:formula="of:=-[$Capital_Trabajo.F19]" office:value-type="float" office:value="-7587.04117500002" calcext:value-type="float">
            <text:p>-7,587 </text:p>
          </table:table-cell>
          <table:table-cell table:style-name="ce408" table:formula="of:=-[$Capital_Trabajo.G19]" office:value-type="float" office:value="-7966.39323375002" calcext:value-type="float">
            <text:p>-7,966 </text:p>
          </table:table-cell>
          <table:table-cell table:style-name="ce409"/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5" office:value-type="string" calcext:value-type="string">
            <text:p>Recupero de capital de trabajo</text:p>
          </table:table-cell>
          <table:table-cell table:style-name="ce409" table:number-columns-repeated="5"/>
          <table:table-cell table:style-name="ce408" table:formula="of:=-SUM([.D8:.H8])" office:value-type="float" office:value="167299.875598546" calcext:value-type="float">
            <text:p><text:s/>167,300 </text:p>
          </table:table-cell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5" office:value-type="string" calcext:value-type="string">
            <text:p>Recupero de activo fijo tangible</text:p>
          </table:table-cell>
          <table:table-cell table:style-name="ce409" table:number-columns-repeated="5"/>
          <table:table-cell table:style-name="ce408" table:formula="of:=[$Deprecion_VR.H13]" office:value-type="float" office:value="13500" calcext:value-type="float">
            <text:p><text:s/>13,500 </text:p>
          </table:table-cell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6" office:value-type="string" calcext:value-type="string">
            <text:p>Flujo de Inversión y Liquidación</text:p>
          </table:table-cell>
          <table:table-cell table:style-name="ce410" table:formula="of:=SUM([.D6:.D10])" office:value-type="float" office:value="-156169.4" calcext:value-type="float">
            <text:p>-156,169 </text:p>
          </table:table-cell>
          <table:table-cell table:style-name="ce410" table:formula="of:=SUM([.E6:.E10])" office:value-type="float" office:value="-6881.66999999998" calcext:value-type="float">
            <text:p>-6,882 </text:p>
          </table:table-cell>
          <table:table-cell table:style-name="ce410" table:formula="of:=SUM([.F6:.F10])" office:value-type="float" office:value="-2137.3711897959" calcext:value-type="float">
            <text:p>-2,137 </text:p>
          </table:table-cell>
          <table:table-cell table:style-name="ce410" table:formula="of:=SUM([.G6:.G10])" office:value-type="float" office:value="-12087.041175" calcext:value-type="float">
            <text:p>-12,087 </text:p>
          </table:table-cell>
          <table:table-cell table:style-name="ce410" table:formula="of:=SUM([.H6:.H10])" office:value-type="float" office:value="-7966.39323375002" calcext:value-type="float">
            <text:p>-7,966 </text:p>
          </table:table-cell>
          <table:table-cell table:style-name="ce410" table:formula="of:=SUM([.I6:.I10])" office:value-type="float" office:value="180799.875598546" calcext:value-type="float">
            <text:p><text:s/>180,800 </text:p>
          </table:table-cell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5" office:value-type="string" calcext:value-type="string">
            <text:p>Ingresos por ventas</text:p>
          </table:table-cell>
          <table:table-cell table:style-name="ce408"/>
          <table:table-cell table:style-name="ce408" table:formula="of:=[$Estado_Resultados.D7]" office:value-type="float" office:value="1995000" calcext:value-type="float">
            <text:p><text:s/>1,995,000 </text:p>
          </table:table-cell>
          <table:table-cell table:style-name="ce408" table:formula="of:=[$Estado_Resultados.E7]" office:value-type="float" office:value="2094758" calcext:value-type="float">
            <text:p><text:s/>2,094,758 </text:p>
          </table:table-cell>
          <table:table-cell table:style-name="ce408" table:formula="of:=[$Estado_Resultados.F7]" office:value-type="float" office:value="2199496.5" calcext:value-type="float">
            <text:p><text:s/>2,199,497 </text:p>
          </table:table-cell>
          <table:table-cell table:style-name="ce408" table:formula="of:=[$Estado_Resultados.G7]" office:value-type="float" office:value="2309471.875" calcext:value-type="float">
            <text:p><text:s/>2,309,472 </text:p>
          </table:table-cell>
          <table:table-cell table:style-name="ce408" table:formula="of:=[$Estado_Resultados.H7]" office:value-type="float" office:value="2424945.96875" calcext:value-type="float">
            <text:p><text:s/>2,424,946 </text:p>
          </table:table-cell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5" office:value-type="string" calcext:value-type="string">
            <text:p>Costos de produccion (*)</text:p>
          </table:table-cell>
          <table:table-cell table:style-name="ce408"/>
          <table:table-cell table:style-name="ce408" table:formula="of:=-[$Estado_Resultados.D9]+[$Deprecion_VR.$F$13]" office:value-type="float" office:value="-1913097.43333333" calcext:value-type="float">
            <text:p>-1,913,097 </text:p>
          </table:table-cell>
          <table:table-cell table:style-name="ce408" table:formula="of:=-[$Estado_Resultados.E9]+[$Deprecion_VR.$F$13]" office:value-type="float" office:value="-2008900.025" calcext:value-type="float">
            <text:p>-2,008,900 </text:p>
          </table:table-cell>
          <table:table-cell table:style-name="ce408" table:formula="of:=-[$Estado_Resultados.F9]+[$Deprecion_VR.$F$13]" office:value-type="float" office:value="-2109492.74625" calcext:value-type="float">
            <text:p>-2,109,493 </text:p>
          </table:table-cell>
          <table:table-cell table:style-name="ce408" table:formula="of:=-[$Estado_Resultados.G9]+[$Deprecion_VR.$F$13]" office:value-type="float" office:value="-2215115.1035625" calcext:value-type="float">
            <text:p>-2,215,115 </text:p>
          </table:table-cell>
          <table:table-cell table:style-name="ce408" table:formula="of:=-[$Estado_Resultados.H9]+[$Deprecion_VR.$F$13]" office:value-type="float" office:value="-2326018.57874063" calcext:value-type="float">
            <text:p>-2,326,019 </text:p>
          </table:table-cell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5" office:value-type="string" calcext:value-type="string">
            <text:p>Gastos operativos (*)</text:p>
          </table:table-cell>
          <table:table-cell table:style-name="ce408"/>
          <table:table-cell table:style-name="ce408" table:formula="of:=-[$Estado_Resultados.D12]+[$Estado_Resultados.$D$15]" office:value-type="float" office:value="-63794" calcext:value-type="float">
            <text:p>-63,794 </text:p>
          </table:table-cell>
          <table:table-cell table:style-name="ce408" table:formula="of:=-[$Estado_Resultados.E12]+[$Estado_Resultados.$D$15]" office:value-type="float" office:value="-63794" calcext:value-type="float">
            <text:p>-63,794 </text:p>
          </table:table-cell>
          <table:table-cell table:style-name="ce408" table:formula="of:=-[$Estado_Resultados.F12]+[$Estado_Resultados.$D$15]" office:value-type="float" office:value="-63794" calcext:value-type="float">
            <text:p>-63,794 </text:p>
          </table:table-cell>
          <table:table-cell table:style-name="ce408" table:formula="of:=-[$Estado_Resultados.G12]+[$Estado_Resultados.$D$15]" office:value-type="float" office:value="-63794" calcext:value-type="float">
            <text:p>-63,794 </text:p>
          </table:table-cell>
          <table:table-cell table:style-name="ce408" table:formula="of:=-[$Estado_Resultados.H12]+[$Estado_Resultados.$D$15]" office:value-type="float" office:value="-63794" calcext:value-type="float">
            <text:p>-63,794 </text:p>
          </table:table-cell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5" office:value-type="string" calcext:value-type="string">
            <text:p>Pago de IGV</text:p>
          </table:table-cell>
          <table:table-cell table:style-name="ce408"/>
          <table:table-cell table:style-name="ce408" table:formula="of:=-[$IGV.D17]" office:value-type="float" office:value="-117414.648" calcext:value-type="float">
            <text:p>-117,415 </text:p>
          </table:table-cell>
          <table:table-cell table:style-name="ce408" table:formula="of:=-[$IGV.E17]" office:value-type="float" office:value="-123401.088" calcext:value-type="float">
            <text:p>-123,401 </text:p>
          </table:table-cell>
          <table:table-cell table:style-name="ce408" table:formula="of:=-[$IGV.F17]" office:value-type="float" office:value="-129685.518" calcext:value-type="float">
            <text:p>-129,686 </text:p>
          </table:table-cell>
          <table:table-cell table:style-name="ce408" table:formula="of:=-[$IGV.G17]" office:value-type="float" office:value="-149481.0855" calcext:value-type="float">
            <text:p>-149,481 </text:p>
          </table:table-cell>
          <table:table-cell table:style-name="ce408" table:formula="of:=-[$IGV.H17]" office:value-type="float" office:value="-143212.726125" calcext:value-type="float">
            <text:p>-143,213 </text:p>
          </table:table-cell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5" office:value-type="string" calcext:value-type="string">
            <text:p>Impuestos (**)</text:p>
          </table:table-cell>
          <table:table-cell table:style-name="ce408"/>
          <table:table-cell table:style-name="ce408" table:formula="of:=-[$Estado_Resultados.D18]" office:value-type="float" office:value="-1729.76500000001" calcext:value-type="float">
            <text:p>-1,730 </text:p>
          </table:table-cell>
          <table:table-cell table:style-name="ce408" table:formula="of:=-[$Estado_Resultados.E18]" office:value-type="float" office:value="-2323.07625000003" calcext:value-type="float">
            <text:p>-2,323 </text:p>
          </table:table-cell>
          <table:table-cell table:style-name="ce408" table:formula="of:=-[$Estado_Resultados.F18]" office:value-type="float" office:value="-2944.94306250004" calcext:value-type="float">
            <text:p>-2,945 </text:p>
          </table:table-cell>
          <table:table-cell table:style-name="ce408" table:formula="of:=-[$Estado_Resultados.G18]" office:value-type="float" office:value="-3597.89571562504" calcext:value-type="float">
            <text:p>-3,598 </text:p>
          </table:table-cell>
          <table:table-cell table:style-name="ce408" table:formula="of:=-[$Estado_Resultados.H18]" office:value-type="float" office:value="-4283.48850140624" calcext:value-type="float">
            <text:p>-4,283 </text:p>
          </table:table-cell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5" office:value-type="string" calcext:value-type="string">
            <text:p>Flujo Operativo</text:p>
          </table:table-cell>
          <table:table-cell table:style-name="ce411" table:formula="of:=SUM([.D12:.D16])" office:value-type="float" office:value="0" calcext:value-type="float">
            <text:p><text:s/>- <text:s text:c="2"/></text:p>
          </table:table-cell>
          <table:table-cell table:style-name="ce408" table:formula="of:=SUM([.E12:.E16])" office:value-type="float" office:value="-101035.846333333" calcext:value-type="float">
            <text:p>-101,036 </text:p>
          </table:table-cell>
          <table:table-cell table:style-name="ce408" table:formula="of:=SUM([.F12:.F16])" office:value-type="float" office:value="-103660.18925" calcext:value-type="float">
            <text:p>-103,660 </text:p>
          </table:table-cell>
          <table:table-cell table:style-name="ce408" table:formula="of:=SUM([.G12:.G16])" office:value-type="float" office:value="-106420.7073125" calcext:value-type="float">
            <text:p>-106,421 </text:p>
          </table:table-cell>
          <table:table-cell table:style-name="ce408" table:formula="of:=SUM([.H12:.H16])" office:value-type="float" office:value="-122516.209778125" calcext:value-type="float">
            <text:p>-122,516 </text:p>
          </table:table-cell>
          <table:table-cell table:style-name="ce408" table:formula="of:=SUM([.I12:.I16])" office:value-type="float" office:value="-112362.824617031" calcext:value-type="float">
            <text:p>-112,363 </text:p>
          </table:table-cell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7" office:value-type="string" calcext:value-type="string">
            <text:p>Flujo de Caja Económico, FCE</text:p>
          </table:table-cell>
          <table:table-cell table:style-name="ce412" table:formula="of:=[.D11]+[.D17]" office:value-type="float" office:value="-156169.4" calcext:value-type="float">
            <text:p>-156,169 </text:p>
          </table:table-cell>
          <table:table-cell table:style-name="ce412" table:formula="of:=[.E11]+[.E17]" office:value-type="float" office:value="-107917.516333333" calcext:value-type="float">
            <text:p>-107,918 </text:p>
          </table:table-cell>
          <table:table-cell table:style-name="ce412" table:formula="of:=[.F11]+[.F17]" office:value-type="float" office:value="-105797.560439796" calcext:value-type="float">
            <text:p>-105,798 </text:p>
          </table:table-cell>
          <table:table-cell table:style-name="ce412" table:formula="of:=[.G11]+[.G17]" office:value-type="float" office:value="-118507.7484875" calcext:value-type="float">
            <text:p>-118,508 </text:p>
          </table:table-cell>
          <table:table-cell table:style-name="ce412" table:formula="of:=[.H11]+[.H17]" office:value-type="float" office:value="-130482.603011875" calcext:value-type="float">
            <text:p>-130,483 </text:p>
          </table:table-cell>
          <table:table-cell table:style-name="ce412" table:formula="of:=[.I11]+[.I17]" office:value-type="float" office:value="68437.0509815147" calcext:value-type="float">
            <text:p><text:s/>68,437 </text:p>
          </table:table-cell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5" office:value-type="string" calcext:value-type="string">
            <text:p>Prestamo</text:p>
          </table:table-cell>
          <table:table-cell table:style-name="ce408" table:formula="of:=[$Flujo_Deuda.$D$3]" office:value-type="float" office:value="8067" calcext:value-type="float">
            <text:p><text:s/>8,067 </text:p>
          </table:table-cell>
          <table:table-cell table:style-name="ce408" table:formula="of:=[$Flujo_Deuda.$D$3]" office:value-type="float" office:value="8067" calcext:value-type="float">
            <text:p><text:s/>8,067 </text:p>
          </table:table-cell>
          <table:table-cell table:style-name="ce408" table:formula="of:=[$Flujo_Deuda.$D$3]" office:value-type="float" office:value="8067" calcext:value-type="float">
            <text:p><text:s/>8,067 </text:p>
          </table:table-cell>
          <table:table-cell table:style-name="ce408" table:formula="of:=[$Flujo_Deuda.$D$3]" office:value-type="float" office:value="8067" calcext:value-type="float">
            <text:p><text:s/>8,067 </text:p>
          </table:table-cell>
          <table:table-cell table:style-name="ce408" table:formula="of:=[$Flujo_Deuda.$D$3]" office:value-type="float" office:value="8067" calcext:value-type="float">
            <text:p><text:s/>8,067 </text:p>
          </table:table-cell>
          <table:table-cell table:style-name="ce408"/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5" office:value-type="string" calcext:value-type="string">
            <text:p>Cuota de capital </text:p>
          </table:table-cell>
          <table:table-cell table:style-name="ce408"/>
          <table:table-cell table:style-name="ce408" table:formula="of:=-[$Flujo_Deuda.$E$13]" office:value-type="float" office:value="-8067" calcext:value-type="float">
            <text:p>-8,067 </text:p>
          </table:table-cell>
          <table:table-cell table:style-name="ce408" table:formula="of:=-[$Flujo_Deuda.$E$13]" office:value-type="float" office:value="-8067" calcext:value-type="float">
            <text:p>-8,067 </text:p>
          </table:table-cell>
          <table:table-cell table:style-name="ce408" table:formula="of:=-[$Flujo_Deuda.$E$13]" office:value-type="float" office:value="-8067" calcext:value-type="float">
            <text:p>-8,067 </text:p>
          </table:table-cell>
          <table:table-cell table:style-name="ce408" table:formula="of:=-[$Flujo_Deuda.$E$13]" office:value-type="float" office:value="-8067" calcext:value-type="float">
            <text:p>-8,067 </text:p>
          </table:table-cell>
          <table:table-cell table:style-name="ce408" table:formula="of:=-[$Flujo_Deuda.$E$13]" office:value-type="float" office:value="-8067" calcext:value-type="float">
            <text:p>-8,067 </text:p>
          </table:table-cell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5" office:value-type="string" calcext:value-type="string">
            <text:p>Intereses</text:p>
          </table:table-cell>
          <table:table-cell table:style-name="ce408"/>
          <table:table-cell table:style-name="ce408" table:formula="of:=-[$Flujo_Deuda.$D$13]" office:value-type="float" office:value="-749.290343932645" calcext:value-type="float">
            <text:p>-749 </text:p>
          </table:table-cell>
          <table:table-cell table:style-name="ce408" table:formula="of:=-[$Flujo_Deuda.$D$13]" office:value-type="float" office:value="-749.290343932645" calcext:value-type="float">
            <text:p>-749 </text:p>
          </table:table-cell>
          <table:table-cell table:style-name="ce408" table:formula="of:=-[$Flujo_Deuda.$D$13]" office:value-type="float" office:value="-749.290343932645" calcext:value-type="float">
            <text:p>-749 </text:p>
          </table:table-cell>
          <table:table-cell table:style-name="ce408" table:formula="of:=-[$Flujo_Deuda.$D$13]" office:value-type="float" office:value="-749.290343932645" calcext:value-type="float">
            <text:p>-749 </text:p>
          </table:table-cell>
          <table:table-cell table:style-name="ce408" table:formula="of:=-[$Flujo_Deuda.$D$13]" office:value-type="float" office:value="-749.290343932645" calcext:value-type="float">
            <text:p>-749 </text:p>
          </table:table-cell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5" office:value-type="string" calcext:value-type="string">
            <text:p>Total Flujo de Deuda</text:p>
          </table:table-cell>
          <table:table-cell table:style-name="ce408" table:formula="of:=SUM([.D19:.D21])" office:value-type="float" office:value="8067" calcext:value-type="float">
            <text:p><text:s/>8,067 </text:p>
          </table:table-cell>
          <table:table-cell table:style-name="ce408" table:formula="of:=SUM([.E19:.E21])" office:value-type="float" office:value="-749.290343932645" calcext:value-type="float">
            <text:p>-749 </text:p>
          </table:table-cell>
          <table:table-cell table:style-name="ce408" table:formula="of:=SUM([.F19:.F21])" office:value-type="float" office:value="-749.290343932645" calcext:value-type="float">
            <text:p>-749 </text:p>
          </table:table-cell>
          <table:table-cell table:style-name="ce408" table:formula="of:=SUM([.G19:.G21])" office:value-type="float" office:value="-749.290343932645" calcext:value-type="float">
            <text:p>-749 </text:p>
          </table:table-cell>
          <table:table-cell table:style-name="ce408" table:formula="of:=SUM([.H19:.H21])" office:value-type="float" office:value="-749.290343932645" calcext:value-type="float">
            <text:p>-749 </text:p>
          </table:table-cell>
          <table:table-cell table:style-name="ce408" table:formula="of:=SUM([.I19:.I21])" office:value-type="float" office:value="-8816.29034393265" calcext:value-type="float">
            <text:p>-8,816 </text:p>
          </table:table-cell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07" office:value-type="string" calcext:value-type="string">
            <text:p>Flujo de Caja Financiero, FCF</text:p>
          </table:table-cell>
          <table:table-cell table:style-name="ce412" table:formula="of:=[.D18]+[.D22]" office:value-type="float" office:value="-148102.4" calcext:value-type="float">
            <text:p>-148,102 </text:p>
          </table:table-cell>
          <table:table-cell table:style-name="ce412" table:formula="of:=[.E18]+[.E22]" office:value-type="float" office:value="-108666.806677266" calcext:value-type="float">
            <text:p>-108,667 </text:p>
          </table:table-cell>
          <table:table-cell table:style-name="ce412" table:formula="of:=[.F18]+[.F22]" office:value-type="float" office:value="-106546.850783728" calcext:value-type="float">
            <text:p>-106,547 </text:p>
          </table:table-cell>
          <table:table-cell table:style-name="ce412" table:formula="of:=[.G18]+[.G22]" office:value-type="float" office:value="-119257.038831433" calcext:value-type="float">
            <text:p>-119,257 </text:p>
          </table:table-cell>
          <table:table-cell table:style-name="ce412" table:formula="of:=[.H18]+[.H22]" office:value-type="float" office:value="-131231.893355808" calcext:value-type="float">
            <text:p>-131,232 </text:p>
          </table:table-cell>
          <table:table-cell table:style-name="ce412" table:formula="of:=[.I18]+[.I22]" office:value-type="float" office:value="59620.760637582" calcext:value-type="float">
            <text:p><text:s/>59,621 </text:p>
          </table:table-cell>
          <table:table-cell table:style-name="ce221"/>
          <table:table-cell table:style-name="ce414" table:number-columns-repeated="5"/>
          <table:table-cell table:style-name="ce221" table:number-columns-repeated="11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50" office:value-type="string" calcext:value-type="string">
            <text:p>(*) Régimen laboral de la Microempresa</text:p>
          </table:table-cell>
          <table:table-cell table:style-name="ce413" table:number-columns-repeated="6"/>
          <table:table-cell table:style-name="ce221" table:number-columns-repeated="17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50" office:value-type="string" calcext:value-type="string">
            <text:p>(**) Régimen tributario Especial</text:p>
          </table:table-cell>
          <table:table-cell table:style-name="ce413" table:number-columns-repeated="6"/>
          <table:table-cell table:style-name="ce221" table:number-columns-repeated="17"/>
          <table:table-cell table:number-columns-repeated="16358"/>
        </table:table-row>
        <table:table-row table:style-name="ro1" table:number-rows-repeated="975">
          <table:table-cell table:style-name="ce221" table:number-columns-repeated="26"/>
          <table:table-cell table:number-columns-repeated="16358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GV" table:style-name="ta16"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4" table:default-cell-style-name="Default"/>
        <table:table-column table:style-name="co48" table:default-cell-style-name="Default"/>
        <table:table-column table:style-name="co7" table:number-columns-repeated="18" table:default-cell-style-name="Default"/>
        <table:table-column table:style-name="co8" table:number-columns-repeated="16358" table:default-cell-style-name="Default"/>
        <table:table-row table:style-name="ro1">
          <table:table-cell table:style-name="ce221"/>
          <table:table-cell table:style-name="ce129"/>
          <table:table-cell table:style-name="ce221" table:number-columns-repeated="24"/>
          <table:table-cell table:number-columns-repeated="16358"/>
        </table:table-row>
        <table:table-row table:style-name="ro1">
          <table:table-cell table:style-name="ce221" table:number-columns-repeated="26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215" office:value-type="string" calcext:value-type="string" table:number-columns-spanned="6" table:number-rows-spanned="1">
            <text:p>PAGO DE IGV PROYECTADO</text:p>
          </table:table-cell>
          <table:covered-table-cell table:number-columns-repeated="5" table:style-name="ce12"/>
          <table:table-cell table:style-name="ce221" table:number-columns-repeated="18"/>
          <table:table-cell table:number-columns-repeated="16358"/>
        </table:table-row>
        <table:table-row table:style-name="ro1">
          <table:table-cell table:style-name="ce221" table:number-columns-repeated="26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367" office:value-type="string" calcext:value-type="string">
            <text:p>RUBRO</text:p>
          </table:table-cell>
          <table:table-cell table:style-name="ce372" office:value-type="string" calcext:value-type="string">
            <text:p>Año 1</text:p>
          </table:table-cell>
          <table:table-cell table:style-name="ce372" office:value-type="string" calcext:value-type="string">
            <text:p>Año 2</text:p>
          </table:table-cell>
          <table:table-cell table:style-name="ce372" office:value-type="string" calcext:value-type="string">
            <text:p>Año 3</text:p>
          </table:table-cell>
          <table:table-cell table:style-name="ce372" office:value-type="string" calcext:value-type="string">
            <text:p>Año 4</text:p>
          </table:table-cell>
          <table:table-cell table:style-name="ce285" office:value-type="string" calcext:value-type="string">
            <text:p>Año 5</text:p>
          </table:table-cell>
          <table:table-cell table:style-name="ce221" table:number-columns-repeated="18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15" office:value-type="string" calcext:value-type="string">
            <text:p>Ingresos sin IGV</text:p>
          </table:table-cell>
          <table:table-cell table:style-name="ce418" table:formula="of:=[.D7]-([.D7]*18/100)" office:value-type="currency" office:currency="PEN" office:value="1635900" calcext:value-type="currency">
            <text:p><text:s/>S/ 1,635,900.00 </text:p>
          </table:table-cell>
          <table:table-cell table:style-name="ce418" table:formula="of:=[.E7]-([.E7]*18/100)" office:value-type="currency" office:currency="PEN" office:value="1717701.56" calcext:value-type="currency">
            <text:p><text:s/>S/ 1,717,701.56 </text:p>
          </table:table-cell>
          <table:table-cell table:style-name="ce418" table:formula="of:=[.F7]-([.F7]*18/100)" office:value-type="currency" office:currency="PEN" office:value="1803587.13" calcext:value-type="currency">
            <text:p><text:s/>S/ 1,803,587.13 </text:p>
          </table:table-cell>
          <table:table-cell table:style-name="ce418" table:formula="of:=[.G7]-([.G7]*18/100)" office:value-type="currency" office:currency="PEN" office:value="1893766.9375" calcext:value-type="currency">
            <text:p><text:s/>S/ 1,893,766.94 </text:p>
          </table:table-cell>
          <table:table-cell table:style-name="ce423" table:formula="of:=[.H7]-([.H7]*18/100)" office:value-type="currency" office:currency="PEN" office:value="1988455.694375" calcext:value-type="currency">
            <text:p><text:s/>S/ 1,988,455.69 </text:p>
          </table:table-cell>
          <table:table-cell table:style-name="ce221" table:number-columns-repeated="18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225" office:value-type="string" calcext:value-type="string">
            <text:p>Ingreso con GV</text:p>
          </table:table-cell>
          <table:table-cell table:style-name="ce419" table:formula="of:=[$Estado_Resultados.D7]" office:value-type="currency" office:currency="PEN" office:value="1995000" calcext:value-type="currency">
            <text:p><text:s/>S/ 1,995,000.00 </text:p>
          </table:table-cell>
          <table:table-cell table:style-name="ce419" table:formula="of:=[$Estado_Resultados.E7]" office:value-type="currency" office:currency="PEN" office:value="2094758" calcext:value-type="currency">
            <text:p><text:s/>S/ 2,094,758.00 </text:p>
          </table:table-cell>
          <table:table-cell table:style-name="ce419" table:formula="of:=[$Estado_Resultados.F7]" office:value-type="currency" office:currency="PEN" office:value="2199496.5" calcext:value-type="currency">
            <text:p><text:s/>S/ 2,199,496.50 </text:p>
          </table:table-cell>
          <table:table-cell table:style-name="ce419" table:formula="of:=[$Estado_Resultados.G7]" office:value-type="currency" office:currency="PEN" office:value="2309471.875" calcext:value-type="currency">
            <text:p><text:s/>S/ 2,309,471.88 </text:p>
          </table:table-cell>
          <table:table-cell table:style-name="ce424" table:formula="of:=[$Estado_Resultados.H7]" office:value-type="currency" office:currency="PEN" office:value="2424945.96875" calcext:value-type="currency">
            <text:p><text:s/>S/ 2,424,945.97 </text:p>
          </table:table-cell>
          <table:table-cell table:style-name="ce221" table:number-columns-repeated="18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369" office:value-type="string" calcext:value-type="string">
            <text:p>IGV Venta</text:p>
          </table:table-cell>
          <table:table-cell table:style-name="ce420" table:formula="of:=[.D7]-[.D6]" office:value-type="currency" office:currency="PEN" office:value="359100" calcext:value-type="currency">
            <text:p><text:s/>S/ 359,100.00 </text:p>
          </table:table-cell>
          <table:table-cell table:style-name="ce420" table:formula="of:=[.E7]-[.E6]" office:value-type="currency" office:currency="PEN" office:value="377056.44" calcext:value-type="currency">
            <text:p><text:s/>S/ 377,056.44 </text:p>
          </table:table-cell>
          <table:table-cell table:style-name="ce420" table:formula="of:=[.F7]-[.F6]" office:value-type="currency" office:currency="PEN" office:value="395909.37" calcext:value-type="currency">
            <text:p><text:s/>S/ 395,909.37 </text:p>
          </table:table-cell>
          <table:table-cell table:style-name="ce420" table:formula="of:=[.G7]-[.G6]" office:value-type="currency" office:currency="PEN" office:value="415704.9375" calcext:value-type="currency">
            <text:p><text:s/>S/ 415,704.94 </text:p>
          </table:table-cell>
          <table:table-cell table:style-name="ce425" table:formula="of:=[.H7]-[.H6]" office:value-type="currency" office:currency="PEN" office:value="436490.274375" calcext:value-type="currency">
            <text:p><text:s/>S/ 436,490.27 </text:p>
          </table:table-cell>
          <table:table-cell table:style-name="ce221" table:number-columns-repeated="18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225" office:value-type="string" calcext:value-type="string">
            <text:p>Costos de produccion</text:p>
          </table:table-cell>
          <table:table-cell table:style-name="ce419" table:formula="of:=[$Costos_Ventas.D23]" office:value-type="currency" office:currency="PEN" office:value="1330000" calcext:value-type="currency">
            <text:p><text:s/>S/ 1,330,000.00 </text:p>
          </table:table-cell>
          <table:table-cell table:style-name="ce419" table:formula="of:=[$Costos_Ventas.E23]" office:value-type="currency" office:currency="PEN" office:value="1396500" calcext:value-type="currency">
            <text:p><text:s/>S/ 1,396,500.00 </text:p>
          </table:table-cell>
          <table:table-cell table:style-name="ce419" table:formula="of:=[$Costos_Ventas.F23]" office:value-type="currency" office:currency="PEN" office:value="1466325" calcext:value-type="currency">
            <text:p><text:s/>S/ 1,466,325.00 </text:p>
          </table:table-cell>
          <table:table-cell table:style-name="ce419" table:formula="of:=[$Costos_Ventas.G23]" office:value-type="currency" office:currency="PEN" office:value="1466325" calcext:value-type="currency">
            <text:p><text:s/>S/ 1,466,325.00 </text:p>
          </table:table-cell>
          <table:table-cell table:style-name="ce424" table:formula="of:=[$Costos_Ventas.H23]" office:value-type="currency" office:currency="PEN" office:value="1616623.3125" calcext:value-type="currency">
            <text:p><text:s/>S/ 1,616,623.31 </text:p>
          </table:table-cell>
          <table:table-cell table:style-name="ce221" table:number-columns-repeated="18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225" office:value-type="string" calcext:value-type="string">
            <text:p>Depreciación de activo fijo</text:p>
          </table:table-cell>
          <table:table-cell table:style-name="ce419" table:formula="of:=[$Estado_Resultados.D10]" office:value-type="currency" office:currency="PEN" office:value="2954.4" calcext:value-type="currency">
            <text:p><text:s/>S/ 2,954.40 </text:p>
          </table:table-cell>
          <table:table-cell table:style-name="ce419" table:formula="of:=[$Estado_Resultados.E10]" office:value-type="currency" office:currency="PEN" office:value="2954.4" calcext:value-type="currency">
            <text:p><text:s/>S/ 2,954.40 </text:p>
          </table:table-cell>
          <table:table-cell table:style-name="ce419" table:formula="of:=[$Estado_Resultados.F10]" office:value-type="currency" office:currency="PEN" office:value="2954.4" calcext:value-type="currency">
            <text:p><text:s/>S/ 2,954.40 </text:p>
          </table:table-cell>
          <table:table-cell table:style-name="ce419" table:formula="of:=[$Estado_Resultados.G10]" office:value-type="currency" office:currency="PEN" office:value="2954.4" calcext:value-type="currency">
            <text:p><text:s/>S/ 2,954.40 </text:p>
          </table:table-cell>
          <table:table-cell table:style-name="ce424" table:formula="of:=[$Estado_Resultados.H10]" office:value-type="currency" office:currency="PEN" office:value="2954.4" calcext:value-type="currency">
            <text:p><text:s/>S/ 2,954.40 </text:p>
          </table:table-cell>
          <table:table-cell table:style-name="ce221" table:number-columns-repeated="18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225" office:value-type="string" calcext:value-type="string">
            <text:p>Gastos Administrativos</text:p>
          </table:table-cell>
          <table:table-cell table:style-name="ce419" table:formula="of:=[$Estado_Resultados.D13]-[$Gastos_Operativos.$H$8]*12" office:value-type="currency" office:currency="PEN" office:value="7008" calcext:value-type="currency">
            <text:p><text:s/>S/ 7,008.00 </text:p>
          </table:table-cell>
          <table:table-cell table:style-name="ce419" table:formula="of:=[$Estado_Resultados.E13]-[$Gastos_Operativos.$H$8]*12" office:value-type="currency" office:currency="PEN" office:value="7008" calcext:value-type="currency">
            <text:p><text:s/>S/ 7,008.00 </text:p>
          </table:table-cell>
          <table:table-cell table:style-name="ce419" table:formula="of:=[$Estado_Resultados.F13]-[$Gastos_Operativos.$H$8]*12" office:value-type="currency" office:currency="PEN" office:value="7008" calcext:value-type="currency">
            <text:p><text:s/>S/ 7,008.00 </text:p>
          </table:table-cell>
          <table:table-cell table:style-name="ce419" table:formula="of:=[$Estado_Resultados.G13]-[$Gastos_Operativos.$H$8]*12" office:value-type="currency" office:currency="PEN" office:value="7008" calcext:value-type="currency">
            <text:p><text:s/>S/ 7,008.00 </text:p>
          </table:table-cell>
          <table:table-cell table:style-name="ce426" table:formula="of:=[$Estado_Resultados.H13]-[$Gastos_Operativos.$H$8]*12" office:value-type="currency" office:currency="PEN" office:value="7008" calcext:value-type="currency">
            <text:p><text:s/>S/ 7,008.00 </text:p>
          </table:table-cell>
          <table:table-cell table:style-name="ce221" table:number-columns-repeated="18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225" office:value-type="string" calcext:value-type="string">
            <text:p>Gastos de Ventas</text:p>
          </table:table-cell>
          <table:table-cell table:style-name="ce419" table:formula="of:=[$Estado_Resultados.D14]-[$Gastos_Operativos.$H$15]*12" office:value-type="currency" office:currency="PEN" office:value="2400" calcext:value-type="currency">
            <text:p><text:s/>S/ 2,400.00 </text:p>
          </table:table-cell>
          <table:table-cell table:style-name="ce419" table:formula="of:=[$Estado_Resultados.E14]-[$Gastos_Operativos.$H$15]*12" office:value-type="currency" office:currency="PEN" office:value="2400" calcext:value-type="currency">
            <text:p><text:s/>S/ 2,400.00 </text:p>
          </table:table-cell>
          <table:table-cell table:style-name="ce419" table:formula="of:=[$Estado_Resultados.F14]-[$Gastos_Operativos.$H$15]*12" office:value-type="currency" office:currency="PEN" office:value="2400" calcext:value-type="currency">
            <text:p><text:s/>S/ 2,400.00 </text:p>
          </table:table-cell>
          <table:table-cell table:style-name="ce419" table:formula="of:=[$Estado_Resultados.G14]-[$Gastos_Operativos.$H$15]*12" office:value-type="currency" office:currency="PEN" office:value="2400" calcext:value-type="currency">
            <text:p><text:s/>S/ 2,400.00 </text:p>
          </table:table-cell>
          <table:table-cell table:style-name="ce424" table:formula="of:=[$Estado_Resultados.H14]-[$Gastos_Operativos.$H$15]*12" office:value-type="currency" office:currency="PEN" office:value="2400" calcext:value-type="currency">
            <text:p><text:s/>S/ 2,400.00 </text:p>
          </table:table-cell>
          <table:table-cell table:style-name="ce221" table:number-columns-repeated="18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225" office:value-type="string" calcext:value-type="string">
            <text:p>Amortización de intangibles</text:p>
          </table:table-cell>
          <table:table-cell table:style-name="ce419" table:formula="of:=[$Estado_Resultados.D15]" office:value-type="currency" office:currency="PEN" office:value="334" calcext:value-type="currency">
            <text:p><text:s/>S/ 334.00 </text:p>
          </table:table-cell>
          <table:table-cell table:style-name="ce419" table:formula="of:=[$Estado_Resultados.E15]" office:value-type="currency" office:currency="PEN" office:value="334" calcext:value-type="currency">
            <text:p><text:s/>S/ 334.00 </text:p>
          </table:table-cell>
          <table:table-cell table:style-name="ce419" table:formula="of:=[$Estado_Resultados.F15]" office:value-type="currency" office:currency="PEN" office:value="334" calcext:value-type="currency">
            <text:p><text:s/>S/ 334.00 </text:p>
          </table:table-cell>
          <table:table-cell table:style-name="ce419" table:formula="of:=[$Estado_Resultados.G15]" office:value-type="currency" office:currency="PEN" office:value="334" calcext:value-type="currency">
            <text:p><text:s/>S/ 334.00 </text:p>
          </table:table-cell>
          <table:table-cell table:style-name="ce424" table:formula="of:=[$Estado_Resultados.H15]" office:value-type="currency" office:currency="PEN" office:value="334" calcext:value-type="currency">
            <text:p><text:s/>S/ 334.00 </text:p>
          </table:table-cell>
          <table:table-cell table:style-name="ce221" table:number-columns-repeated="18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225" office:value-type="string" calcext:value-type="string">
            <text:p>Egresos sin IGV</text:p>
          </table:table-cell>
          <table:table-cell table:style-name="ce419" table:formula="of:=SUM([.D9:.D13])" office:value-type="currency" office:currency="PEN" office:value="1342696.4" calcext:value-type="currency">
            <text:p><text:s/>S/ 1,342,696.40 </text:p>
          </table:table-cell>
          <table:table-cell table:style-name="ce419" table:formula="of:=SUM([.E9:.E13])" office:value-type="currency" office:currency="PEN" office:value="1409196.4" calcext:value-type="currency">
            <text:p><text:s/>S/ 1,409,196.40 </text:p>
          </table:table-cell>
          <table:table-cell table:style-name="ce419" table:formula="of:=SUM([.F9:.F13])" office:value-type="currency" office:currency="PEN" office:value="1479021.4" calcext:value-type="currency">
            <text:p><text:s/>S/ 1,479,021.40 </text:p>
          </table:table-cell>
          <table:table-cell table:style-name="ce419" table:formula="of:=SUM([.G9:.G13])" office:value-type="currency" office:currency="PEN" office:value="1479021.4" calcext:value-type="currency">
            <text:p><text:s/>S/ 1,479,021.40 </text:p>
          </table:table-cell>
          <table:table-cell table:style-name="ce424" table:formula="of:=SUM([.H9:.H13])" office:value-type="currency" office:currency="PEN" office:value="1629319.7125" calcext:value-type="currency">
            <text:p><text:s/>S/ 1,629,319.71 </text:p>
          </table:table-cell>
          <table:table-cell table:style-name="ce221" table:number-columns-repeated="18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225" office:value-type="string" calcext:value-type="string">
            <text:p>Egresos con IGV</text:p>
          </table:table-cell>
          <table:table-cell table:style-name="ce419" table:formula="of:=[.D14]+[.D14]*18/100" office:value-type="currency" office:currency="PEN" office:value="1584381.752" calcext:value-type="currency">
            <text:p><text:s/>S/ 1,584,381.75 </text:p>
          </table:table-cell>
          <table:table-cell table:style-name="ce419" table:formula="of:=[.E14]+[.E14]*18/100" office:value-type="currency" office:currency="PEN" office:value="1662851.752" calcext:value-type="currency">
            <text:p><text:s/>S/ 1,662,851.75 </text:p>
          </table:table-cell>
          <table:table-cell table:style-name="ce419" table:formula="of:=[.F14]+[.F14]*18/100" office:value-type="currency" office:currency="PEN" office:value="1745245.252" calcext:value-type="currency">
            <text:p><text:s/>S/ 1,745,245.25 </text:p>
          </table:table-cell>
          <table:table-cell table:style-name="ce419" table:formula="of:=[.G14]+[.G14]*18/100" office:value-type="currency" office:currency="PEN" office:value="1745245.252" calcext:value-type="currency">
            <text:p><text:s/>S/ 1,745,245.25 </text:p>
          </table:table-cell>
          <table:table-cell table:style-name="ce424" table:formula="of:=[.H14]+[.H14]*18/100" office:value-type="currency" office:currency="PEN" office:value="1922597.26075" calcext:value-type="currency">
            <text:p><text:s/>S/ 1,922,597.26 </text:p>
          </table:table-cell>
          <table:table-cell table:style-name="ce221" table:number-columns-repeated="18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16" office:value-type="string" calcext:value-type="string">
            <text:p>IGV Compra</text:p>
          </table:table-cell>
          <table:table-cell table:style-name="ce421" table:formula="of:=[.D15]-[.D14]" office:value-type="currency" office:currency="PEN" office:value="241685.352" calcext:value-type="currency">
            <text:p><text:s/>S/ 241,685.35 </text:p>
          </table:table-cell>
          <table:table-cell table:style-name="ce421" table:formula="of:=[.E15]-[.E14]" office:value-type="currency" office:currency="PEN" office:value="253655.352" calcext:value-type="currency">
            <text:p><text:s/>S/ 253,655.35 </text:p>
          </table:table-cell>
          <table:table-cell table:style-name="ce421" table:formula="of:=[.F15]-[.F14]" office:value-type="currency" office:currency="PEN" office:value="266223.852" calcext:value-type="currency">
            <text:p><text:s/>S/ 266,223.85 </text:p>
          </table:table-cell>
          <table:table-cell table:style-name="ce421" table:formula="of:=[.G15]-[.G14]" office:value-type="currency" office:currency="PEN" office:value="266223.852" calcext:value-type="currency">
            <text:p><text:s/>S/ 266,223.85 </text:p>
          </table:table-cell>
          <table:table-cell table:style-name="ce427" table:formula="of:=[.H15]-[.H14]" office:value-type="currency" office:currency="PEN" office:value="293277.54825" calcext:value-type="currency">
            <text:p><text:s/>S/ 293,277.55 </text:p>
          </table:table-cell>
          <table:table-cell table:style-name="ce221" table:number-columns-repeated="18"/>
          <table:table-cell table:number-columns-repeated="16358"/>
        </table:table-row>
        <table:table-row table:style-name="ro1">
          <table:table-cell table:style-name="ce221" table:number-columns-repeated="2"/>
          <table:table-cell table:style-name="ce417" office:value-type="string" calcext:value-type="string">
            <text:p>Pago IGV (Icon-Econ)</text:p>
          </table:table-cell>
          <table:table-cell table:style-name="ce422" table:formula="of:=[.D8]-[.D16]" office:value-type="currency" office:currency="PEN" office:value="117414.648" calcext:value-type="currency">
            <text:p><text:s/>S/ 117,414.65 </text:p>
          </table:table-cell>
          <table:table-cell table:style-name="ce422" table:formula="of:=[.E8]-[.E16]" office:value-type="currency" office:currency="PEN" office:value="123401.088" calcext:value-type="currency">
            <text:p><text:s/>S/ 123,401.09 </text:p>
          </table:table-cell>
          <table:table-cell table:style-name="ce422" table:formula="of:=[.F8]-[.F16]" office:value-type="currency" office:currency="PEN" office:value="129685.518" calcext:value-type="currency">
            <text:p><text:s/>S/ 129,685.52 </text:p>
          </table:table-cell>
          <table:table-cell table:style-name="ce422" table:formula="of:=[.G8]-[.G16]" office:value-type="currency" office:currency="PEN" office:value="149481.0855" calcext:value-type="currency">
            <text:p><text:s/>S/ 149,481.09 </text:p>
          </table:table-cell>
          <table:table-cell table:style-name="ce422" table:formula="of:=[.H8]-[.H16]" office:value-type="currency" office:currency="PEN" office:value="143212.726125" calcext:value-type="currency">
            <text:p><text:s/>S/ 143,212.73 </text:p>
          </table:table-cell>
          <table:table-cell table:style-name="ce221" table:number-columns-repeated="18"/>
          <table:table-cell table:number-columns-repeated="16358"/>
        </table:table-row>
        <table:table-row table:style-name="ro1">
          <table:table-cell table:style-name="ce221" table:number-columns-repeated="26"/>
          <table:table-cell table:number-columns-repeated="16358"/>
        </table:table-row>
        <table:table-row table:style-name="ro1" table:number-rows-repeated="982">
          <table:table-cell table:style-name="ce221" table:number-columns-repeated="26"/>
          <table:table-cell table:number-columns-repeated="16358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ntabilidad" table:style-name="ta17"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24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24" table:number-columns-repeated="6" table:default-cell-style-name="Default"/>
        <table:table-column table:style-name="co8" table:number-columns-repeated="16369" table:default-cell-style-name="Default"/>
        <table:table-row table:style-name="ro16" table:number-rows-repeated="3">
          <table:table-cell table:style-name="ce1" table:number-columns-repeated="26"/>
          <table:table-cell table:number-columns-repeated="16358"/>
        </table:table-row>
        <table:table-row table:style-name="ro25">
          <table:table-cell table:style-name="ce1"/>
          <table:table-cell table:style-name="ce129"/>
          <table:table-cell table:style-name="ce428" office:value-type="string" calcext:value-type="string" table:number-columns-spanned="3" table:number-rows-spanned="1">
            <text:p>EVALUACIÓN ECONÓMICA</text:p>
          </table:table-cell>
          <table:covered-table-cell table:style-name="ce94"/>
          <table:covered-table-cell table:style-name="ce449"/>
          <table:table-cell table:style-name="ce1"/>
          <table:table-cell table:style-name="ce455" office:value-type="string" calcext:value-type="string" table:number-columns-spanned="3" table:number-rows-spanned="1">
            <text:p>EVALUACIÓN FINANCIERA <text:s text:c="41"/>EN EMPRESA DIVERSIFICADA</text:p>
          </table:table-cell>
          <table:covered-table-cell table:style-name="ce94"/>
          <table:covered-table-cell table:style-name="ce449"/>
          <table:table-cell table:style-name="ce1" table:number-columns-repeated="17"/>
          <table:table-cell table:number-columns-repeated="16358"/>
        </table:table-row>
        <table:table-row table:style-name="ro17">
          <table:table-cell table:style-name="ce1"/>
          <table:table-cell table:style-name="ce129"/>
          <table:table-cell table:style-name="ce220" table:number-columns-repeated="3"/>
          <table:table-cell table:style-name="ce1"/>
          <table:table-cell table:style-name="ce456" table:number-columns-repeated="3"/>
          <table:table-cell table:style-name="ce1" table:number-columns-repeated="17"/>
          <table:table-cell table:number-columns-repeated="16358"/>
        </table:table-row>
        <table:table-row table:style-name="ro18">
          <table:table-cell table:style-name="ce1"/>
          <table:table-cell table:style-name="ce129"/>
          <table:table-cell table:style-name="ce404" office:value-type="string" calcext:value-type="string">
            <text:p>Tasa/criterio</text:p>
          </table:table-cell>
          <table:table-cell table:style-name="ce433" office:value-type="string" calcext:value-type="string">
            <text:p>Valor</text:p>
          </table:table-cell>
          <table:table-cell table:style-name="ce404"/>
          <table:table-cell table:style-name="ce450"/>
          <table:table-cell table:style-name="ce404" office:value-type="string" calcext:value-type="string">
            <text:p>Tasa/criterio</text:p>
          </table:table-cell>
          <table:table-cell table:style-name="ce433" office:value-type="string" calcext:value-type="string">
            <text:p>Valor</text:p>
          </table:table-cell>
          <table:table-cell table:style-name="ce404"/>
          <table:table-cell table:style-name="ce1" table:number-columns-repeated="17"/>
          <table:table-cell table:number-columns-repeated="16358"/>
        </table:table-row>
        <table:table-row table:style-name="ro16">
          <table:table-cell table:style-name="ce1"/>
          <table:table-cell table:style-name="ce129"/>
          <table:table-cell table:style-name="ce405" office:value-type="string" calcext:value-type="string">
            <text:p>Ku nominal en dolares</text:p>
          </table:table-cell>
          <table:table-cell table:style-name="ce434" table:formula="of:=[$Ku.C12]" office:value-type="percentage" office:value="0.2293" calcext:value-type="percentage">
            <text:p>22.93 %</text:p>
          </table:table-cell>
          <table:table-cell table:style-name="ce450" table:number-columns-repeated="2"/>
          <table:table-cell table:style-name="ce405" office:value-type="string" calcext:value-type="string">
            <text:p>Kers nominal en dolares</text:p>
          </table:table-cell>
          <table:table-cell table:style-name="ce457" office:value-type="percentage" office:value="0.1131" calcext:value-type="percentage">
            <text:p>11.31 %</text:p>
          </table:table-cell>
          <table:table-cell table:style-name="ce450"/>
          <table:table-cell table:style-name="ce1" table:number-columns-repeated="17"/>
          <table:table-cell table:number-columns-repeated="16358"/>
        </table:table-row>
        <table:table-row table:style-name="ro16">
          <table:table-cell table:style-name="ce1" table:number-columns-repeated="2"/>
          <table:table-cell table:style-name="ce405" office:value-type="string" calcext:value-type="string">
            <text:p>Ku nominal en soles</text:p>
          </table:table-cell>
          <table:table-cell table:style-name="ce435" table:formula="of:=[.D7]*((1+[.D9])/(1+[.D10]))" office:value-type="percentage" office:value="0.231323235294118" calcext:value-type="percentage">
            <text:p>23.13 %</text:p>
          </table:table-cell>
          <table:table-cell table:style-name="ce405"/>
          <table:table-cell table:style-name="ce450"/>
          <table:table-cell table:style-name="ce405" office:value-type="string" calcext:value-type="string">
            <text:p>Kers nominal en soles</text:p>
          </table:table-cell>
          <table:table-cell table:style-name="ce434" table:formula="of:=[.H7]*(1+[.H9])/(1+[.H10])" office:value-type="percentage" office:value="0.114097941176471" calcext:value-type="percentage">
            <text:p>11.41 %</text:p>
          </table:table-cell>
          <table:table-cell table:style-name="ce405"/>
          <table:table-cell table:style-name="ce1" table:number-columns-repeated="4"/>
          <table:table-cell table:style-name="ce461"/>
          <table:table-cell table:style-name="ce1" table:number-columns-repeated="12"/>
          <table:table-cell table:number-columns-repeated="16358"/>
        </table:table-row>
        <table:table-row table:style-name="ro16">
          <table:table-cell table:style-name="ce1" table:number-columns-repeated="2"/>
          <table:table-cell table:style-name="ce405" office:value-type="string" calcext:value-type="string">
            <text:p>Inflacion en Perú</text:p>
          </table:table-cell>
          <table:table-cell table:style-name="ce436" table:formula="of:=[$Resumen.H15]" office:value-type="percentage" office:value="0.029" calcext:value-type="percentage">
            <text:p>2.9%</text:p>
          </table:table-cell>
          <table:table-cell table:style-name="ce405"/>
          <table:table-cell table:style-name="ce450"/>
          <table:table-cell table:style-name="ce405" office:value-type="string" calcext:value-type="string">
            <text:p>Inflacion en Perú</text:p>
          </table:table-cell>
          <table:table-cell table:style-name="ce436" table:formula="of:=[.D9]" office:value-type="percentage" office:value="0.029" calcext:value-type="percentage">
            <text:p>2.9%</text:p>
          </table:table-cell>
          <table:table-cell table:style-name="ce405"/>
          <table:table-cell table:style-name="ce1" table:number-columns-repeated="17"/>
          <table:table-cell table:number-columns-repeated="16358"/>
        </table:table-row>
        <table:table-row table:style-name="ro16">
          <table:table-cell table:style-name="ce1" table:number-columns-repeated="2"/>
          <table:table-cell table:style-name="ce405" office:value-type="string" calcext:value-type="string">
            <text:p>Inflacion USA</text:p>
          </table:table-cell>
          <table:table-cell table:style-name="ce436" table:formula="of:=[$Resumen.H14]" office:value-type="percentage" office:value="0.02" calcext:value-type="percentage">
            <text:p>2.0%</text:p>
          </table:table-cell>
          <table:table-cell table:style-name="ce405"/>
          <table:table-cell table:style-name="ce450"/>
          <table:table-cell table:style-name="ce405" office:value-type="string" calcext:value-type="string">
            <text:p>Inflacion USA</text:p>
          </table:table-cell>
          <table:table-cell table:style-name="ce436" table:formula="of:=[.D10]" office:value-type="percentage" office:value="0.02" calcext:value-type="percentage">
            <text:p>2.0%</text:p>
          </table:table-cell>
          <table:table-cell table:style-name="ce405"/>
          <table:table-cell table:style-name="ce1" table:number-columns-repeated="3"/>
          <table:table-cell table:style-name="ce461" table:number-columns-repeated="3"/>
          <table:table-cell table:style-name="ce1" table:number-columns-repeated="11"/>
          <table:table-cell table:number-columns-repeated="16358"/>
        </table:table-row>
        <table:table-row table:style-name="ro16">
          <table:table-cell table:style-name="ce1" table:number-columns-repeated="2"/>
          <table:table-cell table:style-name="ce405" office:value-type="string" calcext:value-type="string">
            <text:p>COK <text:s/>real</text:p>
          </table:table-cell>
          <table:table-cell table:style-name="ce436" table:formula="of:=((1+[.D8])/(1+[.D9]))-1" office:value-type="percentage" office:value="0.196621219916538" calcext:value-type="percentage">
            <text:p>19.7%</text:p>
          </table:table-cell>
          <table:table-cell table:style-name="ce405"/>
          <table:table-cell table:style-name="ce450"/>
          <table:table-cell table:style-name="ce405" office:value-type="string" calcext:value-type="string">
            <text:p>Kers <text:s/>real</text:p>
          </table:table-cell>
          <table:table-cell table:style-name="ce437" table:formula="of:=((1+[.H8])/(1+[.H9]))-1" office:value-type="percentage" office:value="0.0826996512890872" calcext:value-type="percentage">
            <text:p>8 %</text:p>
          </table:table-cell>
          <table:table-cell table:style-name="ce405"/>
          <table:table-cell table:style-name="ce1" table:number-columns-repeated="17"/>
          <table:table-cell table:number-columns-repeated="16358"/>
        </table:table-row>
        <table:table-row table:style-name="ro3">
          <table:table-cell table:style-name="ce1" table:number-columns-repeated="2"/>
          <table:table-cell table:style-name="ce405"/>
          <table:table-cell table:style-name="ce437"/>
          <table:table-cell table:style-name="ce405"/>
          <table:table-cell table:style-name="ce450"/>
          <table:table-cell table:style-name="ce405"/>
          <table:table-cell table:style-name="ce439"/>
          <table:table-cell table:style-name="ce405"/>
          <table:table-cell table:style-name="ce1" table:number-columns-repeated="4"/>
          <table:table-cell table:style-name="ce461" table:number-columns-repeated="2"/>
          <table:table-cell table:style-name="ce1" table:number-columns-repeated="11"/>
          <table:table-cell table:number-columns-repeated="16358"/>
        </table:table-row>
        <table:table-row table:style-name="ro16">
          <table:table-cell table:style-name="ce1" table:number-columns-repeated="2"/>
          <table:table-cell table:style-name="ce407" office:value-type="string" calcext:value-type="string">
            <text:p>VANE =</text:p>
          </table:table-cell>
          <table:table-cell table:style-name="ce438" table:formula="of:=NPV([.D11];[$Flujo_Caja.E18:.I18])+[$Flujo_Caja.D18]" office:value-type="float" office:value="-425149.614516734" calcext:value-type="float">
            <text:p><text:s/>-425,150 </text:p>
          </table:table-cell>
          <table:table-cell table:style-name="ce451" office:value-type="string" calcext:value-type="string">
            <text:p>soles</text:p>
          </table:table-cell>
          <table:table-cell table:style-name="ce450"/>
          <table:table-cell table:style-name="ce407" office:value-type="string" calcext:value-type="string">
            <text:p><text:s/>VANF=</text:p>
          </table:table-cell>
          <table:table-cell table:style-name="ce458" table:formula="of:=NPV([.H11];[$Flujo_Caja.E23:.I23])+[$Flujo_Caja.D23]" office:value-type="float" office:value="-488751.759909963" calcext:value-type="float">
            <text:p><text:s/>-488,752 </text:p>
          </table:table-cell>
          <table:table-cell table:style-name="ce459" office:value-type="string" office:string-value="soles" calcext:value-type="string">
            <text:p><text:s/>soles </text:p>
          </table:table-cell>
          <table:table-cell table:style-name="ce1" table:number-columns-repeated="17"/>
          <table:table-cell table:number-columns-repeated="16358"/>
        </table:table-row>
        <table:table-row table:style-name="ro16">
          <table:table-cell table:style-name="ce1" table:number-columns-repeated="2"/>
          <table:table-cell table:style-name="ce405"/>
          <table:table-cell table:style-name="ce439"/>
          <table:table-cell table:style-name="ce405"/>
          <table:table-cell table:style-name="ce450"/>
          <table:table-cell table:style-name="ce405"/>
          <table:table-cell table:style-name="ce439"/>
          <table:table-cell table:style-name="ce405"/>
          <table:table-cell table:style-name="ce1" table:number-columns-repeated="17"/>
          <table:table-cell table:number-columns-repeated="16358"/>
        </table:table-row>
        <table:table-row table:style-name="ro16">
          <table:table-cell table:style-name="ce1" table:number-columns-repeated="2"/>
          <table:table-cell table:style-name="ce407" office:value-type="string" calcext:value-type="string">
            <text:p>TIRE =</text:p>
          </table:table-cell>
          <table:table-cell table:style-name="ce440" table:formula="of:=IRR([$Flujo_Caja.D18:.I18])" office:value-type="percentage" office:value="-0.645513633860833" calcext:value-type="percentage">
            <text:p>-64.6%</text:p>
          </table:table-cell>
          <table:table-cell table:style-name="ce451" office:value-type="string" calcext:value-type="string">
            <text:p>anual</text:p>
          </table:table-cell>
          <table:table-cell table:style-name="ce450"/>
          <table:table-cell table:style-name="ce407" office:value-type="string" calcext:value-type="string">
            <text:p>TIRF <text:s/>=</text:p>
          </table:table-cell>
          <table:table-cell table:style-name="ce440" table:formula="of:=IRR([$Flujo_Caja.D23:.I23])" office:value-type="percentage" office:value="-0.678907716542367" calcext:value-type="percentage">
            <text:p>-67.9%</text:p>
          </table:table-cell>
          <table:table-cell table:style-name="ce460" office:value-type="string" calcext:value-type="string">
            <text:p>anual</text:p>
          </table:table-cell>
          <table:table-cell table:style-name="ce1" table:number-columns-repeated="17"/>
          <table:table-cell table:number-columns-repeated="16358"/>
        </table:table-row>
        <table:table-row table:style-name="ro16">
          <table:table-cell table:style-name="ce1" table:number-columns-repeated="2"/>
          <table:table-cell table:style-name="ce429"/>
          <table:table-cell table:style-name="ce441"/>
          <table:table-cell table:style-name="ce429"/>
          <table:table-cell table:style-name="ce1" table:number-columns-repeated="21"/>
          <table:table-cell table:number-columns-repeated="16358"/>
        </table:table-row>
        <table:table-row table:style-name="ro26">
          <table:table-cell table:style-name="ce1"/>
          <table:table-cell table:style-name="ce129"/>
          <table:table-cell table:style-name="ce430" office:value-type="string" calcext:value-type="string" table:number-columns-spanned="3" table:number-rows-spanned="1">
            <text:p>EVALUACIÓN FINANCIERA CON MÉTODO WACCC</text:p>
          </table:table-cell>
          <table:covered-table-cell table:style-name="ce94"/>
          <table:covered-table-cell table:style-name="ce449"/>
          <table:table-cell table:style-name="ce1"/>
          <table:table-cell table:style-name="ce455" office:value-type="string" calcext:value-type="string" table:number-columns-spanned="3" table:number-rows-spanned="1">
            <text:p>EVALUACIÓN FINANCIERA <text:s text:c="35"/>EN EMPRESA NO DIVERSIFICADA</text:p>
          </table:table-cell>
          <table:covered-table-cell table:style-name="ce94"/>
          <table:covered-table-cell table:style-name="ce449"/>
          <table:table-cell table:style-name="ce1" table:number-columns-repeated="17"/>
          <table:table-cell table:number-columns-repeated="16358"/>
        </table:table-row>
        <table:table-row table:style-name="ro27">
          <table:table-cell table:style-name="ce1"/>
          <table:table-cell table:style-name="ce129"/>
          <table:table-cell table:style-name="ce431" table:number-columns-repeated="3"/>
          <table:table-cell table:style-name="ce1"/>
          <table:table-cell table:style-name="ce456" table:number-columns-repeated="3"/>
          <table:table-cell table:style-name="ce1" table:number-columns-repeated="17"/>
          <table:table-cell table:number-columns-repeated="16358"/>
        </table:table-row>
        <table:table-row table:style-name="ro19">
          <table:table-cell table:style-name="ce1"/>
          <table:table-cell table:style-name="ce129"/>
          <table:table-cell table:style-name="ce404" office:value-type="string" calcext:value-type="string">
            <text:p>Tasa/criterio</text:p>
          </table:table-cell>
          <table:table-cell table:style-name="ce433" office:value-type="string" calcext:value-type="string">
            <text:p>Valor</text:p>
          </table:table-cell>
          <table:table-cell table:style-name="ce404"/>
          <table:table-cell table:style-name="ce41"/>
          <table:table-cell table:style-name="ce404" office:value-type="string" calcext:value-type="string">
            <text:p>Tasa/criterio</text:p>
          </table:table-cell>
          <table:table-cell table:style-name="ce433" office:value-type="string" calcext:value-type="string">
            <text:p>Valor</text:p>
          </table:table-cell>
          <table:table-cell table:style-name="ce404"/>
          <table:table-cell table:style-name="ce1" table:number-columns-repeated="17"/>
          <table:table-cell table:number-columns-repeated="16358"/>
        </table:table-row>
        <table:table-row table:style-name="ro19">
          <table:table-cell table:style-name="ce1" table:number-columns-repeated="2"/>
          <table:table-cell table:style-name="ce139" office:value-type="string" calcext:value-type="string">
            <text:p>Wacc nominal en dolares</text:p>
          </table:table-cell>
          <table:table-cell table:style-name="ce442" table:formula="of:=[$Ke_Kwacc.K13]" office:value-type="percentage" office:value="0.239899391811406" calcext:value-type="percentage">
            <text:p>23.99 %</text:p>
          </table:table-cell>
          <table:table-cell table:style-name="ce452"/>
          <table:table-cell table:style-name="ce41"/>
          <table:table-cell table:style-name="ce139" office:value-type="string" calcext:value-type="string">
            <text:p>Kert nominal en dolares</text:p>
          </table:table-cell>
          <table:table-cell table:style-name="ce442" table:formula="of:=[$Ke_Kwacc.E13]" office:value-type="percentage" office:value="0.241697367522024" calcext:value-type="percentage">
            <text:p>24.17 %</text:p>
          </table:table-cell>
          <table:table-cell table:style-name="ce452"/>
          <table:table-cell table:style-name="ce1" table:number-columns-repeated="17"/>
          <table:table-cell table:number-columns-repeated="16358"/>
        </table:table-row>
        <table:table-row table:style-name="ro7">
          <table:table-cell table:style-name="ce1" table:number-columns-repeated="2"/>
          <table:table-cell table:style-name="ce139" office:value-type="string" calcext:value-type="string">
            <text:p>wacc nominal en soles</text:p>
          </table:table-cell>
          <table:table-cell table:style-name="ce443" table:formula="of:=[.D20]*(1+[.D22])/(1+[.D23])" office:value-type="percentage" office:value="0.242016151150918" calcext:value-type="percentage">
            <text:p>24.20 %</text:p>
          </table:table-cell>
          <table:table-cell table:style-name="ce139"/>
          <table:table-cell table:style-name="ce41"/>
          <table:table-cell table:style-name="ce139" office:value-type="string" calcext:value-type="string">
            <text:p>Kert nominal en soles</text:p>
          </table:table-cell>
          <table:table-cell table:style-name="ce443" table:formula="of:=[.H20]*(1+[.H22])/(1+[.H23])" office:value-type="percentage" office:value="0.243829991353101" calcext:value-type="percentage">
            <text:p>24.38 %</text:p>
          </table:table-cell>
          <table:table-cell table:style-name="ce139"/>
          <table:table-cell table:style-name="ce1" table:number-columns-repeated="17"/>
          <table:table-cell table:number-columns-repeated="16358"/>
        </table:table-row>
        <table:table-row table:style-name="ro7">
          <table:table-cell table:style-name="ce1" table:number-columns-repeated="2"/>
          <table:table-cell table:style-name="ce139" office:value-type="string" calcext:value-type="string">
            <text:p>Inflacion en Perú</text:p>
          </table:table-cell>
          <table:table-cell table:style-name="ce444" table:formula="of:=[.D9]" office:value-type="percentage" office:value="0.029" calcext:value-type="percentage">
            <text:p>2.9%</text:p>
          </table:table-cell>
          <table:table-cell table:style-name="ce139"/>
          <table:table-cell table:style-name="ce41"/>
          <table:table-cell table:style-name="ce139" office:value-type="string" calcext:value-type="string">
            <text:p>Inflacion en Perú</text:p>
          </table:table-cell>
          <table:table-cell table:style-name="ce444" table:formula="of:=[.D9]" office:value-type="percentage" office:value="0.029" calcext:value-type="percentage">
            <text:p>2.9%</text:p>
          </table:table-cell>
          <table:table-cell table:style-name="ce139"/>
          <table:table-cell table:style-name="ce1" table:number-columns-repeated="17"/>
          <table:table-cell table:number-columns-repeated="16358"/>
        </table:table-row>
        <table:table-row table:style-name="ro7">
          <table:table-cell table:style-name="ce1" table:number-columns-repeated="2"/>
          <table:table-cell table:style-name="ce139" office:value-type="string" calcext:value-type="string">
            <text:p>Inflacion USA</text:p>
          </table:table-cell>
          <table:table-cell table:style-name="ce444" table:formula="of:=[.D10]" office:value-type="percentage" office:value="0.02" calcext:value-type="percentage">
            <text:p>2.0%</text:p>
          </table:table-cell>
          <table:table-cell table:style-name="ce139"/>
          <table:table-cell table:style-name="ce41"/>
          <table:table-cell table:style-name="ce139" office:value-type="string" calcext:value-type="string">
            <text:p>Inflacion USA</text:p>
          </table:table-cell>
          <table:table-cell table:style-name="ce444" table:formula="of:=[.D10]" office:value-type="percentage" office:value="0.02" calcext:value-type="percentage">
            <text:p>2.0%</text:p>
          </table:table-cell>
          <table:table-cell table:style-name="ce139"/>
          <table:table-cell table:style-name="ce1" table:number-columns-repeated="17"/>
          <table:table-cell table:number-columns-repeated="16358"/>
        </table:table-row>
        <table:table-row table:style-name="ro7">
          <table:table-cell table:style-name="ce1" table:number-columns-repeated="2"/>
          <table:table-cell table:style-name="ce139" office:value-type="string" calcext:value-type="string">
            <text:p>Wacc <text:s/>real</text:p>
          </table:table-cell>
          <table:table-cell table:style-name="ce445" table:formula="of:=((1+[.D21])/(1+[.D22]))-1" office:value-type="percentage" office:value="0.207012780515955" calcext:value-type="percentage">
            <text:p>21 %</text:p>
          </table:table-cell>
          <table:table-cell table:style-name="ce139"/>
          <table:table-cell table:style-name="ce41"/>
          <table:table-cell table:style-name="ce139" office:value-type="string" calcext:value-type="string">
            <text:p>Kert <text:s/>real</text:p>
          </table:table-cell>
          <table:table-cell table:style-name="ce445" table:formula="of:=((1+[.H21])/(1+[.H22]))-1" office:value-type="percentage" office:value="0.208775501800876" calcext:value-type="percentage">
            <text:p>21 %</text:p>
          </table:table-cell>
          <table:table-cell table:style-name="ce139"/>
          <table:table-cell table:style-name="ce1" table:number-columns-repeated="17"/>
          <table:table-cell table:number-columns-repeated="16358"/>
        </table:table-row>
        <table:table-row table:style-name="ro7">
          <table:table-cell table:style-name="ce1" table:number-columns-repeated="2"/>
          <table:table-cell table:style-name="ce139"/>
          <table:table-cell table:style-name="ce446"/>
          <table:table-cell table:style-name="ce139"/>
          <table:table-cell table:style-name="ce41"/>
          <table:table-cell table:style-name="ce139"/>
          <table:table-cell table:style-name="ce446"/>
          <table:table-cell table:style-name="ce139"/>
          <table:table-cell table:style-name="ce1" table:number-columns-repeated="17"/>
          <table:table-cell table:number-columns-repeated="16358"/>
        </table:table-row>
        <table:table-row table:style-name="ro7">
          <table:table-cell table:style-name="ce1" table:number-columns-repeated="2"/>
          <table:table-cell table:style-name="ce432" office:value-type="string" calcext:value-type="string">
            <text:p><text:s/>VANF=</text:p>
          </table:table-cell>
          <table:table-cell table:style-name="ce447" table:formula="of:=NPV([$Rentabilidad.D24];[$Flujo_Caja.E18:.I18])+[$Flujo_Caja.D18]" office:value-type="float" office:value="-420352.233799845" calcext:value-type="float">
            <text:p><text:s/>-420,352 </text:p>
          </table:table-cell>
          <table:table-cell table:style-name="ce453" office:value-type="string" office:string-value="soles" calcext:value-type="string">
            <text:p><text:s/>soles </text:p>
          </table:table-cell>
          <table:table-cell table:style-name="ce41"/>
          <table:table-cell table:style-name="ce432" office:value-type="string" calcext:value-type="string">
            <text:p><text:s/>VANF=</text:p>
          </table:table-cell>
          <table:table-cell table:style-name="ce447" table:formula="of:=NPV([.H24];[$Flujo_Caja.E23:.I23])+[$Flujo_Caja.D23]" office:value-type="float" office:value="-416809.420664689" calcext:value-type="float">
            <text:p><text:s/>-416,809 </text:p>
          </table:table-cell>
          <table:table-cell table:style-name="ce453" office:value-type="string" office:string-value="soles" calcext:value-type="string">
            <text:p><text:s/>soles </text:p>
          </table:table-cell>
          <table:table-cell table:style-name="ce1" table:number-columns-repeated="17"/>
          <table:table-cell table:number-columns-repeated="16358"/>
        </table:table-row>
        <table:table-row table:style-name="ro7">
          <table:table-cell table:style-name="ce1" table:number-columns-repeated="2"/>
          <table:table-cell table:style-name="ce139"/>
          <table:table-cell table:style-name="ce446"/>
          <table:table-cell table:style-name="ce139"/>
          <table:table-cell table:style-name="ce41"/>
          <table:table-cell table:style-name="ce139"/>
          <table:table-cell table:style-name="ce446"/>
          <table:table-cell table:style-name="ce139"/>
          <table:table-cell table:style-name="ce1" table:number-columns-repeated="17"/>
          <table:table-cell table:number-columns-repeated="16358"/>
        </table:table-row>
        <table:table-row table:style-name="ro7">
          <table:table-cell table:style-name="ce1" table:number-columns-repeated="2"/>
          <table:table-cell table:style-name="ce432" office:value-type="string" calcext:value-type="string">
            <text:p>TIRF <text:s/>=</text:p>
          </table:table-cell>
          <table:table-cell table:style-name="ce448" table:formula="of:=IRR([$Flujo_Caja.D23:.I23])" office:value-type="percentage" office:value="-0.678907716542367" calcext:value-type="percentage">
            <text:p>-67.9%</text:p>
          </table:table-cell>
          <table:table-cell table:style-name="ce454" office:value-type="string" calcext:value-type="string">
            <text:p>soles</text:p>
          </table:table-cell>
          <table:table-cell table:style-name="ce41"/>
          <table:table-cell table:style-name="ce432" office:value-type="string" calcext:value-type="string">
            <text:p>TIRF <text:s/>=</text:p>
          </table:table-cell>
          <table:table-cell table:style-name="ce448" table:formula="of:=IRR([$Flujo_Caja.D23:.I23])" office:value-type="percentage" office:value="-0.678907716542367" calcext:value-type="percentage">
            <text:p>-67.9%</text:p>
          </table:table-cell>
          <table:table-cell table:style-name="ce454" office:value-type="string" calcext:value-type="string">
            <text:p>anual</text:p>
          </table:table-cell>
          <table:table-cell table:style-name="ce1" table:number-columns-repeated="17"/>
          <table:table-cell table:number-columns-repeated="16358"/>
        </table:table-row>
        <table:table-row table:style-name="ro1" table:number-rows-repeated="200">
          <table:table-cell table:style-name="ce1" table:number-columns-repeated="26"/>
          <table:table-cell table:number-columns-repeated="16358"/>
        </table:table-row>
        <table:table-row table:style-name="ro7" table:number-rows-repeated="772">
          <table:table-cell table:style-name="ce1" table:number-columns-repeated="26"/>
          <table:table-cell table:number-columns-repeated="16358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ensibilidad" table:style-name="ta18">
        <table:table-column table:style-name="co1" table:default-cell-style-name="Default"/>
        <table:table-column table:style-name="co32" table:default-cell-style-name="Default"/>
        <table:table-column table:style-name="co1" table:number-columns-repeated="6" table:default-cell-style-name="Default"/>
        <table:table-column table:style-name="co79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77" table:default-cell-style-name="Default"/>
        <table:table-column table:style-name="co4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8" table:number-columns-repeated="16358" table:default-cell-style-name="Default"/>
        <table:table-row table:style-name="ro1" table:number-rows-repeated="2">
          <table:table-cell table:style-name="ce236" table:number-columns-repeated="26"/>
          <table:table-cell table:number-columns-repeated="16358"/>
        </table:table-row>
        <table:table-row table:style-name="ro1">
          <table:table-cell table:style-name="ce236"/>
          <table:table-cell table:style-name="ce464" office:value-type="string" calcext:value-type="string">
            <text:p>Variable</text:p>
          </table:table-cell>
          <table:table-cell table:style-name="ce474" office:value-type="string" calcext:value-type="string">
            <text:p>VANE</text:p>
          </table:table-cell>
          <table:table-cell table:style-name="ce474" office:value-type="string" calcext:value-type="string">
            <text:p>TIRE</text:p>
          </table:table-cell>
          <table:table-cell table:style-name="ce474" office:value-type="string" calcext:value-type="string">
            <text:p>VANF</text:p>
          </table:table-cell>
          <table:table-cell table:style-name="ce474" office:value-type="string" calcext:value-type="string">
            <text:p>TIRF</text:p>
          </table:table-cell>
          <table:table-cell table:style-name="ce236" table:number-columns-repeated="20"/>
          <table:table-cell table:number-columns-repeated="16358"/>
        </table:table-row>
        <table:table-row table:style-name="ro1">
          <table:table-cell table:style-name="ce236"/>
          <table:table-cell table:style-name="ce465"/>
          <table:table-cell table:style-name="ce475" table:formula="of:=[$Resumen.C20]" office:value-type="float" office:value="-425149.614516734" calcext:value-type="float">
            <text:p>-425,150</text:p>
          </table:table-cell>
          <table:table-cell table:style-name="ce482" table:formula="of:=[$Resumen.C22]" office:value-type="percentage" office:value="-0.645513633860833" calcext:value-type="percentage">
            <text:p>-64.55 %</text:p>
          </table:table-cell>
          <table:table-cell table:style-name="ce489" table:formula="of:=[$Resumen.E20]" office:value-type="float" office:value="-420352.233799845" calcext:value-type="float">
            <text:p>-420,352.2</text:p>
          </table:table-cell>
          <table:table-cell table:style-name="ce482" table:formula="of:=[$Resumen.E22]" office:value-type="percentage" office:value="-0.678907716542367" calcext:value-type="percentage">
            <text:p>-67.89 %</text:p>
          </table:table-cell>
          <table:table-cell table:style-name="ce236" table:number-columns-repeated="20"/>
          <table:table-cell table:number-columns-repeated="16358"/>
        </table:table-row>
        <table:table-row table:style-name="ro1">
          <table:table-cell table:style-name="ce236" table:number-columns-repeated="8"/>
          <table:table-cell/>
          <table:table-cell table:style-name="ce236" table:number-columns-repeated="17"/>
          <table:table-cell table:number-columns-repeated="16358"/>
        </table:table-row>
        <table:table-row table:style-name="ro8">
          <table:table-cell table:style-name="ce236"/>
          <table:table-cell table:style-name="ce466" table:formula="of:=&quot;1. Sensibilidad de &quot;&amp;[$Resumen.G20]" office:value-type="string" office:string-value="1. Sensibilidad de Precio venta ovillo" calcext:value-type="string">
            <text:p>1. Sensibilidad de Precio venta ovillo</text:p>
          </table:table-cell>
          <table:table-cell table:style-name="ce466" table:number-columns-repeated="4"/>
          <table:table-cell table:style-name="ce236" table:number-columns-repeated="20"/>
          <table:table-cell table:number-columns-repeated="16358"/>
        </table:table-row>
        <table:table-row table:style-name="ro23">
          <table:table-cell table:style-name="ce236"/>
          <table:table-cell table:style-name="ce176" table:formula="of:=[$Resumen.G20]" office:value-type="string" office:string-value="Precio venta ovillo" calcext:value-type="string">
            <text:p>Precio venta ovillo</text:p>
          </table:table-cell>
          <table:table-cell table:style-name="ce476" office:value-type="string" calcext:value-type="string">
            <text:p>VANE</text:p>
          </table:table-cell>
          <table:table-cell table:style-name="ce476" office:value-type="string" calcext:value-type="string">
            <text:p>TIRE</text:p>
          </table:table-cell>
          <table:table-cell table:style-name="ce476" office:value-type="string" calcext:value-type="string">
            <text:p>VANF</text:p>
          </table:table-cell>
          <table:table-cell table:style-name="ce490" office:value-type="string" calcext:value-type="string">
            <text:p>TIRF</text:p>
          </table:table-cell>
          <table:table-cell table:style-name="ce236" table:number-columns-repeated="2"/>
          <table:table-cell table:style-name="ce496" office:value-type="string" calcext:value-type="string">
            <text:p>Precio venta ovillo</text:p>
          </table:table-cell>
          <table:table-cell table:style-name="ce503" office:value-type="float" office:value="6" calcext:value-type="float">
            <text:p>6.00</text:p>
          </table:table-cell>
          <table:table-cell table:style-name="ce236" table:number-columns-repeated="16"/>
          <table:table-cell table:number-columns-repeated="16358"/>
        </table:table-row>
        <table:table-row table:style-name="ro1">
          <table:table-cell table:style-name="ce462"/>
          <table:table-cell table:style-name="ce467" office:value-type="float" office:value="6.3" calcext:value-type="float">
            <text:p>S/. 6.30</text:p>
          </table:table-cell>
          <table:table-cell table:style-name="ce477" office:value-type="float" office:value="71454.1126861108" calcext:value-type="float">
            <text:p>71,454</text:p>
          </table:table-cell>
          <table:table-cell table:style-name="ce483" office:value-type="percentage" office:value="0.960144380282033" calcext:value-type="percentage">
            <text:p>96 %</text:p>
          </table:table-cell>
          <table:table-cell table:style-name="ce477" office:value-type="float" office:value="57761.6340339825" calcext:value-type="float">
            <text:p>57,762</text:p>
          </table:table-cell>
          <table:table-cell table:style-name="ce491" office:value-type="percentage" office:value="1.18975182876027" calcext:value-type="percentage">
            <text:p>119 %</text:p>
          </table:table-cell>
          <table:table-cell table:style-name="ce236" table:number-columns-repeated="2"/>
          <table:table-cell table:style-name="ce496" office:value-type="string" calcext:value-type="string">
            <text:p>Precio compra ovillo</text:p>
          </table:table-cell>
          <table:table-cell table:style-name="ce503" office:value-type="float" office:value="4" calcext:value-type="float">
            <text:p>4.00</text:p>
          </table:table-cell>
          <table:table-cell table:style-name="ce236" table:number-columns-repeated="16"/>
          <table:table-cell table:number-columns-repeated="16358"/>
        </table:table-row>
        <table:table-row table:style-name="ro1">
          <table:table-cell/>
          <table:table-cell table:style-name="ce468" office:value-type="float" office:value="6.2" calcext:value-type="float">
            <text:p>S/. 6.20</text:p>
          </table:table-cell>
          <table:table-cell table:style-name="ce475" office:value-type="float" office:value="58940.8865079888" calcext:value-type="float">
            <text:p>58,941</text:p>
          </table:table-cell>
          <table:table-cell table:style-name="ce484" office:value-type="percentage" office:value="0.826495433783506" calcext:value-type="percentage">
            <text:p>83 %</text:p>
          </table:table-cell>
          <table:table-cell table:style-name="ce475" office:value-type="float" office:value="46793.2654528756" calcext:value-type="float">
            <text:p>46,793</text:p>
          </table:table-cell>
          <table:table-cell table:style-name="ce492" office:value-type="percentage" office:value="1.00250672390304" calcext:value-type="percentage">
            <text:p>100 %</text:p>
          </table:table-cell>
          <table:table-cell table:style-name="ce236" table:number-columns-repeated="2"/>
          <table:table-cell table:style-name="ce236" office:value-type="string" calcext:value-type="string">
            <text:p>cok real</text:p>
          </table:table-cell>
          <table:table-cell table:style-name="ce504" office:value-type="string" calcext:value-type="string">
            <text:p>19.7%</text:p>
          </table:table-cell>
          <table:table-cell table:style-name="ce236" table:number-columns-repeated="16"/>
          <table:table-cell table:number-columns-repeated="16358"/>
        </table:table-row>
        <table:table-row table:style-name="ro1">
          <table:table-cell table:style-name="ce236"/>
          <table:table-cell table:style-name="ce468" office:value-type="float" office:value="6.1" calcext:value-type="float">
            <text:p>S/. 6.10</text:p>
          </table:table-cell>
          <table:table-cell table:style-name="ce475" office:value-type="float" office:value="46427.6603298665" calcext:value-type="float">
            <text:p>46,428</text:p>
          </table:table-cell>
          <table:table-cell table:style-name="ce482" office:value-type="percentage" office:value="0.693098030067668" calcext:value-type="percentage">
            <text:p>69.31 %</text:p>
          </table:table-cell>
          <table:table-cell table:style-name="ce489" office:value-type="float" office:value="35824.8968717686" calcext:value-type="float">
            <text:p>35,824.9</text:p>
          </table:table-cell>
          <table:table-cell table:style-name="ce482" office:value-type="percentage" office:value="0.821489121108439" calcext:value-type="percentage">
            <text:p>82.15 %</text:p>
          </table:table-cell>
          <table:table-cell table:style-name="ce236" table:number-columns-repeated="2"/>
          <table:table-cell table:style-name="ce236" office:value-type="string" calcext:value-type="string">
            <text:p>wacck</text:p>
          </table:table-cell>
          <table:table-cell table:style-name="ce463" office:value-type="percentage" office:value="0.21" calcext:value-type="percentage">
            <text:p>21 %</text:p>
          </table:table-cell>
          <table:table-cell table:style-name="ce236" table:number-columns-repeated="16"/>
          <table:table-cell table:number-columns-repeated="16358"/>
        </table:table-row>
        <table:table-row table:style-name="ro1">
          <table:table-cell table:style-name="ce236"/>
          <table:table-cell table:style-name="ce469" office:value-type="float" office:value="6" calcext:value-type="float">
            <text:p>S/. 6.00</text:p>
          </table:table-cell>
          <table:table-cell table:style-name="ce478" office:value-type="float" office:value="33914.4341517444" calcext:value-type="float">
            <text:p>S/33,914.43</text:p>
          </table:table-cell>
          <table:table-cell table:style-name="ce485" office:value-type="percentage" office:value="0.559817769796686" calcext:value-type="percentage">
            <text:p>55.98 %</text:p>
          </table:table-cell>
          <table:table-cell table:style-name="ce478" office:value-type="float" office:value="24856.5282906616" calcext:value-type="float">
            <text:p>S/24,856.53</text:p>
          </table:table-cell>
          <table:table-cell table:style-name="ce493" office:value-type="percentage" office:value="0.64714658876133" calcext:value-type="percentage">
            <text:p>64.71 %</text:p>
          </table:table-cell>
          <table:table-cell table:style-name="ce495"/>
          <table:table-cell table:style-name="ce236" table:number-columns-repeated="19"/>
          <table:table-cell table:number-columns-repeated="16358"/>
        </table:table-row>
        <table:table-row table:style-name="ro1">
          <table:table-cell table:style-name="ce236"/>
          <table:table-cell table:style-name="ce468" office:value-type="float" office:value="5.95" calcext:value-type="float">
            <text:p>S/. 5.95</text:p>
          </table:table-cell>
          <table:table-cell table:style-name="ce475" office:value-type="float" office:value="27657.8210626834" calcext:value-type="float">
            <text:p>27,658</text:p>
          </table:table-cell>
          <table:table-cell table:style-name="ce484" office:value-type="percentage" office:value="0.493151257551213" calcext:value-type="percentage">
            <text:p>49 %</text:p>
          </table:table-cell>
          <table:table-cell table:style-name="ce475" office:value-type="float" office:value="19372.3440001082" calcext:value-type="float">
            <text:p>19,372</text:p>
          </table:table-cell>
          <table:table-cell table:style-name="ce492" office:value-type="percentage" office:value="0.56255142893071" calcext:value-type="percentage">
            <text:p>56 %</text:p>
          </table:table-cell>
          <table:table-cell table:style-name="ce236" table:number-columns-repeated="2"/>
          <table:table-cell table:style-name="ce497" office:value-type="string" calcext:value-type="string" table:number-columns-spanned="7" table:number-rows-spanned="1">
            <text:p>FLUJOS DE CAJA ECONOMICO Y FINANCIERO</text:p>
          </table:table-cell>
          <table:covered-table-cell table:number-columns-repeated="6" table:style-name="ce505"/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/>
          <table:table-cell table:style-name="ce468" office:value-type="float" office:value="5.85" calcext:value-type="float">
            <text:p>S/. 5.85</text:p>
          </table:table-cell>
          <table:table-cell table:style-name="ce475" office:value-type="float" office:value="15144.5948845611" calcext:value-type="float">
            <text:p>15,145</text:p>
          </table:table-cell>
          <table:table-cell table:style-name="ce484" office:value-type="percentage" office:value="0.359538947795859" calcext:value-type="percentage">
            <text:p>36 %</text:p>
          </table:table-cell>
          <table:table-cell table:style-name="ce475" office:value-type="float" office:value="8403.97541900112" calcext:value-type="float">
            <text:p>8,404</text:p>
          </table:table-cell>
          <table:table-cell table:style-name="ce492" office:value-type="percentage" office:value="0.398459811453382" calcext:value-type="percentage">
            <text:p>40 %</text:p>
          </table:table-cell>
          <table:table-cell table:style-name="ce236" table:number-columns-repeated="2"/>
          <table:table-cell table:style-name="ce498" table:number-columns-repeated="7"/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/>
          <table:table-cell table:style-name="ce470" office:value-type="float" office:value="5.73" calcext:value-type="float">
            <text:p>S/. 5.73</text:p>
          </table:table-cell>
          <table:table-cell table:style-name="ce479" office:value-type="float" office:value="0.000000000152795109897852" calcext:value-type="float">
            <text:p>S/0.00</text:p>
          </table:table-cell>
          <table:table-cell table:style-name="ce486" office:value-type="percentage" office:value="0.19662121991654" calcext:value-type="percentage">
            <text:p>19.66 %</text:p>
          </table:table-cell>
          <table:table-cell table:style-name="ce479" office:value-type="float" office:value="-4870.89840976713" calcext:value-type="float">
            <text:p>-S/4,870.90</text:p>
          </table:table-cell>
          <table:table-cell table:style-name="ce494" office:value-type="percentage" office:value="0.20829033965111" calcext:value-type="percentage">
            <text:p>20.83 %</text:p>
          </table:table-cell>
          <table:table-cell table:style-name="ce236" table:number-columns-repeated="2"/>
          <table:table-cell table:style-name="ce404" office:value-type="string" calcext:value-type="string">
            <text:p>RUBRO</text:p>
          </table:table-cell>
          <table:table-cell table:style-name="ce404" office:value-type="string" calcext:value-type="string">
            <text:p>Año 0</text:p>
          </table:table-cell>
          <table:table-cell table:style-name="ce404" office:value-type="string" calcext:value-type="string">
            <text:p>Año 1</text:p>
          </table:table-cell>
          <table:table-cell table:style-name="ce404" office:value-type="string" calcext:value-type="string">
            <text:p>Año 2</text:p>
          </table:table-cell>
          <table:table-cell table:style-name="ce404" office:value-type="string" calcext:value-type="string">
            <text:p>Año 3</text:p>
          </table:table-cell>
          <table:table-cell table:style-name="ce404" office:value-type="string" calcext:value-type="string">
            <text:p>Año 4</text:p>
          </table:table-cell>
          <table:table-cell table:style-name="ce404" office:value-type="string" calcext:value-type="string">
            <text:p>Año 5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 table:number-columns-repeated="8"/>
          <table:table-cell table:style-name="ce499" office:value-type="string" calcext:value-type="string">
            <text:p>Activo fijo tangible</text:p>
          </table:table-cell>
          <table:table-cell table:style-name="ce506" table:formula="of:=[$Flujo_Caja.D6]" office:value-type="float" office:value="-11772" calcext:value-type="float">
            <text:p>-11,772 </text:p>
          </table:table-cell>
          <table:table-cell table:style-name="ce506" table:formula="of:=[$Flujo_Caja.E6]" office:value-type="float" office:value="0" calcext:value-type="float">
            <text:p><text:s/>- <text:s text:c="2"/></text:p>
          </table:table-cell>
          <table:table-cell table:style-name="ce506" table:formula="of:=[$Flujo_Caja.F6]" office:value-type="float" office:value="0" calcext:value-type="float">
            <text:p><text:s/>- <text:s text:c="2"/></text:p>
          </table:table-cell>
          <table:table-cell table:style-name="ce506" table:formula="of:=[$Flujo_Caja.G6]" office:value-type="float" office:value="-4500" calcext:value-type="float">
            <text:p>-4,500 </text:p>
          </table:table-cell>
          <table:table-cell table:style-name="ce506" table:formula="of:=[$Flujo_Caja.H6]" office:value-type="float" office:value="0" calcext:value-type="float">
            <text:p><text:s/>- <text:s text:c="2"/></text:p>
          </table:table-cell>
          <table:table-cell table:style-name="ce506" table:formula="of:=[$Flujo_Caja.I6]" office:value-type="float" office:value="0" calcext:value-type="float">
            <text:p><text:s/>- <text:s text:c="2"/>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/>
          <table:table-cell table:style-name="ce471" table:formula="of:=&quot;2. Sensibilidad de &quot;&amp;[$Resumen.G21]" office:value-type="string" office:string-value="2. Sensibilidad de Precio compra ovillo" calcext:value-type="string" table:number-columns-spanned="5" table:number-rows-spanned="1">
            <text:p>2. Sensibilidad de Precio compra ovillo</text:p>
          </table:table-cell>
          <table:covered-table-cell table:number-columns-repeated="4" table:style-name="ce480"/>
          <table:table-cell table:style-name="ce236" table:number-columns-repeated="2"/>
          <table:table-cell table:style-name="ce499" office:value-type="string" calcext:value-type="string">
            <text:p>Activo fijo intangible</text:p>
          </table:table-cell>
          <table:table-cell table:style-name="ce506" table:formula="of:=[$Flujo_Caja.D7]" office:value-type="float" office:value="-1670" calcext:value-type="float">
            <text:p>-1,670 </text:p>
          </table:table-cell>
          <table:table-cell table:style-name="ce506" table:formula="of:=[$Flujo_Caja.E7]" office:value-type="float" office:value="0" calcext:value-type="float">
            <text:p><text:s/>- <text:s text:c="2"/></text:p>
          </table:table-cell>
          <table:table-cell table:style-name="ce506" table:formula="of:=[$Flujo_Caja.F7]" office:value-type="float" office:value="0" calcext:value-type="float">
            <text:p><text:s/>- <text:s text:c="2"/></text:p>
          </table:table-cell>
          <table:table-cell table:style-name="ce506" table:formula="of:=[$Flujo_Caja.G7]" office:value-type="float" office:value="0" calcext:value-type="float">
            <text:p><text:s/>- <text:s text:c="2"/></text:p>
          </table:table-cell>
          <table:table-cell table:style-name="ce506" table:formula="of:=[$Flujo_Caja.H7]" office:value-type="float" office:value="0" calcext:value-type="float">
            <text:p><text:s/>- <text:s text:c="2"/></text:p>
          </table:table-cell>
          <table:table-cell table:style-name="ce506" table:formula="of:=[$Flujo_Caja.I7]" office:value-type="float" office:value="0" calcext:value-type="float">
            <text:p><text:s/>- <text:s text:c="2"/>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/>
          <table:table-cell table:style-name="ce176" table:formula="of:=[$Resumen.G21]" office:value-type="string" office:string-value="Precio compra ovillo" calcext:value-type="string">
            <text:p>Precio compra ovillo</text:p>
          </table:table-cell>
          <table:table-cell table:style-name="ce476" office:value-type="string" calcext:value-type="string">
            <text:p>VANE</text:p>
          </table:table-cell>
          <table:table-cell table:style-name="ce476" office:value-type="string" calcext:value-type="string">
            <text:p>TIRE</text:p>
          </table:table-cell>
          <table:table-cell table:style-name="ce476" office:value-type="string" calcext:value-type="string">
            <text:p>VANF</text:p>
          </table:table-cell>
          <table:table-cell table:style-name="ce490" office:value-type="string" calcext:value-type="string">
            <text:p>TIRF</text:p>
          </table:table-cell>
          <table:table-cell table:style-name="ce236" table:number-columns-repeated="2"/>
          <table:table-cell table:style-name="ce499" office:value-type="string" calcext:value-type="string">
            <text:p>Capital de trabajo</text:p>
          </table:table-cell>
          <table:table-cell table:style-name="ce506" table:formula="of:=[$Flujo_Caja.D8]" office:value-type="float" office:value="-142727.4" calcext:value-type="float">
            <text:p>-142,727 </text:p>
          </table:table-cell>
          <table:table-cell table:style-name="ce506" table:formula="of:=[$Flujo_Caja.E8]" office:value-type="float" office:value="-6881.66999999998" calcext:value-type="float">
            <text:p>-6,882 </text:p>
          </table:table-cell>
          <table:table-cell table:style-name="ce506" table:formula="of:=[$Flujo_Caja.F8]" office:value-type="float" office:value="-2137.3711897959" calcext:value-type="float">
            <text:p>-2,137 </text:p>
          </table:table-cell>
          <table:table-cell table:style-name="ce506" table:formula="of:=[$Flujo_Caja.G8]" office:value-type="float" office:value="-7587.04117500002" calcext:value-type="float">
            <text:p>-7,587 </text:p>
          </table:table-cell>
          <table:table-cell table:style-name="ce506" table:formula="of:=[$Flujo_Caja.H8]" office:value-type="float" office:value="-7966.39323375002" calcext:value-type="float">
            <text:p>-7,966 </text:p>
          </table:table-cell>
          <table:table-cell table:style-name="ce506" table:formula="of:=[$Flujo_Caja.I8]" office:value-type="float" office:value="0" calcext:value-type="float">
            <text:p><text:s/>- <text:s text:c="2"/>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/>
          <table:table-cell table:style-name="ce472" office:value-type="float" office:value="4.27" calcext:value-type="float">
            <text:p>S/. 4.27</text:p>
          </table:table-cell>
          <table:table-cell table:style-name="ce481" office:value-type="float" office:value="0" calcext:value-type="float">
            <text:p>S/0.00</text:p>
          </table:table-cell>
          <table:table-cell table:style-name="ce487" office:value-type="percentage" office:value="0.196621219916538" calcext:value-type="percentage">
            <text:p>19.66 %</text:p>
          </table:table-cell>
          <table:table-cell table:style-name="ce481" office:value-type="float" office:value="-5170.43288276746" calcext:value-type="float">
            <text:p>-S/5,170.43</text:p>
          </table:table-cell>
          <table:table-cell table:style-name="ce487" office:value-type="percentage" office:value="0.207868948819822" calcext:value-type="percentage">
            <text:p>20.79 %</text:p>
          </table:table-cell>
          <table:table-cell table:style-name="ce236" table:number-columns-repeated="2"/>
          <table:table-cell table:style-name="ce499" office:value-type="string" calcext:value-type="string">
            <text:p>Recupero de capital de trabajo</text:p>
          </table:table-cell>
          <table:table-cell table:style-name="ce506" table:formula="of:=[$Flujo_Caja.D9]" office:value-type="float" office:value="0" calcext:value-type="float">
            <text:p><text:s/>- <text:s text:c="2"/></text:p>
          </table:table-cell>
          <table:table-cell table:style-name="ce506" table:formula="of:=[$Flujo_Caja.E9]" office:value-type="float" office:value="0" calcext:value-type="float">
            <text:p><text:s/>- <text:s text:c="2"/></text:p>
          </table:table-cell>
          <table:table-cell table:style-name="ce506" table:formula="of:=[$Flujo_Caja.F9]" office:value-type="float" office:value="0" calcext:value-type="float">
            <text:p><text:s/>- <text:s text:c="2"/></text:p>
          </table:table-cell>
          <table:table-cell table:style-name="ce506" table:formula="of:=[$Flujo_Caja.G9]" office:value-type="float" office:value="0" calcext:value-type="float">
            <text:p><text:s/>- <text:s text:c="2"/></text:p>
          </table:table-cell>
          <table:table-cell table:style-name="ce506" table:formula="of:=[$Flujo_Caja.H9]" office:value-type="float" office:value="0" calcext:value-type="float">
            <text:p><text:s/>- <text:s text:c="2"/></text:p>
          </table:table-cell>
          <table:table-cell table:style-name="ce506" table:formula="of:=[$Flujo_Caja.I9]" office:value-type="float" office:value="167299.875598546" calcext:value-type="float">
            <text:p><text:s/>167,300 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/>
          <table:table-cell table:style-name="ce465" office:value-type="float" office:value="4.2" calcext:value-type="float">
            <text:p>S/. 4.20</text:p>
          </table:table-cell>
          <table:table-cell table:style-name="ce475" office:value-type="float" office:value="8438.06540185939" calcext:value-type="float">
            <text:p>8,438</text:p>
          </table:table-cell>
          <table:table-cell table:style-name="ce488" office:value-type="percentage" office:value="0.285439684635302" calcext:value-type="percentage">
            <text:p>28.5%</text:p>
          </table:table-cell>
          <table:table-cell table:style-name="ce475" office:value-type="float" office:value="2277.91595676418" calcext:value-type="float">
            <text:p>2,278</text:p>
          </table:table-cell>
          <table:table-cell table:style-name="ce488" office:value-type="percentage" office:value="0.309921759540691" calcext:value-type="percentage">
            <text:p>31.0%</text:p>
          </table:table-cell>
          <table:table-cell table:style-name="ce236" table:number-columns-repeated="2"/>
          <table:table-cell table:style-name="ce499" office:value-type="string" calcext:value-type="string">
            <text:p>Recupero de activo fijo tangible</text:p>
          </table:table-cell>
          <table:table-cell table:style-name="ce506" table:formula="of:=[$Flujo_Caja.D10]" office:value-type="float" office:value="0" calcext:value-type="float">
            <text:p><text:s/>- <text:s text:c="2"/></text:p>
          </table:table-cell>
          <table:table-cell table:style-name="ce506" table:formula="of:=[$Flujo_Caja.E10]" office:value-type="float" office:value="0" calcext:value-type="float">
            <text:p><text:s/>- <text:s text:c="2"/></text:p>
          </table:table-cell>
          <table:table-cell table:style-name="ce506" table:formula="of:=[$Flujo_Caja.F10]" office:value-type="float" office:value="0" calcext:value-type="float">
            <text:p><text:s/>- <text:s text:c="2"/></text:p>
          </table:table-cell>
          <table:table-cell table:style-name="ce506" table:formula="of:=[$Flujo_Caja.G10]" office:value-type="float" office:value="0" calcext:value-type="float">
            <text:p><text:s/>- <text:s text:c="2"/></text:p>
          </table:table-cell>
          <table:table-cell table:style-name="ce506" table:formula="of:=[$Flujo_Caja.H10]" office:value-type="float" office:value="0" calcext:value-type="float">
            <text:p><text:s/>- <text:s text:c="2"/></text:p>
          </table:table-cell>
          <table:table-cell table:style-name="ce506" table:formula="of:=[$Flujo_Caja.I10]" office:value-type="float" office:value="13500" calcext:value-type="float">
            <text:p><text:s/>13,500 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/>
          <table:table-cell table:style-name="ce465" office:value-type="float" office:value="4.1" calcext:value-type="float">
            <text:p>S/. 4.10</text:p>
          </table:table-cell>
          <table:table-cell table:style-name="ce475" office:value-type="float" office:value="21176.2497768019" calcext:value-type="float">
            <text:p>21,176</text:p>
          </table:table-cell>
          <table:table-cell table:style-name="ce484" office:value-type="percentage" office:value="0.421262176842883" calcext:value-type="percentage">
            <text:p>42 %</text:p>
          </table:table-cell>
          <table:table-cell table:style-name="ce475" office:value-type="float" office:value="13549.853157872" calcext:value-type="float">
            <text:p>13,550</text:p>
          </table:table-cell>
          <table:table-cell table:style-name="ce484" office:value-type="percentage" office:value="0.472581119612476" calcext:value-type="percentage">
            <text:p>47 %</text:p>
          </table:table-cell>
          <table:table-cell table:style-name="ce236" table:number-columns-repeated="2"/>
          <table:table-cell table:style-name="ce500" office:value-type="string" calcext:value-type="string">
            <text:p>Flujo de Inversión y Liquidación</text:p>
          </table:table-cell>
          <table:table-cell table:style-name="ce507" table:formula="of:=SUM([.J15:.J19])" office:value-type="float" office:value="-156169.4" calcext:value-type="float">
            <text:p>-156,169 </text:p>
          </table:table-cell>
          <table:table-cell table:style-name="ce506" table:formula="of:=[$Flujo_Caja.E11]" office:value-type="float" office:value="-6881.66999999998" calcext:value-type="float">
            <text:p>-6,882 </text:p>
          </table:table-cell>
          <table:table-cell table:style-name="ce506" table:formula="of:=[$Flujo_Caja.F11]" office:value-type="float" office:value="-2137.3711897959" calcext:value-type="float">
            <text:p>-2,137 </text:p>
          </table:table-cell>
          <table:table-cell table:style-name="ce506" table:formula="of:=[$Flujo_Caja.G11]" office:value-type="float" office:value="-12087.041175" calcext:value-type="float">
            <text:p>-12,087 </text:p>
          </table:table-cell>
          <table:table-cell table:style-name="ce506" table:formula="of:=[$Flujo_Caja.H11]" office:value-type="float" office:value="-7966.39323375002" calcext:value-type="float">
            <text:p>-7,966 </text:p>
          </table:table-cell>
          <table:table-cell table:style-name="ce506" table:formula="of:=[$Flujo_Caja.I11]" office:value-type="float" office:value="180799.875598546" calcext:value-type="float">
            <text:p><text:s/>180,800 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463"/>
          <table:table-cell table:style-name="ce473" office:value-type="float" office:value="4" calcext:value-type="float">
            <text:p>S/. 4.00</text:p>
          </table:table-cell>
          <table:table-cell table:style-name="ce478" office:value-type="float" office:value="33914.4341517444" calcext:value-type="float">
            <text:p>S/33,914.43</text:p>
          </table:table-cell>
          <table:table-cell table:style-name="ce485" office:value-type="percentage" office:value="0.559817769796686" calcext:value-type="percentage">
            <text:p>55.98 %</text:p>
          </table:table-cell>
          <table:table-cell table:style-name="ce478" office:value-type="float" office:value="24856.5282906616" calcext:value-type="float">
            <text:p>S/24,856.53</text:p>
          </table:table-cell>
          <table:table-cell table:style-name="ce493" office:value-type="percentage" office:value="0.64714658876133" calcext:value-type="percentage">
            <text:p>64.71 %</text:p>
          </table:table-cell>
          <table:table-cell table:style-name="ce236" table:number-columns-repeated="2"/>
          <table:table-cell table:style-name="ce499" office:value-type="string" calcext:value-type="string">
            <text:p>Ingresos por ventas</text:p>
          </table:table-cell>
          <table:table-cell table:style-name="ce506"/>
          <table:table-cell table:style-name="ce506" table:formula="of:=[.$J$7]*[$Presupuesto_Ventas.P19]*(-1)" office:value-type="float" office:value="-11970000" calcext:value-type="float">
            <text:p>-11,970,000 </text:p>
          </table:table-cell>
          <table:table-cell table:style-name="ce506" table:formula="of:=[.J7]*[$Presupuesto_Ventas.P20]" office:value-type="float" office:value="12568548" calcext:value-type="float">
            <text:p><text:s/>12,568,548 </text:p>
          </table:table-cell>
          <table:table-cell table:style-name="ce506" table:formula="of:=[.J7]*[$Presupuesto_Ventas.P21]" office:value-type="float" office:value="13196979" calcext:value-type="float">
            <text:p><text:s/>13,196,979 </text:p>
          </table:table-cell>
          <table:table-cell table:style-name="ce506" table:formula="of:=[.J7]*[$Presupuesto_Ventas.P21]" office:value-type="float" office:value="13196979" calcext:value-type="float">
            <text:p><text:s/>13,196,979 </text:p>
          </table:table-cell>
          <table:table-cell table:style-name="ce506" table:formula="of:=[.J7]*[$Presupuesto_Ventas.P23]" office:value-type="float" office:value="14549675.8125" calcext:value-type="float">
            <text:p><text:s/>14,549,676 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/>
          <table:table-cell table:style-name="ce465" office:value-type="float" office:value="3.9" calcext:value-type="float">
            <text:p>S/. 3.90</text:p>
          </table:table-cell>
          <table:table-cell table:style-name="ce475" office:value-type="float" office:value="46652.6185266868" calcext:value-type="float">
            <text:p>46,653</text:p>
          </table:table-cell>
          <table:table-cell table:style-name="ce484" office:value-type="percentage" office:value="0.701657225605614" calcext:value-type="percentage">
            <text:p>70 %</text:p>
          </table:table-cell>
          <table:table-cell table:style-name="ce475" office:value-type="float" office:value="36199.4188016575" calcext:value-type="float">
            <text:p>36,199</text:p>
          </table:table-cell>
          <table:table-cell table:style-name="ce484" office:value-type="percentage" office:value="0.835090792088286" calcext:value-type="percentage">
            <text:p>84 %</text:p>
          </table:table-cell>
          <table:table-cell table:style-name="ce236" table:number-columns-repeated="2"/>
          <table:table-cell table:style-name="ce499" office:value-type="string" calcext:value-type="string">
            <text:p>Costos de produccion (*)</text:p>
          </table:table-cell>
          <table:table-cell table:style-name="ce506" table:number-columns-repeated="2"/>
          <table:table-cell table:style-name="ce506" table:formula="of:=[.K8]-[$Presupuesto_Ventas.Q19]" office:value-type="float" office:value="-453.409090909091" calcext:value-type="float">
            <text:p>-453 </text:p>
          </table:table-cell>
          <table:table-cell table:style-name="ce506" table:formula="of:=[.L8]-[$Presupuesto_Ventas.R19]" office:value-type="float" office:value="0" calcext:value-type="float">
            <text:p><text:s/>- <text:s text:c="2"/></text:p>
          </table:table-cell>
          <table:table-cell table:style-name="ce506" table:formula="of:=[.M8]-[$Presupuesto_Ventas.S19]" office:value-type="float" office:value="0" calcext:value-type="float">
            <text:p><text:s/>- <text:s text:c="2"/></text:p>
          </table:table-cell>
          <table:table-cell table:style-name="ce506" table:formula="of:=[.N8]-[$Presupuesto_Ventas.T19]" office:value-type="float" office:value="0" calcext:value-type="float">
            <text:p><text:s/>- <text:s text:c="2"/>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/>
          <table:table-cell table:style-name="ce465" office:value-type="float" office:value="3.85" calcext:value-type="float">
            <text:p>S/. 3.85</text:p>
          </table:table-cell>
          <table:table-cell table:style-name="ce475" office:value-type="float" office:value="53021.7107141581" calcext:value-type="float">
            <text:p>53,022</text:p>
          </table:table-cell>
          <table:table-cell table:style-name="ce484" office:value-type="percentage" office:value="0.773943105099975" calcext:value-type="percentage">
            <text:p>77 %</text:p>
          </table:table-cell>
          <table:table-cell table:style-name="ce475" office:value-type="float" office:value="41884.9295746028" calcext:value-type="float">
            <text:p>41,885</text:p>
          </table:table-cell>
          <table:table-cell table:style-name="ce484" office:value-type="percentage" office:value="0.934461516123329" calcext:value-type="percentage">
            <text:p>93 %</text:p>
          </table:table-cell>
          <table:table-cell table:style-name="ce236" table:number-columns-repeated="2"/>
          <table:table-cell table:style-name="ce499" office:value-type="string" calcext:value-type="string">
            <text:p>Gastos operativos (*)</text:p>
          </table:table-cell>
          <table:table-cell table:style-name="ce506"/>
          <table:table-cell table:style-name="ce506" table:formula="of:=[$Flujo_Caja.E14]" office:value-type="float" office:value="-63794" calcext:value-type="float">
            <text:p>-63,794 </text:p>
          </table:table-cell>
          <table:table-cell table:style-name="ce506" table:formula="of:=[$Flujo_Caja.F14]" office:value-type="float" office:value="-63794" calcext:value-type="float">
            <text:p>-63,794 </text:p>
          </table:table-cell>
          <table:table-cell table:style-name="ce506" table:formula="of:=[$Flujo_Caja.G14]" office:value-type="float" office:value="-63794" calcext:value-type="float">
            <text:p>-63,794 </text:p>
          </table:table-cell>
          <table:table-cell table:style-name="ce506" table:formula="of:=[$Flujo_Caja.H14]" office:value-type="float" office:value="-63794" calcext:value-type="float">
            <text:p>-63,794 </text:p>
          </table:table-cell>
          <table:table-cell table:style-name="ce506" table:formula="of:=[$Flujo_Caja.I14]" office:value-type="float" office:value="-63794" calcext:value-type="float">
            <text:p>-63,794 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/>
          <table:table-cell table:style-name="ce465" table:formula="of:=[.B21]-([.B18]-[.B21])" office:value-type="float" office:value="3.73" calcext:value-type="float">
            <text:p>S/. 3.73</text:p>
          </table:table-cell>
          <table:table-cell table:style-name="ce475" office:value-type="float" office:value="68307.5319640891" calcext:value-type="float">
            <text:p>68,308</text:p>
          </table:table-cell>
          <table:table-cell table:style-name="ce484" office:value-type="percentage" office:value="0.951459241009632" calcext:value-type="percentage">
            <text:p>95 %</text:p>
          </table:table-cell>
          <table:table-cell table:style-name="ce475" office:value-type="float" office:value="55569.914093767" calcext:value-type="float">
            <text:p>55,570</text:p>
          </table:table-cell>
          <table:table-cell table:style-name="ce484" office:value-type="percentage" office:value="1.18854948515997" calcext:value-type="percentage">
            <text:p>119 %</text:p>
          </table:table-cell>
          <table:table-cell table:style-name="ce236" table:number-columns-repeated="2"/>
          <table:table-cell table:style-name="ce499" office:value-type="string" calcext:value-type="string">
            <text:p>Pago de IGV</text:p>
          </table:table-cell>
          <table:table-cell table:style-name="ce506"/>
          <table:table-cell table:style-name="ce506" table:formula="of:=[$Flujo_Caja.E15]" office:value-type="float" office:value="-117414.648" calcext:value-type="float">
            <text:p>-117,415 </text:p>
          </table:table-cell>
          <table:table-cell table:style-name="ce506" table:formula="of:=[$Flujo_Caja.F15]" office:value-type="float" office:value="-123401.088" calcext:value-type="float">
            <text:p>-123,401 </text:p>
          </table:table-cell>
          <table:table-cell table:style-name="ce506" table:formula="of:=[$Flujo_Caja.G15]" office:value-type="float" office:value="-129685.518" calcext:value-type="float">
            <text:p>-129,686 </text:p>
          </table:table-cell>
          <table:table-cell table:style-name="ce506" table:formula="of:=[$Flujo_Caja.H15]" office:value-type="float" office:value="-149481.0855" calcext:value-type="float">
            <text:p>-149,481 </text:p>
          </table:table-cell>
          <table:table-cell table:style-name="ce506" table:formula="of:=[$Flujo_Caja.I15]" office:value-type="float" office:value="-143212.726125" calcext:value-type="float">
            <text:p>-143,213 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 table:number-columns-repeated="8"/>
          <table:table-cell table:style-name="ce499" office:value-type="string" calcext:value-type="string">
            <text:p>Impuestos (**)</text:p>
          </table:table-cell>
          <table:table-cell table:style-name="ce506"/>
          <table:table-cell table:style-name="ce506" table:formula="of:=[$Flujo_Caja.E16]" office:value-type="float" office:value="-1729.76500000001" calcext:value-type="float">
            <text:p>-1,730 </text:p>
          </table:table-cell>
          <table:table-cell table:style-name="ce506" table:formula="of:=[$Flujo_Caja.F16]" office:value-type="float" office:value="-2323.07625000003" calcext:value-type="float">
            <text:p>-2,323 </text:p>
          </table:table-cell>
          <table:table-cell table:style-name="ce506" table:formula="of:=[$Flujo_Caja.G16]" office:value-type="float" office:value="-2944.94306250004" calcext:value-type="float">
            <text:p>-2,945 </text:p>
          </table:table-cell>
          <table:table-cell table:style-name="ce506" table:formula="of:=[$Flujo_Caja.H16]" office:value-type="float" office:value="-3597.89571562504" calcext:value-type="float">
            <text:p>-3,598 </text:p>
          </table:table-cell>
          <table:table-cell table:style-name="ce506" table:formula="of:=[$Flujo_Caja.I16]" office:value-type="float" office:value="-4283.48850140624" calcext:value-type="float">
            <text:p>-4,283 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 table:number-columns-repeated="8"/>
          <table:table-cell table:style-name="ce499" office:value-type="string" calcext:value-type="string">
            <text:p>Flujo Operativo</text:p>
          </table:table-cell>
          <table:table-cell table:style-name="ce508" table:formula="of:=SUM([.J21:.J25])" office:value-type="float" office:value="0" calcext:value-type="float">
            <text:p><text:s/>- <text:s text:c="2"/></text:p>
          </table:table-cell>
          <table:table-cell table:style-name="ce506" table:formula="of:=[$Flujo_Caja.E17]" office:value-type="float" office:value="-101035.846333333" calcext:value-type="float">
            <text:p>-101,036 </text:p>
          </table:table-cell>
          <table:table-cell table:style-name="ce506" table:formula="of:=[$Flujo_Caja.F17]" office:value-type="float" office:value="-103660.18925" calcext:value-type="float">
            <text:p>-103,660 </text:p>
          </table:table-cell>
          <table:table-cell table:style-name="ce506" table:formula="of:=[$Flujo_Caja.G17]" office:value-type="float" office:value="-106420.7073125" calcext:value-type="float">
            <text:p>-106,421 </text:p>
          </table:table-cell>
          <table:table-cell table:style-name="ce506" table:formula="of:=SUM([.N21:.N25])" office:value-type="float" office:value="12980106.0187844" calcext:value-type="float">
            <text:p><text:s/>12,980,106 </text:p>
          </table:table-cell>
          <table:table-cell table:style-name="ce506" table:formula="of:=[$Flujo_Caja.I17]" office:value-type="float" office:value="-112362.824617031" calcext:value-type="float">
            <text:p>-112,363 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 table:number-columns-repeated="8"/>
          <table:table-cell table:style-name="ce501" office:value-type="string" calcext:value-type="string">
            <text:p>Flujo de Caja Económico, FCE</text:p>
          </table:table-cell>
          <table:table-cell table:style-name="ce509" table:formula="of:=[.J20]+[.J26]" office:value-type="float" office:value="-156169.4" calcext:value-type="float">
            <text:p>-156,169 </text:p>
          </table:table-cell>
          <table:table-cell table:style-name="ce509" table:formula="of:=[.K20]+[.K26]" office:value-type="float" office:value="-107917.516333333" calcext:value-type="float">
            <text:p>-107,918 </text:p>
          </table:table-cell>
          <table:table-cell table:style-name="ce509" table:formula="of:=[.L20]+[.L26]" office:value-type="float" office:value="-105797.560439796" calcext:value-type="float">
            <text:p>-105,798 </text:p>
          </table:table-cell>
          <table:table-cell table:style-name="ce509" table:formula="of:=[.M20]+[.M26]" office:value-type="float" office:value="-118507.7484875" calcext:value-type="float">
            <text:p>-118,508 </text:p>
          </table:table-cell>
          <table:table-cell table:style-name="ce509" table:formula="of:=[.N20]+[.N26]" office:value-type="float" office:value="12972139.6255506" calcext:value-type="float">
            <text:p><text:s/>12,972,140 </text:p>
          </table:table-cell>
          <table:table-cell table:style-name="ce509" table:formula="of:=[.O20]+[.O26]" office:value-type="float" office:value="68437.0509815147" calcext:value-type="float">
            <text:p><text:s/>68,437 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 table:number-columns-repeated="8"/>
          <table:table-cell table:style-name="ce499" office:value-type="string" calcext:value-type="string">
            <text:p>Prestamo</text:p>
          </table:table-cell>
          <table:table-cell table:style-name="ce506" table:formula="of:=[$Flujo_Deuda.$D$3]" office:value-type="float" office:value="8067" calcext:value-type="float">
            <text:p><text:s/>8,067 </text:p>
          </table:table-cell>
          <table:table-cell table:style-name="ce506" table:formula="of:=[$Flujo_Deuda.$D$3]" office:value-type="float" office:value="8067" calcext:value-type="float">
            <text:p><text:s/>8,067 </text:p>
          </table:table-cell>
          <table:table-cell table:style-name="ce506" table:formula="of:=[$Flujo_Deuda.$D$3]" office:value-type="float" office:value="8067" calcext:value-type="float">
            <text:p><text:s/>8,067 </text:p>
          </table:table-cell>
          <table:table-cell table:style-name="ce506" table:formula="of:=[$Flujo_Deuda.$D$3]" office:value-type="float" office:value="8067" calcext:value-type="float">
            <text:p><text:s/>8,067 </text:p>
          </table:table-cell>
          <table:table-cell table:style-name="ce506" table:formula="of:=[$Flujo_Deuda.$D$3]" office:value-type="float" office:value="8067" calcext:value-type="float">
            <text:p><text:s/>8,067 </text:p>
          </table:table-cell>
          <table:table-cell table:style-name="ce506"/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 table:number-columns-repeated="8"/>
          <table:table-cell table:style-name="ce499" office:value-type="string" calcext:value-type="string">
            <text:p>Cuota de capital </text:p>
          </table:table-cell>
          <table:table-cell table:style-name="ce506"/>
          <table:table-cell table:style-name="ce506" table:formula="of:=-[$Flujo_Deuda.$E$13]" office:value-type="float" office:value="-8067" calcext:value-type="float">
            <text:p>-8,067 </text:p>
          </table:table-cell>
          <table:table-cell table:style-name="ce506" table:formula="of:=-[$Flujo_Deuda.$E$13]" office:value-type="float" office:value="-8067" calcext:value-type="float">
            <text:p>-8,067 </text:p>
          </table:table-cell>
          <table:table-cell table:style-name="ce506" table:formula="of:=-[$Flujo_Deuda.$E$13]" office:value-type="float" office:value="-8067" calcext:value-type="float">
            <text:p>-8,067 </text:p>
          </table:table-cell>
          <table:table-cell table:style-name="ce506" table:formula="of:=-[$Flujo_Deuda.$E$13]" office:value-type="float" office:value="-8067" calcext:value-type="float">
            <text:p>-8,067 </text:p>
          </table:table-cell>
          <table:table-cell table:style-name="ce506" table:formula="of:=-[$Flujo_Deuda.$E$13]" office:value-type="float" office:value="-8067" calcext:value-type="float">
            <text:p>-8,067 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 table:number-columns-repeated="8"/>
          <table:table-cell table:style-name="ce499" office:value-type="string" calcext:value-type="string">
            <text:p>Intereses</text:p>
          </table:table-cell>
          <table:table-cell table:style-name="ce506"/>
          <table:table-cell table:style-name="ce506" table:formula="of:=-[$Flujo_Deuda.$D$13]" office:value-type="float" office:value="-749.290343932645" calcext:value-type="float">
            <text:p>-749 </text:p>
          </table:table-cell>
          <table:table-cell table:style-name="ce506" table:formula="of:=-[$Flujo_Deuda.$D$13]" office:value-type="float" office:value="-749.290343932645" calcext:value-type="float">
            <text:p>-749 </text:p>
          </table:table-cell>
          <table:table-cell table:style-name="ce506" table:formula="of:=-[$Flujo_Deuda.$D$13]" office:value-type="float" office:value="-749.290343932645" calcext:value-type="float">
            <text:p>-749 </text:p>
          </table:table-cell>
          <table:table-cell table:style-name="ce506" table:formula="of:=-[$Flujo_Deuda.$D$13]" office:value-type="float" office:value="-749.290343932645" calcext:value-type="float">
            <text:p>-749 </text:p>
          </table:table-cell>
          <table:table-cell table:style-name="ce506" table:formula="of:=-[$Flujo_Deuda.$D$13]" office:value-type="float" office:value="-749.290343932645" calcext:value-type="float">
            <text:p>-749 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 table:number-columns-repeated="8"/>
          <table:table-cell table:style-name="ce499" office:value-type="string" calcext:value-type="string">
            <text:p>Total Flujo de Deuda</text:p>
          </table:table-cell>
          <table:table-cell table:style-name="ce506" table:formula="of:=SUM([.J28:.J30])" office:value-type="float" office:value="8067" calcext:value-type="float">
            <text:p><text:s/>8,067 </text:p>
          </table:table-cell>
          <table:table-cell table:style-name="ce506" table:formula="of:=SUM([.K28:.K30])" office:value-type="float" office:value="-749.290343932645" calcext:value-type="float">
            <text:p>-749 </text:p>
          </table:table-cell>
          <table:table-cell table:style-name="ce506" table:formula="of:=SUM([.L28:.L30])" office:value-type="float" office:value="-749.290343932645" calcext:value-type="float">
            <text:p>-749 </text:p>
          </table:table-cell>
          <table:table-cell table:style-name="ce506" table:formula="of:=SUM([.M28:.M30])" office:value-type="float" office:value="-749.290343932645" calcext:value-type="float">
            <text:p>-749 </text:p>
          </table:table-cell>
          <table:table-cell table:style-name="ce506" table:formula="of:=SUM([.N28:.N30])" office:value-type="float" office:value="-749.290343932645" calcext:value-type="float">
            <text:p>-749 </text:p>
          </table:table-cell>
          <table:table-cell table:style-name="ce506" table:formula="of:=SUM([.O28:.O30])" office:value-type="float" office:value="-8816.29034393265" calcext:value-type="float">
            <text:p>-8,816 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 table:number-columns-repeated="8"/>
          <table:table-cell table:style-name="ce501" office:value-type="string" calcext:value-type="string">
            <text:p>Flujo de Caja Financiero, FCF</text:p>
          </table:table-cell>
          <table:table-cell table:style-name="ce509" table:formula="of:=[.J27]+[.J31]" office:value-type="float" office:value="-148102.4" calcext:value-type="float">
            <text:p>-148,102 </text:p>
          </table:table-cell>
          <table:table-cell table:style-name="ce509" table:formula="of:=[.K27]+[.K31]" office:value-type="float" office:value="-108666.806677266" calcext:value-type="float">
            <text:p>-108,667 </text:p>
          </table:table-cell>
          <table:table-cell table:style-name="ce509" table:formula="of:=[.L27]+[.L31]" office:value-type="float" office:value="-106546.850783728" calcext:value-type="float">
            <text:p>-106,547 </text:p>
          </table:table-cell>
          <table:table-cell table:style-name="ce509" table:formula="of:=[.M27]+[.M31]" office:value-type="float" office:value="-119257.038831433" calcext:value-type="float">
            <text:p>-119,257 </text:p>
          </table:table-cell>
          <table:table-cell table:style-name="ce509" table:formula="of:=[.N27]+[.N31]" office:value-type="float" office:value="12971390.3352067" calcext:value-type="float">
            <text:p><text:s/>12,971,390 </text:p>
          </table:table-cell>
          <table:table-cell table:style-name="ce509" table:formula="of:=[.O27]+[.O31]" office:value-type="float" office:value="59620.760637582" calcext:value-type="float">
            <text:p><text:s/>59,621 </text:p>
          </table:table-cell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 table:number-columns-repeated="8"/>
          <table:table-cell table:style-name="ce502" office:value-type="string" calcext:value-type="string">
            <text:p>(*) Régimen laboral de la Microempresa</text:p>
          </table:table-cell>
          <table:table-cell table:style-name="ce510" table:number-columns-repeated="6"/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 table:number-columns-repeated="8"/>
          <table:table-cell table:style-name="ce502" office:value-type="string" calcext:value-type="string">
            <text:p>(**) Régimen tributario Especial</text:p>
          </table:table-cell>
          <table:table-cell table:style-name="ce510" table:number-columns-repeated="6"/>
          <table:table-cell table:style-name="ce236" table:number-columns-repeated="11"/>
          <table:table-cell table:number-columns-repeated="16358"/>
        </table:table-row>
        <table:table-row table:style-name="ro1">
          <table:table-cell table:style-name="ce236" table:number-columns-repeated="26"/>
          <table:table-cell table:number-columns-repeated="16358"/>
        </table:table-row>
        <table:table-row table:style-name="ro1" table:number-rows-repeated="965">
          <table:table-cell table:style-name="ce236" table:number-columns-repeated="26"/>
          <table:table-cell table:number-columns-repeated="16358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sumen del escenario 1" table:style-name="ta19">
        <table:table-column table:style-name="co7" table:default-cell-style-name="Default"/>
        <table:table-column table:style-name="co80" table:default-cell-style-name="Default"/>
        <table:table-column table:style-name="co81" table:default-cell-style-name="Default"/>
        <table:table-column-group>
          <table:table-column table:style-name="co30" table:default-cell-style-name="Default"/>
          <table:table-column table:style-name="co74" table:default-cell-style-name="Default"/>
          <table:table-column table:style-name="co77" table:default-cell-style-name="Default"/>
        </table:table-column-group>
        <table:table-column table:style-name="co7" table:number-columns-repeated="20" table:default-cell-style-name="Default"/>
        <table:table-column table:style-name="co8" table:number-columns-repeated="1635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511" office:value-type="string" calcext:value-type="string">
            <text:p>Resumen del escenario</text:p>
          </table:table-cell>
          <table:table-cell table:style-name="ce511"/>
          <table:table-cell table:style-name="ce519" table:number-columns-repeated="3"/>
          <table:table-cell table:number-columns-repeated="16378"/>
        </table:table-row>
        <table:table-row table:style-name="ro1">
          <table:table-cell/>
          <table:table-cell table:style-name="ce512" table:number-columns-repeated="2"/>
          <table:table-cell table:style-name="ce520" office:value-type="string" calcext:value-type="string">
            <text:p>PROBABLE</text:p>
          </table:table-cell>
          <table:table-cell table:style-name="ce520" office:value-type="string" calcext:value-type="string">
            <text:p>OPTIMISTA</text:p>
          </table:table-cell>
          <table:table-cell table:style-name="ce520" office:value-type="string" calcext:value-type="string">
            <text:p>PESIMISTA</text:p>
          </table:table-cell>
          <table:table-cell table:number-columns-repeated="16378"/>
        </table:table-row>
        <table:table-row-group>
          <table:table-row table:style-name="ro1" table:visibility="collapse">
            <table:table-cell/>
            <table:table-cell table:style-name="ce513" table:number-columns-repeated="2"/>
            <table:table-cell table:style-name="ce174"/>
            <table:table-cell table:style-name="ce525" office:value-type="string" calcext:value-type="string">
              <text:p>Creado por Admin el 20/02/2021</text:p>
              <text:p>Modificado por Admin el 20/02/2021</text:p>
              <text:p>Modificado por Admin el 25/02/2021</text:p>
            </table:table-cell>
            <table:table-cell table:style-name="ce525" office:value-type="string" calcext:value-type="string">
              <text:p>Creado por Admin el 20/02/2021</text:p>
              <text:p>Modificado por Admin el 20/02/2021</text:p>
              <text:p>Modificado por Admin el 25/02/2021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ce514" office:value-type="string" calcext:value-type="string">
            <text:p>VARIABLES</text:p>
          </table:table-cell>
          <table:table-cell table:style-name="ce516"/>
          <table:table-cell table:style-name="ce521" table:number-columns-repeated="3"/>
          <table:table-cell table:number-columns-repeated="16378"/>
        </table:table-row>
        <table:table-row-group>
          <table:table-row table:style-name="ro1">
            <table:table-cell/>
            <table:table-cell table:style-name="ce513"/>
            <table:table-cell table:style-name="ce517" office:value-type="string" calcext:value-type="string">
              <text:p>Precio de venta de ovillo</text:p>
            </table:table-cell>
            <table:table-cell table:style-name="ce522" office:value-type="float" office:value="6" calcext:value-type="float">
              <text:p>S/6.00</text:p>
            </table:table-cell>
            <table:table-cell table:style-name="ce526" office:value-type="float" office:value="6.2" calcext:value-type="float">
              <text:p>S/6.20</text:p>
            </table:table-cell>
            <table:table-cell table:style-name="ce526" office:value-type="float" office:value="5.8" calcext:value-type="float">
              <text:p>S/5.80</text:p>
            </table:table-cell>
            <table:table-cell table:number-columns-repeated="16378"/>
          </table:table-row>
          <table:table-row table:style-name="ro1">
            <table:table-cell/>
            <table:table-cell table:style-name="ce513"/>
            <table:table-cell table:style-name="ce517" office:value-type="string" calcext:value-type="string">
              <text:p>Precio de compra de ovillo</text:p>
            </table:table-cell>
            <table:table-cell table:style-name="ce522" office:value-type="float" office:value="4" calcext:value-type="float">
              <text:p>S/4.00</text:p>
            </table:table-cell>
            <table:table-cell table:style-name="ce526" office:value-type="float" office:value="3.8" calcext:value-type="float">
              <text:p>S/3.80</text:p>
            </table:table-cell>
            <table:table-cell table:style-name="ce526" office:value-type="float" office:value="4.2" calcext:value-type="float">
              <text:p>S/4.20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ce514" office:value-type="string" calcext:value-type="string">
            <text:p>INDICADORES</text:p>
          </table:table-cell>
          <table:table-cell table:style-name="ce516"/>
          <table:table-cell table:style-name="ce521" table:number-columns-repeated="3"/>
          <table:table-cell table:number-columns-repeated="16378"/>
        </table:table-row>
        <table:table-row-group>
          <table:table-row table:style-name="ro1">
            <table:table-cell/>
            <table:table-cell table:style-name="ce513"/>
            <table:table-cell table:style-name="ce517" office:value-type="string" calcext:value-type="string">
              <text:p>VANE</text:p>
            </table:table-cell>
            <table:table-cell table:style-name="ce522" office:value-type="float" office:value="33914.4341517444" calcext:value-type="float">
              <text:p>S/33,914.43</text:p>
            </table:table-cell>
            <table:table-cell table:style-name="ce522" office:value-type="float" office:value="84417.2552578737" calcext:value-type="float">
              <text:p>S/84,417.26</text:p>
            </table:table-cell>
            <table:table-cell table:style-name="ce522" office:value-type="float" office:value="-16588.3869543849" calcext:value-type="float">
              <text:p>-S/16,588.39</text:p>
            </table:table-cell>
            <table:table-cell table:number-columns-repeated="16378"/>
          </table:table-row>
          <table:table-row table:style-name="ro1">
            <table:table-cell/>
            <table:table-cell table:style-name="ce513"/>
            <table:table-cell table:style-name="ce517" office:value-type="string" calcext:value-type="string">
              <text:p>TIRE</text:p>
            </table:table-cell>
            <table:table-cell table:style-name="ce523" office:value-type="percentage" office:value="0.559817769796686" calcext:value-type="percentage">
              <text:p>55.98 %</text:p>
            </table:table-cell>
            <table:table-cell table:style-name="ce523" office:value-type="percentage" office:value="1.12165605362399" calcext:value-type="percentage">
              <text:p>112.17 %</text:p>
            </table:table-cell>
            <table:table-cell table:style-name="ce523" office:value-type="percentage" office:value="0.0192349199826201" calcext:value-type="percentage">
              <text:p>1.92 %</text:p>
            </table:table-cell>
            <table:table-cell/>
            <table:table-cell table:style-name="ce523" table:formula="of:=[.E10]-[.D10]" office:value-type="percentage" office:value="0.561838283827304" calcext:value-type="percentage">
              <text:p>56.18 %</text:p>
            </table:table-cell>
            <table:table-cell table:style-name="ce523" table:formula="of:=[.D10]-[.F10]" office:value-type="percentage" office:value="0.540582849814066" calcext:value-type="percentage">
              <text:p>54.06 %</text:p>
            </table:table-cell>
            <table:table-cell table:number-columns-repeated="16375"/>
          </table:table-row>
          <table:table-row table:style-name="ro1">
            <table:table-cell/>
            <table:table-cell table:style-name="ce513"/>
            <table:table-cell table:style-name="ce517" office:value-type="string" calcext:value-type="string">
              <text:p>VANF</text:p>
            </table:table-cell>
            <table:table-cell table:style-name="ce522" office:value-type="float" office:value="24856.5282906616" calcext:value-type="float">
              <text:p>S/24,856.53</text:p>
            </table:table-cell>
            <table:table-cell table:style-name="ce522" office:value-type="float" office:value="69586.9879951654" calcext:value-type="float">
              <text:p>S/69,586.99</text:p>
            </table:table-cell>
            <table:table-cell table:style-name="ce522" office:value-type="float" office:value="-19592.4742395579" calcext:value-type="float">
              <text:p>-S/19,592.47</text:p>
            </table:table-cell>
            <table:table-cell table:number-columns-repeated="16378"/>
          </table:table-row>
          <table:table-row table:style-name="ro1">
            <table:table-cell/>
            <table:table-cell table:style-name="ce515"/>
            <table:table-cell table:style-name="ce518" office:value-type="string" calcext:value-type="string">
              <text:p>TIRF</text:p>
            </table:table-cell>
            <table:table-cell table:style-name="ce524" office:value-type="percentage" office:value="0.64714658876133" calcext:value-type="percentage">
              <text:p>64.71 %</text:p>
            </table:table-cell>
            <table:table-cell table:style-name="ce524" office:value-type="percentage" office:value="1.4341199838584" calcext:value-type="percentage">
              <text:p>143.41 %</text:p>
            </table:table-cell>
            <table:table-cell table:style-name="ce524" office:value-type="percentage" office:value="0.013175591452762" calcext:value-type="percentage">
              <text:p>1.32 %</text:p>
            </table:table-cell>
            <table:table-cell table:number-columns-repeated="16378"/>
          </table:table-row>
        </table:table-row-group>
        <table:table-row table:style-name="ro1" table:number-rows-repeated="988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percentage-style style:name="N134">
      <number:number number:decimal-places="1" number:min-decimal-places="1" number:min-integer-digits="1"/>
      <number:text>%</number:text>
    </number:percentage-style>
    <number:number-style style:name="N135">
      <number:text>S/</number:text>
      <number:number number:decimal-places="2" number:min-decimal-places="2" number:min-integer-digits="1" number:grouping="true"/>
    </number:number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6">
      <number:text loext:blank-width-char="-"> </number:text>
      <number:text-conten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1" number:min-decimal-places="1" number:min-integer-digits="1"/>
    </number:number-style>
    <number:number-style style:name="N138P0" style:volatile="true">
      <number:text loext:blank-width-char="-"> S/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1" style:volatile="true">
      <number:text>-S/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2" style:volatile="true">
      <number:text loext:blank-width-char="-"> S/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8">
      <number:text loext:blank-width-char="-"> </number:text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 loext:blank-width-char="-"> </number:text>
      <number:currency-symbol number:language="es" number:country="PE">S/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9P1" style:volatile="true">
      <number:text>-</number:text>
      <number:currency-symbol number:language="es" number:country="PE">S/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9P2" style:volatile="true">
      <number:text loext:blank-width-char="-"> </number:text>
      <number:currency-symbol number:language="es" number:country="PE">S/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9">
      <number:text loext:blank-width-char="-"> </number:text>
      <number:text-conten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">
      <number:currency-symbol number:language="es" number:country="PE">S/.</number:currency-symbol>
      <number:text> </number:text>
      <number:number number:decimal-places="2" number:min-decimal-places="2" number:min-integer-digits="1" number:grouping="true"/>
    </number:currency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text>S/</number:text>
      <number:number number:decimal-places="0" number:min-decimal-places="0" number:min-integer-digits="1" number:grouping="true"/>
    </number:number-style>
    <number:number-style style:name="N143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3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3">
      <number:text loext:blank-width-char=" "> </number:text>
      <number:text-content/>
      <number:text loext:blank-width-char=" 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 loext:blank-width-char=" ">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44P1" style:volatile="true">
      <number:text loext:blank-width-char=" ">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4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4">
      <number:text loext:blank-width-char=" "> </number:text>
      <number:text-content/>
      <number:text loext:blank-width-char=" 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text>S/. </number:text>
      <number:number number:decimal-places="2" number:min-decimal-places="2" number:min-integer-digits="1" number:grouping="true"/>
    </number:number-style>
    <number:number-style style:name="N146">
      <number:number number:decimal-places="1" number:min-decimal-places="1" number:min-integer-digits="1" number:grouping="true"/>
    </number:number-style>
    <number:number-style style:name="N147">
      <number:text>$ </number:text>
      <number:number number:decimal-places="2" number:min-decimal-places="2" number:min-integer-digits="1" number:grouping="true"/>
    </number:number-style>
    <number:currency-style style:name="N148P0" style:volatile="true">
      <number:text loext:blank-width-char=" "> </number:text>
      <number:currency-symbol number:language="quz" number:country="PE">S/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 "> </number:text>
    </number:currency-style>
    <number:currency-style style:name="N148P1" style:volatile="true">
      <number:text loext:blank-width-char=" "> </number:text>
      <number:currency-symbol number:language="quz" number:country="PE">S/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currency-style>
    <number:currency-style style:name="N148P2" style:volatile="true">
      <number:text loext:blank-width-char=" "> </number:text>
      <number:currency-symbol number:language="quz" number:country="PE">S/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48">
      <number:text loext:blank-width-char=" "> </number:text>
      <number:text-content/>
      <number:text loext:blank-width-char=" 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Ventas" style:display-name="PageStyle_Costos_Ve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on_5f_Inicial" style:display-name="PageStyle_Inversion_Inic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eldos" style:display-name="PageStyle_Suel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stos_5f_Operativos" style:display-name="PageStyle_Gastos_Operativ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recion_5f_VR" style:display-name="PageStyle_Deprecion_V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uesto_5f_Ventas" style:display-name="PageStyle_Presupuesto_Ve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pital_5f_Trabajo" style:display-name="PageStyle_Capital_Trabaj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do_5f_Resultados" style:display-name="PageStyle_Estado_Resulta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_5f_Kwacc" style:display-name="PageStyle_Ke_Kwa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u" style:display-name="PageStyle_K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5f_Caja" style:display-name="PageStyle_Flujo_Caj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nto_5f_Equilibrio" style:display-name="PageStyle_Punto_Equilib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GV" style:display-name="PageStyle_IGV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Unitario" style:display-name="PageStyle_Costos_Unita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5f_Deuda" style:display-name="PageStyle_Flujo_Deud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del_20_escenario_20_1" style:display-name="PageStyle_Resumen del escenario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ntabilidad" style:display-name="PageStyle_Renta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nsibilidad" style:display-name="PageStyle_Sensibilidad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E. Edison Achalma Mendoza</dc:creator>
    <meta:creation-date>2021-07-21T01:12:51</meta:creation-date>
    <dc:date>2022-05-22T01:18:15</dc:date>
    <meta:generator>LibreOffice/24.2.4.2$Linux_X86_64 LibreOffice_project/420$Build-2</meta:generator>
    <meta:document-statistic meta:table-count="19" meta:cell-count="2215" meta:object-count="0"/>
    <meta:user-defined meta:name="AppVersion">16.0300</meta:user-defined>
  </office:meta>
</office:document-meta>
</file>