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5.851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1.632cm"/>
    </style:style>
    <style:style style:name="co10" style:family="table-column">
      <style:table-column-properties fo:break-before="auto" style:column-width="7.04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783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3.634cm"/>
    </style:style>
    <style:style style:name="co15" style:family="table-column">
      <style:table-column-properties fo:break-before="auto" style:column-width="4.046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3.11cm"/>
    </style:style>
    <style:style style:name="co19" style:family="table-column">
      <style:table-column-properties fo:break-before="auto" style:column-width="3.655cm"/>
    </style:style>
    <style:style style:name="co20" style:family="table-column">
      <style:table-column-properties fo:break-before="auto" style:column-width="4.06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CASO_20_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4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33">
      <style:table-cell-properties style:rotation-align="non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35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5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134">
      <style:table-cell-properties style:rotation-align="none"/>
    </style:style>
    <style:style style:name="ce31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133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35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34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33">
      <style:table-cell-properties style:diagonal-bl-tr="none" style:diagonal-tl-br="none" fo:border="none" style:rotation-align="none"/>
    </style:style>
    <style:style style:name="ce52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133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33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Excel_20_Built-in_20_Percen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6369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Para una capacidad de 300 polos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RUBRO</text:p>
          </table:table-cell>
          <table:table-cell table:style-name="ce13" office:value-type="string" calcext:value-type="string" table:number-columns-spanned="1" table:number-rows-spanned="2">
            <text:p>UNIDAD DE MEDIDA</text:p>
          </table:table-cell>
          <table:table-cell table:style-name="ce13" office:value-type="string" calcext:value-type="string" table:number-columns-spanned="1" table:number-rows-spanned="2">
            <text:p>VALOR UNITARIO</text:p>
          </table:table-cell>
          <table:table-cell table:style-name="ce13" office:value-type="string" calcext:value-type="string" table:number-columns-spanned="1" table:number-rows-spanned="2">
            <text:p>UNIDADES REQUERIDAS</text:p>
          </table:table-cell>
          <table:table-cell table:style-name="ce13" office:value-type="string" calcext:value-type="string" table:number-columns-spanned="1" table:number-rows-spanned="2">
            <text:p>COSTO FIJO</text:p>
          </table:table-cell>
          <table:table-cell table:style-name="ce13" office:value-type="string" calcext:value-type="string" table:number-columns-spanned="1" table:number-rows-spanned="2">
            <text:p>COSTO VARIABLE</text:p>
          </table:table-cell>
          <table:table-cell table:style-name="ce19" office:value-type="string" calcext:value-type="string" table:number-columns-spanned="1" table:number-rows-spanned="2">
            <text:p>COSTO TOTAL</text:p>
          </table:table-cell>
          <table:table-cell/>
          <table:table-cell table:style-name="ce52" office:value-type="string" calcext:value-type="string" table:number-columns-spanned="1" table:number-rows-spanned="2">
            <text:p>inversiones en Activo Fijo Tangibles</text:p>
          </table:table-cell>
          <table:table-cell table:style-name="ce64" office:value-type="string" calcext:value-type="string" table:number-columns-spanned="1" table:number-rows-spanned="2">
            <text:p>Cantidad </text:p>
          </table:table-cell>
          <table:table-cell table:style-name="ce69" office:value-type="string" calcext:value-type="string" table:number-columns-spanned="1" table:number-rows-spanned="2">
            <text:p>Precio Unitario</text:p>
          </table:table-cell>
          <table:table-cell table:style-name="ce64" office:value-type="string" calcext:value-type="string" table:number-columns-spanned="1" table:number-rows-spanned="2">
            <text:p>Total </text:p>
          </table:table-cell>
          <table:table-cell table:number-columns-repeated="16371"/>
        </table:table-row>
        <table:table-row table:style-name="ro2">
          <table:table-cell/>
          <table:covered-table-cell table:style-name="ce1"/>
          <table:covered-table-cell table:number-columns-repeated="5" table:style-name="ce13"/>
          <table:covered-table-cell table:style-name="ce19"/>
          <table:table-cell/>
          <table:covered-table-cell table:style-name="ce53"/>
          <table:covered-table-cell table:style-name="ce65"/>
          <table:covered-table-cell table:style-name="ce70"/>
          <table:covered-table-cell table:style-name="ce74"/>
          <table:table-cell table:number-columns-repeated="16371"/>
        </table:table-row>
        <table:table-row table:style-name="ro3">
          <table:table-cell/>
          <table:table-cell table:style-name="ce2" office:value-type="string" calcext:value-type="string">
            <text:p>COSTOS DE PRODUCCIÓN</text:p>
          </table:table-cell>
          <table:table-cell table:style-name="ce14" table:number-columns-spanned="6" table:number-rows-spanned="1"/>
          <table:covered-table-cell table:number-columns-repeated="5" table:style-name="ce14"/>
          <table:table-cell/>
          <table:table-cell table:style-name="ce54" office:value-type="string" calcext:value-type="string">
            <text:p>Equipos</text:p>
          </table:table-cell>
          <table:table-cell table:style-name="ce16" table:number-columns-repeated="2"/>
          <table:table-cell table:style-name="ce38" table:formula="of:=SUM([.M7:.M10])" office:value-type="float" office:value="6304" calcext:value-type="float">
            <text:p>S/.6,304.00</text:p>
          </table:table-cell>
          <table:table-cell table:number-columns-repeated="16371"/>
        </table:table-row>
        <table:table-row table:style-name="ro3">
          <table:table-cell/>
          <table:table-cell table:style-name="ce2" office:value-type="string" calcext:value-type="string">
            <text:p>MATERIA PRIMA E INSUMOS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/>
          <table:table-cell table:style-name="ce55" office:value-type="string" calcext:value-type="string">
            <text:p>Computadora portátil Laptop</text:p>
          </table:table-cell>
          <table:table-cell table:style-name="ce16" office:value-type="float" office:value="2" calcext:value-type="float">
            <text:p>2</text:p>
          </table:table-cell>
          <table:table-cell table:style-name="ce28" office:value-type="float" office:value="1899" calcext:value-type="float">
            <text:p>S/.1,899.00</text:p>
          </table:table-cell>
          <table:table-cell table:style-name="ce28" table:formula="of:=[.K7]*[.L7]" office:value-type="float" office:value="3798" calcext:value-type="float">
            <text:p>S/.3,798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Polos de algodón</text:p>
          </table:table-cell>
          <table:table-cell office:value-type="string" calcext:value-type="string">
            <text:p>Unid.</text:p>
          </table:table-cell>
          <table:table-cell table:style-name="ce28" office:value-type="float" office:value="15" calcext:value-type="float">
            <text:p>S/.15.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/>
          <table:table-cell table:style-name="ce41" table:formula="of:=[.E8]*[.D8]" office:value-type="float" office:value="4500" calcext:value-type="float">
            <text:p>S/.4,500</text:p>
          </table:table-cell>
          <table:table-cell table:style-name="ce47" table:formula="of:=[.F8]+[.G8]" office:value-type="float" office:value="4500" calcext:value-type="float">
            <text:p>4,500.00</text:p>
          </table:table-cell>
          <table:table-cell/>
          <table:table-cell table:style-name="ce55" office:value-type="string" calcext:value-type="string">
            <text:p>Impresora 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979" calcext:value-type="float">
            <text:p>S/.979.00</text:p>
          </table:table-cell>
          <table:table-cell table:style-name="ce28" table:formula="of:=[.K8]*[.L8]" office:value-type="float" office:value="979" calcext:value-type="float">
            <text:p>S/.979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papel transfer tela oscura(A4)</text:p>
          </table:table-cell>
          <table:table-cell office:value-type="string" calcext:value-type="string">
            <text:p>Unid.</text:p>
          </table:table-cell>
          <table:table-cell table:style-name="ce28" table:formula="of:=1*50/50" office:value-type="float" office:value="1" calcext:value-type="float">
            <text:p>S/.1.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/>
          <table:table-cell table:style-name="ce41" table:formula="of:=[.E9]*[.D9]" office:value-type="float" office:value="200" calcext:value-type="float">
            <text:p>S/.200</text:p>
          </table:table-cell>
          <table:table-cell table:style-name="ce47" table:formula="of:=[.F9]+[.G9]" office:value-type="float" office:value="200" calcext:value-type="float">
            <text:p>200.00</text:p>
          </table:table-cell>
          <table:table-cell/>
          <table:table-cell table:style-name="ce55" office:value-type="string" calcext:value-type="string">
            <text:p>Plancha Plana(Estampado)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1500" calcext:value-type="float">
            <text:p>S/.1,500.00</text:p>
          </table:table-cell>
          <table:table-cell table:style-name="ce28" table:formula="of:=[.K9]*[.L9]" office:value-type="float" office:value="1500" calcext:value-type="float">
            <text:p>S/.1,500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papel transfer tela clara(A4)</text:p>
          </table:table-cell>
          <table:table-cell office:value-type="string" calcext:value-type="string">
            <text:p>Unid.</text:p>
          </table:table-cell>
          <table:table-cell table:style-name="ce28" table:formula="of:=1*30/50" office:value-type="float" office:value="0.6" calcext:value-type="float">
            <text:p>S/.0.6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/>
          <table:table-cell table:style-name="ce41" table:formula="of:=[.E10]*[.D10]" office:value-type="float" office:value="60" calcext:value-type="float">
            <text:p>S/.60</text:p>
          </table:table-cell>
          <table:table-cell table:style-name="ce47" table:formula="of:=[.F10]+[.G10]" office:value-type="float" office:value="60" calcext:value-type="float">
            <text:p>60.00</text:p>
          </table:table-cell>
          <table:table-cell/>
          <table:table-cell table:style-name="ce55" office:value-type="string" calcext:value-type="string">
            <text:p>Pistola Etiquetadora Textil 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27" calcext:value-type="float">
            <text:p>S/.27.00</text:p>
          </table:table-cell>
          <table:table-cell table:style-name="ce28" table:formula="of:=[.K10]*[.L10]" office:value-type="float" office:value="27" calcext:value-type="float">
            <text:p>S/.27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Etiquetas colgantes</text:p>
          </table:table-cell>
          <table:table-cell office:value-type="string" calcext:value-type="string">
            <text:p>Unid.</text:p>
          </table:table-cell>
          <table:table-cell table:style-name="ce28" table:formula="of:=30/50" office:value-type="float" office:value="0.6" calcext:value-type="float">
            <text:p>S/.0.6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/>
          <table:table-cell table:style-name="ce41" table:formula="of:=[.E11]*[.D11]" office:value-type="float" office:value="180" calcext:value-type="float">
            <text:p>S/.180</text:p>
          </table:table-cell>
          <table:table-cell table:style-name="ce47" table:formula="of:=[.F11]+[.G11]" office:value-type="float" office:value="180" calcext:value-type="float">
            <text:p>180.00</text:p>
          </table:table-cell>
          <table:table-cell/>
          <table:table-cell table:style-name="ce56" office:value-type="string" calcext:value-type="string">
            <text:p>Muebles ,Enseres </text:p>
          </table:table-cell>
          <table:table-cell table:style-name="ce66"/>
          <table:table-cell table:style-name="ce71"/>
          <table:table-cell table:style-name="ce75" table:formula="of:=SUM([.M12:.M18])" office:value-type="float" office:value="554" calcext:value-type="float">
            <text:p>S/.554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Bolsas de papel</text:p>
          </table:table-cell>
          <table:table-cell office:value-type="string" calcext:value-type="string">
            <text:p>Unid.</text:p>
          </table:table-cell>
          <table:table-cell table:style-name="ce28" table:formula="of:=89/100" office:value-type="float" office:value="0.89" calcext:value-type="float">
            <text:p>S/.0.8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/>
          <table:table-cell table:style-name="ce41" table:formula="of:=[.E12]*[.D12]" office:value-type="float" office:value="267" calcext:value-type="float">
            <text:p>S/.267</text:p>
          </table:table-cell>
          <table:table-cell table:style-name="ce47" table:formula="of:=[.F12]+[.G12]" office:value-type="float" office:value="267" calcext:value-type="float">
            <text:p>267.00</text:p>
          </table:table-cell>
          <table:table-cell/>
          <table:table-cell table:style-name="ce55" office:value-type="string" calcext:value-type="string">
            <text:p>Escritorio para computador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130" calcext:value-type="float">
            <text:p>S/.130.00</text:p>
          </table:table-cell>
          <table:table-cell table:style-name="ce28" table:formula="of:=[.K12]*[.L12]" office:value-type="float" office:value="130" calcext:value-type="float">
            <text:p>S/.130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tinta pigmentada(100ml)</text:p>
          </table:table-cell>
          <table:table-cell office:value-type="string" calcext:value-type="string">
            <text:p>ml.</text:p>
          </table:table-cell>
          <table:table-cell table:style-name="ce28" table:formula="of:=156/2000" office:value-type="float" office:value="0.078" calcext:value-type="float">
            <text:p>S/.0.08</text:p>
          </table:table-cell>
          <table:table-cell table:style-name="ce16" office:value-type="float" office:value="300" calcext:value-type="float">
            <text:p>300</text:p>
          </table:table-cell>
          <table:table-cell table:style-name="ce16"/>
          <table:table-cell table:style-name="ce41" table:formula="of:=[.E13]*[.D13]" office:value-type="float" office:value="23.4" calcext:value-type="float">
            <text:p>S/.23</text:p>
          </table:table-cell>
          <table:table-cell table:style-name="ce47" table:formula="of:=[.F13]+[.G13]" office:value-type="float" office:value="23.4" calcext:value-type="float">
            <text:p>23.40</text:p>
          </table:table-cell>
          <table:table-cell/>
          <table:table-cell table:style-name="ce55" office:value-type="string" calcext:value-type="string">
            <text:p>Silla de escritorio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50" calcext:value-type="float">
            <text:p>S/.50.00</text:p>
          </table:table-cell>
          <table:table-cell table:style-name="ce28" table:formula="of:=[.K13]*[.L13]" office:value-type="float" office:value="50" calcext:value-type="float">
            <text:p>S/.50.00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MANO DE OBRA</text:p>
          </table:table-cell>
          <table:table-cell table:style-name="ce17" table:number-columns-repeated="5"/>
          <table:table-cell table:style-name="ce18" table:formula="of:=SUM([.H15:.H17])" office:value-type="float" office:value="2321.70277777778" calcext:value-type="float">
            <text:p>2,321.70</text:p>
          </table:table-cell>
          <table:table-cell/>
          <table:table-cell table:style-name="ce55" office:value-type="string" calcext:value-type="string">
            <text:p>Silla </text:p>
          </table:table-cell>
          <table:table-cell table:style-name="ce16" office:value-type="float" office:value="2" calcext:value-type="float">
            <text:p>2</text:p>
          </table:table-cell>
          <table:table-cell table:style-name="ce28" office:value-type="float" office:value="30" calcext:value-type="float">
            <text:p>S/.30.00</text:p>
          </table:table-cell>
          <table:table-cell table:style-name="ce28" table:formula="of:=[.K14]*[.L14]" office:value-type="float" office:value="60" calcext:value-type="float">
            <text:p>S/.60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Sueldo del diseñador</text:p>
          </table:table-cell>
          <table:table-cell office:value-type="string" calcext:value-type="string">
            <text:p>Mensual/8hrs/d</text:p>
          </table:table-cell>
          <table:table-cell table:style-name="ce28" office:value-type="float" office:value="1185" calcext:value-type="float">
            <text:p>S/.1,185.00</text:p>
          </table:table-cell>
          <table:table-cell table:style-name="ce16" table:number-columns-repeated="2"/>
          <table:table-cell table:style-name="ce41" table:formula="of:=[.D15]" office:value-type="float" office:value="1185" calcext:value-type="float">
            <text:p>S/.1,185</text:p>
          </table:table-cell>
          <table:table-cell table:style-name="ce47" table:formula="of:=[.F15]+[.G15]" office:value-type="float" office:value="1185" calcext:value-type="float">
            <text:p>1,185.00</text:p>
          </table:table-cell>
          <table:table-cell/>
          <table:table-cell table:style-name="ce55" office:value-type="string" calcext:value-type="string">
            <text:p>Exibidor de polos 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formula="of:=95+125" office:value-type="float" office:value="220" calcext:value-type="float">
            <text:p>S/.220.00</text:p>
          </table:table-cell>
          <table:table-cell table:style-name="ce28" table:formula="of:=[.K15]*[.L15]" office:value-type="float" office:value="220" calcext:value-type="float">
            <text:p>S/.220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sueldo del estampador</text:p>
          </table:table-cell>
          <table:table-cell office:value-type="string" calcext:value-type="string">
            <text:p>Mensual/8hrs/d</text:p>
          </table:table-cell>
          <table:table-cell table:style-name="ce28" office:value-type="float" office:value="930" calcext:value-type="float">
            <text:p>S/.930.00</text:p>
          </table:table-cell>
          <table:table-cell table:style-name="ce16" table:number-columns-repeated="2"/>
          <table:table-cell table:style-name="ce41" table:formula="of:=[.D16]" office:value-type="float" office:value="930" calcext:value-type="float">
            <text:p>S/.930</text:p>
          </table:table-cell>
          <table:table-cell table:style-name="ce47" table:formula="of:=[.F16]+[.G16]" office:value-type="float" office:value="930" calcext:value-type="float">
            <text:p>930.00</text:p>
          </table:table-cell>
          <table:table-cell/>
          <table:table-cell table:style-name="ce55" office:value-type="string" calcext:value-type="string">
            <text:p>Espejo para vestidor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15" calcext:value-type="float">
            <text:p>S/.15.00</text:p>
          </table:table-cell>
          <table:table-cell table:style-name="ce28" table:formula="of:=[.K16]*[.L16]" office:value-type="float" office:value="15" calcext:value-type="float">
            <text:p>S/.15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Depreciciones</text:p>
          </table:table-cell>
          <table:table-cell/>
          <table:table-cell table:style-name="ce16"/>
          <table:table-cell table:style-name="ce28"/>
          <table:table-cell table:style-name="ce28" table:formula="of:=[$Sheet1.G10]" office:value-type="float" office:value="206.702777777778" calcext:value-type="float">
            <text:p>S/.206.70</text:p>
          </table:table-cell>
          <table:table-cell table:style-name="ce16"/>
          <table:table-cell table:style-name="ce47" table:formula="of:=[.F17]+[.G17]" office:value-type="float" office:value="206.702777777778" calcext:value-type="float">
            <text:p>206.70</text:p>
          </table:table-cell>
          <table:table-cell/>
          <table:table-cell table:style-name="ce55" office:value-type="string" calcext:value-type="string">
            <text:p>Provador vestidor de metal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49" calcext:value-type="float">
            <text:p>S/.49.00</text:p>
          </table:table-cell>
          <table:table-cell table:style-name="ce28" table:formula="of:=[.K17]*[.L17]" office:value-type="float" office:value="49" calcext:value-type="float">
            <text:p>S/.49.00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GASTOS ADMINISTRATIVOS</text:p>
          </table:table-cell>
          <table:table-cell table:style-name="ce18"/>
          <table:table-cell table:style-name="ce17" table:number-columns-repeated="5"/>
          <table:table-cell/>
          <table:table-cell table:style-name="ce55" office:value-type="string" calcext:value-type="string">
            <text:p>Cortina de vestidor de polos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30" calcext:value-type="float">
            <text:p>S/.30.00</text:p>
          </table:table-cell>
          <table:table-cell table:style-name="ce28" table:formula="of:=[.K18]*[.L18]" office:value-type="float" office:value="30" calcext:value-type="float">
            <text:p>S/.30.00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SUELDOS DEL PERSONAL</text:p>
          </table:table-cell>
          <table:table-cell table:style-name="ce17" table:number-columns-repeated="5"/>
          <table:table-cell table:style-name="ce18" table:formula="of:=SUM([.H20:.H26])" office:value-type="float" office:value="2299.6165" calcext:value-type="float">
            <text:p>2,299.62</text:p>
          </table:table-cell>
          <table:table-cell/>
          <table:table-cell table:style-name="ce55" office:value-type="string" calcext:value-type="string">
            <text:p>Vehículos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Gerencia</text:p>
          </table:table-cell>
          <table:table-cell office:value-type="string" calcext:value-type="string">
            <text:p>Mensual/8hrs/d</text:p>
          </table:table-cell>
          <table:table-cell table:style-name="ce29" office:value-type="float" office:value="1200" calcext:value-type="float">
            <text:p>S/.1,200.00</text:p>
          </table:table-cell>
          <table:table-cell table:style-name="ce16" office:value-type="float" office:value="1" calcext:value-type="float">
            <text:p>1</text:p>
          </table:table-cell>
          <table:table-cell table:style-name="ce29" table:formula="of:=[.D20]*[.E20]" office:value-type="float" office:value="1200" calcext:value-type="float">
            <text:p>S/.1,200.00</text:p>
          </table:table-cell>
          <table:table-cell table:style-name="ce16"/>
          <table:table-cell table:style-name="ce47" table:formula="of:=[.F20]+[.G20]" office:value-type="float" office:value="1200" calcext:value-type="float">
            <text:p>1,200.00</text:p>
          </table:table-cell>
          <table:table-cell/>
          <table:table-cell table:style-name="ce55" office:value-type="string" calcext:value-type="string">
            <text:p>Moto lineal(eléctrica)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3400" calcext:value-type="float">
            <text:p>S/.3,400.00</text:p>
          </table:table-cell>
          <table:table-cell table:style-name="ce38" table:formula="of:=[.K20]*[.L20]" office:value-type="float" office:value="3400" calcext:value-type="float">
            <text:p>S/.3,400.0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ontabilidad</text:p>
          </table:table-cell>
          <table:table-cell office:value-type="string" calcext:value-type="string">
            <text:p>Mensual/8hrs/d</text:p>
          </table:table-cell>
          <table:table-cell table:style-name="ce29" office:value-type="float" office:value="930" calcext:value-type="float">
            <text:p>S/.930.00</text:p>
          </table:table-cell>
          <table:table-cell table:style-name="ce16" office:value-type="float" office:value="1" calcext:value-type="float">
            <text:p>1</text:p>
          </table:table-cell>
          <table:table-cell table:style-name="ce29" table:formula="of:=[.D21]*[.E21]" office:value-type="float" office:value="930" calcext:value-type="float">
            <text:p>S/.930.00</text:p>
          </table:table-cell>
          <table:table-cell table:style-name="ce16"/>
          <table:table-cell table:style-name="ce47" table:formula="of:=[.F21]+[.G21]" office:value-type="float" office:value="930" calcext:value-type="float">
            <text:p>930.00</text:p>
          </table:table-cell>
          <table:table-cell/>
          <table:table-cell table:style-name="ce57" office:value-type="string" calcext:value-type="string">
            <text:p>Total Activo Fijo Tangible </text:p>
          </table:table-cell>
          <table:table-cell table:style-name="ce67"/>
          <table:table-cell table:style-name="ce72"/>
          <table:table-cell table:style-name="ce72" table:formula="of:=[.M6]+[.M11]+[.M20]" office:value-type="float" office:value="10258" calcext:value-type="float">
            <text:p>S/.10,258.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Pago de SIS x3 trabajadores</text:p>
          </table:table-cell>
          <table:table-cell office:value-type="string" calcext:value-type="string">
            <text:p>soles</text:p>
          </table:table-cell>
          <table:table-cell table:style-name="ce28" office:value-type="float" office:value="15" calcext:value-type="float">
            <text:p>S/.15.00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formula="of:=[.D22]*[.E22]" office:value-type="float" office:value="45" calcext:value-type="float">
            <text:p>S/.45.00</text:p>
          </table:table-cell>
          <table:table-cell table:style-name="ce16"/>
          <table:table-cell table:style-name="ce47" table:formula="of:=[.F22]+[.G22]" office:value-type="float" office:value="45" calcext:value-type="float">
            <text:p>45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nergía Eléctrica</text:p>
          </table:table-cell>
          <table:table-cell office:value-type="string" calcext:value-type="string">
            <text:p>Horas /mes</text:p>
          </table:table-cell>
          <table:table-cell table:style-name="ce28" office:value-type="float" office:value="15" calcext:value-type="float">
            <text:p>S/.15.00</text:p>
          </table:table-cell>
          <table:table-cell table:style-name="ce16"/>
          <table:table-cell table:style-name="ce28" table:formula="of:=[.D23]" office:value-type="float" office:value="15" calcext:value-type="float">
            <text:p>S/.15.00</text:p>
          </table:table-cell>
          <table:table-cell table:style-name="ce16"/>
          <table:table-cell table:style-name="ce47" table:formula="of:=[.F23]+[.G23]" office:value-type="float" office:value="15" calcext:value-type="float">
            <text:p>15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Teléfono</text:p>
          </table:table-cell>
          <table:table-cell office:value-type="string" calcext:value-type="string">
            <text:p>Horas /mes</text:p>
          </table:table-cell>
          <table:table-cell table:style-name="ce28" table:formula="of:=[.F24]" office:value-type="float" office:value="30" calcext:value-type="float">
            <text:p>S/.30.00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float" office:value="30" calcext:value-type="float">
            <text:p>S/.30.00</text:p>
          </table:table-cell>
          <table:table-cell table:style-name="ce16"/>
          <table:table-cell table:style-name="ce47" table:formula="of:=[.F24]+[.G24]" office:value-type="float" office:value="30" calcext:value-type="float">
            <text:p>30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Internet</text:p>
          </table:table-cell>
          <table:table-cell office:value-type="string" calcext:value-type="string">
            <text:p>Horas /mes</text:p>
          </table:table-cell>
          <table:table-cell table:style-name="ce28" table:formula="of:=[.F25]" office:value-type="float" office:value="60" calcext:value-type="float">
            <text:p>S/.60.00</text:p>
          </table:table-cell>
          <table:table-cell table:style-name="ce16"/>
          <table:table-cell table:style-name="ce28" office:value-type="float" office:value="60" calcext:value-type="float">
            <text:p>S/.60.00</text:p>
          </table:table-cell>
          <table:table-cell table:style-name="ce16"/>
          <table:table-cell table:style-name="ce47" table:formula="of:=[.F25]+[.G25]" office:value-type="float" office:value="60" calcext:value-type="float">
            <text:p>60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mortización de intangibles</text:p>
          </table:table-cell>
          <table:table-cell/>
          <table:table-cell table:style-name="ce28"/>
          <table:table-cell table:style-name="ce16"/>
          <table:table-cell table:style-name="ce28" table:formula="of:=[.O38]" office:value-type="float" office:value="19.6165" calcext:value-type="float">
            <text:p>S/.19.62</text:p>
          </table:table-cell>
          <table:table-cell table:style-name="ce16"/>
          <table:table-cell table:style-name="ce47" table:formula="of:=[.F26]+[.G26]" office:value-type="float" office:value="19.6165" calcext:value-type="float">
            <text:p>19.62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GASTOS DE VENTA</text:p>
          </table:table-cell>
          <table:table-cell table:style-name="ce18"/>
          <table:table-cell table:style-name="ce17" table:number-columns-repeated="4"/>
          <table:table-cell table:style-name="ce18" table:formula="of:=SUM([.H28:.H31])" office:value-type="float" office:value="1770" calcext:value-type="float">
            <text:p>1,770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ueldo del personal</text:p>
          </table:table-cell>
          <table:table-cell office:value-type="string" calcext:value-type="string">
            <text:p>Mensual/8hrs/d</text:p>
          </table:table-cell>
          <table:table-cell table:style-name="ce28" table:formula="of:=[.F28]" office:value-type="float" office:value="930" calcext:value-type="float">
            <text:p>S/.930.00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930" calcext:value-type="float">
            <text:p>S/.930.00</text:p>
          </table:table-cell>
          <table:table-cell table:style-name="ce16"/>
          <table:table-cell table:style-name="ce47" table:formula="of:=[.F28]+[.G28]" office:value-type="float" office:value="930" calcext:value-type="float">
            <text:p>930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Transporte</text:p>
          </table:table-cell>
          <table:table-cell/>
          <table:table-cell table:style-name="ce28" office:value-type="float" office:value="15" calcext:value-type="float">
            <text:p>S/.15.00</text:p>
          </table:table-cell>
          <table:table-cell table:style-name="ce16"/>
          <table:table-cell table:style-name="ce29" table:formula="of:=[.D29]" office:value-type="float" office:value="15" calcext:value-type="float">
            <text:p>S/.15.00</text:p>
          </table:table-cell>
          <table:table-cell table:style-name="ce16"/>
          <table:table-cell table:style-name="ce47" table:formula="of:=[.F29]+[.G29]" office:value-type="float" office:value="15" calcext:value-type="float">
            <text:p>15.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lquiler del local</text:p>
          </table:table-cell>
          <table:table-cell office:value-type="string" calcext:value-type="string">
            <text:p>Mensual</text:p>
          </table:table-cell>
          <table:table-cell table:style-name="ce28" office:value-type="float" office:value="800" calcext:value-type="float">
            <text:p>S/.800.00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formula="of:=[.D30]" office:value-type="float" office:value="800" calcext:value-type="float">
            <text:p>S/.800.00</text:p>
          </table:table-cell>
          <table:table-cell table:style-name="ce16"/>
          <table:table-cell table:style-name="ce47" table:formula="of:=[.F30]+[.G30]" office:value-type="float" office:value="800" calcext:value-type="float">
            <text:p>800.00</text:p>
          </table:table-cell>
          <table:table-cell/>
          <table:table-cell table:style-name="ce58" table:number-columns-repeated="2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Promoción</text:p>
          </table:table-cell>
          <table:table-cell/>
          <table:table-cell table:style-name="ce28" office:value-type="float" office:value="25" calcext:value-type="float">
            <text:p>S/.25.00</text:p>
          </table:table-cell>
          <table:table-cell table:style-name="ce16"/>
          <table:table-cell table:style-name="ce28"/>
          <table:table-cell table:style-name="ce28" table:formula="of:=[.D31]" office:value-type="float" office:value="25" calcext:value-type="float">
            <text:p>S/.25.00</text:p>
          </table:table-cell>
          <table:table-cell table:style-name="ce47" table:formula="of:=[.F31]+[.G31]" office:value-type="float" office:value="25" calcext:value-type="float">
            <text:p>25.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TOTAL DE COSTOS OPERATIVOS</text:p>
          </table:table-cell>
          <table:table-cell table:style-name="ce19" table:number-columns-repeated="3"/>
          <table:table-cell table:style-name="ce35" table:formula="of:=[.F17]+[.F20]+[.F21]+[.F22]+[.F23]+[.F24]+[.F25]+[.F28]+[.F29]+[.F30]+[.F31]+[.F26]" office:value-type="float" office:value="4251.31927777778" calcext:value-type="float">
            <text:p>S/.4,251.32</text:p>
          </table:table-cell>
          <table:table-cell table:style-name="ce42" table:formula="of:=SUM([.G8:.G31])" office:value-type="float" office:value="7370.4" calcext:value-type="float">
            <text:p>S/.7,370</text:p>
          </table:table-cell>
          <table:table-cell table:style-name="ce35" table:formula="of:=SUM([.F32]+[.G32])" office:value-type="float" office:value="11621.7192777778" calcext:value-type="float">
            <text:p>S/.11,621.72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59" office:value-type="string" calcext:value-type="string">
            <text:p>Tabla de Amortización de lo Intangibles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4" office:value-type="string" calcext:value-type="string">
            <text:p>COSTO FIJO UNITARIO</text:p>
          </table:table-cell>
          <table:table-cell table:style-name="ce36" table:formula="of:=[.F32]/[.E8]" office:value-type="float" office:value="14.1710642592593" calcext:value-type="float">
            <text:p>S/.14.17</text:p>
          </table:table-cell>
          <table:table-cell table:style-name="ce43" office:value-type="string" calcext:value-type="string" table:number-columns-spanned="1" table:number-rows-spanned="2">
            <text:p>Costo Total Unitario</text:p>
          </table:table-cell>
          <table:table-cell table:style-name="ce48" table:formula="of:=[.H32]/300" office:value-type="float" office:value="38.7390642592593" calcext:value-type="float" table:number-columns-spanned="1" table:number-rows-spanned="2">
            <text:p>S/. 38.74</text:p>
          </table:table-cell>
          <table:table-cell/>
          <table:table-cell table:style-name="ce60" office:value-type="string" calcext:value-type="string">
            <text:p>INTANGIBLE</text:p>
          </table:table-cell>
          <table:table-cell table:style-name="ce60" office:value-type="string" calcext:value-type="string">
            <text:p>Monto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Tasa</text:p>
          </table:table-cell>
          <table:table-cell table:style-name="ce78" office:value-type="string" calcext:value-type="string">
            <text:p>Amort. año</text:p>
          </table:table-cell>
          <table:table-cell table:style-name="ce78" office:value-type="string" calcext:value-type="string">
            <text:p>Amort. mes</text:p>
          </table:table-cell>
          <table:table-cell table:number-columns-repeated="1636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4" office:value-type="string" calcext:value-type="string">
            <text:p>COSTO VARIABLE UNITARIO</text:p>
          </table:table-cell>
          <table:table-cell table:style-name="ce36" table:formula="of:=[.G32]/[.E8]" office:value-type="float" office:value="24.568" calcext:value-type="float">
            <text:p>S/.24.57</text:p>
          </table:table-cell>
          <table:covered-table-cell table:style-name="ce43"/>
          <table:covered-table-cell table:style-name="ce49"/>
          <table:table-cell/>
          <table:table-cell table:style-name="ce61" office:value-type="string" calcext:value-type="string">
            <text:p>Capacitacion</text:p>
          </table:table-cell>
          <table:table-cell table:style-name="ce36" office:value-type="float" office:value="60" calcext:value-type="float">
            <text:p>S/.60.00</text:p>
          </table:table-cell>
          <table:table-cell table:style-name="ce73" office:value-type="float" office:value="5" calcext:value-type="float">
            <text:p>5</text:p>
          </table:table-cell>
          <table:table-cell table:style-name="ce76" table:formula="of:=1/[.L35]" office:value-type="percentage" office:value="0.2" calcext:value-type="percentage">
            <text:p>20.00 %</text:p>
          </table:table-cell>
          <table:table-cell table:style-name="ce36" table:formula="of:=[.M35]*[.K35]" office:value-type="float" office:value="12" calcext:value-type="float">
            <text:p>S/.12.00</text:p>
          </table:table-cell>
          <table:table-cell table:style-name="ce36" table:formula="of:=[.N35]/12" office:value-type="float" office:value="1" calcext:value-type="float">
            <text:p>S/.1.00</text:p>
          </table:table-cell>
          <table:table-cell table:number-columns-repeated="1636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4" office:value-type="string" calcext:value-type="string">
            <text:p>PUNTO DE EQUILIBRIO</text:p>
          </table:table-cell>
          <table:table-cell table:style-name="ce37" table:formula="of:=[.F32]/([.I39]-[.F35])" office:value-type="float" office:value="149.525860923529" calcext:value-type="float">
            <text:p>S/.150</text:p>
          </table:table-cell>
          <table:table-cell table:style-name="ce44" office:value-type="string" calcext:value-type="string">
            <text:p>Margen de Ganancia</text:p>
          </table:table-cell>
          <table:table-cell table:style-name="ce50" office:value-type="float" office:value="6" calcext:value-type="float">
            <text:p>S/. 6.00</text:p>
          </table:table-cell>
          <table:table-cell/>
          <table:table-cell table:style-name="ce61" office:value-type="string" calcext:value-type="string">
            <text:p>Registro de Marca</text:p>
          </table:table-cell>
          <table:table-cell table:style-name="ce28" office:value-type="float" office:value="534.99" calcext:value-type="float">
            <text:p>S/.534.99</text:p>
          </table:table-cell>
          <table:table-cell table:style-name="ce73" office:value-type="float" office:value="5" calcext:value-type="float">
            <text:p>5</text:p>
          </table:table-cell>
          <table:table-cell table:style-name="ce76" table:formula="of:=1/[.L36]" office:value-type="percentage" office:value="0.2" calcext:value-type="percentage">
            <text:p>20.00 %</text:p>
          </table:table-cell>
          <table:table-cell table:style-name="ce36" table:formula="of:=[.M36]*[.K36]" office:value-type="float" office:value="106.998" calcext:value-type="float">
            <text:p>S/.107.00</text:p>
          </table:table-cell>
          <table:table-cell table:style-name="ce36" table:formula="of:=[.N36]/12" office:value-type="float" office:value="8.9165" calcext:value-type="float">
            <text:p>S/.8.92</text:p>
          </table:table-cell>
          <table:table-cell table:number-columns-repeated="1636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4" office:value-type="string" calcext:value-type="string">
            <text:p>MgC</text:p>
          </table:table-cell>
          <table:table-cell table:style-name="ce38" table:formula="of:=[.I39]-[.F35]" office:value-type="float" office:value="28.432" calcext:value-type="float">
            <text:p>S/.28.43</text:p>
          </table:table-cell>
          <table:table-cell table:style-name="ce34" office:value-type="string" calcext:value-type="string">
            <text:p>Precio</text:p>
          </table:table-cell>
          <table:table-cell table:style-name="ce50" table:formula="of:=[.H34]+[.H36]" office:value-type="float" office:value="44.7390642592593" calcext:value-type="float">
            <text:p>S/. 44.74</text:p>
          </table:table-cell>
          <table:table-cell/>
          <table:table-cell table:style-name="ce62" office:value-type="string" calcext:value-type="string">
            <text:p>Gastos en constitución de la empresa</text:p>
          </table:table-cell>
          <table:table-cell table:style-name="ce28" office:value-type="float" office:value="582" calcext:value-type="float">
            <text:p>S/.582.00</text:p>
          </table:table-cell>
          <table:table-cell table:style-name="ce73" office:value-type="float" office:value="5" calcext:value-type="float">
            <text:p>5</text:p>
          </table:table-cell>
          <table:table-cell table:style-name="ce76" table:formula="of:=1/[.L37]" office:value-type="percentage" office:value="0.2" calcext:value-type="percentage">
            <text:p>20.00 %</text:p>
          </table:table-cell>
          <table:table-cell table:style-name="ce36" table:formula="of:=[.M37]*[.K37]" office:value-type="float" office:value="116.4" calcext:value-type="float">
            <text:p>S/.116.40</text:p>
          </table:table-cell>
          <table:table-cell table:style-name="ce36" table:formula="of:=[.N37]/12" office:value-type="float" office:value="9.7" calcext:value-type="float">
            <text:p>S/.9.70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style-name="ce20" table:number-columns-repeated="2"/>
          <table:table-cell table:number-columns-repeated="2"/>
          <table:table-cell table:style-name="ce34" office:value-type="string" calcext:value-type="string">
            <text:p>IGV(18)</text:p>
          </table:table-cell>
          <table:table-cell table:style-name="ce50" table:formula="of:=[.H37]*18%" office:value-type="float" office:value="8.05303156666667" calcext:value-type="float">
            <text:p>S/. 8.05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8" table:number-columns-repeated="2"/>
          <table:table-cell table:style-name="ce77"/>
          <table:table-cell table:style-name="ce79" table:formula="of:=SUM([.N35:.N37])" office:value-type="float" office:value="235.398" calcext:value-type="float">
            <text:p>S/.235.40</text:p>
          </table:table-cell>
          <table:table-cell table:style-name="ce79" table:formula="of:=[.N38]/12" office:value-type="float" office:value="19.6165" calcext:value-type="float">
            <text:p>S/.19.62</text:p>
          </table:table-cell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ADO DE RESULTADOS PARA 300 POLOS</text:p>
          </table:table-cell>
          <table:covered-table-cell table:style-name="ce6"/>
          <table:table-cell table:number-columns-repeated="3"/>
          <table:table-cell table:style-name="ce34" office:value-type="string" calcext:value-type="string">
            <text:p>Precio de Venta</text:p>
          </table:table-cell>
          <table:table-cell table:style-name="ce50" table:formula="of:=[.H37]+[.H38]" office:value-type="float" office:value="52.7920958259259" calcext:value-type="float">
            <text:p>S/. 52.79</text:p>
          </table:table-cell>
          <table:table-cell table:style-name="ce20" office:value-type="float" office:value="53" calcext:value-type="float">
            <text:p>S/.53.00</text:p>
          </table:table-cell>
          <table:table-cell table:number-columns-repeated="16375"/>
        </table:table-row>
        <table:table-row table:style-name="ro3">
          <table:table-cell/>
          <table:table-cell table:style-name="ce7" office:value-type="string" calcext:value-type="string">
            <text:p>RUBRO</text:p>
          </table:table-cell>
          <table:table-cell table:style-name="ce21" office:value-type="string" calcext:value-type="string">
            <text:p>MONTO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Ventas</text:p>
          </table:table-cell>
          <table:table-cell table:style-name="ce22" table:formula="of:=300*53" office:value-type="float" office:value="15900" calcext:value-type="float">
            <text:p>S/. 15,900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Ventas Netas</text:p>
          </table:table-cell>
          <table:table-cell table:style-name="ce22" table:formula="of:=[.C41]/1.18" office:value-type="float" office:value="13474.5762711864" calcext:value-type="float">
            <text:p>S/. 13,475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Costo de ventas</text:p>
          </table:table-cell>
          <table:table-cell table:style-name="ce22" table:formula="of:=[.H34]*300" office:value-type="float" office:value="11621.7192777778" calcext:value-type="float">
            <text:p>S/. 11,622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Costo de ventas netas</text:p>
          </table:table-cell>
          <table:table-cell table:style-name="ce22" table:formula="of:=[.C43]/1.18" office:value-type="float" office:value="9848.91464218456" calcext:value-type="float">
            <text:p>S/. 9,849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Depreciacion de activos fijos</text:p>
          </table:table-cell>
          <table:table-cell table:style-name="ce22" table:formula="of:=[.F17]" office:value-type="float" office:value="206.702777777778" calcext:value-type="float">
            <text:p>S/. 207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table:style-name="ce9" office:value-type="string" calcext:value-type="string">
            <text:p>Utlidad Bruta</text:p>
          </table:table-cell>
          <table:table-cell table:style-name="ce23" table:formula="of:=[.C42]-[.C44]-[.C45]" office:value-type="float" office:value="3418.95885122411" calcext:value-type="float">
            <text:p>S/. 3,419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Gastos de venta</text:p>
          </table:table-cell>
          <table:table-cell table:style-name="ce22" table:formula="of:=[.H27]" office:value-type="float" office:value="1770" calcext:value-type="float">
            <text:p>S/. 1,770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Gastos de administración</text:p>
          </table:table-cell>
          <table:table-cell table:style-name="ce22" office:value-type="float" office:value="2299.6165" calcext:value-type="float">
            <text:p>S/. 2,300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 table:number-columns-repeated="2"/>
          <table:table-cell table:style-name="ce22"/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table:style-name="ce9" office:value-type="string" calcext:value-type="string">
            <text:p>Utilidad operativa</text:p>
          </table:table-cell>
          <table:table-cell table:style-name="ce23" table:formula="of:=[.C46]-[.C47]-[.C48]" office:value-type="float" office:value="-650.657648775895" calcext:value-type="float">
            <text:p>-S/. 651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Gastos finacieros</text:p>
          </table:table-cell>
          <table:table-cell table:style-name="ce22"/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table:style-name="ce9" office:value-type="string" calcext:value-type="string">
            <text:p>Utilidad antes de Impuestos</text:p>
          </table:table-cell>
          <table:table-cell table:style-name="ce23" table:formula="of:=[.C50]-[.C51]" office:value-type="float" office:value="-650.657648775895" calcext:value-type="float">
            <text:p>-S/. 651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Impuesto a la renta</text:p>
          </table:table-cell>
          <table:table-cell table:style-name="ce22" table:formula="of:=[.C42]*1.5%" office:value-type="float" office:value="202.118644067797" calcext:value-type="float">
            <text:p>S/. 202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3">
          <table:table-cell/>
          <table:table-cell table:style-name="ce9" office:value-type="string" calcext:value-type="string">
            <text:p>Utilidad Neta</text:p>
          </table:table-cell>
          <table:table-cell table:style-name="ce23" table:formula="of:=[.C52]-[.C53]" office:value-type="float" office:value="-852.776292843691" calcext:value-type="float">
            <text:p>-S/. 853</text:p>
          </table:table-cell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ce45"/>
          <table:table-cell table:style-name="ce51"/>
          <table:table-cell table:style-name="ce20"/>
          <table:table-cell table:number-columns-repeated="16375"/>
        </table:table-row>
        <table:table-row table:style-name="ro1">
          <table:table-cell/>
          <table:table-cell table:style-name="ce10" table:number-columns-repeated="2"/>
          <table:table-cell table:style-name="ce30"/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ESTADO DE RESULTADOS PARA 200 POLOS </text:p>
          </table:table-cell>
          <table:covered-table-cell table:number-columns-repeated="4" table:style-name="ce6"/>
          <table:table-cell table:number-columns-repeated="16378"/>
        </table:table-row>
        <table:table-row table:style-name="ro3">
          <table:table-cell/>
          <table:table-cell table:style-name="ce11" office:value-type="string" calcext:value-type="string">
            <text:p>Rubro</text:p>
          </table:table-cell>
          <table:table-cell table:style-name="ce24" office:value-type="string" calcext:value-type="string">
            <text:p>SIN PEDIDO</text:p>
          </table:table-cell>
          <table:table-cell table:style-name="ce31"/>
          <table:table-cell table:style-name="ce24" office:value-type="string" calcext:value-type="string">
            <text:p>CON PEDIDO</text:p>
          </table:table-cell>
          <table:table-cell table:style-name="ce31" office:value-type="string" calcext:value-type="string">
            <text:p>CON-SIN</text:p>
          </table:table-cell>
          <table:table-cell table:style-name="ce46" table:number-columns-repeated="5"/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Ventas</text:p>
          </table:table-cell>
          <table:table-cell table:style-name="ce25" table:formula="of:=200*53" office:value-type="float" office:value="10600" calcext:value-type="float">
            <text:p>S/. 10,600</text:p>
          </table:table-cell>
          <table:table-cell table:style-name="ce32"/>
          <table:table-cell table:style-name="ce25" table:formula="of:=200*50" office:value-type="float" office:value="10000" calcext:value-type="float">
            <text:p>S/. 10,000</text:p>
          </table:table-cell>
          <table:table-cell table:style-name="ce39" table:formula="of:=[.E60]-[.C60]" office:value-type="float" office:value="-600" calcext:value-type="float">
            <text:p>-S/. 600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Ventas Netas</text:p>
          </table:table-cell>
          <table:table-cell table:style-name="ce25" table:formula="of:=[.C60]/1.18" office:value-type="float" office:value="8983.05084745763" calcext:value-type="float">
            <text:p>S/. 8,983</text:p>
          </table:table-cell>
          <table:table-cell table:style-name="ce32"/>
          <table:table-cell table:style-name="ce25" table:formula="of:=[.E60]/1.18" office:value-type="float" office:value="8474.57627118644" calcext:value-type="float">
            <text:p>S/. 8,475</text:p>
          </table:table-cell>
          <table:table-cell table:style-name="ce39" table:formula="of:=[.E61]-[.C61]" office:value-type="float" office:value="-508.474576271186" calcext:value-type="float">
            <text:p>-S/. 508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osto de ventas</text:p>
          </table:table-cell>
          <table:table-cell table:style-name="ce25" table:formula="of:=[.H34]*200" office:value-type="float" office:value="7747.81285185185" calcext:value-type="float">
            <text:p>S/. 7,748</text:p>
          </table:table-cell>
          <table:table-cell table:style-name="ce32"/>
          <table:table-cell table:style-name="ce25" table:formula="of:=[.C62]" office:value-type="float" office:value="7747.81285185185" calcext:value-type="float">
            <text:p>S/. 7,748</text:p>
          </table:table-cell>
          <table:table-cell table:style-name="ce39" table:formula="of:=[.E62]-[.C62]" office:value-type="float" office:value="0" calcext:value-type="float">
            <text:p>S/. 0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osto de ventas netas</text:p>
          </table:table-cell>
          <table:table-cell table:style-name="ce25" table:formula="of:=[.C62]/1.18" office:value-type="float" office:value="6565.94309478971" calcext:value-type="float">
            <text:p>S/. 6,566</text:p>
          </table:table-cell>
          <table:table-cell table:style-name="ce32"/>
          <table:table-cell table:style-name="ce25" table:formula="of:=[.E62]/1.18" office:value-type="float" office:value="6565.94309478971" calcext:value-type="float">
            <text:p>S/. 6,566</text:p>
          </table:table-cell>
          <table:table-cell table:style-name="ce39" table:formula="of:=[.E63]-[.C63]" office:value-type="float" office:value="0" calcext:value-type="float">
            <text:p>S/. 0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Depreciacion de activos fijos</text:p>
          </table:table-cell>
          <table:table-cell table:style-name="ce25" table:formula="of:=[.F17]" office:value-type="float" office:value="206.702777777778" calcext:value-type="float">
            <text:p>S/. 207</text:p>
          </table:table-cell>
          <table:table-cell table:style-name="ce32"/>
          <table:table-cell table:style-name="ce25" table:formula="of:=[.C64]" office:value-type="float" office:value="206.702777777778" calcext:value-type="float">
            <text:p>S/. 207</text:p>
          </table:table-cell>
          <table:table-cell table:style-name="ce39" table:formula="of:=[.E64]-[.C64]" office:value-type="float" office:value="0" calcext:value-type="float">
            <text:p>S/. 0</text:p>
          </table:table-cell>
          <table:table-cell table:number-columns-repeated="16378"/>
        </table:table-row>
        <table:table-row table:style-name="ro3">
          <table:table-cell/>
          <table:table-cell table:style-name="ce11" office:value-type="string" calcext:value-type="string">
            <text:p>Utlidad Bruta</text:p>
          </table:table-cell>
          <table:table-cell table:style-name="ce26" table:formula="of:=[.C61]-[.C63]-[.C64]" office:value-type="float" office:value="2210.40497489014" calcext:value-type="float">
            <text:p>S/. 2,210</text:p>
          </table:table-cell>
          <table:table-cell table:style-name="ce33"/>
          <table:table-cell table:style-name="ce26" table:formula="of:=[.E61]-[.E63]-[.E64]" office:value-type="float" office:value="1701.93039861896" calcext:value-type="float">
            <text:p>S/. 1,702</text:p>
          </table:table-cell>
          <table:table-cell table:style-name="ce40" table:formula="of:=[.E65]-[.C65]" office:value-type="float" office:value="-508.474576271187" calcext:value-type="float">
            <text:p>-S/. 508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Gastos de venta</text:p>
          </table:table-cell>
          <table:table-cell table:style-name="ce25"/>
          <table:table-cell table:style-name="ce32"/>
          <table:table-cell table:style-name="ce25" table:formula="of:=[.C66]" office:value-type="float" office:value="0" calcext:value-type="float">
            <text:p>S/. 0</text:p>
          </table:table-cell>
          <table:table-cell table:style-name="ce39" table:formula="of:=[.E66]-[.C66]" office:value-type="float" office:value="0" calcext:value-type="float">
            <text:p>S/. 0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Gastos de administración</text:p>
          </table:table-cell>
          <table:table-cell table:style-name="ce25" office:value-type="float" office:value="2299.6165" calcext:value-type="float">
            <text:p>S/. 2,300</text:p>
          </table:table-cell>
          <table:table-cell table:style-name="ce32"/>
          <table:table-cell table:style-name="ce25" office:value-type="float" office:value="2299.6165" calcext:value-type="float">
            <text:p>S/. 2,300</text:p>
          </table:table-cell>
          <table:table-cell table:style-name="ce39" table:formula="of:=[.E67]-[.C67]" office:value-type="float" office:value="0" calcext:value-type="float">
            <text:p>S/. 0</text:p>
          </table:table-cell>
          <table:table-cell table:number-columns-repeated="16378"/>
        </table:table-row>
        <table:table-row table:style-name="ro3">
          <table:table-cell/>
          <table:table-cell table:style-name="ce11" office:value-type="string" calcext:value-type="string">
            <text:p>Utilidad operativa</text:p>
          </table:table-cell>
          <table:table-cell table:style-name="ce26" table:formula="of:=[.C65]-[.C66]-[.C67]" office:value-type="float" office:value="-89.2115251098558" calcext:value-type="float">
            <text:p>-S/. 89</text:p>
          </table:table-cell>
          <table:table-cell table:style-name="ce33"/>
          <table:table-cell table:style-name="ce26" table:formula="of:=[.E65]-[.E66]-[.E67]" office:value-type="float" office:value="-597.686101381042" calcext:value-type="float">
            <text:p>-S/. 598</text:p>
          </table:table-cell>
          <table:table-cell table:style-name="ce40" table:formula="of:=[.E68]-[.C68]" office:value-type="float" office:value="-508.474576271187" calcext:value-type="float">
            <text:p>-S/. 508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Gastos finacieros</text:p>
          </table:table-cell>
          <table:table-cell table:style-name="ce25"/>
          <table:table-cell table:style-name="ce32"/>
          <table:table-cell table:style-name="ce25"/>
          <table:table-cell table:style-name="ce39" table:formula="of:=[.E69]-[.C69]" office:value-type="float" office:value="0" calcext:value-type="float">
            <text:p>S/. 0</text:p>
          </table:table-cell>
          <table:table-cell table:number-columns-repeated="16378"/>
        </table:table-row>
        <table:table-row table:style-name="ro3">
          <table:table-cell/>
          <table:table-cell table:style-name="ce11" office:value-type="string" calcext:value-type="string">
            <text:p>Utilidad antes de Impuestos</text:p>
          </table:table-cell>
          <table:table-cell table:style-name="ce26" table:formula="of:=[.C68]-[.C69]" office:value-type="float" office:value="-89.2115251098558" calcext:value-type="float">
            <text:p>-S/. 89</text:p>
          </table:table-cell>
          <table:table-cell table:style-name="ce33"/>
          <table:table-cell table:style-name="ce26" table:formula="of:=[.E68]-[.E69]" office:value-type="float" office:value="-597.686101381042" calcext:value-type="float">
            <text:p>-S/. 598</text:p>
          </table:table-cell>
          <table:table-cell table:style-name="ce40" table:formula="of:=[.E70]-[.C70]" office:value-type="float" office:value="-508.474576271187" calcext:value-type="float">
            <text:p>-S/. 508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Impuesto a la renta</text:p>
          </table:table-cell>
          <table:table-cell table:style-name="ce25" table:formula="of:=[.C61]*1.5%" office:value-type="float" office:value="134.745762711864" calcext:value-type="float">
            <text:p>S/. 135</text:p>
          </table:table-cell>
          <table:table-cell table:style-name="ce32"/>
          <table:table-cell table:style-name="ce25" table:formula="of:=[.E61]*1.5%" office:value-type="float" office:value="127.118644067797" calcext:value-type="float">
            <text:p>S/. 127</text:p>
          </table:table-cell>
          <table:table-cell table:style-name="ce39" table:formula="of:=[.E71]-[.C71]" office:value-type="float" office:value="-7.62711864406781" calcext:value-type="float">
            <text:p>-S/. 8</text:p>
          </table:table-cell>
          <table:table-cell table:number-columns-repeated="16378"/>
        </table:table-row>
        <table:table-row table:style-name="ro3">
          <table:table-cell/>
          <table:table-cell table:style-name="ce11" office:value-type="string" calcext:value-type="string">
            <text:p>Utilidad Neta</text:p>
          </table:table-cell>
          <table:table-cell table:style-name="ce26" table:formula="of:=[.C70]-[.C71]" office:value-type="float" office:value="-223.95728782172" calcext:value-type="float">
            <text:p>-S/. 224</text:p>
          </table:table-cell>
          <table:table-cell table:style-name="ce33"/>
          <table:table-cell table:style-name="ce26" table:formula="of:=[.E70]-[.E71]" office:value-type="float" office:value="-724.804745448839" calcext:value-type="float">
            <text:p>-S/. 725</text:p>
          </table:table-cell>
          <table:table-cell table:style-name="ce40" table:formula="of:=[.E72]-[.C72]" office:value-type="float" office:value="-500.847457627119" calcext:value-type="float">
            <text:p>-S/. 501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El aumuento <text:s/>de las perdidas enS/.501, se rechazaría el pedido especial</text:p>
          </table:table-cell>
          <table:covered-table-cell table:number-columns-repeated="4" table:style-name="ce27"/>
          <table:table-cell table:number-columns-repeated="16378"/>
        </table:table-row>
      </table:table>
      <table:table table:name="Sheet1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ce83"/>
        <table:table-column table:style-name="co11" table:default-cell-style-name="ce28"/>
        <table:table-column table:style-name="co17" table:default-cell-style-name="ce16"/>
        <table:table-column table:style-name="co17" table:default-cell-style-name="ce85"/>
        <table:table-column table:style-name="co19" table:default-cell-style-name="ce28"/>
        <table:table-column table:style-name="co20" table:default-cell-style-name="ce28"/>
        <table:table-column table:style-name="co17" table:number-columns-repeated="16377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ce80" office:value-type="string" calcext:value-type="string" table:number-columns-spanned="6" table:number-rows-spanned="1">
            <text:p>TABLA DE DEPRECIACIONES Y AMORTIZACIÓN DE INTANGIBLES</text:p>
          </table:table-cell>
          <table:covered-table-cell table:number-columns-repeated="5" table:style-name="ce84"/>
          <table:table-cell table:number-columns-repeated="16377"/>
        </table:table-row>
        <table:table-row table:style-name="ro1">
          <table:table-cell/>
          <table:table-cell table:style-name="ce81"/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table:style-name="ce82" office:value-type="string" calcext:value-type="string">
            <text:p>Activo</text:p>
          </table:table-cell>
          <table:table-cell table:style-name="ce82" office:value-type="string" calcext:value-type="string">
            <text:p>Total</text:p>
          </table:table-cell>
          <table:table-cell table:style-name="ce82" office:value-type="string" calcext:value-type="string">
            <text:p>Vida útil</text:p>
          </table:table-cell>
          <table:table-cell table:style-name="ce82" office:value-type="string" calcext:value-type="string">
            <text:p>Tasa</text:p>
          </table:table-cell>
          <table:table-cell table:style-name="ce82" office:value-type="string" calcext:value-type="string">
            <text:p><text:s/>Depreciación Anual</text:p>
          </table:table-cell>
          <table:table-cell table:style-name="ce82" office:value-type="string" calcext:value-type="string">
            <text:p><text:s/>Depreciación Mensua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quipos</text:p>
          </table:table-cell>
          <table:table-cell table:formula="of:=[$'CASO '.M9]+[$'CASO '.M10]" office:value-type="float" office:value="1527" calcext:value-type="float">
            <text:p>S/.1,527.00</text:p>
          </table:table-cell>
          <table:table-cell office:value-type="float" office:value="10" calcext:value-type="float">
            <text:p>10</text:p>
          </table:table-cell>
          <table:table-cell table:formula="of:=1/[.D6]" office:value-type="float" office:value="0.1" calcext:value-type="float">
            <text:p>0.1</text:p>
          </table:table-cell>
          <table:table-cell table:formula="of:=[.C6]*[.E6]" office:value-type="float" office:value="152.7" calcext:value-type="float">
            <text:p>S/.152.70</text:p>
          </table:table-cell>
          <table:table-cell table:formula="of:=[.F6]/12" office:value-type="float" office:value="12.725" calcext:value-type="float">
            <text:p>S/.12.73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quipo cómputo</text:p>
          </table:table-cell>
          <table:table-cell table:formula="of:=[$'CASO '.M7]+[$'CASO '.M8]" office:value-type="float" office:value="4777" calcext:value-type="float">
            <text:p>S/.4,777.00</text:p>
          </table:table-cell>
          <table:table-cell office:value-type="float" office:value="3" calcext:value-type="float">
            <text:p>3</text:p>
          </table:table-cell>
          <table:table-cell table:formula="of:=1/[.D7]" office:value-type="float" office:value="0.333333333333333" calcext:value-type="float">
            <text:p>0.3</text:p>
          </table:table-cell>
          <table:table-cell table:formula="of:=[.C7]*[.E7]" office:value-type="float" office:value="1592.33333333333" calcext:value-type="float">
            <text:p>S/.1,592.33</text:p>
          </table:table-cell>
          <table:table-cell table:formula="of:=[.F7]/12" office:value-type="float" office:value="132.694444444444" calcext:value-type="float">
            <text:p>S/.132.6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uebles y enseres</text:p>
          </table:table-cell>
          <table:table-cell table:formula="of:=[$'CASO '.M11]" office:value-type="float" office:value="554" calcext:value-type="float">
            <text:p>S/.554.00</text:p>
          </table:table-cell>
          <table:table-cell office:value-type="float" office:value="10" calcext:value-type="float">
            <text:p>10</text:p>
          </table:table-cell>
          <table:table-cell table:formula="of:=1/[.D8]" office:value-type="float" office:value="0.1" calcext:value-type="float">
            <text:p>0.1</text:p>
          </table:table-cell>
          <table:table-cell table:formula="of:=[.C8]*[.E8]" office:value-type="float" office:value="55.4" calcext:value-type="float">
            <text:p>S/.55.40</text:p>
          </table:table-cell>
          <table:table-cell table:formula="of:=[.F8]/12" office:value-type="float" office:value="4.61666666666667" calcext:value-type="float">
            <text:p>S/.4.62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hículos</text:p>
          </table:table-cell>
          <table:table-cell table:formula="of:=[$'CASO '.M20]" office:value-type="float" office:value="3400" calcext:value-type="float">
            <text:p>S/.3,400.00</text:p>
          </table:table-cell>
          <table:table-cell office:value-type="float" office:value="5" calcext:value-type="float">
            <text:p>5</text:p>
          </table:table-cell>
          <table:table-cell table:formula="of:=1/[.D9]" office:value-type="float" office:value="0.2" calcext:value-type="float">
            <text:p>0.2</text:p>
          </table:table-cell>
          <table:table-cell table:formula="of:=[.C9]*[.E9]" office:value-type="float" office:value="680" calcext:value-type="float">
            <text:p>S/.680.00</text:p>
          </table:table-cell>
          <table:table-cell table:formula="of:=[.F9]/12" office:value-type="float" office:value="56.6666666666667" calcext:value-type="float">
            <text:p>S/.56.67</text:p>
          </table:table-cell>
          <table:table-cell table:number-columns-repeated="16377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19" table:number-columns-repeated="4"/>
          <table:table-cell table:style-name="ce35" table:formula="of:=SUM([.G6:.G9])" office:value-type="float" office:value="206.702777777778" calcext:value-type="float">
            <text:p>S/.206.70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S/.</number:text>
      <number:number number:decimal-places="2" number:min-decimal-places="2" number:min-integer-digits="1" number:grouping="true"/>
    </number:number-style>
    <number:number-style style:name="N134">
      <number:text>S/.</number:text>
      <number:number number:decimal-places="0" number:min-decimal-places="0" number:min-integer-digits="1" number:grouping="true"/>
    </number:number-style>
    <number:number-style style:name="N135">
      <number:text>S/. </number:text>
      <number:number number:decimal-places="0" number:min-decimal-places="0" number:min-integer-digits="1" number:grouping="true"/>
    </number:number-style>
    <number:number-style style:name="N136">
      <number:text>S/. </number:text>
      <number:number number:decimal-places="2" number:min-decimal-places="2" number:min-integer-digits="1" number:grouping="true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O_20_" style:display-name="PageStyle_CASO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EDISON ACHALMA</dc:creator>
    <meta:creation-date>2020-11-17T15:39:52</meta:creation-date>
    <dc:date>2021-05-08T18:34:15</dc:date>
    <meta:generator>LibreOffice/24.2.4.2$Linux_X86_64 LibreOffice_project/420$Build-2</meta:generator>
    <meta:document-statistic meta:table-count="2" meta:cell-count="350" meta:object-count="0"/>
    <meta:user-defined meta:name="AppVersion">16.0300</meta:user-defined>
  </office:meta>
</office:document-meta>
</file>