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D00000003C6B66D524.png" manifest:media-type="image/png"/>
  <manifest:file-entry manifest:full-path="Pictures/10000000000000DE0000003DE531F8D3.png" manifest:media-type="image/png"/>
  <manifest:file-entry manifest:full-path="Pictures/10000000000000630000001E66F0A090.png" manifest:media-type="image/png"/>
  <manifest:file-entry manifest:full-path="Pictures/100000000000008200000021FC2FFA00.png" manifest:media-type="image/png"/>
  <manifest:file-entry manifest:full-path="Pictures/100000000000005B000000210354FE89.png" manifest:media-type="image/png"/>
  <manifest:file-entry manifest:full-path="Pictures/100000000000006F00000020B268EF49.png" manifest:media-type="image/png"/>
  <manifest:file-entry manifest:full-path="Pictures/10000000000000540000001E92954559.png" manifest:media-type="image/png"/>
  <manifest:file-entry manifest:full-path="Pictures/1000000000000160000000B4F34907E9.png" manifest:media-type="image/png"/>
  <manifest:file-entry manifest:full-path="Pictures/100000000000013D000001ACFB88F9B7.png" manifest:media-type="image/png"/>
  <manifest:file-entry manifest:full-path="Pictures/1000000000000044000000216EAE50BE.png" manifest:media-type="image/png"/>
  <manifest:file-entry manifest:full-path="Pictures/10000000000000470000002144B376DF.png" manifest:media-type="image/png"/>
  <manifest:file-entry manifest:full-path="Pictures/10000000000000380000002ACF5C8D74.png" manifest:media-type="image/png"/>
  <manifest:file-entry manifest:full-path="Pictures/100000000000001B000000191822BC8B.png" manifest:media-type="image/png"/>
  <manifest:file-entry manifest:full-path="Pictures/100000000000003C0000001F5EAF6B81.png" manifest:media-type="image/png"/>
  <manifest:file-entry manifest:full-path="Pictures/100000000000004600000025A23D9507.png" manifest:media-type="image/png"/>
  <manifest:file-entry manifest:full-path="Pictures/10000000000001BD000001CBA60D0C60.png" manifest:media-type="image/png"/>
  <manifest:file-entry manifest:full-path="Pictures/100000000000003B0000001E13318B9A.png" manifest:media-type="image/png"/>
  <manifest:file-entry manifest:full-path="Pictures/100000000000006F000000207E6605CE.png" manifest:media-type="image/png"/>
  <manifest:file-entry manifest:full-path="Pictures/100000000000004200000020DF28FCCF.png" manifest:media-type="image/png"/>
  <manifest:file-entry manifest:full-path="Pictures/10000000000001520000014016110AE2.png" manifest:media-type="image/png"/>
  <manifest:file-entry manifest:full-path="Pictures/10000000000000300000002DC951C963.png" manifest:media-type="image/png"/>
  <manifest:file-entry manifest:full-path="Pictures/10000000000000420000001F3F314825.png" manifest:media-type="image/png"/>
  <manifest:file-entry manifest:full-path="Pictures/100000000000009600000028D6ED30E8.png" manifest:media-type="image/png"/>
  <manifest:file-entry manifest:full-path="Pictures/100000000000002B000000165114F7F6.png" manifest:media-type="image/png"/>
  <manifest:file-entry manifest:full-path="Pictures/10000001000000100000002470E40554.png" manifest:media-type="image/png"/>
  <manifest:file-entry manifest:full-path="Pictures/10000000000000670000001B6B290AE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0.559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1.762cm"/>
    </style:style>
    <style:style style:name="co17" style:family="table-column">
      <style:table-column-properties fo:break-before="auto" style:column-width="1.845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3.581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1.706cm"/>
    </style:style>
    <style:style style:name="co22" style:family="table-column">
      <style:table-column-properties fo:break-before="auto" style:column-width="1.453cm"/>
    </style:style>
    <style:style style:name="co23" style:family="table-column">
      <style:table-column-properties fo:break-before="auto" style:column-width="2.0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Alter_20_Sin_20_Py">
      <style:table-properties table:display="true" style:writing-mode="lr-tb"/>
    </style:style>
    <style:style style:name="ta2" style:family="table" style:master-page-name="PageStyle_5f_costo_20_capital">
      <style:table-properties table:display="true" style:writing-mode="lr-tb"/>
    </style:style>
    <style:style style:name="ta3" style:family="table" style:master-page-name="PageStyle_5f_Alter_20_Con_20_p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e1eac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Millares_20_2" style:data-style-name="N134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Millares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20_2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Normal_20_2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Normal_20_2" style:data-style-name="N141">
      <style:table-cell-properties fo:border-bottom="1.76pt solid #000000" fo:background-color="#e1eacd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Normal_20_2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</style:style>
    <style:style style:name="ce36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Normal_20_2" style:data-style-name="N141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Normal_20_2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Normal_20_2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 style:data-style-name="N14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 style:data-style-name="N14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141">
      <style:table-cell-properties fo:border-bottom="1.76pt solid #000000" fo:background-color="#e1eacd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fo:background-color="#e1ea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20_2" style:data-style-name="N13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Normal_20_2" style:data-style-name="N141">
      <style:table-cell-properties fo:background-color="#e1eac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0" style:family="table-cell" style:parent-style-name="Default">
      <style:table-cell-properties fo:background-color="#dbeef4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1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3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7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8" style:family="table-cell" style:parent-style-name="Default" style:data-style-name="N11">
      <style:table-cell-properties style:rotation-align="none"/>
    </style:style>
    <style:style style:name="ce79" style:family="table-cell" style:parent-style-name="Default" style:data-style-name="N140">
      <style:table-cell-properties style:rotation-align="none"/>
    </style:style>
    <style:style style:name="ce80" style:family="table-cell" style:parent-style-name="Default" style:data-style-name="N11">
      <style:table-cell-properties fo:background-color="#77933c" style:rotation-align="none">
        <loext:background-complex-color loext:theme-type="accent3" loext:color-type="theme">
          <loext:transformation loext:type="lummod" loext:value="7500"/>
        </loext:background-complex-color>
      </style:table-cell-properties>
    </style:style>
    <style:style style:name="ce81" style:family="table-cell" style:parent-style-name="Excel_20_Built-in_20_Percent" style:data-style-name="N11">
      <style:table-cell-properties fo:background-color="#77933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fo:border="none" style:rotation-align="none"/>
    </style:style>
    <style:style style:name="ce84" style:family="table-cell" style:parent-style-name="Default" style:data-style-name="N135">
      <style:table-cell-properties style:rotation-align="none"/>
    </style:style>
    <style:style style:name="ce85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8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 style:data-style-name="N11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90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9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93" style:family="table-cell" style:parent-style-name="Default" style:data-style-name="N2">
      <style:table-cell-properties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Normal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d7e4bd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14" style:family="table-cell" style:parent-style-name="Default">
      <style:table-cell-properties fo:background-color="#d7e4b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Millares_20_2" style:data-style-name="N134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Normal_20_2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 style:data-style-name="N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Normal_20_2" style:data-style-name="N141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Normal_20_2" style:data-style-name="N133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4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35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4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133" style:family="table-cell" style:parent-style-name="Default" style:data-style-name="N138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Normal_20_2" style:data-style-name="N136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Normal_20_2" style:data-style-name="N136">
      <style:table-cell-properties fo:background-color="#c6d9f1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11">
      <style:table-cell-properties fo:background-color="#c6d9f1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37" style:family="table-cell" style:parent-style-name="Default" style:data-style-name="N3">
      <style:table-cell-properties style:rotation-align="none"/>
    </style:style>
    <style:style style:name="ce138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39" style:family="table-cell" style:parent-style-name="Default" style:data-style-name="N143">
      <style:table-cell-properties style:rotation-align="none"/>
    </style:style>
    <style:style style:name="ce140" style:family="table-cell" style:parent-style-name="Default" style:data-style-name="N4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">
      <style:table-cell-properties fo:background-color="#d7e4bd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42" style:family="table-cell" style:parent-style-name="Normal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4">
      <style:table-cell-properties style:rotation-align="none"/>
    </style:style>
    <style:style style:name="ce145" style:family="table-cell" style:parent-style-name="Default" style:data-style-name="N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14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Normal_20_2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60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1" style:family="table-cell" style:parent-style-name="Default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14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77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6" style:family="table-cell" style:parent-style-name="Default" style:data-style-name="N11">
      <style:table-cell-properties fo:background-color="transparent" style:rotation-align="none"/>
    </style:style>
    <style:style style:name="ce187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3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16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9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7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style:use-window-font-color="true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er Sin 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6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Default"/>
        <table:table-column table:style-name="co8" table:default-cell-style-name="ce4"/>
        <table:table-column table:style-name="co7" table:default-cell-style-name="ce6"/>
        <table:table-column table:style-name="co9" table:default-cell-style-name="ce6"/>
        <table:table-column table:style-name="co1" table:default-cell-style-name="ce6"/>
        <table:table-column table:style-name="co1" table:number-columns-repeated="16373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DAT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Cantidad (vasos de jugo) al mes </text:p>
          </table:table-cell>
          <table:table-cell table:style-name="ce8" office:value-type="string" calcext:value-type="string" table:number-columns-spanned="2" table:number-rows-spanned="1">
            <text:p>CANTIDADES</text:p>
          </table:table-cell>
          <table:covered-table-cell table:style-name="ce8"/>
          <table:table-cell table:style-name="ce46" office:value-type="string" calcext:value-type="string" table:number-columns-spanned="1" table:number-rows-spanned="2">
            <text:p>PRECIO</text:p>
          </table:table-cell>
          <table:table-cell table:style-name="ce46" office:value-type="string" calcext:value-type="string" table:number-columns-spanned="1" table:number-rows-spanned="2">
            <text:p>COSTO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covered-table-cell table:style-name="ce8"/>
          <table:table-cell table:style-name="ce26" office:value-type="string" office:string-value="Actual " calcext:value-type="string">
            <text:p><text:s/>Actual <text:s/></text:p>
          </table:table-cell>
          <table:table-cell table:style-name="ce26" office:value-type="string" office:string-value="Nueva" calcext:value-type="string">
            <text:p><text:s/>Nueva </text:p>
          </table:table-cell>
          <table:covered-table-cell table:number-columns-repeated="2" table:style-name="ce46"/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>
            <text:p>jugo especial</text:p>
          </table:table-cell>
          <table:table-cell table:style-name="ce27" office:value-type="float" office:value="400" calcext:value-type="float">
            <text:p><text:s/>400 </text:p>
          </table:table-cell>
          <table:table-cell table:style-name="ce43" office:value-type="float" office:value="518.4" calcext:value-type="float">
            <text:p>518</text:p>
          </table:table-cell>
          <table:table-cell table:style-name="ce47" office:value-type="float" office:value="4" calcext:value-type="float">
            <text:p><text:s/>4 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>
            <text:p>jugo de pasto de trigo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1.4" calcext:value-type="float">
            <text:p>1.4</text:p>
          </table:table-cell>
          <table:table-cell/>
          <table:table-cell table:style-name="ce7"/>
          <table:table-cell table:style-name="ce68"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>
            <text:p>jugo de toronja 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.6" calcext:value-type="float">
            <text:p>1.6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Horizonte de evaluacion: 4 años</text:p>
          </table:table-cell>
          <table:table-cell table:style-name="ce10" table:number-columns-repeated="2"/>
          <table:table-cell table:style-name="ce4" table:number-columns-repeated="2"/>
          <table:table-cell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1" office:value-type="string" calcext:value-type="string">
            <text:p>Se obtiene el EGP y FCE de opcion <text:s/>de seguir con la maquina actual </text:p>
          </table:table-cell>
          <table:table-cell table:style-name="ce11" table:number-columns-repeated="2"/>
          <table:table-cell table:style-name="ce10" table:number-columns-repeated="3"/>
          <table:table-cell table:style-name="ce4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11" table:number-columns-repeated="3"/>
          <table:table-cell table:style-name="ce10" table:number-columns-repeated="3"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6" table:number-rows-spanned="1">
            <text:p>ESTADO DE GANANCIAS Y PERDIDAS CON EQUIPO ACTUAL</text:p>
          </table:table-cell>
          <table:covered-table-cell table:number-columns-repeated="5" table:style-name="ce28"/>
          <table:table-cell table:style-name="ce63" table:number-columns-repeated="3"/>
          <table:table-cell table:style-name="ce69" table:number-columns-repeated="3"/>
          <table:table-cell table:number-columns-repeated="16370"/>
        </table:table-row>
        <table:table-row table:style-name="ro3">
          <table:table-cell table:style-name="ce2"/>
          <table:table-cell table:style-name="ce5"/>
          <table:table-cell table:style-name="ce13" table:number-columns-repeated="9"/>
          <table:table-cell table:style-name="ce69" table:number-columns-repeated="3"/>
          <table:table-cell table:style-name="ce2" table:number-columns-repeated="16370"/>
        </table:table-row>
        <table:table-row table:style-name="ro1">
          <table:table-cell table:style-name="ce2"/>
          <table:table-cell table:style-name="ce5"/>
          <table:table-cell table:style-name="ce14" office:value-type="string" calcext:value-type="string" table:number-columns-spanned="1" table:number-rows-spanned="2">
            <text:p>DESCRIPCIÓN DE CATEGORÍA</text:p>
          </table:table-cell>
          <table:table-cell table:style-name="ce29" office:value-type="string" calcext:value-type="string" table:number-columns-spanned="4" table:number-rows-spanned="1">
            <text:p>PERIODO (EN AÑOS)</text:p>
          </table:table-cell>
          <table:covered-table-cell table:number-columns-repeated="2" table:style-name="ce44"/>
          <table:covered-table-cell table:style-name="ce49"/>
          <table:table-cell table:style-name="ce56"/>
          <table:table-cell table:style-name="ce64" table:number-columns-repeated="6"/>
          <table:table-cell table:style-name="ce2" table:number-columns-repeated="16370"/>
        </table:table-row>
        <table:table-row table:style-name="ro4">
          <table:table-cell table:number-columns-repeated="2"/>
          <table:covered-table-cell table:style-name="ce15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/>
          <table:table-cell table:style-name="ce65" table:number-columns-repeated="6"/>
          <table:table-cell table:number-columns-repeated="16370"/>
        </table:table-row>
        <table:table-row table:style-name="ro5">
          <table:table-cell table:number-columns-repeated="2"/>
          <table:table-cell office:value-type="string" calcext:value-type="string">
            <text:p>(+) Ventas netas en s/. </text:p>
          </table:table-cell>
          <table:table-cell table:style-name="ce30" table:formula="of:=([.D4]*[.F4]+[.D5]*[.F5]+[.D6]*[.F6])*12" office:value-type="float" office:value="31080" calcext:value-type="float">
            <text:p><text:s/>31,080 </text:p>
          </table:table-cell>
          <table:table-cell table:style-name="ce30" table:formula="of:=+[.D14]" office:value-type="float" office:value="31080" calcext:value-type="float">
            <text:p><text:s/>31,080 </text:p>
          </table:table-cell>
          <table:table-cell table:style-name="ce30" table:formula="of:=+[.E14]" office:value-type="float" office:value="31080" calcext:value-type="float">
            <text:p><text:s/>31,080 </text:p>
          </table:table-cell>
          <table:table-cell table:style-name="ce51" table:formula="of:=+[.F14]" office:value-type="float" office:value="31080" calcext:value-type="float">
            <text:p><text:s/>31,080 </text:p>
          </table:table-cell>
          <table:table-cell table:style-name="ce57"/>
          <table:table-cell table:style-name="ce66"/>
          <table:table-cell table:style-name="ce4" table:number-columns-repeated="2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Costos de ventas </text:p>
          </table:table-cell>
          <table:table-cell table:style-name="ce30" table:formula="of:=([.$D$4]*[.$G$4]+[.$D$5]*[.$G$5]+[.$D$6]*[.$G$6])*12" office:value-type="float" office:value="20880" calcext:value-type="float">
            <text:p><text:s/>20,880 </text:p>
          </table:table-cell>
          <table:table-cell table:style-name="ce30" table:formula="of:=([.$D$4]*[.$G$4]+[.$D$5]*[.$G$5]+[.$D$6]*[.$G$6])*12" office:value-type="float" office:value="20880" calcext:value-type="float">
            <text:p><text:s/>20,880 </text:p>
          </table:table-cell>
          <table:table-cell table:style-name="ce30" table:formula="of:=([.$D$4]*[.$G$4]+[.$D$5]*[.$G$5]+[.$D$6]*[.$G$6])*12" office:value-type="float" office:value="20880" calcext:value-type="float">
            <text:p><text:s/>20,880 </text:p>
          </table:table-cell>
          <table:table-cell table:style-name="ce51" table:formula="of:=([.$D$4]*[.$G$4]+[.$D$5]*[.$G$5]+[.$D$6]*[.$G$6])*12" office:value-type="float" office:value="20880" calcext:value-type="float">
            <text:p><text:s/>20,880 </text:p>
          </table:table-cell>
          <table:table-cell table:style-name="ce57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administrativos (15%)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formula="of:=0.15*[.$D$14]" office:value-type="float" office:value="4662" calcext:value-type="float">
            <text:p><text:s/>4,662 </text:p>
          </table:table-cell>
          <table:table-cell table:style-name="ce52" table:formula="of:=0.15*[.$D$14]" office:value-type="float" office:value="4662" calcext:value-type="float">
            <text:p><text:s/>4,662 </text:p>
          </table:table-cell>
          <table:table-cell table:style-name="ce58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Gastos de Ventas (6%)</text:p>
          </table:table-cell>
          <table:table-cell table:formula="of:=0.06*[.D14]" office:value-type="float" office:value="1864.8" calcext:value-type="float">
            <text:p><text:s/>1,865 </text:p>
          </table:table-cell>
          <table:table-cell table:formula="of:=0.06*[.E14]" office:value-type="float" office:value="1864.8" calcext:value-type="float">
            <text:p><text:s/>1,865 </text:p>
          </table:table-cell>
          <table:table-cell table:formula="of:=0.06*[.F14]" office:value-type="float" office:value="1864.8" calcext:value-type="float">
            <text:p><text:s/>1,865 </text:p>
          </table:table-cell>
          <table:table-cell table:style-name="ce52" table:formula="of:=0.06*[.G14]" office:value-type="float" office:value="1864.8" calcext:value-type="float">
            <text:p><text:s/>1,865 </text:p>
          </table:table-cell>
          <table:table-cell table:style-name="ce58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operativa </text:p>
          </table:table-cell>
          <table:table-cell table:style-name="ce32" table:formula="of:=+[.D14]-([.D15]+[.D16]+[.D17])" office:value-type="float" office:value="3673.2" calcext:value-type="float">
            <text:p><text:s/>3,673 </text:p>
          </table:table-cell>
          <table:table-cell table:style-name="ce32" table:formula="of:=+[.D18]" office:value-type="float" office:value="3673.2" calcext:value-type="float">
            <text:p><text:s/>3,673 </text:p>
          </table:table-cell>
          <table:table-cell table:style-name="ce32" table:formula="of:=+[.E18]" office:value-type="float" office:value="3673.2" calcext:value-type="float">
            <text:p><text:s/>3,673 </text:p>
          </table:table-cell>
          <table:table-cell table:style-name="ce53" table:formula="of:=+[.F18]" office:value-type="float" office:value="3673.2" calcext:value-type="float">
            <text:p><text:s/>3,673 </text:p>
          </table:table-cell>
          <table:table-cell table:style-name="ce59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intereses 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0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Utilidad imponible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formula="of:=+[.$D$18]" office:value-type="float" office:value="3673.2" calcext:value-type="float">
            <text:p><text:s/>3,673 </text:p>
          </table:table-cell>
          <table:table-cell table:style-name="ce52" table:formula="of:=+[.$D$18]" office:value-type="float" office:value="3673.2" calcext:value-type="float">
            <text:p><text:s/>3,673 </text:p>
          </table:table-cell>
          <table:table-cell table:style-name="ce58"/>
          <table:table-cell table:style-name="ce4" table:number-columns-repeated="3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(-) Impuestos (30%)</text:p>
          </table:table-cell>
          <table:table-cell table:style-name="ce30" table:formula="of:=+[.$D$20]*0.3" office:value-type="float" office:value="1101.96" calcext:value-type="float">
            <text:p><text:s/>1,102 </text:p>
          </table:table-cell>
          <table:table-cell table:style-name="ce30" table:formula="of:=+[.$D$20]*0.3" office:value-type="float" office:value="1101.96" calcext:value-type="float">
            <text:p><text:s/>1,102 </text:p>
          </table:table-cell>
          <table:table-cell table:style-name="ce30" table:formula="of:=+[.$D$20]*0.3" office:value-type="float" office:value="1101.96" calcext:value-type="float">
            <text:p><text:s/>1,102 </text:p>
          </table:table-cell>
          <table:table-cell table:style-name="ce51" table:formula="of:=+[.$D$20]*0.3" office:value-type="float" office:value="1101.96" calcext:value-type="float">
            <text:p><text:s/>1,102 </text:p>
          </table:table-cell>
          <table:table-cell table:style-name="ce57"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7" office:value-type="string" calcext:value-type="string">
            <text:p>Utilidad Neta</text:p>
          </table:table-cell>
          <table:table-cell table:style-name="ce33" table:formula="of:=+[.D20]-[.D21]" office:value-type="float" office:value="2571.24" calcext:value-type="float">
            <text:p><text:s/>2,571 </text:p>
          </table:table-cell>
          <table:table-cell table:style-name="ce33" table:formula="of:=+[.E20]-[.E21]" office:value-type="float" office:value="2571.24" calcext:value-type="float">
            <text:p><text:s/>2,571 </text:p>
          </table:table-cell>
          <table:table-cell table:style-name="ce33" table:formula="of:=+[.F20]-[.F21]" office:value-type="float" office:value="2571.24" calcext:value-type="float">
            <text:p><text:s/>2,571 </text:p>
          </table:table-cell>
          <table:table-cell table:style-name="ce55" table:formula="of:=+[.G20]-[.G21]" office:value-type="float" office:value="2571.24" calcext:value-type="float">
            <text:p><text:s/>2,571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1">
          <table:table-cell table:style-name="ce3"/>
          <table:table-cell table:style-name="ce6"/>
          <table:table-cell table:style-name="ce18"/>
          <table:table-cell table:style-name="ce34"/>
          <table:table-cell table:style-name="ce18" table:number-columns-repeated="4"/>
          <table:table-cell table:number-columns-repeated="3"/>
          <table:table-cell table:style-name="ce3" table:number-columns-repeated="16373"/>
        </table:table-row>
        <table:table-row table:style-name="ro6">
          <table:table-cell table:style-name="ce3"/>
          <table:table-cell table:style-name="ce6"/>
          <table:table-cell table:style-name="ce12" office:value-type="string" calcext:value-type="string" table:number-columns-spanned="6" table:number-rows-spanned="1">
            <text:p>FLUJO DE CAJA ECONÓMICO <text:s/>CON EQUIPO ACTUAL</text:p>
          </table:table-cell>
          <table:covered-table-cell table:number-columns-repeated="5" table:style-name="ce28"/>
          <table:table-cell table:style-name="ce67" table:number-columns-repeated="6"/>
          <table:table-cell table:style-name="ce3" table:number-columns-repeated="16370"/>
        </table:table-row>
        <table:table-row table:style-name="ro2">
          <table:table-cell table:style-name="ce3"/>
          <table:table-cell table:style-name="ce6"/>
          <table:table-cell table:style-name="ce13" table:number-columns-repeated="6"/>
          <table:table-cell table:style-name="ce67" table:number-columns-repeated="6"/>
          <table:table-cell table:style-name="ce3" table:number-columns-repeated="16370"/>
        </table:table-row>
        <table:table-row table:style-name="ro1">
          <table:table-cell table:style-name="ce3"/>
          <table:table-cell table:style-name="ce6"/>
          <table:table-cell table:style-name="ce19" office:value-type="string" calcext:value-type="string" table:number-columns-spanned="1" table:number-rows-spanned="2">
            <text:p>DESCRIPCIÓN DE CATEGORÍA</text:p>
          </table:table-cell>
          <table:table-cell table:style-name="ce23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45"/>
          <table:covered-table-cell table:style-name="ce62"/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covered-table-cell table:style-name="ce1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0" office:value-type="string" calcext:value-type="string">
            <text:p>Ingresos</text:p>
          </table:table-cell>
          <table:table-cell table:style-name="ce35" table:number-columns-repeated="5"/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1" office:value-type="string" calcext:value-type="string">
            <text:p>(+) Ventas netas en s/. </text:p>
          </table:table-cell>
          <table:table-cell table:style-name="ce36"/>
          <table:table-cell table:style-name="ce36" table:formula="of:=[.D14]" office:value-type="float" office:value="31080" calcext:value-type="float">
            <text:p><text:s/>31,080 </text:p>
          </table:table-cell>
          <table:table-cell table:style-name="ce36" table:formula="of:=[.E14]" office:value-type="float" office:value="31080" calcext:value-type="float">
            <text:p><text:s/>31,080 </text:p>
          </table:table-cell>
          <table:table-cell table:style-name="ce36" table:formula="of:=[.F14]" office:value-type="float" office:value="31080" calcext:value-type="float">
            <text:p><text:s/>31,080 </text:p>
          </table:table-cell>
          <table:table-cell table:style-name="ce36" table:formula="of:=[.G14]" office:value-type="float" office:value="31080" calcext:value-type="float">
            <text:p><text:s/>31,08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2" office:value-type="string" calcext:value-type="string">
            <text:p>total de ingresos </text:p>
          </table:table-cell>
          <table:table-cell table:style-name="ce37" office:value-type="float" office:value="0" calcext:value-type="float">
            <text:p><text:s/>- <text:s text:c="2"/></text:p>
          </table:table-cell>
          <table:table-cell table:style-name="ce37" table:formula="of:=+[.E29]" office:value-type="float" office:value="31080" calcext:value-type="float">
            <text:p><text:s/>31,080 </text:p>
          </table:table-cell>
          <table:table-cell table:style-name="ce37" table:formula="of:=+[.F29]" office:value-type="float" office:value="31080" calcext:value-type="float">
            <text:p><text:s/>31,080 </text:p>
          </table:table-cell>
          <table:table-cell table:style-name="ce37" table:formula="of:=+[.G29]" office:value-type="float" office:value="31080" calcext:value-type="float">
            <text:p><text:s/>31,080 </text:p>
          </table:table-cell>
          <table:table-cell table:style-name="ce37" table:formula="of:=+[.H29]" office:value-type="float" office:value="31080" calcext:value-type="float">
            <text:p><text:s/>31,08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2" office:value-type="string" calcext:value-type="string">
            <text:p>Egresos</text:p>
          </table:table-cell>
          <table:table-cell table:style-name="ce37" table:number-columns-repeated="5"/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1" office:value-type="string" calcext:value-type="string">
            <text:p>(-) Costos de ventas</text:p>
          </table:table-cell>
          <table:table-cell table:style-name="ce30"/>
          <table:table-cell table:style-name="ce30" table:formula="of:=[.D15]" office:value-type="float" office:value="20880" calcext:value-type="float">
            <text:p><text:s/>20,880 </text:p>
          </table:table-cell>
          <table:table-cell table:style-name="ce30" table:formula="of:=[.E15]" office:value-type="float" office:value="20880" calcext:value-type="float">
            <text:p><text:s/>20,880 </text:p>
          </table:table-cell>
          <table:table-cell table:style-name="ce30" table:formula="of:=[.F15]" office:value-type="float" office:value="20880" calcext:value-type="float">
            <text:p><text:s/>20,880 </text:p>
          </table:table-cell>
          <table:table-cell table:style-name="ce30" table:formula="of:=[.G15]" office:value-type="float" office:value="20880" calcext:value-type="float">
            <text:p><text:s/>20,880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1" office:value-type="string" calcext:value-type="string">
            <text:p>(-) Gastos administrativos (15%)</text:p>
          </table:table-cell>
          <table:table-cell/>
          <table:table-cell table:formula="of:=[.D16]" office:value-type="float" office:value="4662" calcext:value-type="float">
            <text:p><text:s/>4,662 </text:p>
          </table:table-cell>
          <table:table-cell table:formula="of:=[.E16]" office:value-type="float" office:value="4662" calcext:value-type="float">
            <text:p><text:s/>4,662 </text:p>
          </table:table-cell>
          <table:table-cell table:style-name="ce31" table:formula="of:=[.F16]" office:value-type="float" office:value="4662" calcext:value-type="float">
            <text:p><text:s/>4,662 </text:p>
          </table:table-cell>
          <table:table-cell table:style-name="ce31" table:formula="of:=[.G16]" office:value-type="float" office:value="4662" calcext:value-type="float">
            <text:p><text:s/>4,662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1" office:value-type="string" calcext:value-type="string">
            <text:p>(-) Gastos de ventas 6%)</text:p>
          </table:table-cell>
          <table:table-cell table:formula="of:=0.06*[.D30]" office:value-type="float" office:value="0" calcext:value-type="float">
            <text:p><text:s/>- <text:s text:c="2"/></text:p>
          </table:table-cell>
          <table:table-cell table:formula="of:=0.06*[.E30]" office:value-type="float" office:value="1864.8" calcext:value-type="float">
            <text:p><text:s/>1,865 </text:p>
          </table:table-cell>
          <table:table-cell table:formula="of:=0.06*[.F30]" office:value-type="float" office:value="1864.8" calcext:value-type="float">
            <text:p><text:s/>1,865 </text:p>
          </table:table-cell>
          <table:table-cell table:style-name="ce31" table:formula="of:=0.06*[.G30]" office:value-type="float" office:value="1864.8" calcext:value-type="float">
            <text:p><text:s/>1,865 </text:p>
          </table:table-cell>
          <table:table-cell table:style-name="ce31" table:formula="of:=0.06*[.H30]" office:value-type="float" office:value="1864.8" calcext:value-type="float">
            <text:p><text:s/>1,865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1" office:value-type="string" calcext:value-type="string">
            <text:p>(-) Impuestos </text:p>
          </table:table-cell>
          <table:table-cell/>
          <table:table-cell table:formula="of:=[.D21]" office:value-type="float" office:value="1101.96" calcext:value-type="float">
            <text:p><text:s/>1,102 </text:p>
          </table:table-cell>
          <table:table-cell table:formula="of:=[.E21]" office:value-type="float" office:value="1101.96" calcext:value-type="float">
            <text:p><text:s/>1,102 </text:p>
          </table:table-cell>
          <table:table-cell table:style-name="ce31" table:formula="of:=[.F21]" office:value-type="float" office:value="1101.96" calcext:value-type="float">
            <text:p><text:s/>1,102 </text:p>
          </table:table-cell>
          <table:table-cell table:style-name="ce31" table:formula="of:=[.G21]" office:value-type="float" office:value="1101.96" calcext:value-type="float">
            <text:p><text:s/>1,102 </text:p>
          </table:table-cell>
          <table:table-cell table:number-columns-repeated="3"/>
          <table:table-cell table:style-name="ce3" table:number-columns-repeated="16373"/>
        </table:table-row>
        <table:table-row table:style-name="ro8">
          <table:table-cell table:style-name="ce3"/>
          <table:table-cell table:style-name="ce6"/>
          <table:table-cell table:style-name="ce22" office:value-type="string" calcext:value-type="string">
            <text:p>Total Egresos</text:p>
          </table:table-cell>
          <table:table-cell table:style-name="ce38" table:formula="of:=+([.D32]+[.D33]+[.D34]+[.D35])" office:value-type="float" office:value="0" calcext:value-type="float">
            <text:p><text:s/>- <text:s text:c="2"/></text:p>
          </table:table-cell>
          <table:table-cell table:style-name="ce38" table:formula="of:=+([.E32]+[.E33]+[.E34]+[.E35])" office:value-type="float" office:value="28508.76" calcext:value-type="float">
            <text:p><text:s/>28,509 </text:p>
          </table:table-cell>
          <table:table-cell table:style-name="ce38" table:formula="of:=+([.F32]+[.F33]+[.F34]+[.F35])" office:value-type="float" office:value="28508.76" calcext:value-type="float">
            <text:p><text:s/>28,509 </text:p>
          </table:table-cell>
          <table:table-cell table:style-name="ce38" table:formula="of:=+([.G32]+[.G33]+[.G34]+[.G35])" office:value-type="float" office:value="28508.76" calcext:value-type="float">
            <text:p><text:s/>28,509 </text:p>
          </table:table-cell>
          <table:table-cell table:style-name="ce38" table:formula="of:=+([.H32]+[.H33]+[.H34]+[.H35])" office:value-type="float" office:value="28508.76" calcext:value-type="float">
            <text:p><text:s/>28,509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3" office:value-type="string" calcext:value-type="string">
            <text:p>Flujo de Caja Economico </text:p>
          </table:table-cell>
          <table:table-cell table:style-name="ce39" office:value-type="float" office:value="0" calcext:value-type="float">
            <text:p><text:s/>- <text:s text:c="2"/></text:p>
          </table:table-cell>
          <table:table-cell table:style-name="ce39" table:formula="of:=+([.E30]-[.E36])" office:value-type="float" office:value="2571.24" calcext:value-type="float">
            <text:p><text:s/>2,571 </text:p>
          </table:table-cell>
          <table:table-cell table:style-name="ce39" table:formula="of:=+([.F30]-[.F36])" office:value-type="float" office:value="2571.24" calcext:value-type="float">
            <text:p><text:s/>2,571 </text:p>
          </table:table-cell>
          <table:table-cell table:style-name="ce39" table:formula="of:=+([.G30]-[.G36])" office:value-type="float" office:value="2571.24" calcext:value-type="float">
            <text:p><text:s/>2,571 </text:p>
          </table:table-cell>
          <table:table-cell table:style-name="ce39" table:formula="of:=+([.H30]-[.H36])" office:value-type="float" office:value="2571.24" calcext:value-type="float">
            <text:p><text:s/>2,571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4"/>
          <table:table-cell table:style-name="ce40" table:number-columns-repeated="5"/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5" office:value-type="string" calcext:value-type="string">
            <text:p>VANE =</text:p>
          </table:table-cell>
          <table:table-cell table:style-name="ce41" table:formula="of:=NPV([$'costo capital'.J17];[.E37:.H37])" office:value-type="float" office:value="8981.7798519883" calcext:value-type="float">
            <text:p>S/. 8,981.78</text:p>
          </table:table-cell>
          <table:table-cell table:style-name="ce25" table:number-columns-repeated="4"/>
          <table:table-cell table:number-columns-repeated="3"/>
          <table:table-cell table:style-name="ce3" table:number-columns-repeated="1637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 table:number-columns-repeated="2"/>
          <table:table-cell table:style-name="ce42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</table:table>
      <table:table table:name="costo capital" table:style-name="ta2">
        <table:table-column table:style-name="co1" table:number-columns-repeated="5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6368" table:default-cell-style-name="Default"/>
        <table:table-row table:style-name="ro1">
          <table:table-cell table:style-name="ce70" table:number-columns-repeated="16384"/>
        </table:table-row>
        <table:table-row table:style-name="ro1">
          <table:table-cell/>
          <table:table-cell table:style-name="ce7" office:value-type="string" calcext:value-type="string">
            <text:p>Ru : COSTO DE CAPITAL DESAPALANCADO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6" draw:name="13 Imagen" draw:style-name="gr1" draw:text-style-name="P1" svg:width="7.566cm" svg:height="11.323cm" svg:x="0.132cm" svg:y="0.476cm">
              <draw:image xlink:href="Pictures/100000000000013D000001ACFB88F9B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" draw:name="7 Imagen" draw:style-name="gr1" draw:text-style-name="P1" svg:width="1.269cm" svg:height="0.66cm" svg:x="1.323cm" svg:y="0cm">
              <draw:image xlink:href="Pictures/100000000000003C0000001F5EAF6B81.png" xlink:type="simple" xlink:show="embed" xlink:actuate="onLoad" draw:mime-type="image/png">
                <text:p/>
              </draw:image>
            </draw:frame>
          </table:table-cell>
          <table:table-cell table:style-name="ce78" office:value-type="percentage" office:value="0.0366" calcext:value-type="percentage">
            <office:annotation draw:style-name="gr2" draw:text-style-name="P2" svg:width="3.973cm" svg:height="2.571cm" svg:x="17.196cm" svg:y="1.853cm" draw:caption-point-x="-0.407cm" draw:caption-point-y="0.274cm">
              <dc:creator>Edison Achalma Mendoza</dc:creator>
              <dc:date>2024-07-31T03:28:00</dc:date>
              <text:p>Media Aritmética de los Rendimientos Anuales de T.BILLS de EE. UU (serie histórica anual 1928 - 2011).</text:p>
              <text:p/>
            </office:annotation>
            <text:p>3.66 %</text:p>
          </table:table-cell>
          <table:table-cell table:style-name="ce78"/>
          <table:table-cell table:style-name="ce92"/>
          <table:table-cell table:number-columns-repeated="16372"/>
        </table:table-row>
        <table:table-row table:style-name="ro1">
          <table:table-cell table:number-columns-repeated="8"/>
          <table:table-cell>
            <draw:frame draw:z-index="2" draw:name="8 Imagen" draw:style-name="gr1" draw:text-style-name="P1" svg:width="1.587cm" svg:height="0.766cm" svg:x="1.032cm" svg:y="0.397cm">
              <draw:image xlink:href="Pictures/1000000000000044000000216EAE50BE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78" table:formula="of:=['file://7C3DF6E2/Copia%20de%20_EVALUACI%C3%93N.xls'#$Rm.M23]" office:value-type="percentage" office:value="0.0752224471232155" calcext:value-type="percentage">
            <office:annotation draw:style-name="gr3" draw:text-style-name="P2" svg:width="5.402cm" svg:height="3.361cm" svg:x="17.196cm" svg:y="2.911cm" draw:caption-point-x="-0.407cm" draw:caption-point-y="0.274cm">
              <dc:creator>Edison Achalma Mendoza</dc:creator>
              <dc:date>2024-07-31T03:28:00</dc:date>
              <text:p>Promedio de Rendimiento de la Cartera de Mercado <text:s/>anual (Serie histórica de 03/01/2050 a 03/01/2011), no se tomó en cuenta el año 2012 porque se dispone toda la data para el año 2012.</text:p>
              <text:p/>
            </office:annotation>
            <text:p>7.52 %</text:p>
          </table:table-cell>
          <table:table-cell/>
          <table:table-cell table:style-name="ce92"/>
          <table:table-cell table:number-columns-repeated="16372"/>
        </table:table-row>
        <table:table-row table:style-name="ro1">
          <table:table-cell table:number-columns-repeated="8"/>
          <table:table-cell>
            <draw:frame draw:z-index="3" draw:name="9 Imagen" draw:style-name="gr1" draw:text-style-name="P1" svg:width="1.791cm" svg:height="0.767cm" svg:x="1.005cm" svg:y="0.503cm">
              <draw:image xlink:href="Pictures/10000000000000470000002144B376D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78" office:value-type="percentage" office:value="0.023" calcext:value-type="percentage">
            <office:annotation draw:style-name="gr4" draw:text-style-name="P2" svg:width="4.449cm" svg:height="3.174cm" svg:x="17.196cm" svg:y="3.969cm" draw:caption-point-x="-0.407cm" draw:caption-point-y="0.274cm">
              <dc:creator>Edison Achalma Mendoza</dc:creator>
              <dc:date>2024-07-31T03:28:00</dc:date>
              <text:p>Riesgo País promedio del Perú, a partir de la serie histórica de 10 años recientes (08/10/2002 - 08/10/2012). El 2.30% corresponde a 230.23 Puntos Básicos.</text:p>
            </office:annotation>
            <text:p>2.30 %</text:p>
          </table:table-cell>
          <table:table-cell/>
          <table:table-cell table:style-name="ce92"/>
          <table:table-cell table:number-columns-repeated="16372"/>
        </table:table-row>
        <table:table-row table:style-name="ro1">
          <table:table-cell table:number-columns-repeated="8"/>
          <table:table-cell>
            <draw:frame draw:z-index="4" draw:name="10 Imagen" draw:style-name="gr1" draw:text-style-name="P1" svg:width="1.375cm" svg:height="0.713cm" svg:x="1.191cm" svg:y="0.45cm">
              <draw:image xlink:href="Pictures/100000000000004600000025A23D9507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79" office:value-type="float" office:value="0.74" calcext:value-type="float">
            <text:p>0.740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6 Imagen" draw:style-name="gr1" draw:text-style-name="P1" svg:width="1.295cm" svg:height="0.66cm" svg:x="1.323cm" svg:y="0.476cm">
              <draw:image xlink:href="Pictures/100000000000003B0000001E13318B9A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0" table:formula="of:=[.J5]+[.J11]*([.J7]-[.J5])+[.J9]" office:value-type="percentage" office:value="0.0881806108711795" calcext:value-type="percentage">
            <text:p>8.82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>
            <draw:frame draw:z-index="5" draw:name="12 Imagen" draw:style-name="gr1" draw:text-style-name="P1" svg:width="3.182cm" svg:height="0.66cm" svg:x="0.45cm" svg:y="0.45cm">
              <draw:image xlink:href="Pictures/100000000000006F000000207E6605CE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number-columns-repeated="9"/>
          <table:table-cell table:style-name="ce81" table:formula="of:=((1+[.J14])/(1+[$'Alter Con py'.J35])-1)" office:value-type="percentage" office:value="0.0564860299720187" calcext:value-type="percentage">
            <text:p>5.65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8"/>
          <table:table-cell table:style-name="ce73" office:value-type="string" calcext:value-type="string" table:number-columns-spanned="3" table:number-rows-spanned="1">
            <text:p>COK Desapalancado, Ru</text:p>
          </table:table-cell>
          <table:covered-table-cell table:style-name="ce82"/>
          <table:covered-table-cell table:style-name="ce85"/>
          <table:table-cell table:style-name="ce2"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BetaApalancado</text:p>
          </table:table-cell>
          <table:table-cell table:style-name="ce83"/>
          <table:table-cell table:style-name="ce86" office:value-type="float" office:value="0.91" calcext:value-type="float">
            <text:p>0.91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D/E de USA</text:p>
          </table:table-cell>
          <table:table-cell table:style-name="ce83"/>
          <table:table-cell table:style-name="ce87" table:formula="of:=+[.M32]" office:value-type="float" office:value="1.75438596491228" calcext:value-type="float">
            <text:p>1.75</text:p>
          </table:table-cell>
          <table:table-cell/>
          <table:table-cell table:style-name="ce68"/>
          <table:table-cell table:number-columns-repeated="16371"/>
        </table:table-row>
        <table:table-row table:style-name="ro1">
          <table:table-cell table:number-columns-repeated="8"/>
          <table:table-cell table:style-name="ce74" office:value-type="string" calcext:value-type="string">
            <text:p>Tasa impositiva</text:p>
          </table:table-cell>
          <table:table-cell table:style-name="ce83"/>
          <table:table-cell table:style-name="ce86" office:value-type="float" office:value="0.1" calcext:value-type="float">
            <text:p>0.1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Beta Desapalancado</text:p>
          </table:table-cell>
          <table:table-cell table:style-name="ce83"/>
          <table:table-cell table:style-name="ce86" office:value-type="float" office:value="0.74" calcext:value-type="float">
            <text:p>0.74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Rf</text:p>
          </table:table-cell>
          <table:table-cell table:style-name="ce83"/>
          <table:table-cell table:style-name="ce88" table:formula="of:=+[.J5]" office:value-type="percentage" office:value="0.0366" calcext:value-type="percentage">
            <text:p>3.66 %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Rm</text:p>
          </table:table-cell>
          <table:table-cell table:style-name="ce83"/>
          <table:table-cell table:style-name="ce88" table:formula="of:=+[.J7]" office:value-type="percentage" office:value="0.0752224471232155" calcext:value-type="percentage">
            <text:p>7.52 %</text:p>
          </table:table-cell>
          <table:table-cell table:number-columns-repeated="16373"/>
        </table:table-row>
        <table:table-row table:style-name="ro1">
          <table:table-cell/>
          <table:table-cell table:style-name="ce71" office:value-type="string" calcext:value-type="string">
            <text:p>Re : COSTO DE CAPITAL REAPALANCADO</text:p>
          </table:table-cell>
          <table:table-cell table:style-name="ce71" table:number-columns-repeated="6"/>
          <table:table-cell table:style-name="ce75" office:value-type="string" calcext:value-type="string">
            <text:p>Rp</text:p>
          </table:table-cell>
          <table:table-cell table:style-name="ce3"/>
          <table:table-cell table:style-name="ce89" table:formula="of:=+[.J9]" office:value-type="percentage" office:value="0.023" calcext:value-type="percentage">
            <text:p>2.30 %</text:p>
          </table:table-cell>
          <table:table-cell table:number-columns-repeated="16373"/>
        </table:table-row>
        <table:table-row table:style-name="ro1">
          <table:table-cell/>
          <table:table-cell>
            <draw:frame draw:z-index="7" draw:name="14 Imagen" draw:style-name="gr1" draw:text-style-name="P1" svg:width="7.963cm" svg:height="5.688cm" svg:x="0.318cm" svg:y="0.423cm">
              <draw:image xlink:href="Pictures/10000000000001520000014016110AE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74"/>
          <table:table-cell table:style-name="ce83"/>
          <table:table-cell table:style-name="ce86"/>
          <table:table-cell table:number-columns-repeated="16373"/>
        </table:table-row>
        <table:table-row table:style-name="ro1">
          <table:table-cell table:number-columns-repeated="8"/>
          <table:table-cell table:style-name="ce74" office:value-type="string" calcext:value-type="string">
            <text:p>Ru=COK desapalancado= Rf+BD (Rm-Rf)+Rp</text:p>
          </table:table-cell>
          <table:table-cell table:style-name="ce83"/>
          <table:table-cell table:style-name="ce86"/>
          <table:table-cell table:number-columns-repeated="16373"/>
        </table:table-row>
        <table:table-row table:style-name="ro1">
          <table:table-cell table:number-columns-repeated="8"/>
          <table:table-cell table:style-name="ce76" office:value-type="string" calcext:value-type="string" table:number-columns-spanned="2" table:number-rows-spanned="1">
            <text:p>Ru</text:p>
          </table:table-cell>
          <table:covered-table-cell table:style-name="ce76"/>
          <table:table-cell table:style-name="ce90" table:formula="of:=+[.K30]" office:value-type="float" office:value="0.0881806108711795" calcext:value-type="float">
            <text:p><text:s/>0.0882 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7" office:value-type="string" calcext:value-type="string" table:number-columns-spanned="2" table:number-rows-spanned="1">
            <text:p>% Ru</text:p>
          </table:table-cell>
          <table:covered-table-cell table:style-name="ce77"/>
          <table:table-cell table:style-name="ce91" table:formula="of:=+[.J14]" office:value-type="percentage" office:value="0.0881806108711795" calcext:value-type="percentage">
            <text:p>8.82 %</text:p>
          </table:table-cell>
          <table:table-cell table:number-columns-repeated="16373"/>
        </table:table-row>
        <table:table-row table:style-name="ro1">
          <table:table-cell table:number-columns-repeated="8"/>
          <table:table-cell>
            <draw:frame draw:z-index="8" draw:name="15 Imagen" draw:style-name="gr1" draw:text-style-name="P1" svg:width="1.295cm" svg:height="0.82cm" svg:x="0.82cm" svg:y="0.318cm">
              <draw:image xlink:href="Pictures/10000000000000420000001F3F314825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costo capital'.L33" table:end-x="1.613cm" table:end-y="0.343cm" draw:z-index="9" draw:name="16 Imagen" draw:style-name="gr1" draw:text-style-name="P1" svg:width="0.422cm" svg:height="0.951cm" svg:x="1.191cm" svg:y="0.45cm">
              <draw:image xlink:href="Pictures/10000001000000100000002470E40554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79" table:formula="of:=[.J11]*(1+(1-[.M34])*([.M32]))" office:value-type="float" office:value="1.64877192982456" calcext:value-type="float">
            <text:p>1.6488</text:p>
          </table:table-cell>
          <table:table-cell table:style-name="ce68" office:value-type="string" calcext:value-type="string">
            <text:p>Con</text:p>
          </table:table-cell>
          <table:table-cell table:style-name="ce68" office:value-type="string" calcext:value-type="string">
            <text:p>=</text:p>
          </table:table-cell>
          <table:table-cell table:style-name="ce93" table:formula="of:=-[$'Alter Con py'.C70]/[$'Alter Con py'.C75]" office:value-type="float" office:value="1.75438596491228" calcext:value-type="float">
            <text:p>1.75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1" draw:name="18 Imagen" draw:style-name="gr1" draw:text-style-name="P1" svg:width="1.428cm" svg:height="0.845cm" svg:x="0.688cm" svg:y="0.265cm">
              <draw:image xlink:href="Pictures/100000000000004200000020DF28FCC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1" table:formula="of:=[.J5]+[.J32]*([.J7]-[.J5])+[.J9]" office:value-type="percentage" office:value="0.123279606677891" calcext:value-type="percentage">
            <text:p>12.33 %</text:p>
          </table:table-cell>
          <table:table-cell office:value-type="string" calcext:value-type="string">
            <text:p>Nominal</text:p>
          </table:table-cell>
          <table:table-cell>
            <draw:frame draw:z-index="10" draw:name="17 Imagen" draw:style-name="gr1" draw:text-style-name="P1" svg:width="1.11cm" svg:height="0.581cm" svg:x="1.005cm" svg:y="0.053cm">
              <draw:image xlink:href="Pictures/100000000000002B000000165114F7F6.png" xlink:type="simple" xlink:show="embed" xlink:actuate="onLoad" draw:mime-type="image/png">
                <text:p/>
              </draw:image>
            </draw:frame>
          </table:table-cell>
          <table:table-cell table:style-name="ce42" office:value-type="percentage" office:value="0.3" calcext:value-type="percentage">
            <text:p>30 %</text:p>
          </table:table-cell>
          <table:table-cell table:number-columns-repeated="16371"/>
        </table:table-row>
        <table:table-row table:style-name="ro1">
          <table:table-cell table:number-columns-repeated="7"/>
          <table:table-cell>
            <draw:frame draw:z-index="12" draw:name="19 Imagen" draw:style-name="gr1" draw:text-style-name="P1" svg:width="3.277cm" svg:height="0.713cm" svg:x="0.238cm" svg:y="0.423cm">
              <draw:image xlink:href="Pictures/10000000000000670000001B6B290AEF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9"/>
          <table:table-cell table:style-name="ce81" table:formula="of:=((1+[.J34])/(1+[$'Alter Con py'.J35])-1)" office:value-type="percentage" office:value="0.0905627249299914" calcext:value-type="percentage">
            <text:p>9.06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/>
          <table:table-cell table:style-name="ce71" office:value-type="string" calcext:value-type="string">
            <text:p>WACCA: COSTO PROMEDIO PONDERADO DE CAPITAL</text:p>
          </table:table-cell>
          <table:table-cell table:style-name="ce72" table:number-columns-repeated="8"/>
          <table:table-cell table:style-name="ce2" table:number-columns-repeated="16374"/>
        </table:table-row>
        <table:table-row table:style-name="ro1">
          <table:table-cell/>
          <table:table-cell>
            <draw:frame draw:z-index="13" draw:name="21 Imagen" draw:style-name="gr1" draw:text-style-name="P1" svg:width="8.069cm" svg:height="4.761cm" svg:x="0.265cm" svg:y="0.37cm">
              <draw:image xlink:href="Pictures/1000000000000160000000B4F34907E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5" draw:name="24 Imagen" draw:style-name="gr1" draw:text-style-name="P1" svg:width="1.692cm" svg:height="0.792cm" svg:x="0.635cm" svg:y="0.45cm">
              <draw:image xlink:href="Pictures/10000000000000540000001E9295455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9" draw:name="28 Imagen" draw:style-name="gr1" draw:text-style-name="P1" svg:width="0.713cm" svg:height="0.66cm" svg:x="0.37cm" svg:y="0.397cm">
              <draw:image xlink:href="Pictures/100000000000001B000000191822BC8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80" table:formula="of:=+[$'Alter Con py'.J32]" office:value-type="percentage" office:value="0.1539" calcext:value-type="percentage">
            <text:p>15.39 %</text:p>
          </table:table-cell>
          <table:table-cell/>
          <table:table-cell table:style-name="ce68" office:value-type="string" calcext:value-type="string">
            <text:p>Real=</text:p>
          </table:table-cell>
          <table:table-cell table:style-name="ce81" table:formula="of:=((1+[.J41])/(1+[$'Alter Con py'.J35]))-1" office:value-type="percentage" office:value="0.120291262135922" calcext:value-type="percentage">
            <text:p>12.03 %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6" draw:name="25 Imagen" draw:style-name="gr1" draw:text-style-name="P1" svg:width="0.952cm" svg:height="1.111cm" svg:x="1.376cm" svg:y="0.318cm">
              <draw:image xlink:href="Pictures/10000000000000380000002ACF5C8D74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4" table:formula="of:=[$'Alter Con py'.C75]/[$'Alter Con py'.C68]" office:value-type="float" office:value="0.363057324840764" calcext:value-type="float">
            <text:p>0.4</text:p>
          </table:table-cell>
          <table:table-cell table:number-columns-repeated="16374"/>
        </table:table-row>
        <table:table-row table:style-name="ro1">
          <table:table-cell table:number-columns-repeated="8"/>
          <table:table-cell>
            <draw:frame draw:z-index="17" draw:name="26 Imagen" draw:style-name="gr1" draw:text-style-name="P1" svg:width="0.74cm" svg:height="1.189cm" svg:x="1.614cm" svg:y="0.265cm">
              <draw:image xlink:href="Pictures/10000000000000300000002DC951C963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4" table:formula="of:=-[$'Alter Con py'.C70]/[$'Alter Con py'.C68]" office:value-type="float" office:value="0.636942675159236" calcext:value-type="float">
            <text:p>0.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4" draw:name="22 Imagen" draw:style-name="gr1" draw:text-style-name="P1" svg:width="1.825cm" svg:height="0.845cm" svg:x="0.741cm" svg:y="0.503cm">
              <draw:image xlink:href="Pictures/100000000000005B000000210354FE89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1" table:formula="of:=[.J43]*[.J34]+[.J45]*[.J41]*(1-[.M34])" office:value-type="percentage" office:value="0.113375398602801" calcext:value-type="percentage">
            <text:p>11.34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18" draw:name="27 Imagen" draw:style-name="gr1" draw:text-style-name="P1" svg:width="4.005cm" svg:height="0.872cm" svg:x="2.064cm" svg:y="0.37cm">
              <draw:image xlink:href="Pictures/100000000000008200000021FC2FFA0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9"/>
          <table:table-cell table:style-name="ce81" table:formula="of:=((1+[.J48])/(1+[$'Alter Con py'.J35]))-1" office:value-type="percentage" office:value="0.0809469889347585" calcext:value-type="percentage">
            <text:p>8.09 %</text:p>
          </table:table-cell>
          <table:table-cell table:number-columns-repeated="16374"/>
        </table:table-row>
      </table:table>
      <table:table table:name="Alter Con py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Información para la Situación Con Proyecto</text:p>
          </table:table-cell>
          <table:table-cell table:style-name="ce4" table:number-columns-repeated="6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Alternativa B:<text:span text:style-name="T1"> Producir con los equipos nuevos </text:span></text:p>
          </table:table-cell>
          <table:table-cell table:style-name="ce10" table:number-columns-repeated="2"/>
          <table:table-cell table:style-name="ce4" table:number-columns-repeated="4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DATOS:</text:p>
          </table:table-cell>
          <table:table-cell table:style-name="ce10" table:number-columns-repeated="2"/>
          <table:table-cell table:style-name="ce4" table:number-columns-repeated="4"/>
          <table:table-cell table:number-columns-repeated="16376"/>
        </table:table-row>
        <table:table-row table:style-name="ro5">
          <table:table-cell table:number-columns-repeated="6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95" office:value-type="string" calcext:value-type="string" table:number-columns-spanned="1" table:number-rows-spanned="2">
            <text:p>Cantidad (vasos de jugo) al mes </text:p>
          </table:table-cell>
          <table:table-cell table:style-name="ce95" office:value-type="string" calcext:value-type="string" table:number-columns-spanned="2" table:number-rows-spanned="1">
            <text:p>CANTIDADES</text:p>
          </table:table-cell>
          <table:covered-table-cell table:style-name="ce95"/>
          <table:table-cell table:style-name="ce148" office:value-type="string" calcext:value-type="string" table:number-columns-spanned="1" table:number-rows-spanned="2">
            <text:p>PRECIO</text:p>
          </table:table-cell>
          <table:table-cell table:style-name="ce148" office:value-type="string" calcext:value-type="string" table:number-columns-spanned="1" table:number-rows-spanned="2">
            <text:p>COSTO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covered-table-cell table:style-name="ce95"/>
          <table:table-cell table:style-name="ce116" office:value-type="string" office:string-value="Actual " calcext:value-type="string">
            <text:p><text:s/>Actual <text:s/></text:p>
          </table:table-cell>
          <table:table-cell table:style-name="ce116" office:value-type="string" office:string-value="Nueva" calcext:value-type="string">
            <text:p><text:s/>Nueva </text:p>
          </table:table-cell>
          <table:covered-table-cell table:number-columns-repeated="2" table:style-name="ce148"/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jugo especial</text:p>
          </table:table-cell>
          <table:table-cell table:style-name="ce27" office:value-type="float" office:value="400" calcext:value-type="float">
            <text:p><text:s/>400 </text:p>
          </table:table-cell>
          <table:table-cell table:style-name="ce43" office:value-type="float" office:value="518.4" calcext:value-type="float">
            <text:p>518</text:p>
          </table:table-cell>
          <table:table-cell table:style-name="ce47" office:value-type="float" office:value="4" calcext:value-type="float">
            <text:p><text:s/>4 </text:p>
          </table:table-cell>
          <table:table-cell table:style-name="ce48" office:value-type="float" office:value="3" calcext:value-type="float">
            <text:p>3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9" office:value-type="string" calcext:value-type="string">
            <text:p>jugo de pasto de trigo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1.4" calcext:value-type="float">
            <text:p>1.4</text:p>
          </table:table-cell>
          <table:table-cell table:style-name="ce6" table:number-columns-repeated="2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9" office:value-type="string" calcext:value-type="string">
            <text:p>jugo de toronja 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.6" calcext:value-type="float">
            <text:p>1.6</text:p>
          </table:table-cell>
          <table:table-cell table:style-name="ce96"/>
          <table:table-cell table:style-name="ce153"/>
          <table:table-cell table:style-name="ce3"/>
          <table:table-cell table:number-columns-repeated="16375"/>
        </table:table-row>
        <table:table-row table:style-name="ro5" table:visibility="collapse">
          <table:table-cell/>
          <table:table-cell table:style-name="ce96"/>
          <table:table-cell table:style-name="ce117" table:number-columns-repeated="2"/>
          <table:table-cell table:style-name="ce6" table:number-columns-repeated="3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jugo de pasto de trigo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1.4" calcext:value-type="float">
            <text:p>1.4</text:p>
          </table:table-cell>
          <table:table-cell table:style-name="ce6"/>
          <table:table-cell table:style-name="ce3" table:number-columns-repeated="2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jugo de toronja </text:p>
          </table:table-cell>
          <table:table-cell table:style-name="ce27" office:value-type="float" office:value="180" calcext:value-type="float">
            <text:p><text:s/>180 </text:p>
          </table:table-cell>
          <table:table-cell table:style-name="ce43" office:value-type="float" office:value="230.4" calcext:value-type="float">
            <text:p>23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.6" calcext:value-type="float">
            <text:p>1.6</text:p>
          </table:table-cell>
          <table:table-cell table:style-name="ce6"/>
          <table:table-cell table:style-name="ce154"/>
          <table:table-cell table:style-name="ce3"/>
          <table:table-cell table:number-columns-repeated="16375"/>
        </table:table-row>
        <table:table-row table:style-name="ro1">
          <table:table-cell/>
          <table:table-cell table:style-name="ce18" table:number-columns-repeated="3"/>
          <table:table-cell table:style-name="ce6" table:number-columns-repeated="3"/>
          <table:table-cell table:style-name="ce154"/>
          <table:table-cell table:style-name="ce3"/>
          <table:table-cell table:number-columns-repeated="16375"/>
        </table:table-row>
        <table:table-row table:style-name="ro1">
          <table:table-cell table:number-columns-repeated="10"/>
          <table:table-cell table:style-name="ce173" table:number-columns-spanned="7" table:number-rows-spanned="1"/>
          <table:covered-table-cell table:number-columns-repeated="6" table:style-name="ce173"/>
          <table:table-cell table:number-columns-repeated="16367"/>
        </table:table-row>
        <table:table-row table:style-name="ro1">
          <table:table-cell/>
          <table:table-cell table:style-name="ce97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118"/>
          <table:covered-table-cell table:style-name="ce160"/>
          <table:table-cell/>
          <table:table-cell table:style-name="ce174"/>
          <table:table-cell table:style-name="ce179"/>
          <table:table-cell table:style-name="ce183" table:number-columns-repeated="2"/>
          <table:table-cell table:style-name="ce191" table:number-columns-repeated="3"/>
          <table:table-cell table:number-columns-repeated="16367"/>
        </table:table-row>
        <table:table-row table:style-name="ro9">
          <table:table-cell/>
          <table:table-cell table:style-name="ce98" office:value-type="string" calcext:value-type="string">
            <text:p>Inversión Inicial</text:p>
          </table:table-cell>
          <table:table-cell table:style-name="ce98" office:value-type="string" calcext:value-type="string">
            <text:p>Monto</text:p>
          </table:table-cell>
          <table:table-cell table:style-name="ce142" office:value-type="string" calcext:value-type="string">
            <text:p>Vida util</text:p>
          </table:table-cell>
          <table:table-cell table:style-name="ce149" office:value-type="string" calcext:value-type="string">
            <text:p>tasa de Deprec</text:p>
          </table:table-cell>
          <table:table-cell table:style-name="ce149" office:value-type="string" calcext:value-type="string">
            <text:p>Depreci Anual</text:p>
          </table:table-cell>
          <table:table-cell table:style-name="ce149" office:value-type="string" calcext:value-type="string">
            <text:p>Valor <text:s/>Residual</text:p>
          </table:table-cell>
          <table:table-cell table:style-name="ce149" office:value-type="string" calcext:value-type="string">
            <text:p>Valor Mercado</text:p>
          </table:table-cell>
          <table:table-cell table:style-name="ce149" office:value-type="string" calcext:value-type="string">
            <text:p>Utilidad</text:p>
          </table:table-cell>
          <table:table-cell/>
          <table:table-cell table:style-name="ce175"/>
          <table:table-cell table:style-name="ce180"/>
          <table:table-cell table:style-name="ce184"/>
          <table:table-cell table:style-name="ce190"/>
          <table:table-cell table:style-name="ce192"/>
          <table:table-cell table:style-name="ce194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99" office:value-type="string" calcext:value-type="string">
            <text:p>equipos electrodomesticos</text:p>
          </table:table-cell>
          <table:table-cell table:style-name="ce99" office:value-type="float" office:value="7850" calcext:value-type="float">
            <text:p>7850</text:p>
          </table:table-cell>
          <table:table-cell table:style-name="ce99" office:value-type="float" office:value="4" calcext:value-type="float">
            <text:p>4</text:p>
          </table:table-cell>
          <table:table-cell table:style-name="ce150" table:formula="of:=1/[.D18]" office:value-type="float" office:value="0.25" calcext:value-type="float">
            <text:p>0.25</text:p>
          </table:table-cell>
          <table:table-cell table:style-name="ce151" table:formula="of:=+[.C18]*[.E18]" office:value-type="float" office:value="1962.5" calcext:value-type="float">
            <text:p>1962.5</text:p>
          </table:table-cell>
          <table:table-cell table:style-name="ce151" office:value-type="float" office:value="0" calcext:value-type="float">
            <text:p>0</text:p>
          </table:table-cell>
          <table:table-cell table:style-name="ce151" table:formula="of:=0.2*([.C18]-3000)" office:value-type="float" office:value="970" calcext:value-type="float">
            <text:p>970</text:p>
          </table:table-cell>
          <table:table-cell table:style-name="ce151" table:formula="of:=+[.H18]" office:value-type="float" office:value="970" calcext:value-type="float">
            <text:p>970</text:p>
          </table:table-cell>
          <table:table-cell/>
          <table:table-cell table:style-name="ce176"/>
          <table:table-cell table:style-name="ce181"/>
          <table:table-cell table:style-name="ce185" table:number-columns-repeated="3"/>
          <table:table-cell table:style-name="ce195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 table:number-columns-repeated="10"/>
          <table:table-cell table:style-name="ce3" table:number-columns-repeated="7"/>
          <table:table-cell table:number-columns-repeated="16367"/>
        </table:table-row>
        <table:table-row table:style-name="ro1">
          <table:table-cell/>
          <table:table-cell table:style-name="ce11" office:value-type="string" calcext:value-type="string">
            <text:p>Se obtiene el EGP y FC de la opcion de maquina nueva y local renovado</text:p>
          </table:table-cell>
          <table:table-cell table:style-name="ce11" table:number-columns-repeated="2"/>
          <table:table-cell table:style-name="ce10" table:number-columns-repeated="3"/>
          <table:table-cell table:number-columns-repeated="16377"/>
        </table:table-row>
        <table:table-row table:style-name="ro1">
          <table:table-cell/>
          <table:table-cell table:style-name="ce10"/>
          <table:table-cell table:style-name="ce11" table:number-columns-repeated="2"/>
          <table:table-cell table:style-name="ce10" table:number-columns-repeated="3"/>
          <table:table-cell table:number-columns-repeated="16377"/>
        </table:table-row>
        <table:table-row table:style-name="ro1">
          <table:table-cell/>
          <table:table-cell table:style-name="ce11" table:number-columns-repeated="3"/>
          <table:table-cell table:style-name="ce10" table:number-columns-repeated="3"/>
          <table:table-cell table:number-columns-repeated="16377"/>
        </table:table-row>
        <table:table-row table:style-name="ro1">
          <table:table-cell/>
          <table:table-cell table:style-name="ce100" office:value-type="string" calcext:value-type="string" table:number-columns-spanned="6" table:number-rows-spanned="1">
            <text:p>ESTADO DE GANANCIAS Y PÉRDIDAS <text:s/>CON EQUIPOS NUEVOS</text:p>
          </table:table-cell>
          <table:covered-table-cell table:number-columns-repeated="5" table:style-name="ce13"/>
          <table:table-cell table:number-columns-repeated="16377"/>
        </table:table-row>
        <table:table-row table:style-name="ro1">
          <table:table-cell/>
          <table:table-cell table:style-name="ce13" table:number-columns-repeated="6"/>
          <table:table-cell table:number-columns-repeated="16377"/>
        </table:table-row>
        <table:table-row table:style-name="ro1">
          <table:table-cell/>
          <table:table-cell table:style-name="ce101" office:value-type="string" calcext:value-type="string" table:number-columns-spanned="1" table:number-rows-spanned="2">
            <text:p>DESCRIPCIÓN DE CATEGORÍA</text:p>
          </table:table-cell>
          <table:table-cell table:style-name="ce119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43"/>
          <table:covered-table-cell table:style-name="ce152"/>
          <table:table-cell table:number-columns-repeated="16377"/>
        </table:table-row>
        <table:table-row table:style-name="ro1">
          <table:table-cell/>
          <table:covered-table-cell table:style-name="ce101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(+) Ventas netas en s/. </text:p>
          </table:table-cell>
          <table:table-cell table:style-name="ce30"/>
          <table:table-cell table:style-name="ce30" table:formula="of:=([.D8]*[.E8]+[.D12]*[.E12]+[.D13]*[.E13])*12" office:value-type="float" office:value="40089.6" calcext:value-type="float">
            <text:p><text:s/>40,090 </text:p>
          </table:table-cell>
          <table:table-cell table:style-name="ce30" table:formula="of:=+[.D27]" office:value-type="float" office:value="40089.6" calcext:value-type="float">
            <text:p><text:s/>40,090 </text:p>
          </table:table-cell>
          <table:table-cell table:style-name="ce30" table:formula="of:=+[.E27]" office:value-type="float" office:value="40089.6" calcext:value-type="float">
            <text:p><text:s/>40,090 </text:p>
          </table:table-cell>
          <table:table-cell table:style-name="ce30" table:formula="of:=+[.F27]" office:value-type="float" office:value="40089.6" calcext:value-type="float">
            <text:p><text:s/>40,090 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(-) Costos de ventas </text:p>
          </table:table-cell>
          <table:table-cell table:style-name="ce30" table:formula="of:=+[$'Alter Sin Py'.D32]" office:value-type="float" office:value="0" calcext:value-type="float">
            <text:p><text:s/>- <text:s text:c="2"/></text:p>
          </table:table-cell>
          <table:table-cell table:style-name="ce30" table:formula="of:=([.$D$8]*[.$F$8]+[.$D$12]*[.$F$12]+[.$D$13]*[.$F$13])*12" office:value-type="float" office:value="26956.8" calcext:value-type="float">
            <text:p><text:s/>26,957 </text:p>
          </table:table-cell>
          <table:table-cell table:style-name="ce30" table:formula="of:=([.$D$8]*[.$F$8]+[.$D$12]*[.$F$12]+[.$D$13]*[.$F$13])*12" office:value-type="float" office:value="26956.8" calcext:value-type="float">
            <text:p><text:s/>26,957 </text:p>
          </table:table-cell>
          <table:table-cell table:style-name="ce30" table:formula="of:=([.$D$8]*[.$F$8]+[.$D$12]*[.$F$12]+[.$D$13]*[.$F$13])*12" office:value-type="float" office:value="26956.8" calcext:value-type="float">
            <text:p><text:s/>26,957 </text:p>
          </table:table-cell>
          <table:table-cell table:style-name="ce30" table:formula="of:=([.$D$8]*[.$F$8]+[.$D$12]*[.$F$12]+[.$D$13]*[.$F$13])*12" office:value-type="float" office:value="26956.8" calcext:value-type="float">
            <text:p><text:s/>26,957 </text:p>
          </table:table-cell>
          <table:table-cell/>
          <table:table-cell table:style-name="ce144"/>
          <table:table-cell table:number-columns-repeated="16375"/>
        </table:table-row>
        <table:table-row table:style-name="ro1">
          <table:table-cell/>
          <table:table-cell table:style-name="ce21" office:value-type="string" calcext:value-type="string">
            <text:p>(-) Gastos administrativos (15%)</text:p>
          </table:table-cell>
          <table:table-cell table:style-name="ce31"/>
          <table:table-cell table:style-name="ce31" table:formula="of:=+[$'Alter Con py'.$D$27]*0.15" office:value-type="float" office:value="6013.44" calcext:value-type="float">
            <text:p><text:s/>6,013 </text:p>
          </table:table-cell>
          <table:table-cell table:style-name="ce31" table:formula="of:=+[$'Alter Con py'.$D$27]*0.15" office:value-type="float" office:value="6013.44" calcext:value-type="float">
            <text:p><text:s/>6,013 </text:p>
          </table:table-cell>
          <table:table-cell table:style-name="ce31" table:formula="of:=+[$'Alter Con py'.$D$27]*0.15" office:value-type="float" office:value="6013.44" calcext:value-type="float">
            <text:p><text:s/>6,013 </text:p>
          </table:table-cell>
          <table:table-cell table:style-name="ce31" table:formula="of:=+[$'Alter Con py'.$D$27]*0.15" office:value-type="float" office:value="6013.44" calcext:value-type="float">
            <text:p><text:s/>6,013 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(-) Gastos de ventas (6%)</text:p>
          </table:table-cell>
          <table:table-cell table:style-name="ce31"/>
          <table:table-cell table:style-name="ce31" table:formula="of:=[.$D$27]*0.06" office:value-type="float" office:value="2405.376" calcext:value-type="float">
            <text:p><text:s/>2,405 </text:p>
          </table:table-cell>
          <table:table-cell table:style-name="ce31" table:formula="of:=[.$D$27]*0.06" office:value-type="float" office:value="2405.376" calcext:value-type="float">
            <text:p><text:s/>2,405 </text:p>
          </table:table-cell>
          <table:table-cell table:style-name="ce31" table:formula="of:=[.$D$27]*0.06" office:value-type="float" office:value="2405.376" calcext:value-type="float">
            <text:p><text:s/>2,405 </text:p>
          </table:table-cell>
          <table:table-cell table:style-name="ce31" table:formula="of:=[.$D$27]*0.06" office:value-type="float" office:value="2405.376" calcext:value-type="float">
            <text:p><text:s/>2,405 </text:p>
          </table:table-cell>
          <table:table-cell/>
          <table:table-cell table:style-name="ce7" office:value-type="string" calcext:value-type="string">
            <text:p>PRÉSTAMO</text:p>
          </table:table-cell>
          <table:table-cell table:number-columns-repeated="16375"/>
        </table:table-row>
        <table:table-row table:style-name="ro1">
          <table:table-cell/>
          <table:table-cell table:style-name="ce21" office:value-type="string" calcext:value-type="string">
            <text:p>(-) Depreciaciones</text:p>
          </table:table-cell>
          <table:table-cell table:style-name="ce31"/>
          <table:table-cell table:style-name="ce31" table:formula="of:=+[.$F$18]" office:value-type="float" office:value="1962.5" calcext:value-type="float">
            <text:p><text:s/>1,963 </text:p>
          </table:table-cell>
          <table:table-cell table:style-name="ce31" table:formula="of:=+[.$F$18]" office:value-type="float" office:value="1962.5" calcext:value-type="float">
            <text:p><text:s/>1,963 </text:p>
          </table:table-cell>
          <table:table-cell table:style-name="ce31" table:formula="of:=+[.$F$18]" office:value-type="float" office:value="1962.5" calcext:value-type="float">
            <text:p><text:s/>1,963 </text:p>
          </table:table-cell>
          <table:table-cell table:style-name="ce31" table:formula="of:=+[.$F$18]" office:value-type="float" office:value="1962.5" calcext:value-type="float">
            <text:p><text:s/>1,963 </text:p>
          </table:table-cell>
          <table:table-cell/>
          <table:table-cell table:style-name="ce161" office:value-type="string" calcext:value-type="string">
            <text:p>Monto del préstamo</text:p>
          </table:table-cell>
          <table:table-cell table:style-name="ce165" office:value-type="float" office:value="5000" calcext:value-type="float">
            <text:p>5,000</text:p>
          </table:table-cell>
          <table:table-cell table:number-columns-repeated="16374"/>
        </table:table-row>
        <table:table-row table:style-name="ro1">
          <table:table-cell/>
          <table:table-cell table:style-name="ce21" office:value-type="string" calcext:value-type="string">
            <text:p>Utilidad venta maquinas </text:p>
          </table:table-cell>
          <table:table-cell table:style-name="ce31" table:number-columns-repeated="4"/>
          <table:table-cell table:style-name="ce31" table:formula="of:=+[.I18]" office:value-type="float" office:value="970" calcext:value-type="float">
            <text:p><text:s/>970 </text:p>
          </table:table-cell>
          <table:table-cell/>
          <table:table-cell table:style-name="ce161" office:value-type="string" calcext:value-type="string">
            <text:p>Tasa Efectiva Anual (TEA)</text:p>
          </table:table-cell>
          <table:table-cell table:style-name="ce166" office:value-type="percentage" office:value="0.1539" calcext:value-type="percentage">
            <text:p>15.39 %</text:p>
          </table:table-cell>
          <table:table-cell/>
          <table:table-cell table:style-name="ce2"/>
          <table:table-cell table:style-name="ce186"/>
          <table:table-cell table:number-columns-repeated="16371"/>
        </table:table-row>
        <table:table-row table:style-name="ro1">
          <table:table-cell/>
          <table:table-cell table:style-name="ce21" office:value-type="string" calcext:value-type="string">
            <text:p>Utilidad operativa </text:p>
          </table:table-cell>
          <table:table-cell table:style-name="ce32" table:formula="of:=+SUM([.C27]+[.C32])-SUM([.C28:.C31])" office:value-type="float" office:value="0" calcext:value-type="float">
            <text:p><text:s/>- <text:s text:c="2"/></text:p>
          </table:table-cell>
          <table:table-cell table:style-name="ce32" table:formula="of:=+SUM([.D27]+[.D32])-SUM([.D28:.D31])" office:value-type="float" office:value="2751.48400000001" calcext:value-type="float">
            <text:p><text:s/>2,751 </text:p>
          </table:table-cell>
          <table:table-cell table:style-name="ce32" table:formula="of:=+SUM([.E27]+[.E32])-SUM([.E28:.E31])" office:value-type="float" office:value="2751.48400000001" calcext:value-type="float">
            <text:p><text:s/>2,751 </text:p>
          </table:table-cell>
          <table:table-cell table:style-name="ce32" table:formula="of:=+SUM([.F27]+[.F32])-SUM([.F28:.F31])" office:value-type="float" office:value="2751.48400000001" calcext:value-type="float">
            <text:p><text:s/>2,751 </text:p>
          </table:table-cell>
          <table:table-cell table:style-name="ce32" table:formula="of:=+SUM([.G27]+[.G32])-SUM([.G28:.G31])" office:value-type="float" office:value="3721.48400000001" calcext:value-type="float">
            <text:p><text:s/>3,721 </text:p>
          </table:table-cell>
          <table:table-cell/>
          <table:table-cell table:style-name="ce161" office:value-type="string" calcext:value-type="string">
            <text:p>Plazo Devolución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ce21" office:value-type="string" calcext:value-type="string">
            <text:p>Utilidad imponible</text:p>
          </table:table-cell>
          <table:table-cell table:style-name="ce31" table:formula="of:=+[.C33]" office:value-type="float" office:value="0" calcext:value-type="float">
            <text:p><text:s/>- <text:s text:c="2"/></text:p>
          </table:table-cell>
          <table:table-cell table:style-name="ce31" table:formula="of:=+[.D33]" office:value-type="float" office:value="2751.48400000001" calcext:value-type="float">
            <text:p><text:s/>2,751 </text:p>
          </table:table-cell>
          <table:table-cell table:style-name="ce31" table:formula="of:=+[.E33]" office:value-type="float" office:value="2751.48400000001" calcext:value-type="float">
            <text:p><text:s/>2,751 </text:p>
          </table:table-cell>
          <table:table-cell table:style-name="ce31" table:formula="of:=+[.F33]" office:value-type="float" office:value="2751.48400000001" calcext:value-type="float">
            <text:p><text:s/>2,751 </text:p>
          </table:table-cell>
          <table:table-cell table:style-name="ce31" table:formula="of:=+[.G33]" office:value-type="float" office:value="3721.48400000001" calcext:value-type="float">
            <text:p><text:s/>3,721 </text:p>
          </table:table-cell>
          <table:table-cell/>
          <table:table-cell table:style-name="ce161" office:value-type="string" calcext:value-type="string">
            <text:p>Tasa de Interés Real</text:p>
          </table:table-cell>
          <table:table-cell table:style-name="ce166" table:formula="of:=((1+[.J32])/(1+[.J35]))-1" office:value-type="percentage" office:value="0.120291262135922" calcext:value-type="percentage">
            <text:p>12.03 %</text:p>
          </table:table-cell>
          <table:table-cell table:number-columns-repeated="16374"/>
        </table:table-row>
        <table:table-row table:style-name="ro1">
          <table:table-cell/>
          <table:table-cell table:style-name="ce21" office:value-type="string" calcext:value-type="string">
            <text:p>(-) Impuestos (30%)</text:p>
          </table:table-cell>
          <table:table-cell table:style-name="ce31"/>
          <table:table-cell table:style-name="ce30" table:formula="of:=+[.D34]*0.3" office:value-type="float" office:value="825.445200000003" calcext:value-type="float">
            <text:p><text:s/>825 </text:p>
          </table:table-cell>
          <table:table-cell table:style-name="ce30" table:formula="of:=+[.E34]*0.3" office:value-type="float" office:value="825.445200000003" calcext:value-type="float">
            <text:p><text:s/>825 </text:p>
          </table:table-cell>
          <table:table-cell table:style-name="ce30" table:formula="of:=+[.F34]*0.3" office:value-type="float" office:value="825.445200000003" calcext:value-type="float">
            <text:p><text:s/>825 </text:p>
          </table:table-cell>
          <table:table-cell table:style-name="ce30" table:formula="of:=+[.G34]*0.3" office:value-type="float" office:value="1116.4452" calcext:value-type="float">
            <text:p><text:s/>1,116 </text:p>
          </table:table-cell>
          <table:table-cell/>
          <table:table-cell table:style-name="ce161" office:value-type="string" calcext:value-type="string">
            <text:p>Tasa Inflación Anual</text:p>
          </table:table-cell>
          <table:table-cell table:style-name="ce168" office:value-type="percentage" office:value="0.03" calcext:value-type="percentage">
            <text:p>3 %</text:p>
          </table:table-cell>
          <table:table-cell table:style-name="ce177">
            <office:annotation draw:style-name="gr5" draw:text-style-name="P2" svg:width="3.782cm" svg:height="2.176cm" svg:x="23.516cm" svg:y="16.876cm" draw:caption-point-x="4.169cm" draw:caption-point-y="-0.36cm">
              <dc:creator>Edison Achalma Mendoza</dc:creator>
              <dc:date>2024-07-31T03:28:00</dc:date>
              <text:p>Debido a que la tasa de inflación tiene tendencia a la alza (BCRP).</text:p>
              <text:p/>
            </office:annotation>
          </table:table-cell>
          <table:table-cell table:number-columns-repeated="16373"/>
        </table:table-row>
        <table:table-row table:style-name="ro1">
          <table:table-cell/>
          <table:table-cell table:style-name="ce23" office:value-type="string" calcext:value-type="string">
            <text:p>Utilidad Neta</text:p>
          </table:table-cell>
          <table:table-cell table:style-name="ce39" table:formula="of:=+[.C34]-[.C35]" office:value-type="float" office:value="0" calcext:value-type="float">
            <text:p><text:s/>- <text:s text:c="2"/></text:p>
          </table:table-cell>
          <table:table-cell table:style-name="ce39" table:formula="of:=+[.D34]-[.D35]" office:value-type="float" office:value="1926.03880000001" calcext:value-type="float">
            <text:p><text:s/>1,926 </text:p>
          </table:table-cell>
          <table:table-cell table:style-name="ce39" table:formula="of:=+[.E34]-[.E35]" office:value-type="float" office:value="1926.03880000001" calcext:value-type="float">
            <text:p><text:s/>1,926 </text:p>
          </table:table-cell>
          <table:table-cell table:style-name="ce39" table:formula="of:=+[.F34]-[.F35]" office:value-type="float" office:value="1926.03880000001" calcext:value-type="float">
            <text:p><text:s/>1,926 </text:p>
          </table:table-cell>
          <table:table-cell table:style-name="ce39" table:formula="of:=+[.G34]-[.G35]" office:value-type="float" office:value="2605.03880000001" calcext:value-type="float">
            <text:p><text:s/>2,605 </text:p>
          </table:table-cell>
          <table:table-cell/>
          <table:table-cell table:style-name="ce161" office:value-type="string" calcext:value-type="string">
            <text:p>Cuota de Capital</text:p>
          </table:table-cell>
          <table:table-cell table:style-name="ce169" table:formula="of:=[.J31]/2" office:value-type="float" office:value="2500" calcext:value-type="float">
            <text:p>S/. 2,500 </text:p>
          </table:table-cell>
          <table:table-cell table:number-columns-repeated="16374"/>
        </table:table-row>
        <table:table-row table:style-name="ro10">
          <table:table-cell/>
          <table:table-cell table:style-name="ce102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102"/>
          <table:table-cell table:number-columns-repeated="16377"/>
        </table:table-row>
        <table:table-row table:style-name="ro1">
          <table:table-cell table:number-columns-repeated="8"/>
          <table:table-cell table:style-name="ce7" office:value-type="string" calcext:value-type="string">
            <text:p>TABLA DE AMORTIZACIÓN DE LA DEUDA</text:p>
          </table:table-cell>
          <table:table-cell table:number-columns-repeated="16375"/>
        </table:table-row>
        <table:table-row table:style-name="ro11">
          <table:table-cell/>
          <table:table-cell table:style-name="ce103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120"/>
          <table:table-cell/>
          <table:table-cell table:style-name="ce162" office:value-type="string" calcext:value-type="string">
            <text:p>Periodo</text:p>
          </table:table-cell>
          <table:table-cell table:style-name="ce170" office:value-type="string" calcext:value-type="string">
            <text:p>Saldo Inicial</text:p>
          </table:table-cell>
          <table:table-cell table:style-name="ce170" office:value-type="string" calcext:value-type="string">
            <text:p>Principal</text:p>
          </table:table-cell>
          <table:table-cell table:style-name="ce170" office:value-type="string" calcext:value-type="string">
            <text:p>Interes</text:p>
          </table:table-cell>
          <table:table-cell table:style-name="ce170" office:value-type="string" calcext:value-type="string">
            <text:p>cuota</text:p>
          </table:table-cell>
          <table:table-cell table:style-name="ce170" office:value-type="string" calcext:value-type="string">
            <text:p>Saldo Final</text:p>
          </table:table-cell>
          <table:table-cell table:number-columns-repeated="16370"/>
        </table:table-row>
        <table:table-row table:style-name="ro12">
          <table:table-cell table:number-columns-repeated="3"/>
          <table:table-cell table:style-name="ce144"/>
          <table:table-cell table:number-columns-repeated="4"/>
          <table:table-cell table:style-name="ce163" office:value-type="float" office:value="1" calcext:value-type="float">
            <text:p>1</text:p>
          </table:table-cell>
          <table:table-cell table:style-name="ce171" table:formula="of:=[.J31]" office:value-type="float" office:value="5000" calcext:value-type="float">
            <text:p>5,000</text:p>
          </table:table-cell>
          <table:table-cell table:style-name="ce171" table:formula="of:=+[.J36]" office:value-type="float" office:value="2500" calcext:value-type="float">
            <text:p>2,500</text:p>
          </table:table-cell>
          <table:table-cell table:style-name="ce172" table:formula="of:=+[.J40]*[.$J$34]" office:value-type="float" office:value="601.456310679611" calcext:value-type="float">
            <text:p>601</text:p>
          </table:table-cell>
          <table:table-cell table:style-name="ce187" table:formula="of:=[.K40]+[.L40]" office:value-type="float" office:value="3101.45631067961" calcext:value-type="float">
            <text:p>3,101.5</text:p>
          </table:table-cell>
          <table:table-cell table:style-name="ce172" table:formula="of:=[.J40]-[.K40]" office:value-type="float" office:value="2500" calcext:value-type="float">
            <text:p>2,500</text:p>
          </table:table-cell>
          <table:table-cell table:number-columns-repeated="16370"/>
        </table:table-row>
        <table:table-row table:style-name="ro1">
          <table:table-cell/>
          <table:table-cell table:style-name="ce101" office:value-type="string" calcext:value-type="string" table:number-columns-spanned="1" table:number-rows-spanned="2">
            <text:p>DESCRIPCIÓN DE CATEGORÍA</text:p>
          </table:table-cell>
          <table:table-cell table:style-name="ce119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19"/>
          <table:table-cell table:style-name="ce3"/>
          <table:table-cell table:style-name="ce163" office:value-type="float" office:value="2" calcext:value-type="float">
            <text:p>2</text:p>
          </table:table-cell>
          <table:table-cell table:style-name="ce172" table:formula="of:=[.N40]" office:value-type="float" office:value="2500" calcext:value-type="float">
            <text:p>2,500</text:p>
          </table:table-cell>
          <table:table-cell table:style-name="ce171" table:formula="of:=+[.J36]" office:value-type="float" office:value="2500" calcext:value-type="float">
            <text:p>2,500</text:p>
          </table:table-cell>
          <table:table-cell table:style-name="ce172" table:formula="of:=+[.J41]*[.$J$34]" office:value-type="float" office:value="300.728155339806" calcext:value-type="float">
            <text:p>301</text:p>
          </table:table-cell>
          <table:table-cell table:style-name="ce187" table:formula="of:=[.K41]+[.L41]" office:value-type="float" office:value="2800.72815533981" calcext:value-type="float">
            <text:p>2,800.7</text:p>
          </table:table-cell>
          <table:table-cell table:style-name="ce172" table:formula="of:=[.J41]-[.K4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covered-table-cell table:style-name="ce101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178"/>
          <table:table-cell table:style-name="ce182"/>
          <table:table-cell table:style-name="ce188"/>
          <table:table-cell table:style-name="ce182"/>
          <table:table-cell table:style-name="ce193"/>
          <table:table-cell table:style-name="ce182"/>
          <table:table-cell table:number-columns-repeated="16368"/>
        </table:table-row>
        <table:table-row table:style-name="ro1">
          <table:table-cell/>
          <table:table-cell table:style-name="ce22" office:value-type="string" calcext:value-type="string">
            <text:p>Inversiones y Liquidación</text:p>
          </table:table-cell>
          <table:table-cell table:style-name="ce48" table:number-columns-repeated="5"/>
          <table:table-cell table:style-name="ce6"/>
          <table:table-cell table:number-columns-repeated="2"/>
          <table:table-cell table:style-name="ce178"/>
          <table:table-cell table:style-name="ce182"/>
          <table:table-cell table:style-name="ce189"/>
          <table:table-cell table:style-name="ce182"/>
          <table:table-cell table:style-name="ce193"/>
          <table:table-cell table:style-name="ce182"/>
          <table:table-cell table:number-columns-repeated="16368"/>
        </table:table-row>
        <table:table-row table:style-name="ro1">
          <table:table-cell/>
          <table:table-cell table:style-name="ce21" office:value-type="string" calcext:value-type="string">
            <text:p>Maquinarias (-)</text:p>
          </table:table-cell>
          <table:table-cell table:style-name="ce31" table:formula="of:=-4850" office:value-type="float" office:value="-4850" calcext:value-type="float">
            <text:p><text:s/>-4,850 </text:p>
          </table:table-cell>
          <table:table-cell table:style-name="ce31" table:number-columns-repeated="4"/>
          <table:table-cell table:style-name="ce155"/>
          <table:table-cell table:number-columns-repeated="2"/>
          <table:table-cell table:style-name="ce178"/>
          <table:table-cell table:style-name="ce182"/>
          <table:table-cell table:style-name="ce189"/>
          <table:table-cell table:style-name="ce182"/>
          <table:table-cell table:style-name="ce193"/>
          <table:table-cell table:style-name="ce182"/>
          <table:table-cell table:number-columns-repeated="16368"/>
        </table:table-row>
        <table:table-row table:style-name="ro1">
          <table:table-cell/>
          <table:table-cell table:style-name="ce21" office:value-type="string" calcext:value-type="string">
            <text:p>Acondicionamiento de local</text:p>
          </table:table-cell>
          <table:table-cell table:style-name="ce31" office:value-type="float" office:value="-3000" calcext:value-type="float">
            <text:p><text:s/>-3,000 </text:p>
          </table:table-cell>
          <table:table-cell table:style-name="ce31" table:number-columns-repeated="4"/>
          <table:table-cell table:style-name="ce155"/>
          <table:table-cell table:number-columns-repeated="2"/>
          <table:table-cell table:style-name="ce178"/>
          <table:table-cell table:style-name="ce182"/>
          <table:table-cell table:style-name="ce189"/>
          <table:table-cell table:style-name="ce182"/>
          <table:table-cell table:style-name="ce193"/>
          <table:table-cell table:style-name="ce182"/>
          <table:table-cell table:number-columns-repeated="16368"/>
        </table:table-row>
        <table:table-row table:style-name="ro1">
          <table:table-cell/>
          <table:table-cell table:style-name="ce21" office:value-type="string" calcext:value-type="string">
            <text:p>Venta de Activo Fijo (+)</text:p>
          </table:table-cell>
          <table:table-cell table:style-name="ce31" table:number-columns-repeated="4"/>
          <table:table-cell table:style-name="ce31" table:formula="of:=+[.H18]" office:value-type="float" office:value="970" calcext:value-type="float">
            <text:p><text:s/>970 </text:p>
          </table:table-cell>
          <table:table-cell table:style-name="ce15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Flujo de Inversiones</text:p>
          </table:table-cell>
          <table:table-cell table:style-name="ce121" table:formula="of:=[.C44]+[.C46]+[.C45]" office:value-type="float" office:value="-7850" calcext:value-type="float">
            <text:p>-7,850.00</text:p>
          </table:table-cell>
          <table:table-cell table:style-name="ce121" table:formula="of:=[.D44]+[.D46]+[.D45]" office:value-type="float" office:value="0" calcext:value-type="float">
            <text:p>0.00</text:p>
          </table:table-cell>
          <table:table-cell table:style-name="ce121" table:formula="of:=[.E44]+[.E46]+[.E45]" office:value-type="float" office:value="0" calcext:value-type="float">
            <text:p>0.00</text:p>
          </table:table-cell>
          <table:table-cell table:style-name="ce121" table:formula="of:=[.F44]+[.F46]+[.F45]" office:value-type="float" office:value="0" calcext:value-type="float">
            <text:p>0.00</text:p>
          </table:table-cell>
          <table:table-cell table:style-name="ce121" table:formula="of:=[.G44]+[.G46]+[.G45]" office:value-type="float" office:value="970" calcext:value-type="float">
            <text:p>970.00</text:p>
          </table:table-cell>
          <table:table-cell table:style-name="ce156"/>
          <table:table-cell table:number-columns-repeated="16376"/>
        </table:table-row>
        <table:table-row table:style-name="ro1">
          <table:table-cell table:style-name="ce2"/>
          <table:table-cell table:style-name="ce105" table:formula="of:=+[.B27]" office:value-type="string" office:string-value="(+) Ventas netas en s/. " calcext:value-type="string">
            <text:p>(+) Ventas netas en s/. </text:p>
          </table:table-cell>
          <table:table-cell table:style-name="ce122"/>
          <table:table-cell table:style-name="ce122" table:formula="of:=+[.D27]" office:value-type="float" office:value="40089.6" calcext:value-type="float">
            <text:p>40,089.60</text:p>
          </table:table-cell>
          <table:table-cell table:style-name="ce122" table:formula="of:=+[.E27]" office:value-type="float" office:value="40089.6" calcext:value-type="float">
            <text:p>40,089.60</text:p>
          </table:table-cell>
          <table:table-cell table:style-name="ce122" table:formula="of:=+[.F27]" office:value-type="float" office:value="40089.6" calcext:value-type="float">
            <text:p>40,089.60</text:p>
          </table:table-cell>
          <table:table-cell table:style-name="ce122" table:formula="of:=+[.G27]" office:value-type="float" office:value="40089.6" calcext:value-type="float">
            <text:p>40,089.60</text:p>
          </table:table-cell>
          <table:table-cell table:style-name="ce156"/>
          <table:table-cell table:style-name="ce2" table:number-columns-repeated="16376"/>
        </table:table-row>
        <table:table-row table:style-name="ro1">
          <table:table-cell/>
          <table:table-cell table:style-name="ce105" table:formula="of:=[.B28]" office:value-type="string" office:string-value="(-) Costos de ventas " calcext:value-type="string">
            <text:p>(-) Costos de ventas </text:p>
          </table:table-cell>
          <table:table-cell table:style-name="ce31" table:formula="of:=+[.C28]" office:value-type="float" office:value="0" calcext:value-type="float">
            <text:p><text:s/>- <text:s text:c="2"/></text:p>
          </table:table-cell>
          <table:table-cell table:style-name="ce31" table:formula="of:=+[.D28]" office:value-type="float" office:value="26956.8" calcext:value-type="float">
            <text:p><text:s/>26,957 </text:p>
          </table:table-cell>
          <table:table-cell table:style-name="ce31" table:formula="of:=+[.E28]" office:value-type="float" office:value="26956.8" calcext:value-type="float">
            <text:p><text:s/>26,957 </text:p>
          </table:table-cell>
          <table:table-cell table:style-name="ce31" table:formula="of:=+[.F28]" office:value-type="float" office:value="26956.8" calcext:value-type="float">
            <text:p><text:s/>26,957 </text:p>
          </table:table-cell>
          <table:table-cell table:style-name="ce31" table:formula="of:=+[.G28]" office:value-type="float" office:value="26956.8" calcext:value-type="float">
            <text:p><text:s/>26,957 </text:p>
          </table:table-cell>
          <table:table-cell table:style-name="ce155"/>
          <table:table-cell table:number-columns-repeated="16376"/>
        </table:table-row>
        <table:table-row table:style-name="ro1">
          <table:table-cell/>
          <table:table-cell table:style-name="ce105" table:formula="of:=[.B29]" office:value-type="string" office:string-value="(-) Gastos administrativos (15%)" calcext:value-type="string">
            <text:p>(-) Gastos administrativos (15%)</text:p>
          </table:table-cell>
          <table:table-cell table:style-name="ce31"/>
          <table:table-cell table:style-name="ce31" table:formula="of:=+[.E29]" office:value-type="float" office:value="6013.44" calcext:value-type="float">
            <text:p><text:s/>6,013 </text:p>
          </table:table-cell>
          <table:table-cell table:style-name="ce31" table:formula="of:=+[.F29]" office:value-type="float" office:value="6013.44" calcext:value-type="float">
            <text:p><text:s/>6,013 </text:p>
          </table:table-cell>
          <table:table-cell table:style-name="ce31" table:formula="of:=+[.G29]" office:value-type="float" office:value="6013.44" calcext:value-type="float">
            <text:p><text:s/>6,013 </text:p>
          </table:table-cell>
          <table:table-cell table:style-name="ce31" table:formula="of:=+[.F50]" office:value-type="float" office:value="6013.44" calcext:value-type="float">
            <text:p><text:s/>6,013 </text:p>
          </table:table-cell>
          <table:table-cell table:style-name="ce155"/>
          <table:table-cell table:number-columns-repeated="16376"/>
        </table:table-row>
        <table:table-row table:style-name="ro1">
          <table:table-cell/>
          <table:table-cell table:style-name="ce105" table:formula="of:=+[.B30]" office:value-type="string" office:string-value="(-) Gastos de ventas (6%)" calcext:value-type="string">
            <text:p>(-) Gastos de ventas (6%)</text:p>
          </table:table-cell>
          <table:table-cell table:style-name="ce31"/>
          <table:table-cell table:style-name="ce31" table:formula="of:=+[.E30]" office:value-type="float" office:value="2405.376" calcext:value-type="float">
            <text:p><text:s/>2,405 </text:p>
          </table:table-cell>
          <table:table-cell table:style-name="ce31" table:formula="of:=+[.F30]" office:value-type="float" office:value="2405.376" calcext:value-type="float">
            <text:p><text:s/>2,405 </text:p>
          </table:table-cell>
          <table:table-cell table:style-name="ce31" table:formula="of:=+[.G30]" office:value-type="float" office:value="2405.376" calcext:value-type="float">
            <text:p><text:s/>2,405 </text:p>
          </table:table-cell>
          <table:table-cell table:style-name="ce31" table:formula="of:=+[.F51]" office:value-type="float" office:value="2405.376" calcext:value-type="float">
            <text:p><text:s/>2,405 </text:p>
          </table:table-cell>
          <table:table-cell table:style-name="ce155"/>
          <table:table-cell table:number-columns-repeated="16376"/>
        </table:table-row>
        <table:table-row table:style-name="ro1">
          <table:table-cell/>
          <table:table-cell table:style-name="ce105" office:value-type="string" calcext:value-type="string">
            <text:p>Impuestos (-)</text:p>
          </table:table-cell>
          <table:table-cell table:style-name="ce31" table:formula="of:=+[.C35]" office:value-type="float" office:value="0" calcext:value-type="float">
            <text:p><text:s/>- <text:s text:c="2"/></text:p>
          </table:table-cell>
          <table:table-cell table:style-name="ce31" table:formula="of:=+[.D35]" office:value-type="float" office:value="825.445200000003" calcext:value-type="float">
            <text:p><text:s/>825 </text:p>
          </table:table-cell>
          <table:table-cell table:style-name="ce31" table:formula="of:=+[.E35]" office:value-type="float" office:value="825.445200000003" calcext:value-type="float">
            <text:p><text:s/>825 </text:p>
          </table:table-cell>
          <table:table-cell table:style-name="ce31" table:formula="of:=+[.F35]" office:value-type="float" office:value="825.445200000003" calcext:value-type="float">
            <text:p><text:s/>825 </text:p>
          </table:table-cell>
          <table:table-cell table:style-name="ce31" table:formula="of:=+[.G35]" office:value-type="float" office:value="1116.4452" calcext:value-type="float">
            <text:p><text:s/>1,116 </text:p>
          </table:table-cell>
          <table:table-cell table:style-name="ce155"/>
          <table:table-cell table:number-columns-repeated="16376"/>
        </table:table-row>
        <table:table-row table:style-name="ro1">
          <table:table-cell/>
          <table:table-cell table:style-name="ce106" office:value-type="string" calcext:value-type="string">
            <text:p>Flujo de Caja Operativo</text:p>
          </table:table-cell>
          <table:table-cell table:style-name="ce123" table:formula="of:=+SUM([.C48])-SUM(([.C49:.C52]))" office:value-type="float" office:value="0" calcext:value-type="float">
            <text:p><text:s/>- <text:s text:c="2"/></text:p>
          </table:table-cell>
          <table:table-cell table:style-name="ce123" table:formula="of:=+SUM([.D48])-SUM(([.D49:.D52]))" office:value-type="float" office:value="3888.53880000001" calcext:value-type="float">
            <text:p><text:s/>3,889 </text:p>
          </table:table-cell>
          <table:table-cell table:style-name="ce123" table:formula="of:=+SUM([.E48])-SUM(([.E49:.E52]))" office:value-type="float" office:value="3888.53880000001" calcext:value-type="float">
            <text:p><text:s/>3,889 </text:p>
          </table:table-cell>
          <table:table-cell table:style-name="ce123" table:formula="of:=+SUM([.F48])-SUM(([.F49:.F52]))" office:value-type="float" office:value="3888.53880000001" calcext:value-type="float">
            <text:p><text:s/>3,889 </text:p>
          </table:table-cell>
          <table:table-cell table:style-name="ce123" table:formula="of:=+SUM([.G48])-SUM(([.G49:.G52]))" office:value-type="float" office:value="3597.53880000001" calcext:value-type="float">
            <text:p><text:s/>3,598 </text:p>
          </table:table-cell>
          <table:table-cell table:style-name="ce156"/>
          <table:table-cell table:number-columns-repeated="16376"/>
        </table:table-row>
        <table:table-row table:style-name="ro13">
          <table:table-cell/>
          <table:table-cell table:style-name="ce107" office:value-type="string" calcext:value-type="string">
            <text:p>Flujo de Caja Económico (FCE)</text:p>
          </table:table-cell>
          <table:table-cell table:style-name="ce124" table:formula="of:=+[.C47]+[.C53]" office:value-type="float" office:value="-7850" calcext:value-type="float">
            <text:p><text:s/>-7,850.00 </text:p>
          </table:table-cell>
          <table:table-cell table:style-name="ce124" table:formula="of:=+[.D47]+[.D53]" office:value-type="float" office:value="3888.53880000001" calcext:value-type="float">
            <text:p><text:s/>3,888.54 </text:p>
          </table:table-cell>
          <table:table-cell table:style-name="ce124" table:formula="of:=+[.E47]+[.E53]" office:value-type="float" office:value="3888.53880000001" calcext:value-type="float">
            <text:p><text:s/>3,888.54 </text:p>
          </table:table-cell>
          <table:table-cell table:style-name="ce124" table:formula="of:=+[.F47]+[.F53]" office:value-type="float" office:value="3888.53880000001" calcext:value-type="float">
            <text:p><text:s/>3,888.54 </text:p>
          </table:table-cell>
          <table:table-cell table:style-name="ce124" table:formula="of:=+[.G47]+[.G53]" office:value-type="float" office:value="4567.53880000001" calcext:value-type="float">
            <text:p><text:s/>4,567.54 </text:p>
          </table:table-cell>
          <table:table-cell table:style-name="ce15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125"/>
          <table:table-cell table:style-name="ce69"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DESCRIPCIÓN DE CATEGORÍA</text:p>
          </table:table-cell>
          <table:table-cell table:style-name="ce126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45"/>
          <table:table-cell table:style-name="ce158" table:number-columns-spanned="1" table:number-rows-spanned="2"/>
          <table:table-cell table:style-name="ce164" table:number-columns-spanned="5" table:number-rows-spanned="1"/>
          <table:covered-table-cell table:number-columns-repeated="4" table:style-name="ce164"/>
          <table:table-cell table:number-columns-repeated="16371"/>
        </table:table-row>
        <table:table-row table:style-name="ro1">
          <table:table-cell/>
          <table:covered-table-cell table:style-name="ce19"/>
          <table:table-cell table:style-name="ce23" table:formula="of:=[.C42]" office:value-type="float" office:value="0" calcext:value-type="float">
            <text:p>0</text:p>
          </table:table-cell>
          <table:table-cell table:style-name="ce23" table:formula="of:=[.D42]" office:value-type="float" office:value="1" calcext:value-type="float">
            <text:p>1</text:p>
          </table:table-cell>
          <table:table-cell table:style-name="ce126" table:formula="of:=[.E42]" office:value-type="float" office:value="2" calcext:value-type="float">
            <text:p>2</text:p>
          </table:table-cell>
          <table:table-cell table:style-name="ce23" table:formula="of:=[.F42]" office:value-type="float" office:value="3" calcext:value-type="float">
            <text:p>3</text:p>
          </table:table-cell>
          <table:table-cell table:style-name="ce126" table:formula="of:=[.G42]" office:value-type="float" office:value="4" calcext:value-type="float">
            <text:p>4</text:p>
          </table:table-cell>
          <table:covered-table-cell table:style-name="ce158"/>
          <table:table-cell table:style-name="ce164" table:number-columns-repeated="5"/>
          <table:table-cell table:number-columns-repeated="16371"/>
        </table:table-row>
        <table:table-row table:style-name="ro1">
          <table:table-cell/>
          <table:table-cell table:style-name="ce105" office:value-type="string" calcext:value-type="string">
            <text:p>FCE Con Equipos Nuevos</text:p>
          </table:table-cell>
          <table:table-cell table:style-name="ce127" table:formula="of:=+[.C54]" office:value-type="float" office:value="-7850" calcext:value-type="float">
            <text:p><text:s/>-7,850 </text:p>
          </table:table-cell>
          <table:table-cell table:style-name="ce127" table:formula="of:=+[.D54]" office:value-type="float" office:value="3888.53880000001" calcext:value-type="float">
            <text:p><text:s/>3,889 </text:p>
          </table:table-cell>
          <table:table-cell table:style-name="ce127" table:formula="of:=+[.E54]" office:value-type="float" office:value="3888.53880000001" calcext:value-type="float">
            <text:p><text:s/>3,889 </text:p>
          </table:table-cell>
          <table:table-cell table:style-name="ce127" table:formula="of:=+[.F54]" office:value-type="float" office:value="3888.53880000001" calcext:value-type="float">
            <text:p><text:s/>3,889 </text:p>
          </table:table-cell>
          <table:table-cell table:style-name="ce127" table:formula="of:=+[.G54]" office:value-type="float" office:value="4567.53880000001" calcext:value-type="float">
            <text:p><text:s/>4,568 </text:p>
          </table:table-cell>
          <table:table-cell table:style-name="ce159" table:number-columns-repeated="6"/>
          <table:table-cell table:number-columns-repeated="16371"/>
        </table:table-row>
        <table:table-row table:style-name="ro1">
          <table:table-cell/>
          <table:table-cell table:style-name="ce105" office:value-type="string" calcext:value-type="string">
            <text:p>FCE Con Equipos Actuales</text:p>
          </table:table-cell>
          <table:table-cell table:style-name="ce127" table:formula="of:=+[$'Alter Sin Py'.D37]" office:value-type="float" office:value="0" calcext:value-type="float">
            <text:p><text:s/>- <text:s text:c="2"/></text:p>
          </table:table-cell>
          <table:table-cell table:style-name="ce127" table:formula="of:=+[$'Alter Sin Py'.E37]" office:value-type="float" office:value="2571.24" calcext:value-type="float">
            <text:p><text:s/>2,571 </text:p>
          </table:table-cell>
          <table:table-cell table:style-name="ce127" table:formula="of:=+[$'Alter Sin Py'.F37]" office:value-type="float" office:value="2571.24" calcext:value-type="float">
            <text:p><text:s/>2,571 </text:p>
          </table:table-cell>
          <table:table-cell table:style-name="ce127" table:formula="of:=+[$'Alter Sin Py'.G37]" office:value-type="float" office:value="2571.24" calcext:value-type="float">
            <text:p><text:s/>2,571 </text:p>
          </table:table-cell>
          <table:table-cell table:style-name="ce127" table:formula="of:=+[$'Alter Sin Py'.H37]" office:value-type="float" office:value="2571.24" calcext:value-type="float">
            <text:p><text:s/>2,571 </text:p>
          </table:table-cell>
          <table:table-cell table:style-name="ce159" table:number-columns-repeated="6"/>
          <table:table-cell table:number-columns-repeated="16371"/>
        </table:table-row>
        <table:table-row table:style-name="ro1">
          <table:table-cell/>
          <table:table-cell table:style-name="ce107" office:value-type="string" calcext:value-type="string">
            <text:p>FCE Incremental</text:p>
          </table:table-cell>
          <table:table-cell table:style-name="ce128" table:formula="of:=[.C60]-[.C61]" office:value-type="float" office:value="-7850" calcext:value-type="float">
            <text:p>-7850.0</text:p>
          </table:table-cell>
          <table:table-cell table:style-name="ce39" table:formula="of:=[.D60]-[.D61]" office:value-type="float" office:value="1317.29880000001" calcext:value-type="float">
            <text:p><text:s/>1,317 </text:p>
          </table:table-cell>
          <table:table-cell table:style-name="ce39" table:formula="of:=[.E60]-[.E61]" office:value-type="float" office:value="1317.29880000001" calcext:value-type="float">
            <text:p><text:s/>1,317 </text:p>
          </table:table-cell>
          <table:table-cell table:style-name="ce39" table:formula="of:=[.F60]-[.F61]" office:value-type="float" office:value="1317.29880000001" calcext:value-type="float">
            <text:p><text:s/>1,317 </text:p>
          </table:table-cell>
          <table:table-cell table:style-name="ce39" table:formula="of:=[.G60]-[.G61]" office:value-type="float" office:value="1996.29880000001" calcext:value-type="float">
            <text:p><text:s/>1,996 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125"/>
          <table:table-cell table:style-name="ce103" table:number-columns-spanned="6" table:number-rows-spanned="1"/>
          <table:covered-table-cell table:number-columns-repeated="5" table:style-name="ce12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DESCRIPCIÓN DE CATEGORÍA</text:p>
          </table:table-cell>
          <table:table-cell table:style-name="ce23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23"/>
          <table:table-cell table:number-columns-repeated="16377"/>
        </table:table-row>
        <table:table-row table:style-name="ro1">
          <table:table-cell/>
          <table:covered-table-cell table:style-name="ce1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09" table:formula="of:=[.B60]" office:value-type="string" office:string-value="FCE Con Equipos Nuevos" calcext:value-type="string">
            <text:p>FCE Con Equipos Nuevos</text:p>
          </table:table-cell>
          <table:table-cell table:style-name="ce129" table:formula="of:=[.C60]" office:value-type="float" office:value="-7850" calcext:value-type="float">
            <text:p><text:s/>-7,850 </text:p>
          </table:table-cell>
          <table:table-cell table:style-name="ce145" table:formula="of:=[.D60]" office:value-type="float" office:value="3888.53880000001" calcext:value-type="float">
            <text:p>3889</text:p>
          </table:table-cell>
          <table:table-cell table:style-name="ce145" table:formula="of:=[.E60]" office:value-type="float" office:value="3888.53880000001" calcext:value-type="float">
            <text:p>3889</text:p>
          </table:table-cell>
          <table:table-cell table:style-name="ce145" table:formula="of:=[.F60]" office:value-type="float" office:value="3888.53880000001" calcext:value-type="float">
            <text:p>3889</text:p>
          </table:table-cell>
          <table:table-cell table:style-name="ce145" table:formula="of:=[.G60]" office:value-type="float" office:value="4567.53880000001" calcext:value-type="float">
            <text:p>4568</text:p>
          </table:table-cell>
          <table:table-cell table:number-columns-repeated="16377"/>
        </table:table-row>
        <table:table-row table:style-name="ro1">
          <table:table-cell/>
          <table:table-cell table:style-name="ce110" office:value-type="string" calcext:value-type="string">
            <text:p>Financiamiento Neto</text:p>
          </table:table-cell>
          <table:table-cell table:style-name="ce130" table:number-columns-repeated="5"/>
          <table:table-cell table:number-columns-repeated="16377"/>
        </table:table-row>
        <table:table-row table:style-name="ro1">
          <table:table-cell/>
          <table:table-cell table:style-name="ce111" office:value-type="string" calcext:value-type="string">
            <text:p>Préstamos (+)</text:p>
          </table:table-cell>
          <table:table-cell table:style-name="ce131" table:formula="of:=+[.J31]" office:value-type="float" office:value="5000" calcext:value-type="float">
            <text:p>5,000.0</text:p>
          </table:table-cell>
          <table:table-cell table:style-name="ce132" table:number-columns-repeated="4"/>
          <table:table-cell table:number-columns-repeated="16377"/>
        </table:table-row>
        <table:table-row table:style-name="ro1">
          <table:table-cell/>
          <table:table-cell table:style-name="ce111" office:value-type="string" calcext:value-type="string">
            <text:p>Amortizaciones (-)</text:p>
          </table:table-cell>
          <table:table-cell table:style-name="ce132"/>
          <table:table-cell table:style-name="ce146" table:formula="of:=+[.$K$40]" office:value-type="float" office:value="2500" calcext:value-type="float">
            <text:p>2,500</text:p>
          </table:table-cell>
          <table:table-cell table:style-name="ce146" table:formula="of:=+[.$K$40]" office:value-type="float" office:value="2500" calcext:value-type="float">
            <text:p>2,500</text:p>
          </table:table-cell>
          <table:table-cell table:style-name="ce131"/>
          <table:table-cell table:style-name="ce132"/>
          <table:table-cell table:number-columns-repeated="16377"/>
        </table:table-row>
        <table:table-row table:style-name="ro1">
          <table:table-cell/>
          <table:table-cell table:style-name="ce111" office:value-type="string" calcext:value-type="string">
            <text:p>Intereses (-)</text:p>
          </table:table-cell>
          <table:table-cell table:style-name="ce132"/>
          <table:table-cell table:style-name="ce147" table:formula="of:=+[.L40]" office:value-type="float" office:value="601.456310679611" calcext:value-type="float">
            <text:p>601</text:p>
          </table:table-cell>
          <table:table-cell table:style-name="ce147" table:formula="of:=+[.L41]" office:value-type="float" office:value="300.728155339806" calcext:value-type="float">
            <text:p>301</text:p>
          </table:table-cell>
          <table:table-cell table:style-name="ce132" table:number-columns-repeated="2"/>
          <table:table-cell table:number-columns-repeated="16377"/>
        </table:table-row>
        <table:table-row table:style-name="ro1">
          <table:table-cell/>
          <table:table-cell table:style-name="ce111" office:value-type="string" calcext:value-type="string">
            <text:p>Escudo Fiscal por Intereses(+)</text:p>
          </table:table-cell>
          <table:table-cell table:style-name="ce132"/>
          <table:table-cell table:style-name="ce147" table:formula="of:=+[.D72]*0.3" office:value-type="float" office:value="180.436893203883" calcext:value-type="float">
            <text:p>180</text:p>
          </table:table-cell>
          <table:table-cell table:style-name="ce147" table:formula="of:=+[.E72]*0.3" office:value-type="float" office:value="90.2184466019417" calcext:value-type="float">
            <text:p>90</text:p>
          </table:table-cell>
          <table:table-cell table:style-name="ce132" table:number-columns-repeated="2"/>
          <table:table-cell table:number-columns-repeated="16377"/>
        </table:table-row>
        <table:table-row table:style-name="ro1">
          <table:table-cell/>
          <table:table-cell table:style-name="ce112" office:value-type="string" calcext:value-type="string">
            <text:p>Flujo Financiamiento Neto</text:p>
          </table:table-cell>
          <table:table-cell table:style-name="ce133" table:formula="of:=+[.C70]-[.C71]-[.C72]-[.C73]" office:value-type="float" office:value="5000" calcext:value-type="float">
            <text:p>5,000.0</text:p>
          </table:table-cell>
          <table:table-cell table:style-name="ce133" table:formula="of:=+[.D70]-[.D71]-[.D72]-[.D73]" office:value-type="float" office:value="-3281.89320388349" calcext:value-type="float">
            <text:p>-3,281.9</text:p>
          </table:table-cell>
          <table:table-cell table:style-name="ce133" table:formula="of:=+[.E70]-[.E71]-[.E72]-[.E73]" office:value-type="float" office:value="-2890.94660194175" calcext:value-type="float">
            <text:p>-2,890.9</text:p>
          </table:table-cell>
          <table:table-cell table:style-name="ce133" office:value-type="float" office:value="0" calcext:value-type="float">
            <text:p>0.0</text:p>
          </table:table-cell>
          <table:table-cell table:style-name="ce133" table:formula="of:=+[.G70]-[.G71]-[.G72]-[.G73]" office:value-type="float" office:value="0" calcext:value-type="float">
            <text:p>0.0</text:p>
          </table:table-cell>
          <table:table-cell table:number-columns-repeated="16377"/>
        </table:table-row>
        <table:table-row table:style-name="ro1">
          <table:table-cell/>
          <table:table-cell table:style-name="ce107" office:value-type="string" calcext:value-type="string">
            <text:p>Flujo de Caja Financiero</text:p>
          </table:table-cell>
          <table:table-cell table:style-name="ce134" table:formula="of:=[.C68]+[.C74]" office:value-type="float" office:value="-2850" calcext:value-type="float">
            <text:p><text:s/>-2,850.0 </text:p>
          </table:table-cell>
          <table:table-cell table:style-name="ce134" table:formula="of:=[.D68]+[.D74]" office:value-type="float" office:value="606.645596116515" calcext:value-type="float">
            <text:p><text:s/>606.6 </text:p>
          </table:table-cell>
          <table:table-cell table:style-name="ce134" table:formula="of:=[.E68]+[.E74]" office:value-type="float" office:value="997.592198058262" calcext:value-type="float">
            <text:p><text:s/>997.6 </text:p>
          </table:table-cell>
          <table:table-cell table:style-name="ce134" table:formula="of:=[.F68]+[.F74]" office:value-type="float" office:value="3888.53880000001" calcext:value-type="float">
            <text:p><text:s/>3,888.5 </text:p>
          </table:table-cell>
          <table:table-cell table:style-name="ce134" table:formula="of:=[.G68]+[.G74]" office:value-type="float" office:value="4567.53880000001" calcext:value-type="float">
            <text:p><text:s/>4,567.5 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:</text:p>
          </table:table-cell>
          <table:table-cell table:number-columns-repeated="3"/>
          <table:table-cell>
            <draw:frame draw:z-index="0" draw:name="8 Imagen" draw:style-name="gr1" draw:text-style-name="P1" svg:width="2.74cm" svg:height="0.846cm" svg:x="0.635cm" svg:y="0.476cm">
              <draw:image xlink:href="Pictures/100000000000006F00000020B268EF49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78" table:formula="of:=+[$'costo capital'.J14]" office:value-type="percentage" office:value="0.0881806108711795" calcext:value-type="percentage">
            <text:p>8.82 %</text:p>
          </table:table-cell>
          <table:table-cell table:number-columns-repeated="16376"/>
        </table:table-row>
        <table:table-row table:style-name="ro1">
          <table:table-cell/>
          <table:table-cell table:style-name="ce113" office:value-type="string" calcext:value-type="string">
            <text:p>VANE INCREMENTAL </text:p>
          </table:table-cell>
          <table:table-cell table:style-name="ce135" table:formula="of:=NPV([.H79];[.C62:.G62])" office:value-type="float" office:value="-2831.30979121947" calcext:value-type="float">
            <text:p><text:s/>-2,831.3 </text:p>
          </table:table-cell>
          <table:table-cell table:number-columns-repeated="2"/>
          <table:table-cell>
            <draw:frame draw:z-index="1" draw:name="10 Imagen" draw:style-name="gr1" draw:text-style-name="P1" svg:width="2.449cm" svg:height="0.792cm" svg:x="0.741cm" svg:y="0.503cm">
              <draw:image xlink:href="Pictures/10000000000000630000001E66F0A09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78" table:formula="of:=+[$'costo capital'.M41]" office:value-type="percentage" office:value="0.120291262135922" calcext:value-type="percentage">
            <text:p>12.03 %</text:p>
          </table:table-cell>
          <table:table-cell table:number-columns-repeated="16376"/>
        </table:table-row>
        <table:table-row table:style-name="ro1">
          <table:table-cell/>
          <table:table-cell table:style-name="ce113" office:value-type="string" calcext:value-type="string">
            <text:p>TIRE INCREMENTAL </text:p>
          </table:table-cell>
          <table:table-cell table:style-name="ce136" table:formula="of:=IRR([.C62:.G62])" office:value-type="percentage" office:value="-0.0963526583904393" calcext:value-type="percentage">
            <text:p>-9.64 %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EVALUACIÓN POR METODOLOGÍA : APV (VALOR PRESENTE AJUSTADO)</text:p>
          </table:table-cell>
          <table:table-cell table:number-columns-repeated="16382"/>
        </table:table-row>
        <table:table-row table:style-name="ro1">
          <table:table-cell table:number-columns-repeated="4"/>
          <table:table-cell>
            <draw:frame draw:z-index="2" draw:name="3 Imagen" draw:style-name="gr1" draw:text-style-name="P1" svg:width="11.034cm" svg:height="9.127cm" svg:x="1.111cm" svg:y="0.079cm">
              <draw:image xlink:href="Pictures/10000000000001BD000001CBA60D0C6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/>
          <table:table-cell>
            <draw:frame draw:z-index="3" draw:name="4 Imagen" draw:style-name="gr1" draw:text-style-name="P1" svg:width="4.391cm" svg:height="1.718cm" svg:x="0.45cm" svg:y="0.159cm">
              <draw:image xlink:href="Pictures/10000000000000DE0000003DE531F8D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7" table:formula="of:=NPV([.H79];[.D68:.G68])+[.C68]" office:value-type="float" office:value="5282.49592904639" calcext:value-type="float">
            <text:p>5,28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CALCULO DEL VANF Y TIRF</text:p>
          </table:table-cell>
          <table:covered-table-cell table:style-name="ce138"/>
          <table:table-cell table:number-columns-repeated="16381"/>
        </table:table-row>
        <table:table-row table:style-name="ro1">
          <table:table-cell/>
          <table:table-cell>
            <draw:frame draw:z-index="4" draw:name="9 Imagen" draw:style-name="gr1" draw:text-style-name="P1" svg:width="4.418cm" svg:height="1.586cm" svg:x="0.37cm" svg:y="0.185cm">
              <draw:image xlink:href="Pictures/10000000000000D00000003C6B66D52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4">
          <table:table-cell table:number-columns-repeated="2"/>
          <table:table-cell table:style-name="ce139" table:formula="of:=NPV([.H81];[.D73:.E73])" office:value-type="float" office:value="232.94668440215" calcext:value-type="float">
            <text:p>233 </text:p>
          </table:table-cell>
          <table:table-cell table:number-columns-repeated="16381"/>
        </table:table-row>
        <table:table-row table:style-name="ro15">
          <table:table-cell table:number-columns-repeated="16384"/>
        </table:table-row>
        <table:table-row table:style-name="ro1">
          <table:table-cell/>
          <table:table-cell>
            <draw:frame draw:z-index="5" draw:name="12 Imagen" draw:style-name="gr1" draw:text-style-name="P1" svg:width="3.862cm" svg:height="1.058cm" svg:x="0.714cm" svg:y="0.265cm">
              <draw:image xlink:href="Pictures/100000000000009600000028D6ED30E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40" table:formula="of:=[.C89]+[.C93]" office:value-type="float" office:value="5515.44261344854" calcext:value-type="float">
            <text:p>5,515.44</text:p>
          </table:table-cell>
          <table:table-cell table:number-columns-repeated="16381"/>
        </table:table-row>
        <table:table-row table:style-name="ro16">
          <table:table-cell table:number-columns-repeated="16384"/>
        </table:table-row>
        <table:table-row table:style-name="ro1">
          <table:table-cell/>
          <table:table-cell table:style-name="ce115" office:value-type="string" calcext:value-type="string">
            <text:p>TIRF</text:p>
          </table:table-cell>
          <table:table-cell table:style-name="ce141" table:formula="of:=+IRR([.C75:.G75])" office:value-type="percentage" office:value="0.509494473352241" calcext:value-type="percentage">
            <text:p>51 %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/>
    </number:number-style>
    <number:number-style style:name="N136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 number:grouping="true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1">
      <number:text loext:blank-width-char=" "> </number:text>
      <number:text-content/>
      <number:text loext:blank-width-char=" 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ter_20_Sin_20_Py" style:display-name="PageStyle_Alter Si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capital" style:display-name="PageStyle_costo capit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Con_20_py" style:display-name="PageStyle_Alter Con p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 Pavilion</meta:initial-creator>
    <dc:creator>EDISON ACHALMA</dc:creator>
    <meta:creation-date>2012-10-08T15:21:45</meta:creation-date>
    <dc:date>2021-08-04T00:06:28</dc:date>
    <meta:generator>LibreOffice/24.2.4.2$Linux_X86_64 LibreOffice_project/420$Build-2</meta:generator>
    <meta:document-statistic meta:table-count="3" meta:cell-count="458" meta:object-count="26"/>
    <meta:user-defined meta:name="AppVersion">16.0300</meta:user-defined>
  </office:meta>
</office:document-meta>
</file>