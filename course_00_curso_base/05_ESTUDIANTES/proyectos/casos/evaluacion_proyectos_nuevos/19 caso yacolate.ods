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189cm"/>
    </style:style>
    <style:style style:name="co9" style:family="table-column">
      <style:table-column-properties fo:break-before="auto" style:column-width="2.406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1.286cm"/>
    </style:style>
    <style:style style:name="co13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1.51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0.4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5.985cm"/>
    </style:style>
    <style:style style:name="co20" style:family="table-column">
      <style:table-column-properties fo:break-before="auto" style:column-width="2.798cm"/>
    </style:style>
    <style:style style:name="co21" style:family="table-column">
      <style:table-column-properties fo:break-before="auto" style:column-width="2.265cm"/>
    </style:style>
    <style:style style:name="co22" style:family="table-column">
      <style:table-column-properties fo:break-before="auto" style:column-width="1.566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453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0.392cm"/>
    </style:style>
    <style:style style:name="co27" style:family="table-column">
      <style:table-column-properties fo:break-before="auto" style:column-width="2.574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93cm"/>
    </style:style>
    <style:style style:name="co30" style:family="table-column">
      <style:table-column-properties fo:break-before="auto" style:column-width="3.468cm"/>
    </style:style>
    <style:style style:name="co31" style:family="table-column">
      <style:table-column-properties fo:break-before="auto" style:column-width="3.776cm"/>
    </style:style>
    <style:style style:name="co32" style:family="table-column">
      <style:table-column-properties fo:break-before="auto" style:column-width="3.048cm"/>
    </style:style>
    <style:style style:name="co33" style:family="table-column">
      <style:table-column-properties fo:break-before="auto" style:column-width="3.02cm"/>
    </style:style>
    <style:style style:name="co34" style:family="table-column">
      <style:table-column-properties fo:break-before="auto" style:column-width="2.489cm"/>
    </style:style>
    <style:style style:name="co35" style:family="table-column">
      <style:table-column-properties fo:break-before="auto" style:column-width="2.628cm"/>
    </style:style>
    <style:style style:name="co36" style:family="table-column">
      <style:table-column-properties fo:break-before="auto" style:column-width="2.741cm"/>
    </style:style>
    <style:style style:name="co37" style:family="table-column">
      <style:table-column-properties fo:break-before="auto" style:column-width="2.937cm"/>
    </style:style>
    <style:style style:name="co38" style:family="table-column">
      <style:table-column-properties fo:break-before="auto" style:column-width="2.713cm"/>
    </style:style>
    <style:style style:name="co39" style:family="table-column">
      <style:table-column-properties fo:break-before="auto" style:column-width="2.097cm"/>
    </style:style>
    <style:style style:name="co40" style:family="table-column">
      <style:table-column-properties fo:break-before="auto" style:column-width="6.348cm"/>
    </style:style>
    <style:style style:name="co41" style:family="table-column">
      <style:table-column-properties fo:break-before="auto" style:column-width="2.545cm"/>
    </style:style>
    <style:style style:name="co42" style:family="table-column">
      <style:table-column-properties fo:break-before="auto" style:column-width="2.461cm"/>
    </style:style>
    <style:style style:name="co43" style:family="table-column">
      <style:table-column-properties fo:break-before="auto" style:column-width="5.51cm"/>
    </style:style>
    <style:style style:name="co44" style:family="table-column">
      <style:table-column-properties fo:break-before="auto" style:column-width="4.923cm"/>
    </style:style>
    <style:style style:name="co45" style:family="table-column">
      <style:table-column-properties fo:break-before="auto" style:column-width="4.699cm"/>
    </style:style>
    <style:style style:name="co46" style:family="table-column">
      <style:table-column-properties fo:break-before="auto" style:column-width="2.35cm"/>
    </style:style>
    <style:style style:name="co47" style:family="table-column">
      <style:table-column-properties fo:break-before="auto" style:column-width="3.3cm"/>
    </style:style>
    <style:style style:name="co48" style:family="table-column">
      <style:table-column-properties fo:break-before="auto" style:column-width="2.656cm"/>
    </style:style>
    <style:style style:name="co49" style:family="table-column">
      <style:table-column-properties fo:break-before="auto" style:column-width="0.644cm"/>
    </style:style>
    <style:style style:name="co50" style:family="table-column">
      <style:table-column-properties fo:break-before="auto" style:column-width="3.607cm"/>
    </style:style>
    <style:style style:name="co51" style:family="table-column">
      <style:table-column-properties fo:break-before="auto" style:column-width="2.321cm"/>
    </style:style>
    <style:style style:name="co52" style:family="table-column">
      <style:table-column-properties fo:break-before="auto" style:column-width="1.203cm"/>
    </style:style>
    <style:style style:name="co53" style:family="table-column">
      <style:table-column-properties fo:break-before="auto" style:column-width="4.307cm"/>
    </style:style>
    <style:style style:name="co54" style:family="table-column">
      <style:table-column-properties fo:break-before="auto" style:column-width="4.39cm"/>
    </style:style>
    <style:style style:name="co55" style:family="table-column">
      <style:table-column-properties fo:break-before="auto" style:column-width="2.125cm"/>
    </style:style>
    <style:style style:name="co56" style:family="table-column">
      <style:table-column-properties fo:break-before="auto" style:column-width="2.237cm"/>
    </style:style>
    <style:style style:name="co57" style:family="table-column">
      <style:table-column-properties fo:break-before="auto" style:column-width="2.378cm"/>
    </style:style>
    <style:style style:name="co58" style:family="table-column">
      <style:table-column-properties fo:break-before="auto" style:column-width="0.699cm"/>
    </style:style>
    <style:style style:name="co59" style:family="table-column">
      <style:table-column-properties fo:break-before="auto" style:column-width="5.678cm"/>
    </style:style>
    <style:style style:name="co60" style:family="table-column">
      <style:table-column-properties fo:break-before="auto" style:column-width="3.972cm"/>
    </style:style>
    <style:style style:name="co61" style:family="table-column">
      <style:table-column-properties fo:break-before="auto" style:column-width="3.385cm"/>
    </style:style>
    <style:style style:name="co62" style:family="table-column">
      <style:table-column-properties fo:break-before="auto" style:column-width="2.602cm"/>
    </style:style>
    <style:style style:name="co63" style:family="table-column">
      <style:table-column-properties fo:break-before="auto" style:column-width="3.272cm"/>
    </style:style>
    <style:style style:name="co64" style:family="table-column">
      <style:table-column-properties fo:break-before="auto" style:column-width="4.251cm"/>
    </style:style>
    <style:style style:name="co65" style:family="table-column">
      <style:table-column-properties fo:break-before="auto" style:column-width="4.027cm"/>
    </style:style>
    <style:style style:name="co66" style:family="table-column">
      <style:table-column-properties fo:break-before="auto" style:column-width="6.796cm"/>
    </style:style>
    <style:style style:name="co67" style:family="table-column">
      <style:table-column-properties fo:break-before="auto" style:column-width="2.88cm"/>
    </style:style>
    <style:style style:name="co68" style:family="table-column">
      <style:table-column-properties fo:break-before="auto" style:column-width="3.076cm"/>
    </style:style>
    <style:style style:name="co69" style:family="table-column">
      <style:table-column-properties fo:break-before="auto" style:column-width="1.79cm"/>
    </style:style>
    <style:style style:name="co70" style:family="table-column">
      <style:table-column-properties fo:break-before="auto" style:column-width="7.105cm"/>
    </style:style>
    <style:style style:name="co71" style:family="table-column">
      <style:table-column-properties fo:break-before="auto" style:column-width="3.133cm"/>
    </style:style>
    <style:style style:name="co72" style:family="table-column">
      <style:table-column-properties fo:break-before="auto" style:column-width="2.432cm"/>
    </style:style>
    <style:style style:name="co73" style:family="table-column">
      <style:table-column-properties fo:break-before="auto" style:column-width="2.685cm"/>
    </style:style>
    <style:style style:name="co74" style:family="table-column">
      <style:table-column-properties fo:break-before="auto" style:column-width="2.965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1.734cm"/>
    </style:style>
    <style:style style:name="co77" style:family="table-column">
      <style:table-column-properties fo:break-before="auto" style:column-width="2.182cm"/>
    </style:style>
    <style:style style:name="co78" style:family="table-column">
      <style:table-column-properties fo:break-before="auto" style:column-width="2.21cm"/>
    </style:style>
    <style:style style:name="co79" style:family="table-column">
      <style:table-column-properties fo:break-before="auto" style:column-width="0.616cm"/>
    </style:style>
    <style:style style:name="co80" style:family="table-column">
      <style:table-column-properties fo:break-before="auto" style:column-width="5.426cm"/>
    </style:style>
    <style:style style:name="co81" style:family="table-column">
      <style:table-column-properties fo:break-before="auto" style:column-width="4.223cm"/>
    </style:style>
    <style:style style:name="co82" style:family="table-column">
      <style:table-column-properties fo:break-before="auto" style:column-width="0.531cm"/>
    </style:style>
    <style:style style:name="co83" style:family="table-column">
      <style:table-column-properties fo:break-before="auto" style:column-width="1.762cm"/>
    </style:style>
    <style:style style:name="co84" style:family="table-column">
      <style:table-column-properties fo:break-before="auto" style:column-width="6.713cm"/>
    </style:style>
    <style:style style:name="co85" style:family="table-column">
      <style:table-column-properties fo:break-before="auto" style:column-width="3.524cm"/>
    </style:style>
    <style:style style:name="co86" style:family="table-column">
      <style:table-column-properties fo:break-before="auto" style:column-width="3.161cm"/>
    </style:style>
    <style:style style:name="co87" style:family="table-column">
      <style:table-column-properties fo:break-before="auto" style:column-width="5.398cm"/>
    </style:style>
    <style:style style:name="co88" style:family="table-column">
      <style:table-column-properties fo:break-before="auto" style:column-width="0.866cm"/>
    </style:style>
    <style:style style:name="co89" style:family="table-column">
      <style:table-column-properties fo:break-before="auto" style:column-width="5.034cm"/>
    </style:style>
    <style:style style:name="co90" style:family="table-column">
      <style:table-column-properties fo:break-before="auto" style:column-width="0.727cm"/>
    </style:style>
    <style:style style:name="co91" style:family="table-column">
      <style:table-column-properties fo:break-before="auto" style:column-width="1.819cm"/>
    </style:style>
    <style:style style:name="co92" style:family="table-column">
      <style:table-column-properties fo:break-before="auto" style:column-width="1.649cm"/>
    </style:style>
    <style:style style:name="co93" style:family="table-column">
      <style:table-column-properties fo:break-before="auto" style:column-width="1.147cm"/>
    </style:style>
    <style:style style:name="co94" style:family="table-column">
      <style:table-column-properties fo:break-before="auto" style:column-width="0.559cm"/>
    </style:style>
    <style:style style:name="co95" style:family="table-column">
      <style:table-column-properties fo:break-before="auto" style:column-width="4.503cm"/>
    </style:style>
    <style:style style:name="co96" style:family="table-column">
      <style:table-column-properties fo:break-before="auto" style:column-width="0.503cm"/>
    </style:style>
    <style:style style:name="co97" style:family="table-column">
      <style:table-column-properties fo:break-before="auto" style:column-width="2.014cm"/>
    </style:style>
    <style:style style:name="co98" style:family="table-column">
      <style:table-column-properties fo:break-before="auto" style:column-width="4.671cm"/>
    </style:style>
    <style:style style:name="co99" style:family="table-column">
      <style:table-column-properties fo:break-before="auto" style:column-width="4.727cm"/>
    </style:style>
    <style:style style:name="co100" style:family="table-column">
      <style:table-column-properties fo:break-before="auto" style:column-width="6.152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873cm"/>
    </style:style>
    <style:style style:name="co103" style:family="table-column">
      <style:table-column-properties fo:break-before="auto" style:column-width="6.992cm"/>
    </style:style>
    <style:style style:name="co104" style:family="table-column">
      <style:table-column-properties fo:break-before="auto" style:column-width="1.986cm"/>
    </style:style>
    <style:style style:name="co105" style:family="table-column">
      <style:table-column-properties fo:break-before="auto" style:column-width="4.083cm"/>
    </style:style>
    <style:style style:name="co106" style:family="table-column">
      <style:table-column-properties fo:break-before="auto" style:column-width="3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612cm" fo:break-before="auto" style:use-optimal-row-height="tru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0.582cm" fo:break-before="auto" style:use-optimal-row-height="false"/>
    </style:style>
    <style:style style:name="ro17" style:family="table-row">
      <style:table-row-properties style:row-height="1.296cm" fo:break-before="auto" style:use-optimal-row-height="fals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1.508cm" fo:break-before="auto" style:use-optimal-row-height="false"/>
    </style:style>
    <style:style style:name="ro20" style:family="table-row">
      <style:table-row-properties style:row-height="1.111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0.767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0.741cm" fo:break-before="auto" style:use-optimal-row-height="false"/>
    </style:style>
    <style:style style:name="ro25" style:family="table-row">
      <style:table-row-properties style:row-height="0.794cm" fo:break-before="auto" style:use-optimal-row-height="false"/>
    </style:style>
    <style:style style:name="ro26" style:family="table-row">
      <style:table-row-properties style:row-height="1.984cm" fo:break-before="auto" style:use-optimal-row-height="false"/>
    </style:style>
    <style:style style:name="ro27" style:family="table-row">
      <style:table-row-properties style:row-height="0.661cm" fo:break-before="auto" style:use-optimal-row-height="false"/>
    </style:style>
    <style:style style:name="ro28" style:family="table-row">
      <style:table-row-properties style:row-height="0.609cm" fo:break-before="auto" style:use-optimal-row-height="false"/>
    </style:style>
    <style:style style:name="ro29" style:family="table-row">
      <style:table-row-properties style:row-height="0.688cm" fo:break-before="auto" style:use-optimal-row-height="false"/>
    </style:style>
    <style:style style:name="ro30" style:family="table-row">
      <style:table-row-properties style:row-height="0.841cm" fo:break-before="auto" style:use-optimal-row-height="true"/>
    </style:style>
    <style:style style:name="ro31" style:family="table-row">
      <style:table-row-properties style:row-height="0.714cm" fo:break-before="auto" style:use-optimal-row-height="false"/>
    </style:style>
    <style:style style:name="ro32" style:family="table-row">
      <style:table-row-properties style:row-height="1.058cm" fo:break-before="auto" style:use-optimal-row-height="false"/>
    </style:style>
    <style:style style:name="ro33" style:family="table-row">
      <style:table-row-properties style:row-height="1.402cm" fo:break-before="auto" style:use-optimal-row-height="false"/>
    </style:style>
    <style:style style:name="ro34" style:family="table-row">
      <style:table-row-properties style:row-height="0.658cm" fo:break-before="auto" style:use-optimal-row-height="true"/>
    </style:style>
    <style:style style:name="ro35" style:family="table-row">
      <style:table-row-properties style:row-height="0.82cm" fo:break-before="auto" style:use-optimal-row-height="false"/>
    </style:style>
    <style:style style:name="ta1" style:family="table" style:master-page-name="PageStyle_5f_Resumen_20_del_20_escenario">
      <style:table-properties table:display="true" style:writing-mode="lr-tb" table:tab-color="#92d050"/>
    </style:style>
    <style:style style:name="ta2" style:family="table" style:master-page-name="PageStyle_5f_Sensibilidad">
      <style:table-properties table:display="true" style:writing-mode="lr-tb" table:tab-color="#92d050"/>
    </style:style>
    <style:style style:name="ta3" style:family="table" style:master-page-name="PageStyle_5f_Resumen">
      <style:table-properties table:display="true" style:writing-mode="lr-tb" table:tab-color="#92d050"/>
    </style:style>
    <style:style style:name="ta4" style:family="table" style:master-page-name="PageStyle_5f_Resumen">
      <style:table-properties table:display="false" style:writing-mode="lr-tb" table:tab-color="#92d050"/>
    </style:style>
    <style:style style:name="ta5" style:family="table" style:master-page-name="PageStyle_5f_Presupuesto_20_de_20_ventas">
      <style:table-properties table:display="true" style:writing-mode="lr-tb" table:tab-color="#7030a0"/>
    </style:style>
    <style:style style:name="ta6" style:family="table" style:master-page-name="PageStyle_5f_INVERSION_20_INICIAL">
      <style:table-properties table:display="true" style:writing-mode="lr-tb" table:tab-color="#7030a0"/>
    </style:style>
    <style:style style:name="ta7" style:family="table" style:master-page-name="PageStyle_5f_Depreciacion_20_y_20_VR">
      <style:table-properties table:display="true" style:writing-mode="lr-tb"/>
    </style:style>
    <style:style style:name="ta8" style:family="table" style:master-page-name="PageStyle_5f_Capital_20_de_20_Trabajo_20__28_kw_29_">
      <style:table-properties table:display="true" style:writing-mode="lr-tb"/>
    </style:style>
    <style:style style:name="ta9" style:family="table" style:master-page-name="PageStyle_5f_SUELDO_20_BASE">
      <style:table-properties table:display="true" style:writing-mode="lr-tb"/>
    </style:style>
    <style:style style:name="ta10" style:family="table" style:master-page-name="PageStyle_5f_Planilla">
      <style:table-properties table:display="true" style:writing-mode="lr-tb" table:tab-color="#7030a0"/>
    </style:style>
    <style:style style:name="ta11" style:family="table" style:master-page-name="PageStyle_5f_costos_20_por_20_mes">
      <style:table-properties table:display="true" style:writing-mode="lr-tb" table:tab-color="#7030a0"/>
    </style:style>
    <style:style style:name="ta12" style:family="table" style:master-page-name="PageStyle_5f_Costos_5f_Ventas">
      <style:table-properties table:display="true" style:writing-mode="lr-tb" table:tab-color="#7030a0"/>
    </style:style>
    <style:style style:name="ta13" style:family="table" style:master-page-name="PageStyle_5f_Gastos_20_Operativos">
      <style:table-properties table:display="true" style:writing-mode="lr-tb" table:tab-color="#7030a0"/>
    </style:style>
    <style:style style:name="ta14" style:family="table" style:master-page-name="PageStyle_5f_Flujo_5f_Deuda">
      <style:table-properties table:display="true" style:writing-mode="lr-tb" table:tab-color="#ff0000"/>
    </style:style>
    <style:style style:name="ta15" style:family="table" style:master-page-name="PageStyle_5f_Costos_5f_Unitario_20_">
      <style:table-properties table:display="true" style:writing-mode="lr-tb" table:tab-color="#ffff00"/>
    </style:style>
    <style:style style:name="ta16" style:family="table" style:master-page-name="PageStyle_5f_PUNTO_20_DE_20_EQUILIBRIO">
      <style:table-properties table:display="true" style:writing-mode="lr-tb" table:tab-color="#ff0000"/>
    </style:style>
    <style:style style:name="ta17" style:family="table" style:master-page-name="PageStyle_5f_ESTADO_20_RESULTADOS_20_">
      <style:table-properties table:display="true" style:writing-mode="lr-tb" table:tab-color="#ffff00"/>
    </style:style>
    <style:style style:name="ta18" style:family="table" style:master-page-name="PageStyle_5f_IGV">
      <style:table-properties table:display="true" style:writing-mode="lr-tb" table:tab-color="#92d050"/>
    </style:style>
    <style:style style:name="ta19" style:family="table" style:master-page-name="PageStyle_5f__20_Ku_20_COK">
      <style:table-properties table:display="true" style:writing-mode="lr-tb" table:tab-color="#ff0000"/>
    </style:style>
    <style:style style:name="ta20" style:family="table" style:master-page-name="PageStyle_5f_Ke_20_y_20_Kwacc_20_WACC">
      <style:table-properties table:display="true" style:writing-mode="lr-tb" table:tab-color="#ff0000"/>
    </style:style>
    <style:style style:name="ta21" style:family="table" style:master-page-name="PageStyle_5f_Flujos_20_de_20_Caja">
      <style:table-properties table:display="true" style:writing-mode="lr-tb" table:tab-color="#92d050"/>
    </style:style>
    <style:style style:name="ta22" style:family="table" style:master-page-name="PageStyle_5f_Rentabilidad">
      <style:table-properties table:display="true" style:writing-mode="lr-tb" table:tab-color="#92d050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148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35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35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48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26" style:family="table-cell" style:parent-style-name="Default" style:data-style-name="N138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27" style:family="table-cell" style:parent-style-name="Default" style:data-style-name="N4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28" style:family="table-cell" style:parent-style-name="Default" style:data-style-name="N2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29" style:family="table-cell" style:parent-style-name="Default" style:data-style-name="N1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30" style:family="table-cell" style:parent-style-name="Default" style:data-style-name="N135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31" style:family="table-cell" style:parent-style-name="Default" style:data-style-name="N135">
      <style:table-cell-properties fo:border-bottom="1.76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32" style:family="table-cell" style:parent-style-name="Normal_20_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5" style:data-style-name="N2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5">
      <style:table-cell-properties fo:border-bottom="0.74pt solid #000000" fo:background-color="#4472c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8" style:family="table-cell" style:parent-style-name="Normal_20_5">
      <style:table-cell-properties fo:border-bottom="0.74pt solid #000000" fo:background-color="#4472c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9" style:family="table-cell" style:parent-style-name="Normal_20_5">
      <style:table-cell-properties fo:background-color="#bdd7ee" style:diagonal-bl-tr="none" style:diagonal-tl-br="none" fo:border="none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Normal_20_5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Normal_20_5" style:data-style-name="N14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Normal_20_5" style:data-style-name="N146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5" style:data-style-name="N147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Normal_20_5">
      <style:table-cell-properties fo:background-color="#bdd7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Normal_20_5" style:data-style-name="N146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5" style:data-style-name="N14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5" style:data-style-name="N146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Normal_20_5" style:data-style-name="N14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0" style:family="table-cell" style:parent-style-name="Normal_20_5" style:data-style-name="N3">
      <style:table-cell-properties fo:border-bottom="0.74pt solid #000000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Normal_20_5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Normal_20_5" style:data-style-name="N4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al_20_5">
      <style:table-cell-properties fo:background-color="#bdd7ee" style:diagonal-bl-tr="none" style:diagonal-tl-br="none" fo:border="none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Normal_20_5" style:data-style-name="N2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5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5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5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Normal_20_5" style:data-style-name="N3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Normal_20_5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Normal_20_5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Normal_20_5" style:data-style-name="N11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Normal_20_5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Excel_20_Built-in_20_Percent" style:data-style-name="N11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20_Built-in_20_Percent" style:data-style-name="N11">
      <style:table-cell-properties fo:background-color="#fbe5d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Normal_20_5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Normal_20_5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Normal_20_5" style:data-style-name="N135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Normal_20_5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Normal_20_5" style:data-style-name="N145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Normal_20_5" style:data-style-name="N14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Normal_20_5" style:data-style-name="N14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5" style:data-style-name="N141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5" style:data-style-name="N14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Normal_20_5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78" style:family="table-cell" style:parent-style-name="Normal_20_5" style:data-style-name="N11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Percent" style:data-style-name="N2">
      <style:table-cell-properties fo:background-color="#fbe5d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4">
      <style:table-cell-properties fo:background-color="#dae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20_4">
      <style:table-cell-properties fo:background-color="#4472c4" style:diagonal-bl-tr="none" style:diagonal-tl-br="none" fo:border="none" style:rotation-align="none">
        <loext:background-complex-color loext:theme-type="accen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Normal_20_4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84" style:family="table-cell" style:parent-style-name="Normal_20_4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Normal_20_4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4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4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4" style:data-style-name="N1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4" style:data-style-name="N13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4" style:data-style-name="N2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4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4" style:data-style-name="N1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deebf7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4">
      <style:table-cell-properties fo:background-color="#deebf7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4" style:data-style-name="N135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4" style:data-style-name="N135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4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4" style:data-style-name="N11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4" style:data-style-name="N10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Millares_20_3" style:data-style-name="N148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Normal_20_4" style:data-style-name="N13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4" style:data-style-name="N4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4" style:data-style-name="N2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4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07" style:family="table-cell" style:parent-style-name="Normal_20_4">
      <style:table-cell-properties fo:background-color="#dae3f3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4" style:data-style-name="N13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4" style:data-style-name="N13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/>
    </style:style>
    <style:style style:name="ce112" style:family="table-cell" style:parent-style-name="Normal_20_4" style:data-style-name="N138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20_4" style:data-style-name="N4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4" style:data-style-name="N2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11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138">
      <style:table-cell-properties style:rotation-align="none"/>
    </style:style>
    <style:style style:name="ce124" style:family="table-cell" style:parent-style-name="Default">
      <style:table-cell-properties fo:background-color="#4472c4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dae3f3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0.74pt solid #000000" style:rotation-align="none"/>
    </style:style>
    <style:style style:name="ce129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30" style:family="table-cell" style:parent-style-name="Default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31" style:family="table-cell" style:parent-style-name="Default">
      <style:table-cell-properties fo:background-color="transparent" style:rotation-align="none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>
      <style:table-cell-properties fo:background-color="#4472c4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34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35" style:family="table-cell" style:parent-style-name="Default" style:data-style-name="N3">
      <style:table-cell-properties fo:background-color="transparent" style:rotation-align="none"/>
    </style:style>
    <style:style style:name="ce136" style:family="table-cell" style:parent-style-name="Excel_20_Built-in_20_Comma" style:data-style-name="N127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Excel_20_Built-in_20_Comma" style:data-style-name="N127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127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4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 style:data-style-name="N10">
      <style:table-cell-properties style:rotation-align="none"/>
    </style:style>
    <style:style style:name="ce143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4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5" style:family="table-cell" style:parent-style-name="Default" style:data-style-name="N127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46" style:family="table-cell" style:parent-style-name="Excel_20_Built-in_20_Percent" style:data-style-name="N10">
      <style:table-cell-properties fo:border-bottom="1.76pt solid #000000" fo:background-color="#dae3f3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 style:data-style-name="N137">
      <style:table-cell-properties fo:border-bottom="none" fo:background-color="#4472c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ce149" style:family="table-cell" style:parent-style-name="Default" style:data-style-name="N137">
      <style:table-cell-properties fo:border-bottom="none" fo:background-color="#4472c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ce150" style:family="table-cell" style:parent-style-name="Excel_20_Built-in_20_Comma" style:data-style-name="N12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Percent" style:data-style-name="N10">
      <style:table-cell-properties fo:border-bottom="1.76pt solid #000000" fo:background-color="#dae3f3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27">
      <style:table-cell-properties style:rotation-align="none"/>
    </style:style>
    <style:style style:name="ce153" style:family="table-cell" style:parent-style-name="Default">
      <style:table-cell-properties fo:background-color="#4472c4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4" style:family="table-cell" style:parent-style-name="Default">
      <style:table-cell-properties fo:background-color="#dae3f3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6" style:family="table-cell" style:parent-style-name="Default">
      <style:table-cell-properties fo:background-color="#4472c4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9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60" style:family="table-cell" style:parent-style-name="Default">
      <style:table-cell-properties fo:background-color="#ededed" style:diagonal-bl-tr="none" style:diagonal-tl-br="none" fo:border="0.74pt solid #000000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61" style:family="table-cell" style:parent-style-name="Default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162" style:family="table-cell" style:parent-style-name="Default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163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164" style:family="table-cell" style:parent-style-name="Default" style:data-style-name="N127">
      <style:table-cell-properties style:diagonal-bl-tr="none" style:diagonal-tl-br="none" fo:border="0.74pt solid #000000" style:rotation-align="none"/>
    </style:style>
    <style:style style:name="ce165" style:family="table-cell" style:parent-style-name="Default" style:data-style-name="N127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166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167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6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71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</style:style>
    <style:style style:name="ce172" style:family="table-cell" style:parent-style-name="Default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7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74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75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</style:style>
    <style:style style:name="ce176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</style:style>
    <style:style style:name="ce177" style:family="table-cell" style:parent-style-name="Default" style:data-style-name="N3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7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 style:data-style-name="N3">
      <style:table-cell-properties fo:background-color="#fff2cc" style:diagonal-bl-tr="none" style:diagonal-tl-br="none" fo:border="0.74pt solid #000000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81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3" style:family="table-cell" style:parent-style-name="Excel_20_Built-in_20_Comma" style:data-style-name="N137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5" style:family="table-cell" style:parent-style-name="Default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6" style:family="table-cell" style:parent-style-name="Default" style:data-style-name="N127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7" style:family="table-cell" style:parent-style-name="Excel_20_Built-in_20_Comma" style:data-style-name="N127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ackground-color="#deebf7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90" style:family="table-cell" style:parent-style-name="Normal_20_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Normal_20_5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Normal_20_5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Normal_20_5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195" style:family="table-cell" style:parent-style-name="Normal_20_5">
      <style:table-cell-properties fo:border-bottom="0.74pt solid #000000" fo:background-color="#dae3f3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5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Normal_20_5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Normal_20_5">
      <style:table-cell-properties fo:border-bottom="0.74pt solid #000000" fo:background-color="#dae3f3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5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Normal_20_5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light1" loext:color-type="theme"/>
      </style:text-properties>
    </style:style>
    <style:style style:name="ce201" style:family="table-cell" style:parent-style-name="Normal_20_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02" style:family="table-cell" style:parent-style-name="Normal_20_5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Normal_20_5">
      <style:table-cell-properties fo:border-bottom="1.76pt solid #000000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04" style:family="table-cell" style:parent-style-name="Normal_20_5">
      <style:table-cell-properties fo:border-bottom="1.76pt solid #000000" fo:background-color="#4472c4" style:diagonal-bl-tr="none" style:diagonal-tl-br="none" fo:border-left="1.76pt solid #000000" fo:border-right="0.74pt solid #000000" style:rotation-align="none" fo:border-top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05" style:family="table-cell" style:parent-style-name="Normal_20_5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Normal_20_5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Normal_20_5">
      <style:table-cell-properties fo:border-bottom="1.76pt solid #000000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08" style:family="table-cell" style:parent-style-name="Normal_20_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5">
      <style:table-cell-properties fo:background-color="#dae3f3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Millares_20_4" style:data-style-name="N12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Millares_20_4" style:data-style-name="N127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Millares_20_4" style:data-style-name="N12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Normal_20_5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Millares_20_4" style:data-style-name="N127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light1" loext:color-type="theme"/>
      </style:text-properties>
    </style:style>
    <style:style style:name="ce215" style:family="table-cell" style:parent-style-name="Normal_20_5" style:data-style-name="N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Normal_20_5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Normal_20_5" style:data-style-name="N4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18" style:family="table-cell" style:parent-style-name="Normal_20_5" style:data-style-name="N3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19" style:family="table-cell" style:parent-style-name="Normal_20_5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Normal_20_5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Normal_20_5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Normal_20_5" style:data-style-name="N4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23" style:family="table-cell" style:parent-style-name="Normal_20_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Normal_20_5">
      <style:table-cell-properties fo:border-bottom="0.74pt solid #000000" fo:background-color="#4472c4" style:diagonal-bl-tr="none" style:diagonal-tl-br="none" fo:border-left="none" fo:border-right="none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25" style:family="table-cell" style:parent-style-name="Normal_20_5" style:data-style-name="N3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26" style:family="table-cell" style:parent-style-name="Normal_20_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Normal_20_5">
      <style:table-cell-properties fo:border-bottom="0.74pt solid #000000" fo:background-color="#4472c4" style:diagonal-bl-tr="none" style:diagonal-tl-br="none" fo:border-left="none" fo:border-right="1.76pt solid #000000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28" style:family="table-cell" style:parent-style-name="Normal_20_5" style:data-style-name="N3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29" style:family="table-cell" style:parent-style-name="Normal_20_5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Normal_20_5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Normal_20_5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Normal_20_5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Normal_20_5" style:data-style-name="N127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Millares_20_4" style:data-style-name="N12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Millares_20_4" style:data-style-name="N127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Millares_20_4" style:data-style-name="N12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Millares_20_4" style:data-style-name="N127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39" style:family="table-cell" style:parent-style-name="Normal_20_5" style:data-style-name="N4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Normal_20_5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Normal_20_5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Normal_20_5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Normal_20_5" style:data-style-name="N4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Normal_20_5" style:data-style-name="N127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6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7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8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9" style:family="table-cell" style:parent-style-name="Default">
      <style:table-cell-properties fo:background-color="#d6dce5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Normal_20_5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51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Normal_20_5" style:data-style-name="N3">
      <style:table-cell-properties fo:background-color="#d6dce5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5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5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Normal_20_5" style:data-style-name="N3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56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Normal_20_5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58" style:family="table-cell" style:parent-style-name="Normal_20_5" style:data-style-name="N3">
      <style:table-cell-properties fo:background-color="#dae3f3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fo:background-color="#d6dce5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>
      <style:table-cell-properties fo:background-color="#dae3f3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ackground-color="#dae3f3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Default">
      <style:table-cell-properties fo:background-color="#dae3f3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Normal_20_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Normal_20_5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Normal_20_5" style:data-style-name="N3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Normal_20_5" style:data-style-name="N3">
      <style:table-cell-properties fo:border-bottom="1.76pt solid #000000" fo:background-color="#4472c4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6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69" style:family="table-cell" style:parent-style-name="Default">
      <style:table-cell-properties fo:background-color="#d6dce5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70" style:family="table-cell" style:parent-style-name="Default">
      <style:table-cell-properties fo:background-color="#d6dce5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1" style:family="table-cell" style:parent-style-name="Normal_20_5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72" style:family="table-cell" style:parent-style-name="Normal_20_5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Normal_20_5" style:data-style-name="N3">
      <style:table-cell-properties fo:background-color="#d6dce5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Normal_20_5" style:data-style-name="N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Normal_20_5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Normal_20_5" style:data-style-name="N3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77" style:family="table-cell" style:parent-style-name="Normal_20_5">
      <style:table-cell-properties fo:border-bottom="0.74pt solid #000000" fo:background-color="#4472c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78" style:family="table-cell" style:parent-style-name="Normal_20_5" style:data-style-name="N3">
      <style:table-cell-properties fo:background-color="#dae3f3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fo:background-color="#d6dce5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fo:background-color="#dae3f3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2" style:family="table-cell" style:parent-style-name="Default">
      <style:table-cell-properties fo:background-color="#dae3f3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Normal_20_5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84" style:family="table-cell" style:parent-style-name="Normal_20_5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Millares_20_4" style:data-style-name="N12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Millares_20_4" style:data-style-name="N127">
      <style:table-cell-properties fo:border-bottom="1.76pt solid #000000" fo:background-color="#4472c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8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8" style:family="table-cell" style:parent-style-name="Normal_20_5" style:data-style-name="N127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Millares_20_4" style:data-style-name="N127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91" style:family="table-cell" style:parent-style-name="Normal_20_5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Normal_20_5" style:data-style-name="N3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Normal_20_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5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95" style:family="table-cell" style:parent-style-name="Normal_20_5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96" style:family="table-cell" style:parent-style-name="Normal_20_5" style:data-style-name="N3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5">
      <style:table-cell-properties fo:border-bottom="0.74pt solid #000000" fo:background-color="#4472c4" style:diagonal-bl-tr="none" style:diagonal-tl-br="none" fo:border-left="0.74pt solid #000000" fo:border-right="0.74pt solid #000000" style:rotation-align="none" fo:border-top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98" style:family="table-cell" style:parent-style-name="Normal_20_5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Normal_20_5" style:data-style-name="N127">
      <style:table-cell-properties fo:background-color="#d6dce5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Millares_20_4" style:data-style-name="N127">
      <style:table-cell-properties fo:background-color="#d6dce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Millares_20_4" style:data-style-name="N127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02" style:family="table-cell" style:parent-style-name="Normal_20_5" style:data-style-name="N127">
      <style:table-cell-properties fo:background-color="#dae3f3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Millares_20_4" style:data-style-name="N127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Millares_20_4" style:data-style-name="N13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Normal_20_5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06" style:family="table-cell" style:parent-style-name="Normal_20_5" style:data-style-name="N4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08" style:family="table-cell" style:parent-style-name="Normal_20_5">
      <style:table-cell-properties fo:background-color="#4472c4" style:diagonal-bl-tr="none" style:diagonal-tl-br="none" fo:border="none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309" style:family="table-cell" style:parent-style-name="Normal_20_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Normal_20_5" style:data-style-name="N127">
      <style:table-cell-properties fo:background-color="#d6dce5" style:diagonal-bl-tr="none" style:diagonal-tl-br="none" fo:border="none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Millares_20_4" style:data-style-name="N12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Millares_20_4" style:data-style-name="N127">
      <style:table-cell-properties fo:background-color="#d6dc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Millares_20_4" style:data-style-name="N127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14" style:family="table-cell" style:parent-style-name="Normal_20_5" style:data-style-name="N127">
      <style:table-cell-properties fo:background-color="#dae3f3" style:diagonal-bl-tr="none" style:diagonal-tl-br="none" fo:border="none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Millares_20_4" style:data-style-name="N127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Millares_20_4" style:data-style-name="N127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17" style:family="table-cell" style:parent-style-name="Normal_20_5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 style:data-style-name="N119">
      <style:table-cell-properties style:rotation-align="none"/>
    </style:style>
    <style:style style:name="ce319" style:family="table-cell" style:parent-style-name="Normal_20_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 style:data-style-name="N3">
      <style:table-cell-properties style:rotation-align="none"/>
    </style:style>
    <style:style style:name="ce321" style:family="table-cell" style:parent-style-name="Default" style:data-style-name="N127">
      <style:table-cell-properties fo:background-color="#ffff00" style:rotation-align="none"/>
    </style:style>
    <style:style style:name="ce322" style:family="table-cell" style:parent-style-name="Default">
      <style:table-cell-properties fo:background-color="#dae3f3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23" style:family="table-cell" style:parent-style-name="Default">
      <style:table-cell-properties style:diagonal-bl-tr="none" style:diagonal-tl-br="none" fo:border="none" style:rotation-align="none"/>
    </style:style>
    <style:style style:name="ce324" style:family="table-cell" style:parent-style-name="Normal_20_5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Normal_20_5" style:data-style-name="N3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Normal_20_5" style:data-style-name="N3">
      <style:table-cell-properties fo:border-bottom="0.74pt solid #000000" fo:background-color="#dae3f3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Normal_20_5" style:data-style-name="N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8" style:family="table-cell" style:parent-style-name="Normal_20_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Millares_20_4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Millares_20_4" style:data-style-name="N127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331" style:family="table-cell" style:parent-style-name="Normal_20_5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Normal_20_5" style:data-style-name="N3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Normal_20_5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Normal_20_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Normal_20_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Normal_20_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38" style:family="table-cell" style:parent-style-name="Normal_20_2">
      <style:table-cell-properties fo:border-bottom="1.76pt solid #000000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39" style:family="table-cell" style:parent-style-name="Normal_20_2">
      <style:table-cell-properties fo:border-bottom="1.76pt solid #000000" fo:background-color="#4472c4" style:diagonal-bl-tr="none" style:diagonal-tl-br="none" fo:border-left="1.76pt solid #000000" fo:border-right="0.74pt solid #000000" style:rotation-align="none" fo:border-top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340" style:family="table-cell" style:parent-style-name="Normal_20_2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Normal_20_2" style:data-style-name="N3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Normal_20_2" style:data-style-name="N3">
      <style:table-cell-properties fo:border-bottom="1.76pt solid #000000" fo:background-color="#dae3f3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Normal_20_2" style:data-style-name="N3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Normal_20_2" style:data-style-name="N3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Normal_20_2" style:data-style-name="N3">
      <style:table-cell-properties fo:border-bottom="1.76pt solid #000000" fo:background-color="#4472c4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48" style:family="table-cell" style:parent-style-name="Normal_20_2" style:data-style-name="N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Normal_20_2">
      <style:table-cell-properties fo:border-bottom="1.76pt solid #000000" fo:background-color="#4472c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51" style:family="table-cell" style:parent-style-name="Normal_20_2">
      <style:table-cell-properties fo:border-bottom="1.76pt solid #000000" fo:background-color="#4472c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352" style:family="table-cell" style:parent-style-name="Normal_20_2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Normal_20_2" style:data-style-name="N3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Normal_20_2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Normal_20_2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Normal_20_2" style:data-style-name="N3">
      <style:table-cell-properties fo:border-bottom="1.76pt solid #000000" fo:background-color="#dae3f3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Normal_20_2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Normal_20_2" style:data-style-name="N3">
      <style:table-cell-properties fo:border-bottom="1.76pt solid #000000" fo:background-color="#4472c4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59" style:family="table-cell" style:parent-style-name="Normal_20_2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Normal_20_2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61" style:family="table-cell" style:parent-style-name="Normal_20_2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62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Normal_20_2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Normal_20_2">
      <style:table-cell-properties fo:border-bottom="0.74pt solid #000000" fo:background-color="#4472c4" style:diagonal-bl-tr="none" style:diagonal-tl-br="none" fo:border-left="none" fo:border-right="0.74pt solid #000000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366" style:family="table-cell" style:parent-style-name="Normal_20_2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67" style:family="table-cell" style:parent-style-name="Normal_20_2">
      <style:table-cell-properties fo:border-bottom="1.76pt solid #000000" fo:background-color="#4472c4" style:diagonal-bl-tr="none" style:diagonal-tl-br="none" fo:border-left="0.74pt solid #000000" fo:border-right="1.76pt solid #000000" style:rotation-align="none" fo:border-top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368" style:family="table-cell" style:parent-style-name="Normal_20_2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69" style:family="table-cell" style:parent-style-name="Normal_20_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Normal_20_2" style:data-style-name="N3">
      <style:table-cell-properties fo:border-bottom="1.76pt solid #000000" fo:background-color="#4472c4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371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Normal_20_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Normal_20_4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Normal_20_4">
      <style:table-cell-properties fo:background-color="#4472c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376" style:family="table-cell" style:parent-style-name="Normal_20_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Normal_20_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Normal_20_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Normal_20_4">
      <style:table-cell-properties fo:background-color="#4472c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80" style:family="table-cell" style:parent-style-name="Normal_20_4" style:data-style-name="N4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Porcentaje_20_3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Porcentaje_20_3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Normal_20_4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Normal_20_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Normal_20_4" style:data-style-name="N138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Normal_20_4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Normal_20_4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Normal_20_4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89" style:family="table-cell" style:parent-style-name="Normal_20_4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Normal_20_4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Normal_20_4" style:data-style-name="N2">
      <style:table-cell-properties fo:background-color="#4472c4" style:diagonal-bl-tr="none" style:diagonal-tl-br="none" fo:border="1.76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92" style:family="table-cell" style:parent-style-name="Normal_20_4" style:data-style-name="N138">
      <style:table-cell-properties fo:background-color="#4472c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393" style:family="table-cell" style:parent-style-name="Normal_20_4" style:data-style-name="N2">
      <style:table-cell-properties fo:border-bottom="1.76pt solid #000000" fo:background-color="#4472c4" style:diagonal-bl-tr="none" style:diagonal-tl-br="none" fo:border-left="none" fo:border-right="none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94" style:family="table-cell" style:parent-style-name="Normal_20_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Normal_20_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96" style:family="table-cell" style:parent-style-name="Normal_20_4" style:data-style-name="N2">
      <style:table-cell-properties fo:border-bottom="0.74pt solid #000000" fo:background-color="#fff2cc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Normal_20_4" style:data-style-name="N138">
      <style:table-cell-properties fo:background-color="#fff2cc" style:diagonal-bl-tr="none" style:diagonal-tl-br="none" fo:border="0.74pt solid #000000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Normal_20_4" style:data-style-name="N2">
      <style:table-cell-properties fo:border-bottom="1.76pt solid #000000" fo:background-color="#4472c4" style:diagonal-bl-tr="none" style:diagonal-tl-br="none" fo:border-left="none" fo:border-right="1.76pt solid #000000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399" style:family="table-cell" style:parent-style-name="Normal_20_4" style:data-style-name="N13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Normal_20_4" style:data-style-name="N14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Normal_20_4" style:data-style-name="N13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02" style:family="table-cell" style:parent-style-name="Normal_20_4">
      <style:table-cell-properties fo:background-color="#4472c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03" style:family="table-cell" style:parent-style-name="Normal_20_4" style:data-style-name="N138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Normal_20_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05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06" style:family="table-cell" style:parent-style-name="Normal_20_5">
      <style:table-cell-properties fo:background-color="#4472c4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07" style:family="table-cell" style:parent-style-name="Normal_20_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08" style:family="table-cell" style:parent-style-name="Normal_20_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09" style:family="table-cell" style:parent-style-name="Normal_20_5" style:data-style-name="N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Normal_20_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Normal_20_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Normal_20_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Normal_20_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14" style:family="table-cell" style:parent-style-name="Normal_20_5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Normal_20_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Normal_20_5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Normal_20_5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Normal_20_5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Normal_20_5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Normal_20_5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light1" loext:color-type="theme"/>
      </style:text-properties>
    </style:style>
    <style:style style:name="ce422" style:family="table-cell" style:parent-style-name="Normal_20_5">
      <style:table-cell-properties fo:border-bottom="0.74pt solid #000000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23" style:family="table-cell" style:parent-style-name="Normal_20_5">
      <style:table-cell-properties fo:border-bottom="0.74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Normal_20_5">
      <style:table-cell-properties fo:border-bottom="0.74pt solid #000000" fo:background-color="#f2f2f2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Normal_20_5">
      <style:table-cell-properties fo:border-bottom="0.74pt solid #000000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26" style:family="table-cell" style:parent-style-name="Normal_20_5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Normal_20_5">
      <style:table-cell-properties fo:border-bottom="1.76pt solid #000000" fo:background-color="#f2f2f2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8" style:family="table-cell" style:parent-style-name="Normal_20_5">
      <style:table-cell-properties fo:border-bottom="1.76pt solid #000000" fo:background-color="#4472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29" style:family="table-cell" style:parent-style-name="Normal_20_5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Normal_20_5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Normal_20_5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Normal_20_5">
      <style:table-cell-properties fo:border-bottom="1.76pt solid #000000" fo:background-color="#4472c4" style:diagonal-bl-tr="none" style:diagonal-tl-br="none" fo:border-left="none" fo:border-right="1.76pt solid #000000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33" style:family="table-cell" style:parent-style-name="Normal_20_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Normal_20_5" style:data-style-name="N2">
      <style:table-cell-properties fo:border-bottom="none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3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Normal_20_5" style:data-style-name="N2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37" style:family="table-cell" style:parent-style-name="Normal_20_5" style:data-style-name="N2">
      <style:table-cell-properties fo:border-bottom="none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38" style:family="table-cell" style:parent-style-name="Normal_20_5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Normal_20_5" style:data-style-name="N2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40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Comma" style:data-style-name="N127">
      <style:table-cell-properties fo:border-bottom="0.74pt solid #000000" fo:background-color="#fbe5d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Normal_20_5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Normal_20_5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447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light1" loext:color-type="theme"/>
      </style:text-properties>
    </style:style>
    <style:style style:name="ce448" style:family="table-cell" style:parent-style-name="Normal_20_5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49" style:family="table-cell" style:parent-style-name="Normal_20_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0" style:family="table-cell" style:parent-style-name="Normal_20_5">
      <style:table-cell-properties fo:border-bottom="none" fo:background-color="#ffffff" style:diagonal-bl-tr="none" style:diagonal-tl-br="none" fo:border-left="1.76pt solid #000000" fo:border-right="none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Normal_20_5">
      <style:table-cell-properties fo:border-bottom="1.76pt solid #000000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Normal_20_5">
      <style:table-cell-properties fo:border-bottom="none" fo:background-color="#4472c4" style:diagonal-bl-tr="none" style:diagonal-tl-br="none" fo:border-left="0.74pt solid #000000" fo:border-right="none" style:rotation-align="none" fo:border-top="0.74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53" style:family="table-cell" style:parent-style-name="Normal_20_5">
      <style:table-cell-properties fo:border-bottom="0.74pt solid #000000" fo:background-color="#4472c4" style:diagonal-bl-tr="none" style:diagonal-tl-br="none" fo:border-left="0.74pt solid #000000" fo:border-right="none" style:rotation-align="none" fo:border-top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54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light1" loext:color-type="theme"/>
      </style:text-properties>
    </style:style>
    <style:style style:name="ce455" style:family="table-cell" style:parent-style-name="Normal_20_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Normal_20_5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Normal_20_5">
      <style:table-cell-properties fo:background-color="#4472c4" style:diagonal-bl-tr="none" style:diagonal-tl-br="none" fo:border="none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light1" loext:color-type="theme"/>
      </style:text-properties>
    </style:style>
    <style:style style:name="ce458" style:family="table-cell" style:parent-style-name="Normal_20_5">
      <style:table-cell-properties fo:background-color="#4472c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59" style:family="table-cell" style:parent-style-name="Normal_20_5" style:data-style-name="N138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Normal_20_5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Normal_20_5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Millares_20_4" style:data-style-name="N137">
      <style:table-cell-properties fo:border-bottom="0.74pt solid #000000" fo:background-color="#4472c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63" style:family="table-cell" style:parent-style-name="Normal_20_5" style:data-style-name="N2">
      <style:table-cell-properties fo:border-bottom="0.74pt solid #000000" fo:background-color="#4472c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64" style:family="table-cell" style:parent-style-name="Normal_20_5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light1" loext:color-type="theme"/>
      </style:text-properties>
    </style:style>
    <style:style style:name="ce465" style:family="table-cell" style:parent-style-name="Normal_20_5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Normal_20_5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Normal_20_5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Normal_20_5" style:data-style-name="N2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Normal_20_5" style:data-style-name="N137">
      <style:table-cell-properties fo:border-bottom="none" fo:background-color="#4472c4" style:diagonal-bl-tr="none" style:diagonal-tl-br="none" fo:border-left="none" fo:border-right="0.74pt solid #000000" style:rotation-align="none" fo:border-top="0.74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70" style:family="table-cell" style:parent-style-name="Normal_20_5">
      <style:table-cell-properties fo:border-bottom="0.74pt solid #000000" fo:background-color="#4472c4" style:diagonal-bl-tr="none" style:diagonal-tl-br="none" fo:border-left="none" fo:border-right="0.74pt solid #000000" style:rotation-align="none" fo:border-top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71" style:family="table-cell" style:parent-style-name="Normal_20_5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Normal_20_5" style:data-style-name="N13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Normal_20_5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Normal_20_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75" style:family="table-cell" style:parent-style-name="Normal_20_5" style:data-style-name="N13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Normal_20_5" style:data-style-name="N135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Normal_20_5">
      <style:table-cell-properties fo:background-color="#4472c4" style:diagonal-bl-tr="none" style:diagonal-tl-br="none" fo:border="none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78" style:family="table-cell" style:parent-style-name="Normal_20_5" style:data-style-name="N133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Normal_20_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Normal_20_5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81" style:family="table-cell" style:parent-style-name="Normal_20_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Normal_20_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Normal_20_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84" style:family="table-cell" style:parent-style-name="Normal_20_5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Normal_20_5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Millares_20_4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Millares_20_4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88" style:family="table-cell" style:parent-style-name="Millares_20_4" style:data-style-name="N13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Millares_20_4" style:data-style-name="N127">
      <style:table-cell-properties fo:background-color="#4472c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90" style:family="table-cell" style:parent-style-name="Normal_20_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91" style:family="table-cell" style:parent-style-name="Normal_20_5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Normal_20_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Normal_20_4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Normal_20_4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Normal_20_4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Normal_20_4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Normal_20_4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8" style:family="table-cell" style:parent-style-name="Normal_20_4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Normal_20_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Normal_20_4" style:data-style-name="N13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Normal_20_4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Normal_20_4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Normal_20_4" style:data-style-name="N139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Normal_20_4" style:data-style-name="N13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Normal_20_4" style:data-style-name="N139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06" style:family="table-cell" style:parent-style-name="Normal_20_4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Normal_20_4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8" style:family="table-cell" style:parent-style-name="Normal_20_4" style:data-style-name="N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Normal_20_4" style:data-style-name="N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Normal_20_4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17" style:family="table-cell" style:parent-style-name="Default">
      <style:table-cell-properties fo:border-bottom="none" fo:background-color="#deebf7" style:diagonal-bl-tr="none" style:diagonal-tl-br="none" fo:border-left="1.76pt solid #000000" fo:border-right="none" style:rotation-align="none" fo:border-top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18" style:family="table-cell" style:parent-style-name="Default">
      <style:table-cell-properties fo:border-bottom="1.76pt solid #000000" fo:background-color="#deebf7" style:diagonal-bl-tr="none" style:diagonal-tl-br="none" fo:border-left="1.76pt solid #000000" fo:border-right="none" style:rotation-align="none" fo:border-top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1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52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5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28" style:family="table-cell" style:parent-style-name="Excel_20_Built-in_20_Percent" style:data-style-name="N11">
      <style:table-cell-properties fo:border-bottom="none" fo:background-color="#4472c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29" style:family="table-cell" style:parent-style-name="Excel_20_Built-in_20_Percent" style:data-style-name="N11">
      <style:table-cell-properties fo:border-bottom="1.76pt solid #000000" fo:background-color="#4472c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3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5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32" style:family="table-cell" style:parent-style-name="Default" style:data-style-name="N11">
      <style:table-cell-properties fo:border-bottom="1.76pt solid #000000" fo:background-color="#4472c4" style:diagonal-bl-tr="none" style:diagonal-tl-br="none" fo:border-left="none" fo:border-right="1.76pt solid #000000" style:rotation-align="none" fo:border-top="1.76pt solid #000000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33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4" style:family="table-cell" style:parent-style-name="Excel_20_Built-in_20_Percent" style:data-style-name="N135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Percent" style:data-style-name="N135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Default" style:data-style-name="N11">
      <style:table-cell-properties style:rotation-align="none"/>
    </style:style>
    <style:style style:name="ce53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0" style:family="table-cell" style:parent-style-name="Default">
      <style:table-cell-properties fo:border-bottom="none" fo:background-color="#4472c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541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4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3" style:family="table-cell" style:parent-style-name="Default">
      <style:table-cell-properties fo:background-color="#4472c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544" style:family="table-cell" style:parent-style-name="Default">
      <style:table-cell-properties style:rotation-align="none"/>
    </style:style>
    <style:style style:name="ce54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4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54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Excel_20_Built-in_20_Percent" style:data-style-name="N2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9" style:family="table-cell" style:parent-style-name="Default" style:data-style-name="N11">
      <style:table-cell-properties fo:border-bottom="1.76pt solid #000000" fo:background-color="#fff2cc" style:diagonal-bl-tr="none" style:diagonal-tl-br="none" fo:border-left="none" fo:border-right="none" style:rotation-align="none" fo:border-top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0" style:family="table-cell" style:parent-style-name="Default" style:data-style-name="N2">
      <style:table-cell-properties fo:background-color="#fff2cc" style:diagonal-bl-tr="none" style:diagonal-tl-br="none" fo:border="none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1" style:family="table-cell" style:parent-style-name="Default" style:data-style-name="N141">
      <style:table-cell-properties style:diagonal-bl-tr="none" style:diagonal-tl-br="none" fo:border="none" style:rotation-align="none"/>
    </style:style>
    <style:style style:name="ce552" style:family="table-cell" style:parent-style-name="Default" style:data-style-name="N2">
      <style:table-cell-properties fo:background-color="#dae3f3" style:diagonal-bl-tr="none" style:diagonal-tl-br="none" fo:border="none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55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56" style:family="table-cell" style:parent-style-name="Default">
      <style:table-cell-properties fo:border-bottom="none" fo:background-color="#4472c4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55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558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59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0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56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2" style:family="table-cell" style:parent-style-name="Default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563" style:family="table-cell" style:parent-style-name="Default" style:data-style-name="N11">
      <style:table-cell-properties style:diagonal-bl-tr="none" style:diagonal-tl-br="none" fo:border="none" style:rotation-align="none"/>
    </style:style>
    <style:style style:name="ce564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5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566" style:family="table-cell" style:parent-style-name="Normal_20_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Normal_20_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Normal_20_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Normal_20_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Normal_20_3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72" style:family="table-cell" style:parent-style-name="Normal_20_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73" style:family="table-cell" style:parent-style-name="Normal_20_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74" style:family="table-cell" style:parent-style-name="Normal_20_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Normal_20_3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76" style:family="table-cell" style:parent-style-name="Normal_20_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7" style:family="table-cell" style:parent-style-name="Normal_20_3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78" style:family="table-cell" style:parent-style-name="Normal_20_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9" style:family="table-cell" style:parent-style-name="Normal_20_3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Normal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Normal_20_3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Normal_20_3">
      <style:table-cell-properties fo:background-color="#4472c4" style:diagonal-bl-tr="none" style:diagonal-tl-br="none" fo:border="none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83" style:family="table-cell" style:parent-style-name="Normal_20_3">
      <style:table-cell-properties fo:border-bottom="1.76pt solid #000000" fo:background-color="#fff2cc" style:diagonal-bl-tr="none" style:diagonal-tl-br="none" fo:border-left="1.76pt solid #000000" fo:border-right="none" style:rotation-align="none" fo:border-top="1.76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4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5" style:family="table-cell" style:parent-style-name="Normal_20_3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86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87" style:family="table-cell" style:parent-style-name="Normal_20_3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88" style:family="table-cell" style:parent-style-name="Normal_20_3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89" style:family="table-cell" style:parent-style-name="Normal_20_3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light1" loext:color-type="theme"/>
      </style:text-properties>
    </style:style>
    <style:style style:name="ce590" style:family="table-cell" style:parent-style-name="Normal_20_3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91" style:family="table-cell" style:parent-style-name="Normal_20_3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Normal_20_3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Normal_20_3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Normal_20_3" style:data-style-name="N1">
      <style:table-cell-properties fo:background-color="#4472c4" style:diagonal-bl-tr="none" style:diagonal-tl-br="none" fo:border="none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95" style:family="table-cell" style:parent-style-name="Normal_20_3" style:data-style-name="N1">
      <style:table-cell-properties fo:border-bottom="1.76pt solid #000000" fo:background-color="#fff2cc" style:diagonal-bl-tr="none" style:diagonal-tl-br="none" fo:border-left="none" fo:border-right="none" style:rotation-align="none" fo:border-top="1.76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Normal_20_3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7" style:family="table-cell" style:parent-style-name="Normal_20_3" style:data-style-name="N1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Moneda_20_2" style:data-style-name="N142">
      <style:table-cell-properties fo:background-color="#fbe5d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0" style:family="table-cell" style:parent-style-name="Moneda_20_2" style:data-style-name="N14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Normal_20_3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2" style:family="table-cell" style:parent-style-name="Normal_20_3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Normal_20_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Normal_20_3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Normal_20_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Normal_20_3" style:data-style-name="N1">
      <style:table-cell-properties fo:border-bottom="1.76pt solid #000000" fo:background-color="#fff2cc" style:diagonal-bl-tr="none" style:diagonal-tl-br="none" fo:border-left="none" fo:border-right="1.76pt solid #000000" style:rotation-align="none" fo:border-top="1.76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7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8" style:family="table-cell" style:parent-style-name="Normal_20_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2" style:family="table-cell" style:parent-style-name="Normal_20_2">
      <style:table-cell-properties fo:border-bottom="none" fo:background-color="#4472c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1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1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Normal_20_2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17" style:family="table-cell" style:parent-style-name="Normal_20_2">
      <style:table-cell-properties fo:border-bottom="none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8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Normal_20_2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Normal_20_2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21" style:family="table-cell" style:parent-style-name="Normal_20_2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Normal_20_2" style:data-style-name="N13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3" style:family="table-cell" style:parent-style-name="Normal_20_2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Normal_20_2" style:data-style-name="N13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Normal_20_2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Normal_20_2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Normal_20_2" style:data-style-name="N135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Comma" style:data-style-name="N137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Normal_20_2" style:data-style-name="N14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Normal_20_2" style:data-style-name="N11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Normal_20_2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Normal_20_2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35" style:family="table-cell" style:parent-style-name="Normal_20_2">
      <style:table-cell-properties fo:border-bottom="none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7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0" style:family="table-cell" style:parent-style-name="Normal_20_2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2" style:family="table-cell" style:parent-style-name="Normal_20_2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3" style:family="table-cell" style:parent-style-name="Normal_20_2" style:data-style-name="N13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4" style:family="table-cell" style:parent-style-name="Excel_20_Built-in_20_Comma" style:data-style-name="N137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Normal_20_2" style:data-style-name="N10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4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Calibri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8pt" style:font-size-asian="8pt" style:font-size-complex="8pt"/>
    </style:style>
    <style:style style:name="T5" style:family="text">
      <style:text-properties fo:color="#000000"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6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7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/>
    </style:style>
    <style:style style:name="T8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 style:text-underline-style="solid" style:text-underline-width="auto" style:text-underline-color="font-color"/>
    </style:style>
    <style:style style:name="T9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style:text-underline-style="solid" style:text-underline-width="auto" style:text-underline-color="font-color" fo:font-size="12pt" style:font-size-asian="12pt" style:font-size-complex="12pt"/>
    </style:style>
    <style:style style:name="T10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text-underline-style="none" style:text-underline-color="font-color" style:font-size-asian="18pt" style:font-size-complex="18pt"/>
    </style:style>
    <style:style style:name="T11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20pt" style:font-size-asian="20pt" style:font-size-complex="20pt"/>
    </style:style>
    <style:style style:name="T12" style:family="text">
      <style:text-properties fo:color="#000000" style:font-name="Times New Roman" fo:font-size="18pt" fo:font-weight="bold" style:text-line-through-type="none" fo:font-style="normal" style:text-outline="false" fo:text-shadow="none" style:text-position="0% 100%" style:font-name-complex="Times New Roman" style:font-size-asian="18pt" style:font-size-complex="18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13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style:text-underline-style="solid" style:text-underline-width="auto" style:text-underline-color="font-color" fo:font-size="20pt" style:font-size-asian="20pt" style:font-size-complex="20pt"/>
    </style:style>
    <style:style style:name="T14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style:text-underline-style="solid" style:text-underline-width="auto" style:text-underline-color="font-color" fo:font-size="18pt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 del escenari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-group>
          <table:table-column table:style-name="co3" table:number-columns-repeated="3" table:default-cell-style-name="Default"/>
        </table:table-column-group>
        <table:table-column table:style-name="co1" table:number-columns-repeated="16378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2" table:number-rows-spanned="2">
            <text:p>Resumen del escenario</text:p>
          </table:table-cell>
          <table:covered-table-cell table:style-name="ce12"/>
          <table:table-cell table:style-name="ce13" table:number-columns-repeated="3"/>
          <table:table-cell table:number-columns-repeated="16378"/>
        </table:table-row>
        <table:table-row table:style-name="ro2">
          <table:table-cell/>
          <table:covered-table-cell table:number-columns-repeated="2" table:style-name="ce3"/>
          <table:table-cell table:style-name="ce14" office:value-type="string" calcext:value-type="string">
            <text:p>Valores actuales:</text:p>
          </table:table-cell>
          <table:table-cell table:style-name="ce14" office:value-type="string" calcext:value-type="string">
            <text:p>OPTIMISTA</text:p>
          </table:table-cell>
          <table:table-cell table:style-name="ce14" office:value-type="string" calcext:value-type="string">
            <text:p>PESIMISTA</text:p>
          </table:table-cell>
          <table:table-cell table:number-columns-repeated="16378"/>
        </table:table-row>
        <table:table-row-group>
          <table:table-row table:style-name="ro3" table:visibility="collapse">
            <table:table-cell/>
            <table:table-cell table:style-name="ce4" table:number-columns-repeated="2"/>
            <table:table-cell table:style-name="ce15"/>
            <table:table-cell table:style-name="ce24" office:value-type="string" calcext:value-type="string">
              <text:p/>
              <text:p>Modificado por HP el 22/02/2021</text:p>
              <text:p>Modificado por Usuario el 24/02/2021</text:p>
            </table:table-cell>
            <table:table-cell table:style-name="ce24" office:value-type="string" calcext:value-type="string">
              <text:p>Creado por Usuario el 24/02/2021</text:p>
              <text:p>Modificado por Usuario el 24/02/2021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" office:value-type="string" calcext:value-type="string">
            <text:p>Celdas cambiantes:</text:p>
          </table:table-cell>
          <table:table-cell table:style-name="ce5"/>
          <table:table-cell table:style-name="ce16" table:number-columns-repeated="3"/>
          <table:table-cell table:number-columns-repeated="16378"/>
        </table:table-row>
        <table:table-row-group>
          <table:table-row table:style-name="ro1">
            <table:table-cell/>
            <table:table-cell table:style-name="ce6" office:value-type="string" calcext:value-type="string" table:number-columns-spanned="2" table:number-rows-spanned="1">
              <text:p>VALOR DE VENTA</text:p>
            </table:table-cell>
            <table:covered-table-cell table:style-name="ce6"/>
            <table:table-cell table:style-name="ce17" office:value-type="float" office:value="10" calcext:value-type="float">
              <text:p><text:s/>10.0 </text:p>
            </table:table-cell>
            <table:table-cell table:style-name="ce25" office:value-type="float" office:value="11.5" calcext:value-type="float">
              <text:p><text:s/>11.5 </text:p>
            </table:table-cell>
            <table:table-cell table:style-name="ce25" office:value-type="float" office:value="9" calcext:value-type="float">
              <text:p><text:s/>9.0 </text:p>
            </table:table-cell>
            <table:table-cell table:number-columns-repeated="16378"/>
          </table:table-row>
          <table:table-row table:style-name="ro1">
            <table:table-cell/>
            <table:table-cell table:style-name="ce7" office:value-type="string" calcext:value-type="string" table:number-columns-spanned="2" table:number-rows-spanned="1">
              <text:p>VALOR MANO DE OBRA</text:p>
            </table:table-cell>
            <table:covered-table-cell table:style-name="ce7"/>
            <table:table-cell table:style-name="ce18" office:value-type="float" office:value="0.7" calcext:value-type="float">
              <text:p>0.7</text:p>
            </table:table-cell>
            <table:table-cell table:style-name="ce26" office:value-type="float" office:value="0.6" calcext:value-type="float">
              <text:p>0.6</text:p>
            </table:table-cell>
            <table:table-cell table:style-name="ce26" office:value-type="float" office:value="1" calcext:value-type="float">
              <text:p>1.0</text:p>
            </table:table-cell>
            <table:table-cell table:number-columns-repeated="16378"/>
          </table:table-row>
          <table:table-row table:style-name="ro1">
            <table:table-cell/>
            <table:table-cell table:style-name="ce7" office:value-type="string" calcext:value-type="string" table:number-columns-spanned="2" table:number-rows-spanned="1">
              <text:p>VALOR YACON</text:p>
            </table:table-cell>
            <table:covered-table-cell table:style-name="ce7"/>
            <table:table-cell table:style-name="ce19" office:value-type="float" office:value="3" calcext:value-type="float">
              <text:p>3.00</text:p>
            </table:table-cell>
            <table:table-cell table:style-name="ce27" office:value-type="float" office:value="2.7" calcext:value-type="float">
              <text:p>2.70</text:p>
            </table:table-cell>
            <table:table-cell table:style-name="ce27" office:value-type="float" office:value="3.5" calcext:value-type="float">
              <text:p>3.50</text:p>
            </table:table-cell>
            <table:table-cell table:number-columns-repeated="16378"/>
          </table:table-row>
          <table:table-row table:style-name="ro1">
            <table:table-cell/>
            <table:table-cell table:style-name="ce8" office:value-type="string" calcext:value-type="string" table:number-columns-spanned="2" table:number-rows-spanned="1">
              <text:p>VALOR PASTA DE CACAO</text:p>
            </table:table-cell>
            <table:covered-table-cell table:style-name="ce8"/>
            <table:table-cell table:style-name="ce20" office:value-type="float" office:value="20" calcext:value-type="float">
              <text:p>20.00</text:p>
            </table:table-cell>
            <table:table-cell table:style-name="ce28" office:value-type="float" office:value="19" calcext:value-type="float">
              <text:p>19.00</text:p>
            </table:table-cell>
            <table:table-cell table:style-name="ce28" office:value-type="float" office:value="21" calcext:value-type="float">
              <text:p>21.00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" office:value-type="string" calcext:value-type="string">
            <text:p>Celdas de resultado:</text:p>
          </table:table-cell>
          <table:table-cell table:style-name="ce5"/>
          <table:table-cell table:style-name="ce16" table:number-columns-repeated="3"/>
          <table:table-cell table:number-columns-repeated="16378"/>
        </table:table-row>
        <table:table-row-group>
          <table:table-row table:style-name="ro1">
            <table:table-cell/>
            <table:table-cell table:style-name="ce9" office:value-type="string" calcext:value-type="string" table:number-columns-spanned="2" table:number-rows-spanned="1">
              <text:p>VANE</text:p>
            </table:table-cell>
            <table:covered-table-cell table:style-name="ce9"/>
            <table:table-cell table:style-name="ce21" office:value-type="float" office:value="811329.798397679" calcext:value-type="float">
              <text:p>811330</text:p>
            </table:table-cell>
            <table:table-cell table:style-name="ce29" office:value-type="float" office:value="1226154.071675" calcext:value-type="float">
              <text:p>1226154</text:p>
            </table:table-cell>
            <table:table-cell table:style-name="ce29" office:value-type="float" office:value="463209.64511126" calcext:value-type="float">
              <text:p>463210</text:p>
            </table:table-cell>
            <table:table-cell table:number-columns-repeated="16378"/>
          </table:table-row>
          <table:table-row table:style-name="ro1">
            <table:table-cell/>
            <table:table-cell table:style-name="ce10" office:value-type="string" calcext:value-type="string" table:number-columns-spanned="2" table:number-rows-spanned="1">
              <text:p>TIRE</text:p>
            </table:table-cell>
            <table:covered-table-cell table:style-name="ce10"/>
            <table:table-cell table:style-name="ce22" office:value-type="percentage" office:value="3.71950137378268" calcext:value-type="percentage">
              <text:p>372.0%</text:p>
            </table:table-cell>
            <table:table-cell table:style-name="ce30" office:value-type="percentage" office:value="5.69739245923719" calcext:value-type="percentage">
              <text:p>569.7%</text:p>
            </table:table-cell>
            <table:table-cell table:style-name="ce30" office:value-type="percentage" office:value="2.1023540374548" calcext:value-type="percentage">
              <text:p>210.2%</text:p>
            </table:table-cell>
            <table:table-cell table:number-columns-repeated="16378"/>
          </table:table-row>
          <table:table-row table:style-name="ro1">
            <table:table-cell/>
            <table:table-cell table:style-name="ce10" office:value-type="string" calcext:value-type="string" table:number-columns-spanned="2" table:number-rows-spanned="1">
              <text:p>VANF</text:p>
            </table:table-cell>
            <table:covered-table-cell table:style-name="ce10"/>
            <table:table-cell table:style-name="ce20" office:value-type="float" office:value="1018.83897011284" calcext:value-type="float">
              <text:p>1018.84</text:p>
            </table:table-cell>
            <table:table-cell table:number-columns-repeated="2" table:style-name="ce28" office:value-type="float" office:value="1018.83897011284" calcext:value-type="float">
              <text:p>1018.84</text:p>
            </table:table-cell>
            <table:table-cell table:number-columns-repeated="16378"/>
          </table:table-row>
          <table:table-row table:style-name="ro1">
            <table:table-cell/>
            <table:table-cell table:style-name="ce11" office:value-type="string" calcext:value-type="string" table:number-columns-spanned="2" table:number-rows-spanned="1">
              <text:p>TIRF</text:p>
            </table:table-cell>
            <table:covered-table-cell table:style-name="ce11"/>
            <table:table-cell table:style-name="ce23" office:value-type="percentage" office:value="3.72959854726687" calcext:value-type="percentage">
              <text:p>373.0%</text:p>
            </table:table-cell>
            <table:table-cell table:style-name="ce31" office:value-type="percentage" office:value="5.7085844878928" calcext:value-type="percentage">
              <text:p>570.9%</text:p>
            </table:table-cell>
            <table:table-cell table:style-name="ce31" office:value-type="percentage" office:value="2.11084234783397" calcext:value-type="percentage">
              <text:p>211.1%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office:value-type="string" calcext:value-type="string">
            <text:p>Notas: La columna de valores actuales representa los valores de las celdas cambiant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n el momento en que se creó el Informe resumen de escenario. Las celdas cambiantes d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ada escenario se muestran en gris.</text:p>
          </table:table-cell>
          <table:table-cell table:number-columns-repeated="16382"/>
        </table:table-row>
      </table:table>
      <table:table table:name="Sensibilidad" table:style-name="ta2"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4"/>
        <table:table-column table:style-name="co8" table:default-cell-style-name="ce32"/>
        <table:table-column table:style-name="co9" table:default-cell-style-name="ce32"/>
        <table:table-column table:style-name="co4" table:number-columns-repeated="10" table:default-cell-style-name="ce32"/>
        <table:table-column table:style-name="co10" table:number-columns-repeated="16368" table:default-cell-style-name="ce32"/>
        <table:table-row table:style-name="ro4">
          <table:table-cell table:number-columns-repeated="4"/>
          <table:table-cell table:style-name="ce37" office:value-type="string" calcext:value-type="string" table:number-columns-spanned="1" table:number-rows-spanned="2">
            <text:p>Variable</text:p>
          </table:table-cell>
          <table:table-cell table:style-name="ce49" office:value-type="string" calcext:value-type="string">
            <text:p>VANE</text:p>
          </table:table-cell>
          <table:table-cell table:style-name="ce62" office:value-type="string" calcext:value-type="string">
            <text:p>TIRE</text:p>
          </table:table-cell>
          <table:table-cell table:style-name="ce49" office:value-type="string" calcext:value-type="string">
            <text:p>VANF</text:p>
          </table:table-cell>
          <table:table-cell table:style-name="ce77" office:value-type="string" calcext:value-type="string">
            <text:p>TIRF</text:p>
          </table:table-cell>
          <table:table-cell table:number-columns-repeated="16375"/>
        </table:table-row>
        <table:table-row table:style-name="ro5">
          <table:table-cell table:number-columns-repeated="4"/>
          <table:covered-table-cell table:style-name="ce38"/>
          <table:table-cell table:style-name="ce50" table:formula="of:=[$Resumen.C13]" office:value-type="float" office:value="135582.735468953" calcext:value-type="float">
            <text:p>135,583</text:p>
          </table:table-cell>
          <table:table-cell table:style-name="ce63" table:formula="of:=[$Resumen.C15]" office:value-type="percentage" office:value="0.581814239972824" calcext:value-type="percentage">
            <text:p>58.18 %</text:p>
          </table:table-cell>
          <table:table-cell table:style-name="ce72" table:formula="of:=[$Resumen.E13]" office:value-type="float" office:value="963.322633784986" calcext:value-type="float">
            <text:p>963.3</text:p>
          </table:table-cell>
          <table:table-cell table:style-name="ce78" table:formula="of:=[$Resumen.E15]" office:value-type="percentage" office:value="0.586033203078177" calcext:value-type="percentage">
            <text:p>58.60 %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3"/>
          <table:table-cell office:value-type="string" calcext:value-type="string">
            <text:p>SENSIBILIDAD %</text:p>
          </table:table-cell>
          <table:table-cell table:style-name="ce39" office:value-type="string" calcext:value-type="string">
            <text:p>1. Sensibilidad de valor de venta</text:p>
          </table:table-cell>
          <table:table-cell table:style-name="ce39" table:number-columns-repeated="4"/>
          <table:table-cell table:number-columns-repeated="16375"/>
        </table:table-row>
        <table:table-row table:style-name="ro6">
          <table:table-cell table:number-columns-repeated="3"/>
          <table:table-cell table:style-name="ce35" table:formula="of:=([.E9]-[.E12])/[.E9]*100" office:value-type="float" office:value="5.85714285714286" calcext:value-type="float">
            <text:p>5.86</text:p>
          </table:table-cell>
          <table:table-cell table:style-name="ce40" office:value-type="string" calcext:value-type="string">
            <text:p>Valor de Venta</text:p>
          </table:table-cell>
          <table:table-cell table:style-name="ce51" office:value-type="string" calcext:value-type="string">
            <text:p>VANE</text:p>
          </table:table-cell>
          <table:table-cell table:style-name="ce51" office:value-type="string" calcext:value-type="string">
            <text:p>TIRE</text:p>
          </table:table-cell>
          <table:table-cell table:style-name="ce51" office:value-type="string" calcext:value-type="string">
            <text:p>VANF</text:p>
          </table:table-cell>
          <table:table-cell table:style-name="ce51" office:value-type="string" calcext:value-type="string">
            <text:p>TIRF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1" office:value-type="float" office:value="12" calcext:value-type="float">
            <text:p>S/. 12.00</text:p>
          </table:table-cell>
          <table:table-cell table:style-name="ce52" office:value-type="float" office:value="1263843.06824637" calcext:value-type="float">
            <text:p>1,263,843</text:p>
          </table:table-cell>
          <table:table-cell table:style-name="ce64" office:value-type="percentage" office:value="5.6146533191965" calcext:value-type="percentage">
            <text:p>561.47 %</text:p>
          </table:table-cell>
          <table:table-cell table:style-name="ce52" office:value-type="float" office:value="1018.83897011284" calcext:value-type="float">
            <text:p>1,019</text:p>
          </table:table-cell>
          <table:table-cell table:style-name="ce64" office:value-type="percentage" office:value="5.62532242326156" calcext:value-type="percentage">
            <text:p>562.53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1" office:value-type="float" office:value="11.8" calcext:value-type="float">
            <text:p>S/. 11.80</text:p>
          </table:table-cell>
          <table:table-cell table:style-name="ce52" office:value-type="float" office:value="1218591.7412615" calcext:value-type="float">
            <text:p>1,218,592</text:p>
          </table:table-cell>
          <table:table-cell table:style-name="ce64" office:value-type="percentage" office:value="5.42610254843573" calcext:value-type="percentage">
            <text:p>542.61 %</text:p>
          </table:table-cell>
          <table:table-cell table:style-name="ce52" office:value-type="float" office:value="1018.83897011284" calcext:value-type="float">
            <text:p>1,019</text:p>
          </table:table-cell>
          <table:table-cell table:style-name="ce64" office:value-type="percentage" office:value="5.43672867530624" calcext:value-type="percentage">
            <text:p>543.67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1" office:value-type="float" office:value="11.5" calcext:value-type="float">
            <text:p>S/. 11.50</text:p>
          </table:table-cell>
          <table:table-cell table:style-name="ce52" office:value-type="float" office:value="1150714.7507842" calcext:value-type="float">
            <text:p>1,150,715</text:p>
          </table:table-cell>
          <table:table-cell table:style-name="ce64" office:value-type="percentage" office:value="5.14295257703234" calcext:value-type="percentage">
            <text:p>514.30 %</text:p>
          </table:table-cell>
          <table:table-cell table:style-name="ce52" office:value-type="float" office:value="1018.83897011284" calcext:value-type="float">
            <text:p>1,019</text:p>
          </table:table-cell>
          <table:table-cell table:style-name="ce64" office:value-type="percentage" office:value="5.15350967660551" calcext:value-type="percentage">
            <text:p>515.35 %</text:p>
          </table:table-cell>
          <table:table-cell table:number-columns-repeated="16375"/>
        </table:table-row>
        <table:table-row table:style-name="ro5">
          <table:table-cell table:number-columns-repeated="3"/>
          <table:table-cell office:value-type="string" calcext:value-type="string">
            <text:p>PRECIO ORIGINAL</text:p>
          </table:table-cell>
          <table:table-cell table:style-name="ce42" office:value-type="float" office:value="7" calcext:value-type="float">
            <text:p>S/. 7.00</text:p>
          </table:table-cell>
          <table:table-cell table:style-name="ce53" office:value-type="float" office:value="103214.186363381" calcext:value-type="float">
            <text:p>103,214.19</text:p>
          </table:table-cell>
          <table:table-cell table:style-name="ce65" office:value-type="percentage" office:value="0.499359046980597" calcext:value-type="percentage">
            <text:p>49.94 %</text:p>
          </table:table-cell>
          <table:table-cell table:style-name="ce53" office:value-type="float" office:value="1018.83897011284" calcext:value-type="float">
            <text:p>1,018.84</text:p>
          </table:table-cell>
          <table:table-cell table:style-name="ce65" office:value-type="percentage" office:value="0.503701942201115" calcext:value-type="percentage">
            <text:p>50.37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1" office:value-type="float" office:value="9" calcext:value-type="float">
            <text:p>S/. 9.00</text:p>
          </table:table-cell>
          <table:table-cell table:style-name="ce52" office:value-type="float" office:value="585073.163473332" calcext:value-type="float">
            <text:p>585,073</text:p>
          </table:table-cell>
          <table:table-cell table:style-name="ce64" office:value-type="percentage" office:value="2.75961025622174" calcext:value-type="percentage">
            <text:p>275.96 %</text:p>
          </table:table-cell>
          <table:table-cell table:style-name="ce52" office:value-type="float" office:value="1018.83897011284" calcext:value-type="float">
            <text:p>1,019</text:p>
          </table:table-cell>
          <table:table-cell table:style-name="ce64" office:value-type="percentage" office:value="2.7692169453296" calcext:value-type="percentage">
            <text:p>276.92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1" office:value-type="float" office:value="8" calcext:value-type="float">
            <text:p>S/. 8.00</text:p>
          </table:table-cell>
          <table:table-cell table:style-name="ce52" office:value-type="float" office:value="358816.528548986" calcext:value-type="float">
            <text:p>358,817</text:p>
          </table:table-cell>
          <table:table-cell table:style-name="ce64" office:value-type="percentage" office:value="1.78408246638055" calcext:value-type="percentage">
            <text:p>178.41 %</text:p>
          </table:table-cell>
          <table:table-cell table:style-name="ce52" office:value-type="float" office:value="1018.83897011284" calcext:value-type="float">
            <text:p>1,019</text:p>
          </table:table-cell>
          <table:table-cell table:style-name="ce64" office:value-type="percentage" office:value="1.79285571534394" calcext:value-type="percentage">
            <text:p>179.29 %</text:p>
          </table:table-cell>
          <table:table-cell table:number-columns-repeated="16375"/>
        </table:table-row>
        <table:table-row table:style-name="ro4">
          <table:table-cell table:number-columns-repeated="4"/>
          <table:table-cell table:style-name="ce43" office:value-type="float" office:value="6.59" calcext:value-type="float">
            <text:p>S/. 6.6</text:p>
          </table:table-cell>
          <table:table-cell table:style-name="ce50" office:value-type="float" office:value="0.000000000349245965480804" calcext:value-type="float">
            <text:p>0</text:p>
          </table:table-cell>
          <table:table-cell table:style-name="ce63" office:value-type="percentage" office:value="0.186613376779285" calcext:value-type="percentage">
            <text:p>18.66 %</text:p>
          </table:table-cell>
          <table:table-cell table:style-name="ce72" office:value-type="float" office:value="611.303382067704" calcext:value-type="float">
            <text:p>611.3</text:p>
          </table:table-cell>
          <table:table-cell table:style-name="ce78" office:value-type="percentage" office:value="0.189255997123952" calcext:value-type="percentage">
            <text:p>18.93 %</text:p>
          </table:table-cell>
          <table:table-cell table:number-columns-repeated="16375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4"/>
          <table:table-cell table:style-name="ce44" office:value-type="string" calcext:value-type="string" table:number-columns-spanned="5" table:number-rows-spanned="1">
            <text:p>2. Sensibilidad de valor de mano de obra.</text:p>
          </table:table-cell>
          <table:covered-table-cell table:number-columns-repeated="4" table:style-name="ce54"/>
          <table:table-cell table:number-columns-repeated="16375"/>
        </table:table-row>
        <table:table-row table:style-name="ro7">
          <table:table-cell table:number-columns-repeated="3"/>
          <table:table-cell table:style-name="ce35" table:formula="of:=([.E17]-[.E22])/[.E22]*100" office:value-type="float" office:value="1000" calcext:value-type="float">
            <text:p>1000.00</text:p>
          </table:table-cell>
          <table:table-cell table:style-name="ce40" office:value-type="string" calcext:value-type="string">
            <text:p>Valor de Mano de Obra</text:p>
          </table:table-cell>
          <table:table-cell table:style-name="ce51" office:value-type="string" calcext:value-type="string">
            <text:p>VANE</text:p>
          </table:table-cell>
          <table:table-cell table:style-name="ce51" office:value-type="string" calcext:value-type="string">
            <text:p>TIRE</text:p>
          </table:table-cell>
          <table:table-cell table:style-name="ce51" office:value-type="string" calcext:value-type="string">
            <text:p>VANF</text:p>
          </table:table-cell>
          <table:table-cell table:style-name="ce51" office:value-type="string" calcext:value-type="string">
            <text:p>TIRF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5" office:value-type="float" office:value="7.7" calcext:value-type="float">
            <text:p>S/. 7.70</text:p>
          </table:table-cell>
          <table:table-cell table:style-name="ce55" office:value-type="float" office:value="-0.000000000160071067512035" calcext:value-type="float">
            <text:p>0.00</text:p>
          </table:table-cell>
          <table:table-cell table:style-name="ce66" office:value-type="percentage" office:value="0.186613376779283" calcext:value-type="percentage">
            <text:p>18.66 %</text:p>
          </table:table-cell>
          <table:table-cell table:style-name="ce55" office:value-type="float" office:value="1018.83897011284" calcext:value-type="float">
            <text:p>1018.84</text:p>
          </table:table-cell>
          <table:table-cell table:style-name="ce79" office:value-type="float" office:value="0.189657788982054" calcext:value-type="float">
            <text:p>0.19</text:p>
          </table:table-cell>
          <table:table-cell table:number-columns-repeated="16375"/>
        </table:table-row>
        <table:table-row table:style-name="ro4">
          <table:table-cell table:number-columns-repeated="4"/>
          <table:table-cell table:style-name="ce46" office:value-type="float" office:value="6.7" calcext:value-type="float">
            <text:p>S/. 6.70</text:p>
          </table:table-cell>
          <table:table-cell table:style-name="ce56" office:value-type="float" office:value="114966.836328693" calcext:value-type="float">
            <text:p>114966.836328693</text:p>
          </table:table-cell>
          <table:table-cell table:style-name="ce67" office:value-type="percentage" office:value="0.552489332990019" calcext:value-type="percentage">
            <text:p>55.25 %</text:p>
          </table:table-cell>
          <table:table-cell table:style-name="ce73" office:value-type="float" office:value="1018.83897011284" calcext:value-type="float">
            <text:p>1018.839</text:p>
          </table:table-cell>
          <table:table-cell table:style-name="ce67" office:value-type="percentage" office:value="0.556868487858718" calcext:value-type="percentage">
            <text:p>55.69 %</text:p>
          </table:table-cell>
          <table:table-cell table:number-columns-repeated="16375"/>
        </table:table-row>
        <table:table-row table:style-name="ro8">
          <table:table-cell table:number-columns-repeated="4"/>
          <table:table-cell table:style-name="ce46" office:value-type="float" office:value="4.5" calcext:value-type="float">
            <text:p>S/. 4.50</text:p>
          </table:table-cell>
          <table:table-cell table:style-name="ce56" office:value-type="float" office:value="370299.922420655" calcext:value-type="float">
            <text:p>370299.922420655</text:p>
          </table:table-cell>
          <table:table-cell table:style-name="ce67" office:value-type="percentage" office:value="1.49965249359232" calcext:value-type="percentage">
            <text:p>149.97 %</text:p>
          </table:table-cell>
          <table:table-cell table:style-name="ce73" office:value-type="float" office:value="1018.83897011284" calcext:value-type="float">
            <text:p>1018.839</text:p>
          </table:table-cell>
          <table:table-cell table:style-name="ce67" office:value-type="percentage" office:value="1.50631733263144" calcext:value-type="percentage">
            <text:p>150.63 %</text:p>
          </table:table-cell>
          <table:table-cell table:number-columns-repeated="16375"/>
        </table:table-row>
        <table:table-row table:style-name="ro5">
          <table:table-cell table:style-name="ce33" table:number-columns-repeated="3"/>
          <table:table-cell table:style-name="ce36"/>
          <table:table-cell table:style-name="ce46" office:value-type="float" office:value="2.5" calcext:value-type="float">
            <text:p>S/. 2.50</text:p>
          </table:table-cell>
          <table:table-cell table:style-name="ce56" office:value-type="float" office:value="602420.909776983" calcext:value-type="float">
            <text:p>602420.909776983</text:p>
          </table:table-cell>
          <table:table-cell table:style-name="ce67" office:value-type="percentage" office:value="2.5504382479616" calcext:value-type="percentage">
            <text:p>255.04 %</text:p>
          </table:table-cell>
          <table:table-cell table:style-name="ce73" office:value-type="float" office:value="1018.83897011284" calcext:value-type="float">
            <text:p>1018.839</text:p>
          </table:table-cell>
          <table:table-cell table:style-name="ce67" office:value-type="percentage" office:value="2.55885795949479" calcext:value-type="percentage">
            <text:p>255.89 %</text:p>
          </table:table-cell>
          <table:table-cell table:style-name="ce33" table:number-columns-repeated="16375"/>
        </table:table-row>
        <table:table-row table:style-name="ro5">
          <table:table-cell table:style-name="ce33" table:number-columns-repeated="3"/>
          <table:table-cell table:style-name="ce36"/>
          <table:table-cell table:style-name="ce46" office:value-type="float" office:value="1.5" calcext:value-type="float">
            <text:p>S/. 1.50</text:p>
          </table:table-cell>
          <table:table-cell table:style-name="ce56" office:value-type="float" office:value="718481.403455147" calcext:value-type="float">
            <text:p>718481.403455147</text:p>
          </table:table-cell>
          <table:table-cell table:style-name="ce67" office:value-type="percentage" office:value="3.16819659921338" calcext:value-type="percentage">
            <text:p>316.82 %</text:p>
          </table:table-cell>
          <table:table-cell table:style-name="ce73" office:value-type="float" office:value="1018.83897011284" calcext:value-type="float">
            <text:p>1018.839</text:p>
          </table:table-cell>
          <table:table-cell table:style-name="ce67" office:value-type="percentage" office:value="3.17752226169757" calcext:value-type="percentage">
            <text:p>317.75 %</text:p>
          </table:table-cell>
          <table:table-cell table:style-name="ce33" table:number-columns-repeated="16375"/>
        </table:table-row>
        <table:table-row table:style-name="ro9">
          <table:table-cell table:number-columns-repeated="3"/>
          <table:table-cell table:style-name="ce36" office:value-type="string" calcext:value-type="string">
            <text:p>PRECIO ORIGINAL</text:p>
          </table:table-cell>
          <table:table-cell table:style-name="ce42" office:value-type="float" office:value="0.7" calcext:value-type="float">
            <text:p>S/. 0.70</text:p>
          </table:table-cell>
          <table:table-cell table:style-name="ce53" office:value-type="float" office:value="811329.798397679" calcext:value-type="float">
            <text:p>811,329.80</text:p>
          </table:table-cell>
          <table:table-cell table:style-name="ce65" office:value-type="percentage" office:value="3.71950137378268" calcext:value-type="percentage">
            <text:p>371.95 %</text:p>
          </table:table-cell>
          <table:table-cell table:style-name="ce53" office:value-type="float" office:value="1018.83897011284" calcext:value-type="float">
            <text:p>1,018.84</text:p>
          </table:table-cell>
          <table:table-cell table:style-name="ce65" office:value-type="percentage" office:value="3.72959854726687" calcext:value-type="percentage">
            <text:p>372.96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6" office:value-type="float" office:value="0.6" calcext:value-type="float">
            <text:p>S/. 0.60</text:p>
          </table:table-cell>
          <table:table-cell table:style-name="ce57" office:value-type="float" office:value="822935.847765495" calcext:value-type="float">
            <text:p>822,936</text:p>
          </table:table-cell>
          <table:table-cell table:style-name="ce68" office:value-type="percentage" office:value="3.79248739924447" calcext:value-type="percentage">
            <text:p>379 %</text:p>
          </table:table-cell>
          <table:table-cell table:style-name="ce74" office:value-type="float" office:value="1018.83897011284" calcext:value-type="float">
            <text:p>1018.839</text:p>
          </table:table-cell>
          <table:table-cell table:style-name="ce68" office:value-type="percentage" office:value="3.80268486825473" calcext:value-type="percentage">
            <text:p>380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6" office:value-type="float" office:value="0.5" calcext:value-type="float">
            <text:p>S/. 0.50</text:p>
          </table:table-cell>
          <table:table-cell table:style-name="ce57" office:value-type="float" office:value="834541.897133311" calcext:value-type="float">
            <text:p>834,542</text:p>
          </table:table-cell>
          <table:table-cell table:style-name="ce68" office:value-type="percentage" office:value="3.8664455291613" calcext:value-type="percentage">
            <text:p>387 %</text:p>
          </table:table-cell>
          <table:table-cell table:style-name="ce74" office:value-type="float" office:value="1018.83897011284" calcext:value-type="float">
            <text:p>1018.839</text:p>
          </table:table-cell>
          <table:table-cell table:style-name="ce68" office:value-type="percentage" office:value="3.87674426169714" calcext:value-type="percentage">
            <text:p>388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6" office:value-type="float" office:value="0.4" calcext:value-type="float">
            <text:p>S/. 0.40</text:p>
          </table:table-cell>
          <table:table-cell table:style-name="ce57" office:value-type="float" office:value="846147.946501128" calcext:value-type="float">
            <text:p>846,148</text:p>
          </table:table-cell>
          <table:table-cell table:style-name="ce68" office:value-type="percentage" office:value="3.94139738867564" calcext:value-type="percentage">
            <text:p>394 %</text:p>
          </table:table-cell>
          <table:table-cell table:style-name="ce74" office:value-type="float" office:value="1018.83897011284" calcext:value-type="float">
            <text:p>1018.839</text:p>
          </table:table-cell>
          <table:table-cell table:style-name="ce68" office:value-type="percentage" office:value="3.95179838683561" calcext:value-type="percentage">
            <text:p>395 %</text:p>
          </table:table-cell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4"/>
          <table:table-cell table:style-name="ce44" office:value-type="string" calcext:value-type="string" table:number-columns-spanned="5" table:number-rows-spanned="1">
            <text:p>3. Sensibilidad de valor del Yacon</text:p>
          </table:table-cell>
          <table:covered-table-cell table:number-columns-repeated="4" table:style-name="ce54"/>
          <table:table-cell table:number-columns-repeated="16375"/>
        </table:table-row>
        <table:table-row table:style-name="ro5">
          <table:table-cell table:number-columns-repeated="3"/>
          <table:table-cell table:style-name="ce35" table:formula="of:=([.E30]-[.E33])/[.E33]*100" office:value-type="float" office:value="233.019227785209" calcext:value-type="float">
            <text:p>233.02</text:p>
          </table:table-cell>
          <table:table-cell table:style-name="ce40" office:value-type="string" calcext:value-type="string">
            <text:p>Precio</text:p>
          </table:table-cell>
          <table:table-cell table:style-name="ce51" office:value-type="string" calcext:value-type="string">
            <text:p>VANE</text:p>
          </table:table-cell>
          <table:table-cell table:style-name="ce51" office:value-type="string" calcext:value-type="string">
            <text:p>TIRE</text:p>
          </table:table-cell>
          <table:table-cell table:style-name="ce51" office:value-type="string" calcext:value-type="string">
            <text:p>VANF</text:p>
          </table:table-cell>
          <table:table-cell table:style-name="ce51" office:value-type="string" calcext:value-type="string">
            <text:p>TIRF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7" office:value-type="float" office:value="9.99057683355628" calcext:value-type="float">
            <text:p>S/. 9.99</text:p>
          </table:table-cell>
          <table:table-cell table:style-name="ce55" office:value-type="float" office:value="-0.00000000120780896395445" calcext:value-type="float">
            <text:p>0.00</text:p>
          </table:table-cell>
          <table:table-cell table:style-name="ce66" office:value-type="percentage" office:value="0.186613376779279" calcext:value-type="percentage">
            <text:p>18.66 %</text:p>
          </table:table-cell>
          <table:table-cell table:style-name="ce75" office:value-type="float" office:value="1018.83897011284" calcext:value-type="float">
            <text:p>1018.839</text:p>
          </table:table-cell>
          <table:table-cell table:style-name="ce66" office:value-type="percentage" office:value="0.189657788982051" calcext:value-type="percentage">
            <text:p>18.97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8" office:value-type="float" office:value="7" calcext:value-type="float">
            <text:p>S/. 7.00</text:p>
          </table:table-cell>
          <table:table-cell table:style-name="ce58" office:value-type="float" office:value="347087.823685022" calcext:value-type="float">
            <text:p>347087.82</text:p>
          </table:table-cell>
          <table:table-cell table:style-name="ce67" office:value-type="percentage" office:value="1.40556024096161" calcext:value-type="percentage">
            <text:p>140.56 %</text:p>
          </table:table-cell>
          <table:table-cell table:style-name="ce73" office:value-type="float" office:value="1018.83897011284" calcext:value-type="float">
            <text:p>1018.839</text:p>
          </table:table-cell>
          <table:table-cell table:style-name="ce67" office:value-type="percentage" office:value="1.41204302941313" calcext:value-type="percentage">
            <text:p>141.20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8" office:value-type="float" office:value="5" calcext:value-type="float">
            <text:p>S/. 5.00</text:p>
          </table:table-cell>
          <table:table-cell table:style-name="ce58" office:value-type="float" office:value="579208.81104135" calcext:value-type="float">
            <text:p>579208.81</text:p>
          </table:table-cell>
          <table:table-cell table:style-name="ce67" office:value-type="percentage" office:value="2.43516278896362" calcext:value-type="percentage">
            <text:p>243.52 %</text:p>
          </table:table-cell>
          <table:table-cell table:style-name="ce73" office:value-type="float" office:value="1018.83897011284" calcext:value-type="float">
            <text:p>1018.839</text:p>
          </table:table-cell>
          <table:table-cell table:style-name="ce67" office:value-type="percentage" office:value="2.44340642576215" calcext:value-type="percentage">
            <text:p>244.34 %</text:p>
          </table:table-cell>
          <table:table-cell table:number-columns-repeated="16375"/>
        </table:table-row>
        <table:table-row table:style-name="ro4">
          <table:table-cell table:number-columns-repeated="4"/>
          <table:table-cell table:style-name="ce42" office:value-type="float" office:value="3" calcext:value-type="float">
            <text:p>S/. 3.00</text:p>
          </table:table-cell>
          <table:table-cell table:style-name="ce53" office:value-type="float" office:value="811329.798397679" calcext:value-type="float">
            <text:p>811,329.80</text:p>
          </table:table-cell>
          <table:table-cell table:style-name="ce65" office:value-type="percentage" office:value="3.71950137378268" calcext:value-type="percentage">
            <text:p>371.95 %</text:p>
          </table:table-cell>
          <table:table-cell table:style-name="ce53" office:value-type="float" office:value="1018.83897011284" calcext:value-type="float">
            <text:p>1,018.84</text:p>
          </table:table-cell>
          <table:table-cell table:style-name="ce65" office:value-type="percentage" office:value="3.72959854726687" calcext:value-type="percentage">
            <text:p>372.96 %</text:p>
          </table:table-cell>
          <table:table-cell table:number-columns-repeated="16375"/>
        </table:table-row>
        <table:table-row table:style-name="ro10">
          <table:table-cell table:number-columns-repeated="4"/>
          <table:table-cell table:style-name="ce48" office:value-type="float" office:value="2.5" calcext:value-type="float">
            <text:p>S/. 2.50</text:p>
          </table:table-cell>
          <table:table-cell table:style-name="ce59" office:value-type="float" office:value="869360.045236761" calcext:value-type="float">
            <text:p>869360.05</text:p>
          </table:table-cell>
          <table:table-cell table:style-name="ce69" office:value-type="percentage" office:value="4.09437182661069" calcext:value-type="percentage">
            <text:p>409 %</text:p>
          </table:table-cell>
          <table:table-cell table:style-name="ce76" office:value-type="float" office:value="1018.83897011284" calcext:value-type="float">
            <text:p>1018.839</text:p>
          </table:table-cell>
          <table:table-cell table:style-name="ce69" office:value-type="percentage" office:value="4.10498050076264" calcext:value-type="percentage">
            <text:p>410 %</text:p>
          </table:table-cell>
          <table:table-cell table:number-columns-repeated="16375"/>
        </table:table-row>
        <table:table-row table:style-name="ro2">
          <table:table-cell table:style-name="ce33" table:number-columns-repeated="3"/>
          <table:table-cell table:style-name="ce36"/>
          <table:table-cell table:style-name="ce48" office:value-type="float" office:value="2" calcext:value-type="float">
            <text:p>S/. 2.00</text:p>
          </table:table-cell>
          <table:table-cell table:style-name="ce59" office:value-type="float" office:value="927390.292075843" calcext:value-type="float">
            <text:p>927390.29</text:p>
          </table:table-cell>
          <table:table-cell table:style-name="ce69" office:value-type="percentage" office:value="4.49583339385675" calcext:value-type="percentage">
            <text:p>450 %</text:p>
          </table:table-cell>
          <table:table-cell table:style-name="ce76" office:value-type="float" office:value="1018.83897011284" calcext:value-type="float">
            <text:p>1018.839</text:p>
          </table:table-cell>
          <table:table-cell table:style-name="ce69" office:value-type="percentage" office:value="4.50698127002906" calcext:value-type="percentage">
            <text:p>451 %</text:p>
          </table:table-cell>
          <table:table-cell table:style-name="ce33" table:number-columns-repeated="16375"/>
        </table:table-row>
        <table:table-row table:style-name="ro2">
          <table:table-cell table:style-name="ce33" table:number-columns-repeated="3"/>
          <table:table-cell table:style-name="ce36"/>
          <table:table-cell table:style-name="ce48" office:value-type="float" office:value="1" calcext:value-type="float">
            <text:p>S/. 1.00</text:p>
          </table:table-cell>
          <table:table-cell table:style-name="ce59" office:value-type="float" office:value="1043450.78575401" calcext:value-type="float">
            <text:p>1043450.79</text:p>
          </table:table-cell>
          <table:table-cell table:style-name="ce69" office:value-type="percentage" office:value="5.39186988189152" calcext:value-type="percentage">
            <text:p>539 %</text:p>
          </table:table-cell>
          <table:table-cell table:style-name="ce76" office:value-type="float" office:value="1018.83897011284" calcext:value-type="float">
            <text:p>1018.839</text:p>
          </table:table-cell>
          <table:table-cell table:style-name="ce69" office:value-type="percentage" office:value="5.40419840861972" calcext:value-type="percentage">
            <text:p>540 %</text:p>
          </table:table-cell>
          <table:table-cell table:style-name="ce33" table:number-columns-repeated="16375"/>
        </table:table-row>
        <table:table-row table:style-name="ro2">
          <table:table-cell table:style-name="ce33" table:number-columns-repeated="16384"/>
        </table:table-row>
        <table:table-row table:style-name="ro2">
          <table:table-cell table:style-name="ce33" table:number-columns-repeated="3"/>
          <table:table-cell table:style-name="ce36"/>
          <table:table-cell table:style-name="ce44" office:value-type="string" calcext:value-type="string" table:number-columns-spanned="5" table:number-rows-spanned="1">
            <text:p>2. Sensibilidad de valor de la pasta de cacao</text:p>
          </table:table-cell>
          <table:covered-table-cell table:number-columns-repeated="4" table:style-name="ce54"/>
          <table:table-cell table:style-name="ce33" table:number-columns-repeated="16375"/>
        </table:table-row>
        <table:table-row table:style-name="ro11">
          <table:table-cell table:style-name="ce33" table:number-columns-repeated="3"/>
          <table:table-cell table:style-name="ce35" table:formula="of:=([.E40]-[.E43])/[.E43]*100" office:value-type="float" office:value="139.811536671126" calcext:value-type="float">
            <text:p>139.81</text:p>
          </table:table-cell>
          <table:table-cell table:style-name="ce40" office:value-type="string" calcext:value-type="string">
            <text:p>Precio</text:p>
          </table:table-cell>
          <table:table-cell table:style-name="ce51" office:value-type="string" calcext:value-type="string">
            <text:p>VANE</text:p>
          </table:table-cell>
          <table:table-cell table:style-name="ce51" office:value-type="string" calcext:value-type="string">
            <text:p>TIRE</text:p>
          </table:table-cell>
          <table:table-cell table:style-name="ce51" office:value-type="string" calcext:value-type="string">
            <text:p>VANF</text:p>
          </table:table-cell>
          <table:table-cell table:style-name="ce51" office:value-type="string" calcext:value-type="string">
            <text:p>TIRF</text:p>
          </table:table-cell>
          <table:table-cell table:style-name="ce33" table:number-columns-repeated="16375"/>
        </table:table-row>
        <table:table-row table:style-name="ro5">
          <table:table-cell table:number-columns-repeated="4"/>
          <table:table-cell table:style-name="ce47" office:value-type="float" office:value="47.9623073342251" calcext:value-type="float">
            <text:p>S/. 47.96</text:p>
          </table:table-cell>
          <table:table-cell table:style-name="ce60" office:value-type="float" office:value="-0.00000000122236087918282" calcext:value-type="float">
            <text:p>0</text:p>
          </table:table-cell>
          <table:table-cell table:style-name="ce70" office:value-type="percentage" office:value="0.186613376779279" calcext:value-type="percentage">
            <text:p>18.7%</text:p>
          </table:table-cell>
          <table:table-cell table:style-name="ce60" office:value-type="float" office:value="1018.83897011284" calcext:value-type="float">
            <text:p>1,019</text:p>
          </table:table-cell>
          <table:table-cell table:style-name="ce70" office:value-type="percentage" office:value="0.189657788982051" calcext:value-type="percentage">
            <text:p>19.0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8" office:value-type="float" office:value="40" calcext:value-type="float">
            <text:p>S/. 40.00</text:p>
          </table:table-cell>
          <table:table-cell table:style-name="ce61" office:value-type="float" office:value="231027.330006858" calcext:value-type="float">
            <text:p>231,027</text:p>
          </table:table-cell>
          <table:table-cell table:style-name="ce71" office:value-type="percentage" office:value="0.959935437037157" calcext:value-type="percentage">
            <text:p>96.0%</text:p>
          </table:table-cell>
          <table:table-cell table:style-name="ce61" office:value-type="float" office:value="1018.83897011284" calcext:value-type="float">
            <text:p>1,019</text:p>
          </table:table-cell>
          <table:table-cell table:style-name="ce71" office:value-type="percentage" office:value="0.965448172068541" calcext:value-type="percentage">
            <text:p>96.5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8" office:value-type="float" office:value="30" calcext:value-type="float">
            <text:p>S/. 30.00</text:p>
          </table:table-cell>
          <table:table-cell table:style-name="ce61" office:value-type="float" office:value="521178.564202268" calcext:value-type="float">
            <text:p>521,179</text:p>
          </table:table-cell>
          <table:table-cell table:style-name="ce71" office:value-type="percentage" office:value="2.15772718412422" calcext:value-type="percentage">
            <text:p>215.8%</text:p>
          </table:table-cell>
          <table:table-cell table:style-name="ce61" office:value-type="float" office:value="1018.83897011284" calcext:value-type="float">
            <text:p>1,019</text:p>
          </table:table-cell>
          <table:table-cell table:style-name="ce71" office:value-type="percentage" office:value="2.16553451189985" calcext:value-type="percentage">
            <text:p>216.6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2" office:value-type="float" office:value="20" calcext:value-type="float">
            <text:p>S/. 20.00</text:p>
          </table:table-cell>
          <table:table-cell table:style-name="ce53" office:value-type="float" office:value="811329.798397679" calcext:value-type="float">
            <text:p>811,329.80</text:p>
          </table:table-cell>
          <table:table-cell table:style-name="ce65" office:value-type="percentage" office:value="3.71950137378268" calcext:value-type="percentage">
            <text:p>371.95 %</text:p>
          </table:table-cell>
          <table:table-cell table:style-name="ce53" office:value-type="float" office:value="1018.83897011284" calcext:value-type="float">
            <text:p>1,018.84</text:p>
          </table:table-cell>
          <table:table-cell table:style-name="ce65" office:value-type="percentage" office:value="3.72959854726687" calcext:value-type="percentage">
            <text:p>372.96 %</text:p>
          </table:table-cell>
          <table:table-cell table:number-columns-repeated="16375"/>
        </table:table-row>
        <table:table-row table:style-name="ro4">
          <table:table-cell table:number-columns-repeated="4"/>
          <table:table-cell table:style-name="ce48" office:value-type="float" office:value="10" calcext:value-type="float">
            <text:p>S/. 10.00</text:p>
          </table:table-cell>
          <table:table-cell table:style-name="ce61" office:value-type="float" office:value="1101481.03259309" calcext:value-type="float">
            <text:p>1,101,481</text:p>
          </table:table-cell>
          <table:table-cell table:style-name="ce69" office:value-type="percentage" office:value="5.89449174568917" calcext:value-type="percentage">
            <text:p>589 %</text:p>
          </table:table-cell>
          <table:table-cell table:style-name="ce61" office:value-type="float" office:value="1018.83897011284" calcext:value-type="float">
            <text:p>1,019</text:p>
          </table:table-cell>
          <table:table-cell table:style-name="ce69" office:value-type="percentage" office:value="5.90747266216542" calcext:value-type="percentage">
            <text:p>591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8" office:value-type="float" office:value="8" calcext:value-type="float">
            <text:p>S/. 8.00</text:p>
          </table:table-cell>
          <table:table-cell table:style-name="ce61" office:value-type="float" office:value="1159511.27943217" calcext:value-type="float">
            <text:p>1,159,511</text:p>
          </table:table-cell>
          <table:table-cell table:style-name="ce69" office:value-type="percentage" office:value="6.44004282983821" calcext:value-type="percentage">
            <text:p>644 %</text:p>
          </table:table-cell>
          <table:table-cell table:style-name="ce61" office:value-type="float" office:value="1018.83897011284" calcext:value-type="float">
            <text:p>1,019</text:p>
          </table:table-cell>
          <table:table-cell table:style-name="ce69" office:value-type="percentage" office:value="6.45372607345833" calcext:value-type="percentage">
            <text:p>645 %</text:p>
          </table:table-cell>
          <table:table-cell table:number-columns-repeated="16375"/>
        </table:table-row>
        <table:table-row table:style-name="ro5">
          <table:table-cell table:number-columns-repeated="4"/>
          <table:table-cell table:style-name="ce48" office:value-type="float" office:value="5" calcext:value-type="float">
            <text:p>S/. 5.00</text:p>
          </table:table-cell>
          <table:table-cell table:style-name="ce61" office:value-type="float" office:value="1246556.64969079" calcext:value-type="float">
            <text:p>1,246,557</text:p>
          </table:table-cell>
          <table:table-cell table:style-name="ce69" office:value-type="percentage" office:value="7.35231286351" calcext:value-type="percentage">
            <text:p>735 %</text:p>
          </table:table-cell>
          <table:table-cell table:style-name="ce61" office:value-type="float" office:value="1018.83897011284" calcext:value-type="float">
            <text:p>1,019</text:p>
          </table:table-cell>
          <table:table-cell table:style-name="ce69" office:value-type="percentage" office:value="7.36716042882744" calcext:value-type="percentage">
            <text:p>737 %</text:p>
          </table:table-cell>
          <table:table-cell table:number-columns-repeated="16375"/>
        </table:table-row>
        <table:table-row table:style-name="ro5" table:number-rows-repeated="964">
          <table:table-cell table:number-columns-repeated="16384"/>
        </table:table-row>
        <table:table-row table:style-name="ro9" table:number-rows-repeated="104756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3">
        <table:table-column table:style-name="co11" table:default-cell-style-name="ce80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6" table:default-cell-style-name="ce80"/>
        <table:table-column table:style-name="co20" table:default-cell-style-name="ce80"/>
        <table:table-column table:style-name="co21" table:number-columns-repeated="244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7" table:default-cell-style-name="ce80"/>
        <table:table-column table:style-name="co11" table:default-cell-style-name="ce80"/>
        <table:table-column table:style-name="co12" table:default-cell-style-name="ce80"/>
        <table:table-column table:style-name="co22" table:default-cell-style-name="ce80"/>
        <table:table-column table:style-name="co14" table:default-cell-style-name="ce80"/>
        <table:table-column table:style-name="co23" table:default-cell-style-name="ce80"/>
        <table:table-column table:style-name="co16" table:default-cell-style-name="ce80"/>
        <table:table-column table:style-name="co21" table:default-cell-style-name="ce80"/>
        <table:table-column table:style-name="co24" table:default-cell-style-name="ce80"/>
        <table:table-column table:style-name="co25" table:default-cell-style-name="ce80"/>
        <table:table-column table:style-name="co21" table:number-columns-repeated="248" table:default-cell-style-name="ce80"/>
        <table:table-row table:style-name="ro12" table:number-rows-repeated="5">
          <table:table-cell table:number-columns-repeated="16384"/>
        </table:table-row>
        <table:table-row table:style-name="ro12">
          <table:table-cell table:number-columns-repeated="11"/>
          <table:table-cell office:value-type="string" calcext:value-type="string">
            <text:p>del proyecto</text:p>
          </table:table-cell>
          <table:table-cell table:number-columns-repeated="16372"/>
        </table:table-row>
        <table:table-row table:style-name="ro12">
          <table:table-cell/>
          <table:table-cell table:style-name="ce81" office:value-type="string" calcext:value-type="string" table:number-columns-spanned="4" table:number-rows-spanned="1">
            <text:p>MODELO FINANCIERO</text:p>
          </table:table-cell>
          <table:covered-table-cell table:number-columns-repeated="3" table:style-name="ce81"/>
          <table:table-cell/>
          <table:table-cell table:style-name="ce93" office:value-type="string" calcext:value-type="string">
            <text:p>Inflacion USA</text:p>
          </table:table-cell>
          <table:table-cell table:style-name="ce95" office:value-type="percentage" office:value="0.02" calcext:value-type="percentage">
            <text:p>2.0%</text:p>
          </table:table-cell>
          <table:table-cell table:style-name="ce104" office:value-type="string" calcext:value-type="string">
            <text:p>nominal anual</text:p>
          </table:table-cell>
          <table:table-cell/>
          <table:table-cell table:style-name="ce106" office:value-type="string" calcext:value-type="string">
            <text:p>Variable</text:p>
          </table:table-cell>
          <table:table-cell table:style-name="ce106" office:value-type="string" calcext:value-type="string">
            <text:p>Probable </text:p>
          </table:table-cell>
          <table:table-cell table:style-name="ce106" office:value-type="string" calcext:value-type="string">
            <text:p>Optimista</text:p>
          </table:table-cell>
          <table:table-cell table:style-name="ce106" office:value-type="string" calcext:value-type="string">
            <text:p>pesimista</text:p>
          </table:table-cell>
          <table:table-cell table:number-columns-repeated="16370"/>
        </table:table-row>
        <table:table-row table:style-name="ro12">
          <table:table-cell/>
          <table:table-cell table:style-name="ce82" table:number-columns-repeated="4"/>
          <table:table-cell/>
          <table:table-cell table:style-name="ce93" office:value-type="string" calcext:value-type="string">
            <text:p>Inflacion Peru</text:p>
          </table:table-cell>
          <table:table-cell table:style-name="ce96" office:value-type="percentage" office:value="0.029" calcext:value-type="percentage">
            <text:p>2.9%</text:p>
          </table:table-cell>
          <table:table-cell table:style-name="ce104" office:value-type="string" calcext:value-type="string">
            <text:p><text:s/>nominal anual</text:p>
          </table:table-cell>
          <table:table-cell/>
          <table:table-cell table:style-name="ce107" office:value-type="string" calcext:value-type="string">
            <text:p>P venta</text:p>
          </table:table-cell>
          <table:table-cell table:style-name="ce104" office:value-type="float" office:value="10.5" calcext:value-type="float">
            <text:p>10.5</text:p>
          </table:table-cell>
          <table:table-cell table:style-name="ce104" office:value-type="float" office:value="11.5" calcext:value-type="float">
            <text:p>11.5</text:p>
          </table:table-cell>
          <table:table-cell table:style-name="ce104" office:value-type="float" office:value="9" calcext:value-type="float">
            <text:p>9</text:p>
          </table:table-cell>
          <table:table-cell table:number-columns-repeated="16370"/>
        </table:table-row>
        <table:table-row table:style-name="ro12">
          <table:table-cell/>
          <table:table-cell table:style-name="ce83" office:value-type="string" calcext:value-type="string" table:number-columns-spanned="4" table:number-rows-spanned="1">
            <text:p>EVALUACION ECONOMICA</text:p>
          </table:table-cell>
          <table:covered-table-cell table:number-columns-repeated="3" table:style-name="ce83"/>
          <table:table-cell/>
          <table:table-cell table:style-name="ce94" office:value-type="string" calcext:value-type="string">
            <text:p>Horizonte Ev.</text:p>
          </table:table-cell>
          <table:table-cell table:style-name="ce97" office:value-type="float" office:value="5" calcext:value-type="float">
            <text:p>5</text:p>
          </table:table-cell>
          <table:table-cell table:style-name="ce104" office:value-type="string" calcext:value-type="string">
            <text:p>años</text:p>
          </table:table-cell>
          <table:table-cell/>
          <table:table-cell table:style-name="ce107" office:value-type="string" calcext:value-type="string">
            <text:p>Mano de obra</text:p>
          </table:table-cell>
          <table:table-cell table:style-name="ce110" office:value-type="float" office:value="0.7" calcext:value-type="float">
            <text:p>0.7</text:p>
          </table:table-cell>
          <table:table-cell table:style-name="ce104" office:value-type="float" office:value="0.6" calcext:value-type="float">
            <text:p>0.6</text:p>
          </table:table-cell>
          <table:table-cell table:style-name="ce104" office:value-type="float" office:value="1.5" calcext:value-type="float">
            <text:p>1.5</text:p>
          </table:table-cell>
          <table:table-cell table:number-columns-repeated="16370"/>
        </table:table-row>
        <table:table-row table:style-name="ro12">
          <table:table-cell/>
          <table:table-cell table:style-name="ce84" office:value-type="string" calcext:value-type="string" table:number-columns-spanned="4" table:number-rows-spanned="1">
            <text:p>Y FINANCIERA DE INVERSIONES</text:p>
          </table:table-cell>
          <table:covered-table-cell table:number-columns-repeated="3" table:style-name="ce84"/>
          <table:table-cell/>
          <table:table-cell table:style-name="ce94" office:value-type="string" calcext:value-type="string">
            <text:p>TEA</text:p>
          </table:table-cell>
          <table:table-cell table:style-name="ce98" office:value-type="percentage" office:value="0.2163" calcext:value-type="percentage">
            <text:p>21.63 %</text:p>
          </table:table-cell>
          <table:table-cell table:style-name="ce104" office:value-type="string" calcext:value-type="string">
            <text:p>CAMC</text:p>
          </table:table-cell>
          <table:table-cell/>
          <table:table-cell table:style-name="ce107" office:value-type="string" calcext:value-type="string">
            <text:p>Yacon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.5" calcext:value-type="float">
            <text:p>2.5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16370"/>
        </table:table-row>
        <table:table-row table:style-name="ro12">
          <table:table-cell/>
          <table:table-cell table:style-name="ce83" table:number-columns-spanned="4" table:number-rows-spanned="1"/>
          <table:covered-table-cell table:number-columns-repeated="3" table:style-name="ce83"/>
          <table:table-cell/>
          <table:table-cell table:style-name="ce94" office:value-type="string" calcext:value-type="string">
            <text:p>Impuesto I</text:p>
          </table:table-cell>
          <table:table-cell table:style-name="ce99" office:value-type="percentage" office:value="0.1" calcext:value-type="percentage">
            <text:p>10 %</text:p>
          </table:table-cell>
          <table:table-cell table:style-name="ce104" office:value-type="string" calcext:value-type="string">
            <text:p>0-S/. 66,000</text:p>
          </table:table-cell>
          <table:table-cell/>
          <table:table-cell table:style-name="ce107" office:value-type="string" calcext:value-type="string">
            <text:p>Pasta de cacao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0" calcext:value-type="float">
            <text:p>30</text:p>
          </table:table-cell>
          <table:table-cell table:number-columns-repeated="16370"/>
        </table:table-row>
        <table:table-row table:style-name="ro12">
          <table:table-cell/>
          <table:table-cell table:style-name="ce82"/>
          <table:table-cell table:style-name="ce87" table:number-columns-repeated="2"/>
          <table:table-cell table:style-name="ce82"/>
          <table:table-cell/>
          <table:table-cell table:style-name="ce94" office:value-type="string" calcext:value-type="string">
            <text:p>Impuesto II</text:p>
          </table:table-cell>
          <table:table-cell table:style-name="ce96" office:value-type="percentage" office:value="0.295" calcext:value-type="percentage">
            <text:p>29.5%</text:p>
          </table:table-cell>
          <table:table-cell table:style-name="ce104" office:value-type="string" calcext:value-type="string">
            <text:p>Mayor a 66,000</text:p>
          </table:table-cell>
          <table:table-cell/>
          <table:table-cell table:style-name="ce108" table:number-columns-repeated="4"/>
          <table:table-cell table:number-columns-repeated="16370"/>
        </table:table-row>
        <table:table-row table:style-name="ro13">
          <table:table-cell/>
          <table:table-cell table:style-name="ce85" office:value-type="string" calcext:value-type="string">
            <text:p>VANE</text:p>
          </table:table-cell>
          <table:table-cell table:style-name="ce88" table:formula="of:=[$Rentabilidad.D13]" office:value-type="float" office:value="135582.735468953" calcext:value-type="float">
            <text:p>135583</text:p>
          </table:table-cell>
          <table:table-cell table:style-name="ce85" office:value-type="string" calcext:value-type="string">
            <text:p>VANF</text:p>
          </table:table-cell>
          <table:table-cell table:style-name="ce90" table:formula="of:=[$Rentabilidad.D22]" office:value-type="float" office:value="963.322633784986" calcext:value-type="float">
            <text:p>963.32</text:p>
          </table:table-cell>
          <table:table-cell table:style-name="ce91"/>
          <table:table-cell table:style-name="ce94" office:value-type="string" calcext:value-type="string">
            <text:p>Precio venta</text:p>
          </table:table-cell>
          <table:table-cell table:style-name="ce100" office:value-type="float" office:value="7" calcext:value-type="float">
            <text:p><text:s/>7.0 </text:p>
          </table:table-cell>
          <table:table-cell table:style-name="ce104" office:value-type="string" calcext:value-type="string">
            <text:p>Por <text:s/>unidad de chocolate chocolate</text:p>
          </table:table-cell>
          <table:table-cell table:number-columns-repeated="16375"/>
        </table:table-row>
        <table:table-row table:style-name="ro12">
          <table:table-cell/>
          <table:table-cell table:style-name="ce86" table:number-columns-repeated="4"/>
          <table:table-cell/>
          <table:table-cell table:style-name="ce94" office:value-type="string" calcext:value-type="string">
            <text:p>Mano Obra por chocolate</text:p>
          </table:table-cell>
          <table:table-cell table:style-name="ce101" office:value-type="float" office:value="0.7" calcext:value-type="float">
            <text:p>0.7</text:p>
          </table:table-cell>
          <table:table-cell table:style-name="ce105" office:value-type="string" calcext:value-type="string">
            <text:p>Por chocolate</text:p>
          </table:table-cell>
          <table:table-cell/>
          <table:table-cell table:style-name="ce109"/>
          <table:table-cell table:number-columns-repeated="16373"/>
        </table:table-row>
        <table:table-row table:style-name="ro12">
          <table:table-cell/>
          <table:table-cell table:style-name="ce85" office:value-type="string" calcext:value-type="string">
            <text:p>TIRE</text:p>
          </table:table-cell>
          <table:table-cell table:style-name="ce89" table:formula="of:=[$Rentabilidad.D15]" office:value-type="percentage" office:value="0.581814239972824" calcext:value-type="percentage">
            <text:p>58.2%</text:p>
          </table:table-cell>
          <table:table-cell table:style-name="ce85" office:value-type="string" calcext:value-type="string">
            <text:p>TIRF</text:p>
          </table:table-cell>
          <table:table-cell table:style-name="ce89" table:formula="of:=[$Rentabilidad.D26]" office:value-type="percentage" office:value="0.586033203078177" calcext:value-type="percentage">
            <text:p>58.6%</text:p>
          </table:table-cell>
          <table:table-cell table:style-name="ce92"/>
          <table:table-cell table:style-name="ce94" office:value-type="string" calcext:value-type="string">
            <text:p>Valor del Yacon</text:p>
          </table:table-cell>
          <table:table-cell table:style-name="ce102" office:value-type="float" office:value="3" calcext:value-type="float">
            <text:p>3.00</text:p>
          </table:table-cell>
          <table:table-cell table:style-name="ce104" office:value-type="string" calcext:value-type="string">
            <text:p>Por Kilo</text:p>
          </table:table-cell>
          <table:table-cell table:number-columns-repeated="16375"/>
        </table:table-row>
        <table:table-row table:style-name="ro12">
          <table:table-cell table:number-columns-repeated="6"/>
          <table:table-cell table:style-name="ce94" office:value-type="string" calcext:value-type="string">
            <text:p>Valor de la pasta de cacao</text:p>
          </table:table-cell>
          <table:table-cell table:style-name="ce103" office:value-type="float" office:value="20" calcext:value-type="float">
            <text:p>20.00</text:p>
          </table:table-cell>
          <table:table-cell table:style-name="ce104" office:value-type="string" calcext:value-type="string">
            <text:p>400 gramos</text:p>
          </table:table-cell>
          <table:table-cell table:number-columns-repeated="16375"/>
        </table:table-row>
        <table:table-row table:style-name="ro12" table:number-rows-repeated="1048559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OPTIMISTA" table:style-name="ta4">
        <table:scenario table:display-border="false" table:border-color="#c0c0c0" table:copy-back="false" table:copy-styles="false" table:copy-formulas="false" table:protected="true" table:is-active="false" table:scenario-ranges="OPTIMISTA.H13:OPTIMISTA.H16" table:comment="&#10;Modificado por HP el 22/02/2021&#10;Modificado por Usuario el 24/02/2021"/>
        <table:table-column table:style-name="co11" table:default-cell-style-name="ce111"/>
        <table:table-column table:style-name="co12" table:default-cell-style-name="ce111"/>
        <table:table-column table:style-name="co13" table:default-cell-style-name="ce111"/>
        <table:table-column table:style-name="co14" table:default-cell-style-name="ce111"/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18" table:default-cell-style-name="ce111"/>
        <table:table-column table:style-name="co19" table:default-cell-style-name="ce111"/>
        <table:table-column table:style-name="co6" table:default-cell-style-name="ce111"/>
        <table:table-column table:style-name="co20" table:default-cell-style-name="ce111"/>
        <table:table-column table:style-name="co21" table:number-columns-repeated="244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8" table:default-cell-style-name="ce111"/>
        <table:table-row table:style-name="ro13" table:number-rows-repeated="12">
          <table:table-cell table:number-columns-repeated="16384"/>
        </table:table-row>
        <table:table-row table:style-name="ro13">
          <table:table-cell table:number-columns-repeated="7"/>
          <table:table-cell table:style-name="ce100" office:value-type="float" office:value="11.5" calcext:value-type="float">
            <text:p><text:s/>11.5 </text:p>
          </table:table-cell>
          <table:table-cell table:number-columns-repeated="16376"/>
        </table:table-row>
        <table:table-row table:style-name="ro13">
          <table:table-cell table:number-columns-repeated="7"/>
          <table:table-cell table:style-name="ce112" office:value-type="float" office:value="0.6" calcext:value-type="float">
            <text:p>0.6</text:p>
          </table:table-cell>
          <table:table-cell table:number-columns-repeated="16376"/>
        </table:table-row>
        <table:table-row table:style-name="ro13">
          <table:table-cell table:number-columns-repeated="7"/>
          <table:table-cell table:style-name="ce113" office:value-type="float" office:value="2.7" calcext:value-type="float">
            <text:p>2.70</text:p>
          </table:table-cell>
          <table:table-cell table:number-columns-repeated="16376"/>
        </table:table-row>
        <table:table-row table:style-name="ro13">
          <table:table-cell table:number-columns-repeated="7"/>
          <table:table-cell table:style-name="ce114" office:value-type="float" office:value="19" calcext:value-type="float">
            <text:p>19.00</text:p>
          </table:table-cell>
          <table:table-cell table:number-columns-repeated="16376"/>
        </table:table-row>
        <table:table-row table:style-name="ro12" table:number-rows-repeated="1048559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PESIMISTA" table:style-name="ta4">
        <table:scenario table:display-border="false" table:border-color="#c0c0c0" table:copy-back="false" table:copy-styles="false" table:copy-formulas="false" table:protected="true" table:is-active="false" table:scenario-ranges="PESIMISTA.H13:PESIMISTA.H16" table:comment="Creado por Usuario el 24/02/2021&#10;Modificado por Usuario el 24/02/2021"/>
        <table:table-column table:style-name="co11" table:default-cell-style-name="ce111"/>
        <table:table-column table:style-name="co12" table:default-cell-style-name="ce111"/>
        <table:table-column table:style-name="co13" table:default-cell-style-name="ce111"/>
        <table:table-column table:style-name="co14" table:default-cell-style-name="ce111"/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18" table:default-cell-style-name="ce111"/>
        <table:table-column table:style-name="co19" table:default-cell-style-name="ce111"/>
        <table:table-column table:style-name="co6" table:default-cell-style-name="ce111"/>
        <table:table-column table:style-name="co20" table:default-cell-style-name="ce111"/>
        <table:table-column table:style-name="co21" table:number-columns-repeated="244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7" table:default-cell-style-name="ce111"/>
        <table:table-column table:style-name="co11" table:default-cell-style-name="ce111"/>
        <table:table-column table:style-name="co12" table:default-cell-style-name="ce111"/>
        <table:table-column table:style-name="co22" table:default-cell-style-name="ce111"/>
        <table:table-column table:style-name="co14" table:default-cell-style-name="ce111"/>
        <table:table-column table:style-name="co23" table:default-cell-style-name="ce111"/>
        <table:table-column table:style-name="co16" table:default-cell-style-name="ce111"/>
        <table:table-column table:style-name="co21" table:default-cell-style-name="ce111"/>
        <table:table-column table:style-name="co24" table:default-cell-style-name="ce111"/>
        <table:table-column table:style-name="co25" table:default-cell-style-name="ce111"/>
        <table:table-column table:style-name="co21" table:number-columns-repeated="248" table:default-cell-style-name="ce111"/>
        <table:table-row table:style-name="ro13" table:number-rows-repeated="12">
          <table:table-cell table:number-columns-repeated="16384"/>
        </table:table-row>
        <table:table-row table:style-name="ro13">
          <table:table-cell table:number-columns-repeated="7"/>
          <table:table-cell table:style-name="ce100" office:value-type="float" office:value="9" calcext:value-type="float">
            <text:p><text:s/>9.0 </text:p>
          </table:table-cell>
          <table:table-cell table:number-columns-repeated="16376"/>
        </table:table-row>
        <table:table-row table:style-name="ro13">
          <table:table-cell table:number-columns-repeated="7"/>
          <table:table-cell table:style-name="ce112" office:value-type="float" office:value="1" calcext:value-type="float">
            <text:p>1.0</text:p>
          </table:table-cell>
          <table:table-cell table:number-columns-repeated="16376"/>
        </table:table-row>
        <table:table-row table:style-name="ro13">
          <table:table-cell table:number-columns-repeated="7"/>
          <table:table-cell table:style-name="ce113" office:value-type="float" office:value="3.5" calcext:value-type="float">
            <text:p>3.50</text:p>
          </table:table-cell>
          <table:table-cell table:number-columns-repeated="16376"/>
        </table:table-row>
        <table:table-row table:style-name="ro13">
          <table:table-cell table:number-columns-repeated="7"/>
          <table:table-cell table:style-name="ce114" office:value-type="float" office:value="21" calcext:value-type="float">
            <text:p>21.00</text:p>
          </table:table-cell>
          <table:table-cell table:number-columns-repeated="16376"/>
        </table:table-row>
        <table:table-row table:style-name="ro12" table:number-rows-repeated="1048559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Presupuesto de ventas" table:style-name="ta5">
        <table:table-column table:style-name="co26" table:default-cell-style-name="Default"/>
        <table:table-column table:style-name="co2" table:default-cell-style-name="ce116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6367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4"/>
          <table:table-cell office:value-type="string" calcext:value-type="string">
            <text:p>caja de 12 unidades 50 gr cada chocolate</text:p>
          </table:table-cell>
          <table:table-cell table:number-columns-repeated="1636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9"/>
          <table:table-cell table:style-name="ce119" office:value-type="string" calcext:value-type="string">
            <text:p>CUADRO N° 01</text:p>
          </table:table-cell>
          <table:table-cell table:style-name="ce119" table:number-columns-repeated="3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9" office:value-type="string" calcext:value-type="string">
            <text:p>Proyeccion de ventas ( Chocolates endulzados )</text:p>
          </table:table-cell>
          <table:table-cell table:style-name="ce119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12"/>
          <table:table-cell office:value-type="string" calcext:value-type="string">
            <text:p>UNIDADE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chocolates al mes</text:p>
          </table:table-cell>
          <table:table-cell table:number-columns-repeated="16367"/>
        </table:table-row>
        <table:table-row table:style-name="ro1">
          <table:table-cell/>
          <table:table-cell table:style-name="ce115" office:value-type="string" calcext:value-type="string">
            <text:p>Año</text:p>
          </table:table-cell>
          <table:table-cell table:style-name="ce115" office:value-type="string" calcext:value-type="string">
            <text:p>Mes 1</text:p>
          </table:table-cell>
          <table:table-cell table:style-name="ce115" office:value-type="string" calcext:value-type="string">
            <text:p>Mes 2</text:p>
          </table:table-cell>
          <table:table-cell table:style-name="ce115" office:value-type="string" calcext:value-type="string">
            <text:p>Mes 3</text:p>
          </table:table-cell>
          <table:table-cell table:style-name="ce115" office:value-type="string" calcext:value-type="string">
            <text:p>Mes 4</text:p>
          </table:table-cell>
          <table:table-cell table:style-name="ce115" office:value-type="string" calcext:value-type="string">
            <text:p>Mes 5</text:p>
          </table:table-cell>
          <table:table-cell table:style-name="ce115" office:value-type="string" calcext:value-type="string">
            <text:p>Mes 6</text:p>
          </table:table-cell>
          <table:table-cell table:style-name="ce115" office:value-type="string" calcext:value-type="string">
            <text:p>Mes 7</text:p>
          </table:table-cell>
          <table:table-cell table:style-name="ce115" office:value-type="string" calcext:value-type="string">
            <text:p>Mes 8</text:p>
          </table:table-cell>
          <table:table-cell table:style-name="ce115" office:value-type="string" calcext:value-type="string">
            <text:p>Mes 9</text:p>
          </table:table-cell>
          <table:table-cell table:style-name="ce115" office:value-type="string" calcext:value-type="string">
            <text:p>Mes 10</text:p>
          </table:table-cell>
          <table:table-cell table:style-name="ce115" office:value-type="string" calcext:value-type="string">
            <text:p>Mes 11</text:p>
          </table:table-cell>
          <table:table-cell table:style-name="ce115" office:value-type="string" calcext:value-type="string">
            <text:p>Mes 12</text:p>
          </table:table-cell>
          <table:table-cell table:style-name="ce115" office:value-type="string" calcext:value-type="string">
            <text:p>TOTA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hocolates al dia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7" table:formula="of:=300*12" office:value-type="float" office:value="3600" calcext:value-type="float">
            <text:p>3600</text:p>
          </table:table-cell>
          <table:table-cell table:style-name="ce117" table:formula="of:=350*12" office:value-type="float" office:value="4200" calcext:value-type="float">
            <text:p>4200</text:p>
          </table:table-cell>
          <table:table-cell table:style-name="ce117" table:formula="of:=400*12" office:value-type="float" office:value="4800" calcext:value-type="float">
            <text:p>4800</text:p>
          </table:table-cell>
          <table:table-cell table:style-name="ce117" table:formula="of:=450*12" office:value-type="float" office:value="5400" calcext:value-type="float">
            <text:p>5400</text:p>
          </table:table-cell>
          <table:table-cell table:style-name="ce117" table:formula="of:=500*12" office:value-type="float" office:value="6000" calcext:value-type="float">
            <text:p>6000</text:p>
          </table:table-cell>
          <table:table-cell table:style-name="ce117" table:formula="of:=550*12" office:value-type="float" office:value="6600" calcext:value-type="float">
            <text:p>6600</text:p>
          </table:table-cell>
          <table:table-cell table:style-name="ce117" table:formula="of:=600*12" office:value-type="float" office:value="7200" calcext:value-type="float">
            <text:p>7200</text:p>
          </table:table-cell>
          <table:table-cell table:style-name="ce117" table:formula="of:=650*12" office:value-type="float" office:value="7800" calcext:value-type="float">
            <text:p>7800</text:p>
          </table:table-cell>
          <table:table-cell table:style-name="ce117" table:formula="of:=700*12" office:value-type="float" office:value="8400" calcext:value-type="float">
            <text:p>8400</text:p>
          </table:table-cell>
          <table:table-cell table:style-name="ce117" table:formula="of:=750*12" office:value-type="float" office:value="9000" calcext:value-type="float">
            <text:p>9000</text:p>
          </table:table-cell>
          <table:table-cell table:style-name="ce117" table:formula="of:=800*12" office:value-type="float" office:value="9600" calcext:value-type="float">
            <text:p>9600</text:p>
          </table:table-cell>
          <table:table-cell table:style-name="ce117" table:formula="of:=850*12" office:value-type="float" office:value="10200" calcext:value-type="float">
            <text:p>10200</text:p>
          </table:table-cell>
          <table:table-cell table:style-name="ce121" table:formula="of:=SUM([.C7:.N7])" office:value-type="float" office:value="82800" calcext:value-type="float">
            <text:p><text:s/>82,800.00 </text:p>
          </table:table-cell>
          <table:table-cell table:formula="of:=[.P6]*25" office:value-type="float" office:value="3600" calcext:value-type="float">
            <text:p>3600</text:p>
          </table:table-cell>
          <table:table-cell table:number-columns-repeated="5"/>
          <table:table-cell office:value-type="float" office:value="1930" calcext:value-type="float">
            <text:p>1930</text:p>
          </table:table-cell>
          <table:table-cell office:value-type="float" office:value="3600" calcext:value-type="float">
            <text:p>3600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1" table:formula="of:=SUM([.C8:.N8])" office:value-type="float" office:value="122400" calcext:value-type="float">
            <text:p><text:s/>122,400.00 </text:p>
          </table:table-cell>
          <table:table-cell/>
          <table:table-cell office:value-type="string" calcext:value-type="string">
            <text:p>Horizonte de evaluacion es 5 años</text:p>
          </table:table-cell>
          <table:table-cell table:number-columns-repeated="4"/>
          <table:table-cell table:style-name="ce123" table:formula="of:=[.V7]/[.W7]" office:value-type="float" office:value="0.536111111111111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1" table:formula="of:=SUM([.C9:.N9])" office:value-type="float" office:value="122400" calcext:value-type="float">
            <text:p><text:s/>122,40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1" table:formula="of:=SUM([.C10:.N10])" office:value-type="float" office:value="122400" calcext:value-type="float">
            <text:p><text:s/>122,40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1" table:formula="of:=SUM([.C11:.N11])" office:value-type="float" office:value="122400" calcext:value-type="float">
            <text:p><text:s/>122,400.00 </text:p>
          </table:table-cell>
          <table:table-cell table:number-columns-repeated="16369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2 trabajdores</text:p>
          </table:table-cell>
          <table:table-cell table:number-columns-repeated="2"/>
          <table:table-cell office:value-type="string" calcext:value-type="string">
            <text:p>4 trabjadores</text:p>
          </table:table-cell>
          <table:table-cell table:number-columns-repeated="4"/>
          <table:table-cell office:value-type="string" calcext:value-type="string">
            <text:p>6 trabajadpres</text:p>
          </table:table-cell>
          <table:table-cell table:number-columns-repeated="16370"/>
        </table:table-row>
        <table:table-row table:style-name="ro14">
          <table:table-cell/>
          <table:table-cell table:style-name="Default"/>
          <table:table-cell table:number-columns-repeated="3"/>
          <table:table-cell table:style-name="ce120"/>
          <table:table-cell table:style-name="ce120" office:value-type="string" calcext:value-type="string">
            <text:p>CUADRO N° 02</text:p>
          </table:table-cell>
          <table:table-cell table:style-name="ce120"/>
          <table:table-cell table:number-columns-repeated="16376"/>
        </table:table-row>
        <table:table-row table:style-name="ro14">
          <table:table-cell/>
          <table:table-cell table:style-name="Default"/>
          <table:table-cell table:number-columns-repeated="3"/>
          <table:table-cell table:style-name="ce120" office:value-type="string" calcext:value-type="string">
            <text:p>Proyeccion de ventas en nuevos soles</text:p>
          </table:table-cell>
          <table:table-cell table:style-name="ce120" table:number-columns-repeated="2"/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15" office:value-type="string" calcext:value-type="string">
            <text:p>Año</text:p>
          </table:table-cell>
          <table:table-cell table:style-name="ce115" office:value-type="string" calcext:value-type="string">
            <text:p>Valor Unitario</text:p>
          </table:table-cell>
          <table:table-cell table:style-name="ce115" office:value-type="string" calcext:value-type="string">
            <text:p>Mes 1</text:p>
          </table:table-cell>
          <table:table-cell table:style-name="ce115" office:value-type="string" calcext:value-type="string">
            <text:p>Mes 2</text:p>
          </table:table-cell>
          <table:table-cell table:style-name="ce115" office:value-type="string" calcext:value-type="string">
            <text:p>Mes 3</text:p>
          </table:table-cell>
          <table:table-cell table:style-name="ce115" office:value-type="string" calcext:value-type="string">
            <text:p>Mes 4</text:p>
          </table:table-cell>
          <table:table-cell table:style-name="ce115" office:value-type="string" calcext:value-type="string">
            <text:p>Mes 5</text:p>
          </table:table-cell>
          <table:table-cell table:style-name="ce115" office:value-type="string" calcext:value-type="string">
            <text:p>Mes 6</text:p>
          </table:table-cell>
          <table:table-cell table:style-name="ce115" office:value-type="string" calcext:value-type="string">
            <text:p>Mes 7</text:p>
          </table:table-cell>
          <table:table-cell table:style-name="ce115" office:value-type="string" calcext:value-type="string">
            <text:p>Mes 8</text:p>
          </table:table-cell>
          <table:table-cell table:style-name="ce115" office:value-type="string" calcext:value-type="string">
            <text:p>Mes 9</text:p>
          </table:table-cell>
          <table:table-cell table:style-name="ce115" office:value-type="string" calcext:value-type="string">
            <text:p>Mes 10</text:p>
          </table:table-cell>
          <table:table-cell table:style-name="ce115" office:value-type="string" calcext:value-type="string">
            <text:p>Mes 11</text:p>
          </table:table-cell>
          <table:table-cell table:style-name="ce115" office:value-type="string" calcext:value-type="string">
            <text:p>Mes 12</text:p>
          </table:table-cell>
          <table:table-cell table:style-name="ce115" office:value-type="string" calcext:value-type="string">
            <text:p>TOTAL</text:p>
          </table:table-cell>
          <table:table-cell office:value-type="string" calcext:value-type="string">
            <text:p>costo de venta por chocol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sto de venta por caja de chocolates</text:p>
          </table:table-cell>
          <table:table-cell office:value-type="float" office:value="120" calcext:value-type="float">
            <text:p>12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8" table:formula="of:=[$Resumen.$H$13]" office:value-type="float" office:value="7" calcext:value-type="float">
            <text:p>S/7.00</text:p>
          </table:table-cell>
          <table:table-cell table:style-name="ce118" table:formula="of:=[.C7]*[.$C$17]" office:value-type="float" office:value="25200" calcext:value-type="float">
            <text:p>S/25,200.00</text:p>
          </table:table-cell>
          <table:table-cell table:style-name="ce118" table:formula="of:=[.D7]*[.$C$17]" office:value-type="float" office:value="29400" calcext:value-type="float">
            <text:p>S/29,400.00</text:p>
          </table:table-cell>
          <table:table-cell table:style-name="ce118" table:formula="of:=[.E7]*[.$C$17]" office:value-type="float" office:value="33600" calcext:value-type="float">
            <text:p>S/33,600.00</text:p>
          </table:table-cell>
          <table:table-cell table:style-name="ce118" table:formula="of:=[.F7]*[.$C$17]" office:value-type="float" office:value="37800" calcext:value-type="float">
            <text:p>S/37,800.00</text:p>
          </table:table-cell>
          <table:table-cell table:style-name="ce118" table:formula="of:=[.G7]*[.$C$17]" office:value-type="float" office:value="42000" calcext:value-type="float">
            <text:p>S/42,000.00</text:p>
          </table:table-cell>
          <table:table-cell table:style-name="ce118" table:formula="of:=[.H7]*[.$C$17]" office:value-type="float" office:value="46200" calcext:value-type="float">
            <text:p>S/46,200.00</text:p>
          </table:table-cell>
          <table:table-cell table:style-name="ce118" table:formula="of:=[.I7]*[.$C$17]" office:value-type="float" office:value="50400" calcext:value-type="float">
            <text:p>S/50,400.00</text:p>
          </table:table-cell>
          <table:table-cell table:style-name="ce118" table:formula="of:=[.J7]*[.$C$17]" office:value-type="float" office:value="54600" calcext:value-type="float">
            <text:p>S/54,600.00</text:p>
          </table:table-cell>
          <table:table-cell table:style-name="ce118" table:formula="of:=[.K7]*[.$C$17]" office:value-type="float" office:value="58800" calcext:value-type="float">
            <text:p>S/58,800.00</text:p>
          </table:table-cell>
          <table:table-cell table:style-name="ce118" table:formula="of:=[.L7]*[.$C$17]" office:value-type="float" office:value="63000" calcext:value-type="float">
            <text:p>S/63,000.00</text:p>
          </table:table-cell>
          <table:table-cell table:style-name="ce118" table:formula="of:=[.M7]*[.$C$17]" office:value-type="float" office:value="67200" calcext:value-type="float">
            <text:p>S/67,200.00</text:p>
          </table:table-cell>
          <table:table-cell table:style-name="ce118" table:formula="of:=[.N7]*[.$C$17]" office:value-type="float" office:value="71400" calcext:value-type="float">
            <text:p>S/71,400.00</text:p>
          </table:table-cell>
          <table:table-cell table:style-name="ce118" table:formula="of:=SUM([.D17:.O17])" office:value-type="float" office:value="579600" calcext:value-type="float">
            <text:p>S/579,600.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8" table:formula="of:=[$Resumen.$H$13]" office:value-type="float" office:value="7" calcext:value-type="float">
            <text:p>S/7.00</text:p>
          </table:table-cell>
          <table:table-cell table:style-name="ce118" table:formula="of:=[.C8]*[.$C$17]" office:value-type="float" office:value="71400" calcext:value-type="float">
            <text:p>S/71,400.00</text:p>
          </table:table-cell>
          <table:table-cell table:style-name="ce118" table:formula="of:=[.D8]*[.$C$17]" office:value-type="float" office:value="71400" calcext:value-type="float">
            <text:p>S/71,400.00</text:p>
          </table:table-cell>
          <table:table-cell table:style-name="ce118" table:formula="of:=[.E8]*[.$C$17]" office:value-type="float" office:value="71400" calcext:value-type="float">
            <text:p>S/71,400.00</text:p>
          </table:table-cell>
          <table:table-cell table:style-name="ce118" table:formula="of:=[.F8]*[.$C$17]" office:value-type="float" office:value="71400" calcext:value-type="float">
            <text:p>S/71,400.00</text:p>
          </table:table-cell>
          <table:table-cell table:style-name="ce118" table:formula="of:=[.G8]*[.$C$17]" office:value-type="float" office:value="71400" calcext:value-type="float">
            <text:p>S/71,400.00</text:p>
          </table:table-cell>
          <table:table-cell table:style-name="ce118" table:formula="of:=[.H8]*[.$C$17]" office:value-type="float" office:value="71400" calcext:value-type="float">
            <text:p>S/71,400.00</text:p>
          </table:table-cell>
          <table:table-cell table:style-name="ce118" table:formula="of:=[.I8]*[.$C$17]" office:value-type="float" office:value="71400" calcext:value-type="float">
            <text:p>S/71,400.00</text:p>
          </table:table-cell>
          <table:table-cell table:style-name="ce118" table:formula="of:=[.J8]*[.$C$17]" office:value-type="float" office:value="71400" calcext:value-type="float">
            <text:p>S/71,400.00</text:p>
          </table:table-cell>
          <table:table-cell table:style-name="ce118" table:formula="of:=[.K8]*[.$C$17]" office:value-type="float" office:value="71400" calcext:value-type="float">
            <text:p>S/71,400.00</text:p>
          </table:table-cell>
          <table:table-cell table:style-name="ce118" table:formula="of:=[.L8]*[.$C$17]" office:value-type="float" office:value="71400" calcext:value-type="float">
            <text:p>S/71,400.00</text:p>
          </table:table-cell>
          <table:table-cell table:style-name="ce118" table:formula="of:=[.M8]*[.$C$17]" office:value-type="float" office:value="71400" calcext:value-type="float">
            <text:p>S/71,400.00</text:p>
          </table:table-cell>
          <table:table-cell table:style-name="ce118" table:formula="of:=[.N8]*[.$C$17]" office:value-type="float" office:value="71400" calcext:value-type="float">
            <text:p>S/71,400.00</text:p>
          </table:table-cell>
          <table:table-cell table:style-name="ce118" table:formula="of:=SUM([.D18:.O18])" office:value-type="float" office:value="856800" calcext:value-type="float">
            <text:p>S/856,800.00</text:p>
          </table:table-cell>
          <table:table-cell office:value-type="float" office:value="660000" calcext:value-type="float">
            <text:p>6600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8" table:formula="of:=[$Resumen.$H$13]" office:value-type="float" office:value="7" calcext:value-type="float">
            <text:p>S/7.00</text:p>
          </table:table-cell>
          <table:table-cell table:style-name="ce118" table:formula="of:=[.C9]*[.$C$17]" office:value-type="float" office:value="71400" calcext:value-type="float">
            <text:p>S/71,400.00</text:p>
          </table:table-cell>
          <table:table-cell table:style-name="ce118" table:formula="of:=[.D9]*[.$C$17]" office:value-type="float" office:value="71400" calcext:value-type="float">
            <text:p>S/71,400.00</text:p>
          </table:table-cell>
          <table:table-cell table:style-name="ce118" table:formula="of:=[.E9]*[.$C$17]" office:value-type="float" office:value="71400" calcext:value-type="float">
            <text:p>S/71,400.00</text:p>
          </table:table-cell>
          <table:table-cell table:style-name="ce118" table:formula="of:=[.F9]*[.$C$17]" office:value-type="float" office:value="71400" calcext:value-type="float">
            <text:p>S/71,400.00</text:p>
          </table:table-cell>
          <table:table-cell table:style-name="ce118" table:formula="of:=[.G9]*[.$C$17]" office:value-type="float" office:value="71400" calcext:value-type="float">
            <text:p>S/71,400.00</text:p>
          </table:table-cell>
          <table:table-cell table:style-name="ce118" table:formula="of:=[.H9]*[.$C$17]" office:value-type="float" office:value="71400" calcext:value-type="float">
            <text:p>S/71,400.00</text:p>
          </table:table-cell>
          <table:table-cell table:style-name="ce118" table:formula="of:=[.I9]*[.$C$17]" office:value-type="float" office:value="71400" calcext:value-type="float">
            <text:p>S/71,400.00</text:p>
          </table:table-cell>
          <table:table-cell table:style-name="ce118" table:formula="of:=[.J9]*[.$C$17]" office:value-type="float" office:value="71400" calcext:value-type="float">
            <text:p>S/71,400.00</text:p>
          </table:table-cell>
          <table:table-cell table:style-name="ce118" table:formula="of:=[.K9]*[.$C$17]" office:value-type="float" office:value="71400" calcext:value-type="float">
            <text:p>S/71,400.00</text:p>
          </table:table-cell>
          <table:table-cell table:style-name="ce118" table:formula="of:=[.L9]*[.$C$17]" office:value-type="float" office:value="71400" calcext:value-type="float">
            <text:p>S/71,400.00</text:p>
          </table:table-cell>
          <table:table-cell table:style-name="ce118" table:formula="of:=[.M9]*[.$C$17]" office:value-type="float" office:value="71400" calcext:value-type="float">
            <text:p>S/71,400.00</text:p>
          </table:table-cell>
          <table:table-cell table:style-name="ce118" table:formula="of:=[.N9]*[.$C$17]" office:value-type="float" office:value="71400" calcext:value-type="float">
            <text:p>S/71,400.00</text:p>
          </table:table-cell>
          <table:table-cell table:style-name="ce118" table:formula="of:=SUM([.D19:.O19])" office:value-type="float" office:value="856800" calcext:value-type="float">
            <text:p>S/856,800.00</text:p>
          </table:table-cell>
          <table:table-cell table:style-name="ce122" office:value-type="float" office:value="7480000" calcext:value-type="float">
            <text:p><text:s/>7,480,000.00 </text:p>
          </table:table-cell>
          <table:table-cell office:value-type="string" calcext:value-type="string">
            <text:p>Pequeña empresa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8" table:formula="of:=[$Resumen.$H$13]" office:value-type="float" office:value="7" calcext:value-type="float">
            <text:p>S/7.00</text:p>
          </table:table-cell>
          <table:table-cell table:style-name="ce118" table:formula="of:=[.C10]*[.$C$17]" office:value-type="float" office:value="71400" calcext:value-type="float">
            <text:p>S/71,400.00</text:p>
          </table:table-cell>
          <table:table-cell table:style-name="ce118" table:formula="of:=[.D10]*[.$C$17]" office:value-type="float" office:value="71400" calcext:value-type="float">
            <text:p>S/71,400.00</text:p>
          </table:table-cell>
          <table:table-cell table:style-name="ce118" table:formula="of:=[.E10]*[.$C$17]" office:value-type="float" office:value="71400" calcext:value-type="float">
            <text:p>S/71,400.00</text:p>
          </table:table-cell>
          <table:table-cell table:style-name="ce118" table:formula="of:=[.F10]*[.$C$17]" office:value-type="float" office:value="71400" calcext:value-type="float">
            <text:p>S/71,400.00</text:p>
          </table:table-cell>
          <table:table-cell table:style-name="ce118" table:formula="of:=[.G10]*[.$C$17]" office:value-type="float" office:value="71400" calcext:value-type="float">
            <text:p>S/71,400.00</text:p>
          </table:table-cell>
          <table:table-cell table:style-name="ce118" table:formula="of:=[.H10]*[.$C$17]" office:value-type="float" office:value="71400" calcext:value-type="float">
            <text:p>S/71,400.00</text:p>
          </table:table-cell>
          <table:table-cell table:style-name="ce118" table:formula="of:=[.I10]*[.$C$17]" office:value-type="float" office:value="71400" calcext:value-type="float">
            <text:p>S/71,400.00</text:p>
          </table:table-cell>
          <table:table-cell table:style-name="ce118" table:formula="of:=[.J10]*[.$C$17]" office:value-type="float" office:value="71400" calcext:value-type="float">
            <text:p>S/71,400.00</text:p>
          </table:table-cell>
          <table:table-cell table:style-name="ce118" table:formula="of:=[.K10]*[.$C$17]" office:value-type="float" office:value="71400" calcext:value-type="float">
            <text:p>S/71,400.00</text:p>
          </table:table-cell>
          <table:table-cell table:style-name="ce118" table:formula="of:=[.L10]*[.$C$17]" office:value-type="float" office:value="71400" calcext:value-type="float">
            <text:p>S/71,400.00</text:p>
          </table:table-cell>
          <table:table-cell table:style-name="ce118" table:formula="of:=[.M10]*[.$C$17]" office:value-type="float" office:value="71400" calcext:value-type="float">
            <text:p>S/71,400.00</text:p>
          </table:table-cell>
          <table:table-cell table:style-name="ce118" table:formula="of:=[.N10]*[.$C$17]" office:value-type="float" office:value="71400" calcext:value-type="float">
            <text:p>S/71,400.00</text:p>
          </table:table-cell>
          <table:table-cell table:style-name="ce118" table:formula="of:=SUM([.D20:.O20])" office:value-type="float" office:value="856800" calcext:value-type="float">
            <text:p>S/856,800.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8" table:formula="of:=[$Resumen.$H$13]" office:value-type="float" office:value="7" calcext:value-type="float">
            <text:p>S/7.00</text:p>
          </table:table-cell>
          <table:table-cell table:style-name="ce118" table:formula="of:=[.C11]*[.$C$17]" office:value-type="float" office:value="71400" calcext:value-type="float">
            <text:p>S/71,400.00</text:p>
          </table:table-cell>
          <table:table-cell table:style-name="ce118" table:formula="of:=[.D11]*[.$C$17]" office:value-type="float" office:value="71400" calcext:value-type="float">
            <text:p>S/71,400.00</text:p>
          </table:table-cell>
          <table:table-cell table:style-name="ce118" table:formula="of:=[.E11]*[.$C$17]" office:value-type="float" office:value="71400" calcext:value-type="float">
            <text:p>S/71,400.00</text:p>
          </table:table-cell>
          <table:table-cell table:style-name="ce118" table:formula="of:=[.F11]*[.$C$17]" office:value-type="float" office:value="71400" calcext:value-type="float">
            <text:p>S/71,400.00</text:p>
          </table:table-cell>
          <table:table-cell table:style-name="ce118" table:formula="of:=[.G11]*[.$C$17]" office:value-type="float" office:value="71400" calcext:value-type="float">
            <text:p>S/71,400.00</text:p>
          </table:table-cell>
          <table:table-cell table:style-name="ce118" table:formula="of:=[.H11]*[.$C$17]" office:value-type="float" office:value="71400" calcext:value-type="float">
            <text:p>S/71,400.00</text:p>
          </table:table-cell>
          <table:table-cell table:style-name="ce118" table:formula="of:=[.I11]*[.$C$17]" office:value-type="float" office:value="71400" calcext:value-type="float">
            <text:p>S/71,400.00</text:p>
          </table:table-cell>
          <table:table-cell table:style-name="ce118" table:formula="of:=[.J11]*[.$C$17]" office:value-type="float" office:value="71400" calcext:value-type="float">
            <text:p>S/71,400.00</text:p>
          </table:table-cell>
          <table:table-cell table:style-name="ce118" table:formula="of:=[.K11]*[.$C$17]" office:value-type="float" office:value="71400" calcext:value-type="float">
            <text:p>S/71,400.00</text:p>
          </table:table-cell>
          <table:table-cell table:style-name="ce118" table:formula="of:=[.L11]*[.$C$17]" office:value-type="float" office:value="71400" calcext:value-type="float">
            <text:p>S/71,400.00</text:p>
          </table:table-cell>
          <table:table-cell table:style-name="ce118" table:formula="of:=[.M11]*[.$C$17]" office:value-type="float" office:value="71400" calcext:value-type="float">
            <text:p>S/71,400.00</text:p>
          </table:table-cell>
          <table:table-cell table:style-name="ce118" table:formula="of:=[.N11]*[.$C$17]" office:value-type="float" office:value="71400" calcext:value-type="float">
            <text:p>S/71,400.00</text:p>
          </table:table-cell>
          <table:table-cell table:style-name="ce118" table:formula="of:=SUM([.D21:.O21])" office:value-type="float" office:value="856800" calcext:value-type="float">
            <text:p>S/856,800.00</text:p>
          </table:table-cell>
          <table:table-cell table:number-columns-repeated="16368"/>
        </table:table-row>
      </table:table>
      <table:table table:name="INVERSION INICIAL" table:style-name="ta6">
        <table:table-column table:style-name="co39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9" table:number-columns-repeated="2" table:default-cell-style-name="Default"/>
        <table:table-column table:style-name="co44" table:default-cell-style-name="Default"/>
        <table:table-column table:style-name="co39" table:number-columns-repeated="1637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2"/>
          <table:table-cell table:number-columns-repeated="16381"/>
        </table:table-row>
        <table:table-row table:style-name="ro1">
          <table:table-cell/>
          <table:table-cell table:style-name="ce124" office:value-type="string" calcext:value-type="string" table:number-columns-spanned="5" table:number-rows-spanned="1">
            <text:p>PRESUPUESTO DE INVERSIÓN Y FINANCIAMIENTO</text:p>
          </table:table-cell>
          <table:covered-table-cell table:number-columns-repeated="4" table:style-name="ce13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5" office:value-type="string" calcext:value-type="string" table:number-columns-spanned="1" table:number-rows-spanned="2">
            <text:p>RUBRO</text:p>
          </table:table-cell>
          <table:table-cell table:style-name="ce134" office:value-type="string" calcext:value-type="string" table:number-columns-spanned="2" table:number-rows-spanned="1">
            <text:p>INVERSIÓN INICIAL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FINANCIAMIENTO</text:p>
          </table:table-cell>
          <table:covered-table-cell table:style-name="ce147"/>
          <table:table-cell table:number-columns-repeated="16378"/>
        </table:table-row>
        <table:table-row table:style-name="ro1">
          <table:table-cell/>
          <table:covered-table-cell table:style-name="ce125"/>
          <table:table-cell table:style-name="ce134" office:value-type="string" calcext:value-type="string">
            <text:p>Unidad de Medida</text:p>
          </table:table-cell>
          <table:table-cell table:style-name="ce134" office:value-type="string" calcext:value-type="string">
            <text:p>Total</text:p>
          </table:table-cell>
          <table:table-cell table:style-name="ce134" office:value-type="string" calcext:value-type="string">
            <text:p>Capital Propio</text:p>
          </table:table-cell>
          <table:table-cell table:style-name="ce134" office:value-type="string" calcext:value-type="string">
            <text:p>Préstamo</text:p>
          </table:table-cell>
          <table:table-cell table:number-columns-repeated="16378"/>
        </table:table-row>
        <table:table-row table:style-name="ro1">
          <table:table-cell/>
          <table:table-cell table:style-name="ce126" office:value-type="string" calcext:value-type="string">
            <text:p>ACTIVO FIJO</text:p>
          </table:table-cell>
          <table:table-cell table:style-name="ce126" table:number-columns-repeated="4"/>
          <table:table-cell table:number-columns-repeated="16378"/>
        </table:table-row>
        <table:table-row table:style-name="ro1">
          <table:table-cell/>
          <table:table-cell table:style-name="ce127" office:value-type="string" calcext:value-type="string">
            <text:p>A. TANGIBLES</text:p>
          </table:table-cell>
          <table:table-cell table:style-name="ce127"/>
          <table:table-cell table:style-name="ce136" table:formula="of:=SUM([.D11:.D14])" office:value-type="float" office:value="9187" calcext:value-type="float">
            <text:p><text:s/>9,187.00 </text:p>
          </table:table-cell>
          <table:table-cell table:style-name="ce136" table:formula="of:=SUM([.E11:.E14])" office:value-type="float" office:value="4187" calcext:value-type="float">
            <text:p><text:s/>4,187.00 </text:p>
          </table:table-cell>
          <table:table-cell table:style-name="ce139" table:formula="of:=SUM([.F11:.F14])" office:value-type="float" office:value="5000" calcext:value-type="float">
            <text:p><text:s/>5,000.00 </text:p>
          </table:table-cell>
          <table:table-cell table:number-columns-repeated="16378"/>
        </table:table-row>
        <table:table-row table:style-name="ro1">
          <table:table-cell/>
          <table:table-cell table:style-name="ce128" office:value-type="string" calcext:value-type="string">
            <text:p>Terreno</text:p>
          </table:table-cell>
          <table:table-cell table:style-name="ce128"/>
          <table:table-cell table:style-name="ce137"/>
          <table:table-cell table:style-name="ce138" table:number-columns-repeated="2"/>
          <table:table-cell/>
          <table:table-cell table:style-name="ce153" office:value-type="string" calcext:value-type="string" table:number-columns-spanned="2" table:number-rows-spanned="1">
            <text:p>Maquinarias y equipos</text:p>
          </table:table-cell>
          <table:covered-table-cell table:style-name="ce156"/>
          <table:table-cell table:number-columns-repeated="16375"/>
        </table:table-row>
        <table:table-row table:style-name="ro1">
          <table:table-cell/>
          <table:table-cell table:style-name="ce128" office:value-type="string" calcext:value-type="string">
            <text:p>Construccion y edificaciones</text:p>
          </table:table-cell>
          <table:table-cell table:style-name="ce128"/>
          <table:table-cell table:style-name="ce138" table:number-columns-repeated="3"/>
          <table:table-cell/>
          <table:table-cell table:style-name="ce128" office:value-type="string" calcext:value-type="string">
            <text:p>Balanza (3)</text:p>
          </table:table-cell>
          <table:table-cell table:style-name="ce128" office:value-type="float" office:value="600" calcext:value-type="float">
            <text:p>600</text:p>
          </table:table-cell>
          <table:table-cell table:number-columns-repeated="16375"/>
        </table:table-row>
        <table:table-row table:style-name="ro1">
          <table:table-cell/>
          <table:table-cell table:style-name="ce128" office:value-type="string" calcext:value-type="string">
            <text:p>Maquinarias y equipos </text:p>
          </table:table-cell>
          <table:table-cell table:style-name="ce128" office:value-type="string" calcext:value-type="string">
            <text:p>Unidades</text:p>
          </table:table-cell>
          <table:table-cell table:style-name="ce138" table:formula="of:=[.I13]" office:value-type="float" office:value="2500" calcext:value-type="float">
            <text:p><text:s/>2,500.00 </text:p>
          </table:table-cell>
          <table:table-cell table:style-name="ce138" office:value-type="float" office:value="0" calcext:value-type="float">
            <text:p><text:s/>- <text:s text:c="2"/></text:p>
          </table:table-cell>
          <table:table-cell table:style-name="ce138" office:value-type="float" office:value="2500" calcext:value-type="float">
            <text:p><text:s/>2,500.00 </text:p>
          </table:table-cell>
          <table:table-cell/>
          <table:table-cell table:style-name="ce128" office:value-type="string" calcext:value-type="string">
            <text:p>cocina industrial</text:p>
          </table:table-cell>
          <table:table-cell table:style-name="ce128" office:value-type="float" office:value="700" calcext:value-type="float">
            <text:p>700</text:p>
          </table:table-cell>
          <table:table-cell table:number-columns-repeated="16375"/>
        </table:table-row>
        <table:table-row table:style-name="ro1">
          <table:table-cell/>
          <table:table-cell table:style-name="ce128" office:value-type="string" calcext:value-type="string">
            <text:p>Herramientas y utensilios</text:p>
          </table:table-cell>
          <table:table-cell table:style-name="ce128" office:value-type="string" calcext:value-type="string">
            <text:p>Unidades</text:p>
          </table:table-cell>
          <table:table-cell table:style-name="ce138" table:formula="of:=[.I36]" office:value-type="float" office:value="2287" calcext:value-type="float">
            <text:p><text:s/>2,287.00 </text:p>
          </table:table-cell>
          <table:table-cell table:style-name="ce138" office:value-type="float" office:value="1287" calcext:value-type="float">
            <text:p><text:s/>1,287.00 </text:p>
          </table:table-cell>
          <table:table-cell table:style-name="ce138" office:value-type="float" office:value="1000" calcext:value-type="float">
            <text:p><text:s/>1,000.00 </text:p>
          </table:table-cell>
          <table:table-cell table:style-name="ce152"/>
          <table:table-cell table:style-name="ce128" office:value-type="string" calcext:value-type="string">
            <text:p>Refrigeradora</text:p>
          </table:table-cell>
          <table:table-cell table:style-name="ce128" office:value-type="float" office:value="1200" calcext:value-type="float">
            <text:p>1200</text:p>
          </table:table-cell>
          <table:table-cell table:number-columns-repeated="16375"/>
        </table:table-row>
        <table:table-row table:style-name="ro1">
          <table:table-cell/>
          <table:table-cell table:style-name="ce128" office:value-type="string" calcext:value-type="string">
            <text:p>Muebles y <text:s/>enseres</text:p>
          </table:table-cell>
          <table:table-cell table:style-name="ce128" office:value-type="string" calcext:value-type="string">
            <text:p>Unidades</text:p>
          </table:table-cell>
          <table:table-cell table:style-name="ce138" table:formula="of:=[.L27]" office:value-type="float" office:value="1900" calcext:value-type="float">
            <text:p><text:s/>1,900.00 </text:p>
          </table:table-cell>
          <table:table-cell table:style-name="ce138" office:value-type="float" office:value="1400" calcext:value-type="float">
            <text:p><text:s/>1,400.00 </text:p>
          </table:table-cell>
          <table:table-cell table:style-name="ce138" office:value-type="float" office:value="500" calcext:value-type="float">
            <text:p><text:s/>500.00 </text:p>
          </table:table-cell>
          <table:table-cell table:style-name="ce152"/>
          <table:table-cell table:style-name="ce154" office:value-type="string" calcext:value-type="string">
            <text:p>TOTAL</text:p>
          </table:table-cell>
          <table:table-cell table:style-name="ce154" table:formula="of:=SUM([.I10:.I12])" office:value-type="float" office:value="2500" calcext:value-type="float">
            <text:p>2500</text:p>
          </table:table-cell>
          <table:table-cell table:number-columns-repeated="16375"/>
        </table:table-row>
        <table:table-row table:style-name="ro1">
          <table:table-cell/>
          <table:table-cell table:style-name="ce128" office:value-type="string" calcext:value-type="string">
            <text:p>Equipo informatico</text:p>
          </table:table-cell>
          <table:table-cell table:style-name="ce128" office:value-type="string" calcext:value-type="string">
            <text:p>Unidades</text:p>
          </table:table-cell>
          <table:table-cell table:style-name="ce138" table:formula="of:=[.I16]" office:value-type="float" office:value="2500" calcext:value-type="float">
            <text:p><text:s/>2,500.00 </text:p>
          </table:table-cell>
          <table:table-cell table:style-name="ce138" office:value-type="float" office:value="1500" calcext:value-type="float">
            <text:p><text:s/>1,500.00 </text:p>
          </table:table-cell>
          <table:table-cell table:style-name="ce138" office:value-type="float" office:value="1000" calcext:value-type="float">
            <text:p><text:s/>1,000.00 </text:p>
          </table:table-cell>
          <table:table-cell table:style-name="ce152"/>
          <table:table-cell table:number-columns-repeated="16377"/>
        </table:table-row>
        <table:table-row table:style-name="ro1">
          <table:table-cell/>
          <table:table-cell table:style-name="ce128" office:value-type="string" calcext:value-type="string">
            <text:p>Vehiculos</text:p>
          </table:table-cell>
          <table:table-cell table:style-name="ce128"/>
          <table:table-cell table:style-name="ce138" table:number-columns-repeated="3"/>
          <table:table-cell/>
          <table:table-cell table:style-name="ce155" office:value-type="string" calcext:value-type="string" table:number-columns-spanned="2" table:number-rows-spanned="1">
            <text:p>Equipos informaticos</text:p>
          </table:table-cell>
          <table:covered-table-cell table:style-name="ce155"/>
          <table:table-cell table:number-columns-repeated="16375"/>
        </table:table-row>
        <table:table-row table:style-name="ro1">
          <table:table-cell/>
          <table:table-cell table:style-name="ce127" office:value-type="string" calcext:value-type="string">
            <text:p>B. INTANGIBLES</text:p>
          </table:table-cell>
          <table:table-cell table:style-name="ce127"/>
          <table:table-cell table:style-name="ce139" table:formula="of:=SUM([.D17:.D19])" office:value-type="float" office:value="1435" calcext:value-type="float">
            <text:p><text:s/>1,435.00 </text:p>
          </table:table-cell>
          <table:table-cell table:style-name="ce139" table:formula="of:=SUM([.E17:.E19])" office:value-type="float" office:value="1435" calcext:value-type="float">
            <text:p><text:s/>1,435.00 </text:p>
          </table:table-cell>
          <table:table-cell table:style-name="ce139" table:formula="of:=SUM([.F17:.F19])" office:value-type="float" office:value="0" calcext:value-type="float">
            <text:p><text:s/>- <text:s text:c="2"/></text:p>
          </table:table-cell>
          <table:table-cell/>
          <table:table-cell table:style-name="ce128" office:value-type="string" calcext:value-type="string">
            <text:p>Laptop mas impresora</text:p>
          </table:table-cell>
          <table:table-cell table:style-name="ce128" office:value-type="float" office:value="2500" calcext:value-type="float">
            <text:p>2500</text:p>
          </table:table-cell>
          <table:table-cell table:number-columns-repeated="16375"/>
        </table:table-row>
        <table:table-row table:style-name="ro1">
          <table:table-cell/>
          <table:table-cell table:style-name="ce128" office:value-type="string" calcext:value-type="string">
            <text:p>Constitución y formalizacion</text:p>
          </table:table-cell>
          <table:table-cell table:style-name="ce128" office:value-type="string" calcext:value-type="string">
            <text:p>unidades</text:p>
          </table:table-cell>
          <table:table-cell table:number-columns-repeated="2" table:style-name="ce138" office:value-type="float" office:value="1000" calcext:value-type="float">
            <text:p><text:s/>1,000.00 </text:p>
          </table:table-cell>
          <table:table-cell table:style-name="ce138"/>
          <table:table-cell table:number-columns-repeated="16378"/>
        </table:table-row>
        <table:table-row table:style-name="ro1">
          <table:table-cell/>
          <table:table-cell table:style-name="ce128" office:value-type="string" calcext:value-type="string">
            <text:p>Licencias</text:p>
          </table:table-cell>
          <table:table-cell table:style-name="ce128" office:value-type="string" calcext:value-type="string">
            <text:p>unidades</text:p>
          </table:table-cell>
          <table:table-cell table:number-columns-repeated="2" table:style-name="ce138" office:value-type="float" office:value="420" calcext:value-type="float">
            <text:p><text:s/>420.00 </text:p>
          </table:table-cell>
          <table:table-cell table:style-name="ce138"/>
          <table:table-cell table:number-columns-repeated="16378"/>
        </table:table-row>
        <table:table-row table:style-name="ro1">
          <table:table-cell/>
          <table:table-cell table:style-name="ce128" office:value-type="string" calcext:value-type="string">
            <text:p>Certificaciones</text:p>
          </table:table-cell>
          <table:table-cell table:style-name="ce128" office:value-type="string" calcext:value-type="string">
            <text:p>unidades</text:p>
          </table:table-cell>
          <table:table-cell table:number-columns-repeated="2" table:style-name="ce138" office:value-type="float" office:value="15" calcext:value-type="float">
            <text:p><text:s/>15.00 </text:p>
          </table:table-cell>
          <table:table-cell table:style-name="ce138"/>
          <table:table-cell table:number-columns-repeated="16378"/>
        </table:table-row>
        <table:table-row table:style-name="ro1">
          <table:table-cell/>
          <table:table-cell table:style-name="ce128" office:value-type="string" calcext:value-type="string">
            <text:p>Capacitaciones</text:p>
          </table:table-cell>
          <table:table-cell table:style-name="ce128"/>
          <table:table-cell table:style-name="ce138" table:number-columns-repeated="3"/>
          <table:table-cell table:number-columns-repeated="16378"/>
        </table:table-row>
        <table:table-row table:style-name="ro1">
          <table:table-cell/>
          <table:table-cell table:style-name="ce128" office:value-type="string" calcext:value-type="string">
            <text:p>Promocion</text:p>
          </table:table-cell>
          <table:table-cell table:style-name="ce128"/>
          <table:table-cell table:style-name="ce138" table:number-columns-repeated="3"/>
          <table:table-cell table:number-columns-repeated="16378"/>
        </table:table-row>
        <table:table-row table:style-name="ro1">
          <table:table-cell/>
          <table:table-cell table:style-name="ce128" office:value-type="string" calcext:value-type="string">
            <text:p>Implementación y puesta en marcha</text:p>
          </table:table-cell>
          <table:table-cell table:style-name="ce128"/>
          <table:table-cell table:style-name="ce138" table:number-columns-repeated="3"/>
          <table:table-cell/>
          <table:table-cell table:style-name="ce134" office:value-type="string" calcext:value-type="string" table:number-columns-spanned="2" table:number-rows-spanned="1">
            <text:p>Herramientas y utensilios</text:p>
          </table:table-cell>
          <table:covered-table-cell table:style-name="ce134"/>
          <table:table-cell/>
          <table:table-cell table:style-name="ce153" office:value-type="string" calcext:value-type="string" table:number-columns-spanned="2" table:number-rows-spanned="1">
            <text:p>Muebles y enseres</text:p>
          </table:table-cell>
          <table:covered-table-cell table:style-name="ce156"/>
          <table:table-cell table:number-columns-repeated="16372"/>
        </table:table-row>
        <table:table-row table:style-name="ro1">
          <table:table-cell/>
          <table:table-cell table:style-name="ce126" office:value-type="string" calcext:value-type="string">
            <text:p>TOTAL DE ACTIVO FIJO</text:p>
          </table:table-cell>
          <table:table-cell table:style-name="ce126"/>
          <table:table-cell table:style-name="ce137" table:number-columns-repeated="3"/>
          <table:table-cell/>
          <table:table-cell table:style-name="ce128" office:value-type="string" calcext:value-type="string">
            <text:p>cuchillos</text:p>
          </table:table-cell>
          <table:table-cell table:style-name="ce128" office:value-type="float" office:value="60" calcext:value-type="float">
            <text:p>60</text:p>
          </table:table-cell>
          <table:table-cell/>
          <table:table-cell table:style-name="ce128" office:value-type="string" calcext:value-type="string">
            <text:p>mesa de acero inoxidable</text:p>
          </table:table-cell>
          <table:table-cell table:style-name="ce128" office:value-type="float" office:value="800" calcext:value-type="float">
            <text:p>800</text:p>
          </table:table-cell>
          <table:table-cell table:number-columns-repeated="16372"/>
        </table:table-row>
        <table:table-row table:style-name="ro1">
          <table:table-cell/>
          <table:table-cell table:style-name="ce127" office:value-type="string" calcext:value-type="string">
            <text:p>CAPITAL DE TRABAJO </text:p>
          </table:table-cell>
          <table:table-cell table:style-name="ce127"/>
          <table:table-cell table:style-name="ce139" table:formula="of:=SUM([.D25:.D25])" office:value-type="float" office:value="61307.4207125604" calcext:value-type="float">
            <text:p><text:s/>61,307.42 </text:p>
          </table:table-cell>
          <table:table-cell table:style-name="ce139" table:formula="of:=SUM([.E25:.E25])" office:value-type="float" office:value="46307.4207125604" calcext:value-type="float">
            <text:p><text:s/>46,307.42 </text:p>
          </table:table-cell>
          <table:table-cell table:style-name="ce139" table:formula="of:=SUM([.F25:.F25])" office:value-type="float" office:value="15000" calcext:value-type="float">
            <text:p><text:s/>15,000.00 </text:p>
          </table:table-cell>
          <table:table-cell/>
          <table:table-cell table:style-name="ce128" office:value-type="string" calcext:value-type="string">
            <text:p>Jarra</text:p>
          </table:table-cell>
          <table:table-cell table:style-name="ce128" office:value-type="float" office:value="40" calcext:value-type="float">
            <text:p>40</text:p>
          </table:table-cell>
          <table:table-cell/>
          <table:table-cell table:style-name="ce128" office:value-type="string" calcext:value-type="string">
            <text:p>sillas</text:p>
          </table:table-cell>
          <table:table-cell table:style-name="ce128"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/>
          <table:table-cell table:style-name="ce129" office:value-type="string" calcext:value-type="string">
            <text:p>Costos de producción y GO</text:p>
          </table:table-cell>
          <table:table-cell table:style-name="ce129" office:value-type="string" calcext:value-type="string">
            <text:p>unidades</text:p>
          </table:table-cell>
          <table:table-cell table:style-name="ce138" table:formula="of:=[$'Capital de Trabajo (kw)'.O13]" office:value-type="float" office:value="61307.4207125604" calcext:value-type="float">
            <text:p><text:s/>61,307.42 </text:p>
          </table:table-cell>
          <table:table-cell table:style-name="ce138" table:formula="of:=[.G26]" office:value-type="float" office:value="46307.4207125604" calcext:value-type="float">
            <text:p><text:s/>46,307.42 </text:p>
          </table:table-cell>
          <table:table-cell table:style-name="ce138" office:value-type="float" office:value="15000" calcext:value-type="float">
            <text:p><text:s/>15,000.00 </text:p>
          </table:table-cell>
          <table:table-cell table:style-name="ce152" table:formula="of:=[.E25]+[.F25]" office:value-type="float" office:value="61307.4207125604" calcext:value-type="float">
            <text:p><text:s/>61,307.42 </text:p>
          </table:table-cell>
          <table:table-cell table:style-name="ce128" office:value-type="string" calcext:value-type="string">
            <text:p>coladores</text:p>
          </table:table-cell>
          <table:table-cell table:style-name="ce128" office:value-type="float" office:value="20" calcext:value-type="float">
            <text:p>20</text:p>
          </table:table-cell>
          <table:table-cell/>
          <table:table-cell table:style-name="ce128" office:value-type="string" calcext:value-type="string">
            <text:p>estantes</text:p>
          </table:table-cell>
          <table:table-cell table:style-name="ce128" office:value-type="float" office:value="500" calcext:value-type="float">
            <text:p>500</text:p>
          </table:table-cell>
          <table:table-cell table:number-columns-repeated="16372"/>
        </table:table-row>
        <table:table-row table:style-name="ro1">
          <table:table-cell/>
          <table:table-cell table:style-name="ce130" office:value-type="string" calcext:value-type="string">
            <text:p>TOTAL DE INVERSIÓN</text:p>
          </table:table-cell>
          <table:table-cell table:style-name="ce130"/>
          <table:table-cell table:style-name="ce140" table:formula="of:=[.D24]+[.D16]+[.D8]" office:value-type="float" office:value="71929.4207125604" calcext:value-type="float">
            <text:p><text:s/>71,929.42 </text:p>
          </table:table-cell>
          <table:table-cell table:style-name="ce140" table:formula="of:=[.E24]+[.E16]+[.E8]" office:value-type="float" office:value="51929.4207125604" calcext:value-type="float">
            <text:p><text:s/>51,929.42 </text:p>
          </table:table-cell>
          <table:table-cell table:style-name="ce140" table:formula="of:=[.F24]+[.F16]+[.F8]" office:value-type="float" office:value="20000" calcext:value-type="float">
            <text:p><text:s/>20,000.00 </text:p>
          </table:table-cell>
          <table:table-cell table:style-name="ce152" table:formula="of:=[.D25]-[.F25]" office:value-type="float" office:value="46307.4207125604" calcext:value-type="float">
            <text:p><text:s/>46,307.42 </text:p>
          </table:table-cell>
          <table:table-cell table:style-name="ce128" office:value-type="string" calcext:value-type="string">
            <text:p>cucharoones de madera</text:p>
          </table:table-cell>
          <table:table-cell table:style-name="ce128" office:value-type="float" office:value="40" calcext:value-type="float">
            <text:p>40</text:p>
          </table:table-cell>
          <table:table-cell/>
          <table:table-cell table:style-name="ce128" office:value-type="string" calcext:value-type="string">
            <text:p>escritorio</text:p>
          </table:table-cell>
          <table:table-cell table:style-name="ce128" office:value-type="float" office:value="500" calcext:value-type="float">
            <text:p>500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141" table:number-columns-repeated="2"/>
          <table:table-cell/>
          <table:table-cell table:style-name="ce128" office:value-type="string" calcext:value-type="string">
            <text:p>Ollas medianas</text:p>
          </table:table-cell>
          <table:table-cell table:style-name="ce128" office:value-type="float" office:value="250" calcext:value-type="float">
            <text:p>250</text:p>
          </table:table-cell>
          <table:table-cell/>
          <table:table-cell table:style-name="ce127" office:value-type="string" calcext:value-type="string">
            <text:p>TOTAL</text:p>
          </table:table-cell>
          <table:table-cell table:style-name="ce127" table:formula="of:=SUM([.L23:.L26])" office:value-type="float" office:value="1900" calcext:value-type="float">
            <text:p>1900</text:p>
          </table:table-cell>
          <table:table-cell table:number-columns-repeated="16372"/>
        </table:table-row>
        <table:table-row table:style-name="ro1">
          <table:table-cell/>
          <table:table-cell table:style-name="ce131"/>
          <table:table-cell table:style-name="ce135"/>
          <table:table-cell table:number-columns-repeated="4"/>
          <table:table-cell table:style-name="ce128" office:value-type="string" calcext:value-type="string">
            <text:p>tazones o boul de aceros</text:p>
          </table:table-cell>
          <table:table-cell table:style-name="ce128"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142" table:number-columns-repeated="2"/>
          <table:table-cell/>
          <table:table-cell table:style-name="ce128" office:value-type="string" calcext:value-type="string">
            <text:p>cucharas</text:p>
          </table:table-cell>
          <table:table-cell table:style-name="ce128"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143" office:value-type="string" calcext:value-type="string" table:number-columns-spanned="1" table:number-rows-spanned="2">
            <text:p>Capital Propio</text:p>
          </table:table-cell>
          <table:table-cell table:style-name="ce148" office:value-type="string" office:string-value="Financiamiento de terceros" calcext:value-type="string" table:number-columns-spanned="1" table:number-rows-spanned="2">
            <text:p><text:s/>Financiamiento de terceros </text:p>
          </table:table-cell>
          <table:table-cell/>
          <table:table-cell table:style-name="ce128" office:value-type="string" calcext:value-type="string">
            <text:p>Tablas para picar</text:p>
          </table:table-cell>
          <table:table-cell table:style-name="ce128" office:value-type="float" office:value="48" calcext:value-type="float">
            <text:p>48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144"/>
          <table:covered-table-cell table:style-name="ce149"/>
          <table:table-cell/>
          <table:table-cell table:style-name="ce128" office:value-type="string" calcext:value-type="string">
            <text:p>peladores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145" table:formula="of:=[.E26]" office:value-type="float" office:value="51929.4207125604" calcext:value-type="float">
            <text:p><text:s/>51,929.42 </text:p>
          </table:table-cell>
          <table:table-cell table:style-name="ce150" table:formula="of:=[.F26]" office:value-type="float" office:value="20000" calcext:value-type="float">
            <text:p><text:s/>20,000.00 </text:p>
          </table:table-cell>
          <table:table-cell/>
          <table:table-cell table:style-name="ce128" office:value-type="string" calcext:value-type="string">
            <text:p>Moldes de plastico (100)</text:p>
          </table:table-cell>
          <table:table-cell table:style-name="ce128" office:value-type="float" office:value="300" calcext:value-type="float">
            <text:p>300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146" table:formula="of:=[.E32]/[.D26]" office:value-type="percentage" office:value="0.721949658403024" calcext:value-type="percentage">
            <text:p>72 %</text:p>
          </table:table-cell>
          <table:table-cell table:style-name="ce151" table:formula="of:=[.F32]/[.D26]" office:value-type="percentage" office:value="0.278050341596976" calcext:value-type="percentage">
            <text:p>28 %</text:p>
          </table:table-cell>
          <table:table-cell/>
          <table:table-cell table:style-name="ce128" office:value-type="string" calcext:value-type="string">
            <text:p>Selladora (2)</text:p>
          </table:table-cell>
          <table:table-cell table:style-name="ce128" office:value-type="float" office:value="200" calcext:value-type="float">
            <text:p>200</text:p>
          </table:table-cell>
          <table:table-cell table:number-columns-repeated="16375"/>
        </table:table-row>
        <table:table-row table:style-name="ro2">
          <table:table-cell table:number-columns-repeated="6"/>
          <table:table-cell table:style-name="ce142"/>
          <table:table-cell table:style-name="ce128" office:value-type="string" calcext:value-type="string">
            <text:p>Extractora (2)</text:p>
          </table:table-cell>
          <table:table-cell table:style-name="ce128" office:value-type="float" office:value="1200" calcext:value-type="float">
            <text:p>1200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128" office:value-type="string" calcext:value-type="string">
            <text:p>encededor</text:p>
          </table:table-cell>
          <table:table-cell table:style-name="ce128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154" office:value-type="string" calcext:value-type="string">
            <text:p>TOTAL</text:p>
          </table:table-cell>
          <table:table-cell table:style-name="ce154" table:formula="of:=SUM([.I23:.I35])" office:value-type="float" office:value="2287" calcext:value-type="float">
            <text:p>2287</text:p>
          </table:table-cell>
          <table:table-cell table:number-columns-repeated="16375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8"/>
          <table:table-cell table:style-name="ce157"/>
          <table:table-cell table:number-columns-repeated="16375"/>
        </table:table-row>
        <table:table-row table:style-name="ro1">
          <table:table-cell table:number-columns-repeated="8"/>
          <table:table-cell table:style-name="ce157"/>
          <table:table-cell table:number-columns-repeated="16375"/>
        </table:table-row>
      </table:table>
      <table:table table:name="Depreciacion y VR" table:style-name="ta7">
        <table:table-column table:style-name="co3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e128"/>
        <table:table-column table:style-name="co47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41" table:default-cell-style-name="Default"/>
        <table:table-column table:style-name="co39" table:number-columns-repeated="16376" table:default-cell-style-name="Default"/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style-name="ce132" office:value-type="string" calcext:value-type="string">
            <text:p>CUADRO N° 04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2" office:value-type="string" calcext:value-type="string">
            <text:p>TABLA DE DEPRECIACIONES Y VALOR DE RECUPERO</text:p>
          </table:table-cell>
          <table:table-cell table:number-columns-repeated="16380"/>
        </table:table-row>
        <table:table-row table:style-name="ro15">
          <table:table-cell table:style-name="ce158"/>
          <table:table-cell table:style-name="ce159" office:value-type="string" calcext:value-type="string">
            <text:p>ACTIVO FIJO</text:p>
          </table:table-cell>
          <table:table-cell table:style-name="ce159" office:value-type="string" calcext:value-type="string">
            <text:p>Valor de compra</text:p>
          </table:table-cell>
          <table:table-cell table:style-name="ce159" office:value-type="string" calcext:value-type="string">
            <text:p>Vida útil (años)</text:p>
          </table:table-cell>
          <table:table-cell table:style-name="ce159" office:value-type="string" calcext:value-type="string">
            <text:p>Tasa de Depreciacion</text:p>
          </table:table-cell>
          <table:table-cell table:style-name="ce159" office:value-type="string" calcext:value-type="string">
            <text:p>Depreciación anual</text:p>
          </table:table-cell>
          <table:table-cell table:style-name="ce159" office:value-type="string" calcext:value-type="string">
            <text:p>Depreciación Acumulada</text:p>
          </table:table-cell>
          <table:table-cell table:style-name="ce159" office:value-type="string" calcext:value-type="string">
            <text:p>Valor de Recupero</text:p>
          </table:table-cell>
          <table:table-cell table:style-name="ce158" table:number-columns-repeated="16376"/>
        </table:table-row>
        <table:table-row table:style-name="ro1">
          <table:table-cell/>
          <table:table-cell table:style-name="ce160" office:value-type="string" calcext:value-type="string">
            <text:p>Infraestructura</text:p>
          </table:table-cell>
          <table:table-cell table:style-name="ce128"/>
          <table:table-cell/>
          <table:table-cell table:style-name="ce128" table:number-columns-repeated="4"/>
          <table:table-cell table:number-columns-repeated="16376"/>
        </table:table-row>
        <table:table-row table:style-name="ro1">
          <table:table-cell/>
          <table:table-cell table:style-name="ce160" office:value-type="string" calcext:value-type="string">
            <text:p>Maquinaria y equipos</text:p>
          </table:table-cell>
          <table:table-cell table:style-name="ce138" table:formula="of:=[$'INVERSION INICIAL'.D11]" office:value-type="float" office:value="2500" calcext:value-type="float">
            <text:p><text:s/>2,500.00 </text:p>
          </table:table-cell>
          <table:table-cell office:value-type="float" office:value="5" calcext:value-type="float">
            <text:p>5</text:p>
          </table:table-cell>
          <table:table-cell table:style-name="ce128" table:formula="of:=1/[.D6]" office:value-type="float" office:value="0.2" calcext:value-type="float">
            <text:p>0.2</text:p>
          </table:table-cell>
          <table:table-cell table:style-name="ce164" table:formula="of:=[.E6]*[.C6]" office:value-type="float" office:value="500" calcext:value-type="float">
            <text:p><text:s/>500.00 </text:p>
          </table:table-cell>
          <table:table-cell table:style-name="ce138" table:formula="of:=[.F6]*5" office:value-type="float" office:value="2500" calcext:value-type="float">
            <text:p><text:s/>2,500.00 </text:p>
          </table:table-cell>
          <table:table-cell table:style-name="ce166" table:formula="of:=[.C6]-[.G6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60" office:value-type="string" calcext:value-type="string">
            <text:p>Herramientas y utensilios</text:p>
          </table:table-cell>
          <table:table-cell table:style-name="ce138" table:formula="of:=[$'INVERSION INICIAL'.D12]" office:value-type="float" office:value="2287" calcext:value-type="float">
            <text:p><text:s/>2,287.00 </text:p>
          </table:table-cell>
          <table:table-cell office:value-type="float" office:value="2" calcext:value-type="float">
            <text:p>2</text:p>
          </table:table-cell>
          <table:table-cell table:style-name="ce128" table:formula="of:=1/[.D7]" office:value-type="float" office:value="0.5" calcext:value-type="float">
            <text:p>0.5</text:p>
          </table:table-cell>
          <table:table-cell table:style-name="ce164" table:formula="of:=[.E7]*[.C7]" office:value-type="float" office:value="1143.5" calcext:value-type="float">
            <text:p><text:s/>1,143.50 </text:p>
          </table:table-cell>
          <table:table-cell table:style-name="ce138" table:formula="of:=[.F7]*1" office:value-type="float" office:value="1143.5" calcext:value-type="float">
            <text:p><text:s/>1,143.50 </text:p>
          </table:table-cell>
          <table:table-cell table:style-name="ce164" table:formula="of:=[.C7]-[.G7]" office:value-type="float" office:value="1143.5" calcext:value-type="float">
            <text:p><text:s/>1,143.50 </text:p>
          </table:table-cell>
          <table:table-cell table:number-columns-repeated="16376"/>
        </table:table-row>
        <table:table-row table:style-name="ro1">
          <table:table-cell/>
          <table:table-cell table:style-name="ce160" office:value-type="string" calcext:value-type="string">
            <text:p>Equipos informaticos</text:p>
          </table:table-cell>
          <table:table-cell table:style-name="ce138" table:formula="of:=[$'INVERSION INICIAL'.D14]" office:value-type="float" office:value="2500" calcext:value-type="float">
            <text:p><text:s/>2,500.00 </text:p>
          </table:table-cell>
          <table:table-cell office:value-type="float" office:value="3" calcext:value-type="float">
            <text:p>3</text:p>
          </table:table-cell>
          <table:table-cell table:style-name="ce163" table:formula="of:=1/[.D8]" office:value-type="float" office:value="0.333333333333333" calcext:value-type="float">
            <text:p>0.3</text:p>
          </table:table-cell>
          <table:table-cell table:style-name="ce164" table:formula="of:=[.E8]*[.C8]" office:value-type="float" office:value="833.333333333333" calcext:value-type="float">
            <text:p><text:s/>833.33 </text:p>
          </table:table-cell>
          <table:table-cell table:style-name="ce138" table:formula="of:=([.F8]*1)*2" office:value-type="float" office:value="1666.66666666667" calcext:value-type="float">
            <text:p><text:s/>1,666.67 </text:p>
          </table:table-cell>
          <table:table-cell table:style-name="ce164" table:formula="of:=[.C8]-[.G8]" office:value-type="float" office:value="833.333333333334" calcext:value-type="float">
            <text:p><text:s/>833.33 </text:p>
          </table:table-cell>
          <table:table-cell table:number-columns-repeated="16376"/>
        </table:table-row>
        <table:table-row table:style-name="ro1">
          <table:table-cell/>
          <table:table-cell table:style-name="ce160" office:value-type="string" calcext:value-type="string">
            <text:p>Muebles y enseres</text:p>
          </table:table-cell>
          <table:table-cell table:style-name="ce138" table:formula="of:=[$'INVERSION INICIAL'.D13]" office:value-type="float" office:value="1900" calcext:value-type="float">
            <text:p><text:s/>1,900.00 </text:p>
          </table:table-cell>
          <table:table-cell office:value-type="float" office:value="5" calcext:value-type="float">
            <text:p>5</text:p>
          </table:table-cell>
          <table:table-cell table:style-name="ce128" table:formula="of:=1/[.D9]" office:value-type="float" office:value="0.2" calcext:value-type="float">
            <text:p>0.2</text:p>
          </table:table-cell>
          <table:table-cell table:style-name="ce164" table:formula="of:=[.E9]*[.C9]" office:value-type="float" office:value="380" calcext:value-type="float">
            <text:p><text:s/>380.00 </text:p>
          </table:table-cell>
          <table:table-cell table:style-name="ce138" table:formula="of:=[.F9]*5" office:value-type="float" office:value="1900" calcext:value-type="float">
            <text:p><text:s/>1,900.00 </text:p>
          </table:table-cell>
          <table:table-cell table:style-name="ce166" table:formula="of:=[.C9]-[.G9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60" office:value-type="string" calcext:value-type="string">
            <text:p>Vehiculos</text:p>
          </table:table-cell>
          <table:table-cell table:style-name="ce128"/>
          <table:table-cell/>
          <table:table-cell table:style-name="ce128" table:number-columns-repeated="4"/>
          <table:table-cell table:number-columns-repeated="16376"/>
        </table:table-row>
        <table:table-row table:style-name="ro1">
          <table:table-cell/>
          <table:table-cell table:style-name="ce161" office:value-type="string" calcext:value-type="string">
            <text:p>Total</text:p>
          </table:table-cell>
          <table:table-cell table:style-name="ce162" table:number-columns-repeated="3"/>
          <table:table-cell table:style-name="ce165" table:formula="of:=SUM([.F6:.F9])" office:value-type="float" office:value="2856.83333333333" calcext:value-type="float">
            <text:p><text:s/>2,856.83 </text:p>
          </table:table-cell>
          <table:table-cell table:style-name="ce162"/>
          <table:table-cell table:style-name="ce165" table:formula="of:=SUM([.H6:.H9])" office:value-type="float" office:value="1976.83333333333" calcext:value-type="float">
            <text:p><text:s/>1,976.83 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52"/>
          <table:table-cell table:number-columns-repeated="1637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52"/>
          <table:table-cell table:number-columns-repeated="16377"/>
        </table:table-row>
      </table:table>
      <table:table table:name="Capital de Trabajo (kw)" table:style-name="ta8">
        <table:table-column table:style-name="co49" table:default-cell-style-name="Default"/>
        <table:table-column table:style-name="co50" table:default-cell-style-name="ce168"/>
        <table:table-column table:style-name="co39" table:default-cell-style-name="ce129"/>
        <table:table-column table:style-name="co39" table:number-columns-repeated="12" table:default-cell-style-name="Default"/>
        <table:table-column table:style-name="co39" table:default-cell-style-name="ce128"/>
        <table:table-column table:style-name="co39" table:number-columns-repeated="16368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2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Default" table:number-columns-repeated="2"/>
          <table:table-cell table:style-name="ce173"/>
          <table:table-cell table:number-columns-repeated="2"/>
          <table:table-cell table:style-name="ce119"/>
          <table:table-cell table:style-name="ce119" office:value-type="string" calcext:value-type="string">
            <text:p>CUADRO N° 05</text:p>
          </table:table-cell>
          <table:table-cell table:style-name="ce119" table:number-columns-repeated="2"/>
          <table:table-cell table:number-columns-repeated="5"/>
          <table:table-cell table:style-name="Default"/>
          <table:table-cell table:number-columns-repeated="16368"/>
        </table:table-row>
        <table:table-row table:style-name="ro1">
          <table:table-cell table:style-name="ce122" table:number-columns-repeated="6"/>
          <table:table-cell table:style-name="ce178" office:value-type="string" office:string-value="VARIACION DE CAPITAL DE TRABAJO AÑO 1" calcext:value-type="string">
            <text:p><text:s/>VARIACION DE CAPITAL DE TRABAJO AÑO 1 </text:p>
          </table:table-cell>
          <table:table-cell table:style-name="ce178" table:number-columns-repeated="3"/>
          <table:table-cell table:style-name="ce122" table:number-columns-repeated="16374"/>
        </table:table-row>
        <table:table-row table:style-name="ro1">
          <table:table-cell/>
          <table:table-cell table:style-name="ce125" office:value-type="string" calcext:value-type="string" table:number-columns-spanned="1" table:number-rows-spanned="2">
            <text:p>RUBRO</text:p>
          </table:table-cell>
          <table:table-cell table:style-name="ce134" office:value-type="string" calcext:value-type="string" table:number-columns-spanned="13" table:number-rows-spanned="1">
            <text:p>AÑO 1</text:p>
          </table:table-cell>
          <table:covered-table-cell table:number-columns-repeated="11" table:style-name="ce174"/>
          <table:covered-table-cell table:style-name="ce147"/>
          <table:table-cell table:style-name="ce125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167"/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11" calcext:value-type="float">
            <text:p>11</text:p>
          </table:table-cell>
          <table:table-cell table:style-name="ce130" office:value-type="float" office:value="12" calcext:value-type="float">
            <text:p>12</text:p>
          </table:table-cell>
          <table:covered-table-cell table:style-name="ce167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nidades</text:p>
          </table:table-cell>
          <table:table-cell/>
          <table:table-cell table:style-name="ce129" table:formula="of:=[$'Presupuesto de ventas'.C7]" office:value-type="float" office:value="3600" calcext:value-type="float">
            <text:p>3600</text:p>
          </table:table-cell>
          <table:table-cell table:style-name="ce129" table:formula="of:=[$'Presupuesto de ventas'.D7]" office:value-type="float" office:value="4200" calcext:value-type="float">
            <text:p>4200</text:p>
          </table:table-cell>
          <table:table-cell table:style-name="ce129" table:formula="of:=[$'Presupuesto de ventas'.E7]" office:value-type="float" office:value="4800" calcext:value-type="float">
            <text:p>4800</text:p>
          </table:table-cell>
          <table:table-cell table:style-name="ce129" table:formula="of:=[$'Presupuesto de ventas'.F7]" office:value-type="float" office:value="5400" calcext:value-type="float">
            <text:p>5400</text:p>
          </table:table-cell>
          <table:table-cell table:style-name="ce129" table:formula="of:=[$'Presupuesto de ventas'.G7]" office:value-type="float" office:value="6000" calcext:value-type="float">
            <text:p>6000</text:p>
          </table:table-cell>
          <table:table-cell table:style-name="ce129" table:formula="of:=[$'Presupuesto de ventas'.H7]" office:value-type="float" office:value="6600" calcext:value-type="float">
            <text:p>6600</text:p>
          </table:table-cell>
          <table:table-cell table:style-name="ce129" table:formula="of:=[$'Presupuesto de ventas'.I7]" office:value-type="float" office:value="7200" calcext:value-type="float">
            <text:p>7200</text:p>
          </table:table-cell>
          <table:table-cell table:style-name="ce129" table:formula="of:=[$'Presupuesto de ventas'.J7]" office:value-type="float" office:value="7800" calcext:value-type="float">
            <text:p>7800</text:p>
          </table:table-cell>
          <table:table-cell table:style-name="ce129" table:formula="of:=[$'Presupuesto de ventas'.K7]" office:value-type="float" office:value="8400" calcext:value-type="float">
            <text:p>8400</text:p>
          </table:table-cell>
          <table:table-cell table:style-name="ce129" table:formula="of:=[$'Presupuesto de ventas'.L7]" office:value-type="float" office:value="9000" calcext:value-type="float">
            <text:p>9000</text:p>
          </table:table-cell>
          <table:table-cell table:style-name="ce129" table:formula="of:=[$'Presupuesto de ventas'.M7]" office:value-type="float" office:value="9600" calcext:value-type="float">
            <text:p>9600</text:p>
          </table:table-cell>
          <table:table-cell table:style-name="ce129" table:formula="of:=[$'Presupuesto de ventas'.N7]" office:value-type="float" office:value="10200" calcext:value-type="float">
            <text:p>10200</text:p>
          </table:table-cell>
          <table:table-cell table:formula="of:=SUM([.D7:.O7])" office:value-type="float" office:value="82800" calcext:value-type="float">
            <text:p>828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V Unitario</text:p>
          </table:table-cell>
          <table:table-cell/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style-name="ce175" table:formula="of:=[$'Costos_Unitario '.$I$20]" office:value-type="float" office:value="5.72487117552335" calcext:value-type="float">
            <text:p>5.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V Total</text:p>
          </table:table-cell>
          <table:table-cell/>
          <table:table-cell table:style-name="ce176" table:formula="of:=[.D8]*[.D7]" office:value-type="float" office:value="20609.5362318841" calcext:value-type="float">
            <text:p>20610</text:p>
          </table:table-cell>
          <table:table-cell table:style-name="ce129" table:formula="of:=[.E8]*[.E7]" office:value-type="float" office:value="24044.4589371981" calcext:value-type="float">
            <text:p>24044.4589371981</text:p>
          </table:table-cell>
          <table:table-cell table:style-name="ce129" table:formula="of:=[.F8]*[.F7]" office:value-type="float" office:value="27479.3816425121" calcext:value-type="float">
            <text:p>27479.3816425121</text:p>
          </table:table-cell>
          <table:table-cell table:style-name="ce129" table:formula="of:=[.G8]*[.G7]" office:value-type="float" office:value="30914.3043478261" calcext:value-type="float">
            <text:p>30914.3043478261</text:p>
          </table:table-cell>
          <table:table-cell table:style-name="ce129" table:formula="of:=[.H8]*[.H7]" office:value-type="float" office:value="34349.2270531401" calcext:value-type="float">
            <text:p>34349.2270531401</text:p>
          </table:table-cell>
          <table:table-cell table:style-name="ce129" table:formula="of:=[.I8]*[.I7]" office:value-type="float" office:value="37784.1497584541" calcext:value-type="float">
            <text:p>37784.1497584541</text:p>
          </table:table-cell>
          <table:table-cell table:style-name="ce129" table:formula="of:=[.J8]*[.J7]" office:value-type="float" office:value="41219.0724637681" calcext:value-type="float">
            <text:p>41219.0724637681</text:p>
          </table:table-cell>
          <table:table-cell table:style-name="ce129" table:formula="of:=[.K8]*[.K7]" office:value-type="float" office:value="44653.9951690821" calcext:value-type="float">
            <text:p>44653.9951690821</text:p>
          </table:table-cell>
          <table:table-cell table:style-name="ce129" table:formula="of:=[.L8]*[.L7]" office:value-type="float" office:value="48088.9178743961" calcext:value-type="float">
            <text:p>48088.9178743961</text:p>
          </table:table-cell>
          <table:table-cell table:style-name="ce129" table:formula="of:=[.M8]*[.M7]" office:value-type="float" office:value="51523.8405797101" calcext:value-type="float">
            <text:p>51523.8405797101</text:p>
          </table:table-cell>
          <table:table-cell table:style-name="ce129" table:formula="of:=[.N8]*[.N7]" office:value-type="float" office:value="54958.7632850242" calcext:value-type="float">
            <text:p>54958.7632850242</text:p>
          </table:table-cell>
          <table:table-cell table:style-name="ce129" table:formula="of:=[.O8]*[.O7]" office:value-type="float" office:value="58393.6859903382" calcext:value-type="float">
            <text:p>58393.685990338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GF Total</text:p>
          </table:table-cell>
          <table:table-cell/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style-name="ce171" table:formula="of:=[$'Gastos Operativos'.$H$19]" office:value-type="float" office:value="2913.73472222222" calcext:value-type="float">
            <text:p>2,91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KW Total</text:p>
          </table:table-cell>
          <table:table-cell/>
          <table:table-cell table:style-name="ce171" table:formula="of:=[.D10]+[.D9]" office:value-type="float" office:value="23523.2709541063" calcext:value-type="float">
            <text:p>23,523</text:p>
          </table:table-cell>
          <table:table-cell table:style-name="ce171" table:formula="of:=[.E10]+[.E9]" office:value-type="float" office:value="26958.1936594203" calcext:value-type="float">
            <text:p>26,958</text:p>
          </table:table-cell>
          <table:table-cell table:style-name="ce171" table:formula="of:=[.F10]+[.F9]" office:value-type="float" office:value="30393.1163647343" calcext:value-type="float">
            <text:p>30,393</text:p>
          </table:table-cell>
          <table:table-cell table:style-name="ce171" table:formula="of:=[.G10]+[.G9]" office:value-type="float" office:value="33828.0390700483" calcext:value-type="float">
            <text:p>33,828</text:p>
          </table:table-cell>
          <table:table-cell table:style-name="ce171" table:formula="of:=[.H10]+[.H9]" office:value-type="float" office:value="37262.9617753623" calcext:value-type="float">
            <text:p>37,263</text:p>
          </table:table-cell>
          <table:table-cell table:style-name="ce171" table:formula="of:=[.I10]+[.I9]" office:value-type="float" office:value="40697.8844806763" calcext:value-type="float">
            <text:p>40,698</text:p>
          </table:table-cell>
          <table:table-cell table:style-name="ce171" table:formula="of:=[.J10]+[.J9]" office:value-type="float" office:value="44132.8071859903" calcext:value-type="float">
            <text:p>44,133</text:p>
          </table:table-cell>
          <table:table-cell table:style-name="ce171" table:formula="of:=[.K10]+[.K9]" office:value-type="float" office:value="47567.7298913044" calcext:value-type="float">
            <text:p>47,568</text:p>
          </table:table-cell>
          <table:table-cell table:style-name="ce171" table:formula="of:=[.L10]+[.L9]" office:value-type="float" office:value="51002.6525966184" calcext:value-type="float">
            <text:p>51,003</text:p>
          </table:table-cell>
          <table:table-cell table:style-name="ce171" table:formula="of:=[.M10]+[.M9]" office:value-type="float" office:value="54437.5753019324" calcext:value-type="float">
            <text:p>54,438</text:p>
          </table:table-cell>
          <table:table-cell table:style-name="ce171" table:formula="of:=[.N10]+[.N9]" office:value-type="float" office:value="57872.4980072464" calcext:value-type="float">
            <text:p>57,872</text:p>
          </table:table-cell>
          <table:table-cell table:style-name="ce171" table:formula="of:=[.O10]+[.O9]" office:value-type="float" office:value="61307.4207125604" calcext:value-type="float">
            <text:p>61,307</text:p>
          </table:table-cell>
          <table:table-cell table:number-columns-repeated="16369"/>
        </table:table-row>
        <table:table-row table:style-name="ro1">
          <table:table-cell/>
          <table:table-cell table:style-name="ce169" office:value-type="string" calcext:value-type="string">
            <text:p>Variacion KW</text:p>
          </table:table-cell>
          <table:table-cell table:style-name="ce171" table:formula="of:=[.D11]" office:value-type="float" office:value="23523.2709541063" calcext:value-type="float">
            <text:p>23,523</text:p>
          </table:table-cell>
          <table:table-cell table:style-name="ce171" table:formula="of:=[.E11]-[.C12]" office:value-type="float" office:value="3434.92270531401" calcext:value-type="float">
            <text:p>3,435</text:p>
          </table:table-cell>
          <table:table-cell table:style-name="ce171" table:formula="of:=[.F11]-[.D13]" office:value-type="float" office:value="3434.92270531401" calcext:value-type="float">
            <text:p>3,435</text:p>
          </table:table-cell>
          <table:table-cell table:style-name="ce171" table:formula="of:=[.G11]-[.E13]" office:value-type="float" office:value="3434.92270531401" calcext:value-type="float">
            <text:p>3,435</text:p>
          </table:table-cell>
          <table:table-cell table:style-name="ce171" table:formula="of:=[.H11]-[.F13]" office:value-type="float" office:value="3434.92270531401" calcext:value-type="float">
            <text:p>3,435</text:p>
          </table:table-cell>
          <table:table-cell table:style-name="ce171" table:formula="of:=[.I11]-[.G13]" office:value-type="float" office:value="3434.92270531401" calcext:value-type="float">
            <text:p>3,435</text:p>
          </table:table-cell>
          <table:table-cell table:style-name="ce171" table:formula="of:=[.J11]-[.H13]" office:value-type="float" office:value="3434.92270531401" calcext:value-type="float">
            <text:p>3,435</text:p>
          </table:table-cell>
          <table:table-cell table:style-name="ce171" table:formula="of:=[.K11]-[.I13]" office:value-type="float" office:value="3434.92270531401" calcext:value-type="float">
            <text:p>3,435</text:p>
          </table:table-cell>
          <table:table-cell table:style-name="ce171" table:formula="of:=[.L11]-[.J13]" office:value-type="float" office:value="3434.92270531401" calcext:value-type="float">
            <text:p>3,435</text:p>
          </table:table-cell>
          <table:table-cell table:style-name="ce171" table:formula="of:=[.M11]-[.K13]" office:value-type="float" office:value="3434.92270531401" calcext:value-type="float">
            <text:p>3,435</text:p>
          </table:table-cell>
          <table:table-cell table:style-name="ce171" table:formula="of:=[.N11]-[.L13]" office:value-type="float" office:value="3434.92270531401" calcext:value-type="float">
            <text:p>3,435</text:p>
          </table:table-cell>
          <table:table-cell table:style-name="ce171" table:formula="of:=[.O11]-[.M13]" office:value-type="float" office:value="3434.92270531401" calcext:value-type="float">
            <text:p>3,435</text:p>
          </table:table-cell>
          <table:table-cell table:style-name="ce171" table:formula="of:=[.O11]-[.N13]" office:value-type="float" office:value="0" calcext:value-type="float">
            <text:p>0</text:p>
          </table:table-cell>
          <table:table-cell table:style-name="ce179" table:formula="of:=SUM([.C12:.O12])" office:value-type="float" office:value="61307.4207125604" calcext:value-type="float">
            <text:p>61,307</text:p>
          </table:table-cell>
          <table:table-cell office:value-type="string" calcext:value-type="string">
            <text:p>variacion para el año cero</text:p>
          </table:table-cell>
          <table:table-cell table:number-columns-repeated="16367"/>
        </table:table-row>
        <table:table-row table:style-name="ro1">
          <table:table-cell/>
          <table:table-cell table:style-name="ce170" office:value-type="string" calcext:value-type="string">
            <text:p>TOTAL</text:p>
          </table:table-cell>
          <table:table-cell table:style-name="ce172"/>
          <table:table-cell table:style-name="ce177" table:formula="of:=[.D11]+[.D12]" office:value-type="float" office:value="26958.1936594203" calcext:value-type="float">
            <text:p>26,958</text:p>
          </table:table-cell>
          <table:table-cell table:style-name="ce177" table:formula="of:=[.E11]+[.E12]" office:value-type="float" office:value="30393.1163647343" calcext:value-type="float">
            <text:p>30,393</text:p>
          </table:table-cell>
          <table:table-cell table:style-name="ce177" table:formula="of:=[.F11]+[.F12]" office:value-type="float" office:value="33828.0390700483" calcext:value-type="float">
            <text:p>33,828</text:p>
          </table:table-cell>
          <table:table-cell table:style-name="ce177" table:formula="of:=[.G11]+[.G12]" office:value-type="float" office:value="37262.9617753623" calcext:value-type="float">
            <text:p>37,263</text:p>
          </table:table-cell>
          <table:table-cell table:style-name="ce177" table:formula="of:=[.H11]+[.H12]" office:value-type="float" office:value="40697.8844806763" calcext:value-type="float">
            <text:p>40,698</text:p>
          </table:table-cell>
          <table:table-cell table:style-name="ce177" table:formula="of:=[.I11]+[.I12]" office:value-type="float" office:value="44132.8071859903" calcext:value-type="float">
            <text:p>44,133</text:p>
          </table:table-cell>
          <table:table-cell table:style-name="ce177" table:formula="of:=[.J11]+[.J12]" office:value-type="float" office:value="47567.7298913044" calcext:value-type="float">
            <text:p>47,568</text:p>
          </table:table-cell>
          <table:table-cell table:style-name="ce177" table:formula="of:=[.K11]+[.K12]" office:value-type="float" office:value="51002.6525966184" calcext:value-type="float">
            <text:p>51,003</text:p>
          </table:table-cell>
          <table:table-cell table:style-name="ce177" table:formula="of:=[.L11]+[.L12]" office:value-type="float" office:value="54437.5753019324" calcext:value-type="float">
            <text:p>54,438</text:p>
          </table:table-cell>
          <table:table-cell table:style-name="ce177" table:formula="of:=[.M11]+[.M12]" office:value-type="float" office:value="57872.4980072464" calcext:value-type="float">
            <text:p>57,872</text:p>
          </table:table-cell>
          <table:table-cell table:style-name="ce177" table:formula="of:=[.N11]+[.N12]" office:value-type="float" office:value="61307.4207125604" calcext:value-type="float">
            <text:p>61,307</text:p>
          </table:table-cell>
          <table:table-cell table:style-name="ce179" table:formula="of:=[.O11]+[.O12]" office:value-type="float" office:value="61307.4207125604" calcext:value-type="float">
            <text:p>61,307</text:p>
          </table:table-cell>
          <table:table-cell table:style-name="ce172"/>
          <table:table-cell table:number-columns-repeated="1636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olo para el primer año</text:p>
          </table:table-cell>
          <table:table-cell table:number-columns-repeated="12"/>
          <table:table-cell table:style-name="Default"/>
          <table:table-cell table:number-columns-repeated="16368"/>
        </table:table-row>
      </table:table>
      <table:table table:name="SUELDO BASE" table:style-name="ta9">
        <table:table-column table:style-name="co1" table:default-cell-style-name="Default"/>
        <table:table-column table:style-name="co1" table:default-cell-style-name="ce116"/>
        <table:table-column table:style-name="co1" table:number-columns-repeated="12" table:default-cell-style-name="Default"/>
        <table:table-column table:style-name="co38" table:default-cell-style-name="Default"/>
        <table:table-column table:style-name="co1" table:number-columns-repeated="3" table:default-cell-style-name="Default"/>
        <table:table-column table:style-name="co51" table:default-cell-style-name="Default"/>
        <table:table-column table:style-name="co1" table:number-columns-repeated="16365" table:default-cell-style-name="Default"/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15" office:value-type="string" calcext:value-type="string">
            <text:p>Año</text:p>
          </table:table-cell>
          <table:table-cell table:style-name="ce115" office:value-type="string" calcext:value-type="string">
            <text:p>Mes 1</text:p>
          </table:table-cell>
          <table:table-cell table:style-name="ce115" office:value-type="string" calcext:value-type="string">
            <text:p>Mes 2</text:p>
          </table:table-cell>
          <table:table-cell table:style-name="ce115" office:value-type="string" calcext:value-type="string">
            <text:p>Mes 3</text:p>
          </table:table-cell>
          <table:table-cell table:style-name="ce115" office:value-type="string" calcext:value-type="string">
            <text:p>Mes 4</text:p>
          </table:table-cell>
          <table:table-cell table:style-name="ce115" office:value-type="string" calcext:value-type="string">
            <text:p>Mes 5</text:p>
          </table:table-cell>
          <table:table-cell table:style-name="ce115" office:value-type="string" calcext:value-type="string">
            <text:p>Mes 6</text:p>
          </table:table-cell>
          <table:table-cell table:style-name="ce115" office:value-type="string" calcext:value-type="string">
            <text:p>Mes 7</text:p>
          </table:table-cell>
          <table:table-cell table:style-name="ce115" office:value-type="string" calcext:value-type="string">
            <text:p>Mes 8</text:p>
          </table:table-cell>
          <table:table-cell table:style-name="ce115" office:value-type="string" calcext:value-type="string">
            <text:p>Mes 9</text:p>
          </table:table-cell>
          <table:table-cell table:style-name="ce115" office:value-type="string" calcext:value-type="string">
            <text:p>Mes 10</text:p>
          </table:table-cell>
          <table:table-cell table:style-name="ce115" office:value-type="string" calcext:value-type="string">
            <text:p>Mes 11</text:p>
          </table:table-cell>
          <table:table-cell table:style-name="ce115" office:value-type="string" calcext:value-type="string">
            <text:p>Mes 12</text:p>
          </table:table-cell>
          <table:table-cell table:style-name="ce115" office:value-type="string" calcext:value-type="string">
            <text:p>TOTAL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7" table:formula="of:=300*12" office:value-type="float" office:value="3600" calcext:value-type="float">
            <text:p>3600</text:p>
          </table:table-cell>
          <table:table-cell table:style-name="ce117" table:formula="of:=350*12" office:value-type="float" office:value="4200" calcext:value-type="float">
            <text:p>4200</text:p>
          </table:table-cell>
          <table:table-cell table:style-name="ce117" table:formula="of:=400*12" office:value-type="float" office:value="4800" calcext:value-type="float">
            <text:p>4800</text:p>
          </table:table-cell>
          <table:table-cell table:style-name="ce117" table:formula="of:=450*12" office:value-type="float" office:value="5400" calcext:value-type="float">
            <text:p>5400</text:p>
          </table:table-cell>
          <table:table-cell table:style-name="ce117" table:formula="of:=500*12" office:value-type="float" office:value="6000" calcext:value-type="float">
            <text:p>6000</text:p>
          </table:table-cell>
          <table:table-cell table:style-name="ce117" table:formula="of:=550*12" office:value-type="float" office:value="6600" calcext:value-type="float">
            <text:p>6600</text:p>
          </table:table-cell>
          <table:table-cell table:style-name="ce117" table:formula="of:=600*12" office:value-type="float" office:value="7200" calcext:value-type="float">
            <text:p>7200</text:p>
          </table:table-cell>
          <table:table-cell table:style-name="ce117" table:formula="of:=650*12" office:value-type="float" office:value="7800" calcext:value-type="float">
            <text:p>7800</text:p>
          </table:table-cell>
          <table:table-cell table:style-name="ce117" table:formula="of:=700*12" office:value-type="float" office:value="8400" calcext:value-type="float">
            <text:p>8400</text:p>
          </table:table-cell>
          <table:table-cell table:style-name="ce117" table:formula="of:=750*12" office:value-type="float" office:value="9000" calcext:value-type="float">
            <text:p>9000</text:p>
          </table:table-cell>
          <table:table-cell table:style-name="ce117" table:formula="of:=800*12" office:value-type="float" office:value="9600" calcext:value-type="float">
            <text:p>9600</text:p>
          </table:table-cell>
          <table:table-cell table:style-name="ce117" table:formula="of:=850*12" office:value-type="float" office:value="10200" calcext:value-type="float">
            <text:p>10200</text:p>
          </table:table-cell>
          <table:table-cell table:style-name="ce121" table:formula="of:=SUM([.C5:.N5])" office:value-type="float" office:value="82800" calcext:value-type="float">
            <text:p><text:s/>82,80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1" table:formula="of:=SUM([.C6:.N6])" office:value-type="float" office:value="122400" calcext:value-type="float">
            <text:p><text:s/>122,40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1" table:formula="of:=SUM([.C7:.N7])" office:value-type="float" office:value="122400" calcext:value-type="float">
            <text:p><text:s/>122,40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1" table:formula="of:=SUM([.C8:.N8])" office:value-type="float" office:value="122400" calcext:value-type="float">
            <text:p><text:s/>122,400.00 </text:p>
          </table:table-cell>
          <table:table-cell/>
          <table:table-cell table:style-name="ce189" office:value-type="float" office:value="8" calcext:value-type="float">
            <text:p>8</text:p>
          </table:table-cell>
          <table:table-cell table:formula="of:=60*[.Q8]" office:value-type="float" office:value="480" calcext:value-type="float">
            <text:p>480</text:p>
          </table:table-cell>
          <table:table-cell office:value-type="string" calcext:value-type="string">
            <text:p>Minutos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1" table:formula="of:=SUM([.C9:.N9])" office:value-type="float" office:value="122400" calcext:value-type="float">
            <text:p><text:s/>122,400.00 </text:p>
          </table:table-cell>
          <table:table-cell table:number-columns-repeated="16369"/>
        </table:table-row>
        <table:table-row table:style-name="ro1">
          <table:table-cell/>
          <table:table-cell table:style-name="Default"/>
          <table:table-cell table:number-columns-repeated="14"/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table:number-columns-repeated="16366"/>
        </table:table-row>
        <table:table-row table:style-name="ro1">
          <table:table-cell/>
          <table:table-cell table:style-name="ce156" office:value-type="string" calcext:value-type="string">
            <text:p>N° trab</text:p>
          </table:table-cell>
          <table:table-cell table:style-name="ce183" table:formula="of:=+[.C5]/[.$C$12]" office:value-type="float" office:value="2" calcext:value-type="float">
            <text:p><text:s/>2 </text:p>
          </table:table-cell>
          <table:table-cell table:style-name="ce183" table:formula="of:=+[.D5]/[.$C$12]" office:value-type="float" office:value="2.33333333333333" calcext:value-type="float">
            <text:p><text:s/>2 </text:p>
          </table:table-cell>
          <table:table-cell table:style-name="ce183" table:formula="of:=+[.E5]/[.$C$12]" office:value-type="float" office:value="2.66666666666667" calcext:value-type="float">
            <text:p><text:s/>3 </text:p>
          </table:table-cell>
          <table:table-cell table:style-name="ce183" table:formula="of:=+[.F5]/[.$C$12]" office:value-type="float" office:value="3" calcext:value-type="float">
            <text:p><text:s/>3 </text:p>
          </table:table-cell>
          <table:table-cell table:style-name="ce183" table:formula="of:=+[.G5]/[.$C$12]" office:value-type="float" office:value="3.33333333333333" calcext:value-type="float">
            <text:p><text:s/>3 </text:p>
          </table:table-cell>
          <table:table-cell table:style-name="ce183" table:formula="of:=+[.H5]/[.$C$12]" office:value-type="float" office:value="3.66666666666667" calcext:value-type="float">
            <text:p><text:s/>4 </text:p>
          </table:table-cell>
          <table:table-cell table:style-name="ce183" table:formula="of:=+[.I5]/[.$C$12]" office:value-type="float" office:value="4" calcext:value-type="float">
            <text:p><text:s/>4 </text:p>
          </table:table-cell>
          <table:table-cell table:style-name="ce183" table:formula="of:=+[.J5]/[.$C$12]" office:value-type="float" office:value="4.33333333333333" calcext:value-type="float">
            <text:p><text:s/>4 </text:p>
          </table:table-cell>
          <table:table-cell table:style-name="ce183" table:formula="of:=+[.K5]/[.$C$12]" office:value-type="float" office:value="4.66666666666667" calcext:value-type="float">
            <text:p><text:s/>5 </text:p>
          </table:table-cell>
          <table:table-cell table:style-name="ce183" table:formula="of:=+[.L5]/[.$C$12]" office:value-type="float" office:value="5" calcext:value-type="float">
            <text:p><text:s/>5 </text:p>
          </table:table-cell>
          <table:table-cell table:style-name="ce183" table:formula="of:=+[.M5]/[.$C$12]" office:value-type="float" office:value="5.33333333333333" calcext:value-type="float">
            <text:p><text:s/>5 </text:p>
          </table:table-cell>
          <table:table-cell table:style-name="ce183" table:formula="of:=+[.N5]/[.$C$12]" office:value-type="float" office:value="5.66666666666667" calcext:value-type="float">
            <text:p><text:s/>6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/>
          <table:table-cell table:style-name="ce180" office:value-type="string" calcext:value-type="string">
            <text:p>prod</text:p>
          </table:table-cell>
          <table:table-cell table:style-name="ce184" office:value-type="float" office:value="1800" calcext:value-type="float">
            <text:p>1800</text:p>
          </table:table-cell>
          <table:table-cell table:style-name="ce184" office:value-type="string" calcext:value-type="string">
            <text:p>Al mes</text:p>
          </table:table-cell>
          <table:table-cell office:value-type="string" calcext:value-type="string">
            <text:p>Por trabajador</text:p>
          </table:table-cell>
          <table:table-cell/>
          <table:table-cell table:style-name="ce185" table:formula="of:=[.C12]/25" office:value-type="float" office:value="72" calcext:value-type="float">
            <text:p>72</text:p>
          </table:table-cell>
          <table:table-cell office:value-type="string" calcext:value-type="string">
            <text:p>Al dia</text:p>
          </table:table-cell>
          <table:table-cell table:number-columns-repeated="9"/>
          <table:table-cell table:style-name="ce123" table:formula="of:=[.R10]/[.Q10]" office:value-type="float" office:value="6.66666666666667" calcext:value-type="float">
            <text:p>6.7</text:p>
          </table:table-cell>
          <table:table-cell office:value-type="string" calcext:value-type="string">
            <text:p>Minutos</text:p>
          </table:table-cell>
          <table:table-cell office:value-type="string" calcext:value-type="string">
            <text:p>se producira un chocolate</text:p>
          </table:table-cell>
          <table:table-cell table:number-columns-repeated="16364"/>
        </table:table-row>
        <table:table-row table:style-name="ro1">
          <table:table-cell/>
          <table:table-cell table:style-name="ce180" office:value-type="string" calcext:value-type="string">
            <text:p>sueldo</text:p>
          </table:table-cell>
          <table:table-cell table:style-name="ce184" office:value-type="float" office:value="930" calcext:value-type="float">
            <text:p>930</text:p>
          </table:table-cell>
          <table:table-cell table:style-name="ce184"/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52"/>
          <table:table-cell table:number-columns-repeated="16375"/>
        </table:table-row>
        <table:table-row table:style-name="ro1">
          <table:table-cell/>
          <table:table-cell table:style-name="ce181" office:value-type="string" calcext:value-type="string">
            <text:p>Año</text:p>
          </table:table-cell>
          <table:table-cell table:number-columns-repeated="3"/>
          <table:table-cell table:style-name="ce152"/>
          <table:table-cell/>
          <table:table-cell table:style-name="ce152" table:formula="of:=AVERAGE([.C16:.H16])" office:value-type="float" office:value="2635" calcext:value-type="float">
            <text:p><text:s/>2,635.00 </text:p>
          </table:table-cell>
          <table:table-cell table:number-columns-repeated="5"/>
          <table:table-cell table:style-name="ce152" table:formula="of:=AVERAGE([.I16:.N16])" office:value-type="float" office:value="4495" calcext:value-type="float">
            <text:p><text:s/>4,495.00 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NUAL</text:p>
          </table:table-cell>
          <table:table-cell office:value-type="float" office:value="1" calcext:value-type="float">
            <text:p>1</text:p>
          </table:table-cell>
          <table:table-cell table:style-name="ce138" table:formula="of:=+[.C5]/[.$C$12]*[.$C$13]" office:value-type="float" office:value="1860" calcext:value-type="float">
            <text:p><text:s/>1,860.00 </text:p>
          </table:table-cell>
          <table:table-cell table:style-name="ce138" table:formula="of:=+[.D5]/[.$C$12]*[.$C$13]" office:value-type="float" office:value="2170" calcext:value-type="float">
            <text:p><text:s/>2,170.00 </text:p>
          </table:table-cell>
          <table:table-cell table:style-name="ce138" table:formula="of:=+[.E5]/[.$C$12]*[.$C$13]" office:value-type="float" office:value="2480" calcext:value-type="float">
            <text:p><text:s/>2,480.00 </text:p>
          </table:table-cell>
          <table:table-cell table:style-name="ce138" table:formula="of:=+[.F5]/[.$C$12]*[.$C$13]" office:value-type="float" office:value="2790" calcext:value-type="float">
            <text:p><text:s/>2,790.00 </text:p>
          </table:table-cell>
          <table:table-cell table:style-name="ce138" table:formula="of:=+[.G5]/[.$C$12]*[.$C$13]" office:value-type="float" office:value="3100" calcext:value-type="float">
            <text:p><text:s/>3,100.00 </text:p>
          </table:table-cell>
          <table:table-cell table:style-name="ce138" table:formula="of:=+[.H5]/[.$C$12]*[.$C$13]" office:value-type="float" office:value="3410" calcext:value-type="float">
            <text:p><text:s/>3,410.00 </text:p>
          </table:table-cell>
          <table:table-cell table:style-name="ce138" table:formula="of:=+[.I5]/[.$C$12]*[.$C$13]" office:value-type="float" office:value="3720" calcext:value-type="float">
            <text:p><text:s/>3,720.00 </text:p>
          </table:table-cell>
          <table:table-cell table:style-name="ce138" table:formula="of:=+[.J5]/[.$C$12]*[.$C$13]" office:value-type="float" office:value="4030" calcext:value-type="float">
            <text:p><text:s/>4,030.00 </text:p>
          </table:table-cell>
          <table:table-cell table:style-name="ce138" table:formula="of:=+[.K5]/[.$C$12]*[.$C$13]" office:value-type="float" office:value="4340" calcext:value-type="float">
            <text:p><text:s/>4,340.00 </text:p>
          </table:table-cell>
          <table:table-cell table:style-name="ce138" table:formula="of:=+[.L5]/[.$C$12]*[.$C$13]" office:value-type="float" office:value="4650" calcext:value-type="float">
            <text:p><text:s/>4,650.00 </text:p>
          </table:table-cell>
          <table:table-cell table:style-name="ce138" table:formula="of:=+[.M5]/[.$C$12]*[.$C$13]" office:value-type="float" office:value="4960" calcext:value-type="float">
            <text:p><text:s/>4,960.00 </text:p>
          </table:table-cell>
          <table:table-cell table:style-name="ce138" table:formula="of:=+[.N5]/[.$C$12]*[.$C$13]" office:value-type="float" office:value="5270" calcext:value-type="float">
            <text:p><text:s/>5,270.00 </text:p>
          </table:table-cell>
          <table:table-cell table:style-name="ce187" table:formula="of:=SUM([.B16:.N16])" office:value-type="float" office:value="42781" calcext:value-type="float">
            <text:p><text:s/>42,781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8" table:formula="of:=+[.C6]/[.$C$12]*[.$C$13]" office:value-type="float" office:value="5270" calcext:value-type="float">
            <text:p><text:s/>5,270.00 </text:p>
          </table:table-cell>
          <table:table-cell table:style-name="ce138" table:formula="of:=+[.D6]/[.$C$12]*[.$C$13]" office:value-type="float" office:value="5270" calcext:value-type="float">
            <text:p><text:s/>5,270.00 </text:p>
          </table:table-cell>
          <table:table-cell table:style-name="ce138" table:formula="of:=+[.E6]/[.$C$12]*[.$C$13]" office:value-type="float" office:value="5270" calcext:value-type="float">
            <text:p><text:s/>5,270.00 </text:p>
          </table:table-cell>
          <table:table-cell table:style-name="ce138" table:formula="of:=+[.F6]/[.$C$12]*[.$C$13]" office:value-type="float" office:value="5270" calcext:value-type="float">
            <text:p><text:s/>5,270.00 </text:p>
          </table:table-cell>
          <table:table-cell table:style-name="ce138" table:formula="of:=+[.G6]/[.$C$12]*[.$C$13]" office:value-type="float" office:value="5270" calcext:value-type="float">
            <text:p><text:s/>5,270.00 </text:p>
          </table:table-cell>
          <table:table-cell table:style-name="ce138" table:formula="of:=+[.H6]/[.$C$12]*[.$C$13]" office:value-type="float" office:value="5270" calcext:value-type="float">
            <text:p><text:s/>5,270.00 </text:p>
          </table:table-cell>
          <table:table-cell table:style-name="ce138" table:formula="of:=+[.I6]/[.$C$12]*[.$C$13]" office:value-type="float" office:value="5270" calcext:value-type="float">
            <text:p><text:s/>5,270.00 </text:p>
          </table:table-cell>
          <table:table-cell table:style-name="ce138" table:formula="of:=+[.J6]/[.$C$12]*[.$C$13]" office:value-type="float" office:value="5270" calcext:value-type="float">
            <text:p><text:s/>5,270.00 </text:p>
          </table:table-cell>
          <table:table-cell table:style-name="ce138" table:formula="of:=+[.K6]/[.$C$12]*[.$C$13]" office:value-type="float" office:value="5270" calcext:value-type="float">
            <text:p><text:s/>5,270.00 </text:p>
          </table:table-cell>
          <table:table-cell table:style-name="ce138" table:formula="of:=+[.L6]/[.$C$12]*[.$C$13]" office:value-type="float" office:value="5270" calcext:value-type="float">
            <text:p><text:s/>5,270.00 </text:p>
          </table:table-cell>
          <table:table-cell table:style-name="ce138" table:formula="of:=+[.M6]/[.$C$12]*[.$C$13]" office:value-type="float" office:value="5270" calcext:value-type="float">
            <text:p><text:s/>5,270.00 </text:p>
          </table:table-cell>
          <table:table-cell table:style-name="ce138" table:formula="of:=+[.N6]/[.$C$12]*[.$C$13]" office:value-type="float" office:value="5270" calcext:value-type="float">
            <text:p><text:s/>5,270.00 </text:p>
          </table:table-cell>
          <table:table-cell table:style-name="ce187" table:formula="of:=SUM([.B17:.N17])" office:value-type="float" office:value="63242" calcext:value-type="float">
            <text:p><text:s/>63,242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8" table:formula="of:=+[.C7]/[.$C$12]*[.$C$13]" office:value-type="float" office:value="5270" calcext:value-type="float">
            <text:p><text:s/>5,270.00 </text:p>
          </table:table-cell>
          <table:table-cell table:style-name="ce138" table:formula="of:=+[.D7]/[.$C$12]*[.$C$13]" office:value-type="float" office:value="5270" calcext:value-type="float">
            <text:p><text:s/>5,270.00 </text:p>
          </table:table-cell>
          <table:table-cell table:style-name="ce138" table:formula="of:=+[.E7]/[.$C$12]*[.$C$13]" office:value-type="float" office:value="5270" calcext:value-type="float">
            <text:p><text:s/>5,270.00 </text:p>
          </table:table-cell>
          <table:table-cell table:style-name="ce138" table:formula="of:=+[.F7]/[.$C$12]*[.$C$13]" office:value-type="float" office:value="5270" calcext:value-type="float">
            <text:p><text:s/>5,270.00 </text:p>
          </table:table-cell>
          <table:table-cell table:style-name="ce138" table:formula="of:=+[.G7]/[.$C$12]*[.$C$13]" office:value-type="float" office:value="5270" calcext:value-type="float">
            <text:p><text:s/>5,270.00 </text:p>
          </table:table-cell>
          <table:table-cell table:style-name="ce138" table:formula="of:=+[.H7]/[.$C$12]*[.$C$13]" office:value-type="float" office:value="5270" calcext:value-type="float">
            <text:p><text:s/>5,270.00 </text:p>
          </table:table-cell>
          <table:table-cell table:style-name="ce138" table:formula="of:=+[.I7]/[.$C$12]*[.$C$13]" office:value-type="float" office:value="5270" calcext:value-type="float">
            <text:p><text:s/>5,270.00 </text:p>
          </table:table-cell>
          <table:table-cell table:style-name="ce138" table:formula="of:=+[.J7]/[.$C$12]*[.$C$13]" office:value-type="float" office:value="5270" calcext:value-type="float">
            <text:p><text:s/>5,270.00 </text:p>
          </table:table-cell>
          <table:table-cell table:style-name="ce138" table:formula="of:=+[.K7]/[.$C$12]*[.$C$13]" office:value-type="float" office:value="5270" calcext:value-type="float">
            <text:p><text:s/>5,270.00 </text:p>
          </table:table-cell>
          <table:table-cell table:style-name="ce138" table:formula="of:=+[.L7]/[.$C$12]*[.$C$13]" office:value-type="float" office:value="5270" calcext:value-type="float">
            <text:p><text:s/>5,270.00 </text:p>
          </table:table-cell>
          <table:table-cell table:style-name="ce138" table:formula="of:=+[.M7]/[.$C$12]*[.$C$13]" office:value-type="float" office:value="5270" calcext:value-type="float">
            <text:p><text:s/>5,270.00 </text:p>
          </table:table-cell>
          <table:table-cell table:style-name="ce138" table:formula="of:=+[.N7]/[.$C$12]*[.$C$13]" office:value-type="float" office:value="5270" calcext:value-type="float">
            <text:p><text:s/>5,270.00 </text:p>
          </table:table-cell>
          <table:table-cell table:style-name="ce187" table:formula="of:=SUM([.B18:.N18])" office:value-type="float" office:value="63243" calcext:value-type="float">
            <text:p><text:s/>63,243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8" table:formula="of:=+[.C8]/[.$C$12]*[.$C$13]" office:value-type="float" office:value="5270" calcext:value-type="float">
            <text:p><text:s/>5,270.00 </text:p>
          </table:table-cell>
          <table:table-cell table:style-name="ce138" table:formula="of:=+[.D8]/[.$C$12]*[.$C$13]" office:value-type="float" office:value="5270" calcext:value-type="float">
            <text:p><text:s/>5,270.00 </text:p>
          </table:table-cell>
          <table:table-cell table:style-name="ce138" table:formula="of:=+[.E8]/[.$C$12]*[.$C$13]" office:value-type="float" office:value="5270" calcext:value-type="float">
            <text:p><text:s/>5,270.00 </text:p>
          </table:table-cell>
          <table:table-cell table:style-name="ce138" table:formula="of:=+[.F8]/[.$C$12]*[.$C$13]" office:value-type="float" office:value="5270" calcext:value-type="float">
            <text:p><text:s/>5,270.00 </text:p>
          </table:table-cell>
          <table:table-cell table:style-name="ce138" table:formula="of:=+[.G8]/[.$C$12]*[.$C$13]" office:value-type="float" office:value="5270" calcext:value-type="float">
            <text:p><text:s/>5,270.00 </text:p>
          </table:table-cell>
          <table:table-cell table:style-name="ce138" table:formula="of:=+[.H8]/[.$C$12]*[.$C$13]" office:value-type="float" office:value="5270" calcext:value-type="float">
            <text:p><text:s/>5,270.00 </text:p>
          </table:table-cell>
          <table:table-cell table:style-name="ce138" table:formula="of:=+[.I8]/[.$C$12]*[.$C$13]" office:value-type="float" office:value="5270" calcext:value-type="float">
            <text:p><text:s/>5,270.00 </text:p>
          </table:table-cell>
          <table:table-cell table:style-name="ce138" table:formula="of:=+[.J8]/[.$C$12]*[.$C$13]" office:value-type="float" office:value="5270" calcext:value-type="float">
            <text:p><text:s/>5,270.00 </text:p>
          </table:table-cell>
          <table:table-cell table:style-name="ce138" table:formula="of:=+[.K8]/[.$C$12]*[.$C$13]" office:value-type="float" office:value="5270" calcext:value-type="float">
            <text:p><text:s/>5,270.00 </text:p>
          </table:table-cell>
          <table:table-cell table:style-name="ce138" table:formula="of:=+[.L8]/[.$C$12]*[.$C$13]" office:value-type="float" office:value="5270" calcext:value-type="float">
            <text:p><text:s/>5,270.00 </text:p>
          </table:table-cell>
          <table:table-cell table:style-name="ce138" table:formula="of:=+[.M8]/[.$C$12]*[.$C$13]" office:value-type="float" office:value="5270" calcext:value-type="float">
            <text:p><text:s/>5,270.00 </text:p>
          </table:table-cell>
          <table:table-cell table:style-name="ce138" table:formula="of:=+[.N8]/[.$C$12]*[.$C$13]" office:value-type="float" office:value="5270" calcext:value-type="float">
            <text:p><text:s/>5,270.00 </text:p>
          </table:table-cell>
          <table:table-cell table:style-name="ce187" table:formula="of:=SUM([.B19:.N19])" office:value-type="float" office:value="63244" calcext:value-type="float">
            <text:p><text:s/>63,244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8" table:formula="of:=+[.C9]/[.$C$12]*[.$C$13]" office:value-type="float" office:value="5270" calcext:value-type="float">
            <text:p><text:s/>5,270.00 </text:p>
          </table:table-cell>
          <table:table-cell table:style-name="ce138" table:formula="of:=+[.D9]/[.$C$12]*[.$C$13]" office:value-type="float" office:value="5270" calcext:value-type="float">
            <text:p><text:s/>5,270.00 </text:p>
          </table:table-cell>
          <table:table-cell table:style-name="ce138" table:formula="of:=+[.E9]/[.$C$12]*[.$C$13]" office:value-type="float" office:value="5270" calcext:value-type="float">
            <text:p><text:s/>5,270.00 </text:p>
          </table:table-cell>
          <table:table-cell table:style-name="ce138" table:formula="of:=+[.F9]/[.$C$12]*[.$C$13]" office:value-type="float" office:value="5270" calcext:value-type="float">
            <text:p><text:s/>5,270.00 </text:p>
          </table:table-cell>
          <table:table-cell table:style-name="ce138" table:formula="of:=+[.G9]/[.$C$12]*[.$C$13]" office:value-type="float" office:value="5270" calcext:value-type="float">
            <text:p><text:s/>5,270.00 </text:p>
          </table:table-cell>
          <table:table-cell table:style-name="ce138" table:formula="of:=+[.H9]/[.$C$12]*[.$C$13]" office:value-type="float" office:value="5270" calcext:value-type="float">
            <text:p><text:s/>5,270.00 </text:p>
          </table:table-cell>
          <table:table-cell table:style-name="ce138" table:formula="of:=+[.I9]/[.$C$12]*[.$C$13]" office:value-type="float" office:value="5270" calcext:value-type="float">
            <text:p><text:s/>5,270.00 </text:p>
          </table:table-cell>
          <table:table-cell table:style-name="ce138" table:formula="of:=+[.J9]/[.$C$12]*[.$C$13]" office:value-type="float" office:value="5270" calcext:value-type="float">
            <text:p><text:s/>5,270.00 </text:p>
          </table:table-cell>
          <table:table-cell table:style-name="ce138" table:formula="of:=+[.K9]/[.$C$12]*[.$C$13]" office:value-type="float" office:value="5270" calcext:value-type="float">
            <text:p><text:s/>5,270.00 </text:p>
          </table:table-cell>
          <table:table-cell table:style-name="ce138" table:formula="of:=+[.L9]/[.$C$12]*[.$C$13]" office:value-type="float" office:value="5270" calcext:value-type="float">
            <text:p><text:s/>5,270.00 </text:p>
          </table:table-cell>
          <table:table-cell table:style-name="ce138" table:formula="of:=+[.M9]/[.$C$12]*[.$C$13]" office:value-type="float" office:value="5270" calcext:value-type="float">
            <text:p><text:s/>5,270.00 </text:p>
          </table:table-cell>
          <table:table-cell table:style-name="ce138" table:formula="of:=+[.N9]/[.$C$12]*[.$C$13]" office:value-type="float" office:value="5270" calcext:value-type="float">
            <text:p><text:s/>5,270.00 </text:p>
          </table:table-cell>
          <table:table-cell table:style-name="ce187" table:formula="of:=SUM([.B20:.N20])" office:value-type="float" office:value="63245" calcext:value-type="float">
            <text:p><text:s/>63,245.00 </text:p>
          </table:table-cell>
          <table:table-cell table:number-columns-repeated="16369"/>
        </table:table-row>
        <table:table-row table:style-name="ro1">
          <table:table-cell/>
          <table:table-cell table:style-name="ce182"/>
          <table:table-cell table:style-name="ce122" table:number-columns-repeated="13"/>
          <table:table-cell table:number-columns-repeated="16369"/>
        </table:table-row>
        <table:table-row table:style-name="ro1">
          <table:table-cell/>
          <table:table-cell table:style-name="ce181" office:value-type="string" calcext:value-type="string">
            <text:p>Año</text:p>
          </table:table-cell>
          <table:table-cell table:number-columns-repeated="6"/>
          <table:table-cell table:style-name="ce186" table:formula="of:=([.H15]+(0.09*[.H15]))" office:value-type="float" office:value="2872.15" calcext:value-type="float">
            <text:p><text:s/>2,872.15 </text:p>
          </table:table-cell>
          <table:table-cell table:number-columns-repeated="4"/>
          <table:table-cell table:style-name="ce152" table:formula="of:=([.N15]+([.N15]*0.09))" office:value-type="float" office:value="4899.55" calcext:value-type="float">
            <text:p><text:s/>4,899.55 </text:p>
          </table:table-cell>
          <table:table-cell table:style-name="ce152" table:formula="of:=[.I22]+[.N22]" office:value-type="float" office:value="7771.7" calcext:value-type="float">
            <text:p><text:s/>7,771.70 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ratif</text:p>
          </table:table-cell>
          <table:table-cell office:value-type="float" office:value="1" calcext:value-type="float">
            <text:p>1</text:p>
          </table:table-cell>
          <table:table-cell table:style-name="ce138" table:formula="of:=+[.C16]/6" office:value-type="float" office:value="310" calcext:value-type="float">
            <text:p><text:s/>310.00 </text:p>
          </table:table-cell>
          <table:table-cell table:style-name="ce138" table:formula="of:=+[.D16]/6" office:value-type="float" office:value="361.666666666667" calcext:value-type="float">
            <text:p><text:s/>361.67 </text:p>
          </table:table-cell>
          <table:table-cell table:style-name="ce138" table:formula="of:=+[.E16]/6" office:value-type="float" office:value="413.333333333333" calcext:value-type="float">
            <text:p><text:s/>413.33 </text:p>
          </table:table-cell>
          <table:table-cell table:style-name="ce138" table:formula="of:=+[.F16]/6" office:value-type="float" office:value="465" calcext:value-type="float">
            <text:p><text:s/>465.00 </text:p>
          </table:table-cell>
          <table:table-cell table:style-name="ce138" table:formula="of:=+[.G16]/6" office:value-type="float" office:value="516.666666666667" calcext:value-type="float">
            <text:p><text:s/>516.67 </text:p>
          </table:table-cell>
          <table:table-cell table:style-name="ce138" table:formula="of:=+[.H16]/6" office:value-type="float" office:value="568.333333333333" calcext:value-type="float">
            <text:p><text:s/>568.33 </text:p>
          </table:table-cell>
          <table:table-cell table:style-name="ce138" table:formula="of:=+[.I16]/6" office:value-type="float" office:value="620" calcext:value-type="float">
            <text:p><text:s/>620.00 </text:p>
          </table:table-cell>
          <table:table-cell table:style-name="ce138" table:formula="of:=+[.J16]/6" office:value-type="float" office:value="671.666666666667" calcext:value-type="float">
            <text:p><text:s/>671.67 </text:p>
          </table:table-cell>
          <table:table-cell table:style-name="ce138" table:formula="of:=+[.K16]/6" office:value-type="float" office:value="723.333333333333" calcext:value-type="float">
            <text:p><text:s/>723.33 </text:p>
          </table:table-cell>
          <table:table-cell table:style-name="ce138" table:formula="of:=+[.L16]/6" office:value-type="float" office:value="775" calcext:value-type="float">
            <text:p><text:s/>775.00 </text:p>
          </table:table-cell>
          <table:table-cell table:style-name="ce138" table:formula="of:=+[.M16]/6" office:value-type="float" office:value="826.666666666667" calcext:value-type="float">
            <text:p><text:s/>826.67 </text:p>
          </table:table-cell>
          <table:table-cell table:style-name="ce138" table:formula="of:=+[.N16]/6" office:value-type="float" office:value="878.333333333333" calcext:value-type="float">
            <text:p><text:s/>878.33 </text:p>
          </table:table-cell>
          <table:table-cell table:style-name="ce187" table:formula="of:=SUM([.C23:.N23])" office:value-type="float" office:value="7130" calcext:value-type="float">
            <text:p><text:s/>7,13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8" table:formula="of:=+[.C17]/6" office:value-type="float" office:value="878.333333333333" calcext:value-type="float">
            <text:p><text:s/>878.33 </text:p>
          </table:table-cell>
          <table:table-cell table:style-name="ce138" table:formula="of:=+[.D17]/6" office:value-type="float" office:value="878.333333333333" calcext:value-type="float">
            <text:p><text:s/>878.33 </text:p>
          </table:table-cell>
          <table:table-cell table:style-name="ce138" table:formula="of:=+[.E17]/6" office:value-type="float" office:value="878.333333333333" calcext:value-type="float">
            <text:p><text:s/>878.33 </text:p>
          </table:table-cell>
          <table:table-cell table:style-name="ce138" table:formula="of:=+[.F17]/6" office:value-type="float" office:value="878.333333333333" calcext:value-type="float">
            <text:p><text:s/>878.33 </text:p>
          </table:table-cell>
          <table:table-cell table:style-name="ce138" table:formula="of:=+[.G17]/6" office:value-type="float" office:value="878.333333333333" calcext:value-type="float">
            <text:p><text:s/>878.33 </text:p>
          </table:table-cell>
          <table:table-cell table:style-name="ce138" table:formula="of:=+[.H17]/6" office:value-type="float" office:value="878.333333333333" calcext:value-type="float">
            <text:p><text:s/>878.33 </text:p>
          </table:table-cell>
          <table:table-cell table:style-name="ce138" table:formula="of:=+[.I17]/6" office:value-type="float" office:value="878.333333333333" calcext:value-type="float">
            <text:p><text:s/>878.33 </text:p>
          </table:table-cell>
          <table:table-cell table:style-name="ce138" table:formula="of:=+[.J17]/6" office:value-type="float" office:value="878.333333333333" calcext:value-type="float">
            <text:p><text:s/>878.33 </text:p>
          </table:table-cell>
          <table:table-cell table:style-name="ce138" table:formula="of:=+[.K17]/6" office:value-type="float" office:value="878.333333333333" calcext:value-type="float">
            <text:p><text:s/>878.33 </text:p>
          </table:table-cell>
          <table:table-cell table:style-name="ce138" table:formula="of:=+[.L17]/6" office:value-type="float" office:value="878.333333333333" calcext:value-type="float">
            <text:p><text:s/>878.33 </text:p>
          </table:table-cell>
          <table:table-cell table:style-name="ce138" table:formula="of:=+[.M17]/6" office:value-type="float" office:value="878.333333333333" calcext:value-type="float">
            <text:p><text:s/>878.33 </text:p>
          </table:table-cell>
          <table:table-cell table:style-name="ce138" table:formula="of:=+[.N17]/6" office:value-type="float" office:value="878.333333333333" calcext:value-type="float">
            <text:p><text:s/>878.33 </text:p>
          </table:table-cell>
          <table:table-cell table:style-name="ce187" table:formula="of:=SUM([.C24:.N24])" office:value-type="float" office:value="10540" calcext:value-type="float">
            <text:p><text:s/>10,54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8" table:formula="of:=+[.C18]/6" office:value-type="float" office:value="878.333333333333" calcext:value-type="float">
            <text:p><text:s/>878.33 </text:p>
          </table:table-cell>
          <table:table-cell table:style-name="ce138" table:formula="of:=+[.D18]/6" office:value-type="float" office:value="878.333333333333" calcext:value-type="float">
            <text:p><text:s/>878.33 </text:p>
          </table:table-cell>
          <table:table-cell table:style-name="ce138" table:formula="of:=+[.E18]/6" office:value-type="float" office:value="878.333333333333" calcext:value-type="float">
            <text:p><text:s/>878.33 </text:p>
          </table:table-cell>
          <table:table-cell table:style-name="ce138" table:formula="of:=+[.F18]/6" office:value-type="float" office:value="878.333333333333" calcext:value-type="float">
            <text:p><text:s/>878.33 </text:p>
          </table:table-cell>
          <table:table-cell table:style-name="ce138" table:formula="of:=+[.G18]/6" office:value-type="float" office:value="878.333333333333" calcext:value-type="float">
            <text:p><text:s/>878.33 </text:p>
          </table:table-cell>
          <table:table-cell table:style-name="ce138" table:formula="of:=+[.H18]/6" office:value-type="float" office:value="878.333333333333" calcext:value-type="float">
            <text:p><text:s/>878.33 </text:p>
          </table:table-cell>
          <table:table-cell table:style-name="ce138" table:formula="of:=+[.I18]/6" office:value-type="float" office:value="878.333333333333" calcext:value-type="float">
            <text:p><text:s/>878.33 </text:p>
          </table:table-cell>
          <table:table-cell table:style-name="ce138" table:formula="of:=+[.J18]/6" office:value-type="float" office:value="878.333333333333" calcext:value-type="float">
            <text:p><text:s/>878.33 </text:p>
          </table:table-cell>
          <table:table-cell table:style-name="ce138" table:formula="of:=+[.K18]/6" office:value-type="float" office:value="878.333333333333" calcext:value-type="float">
            <text:p><text:s/>878.33 </text:p>
          </table:table-cell>
          <table:table-cell table:style-name="ce138" table:formula="of:=+[.L18]/6" office:value-type="float" office:value="878.333333333333" calcext:value-type="float">
            <text:p><text:s/>878.33 </text:p>
          </table:table-cell>
          <table:table-cell table:style-name="ce138" table:formula="of:=+[.M18]/6" office:value-type="float" office:value="878.333333333333" calcext:value-type="float">
            <text:p><text:s/>878.33 </text:p>
          </table:table-cell>
          <table:table-cell table:style-name="ce138" table:formula="of:=+[.N18]/6" office:value-type="float" office:value="878.333333333333" calcext:value-type="float">
            <text:p><text:s/>878.33 </text:p>
          </table:table-cell>
          <table:table-cell table:style-name="ce187" table:formula="of:=SUM([.C25:.N25])" office:value-type="float" office:value="10540" calcext:value-type="float">
            <text:p><text:s/>10,54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8" table:formula="of:=+[.C19]/6" office:value-type="float" office:value="878.333333333333" calcext:value-type="float">
            <text:p><text:s/>878.33 </text:p>
          </table:table-cell>
          <table:table-cell table:style-name="ce138" table:formula="of:=+[.D19]/6" office:value-type="float" office:value="878.333333333333" calcext:value-type="float">
            <text:p><text:s/>878.33 </text:p>
          </table:table-cell>
          <table:table-cell table:style-name="ce138" table:formula="of:=+[.E19]/6" office:value-type="float" office:value="878.333333333333" calcext:value-type="float">
            <text:p><text:s/>878.33 </text:p>
          </table:table-cell>
          <table:table-cell table:style-name="ce138" table:formula="of:=+[.F19]/6" office:value-type="float" office:value="878.333333333333" calcext:value-type="float">
            <text:p><text:s/>878.33 </text:p>
          </table:table-cell>
          <table:table-cell table:style-name="ce138" table:formula="of:=+[.G19]/6" office:value-type="float" office:value="878.333333333333" calcext:value-type="float">
            <text:p><text:s/>878.33 </text:p>
          </table:table-cell>
          <table:table-cell table:style-name="ce138" table:formula="of:=+[.H19]/6" office:value-type="float" office:value="878.333333333333" calcext:value-type="float">
            <text:p><text:s/>878.33 </text:p>
          </table:table-cell>
          <table:table-cell table:style-name="ce138" table:formula="of:=+[.I19]/6" office:value-type="float" office:value="878.333333333333" calcext:value-type="float">
            <text:p><text:s/>878.33 </text:p>
          </table:table-cell>
          <table:table-cell table:style-name="ce138" table:formula="of:=+[.J19]/6" office:value-type="float" office:value="878.333333333333" calcext:value-type="float">
            <text:p><text:s/>878.33 </text:p>
          </table:table-cell>
          <table:table-cell table:style-name="ce138" table:formula="of:=+[.K19]/6" office:value-type="float" office:value="878.333333333333" calcext:value-type="float">
            <text:p><text:s/>878.33 </text:p>
          </table:table-cell>
          <table:table-cell table:style-name="ce138" table:formula="of:=+[.L19]/6" office:value-type="float" office:value="878.333333333333" calcext:value-type="float">
            <text:p><text:s/>878.33 </text:p>
          </table:table-cell>
          <table:table-cell table:style-name="ce138" table:formula="of:=+[.M19]/6" office:value-type="float" office:value="878.333333333333" calcext:value-type="float">
            <text:p><text:s/>878.33 </text:p>
          </table:table-cell>
          <table:table-cell table:style-name="ce138" table:formula="of:=+[.N19]/6" office:value-type="float" office:value="878.333333333333" calcext:value-type="float">
            <text:p><text:s/>878.33 </text:p>
          </table:table-cell>
          <table:table-cell table:style-name="ce187" table:formula="of:=SUM([.C26:.N26])" office:value-type="float" office:value="10540" calcext:value-type="float">
            <text:p><text:s/>10,540.00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8" table:formula="of:=+[.C20]/6" office:value-type="float" office:value="878.333333333333" calcext:value-type="float">
            <text:p><text:s/>878.33 </text:p>
          </table:table-cell>
          <table:table-cell table:style-name="ce138" table:formula="of:=+[.D20]/6" office:value-type="float" office:value="878.333333333333" calcext:value-type="float">
            <text:p><text:s/>878.33 </text:p>
          </table:table-cell>
          <table:table-cell table:style-name="ce138" table:formula="of:=+[.E20]/6" office:value-type="float" office:value="878.333333333333" calcext:value-type="float">
            <text:p><text:s/>878.33 </text:p>
          </table:table-cell>
          <table:table-cell table:style-name="ce138" table:formula="of:=+[.F20]/6" office:value-type="float" office:value="878.333333333333" calcext:value-type="float">
            <text:p><text:s/>878.33 </text:p>
          </table:table-cell>
          <table:table-cell table:style-name="ce138" table:formula="of:=+[.G20]/6" office:value-type="float" office:value="878.333333333333" calcext:value-type="float">
            <text:p><text:s/>878.33 </text:p>
          </table:table-cell>
          <table:table-cell table:style-name="ce138" table:formula="of:=+[.H20]/6" office:value-type="float" office:value="878.333333333333" calcext:value-type="float">
            <text:p><text:s/>878.33 </text:p>
          </table:table-cell>
          <table:table-cell table:style-name="ce138" table:formula="of:=+[.I20]/6" office:value-type="float" office:value="878.333333333333" calcext:value-type="float">
            <text:p><text:s/>878.33 </text:p>
          </table:table-cell>
          <table:table-cell table:style-name="ce138" table:formula="of:=+[.J20]/6" office:value-type="float" office:value="878.333333333333" calcext:value-type="float">
            <text:p><text:s/>878.33 </text:p>
          </table:table-cell>
          <table:table-cell table:style-name="ce138" table:formula="of:=+[.K20]/6" office:value-type="float" office:value="878.333333333333" calcext:value-type="float">
            <text:p><text:s/>878.33 </text:p>
          </table:table-cell>
          <table:table-cell table:style-name="ce138" table:formula="of:=+[.L20]/6" office:value-type="float" office:value="878.333333333333" calcext:value-type="float">
            <text:p><text:s/>878.33 </text:p>
          </table:table-cell>
          <table:table-cell table:style-name="ce138" table:formula="of:=+[.M20]/6" office:value-type="float" office:value="878.333333333333" calcext:value-type="float">
            <text:p><text:s/>878.33 </text:p>
          </table:table-cell>
          <table:table-cell table:style-name="ce138" table:formula="of:=+[.N20]/6" office:value-type="float" office:value="878.333333333333" calcext:value-type="float">
            <text:p><text:s/>878.33 </text:p>
          </table:table-cell>
          <table:table-cell table:style-name="ce187" table:formula="of:=SUM([.C27:.N27])" office:value-type="float" office:value="10540" calcext:value-type="float">
            <text:p><text:s/>10,540.00 </text:p>
          </table:table-cell>
          <table:table-cell table:number-columns-repeated="16369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CTS</text:p>
          </table:table-cell>
          <table:table-cell table:style-name="ce181" office:value-type="string" calcext:value-type="string">
            <text:p>Año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8" table:formula="of:=+([.C16]+[.C16]/6)/12" office:value-type="float" office:value="180.833333333333" calcext:value-type="float">
            <text:p><text:s/>180.83 </text:p>
          </table:table-cell>
          <table:table-cell table:style-name="ce138" table:formula="of:=+([.D16]+[.D16]/6)/12" office:value-type="float" office:value="210.972222222222" calcext:value-type="float">
            <text:p><text:s/>210.97 </text:p>
          </table:table-cell>
          <table:table-cell table:style-name="ce138" table:formula="of:=+([.E16]+[.E16]/6)/12" office:value-type="float" office:value="241.111111111111" calcext:value-type="float">
            <text:p><text:s/>241.11 </text:p>
          </table:table-cell>
          <table:table-cell table:style-name="ce138" table:formula="of:=+([.F16]+[.F16]/6)/12" office:value-type="float" office:value="271.25" calcext:value-type="float">
            <text:p><text:s/>271.25 </text:p>
          </table:table-cell>
          <table:table-cell table:style-name="ce138" table:formula="of:=+([.G16]+[.G16]/6)/12" office:value-type="float" office:value="301.388888888889" calcext:value-type="float">
            <text:p><text:s/>301.39 </text:p>
          </table:table-cell>
          <table:table-cell table:style-name="ce138" table:formula="of:=+([.H16]+[.H16]/6)/12" office:value-type="float" office:value="331.527777777778" calcext:value-type="float">
            <text:p><text:s/>331.53 </text:p>
          </table:table-cell>
          <table:table-cell table:style-name="ce138" table:formula="of:=+([.I16]+[.I16]/6)/12" office:value-type="float" office:value="361.666666666667" calcext:value-type="float">
            <text:p><text:s/>361.67 </text:p>
          </table:table-cell>
          <table:table-cell table:style-name="ce138" table:formula="of:=+([.J16]+[.J16]/6)/12" office:value-type="float" office:value="391.805555555556" calcext:value-type="float">
            <text:p><text:s/>391.81 </text:p>
          </table:table-cell>
          <table:table-cell table:style-name="ce138" table:formula="of:=+([.K16]+[.K16]/6)/12" office:value-type="float" office:value="421.944444444444" calcext:value-type="float">
            <text:p><text:s/>421.94 </text:p>
          </table:table-cell>
          <table:table-cell table:style-name="ce138" table:formula="of:=+([.L16]+[.L16]/6)/12" office:value-type="float" office:value="452.083333333333" calcext:value-type="float">
            <text:p><text:s/>452.08 </text:p>
          </table:table-cell>
          <table:table-cell table:style-name="ce138" table:formula="of:=+([.M16]+[.M16]/6)/12" office:value-type="float" office:value="482.222222222222" calcext:value-type="float">
            <text:p><text:s/>482.22 </text:p>
          </table:table-cell>
          <table:table-cell table:style-name="ce138" table:formula="of:=+([.N16]+[.N16]/6)/12" office:value-type="float" office:value="512.361111111111" calcext:value-type="float">
            <text:p><text:s/>512.36 </text:p>
          </table:table-cell>
          <table:table-cell table:style-name="ce187" table:formula="of:=SUM([.C31:.N31])" office:value-type="float" office:value="4159.16666666667" calcext:value-type="float">
            <text:p><text:s/>4,159.17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8" table:formula="of:=+([.C17]+[.C17]/6)/12" office:value-type="float" office:value="512.361111111111" calcext:value-type="float">
            <text:p><text:s/>512.36 </text:p>
          </table:table-cell>
          <table:table-cell table:style-name="ce138" table:formula="of:=+([.D17]+[.D17]/6)/12" office:value-type="float" office:value="512.361111111111" calcext:value-type="float">
            <text:p><text:s/>512.36 </text:p>
          </table:table-cell>
          <table:table-cell table:style-name="ce138" table:formula="of:=+([.E17]+[.E17]/6)/12" office:value-type="float" office:value="512.361111111111" calcext:value-type="float">
            <text:p><text:s/>512.36 </text:p>
          </table:table-cell>
          <table:table-cell table:style-name="ce138" table:formula="of:=+([.F17]+[.F17]/6)/12" office:value-type="float" office:value="512.361111111111" calcext:value-type="float">
            <text:p><text:s/>512.36 </text:p>
          </table:table-cell>
          <table:table-cell table:style-name="ce138" table:formula="of:=+([.G17]+[.G17]/6)/12" office:value-type="float" office:value="512.361111111111" calcext:value-type="float">
            <text:p><text:s/>512.36 </text:p>
          </table:table-cell>
          <table:table-cell table:style-name="ce138" table:formula="of:=+([.H17]+[.H17]/6)/12" office:value-type="float" office:value="512.361111111111" calcext:value-type="float">
            <text:p><text:s/>512.36 </text:p>
          </table:table-cell>
          <table:table-cell table:style-name="ce138" table:formula="of:=+([.I17]+[.I17]/6)/12" office:value-type="float" office:value="512.361111111111" calcext:value-type="float">
            <text:p><text:s/>512.36 </text:p>
          </table:table-cell>
          <table:table-cell table:style-name="ce138" table:formula="of:=+([.J17]+[.J17]/6)/12" office:value-type="float" office:value="512.361111111111" calcext:value-type="float">
            <text:p><text:s/>512.36 </text:p>
          </table:table-cell>
          <table:table-cell table:style-name="ce138" table:formula="of:=+([.K17]+[.K17]/6)/12" office:value-type="float" office:value="512.361111111111" calcext:value-type="float">
            <text:p><text:s/>512.36 </text:p>
          </table:table-cell>
          <table:table-cell table:style-name="ce138" table:formula="of:=+([.L17]+[.L17]/6)/12" office:value-type="float" office:value="512.361111111111" calcext:value-type="float">
            <text:p><text:s/>512.36 </text:p>
          </table:table-cell>
          <table:table-cell table:style-name="ce138" table:formula="of:=+([.M17]+[.M17]/6)/12" office:value-type="float" office:value="512.361111111111" calcext:value-type="float">
            <text:p><text:s/>512.36 </text:p>
          </table:table-cell>
          <table:table-cell table:style-name="ce138" table:formula="of:=+([.N17]+[.N17]/6)/12" office:value-type="float" office:value="512.361111111111" calcext:value-type="float">
            <text:p><text:s/>512.36 </text:p>
          </table:table-cell>
          <table:table-cell table:style-name="ce187" table:formula="of:=SUM([.C32:.N32])" office:value-type="float" office:value="6148.33333333333" calcext:value-type="float">
            <text:p><text:s/>6,148.33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8" table:formula="of:=+([.C18]+[.C18]/6)/12" office:value-type="float" office:value="512.361111111111" calcext:value-type="float">
            <text:p><text:s/>512.36 </text:p>
          </table:table-cell>
          <table:table-cell table:style-name="ce138" table:formula="of:=+([.D18]+[.D18]/6)/12" office:value-type="float" office:value="512.361111111111" calcext:value-type="float">
            <text:p><text:s/>512.36 </text:p>
          </table:table-cell>
          <table:table-cell table:style-name="ce138" table:formula="of:=+([.E18]+[.E18]/6)/12" office:value-type="float" office:value="512.361111111111" calcext:value-type="float">
            <text:p><text:s/>512.36 </text:p>
          </table:table-cell>
          <table:table-cell table:style-name="ce138" table:formula="of:=+([.F18]+[.F18]/6)/12" office:value-type="float" office:value="512.361111111111" calcext:value-type="float">
            <text:p><text:s/>512.36 </text:p>
          </table:table-cell>
          <table:table-cell table:style-name="ce138" table:formula="of:=+([.G18]+[.G18]/6)/12" office:value-type="float" office:value="512.361111111111" calcext:value-type="float">
            <text:p><text:s/>512.36 </text:p>
          </table:table-cell>
          <table:table-cell table:style-name="ce138" table:formula="of:=+([.H18]+[.H18]/6)/12" office:value-type="float" office:value="512.361111111111" calcext:value-type="float">
            <text:p><text:s/>512.36 </text:p>
          </table:table-cell>
          <table:table-cell table:style-name="ce138" table:formula="of:=+([.I18]+[.I18]/6)/12" office:value-type="float" office:value="512.361111111111" calcext:value-type="float">
            <text:p><text:s/>512.36 </text:p>
          </table:table-cell>
          <table:table-cell table:style-name="ce138" table:formula="of:=+([.J18]+[.J18]/6)/12" office:value-type="float" office:value="512.361111111111" calcext:value-type="float">
            <text:p><text:s/>512.36 </text:p>
          </table:table-cell>
          <table:table-cell table:style-name="ce138" table:formula="of:=+([.K18]+[.K18]/6)/12" office:value-type="float" office:value="512.361111111111" calcext:value-type="float">
            <text:p><text:s/>512.36 </text:p>
          </table:table-cell>
          <table:table-cell table:style-name="ce138" table:formula="of:=+([.L18]+[.L18]/6)/12" office:value-type="float" office:value="512.361111111111" calcext:value-type="float">
            <text:p><text:s/>512.36 </text:p>
          </table:table-cell>
          <table:table-cell table:style-name="ce138" table:formula="of:=+([.M18]+[.M18]/6)/12" office:value-type="float" office:value="512.361111111111" calcext:value-type="float">
            <text:p><text:s/>512.36 </text:p>
          </table:table-cell>
          <table:table-cell table:style-name="ce138" table:formula="of:=+([.N18]+[.N18]/6)/12" office:value-type="float" office:value="512.361111111111" calcext:value-type="float">
            <text:p><text:s/>512.36 </text:p>
          </table:table-cell>
          <table:table-cell table:style-name="ce187" table:formula="of:=SUM([.C33:.N33])" office:value-type="float" office:value="6148.33333333333" calcext:value-type="float">
            <text:p><text:s/>6,148.33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8" table:formula="of:=+([.C19]+[.C19]/6)/12" office:value-type="float" office:value="512.361111111111" calcext:value-type="float">
            <text:p><text:s/>512.36 </text:p>
          </table:table-cell>
          <table:table-cell table:style-name="ce138" table:formula="of:=+([.D19]+[.D19]/6)/12" office:value-type="float" office:value="512.361111111111" calcext:value-type="float">
            <text:p><text:s/>512.36 </text:p>
          </table:table-cell>
          <table:table-cell table:style-name="ce138" table:formula="of:=+([.E19]+[.E19]/6)/12" office:value-type="float" office:value="512.361111111111" calcext:value-type="float">
            <text:p><text:s/>512.36 </text:p>
          </table:table-cell>
          <table:table-cell table:style-name="ce138" table:formula="of:=+([.F19]+[.F19]/6)/12" office:value-type="float" office:value="512.361111111111" calcext:value-type="float">
            <text:p><text:s/>512.36 </text:p>
          </table:table-cell>
          <table:table-cell table:style-name="ce138" table:formula="of:=+([.G19]+[.G19]/6)/12" office:value-type="float" office:value="512.361111111111" calcext:value-type="float">
            <text:p><text:s/>512.36 </text:p>
          </table:table-cell>
          <table:table-cell table:style-name="ce138" table:formula="of:=+([.H19]+[.H19]/6)/12" office:value-type="float" office:value="512.361111111111" calcext:value-type="float">
            <text:p><text:s/>512.36 </text:p>
          </table:table-cell>
          <table:table-cell table:style-name="ce138" table:formula="of:=+([.I19]+[.I19]/6)/12" office:value-type="float" office:value="512.361111111111" calcext:value-type="float">
            <text:p><text:s/>512.36 </text:p>
          </table:table-cell>
          <table:table-cell table:style-name="ce138" table:formula="of:=+([.J19]+[.J19]/6)/12" office:value-type="float" office:value="512.361111111111" calcext:value-type="float">
            <text:p><text:s/>512.36 </text:p>
          </table:table-cell>
          <table:table-cell table:style-name="ce138" table:formula="of:=+([.K19]+[.K19]/6)/12" office:value-type="float" office:value="512.361111111111" calcext:value-type="float">
            <text:p><text:s/>512.36 </text:p>
          </table:table-cell>
          <table:table-cell table:style-name="ce138" table:formula="of:=+([.L19]+[.L19]/6)/12" office:value-type="float" office:value="512.361111111111" calcext:value-type="float">
            <text:p><text:s/>512.36 </text:p>
          </table:table-cell>
          <table:table-cell table:style-name="ce138" table:formula="of:=+([.M19]+[.M19]/6)/12" office:value-type="float" office:value="512.361111111111" calcext:value-type="float">
            <text:p><text:s/>512.36 </text:p>
          </table:table-cell>
          <table:table-cell table:style-name="ce138" table:formula="of:=+([.N19]+[.N19]/6)/12" office:value-type="float" office:value="512.361111111111" calcext:value-type="float">
            <text:p><text:s/>512.36 </text:p>
          </table:table-cell>
          <table:table-cell table:style-name="ce187" table:formula="of:=SUM([.C34:.N34])" office:value-type="float" office:value="6148.33333333333" calcext:value-type="float">
            <text:p><text:s/>6,148.33 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8" table:formula="of:=+([.C20]+[.C20]/6)/12" office:value-type="float" office:value="512.361111111111" calcext:value-type="float">
            <text:p><text:s/>512.36 </text:p>
          </table:table-cell>
          <table:table-cell table:style-name="ce138" table:formula="of:=+([.D20]+[.D20]/6)/12" office:value-type="float" office:value="512.361111111111" calcext:value-type="float">
            <text:p><text:s/>512.36 </text:p>
          </table:table-cell>
          <table:table-cell table:style-name="ce138" table:formula="of:=+([.E20]+[.E20]/6)/12" office:value-type="float" office:value="512.361111111111" calcext:value-type="float">
            <text:p><text:s/>512.36 </text:p>
          </table:table-cell>
          <table:table-cell table:style-name="ce138" table:formula="of:=+([.F20]+[.F20]/6)/12" office:value-type="float" office:value="512.361111111111" calcext:value-type="float">
            <text:p><text:s/>512.36 </text:p>
          </table:table-cell>
          <table:table-cell table:style-name="ce138" table:formula="of:=+([.G20]+[.G20]/6)/12" office:value-type="float" office:value="512.361111111111" calcext:value-type="float">
            <text:p><text:s/>512.36 </text:p>
          </table:table-cell>
          <table:table-cell table:style-name="ce138" table:formula="of:=+([.H20]+[.H20]/6)/12" office:value-type="float" office:value="512.361111111111" calcext:value-type="float">
            <text:p><text:s/>512.36 </text:p>
          </table:table-cell>
          <table:table-cell table:style-name="ce138" table:formula="of:=+([.I20]+[.I20]/6)/12" office:value-type="float" office:value="512.361111111111" calcext:value-type="float">
            <text:p><text:s/>512.36 </text:p>
          </table:table-cell>
          <table:table-cell table:style-name="ce138" table:formula="of:=+([.J20]+[.J20]/6)/12" office:value-type="float" office:value="512.361111111111" calcext:value-type="float">
            <text:p><text:s/>512.36 </text:p>
          </table:table-cell>
          <table:table-cell table:style-name="ce138" table:formula="of:=+([.K20]+[.K20]/6)/12" office:value-type="float" office:value="512.361111111111" calcext:value-type="float">
            <text:p><text:s/>512.36 </text:p>
          </table:table-cell>
          <table:table-cell table:style-name="ce138" table:formula="of:=+([.L20]+[.L20]/6)/12" office:value-type="float" office:value="512.361111111111" calcext:value-type="float">
            <text:p><text:s/>512.36 </text:p>
          </table:table-cell>
          <table:table-cell table:style-name="ce138" table:formula="of:=+([.M20]+[.M20]/6)/12" office:value-type="float" office:value="512.361111111111" calcext:value-type="float">
            <text:p><text:s/>512.36 </text:p>
          </table:table-cell>
          <table:table-cell table:style-name="ce138" table:formula="of:=+([.N20]+[.N20]/6)/12" office:value-type="float" office:value="512.361111111111" calcext:value-type="float">
            <text:p><text:s/>512.36 </text:p>
          </table:table-cell>
          <table:table-cell table:style-name="ce187" table:formula="of:=SUM([.C35:.N35])" office:value-type="float" office:value="6148.33333333333" calcext:value-type="float">
            <text:p><text:s/>6,148.33 </text:p>
          </table:table-cell>
          <table:table-cell table:number-columns-repeated="16369"/>
        </table:table-row>
        <table:table-row table:style-name="ro1">
          <table:table-cell/>
          <table:table-cell table:style-name="Default"/>
          <table:table-cell table:style-name="ce122" table:number-columns-repeated="12"/>
          <table:table-cell table:number-columns-repeated="16370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ESSALUD</text:p>
          </table:table-cell>
          <table:table-cell table:style-name="ce181" office:value-type="string" calcext:value-type="string">
            <text:p>Año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8" table:formula="of:=+[.C16]*0.09" office:value-type="float" office:value="167.4" calcext:value-type="float">
            <text:p>167.4</text:p>
          </table:table-cell>
          <table:table-cell table:style-name="ce128" table:formula="of:=+[.D16]*0.09" office:value-type="float" office:value="195.3" calcext:value-type="float">
            <text:p>195.3</text:p>
          </table:table-cell>
          <table:table-cell table:style-name="ce128" table:formula="of:=+[.E16]*0.09" office:value-type="float" office:value="223.2" calcext:value-type="float">
            <text:p>223.2</text:p>
          </table:table-cell>
          <table:table-cell table:style-name="ce128" table:formula="of:=+[.F16]*0.09" office:value-type="float" office:value="251.1" calcext:value-type="float">
            <text:p>251.1</text:p>
          </table:table-cell>
          <table:table-cell table:style-name="ce128" table:formula="of:=+[.G16]*0.09" office:value-type="float" office:value="279" calcext:value-type="float">
            <text:p>279</text:p>
          </table:table-cell>
          <table:table-cell table:style-name="ce128" table:formula="of:=+[.H16]*0.09" office:value-type="float" office:value="306.9" calcext:value-type="float">
            <text:p>306.9</text:p>
          </table:table-cell>
          <table:table-cell table:style-name="ce128" table:formula="of:=+[.I16]*0.09" office:value-type="float" office:value="334.8" calcext:value-type="float">
            <text:p>334.8</text:p>
          </table:table-cell>
          <table:table-cell table:style-name="ce128" table:formula="of:=+[.J16]*0.09" office:value-type="float" office:value="362.7" calcext:value-type="float">
            <text:p>362.7</text:p>
          </table:table-cell>
          <table:table-cell table:style-name="ce128" table:formula="of:=+[.K16]*0.09" office:value-type="float" office:value="390.6" calcext:value-type="float">
            <text:p>390.6</text:p>
          </table:table-cell>
          <table:table-cell table:style-name="ce128" table:formula="of:=+[.L16]*0.09" office:value-type="float" office:value="418.5" calcext:value-type="float">
            <text:p>418.5</text:p>
          </table:table-cell>
          <table:table-cell table:style-name="ce128" table:formula="of:=+[.M16]*0.09" office:value-type="float" office:value="446.4" calcext:value-type="float">
            <text:p>446.4</text:p>
          </table:table-cell>
          <table:table-cell table:style-name="ce128" table:formula="of:=+[.N16]*0.09" office:value-type="float" office:value="474.3" calcext:value-type="float">
            <text:p>474.3</text:p>
          </table:table-cell>
          <table:table-cell table:style-name="ce188" table:formula="of:=+[.O16]*0.09" office:value-type="float" office:value="3850.29" calcext:value-type="float">
            <text:p>3850.2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8" table:formula="of:=+[.C17]*0.09" office:value-type="float" office:value="474.3" calcext:value-type="float">
            <text:p>474.3</text:p>
          </table:table-cell>
          <table:table-cell table:style-name="ce128" table:formula="of:=+[.D17]*0.09" office:value-type="float" office:value="474.3" calcext:value-type="float">
            <text:p>474.3</text:p>
          </table:table-cell>
          <table:table-cell table:style-name="ce128" table:formula="of:=+[.E17]*0.09" office:value-type="float" office:value="474.3" calcext:value-type="float">
            <text:p>474.3</text:p>
          </table:table-cell>
          <table:table-cell table:style-name="ce128" table:formula="of:=+[.F17]*0.09" office:value-type="float" office:value="474.3" calcext:value-type="float">
            <text:p>474.3</text:p>
          </table:table-cell>
          <table:table-cell table:style-name="ce128" table:formula="of:=+[.G17]*0.09" office:value-type="float" office:value="474.3" calcext:value-type="float">
            <text:p>474.3</text:p>
          </table:table-cell>
          <table:table-cell table:style-name="ce128" table:formula="of:=+[.H17]*0.09" office:value-type="float" office:value="474.3" calcext:value-type="float">
            <text:p>474.3</text:p>
          </table:table-cell>
          <table:table-cell table:style-name="ce128" table:formula="of:=+[.I17]*0.09" office:value-type="float" office:value="474.3" calcext:value-type="float">
            <text:p>474.3</text:p>
          </table:table-cell>
          <table:table-cell table:style-name="ce128" table:formula="of:=+[.J17]*0.09" office:value-type="float" office:value="474.3" calcext:value-type="float">
            <text:p>474.3</text:p>
          </table:table-cell>
          <table:table-cell table:style-name="ce128" table:formula="of:=+[.K17]*0.09" office:value-type="float" office:value="474.3" calcext:value-type="float">
            <text:p>474.3</text:p>
          </table:table-cell>
          <table:table-cell table:style-name="ce128" table:formula="of:=+[.L17]*0.09" office:value-type="float" office:value="474.3" calcext:value-type="float">
            <text:p>474.3</text:p>
          </table:table-cell>
          <table:table-cell table:style-name="ce128" table:formula="of:=+[.M17]*0.09" office:value-type="float" office:value="474.3" calcext:value-type="float">
            <text:p>474.3</text:p>
          </table:table-cell>
          <table:table-cell table:style-name="ce128" table:formula="of:=+[.N17]*0.09" office:value-type="float" office:value="474.3" calcext:value-type="float">
            <text:p>474.3</text:p>
          </table:table-cell>
          <table:table-cell table:style-name="ce188" table:formula="of:=+[.O17]*0.09" office:value-type="float" office:value="5691.78" calcext:value-type="float">
            <text:p>5691.7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8" table:formula="of:=+[.C18]*0.09" office:value-type="float" office:value="474.3" calcext:value-type="float">
            <text:p>474.3</text:p>
          </table:table-cell>
          <table:table-cell table:style-name="ce128" table:formula="of:=+[.D18]*0.09" office:value-type="float" office:value="474.3" calcext:value-type="float">
            <text:p>474.3</text:p>
          </table:table-cell>
          <table:table-cell table:style-name="ce128" table:formula="of:=+[.E18]*0.09" office:value-type="float" office:value="474.3" calcext:value-type="float">
            <text:p>474.3</text:p>
          </table:table-cell>
          <table:table-cell table:style-name="ce128" table:formula="of:=+[.F18]*0.09" office:value-type="float" office:value="474.3" calcext:value-type="float">
            <text:p>474.3</text:p>
          </table:table-cell>
          <table:table-cell table:style-name="ce128" table:formula="of:=+[.G18]*0.09" office:value-type="float" office:value="474.3" calcext:value-type="float">
            <text:p>474.3</text:p>
          </table:table-cell>
          <table:table-cell table:style-name="ce128" table:formula="of:=+[.H18]*0.09" office:value-type="float" office:value="474.3" calcext:value-type="float">
            <text:p>474.3</text:p>
          </table:table-cell>
          <table:table-cell table:style-name="ce128" table:formula="of:=+[.I18]*0.09" office:value-type="float" office:value="474.3" calcext:value-type="float">
            <text:p>474.3</text:p>
          </table:table-cell>
          <table:table-cell table:style-name="ce128" table:formula="of:=+[.J18]*0.09" office:value-type="float" office:value="474.3" calcext:value-type="float">
            <text:p>474.3</text:p>
          </table:table-cell>
          <table:table-cell table:style-name="ce128" table:formula="of:=+[.K18]*0.09" office:value-type="float" office:value="474.3" calcext:value-type="float">
            <text:p>474.3</text:p>
          </table:table-cell>
          <table:table-cell table:style-name="ce128" table:formula="of:=+[.L18]*0.09" office:value-type="float" office:value="474.3" calcext:value-type="float">
            <text:p>474.3</text:p>
          </table:table-cell>
          <table:table-cell table:style-name="ce128" table:formula="of:=+[.M18]*0.09" office:value-type="float" office:value="474.3" calcext:value-type="float">
            <text:p>474.3</text:p>
          </table:table-cell>
          <table:table-cell table:style-name="ce128" table:formula="of:=+[.N18]*0.09" office:value-type="float" office:value="474.3" calcext:value-type="float">
            <text:p>474.3</text:p>
          </table:table-cell>
          <table:table-cell table:style-name="ce188" table:formula="of:=+[.O18]*0.09" office:value-type="float" office:value="5691.87" calcext:value-type="float">
            <text:p>5691.8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8" table:formula="of:=+[.C19]*0.09" office:value-type="float" office:value="474.3" calcext:value-type="float">
            <text:p>474.3</text:p>
          </table:table-cell>
          <table:table-cell table:style-name="ce128" table:formula="of:=+[.D19]*0.09" office:value-type="float" office:value="474.3" calcext:value-type="float">
            <text:p>474.3</text:p>
          </table:table-cell>
          <table:table-cell table:style-name="ce128" table:formula="of:=+[.E19]*0.09" office:value-type="float" office:value="474.3" calcext:value-type="float">
            <text:p>474.3</text:p>
          </table:table-cell>
          <table:table-cell table:style-name="ce128" table:formula="of:=+[.F19]*0.09" office:value-type="float" office:value="474.3" calcext:value-type="float">
            <text:p>474.3</text:p>
          </table:table-cell>
          <table:table-cell table:style-name="ce128" table:formula="of:=+[.G19]*0.09" office:value-type="float" office:value="474.3" calcext:value-type="float">
            <text:p>474.3</text:p>
          </table:table-cell>
          <table:table-cell table:style-name="ce128" table:formula="of:=+[.H19]*0.09" office:value-type="float" office:value="474.3" calcext:value-type="float">
            <text:p>474.3</text:p>
          </table:table-cell>
          <table:table-cell table:style-name="ce128" table:formula="of:=+[.I19]*0.09" office:value-type="float" office:value="474.3" calcext:value-type="float">
            <text:p>474.3</text:p>
          </table:table-cell>
          <table:table-cell table:style-name="ce128" table:formula="of:=+[.J19]*0.09" office:value-type="float" office:value="474.3" calcext:value-type="float">
            <text:p>474.3</text:p>
          </table:table-cell>
          <table:table-cell table:style-name="ce128" table:formula="of:=+[.K19]*0.09" office:value-type="float" office:value="474.3" calcext:value-type="float">
            <text:p>474.3</text:p>
          </table:table-cell>
          <table:table-cell table:style-name="ce128" table:formula="of:=+[.L19]*0.09" office:value-type="float" office:value="474.3" calcext:value-type="float">
            <text:p>474.3</text:p>
          </table:table-cell>
          <table:table-cell table:style-name="ce128" table:formula="of:=+[.M19]*0.09" office:value-type="float" office:value="474.3" calcext:value-type="float">
            <text:p>474.3</text:p>
          </table:table-cell>
          <table:table-cell table:style-name="ce128" table:formula="of:=+[.N19]*0.09" office:value-type="float" office:value="474.3" calcext:value-type="float">
            <text:p>474.3</text:p>
          </table:table-cell>
          <table:table-cell table:style-name="ce188" table:formula="of:=+[.O19]*0.09" office:value-type="float" office:value="5691.96" calcext:value-type="float">
            <text:p>5691.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8" table:formula="of:=+[.C20]*0.09" office:value-type="float" office:value="474.3" calcext:value-type="float">
            <text:p>474.3</text:p>
          </table:table-cell>
          <table:table-cell table:style-name="ce128" table:formula="of:=+[.D20]*0.09" office:value-type="float" office:value="474.3" calcext:value-type="float">
            <text:p>474.3</text:p>
          </table:table-cell>
          <table:table-cell table:style-name="ce128" table:formula="of:=+[.E20]*0.09" office:value-type="float" office:value="474.3" calcext:value-type="float">
            <text:p>474.3</text:p>
          </table:table-cell>
          <table:table-cell table:style-name="ce128" table:formula="of:=+[.F20]*0.09" office:value-type="float" office:value="474.3" calcext:value-type="float">
            <text:p>474.3</text:p>
          </table:table-cell>
          <table:table-cell table:style-name="ce128" table:formula="of:=+[.G20]*0.09" office:value-type="float" office:value="474.3" calcext:value-type="float">
            <text:p>474.3</text:p>
          </table:table-cell>
          <table:table-cell table:style-name="ce128" table:formula="of:=+[.H20]*0.09" office:value-type="float" office:value="474.3" calcext:value-type="float">
            <text:p>474.3</text:p>
          </table:table-cell>
          <table:table-cell table:style-name="ce128" table:formula="of:=+[.I20]*0.09" office:value-type="float" office:value="474.3" calcext:value-type="float">
            <text:p>474.3</text:p>
          </table:table-cell>
          <table:table-cell table:style-name="ce128" table:formula="of:=+[.J20]*0.09" office:value-type="float" office:value="474.3" calcext:value-type="float">
            <text:p>474.3</text:p>
          </table:table-cell>
          <table:table-cell table:style-name="ce128" table:formula="of:=+[.K20]*0.09" office:value-type="float" office:value="474.3" calcext:value-type="float">
            <text:p>474.3</text:p>
          </table:table-cell>
          <table:table-cell table:style-name="ce128" table:formula="of:=+[.L20]*0.09" office:value-type="float" office:value="474.3" calcext:value-type="float">
            <text:p>474.3</text:p>
          </table:table-cell>
          <table:table-cell table:style-name="ce128" table:formula="of:=+[.M20]*0.09" office:value-type="float" office:value="474.3" calcext:value-type="float">
            <text:p>474.3</text:p>
          </table:table-cell>
          <table:table-cell table:style-name="ce128" table:formula="of:=+[.N20]*0.09" office:value-type="float" office:value="474.3" calcext:value-type="float">
            <text:p>474.3</text:p>
          </table:table-cell>
          <table:table-cell table:style-name="ce188" table:formula="of:=+[.O20]*0.09" office:value-type="float" office:value="5692.05" calcext:value-type="float">
            <text:p>5692.05</text:p>
          </table:table-cell>
          <table:table-cell table:number-columns-repeated="16369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81" office:value-type="string" calcext:value-type="string">
            <text:p>Año</text:p>
          </table:table-cell>
          <table:table-cell table:number-columns-repeated="12"/>
          <table:table-cell table:style-name="ce152"/>
          <table:table-cell table:number-columns-repeated="1636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4" table:formula="of:=+[.C16]+[.C23]+[.C31]+[.C40]" office:value-type="float" office:value="2518.23333333333" calcext:value-type="float">
            <text:p><text:s/>2,518.23 </text:p>
          </table:table-cell>
          <table:table-cell table:style-name="ce164" table:formula="of:=+[.D16]+[.D23]+[.D31]+[.D40]" office:value-type="float" office:value="2937.93888888889" calcext:value-type="float">
            <text:p><text:s/>2,937.94 </text:p>
          </table:table-cell>
          <table:table-cell table:style-name="ce164" table:formula="of:=+[.E16]+[.E23]+[.E31]+[.E40]" office:value-type="float" office:value="3357.64444444444" calcext:value-type="float">
            <text:p><text:s/>3,357.64 </text:p>
          </table:table-cell>
          <table:table-cell table:style-name="ce164" table:formula="of:=+[.F16]+[.F23]+[.F31]+[.F40]" office:value-type="float" office:value="3777.35" calcext:value-type="float">
            <text:p><text:s/>3,777.35 </text:p>
          </table:table-cell>
          <table:table-cell table:style-name="ce164" table:formula="of:=+[.G16]+[.G23]+[.G31]+[.G40]" office:value-type="float" office:value="4197.05555555556" calcext:value-type="float">
            <text:p><text:s/>4,197.06 </text:p>
          </table:table-cell>
          <table:table-cell table:style-name="ce164" table:formula="of:=+[.H16]+[.H23]+[.H31]+[.H40]" office:value-type="float" office:value="4616.76111111111" calcext:value-type="float">
            <text:p><text:s/>4,616.76 </text:p>
          </table:table-cell>
          <table:table-cell table:style-name="ce164" table:formula="of:=+[.I16]+[.I23]+[.I31]+[.I40]" office:value-type="float" office:value="5036.46666666667" calcext:value-type="float">
            <text:p><text:s/>5,036.47 </text:p>
          </table:table-cell>
          <table:table-cell table:style-name="ce164" table:formula="of:=+[.J16]+[.J23]+[.J31]+[.J40]" office:value-type="float" office:value="5456.17222222222" calcext:value-type="float">
            <text:p><text:s/>5,456.17 </text:p>
          </table:table-cell>
          <table:table-cell table:style-name="ce164" table:formula="of:=+[.K16]+[.K23]+[.K31]+[.K40]" office:value-type="float" office:value="5875.87777777778" calcext:value-type="float">
            <text:p><text:s/>5,875.88 </text:p>
          </table:table-cell>
          <table:table-cell table:style-name="ce164" table:formula="of:=+[.L16]+[.L23]+[.L31]+[.L40]" office:value-type="float" office:value="6295.58333333333" calcext:value-type="float">
            <text:p><text:s/>6,295.58 </text:p>
          </table:table-cell>
          <table:table-cell table:style-name="ce164" table:formula="of:=+[.M16]+[.M23]+[.M31]+[.M40]" office:value-type="float" office:value="6715.28888888889" calcext:value-type="float">
            <text:p><text:s/>6,715.29 </text:p>
          </table:table-cell>
          <table:table-cell table:style-name="ce164" table:formula="of:=+[.N16]+[.N23]+[.N31]+[.N40]" office:value-type="float" office:value="7134.99444444444" calcext:value-type="float">
            <text:p><text:s/>7,134.99 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4" table:formula="of:=+[.C17]+[.C24]+[.C32]+[.C41]" office:value-type="float" office:value="7134.99444444444" calcext:value-type="float">
            <text:p><text:s/>7,134.99 </text:p>
          </table:table-cell>
          <table:table-cell table:style-name="ce164" table:formula="of:=+[.D17]+[.D24]+[.D32]+[.D41]" office:value-type="float" office:value="7134.99444444444" calcext:value-type="float">
            <text:p><text:s/>7,134.99 </text:p>
          </table:table-cell>
          <table:table-cell table:style-name="ce164" table:formula="of:=+[.E17]+[.E24]+[.E32]+[.E41]" office:value-type="float" office:value="7134.99444444444" calcext:value-type="float">
            <text:p><text:s/>7,134.99 </text:p>
          </table:table-cell>
          <table:table-cell table:style-name="ce164" table:formula="of:=+[.F17]+[.F24]+[.F32]+[.F41]" office:value-type="float" office:value="7134.99444444444" calcext:value-type="float">
            <text:p><text:s/>7,134.99 </text:p>
          </table:table-cell>
          <table:table-cell table:style-name="ce164" table:formula="of:=+[.G17]+[.G24]+[.G32]+[.G41]" office:value-type="float" office:value="7134.99444444444" calcext:value-type="float">
            <text:p><text:s/>7,134.99 </text:p>
          </table:table-cell>
          <table:table-cell table:style-name="ce164" table:formula="of:=+[.H17]+[.H24]+[.H32]+[.H41]" office:value-type="float" office:value="7134.99444444444" calcext:value-type="float">
            <text:p><text:s/>7,134.99 </text:p>
          </table:table-cell>
          <table:table-cell table:style-name="ce164" table:formula="of:=+[.I17]+[.I24]+[.I32]+[.I41]" office:value-type="float" office:value="7134.99444444444" calcext:value-type="float">
            <text:p><text:s/>7,134.99 </text:p>
          </table:table-cell>
          <table:table-cell table:style-name="ce164" table:formula="of:=+[.J17]+[.J24]+[.J32]+[.J41]" office:value-type="float" office:value="7134.99444444444" calcext:value-type="float">
            <text:p><text:s/>7,134.99 </text:p>
          </table:table-cell>
          <table:table-cell table:style-name="ce164" table:formula="of:=+[.K17]+[.K24]+[.K32]+[.K41]" office:value-type="float" office:value="7134.99444444444" calcext:value-type="float">
            <text:p><text:s/>7,134.99 </text:p>
          </table:table-cell>
          <table:table-cell table:style-name="ce164" table:formula="of:=+[.L17]+[.L24]+[.L32]+[.L41]" office:value-type="float" office:value="7134.99444444444" calcext:value-type="float">
            <text:p><text:s/>7,134.99 </text:p>
          </table:table-cell>
          <table:table-cell table:style-name="ce164" table:formula="of:=+[.M17]+[.M24]+[.M32]+[.M41]" office:value-type="float" office:value="7134.99444444444" calcext:value-type="float">
            <text:p><text:s/>7,134.99 </text:p>
          </table:table-cell>
          <table:table-cell table:style-name="ce164" table:formula="of:=+[.N17]+[.N24]+[.N32]+[.N41]" office:value-type="float" office:value="7134.99444444444" calcext:value-type="float">
            <text:p><text:s/>7,134.99 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4" table:formula="of:=+[.C18]+[.C25]+[.C33]+[.C42]" office:value-type="float" office:value="7134.99444444444" calcext:value-type="float">
            <text:p><text:s/>7,134.99 </text:p>
          </table:table-cell>
          <table:table-cell table:style-name="ce164" table:formula="of:=+[.D18]+[.D25]+[.D33]+[.D42]" office:value-type="float" office:value="7134.99444444444" calcext:value-type="float">
            <text:p><text:s/>7,134.99 </text:p>
          </table:table-cell>
          <table:table-cell table:style-name="ce164" table:formula="of:=+[.E18]+[.E25]+[.E33]+[.E42]" office:value-type="float" office:value="7134.99444444444" calcext:value-type="float">
            <text:p><text:s/>7,134.99 </text:p>
          </table:table-cell>
          <table:table-cell table:style-name="ce164" table:formula="of:=+[.F18]+[.F25]+[.F33]+[.F42]" office:value-type="float" office:value="7134.99444444444" calcext:value-type="float">
            <text:p><text:s/>7,134.99 </text:p>
          </table:table-cell>
          <table:table-cell table:style-name="ce164" table:formula="of:=+[.G18]+[.G25]+[.G33]+[.G42]" office:value-type="float" office:value="7134.99444444444" calcext:value-type="float">
            <text:p><text:s/>7,134.99 </text:p>
          </table:table-cell>
          <table:table-cell table:style-name="ce164" table:formula="of:=+[.H18]+[.H25]+[.H33]+[.H42]" office:value-type="float" office:value="7134.99444444444" calcext:value-type="float">
            <text:p><text:s/>7,134.99 </text:p>
          </table:table-cell>
          <table:table-cell table:style-name="ce164" table:formula="of:=+[.I18]+[.I25]+[.I33]+[.I42]" office:value-type="float" office:value="7134.99444444444" calcext:value-type="float">
            <text:p><text:s/>7,134.99 </text:p>
          </table:table-cell>
          <table:table-cell table:style-name="ce164" table:formula="of:=+[.J18]+[.J25]+[.J33]+[.J42]" office:value-type="float" office:value="7134.99444444444" calcext:value-type="float">
            <text:p><text:s/>7,134.99 </text:p>
          </table:table-cell>
          <table:table-cell table:style-name="ce164" table:formula="of:=+[.K18]+[.K25]+[.K33]+[.K42]" office:value-type="float" office:value="7134.99444444444" calcext:value-type="float">
            <text:p><text:s/>7,134.99 </text:p>
          </table:table-cell>
          <table:table-cell table:style-name="ce164" table:formula="of:=+[.L18]+[.L25]+[.L33]+[.L42]" office:value-type="float" office:value="7134.99444444444" calcext:value-type="float">
            <text:p><text:s/>7,134.99 </text:p>
          </table:table-cell>
          <table:table-cell table:style-name="ce164" table:formula="of:=+[.M18]+[.M25]+[.M33]+[.M42]" office:value-type="float" office:value="7134.99444444444" calcext:value-type="float">
            <text:p><text:s/>7,134.99 </text:p>
          </table:table-cell>
          <table:table-cell table:style-name="ce164" table:formula="of:=+[.N18]+[.N25]+[.N33]+[.N42]" office:value-type="float" office:value="7134.99444444444" calcext:value-type="float">
            <text:p><text:s/>7,134.99 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64" table:formula="of:=+[.C19]+[.C26]+[.C34]+[.C43]" office:value-type="float" office:value="7134.99444444444" calcext:value-type="float">
            <text:p><text:s/>7,134.99 </text:p>
          </table:table-cell>
          <table:table-cell table:style-name="ce164" table:formula="of:=+[.D19]+[.D26]+[.D34]+[.D43]" office:value-type="float" office:value="7134.99444444444" calcext:value-type="float">
            <text:p><text:s/>7,134.99 </text:p>
          </table:table-cell>
          <table:table-cell table:style-name="ce164" table:formula="of:=+[.E19]+[.E26]+[.E34]+[.E43]" office:value-type="float" office:value="7134.99444444444" calcext:value-type="float">
            <text:p><text:s/>7,134.99 </text:p>
          </table:table-cell>
          <table:table-cell table:style-name="ce164" table:formula="of:=+[.F19]+[.F26]+[.F34]+[.F43]" office:value-type="float" office:value="7134.99444444444" calcext:value-type="float">
            <text:p><text:s/>7,134.99 </text:p>
          </table:table-cell>
          <table:table-cell table:style-name="ce164" table:formula="of:=+[.G19]+[.G26]+[.G34]+[.G43]" office:value-type="float" office:value="7134.99444444444" calcext:value-type="float">
            <text:p><text:s/>7,134.99 </text:p>
          </table:table-cell>
          <table:table-cell table:style-name="ce164" table:formula="of:=+[.H19]+[.H26]+[.H34]+[.H43]" office:value-type="float" office:value="7134.99444444444" calcext:value-type="float">
            <text:p><text:s/>7,134.99 </text:p>
          </table:table-cell>
          <table:table-cell table:style-name="ce164" table:formula="of:=+[.I19]+[.I26]+[.I34]+[.I43]" office:value-type="float" office:value="7134.99444444444" calcext:value-type="float">
            <text:p><text:s/>7,134.99 </text:p>
          </table:table-cell>
          <table:table-cell table:style-name="ce164" table:formula="of:=+[.J19]+[.J26]+[.J34]+[.J43]" office:value-type="float" office:value="7134.99444444444" calcext:value-type="float">
            <text:p><text:s/>7,134.99 </text:p>
          </table:table-cell>
          <table:table-cell table:style-name="ce164" table:formula="of:=+[.K19]+[.K26]+[.K34]+[.K43]" office:value-type="float" office:value="7134.99444444444" calcext:value-type="float">
            <text:p><text:s/>7,134.99 </text:p>
          </table:table-cell>
          <table:table-cell table:style-name="ce164" table:formula="of:=+[.L19]+[.L26]+[.L34]+[.L43]" office:value-type="float" office:value="7134.99444444444" calcext:value-type="float">
            <text:p><text:s/>7,134.99 </text:p>
          </table:table-cell>
          <table:table-cell table:style-name="ce164" table:formula="of:=+[.M19]+[.M26]+[.M34]+[.M43]" office:value-type="float" office:value="7134.99444444444" calcext:value-type="float">
            <text:p><text:s/>7,134.99 </text:p>
          </table:table-cell>
          <table:table-cell table:style-name="ce164" table:formula="of:=+[.N19]+[.N26]+[.N34]+[.N43]" office:value-type="float" office:value="7134.99444444444" calcext:value-type="float">
            <text:p><text:s/>7,134.99 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4" table:formula="of:=+[.C20]+[.C27]+[.C35]+[.C44]" office:value-type="float" office:value="7134.99444444444" calcext:value-type="float">
            <text:p><text:s/>7,134.99 </text:p>
          </table:table-cell>
          <table:table-cell table:style-name="ce164" table:formula="of:=+[.D20]+[.D27]+[.D35]+[.D44]" office:value-type="float" office:value="7134.99444444444" calcext:value-type="float">
            <text:p><text:s/>7,134.99 </text:p>
          </table:table-cell>
          <table:table-cell table:style-name="ce164" table:formula="of:=+[.E20]+[.E27]+[.E35]+[.E44]" office:value-type="float" office:value="7134.99444444444" calcext:value-type="float">
            <text:p><text:s/>7,134.99 </text:p>
          </table:table-cell>
          <table:table-cell table:style-name="ce164" table:formula="of:=+[.F20]+[.F27]+[.F35]+[.F44]" office:value-type="float" office:value="7134.99444444444" calcext:value-type="float">
            <text:p><text:s/>7,134.99 </text:p>
          </table:table-cell>
          <table:table-cell table:style-name="ce164" table:formula="of:=+[.G20]+[.G27]+[.G35]+[.G44]" office:value-type="float" office:value="7134.99444444444" calcext:value-type="float">
            <text:p><text:s/>7,134.99 </text:p>
          </table:table-cell>
          <table:table-cell table:style-name="ce164" table:formula="of:=+[.H20]+[.H27]+[.H35]+[.H44]" office:value-type="float" office:value="7134.99444444444" calcext:value-type="float">
            <text:p><text:s/>7,134.99 </text:p>
          </table:table-cell>
          <table:table-cell table:style-name="ce164" table:formula="of:=+[.I20]+[.I27]+[.I35]+[.I44]" office:value-type="float" office:value="7134.99444444444" calcext:value-type="float">
            <text:p><text:s/>7,134.99 </text:p>
          </table:table-cell>
          <table:table-cell table:style-name="ce164" table:formula="of:=+[.J20]+[.J27]+[.J35]+[.J44]" office:value-type="float" office:value="7134.99444444444" calcext:value-type="float">
            <text:p><text:s/>7,134.99 </text:p>
          </table:table-cell>
          <table:table-cell table:style-name="ce164" table:formula="of:=+[.K20]+[.K27]+[.K35]+[.K44]" office:value-type="float" office:value="7134.99444444444" calcext:value-type="float">
            <text:p><text:s/>7,134.99 </text:p>
          </table:table-cell>
          <table:table-cell table:style-name="ce164" table:formula="of:=+[.L20]+[.L27]+[.L35]+[.L44]" office:value-type="float" office:value="7134.99444444444" calcext:value-type="float">
            <text:p><text:s/>7,134.99 </text:p>
          </table:table-cell>
          <table:table-cell table:style-name="ce164" table:formula="of:=+[.M20]+[.M27]+[.M35]+[.M44]" office:value-type="float" office:value="7134.99444444444" calcext:value-type="float">
            <text:p><text:s/>7,134.99 </text:p>
          </table:table-cell>
          <table:table-cell table:style-name="ce164" table:formula="of:=+[.N20]+[.N27]+[.N35]+[.N44]" office:value-type="float" office:value="7134.99444444444" calcext:value-type="float">
            <text:p><text:s/>7,134.99 </text:p>
          </table:table-cell>
          <table:table-cell table:number-columns-repeated="16370"/>
        </table:table-row>
      </table:table>
      <table:table table:name="Planilla" table:style-name="ta10">
        <table:table-column table:style-name="co52" table:default-cell-style-name="ce32"/>
        <table:table-column table:style-name="co53" table:default-cell-style-name="ce32"/>
        <table:table-column table:style-name="co32" table:default-cell-style-name="ce32"/>
        <table:table-column table:style-name="co33" table:default-cell-style-name="ce32"/>
        <table:table-column table:style-name="co38" table:number-columns-repeated="2" table:default-cell-style-name="ce32"/>
        <table:table-column table:style-name="co3" table:default-cell-style-name="ce32"/>
        <table:table-column table:style-name="co51" table:default-cell-style-name="ce32"/>
        <table:table-column table:style-name="co27" table:default-cell-style-name="ce32"/>
        <table:table-column table:style-name="co16" table:default-cell-style-name="ce32"/>
        <table:table-column table:style-name="co54" table:default-cell-style-name="ce32"/>
        <table:table-column table:style-name="co55" table:default-cell-style-name="ce32"/>
        <table:table-column table:style-name="co9" table:default-cell-style-name="ce32"/>
        <table:table-column table:style-name="co21" table:default-cell-style-name="ce32"/>
        <table:table-column table:style-name="co46" table:default-cell-style-name="ce32"/>
        <table:table-column table:style-name="co9" table:default-cell-style-name="ce32"/>
        <table:table-column table:style-name="co56" table:default-cell-style-name="ce32"/>
        <table:table-column table:style-name="co57" table:default-cell-style-name="ce32"/>
        <table:table-column table:style-name="co16" table:default-cell-style-name="ce32"/>
        <table:table-column table:style-name="co4" table:default-cell-style-name="ce32"/>
        <table:table-column table:style-name="co9" table:default-cell-style-name="ce32"/>
        <table:table-column table:style-name="co34" table:default-cell-style-name="ce32"/>
        <table:table-column table:style-name="co37" table:default-cell-style-name="ce32"/>
        <table:table-column table:style-name="co56" table:default-cell-style-name="ce32"/>
        <table:table-column table:style-name="co2" table:default-cell-style-name="ce32"/>
        <table:table-column table:style-name="co57" table:default-cell-style-name="ce32"/>
        <table:table-column table:style-name="co10" table:default-cell-style-name="ce32"/>
        <table:table-column table:style-name="co58" table:default-cell-style-name="ce32"/>
        <table:table-column table:style-name="co59" table:default-cell-style-name="ce32"/>
        <table:table-column table:style-name="co10" table:number-columns-repeated="16355" table:default-cell-style-name="ce32"/>
        <table:table-row table:style-name="ro5">
          <table:table-cell table:style-name="ce190" table:number-columns-repeated="26"/>
          <table:table-cell table:number-columns-repeated="16358"/>
        </table:table-row>
        <table:table-row table:style-name="ro9">
          <table:table-cell table:style-name="ce190"/>
          <table:table-cell table:style-name="ce191" office:value-type="string" calcext:value-type="string" table:number-columns-spanned="8" table:number-rows-spanned="1">
            <text:p>PRESUPUESTO ANUAL DE REMUNERACIONES</text:p>
          </table:table-cell>
          <table:covered-table-cell table:number-columns-repeated="7" table:style-name="ce208"/>
          <table:table-cell table:style-name="ce190"/>
          <table:table-cell table:style-name="ce191" office:value-type="string" calcext:value-type="string" table:number-columns-spanned="8" table:number-rows-spanned="1">
            <text:p>PRESUPUESTO ANUAL DE REMUNERACIONES</text:p>
          </table:table-cell>
          <table:covered-table-cell table:number-columns-repeated="7" table:style-name="ce208"/>
          <table:table-cell table:style-name="ce190"/>
          <table:table-cell table:style-name="ce191" office:value-type="string" calcext:value-type="string" table:number-columns-spanned="8" table:number-rows-spanned="1">
            <text:p>PRESUPUESTO ANUAL DE REMUNERACIONES</text:p>
          </table:table-cell>
          <table:covered-table-cell table:number-columns-repeated="7" table:style-name="ce208"/>
          <table:table-cell/>
          <table:table-cell table:style-name="ce191" office:value-type="string" calcext:value-type="string" table:number-columns-spanned="8" table:number-rows-spanned="1">
            <text:p>PRESUPUESTO ANUAL DE REMUNERACIONES</text:p>
          </table:table-cell>
          <table:covered-table-cell table:number-columns-repeated="7" table:style-name="ce208"/>
          <table:table-cell/>
          <table:table-cell table:style-name="ce191" office:value-type="string" calcext:value-type="string" table:number-columns-spanned="8" table:number-rows-spanned="1">
            <text:p>PRESUPUESTO ANUAL DE REMUNERACIONES</text:p>
          </table:table-cell>
          <table:covered-table-cell table:number-columns-repeated="7" table:style-name="ce208"/>
          <table:table-cell table:number-columns-repeated="16339"/>
        </table:table-row>
        <table:table-row table:style-name="ro5">
          <table:table-cell table:style-name="ce190"/>
          <table:table-cell table:style-name="ce192" table:number-columns-repeated="3"/>
          <table:table-cell table:style-name="ce226" office:value-type="string" calcext:value-type="string">
            <text:p>1 AÑO</text:p>
          </table:table-cell>
          <table:table-cell table:style-name="ce192" table:number-columns-repeated="4"/>
          <table:table-cell table:style-name="ce190"/>
          <table:table-cell table:style-name="ce192" table:number-columns-repeated="3"/>
          <table:table-cell table:style-name="ce226" office:value-type="string" calcext:value-type="string">
            <text:p>2 AÑO</text:p>
          </table:table-cell>
          <table:table-cell table:style-name="ce192" table:number-columns-repeated="4"/>
          <table:table-cell table:style-name="ce190"/>
          <table:table-cell table:style-name="ce192" table:number-columns-repeated="3"/>
          <table:table-cell table:style-name="ce226" office:value-type="string" calcext:value-type="string">
            <text:p>3 AÑO</text:p>
          </table:table-cell>
          <table:table-cell table:style-name="ce192" table:number-columns-repeated="4"/>
          <table:table-cell/>
          <table:table-cell table:style-name="ce192" table:number-columns-repeated="3"/>
          <table:table-cell table:style-name="ce226" office:value-type="string" calcext:value-type="string">
            <text:p>4 AÑO</text:p>
          </table:table-cell>
          <table:table-cell table:style-name="ce192" table:number-columns-repeated="4"/>
          <table:table-cell/>
          <table:table-cell table:style-name="ce192" table:number-columns-repeated="3"/>
          <table:table-cell table:style-name="ce226" office:value-type="string" calcext:value-type="string">
            <text:p>5 AÑO</text:p>
          </table:table-cell>
          <table:table-cell table:style-name="ce192" table:number-columns-repeated="4"/>
          <table:table-cell table:number-columns-repeated="16339"/>
        </table:table-row>
        <table:table-row table:style-name="ro5">
          <table:table-cell table:style-name="ce190"/>
          <table:table-cell table:style-name="ce192" table:number-columns-repeated="8"/>
          <table:table-cell table:style-name="ce190"/>
          <table:table-cell table:style-name="ce192" table:number-columns-repeated="8"/>
          <table:table-cell table:style-name="ce190"/>
          <table:table-cell table:style-name="ce192" table:number-columns-repeated="8"/>
          <table:table-cell/>
          <table:table-cell table:style-name="ce192" table:number-columns-repeated="8"/>
          <table:table-cell/>
          <table:table-cell table:style-name="ce192" table:number-columns-repeated="8"/>
          <table:table-cell table:number-columns-repeated="16339"/>
        </table:table-row>
        <table:table-row table:style-name="ro5">
          <table:table-cell table:style-name="ce190"/>
          <table:table-cell table:style-name="ce193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208"/>
          <table:table-cell table:style-name="ce190"/>
          <table:table-cell table:style-name="ce193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208"/>
          <table:table-cell table:style-name="ce190"/>
          <table:table-cell table:style-name="ce193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208"/>
          <table:table-cell/>
          <table:table-cell table:style-name="ce193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208"/>
          <table:table-cell/>
          <table:table-cell table:style-name="ce193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208"/>
          <table:table-cell table:number-columns-repeated="16339"/>
        </table:table-row>
        <table:table-row table:style-name="ro5">
          <table:table-cell table:style-name="ce190"/>
          <table:table-cell table:style-name="ce192" table:number-columns-repeated="8"/>
          <table:table-cell table:style-name="ce190"/>
          <table:table-cell table:style-name="ce192" table:number-columns-repeated="8"/>
          <table:table-cell table:style-name="ce190"/>
          <table:table-cell table:style-name="ce192" table:number-columns-repeated="8"/>
          <table:table-cell/>
          <table:table-cell table:style-name="ce192" table:number-columns-repeated="8"/>
          <table:table-cell/>
          <table:table-cell table:style-name="ce192" table:number-columns-repeated="8"/>
          <table:table-cell table:number-columns-repeated="16339"/>
        </table:table-row>
        <table:table-row table:style-name="ro4">
          <table:table-cell table:style-name="ce190"/>
          <table:table-cell table:style-name="ce194" office:value-type="string" calcext:value-type="string">
            <text:p>Cargo</text:p>
          </table:table-cell>
          <table:table-cell table:style-name="ce194" office:value-type="string" calcext:value-type="string">
            <text:p>Básico mes</text:p>
          </table:table-cell>
          <table:table-cell table:style-name="ce194" office:value-type="string" calcext:value-type="string">
            <text:p>Anual</text:p>
          </table:table-cell>
          <table:table-cell table:style-name="ce194" office:value-type="string" calcext:value-type="string">
            <text:p>Gratificacion *</text:p>
          </table:table-cell>
          <table:table-cell table:style-name="ce194" office:value-type="string" calcext:value-type="string">
            <text:p>CTS **</text:p>
          </table:table-cell>
          <table:table-cell table:style-name="ce194" office:value-type="string" calcext:value-type="string">
            <text:p>Sub Total</text:p>
          </table:table-cell>
          <table:table-cell table:style-name="ce194" office:value-type="string" calcext:value-type="string">
            <text:p>Essalud (***)</text:p>
          </table:table-cell>
          <table:table-cell table:style-name="ce194" office:value-type="string" calcext:value-type="string">
            <text:p>TOTAL</text:p>
          </table:table-cell>
          <table:table-cell table:style-name="ce190"/>
          <table:table-cell table:style-name="ce194" office:value-type="string" calcext:value-type="string">
            <text:p>Cargo</text:p>
          </table:table-cell>
          <table:table-cell table:style-name="ce194" office:value-type="string" calcext:value-type="string">
            <text:p>Básico mes</text:p>
          </table:table-cell>
          <table:table-cell table:style-name="ce194" office:value-type="string" calcext:value-type="string">
            <text:p>Anual</text:p>
          </table:table-cell>
          <table:table-cell table:style-name="ce194" office:value-type="string" calcext:value-type="string">
            <text:p>Gratificacion *</text:p>
          </table:table-cell>
          <table:table-cell table:style-name="ce194" office:value-type="string" calcext:value-type="string">
            <text:p>CTS **</text:p>
          </table:table-cell>
          <table:table-cell table:style-name="ce194" office:value-type="string" calcext:value-type="string">
            <text:p>Sub Total</text:p>
          </table:table-cell>
          <table:table-cell table:style-name="ce194" office:value-type="string" calcext:value-type="string">
            <text:p>Essalud (***)</text:p>
          </table:table-cell>
          <table:table-cell table:style-name="ce194" office:value-type="string" calcext:value-type="string">
            <text:p>TOTAL</text:p>
          </table:table-cell>
          <table:table-cell table:style-name="ce190"/>
          <table:table-cell table:style-name="ce194" office:value-type="string" calcext:value-type="string">
            <text:p>Cargo</text:p>
          </table:table-cell>
          <table:table-cell table:style-name="ce194" office:value-type="string" calcext:value-type="string">
            <text:p>Básico mes</text:p>
          </table:table-cell>
          <table:table-cell table:style-name="ce194" office:value-type="string" calcext:value-type="string">
            <text:p>Anual</text:p>
          </table:table-cell>
          <table:table-cell table:style-name="ce194" office:value-type="string" calcext:value-type="string">
            <text:p>Gratificacion *</text:p>
          </table:table-cell>
          <table:table-cell table:style-name="ce194" office:value-type="string" calcext:value-type="string">
            <text:p>CTS **</text:p>
          </table:table-cell>
          <table:table-cell table:style-name="ce194" office:value-type="string" calcext:value-type="string">
            <text:p>Sub Total</text:p>
          </table:table-cell>
          <table:table-cell table:style-name="ce194" office:value-type="string" calcext:value-type="string">
            <text:p>Essalud (***)</text:p>
          </table:table-cell>
          <table:table-cell table:style-name="ce194" office:value-type="string" calcext:value-type="string">
            <text:p>TOTAL</text:p>
          </table:table-cell>
          <table:table-cell/>
          <table:table-cell table:style-name="ce194" office:value-type="string" calcext:value-type="string">
            <text:p>Cargo</text:p>
          </table:table-cell>
          <table:table-cell table:style-name="ce194" office:value-type="string" calcext:value-type="string">
            <text:p>Básico mes</text:p>
          </table:table-cell>
          <table:table-cell table:style-name="ce194" office:value-type="string" calcext:value-type="string">
            <text:p>Anual</text:p>
          </table:table-cell>
          <table:table-cell table:style-name="ce194" office:value-type="string" calcext:value-type="string">
            <text:p>Gratificacion *</text:p>
          </table:table-cell>
          <table:table-cell table:style-name="ce194" office:value-type="string" calcext:value-type="string">
            <text:p>CTS **</text:p>
          </table:table-cell>
          <table:table-cell table:style-name="ce194" office:value-type="string" calcext:value-type="string">
            <text:p>Sub Total</text:p>
          </table:table-cell>
          <table:table-cell table:style-name="ce194" office:value-type="string" calcext:value-type="string">
            <text:p>Essalud (***)</text:p>
          </table:table-cell>
          <table:table-cell table:style-name="ce194" office:value-type="string" calcext:value-type="string">
            <text:p>TOTAL</text:p>
          </table:table-cell>
          <table:table-cell/>
          <table:table-cell table:style-name="ce194" office:value-type="string" calcext:value-type="string">
            <text:p>Cargo</text:p>
          </table:table-cell>
          <table:table-cell table:style-name="ce194" office:value-type="string" calcext:value-type="string">
            <text:p>Básico mes</text:p>
          </table:table-cell>
          <table:table-cell table:style-name="ce194" office:value-type="string" calcext:value-type="string">
            <text:p>Anual</text:p>
          </table:table-cell>
          <table:table-cell table:style-name="ce194" office:value-type="string" calcext:value-type="string">
            <text:p>Gratificacion *</text:p>
          </table:table-cell>
          <table:table-cell table:style-name="ce194" office:value-type="string" calcext:value-type="string">
            <text:p>CTS **</text:p>
          </table:table-cell>
          <table:table-cell table:style-name="ce194" office:value-type="string" calcext:value-type="string">
            <text:p>Sub Total</text:p>
          </table:table-cell>
          <table:table-cell table:style-name="ce194" office:value-type="string" calcext:value-type="string">
            <text:p>Essalud (***)</text:p>
          </table:table-cell>
          <table:table-cell table:style-name="ce194" office:value-type="string" calcext:value-type="string">
            <text:p>TOTAL</text:p>
          </table:table-cell>
          <table:table-cell table:number-columns-repeated="16339"/>
        </table:table-row>
        <table:table-row table:style-name="ro5">
          <table:table-cell table:style-name="ce190"/>
          <table:table-cell table:style-name="ce195" office:value-type="string" calcext:value-type="string">
            <text:p>Area de producción</text:p>
          </table:table-cell>
          <table:table-cell table:style-name="ce209" table:number-columns-repeated="6"/>
          <table:table-cell table:style-name="ce233" table:formula="of:=[.I9]+[.I10]" office:value-type="float" office:value="57920.4566666667" calcext:value-type="float">
            <text:p><text:s/>57,920.46 </text:p>
          </table:table-cell>
          <table:table-cell table:style-name="ce190"/>
          <table:table-cell table:style-name="ce195" office:value-type="string" calcext:value-type="string">
            <text:p>Area de producción</text:p>
          </table:table-cell>
          <table:table-cell table:style-name="ce209" table:number-columns-repeated="6"/>
          <table:table-cell table:style-name="ce233" table:formula="of:=[.R9]+[.R10]" office:value-type="float" office:value="85622.1133333333" calcext:value-type="float">
            <text:p><text:s/>85,622.11 </text:p>
          </table:table-cell>
          <table:table-cell table:style-name="ce190"/>
          <table:table-cell table:style-name="ce195" office:value-type="string" calcext:value-type="string">
            <text:p>Area de producción</text:p>
          </table:table-cell>
          <table:table-cell table:style-name="ce209" table:number-columns-repeated="6"/>
          <table:table-cell table:style-name="ce233" table:formula="of:=[.AA9]+[.AA10]" office:value-type="float" office:value="85623.2033333333" calcext:value-type="float">
            <text:p><text:s/>85,623.20 </text:p>
          </table:table-cell>
          <table:table-cell/>
          <table:table-cell table:style-name="ce195" office:value-type="string" calcext:value-type="string">
            <text:p>Area de producción</text:p>
          </table:table-cell>
          <table:table-cell table:style-name="ce209" table:number-columns-repeated="6"/>
          <table:table-cell table:style-name="ce233" table:formula="of:=[.AJ9]+[.AJ10]" office:value-type="float" office:value="85624.2933333333" calcext:value-type="float">
            <text:p><text:s/>85,624.29 </text:p>
          </table:table-cell>
          <table:table-cell/>
          <table:table-cell table:style-name="ce195" office:value-type="string" calcext:value-type="string">
            <text:p>Area de producción</text:p>
          </table:table-cell>
          <table:table-cell table:style-name="ce209" table:number-columns-repeated="6"/>
          <table:table-cell table:style-name="ce233" table:formula="of:=[.AS9]+[.AS10]" office:value-type="float" office:value="85625.3833333333" calcext:value-type="float">
            <text:p><text:s/>85,625.38 </text:p>
          </table:table-cell>
          <table:table-cell table:number-columns-repeated="16339"/>
        </table:table-row>
        <table:table-row table:style-name="ro5">
          <table:table-cell table:style-name="ce190"/>
          <table:table-cell table:style-name="ce196" office:value-type="string" calcext:value-type="string">
            <text:p>Cocineros</text:p>
          </table:table-cell>
          <table:table-cell table:style-name="ce210" table:formula="of:=[.D9]/12" office:value-type="float" office:value="3565.08333333333" calcext:value-type="float">
            <text:p><text:s/>3,565.08 </text:p>
          </table:table-cell>
          <table:table-cell table:style-name="ce210" table:formula="of:=[$'SUELDO BASE'.O16]" office:value-type="float" office:value="42781" calcext:value-type="float">
            <text:p><text:s/>42,781.00 </text:p>
          </table:table-cell>
          <table:table-cell table:style-name="ce210" table:formula="of:=[$'SUELDO BASE'.O23]" office:value-type="float" office:value="7130" calcext:value-type="float">
            <text:p><text:s/>7,130.00 </text:p>
          </table:table-cell>
          <table:table-cell table:style-name="ce210" table:formula="of:=[$'SUELDO BASE'.O31]" office:value-type="float" office:value="4159.16666666667" calcext:value-type="float">
            <text:p><text:s/>4,159.17 </text:p>
          </table:table-cell>
          <table:table-cell table:style-name="ce210" table:formula="of:=[.D9]+[.E9]+[.F9]" office:value-type="float" office:value="54070.1666666667" calcext:value-type="float">
            <text:p><text:s/>54,070.17 </text:p>
          </table:table-cell>
          <table:table-cell table:style-name="ce210" table:formula="of:=[.D9]*9%" office:value-type="float" office:value="3850.29" calcext:value-type="float">
            <text:p><text:s/>3,850.29 </text:p>
          </table:table-cell>
          <table:table-cell table:style-name="ce234" table:formula="of:=[.H9]+[.G9]" office:value-type="float" office:value="57920.4566666667" calcext:value-type="float">
            <text:p><text:s/>57,920.46 </text:p>
          </table:table-cell>
          <table:table-cell table:style-name="ce190"/>
          <table:table-cell table:style-name="ce196" office:value-type="string" calcext:value-type="string">
            <text:p>Cocineros</text:p>
          </table:table-cell>
          <table:table-cell table:style-name="ce210" table:formula="of:=[.M9]/12" office:value-type="float" office:value="5270.16666666667" calcext:value-type="float">
            <text:p><text:s/>5,270.17 </text:p>
          </table:table-cell>
          <table:table-cell table:style-name="ce210" table:formula="of:=[$'SUELDO BASE'.O17]" office:value-type="float" office:value="63242" calcext:value-type="float">
            <text:p><text:s/>63,242.00 </text:p>
          </table:table-cell>
          <table:table-cell table:style-name="ce210" table:formula="of:=[$'SUELDO BASE'.O24]" office:value-type="float" office:value="10540" calcext:value-type="float">
            <text:p><text:s/>10,540.00 </text:p>
          </table:table-cell>
          <table:table-cell table:style-name="ce210" table:formula="of:=[$'SUELDO BASE'.O32]" office:value-type="float" office:value="6148.33333333333" calcext:value-type="float">
            <text:p><text:s/>6,148.33 </text:p>
          </table:table-cell>
          <table:table-cell table:style-name="ce210" table:formula="of:=[.M9]+[.N9]+[.O9]" office:value-type="float" office:value="79930.3333333333" calcext:value-type="float">
            <text:p><text:s/>79,930.33 </text:p>
          </table:table-cell>
          <table:table-cell table:style-name="ce210" table:formula="of:=[.M9]*9%" office:value-type="float" office:value="5691.78" calcext:value-type="float">
            <text:p><text:s/>5,691.78 </text:p>
          </table:table-cell>
          <table:table-cell table:style-name="ce234" table:formula="of:=[.Q9]+[.P9]" office:value-type="float" office:value="85622.1133333333" calcext:value-type="float">
            <text:p><text:s/>85,622.11 </text:p>
          </table:table-cell>
          <table:table-cell table:style-name="ce190"/>
          <table:table-cell table:style-name="ce196" office:value-type="string" calcext:value-type="string">
            <text:p>Cocinero 1</text:p>
          </table:table-cell>
          <table:table-cell table:style-name="ce210" table:formula="of:=[.V9]/12" office:value-type="float" office:value="5270.25" calcext:value-type="float">
            <text:p><text:s/>5,270.25 </text:p>
          </table:table-cell>
          <table:table-cell table:style-name="ce210" table:formula="of:=[$'SUELDO BASE'.O18]" office:value-type="float" office:value="63243" calcext:value-type="float">
            <text:p><text:s/>63,243.00 </text:p>
          </table:table-cell>
          <table:table-cell table:style-name="ce210" table:formula="of:=[$'SUELDO BASE'.O25]" office:value-type="float" office:value="10540" calcext:value-type="float">
            <text:p><text:s/>10,540.00 </text:p>
          </table:table-cell>
          <table:table-cell table:style-name="ce210" table:formula="of:=[$'SUELDO BASE'.O33]" office:value-type="float" office:value="6148.33333333333" calcext:value-type="float">
            <text:p><text:s/>6,148.33 </text:p>
          </table:table-cell>
          <table:table-cell table:style-name="ce210" table:formula="of:=[.V9]+[.W9]+[.X9]" office:value-type="float" office:value="79931.3333333333" calcext:value-type="float">
            <text:p><text:s/>79,931.33 </text:p>
          </table:table-cell>
          <table:table-cell table:style-name="ce210" table:formula="of:=[.V9]*9%" office:value-type="float" office:value="5691.87" calcext:value-type="float">
            <text:p><text:s/>5,691.87 </text:p>
          </table:table-cell>
          <table:table-cell table:style-name="ce234" table:formula="of:=[.Z9]+[.Y9]" office:value-type="float" office:value="85623.2033333333" calcext:value-type="float">
            <text:p><text:s/>85,623.20 </text:p>
          </table:table-cell>
          <table:table-cell/>
          <table:table-cell table:style-name="ce196" office:value-type="string" calcext:value-type="string">
            <text:p>Cocineros</text:p>
          </table:table-cell>
          <table:table-cell table:style-name="ce210" table:formula="of:=[.AE9]/12" office:value-type="float" office:value="5270.33333333333" calcext:value-type="float">
            <text:p><text:s/>5,270.33 </text:p>
          </table:table-cell>
          <table:table-cell table:style-name="ce210" table:formula="of:=[$'SUELDO BASE'.O19]" office:value-type="float" office:value="63244" calcext:value-type="float">
            <text:p><text:s/>63,244.00 </text:p>
          </table:table-cell>
          <table:table-cell table:style-name="ce210" table:formula="of:=[$'SUELDO BASE'.O26]" office:value-type="float" office:value="10540" calcext:value-type="float">
            <text:p><text:s/>10,540.00 </text:p>
          </table:table-cell>
          <table:table-cell table:style-name="ce210" table:formula="of:=[$'SUELDO BASE'.O34]" office:value-type="float" office:value="6148.33333333333" calcext:value-type="float">
            <text:p><text:s/>6,148.33 </text:p>
          </table:table-cell>
          <table:table-cell table:style-name="ce210" table:formula="of:=[.AE9]+[.AF9]+[.AG9]" office:value-type="float" office:value="79932.3333333333" calcext:value-type="float">
            <text:p><text:s/>79,932.33 </text:p>
          </table:table-cell>
          <table:table-cell table:style-name="ce210" table:formula="of:=[.AE9]*9%" office:value-type="float" office:value="5691.96" calcext:value-type="float">
            <text:p><text:s/>5,691.96 </text:p>
          </table:table-cell>
          <table:table-cell table:style-name="ce234" table:formula="of:=[.AI9]+[.AH9]" office:value-type="float" office:value="85624.2933333333" calcext:value-type="float">
            <text:p><text:s/>85,624.29 </text:p>
          </table:table-cell>
          <table:table-cell/>
          <table:table-cell table:style-name="ce196" office:value-type="string" calcext:value-type="string">
            <text:p>Cocinero 1</text:p>
          </table:table-cell>
          <table:table-cell table:style-name="ce210" table:formula="of:=[.AN9]/12" office:value-type="float" office:value="5270.41666666667" calcext:value-type="float">
            <text:p><text:s/>5,270.42 </text:p>
          </table:table-cell>
          <table:table-cell table:style-name="ce210" table:formula="of:=[$'SUELDO BASE'.O20]" office:value-type="float" office:value="63245" calcext:value-type="float">
            <text:p><text:s/>63,245.00 </text:p>
          </table:table-cell>
          <table:table-cell table:style-name="ce210" table:formula="of:=[$'SUELDO BASE'.O27]" office:value-type="float" office:value="10540" calcext:value-type="float">
            <text:p><text:s/>10,540.00 </text:p>
          </table:table-cell>
          <table:table-cell table:style-name="ce210" table:formula="of:=[$'SUELDO BASE'.O35]" office:value-type="float" office:value="6148.33333333333" calcext:value-type="float">
            <text:p><text:s/>6,148.33 </text:p>
          </table:table-cell>
          <table:table-cell table:style-name="ce210" table:formula="of:=[.AN9]+[.AO9]+[.AP9]" office:value-type="float" office:value="79933.3333333333" calcext:value-type="float">
            <text:p><text:s/>79,933.33 </text:p>
          </table:table-cell>
          <table:table-cell table:style-name="ce210" table:formula="of:=[.AN9]*9%" office:value-type="float" office:value="5692.05" calcext:value-type="float">
            <text:p><text:s/>5,692.05 </text:p>
          </table:table-cell>
          <table:table-cell table:style-name="ce234" table:formula="of:=[.AR9]+[.AQ9]" office:value-type="float" office:value="85625.3833333333" calcext:value-type="float">
            <text:p><text:s/>85,625.38 </text:p>
          </table:table-cell>
          <table:table-cell table:number-columns-repeated="16339"/>
        </table:table-row>
        <table:table-row table:style-name="ro5" table:number-rows-repeated="2">
          <table:table-cell table:style-name="ce190"/>
          <table:table-cell table:style-name="ce197"/>
          <table:table-cell table:style-name="ce210" table:number-columns-repeated="6"/>
          <table:table-cell table:style-name="ce234"/>
          <table:table-cell table:style-name="ce190"/>
          <table:table-cell table:style-name="ce197"/>
          <table:table-cell table:style-name="ce210" table:number-columns-repeated="6"/>
          <table:table-cell table:style-name="ce234"/>
          <table:table-cell table:style-name="ce190"/>
          <table:table-cell table:style-name="ce197"/>
          <table:table-cell table:style-name="ce210" table:number-columns-repeated="6"/>
          <table:table-cell table:style-name="ce234"/>
          <table:table-cell/>
          <table:table-cell table:style-name="ce197"/>
          <table:table-cell table:style-name="ce210" table:number-columns-repeated="6"/>
          <table:table-cell table:style-name="ce234"/>
          <table:table-cell/>
          <table:table-cell table:style-name="ce197"/>
          <table:table-cell table:style-name="ce210" table:number-columns-repeated="6"/>
          <table:table-cell table:style-name="ce234"/>
          <table:table-cell table:number-columns-repeated="16339"/>
        </table:table-row>
        <table:table-row table:style-name="ro5">
          <table:table-cell table:style-name="ce190"/>
          <table:table-cell table:style-name="ce198" office:value-type="string" calcext:value-type="string">
            <text:p>Area de Administración</text:p>
          </table:table-cell>
          <table:table-cell table:style-name="ce211" table:number-columns-repeated="6"/>
          <table:table-cell table:style-name="ce235" table:formula="of:=[.I13]" office:value-type="float" office:value="13184.8166666667" calcext:value-type="float">
            <text:p><text:s/>13,184.82 </text:p>
          </table:table-cell>
          <table:table-cell table:style-name="ce190"/>
          <table:table-cell table:style-name="ce198" office:value-type="string" calcext:value-type="string">
            <text:p>Area de Administración</text:p>
          </table:table-cell>
          <table:table-cell table:style-name="ce211" table:number-columns-repeated="6"/>
          <table:table-cell table:style-name="ce235" table:formula="of:=[.R13]" office:value-type="float" office:value="13184.8166666667" calcext:value-type="float">
            <text:p><text:s/>13,184.82 </text:p>
          </table:table-cell>
          <table:table-cell table:style-name="ce190"/>
          <table:table-cell table:style-name="ce198" office:value-type="string" calcext:value-type="string">
            <text:p>Area de Administración</text:p>
          </table:table-cell>
          <table:table-cell table:style-name="ce211" table:number-columns-repeated="6"/>
          <table:table-cell table:style-name="ce235" table:formula="of:=[.AA13]" office:value-type="float" office:value="13184.8166666667" calcext:value-type="float">
            <text:p><text:s/>13,184.82 </text:p>
          </table:table-cell>
          <table:table-cell/>
          <table:table-cell table:style-name="ce198" office:value-type="string" calcext:value-type="string">
            <text:p>Area de Administración</text:p>
          </table:table-cell>
          <table:table-cell table:style-name="ce211" table:number-columns-repeated="6"/>
          <table:table-cell table:style-name="ce235" table:formula="of:=[.AJ13]" office:value-type="float" office:value="13184.8166666667" calcext:value-type="float">
            <text:p><text:s/>13,184.82 </text:p>
          </table:table-cell>
          <table:table-cell/>
          <table:table-cell table:style-name="ce198" office:value-type="string" calcext:value-type="string">
            <text:p>Area de Administración</text:p>
          </table:table-cell>
          <table:table-cell table:style-name="ce211" table:number-columns-repeated="6"/>
          <table:table-cell table:style-name="ce235" table:formula="of:=[.AS13]" office:value-type="float" office:value="13184.8166666667" calcext:value-type="float">
            <text:p><text:s/>13,184.82 </text:p>
          </table:table-cell>
          <table:table-cell table:number-columns-repeated="16339"/>
        </table:table-row>
        <table:table-row table:style-name="ro5">
          <table:table-cell table:style-name="ce190"/>
          <table:table-cell table:style-name="ce197" office:value-type="string" calcext:value-type="string">
            <text:p>Asistente Administrativo</text:p>
          </table:table-cell>
          <table:table-cell table:style-name="ce210" office:value-type="float" office:value="930" calcext:value-type="float">
            <text:p><text:s/>930.00 </text:p>
          </table:table-cell>
          <table:table-cell table:style-name="ce210" table:formula="of:=[.C13]*12" office:value-type="float" office:value="11160" calcext:value-type="float">
            <text:p><text:s/>11,160.00 </text:p>
          </table:table-cell>
          <table:table-cell table:style-name="ce210" table:formula="of:=[.C13]" office:value-type="float" office:value="930" calcext:value-type="float">
            <text:p><text:s/>930.00 </text:p>
          </table:table-cell>
          <table:table-cell table:style-name="ce210" table:formula="of:=([.E13]+[.E13]/6)/12" office:value-type="float" office:value="90.4166666666667" calcext:value-type="float">
            <text:p><text:s/>90.42 </text:p>
          </table:table-cell>
          <table:table-cell table:style-name="ce210" table:formula="of:=[.D13]+[.E13]+[.F13]" office:value-type="float" office:value="12180.4166666667" calcext:value-type="float">
            <text:p><text:s/>12,180.42 </text:p>
          </table:table-cell>
          <table:table-cell table:style-name="ce210" table:formula="of:=[.D13]*9%" office:value-type="float" office:value="1004.4" calcext:value-type="float">
            <text:p><text:s/>1,004.40 </text:p>
          </table:table-cell>
          <table:table-cell table:style-name="ce234" table:formula="of:=[.H13]+[.G13]" office:value-type="float" office:value="13184.8166666667" calcext:value-type="float">
            <text:p><text:s/>13,184.82 </text:p>
          </table:table-cell>
          <table:table-cell table:style-name="ce190"/>
          <table:table-cell table:style-name="ce197" office:value-type="string" calcext:value-type="string">
            <text:p>Asistente Administrativo</text:p>
          </table:table-cell>
          <table:table-cell table:style-name="ce210" office:value-type="float" office:value="930" calcext:value-type="float">
            <text:p><text:s/>930.00 </text:p>
          </table:table-cell>
          <table:table-cell table:style-name="ce210" table:formula="of:=[.L13]*12" office:value-type="float" office:value="11160" calcext:value-type="float">
            <text:p><text:s/>11,160.00 </text:p>
          </table:table-cell>
          <table:table-cell table:style-name="ce210" table:formula="of:=[.L13]" office:value-type="float" office:value="930" calcext:value-type="float">
            <text:p><text:s/>930.00 </text:p>
          </table:table-cell>
          <table:table-cell table:style-name="ce210" table:formula="of:=([.N13]+[.N13]/6)/12" office:value-type="float" office:value="90.4166666666667" calcext:value-type="float">
            <text:p><text:s/>90.42 </text:p>
          </table:table-cell>
          <table:table-cell table:style-name="ce210" table:formula="of:=[.M13]+[.N13]+[.O13]" office:value-type="float" office:value="12180.4166666667" calcext:value-type="float">
            <text:p><text:s/>12,180.42 </text:p>
          </table:table-cell>
          <table:table-cell table:style-name="ce210" table:formula="of:=[.M13]*9%" office:value-type="float" office:value="1004.4" calcext:value-type="float">
            <text:p><text:s/>1,004.40 </text:p>
          </table:table-cell>
          <table:table-cell table:style-name="ce234" table:formula="of:=[.Q13]+[.P13]" office:value-type="float" office:value="13184.8166666667" calcext:value-type="float">
            <text:p><text:s/>13,184.82 </text:p>
          </table:table-cell>
          <table:table-cell table:style-name="ce190"/>
          <table:table-cell table:style-name="ce197" office:value-type="string" calcext:value-type="string">
            <text:p>Asistente Administrativo</text:p>
          </table:table-cell>
          <table:table-cell table:style-name="ce210" office:value-type="float" office:value="930" calcext:value-type="float">
            <text:p><text:s/>930.00 </text:p>
          </table:table-cell>
          <table:table-cell table:style-name="ce210" table:formula="of:=[.U13]*12" office:value-type="float" office:value="11160" calcext:value-type="float">
            <text:p><text:s/>11,160.00 </text:p>
          </table:table-cell>
          <table:table-cell table:style-name="ce210" table:formula="of:=[.U13]" office:value-type="float" office:value="930" calcext:value-type="float">
            <text:p><text:s/>930.00 </text:p>
          </table:table-cell>
          <table:table-cell table:style-name="ce210" table:formula="of:=([.W13]+[.W13]/6)/12" office:value-type="float" office:value="90.4166666666667" calcext:value-type="float">
            <text:p><text:s/>90.42 </text:p>
          </table:table-cell>
          <table:table-cell table:style-name="ce210" table:formula="of:=[.V13]+[.W13]+[.X13]" office:value-type="float" office:value="12180.4166666667" calcext:value-type="float">
            <text:p><text:s/>12,180.42 </text:p>
          </table:table-cell>
          <table:table-cell table:style-name="ce210" table:formula="of:=[.V13]*9%" office:value-type="float" office:value="1004.4" calcext:value-type="float">
            <text:p><text:s/>1,004.40 </text:p>
          </table:table-cell>
          <table:table-cell table:style-name="ce234" table:formula="of:=[.Z13]+[.Y13]" office:value-type="float" office:value="13184.8166666667" calcext:value-type="float">
            <text:p><text:s/>13,184.82 </text:p>
          </table:table-cell>
          <table:table-cell/>
          <table:table-cell table:style-name="ce197" office:value-type="string" calcext:value-type="string">
            <text:p>Asistente Administrativo</text:p>
          </table:table-cell>
          <table:table-cell table:style-name="ce210" office:value-type="float" office:value="930" calcext:value-type="float">
            <text:p><text:s/>930.00 </text:p>
          </table:table-cell>
          <table:table-cell table:style-name="ce210" table:formula="of:=[.AD13]*12" office:value-type="float" office:value="11160" calcext:value-type="float">
            <text:p><text:s/>11,160.00 </text:p>
          </table:table-cell>
          <table:table-cell table:style-name="ce210" table:formula="of:=[.AD13]" office:value-type="float" office:value="930" calcext:value-type="float">
            <text:p><text:s/>930.00 </text:p>
          </table:table-cell>
          <table:table-cell table:style-name="ce210" table:formula="of:=([.AF13]+[.AF13]/6)/12" office:value-type="float" office:value="90.4166666666667" calcext:value-type="float">
            <text:p><text:s/>90.42 </text:p>
          </table:table-cell>
          <table:table-cell table:style-name="ce210" table:formula="of:=[.AE13]+[.AF13]+[.AG13]" office:value-type="float" office:value="12180.4166666667" calcext:value-type="float">
            <text:p><text:s/>12,180.42 </text:p>
          </table:table-cell>
          <table:table-cell table:style-name="ce210" table:formula="of:=[.AE13]*9%" office:value-type="float" office:value="1004.4" calcext:value-type="float">
            <text:p><text:s/>1,004.40 </text:p>
          </table:table-cell>
          <table:table-cell table:style-name="ce234" table:formula="of:=[.AI13]+[.AH13]" office:value-type="float" office:value="13184.8166666667" calcext:value-type="float">
            <text:p><text:s/>13,184.82 </text:p>
          </table:table-cell>
          <table:table-cell/>
          <table:table-cell table:style-name="ce197" office:value-type="string" calcext:value-type="string">
            <text:p>Asistente Administrativo</text:p>
          </table:table-cell>
          <table:table-cell table:style-name="ce210" office:value-type="float" office:value="930" calcext:value-type="float">
            <text:p><text:s/>930.00 </text:p>
          </table:table-cell>
          <table:table-cell table:style-name="ce210" table:formula="of:=[.AM13]*12" office:value-type="float" office:value="11160" calcext:value-type="float">
            <text:p><text:s/>11,160.00 </text:p>
          </table:table-cell>
          <table:table-cell table:style-name="ce210" table:formula="of:=[.AM13]" office:value-type="float" office:value="930" calcext:value-type="float">
            <text:p><text:s/>930.00 </text:p>
          </table:table-cell>
          <table:table-cell table:style-name="ce210" table:formula="of:=([.AO13]+[.AO13]/6)/12" office:value-type="float" office:value="90.4166666666667" calcext:value-type="float">
            <text:p><text:s/>90.42 </text:p>
          </table:table-cell>
          <table:table-cell table:style-name="ce210" table:formula="of:=[.AN13]+[.AO13]+[.AP13]" office:value-type="float" office:value="12180.4166666667" calcext:value-type="float">
            <text:p><text:s/>12,180.42 </text:p>
          </table:table-cell>
          <table:table-cell table:style-name="ce210" table:formula="of:=[.AN13]*9%" office:value-type="float" office:value="1004.4" calcext:value-type="float">
            <text:p><text:s/>1,004.40 </text:p>
          </table:table-cell>
          <table:table-cell table:style-name="ce234" table:formula="of:=[.AR13]+[.AQ13]" office:value-type="float" office:value="13184.8166666667" calcext:value-type="float">
            <text:p><text:s/>13,184.82 </text:p>
          </table:table-cell>
          <table:table-cell table:number-columns-repeated="16339"/>
        </table:table-row>
        <table:table-row table:style-name="ro5">
          <table:table-cell table:style-name="ce190"/>
          <table:table-cell table:style-name="ce197"/>
          <table:table-cell table:style-name="ce212" table:number-columns-repeated="6"/>
          <table:table-cell table:style-name="ce236"/>
          <table:table-cell table:style-name="ce190"/>
          <table:table-cell table:style-name="ce197"/>
          <table:table-cell table:style-name="ce212" table:number-columns-repeated="6"/>
          <table:table-cell table:style-name="ce236"/>
          <table:table-cell table:style-name="ce190"/>
          <table:table-cell table:style-name="ce197"/>
          <table:table-cell table:style-name="ce212" table:number-columns-repeated="6"/>
          <table:table-cell table:style-name="ce236"/>
          <table:table-cell/>
          <table:table-cell table:style-name="ce197"/>
          <table:table-cell table:style-name="ce212" table:number-columns-repeated="6"/>
          <table:table-cell table:style-name="ce236"/>
          <table:table-cell/>
          <table:table-cell table:style-name="ce197"/>
          <table:table-cell table:style-name="ce212" table:number-columns-repeated="6"/>
          <table:table-cell table:style-name="ce236"/>
          <table:table-cell table:number-columns-repeated="16339"/>
        </table:table-row>
        <table:table-row table:style-name="ro5">
          <table:table-cell table:style-name="ce190"/>
          <table:table-cell table:style-name="ce199"/>
          <table:table-cell table:style-name="ce212" table:number-columns-repeated="6"/>
          <table:table-cell table:style-name="ce236"/>
          <table:table-cell table:style-name="ce190"/>
          <table:table-cell table:style-name="ce199"/>
          <table:table-cell table:style-name="ce212" table:number-columns-repeated="6"/>
          <table:table-cell table:style-name="ce236"/>
          <table:table-cell table:style-name="ce190"/>
          <table:table-cell table:style-name="ce199"/>
          <table:table-cell table:style-name="ce212" table:number-columns-repeated="6"/>
          <table:table-cell table:style-name="ce236"/>
          <table:table-cell/>
          <table:table-cell table:style-name="ce199"/>
          <table:table-cell table:style-name="ce212" table:number-columns-repeated="6"/>
          <table:table-cell table:style-name="ce236"/>
          <table:table-cell/>
          <table:table-cell table:style-name="ce199"/>
          <table:table-cell table:style-name="ce212" table:number-columns-repeated="6"/>
          <table:table-cell table:style-name="ce236"/>
          <table:table-cell table:number-columns-repeated="16339"/>
        </table:table-row>
        <table:table-row table:style-name="ro5" table:number-rows-repeated="2">
          <table:table-cell table:style-name="ce190"/>
          <table:table-cell table:style-name="ce197"/>
          <table:table-cell table:style-name="ce213" table:number-columns-repeated="6"/>
          <table:table-cell table:style-name="ce237"/>
          <table:table-cell table:style-name="ce190"/>
          <table:table-cell table:style-name="ce197"/>
          <table:table-cell table:style-name="ce213" table:number-columns-repeated="6"/>
          <table:table-cell table:style-name="ce237"/>
          <table:table-cell table:style-name="ce190"/>
          <table:table-cell table:style-name="ce197"/>
          <table:table-cell table:style-name="ce213" table:number-columns-repeated="6"/>
          <table:table-cell table:style-name="ce237"/>
          <table:table-cell/>
          <table:table-cell table:style-name="ce197"/>
          <table:table-cell table:style-name="ce213" table:number-columns-repeated="6"/>
          <table:table-cell table:style-name="ce237"/>
          <table:table-cell/>
          <table:table-cell table:style-name="ce197"/>
          <table:table-cell table:style-name="ce213" table:number-columns-repeated="6"/>
          <table:table-cell table:style-name="ce237"/>
          <table:table-cell table:number-columns-repeated="16339"/>
        </table:table-row>
        <table:table-row table:style-name="ro5">
          <table:table-cell table:style-name="ce190"/>
          <table:table-cell table:style-name="ce200" office:value-type="string" calcext:value-type="string">
            <text:p>TOTAL</text:p>
          </table:table-cell>
          <table:table-cell table:style-name="ce214" table:formula="of:=SUM([.C8:.C17])" office:value-type="float" office:value="4495.08333333333" calcext:value-type="float">
            <text:p><text:s/>4,495.08 </text:p>
          </table:table-cell>
          <table:table-cell table:style-name="ce214" table:formula="of:=SUM([.D8:.D17])" office:value-type="float" office:value="53941" calcext:value-type="float">
            <text:p><text:s/>53,941.00 </text:p>
          </table:table-cell>
          <table:table-cell table:style-name="ce214" table:formula="of:=SUM([.E8:.E17])" office:value-type="float" office:value="8060" calcext:value-type="float">
            <text:p><text:s/>8,060.00 </text:p>
          </table:table-cell>
          <table:table-cell table:style-name="ce214" table:formula="of:=SUM([.F8:.F17])" office:value-type="float" office:value="4249.58333333333" calcext:value-type="float">
            <text:p><text:s/>4,249.58 </text:p>
          </table:table-cell>
          <table:table-cell table:style-name="ce214" table:formula="of:=SUM([.G8:.G17])" office:value-type="float" office:value="66250.5833333333" calcext:value-type="float">
            <text:p><text:s/>66,250.58 </text:p>
          </table:table-cell>
          <table:table-cell table:style-name="ce214" table:formula="of:=SUM([.H8:.H17])" office:value-type="float" office:value="4854.69" calcext:value-type="float">
            <text:p><text:s/>4,854.69 </text:p>
          </table:table-cell>
          <table:table-cell table:style-name="ce238" table:formula="of:=[.I12]+[.I8]" office:value-type="float" office:value="71105.2733333333" calcext:value-type="float">
            <text:p><text:s/>71,105.27 </text:p>
          </table:table-cell>
          <table:table-cell table:style-name="ce190"/>
          <table:table-cell table:style-name="ce200" office:value-type="string" calcext:value-type="string">
            <text:p>TOTAL</text:p>
          </table:table-cell>
          <table:table-cell table:style-name="ce214" table:formula="of:=SUM([.L8:.L17])" office:value-type="float" office:value="6200.16666666667" calcext:value-type="float">
            <text:p><text:s/>6,200.17 </text:p>
          </table:table-cell>
          <table:table-cell table:style-name="ce214" table:formula="of:=SUM([.M8:.M17])" office:value-type="float" office:value="74402" calcext:value-type="float">
            <text:p><text:s/>74,402.00 </text:p>
          </table:table-cell>
          <table:table-cell table:style-name="ce214" table:formula="of:=SUM([.N8:.N17])" office:value-type="float" office:value="11470" calcext:value-type="float">
            <text:p><text:s/>11,470.00 </text:p>
          </table:table-cell>
          <table:table-cell table:style-name="ce214" table:formula="of:=SUM([.O8:.O17])" office:value-type="float" office:value="6238.75" calcext:value-type="float">
            <text:p><text:s/>6,238.75 </text:p>
          </table:table-cell>
          <table:table-cell table:style-name="ce214" table:formula="of:=SUM([.P8:.P17])" office:value-type="float" office:value="92110.75" calcext:value-type="float">
            <text:p><text:s/>92,110.75 </text:p>
          </table:table-cell>
          <table:table-cell table:style-name="ce214" table:formula="of:=SUM([.Q8:.Q17])" office:value-type="float" office:value="6696.18" calcext:value-type="float">
            <text:p><text:s/>6,696.18 </text:p>
          </table:table-cell>
          <table:table-cell table:style-name="ce238" table:formula="of:=[.R12]+[.R8]" office:value-type="float" office:value="98806.93" calcext:value-type="float">
            <text:p><text:s/>98,806.93 </text:p>
          </table:table-cell>
          <table:table-cell table:style-name="ce190"/>
          <table:table-cell table:style-name="ce200" office:value-type="string" calcext:value-type="string">
            <text:p>TOTAL</text:p>
          </table:table-cell>
          <table:table-cell table:style-name="ce214" table:formula="of:=SUM([.U8:.U17])" office:value-type="float" office:value="6200.25" calcext:value-type="float">
            <text:p><text:s/>6,200.25 </text:p>
          </table:table-cell>
          <table:table-cell table:style-name="ce214" table:formula="of:=SUM([.V8:.V17])" office:value-type="float" office:value="74403" calcext:value-type="float">
            <text:p><text:s/>74,403.00 </text:p>
          </table:table-cell>
          <table:table-cell table:style-name="ce214" table:formula="of:=SUM([.W8:.W17])" office:value-type="float" office:value="11470" calcext:value-type="float">
            <text:p><text:s/>11,470.00 </text:p>
          </table:table-cell>
          <table:table-cell table:style-name="ce214" table:formula="of:=SUM([.X8:.X17])" office:value-type="float" office:value="6238.75" calcext:value-type="float">
            <text:p><text:s/>6,238.75 </text:p>
          </table:table-cell>
          <table:table-cell table:style-name="ce214" table:formula="of:=SUM([.Y8:.Y17])" office:value-type="float" office:value="92111.75" calcext:value-type="float">
            <text:p><text:s/>92,111.75 </text:p>
          </table:table-cell>
          <table:table-cell table:style-name="ce214" table:formula="of:=SUM([.Z8:.Z17])" office:value-type="float" office:value="6696.27" calcext:value-type="float">
            <text:p><text:s/>6,696.27 </text:p>
          </table:table-cell>
          <table:table-cell table:style-name="ce238" table:formula="of:=[.AA12]+[.AA8]" office:value-type="float" office:value="98808.02" calcext:value-type="float">
            <text:p><text:s/>98,808.02 </text:p>
          </table:table-cell>
          <table:table-cell/>
          <table:table-cell table:style-name="ce200" office:value-type="string" calcext:value-type="string">
            <text:p>TOTAL</text:p>
          </table:table-cell>
          <table:table-cell table:style-name="ce214" table:formula="of:=SUM([.AD8:.AD17])" office:value-type="float" office:value="6200.33333333333" calcext:value-type="float">
            <text:p><text:s/>6,200.33 </text:p>
          </table:table-cell>
          <table:table-cell table:style-name="ce214" table:formula="of:=SUM([.AE8:.AE17])" office:value-type="float" office:value="74404" calcext:value-type="float">
            <text:p><text:s/>74,404.00 </text:p>
          </table:table-cell>
          <table:table-cell table:style-name="ce214" table:formula="of:=SUM([.AF8:.AF17])" office:value-type="float" office:value="11470" calcext:value-type="float">
            <text:p><text:s/>11,470.00 </text:p>
          </table:table-cell>
          <table:table-cell table:style-name="ce214" table:formula="of:=SUM([.AG8:.AG17])" office:value-type="float" office:value="6238.75" calcext:value-type="float">
            <text:p><text:s/>6,238.75 </text:p>
          </table:table-cell>
          <table:table-cell table:style-name="ce214" table:formula="of:=SUM([.AH8:.AH17])" office:value-type="float" office:value="92112.75" calcext:value-type="float">
            <text:p><text:s/>92,112.75 </text:p>
          </table:table-cell>
          <table:table-cell table:style-name="ce214" table:formula="of:=SUM([.AI8:.AI17])" office:value-type="float" office:value="6696.36" calcext:value-type="float">
            <text:p><text:s/>6,696.36 </text:p>
          </table:table-cell>
          <table:table-cell table:style-name="ce238" table:formula="of:=[.AJ12]+[.AJ8]" office:value-type="float" office:value="98809.11" calcext:value-type="float">
            <text:p><text:s/>98,809.11 </text:p>
          </table:table-cell>
          <table:table-cell/>
          <table:table-cell table:style-name="ce200" office:value-type="string" calcext:value-type="string">
            <text:p>TOTAL</text:p>
          </table:table-cell>
          <table:table-cell table:style-name="ce214" table:formula="of:=SUM([.AM8:.AM17])" office:value-type="float" office:value="6200.41666666667" calcext:value-type="float">
            <text:p><text:s/>6,200.42 </text:p>
          </table:table-cell>
          <table:table-cell table:style-name="ce214" table:formula="of:=SUM([.AN8:.AN17])" office:value-type="float" office:value="74405" calcext:value-type="float">
            <text:p><text:s/>74,405.00 </text:p>
          </table:table-cell>
          <table:table-cell table:style-name="ce214" table:formula="of:=SUM([.AO8:.AO17])" office:value-type="float" office:value="11470" calcext:value-type="float">
            <text:p><text:s/>11,470.00 </text:p>
          </table:table-cell>
          <table:table-cell table:style-name="ce214" table:formula="of:=SUM([.AP8:.AP17])" office:value-type="float" office:value="6238.75" calcext:value-type="float">
            <text:p><text:s/>6,238.75 </text:p>
          </table:table-cell>
          <table:table-cell table:style-name="ce214" table:formula="of:=SUM([.AQ8:.AQ17])" office:value-type="float" office:value="92113.75" calcext:value-type="float">
            <text:p><text:s/>92,113.75 </text:p>
          </table:table-cell>
          <table:table-cell table:style-name="ce214" table:formula="of:=SUM([.AR8:.AR17])" office:value-type="float" office:value="6696.45" calcext:value-type="float">
            <text:p><text:s/>6,696.45 </text:p>
          </table:table-cell>
          <table:table-cell table:style-name="ce238" table:formula="of:=[.AS12]+[.AS8]" office:value-type="float" office:value="98810.2" calcext:value-type="float">
            <text:p><text:s/>98,810.20 </text:p>
          </table:table-cell>
          <table:table-cell table:number-columns-repeated="16339"/>
        </table:table-row>
        <table:table-row table:style-name="ro5">
          <table:table-cell table:style-name="ce190"/>
          <table:table-cell table:style-name="ce192" office:value-type="string" calcext:value-type="string">
            <text:p>(*) Gratificación Medio sueldo en julio y diciembre</text:p>
          </table:table-cell>
          <table:table-cell table:style-name="ce192" table:number-columns-repeated="7"/>
          <table:table-cell table:style-name="ce190"/>
          <table:table-cell table:style-name="ce192" office:value-type="string" calcext:value-type="string">
            <text:p>(*) Gratificación Medio sueldo en julio y diciembre</text:p>
          </table:table-cell>
          <table:table-cell table:style-name="ce192" table:number-columns-repeated="7"/>
          <table:table-cell table:style-name="ce190"/>
          <table:table-cell table:style-name="ce192" office:value-type="string" calcext:value-type="string">
            <text:p>(*) Gratificación Medio sueldo en julio y diciembre</text:p>
          </table:table-cell>
          <table:table-cell table:style-name="ce192" table:number-columns-repeated="7"/>
          <table:table-cell/>
          <table:table-cell table:style-name="ce192" office:value-type="string" calcext:value-type="string">
            <text:p>(*) Gratificación Medio sueldo en julio y diciembre</text:p>
          </table:table-cell>
          <table:table-cell table:style-name="ce192" table:number-columns-repeated="7"/>
          <table:table-cell/>
          <table:table-cell table:style-name="ce192" office:value-type="string" calcext:value-type="string">
            <text:p>(*) Gratificación Medio sueldo en julio y diciembre</text:p>
          </table:table-cell>
          <table:table-cell table:style-name="ce192" table:number-columns-repeated="7"/>
          <table:table-cell table:number-columns-repeated="16339"/>
        </table:table-row>
        <table:table-row table:style-name="ro5">
          <table:table-cell table:style-name="ce190"/>
          <table:table-cell table:style-name="ce192" office:value-type="string" calcext:value-type="string">
            <text:p>(**) Medio Sueldo</text:p>
          </table:table-cell>
          <table:table-cell table:style-name="ce192" table:number-columns-repeated="7"/>
          <table:table-cell table:style-name="ce190"/>
          <table:table-cell table:style-name="ce192" office:value-type="string" calcext:value-type="string">
            <text:p>(**) Medio Sueldo</text:p>
          </table:table-cell>
          <table:table-cell table:style-name="ce192" table:number-columns-repeated="7"/>
          <table:table-cell table:style-name="ce190"/>
          <table:table-cell table:style-name="ce192" office:value-type="string" calcext:value-type="string">
            <text:p>(**) Medio Sueldo</text:p>
          </table:table-cell>
          <table:table-cell table:style-name="ce192" table:number-columns-repeated="7"/>
          <table:table-cell/>
          <table:table-cell table:style-name="ce192" office:value-type="string" calcext:value-type="string">
            <text:p>(**) Medio Sueldo</text:p>
          </table:table-cell>
          <table:table-cell table:style-name="ce192" table:number-columns-repeated="7"/>
          <table:table-cell/>
          <table:table-cell table:style-name="ce192" office:value-type="string" calcext:value-type="string">
            <text:p>(**) Medio Sueldo</text:p>
          </table:table-cell>
          <table:table-cell table:style-name="ce192" table:number-columns-repeated="7"/>
          <table:table-cell table:number-columns-repeated="16339"/>
        </table:table-row>
        <table:table-row table:style-name="ro5">
          <table:table-cell table:style-name="ce190"/>
          <table:table-cell table:style-name="ce192" office:value-type="string" calcext:value-type="string">
            <text:p>(**) 9%</text:p>
          </table:table-cell>
          <table:table-cell table:style-name="ce192" table:number-columns-repeated="7"/>
          <table:table-cell table:style-name="ce190"/>
          <table:table-cell table:style-name="ce192" office:value-type="string" calcext:value-type="string">
            <text:p>(**) 9%</text:p>
          </table:table-cell>
          <table:table-cell table:style-name="ce192" table:number-columns-repeated="7"/>
          <table:table-cell table:style-name="ce190"/>
          <table:table-cell table:style-name="ce192" office:value-type="string" calcext:value-type="string">
            <text:p>(**) 9%</text:p>
          </table:table-cell>
          <table:table-cell table:style-name="ce192" table:number-columns-repeated="7"/>
          <table:table-cell/>
          <table:table-cell table:style-name="ce192" office:value-type="string" calcext:value-type="string">
            <text:p>(**) 9%</text:p>
          </table:table-cell>
          <table:table-cell table:style-name="ce192" table:number-columns-repeated="7"/>
          <table:table-cell/>
          <table:table-cell table:style-name="ce192" office:value-type="string" calcext:value-type="string">
            <text:p>(**) 9%</text:p>
          </table:table-cell>
          <table:table-cell table:style-name="ce192" table:number-columns-repeated="7"/>
          <table:table-cell table:number-columns-repeated="16339"/>
        </table:table-row>
        <table:table-row table:style-name="ro16">
          <table:table-cell table:style-name="ce190"/>
          <table:table-cell table:style-name="ce201"/>
          <table:table-cell table:style-name="ce215" table:number-columns-spanned="9" table:number-rows-spanned="1"/>
          <table:covered-table-cell table:number-columns-repeated="8" table:style-name="ce208"/>
          <table:table-cell table:style-name="ce190" table:number-columns-repeated="15"/>
          <table:table-cell table:number-columns-repeated="16358"/>
        </table:table-row>
        <table:table-row table:style-name="ro2">
          <table:table-cell table:style-name="ce190"/>
          <table:table-cell table:style-name="ce202" office:value-type="string" calcext:value-type="string" table:number-columns-spanned="6" table:number-rows-spanned="1">
            <text:p>PRESUPUESTO DE REMUNERACIONES <text:s/>PROYECTADO</text:p>
          </table:table-cell>
          <table:covered-table-cell table:number-columns-repeated="5" table:style-name="ce208"/>
          <table:table-cell table:style-name="ce229"/>
          <table:table-cell table:number-columns-repeated="3"/>
          <table:table-cell table:style-name="ce215" office:value-type="string" calcext:value-type="string" table:number-columns-spanned="2" table:number-rows-spanned="1">
            <text:p>Produccion Anual</text:p>
          </table:table-cell>
          <table:covered-table-cell table:style-name="ce229"/>
          <table:table-cell table:style-name="ce190" office:value-type="float" office:value="82800" calcext:value-type="float">
            <text:p>82800</text:p>
          </table:table-cell>
          <table:table-cell table:style-name="ce190" table:number-columns-repeated="12"/>
          <table:table-cell table:number-columns-repeated="16358"/>
        </table:table-row>
        <table:table-row table:style-name="ro4">
          <table:table-cell table:style-name="ce190"/>
          <table:table-cell table:style-name="ce201"/>
          <table:table-cell table:style-name="ce216" table:number-columns-repeated="6"/>
          <table:table-cell table:number-columns-repeated="2"/>
          <table:table-cell table:style-name="ce243"/>
          <table:table-cell table:style-name="ce193" office:value-type="string" calcext:value-type="string" table:number-columns-spanned="2" table:number-rows-spanned="1">
            <text:p>Costo de mano de obra</text:p>
          </table:table-cell>
          <table:covered-table-cell table:style-name="ce226"/>
          <table:table-cell table:style-name="ce244" table:formula="of:=[.I8]/[.N23]" office:value-type="float" office:value="0.699522423510467" calcext:value-type="float">
            <text:p><text:s/>0.70 </text:p>
          </table:table-cell>
          <table:table-cell table:style-name="ce190" office:value-type="string" calcext:value-type="string">
            <text:p>por chocolate</text:p>
          </table:table-cell>
          <table:table-cell table:style-name="ce190" table:number-columns-repeated="11"/>
          <table:table-cell table:number-columns-repeated="16358"/>
        </table:table-row>
        <table:table-row table:style-name="ro5">
          <table:table-cell table:style-name="ce190"/>
          <table:table-cell table:style-name="ce203" office:value-type="string" calcext:value-type="string" table:number-columns-spanned="1" table:number-rows-spanned="2">
            <text:p>AREAS</text:p>
          </table:table-cell>
          <table:table-cell table:style-name="ce217" office:value-type="string" calcext:value-type="string" table:number-columns-spanned="5" table:number-rows-spanned="1">
            <text:p>PERIODOS</text:p>
          </table:table-cell>
          <table:covered-table-cell table:number-columns-repeated="3" table:style-name="ce224"/>
          <table:covered-table-cell table:style-name="ce227"/>
          <table:table-cell table:style-name="ce230"/>
          <table:table-cell table:style-name="ce239" table:number-columns-repeated="3"/>
          <table:table-cell table:style-name="ce190" table:number-columns-repeated="15"/>
          <table:table-cell table:number-columns-repeated="16358"/>
        </table:table-row>
        <table:table-row table:style-name="ro4">
          <table:table-cell table:style-name="ce190"/>
          <table:covered-table-cell table:style-name="ce204"/>
          <table:table-cell table:style-name="ce218" office:value-type="float" office:value="1" calcext:value-type="float">
            <text:p>1</text:p>
          </table:table-cell>
          <table:table-cell table:style-name="ce225" table:formula="of:=[.C26]+1" office:value-type="float" office:value="2" calcext:value-type="float">
            <text:p>2</text:p>
          </table:table-cell>
          <table:table-cell table:style-name="ce225" office:value-type="float" office:value="3" calcext:value-type="float">
            <text:p>3</text:p>
          </table:table-cell>
          <table:table-cell table:style-name="ce225" office:value-type="float" office:value="4" calcext:value-type="float">
            <text:p>4</text:p>
          </table:table-cell>
          <table:table-cell table:style-name="ce228" office:value-type="float" office:value="5" calcext:value-type="float">
            <text:p>5</text:p>
          </table:table-cell>
          <table:table-cell table:style-name="ce231"/>
          <table:table-cell table:style-name="ce240" table:number-columns-repeated="3"/>
          <table:table-cell table:style-name="ce190" table:number-columns-repeated="15"/>
          <table:table-cell table:number-columns-repeated="16358"/>
        </table:table-row>
        <table:table-row table:style-name="ro5">
          <table:table-cell table:style-name="ce190"/>
          <table:table-cell table:style-name="ce205" office:value-type="string" calcext:value-type="string">
            <text:p>PRODUCCION</text:p>
          </table:table-cell>
          <table:table-cell table:style-name="ce219" table:formula="of:=[.I8]" office:value-type="float" office:value="57920.4566666667" calcext:value-type="float">
            <text:p>57,920.46</text:p>
          </table:table-cell>
          <table:table-cell table:style-name="ce219" table:formula="of:=[.R8]" office:value-type="float" office:value="85622.1133333333" calcext:value-type="float">
            <text:p>85,622.11</text:p>
          </table:table-cell>
          <table:table-cell table:style-name="ce219" table:formula="of:=[.AA8]" office:value-type="float" office:value="85623.2033333333" calcext:value-type="float">
            <text:p>85,623.20</text:p>
          </table:table-cell>
          <table:table-cell table:style-name="ce219" table:formula="of:=[.AJ8]" office:value-type="float" office:value="85624.2933333333" calcext:value-type="float">
            <text:p>85,624.29</text:p>
          </table:table-cell>
          <table:table-cell table:style-name="ce219" table:formula="of:=[.AS8]" office:value-type="float" office:value="85625.3833333333" calcext:value-type="float">
            <text:p>85,625.38</text:p>
          </table:table-cell>
          <table:table-cell table:style-name="ce232"/>
          <table:table-cell table:style-name="ce241" table:number-columns-repeated="3"/>
          <table:table-cell table:style-name="ce190" table:number-columns-repeated="15"/>
          <table:table-cell table:number-columns-repeated="16358"/>
        </table:table-row>
        <table:table-row table:style-name="ro5">
          <table:table-cell table:style-name="ce190"/>
          <table:table-cell table:style-name="ce199" office:value-type="string" calcext:value-type="string">
            <text:p>ADMINISTRACION</text:p>
          </table:table-cell>
          <table:table-cell table:style-name="ce220" table:formula="of:=[.I12]" office:value-type="float" office:value="13184.8166666667" calcext:value-type="float">
            <text:p>13,184.82</text:p>
          </table:table-cell>
          <table:table-cell table:style-name="ce220" table:formula="of:=[.R12]" office:value-type="float" office:value="13184.8166666667" calcext:value-type="float">
            <text:p>13,184.82</text:p>
          </table:table-cell>
          <table:table-cell table:style-name="ce220" table:formula="of:=[.AA12]" office:value-type="float" office:value="13184.8166666667" calcext:value-type="float">
            <text:p>13,184.82</text:p>
          </table:table-cell>
          <table:table-cell table:style-name="ce220" table:formula="of:=[.AJ12]" office:value-type="float" office:value="13184.8166666667" calcext:value-type="float">
            <text:p>13,184.82</text:p>
          </table:table-cell>
          <table:table-cell table:style-name="ce220" table:formula="of:=[.AS12]" office:value-type="float" office:value="13184.8166666667" calcext:value-type="float">
            <text:p>13,184.82</text:p>
          </table:table-cell>
          <table:table-cell table:style-name="ce232"/>
          <table:table-cell table:style-name="ce241" table:number-columns-repeated="3"/>
          <table:table-cell table:style-name="ce190" table:number-columns-repeated="15"/>
          <table:table-cell table:number-columns-repeated="16358"/>
        </table:table-row>
        <table:table-row table:style-name="ro4">
          <table:table-cell table:style-name="ce190"/>
          <table:table-cell table:style-name="ce206" office:value-type="string" calcext:value-type="string">
            <text:p>VENTAS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32"/>
          <table:table-cell table:style-name="ce241" table:number-columns-repeated="3"/>
          <table:table-cell table:style-name="ce190" table:number-columns-repeated="15"/>
          <table:table-cell table:number-columns-repeated="16358"/>
        </table:table-row>
        <table:table-row table:style-name="ro4">
          <table:table-cell table:style-name="ce190"/>
          <table:table-cell table:style-name="ce207" office:value-type="string" calcext:value-type="string">
            <text:p>TOTAL</text:p>
          </table:table-cell>
          <table:table-cell table:style-name="ce222" table:formula="of:=SUM([.C27:.C29])" office:value-type="float" office:value="71105.2733333333" calcext:value-type="float">
            <text:p>71,105.27</text:p>
          </table:table-cell>
          <table:table-cell table:style-name="ce222" table:formula="of:=SUM([.D27:.D29])" office:value-type="float" office:value="98806.93" calcext:value-type="float">
            <text:p>98,806.93</text:p>
          </table:table-cell>
          <table:table-cell table:style-name="ce222" table:formula="of:=SUM([.E27:.E29])" office:value-type="float" office:value="98808.02" calcext:value-type="float">
            <text:p>98,808.02</text:p>
          </table:table-cell>
          <table:table-cell table:style-name="ce222" table:formula="of:=SUM([.F27:.F29])" office:value-type="float" office:value="98809.11" calcext:value-type="float">
            <text:p>98,809.11</text:p>
          </table:table-cell>
          <table:table-cell table:style-name="ce222" table:formula="of:=SUM([.G27:.G29])" office:value-type="float" office:value="98810.2" calcext:value-type="float">
            <text:p>98,810.20</text:p>
          </table:table-cell>
          <table:table-cell table:style-name="ce230"/>
          <table:table-cell table:style-name="ce242" table:number-columns-repeated="3"/>
          <table:table-cell table:style-name="ce190" table:number-columns-repeated="15"/>
          <table:table-cell table:number-columns-repeated="16358"/>
        </table:table-row>
        <table:table-row table:style-name="ro5">
          <table:table-cell table:style-name="ce190"/>
          <table:table-cell table:style-name="ce201"/>
          <table:table-cell table:style-name="ce223"/>
          <table:table-cell table:style-name="ce216" table:number-columns-repeated="6"/>
          <table:table-cell table:style-name="ce190" table:number-columns-repeated="17"/>
          <table:table-cell table:number-columns-repeated="16358"/>
        </table:table-row>
        <table:table-row table:style-name="ro5" table:number-rows-repeated="936">
          <table:table-cell table:style-name="ce190" table:number-columns-repeated="26"/>
          <table:table-cell table:number-columns-repeated="16358"/>
        </table:table-row>
        <table:table-row table:style-name="ro9" table:number-rows-repeated="104760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ostos por mes" table:style-name="ta11">
        <table:table-column table:style-name="co1" table:default-cell-style-name="Default"/>
        <table:table-column table:style-name="co60" table:default-cell-style-name="ce254"/>
        <table:table-column table:style-name="co61" table:default-cell-style-name="ce275"/>
        <table:table-column table:style-name="co62" table:default-cell-style-name="ce254"/>
        <table:table-column table:style-name="co48" table:default-cell-style-name="ce291"/>
        <table:table-column table:style-name="co25" table:default-cell-style-name="ce291"/>
        <table:table-column table:style-name="co63" table:default-cell-style-name="ce285"/>
        <table:table-column table:style-name="co1" table:default-cell-style-name="ce311"/>
        <table:table-column table:style-name="co1" table:number-columns-repeated="3" table:default-cell-style-name="Default"/>
        <table:table-column table:style-name="co64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number-columns-repeated="14" table:default-cell-style-name="Default"/>
        <table:table-column table:style-name="co28" table:default-cell-style-name="Default"/>
        <table:table-column table:style-name="co1" table:number-columns-repeated="9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65" table:default-cell-style-name="Default"/>
        <table:table-column table:style-name="co1" table:number-columns-repeated="10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25" table:default-cell-style-name="Default"/>
        <table:table-column table:style-name="co68" table:default-cell-style-name="Default"/>
        <table:table-column table:style-name="co32" table:default-cell-style-name="Default"/>
        <table:table-column table:style-name="co1" table:number-columns-repeated="16316" table:default-cell-style-name="Default"/>
        <table:table-row table:style-name="ro1">
          <table:table-cell/>
          <table:table-cell table:style-name="ce125" office:value-type="string" calcext:value-type="string" table:number-columns-spanned="1" table:number-rows-spanned="2">
            <text:p>n° trab</text:p>
          </table:table-cell>
          <table:table-cell table:style-name="ce268" office:value-type="string" calcext:value-type="string">
            <text:p>mes 1</text:p>
          </table:table-cell>
          <table:table-cell table:style-name="ce268" office:value-type="string" calcext:value-type="string">
            <text:p>mes 2</text:p>
          </table:table-cell>
          <table:table-cell table:style-name="ce268" office:value-type="string" calcext:value-type="string">
            <text:p>mes 3</text:p>
          </table:table-cell>
          <table:table-cell table:style-name="ce268" office:value-type="string" calcext:value-type="string">
            <text:p>mes 4</text:p>
          </table:table-cell>
          <table:table-cell table:style-name="ce268" office:value-type="string" calcext:value-type="string">
            <text:p>mes 5</text:p>
          </table:table-cell>
          <table:table-cell table:style-name="ce268" office:value-type="string" calcext:value-type="string">
            <text:p>mes 6</text:p>
          </table:table-cell>
          <table:table-cell table:style-name="ce268" office:value-type="string" calcext:value-type="string">
            <text:p>mes 7</text:p>
          </table:table-cell>
          <table:table-cell table:style-name="ce268" office:value-type="string" calcext:value-type="string">
            <text:p>mes 8</text:p>
          </table:table-cell>
          <table:table-cell table:style-name="ce268" office:value-type="string" calcext:value-type="string">
            <text:p>mes 9</text:p>
          </table:table-cell>
          <table:table-cell table:style-name="ce268" office:value-type="string" calcext:value-type="string">
            <text:p>mes 10</text:p>
          </table:table-cell>
          <table:table-cell table:style-name="ce268" office:value-type="string" calcext:value-type="string">
            <text:p>mes 11</text:p>
          </table:table-cell>
          <table:table-cell table:style-name="ce268" office:value-type="string" calcext:value-type="string">
            <text:p>mes 12</text:p>
          </table:table-cell>
          <table:table-cell table:number-columns-repeated="16370"/>
        </table:table-row>
        <table:table-row table:style-name="ro1">
          <table:table-cell/>
          <table:covered-table-cell table:style-name="ce167"/>
          <table:table-cell table:style-name="ce117" office:value-type="float" office:value="2" calcext:value-type="float">
            <text:p>2</text:p>
          </table:table-cell>
          <table:table-cell table:style-name="ce287" office:value-type="float" office:value="2.33333333333333" calcext:value-type="float">
            <text:p>2</text:p>
          </table:table-cell>
          <table:table-cell table:style-name="ce287" office:value-type="float" office:value="2.66666666666667" calcext:value-type="float">
            <text:p>3</text:p>
          </table:table-cell>
          <table:table-cell table:style-name="ce117" office:value-type="float" office:value="3" calcext:value-type="float">
            <text:p>3</text:p>
          </table:table-cell>
          <table:table-cell table:style-name="ce287" office:value-type="float" office:value="3.33333333333333" calcext:value-type="float">
            <text:p>3</text:p>
          </table:table-cell>
          <table:table-cell table:style-name="ce287" office:value-type="float" office:value="3.66666666666667" calcext:value-type="float">
            <text:p>4</text:p>
          </table:table-cell>
          <table:table-cell table:style-name="ce117" office:value-type="float" office:value="4" calcext:value-type="float">
            <text:p>4</text:p>
          </table:table-cell>
          <table:table-cell table:style-name="ce287" office:value-type="float" office:value="4.33333333333333" calcext:value-type="float">
            <text:p>4</text:p>
          </table:table-cell>
          <table:table-cell table:style-name="ce287" office:value-type="float" office:value="4.66666666666667" calcext:value-type="float">
            <text:p>5</text:p>
          </table:table-cell>
          <table:table-cell table:style-name="ce287" office:value-type="float" office:value="5" calcext:value-type="float">
            <text:p>5</text:p>
          </table:table-cell>
          <table:table-cell table:style-name="ce287" office:value-type="float" office:value="5.33333333333333" calcext:value-type="float">
            <text:p>5</text:p>
          </table:table-cell>
          <table:table-cell table:style-name="ce287" office:value-type="float" office:value="5.66666666666667" calcext:value-type="float">
            <text:p>6</text:p>
          </table:table-cell>
          <table:table-cell table:number-columns-repeated="16370"/>
        </table:table-row>
        <table:table-row table:style-name="ro1">
          <table:table-cell/>
          <table:table-cell table:style-name="ce245" table:number-columns-repeated="13"/>
          <table:table-cell table:number-columns-repeated="16370"/>
        </table:table-row>
        <table:table-row table:style-name="ro17">
          <table:table-cell/>
          <table:table-cell table:style-name="ce159" office:value-type="string" calcext:value-type="string">
            <text:p>Produccion por mes de chocolates</text:p>
          </table:table-cell>
          <table:table-cell table:style-name="ce268" office:value-type="string" calcext:value-type="string">
            <text:p>mes 1</text:p>
          </table:table-cell>
          <table:table-cell table:style-name="ce268" office:value-type="string" calcext:value-type="string">
            <text:p>Mes 2</text:p>
          </table:table-cell>
          <table:table-cell table:style-name="ce268" office:value-type="string" calcext:value-type="string">
            <text:p>Mes 3</text:p>
          </table:table-cell>
          <table:table-cell table:style-name="ce268" office:value-type="string" calcext:value-type="string">
            <text:p>Mes 4</text:p>
          </table:table-cell>
          <table:table-cell table:style-name="ce268" office:value-type="string" calcext:value-type="string">
            <text:p>Mes 5</text:p>
          </table:table-cell>
          <table:table-cell table:style-name="ce268" office:value-type="string" calcext:value-type="string">
            <text:p>Mes 6</text:p>
          </table:table-cell>
          <table:table-cell table:style-name="ce268" office:value-type="string" calcext:value-type="string">
            <text:p>Mes 7</text:p>
          </table:table-cell>
          <table:table-cell table:style-name="ce268" office:value-type="string" calcext:value-type="string">
            <text:p>Mes 8</text:p>
          </table:table-cell>
          <table:table-cell table:style-name="ce268" office:value-type="string" calcext:value-type="string">
            <text:p>Mes 9</text:p>
          </table:table-cell>
          <table:table-cell table:style-name="ce268" office:value-type="string" calcext:value-type="string">
            <text:p>Mes 10</text:p>
          </table:table-cell>
          <table:table-cell table:style-name="ce268" office:value-type="string" calcext:value-type="string">
            <text:p>Mes 11</text:p>
          </table:table-cell>
          <table:table-cell table:style-name="ce268" office:value-type="string" calcext:value-type="string">
            <text:p>Mes 12</text:p>
          </table:table-cell>
          <table:table-cell table:style-name="ce322" office:value-type="string" calcext:value-type="string">
            <text:p>TOTAL</text:p>
          </table:table-cell>
          <table:table-cell table:number-columns-repeated="16369"/>
        </table:table-row>
        <table:table-row table:style-name="ro1">
          <table:table-cell/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600" calcext:value-type="float">
            <text:p>3600</text:p>
          </table:table-cell>
          <table:table-cell table:style-name="ce117" office:value-type="float" office:value="4200" calcext:value-type="float">
            <text:p>4200</text:p>
          </table:table-cell>
          <table:table-cell table:style-name="ce117" office:value-type="float" office:value="4800" calcext:value-type="float">
            <text:p>4800</text:p>
          </table:table-cell>
          <table:table-cell table:style-name="ce117" office:value-type="float" office:value="5400" calcext:value-type="float">
            <text:p>5400</text:p>
          </table:table-cell>
          <table:table-cell table:style-name="ce117" office:value-type="float" office:value="6000" calcext:value-type="float">
            <text:p>6000</text:p>
          </table:table-cell>
          <table:table-cell table:style-name="ce117" office:value-type="float" office:value="6600" calcext:value-type="float">
            <text:p>6600</text:p>
          </table:table-cell>
          <table:table-cell table:style-name="ce117" office:value-type="float" office:value="7200" calcext:value-type="float">
            <text:p>7200</text:p>
          </table:table-cell>
          <table:table-cell table:style-name="ce117" office:value-type="float" office:value="7800" calcext:value-type="float">
            <text:p>7800</text:p>
          </table:table-cell>
          <table:table-cell table:style-name="ce117" office:value-type="float" office:value="8400" calcext:value-type="float">
            <text:p>8400</text:p>
          </table:table-cell>
          <table:table-cell table:style-name="ce117" office:value-type="float" office:value="9000" calcext:value-type="float">
            <text:p>9000</text:p>
          </table:table-cell>
          <table:table-cell table:style-name="ce117" office:value-type="float" office:value="9600" calcext:value-type="float">
            <text:p>9600</text:p>
          </table:table-cell>
          <table:table-cell table:style-name="ce117" office:value-type="float" office:value="10200" calcext:value-type="float">
            <text:p>10200</text:p>
          </table:table-cell>
          <table:table-cell table:style-name="ce128" office:value-type="float" office:value="82800" calcext:value-type="float">
            <text:p>82800</text:p>
          </table:table-cell>
          <table:table-cell table:number-columns-repeated="16369"/>
        </table:table-row>
        <table:table-row table:style-name="ro1">
          <table:table-cell/>
          <table:table-cell table:style-name="ce117" office:value-type="float" office:value="2" calcext:value-type="float">
            <text:p>2</text:p>
          </table:table-cell>
          <table:table-cell table:number-columns-repeated="12" table:style-name="ce117" office:value-type="float" office:value="10200" calcext:value-type="float">
            <text:p>10200</text:p>
          </table:table-cell>
          <table:table-cell table:style-name="ce128" office:value-type="float" office:value="122400" calcext:value-type="float">
            <text:p>122400</text:p>
          </table:table-cell>
          <table:table-cell table:number-columns-repeated="16369"/>
        </table:table-row>
        <table:table-row table:style-name="ro1" table:number-rows-repeated="2">
          <table:table-cell/>
          <table:table-cell table:style-name="ce245" table:number-columns-repeated="13"/>
          <table:table-cell table:style-name="ce323"/>
          <table:table-cell table:number-columns-repeated="16369"/>
        </table:table-row>
        <table:table-row table:style-name="ro1">
          <table:table-cell/>
          <table:table-cell table:style-name="ce246" office:value-type="string" calcext:value-type="string" table:number-columns-spanned="1" table:number-rows-spanned="3">
            <text:p>GAS</text:p>
          </table:table-cell>
          <table:table-cell table:style-name="ce269" office:value-type="string" calcext:value-type="string">
            <text:p>Mes 1</text:p>
          </table:table-cell>
          <table:table-cell table:style-name="ce269" office:value-type="string" calcext:value-type="string">
            <text:p>Mes 2</text:p>
          </table:table-cell>
          <table:table-cell table:style-name="ce269" office:value-type="string" calcext:value-type="string">
            <text:p>Mes 3</text:p>
          </table:table-cell>
          <table:table-cell table:style-name="ce269" office:value-type="string" calcext:value-type="string">
            <text:p>Mes 4</text:p>
          </table:table-cell>
          <table:table-cell table:style-name="ce269" office:value-type="string" calcext:value-type="string">
            <text:p>Mes 5</text:p>
          </table:table-cell>
          <table:table-cell table:style-name="ce269" office:value-type="string" calcext:value-type="string">
            <text:p>Mes 6</text:p>
          </table:table-cell>
          <table:table-cell table:style-name="ce269" office:value-type="string" calcext:value-type="string">
            <text:p>Mes 7</text:p>
          </table:table-cell>
          <table:table-cell table:style-name="ce269" office:value-type="string" calcext:value-type="string">
            <text:p>Mes 8</text:p>
          </table:table-cell>
          <table:table-cell table:style-name="ce269" office:value-type="string" calcext:value-type="string">
            <text:p>Mes 9</text:p>
          </table:table-cell>
          <table:table-cell table:style-name="ce269" office:value-type="string" calcext:value-type="string">
            <text:p>Mes 10</text:p>
          </table:table-cell>
          <table:table-cell table:style-name="ce269" office:value-type="string" calcext:value-type="string">
            <text:p>Mes 11</text:p>
          </table:table-cell>
          <table:table-cell table:style-name="ce269" office:value-type="string" calcext:value-type="string">
            <text:p>Mes 12</text:p>
          </table:table-cell>
          <table:table-cell table:style-name="ce323"/>
          <table:table-cell table:number-columns-repeated="16369"/>
        </table:table-row>
        <table:table-row table:style-name="ro1">
          <table:table-cell/>
          <table:covered-table-cell table:style-name="ce247"/>
          <table:table-cell table:style-name="ce117" table:formula="of:=300*12" office:value-type="float" office:value="3600" calcext:value-type="float">
            <text:p>3600</text:p>
          </table:table-cell>
          <table:table-cell table:style-name="ce117" table:formula="of:=350*12" office:value-type="float" office:value="4200" calcext:value-type="float">
            <text:p>4200</text:p>
          </table:table-cell>
          <table:table-cell table:style-name="ce117" table:formula="of:=400*12" office:value-type="float" office:value="4800" calcext:value-type="float">
            <text:p>4800</text:p>
          </table:table-cell>
          <table:table-cell table:style-name="ce117" table:formula="of:=450*12" office:value-type="float" office:value="5400" calcext:value-type="float">
            <text:p>5400</text:p>
          </table:table-cell>
          <table:table-cell table:style-name="ce117" table:formula="of:=500*12" office:value-type="float" office:value="6000" calcext:value-type="float">
            <text:p>6000</text:p>
          </table:table-cell>
          <table:table-cell table:style-name="ce117" table:formula="of:=550*12" office:value-type="float" office:value="6600" calcext:value-type="float">
            <text:p>6600</text:p>
          </table:table-cell>
          <table:table-cell table:style-name="ce117" table:formula="of:=600*12" office:value-type="float" office:value="7200" calcext:value-type="float">
            <text:p>7200</text:p>
          </table:table-cell>
          <table:table-cell table:style-name="ce117" table:formula="of:=650*12" office:value-type="float" office:value="7800" calcext:value-type="float">
            <text:p>7800</text:p>
          </table:table-cell>
          <table:table-cell table:style-name="ce117" table:formula="of:=700*12" office:value-type="float" office:value="8400" calcext:value-type="float">
            <text:p>8400</text:p>
          </table:table-cell>
          <table:table-cell table:style-name="ce117" table:formula="of:=750*12" office:value-type="float" office:value="9000" calcext:value-type="float">
            <text:p>9000</text:p>
          </table:table-cell>
          <table:table-cell table:style-name="ce117" table:formula="of:=800*12" office:value-type="float" office:value="9600" calcext:value-type="float">
            <text:p>9600</text:p>
          </table:table-cell>
          <table:table-cell table:style-name="ce117" table:formula="of:=850*12" office:value-type="float" office:value="10200" calcext:value-type="float">
            <text:p>10200</text:p>
          </table:table-cell>
          <table:table-cell table:style-name="ce323"/>
          <table:table-cell table:number-columns-repeated="16369"/>
        </table:table-row>
        <table:table-row table:style-name="ro1">
          <table:table-cell/>
          <table:covered-table-cell table:style-name="ce248"/>
          <table:table-cell table:style-name="ce166" table:formula="of:=[.C10]/[.$C$12]" office:value-type="float" office:value="1" calcext:value-type="float">
            <text:p>1</text:p>
          </table:table-cell>
          <table:table-cell table:style-name="ce166" table:formula="of:=[.D10]/[.$C$12]" office:value-type="float" office:value="1.16666666666667" calcext:value-type="float">
            <text:p>1</text:p>
          </table:table-cell>
          <table:table-cell table:style-name="ce166" table:formula="of:=[.E10]/[.$C$12]" office:value-type="float" office:value="1.33333333333333" calcext:value-type="float">
            <text:p>1</text:p>
          </table:table-cell>
          <table:table-cell table:style-name="ce166" table:formula="of:=[.F10]/[.$C$12]" office:value-type="float" office:value="1.5" calcext:value-type="float">
            <text:p>2</text:p>
          </table:table-cell>
          <table:table-cell table:style-name="ce166" table:formula="of:=[.G10]/[.$C$12]" office:value-type="float" office:value="1.66666666666667" calcext:value-type="float">
            <text:p>2</text:p>
          </table:table-cell>
          <table:table-cell table:style-name="ce166" table:formula="of:=[.H10]/[.$C$12]" office:value-type="float" office:value="1.83333333333333" calcext:value-type="float">
            <text:p>2</text:p>
          </table:table-cell>
          <table:table-cell table:style-name="ce166" table:formula="of:=[.I10]/[.$C$12]" office:value-type="float" office:value="2" calcext:value-type="float">
            <text:p>2</text:p>
          </table:table-cell>
          <table:table-cell table:style-name="ce166" table:formula="of:=[.J10]/[.$C$12]" office:value-type="float" office:value="2.16666666666667" calcext:value-type="float">
            <text:p>2</text:p>
          </table:table-cell>
          <table:table-cell table:style-name="ce166" table:formula="of:=[.K10]/[.$C$12]" office:value-type="float" office:value="2.33333333333333" calcext:value-type="float">
            <text:p>2</text:p>
          </table:table-cell>
          <table:table-cell table:style-name="ce166" table:formula="of:=[.L10]/[.$C$12]" office:value-type="float" office:value="2.5" calcext:value-type="float">
            <text:p>3</text:p>
          </table:table-cell>
          <table:table-cell table:style-name="ce166" table:formula="of:=[.M10]/[.$C$12]" office:value-type="float" office:value="2.66666666666667" calcext:value-type="float">
            <text:p>3</text:p>
          </table:table-cell>
          <table:table-cell table:style-name="ce166" table:formula="of:=[.N10]/[.$C$12]" office:value-type="float" office:value="2.83333333333333" calcext:value-type="float">
            <text:p>3</text:p>
          </table:table-cell>
          <table:table-cell table:style-name="ce323"/>
          <table:table-cell table:number-columns-repeated="16369"/>
        </table:table-row>
        <table:table-row table:style-name="ro1">
          <table:table-cell/>
          <table:table-cell table:style-name="Default"/>
          <table:table-cell table:style-name="Default" office:value-type="float" office:value="3600" calcext:value-type="float">
            <text:p>3600</text:p>
          </table:table-cell>
          <table:table-cell table:style-name="Default"/>
          <table:table-cell table:style-name="Default" office:value-type="string" calcext:value-type="string">
            <text:p>Un gas nos durara para proucir 3600 chocolates</text:p>
          </table:table-cell>
          <table:table-cell table:style-name="Default" table:number-columns-repeated="3"/>
          <table:table-cell table:number-columns-repeated="6"/>
          <table:table-cell table:style-name="ce323"/>
          <table:table-cell table:number-columns-repeated="12"/>
          <table:table-cell table:style-name="ce117" table:number-columns-repeated="4"/>
          <table:table-cell table:style-name="ce117" office:value-type="float" office:value="8400" calcext:value-type="float">
            <text:p>8400</text:p>
          </table:table-cell>
          <table:table-cell table:style-name="ce117" office:value-type="float" office:value="9000" calcext:value-type="float">
            <text:p>9000</text:p>
          </table:table-cell>
          <table:table-cell table:style-name="ce117" office:value-type="float" office:value="9600" calcext:value-type="float">
            <text:p>9600</text:p>
          </table:table-cell>
          <table:table-cell table:style-name="ce117" office:value-type="float" office:value="10200" calcext:value-type="float">
            <text:p>10200</text:p>
          </table:table-cell>
          <table:table-cell table:number-columns-repeated="9"/>
          <table:table-cell table:style-name="ce117" office:value-type="float" office:value="8400" calcext:value-type="float">
            <text:p>8400</text:p>
          </table:table-cell>
          <table:table-cell table:style-name="ce117" office:value-type="float" office:value="9000" calcext:value-type="float">
            <text:p>9000</text:p>
          </table:table-cell>
          <table:table-cell table:style-name="ce117" office:value-type="float" office:value="9600" calcext:value-type="float">
            <text:p>9600</text:p>
          </table:table-cell>
          <table:table-cell table:style-name="ce117" office:value-type="float" office:value="10200" calcext:value-type="float">
            <text:p>10200</text:p>
          </table:table-cell>
          <table:table-cell table:number-columns-repeated="16336"/>
        </table:table-row>
        <table:table-row table:style-name="ro1">
          <table:table-cell/>
          <table:table-cell table:style-name="Default" table:number-columns-repeated="7"/>
          <table:table-cell table:number-columns-repeated="6"/>
          <table:table-cell table:style-name="ce323"/>
          <table:table-cell table:number-columns-repeated="12"/>
          <table:table-cell table:style-name="ce245" table:number-columns-repeated="8"/>
          <table:table-cell table:number-columns-repeated="9"/>
          <table:table-cell table:style-name="ce245" table:number-columns-repeated="4"/>
          <table:table-cell table:number-columns-repeated="16336"/>
        </table:table-row>
        <table:table-row table:style-name="ro1">
          <table:table-cell/>
          <table:table-cell table:style-name="ce245" table:number-columns-repeated="9"/>
          <table:table-cell table:number-columns-repeated="16374"/>
        </table:table-row>
        <table:table-row table:style-name="ro18">
          <table:table-cell/>
          <table:table-cell table:style-name="ce249" office:value-type="string" calcext:value-type="string" table:number-columns-spanned="7" table:number-rows-spanned="1">
            <text:p>costos de produccion mes 1 - 3600 unidades</text:p>
          </table:table-cell>
          <table:covered-table-cell table:number-columns-repeated="6" table:style-name="ce270"/>
          <table:table-cell table:number-columns-repeated="16376"/>
        </table:table-row>
        <table:table-row table:style-name="ro9">
          <table:table-cell/>
          <table:table-cell table:style-name="ce5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" table:number-rows-spanned="2">
            <text:p>COSTO UNITARIO</text:p>
          </table:table-cell>
          <table:table-cell table:style-name="ce40" office:value-type="string" calcext:value-type="string" table:number-columns-spanned="1" table:number-rows-spanned="2">
            <text:p>UNIDADES REQUERIDAS (KG)</text:p>
          </table:table-cell>
          <table:table-cell table:style-name="ce290" office:value-type="string" calcext:value-type="string" table:number-columns-spanned="2" table:number-rows-spanned="1">
            <text:p>COSTO </text:p>
          </table:table-cell>
          <table:covered-table-cell table:style-name="ce250"/>
          <table:table-cell table:style-name="ce51" office:value-type="string" calcext:value-type="string" table:number-columns-spanned="1" table:number-rows-spanned="2">
            <text:p>TOTAL</text:p>
          </table:table-cell>
          <table:table-cell table:style-name="ce307"/>
          <table:table-cell table:number-columns-repeated="16376"/>
        </table:table-row>
        <table:table-row table:style-name="ro19">
          <table:table-cell/>
          <table:covered-table-cell table:style-name="ce250"/>
          <table:covered-table-cell table:number-columns-repeated="2" table:style-name="ce271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covered-table-cell table:style-name="ce250"/>
          <table:table-cell table:style-name="ce308"/>
          <table:table-cell table:number-columns-repeated="16376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2" office:value-type="string" calcext:value-type="string">
            <text:p><text:s/>Materia Prima Directa</text:p>
          </table:table-cell>
          <table:table-cell table:style-name="ce273" table:number-columns-repeated="4"/>
          <table:table-cell table:style-name="ce299" table:formula="of:=[.G20]+[.G21]+[.G22]" office:value-type="float" office:value="19800" calcext:value-type="float">
            <text:p><text:s/>19,800.00 </text:p>
          </table:table-cell>
          <table:table-cell table:style-name="ce310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$Resumen.H16]" office:value-type="float" office:value="20" calcext:value-type="float">
            <text:p>20.00</text:p>
          </table:table-cell>
          <table:table-cell table:style-name="ce253" table:formula="of:=[.I25]" office:value-type="float" office:value="450" calcext:value-type="float">
            <text:p>450</text:p>
          </table:table-cell>
          <table:table-cell/>
          <table:table-cell table:formula="of:=[.G20]" office:value-type="float" office:value="9000" calcext:value-type="float">
            <text:p>9,000</text:p>
          </table:table-cell>
          <table:table-cell table:formula="of:=[.D20]*[.C20]" office:value-type="float" office:value="9000" calcext:value-type="float">
            <text:p><text:s/>9,000.00 </text:p>
          </table:table-cell>
          <table:table-cell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$Resumen.H15]" office:value-type="float" office:value="3" calcext:value-type="float">
            <text:p>3.00</text:p>
          </table:table-cell>
          <table:table-cell table:style-name="ce253" table:formula="of:=3600/2" office:value-type="float" office:value="1800" calcext:value-type="float">
            <text:p>1,800</text:p>
          </table:table-cell>
          <table:table-cell/>
          <table:table-cell table:formula="of:=[.G21]" office:value-type="float" office:value="5400" calcext:value-type="float">
            <text:p>5,400</text:p>
          </table:table-cell>
          <table:table-cell table:formula="of:=[.C21]*[.D21]" office:value-type="float" office:value="5400" calcext:value-type="float">
            <text:p><text:s/>5,4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21]*[.J20])/[.I20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office:value-type="float" office:value="3600" calcext:value-type="float">
            <text:p>3,600</text:p>
          </table:table-cell>
          <table:table-cell/>
          <table:table-cell table:formula="of:=[.G22]" office:value-type="float" office:value="5400" calcext:value-type="float">
            <text:p>5,400</text:p>
          </table:table-cell>
          <table:table-cell table:formula="of:=[.C22]*[.D22]" office:value-type="float" office:value="5400" calcext:value-type="float">
            <text:p><text:s/>5,400.00 </text:p>
          </table:table-cell>
          <table:table-cell/>
          <table:table-cell table:style-name="ce317" table:number-columns-repeated="2"/>
          <table:table-cell office:value-type="string" calcext:value-type="string">
            <text:p>mp</text:p>
          </table:table-cell>
          <table:table-cell table:style-name="ce321" table:formula="of:=+[.G19]+[.G38]+[.G57]+[.G77]+[.G97]+[.G117]+[.G138]+[.G159]+[.G180]+[.G202]+[.G224]+[.G246]" office:value-type="float" office:value="455400" calcext:value-type="float">
            <text:p><text:s/>455,400.00 </text:p>
          </table:table-cell>
          <table:table-cell table:style-name="ce152" table:formula="of:=+[$'Presupuesto de ventas'.O7]" office:value-type="float" office:value="82800" calcext:value-type="float">
            <text:p><text:s/>82,800.00 </text:p>
          </table:table-cell>
          <table:table-cell table:style-name="ce152" table:formula="of:=+[.L22]/[.M22]" office:value-type="float" office:value="5.5" calcext:value-type="float">
            <text:p><text:s/>5.50 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table:formula="of:=[.I20]/[.I21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/>
          <table:table-cell table:formula="of:=+[.L22]/12" office:value-type="float" office:value="37950" calcext:value-type="float">
            <text:p>37950</text:p>
          </table:table-cell>
          <table:table-cell office:value-type="string" calcext:value-type="string">
            <text:p>x mes</text:p>
          </table:table-cell>
          <table:table-cell table:number-columns-repeated="16371"/>
        </table:table-row>
        <table:table-row table:style-name="ro1">
          <table:table-cell/>
          <table:table-cell table:style-name="ce252" office:value-type="string" calcext:value-type="string">
            <text:p><text:s/>Mano de Obra Directa</text:p>
          </table:table-cell>
          <table:table-cell table:style-name="ce273" table:number-columns-repeated="2"/>
          <table:table-cell table:style-name="ce292" table:number-columns-repeated="2"/>
          <table:table-cell table:style-name="ce299" table:formula="of:=[.G25]+[.G26]" office:value-type="float" office:value="1260" calcext:value-type="float">
            <text:p><text:s/>1,260.00 </text:p>
          </table:table-cell>
          <table:table-cell table:style-name="ce310"/>
          <table:table-cell table:style-name="ce317" office:value-type="float" office:value="3600" calcext:value-type="float">
            <text:p>36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2" office:value-type="float" office:value="0.35" calcext:value-type="float">
            <text:p>0.35</text:p>
          </table:table-cell>
          <table:table-cell table:formula="of:=[$'Presupuesto de ventas'.C7]/2" office:value-type="float" office:value="1800" calcext:value-type="float">
            <text:p>1,800</text:p>
          </table:table-cell>
          <table:table-cell table:style-name="ce293"/>
          <table:table-cell table:formula="of:=[.G25]" office:value-type="float" office:value="630" calcext:value-type="float">
            <text:p>630</text:p>
          </table:table-cell>
          <table:table-cell table:formula="of:=[.C25]*[.D25]" office:value-type="float" office:value="630" calcext:value-type="float">
            <text:p><text:s/>630.00 </text:p>
          </table:table-cell>
          <table:table-cell/>
          <table:table-cell table:style-name="ce317" table:formula="of:=[.I24]/[.I23]" office:value-type="float" office:value="450" calcext:value-type="float">
            <text:p>450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25]" office:value-type="float" office:value="0.35" calcext:value-type="float">
            <text:p>0.35</text:p>
          </table:table-cell>
          <table:table-cell table:formula="of:=[.D25]" office:value-type="float" office:value="1800" calcext:value-type="float">
            <text:p>1,800</text:p>
          </table:table-cell>
          <table:table-cell table:style-name="ce293"/>
          <table:table-cell table:formula="of:=[.G26]" office:value-type="float" office:value="630" calcext:value-type="float">
            <text:p>630</text:p>
          </table:table-cell>
          <table:table-cell table:formula="of:=[.C26]*[.D26]" office:value-type="float" office:value="630" calcext:value-type="float">
            <text:p><text:s/>630.00 </text:p>
          </table:table-cell>
          <table:table-cell table:number-columns-repeated="16377"/>
        </table:table-row>
        <table:table-row table:style-name="ro1">
          <table:table-cell/>
          <table:table-cell table:style-name="ce252" office:value-type="string" calcext:value-type="string">
            <text:p>Costos Indirectos de Fabricacion</text:p>
          </table:table-cell>
          <table:table-cell table:style-name="ce273" table:number-columns-repeated="2"/>
          <table:table-cell table:style-name="ce292" table:number-columns-repeated="2"/>
          <table:table-cell table:style-name="ce300" table:formula="of:=[.G28]+[.G29]" office:value-type="float" office:value="100" calcext:value-type="float">
            <text:p><text:s/>100.00 </text:p>
          </table:table-cell>
          <table:table-cell table:style-name="ce312"/>
          <table:table-cell office:value-type="string" calcext:value-type="string">
            <text:p>yacon</text:p>
          </table:table-cell>
          <table:table-cell/>
          <table:table-cell office:value-type="string" calcext:value-type="string">
            <text:p>mod</text:p>
          </table:table-cell>
          <table:table-cell table:style-name="ce321" table:formula="of:=+[.G24]+[.G43]+[.G62]+[.G82]+[.G102]+[.G122]+[.G143]+[.G164]+[.G185]+[.G207]+[.G229]+[.G251]" office:value-type="float" office:value="15260" calcext:value-type="float">
            <text:p><text:s/>15,260.00 </text:p>
          </table:table-cell>
          <table:table-cell table:style-name="ce152" table:formula="of:=+[.M22]" office:value-type="float" office:value="82800" calcext:value-type="float">
            <text:p><text:s/>82,800.00 </text:p>
          </table:table-cell>
          <table:table-cell table:style-name="ce152" table:formula="of:=+[.L27]/[.M27]" office:value-type="float" office:value="0.184299516908213" calcext:value-type="float">
            <text:p><text:s/>0.18 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8]" office:value-type="float" office:value="100" calcext:value-type="float">
            <text:p>100</text:p>
          </table:table-cell>
          <table:table-cell table:formula="of:=[.C28]*[.D28]" office:value-type="float" office:value="100" calcext:value-type="float">
            <text:p><text:s/>100.00 </text:p>
          </table:table-cell>
          <table:table-cell/>
          <table:table-cell table:style-name="ce318"/>
          <table:table-cell office:value-type="float" office:value="1" calcext:value-type="float">
            <text:p>1</text:p>
          </table:table-cell>
          <table:table-cell/>
          <table:table-cell table:formula="of:=+[.L27]/12" office:value-type="float" office:value="1271.66666666667" calcext:value-type="float">
            <text:p>1271.66666666667</text:p>
          </table:table-cell>
          <table:table-cell office:value-type="string" calcext:value-type="string">
            <text:p>x mes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formula="of:=[.C29]*[.D29]" office:value-type="float" office:value="0" calcext:value-type="float">
            <text:p><text:s/>- <text:s text:c="2"/></text:p>
          </table:table-cell>
          <table:table-cell table:number-columns-repeated="2"/>
          <table:table-cell table:style-name="ce320" office:value-type="float" office:value="3600" calcext:value-type="float">
            <text:p>3,600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7"/>
          <table:table-cell office:value-type="string" calcext:value-type="string">
            <text:p>cif</text:p>
          </table:table-cell>
          <table:table-cell table:style-name="ce321" table:formula="of:=+[.G27]+[.G46]+[.G65]+[.G85]+[.G105]+[.G125]+[.G146]+[.G167]+[.G188]+[.G210]+[.G232]+[.G254]" office:value-type="float" office:value="3359.33333333333" calcext:value-type="float">
            <text:p><text:s/>3,359.33 </text:p>
          </table:table-cell>
          <table:table-cell table:style-name="ce152" table:formula="of:=+[.M27]" office:value-type="float" office:value="82800" calcext:value-type="float">
            <text:p><text:s/>82,800.00 </text:p>
          </table:table-cell>
          <table:table-cell table:style-name="ce152" table:formula="of:=+[.L30]/[.M30]" office:value-type="float" office:value="0.0405716586151369" calcext:value-type="float">
            <text:p><text:s/>0.04 </text:p>
          </table:table-cell>
          <table:table-cell table:number-columns-repeated="16370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18:.E30])" office:value-type="float" office:value="0" calcext:value-type="float">
            <text:p>0</text:p>
          </table:table-cell>
          <table:table-cell table:style-name="ce294" table:formula="of:=SUM([.F18:.F30])" office:value-type="float" office:value="21160" calcext:value-type="float">
            <text:p>21,160</text:p>
          </table:table-cell>
          <table:table-cell table:style-name="ce301" table:formula="of:=[.G19]+[.G24]+[.G27]" office:value-type="float" office:value="21160" calcext:value-type="float">
            <text:p><text:s/>21,160.00 </text:p>
          </table:table-cell>
          <table:table-cell table:style-name="ce313"/>
          <table:table-cell table:number-columns-repeated="3"/>
          <table:table-cell table:style-name="ce152" table:formula="of:=+[.L30]/12" office:value-type="float" office:value="279.944444444444" calcext:value-type="float">
            <text:p><text:s/>279.94 </text:p>
          </table:table-cell>
          <table:table-cell office:value-type="string" calcext:value-type="string">
            <text:p>x mes</text:p>
          </table:table-cell>
          <table:table-cell table:number-columns-repeated="16371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ce152"/>
          <table:table-cell table:number-columns-repeated="16372"/>
        </table:table-row>
        <table:table-row table:style-name="ro9">
          <table:table-cell/>
          <table:table-cell table:style-name="ce256" office:value-type="string" calcext:value-type="string" table:number-columns-spanned="7" table:number-rows-spanned="1">
            <text:p>Costos de produccion mes 2 - 4200 unidades</text:p>
          </table:table-cell>
          <table:covered-table-cell table:number-columns-repeated="6" table:style-name="ce256"/>
          <table:table-cell table:number-columns-repeated="16376"/>
        </table:table-row>
        <table:table-row table:style-name="ro9">
          <table:table-cell/>
          <table:table-cell table:style-name="ce257" office:value-type="string" calcext:value-type="string" table:number-columns-spanned="1" table:number-rows-spanned="2">
            <text:p>RUBRO</text:p>
          </table:table-cell>
          <table:table-cell table:style-name="ce277" office:value-type="string" calcext:value-type="string" table:number-columns-spanned="1" table:number-rows-spanned="2">
            <text:p>COSTO UNITARIO</text:p>
          </table:table-cell>
          <table:table-cell table:style-name="ce277" office:value-type="string" calcext:value-type="string" table:number-columns-spanned="1" table:number-rows-spanned="2">
            <text:p>UNIDADES REQUERIDAS (KG)</text:p>
          </table:table-cell>
          <table:table-cell table:style-name="ce295" office:value-type="string" calcext:value-type="string" table:number-columns-spanned="2" table:number-rows-spanned="1">
            <text:p>COSTO </text:p>
          </table:table-cell>
          <table:covered-table-cell table:style-name="ce297"/>
          <table:table-cell table:style-name="ce257" office:value-type="string" calcext:value-type="string" table:number-columns-spanned="1" table:number-rows-spanned="2">
            <text:p>TOTAL</text:p>
          </table:table-cell>
          <table:table-cell table:style-name="ce307"/>
          <table:table-cell table:number-columns-repeated="16376"/>
        </table:table-row>
        <table:table-row table:style-name="ro20">
          <table:table-cell/>
          <table:covered-table-cell table:style-name="ce250"/>
          <table:covered-table-cell table:number-columns-repeated="2" table:style-name="ce271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covered-table-cell table:style-name="ce250"/>
          <table:table-cell table:style-name="ce308"/>
          <table:table-cell table:number-columns-repeated="16376"/>
        </table:table-row>
        <table:table-row table:style-name="ro9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39]+[.G40]+[.G41]" office:value-type="float" office:value="23100" calcext:value-type="float">
            <text:p><text:s/>23,100.00 </text:p>
          </table:table-cell>
          <table:table-cell table:style-name="ce314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20]" office:value-type="float" office:value="20" calcext:value-type="float">
            <text:p>20.00</text:p>
          </table:table-cell>
          <table:table-cell table:style-name="ce253" table:formula="of:=[.I44]" office:value-type="float" office:value="525" calcext:value-type="float">
            <text:p>525</text:p>
          </table:table-cell>
          <table:table-cell/>
          <table:table-cell table:formula="of:=[.G39]" office:value-type="float" office:value="10500" calcext:value-type="float">
            <text:p>10,500</text:p>
          </table:table-cell>
          <table:table-cell table:formula="of:=[.D39]*[.C39]" office:value-type="float" office:value="10500" calcext:value-type="float">
            <text:p><text:s/>10,500.00 </text:p>
          </table:table-cell>
          <table:table-cell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21]" office:value-type="float" office:value="3" calcext:value-type="float">
            <text:p>3.00</text:p>
          </table:table-cell>
          <table:table-cell table:style-name="ce253" table:formula="of:=[.J46]" office:value-type="float" office:value="2100" calcext:value-type="float">
            <text:p>2,100</text:p>
          </table:table-cell>
          <table:table-cell/>
          <table:table-cell table:formula="of:=[.G40]" office:value-type="float" office:value="6300" calcext:value-type="float">
            <text:p>6,300</text:p>
          </table:table-cell>
          <table:table-cell table:formula="of:=[.C40]*[.D40]" office:value-type="float" office:value="6300" calcext:value-type="float">
            <text:p><text:s/>6,3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40]*[.J39])/[.I39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43]" office:value-type="float" office:value="4200" calcext:value-type="float">
            <text:p>4,200</text:p>
          </table:table-cell>
          <table:table-cell/>
          <table:table-cell table:formula="of:=[.G41]" office:value-type="float" office:value="6300" calcext:value-type="float">
            <text:p>6,300</text:p>
          </table:table-cell>
          <table:table-cell table:formula="of:=[.C41]*[.D41]" office:value-type="float" office:value="6300" calcext:value-type="float">
            <text:p><text:s/>6,3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table:formula="of:=[.I39]/[.I40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[.G44]+[.G45]" office:value-type="float" office:value="1470" calcext:value-type="float">
            <text:p><text:s/>1,470.00 </text:p>
          </table:table-cell>
          <table:table-cell table:style-name="ce314"/>
          <table:table-cell table:style-name="ce317" office:value-type="float" office:value="4200" calcext:value-type="float">
            <text:p>42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2" office:value-type="float" office:value="0.35" calcext:value-type="float">
            <text:p>0.35</text:p>
          </table:table-cell>
          <table:table-cell table:formula="of:=[$'Presupuesto de ventas'.D7]/2" office:value-type="float" office:value="2100" calcext:value-type="float">
            <text:p>2,100</text:p>
          </table:table-cell>
          <table:table-cell table:style-name="ce293"/>
          <table:table-cell table:formula="of:=[.G44]" office:value-type="float" office:value="735" calcext:value-type="float">
            <text:p>735</text:p>
          </table:table-cell>
          <table:table-cell table:formula="of:=[.C44]*[.D44]" office:value-type="float" office:value="735" calcext:value-type="float">
            <text:p><text:s/>735.00 </text:p>
          </table:table-cell>
          <table:table-cell/>
          <table:table-cell table:style-name="ce317" table:formula="of:=[.I43]/[.I42]" office:value-type="float" office:value="525" calcext:value-type="float">
            <text:p>525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44]" office:value-type="float" office:value="0.35" calcext:value-type="float">
            <text:p>0.35</text:p>
          </table:table-cell>
          <table:table-cell table:formula="of:=[.D44]" office:value-type="float" office:value="2100" calcext:value-type="float">
            <text:p>2,100</text:p>
          </table:table-cell>
          <table:table-cell table:style-name="ce293"/>
          <table:table-cell table:formula="of:=[.G45]" office:value-type="float" office:value="735" calcext:value-type="float">
            <text:p>735</text:p>
          </table:table-cell>
          <table:table-cell table:formula="of:=[.C45]*[.D45]" office:value-type="float" office:value="735" calcext:value-type="float">
            <text:p><text:s/>735.00 </text:p>
          </table:table-cell>
          <table:table-cell table:number-columns-repeated="16377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47]+[.G48]" office:value-type="float" office:value="100" calcext:value-type="float">
            <text:p><text:s/>100.00 </text:p>
          </table:table-cell>
          <table:table-cell table:style-name="ce315"/>
          <table:table-cell office:value-type="string" calcext:value-type="string">
            <text:p>yacon</text:p>
          </table:table-cell>
          <table:table-cell table:formula="of:=[.I43]/2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]" office:value-type="float" office:value="100" calcext:value-type="float">
            <text:p>100</text:p>
          </table:table-cell>
          <table:table-cell table:formula="of:=[.C47]*[.D47]" office:value-type="float" office:value="100" calcext:value-type="float">
            <text:p><text:s/>100.00 </text:p>
          </table:table-cell>
          <table:table-cell/>
          <table:table-cell table:style-name="ce318"/>
          <table:table-cell table:number-columns-repeated="16375"/>
        </table:table-row>
        <table:table-row table:style-name="ro1">
          <table:table-cell table:number-columns-repeated="2"/>
          <table:table-cell table:style-name="ce254"/>
          <table:table-cell table:number-columns-repeated="6"/>
          <table:table-cell table:style-name="ce320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37:.E49])" office:value-type="float" office:value="0" calcext:value-type="float">
            <text:p>0</text:p>
          </table:table-cell>
          <table:table-cell table:style-name="ce294" table:formula="of:=SUM([.F37:.F49])" office:value-type="float" office:value="24670" calcext:value-type="float">
            <text:p>24,670</text:p>
          </table:table-cell>
          <table:table-cell table:style-name="ce301" table:formula="of:=[.G38]+[.G43]+[.G46]" office:value-type="float" office:value="24670" calcext:value-type="float">
            <text:p><text:s/>24,670.00 </text:p>
          </table:table-cell>
          <table:table-cell table:style-name="ce313" table:formula="of:=SUM([.H38:.H49])" office:value-type="float" office:value="0" calcext:value-type="float">
            <text:p><text:s/>- <text:s text:c="2"/>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8">
          <table:table-cell/>
          <table:table-cell table:style-name="ce259" office:value-type="string" calcext:value-type="string" table:number-columns-spanned="7" table:number-rows-spanned="1">
            <text:p>Costos de produccion mes 3 - 4800 unidades</text:p>
          </table:table-cell>
          <table:covered-table-cell table:number-columns-repeated="6" table:style-name="ce279"/>
          <table:table-cell table:number-columns-repeated="16376"/>
        </table:table-row>
        <table:table-row table:style-name="ro21">
          <table:table-cell/>
          <table:table-cell table:style-name="ce51" office:value-type="string" calcext:value-type="string">
            <text:p>RUBRO</text:p>
          </table:table-cell>
          <table:table-cell table:style-name="ce40" office:value-type="string" calcext:value-type="string">
            <text:p>COSTO UNITARIO</text:p>
          </table:table-cell>
          <table:table-cell table:style-name="ce40" office:value-type="string" calcext:value-type="string">
            <text:p>UNIDADES REQUERIDAS (KG)</text:p>
          </table:table-cell>
          <table:table-cell table:style-name="ce290" office:value-type="string" calcext:value-type="string">
            <text:p>COSTO </text:p>
          </table:table-cell>
          <table:table-cell table:style-name="ce250"/>
          <table:table-cell table:style-name="ce51" office:value-type="string" calcext:value-type="string">
            <text:p>TOTAL</text:p>
          </table:table-cell>
          <table:table-cell table:style-name="ce307"/>
          <table:table-cell table:number-columns-repeated="16376"/>
        </table:table-row>
        <table:table-row table:style-name="ro1">
          <table:table-cell/>
          <table:table-cell table:style-name="ce250"/>
          <table:table-cell table:style-name="ce271" table:number-columns-repeated="2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table-cell table:style-name="ce250"/>
          <table:table-cell table:style-name="ce308"/>
          <table:table-cell table:number-columns-repeated="16376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2" office:value-type="string" calcext:value-type="string">
            <text:p><text:s/>Materia Prima Directa</text:p>
          </table:table-cell>
          <table:table-cell table:style-name="ce273" table:number-columns-repeated="4"/>
          <table:table-cell table:style-name="ce299" table:formula="of:=[.G58]+[.G59]+[.G60]" office:value-type="float" office:value="26400" calcext:value-type="float">
            <text:p><text:s/>26,400.00 </text:p>
          </table:table-cell>
          <table:table-cell table:style-name="ce310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20]" office:value-type="float" office:value="20" calcext:value-type="float">
            <text:p>20.00</text:p>
          </table:table-cell>
          <table:table-cell table:style-name="ce253" table:formula="of:=[.I63]" office:value-type="float" office:value="600" calcext:value-type="float">
            <text:p>600</text:p>
          </table:table-cell>
          <table:table-cell/>
          <table:table-cell table:formula="of:=[.G58]" office:value-type="float" office:value="12000" calcext:value-type="float">
            <text:p>12,000</text:p>
          </table:table-cell>
          <table:table-cell table:formula="of:=[.D58]*[.C58]" office:value-type="float" office:value="12000" calcext:value-type="float">
            <text:p><text:s/>12,000.00 </text:p>
          </table:table-cell>
          <table:table-cell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21]" office:value-type="float" office:value="3" calcext:value-type="float">
            <text:p>3.00</text:p>
          </table:table-cell>
          <table:table-cell table:style-name="ce253" table:formula="of:=[.J65]" office:value-type="float" office:value="2400" calcext:value-type="float">
            <text:p>2,400</text:p>
          </table:table-cell>
          <table:table-cell/>
          <table:table-cell table:formula="of:=[.G59]" office:value-type="float" office:value="7200" calcext:value-type="float">
            <text:p>7,200</text:p>
          </table:table-cell>
          <table:table-cell table:formula="of:=[.C59]*[.D59]" office:value-type="float" office:value="7200" calcext:value-type="float">
            <text:p><text:s/>7,2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59]*[.J58])/[.I58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62]" office:value-type="float" office:value="4800" calcext:value-type="float">
            <text:p>4,800</text:p>
          </table:table-cell>
          <table:table-cell/>
          <table:table-cell table:formula="of:=[.G60]" office:value-type="float" office:value="7200" calcext:value-type="float">
            <text:p>7,200</text:p>
          </table:table-cell>
          <table:table-cell table:formula="of:=[.C60]*[.D60]" office:value-type="float" office:value="7200" calcext:value-type="float">
            <text:p><text:s/>7,2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table:formula="of:=[.I58]/[.I59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252" office:value-type="string" calcext:value-type="string">
            <text:p><text:s/>Mano de Obra Directa</text:p>
          </table:table-cell>
          <table:table-cell table:style-name="ce273" table:number-columns-repeated="2"/>
          <table:table-cell table:style-name="ce292" table:number-columns-repeated="2"/>
          <table:table-cell table:style-name="ce299" table:formula="of:=[.G63]+[.G64]+[.G65]" office:value-type="float" office:value="1120" calcext:value-type="float">
            <text:p><text:s/>1,120.00 </text:p>
          </table:table-cell>
          <table:table-cell table:style-name="ce310"/>
          <table:table-cell table:style-name="ce317" office:value-type="float" office:value="4800" calcext:value-type="float">
            <text:p>48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3" office:value-type="float" office:value="0.233333333333333" calcext:value-type="float">
            <text:p>0.23</text:p>
          </table:table-cell>
          <table:table-cell table:formula="of:=[$'Presupuesto de ventas'.E7]/3" office:value-type="float" office:value="1600" calcext:value-type="float">
            <text:p>1,600</text:p>
          </table:table-cell>
          <table:table-cell table:style-name="ce293"/>
          <table:table-cell table:formula="of:=[.G63]" office:value-type="float" office:value="373.333333333333" calcext:value-type="float">
            <text:p>373</text:p>
          </table:table-cell>
          <table:table-cell table:formula="of:=[.C63]*[.D63]" office:value-type="float" office:value="373.333333333333" calcext:value-type="float">
            <text:p><text:s/>373.33 </text:p>
          </table:table-cell>
          <table:table-cell/>
          <table:table-cell table:style-name="ce317" table:formula="of:=[.I62]/[.I61]" office:value-type="float" office:value="600" calcext:value-type="float">
            <text:p>600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63]" office:value-type="float" office:value="0.233333333333333" calcext:value-type="float">
            <text:p>0.23</text:p>
          </table:table-cell>
          <table:table-cell table:formula="of:=[.D63]" office:value-type="float" office:value="1600" calcext:value-type="float">
            <text:p>1,600</text:p>
          </table:table-cell>
          <table:table-cell table:style-name="ce293"/>
          <table:table-cell table:formula="of:=[.G64]" office:value-type="float" office:value="373.333333333333" calcext:value-type="float">
            <text:p>373</text:p>
          </table:table-cell>
          <table:table-cell table:formula="of:=[.C64]*[.D64]" office:value-type="float" office:value="373.333333333333" calcext:value-type="float">
            <text:p><text:s/>373.33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3</text:p>
          </table:table-cell>
          <table:table-cell table:formula="of:=[.C64]" office:value-type="float" office:value="0.233333333333333" calcext:value-type="float">
            <text:p>0.23</text:p>
          </table:table-cell>
          <table:table-cell table:formula="of:=[.D64]" office:value-type="float" office:value="1600" calcext:value-type="float">
            <text:p>1,600</text:p>
          </table:table-cell>
          <table:table-cell table:style-name="ce293"/>
          <table:table-cell table:formula="of:=[.G65]" office:value-type="float" office:value="373.333333333333" calcext:value-type="float">
            <text:p>373</text:p>
          </table:table-cell>
          <table:table-cell table:formula="of:=[.C65]*[.D65]" office:value-type="float" office:value="373.333333333333" calcext:value-type="float">
            <text:p><text:s/>373.33 </text:p>
          </table:table-cell>
          <table:table-cell/>
          <table:table-cell office:value-type="string" calcext:value-type="string">
            <text:p>yacon</text:p>
          </table:table-cell>
          <table:table-cell table:formula="of:=[.I62]/2" office:value-type="float" office:value="2400" calcext:value-type="float">
            <text:p>2400</text:p>
          </table:table-cell>
          <table:table-cell table:number-columns-repeated="16374"/>
        </table:table-row>
        <table:table-row table:style-name="ro1">
          <table:table-cell/>
          <table:table-cell table:style-name="ce252" office:value-type="string" calcext:value-type="string">
            <text:p>Costos Indirectos de Fabricacion</text:p>
          </table:table-cell>
          <table:table-cell table:style-name="ce273" table:number-columns-repeated="2"/>
          <table:table-cell table:style-name="ce292" table:number-columns-repeated="2"/>
          <table:table-cell table:style-name="ce300" table:formula="of:=[.G67]+[.G68]" office:value-type="float" office:value="100" calcext:value-type="float">
            <text:p><text:s/>100.00 </text:p>
          </table:table-cell>
          <table:table-cell table:style-name="ce312"/>
          <table:table-cell table:style-name="ce318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7]" office:value-type="float" office:value="100" calcext:value-type="float">
            <text:p>100</text:p>
          </table:table-cell>
          <table:table-cell table:style-name="ce304" table:formula="of:=[.C67]*[.D67]" office:value-type="float" office:value="100" calcext:value-type="float">
            <text:p><text:s/>100 </text:p>
          </table:table-cell>
          <table:table-cell table:number-columns-repeated="2"/>
          <table:table-cell table:style-name="ce320"/>
          <table:table-cell table:number-columns-repeated="16374"/>
        </table:table-row>
        <table:table-row table:style-name="ro1" table:number-rows-repeated="2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56:.E69])" office:value-type="float" office:value="0" calcext:value-type="float">
            <text:p>0</text:p>
          </table:table-cell>
          <table:table-cell table:style-name="ce294" table:formula="of:=SUM([.F56:.F69])" office:value-type="float" office:value="27620" calcext:value-type="float">
            <text:p>27,620</text:p>
          </table:table-cell>
          <table:table-cell table:style-name="ce301" table:formula="of:=[.G57]+[.G62]+[.G66]" office:value-type="float" office:value="27620" calcext:value-type="float">
            <text:p><text:s/>27,620.00 </text:p>
          </table:table-cell>
          <table:table-cell table:style-name="ce313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22">
          <table:table-cell/>
          <table:table-cell table:style-name="ce260" office:value-type="string" calcext:value-type="string" table:number-columns-spanned="7" table:number-rows-spanned="1">
            <text:p>Costos de produccion mes 4 - 5400 unidades</text:p>
          </table:table-cell>
          <table:covered-table-cell table:number-columns-repeated="6" table:style-name="ce280"/>
          <table:table-cell table:number-columns-repeated="16376"/>
        </table:table-row>
        <table:table-row table:style-name="ro21">
          <table:table-cell/>
          <table:table-cell table:style-name="ce51" office:value-type="string" calcext:value-type="string">
            <text:p>RUBRO</text:p>
          </table:table-cell>
          <table:table-cell table:style-name="ce40" office:value-type="string" calcext:value-type="string">
            <text:p>COSTO UNITARIO</text:p>
          </table:table-cell>
          <table:table-cell table:style-name="ce40" office:value-type="string" calcext:value-type="string">
            <text:p>UNIDADES REQUERIDAS (KG)</text:p>
          </table:table-cell>
          <table:table-cell table:style-name="ce290" office:value-type="string" calcext:value-type="string">
            <text:p>COSTO </text:p>
          </table:table-cell>
          <table:table-cell table:style-name="ce250"/>
          <table:table-cell table:style-name="ce51" office:value-type="string" calcext:value-type="string">
            <text:p>TOTAL</text:p>
          </table:table-cell>
          <table:table-cell table:style-name="ce307"/>
          <table:table-cell table:number-columns-repeated="16376"/>
        </table:table-row>
        <table:table-row table:style-name="ro1">
          <table:table-cell/>
          <table:table-cell table:style-name="ce250"/>
          <table:table-cell table:style-name="ce271" table:number-columns-repeated="2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table-cell table:style-name="ce250"/>
          <table:table-cell table:style-name="ce308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78]+[.G79]+[.G80]" office:value-type="float" office:value="29700" calcext:value-type="float">
            <text:p><text:s/>29,700.00 </text:p>
          </table:table-cell>
          <table:table-cell table:style-name="ce314"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58]" office:value-type="float" office:value="20" calcext:value-type="float">
            <text:p>20.00</text:p>
          </table:table-cell>
          <table:table-cell table:style-name="ce253" table:formula="of:=[.I82]" office:value-type="float" office:value="675" calcext:value-type="float">
            <text:p>675</text:p>
          </table:table-cell>
          <table:table-cell/>
          <table:table-cell table:formula="of:=[.G78]" office:value-type="float" office:value="13500" calcext:value-type="float">
            <text:p>13,500</text:p>
          </table:table-cell>
          <table:table-cell table:formula="of:=[.D78]*[.C78]" office:value-type="float" office:value="13500" calcext:value-type="float">
            <text:p><text:s/>13,5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78]*[.J77])/[.I77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59]" office:value-type="float" office:value="3" calcext:value-type="float">
            <text:p>3.00</text:p>
          </table:table-cell>
          <table:table-cell table:style-name="ce253" table:formula="of:=[.J84]" office:value-type="float" office:value="2700" calcext:value-type="float">
            <text:p>2,700</text:p>
          </table:table-cell>
          <table:table-cell/>
          <table:table-cell table:formula="of:=[.G79]" office:value-type="float" office:value="8100" calcext:value-type="float">
            <text:p>8,100</text:p>
          </table:table-cell>
          <table:table-cell table:formula="of:=[.C79]*[.D79]" office:value-type="float" office:value="8100" calcext:value-type="float">
            <text:p><text:s/>8,1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81]" office:value-type="float" office:value="5400" calcext:value-type="float">
            <text:p>5,400</text:p>
          </table:table-cell>
          <table:table-cell/>
          <table:table-cell table:formula="of:=[.G80]" office:value-type="float" office:value="8100" calcext:value-type="float">
            <text:p>8,100</text:p>
          </table:table-cell>
          <table:table-cell table:formula="of:=[.C80]*[.D80]" office:value-type="float" office:value="8100" calcext:value-type="float">
            <text:p><text:s/>8,100.00 </text:p>
          </table:table-cell>
          <table:table-cell/>
          <table:table-cell table:style-name="ce317" table:formula="of:=[.I77]/[.I78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office:value-type="float" office:value="5400" calcext:value-type="float">
            <text:p>54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[.G83]+[.G84]+[.G85]" office:value-type="float" office:value="1260" calcext:value-type="float">
            <text:p><text:s/>1,260.00 </text:p>
          </table:table-cell>
          <table:table-cell table:style-name="ce314"/>
          <table:table-cell table:style-name="ce317" table:formula="of:=[.I81]/[.I80]" office:value-type="float" office:value="675" calcext:value-type="float">
            <text:p>675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3" office:value-type="float" office:value="0.233333333333333" calcext:value-type="float">
            <text:p>0.23</text:p>
          </table:table-cell>
          <table:table-cell table:formula="of:=[$'Presupuesto de ventas'.F7]/3" office:value-type="float" office:value="1800" calcext:value-type="float">
            <text:p>1,800</text:p>
          </table:table-cell>
          <table:table-cell table:style-name="ce293"/>
          <table:table-cell table:formula="of:=[.G83]" office:value-type="float" office:value="420" calcext:value-type="float">
            <text:p>420</text:p>
          </table:table-cell>
          <table:table-cell table:formula="of:=[.C83]*[.D83]" office:value-type="float" office:value="420" calcext:value-type="float">
            <text:p><text:s/>420.00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83]" office:value-type="float" office:value="0.233333333333333" calcext:value-type="float">
            <text:p>0.23</text:p>
          </table:table-cell>
          <table:table-cell table:formula="of:=[.D83]" office:value-type="float" office:value="1800" calcext:value-type="float">
            <text:p>1,800</text:p>
          </table:table-cell>
          <table:table-cell table:style-name="ce293"/>
          <table:table-cell table:formula="of:=[.G84]" office:value-type="float" office:value="420" calcext:value-type="float">
            <text:p>420</text:p>
          </table:table-cell>
          <table:table-cell table:formula="of:=[.C84]*[.D84]" office:value-type="float" office:value="420" calcext:value-type="float">
            <text:p><text:s/>420.00 </text:p>
          </table:table-cell>
          <table:table-cell/>
          <table:table-cell office:value-type="string" calcext:value-type="string">
            <text:p>yacon</text:p>
          </table:table-cell>
          <table:table-cell table:formula="of:=[.I81]/2" office:value-type="float" office:value="2700" calcext:value-type="float">
            <text:p>27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3</text:p>
          </table:table-cell>
          <table:table-cell table:formula="of:=[.C84]" office:value-type="float" office:value="0.233333333333333" calcext:value-type="float">
            <text:p>0.23</text:p>
          </table:table-cell>
          <table:table-cell table:formula="of:=[.D84]" office:value-type="float" office:value="1800" calcext:value-type="float">
            <text:p>1,800</text:p>
          </table:table-cell>
          <table:table-cell table:style-name="ce293"/>
          <table:table-cell table:formula="of:=[.G85]" office:value-type="float" office:value="420" calcext:value-type="float">
            <text:p>420</text:p>
          </table:table-cell>
          <table:table-cell table:formula="of:=[.C85]*[.D85]" office:value-type="float" office:value="420" calcext:value-type="float">
            <text:p><text:s/>420.00 </text:p>
          </table:table-cell>
          <table:table-cell/>
          <table:table-cell table:style-name="ce318"/>
          <table:table-cell table:number-columns-repeated="16375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87]+[.G88]" office:value-type="float" office:value="200" calcext:value-type="float">
            <text:p><text:s/>200.00 </text:p>
          </table:table-cell>
          <table:table-cell table:style-name="ce315"/>
          <table:table-cell/>
          <table:table-cell table:style-name="ce320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87]" office:value-type="float" office:value="200" calcext:value-type="float">
            <text:p>200</text:p>
          </table:table-cell>
          <table:table-cell table:formula="of:=[.C87]*[.D87]" office:value-type="float" office:value="200" calcext:value-type="float">
            <text:p><text:s/>200.00 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76:.E89])" office:value-type="float" office:value="0" calcext:value-type="float">
            <text:p>0</text:p>
          </table:table-cell>
          <table:table-cell table:style-name="ce294" table:formula="of:=SUM([.F76:.F89])" office:value-type="float" office:value="31160" calcext:value-type="float">
            <text:p>31,160</text:p>
          </table:table-cell>
          <table:table-cell table:style-name="ce301" table:formula="of:=[.G77]+[.G82]+[.G86]" office:value-type="float" office:value="31160" calcext:value-type="float">
            <text:p><text:s/>31,160.00 </text:p>
          </table:table-cell>
          <table:table-cell table:style-name="ce313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8">
          <table:table-cell/>
          <table:table-cell table:style-name="ce261" office:value-type="string" calcext:value-type="string" table:number-columns-spanned="7" table:number-rows-spanned="1">
            <text:p>costos de produccion mes 5- 6000 unidades</text:p>
          </table:table-cell>
          <table:covered-table-cell table:number-columns-repeated="6" table:style-name="ce281"/>
          <table:table-cell table:number-columns-repeated="16376"/>
        </table:table-row>
        <table:table-row table:style-name="ro1">
          <table:table-cell/>
          <table:table-cell table:style-name="ce5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" table:number-rows-spanned="2">
            <text:p>COSTO UNITARIO</text:p>
          </table:table-cell>
          <table:table-cell table:style-name="ce40" office:value-type="string" calcext:value-type="string" table:number-columns-spanned="1" table:number-rows-spanned="2">
            <text:p>UNIDADES REQUERIDAS (KG)</text:p>
          </table:table-cell>
          <table:table-cell table:style-name="ce290" office:value-type="string" calcext:value-type="string" table:number-columns-spanned="2" table:number-rows-spanned="1">
            <text:p>COSTO </text:p>
          </table:table-cell>
          <table:covered-table-cell table:style-name="ce250"/>
          <table:table-cell table:style-name="ce51" office:value-type="string" calcext:value-type="string" table:number-columns-spanned="1" table:number-rows-spanned="2">
            <text:p>TOTAL</text:p>
          </table:table-cell>
          <table:table-cell table:style-name="ce307"/>
          <table:table-cell table:number-columns-repeated="16376"/>
        </table:table-row>
        <table:table-row table:style-name="ro1">
          <table:table-cell/>
          <table:covered-table-cell table:style-name="ce250"/>
          <table:covered-table-cell table:number-columns-repeated="2" table:style-name="ce271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covered-table-cell table:style-name="ce250"/>
          <table:table-cell table:style-name="ce308"/>
          <table:table-cell table:number-columns-repeated="16376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98]+[.G99]+[.G100]" office:value-type="float" office:value="33000" calcext:value-type="float">
            <text:p><text:s/>33,000.00 </text:p>
          </table:table-cell>
          <table:table-cell table:style-name="ce314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58]" office:value-type="float" office:value="20" calcext:value-type="float">
            <text:p>20.00</text:p>
          </table:table-cell>
          <table:table-cell table:style-name="ce253" table:formula="of:=[.I103]" office:value-type="float" office:value="750" calcext:value-type="float">
            <text:p>750</text:p>
          </table:table-cell>
          <table:table-cell/>
          <table:table-cell table:formula="of:=[.G98]" office:value-type="float" office:value="15000" calcext:value-type="float">
            <text:p>15,000</text:p>
          </table:table-cell>
          <table:table-cell table:formula="of:=[.D98]*[.C98]" office:value-type="float" office:value="15000" calcext:value-type="float">
            <text:p><text:s/>15,000.00 </text:p>
          </table:table-cell>
          <table:table-cell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59]" office:value-type="float" office:value="3" calcext:value-type="float">
            <text:p>3.00</text:p>
          </table:table-cell>
          <table:table-cell table:style-name="ce253" table:formula="of:=[.J105]" office:value-type="float" office:value="3000" calcext:value-type="float">
            <text:p>3,000</text:p>
          </table:table-cell>
          <table:table-cell/>
          <table:table-cell table:formula="of:=[.G99]" office:value-type="float" office:value="9000" calcext:value-type="float">
            <text:p>9,000</text:p>
          </table:table-cell>
          <table:table-cell table:formula="of:=[.C99]*[.D99]" office:value-type="float" office:value="9000" calcext:value-type="float">
            <text:p><text:s/>9,0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99]*[.J98])/[.I98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102]" office:value-type="float" office:value="6000" calcext:value-type="float">
            <text:p>6,000</text:p>
          </table:table-cell>
          <table:table-cell/>
          <table:table-cell table:formula="of:=[.G100]" office:value-type="float" office:value="9000" calcext:value-type="float">
            <text:p>9,000</text:p>
          </table:table-cell>
          <table:table-cell table:formula="of:=[.C100]*[.D100]" office:value-type="float" office:value="9000" calcext:value-type="float">
            <text:p><text:s/>9,0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table:formula="of:=[.I98]/[.I99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[.G103]+[.G104]+[.G105]" office:value-type="float" office:value="1400" calcext:value-type="float">
            <text:p><text:s/>1,400.00 </text:p>
          </table:table-cell>
          <table:table-cell table:style-name="ce314"/>
          <table:table-cell table:style-name="ce317" office:value-type="float" office:value="6000" calcext:value-type="float">
            <text:p>60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3" office:value-type="float" office:value="0.233333333333333" calcext:value-type="float">
            <text:p>0.23</text:p>
          </table:table-cell>
          <table:table-cell table:formula="of:=[$'Presupuesto de ventas'.G7]/3" office:value-type="float" office:value="2000" calcext:value-type="float">
            <text:p>2,000</text:p>
          </table:table-cell>
          <table:table-cell table:style-name="ce293"/>
          <table:table-cell table:formula="of:=[.G103]" office:value-type="float" office:value="466.666666666667" calcext:value-type="float">
            <text:p>467</text:p>
          </table:table-cell>
          <table:table-cell table:formula="of:=[.C103]*[.D103]" office:value-type="float" office:value="466.666666666667" calcext:value-type="float">
            <text:p><text:s/>466.67 </text:p>
          </table:table-cell>
          <table:table-cell/>
          <table:table-cell table:style-name="ce317" table:formula="of:=[.I102]/[.I101]" office:value-type="float" office:value="750" calcext:value-type="float">
            <text:p>750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103]" office:value-type="float" office:value="0.233333333333333" calcext:value-type="float">
            <text:p>0.23</text:p>
          </table:table-cell>
          <table:table-cell table:formula="of:=[.D103]" office:value-type="float" office:value="2000" calcext:value-type="float">
            <text:p>2,000</text:p>
          </table:table-cell>
          <table:table-cell table:style-name="ce293"/>
          <table:table-cell table:formula="of:=[.G104]" office:value-type="float" office:value="466.666666666667" calcext:value-type="float">
            <text:p>467</text:p>
          </table:table-cell>
          <table:table-cell table:formula="of:=[.C104]*[.D104]" office:value-type="float" office:value="466.666666666667" calcext:value-type="float">
            <text:p><text:s/>466.67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3</text:p>
          </table:table-cell>
          <table:table-cell table:formula="of:=[.C104]" office:value-type="float" office:value="0.233333333333333" calcext:value-type="float">
            <text:p>0.23</text:p>
          </table:table-cell>
          <table:table-cell table:formula="of:=[.D104]" office:value-type="float" office:value="2000" calcext:value-type="float">
            <text:p>2,000</text:p>
          </table:table-cell>
          <table:table-cell table:style-name="ce293"/>
          <table:table-cell table:formula="of:=[.G105]" office:value-type="float" office:value="466.666666666667" calcext:value-type="float">
            <text:p>467</text:p>
          </table:table-cell>
          <table:table-cell table:formula="of:=[.C105]*[.D105]" office:value-type="float" office:value="466.666666666667" calcext:value-type="float">
            <text:p><text:s/>466.67 </text:p>
          </table:table-cell>
          <table:table-cell/>
          <table:table-cell office:value-type="string" calcext:value-type="string">
            <text:p>yacon</text:p>
          </table:table-cell>
          <table:table-cell table:formula="of:=[.I102]/2" office:value-type="float" office:value="3000" calcext:value-type="float">
            <text:p>3000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107]+[.G108]" office:value-type="float" office:value="200" calcext:value-type="float">
            <text:p><text:s/>200.00 </text:p>
          </table:table-cell>
          <table:table-cell table:style-name="ce315"/>
          <table:table-cell table:style-name="ce318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07]" office:value-type="float" office:value="200" calcext:value-type="float">
            <text:p>200</text:p>
          </table:table-cell>
          <table:table-cell table:formula="of:=[.C107]*[.D107]" office:value-type="float" office:value="200" calcext:value-type="float">
            <text:p><text:s/>200.00 </text:p>
          </table:table-cell>
          <table:table-cell table:number-columns-repeated="2"/>
          <table:table-cell table:style-name="ce320"/>
          <table:table-cell table:number-columns-repeated="16374"/>
        </table:table-row>
        <table:table-row table:style-name="ro1" table:number-rows-repeated="2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96:.E109])" office:value-type="float" office:value="0" calcext:value-type="float">
            <text:p>0</text:p>
          </table:table-cell>
          <table:table-cell table:style-name="ce294" table:formula="of:=SUM([.F96:.F109])" office:value-type="float" office:value="34600" calcext:value-type="float">
            <text:p>34,600</text:p>
          </table:table-cell>
          <table:table-cell table:style-name="ce301" table:formula="of:=[.G97]+[.G102]+[.G106]" office:value-type="float" office:value="34600" calcext:value-type="float">
            <text:p><text:s/>34,600.00 </text:p>
          </table:table-cell>
          <table:table-cell table:style-name="ce313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8">
          <table:table-cell/>
          <table:table-cell table:style-name="ce261" office:value-type="string" calcext:value-type="string" table:number-columns-spanned="7" table:number-rows-spanned="1">
            <text:p>costos de produccion mes 6 - 6600 unidades</text:p>
          </table:table-cell>
          <table:covered-table-cell table:number-columns-repeated="6" table:style-name="ce281"/>
          <table:table-cell table:number-columns-repeated="16376"/>
        </table:table-row>
        <table:table-row table:style-name="ro1">
          <table:table-cell/>
          <table:table-cell table:style-name="ce5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" table:number-rows-spanned="2">
            <text:p>COSTO UNITARIO</text:p>
          </table:table-cell>
          <table:table-cell table:style-name="ce40" office:value-type="string" calcext:value-type="string" table:number-columns-spanned="1" table:number-rows-spanned="2">
            <text:p>UNIDADES REQUERIDAS (KG)</text:p>
          </table:table-cell>
          <table:table-cell table:style-name="ce290" office:value-type="string" calcext:value-type="string" table:number-columns-spanned="2" table:number-rows-spanned="1">
            <text:p>COSTO </text:p>
          </table:table-cell>
          <table:covered-table-cell table:style-name="ce250"/>
          <table:table-cell table:style-name="ce51" office:value-type="string" calcext:value-type="string" table:number-columns-spanned="1" table:number-rows-spanned="2">
            <text:p>TOTAL</text:p>
          </table:table-cell>
          <table:table-cell table:style-name="ce307"/>
          <table:table-cell table:number-columns-repeated="16376"/>
        </table:table-row>
        <table:table-row table:style-name="ro1">
          <table:table-cell/>
          <table:covered-table-cell table:style-name="ce250"/>
          <table:covered-table-cell table:number-columns-repeated="2" table:style-name="ce271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covered-table-cell table:style-name="ce250"/>
          <table:table-cell table:style-name="ce308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118]+[.G119]+[.G120]" office:value-type="float" office:value="36300" calcext:value-type="float">
            <text:p><text:s/>36,300.00 </text:p>
          </table:table-cell>
          <table:table-cell table:style-name="ce314"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98]" office:value-type="float" office:value="20" calcext:value-type="float">
            <text:p>20.00</text:p>
          </table:table-cell>
          <table:table-cell table:style-name="ce253" table:formula="of:=[.I122]" office:value-type="float" office:value="825" calcext:value-type="float">
            <text:p>825</text:p>
          </table:table-cell>
          <table:table-cell/>
          <table:table-cell table:formula="of:=[.G118]" office:value-type="float" office:value="16500" calcext:value-type="float">
            <text:p>16,500</text:p>
          </table:table-cell>
          <table:table-cell table:formula="of:=[.D118]*[.C118]" office:value-type="float" office:value="16500" calcext:value-type="float">
            <text:p><text:s/>16,5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118]*[.J117])/[.I117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99]" office:value-type="float" office:value="3" calcext:value-type="float">
            <text:p>3.00</text:p>
          </table:table-cell>
          <table:table-cell table:style-name="ce253" table:formula="of:=[.J124]" office:value-type="float" office:value="3300" calcext:value-type="float">
            <text:p>3,300</text:p>
          </table:table-cell>
          <table:table-cell/>
          <table:table-cell table:formula="of:=[.G119]" office:value-type="float" office:value="9900" calcext:value-type="float">
            <text:p>9,900</text:p>
          </table:table-cell>
          <table:table-cell table:formula="of:=[.C119]*[.D119]" office:value-type="float" office:value="9900" calcext:value-type="float">
            <text:p><text:s/>9,9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121]" office:value-type="float" office:value="6600" calcext:value-type="float">
            <text:p>6,600</text:p>
          </table:table-cell>
          <table:table-cell/>
          <table:table-cell table:formula="of:=[.G120]" office:value-type="float" office:value="9900" calcext:value-type="float">
            <text:p>9,900</text:p>
          </table:table-cell>
          <table:table-cell table:formula="of:=[.C120]*[.D120]" office:value-type="float" office:value="9900" calcext:value-type="float">
            <text:p><text:s/>9,900.00 </text:p>
          </table:table-cell>
          <table:table-cell/>
          <table:table-cell table:style-name="ce317" table:formula="of:=[.I117]/[.I118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office:value-type="float" office:value="6600" calcext:value-type="float">
            <text:p>66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SUM([.G123:.G126])" office:value-type="float" office:value="1155" calcext:value-type="float">
            <text:p><text:s/>1,155.00 </text:p>
          </table:table-cell>
          <table:table-cell table:style-name="ce314"/>
          <table:table-cell table:style-name="ce317" table:formula="of:=[.I121]/[.I120]" office:value-type="float" office:value="825" calcext:value-type="float">
            <text:p>825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4" office:value-type="float" office:value="0.175" calcext:value-type="float">
            <text:p>0.18</text:p>
          </table:table-cell>
          <table:table-cell table:formula="of:=[$'Presupuesto de ventas'.H7]/4" office:value-type="float" office:value="1650" calcext:value-type="float">
            <text:p>1,650</text:p>
          </table:table-cell>
          <table:table-cell table:style-name="ce293"/>
          <table:table-cell table:formula="of:=[.G123]" office:value-type="float" office:value="288.75" calcext:value-type="float">
            <text:p>289</text:p>
          </table:table-cell>
          <table:table-cell table:formula="of:=[.C123]*[.D123]" office:value-type="float" office:value="288.75" calcext:value-type="float">
            <text:p><text:s/>288.75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123]" office:value-type="float" office:value="0.175" calcext:value-type="float">
            <text:p>0.18</text:p>
          </table:table-cell>
          <table:table-cell table:formula="of:=[.D123]" office:value-type="float" office:value="1650" calcext:value-type="float">
            <text:p>1,650</text:p>
          </table:table-cell>
          <table:table-cell table:style-name="ce293"/>
          <table:table-cell table:formula="of:=[.G124]" office:value-type="float" office:value="288.75" calcext:value-type="float">
            <text:p>289</text:p>
          </table:table-cell>
          <table:table-cell table:formula="of:=[.C124]*[.D124]" office:value-type="float" office:value="288.75" calcext:value-type="float">
            <text:p><text:s/>288.75 </text:p>
          </table:table-cell>
          <table:table-cell/>
          <table:table-cell office:value-type="string" calcext:value-type="string">
            <text:p>yacon</text:p>
          </table:table-cell>
          <table:table-cell table:formula="of:=[.I121]/2" office:value-type="float" office:value="3300" calcext:value-type="float">
            <text:p>33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3</text:p>
          </table:table-cell>
          <table:table-cell table:formula="of:=[.C124]" office:value-type="float" office:value="0.175" calcext:value-type="float">
            <text:p>0.18</text:p>
          </table:table-cell>
          <table:table-cell table:formula="of:=[.D124]" office:value-type="float" office:value="1650" calcext:value-type="float">
            <text:p>1,650</text:p>
          </table:table-cell>
          <table:table-cell table:style-name="ce293"/>
          <table:table-cell table:formula="of:=[.G125]" office:value-type="float" office:value="288.75" calcext:value-type="float">
            <text:p>289</text:p>
          </table:table-cell>
          <table:table-cell table:formula="of:=[.C125]*[.D125]" office:value-type="float" office:value="288.75" calcext:value-type="float">
            <text:p><text:s/>288.75 </text:p>
          </table:table-cell>
          <table:table-cell table:style-name="ce315"/>
          <table:table-cell table:style-name="ce318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cinero 4</text:p>
          </table:table-cell>
          <table:table-cell table:formula="of:=[.C125]" office:value-type="float" office:value="0.175" calcext:value-type="float">
            <text:p>0.18</text:p>
          </table:table-cell>
          <table:table-cell table:formula="of:=[.D125]" office:value-type="float" office:value="1650" calcext:value-type="float">
            <text:p>1,650</text:p>
          </table:table-cell>
          <table:table-cell table:style-name="ce293"/>
          <table:table-cell table:formula="of:=[.G126]" office:value-type="float" office:value="288.75" calcext:value-type="float">
            <text:p>289</text:p>
          </table:table-cell>
          <table:table-cell table:formula="of:=[.C126]*[.D126]" office:value-type="float" office:value="288.75" calcext:value-type="float">
            <text:p><text:s/>288.75 </text:p>
          </table:table-cell>
          <table:table-cell table:number-columns-repeated="2"/>
          <table:table-cell table:style-name="ce320"/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128]+[.G129]" office:value-type="float" office:value="200" calcext:value-type="float">
            <text:p><text:s/>200.00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28]" office:value-type="float" office:value="200" calcext:value-type="float">
            <text:p>200</text:p>
          </table:table-cell>
          <table:table-cell table:formula="of:=[.C128]*[.D128]" office:value-type="float" office:value="200" calcext:value-type="float">
            <text:p><text:s/>200.00 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54"/>
          <table:table-cell table:number-columns-repeated="4"/>
          <table:table-cell table:style-name="ce313"/>
          <table:table-cell table:number-columns-repeated="16376"/>
        </table:table-row>
        <table:table-row table:style-name="ro1">
          <table:table-cell table:number-columns-repeated="2"/>
          <table:table-cell table:style-name="ce254"/>
          <table:table-cell table:number-columns-repeated="4"/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116:.E130])" office:value-type="float" office:value="0" calcext:value-type="float">
            <text:p>0</text:p>
          </table:table-cell>
          <table:table-cell table:style-name="ce294" table:formula="of:=SUM([.F116:.F130])" office:value-type="float" office:value="37655" calcext:value-type="float">
            <text:p>37,655</text:p>
          </table:table-cell>
          <table:table-cell table:style-name="ce301" table:formula="of:=[.G117]+[.G122]+[.G127]" office:value-type="float" office:value="37655" calcext:value-type="float">
            <text:p><text:s/>37,655.00 </text:p>
          </table:table-cell>
          <table:table-cell table:style-name="Default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23">
          <table:table-cell/>
          <table:table-cell table:style-name="ce260" table:number-columns-spanned="7" table:number-rows-spanned="1"/>
          <table:covered-table-cell table:number-columns-repeated="6" table:style-name="ce280"/>
          <table:table-cell table:number-columns-repeated="16376"/>
        </table:table-row>
        <table:table-row table:style-name="ro21">
          <table:table-cell/>
          <table:table-cell table:style-name="ce51" office:value-type="string" calcext:value-type="string">
            <text:p>RUBRO</text:p>
          </table:table-cell>
          <table:table-cell table:style-name="ce40" office:value-type="string" calcext:value-type="string">
            <text:p>COSTO UNITARIO</text:p>
          </table:table-cell>
          <table:table-cell table:style-name="ce40" office:value-type="string" calcext:value-type="string">
            <text:p>UNIDADES REQUERIDAS (KG)</text:p>
          </table:table-cell>
          <table:table-cell table:style-name="ce290" office:value-type="string" calcext:value-type="string">
            <text:p>COSTO </text:p>
          </table:table-cell>
          <table:table-cell table:style-name="ce250"/>
          <table:table-cell table:style-name="ce51" office:value-type="string" calcext:value-type="string">
            <text:p>TOTAL</text:p>
          </table:table-cell>
          <table:table-cell table:style-name="ce307"/>
          <table:table-cell table:number-columns-repeated="16376"/>
        </table:table-row>
        <table:table-row table:style-name="ro1">
          <table:table-cell/>
          <table:table-cell table:style-name="ce250"/>
          <table:table-cell table:style-name="ce271" table:number-columns-repeated="2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table-cell table:style-name="ce250"/>
          <table:table-cell table:style-name="ce308"/>
          <table:table-cell table:number-columns-repeated="16376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139]+[.G140]+[.G141]" office:value-type="float" office:value="39600" calcext:value-type="float">
            <text:p><text:s/>39,600.00 </text:p>
          </table:table-cell>
          <table:table-cell table:style-name="ce314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98]" office:value-type="float" office:value="20" calcext:value-type="float">
            <text:p>20.00</text:p>
          </table:table-cell>
          <table:table-cell table:style-name="ce253" table:formula="of:=[.I144]" office:value-type="float" office:value="900" calcext:value-type="float">
            <text:p>900</text:p>
          </table:table-cell>
          <table:table-cell/>
          <table:table-cell table:formula="of:=[.G139]" office:value-type="float" office:value="18000" calcext:value-type="float">
            <text:p>18,000</text:p>
          </table:table-cell>
          <table:table-cell table:formula="of:=[.D139]*[.C139]" office:value-type="float" office:value="18000" calcext:value-type="float">
            <text:p><text:s/>18,000.00 </text:p>
          </table:table-cell>
          <table:table-cell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2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99]" office:value-type="float" office:value="3" calcext:value-type="float">
            <text:p>3.00</text:p>
          </table:table-cell>
          <table:table-cell table:style-name="ce253" table:formula="of:=[.J146]" office:value-type="float" office:value="3600" calcext:value-type="float">
            <text:p>3,600</text:p>
          </table:table-cell>
          <table:table-cell/>
          <table:table-cell table:formula="of:=[.G140]" office:value-type="float" office:value="10800" calcext:value-type="float">
            <text:p>10,800</text:p>
          </table:table-cell>
          <table:table-cell table:formula="of:=[.C140]*[.D140]" office:value-type="float" office:value="10800" calcext:value-type="float">
            <text:p><text:s/>10,8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140]*[.J139])/[.I139]" office:value-type="float" office:value="2.5" calcext:value-type="float">
            <text:p>2.5</text:p>
          </table:table-cell>
          <table:table-cell table:number-columns-repeated="16374"/>
        </table:table-row>
        <table:table-row table:style-name="ro9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143]" office:value-type="float" office:value="7200" calcext:value-type="float">
            <text:p>7,200</text:p>
          </table:table-cell>
          <table:table-cell/>
          <table:table-cell table:formula="of:=[.G141]" office:value-type="float" office:value="10800" calcext:value-type="float">
            <text:p>10,800</text:p>
          </table:table-cell>
          <table:table-cell table:formula="of:=[.C141]*[.D141]" office:value-type="float" office:value="10800" calcext:value-type="float">
            <text:p><text:s/>10,8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table:formula="of:=[.I139]/[.I140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SUM([.G144:.G147])" office:value-type="float" office:value="1260" calcext:value-type="float">
            <text:p><text:s/>1,260.00 </text:p>
          </table:table-cell>
          <table:table-cell table:style-name="ce314"/>
          <table:table-cell table:style-name="ce317" office:value-type="float" office:value="7200" calcext:value-type="float">
            <text:p>72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4" office:value-type="float" office:value="0.175" calcext:value-type="float">
            <text:p>0.18</text:p>
          </table:table-cell>
          <table:table-cell table:formula="of:=[$'Presupuesto de ventas'.I7]/4" office:value-type="float" office:value="1800" calcext:value-type="float">
            <text:p>1,800</text:p>
          </table:table-cell>
          <table:table-cell table:style-name="ce293"/>
          <table:table-cell table:formula="of:=[.G144]" office:value-type="float" office:value="315" calcext:value-type="float">
            <text:p>315</text:p>
          </table:table-cell>
          <table:table-cell table:formula="of:=[.C144]*[.D144]" office:value-type="float" office:value="315" calcext:value-type="float">
            <text:p><text:s/>315.00 </text:p>
          </table:table-cell>
          <table:table-cell/>
          <table:table-cell table:style-name="ce317" table:formula="of:=[.I143]/[.I142]" office:value-type="float" office:value="900" calcext:value-type="float">
            <text:p>900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144]" office:value-type="float" office:value="0.175" calcext:value-type="float">
            <text:p>0.18</text:p>
          </table:table-cell>
          <table:table-cell table:formula="of:=[.D144]" office:value-type="float" office:value="1800" calcext:value-type="float">
            <text:p>1,800</text:p>
          </table:table-cell>
          <table:table-cell table:style-name="ce293"/>
          <table:table-cell table:formula="of:=[.G145]" office:value-type="float" office:value="315" calcext:value-type="float">
            <text:p>315</text:p>
          </table:table-cell>
          <table:table-cell table:formula="of:=[.C145]*[.D145]" office:value-type="float" office:value="315" calcext:value-type="float">
            <text:p><text:s/>315.00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mero 3</text:p>
          </table:table-cell>
          <table:table-cell table:formula="of:=[.C145]" office:value-type="float" office:value="0.175" calcext:value-type="float">
            <text:p>0.18</text:p>
          </table:table-cell>
          <table:table-cell table:formula="of:=[.D145]" office:value-type="float" office:value="1800" calcext:value-type="float">
            <text:p>1,800</text:p>
          </table:table-cell>
          <table:table-cell table:style-name="ce293"/>
          <table:table-cell/>
          <table:table-cell table:formula="of:=[.C146]*[.D146]" office:value-type="float" office:value="315" calcext:value-type="float">
            <text:p><text:s/>315.00 </text:p>
          </table:table-cell>
          <table:table-cell/>
          <table:table-cell office:value-type="string" calcext:value-type="string">
            <text:p>yacon</text:p>
          </table:table-cell>
          <table:table-cell table:formula="of:=[.I143]/2" office:value-type="float" office:value="3600" calcext:value-type="float">
            <text:p>36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4</text:p>
          </table:table-cell>
          <table:table-cell table:formula="of:=[.C146]" office:value-type="float" office:value="0.175" calcext:value-type="float">
            <text:p>0.18</text:p>
          </table:table-cell>
          <table:table-cell table:formula="of:=[.D146]" office:value-type="float" office:value="1800" calcext:value-type="float">
            <text:p>1,800</text:p>
          </table:table-cell>
          <table:table-cell table:style-name="ce293"/>
          <table:table-cell/>
          <table:table-cell table:formula="of:=[.C147]*[.D147]" office:value-type="float" office:value="315" calcext:value-type="float">
            <text:p><text:s/>315.00 </text:p>
          </table:table-cell>
          <table:table-cell/>
          <table:table-cell table:style-name="ce318"/>
          <table:table-cell table:number-columns-repeated="16375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149]+[.G150]" office:value-type="float" office:value="200" calcext:value-type="float">
            <text:p><text:s/>200.00 </text:p>
          </table:table-cell>
          <table:table-cell table:style-name="ce315"/>
          <table:table-cell/>
          <table:table-cell table:style-name="ce320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49]" office:value-type="float" office:value="200" calcext:value-type="float">
            <text:p>200</text:p>
          </table:table-cell>
          <table:table-cell table:formula="of:=[.C149]*[.D149]" office:value-type="float" office:value="200" calcext:value-type="float">
            <text:p><text:s/>200.00 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137:.E151])" office:value-type="float" office:value="0" calcext:value-type="float">
            <text:p>0</text:p>
          </table:table-cell>
          <table:table-cell table:style-name="ce294" table:formula="of:=SUM([.F137:.F151])" office:value-type="float" office:value="40430" calcext:value-type="float">
            <text:p>40,430</text:p>
          </table:table-cell>
          <table:table-cell table:style-name="ce301" table:formula="of:=[.G138]+[.G143]+[.G148]" office:value-type="float" office:value="41060" calcext:value-type="float">
            <text:p><text:s/>41,060.00 </text:p>
          </table:table-cell>
          <table:table-cell table:style-name="ce313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24">
          <table:table-cell/>
          <table:table-cell table:style-name="ce260" office:value-type="string" calcext:value-type="string" table:number-columns-spanned="7" table:number-rows-spanned="1">
            <text:p>costos de produccion mes 8 - 7800 unidades</text:p>
          </table:table-cell>
          <table:covered-table-cell table:number-columns-repeated="6" table:style-name="ce280"/>
          <table:table-cell table:number-columns-repeated="16376"/>
        </table:table-row>
        <table:table-row table:style-name="ro21">
          <table:table-cell/>
          <table:table-cell table:style-name="ce51" office:value-type="string" calcext:value-type="string">
            <text:p>RUBRO</text:p>
          </table:table-cell>
          <table:table-cell table:style-name="ce40" office:value-type="string" calcext:value-type="string">
            <text:p>COSTO UNITARIO</text:p>
          </table:table-cell>
          <table:table-cell table:style-name="ce40" office:value-type="string" calcext:value-type="string">
            <text:p>UNIDADES REQUERIDAS (KG)</text:p>
          </table:table-cell>
          <table:table-cell table:style-name="ce290" office:value-type="string" calcext:value-type="string">
            <text:p>COSTO </text:p>
          </table:table-cell>
          <table:table-cell table:style-name="ce250"/>
          <table:table-cell table:style-name="ce51" office:value-type="string" calcext:value-type="string">
            <text:p>TOTAL</text:p>
          </table:table-cell>
          <table:table-cell table:style-name="ce307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0"/>
          <table:table-cell table:style-name="ce271" table:number-columns-repeated="2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table-cell table:style-name="ce250"/>
          <table:table-cell table:style-name="ce308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160]+[.G161]+[.G162]" office:value-type="float" office:value="42900" calcext:value-type="float">
            <text:p><text:s/>42,900.00 </text:p>
          </table:table-cell>
          <table:table-cell table:style-name="ce314"/>
          <table:table-cell table:style-name="ce317" office:value-type="float" office:value="50" calcext:value-type="float">
            <text:p>50</text:p>
          </table:table-cell>
          <table:table-cell table:style-name="ce317" table:formula="of:=([.I159]*[.J158])/[.I158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139]" office:value-type="float" office:value="20" calcext:value-type="float">
            <text:p>20.00</text:p>
          </table:table-cell>
          <table:table-cell table:style-name="ce253" table:formula="of:=[.I163]" office:value-type="float" office:value="975" calcext:value-type="float">
            <text:p>975</text:p>
          </table:table-cell>
          <table:table-cell/>
          <table:table-cell table:formula="of:=[.G160]" office:value-type="float" office:value="19500" calcext:value-type="float">
            <text:p>19,500</text:p>
          </table:table-cell>
          <table:table-cell table:formula="of:=[.D160]*[.C160]" office:value-type="float" office:value="19500" calcext:value-type="float">
            <text:p><text:s/>19,5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2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140]" office:value-type="float" office:value="3" calcext:value-type="float">
            <text:p>3.00</text:p>
          </table:table-cell>
          <table:table-cell table:style-name="ce253" table:formula="of:=[.J165]" office:value-type="float" office:value="3900" calcext:value-type="float">
            <text:p>3,900</text:p>
          </table:table-cell>
          <table:table-cell/>
          <table:table-cell table:formula="of:=[.G161]" office:value-type="float" office:value="11700" calcext:value-type="float">
            <text:p>11,700</text:p>
          </table:table-cell>
          <table:table-cell table:formula="of:=[.C161]*[.D161]" office:value-type="float" office:value="11700" calcext:value-type="float">
            <text:p><text:s/>11,700.00 </text:p>
          </table:table-cell>
          <table:table-cell/>
          <table:table-cell table:style-name="ce317" table:formula="of:=[.I158]/[.I159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9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162]" office:value-type="float" office:value="7800" calcext:value-type="float">
            <text:p>7,800</text:p>
          </table:table-cell>
          <table:table-cell/>
          <table:table-cell table:formula="of:=[.G162]" office:value-type="float" office:value="11700" calcext:value-type="float">
            <text:p>11,700</text:p>
          </table:table-cell>
          <table:table-cell table:formula="of:=[.C162]*[.D162]" office:value-type="float" office:value="11700" calcext:value-type="float">
            <text:p><text:s/>11,700.00 </text:p>
          </table:table-cell>
          <table:table-cell/>
          <table:table-cell table:style-name="ce317" office:value-type="float" office:value="7800" calcext:value-type="float">
            <text:p>78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table:formula="of:=[.I162]/[.I161]" office:value-type="float" office:value="975" calcext:value-type="float">
            <text:p>975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SUM([.G165:.G168])" office:value-type="float" office:value="1365" calcext:value-type="float">
            <text:p><text:s/>1,365.00 </text:p>
          </table:table-cell>
          <table:table-cell table:style-name="ce31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4" office:value-type="float" office:value="0.175" calcext:value-type="float">
            <text:p>0.18</text:p>
          </table:table-cell>
          <table:table-cell table:formula="of:=[$'Presupuesto de ventas'.J7]/4" office:value-type="float" office:value="1950" calcext:value-type="float">
            <text:p>1,950</text:p>
          </table:table-cell>
          <table:table-cell table:style-name="ce293"/>
          <table:table-cell table:formula="of:=[.G165]" office:value-type="float" office:value="341.25" calcext:value-type="float">
            <text:p>341</text:p>
          </table:table-cell>
          <table:table-cell table:formula="of:=[.C165]*[.D165]" office:value-type="float" office:value="341.25" calcext:value-type="float">
            <text:p><text:s/>341.25 </text:p>
          </table:table-cell>
          <table:table-cell/>
          <table:table-cell office:value-type="string" calcext:value-type="string">
            <text:p>yacon</text:p>
          </table:table-cell>
          <table:table-cell table:formula="of:=[.I162]/2" office:value-type="float" office:value="3900" calcext:value-type="float">
            <text:p>39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165]" office:value-type="float" office:value="0.175" calcext:value-type="float">
            <text:p>0.18</text:p>
          </table:table-cell>
          <table:table-cell table:formula="of:=[.D165]" office:value-type="float" office:value="1950" calcext:value-type="float">
            <text:p>1,950</text:p>
          </table:table-cell>
          <table:table-cell table:style-name="ce293"/>
          <table:table-cell table:formula="of:=[.G166]" office:value-type="float" office:value="341.25" calcext:value-type="float">
            <text:p>341</text:p>
          </table:table-cell>
          <table:table-cell table:formula="of:=[.C166]*[.D166]" office:value-type="float" office:value="341.25" calcext:value-type="float">
            <text:p><text:s/>341.25 </text:p>
          </table:table-cell>
          <table:table-cell/>
          <table:table-cell table:style-name="ce318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cinero 3</text:p>
          </table:table-cell>
          <table:table-cell table:formula="of:=[.C166]" office:value-type="float" office:value="0.175" calcext:value-type="float">
            <text:p>0.18</text:p>
          </table:table-cell>
          <table:table-cell table:formula="of:=[.D166]" office:value-type="float" office:value="1950" calcext:value-type="float">
            <text:p>1,950</text:p>
          </table:table-cell>
          <table:table-cell table:style-name="ce293"/>
          <table:table-cell table:formula="of:=[.G167]" office:value-type="float" office:value="341.25" calcext:value-type="float">
            <text:p>341</text:p>
          </table:table-cell>
          <table:table-cell table:formula="of:=[.C167]*[.D167]" office:value-type="float" office:value="341.25" calcext:value-type="float">
            <text:p><text:s/>341.25 </text:p>
          </table:table-cell>
          <table:table-cell table:number-columns-repeated="2"/>
          <table:table-cell table:style-name="ce320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4</text:p>
          </table:table-cell>
          <table:table-cell table:formula="of:=[.C167]" office:value-type="float" office:value="0.175" calcext:value-type="float">
            <text:p>0.18</text:p>
          </table:table-cell>
          <table:table-cell table:formula="of:=[.D167]" office:value-type="float" office:value="1950" calcext:value-type="float">
            <text:p>1,950</text:p>
          </table:table-cell>
          <table:table-cell table:style-name="ce293"/>
          <table:table-cell table:formula="of:=[.G168]" office:value-type="float" office:value="341.25" calcext:value-type="float">
            <text:p>341</text:p>
          </table:table-cell>
          <table:table-cell table:formula="of:=[.C168]*[.D168]" office:value-type="float" office:value="341.25" calcext:value-type="float">
            <text:p><text:s/>341.25 </text:p>
          </table:table-cell>
          <table:table-cell table:number-columns-repeated="16377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170]+[.G171]" office:value-type="float" office:value="200" calcext:value-type="float">
            <text:p><text:s/>200.00 </text:p>
          </table:table-cell>
          <table:table-cell table:style-name="ce31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70]" office:value-type="float" office:value="200" calcext:value-type="float">
            <text:p>200</text:p>
          </table:table-cell>
          <table:table-cell table:formula="of:=[.C170]*[.D170]" office:value-type="float" office:value="200" calcext:value-type="float">
            <text:p><text:s/>200.00 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158:.E172])" office:value-type="float" office:value="0" calcext:value-type="float">
            <text:p>0</text:p>
          </table:table-cell>
          <table:table-cell table:style-name="ce294" table:formula="of:=SUM([.F158:.F172])" office:value-type="float" office:value="44465" calcext:value-type="float">
            <text:p>44,465</text:p>
          </table:table-cell>
          <table:table-cell table:style-name="ce301" table:formula="of:=[.G159]+[.G164]+[.G169]" office:value-type="float" office:value="44465" calcext:value-type="float">
            <text:p><text:s/>44,465.00 </text:p>
          </table:table-cell>
          <table:table-cell table:style-name="ce313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8">
          <table:table-cell/>
          <table:table-cell table:style-name="ce260" office:value-type="string" calcext:value-type="string" table:number-columns-spanned="7" table:number-rows-spanned="1">
            <text:p>costos de produccion mes 9 - 8400 unidades</text:p>
          </table:table-cell>
          <table:covered-table-cell table:number-columns-repeated="6" table:style-name="ce280"/>
          <table:table-cell table:number-columns-repeated="16376"/>
        </table:table-row>
        <table:table-row table:style-name="ro1">
          <table:table-cell/>
          <table:table-cell table:style-name="ce5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" table:number-rows-spanned="2">
            <text:p>COSTO UNITARIO</text:p>
          </table:table-cell>
          <table:table-cell table:style-name="ce40" office:value-type="string" calcext:value-type="string" table:number-columns-spanned="1" table:number-rows-spanned="2">
            <text:p>UNIDADES REQUERIDAS (KG)</text:p>
          </table:table-cell>
          <table:table-cell table:style-name="ce290" office:value-type="string" calcext:value-type="string" table:number-columns-spanned="2" table:number-rows-spanned="1">
            <text:p>COSTO </text:p>
          </table:table-cell>
          <table:covered-table-cell table:style-name="ce250"/>
          <table:table-cell table:style-name="ce51" office:value-type="string" calcext:value-type="string" table:number-columns-spanned="1" table:number-rows-spanned="2">
            <text:p>TOTAL</text:p>
          </table:table-cell>
          <table:table-cell table:style-name="ce307"/>
          <table:table-cell table:number-columns-repeated="16376"/>
        </table:table-row>
        <table:table-row table:style-name="ro1">
          <table:table-cell/>
          <table:covered-table-cell table:style-name="ce250"/>
          <table:covered-table-cell table:number-columns-repeated="2" table:style-name="ce271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covered-table-cell table:style-name="ce250"/>
          <table:table-cell table:style-name="ce308"/>
          <table:table-cell table:number-columns-repeated="16376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181]+[.G182]+[.G183]" office:value-type="float" office:value="46200" calcext:value-type="float">
            <text:p><text:s/>46,200.00 </text:p>
          </table:table-cell>
          <table:table-cell table:style-name="ce314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139]" office:value-type="float" office:value="20" calcext:value-type="float">
            <text:p>20.00</text:p>
          </table:table-cell>
          <table:table-cell table:style-name="ce253" table:formula="of:=[.I186]" office:value-type="float" office:value="1050" calcext:value-type="float">
            <text:p>1,050</text:p>
          </table:table-cell>
          <table:table-cell/>
          <table:table-cell table:formula="of:=[.G181]" office:value-type="float" office:value="21000" calcext:value-type="float">
            <text:p>21,000</text:p>
          </table:table-cell>
          <table:table-cell table:formula="of:=[.D181]*[.C181]" office:value-type="float" office:value="21000" calcext:value-type="float">
            <text:p><text:s/>21,000.00 </text:p>
          </table:table-cell>
          <table:table-cell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140]" office:value-type="float" office:value="3" calcext:value-type="float">
            <text:p>3.00</text:p>
          </table:table-cell>
          <table:table-cell table:style-name="ce253" table:formula="of:=[.J188]" office:value-type="float" office:value="4200" calcext:value-type="float">
            <text:p>4,200</text:p>
          </table:table-cell>
          <table:table-cell/>
          <table:table-cell table:formula="of:=[.G182]" office:value-type="float" office:value="12600" calcext:value-type="float">
            <text:p>12,600</text:p>
          </table:table-cell>
          <table:table-cell table:formula="of:=[.C182]*[.D182]" office:value-type="float" office:value="12600" calcext:value-type="float">
            <text:p><text:s/>12,6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182]*[.J181])/[.I181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185]" office:value-type="float" office:value="8400" calcext:value-type="float">
            <text:p>8,400</text:p>
          </table:table-cell>
          <table:table-cell/>
          <table:table-cell table:formula="of:=[.G183]" office:value-type="float" office:value="12600" calcext:value-type="float">
            <text:p>12,600</text:p>
          </table:table-cell>
          <table:table-cell table:formula="of:=[.C183]*[.D183]" office:value-type="float" office:value="12600" calcext:value-type="float">
            <text:p><text:s/>12,6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table:formula="of:=[.I181]/[.I182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SUM([.G186:.G190])" office:value-type="float" office:value="1176" calcext:value-type="float">
            <text:p><text:s/>1,176.00 </text:p>
          </table:table-cell>
          <table:table-cell table:style-name="ce314"/>
          <table:table-cell table:style-name="ce317" office:value-type="float" office:value="8400" calcext:value-type="float">
            <text:p>84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5" office:value-type="float" office:value="0.14" calcext:value-type="float">
            <text:p>0.14</text:p>
          </table:table-cell>
          <table:table-cell table:formula="of:=[$'Presupuesto de ventas'.K7]/5" office:value-type="float" office:value="1680" calcext:value-type="float">
            <text:p>1,680</text:p>
          </table:table-cell>
          <table:table-cell table:style-name="ce293"/>
          <table:table-cell table:formula="of:=[.G186]" office:value-type="float" office:value="235.2" calcext:value-type="float">
            <text:p>235</text:p>
          </table:table-cell>
          <table:table-cell table:formula="of:=[.C186]*[.D186]" office:value-type="float" office:value="235.2" calcext:value-type="float">
            <text:p><text:s/>235.20 </text:p>
          </table:table-cell>
          <table:table-cell/>
          <table:table-cell table:style-name="ce317" table:formula="of:=[.I185]/[.I184]" office:value-type="float" office:value="1050" calcext:value-type="float">
            <text:p>1050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186]" office:value-type="float" office:value="0.14" calcext:value-type="float">
            <text:p>0.14</text:p>
          </table:table-cell>
          <table:table-cell table:formula="of:=[.D186]" office:value-type="float" office:value="1680" calcext:value-type="float">
            <text:p>1,680</text:p>
          </table:table-cell>
          <table:table-cell table:style-name="ce293"/>
          <table:table-cell table:formula="of:=[.G187]" office:value-type="float" office:value="235.2" calcext:value-type="float">
            <text:p>235</text:p>
          </table:table-cell>
          <table:table-cell table:formula="of:=[.C187]*[.D187]" office:value-type="float" office:value="235.2" calcext:value-type="float">
            <text:p><text:s/>235.20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3</text:p>
          </table:table-cell>
          <table:table-cell table:formula="of:=[.C187]" office:value-type="float" office:value="0.14" calcext:value-type="float">
            <text:p>0.14</text:p>
          </table:table-cell>
          <table:table-cell table:formula="of:=[.D187]" office:value-type="float" office:value="1680" calcext:value-type="float">
            <text:p>1,680</text:p>
          </table:table-cell>
          <table:table-cell table:style-name="ce293"/>
          <table:table-cell table:formula="of:=[.G188]" office:value-type="float" office:value="235.2" calcext:value-type="float">
            <text:p>235</text:p>
          </table:table-cell>
          <table:table-cell table:formula="of:=[.C188]*[.D188]" office:value-type="float" office:value="235.2" calcext:value-type="float">
            <text:p><text:s/>235.20 </text:p>
          </table:table-cell>
          <table:table-cell/>
          <table:table-cell office:value-type="string" calcext:value-type="string">
            <text:p>yacon</text:p>
          </table:table-cell>
          <table:table-cell table:formula="of:=[.I185]/2" office:value-type="float" office:value="4200" calcext:value-type="float">
            <text:p>42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4</text:p>
          </table:table-cell>
          <table:table-cell table:formula="of:=[.C188]" office:value-type="float" office:value="0.14" calcext:value-type="float">
            <text:p>0.14</text:p>
          </table:table-cell>
          <table:table-cell table:formula="of:=[.D188]" office:value-type="float" office:value="1680" calcext:value-type="float">
            <text:p>1,680</text:p>
          </table:table-cell>
          <table:table-cell table:style-name="ce293"/>
          <table:table-cell table:formula="of:=[.G189]" office:value-type="float" office:value="235.2" calcext:value-type="float">
            <text:p>235</text:p>
          </table:table-cell>
          <table:table-cell table:formula="of:=[.C189]*[.D189]" office:value-type="float" office:value="235.2" calcext:value-type="float">
            <text:p><text:s/>235.20 </text:p>
          </table:table-cell>
          <table:table-cell/>
          <table:table-cell table:style-name="ce318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cinero 5</text:p>
          </table:table-cell>
          <table:table-cell table:formula="of:=[.C189]" office:value-type="float" office:value="0.14" calcext:value-type="float">
            <text:p>0.14</text:p>
          </table:table-cell>
          <table:table-cell table:formula="of:=[.D189]" office:value-type="float" office:value="1680" calcext:value-type="float">
            <text:p>1,680</text:p>
          </table:table-cell>
          <table:table-cell table:style-name="ce293"/>
          <table:table-cell table:formula="of:=[.G190]" office:value-type="float" office:value="235.2" calcext:value-type="float">
            <text:p>235</text:p>
          </table:table-cell>
          <table:table-cell table:formula="of:=[.C190]*[.D190]" office:value-type="float" office:value="235.2" calcext:value-type="float">
            <text:p><text:s/>235.20 </text:p>
          </table:table-cell>
          <table:table-cell table:style-name="ce316"/>
          <table:table-cell/>
          <table:table-cell table:style-name="ce320"/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192]+[.G193]" office:value-type="float" office:value="200" calcext:value-type="float">
            <text:p><text:s/>200.00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92]" office:value-type="float" office:value="200" calcext:value-type="float">
            <text:p>200</text:p>
          </table:table-cell>
          <table:table-cell table:formula="of:=[.C192]*[.D192]" office:value-type="float" office:value="200" calcext:value-type="float">
            <text:p><text:s/>200.00 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 table:number-columns-repeated="2"/>
          <table:table-cell table:style-name="ce254"/>
          <table:table-cell table:number-columns-repeated="4"/>
          <table:table-cell table:style-name="ce313" table:formula="of:=SUM([.H180:.H193])" office:value-type="float" office:value="0" calcext:value-type="float">
            <text:p><text:s/>- 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179:.E194])" office:value-type="float" office:value="0" calcext:value-type="float">
            <text:p>0</text:p>
          </table:table-cell>
          <table:table-cell table:style-name="ce294" table:formula="of:=SUM([.F179:.F194])" office:value-type="float" office:value="47576" calcext:value-type="float">
            <text:p>47,576</text:p>
          </table:table-cell>
          <table:table-cell table:style-name="ce301" table:formula="of:=[.G180]+[.G185]+[.G191]" office:value-type="float" office:value="47576" calcext:value-type="float">
            <text:p><text:s/>47,576.00 </text:p>
          </table:table-cell>
          <table:table-cell table:style-name="Default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25">
          <table:table-cell/>
          <table:table-cell table:style-name="ce261" office:value-type="string" calcext:value-type="string" table:number-columns-spanned="7" table:number-rows-spanned="1">
            <text:p>costos de produccion mes 10- 9000 unidades</text:p>
          </table:table-cell>
          <table:covered-table-cell table:number-columns-repeated="6" table:style-name="ce281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5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" table:number-rows-spanned="2">
            <text:p>COSTO UNITARIO</text:p>
          </table:table-cell>
          <table:table-cell table:style-name="ce40" office:value-type="string" calcext:value-type="string" table:number-columns-spanned="1" table:number-rows-spanned="2">
            <text:p>UNIDADES REQUERIDAS (KG)</text:p>
          </table:table-cell>
          <table:table-cell table:style-name="ce290" office:value-type="string" calcext:value-type="string" table:number-columns-spanned="2" table:number-rows-spanned="1">
            <text:p>COSTO </text:p>
          </table:table-cell>
          <table:covered-table-cell table:style-name="ce250"/>
          <table:table-cell table:style-name="ce51" office:value-type="string" calcext:value-type="string" table:number-columns-spanned="1" table:number-rows-spanned="2">
            <text:p>TOTAL</text:p>
          </table:table-cell>
          <table:table-cell table:style-name="ce307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covered-table-cell table:style-name="ce250"/>
          <table:covered-table-cell table:number-columns-repeated="2" table:style-name="ce271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covered-table-cell table:style-name="ce250"/>
          <table:table-cell table:style-name="ce308"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table:style-name="ce317" office:value-type="float" office:value="50" calcext:value-type="float">
            <text:p>50</text:p>
          </table:table-cell>
          <table:table-cell table:style-name="ce317" table:formula="of:=([.I201]*[.J200])/[.I200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203]+[.G204]+[.G205]" office:value-type="float" office:value="49500" calcext:value-type="float">
            <text:p><text:s/>49,500.00 </text:p>
          </table:table-cell>
          <table:table-cell table:style-name="ce314"/>
          <table:table-cell table:style-name="ce317" table:number-columns-repeated="2"/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181]" office:value-type="float" office:value="20" calcext:value-type="float">
            <text:p>20.00</text:p>
          </table:table-cell>
          <table:table-cell table:style-name="ce253" table:formula="of:=[.I205]" office:value-type="float" office:value="1125" calcext:value-type="float">
            <text:p>1,125</text:p>
          </table:table-cell>
          <table:table-cell/>
          <table:table-cell table:formula="of:=[.G203]" office:value-type="float" office:value="22500" calcext:value-type="float">
            <text:p>22,500</text:p>
          </table:table-cell>
          <table:table-cell table:formula="of:=[.D203]*[.C203]" office:value-type="float" office:value="22500" calcext:value-type="float">
            <text:p><text:s/>22,500.00 </text:p>
          </table:table-cell>
          <table:table-cell/>
          <table:table-cell table:style-name="ce317" table:formula="of:=[.I200]/[.I201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182]" office:value-type="float" office:value="3" calcext:value-type="float">
            <text:p>3.00</text:p>
          </table:table-cell>
          <table:table-cell table:style-name="ce253" table:formula="of:=[.J207]" office:value-type="float" office:value="4500" calcext:value-type="float">
            <text:p>4,500</text:p>
          </table:table-cell>
          <table:table-cell/>
          <table:table-cell table:formula="of:=[.G204]" office:value-type="float" office:value="13500" calcext:value-type="float">
            <text:p>13,500</text:p>
          </table:table-cell>
          <table:table-cell table:formula="of:=[.C204]*[.D204]" office:value-type="float" office:value="13500" calcext:value-type="float">
            <text:p><text:s/>13,500.00 </text:p>
          </table:table-cell>
          <table:table-cell/>
          <table:table-cell table:style-name="ce317" office:value-type="float" office:value="9000" calcext:value-type="float">
            <text:p>90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204]" office:value-type="float" office:value="9000" calcext:value-type="float">
            <text:p>9,000</text:p>
          </table:table-cell>
          <table:table-cell/>
          <table:table-cell table:formula="of:=[.G205]" office:value-type="float" office:value="13500" calcext:value-type="float">
            <text:p>13,500</text:p>
          </table:table-cell>
          <table:table-cell table:formula="of:=[.C205]*[.D205]" office:value-type="float" office:value="13500" calcext:value-type="float">
            <text:p><text:s/>13,500.00 </text:p>
          </table:table-cell>
          <table:table-cell/>
          <table:table-cell table:style-name="ce317" table:formula="of:=[.I204]/[.I203]" office:value-type="float" office:value="1125" calcext:value-type="float">
            <text:p>1125</text:p>
          </table:table-cell>
          <table:table-cell table:style-name="ce317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number-columns-repeated="16376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SUM([.G208:.G212])" office:value-type="float" office:value="1260" calcext:value-type="float">
            <text:p><text:s/>1,260.00 </text:p>
          </table:table-cell>
          <table:table-cell table:style-name="ce314"/>
          <table:table-cell office:value-type="string" calcext:value-type="string">
            <text:p>yacon</text:p>
          </table:table-cell>
          <table:table-cell table:formula="of:=[.I204]/2" office:value-type="float" office:value="4500" calcext:value-type="float">
            <text:p>45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5" office:value-type="float" office:value="0.14" calcext:value-type="float">
            <text:p>0.14</text:p>
          </table:table-cell>
          <table:table-cell table:formula="of:=[$'Presupuesto de ventas'.L7]/5" office:value-type="float" office:value="1800" calcext:value-type="float">
            <text:p>1,800</text:p>
          </table:table-cell>
          <table:table-cell table:style-name="ce293"/>
          <table:table-cell table:formula="of:=[.G208]" office:value-type="float" office:value="252" calcext:value-type="float">
            <text:p>252</text:p>
          </table:table-cell>
          <table:table-cell table:formula="of:=[.C208]*[.D208]" office:value-type="float" office:value="252" calcext:value-type="float">
            <text:p><text:s/>252.00 </text:p>
          </table:table-cell>
          <table:table-cell/>
          <table:table-cell table:style-name="ce318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208]" office:value-type="float" office:value="0.14" calcext:value-type="float">
            <text:p>0.14</text:p>
          </table:table-cell>
          <table:table-cell table:formula="of:=[.D208]" office:value-type="float" office:value="1800" calcext:value-type="float">
            <text:p>1,800</text:p>
          </table:table-cell>
          <table:table-cell table:style-name="ce293"/>
          <table:table-cell table:formula="of:=[.G209]" office:value-type="float" office:value="252" calcext:value-type="float">
            <text:p>252</text:p>
          </table:table-cell>
          <table:table-cell table:formula="of:=[.C209]*[.D209]" office:value-type="float" office:value="252" calcext:value-type="float">
            <text:p><text:s/>252.00 </text:p>
          </table:table-cell>
          <table:table-cell table:number-columns-repeated="2"/>
          <table:table-cell table:style-name="ce320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3</text:p>
          </table:table-cell>
          <table:table-cell table:formula="of:=[.C209]" office:value-type="float" office:value="0.14" calcext:value-type="float">
            <text:p>0.14</text:p>
          </table:table-cell>
          <table:table-cell table:formula="of:=[.D209]" office:value-type="float" office:value="1800" calcext:value-type="float">
            <text:p>1,800</text:p>
          </table:table-cell>
          <table:table-cell table:style-name="ce293"/>
          <table:table-cell table:formula="of:=[.G210]" office:value-type="float" office:value="252" calcext:value-type="float">
            <text:p>252</text:p>
          </table:table-cell>
          <table:table-cell table:formula="of:=[.C210]*[.D210]" office:value-type="float" office:value="252" calcext:value-type="float">
            <text:p><text:s/>252.00 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cinero 4</text:p>
          </table:table-cell>
          <table:table-cell table:formula="of:=[.C210]" office:value-type="float" office:value="0.14" calcext:value-type="float">
            <text:p>0.14</text:p>
          </table:table-cell>
          <table:table-cell table:formula="of:=[.D210]" office:value-type="float" office:value="1800" calcext:value-type="float">
            <text:p>1,800</text:p>
          </table:table-cell>
          <table:table-cell table:style-name="ce293"/>
          <table:table-cell table:formula="of:=[.G211]" office:value-type="float" office:value="252" calcext:value-type="float">
            <text:p>252</text:p>
          </table:table-cell>
          <table:table-cell table:formula="of:=[.C211]*[.D211]" office:value-type="float" office:value="252" calcext:value-type="float">
            <text:p><text:s/>252.00 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cinero 5</text:p>
          </table:table-cell>
          <table:table-cell table:formula="of:=[.C211]" office:value-type="float" office:value="0.14" calcext:value-type="float">
            <text:p>0.14</text:p>
          </table:table-cell>
          <table:table-cell table:formula="of:=[.D211]" office:value-type="float" office:value="1800" calcext:value-type="float">
            <text:p>1,800</text:p>
          </table:table-cell>
          <table:table-cell table:style-name="ce293"/>
          <table:table-cell table:formula="of:=[.G212]" office:value-type="float" office:value="252" calcext:value-type="float">
            <text:p>252</text:p>
          </table:table-cell>
          <table:table-cell table:formula="of:=[.C212]*[.D212]" office:value-type="float" office:value="252" calcext:value-type="float">
            <text:p><text:s/>252.00 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214]+[.G215]" office:value-type="float" office:value="300" calcext:value-type="float">
            <text:p><text:s/>300.00 </text:p>
          </table:table-cell>
          <table:table-cell table:style-name="ce31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214]" office:value-type="float" office:value="300" calcext:value-type="float">
            <text:p>300</text:p>
          </table:table-cell>
          <table:table-cell table:formula="of:=[.C214]*[.D214]" office:value-type="float" office:value="300" calcext:value-type="float">
            <text:p><text:s/>300.00 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201:.E216])" office:value-type="float" office:value="0" calcext:value-type="float">
            <text:p>0</text:p>
          </table:table-cell>
          <table:table-cell table:style-name="ce294" table:formula="of:=SUM([.F201:.F216])" office:value-type="float" office:value="51060" calcext:value-type="float">
            <text:p>51,060</text:p>
          </table:table-cell>
          <table:table-cell table:style-name="ce301" table:formula="of:=[.G202]+[.G207]+[.G213]" office:value-type="float" office:value="51060" calcext:value-type="float">
            <text:p><text:s/>51,060.00 </text:p>
          </table:table-cell>
          <table:table-cell table:style-name="ce313" table:formula="of:=SUM([.H202:.H216])" office:value-type="float" office:value="0" calcext:value-type="float">
            <text:p><text:s/>- <text:s text:c="2"/>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8">
          <table:table-cell/>
          <table:table-cell table:style-name="ce262" office:value-type="string" calcext:value-type="string" table:number-columns-spanned="7" table:number-rows-spanned="1">
            <text:p>costos de produccion mes 11 - 9600 unidades</text:p>
          </table:table-cell>
          <table:covered-table-cell table:number-columns-repeated="6" table:style-name="ce282"/>
          <table:table-cell table:number-columns-repeated="16376"/>
        </table:table-row>
        <table:table-row table:style-name="ro1">
          <table:table-cell/>
          <table:table-cell table:style-name="ce5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" table:number-rows-spanned="2">
            <text:p>COSTO UNITARIO</text:p>
          </table:table-cell>
          <table:table-cell table:style-name="ce40" office:value-type="string" calcext:value-type="string" table:number-columns-spanned="1" table:number-rows-spanned="2">
            <text:p>UNIDADES REQUERIDAS (KG)</text:p>
          </table:table-cell>
          <table:table-cell table:style-name="ce290" office:value-type="string" calcext:value-type="string" table:number-columns-spanned="2" table:number-rows-spanned="1">
            <text:p>COSTO </text:p>
          </table:table-cell>
          <table:covered-table-cell table:style-name="ce250"/>
          <table:table-cell table:style-name="ce51" office:value-type="string" calcext:value-type="string" table:number-columns-spanned="1" table:number-rows-spanned="2">
            <text:p>TOTAL</text:p>
          </table:table-cell>
          <table:table-cell table:style-name="ce307"/>
          <table:table-cell table:number-columns-repeated="16376"/>
        </table:table-row>
        <table:table-row table:style-name="ro1">
          <table:table-cell/>
          <table:covered-table-cell table:style-name="ce250"/>
          <table:covered-table-cell table:number-columns-repeated="2" table:style-name="ce271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covered-table-cell table:style-name="ce250"/>
          <table:table-cell table:style-name="ce308" office:value-type="string" calcext:value-type="string">
            <text:p>C.U.</text:p>
          </table:table-cell>
          <table:table-cell table:number-columns-repeated="16376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225]+[.G226]+[.G227]" office:value-type="float" office:value="52800" calcext:value-type="float">
            <text:p><text:s/>52,800.00 </text:p>
          </table:table-cell>
          <table:table-cell table:style-name="ce314" table:formula="of:=+[.G224]/3600" office:value-type="float" office:value="14.6666666666667" calcext:value-type="float">
            <text:p><text:s/>14.67 </text:p>
          </table:table-cell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181]" office:value-type="float" office:value="20" calcext:value-type="float">
            <text:p>20.00</text:p>
          </table:table-cell>
          <table:table-cell table:style-name="ce253" table:formula="of:=[.I230]" office:value-type="float" office:value="1200" calcext:value-type="float">
            <text:p>1,200</text:p>
          </table:table-cell>
          <table:table-cell/>
          <table:table-cell table:formula="of:=[.G225]" office:value-type="float" office:value="24000" calcext:value-type="float">
            <text:p>24,000</text:p>
          </table:table-cell>
          <table:table-cell table:formula="of:=[.D225]*[.C225]" office:value-type="float" office:value="24000" calcext:value-type="float">
            <text:p><text:s/>24,000.00 </text:p>
          </table:table-cell>
          <table:table-cell/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182]" office:value-type="float" office:value="3" calcext:value-type="float">
            <text:p>3.00</text:p>
          </table:table-cell>
          <table:table-cell table:style-name="ce253" table:formula="of:=[.J232]" office:value-type="float" office:value="4800" calcext:value-type="float">
            <text:p>4,800</text:p>
          </table:table-cell>
          <table:table-cell/>
          <table:table-cell table:formula="of:=[.G226]" office:value-type="float" office:value="14400" calcext:value-type="float">
            <text:p>14,400</text:p>
          </table:table-cell>
          <table:table-cell table:formula="of:=[.C226]*[.D226]" office:value-type="float" office:value="14400" calcext:value-type="float">
            <text:p><text:s/>14,400.00 </text:p>
          </table:table-cell>
          <table:table-cell/>
          <table:table-cell table:style-name="ce317" office:value-type="float" office:value="50" calcext:value-type="float">
            <text:p>50</text:p>
          </table:table-cell>
          <table:table-cell table:style-name="ce317" table:formula="of:=([.I226]*[.J225])/[.I225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229]" office:value-type="float" office:value="9600" calcext:value-type="float">
            <text:p>9,600</text:p>
          </table:table-cell>
          <table:table-cell/>
          <table:table-cell table:formula="of:=[.G227]" office:value-type="float" office:value="14400" calcext:value-type="float">
            <text:p>14,400</text:p>
          </table:table-cell>
          <table:table-cell table:formula="of:=[.C227]*[.D227]" office:value-type="float" office:value="14400" calcext:value-type="float">
            <text:p><text:s/>14,400.00 </text:p>
          </table:table-cell>
          <table:table-cell/>
          <table:table-cell table:style-name="ce317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style-name="ce317" table:formula="of:=[.I225]/[.I226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SUM([.G230:.G234])" office:value-type="float" office:value="1344" calcext:value-type="float">
            <text:p><text:s/>1,344.00 </text:p>
          </table:table-cell>
          <table:table-cell table:style-name="ce314" table:formula="of:=+[.G229]/3600" office:value-type="float" office:value="0.373333333333333" calcext:value-type="float">
            <text:p><text:s/>0.37 </text:p>
          </table:table-cell>
          <table:table-cell table:style-name="ce317" office:value-type="float" office:value="9600" calcext:value-type="float">
            <text:p>96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5" office:value-type="float" office:value="0.14" calcext:value-type="float">
            <text:p>0.14</text:p>
          </table:table-cell>
          <table:table-cell table:formula="of:=[$'Presupuesto de ventas'.M7]/5" office:value-type="float" office:value="1920" calcext:value-type="float">
            <text:p>1,920</text:p>
          </table:table-cell>
          <table:table-cell table:style-name="ce293"/>
          <table:table-cell table:formula="of:=[.G230]" office:value-type="float" office:value="268.8" calcext:value-type="float">
            <text:p>269</text:p>
          </table:table-cell>
          <table:table-cell table:formula="of:=[.C230]*[.D230]" office:value-type="float" office:value="268.8" calcext:value-type="float">
            <text:p><text:s/>268.80 </text:p>
          </table:table-cell>
          <table:table-cell/>
          <table:table-cell table:style-name="ce317" table:formula="of:=[.I229]/[.I228]" office:value-type="float" office:value="1200" calcext:value-type="float">
            <text:p>1200</text:p>
          </table:table-cell>
          <table:table-cell table:style-name="ce317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230]" office:value-type="float" office:value="0.14" calcext:value-type="float">
            <text:p>0.14</text:p>
          </table:table-cell>
          <table:table-cell table:formula="of:=[.D230]" office:value-type="float" office:value="1920" calcext:value-type="float">
            <text:p>1,920</text:p>
          </table:table-cell>
          <table:table-cell table:style-name="ce293"/>
          <table:table-cell table:formula="of:=[.G231]" office:value-type="float" office:value="268.8" calcext:value-type="float">
            <text:p>269</text:p>
          </table:table-cell>
          <table:table-cell table:formula="of:=[.C231]*[.D231]" office:value-type="float" office:value="268.8" calcext:value-type="float">
            <text:p><text:s/>268.80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3</text:p>
          </table:table-cell>
          <table:table-cell table:formula="of:=[.C231]" office:value-type="float" office:value="0.14" calcext:value-type="float">
            <text:p>0.14</text:p>
          </table:table-cell>
          <table:table-cell table:formula="of:=[.D231]" office:value-type="float" office:value="1920" calcext:value-type="float">
            <text:p>1,920</text:p>
          </table:table-cell>
          <table:table-cell table:style-name="ce293"/>
          <table:table-cell table:formula="of:=[.G232]" office:value-type="float" office:value="268.8" calcext:value-type="float">
            <text:p>269</text:p>
          </table:table-cell>
          <table:table-cell table:formula="of:=[.C232]*[.D232]" office:value-type="float" office:value="268.8" calcext:value-type="float">
            <text:p><text:s/>268.80 </text:p>
          </table:table-cell>
          <table:table-cell/>
          <table:table-cell office:value-type="string" calcext:value-type="string">
            <text:p>yacon</text:p>
          </table:table-cell>
          <table:table-cell table:formula="of:=[.I229]/2" office:value-type="float" office:value="4800" calcext:value-type="float">
            <text:p>48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4</text:p>
          </table:table-cell>
          <table:table-cell table:formula="of:=[.C232]" office:value-type="float" office:value="0.14" calcext:value-type="float">
            <text:p>0.14</text:p>
          </table:table-cell>
          <table:table-cell table:formula="of:=[.D232]" office:value-type="float" office:value="1920" calcext:value-type="float">
            <text:p>1,920</text:p>
          </table:table-cell>
          <table:table-cell table:style-name="ce293"/>
          <table:table-cell table:formula="of:=[.G233]" office:value-type="float" office:value="268.8" calcext:value-type="float">
            <text:p>269</text:p>
          </table:table-cell>
          <table:table-cell table:formula="of:=[.C233]*[.D233]" office:value-type="float" office:value="268.8" calcext:value-type="float">
            <text:p><text:s/>268.80 </text:p>
          </table:table-cell>
          <table:table-cell/>
          <table:table-cell table:style-name="ce318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cinero 5</text:p>
          </table:table-cell>
          <table:table-cell table:formula="of:=[.C233]" office:value-type="float" office:value="0.14" calcext:value-type="float">
            <text:p>0.14</text:p>
          </table:table-cell>
          <table:table-cell table:formula="of:=[.D233]" office:value-type="float" office:value="1920" calcext:value-type="float">
            <text:p>1,920</text:p>
          </table:table-cell>
          <table:table-cell table:style-name="ce293"/>
          <table:table-cell table:formula="of:=[.G234]" office:value-type="float" office:value="268.8" calcext:value-type="float">
            <text:p>269</text:p>
          </table:table-cell>
          <table:table-cell table:formula="of:=[.C234]*[.D234]" office:value-type="float" office:value="268.8" calcext:value-type="float">
            <text:p><text:s/>268.80 </text:p>
          </table:table-cell>
          <table:table-cell table:number-columns-repeated="2"/>
          <table:table-cell table:style-name="ce320"/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236]+[.G237]" office:value-type="float" office:value="300" calcext:value-type="float">
            <text:p><text:s/>300.00 </text:p>
          </table:table-cell>
          <table:table-cell table:style-name="ce315" table:formula="of:=+[.G235]/3600" office:value-type="float" office:value="0.0833333333333333" calcext:value-type="float">
            <text:p><text:s/>0.08 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236]" office:value-type="float" office:value="300" calcext:value-type="float">
            <text:p>300</text:p>
          </table:table-cell>
          <table:table-cell table:formula="of:=[.C236]*[.D236]" office:value-type="float" office:value="300" calcext:value-type="float">
            <text:p><text:s/>300.00 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223:.E238])" office:value-type="float" office:value="0" calcext:value-type="float">
            <text:p>0</text:p>
          </table:table-cell>
          <table:table-cell table:style-name="ce294" table:formula="of:=SUM([.F223:.F238])" office:value-type="float" office:value="54444" calcext:value-type="float">
            <text:p>54,444</text:p>
          </table:table-cell>
          <table:table-cell table:style-name="ce301" table:formula="of:=[.G224]+[.G229]+[.G235]" office:value-type="float" office:value="54444" calcext:value-type="float">
            <text:p><text:s/>54,444.00 </text:p>
          </table:table-cell>
          <table:table-cell table:style-name="ce313" table:formula="of:=SUM([.H224:.H238])" office:value-type="float" office:value="15.1233333333333" calcext:value-type="float">
            <text:p><text:s/>15.12 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8">
          <table:table-cell/>
          <table:table-cell table:style-name="ce262" office:value-type="string" calcext:value-type="string" table:number-columns-spanned="7" table:number-rows-spanned="1">
            <text:p>costos de produccion mes 12 - 10200 unidades</text:p>
          </table:table-cell>
          <table:covered-table-cell table:number-columns-repeated="6" table:style-name="ce282"/>
          <table:table-cell office:value-type="string" calcext:value-type="string">
            <text:p>pasta</text:p>
          </table:table-cell>
          <table:table-cell table:number-columns-repeated="16375"/>
        </table:table-row>
        <table:table-row table:style-name="ro1">
          <table:table-cell/>
          <table:table-cell table:style-name="ce5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" table:number-rows-spanned="2">
            <text:p>COSTO UNITARIO</text:p>
          </table:table-cell>
          <table:table-cell table:style-name="ce40" office:value-type="string" calcext:value-type="string" table:number-columns-spanned="1" table:number-rows-spanned="2">
            <text:p>UNIDADES REQUERIDAS (KG)</text:p>
          </table:table-cell>
          <table:table-cell table:style-name="ce290" office:value-type="string" calcext:value-type="string" table:number-columns-spanned="2" table:number-rows-spanned="1">
            <text:p>COSTO </text:p>
          </table:table-cell>
          <table:covered-table-cell table:style-name="ce250"/>
          <table:table-cell table:style-name="ce51" office:value-type="string" calcext:value-type="string" table:number-columns-spanned="1" table:number-rows-spanned="2">
            <text:p>TOTAL</text:p>
          </table:table-cell>
          <table:table-cell table:style-name="ce307"/>
          <table:table-cell table:style-name="ce317" office:value-type="string" calcext:value-type="string">
            <text:p>gramos</text:p>
          </table:table-cell>
          <table:table-cell table:style-name="ce317" office:value-type="string" calcext:value-type="string">
            <text:p>soles</text:p>
          </table:table-cell>
          <table:table-cell table:number-columns-repeated="16374"/>
        </table:table-row>
        <table:table-row table:style-name="ro1">
          <table:table-cell/>
          <table:covered-table-cell table:style-name="ce250"/>
          <table:covered-table-cell table:number-columns-repeated="2" table:style-name="ce271"/>
          <table:table-cell table:style-name="ce290" office:value-type="string" calcext:value-type="string">
            <text:p>FIJO</text:p>
          </table:table-cell>
          <table:table-cell table:style-name="ce290" office:value-type="string" calcext:value-type="string">
            <text:p>VARIABLE</text:p>
          </table:table-cell>
          <table:covered-table-cell table:style-name="ce250"/>
          <table:table-cell table:style-name="ce308" office:value-type="string" calcext:value-type="string">
            <text:p>C.U.</text:p>
          </table:table-cell>
          <table:table-cell table:style-name="ce317" office:value-type="float" office:value="400" calcext:value-type="float">
            <text:p>400</text:p>
          </table:table-cell>
          <table:table-cell table:style-name="ce317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/>
          <table:table-cell table:style-name="ce251" office:value-type="string" calcext:value-type="string">
            <text:p>COSTOS DE PRODUCCION O VENTAS</text:p>
          </table:table-cell>
          <table:table-cell table:style-name="ce272" table:number-columns-repeated="4"/>
          <table:table-cell table:style-name="ce298"/>
          <table:table-cell table:style-name="ce309"/>
          <table:table-cell table:style-name="ce317" office:value-type="float" office:value="50" calcext:value-type="float">
            <text:p>50</text:p>
          </table:table-cell>
          <table:table-cell table:style-name="ce317" table:formula="of:=([.I245]*[.J244])/[.I244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/>
          <table:table-cell table:style-name="ce258" office:value-type="string" calcext:value-type="string">
            <text:p><text:s/>Materia Prima Directa</text:p>
          </table:table-cell>
          <table:table-cell table:style-name="ce278" table:number-columns-repeated="4"/>
          <table:table-cell table:style-name="ce302" table:formula="of:=[.G247]+[.G248]+[.G249]" office:value-type="float" office:value="56100" calcext:value-type="float">
            <text:p><text:s/>56,100.00 </text:p>
          </table:table-cell>
          <table:table-cell table:style-name="ce314" table:formula="of:=+[.G246]/3600" office:value-type="float" office:value="15.5833333333333" calcext:value-type="float">
            <text:p><text:s/>15.58 </text:p>
          </table:table-cell>
          <table:table-cell table:style-name="ce317" table:number-columns-repeated="2"/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Pasta de cacao 400 gr</text:p>
          </table:table-cell>
          <table:table-cell table:style-name="ce274" table:formula="of:=[.C225]" office:value-type="float" office:value="20" calcext:value-type="float">
            <text:p>20.00</text:p>
          </table:table-cell>
          <table:table-cell table:style-name="ce253" table:formula="of:=[.I249]" office:value-type="float" office:value="1275" calcext:value-type="float">
            <text:p>1,275</text:p>
          </table:table-cell>
          <table:table-cell/>
          <table:table-cell table:formula="of:=[.G247]" office:value-type="float" office:value="25500" calcext:value-type="float">
            <text:p>25,500</text:p>
          </table:table-cell>
          <table:table-cell table:formula="of:=[.D247]*[.C247]" office:value-type="float" office:value="25500" calcext:value-type="float">
            <text:p><text:s/>25,500.00 </text:p>
          </table:table-cell>
          <table:table-cell/>
          <table:table-cell table:style-name="ce317" table:formula="of:=[.I244]/[.I245]" office:value-type="float" office:value="8" calcext:value-type="float">
            <text:p>8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253" office:value-type="string" calcext:value-type="string">
            <text:p>Yacon (Kg)</text:p>
          </table:table-cell>
          <table:table-cell table:style-name="ce274" table:formula="of:=[.C226]" office:value-type="float" office:value="3" calcext:value-type="float">
            <text:p>3.00</text:p>
          </table:table-cell>
          <table:table-cell table:style-name="ce253" table:formula="of:=[.J251]" office:value-type="float" office:value="5100" calcext:value-type="float">
            <text:p>5,100</text:p>
          </table:table-cell>
          <table:table-cell/>
          <table:table-cell table:formula="of:=[.G248]" office:value-type="float" office:value="15300" calcext:value-type="float">
            <text:p>15,300</text:p>
          </table:table-cell>
          <table:table-cell table:formula="of:=[.C248]*[.D248]" office:value-type="float" office:value="15300" calcext:value-type="float">
            <text:p><text:s/>15,300.00 </text:p>
          </table:table-cell>
          <table:table-cell/>
          <table:table-cell table:style-name="ce317" office:value-type="float" office:value="10200" calcext:value-type="float">
            <text:p>10200</text:p>
          </table:table-cell>
          <table:table-cell table:style-name="ce31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nvolturas</text:p>
          </table:table-cell>
          <table:table-cell office:value-type="float" office:value="1.5" calcext:value-type="float">
            <text:p>1.50</text:p>
          </table:table-cell>
          <table:table-cell table:formula="of:=[.I248]" office:value-type="float" office:value="10200" calcext:value-type="float">
            <text:p>10,200</text:p>
          </table:table-cell>
          <table:table-cell/>
          <table:table-cell table:formula="of:=[.G249]" office:value-type="float" office:value="15300" calcext:value-type="float">
            <text:p>15,300</text:p>
          </table:table-cell>
          <table:table-cell table:formula="of:=[.C249]*[.D249]" office:value-type="float" office:value="15300" calcext:value-type="float">
            <text:p><text:s/>15,300.00 </text:p>
          </table:table-cell>
          <table:table-cell/>
          <table:table-cell table:style-name="ce317" table:formula="of:=[.I248]/[.I247]" office:value-type="float" office:value="1275" calcext:value-type="float">
            <text:p>1275</text:p>
          </table:table-cell>
          <table:table-cell table:style-name="ce317"/>
          <table:table-cell table:number-columns-repeated="16374"/>
        </table:table-row>
        <table:table-row table:style-name="ro1">
          <table:table-cell table:number-columns-repeated="2"/>
          <table:table-cell table:style-name="ce254"/>
          <table:table-cell table:number-columns-repeated="3"/>
          <table:table-cell table:style-name="ce298"/>
          <table:table-cell table:style-name="ce309"/>
          <table:table-cell table:number-columns-repeated="16376"/>
        </table:table-row>
        <table:table-row table:style-name="ro1">
          <table:table-cell/>
          <table:table-cell table:style-name="ce258" office:value-type="string" calcext:value-type="string">
            <text:p><text:s/>Mano de Obra Directa</text:p>
          </table:table-cell>
          <table:table-cell table:style-name="ce278" table:number-columns-repeated="2"/>
          <table:table-cell table:style-name="ce296" table:number-columns-repeated="2"/>
          <table:table-cell table:style-name="ce302" table:formula="of:=SUM([.G252:.G257])" office:value-type="float" office:value="1190" calcext:value-type="float">
            <text:p><text:s/>1,190.00 </text:p>
          </table:table-cell>
          <table:table-cell table:style-name="ce314" table:formula="of:=+[.G251]/3600" office:value-type="float" office:value="0.330555555555556" calcext:value-type="float">
            <text:p><text:s/>0.33 </text:p>
          </table:table-cell>
          <table:table-cell office:value-type="string" calcext:value-type="string">
            <text:p>yacon</text:p>
          </table:table-cell>
          <table:table-cell table:formula="of:=[.I248]/2" office:value-type="float" office:value="5100" calcext:value-type="float">
            <text:p>51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 1</text:p>
          </table:table-cell>
          <table:table-cell table:formula="of:=[$Resumen.H14]/6" office:value-type="float" office:value="0.116666666666667" calcext:value-type="float">
            <text:p>0.12</text:p>
          </table:table-cell>
          <table:table-cell table:formula="of:=[$'Presupuesto de ventas'.N7]/6" office:value-type="float" office:value="1700" calcext:value-type="float">
            <text:p>1,700</text:p>
          </table:table-cell>
          <table:table-cell table:style-name="ce293"/>
          <table:table-cell table:formula="of:=[.G252]" office:value-type="float" office:value="198.333333333333" calcext:value-type="float">
            <text:p>198</text:p>
          </table:table-cell>
          <table:table-cell table:formula="of:=[.C252]*[.D252]" office:value-type="float" office:value="198.333333333333" calcext:value-type="float">
            <text:p><text:s/>198.33 </text:p>
          </table:table-cell>
          <table:table-cell/>
          <table:table-cell table:style-name="ce318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cinero 2</text:p>
          </table:table-cell>
          <table:table-cell table:formula="of:=[.C252]" office:value-type="float" office:value="0.116666666666667" calcext:value-type="float">
            <text:p>0.12</text:p>
          </table:table-cell>
          <table:table-cell table:formula="of:=[.D252]" office:value-type="float" office:value="1700" calcext:value-type="float">
            <text:p>1,700</text:p>
          </table:table-cell>
          <table:table-cell table:style-name="ce293"/>
          <table:table-cell table:formula="of:=[.G253]" office:value-type="float" office:value="198.333333333333" calcext:value-type="float">
            <text:p>198</text:p>
          </table:table-cell>
          <table:table-cell table:formula="of:=[.C253]*[.D253]" office:value-type="float" office:value="198.333333333333" calcext:value-type="float">
            <text:p><text:s/>198.33 </text:p>
          </table:table-cell>
          <table:table-cell table:number-columns-repeated="2"/>
          <table:table-cell table:style-name="ce320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ocinero3</text:p>
          </table:table-cell>
          <table:table-cell table:formula="of:=[.C253]" office:value-type="float" office:value="0.116666666666667" calcext:value-type="float">
            <text:p>0.12</text:p>
          </table:table-cell>
          <table:table-cell table:formula="of:=[.D253]" office:value-type="float" office:value="1700" calcext:value-type="float">
            <text:p>1,700</text:p>
          </table:table-cell>
          <table:table-cell table:style-name="ce293"/>
          <table:table-cell table:formula="of:=[.G254]" office:value-type="float" office:value="198.333333333333" calcext:value-type="float">
            <text:p>198</text:p>
          </table:table-cell>
          <table:table-cell table:formula="of:=[.C254]*[.D254]" office:value-type="float" office:value="198.333333333333" calcext:value-type="float">
            <text:p><text:s/>198.33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4</text:p>
          </table:table-cell>
          <table:table-cell table:formula="of:=[.C254]" office:value-type="float" office:value="0.116666666666667" calcext:value-type="float">
            <text:p>0.12</text:p>
          </table:table-cell>
          <table:table-cell table:formula="of:=[.D254]" office:value-type="float" office:value="1700" calcext:value-type="float">
            <text:p>1,700</text:p>
          </table:table-cell>
          <table:table-cell table:style-name="ce293"/>
          <table:table-cell table:formula="of:=[.G255]" office:value-type="float" office:value="198.333333333333" calcext:value-type="float">
            <text:p>198</text:p>
          </table:table-cell>
          <table:table-cell table:formula="of:=[.C255]*[.D255]" office:value-type="float" office:value="198.333333333333" calcext:value-type="float">
            <text:p><text:s/>198.33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5</text:p>
          </table:table-cell>
          <table:table-cell table:formula="of:=[.C255]" office:value-type="float" office:value="0.116666666666667" calcext:value-type="float">
            <text:p>0.12</text:p>
          </table:table-cell>
          <table:table-cell table:formula="of:=[.D255]" office:value-type="float" office:value="1700" calcext:value-type="float">
            <text:p>1,700</text:p>
          </table:table-cell>
          <table:table-cell table:style-name="ce293"/>
          <table:table-cell table:formula="of:=[.G256]" office:value-type="float" office:value="198.333333333333" calcext:value-type="float">
            <text:p>198</text:p>
          </table:table-cell>
          <table:table-cell table:formula="of:=[.C256]*[.D256]" office:value-type="float" office:value="198.333333333333" calcext:value-type="float">
            <text:p><text:s/>198.33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cinero 6</text:p>
          </table:table-cell>
          <table:table-cell table:formula="of:=[.C256]" office:value-type="float" office:value="0.116666666666667" calcext:value-type="float">
            <text:p>0.12</text:p>
          </table:table-cell>
          <table:table-cell table:formula="of:=[.D256]" office:value-type="float" office:value="1700" calcext:value-type="float">
            <text:p>1,700</text:p>
          </table:table-cell>
          <table:table-cell table:style-name="ce293"/>
          <table:table-cell table:formula="of:=[.G257]" office:value-type="float" office:value="198.333333333333" calcext:value-type="float">
            <text:p>198</text:p>
          </table:table-cell>
          <table:table-cell table:formula="of:=[.C257]*[.D257]" office:value-type="float" office:value="198.333333333333" calcext:value-type="float">
            <text:p><text:s/>198.33 </text:p>
          </table:table-cell>
          <table:table-cell table:number-columns-repeated="16377"/>
        </table:table-row>
        <table:table-row table:style-name="ro1">
          <table:table-cell/>
          <table:table-cell table:style-name="ce258" office:value-type="string" calcext:value-type="string">
            <text:p>Costos Indirectos de Fabricacion</text:p>
          </table:table-cell>
          <table:table-cell table:style-name="ce278" table:number-columns-repeated="2"/>
          <table:table-cell table:style-name="ce296" table:number-columns-repeated="2"/>
          <table:table-cell table:style-name="ce303" table:formula="of:=[.G259]+[.G260]" office:value-type="float" office:value="300" calcext:value-type="float">
            <text:p><text:s/>300.00 </text:p>
          </table:table-cell>
          <table:table-cell table:style-name="ce315" table:formula="of:=+[.G258]/3600" office:value-type="float" office:value="0.0833333333333333" calcext:value-type="float">
            <text:p><text:s/>0.08 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5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259]" office:value-type="float" office:value="300" calcext:value-type="float">
            <text:p>300</text:p>
          </table:table-cell>
          <table:table-cell table:formula="of:=[.C259]*[.D259]" office:value-type="float" office:value="300" calcext:value-type="float">
            <text:p><text:s/>300.00 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54"/>
          <table:table-cell table:number-columns-repeated="16381"/>
        </table:table-row>
        <table:table-row table:style-name="ro1">
          <table:table-cell/>
          <table:table-cell table:style-name="ce255" office:value-type="string" calcext:value-type="string">
            <text:p>TOTAL COSTOS DE PRODUCCION</text:p>
          </table:table-cell>
          <table:table-cell table:style-name="ce276" table:number-columns-repeated="2"/>
          <table:table-cell table:style-name="ce294" table:formula="of:=SUM([.E245:.E261])" office:value-type="float" office:value="0" calcext:value-type="float">
            <text:p>0</text:p>
          </table:table-cell>
          <table:table-cell table:style-name="ce294" table:formula="of:=SUM([.F245:.F261])" office:value-type="float" office:value="57590" calcext:value-type="float">
            <text:p>57,590</text:p>
          </table:table-cell>
          <table:table-cell table:style-name="ce301" table:formula="of:=[.G246]+[.G251]+[.G258]" office:value-type="float" office:value="57590" calcext:value-type="float">
            <text:p><text:s/>57,590.00 </text:p>
          </table:table-cell>
          <table:table-cell table:style-name="ce313" table:formula="of:=SUM([.H246:.H261])" office:value-type="float" office:value="15.9972222222222" calcext:value-type="float">
            <text:p><text:s/>16.00 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202" office:value-type="string" calcext:value-type="string" table:number-columns-spanned="6" table:number-rows-spanned="1">
            <text:p>PROYECCION DE COSTOS DE PRODUCCIÓN</text:p>
          </table:table-cell>
          <table:covered-table-cell table:number-columns-repeated="5" table:style-name="ce208"/>
          <table:table-cell table:style-name="Default"/>
          <table:table-cell table:number-columns-repeated="16376"/>
        </table:table-row>
        <table:table-row table:style-name="ro14">
          <table:table-cell/>
          <table:table-cell table:style-name="ce263" table:number-columns-repeated="5"/>
          <table:table-cell table:style-name="ce190"/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07" office:value-type="string" calcext:value-type="string">
            <text:p>DESCRIPCION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4" calcext:value-type="float">
            <text:p>4</text:p>
          </table:table-cell>
          <table:table-cell table:style-name="ce305" office:value-type="float" office:value="5" calcext:value-type="float">
            <text:p>5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64" office:value-type="string" calcext:value-type="string">
            <text:p>A. COSTOS DE PRODUCCION</text:p>
          </table:table-cell>
          <table:table-cell table:style-name="ce284" table:number-columns-repeated="4"/>
          <table:table-cell table:style-name="ce306"/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65" office:value-type="string" calcext:value-type="string">
            <text:p><text:s/>Materia prima <text:s/>e insumos</text:p>
          </table:table-cell>
          <table:table-cell table:style-name="ce285" table:formula="of:=SUM([.G19]+[.G38]+[.G57]+[.G77]+[.G97]+[.G117]+[.G138]+[.G159]+[.G180]+[.G202]+[.G224]+[.G246])" office:value-type="float" office:value="455400" calcext:value-type="float">
            <text:p><text:s/>455,400.00 </text:p>
          </table:table-cell>
          <table:table-cell table:style-name="ce288" table:formula="of:=[.G246]*12" office:value-type="float" office:value="673200" calcext:value-type="float">
            <text:p><text:s/>673,200.00 </text:p>
          </table:table-cell>
          <table:table-cell table:style-name="ce288" table:formula="of:=[.D269]" office:value-type="float" office:value="673200" calcext:value-type="float">
            <text:p><text:s/>673,200.00 </text:p>
          </table:table-cell>
          <table:table-cell table:style-name="ce288" table:formula="of:=[.D269]" office:value-type="float" office:value="673200" calcext:value-type="float">
            <text:p><text:s/>673,200.00 </text:p>
          </table:table-cell>
          <table:table-cell table:style-name="ce288" table:formula="of:=[.D269]" office:value-type="float" office:value="673200" calcext:value-type="float">
            <text:p><text:s/>673,200.00 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66" office:value-type="string" calcext:value-type="string">
            <text:p><text:s/>Mano de Obra</text:p>
          </table:table-cell>
          <table:table-cell table:style-name="ce285" table:formula="of:=[.G24]+[.G43]+[.G62]+[.G82]+[.G102]+[.G122]+[.G143]+[.G164]+[.G185]+[.G207]+[.G229]+[.G251]" office:value-type="float" office:value="15260" calcext:value-type="float">
            <text:p><text:s/>15,260.00 </text:p>
          </table:table-cell>
          <table:table-cell table:style-name="ce288" table:formula="of:=[.G251]*12" office:value-type="float" office:value="14280" calcext:value-type="float">
            <text:p><text:s/>14,280.00 </text:p>
          </table:table-cell>
          <table:table-cell table:style-name="ce288" table:formula="of:=[.D270]" office:value-type="float" office:value="14280" calcext:value-type="float">
            <text:p><text:s/>14,280.00 </text:p>
          </table:table-cell>
          <table:table-cell table:style-name="ce288" table:formula="of:=[.E270]" office:value-type="float" office:value="14280" calcext:value-type="float">
            <text:p><text:s/>14,280.00 </text:p>
          </table:table-cell>
          <table:table-cell table:style-name="ce288" table:formula="of:=[.F270]" office:value-type="float" office:value="14280" calcext:value-type="float">
            <text:p><text:s/>14,280.00 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66" office:value-type="string" calcext:value-type="string">
            <text:p>Costos Indirectos de Fabricacion</text:p>
          </table:table-cell>
          <table:table-cell table:style-name="ce285" table:formula="of:=[.G27]+[.G46]+[.G66]+[.G86]+[.G106]+[.G127]+[.G148]+[.G169]+[.G191]+[.G213]+[.G235]+[.G258]" office:value-type="float" office:value="2400" calcext:value-type="float">
            <text:p><text:s/>2,400.00 </text:p>
          </table:table-cell>
          <table:table-cell table:style-name="ce289" table:formula="of:=[.G258]*12" office:value-type="float" office:value="3600" calcext:value-type="float">
            <text:p><text:s/>3,600.00 </text:p>
          </table:table-cell>
          <table:table-cell table:style-name="ce289" table:formula="of:=[.D271]" office:value-type="float" office:value="3600" calcext:value-type="float">
            <text:p><text:s/>3,600.00 </text:p>
          </table:table-cell>
          <table:table-cell table:style-name="ce289" table:formula="of:=[.E271]" office:value-type="float" office:value="3600" calcext:value-type="float">
            <text:p><text:s/>3,600.00 </text:p>
          </table:table-cell>
          <table:table-cell table:style-name="ce289" table:formula="of:=[.F271]" office:value-type="float" office:value="3600" calcext:value-type="float">
            <text:p><text:s/>3,600.00 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67" office:value-type="string" calcext:value-type="string">
            <text:p>TOTAL COSTOS DE PRODUCCION</text:p>
          </table:table-cell>
          <table:table-cell table:style-name="ce286" table:formula="of:=SUM([.C269:.C271])" office:value-type="float" office:value="473060" calcext:value-type="float">
            <text:p><text:s/>473,060.00 </text:p>
          </table:table-cell>
          <table:table-cell table:style-name="ce286" table:formula="of:=SUM([.D269:.D271])" office:value-type="float" office:value="691080" calcext:value-type="float">
            <text:p><text:s/>691,080.00 </text:p>
          </table:table-cell>
          <table:table-cell table:style-name="ce286" table:formula="of:=SUM([.E269:.E271])" office:value-type="float" office:value="691080" calcext:value-type="float">
            <text:p><text:s/>691,080.00 </text:p>
          </table:table-cell>
          <table:table-cell table:style-name="ce286" table:formula="of:=SUM([.F269:.F271])" office:value-type="float" office:value="691080" calcext:value-type="float">
            <text:p><text:s/>691,080.00 </text:p>
          </table:table-cell>
          <table:table-cell table:style-name="ce286" table:formula="of:=SUM([.G269:.G271])" office:value-type="float" office:value="691080" calcext:value-type="float">
            <text:p><text:s/>691,080.00 </text:p>
          </table:table-cell>
          <table:table-cell table:style-name="Default"/>
          <table:table-cell table:number-columns-repeated="16376"/>
        </table:table-row>
      </table:table>
      <table:table table:name="Costos_Ventas" table:style-name="ta12">
        <table:table-column table:style-name="co69" table:default-cell-style-name="ce32"/>
        <table:table-column table:style-name="co34" table:default-cell-style-name="ce32"/>
        <table:table-column table:style-name="co70" table:default-cell-style-name="ce32"/>
        <table:table-column table:style-name="co71" table:default-cell-style-name="ce32"/>
        <table:table-column table:style-name="co62" table:default-cell-style-name="ce32"/>
        <table:table-column table:style-name="co72" table:default-cell-style-name="ce32"/>
        <table:table-column table:style-name="co73" table:default-cell-style-name="ce32"/>
        <table:table-column table:style-name="co74" table:default-cell-style-name="ce32"/>
        <table:table-column table:style-name="co15" table:default-cell-style-name="ce32"/>
        <table:table-column table:style-name="co13" table:default-cell-style-name="ce32"/>
        <table:table-column table:style-name="co4" table:number-columns-repeated="4" table:default-cell-style-name="ce32"/>
        <table:table-column table:style-name="co67" table:default-cell-style-name="ce32"/>
        <table:table-column table:style-name="co10" table:number-columns-repeated="16369" table:default-cell-style-name="ce32"/>
        <table:table-row table:style-name="ro5">
          <table:table-cell table:style-name="ce190" table:number-columns-repeated="15"/>
          <table:table-cell table:number-columns-repeated="16369"/>
        </table:table-row>
        <table:table-row table:style-name="ro26">
          <table:table-cell table:style-name="ce190" table:number-columns-repeated="15"/>
          <table:table-cell table:number-columns-repeated="16369"/>
        </table:table-row>
        <table:table-row table:style-name="ro9">
          <table:table-cell table:style-name="ce190" table:number-columns-repeated="2"/>
          <table:table-cell table:number-columns-repeated="6"/>
          <table:table-cell table:style-name="ce190" table:number-columns-repeated="7"/>
          <table:table-cell table:number-columns-repeated="16369"/>
        </table:table-row>
        <table:table-row table:style-name="ro27">
          <table:table-cell table:style-name="ce190" table:number-columns-repeated="2"/>
          <table:table-cell table:style-name="ce202" office:value-type="string" calcext:value-type="string" table:number-columns-spanned="6" table:number-rows-spanned="1">
            <text:p>PROYECCION DE COSTOS DE PRODUCCIÓN</text:p>
          </table:table-cell>
          <table:covered-table-cell table:number-columns-repeated="5" table:style-name="ce328"/>
          <table:table-cell table:style-name="ce190" table:number-columns-repeated="7"/>
          <table:table-cell table:number-columns-repeated="16369"/>
        </table:table-row>
        <table:table-row table:style-name="ro4">
          <table:table-cell table:style-name="ce190" table:number-columns-repeated="2"/>
          <table:table-cell table:style-name="ce263" table:number-columns-repeated="5"/>
          <table:table-cell table:style-name="ce190"/>
          <table:table-cell table:style-name="ce226"/>
          <table:table-cell table:style-name="ce190" table:number-columns-repeated="6"/>
          <table:table-cell table:number-columns-repeated="16369"/>
        </table:table-row>
        <table:table-row table:style-name="ro5">
          <table:table-cell table:style-name="ce190" table:number-columns-repeated="2"/>
          <table:table-cell table:style-name="ce207" office:value-type="string" calcext:value-type="string">
            <text:p>DESCRIPCION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4" calcext:value-type="float">
            <text:p>4</text:p>
          </table:table-cell>
          <table:table-cell table:style-name="ce305" office:value-type="float" office:value="5" calcext:value-type="float">
            <text:p>5</text:p>
          </table:table-cell>
          <table:table-cell table:style-name="ce243"/>
          <table:table-cell table:style-name="ce190" table:number-columns-repeated="6"/>
          <table:table-cell table:number-columns-repeated="16369"/>
        </table:table-row>
        <table:table-row table:style-name="ro28">
          <table:table-cell table:style-name="ce190" table:number-columns-repeated="2"/>
          <table:table-cell table:style-name="ce324" office:value-type="string" calcext:value-type="string">
            <text:p>A. COSTOS DE PRODUCCION</text:p>
          </table:table-cell>
          <table:table-cell table:style-name="ce284" table:number-columns-repeated="4"/>
          <table:table-cell table:style-name="ce306"/>
          <table:table-cell table:style-name="ce332"/>
          <table:table-cell table:style-name="ce190" table:number-columns-repeated="6"/>
          <table:table-cell table:number-columns-repeated="16369"/>
        </table:table-row>
        <table:table-row table:style-name="ro5">
          <table:table-cell table:style-name="ce190" table:number-columns-repeated="2"/>
          <table:table-cell table:style-name="ce325" office:value-type="string" calcext:value-type="string">
            <text:p><text:s/>Materia prima <text:s/>e insumos</text:p>
          </table:table-cell>
          <table:table-cell table:style-name="ce285" table:formula="of:=[$'costos por mes'.C269]" office:value-type="float" office:value="455400" calcext:value-type="float">
            <text:p><text:s/>455,400.00 </text:p>
          </table:table-cell>
          <table:table-cell table:style-name="ce285" table:formula="of:=[$'costos por mes'.D269]" office:value-type="float" office:value="673200" calcext:value-type="float">
            <text:p><text:s/>673,200.00 </text:p>
          </table:table-cell>
          <table:table-cell table:style-name="ce285" table:formula="of:=[$'costos por mes'.E269]" office:value-type="float" office:value="673200" calcext:value-type="float">
            <text:p><text:s/>673,200.00 </text:p>
          </table:table-cell>
          <table:table-cell table:style-name="ce285" table:formula="of:=[$'costos por mes'.F269]" office:value-type="float" office:value="673200" calcext:value-type="float">
            <text:p><text:s/>673,200.00 </text:p>
          </table:table-cell>
          <table:table-cell table:style-name="ce285" table:formula="of:=[$'costos por mes'.G269]" office:value-type="float" office:value="673200" calcext:value-type="float">
            <text:p><text:s/>673,200.00 </text:p>
          </table:table-cell>
          <table:table-cell table:style-name="ce332"/>
          <table:table-cell table:style-name="ce190" table:number-columns-repeated="6"/>
          <table:table-cell table:number-columns-repeated="16369"/>
        </table:table-row>
        <table:table-row table:style-name="ro5">
          <table:table-cell table:style-name="ce190" table:number-columns-repeated="2"/>
          <table:table-cell table:style-name="ce326" office:value-type="string" calcext:value-type="string">
            <text:p><text:s/>Mano de Obra</text:p>
          </table:table-cell>
          <table:table-cell table:style-name="ce329" table:formula="of:=[$Planilla.I9]" office:value-type="float" office:value="57920.4566666667" calcext:value-type="float">
            <text:p><text:s/>57,920.46 </text:p>
          </table:table-cell>
          <table:table-cell table:style-name="ce329" table:formula="of:=[$Planilla.$R$8]" office:value-type="float" office:value="85622.1133333333" calcext:value-type="float">
            <text:p><text:s/>85,622.11 </text:p>
          </table:table-cell>
          <table:table-cell table:style-name="ce329" table:formula="of:=[$Planilla.$R$8]" office:value-type="float" office:value="85622.1133333333" calcext:value-type="float">
            <text:p><text:s/>85,622.11 </text:p>
          </table:table-cell>
          <table:table-cell table:style-name="ce329" table:formula="of:=[$Planilla.$R$8]" office:value-type="float" office:value="85622.1133333333" calcext:value-type="float">
            <text:p><text:s/>85,622.11 </text:p>
          </table:table-cell>
          <table:table-cell table:style-name="ce329" table:formula="of:=[$Planilla.$R$8]" office:value-type="float" office:value="85622.1133333333" calcext:value-type="float">
            <text:p><text:s/>85,622.11 </text:p>
          </table:table-cell>
          <table:table-cell table:style-name="ce333"/>
          <table:table-cell table:style-name="ce334" table:number-columns-repeated="2"/>
          <table:table-cell table:style-name="ce190" table:number-columns-repeated="4"/>
          <table:table-cell table:number-columns-repeated="16369"/>
        </table:table-row>
        <table:table-row table:style-name="ro5">
          <table:table-cell table:style-name="ce190" table:number-columns-repeated="2"/>
          <table:table-cell table:style-name="ce326" office:value-type="string" calcext:value-type="string">
            <text:p>Costos Indirectos de Fabricacion</text:p>
          </table:table-cell>
          <table:table-cell table:style-name="ce285" table:formula="of:=[$'costos por mes'.C271]" office:value-type="float" office:value="2400" calcext:value-type="float">
            <text:p><text:s/>2,400.00 </text:p>
          </table:table-cell>
          <table:table-cell table:style-name="ce285" table:formula="of:=[$'costos por mes'.D271]" office:value-type="float" office:value="3600" calcext:value-type="float">
            <text:p><text:s/>3,600.00 </text:p>
          </table:table-cell>
          <table:table-cell table:style-name="ce285" table:formula="of:=[$'costos por mes'.E271]" office:value-type="float" office:value="3600" calcext:value-type="float">
            <text:p><text:s/>3,600.00 </text:p>
          </table:table-cell>
          <table:table-cell table:style-name="ce285" table:formula="of:=[$'costos por mes'.F271]" office:value-type="float" office:value="3600" calcext:value-type="float">
            <text:p><text:s/>3,600.00 </text:p>
          </table:table-cell>
          <table:table-cell table:style-name="ce285" table:formula="of:=[$'costos por mes'.G271]" office:value-type="float" office:value="3600" calcext:value-type="float">
            <text:p><text:s/>3,600.00 </text:p>
          </table:table-cell>
          <table:table-cell table:style-name="ce332"/>
          <table:table-cell table:style-name="ce190" table:number-columns-repeated="6"/>
          <table:table-cell table:number-columns-repeated="16369"/>
        </table:table-row>
        <table:table-row table:style-name="ro4">
          <table:table-cell table:style-name="ce190" table:number-columns-repeated="2"/>
          <table:table-cell table:style-name="ce267" office:value-type="string" calcext:value-type="string">
            <text:p>TOTAL COSTOS DE PRODUCCION</text:p>
          </table:table-cell>
          <table:table-cell table:style-name="ce330" table:formula="of:=[$'costos por mes'.C272]" office:value-type="float" office:value="473060" calcext:value-type="float">
            <text:p><text:s/>473,060.00 </text:p>
          </table:table-cell>
          <table:table-cell table:style-name="ce330" table:formula="of:=[$'costos por mes'.D272]" office:value-type="float" office:value="691080" calcext:value-type="float">
            <text:p><text:s/>691,080.00 </text:p>
          </table:table-cell>
          <table:table-cell table:style-name="ce330" table:formula="of:=[$'costos por mes'.E272]" office:value-type="float" office:value="691080" calcext:value-type="float">
            <text:p><text:s/>691,080.00 </text:p>
          </table:table-cell>
          <table:table-cell table:style-name="ce330" table:formula="of:=[$'costos por mes'.F272]" office:value-type="float" office:value="691080" calcext:value-type="float">
            <text:p><text:s/>691,080.00 </text:p>
          </table:table-cell>
          <table:table-cell table:style-name="ce330" table:formula="of:=[$'costos por mes'.G272]" office:value-type="float" office:value="691080" calcext:value-type="float">
            <text:p><text:s/>691,080.00 </text:p>
          </table:table-cell>
          <table:table-cell table:style-name="ce332"/>
          <table:table-cell table:style-name="ce190" table:number-columns-repeated="6"/>
          <table:table-cell table:number-columns-repeated="16369"/>
        </table:table-row>
        <table:table-row table:style-name="ro5">
          <table:table-cell table:style-name="ce190" table:number-columns-repeated="2"/>
          <table:table-cell table:style-name="ce327" table:number-columns-spanned="2" table:number-rows-spanned="1"/>
          <table:covered-table-cell table:style-name="ce208"/>
          <table:table-cell table:style-name="ce331" table:number-columns-repeated="4"/>
          <table:table-cell table:style-name="ce332"/>
          <table:table-cell table:style-name="ce190" table:number-columns-repeated="6"/>
          <table:table-cell table:number-columns-repeated="16369"/>
        </table:table-row>
        <table:table-row table:style-name="ro5" table:number-rows-repeated="20">
          <table:table-cell table:style-name="ce190" table:number-columns-repeated="15"/>
          <table:table-cell table:number-columns-repeated="16369"/>
        </table:table-row>
        <table:table-row table:style-name="ro5">
          <table:table-cell table:style-name="ce190" table:number-columns-repeated="3"/>
          <table:table-cell table:style-name="ce190" office:value-type="string" calcext:value-type="string">
            <text:p>[</text:p>
          </table:table-cell>
          <table:table-cell table:style-name="ce190" table:number-columns-repeated="11"/>
          <table:table-cell table:number-columns-repeated="16369"/>
        </table:table-row>
        <table:table-row table:style-name="ro5" table:number-rows-repeated="934">
          <table:table-cell table:style-name="ce190" table:number-columns-repeated="15"/>
          <table:table-cell table:number-columns-repeated="16369"/>
        </table:table-row>
        <table:table-row table:style-name="ro9" table:number-rows-repeated="104760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Gastos Operativos" table:style-name="ta13">
        <table:table-column table:style-name="co69" table:default-cell-style-name="ce336"/>
        <table:table-column table:style-name="co34" table:default-cell-style-name="ce336"/>
        <table:table-column table:style-name="co70" table:default-cell-style-name="ce336"/>
        <table:table-column table:style-name="co75" table:default-cell-style-name="ce336"/>
        <table:table-column table:style-name="co62" table:default-cell-style-name="ce336"/>
        <table:table-column table:style-name="co76" table:default-cell-style-name="ce336"/>
        <table:table-column table:style-name="co77" table:default-cell-style-name="ce336"/>
        <table:table-column table:style-name="co78" table:default-cell-style-name="ce336"/>
        <table:table-column table:style-name="co4" table:number-columns-repeated="18" table:default-cell-style-name="ce336"/>
        <table:table-column table:style-name="co10" table:number-columns-repeated="16358" table:default-cell-style-name="ce336"/>
        <table:table-row table:style-name="ro5">
          <table:table-cell table:style-name="ce335" table:number-columns-repeated="26"/>
          <table:table-cell table:number-columns-repeated="16358"/>
        </table:table-row>
        <table:table-row table:style-name="ro9">
          <table:table-cell table:style-name="ce335" table:number-columns-repeated="2"/>
          <table:table-cell table:style-name="ce337" table:number-columns-spanned="6" table:number-rows-spanned="1"/>
          <table:covered-table-cell table:number-columns-repeated="5" table:style-name="ce349"/>
          <table:table-cell table:style-name="ce335" table:number-columns-repeated="18"/>
          <table:table-cell table:number-columns-repeated="16358"/>
        </table:table-row>
        <table:table-row table:style-name="ro9">
          <table:table-cell table:style-name="ce335" table:number-columns-repeated="2"/>
          <table:table-cell table:style-name="ce337" office:value-type="string" calcext:value-type="string" table:number-columns-spanned="6" table:number-rows-spanned="1">
            <text:p>GASTOS OPERATIVOS PRIMER MES</text:p>
          </table:table-cell>
          <table:covered-table-cell table:number-columns-repeated="5" table:style-name="ce349"/>
          <table:table-cell table:style-name="ce335" table:number-columns-repeated="18"/>
          <table:table-cell table:number-columns-repeated="16358"/>
        </table:table-row>
        <table:table-row table:style-name="ro4">
          <table:table-cell table:style-name="ce335" table:number-columns-repeated="26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38" office:value-type="string" calcext:value-type="string" table:number-columns-spanned="1" table:number-rows-spanned="2">
            <text:p>RUBRO</text:p>
          </table:table-cell>
          <table:table-cell table:style-name="ce350" office:value-type="string" calcext:value-type="string" table:number-columns-spanned="1" table:number-rows-spanned="2">
            <text:p>COSTO UNITARIO</text:p>
          </table:table-cell>
          <table:table-cell table:style-name="ce350" office:value-type="string" calcext:value-type="string" table:number-columns-spanned="1" table:number-rows-spanned="2">
            <text:p>UNIDADES REQUERIDAS</text:p>
          </table:table-cell>
          <table:table-cell table:style-name="ce360" office:value-type="string" calcext:value-type="string" table:number-columns-spanned="2" table:number-rows-spanned="1">
            <text:p>COSTO </text:p>
          </table:table-cell>
          <table:covered-table-cell table:style-name="ce365"/>
          <table:table-cell table:style-name="ce366" office:value-type="string" calcext:value-type="string" table:number-columns-spanned="1" table:number-rows-spanned="2">
            <text:p>TOTAL</text:p>
          </table:table-cell>
          <table:table-cell table:style-name="ce335" table:number-columns-repeated="18"/>
          <table:table-cell table:number-columns-repeated="16358"/>
        </table:table-row>
        <table:table-row table:style-name="ro4">
          <table:table-cell table:style-name="ce335" table:number-columns-repeated="2"/>
          <table:covered-table-cell table:style-name="ce339"/>
          <table:covered-table-cell table:number-columns-repeated="2" table:style-name="ce351"/>
          <table:table-cell table:style-name="ce361" office:value-type="string" calcext:value-type="string">
            <text:p>FIJO</text:p>
          </table:table-cell>
          <table:table-cell table:style-name="ce361" office:value-type="string" calcext:value-type="string">
            <text:p>VARIABLE</text:p>
          </table:table-cell>
          <table:covered-table-cell table:style-name="ce367"/>
          <table:table-cell table:style-name="ce335" table:number-columns-repeated="18"/>
          <table:table-cell table:number-columns-repeated="16358"/>
        </table:table-row>
        <table:table-row table:style-name="ro4">
          <table:table-cell table:style-name="ce335" table:number-columns-repeated="2"/>
          <table:table-cell table:style-name="ce340" office:value-type="string" calcext:value-type="string">
            <text:p>GASTOS DE ADMINISTRACION</text:p>
          </table:table-cell>
          <table:table-cell table:style-name="ce352" table:number-columns-repeated="4"/>
          <table:table-cell table:style-name="ce368"/>
          <table:table-cell table:style-name="ce335" table:number-columns-repeated="18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41" office:value-type="string" calcext:value-type="string">
            <text:p>Sueldos del personal</text:p>
          </table:table-cell>
          <table:table-cell table:style-name="ce353" table:formula="of:=[$Planilla.I13]/12" office:value-type="float" office:value="1098.73472222222" calcext:value-type="float">
            <text:p>1,099</text:p>
          </table:table-cell>
          <table:table-cell table:style-name="ce357" office:value-type="float" office:value="1" calcext:value-type="float">
            <text:p>1</text:p>
          </table:table-cell>
          <table:table-cell table:style-name="ce362" table:formula="of:=[.D8]" office:value-type="float" office:value="1098.73472222222" calcext:value-type="float">
            <text:p>1,099</text:p>
          </table:table-cell>
          <table:table-cell table:style-name="ce362"/>
          <table:table-cell table:style-name="ce369" table:formula="of:=[.D8]*[.E8]" office:value-type="float" office:value="1098.73472222222" calcext:value-type="float">
            <text:p>1098.73472222222</text:p>
          </table:table-cell>
          <table:table-cell table:style-name="ce371" office:value-type="string" calcext:value-type="string" table:number-columns-spanned="3" table:number-rows-spanned="1">
            <text:p>NO CONSIDERA OTROS GASTOS OK</text:p>
          </table:table-cell>
          <table:covered-table-cell table:number-columns-repeated="2" table:style-name="ce372"/>
          <table:table-cell table:style-name="ce335" table:number-columns-repeated="15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42" office:value-type="string" calcext:value-type="string">
            <text:p>Servicios: Agua, luz, telefono e internet</text:p>
          </table:table-cell>
          <table:table-cell table:number-columns-repeated="2" table:style-name="ce354" office:value-type="float" office:value="0" calcext:value-type="float">
            <text:p>0</text:p>
          </table:table-cell>
          <table:table-cell table:style-name="ce363" table:number-columns-repeated="2"/>
          <table:table-cell table:style-name="ce369" table:formula="of:=[.D9]*[.E9]" office:value-type="float" office:value="0" calcext:value-type="float">
            <text:p>0</text:p>
          </table:table-cell>
          <table:table-cell table:style-name="ce335" table:number-columns-repeated="18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42" office:value-type="string" calcext:value-type="string">
            <text:p>Mantenimiento y reparaciones.</text:p>
          </table:table-cell>
          <table:table-cell table:number-columns-repeated="2" table:style-name="ce354" office:value-type="float" office:value="0" calcext:value-type="float">
            <text:p>0</text:p>
          </table:table-cell>
          <table:table-cell table:style-name="ce363" table:number-columns-repeated="2"/>
          <table:table-cell table:style-name="ce369" table:formula="of:=[.D10]*[.E10]" office:value-type="float" office:value="0" calcext:value-type="float">
            <text:p>0</text:p>
          </table:table-cell>
          <table:table-cell table:style-name="ce335" table:number-columns-repeated="18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42" office:value-type="string" calcext:value-type="string">
            <text:p>Utiles de oficina</text:p>
          </table:table-cell>
          <table:table-cell table:style-name="ce354" office:value-type="float" office:value="100" calcext:value-type="float">
            <text:p>100</text:p>
          </table:table-cell>
          <table:table-cell table:style-name="ce354" office:value-type="float" office:value="1" calcext:value-type="float">
            <text:p>1</text:p>
          </table:table-cell>
          <table:table-cell table:style-name="ce363" table:formula="of:=[.D11]" office:value-type="float" office:value="100" calcext:value-type="float">
            <text:p>100</text:p>
          </table:table-cell>
          <table:table-cell/>
          <table:table-cell table:style-name="ce369" table:formula="of:=[.D11]*[.E11]" office:value-type="float" office:value="100" calcext:value-type="float">
            <text:p>100</text:p>
          </table:table-cell>
          <table:table-cell table:style-name="ce335" table:number-columns-repeated="18"/>
          <table:table-cell table:number-columns-repeated="16358"/>
        </table:table-row>
        <table:table-row table:style-name="ro4">
          <table:table-cell table:style-name="ce335" table:number-columns-repeated="2"/>
          <table:table-cell table:style-name="ce343" office:value-type="string" calcext:value-type="string">
            <text:p>Alquiler de local</text:p>
          </table:table-cell>
          <table:table-cell table:style-name="ce355" office:value-type="float" office:value="1200" calcext:value-type="float">
            <text:p>1,200</text:p>
          </table:table-cell>
          <table:table-cell table:style-name="ce355" office:value-type="float" office:value="1" calcext:value-type="float">
            <text:p>1</text:p>
          </table:table-cell>
          <table:table-cell table:style-name="ce364" table:formula="of:=[.D12]" office:value-type="float" office:value="1200" calcext:value-type="float">
            <text:p>1,200</text:p>
          </table:table-cell>
          <table:table-cell table:style-name="ce364"/>
          <table:table-cell table:style-name="ce369" table:formula="of:=[.D12]*[.E12]" office:value-type="float" office:value="1200" calcext:value-type="float">
            <text:p>1200</text:p>
          </table:table-cell>
          <table:table-cell table:style-name="ce335" table:number-columns-repeated="18"/>
          <table:table-cell table:number-columns-repeated="16358"/>
        </table:table-row>
        <table:table-row table:style-name="ro4">
          <table:table-cell table:style-name="ce335" table:number-columns-repeated="2"/>
          <table:table-cell table:style-name="ce344" office:value-type="string" calcext:value-type="string">
            <text:p>TOTAL GASTOS DE ADMINISTRACION</text:p>
          </table:table-cell>
          <table:table-cell table:style-name="ce356" table:formula="of:=SUM([.D8:.D12])" office:value-type="float" office:value="2398.73472222222" calcext:value-type="float">
            <text:p>2,399</text:p>
          </table:table-cell>
          <table:table-cell table:style-name="ce356"/>
          <table:table-cell table:style-name="ce356" table:formula="of:=SUM([.F8:.F12])" office:value-type="float" office:value="2398.73472222222" calcext:value-type="float">
            <text:p>2,399</text:p>
          </table:table-cell>
          <table:table-cell table:style-name="ce356" table:formula="of:=SUM([.G8:.G12])" office:value-type="float" office:value="0" calcext:value-type="float">
            <text:p>0</text:p>
          </table:table-cell>
          <table:table-cell table:style-name="ce356" table:formula="of:=SUM([.H8:.H12])" office:value-type="float" office:value="2398.73472222222" calcext:value-type="float">
            <text:p>2,399</text:p>
          </table:table-cell>
          <table:table-cell table:style-name="ce335" table:number-columns-repeated="18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41" office:value-type="string" calcext:value-type="string">
            <text:p>GASTOS DE VENTAS</text:p>
          </table:table-cell>
          <table:table-cell table:style-name="ce357" table:number-columns-repeated="2"/>
          <table:table-cell table:style-name="ce362" table:number-columns-repeated="2"/>
          <table:table-cell table:style-name="ce369"/>
          <table:table-cell table:style-name="ce335" table:number-columns-repeated="18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45" office:value-type="string" calcext:value-type="string">
            <text:p>Volantes (Millar)</text:p>
          </table:table-cell>
          <table:table-cell table:style-name="ce354" office:value-type="float" office:value="15" calcext:value-type="float">
            <text:p>15</text:p>
          </table:table-cell>
          <table:table-cell table:style-name="ce354" office:value-type="float" office:value="1" calcext:value-type="float">
            <text:p>1</text:p>
          </table:table-cell>
          <table:table-cell table:style-name="ce363" table:formula="of:=[.D15]" office:value-type="float" office:value="15" calcext:value-type="float">
            <text:p>15</text:p>
          </table:table-cell>
          <table:table-cell/>
          <table:table-cell table:style-name="ce369" table:formula="of:=[.D15]*[.E15]" office:value-type="float" office:value="15" calcext:value-type="float">
            <text:p>15</text:p>
          </table:table-cell>
          <table:table-cell table:style-name="ce335" table:number-columns-repeated="18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45" office:value-type="string" calcext:value-type="string">
            <text:p>Flete</text:p>
          </table:table-cell>
          <table:table-cell table:style-name="ce354" office:value-type="float" office:value="50" calcext:value-type="float">
            <text:p>50</text:p>
          </table:table-cell>
          <table:table-cell table:style-name="ce354" office:value-type="float" office:value="8" calcext:value-type="float">
            <text:p>8</text:p>
          </table:table-cell>
          <table:table-cell table:style-name="ce363" table:formula="of:=[.H16]" office:value-type="float" office:value="400" calcext:value-type="float">
            <text:p>400</text:p>
          </table:table-cell>
          <table:table-cell/>
          <table:table-cell table:style-name="ce369" table:formula="of:=[.D16]*[.E16]" office:value-type="float" office:value="400" calcext:value-type="float">
            <text:p>400</text:p>
          </table:table-cell>
          <table:table-cell table:style-name="ce335" table:number-columns-repeated="18"/>
          <table:table-cell table:number-columns-repeated="16358"/>
        </table:table-row>
        <table:table-row table:style-name="ro4">
          <table:table-cell table:style-name="ce335" table:number-columns-repeated="2"/>
          <table:table-cell table:style-name="ce346" office:value-type="string" calcext:value-type="string">
            <text:p>Publicidad</text:p>
          </table:table-cell>
          <table:table-cell table:style-name="ce355" office:value-type="float" office:value="100" calcext:value-type="float">
            <text:p>100</text:p>
          </table:table-cell>
          <table:table-cell table:style-name="ce355" office:value-type="float" office:value="1" calcext:value-type="float">
            <text:p>1</text:p>
          </table:table-cell>
          <table:table-cell table:style-name="ce364" table:formula="of:=[.H17]" office:value-type="float" office:value="100" calcext:value-type="float">
            <text:p>100</text:p>
          </table:table-cell>
          <table:table-cell/>
          <table:table-cell table:style-name="ce369" table:formula="of:=[.D17]*[.E17]" office:value-type="float" office:value="100" calcext:value-type="float">
            <text:p>100</text:p>
          </table:table-cell>
          <table:table-cell table:style-name="ce335" table:number-columns-repeated="18"/>
          <table:table-cell table:number-columns-repeated="16358"/>
        </table:table-row>
        <table:table-row table:style-name="ro4">
          <table:table-cell table:style-name="ce335" table:number-columns-repeated="2"/>
          <table:table-cell table:style-name="ce344" office:value-type="string" calcext:value-type="string">
            <text:p>TOTAL GASTOS DE VENTAS</text:p>
          </table:table-cell>
          <table:table-cell table:style-name="ce356" table:formula="of:=SUM([.D15:.D17])" office:value-type="float" office:value="165" calcext:value-type="float">
            <text:p>165</text:p>
          </table:table-cell>
          <table:table-cell table:style-name="ce356"/>
          <table:table-cell table:style-name="ce356" table:formula="of:=SUM([.F15:.F17])" office:value-type="float" office:value="515" calcext:value-type="float">
            <text:p>515</text:p>
          </table:table-cell>
          <table:table-cell table:style-name="ce356" table:formula="of:=SUM([.G15:.G17])" office:value-type="float" office:value="0" calcext:value-type="float">
            <text:p>0</text:p>
          </table:table-cell>
          <table:table-cell table:style-name="ce356" table:formula="of:=SUM([.H15:.H17])" office:value-type="float" office:value="515" calcext:value-type="float">
            <text:p>515</text:p>
          </table:table-cell>
          <table:table-cell table:style-name="ce335" table:number-columns-repeated="18"/>
          <table:table-cell table:number-columns-repeated="16358"/>
        </table:table-row>
        <table:table-row table:style-name="ro29">
          <table:table-cell table:style-name="ce335" table:number-columns-repeated="2"/>
          <table:table-cell table:style-name="ce347" office:value-type="string" calcext:value-type="string">
            <text:p>TOTAL GASTOS OPERATIVOS</text:p>
          </table:table-cell>
          <table:table-cell table:style-name="ce358" table:formula="of:=[.D18]+[.D13]" office:value-type="float" office:value="2563.73472222222" calcext:value-type="float">
            <text:p>2,564</text:p>
          </table:table-cell>
          <table:table-cell table:style-name="ce358"/>
          <table:table-cell table:style-name="ce358" table:formula="of:=[.F18]+[.F13]" office:value-type="float" office:value="2913.73472222222" calcext:value-type="float">
            <text:p>2,914</text:p>
          </table:table-cell>
          <table:table-cell table:style-name="ce358" table:formula="of:=[.G18]+[.G13]" office:value-type="float" office:value="0" calcext:value-type="float">
            <text:p>0</text:p>
          </table:table-cell>
          <table:table-cell table:style-name="ce370" table:formula="of:=[.F19]+[.G19]" office:value-type="float" office:value="2913.73472222222" calcext:value-type="float">
            <text:p>2,914</text:p>
          </table:table-cell>
          <table:table-cell table:style-name="ce335" table:number-columns-repeated="18"/>
          <table:table-cell table:number-columns-repeated="16358"/>
        </table:table-row>
        <table:table-row table:style-name="ro5">
          <table:table-cell table:style-name="ce335" table:number-columns-repeated="2"/>
          <table:table-cell table:style-name="ce348" table:number-columns-spanned="2" table:number-rows-spanned="1"/>
          <table:covered-table-cell table:style-name="ce349"/>
          <table:table-cell table:style-name="ce359" table:number-columns-repeated="3"/>
          <table:table-cell table:style-name="ce335" table:number-columns-repeated="19"/>
          <table:table-cell table:number-columns-repeated="16358"/>
        </table:table-row>
        <table:table-row table:style-name="ro5" table:number-rows-repeated="960">
          <table:table-cell table:style-name="ce335" table:number-columns-repeated="26"/>
          <table:table-cell table:number-columns-repeated="16358"/>
        </table:table-row>
        <table:table-row table:style-name="ro1" table:number-rows-repeated="10475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ujo_Deuda" table:style-name="ta14">
        <table:table-column table:style-name="co21" table:default-cell-style-name="ce80"/>
        <table:table-column table:style-name="co79" table:default-cell-style-name="ce80"/>
        <table:table-column table:style-name="co13" table:default-cell-style-name="ce80"/>
        <table:table-column table:style-name="co10" table:default-cell-style-name="ce80"/>
        <table:table-column table:style-name="co78" table:default-cell-style-name="ce80"/>
        <table:table-column table:style-name="co47" table:default-cell-style-name="ce80"/>
        <table:table-column table:style-name="co27" table:default-cell-style-name="ce80"/>
        <table:table-column table:style-name="co10" table:default-cell-style-name="ce80"/>
        <table:table-column table:style-name="co21" table:number-columns-repeated="248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column table:style-name="co79" table:default-cell-style-name="ce80"/>
        <table:table-column table:style-name="co21" table:default-cell-style-name="ce80"/>
        <table:table-column table:style-name="co10" table:default-cell-style-name="ce80"/>
        <table:table-column table:style-name="co9" table:default-cell-style-name="ce80"/>
        <table:table-column table:style-name="co69" table:default-cell-style-name="ce80"/>
        <table:table-column table:style-name="co27" table:default-cell-style-name="ce80"/>
        <table:table-column table:style-name="co21" table:number-columns-repeated="250" table:default-cell-style-name="ce80"/>
        <table:table-row table:style-name="ro12">
          <table:table-cell table:number-columns-repeated="16384"/>
        </table:table-row>
        <table:table-row table:style-name="ro12">
          <table:table-cell/>
          <table:table-cell table:style-name="ce373" office:value-type="string" calcext:value-type="string">
            <text:p>c.) Tabla de amortizacion de la deuda</text:p>
          </table:table-cell>
          <table:table-cell table:number-columns-repeated="5"/>
          <table:table-cell table:style-name="ce394"/>
          <table:table-cell table:style-name="ce399"/>
          <table:table-cell table:number-columns-repeated="16375"/>
        </table:table-row>
        <table:table-row table:style-name="ro12">
          <table:table-cell/>
          <table:table-cell table:style-name="ce374" table:number-columns-repeated="2"/>
          <table:table-cell table:style-name="ce374" office:value-type="string" calcext:value-type="string">
            <text:p>Prestamo =</text:p>
          </table:table-cell>
          <table:table-cell table:style-name="ce380" table:formula="of:=[$'INVERSION INICIAL'.F32]" office:value-type="float" office:value="20000" calcext:value-type="float">
            <text:p>20,000.00</text:p>
          </table:table-cell>
          <table:table-cell table:style-name="ce374" table:number-columns-repeated="2"/>
          <table:table-cell table:style-name="ce394"/>
          <table:table-cell table:style-name="ce400"/>
          <table:table-cell table:number-columns-repeated="16375"/>
        </table:table-row>
        <table:table-row table:style-name="ro12">
          <table:table-cell/>
          <table:table-cell table:style-name="ce374" table:number-columns-repeated="2"/>
          <table:table-cell table:style-name="ce374" office:value-type="string" calcext:value-type="string">
            <text:p>TEA nominal =</text:p>
          </table:table-cell>
          <table:table-cell table:style-name="ce381" table:formula="of:=[$Resumen.H10]" office:value-type="percentage" office:value="0.2163" calcext:value-type="percentage">
            <text:p>21.63 %</text:p>
          </table:table-cell>
          <table:table-cell table:style-name="ce374" table:number-columns-repeated="2"/>
          <table:table-cell table:style-name="ce395" table:number-columns-spanned="1" table:number-rows-spanned="2"/>
          <table:table-cell table:style-name="ce401" table:number-columns-spanned="1" table:number-rows-spanned="2"/>
          <table:table-cell table:number-columns-repeated="16375"/>
        </table:table-row>
        <table:table-row table:style-name="ro12">
          <table:table-cell/>
          <table:table-cell table:style-name="ce374" table:number-columns-repeated="2"/>
          <table:table-cell table:style-name="ce374" office:value-type="string" calcext:value-type="string">
            <text:p>TEM nominal¨=</text:p>
          </table:table-cell>
          <table:table-cell table:style-name="ce381" table:formula="of:=POWER((1+[.E4]);(1/12))-1" office:value-type="percentage" office:value="0.0164516508705581" calcext:value-type="percentage">
            <text:p>1.65 %</text:p>
          </table:table-cell>
          <table:table-cell table:style-name="ce374" table:number-columns-repeated="2"/>
          <table:covered-table-cell table:style-name="ce395"/>
          <table:covered-table-cell table:style-name="ce401"/>
          <table:table-cell table:number-columns-repeated="16375"/>
        </table:table-row>
        <table:table-row table:style-name="ro12">
          <table:table-cell/>
          <table:table-cell table:style-name="ce374" table:number-columns-repeated="2"/>
          <table:table-cell table:style-name="ce374" office:value-type="string" calcext:value-type="string">
            <text:p>Inflacion Anual =</text:p>
          </table:table-cell>
          <table:table-cell table:style-name="ce382" table:formula="of:=[$Resumen.H8]" office:value-type="percentage" office:value="0.029" calcext:value-type="percentage">
            <text:p>2.9%</text:p>
          </table:table-cell>
          <table:table-cell table:style-name="ce374" table:number-columns-repeated="2"/>
          <table:table-cell table:number-columns-repeated="16377"/>
        </table:table-row>
        <table:table-row table:style-name="ro12">
          <table:table-cell/>
          <table:table-cell table:style-name="ce374" table:number-columns-repeated="2"/>
          <table:table-cell table:style-name="ce374" office:value-type="string" calcext:value-type="string">
            <text:p>Inflacion mes =</text:p>
          </table:table-cell>
          <table:table-cell table:style-name="ce383" table:formula="of:=POWER((1+[.E6]);(1/[.E9]))-1" office:value-type="percentage" office:value="0.00119185372930763" calcext:value-type="percentage">
            <text:p>0.12 %</text:p>
          </table:table-cell>
          <table:table-cell table:style-name="ce374" table:number-columns-repeated="2"/>
          <table:table-cell table:number-columns-repeated="16377"/>
        </table:table-row>
        <table:table-row table:style-name="ro12">
          <table:table-cell/>
          <table:table-cell table:style-name="ce374" table:number-columns-repeated="2"/>
          <table:table-cell table:style-name="ce374" office:value-type="string" calcext:value-type="string">
            <text:p>TEM real =</text:p>
          </table:table-cell>
          <table:table-cell table:style-name="ce383" table:formula="of:=((1+[.E5])/(1+[.E7])) - 1" office:value-type="percentage" office:value="0.0152416313460899" calcext:value-type="percentage">
            <text:p>1.52 %</text:p>
          </table:table-cell>
          <table:table-cell table:style-name="ce389" office:value-type="string" calcext:value-type="string">
            <text:p>NO SE CALCULA</text:p>
          </table:table-cell>
          <table:table-cell table:style-name="ce374"/>
          <table:table-cell table:number-columns-repeated="16377"/>
        </table:table-row>
        <table:table-row table:style-name="ro12">
          <table:table-cell/>
          <table:table-cell table:style-name="ce374" table:number-columns-repeated="2"/>
          <table:table-cell table:style-name="ce374" office:value-type="string" calcext:value-type="string">
            <text:p>n =</text:p>
          </table:table-cell>
          <table:table-cell table:style-name="ce384" office:value-type="float" office:value="24" calcext:value-type="float">
            <text:p>24</text:p>
          </table:table-cell>
          <table:table-cell table:style-name="ce374" office:value-type="string" calcext:value-type="string">
            <text:p>MESES</text:p>
          </table:table-cell>
          <table:table-cell table:style-name="ce374" office:value-type="string" calcext:value-type="string">
            <text:p>(2 AÑOS)</text:p>
          </table:table-cell>
          <table:table-cell table:number-columns-repeated="16377"/>
        </table:table-row>
        <table:table-row table:style-name="ro12">
          <table:table-cell/>
          <table:table-cell table:style-name="ce374" table:number-columns-repeated="2"/>
          <table:table-cell table:style-name="ce374" office:value-type="string" calcext:value-type="string">
            <text:p>cuota capital <text:s/>=</text:p>
          </table:table-cell>
          <table:table-cell table:style-name="ce385" table:formula="of:=PMT([.E8];[.E9];[.E3])" office:value-type="float" office:value="-1001.28631110198" calcext:value-type="float">
            <text:p>-1001.3</text:p>
          </table:table-cell>
          <table:table-cell table:style-name="ce374" office:value-type="string" calcext:value-type="string">
            <text:p>MESES</text:p>
          </table:table-cell>
          <table:table-cell table:style-name="ce374"/>
          <table:table-cell table:number-columns-repeated="16377"/>
        </table:table-row>
        <table:table-row table:style-name="ro30">
          <table:table-cell/>
          <table:table-cell table:style-name="ce374" table:number-columns-repeated="2"/>
          <table:table-cell table:style-name="ce375" office:value-type="string" calcext:value-type="string">
            <text:p>N° DE CUOTAS</text:p>
          </table:table-cell>
          <table:table-cell table:style-name="ce375" office:value-type="string" calcext:value-type="string">
            <text:p>SALDO CAPITAL</text:p>
          </table:table-cell>
          <table:table-cell table:style-name="ce375" office:value-type="string" calcext:value-type="string">
            <text:p>AMORTIZACIÓN DE CAPITAL</text:p>
          </table:table-cell>
          <table:table-cell table:style-name="ce392" office:value-type="string" calcext:value-type="string">
            <text:p>INTERÉS</text:p>
          </table:table-cell>
          <table:table-cell table:style-name="ce375" office:value-type="string" calcext:value-type="string">
            <text:p>MONTO CUOTA</text:p>
          </table:table-cell>
          <table:table-cell/>
          <table:table-cell table:style-name="ce402" office:value-type="string" calcext:value-type="string">
            <text:p>Cuota Primer Año</text:p>
          </table:table-cell>
          <table:table-cell table:style-name="ce402" office:value-type="string" calcext:value-type="string">
            <text:p>Cuota Segundo Año </text:p>
          </table:table-cell>
          <table:table-cell table:style-name="ce402" office:value-type="string" calcext:value-type="string">
            <text:p>Intereses Primer Año</text:p>
          </table:table-cell>
          <table:table-cell table:style-name="ce402" office:value-type="string" calcext:value-type="string">
            <text:p>Intereses Segundo Año</text:p>
          </table:table-cell>
          <table:table-cell table:number-columns-repeated="16371"/>
        </table:table-row>
        <table:table-row table:style-name="ro12">
          <table:table-cell table:number-columns-repeated="3"/>
          <table:table-cell table:style-name="ce376" office:value-type="string" calcext:value-type="string">
            <text:p>00</text:p>
          </table:table-cell>
          <table:table-cell table:style-name="ce386" table:formula="of:=[.E3]" office:value-type="float" office:value="20000" calcext:value-type="float">
            <text:p>20000.00</text:p>
          </table:table-cell>
          <table:table-cell table:number-columns-repeated="2" table:style-name="ce390" office:value-type="float" office:value="0" calcext:value-type="float">
            <text:p>0.00</text:p>
          </table:table-cell>
          <table:table-cell table:style-name="ce396" office:value-type="float" office:value="0" calcext:value-type="float">
            <text:p>0.00</text:p>
          </table:table-cell>
          <table:table-cell/>
          <table:table-cell table:style-name="ce403" table:formula="of:=SUM([.H13:.H24])" office:value-type="float" office:value="12015.4357332237" calcext:value-type="float">
            <text:p>12015.4</text:p>
          </table:table-cell>
          <table:table-cell table:style-name="ce403" table:formula="of:=SUM([.H25:.H36])" office:value-type="float" office:value="12015.4357332237" calcext:value-type="float">
            <text:p>12015.4</text:p>
          </table:table-cell>
          <table:table-cell table:style-name="ce403" table:formula="of:=SUM([.G13:.G24])" office:value-type="float" office:value="2920.55052284703" calcext:value-type="float">
            <text:p>2920.6</text:p>
          </table:table-cell>
          <table:table-cell table:style-name="ce403" table:formula="of:=SUM([.G25:.G36])" office:value-type="float" office:value="1110.32094360041" calcext:value-type="float">
            <text:p>1110.3</text:p>
          </table:table-cell>
          <table:table-cell table:number-columns-repeated="16371"/>
        </table:table-row>
        <table:table-row table:style-name="ro12">
          <table:table-cell table:number-columns-repeated="3"/>
          <table:table-cell table:style-name="ce377" office:value-type="string" calcext:value-type="string">
            <text:p>01</text:p>
          </table:table-cell>
          <table:table-cell table:style-name="ce387" table:formula="of:=[.E12]-[.F13]" office:value-type="float" office:value="19303.5463158198" calcext:value-type="float">
            <text:p>19303.55</text:p>
          </table:table-cell>
          <table:table-cell table:style-name="ce387" table:formula="of:=[.H13]-[.G13]" office:value-type="float" office:value="696.453684180179" calcext:value-type="float">
            <text:p>696.45</text:p>
          </table:table-cell>
          <table:table-cell table:style-name="ce387" table:formula="of:=[.E12]*[.$E$8]" office:value-type="float" office:value="304.832626921798" calcext:value-type="float">
            <text:p>304.83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02</text:p>
          </table:table-cell>
          <table:table-cell table:style-name="ce387" table:formula="of:=[.E13]-[.F14]" office:value-type="float" office:value="18596.4775413357" calcext:value-type="float">
            <text:p>18596.48</text:p>
          </table:table-cell>
          <table:table-cell table:style-name="ce387" table:formula="of:=[.H14]-[.G14]" office:value-type="float" office:value="707.068774484079" calcext:value-type="float">
            <text:p>707.07</text:p>
          </table:table-cell>
          <table:table-cell table:style-name="ce387" table:formula="of:=[.E13]*[.$E$8]" office:value-type="float" office:value="294.217536617898" calcext:value-type="float">
            <text:p>294.22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03</text:p>
          </table:table-cell>
          <table:table-cell table:style-name="ce387" table:formula="of:=[.E14]-[.F15]" office:value-type="float" office:value="17878.6318852546" calcext:value-type="float">
            <text:p>17878.63</text:p>
          </table:table-cell>
          <table:table-cell table:style-name="ce387" table:formula="of:=[.H15]-[.G15]" office:value-type="float" office:value="717.845656081097" calcext:value-type="float">
            <text:p>717.85</text:p>
          </table:table-cell>
          <table:table-cell table:style-name="ce387" table:formula="of:=[.E14]*[.$E$8]" office:value-type="float" office:value="283.44065502088" calcext:value-type="float">
            <text:p>283.44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04</text:p>
          </table:table-cell>
          <table:table-cell table:style-name="ce387" table:formula="of:=[.E15]-[.F16]" office:value-type="float" office:value="17149.8450903202" calcext:value-type="float">
            <text:p>17149.85</text:p>
          </table:table-cell>
          <table:table-cell table:style-name="ce387" table:formula="of:=[.H16]-[.G16]" office:value-type="float" office:value="728.786794934477" calcext:value-type="float">
            <text:p>728.79</text:p>
          </table:table-cell>
          <table:table-cell table:style-name="ce387" table:formula="of:=[.E15]*[.$E$8]" office:value-type="float" office:value="272.4995161675" calcext:value-type="float">
            <text:p>272.50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05</text:p>
          </table:table-cell>
          <table:table-cell table:style-name="ce387" table:formula="of:=[.E16]-[.F17]" office:value-type="float" office:value="16409.9503957274" calcext:value-type="float">
            <text:p>16409.95</text:p>
          </table:table-cell>
          <table:table-cell table:style-name="ce387" table:formula="of:=[.H17]-[.G17]" office:value-type="float" office:value="739.894694592767" calcext:value-type="float">
            <text:p>739.89</text:p>
          </table:table-cell>
          <table:table-cell table:style-name="ce387" table:formula="of:=[.E16]*[.$E$8]" office:value-type="float" office:value="261.39161650921" calcext:value-type="float">
            <text:p>261.39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06</text:p>
          </table:table-cell>
          <table:table-cell table:style-name="ce387" table:formula="of:=[.E17]-[.F18]" office:value-type="float" office:value="15658.7784989647" calcext:value-type="float">
            <text:p>15658.78</text:p>
          </table:table-cell>
          <table:table-cell table:style-name="ce387" table:formula="of:=[.H18]-[.G18]" office:value-type="float" office:value="751.171896762678" calcext:value-type="float">
            <text:p>751.17</text:p>
          </table:table-cell>
          <table:table-cell table:style-name="ce387" table:formula="of:=[.E17]*[.$E$8]" office:value-type="float" office:value="250.114414339299" calcext:value-type="float">
            <text:p>250.11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07</text:p>
          </table:table-cell>
          <table:table-cell table:style-name="ce387" table:formula="of:=[.E18]-[.F19]" office:value-type="float" office:value="14896.157517074" calcext:value-type="float">
            <text:p>14896.16</text:p>
          </table:table-cell>
          <table:table-cell table:style-name="ce387" table:formula="of:=[.H19]-[.G19]" office:value-type="float" office:value="762.620981890677" calcext:value-type="float">
            <text:p>762.62</text:p>
          </table:table-cell>
          <table:table-cell table:style-name="ce387" table:formula="of:=[.E18]*[.$E$8]" office:value-type="float" office:value="238.6653292113" calcext:value-type="float">
            <text:p>238.67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08</text:p>
          </table:table-cell>
          <table:table-cell table:style-name="ce387" table:formula="of:=[.E19]-[.F20]" office:value-type="float" office:value="14121.9129473206" calcext:value-type="float">
            <text:p>14121.91</text:p>
          </table:table-cell>
          <table:table-cell table:style-name="ce387" table:formula="of:=[.H20]-[.G20]" office:value-type="float" office:value="774.244569753448" calcext:value-type="float">
            <text:p>774.24</text:p>
          </table:table-cell>
          <table:table-cell table:style-name="ce387" table:formula="of:=[.E19]*[.$E$8]" office:value-type="float" office:value="227.041741348529" calcext:value-type="float">
            <text:p>227.04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09</text:p>
          </table:table-cell>
          <table:table-cell table:style-name="ce387" table:formula="of:=[.E20]-[.F21]" office:value-type="float" office:value="13335.8676272633" calcext:value-type="float">
            <text:p>13335.87</text:p>
          </table:table-cell>
          <table:table-cell table:style-name="ce387" table:formula="of:=[.H21]-[.G21]" office:value-type="float" office:value="786.045320057342" calcext:value-type="float">
            <text:p>786.05</text:p>
          </table:table-cell>
          <table:table-cell table:style-name="ce387" table:formula="of:=[.E20]*[.$E$8]" office:value-type="float" office:value="215.240991044635" calcext:value-type="float">
            <text:p>215.24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0</text:p>
          </table:table-cell>
          <table:table-cell table:style-name="ce387" table:formula="of:=[.E21]-[.F22]" office:value-type="float" office:value="12537.8416942163" calcext:value-type="float">
            <text:p>12537.84</text:p>
          </table:table-cell>
          <table:table-cell table:style-name="ce387" table:formula="of:=[.H22]-[.G22]" office:value-type="float" office:value="798.025933046975" calcext:value-type="float">
            <text:p>798.03</text:p>
          </table:table-cell>
          <table:table-cell table:style-name="ce387" table:formula="of:=[.E21]*[.$E$8]" office:value-type="float" office:value="203.260378055001" calcext:value-type="float">
            <text:p>203.26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1</text:p>
          </table:table-cell>
          <table:table-cell table:style-name="ce387" table:formula="of:=[.E22]-[.F23]" office:value-type="float" office:value="11727.6525440932" calcext:value-type="float">
            <text:p>11727.65</text:p>
          </table:table-cell>
          <table:table-cell table:style-name="ce387" table:formula="of:=[.H23]-[.G23]" office:value-type="float" office:value="810.189150123097" calcext:value-type="float">
            <text:p>810.19</text:p>
          </table:table-cell>
          <table:table-cell table:style-name="ce387" table:formula="of:=[.E22]*[.$E$8]" office:value-type="float" office:value="191.09716097888" calcext:value-type="float">
            <text:p>191.10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2</text:p>
          </table:table-cell>
          <table:table-cell table:style-name="ce387" table:formula="of:=[.E23]-[.F24]" office:value-type="float" office:value="10905.1147896233" calcext:value-type="float">
            <text:p>10905.11</text:p>
          </table:table-cell>
          <table:table-cell table:style-name="ce387" table:formula="of:=[.H24]-[.G24]" office:value-type="float" office:value="822.537754469875" calcext:value-type="float">
            <text:p>822.54</text:p>
          </table:table-cell>
          <table:table-cell table:style-name="ce387" table:formula="of:=[.E23]*[.$E$8]" office:value-type="float" office:value="178.748556632102" calcext:value-type="float">
            <text:p>178.75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3</text:p>
          </table:table-cell>
          <table:table-cell table:style-name="ce387" table:formula="of:=[.E24]-[.F25]" office:value-type="float" office:value="10070.0402179316" calcext:value-type="float">
            <text:p>10070.04</text:p>
          </table:table-cell>
          <table:table-cell table:style-name="ce387" table:formula="of:=[.H25]-[.G25]" office:value-type="float" office:value="835.074571691745" calcext:value-type="float">
            <text:p>835.07</text:p>
          </table:table-cell>
          <table:table-cell table:style-name="ce387" table:formula="of:=[.E24]*[.$E$8]" office:value-type="float" office:value="166.211739410231" calcext:value-type="float">
            <text:p>166.21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4</text:p>
          </table:table-cell>
          <table:table-cell table:style-name="ce387" table:formula="of:=[.E25]-[.F26]" office:value-type="float" office:value="9222.2377474716" calcext:value-type="float">
            <text:p>9222.24</text:p>
          </table:table-cell>
          <table:table-cell table:style-name="ce387" table:formula="of:=[.H26]-[.G26]" office:value-type="float" office:value="847.802470459965" calcext:value-type="float">
            <text:p>847.80</text:p>
          </table:table-cell>
          <table:table-cell table:style-name="ce387" table:formula="of:=[.E25]*[.$E$8]" office:value-type="float" office:value="153.483840642012" calcext:value-type="float">
            <text:p>153.48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5</text:p>
          </table:table-cell>
          <table:table-cell table:style-name="ce387" table:formula="of:=[.E26]-[.F27]" office:value-type="float" office:value="8361.51338430258" calcext:value-type="float">
            <text:p>8361.51</text:p>
          </table:table-cell>
          <table:table-cell table:style-name="ce387" table:formula="of:=[.H27]-[.G27]" office:value-type="float" office:value="860.72436316902" calcext:value-type="float">
            <text:p>860.72</text:p>
          </table:table-cell>
          <table:table-cell table:style-name="ce387" table:formula="of:=[.E26]*[.$E$8]" office:value-type="float" office:value="140.561947932957" calcext:value-type="float">
            <text:p>140.56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6</text:p>
          </table:table-cell>
          <table:table-cell table:style-name="ce387" table:formula="of:=[.E27]-[.F28]" office:value-type="float" office:value="7487.67017769954" calcext:value-type="float">
            <text:p>7487.67</text:p>
          </table:table-cell>
          <table:table-cell table:style-name="ce387" table:formula="of:=[.H28]-[.G28]" office:value-type="float" office:value="873.84320660304" calcext:value-type="float">
            <text:p>873.84</text:p>
          </table:table-cell>
          <table:table-cell table:style-name="ce387" table:formula="of:=[.E27]*[.$E$8]" office:value-type="float" office:value="127.443104498937" calcext:value-type="float">
            <text:p>127.44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7</text:p>
          </table:table-cell>
          <table:table-cell table:style-name="ce387" table:formula="of:=[.E28]-[.F29]" office:value-type="float" office:value="6600.50817508717" calcext:value-type="float">
            <text:p>6600.51</text:p>
          </table:table-cell>
          <table:table-cell table:style-name="ce387" table:formula="of:=[.H29]-[.G29]" office:value-type="float" office:value="887.162002612369" calcext:value-type="float">
            <text:p>887.16</text:p>
          </table:table-cell>
          <table:table-cell table:style-name="ce387" table:formula="of:=[.E28]*[.$E$8]" office:value-type="float" office:value="114.124308489608" calcext:value-type="float">
            <text:p>114.12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8</text:p>
          </table:table-cell>
          <table:table-cell table:style-name="ce387" table:formula="of:=[.E29]-[.F30]" office:value-type="float" office:value="5699.82437628673" calcext:value-type="float">
            <text:p>5699.82</text:p>
          </table:table-cell>
          <table:table-cell table:style-name="ce387" table:formula="of:=[.H30]-[.G30]" office:value-type="float" office:value="900.683798800446" calcext:value-type="float">
            <text:p>900.68</text:p>
          </table:table-cell>
          <table:table-cell table:style-name="ce387" table:formula="of:=[.E29]*[.$E$8]" office:value-type="float" office:value="100.602512301531" calcext:value-type="float">
            <text:p>100.60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19</text:p>
          </table:table-cell>
          <table:table-cell table:style-name="ce387" table:formula="of:=[.E30]-[.F31]" office:value-type="float" office:value="4785.41268706557" calcext:value-type="float">
            <text:p>4785.41</text:p>
          </table:table-cell>
          <table:table-cell table:style-name="ce387" table:formula="of:=[.H31]-[.G31]" office:value-type="float" office:value="914.411689221158" calcext:value-type="float">
            <text:p>914.41</text:p>
          </table:table-cell>
          <table:table-cell table:style-name="ce387" table:formula="of:=[.E30]*[.$E$8]" office:value-type="float" office:value="86.8746218808191" calcext:value-type="float">
            <text:p>86.87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20</text:p>
          </table:table-cell>
          <table:table-cell table:style-name="ce387" table:formula="of:=[.E31]-[.F32]" office:value-type="float" office:value="3857.06387197875" calcext:value-type="float">
            <text:p>3857.06</text:p>
          </table:table-cell>
          <table:table-cell table:style-name="ce387" table:formula="of:=[.H32]-[.G32]" office:value-type="float" office:value="928.348815086822" calcext:value-type="float">
            <text:p>928.35</text:p>
          </table:table-cell>
          <table:table-cell table:style-name="ce387" table:formula="of:=[.E31]*[.$E$8]" office:value-type="float" office:value="72.9374960151549" calcext:value-type="float">
            <text:p>72.94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21</text:p>
          </table:table-cell>
          <table:table-cell table:style-name="ce387" table:formula="of:=[.E32]-[.F33]" office:value-type="float" office:value="2914.56550649179" calcext:value-type="float">
            <text:p>2914.57</text:p>
          </table:table-cell>
          <table:table-cell table:style-name="ce387" table:formula="of:=[.H33]-[.G33]" office:value-type="float" office:value="942.498365486955" calcext:value-type="float">
            <text:p>942.50</text:p>
          </table:table-cell>
          <table:table-cell table:style-name="ce387" table:formula="of:=[.E32]*[.$E$8]" office:value-type="float" office:value="58.7879456150222" calcext:value-type="float">
            <text:p>58.79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22</text:p>
          </table:table-cell>
          <table:table-cell table:style-name="ce387" table:formula="of:=[.E33]-[.F34]" office:value-type="float" office:value="1957.70192837379" calcext:value-type="float">
            <text:p>1957.70</text:p>
          </table:table-cell>
          <table:table-cell table:style-name="ce387" table:formula="of:=[.H34]-[.G34]" office:value-type="float" office:value="956.863578117999" calcext:value-type="float">
            <text:p>956.86</text:p>
          </table:table-cell>
          <table:table-cell table:style-name="ce387" table:formula="of:=[.E33]*[.$E$8]" office:value-type="float" office:value="44.4227329839777" calcext:value-type="float">
            <text:p>44.42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7" office:value-type="string" calcext:value-type="string">
            <text:p>23</text:p>
          </table:table-cell>
          <table:table-cell table:style-name="ce387" table:formula="of:=[.E34]-[.F35]" office:value-type="float" office:value="986.254188349617" calcext:value-type="float">
            <text:p>986.25</text:p>
          </table:table-cell>
          <table:table-cell table:style-name="ce387" table:formula="of:=[.H35]-[.G35]" office:value-type="float" office:value="971.447740024174" calcext:value-type="float">
            <text:p>971.45</text:p>
          </table:table-cell>
          <table:table-cell table:style-name="ce387" table:formula="of:=[.E34]*[.$E$8]" office:value-type="float" office:value="29.8385710778026" calcext:value-type="float">
            <text:p>29.84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8" office:value-type="string" calcext:value-type="string">
            <text:p>24</text:p>
          </table:table-cell>
          <table:table-cell table:style-name="ce387" table:formula="of:=[.E35]-[.F36]" office:value-type="float" office:value="0" calcext:value-type="float">
            <text:p>0.00</text:p>
          </table:table-cell>
          <table:table-cell table:style-name="ce387" table:formula="of:=[.H36]-[.G36]" office:value-type="float" office:value="986.254188349615" calcext:value-type="float">
            <text:p>986.25</text:p>
          </table:table-cell>
          <table:table-cell table:style-name="ce387" table:formula="of:=[.E35]*[.$E$8]" office:value-type="float" office:value="15.032122752362" calcext:value-type="float">
            <text:p>15.03</text:p>
          </table:table-cell>
          <table:table-cell table:style-name="ce397" table:formula="of:=-[.$E$10]" office:value-type="float" office:value="1001.28631110198" calcext:value-type="float">
            <text:p>1001.3</text:p>
          </table:table-cell>
          <table:table-cell table:number-columns-repeated="16376"/>
        </table:table-row>
        <table:table-row table:style-name="ro12">
          <table:table-cell table:number-columns-repeated="3"/>
          <table:table-cell table:style-name="ce379" office:value-type="string" calcext:value-type="string" table:number-columns-spanned="2" table:number-rows-spanned="1">
            <text:p>TOTALES</text:p>
          </table:table-cell>
          <table:covered-table-cell table:style-name="ce388"/>
          <table:table-cell table:style-name="ce391" table:formula="of:=SUM([.F13:.F36])" office:value-type="float" office:value="20000" calcext:value-type="float">
            <text:p>20000.00</text:p>
          </table:table-cell>
          <table:table-cell table:style-name="ce393" table:formula="of:=SUM([.G13:.G36])" office:value-type="float" office:value="4030.87146644745" calcext:value-type="float">
            <text:p>4030.87</text:p>
          </table:table-cell>
          <table:table-cell table:style-name="ce398" table:formula="of:=SUM([.H13:.H36])" office:value-type="float" office:value="24030.8714664474" calcext:value-type="float">
            <text:p>24030.87</text:p>
          </table:table-cell>
          <table:table-cell table:number-columns-repeated="16376"/>
        </table:table-row>
        <table:table-row table:style-name="ro12" table:number-rows-repeated="1048538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Costos_Unitario " table:style-name="ta15">
        <table:table-column table:style-name="co6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33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29" table:default-cell-style-name="ce32"/>
        <table:table-column table:style-name="co4" table:default-cell-style-name="ce32"/>
        <table:table-column table:style-name="co21" table:number-columns-repeated="2" table:default-cell-style-name="ce32"/>
        <table:table-column table:style-name="co4" table:number-columns-repeated="3" table:default-cell-style-name="ce32"/>
        <table:table-column table:style-name="co10" table:number-columns-repeated="16369" table:default-cell-style-name="ce32"/>
        <table:table-row table:style-name="ro4">
          <table:table-cell table:number-columns-repeated="16384"/>
        </table:table-row>
        <table:table-row table:style-name="ro4">
          <table:table-cell/>
          <table:table-cell table:style-name="ce404" office:value-type="string" calcext:value-type="string" table:number-columns-spanned="2" table:number-rows-spanned="1">
            <text:p>COSTO TOTAL UNITARIO- CTU</text:p>
          </table:table-cell>
          <table:covered-table-cell/>
          <table:table-cell table:number-columns-repeated="4"/>
          <table:table-cell table:style-name="ce421" office:value-type="string" calcext:value-type="string" table:number-columns-spanned="2" table:number-rows-spanned="1">
            <text:p>Produccion de 3600 chocolates para el primer mes</text:p>
          </table:table-cell>
          <table:covered-table-cell table:style-name="ce432"/>
          <table:table-cell office:value-type="float" office:value="3600" calcext:value-type="float">
            <text:p>3600</text:p>
          </table:table-cell>
          <table:table-cell table:number-columns-repeated="16374"/>
        </table:table-row>
        <table:table-row table:style-name="ro4">
          <table:table-cell table:number-columns-repeated="7"/>
          <table:table-cell table:style-name="ce223"/>
          <table:table-cell table:style-name="ce433"/>
          <table:table-cell table:number-columns-repeated="16375"/>
        </table:table-row>
        <table:table-row table:style-name="ro4">
          <table:table-cell/>
          <table:table-cell table:style-name="ce405" office:value-type="string" calcext:value-type="string">
            <text:p>CTU = <text:s/>CFU + CVU</text:p>
          </table:table-cell>
          <table:table-cell table:style-name="ce409" table:formula="of:=[.G8]+[.G12]" office:value-type="float" office:value="6.60701585144928" calcext:value-type="float">
            <text:p>6.61</text:p>
          </table:table-cell>
          <table:table-cell table:style-name="ce414"/>
          <table:table-cell table:number-columns-repeated="3"/>
          <table:table-cell table:style-name="ce422" office:value-type="string" calcext:value-type="string">
            <text:p>Costo fijo mes</text:p>
          </table:table-cell>
          <table:table-cell table:style-name="ce434" office:value-type="string" calcext:value-type="string">
            <text:p>soles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423" office:value-type="string" calcext:value-type="string">
            <text:p>Gastos administrativos </text:p>
          </table:table-cell>
          <table:table-cell table:style-name="ce435" table:formula="of:=[$'Gastos Operativos'.H13]" office:value-type="float" office:value="2398.73472222222" calcext:value-type="float">
            <text:p><text:s/>2,398.73 </text:p>
          </table:table-cell>
          <table:table-cell table:number-columns-repeated="16375"/>
        </table:table-row>
        <table:table-row table:style-name="ro5">
          <table:table-cell/>
          <table:table-cell table:style-name="ce223" office:value-type="string" calcext:value-type="string">
            <text:p>Donde:</text:p>
          </table:table-cell>
          <table:table-cell table:number-columns-repeated="5"/>
          <table:table-cell table:style-name="ce423" office:value-type="string" calcext:value-type="string">
            <text:p>Depreciación activo fijo</text:p>
          </table:table-cell>
          <table:table-cell table:style-name="ce435" table:formula="of:=[$'Depreciacion y VR'.$F$11]/12" office:value-type="float" office:value="238.069444444444" calcext:value-type="float">
            <text:p><text:s/>238.07 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423" office:value-type="string" calcext:value-type="string">
            <text:p>Amortización de intangibles</text:p>
          </table:table-cell>
          <table:table-cell table:style-name="ce435" table:formula="of:=([$'INVERSION INICIAL'.D16]/[$Resumen.$H$9])/12" office:value-type="float" office:value="23.9166666666667" calcext:value-type="float">
            <text:p><text:s/>23.92 </text:p>
          </table:table-cell>
          <table:table-cell table:number-columns-repeated="16375"/>
        </table:table-row>
        <table:table-row table:style-name="ro4">
          <table:table-cell/>
          <table:table-cell table:style-name="ce406" office:value-type="string" calcext:value-type="string">
            <text:p>Costo Fijo Unitario (CFU) = <text:s/></text:p>
          </table:table-cell>
          <table:table-cell table:style-name="ce410" office:value-type="string" calcext:value-type="string">
            <text:p>Costo Fijo Total</text:p>
          </table:table-cell>
          <table:table-cell table:style-name="ce415" office:value-type="string" calcext:value-type="string">
            <text:p>=</text:p>
          </table:table-cell>
          <table:table-cell table:style-name="ce416" table:formula="of:=[.I9]" office:value-type="float" office:value="3175.72083333333" calcext:value-type="float">
            <text:p>3175.72</text:p>
          </table:table-cell>
          <table:table-cell table:style-name="ce415" office:value-type="string" calcext:value-type="string">
            <text:p>=</text:p>
          </table:table-cell>
          <table:table-cell table:style-name="ce419" table:formula="of:=[.E8]/[.E9]" office:value-type="float" office:value="0.882144675925926" calcext:value-type="float">
            <text:p>0.88</text:p>
          </table:table-cell>
          <table:table-cell table:style-name="ce423" office:value-type="string" calcext:value-type="string">
            <text:p>Gastos de ventas </text:p>
          </table:table-cell>
          <table:table-cell table:style-name="ce435" table:formula="of:=[$'Gastos Operativos'.$H$18]" office:value-type="float" office:value="515" calcext:value-type="float">
            <text:p><text:s/>515.00 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411" office:value-type="string" calcext:value-type="string">
            <text:p>N° Unidades Producidas</text:p>
          </table:table-cell>
          <table:table-cell table:style-name="ce411"/>
          <table:table-cell table:style-name="ce417" table:formula="of:=[.I18]" office:value-type="float" office:value="3600" calcext:value-type="float">
            <text:p><text:s/>3,600.00 </text:p>
          </table:table-cell>
          <table:table-cell table:style-name="ce411"/>
          <table:table-cell table:style-name="ce420"/>
          <table:table-cell table:style-name="ce424" office:value-type="string" calcext:value-type="string">
            <text:p>Total Costo Fijo</text:p>
          </table:table-cell>
          <table:table-cell table:style-name="ce436" table:formula="of:=SUM([.I5:.I8])" office:value-type="float" office:value="3175.72083333333" calcext:value-type="float">
            <text:p>3175.72</text:p>
          </table:table-cell>
          <table:table-cell/>
          <table:table-cell table:formula="of:=+[.I9]*12" office:value-type="float" office:value="38108.65" calcext:value-type="float">
            <text:p>38108.65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420"/>
          <table:table-cell table:style-name="ce425" office:value-type="string" calcext:value-type="string">
            <text:p>Costo variable mes</text:p>
          </table:table-cell>
          <table:table-cell table:style-name="ce437" office:value-type="string" calcext:value-type="string">
            <text:p>soles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420"/>
          <table:table-cell table:style-name="ce423" office:value-type="string" calcext:value-type="string">
            <text:p>Materia prima directa</text:p>
          </table:table-cell>
          <table:table-cell table:style-name="ce435" table:formula="of:=+[$'costos por mes'.N22]*[$'Costos_Unitario '.J2]" office:value-type="float" office:value="19800" calcext:value-type="float">
            <text:p><text:s/>19,800.00 </text:p>
          </table:table-cell>
          <table:table-cell table:number-columns-repeated="16375"/>
        </table:table-row>
        <table:table-row table:style-name="ro4">
          <table:table-cell/>
          <table:table-cell table:style-name="ce406" office:value-type="string" calcext:value-type="string">
            <text:p>Costo Variable Unitario (CFU) = <text:s/></text:p>
          </table:table-cell>
          <table:table-cell table:style-name="ce410" office:value-type="string" calcext:value-type="string">
            <text:p>Costo Variable Total</text:p>
          </table:table-cell>
          <table:table-cell table:style-name="ce415" office:value-type="string" calcext:value-type="string">
            <text:p>=</text:p>
          </table:table-cell>
          <table:table-cell table:style-name="ce416" table:formula="of:=[.I15]" office:value-type="float" office:value="20609.5362318841" calcext:value-type="float">
            <text:p>20609.54</text:p>
          </table:table-cell>
          <table:table-cell table:style-name="ce415" office:value-type="string" calcext:value-type="string">
            <text:p>=</text:p>
          </table:table-cell>
          <table:table-cell table:style-name="ce419" table:formula="of:=[.E12]/[.E13]" office:value-type="float" office:value="5.72487117552335" calcext:value-type="float">
            <text:p>5.72</text:p>
          </table:table-cell>
          <table:table-cell table:style-name="ce423" office:value-type="string" calcext:value-type="string">
            <text:p>Mano de obra directa</text:p>
          </table:table-cell>
          <table:table-cell table:style-name="ce435" table:formula="of:=+[$'costos por mes'.N27]*[$'Costos_Unitario '.J2]" office:value-type="float" office:value="663.478260869565" calcext:value-type="float">
            <text:p><text:s/>663.48 </text:p>
          </table:table-cell>
          <table:table-cell table:number-columns-repeated="2"/>
          <table:table-cell table:style-name="ce444" table:formula="of:=+[.K9]+[.K15]" office:value-type="float" office:value="512127.983333333" calcext:value-type="float">
            <text:p><text:s/>512,127.98 </text:p>
          </table:table-cell>
          <table:table-cell table:number-columns-repeated="16372"/>
        </table:table-row>
        <table:table-row table:style-name="ro5">
          <table:table-cell table:number-columns-repeated="2"/>
          <table:table-cell table:style-name="ce411" office:value-type="string" calcext:value-type="string">
            <text:p>N° Unidades Producidas</text:p>
          </table:table-cell>
          <table:table-cell table:style-name="ce411"/>
          <table:table-cell table:style-name="ce417" table:formula="of:=[.I18]" office:value-type="float" office:value="3600" calcext:value-type="float">
            <text:p><text:s/>3,600.00 </text:p>
          </table:table-cell>
          <table:table-cell table:style-name="ce411"/>
          <table:table-cell/>
          <table:table-cell table:style-name="ce423" office:value-type="string" calcext:value-type="string">
            <text:p>Costos indirectos de fabricación</text:p>
          </table:table-cell>
          <table:table-cell table:style-name="ce435" table:formula="of:=+[$'costos por mes'.N30]*[$'Costos_Unitario '.J2]" office:value-type="float" office:value="146.057971014493" calcext:value-type="float">
            <text:p><text:s/>146.06 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426"/>
          <table:table-cell table:style-name="ce438"/>
          <table:table-cell table:number-columns-repeated="16375"/>
        </table:table-row>
        <table:table-row table:style-name="ro5">
          <table:table-cell table:number-columns-repeated="7"/>
          <table:table-cell table:style-name="ce427" office:value-type="string" calcext:value-type="string">
            <text:p>Total Costo Variable</text:p>
          </table:table-cell>
          <table:table-cell table:style-name="ce436" table:formula="of:=SUM([.I11:.I14])" office:value-type="float" office:value="20609.5362318841" calcext:value-type="float">
            <text:p>20609.54</text:p>
          </table:table-cell>
          <table:table-cell table:formula="of:=+[.I15]/[.J2]" office:value-type="float" office:value="5.72487117552335" calcext:value-type="float">
            <text:p>5.72487117552335</text:p>
          </table:table-cell>
          <table:table-cell table:style-name="ce444" table:formula="of:=+[.J15]*[$'Presupuesto de ventas'.O7]" office:value-type="float" office:value="474019.333333333" calcext:value-type="float">
            <text:p><text:s/>474,019.33 </text:p>
          </table:table-cell>
          <table:table-cell table:number-columns-repeated="16373"/>
        </table:table-row>
        <table:table-row table:style-name="ro4">
          <table:table-cell/>
          <table:table-cell table:style-name="ce407"/>
          <table:table-cell table:style-name="ce412" table:number-columns-repeated="2"/>
          <table:table-cell table:number-columns-repeated="16380"/>
        </table:table-row>
        <table:table-row table:style-name="ro4">
          <table:table-cell table:number-columns-repeated="7"/>
          <table:table-cell table:style-name="ce428" office:value-type="string" calcext:value-type="string">
            <text:p>Costos Unitarios</text:p>
          </table:table-cell>
          <table:table-cell table:style-name="ce439" office:value-type="string" calcext:value-type="string">
            <text:p>soles</text:p>
          </table:table-cell>
          <table:table-cell table:number-columns-repeated="16375"/>
        </table:table-row>
        <table:table-row table:style-name="ro4">
          <table:table-cell table:number-columns-repeated="7"/>
          <table:table-cell table:style-name="ce429" office:value-type="string" calcext:value-type="string">
            <text:p>Nº de Unidades de chocolatesde 50 gr</text:p>
          </table:table-cell>
          <table:table-cell table:style-name="ce440" office:value-type="float" office:value="3600" calcext:value-type="float">
            <text:p><text:s/>3,600.00 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430" office:value-type="string" calcext:value-type="string">
            <text:p>Costo fijo unitario,CFU</text:p>
          </table:table-cell>
          <table:table-cell table:style-name="ce441" table:formula="of:=[.G8]" office:value-type="float" office:value="0.882144675925926" calcext:value-type="float">
            <text:p><text:s/>0.88 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413" table:number-columns-repeated="2"/>
          <table:table-cell table:style-name="ce418" table:number-columns-repeated="2"/>
          <table:table-cell/>
          <table:table-cell table:style-name="ce430" office:value-type="string" calcext:value-type="string">
            <text:p>Costo variable unitario, CVU</text:p>
          </table:table-cell>
          <table:table-cell table:style-name="ce442" table:formula="of:=[.G12]" office:value-type="float" office:value="5.72487117552335" calcext:value-type="float">
            <text:p><text:s/>5.72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5">
          <table:table-cell table:number-columns-repeated="2"/>
          <table:table-cell table:style-name="ce413" table:number-columns-repeated="2"/>
          <table:table-cell table:style-name="ce418" table:number-columns-repeated="2"/>
          <table:table-cell/>
          <table:table-cell table:style-name="ce431" office:value-type="string" calcext:value-type="string">
            <text:p>Costo total unitario, CTU</text:p>
          </table:table-cell>
          <table:table-cell table:style-name="ce443" table:formula="of:=[.C4]" office:value-type="float" office:value="6.60701585144928" calcext:value-type="float">
            <text:p><text:s/>6.61 </text:p>
          </table:table-cell>
          <table:table-cell/>
          <table:table-cell table:style-name="ce444" table:formula="of:=+[.K20]-[.I21]" office:value-type="float" office:value="3.39298414855073" calcext:value-type="float">
            <text:p><text:s/>3.39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445" table:formula="of:=+[.K21]*[$'Presupuesto de ventas'.O7]" office:value-type="float" office:value="280939.0875" calcext:value-type="float">
            <text:p><text:s/>280,939.09 </text:p>
          </table:table-cell>
          <table:table-cell table:number-columns-repeated="16373"/>
        </table:table-row>
        <table:table-row table:style-name="ro5">
          <table:table-cell/>
          <table:table-cell table:style-name="ce408"/>
          <table:table-cell table:number-columns-repeated="16382"/>
        </table:table-row>
        <table:table-row table:style-name="ro5" table:number-rows-repeated="3">
          <table:table-cell/>
          <table:table-cell table:style-name="ce223"/>
          <table:table-cell table:number-columns-repeated="16382"/>
        </table:table-row>
        <table:table-row table:style-name="ro5" table:number-rows-repeated="97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expression table:name="Precio_Materia_Prima" table:base-cell-address="$'Resumen del escenario'.$A$1" table:expression="#REF!"/>
          <table:named-expression table:name="Precio_Queso_Maduro" table:base-cell-address="$'Resumen del escenario'.$A$1" table:expression="#REF!"/>
          <table:named-expression table:name="Precio_retablo_unidad" table:base-cell-address="$'Resumen del escenario'.$A$1" table:expression="#REF!"/>
          <table:named-expression table:name="TIRE" table:base-cell-address="$'Resumen del escenario'.$A$1" table:expression="#REF!"/>
          <table:named-expression table:name="TIRF" table:base-cell-address="$'Resumen del escenario'.$A$1" table:expression="#REF!"/>
          <table:named-expression table:name="Valor_de_venta" table:base-cell-address="$'Resumen del escenario'.$A$1" table:expression="#REF!"/>
          <table:named-expression table:name="VANE" table:base-cell-address="$'Resumen del escenario'.$A$1" table:expression="#REF!"/>
          <table:named-expression table:name="VANF" table:base-cell-address="$'Resumen del escenario'.$A$1" table:expression="#REF!"/>
        </table:named-expressions>
      </table:table>
      <table:table table:name="PUNTO DE EQUILIBRIO" table:style-name="ta16">
        <table:table-column table:style-name="co48" table:default-cell-style-name="ce32"/>
        <table:table-column table:style-name="co85" table:default-cell-style-name="ce32"/>
        <table:table-column table:style-name="co78" table:default-cell-style-name="ce32"/>
        <table:table-column table:style-name="co86" table:default-cell-style-name="ce32"/>
        <table:table-column table:style-name="co3" table:default-cell-style-name="ce32"/>
        <table:table-column table:style-name="co27" table:default-cell-style-name="ce32"/>
        <table:table-column table:style-name="co87" table:default-cell-style-name="ce32"/>
        <table:table-column table:style-name="co63" table:default-cell-style-name="ce32"/>
        <table:table-column table:style-name="co4" table:number-columns-repeated="18" table:default-cell-style-name="ce32"/>
        <table:table-column table:style-name="co10" table:number-columns-repeated="16358" table:default-cell-style-name="ce32"/>
        <table:table-row table:style-name="ro5">
          <table:table-cell table:style-name="ce190"/>
          <table:table-cell table:number-columns-repeated="16383"/>
        </table:table-row>
        <table:table-row table:style-name="ro4">
          <table:table-cell table:style-name="ce190"/>
          <table:table-cell table:style-name="ce408"/>
          <table:table-cell table:number-columns-repeated="16382"/>
        </table:table-row>
        <table:table-row table:style-name="ro31">
          <table:table-cell table:style-name="ce190"/>
          <table:table-cell table:style-name="ce447" office:value-type="string" calcext:value-type="string" table:number-columns-spanned="5" table:number-rows-spanned="1">
            <text:p>PUNTO DE EQUILIBRIO POR UNIDADES</text:p>
          </table:table-cell>
          <table:covered-table-cell table:number-columns-repeated="4" table:style-name="ce457"/>
          <table:table-cell table:number-columns-repeated="16378"/>
        </table:table-row>
        <table:table-row table:style-name="ro4">
          <table:table-cell table:style-name="ce190"/>
          <table:table-cell table:number-columns-repeated="16383"/>
        </table:table-row>
        <table:table-row table:style-name="ro27">
          <table:table-cell table:style-name="ce190"/>
          <table:table-cell table:style-name="ce307" office:value-type="string" calcext:value-type="string">
            <text:p>PRODUCTO</text:p>
          </table:table-cell>
          <table:table-cell table:style-name="ce458" office:value-type="string" calcext:value-type="string">
            <text:p>PRECIO </text:p>
          </table:table-cell>
          <table:table-cell table:style-name="ce307" office:value-type="string" calcext:value-type="string">
            <text:p>CVU</text:p>
          </table:table-cell>
          <table:table-cell table:style-name="ce307" office:value-type="string" calcext:value-type="string">
            <text:p>MgCU</text:p>
          </table:table-cell>
          <table:table-cell table:style-name="ce474"/>
          <table:table-cell table:number-columns-repeated="16378"/>
        </table:table-row>
        <table:table-row table:style-name="ro4">
          <table:table-cell table:style-name="ce190"/>
          <table:table-cell table:style-name="ce448" office:value-type="string" calcext:value-type="string">
            <text:p>A</text:p>
          </table:table-cell>
          <table:table-cell table:style-name="ce459" table:formula="of:=[$'Presupuesto de ventas'.C17]*1.18" office:value-type="float" office:value="8.26" calcext:value-type="float">
            <text:p>8.3</text:p>
          </table:table-cell>
          <table:table-cell table:style-name="ce467" table:formula="of:=[$'Costos_Unitario '.I20]" office:value-type="float" office:value="5.72487117552335" calcext:value-type="float">
            <text:p>5.72</text:p>
          </table:table-cell>
          <table:table-cell table:style-name="ce473" table:formula="of:=[.C6]-[.D6]" office:value-type="float" office:value="2.53512882447665" calcext:value-type="float">
            <text:p>2.54</text:p>
          </table:table-cell>
          <table:table-cell table:style-name="ce475"/>
          <table:table-cell table:number-columns-repeated="16378"/>
        </table:table-row>
        <table:table-row table:style-name="ro5">
          <table:table-cell table:style-name="ce190"/>
          <table:table-cell table:style-name="ce449" office:value-type="string" calcext:value-type="string">
            <text:p>CVU = Costo variable Unitario</text:p>
          </table:table-cell>
          <table:table-cell table:style-name="ce192"/>
          <table:table-cell table:style-name="ce468" table:number-columns-repeated="2"/>
          <table:table-cell table:style-name="ce476"/>
          <table:table-cell table:number-columns-repeated="16378"/>
        </table:table-row>
        <table:table-row table:style-name="ro5">
          <table:table-cell table:style-name="ce190"/>
          <table:table-cell table:style-name="ce449" office:value-type="string" calcext:value-type="string">
            <text:p>MgCU = Margen de Contribución Unitario</text:p>
          </table:table-cell>
          <table:table-cell table:style-name="ce192"/>
          <table:table-cell table:style-name="ce468" table:number-columns-repeated="2"/>
          <table:table-cell table:style-name="ce476"/>
          <table:table-cell table:number-columns-repeated="16378"/>
        </table:table-row>
        <table:table-row table:style-name="ro4">
          <table:table-cell table:style-name="ce216"/>
          <table:table-cell table:style-name="ce192" table:number-columns-repeated="5"/>
          <table:table-cell table:number-columns-repeated="16378"/>
        </table:table-row>
        <table:table-row table:style-name="ro4">
          <table:table-cell table:style-name="ce216"/>
          <table:table-cell table:style-name="ce450" office:value-type="string" calcext:value-type="string">
            <text:p><text:s text:c="3"/>PE =</text:p>
          </table:table-cell>
          <table:table-cell table:style-name="ce460" office:value-type="string" calcext:value-type="string">
            <text:p>CF</text:p>
          </table:table-cell>
          <table:table-cell table:style-name="ce192" table:number-columns-repeated="3"/>
          <table:table-cell table:number-columns-repeated="16378"/>
        </table:table-row>
        <table:table-row table:style-name="ro4">
          <table:table-cell table:style-name="ce216"/>
          <table:table-cell table:style-name="ce451"/>
          <table:table-cell table:style-name="ce461" office:value-type="string" calcext:value-type="string">
            <text:p>MgCU</text:p>
          </table:table-cell>
          <table:table-cell table:style-name="ce192"/>
          <table:table-cell/>
          <table:table-cell table:style-name="ce192"/>
          <table:table-cell table:number-columns-repeated="16378"/>
        </table:table-row>
        <table:table-row table:style-name="ro5">
          <table:table-cell table:style-name="ce190"/>
          <table:table-cell table:style-name="ce192" table:number-columns-repeated="5"/>
          <table:table-cell table:number-columns-repeated="16378"/>
        </table:table-row>
        <table:table-row table:style-name="ro5">
          <table:table-cell table:style-name="ce446"/>
          <table:table-cell table:style-name="ce452" office:value-type="string" calcext:value-type="string">
            <text:p>PE =</text:p>
          </table:table-cell>
          <table:table-cell table:style-name="ce462" table:formula="of:=[$'Costos_Unitario '.I9]" office:value-type="float" office:value="3175.72083333333" calcext:value-type="float">
            <text:p><text:s/>3,176 </text:p>
          </table:table-cell>
          <table:table-cell table:style-name="ce469" table:formula="of:=[.C13]/[.C14]" office:value-type="float" office:value="1252.68617620997" calcext:value-type="float">
            <text:p><text:s/>1,253 </text:p>
          </table:table-cell>
          <table:table-cell table:style-name="ce192" office:value-type="string" calcext:value-type="string">
            <text:p>UNIDADES</text:p>
          </table:table-cell>
          <table:table-cell table:style-name="ce192"/>
          <table:table-cell table:style-name="ce477" office:value-type="string" calcext:value-type="string">
            <text:p>PUNTO EQUILIBRIO SOLES</text:p>
          </table:table-cell>
          <table:table-cell table:style-name="ce478" table:formula="of:=[.D13]*[.C6]" office:value-type="float" office:value="10347.1878154944" calcext:value-type="float">
            <text:p><text:s/>S/. 10,347.19 </text:p>
          </table:table-cell>
          <table:table-cell table:number-columns-repeated="16376"/>
        </table:table-row>
        <table:table-row table:style-name="ro5">
          <table:table-cell table:style-name="ce190"/>
          <table:table-cell table:style-name="ce453"/>
          <table:table-cell table:style-name="ce463" table:formula="of:=[.E6]" office:value-type="float" office:value="2.53512882447665" calcext:value-type="float">
            <text:p>2.54</text:p>
          </table:table-cell>
          <table:table-cell table:style-name="ce470"/>
          <table:table-cell table:style-name="ce192" table:number-columns-repeated="2"/>
          <table:table-cell/>
          <table:table-cell table:style-name="ce479"/>
          <table:table-cell table:number-columns-repeated="16376"/>
        </table:table-row>
        <table:table-row table:style-name="ro5">
          <table:table-cell table:style-name="ce190"/>
          <table:table-cell table:number-columns-repeated="16383"/>
        </table:table-row>
        <table:table-row table:style-name="ro4">
          <table:table-cell table:style-name="ce190"/>
          <table:table-cell table:style-name="ce193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208"/>
          <table:table-cell table:number-columns-repeated="16378"/>
        </table:table-row>
        <table:table-row table:style-name="ro32">
          <table:table-cell table:style-name="ce190"/>
          <table:table-cell table:style-name="ce454" office:value-type="string" calcext:value-type="string">
            <text:p>PRODUCTOS</text:p>
          </table:table-cell>
          <table:table-cell table:style-name="ce464" office:value-type="string" calcext:value-type="string">
            <text:p>UNIDAD</text:p>
            <text:p>DE MEDIDA</text:p>
          </table:table-cell>
          <table:table-cell table:style-name="ce464" office:value-type="string" calcext:value-type="string">
            <text:p>CANTIDAD</text:p>
            <text:p>ANUAL</text:p>
          </table:table-cell>
          <table:table-cell table:style-name="ce464" office:value-type="string" calcext:value-type="string">
            <text:p>CANTIDAD</text:p>
            <text:p>MENSUAL</text:p>
          </table:table-cell>
          <table:table-cell table:style-name="ce464" office:value-type="string" calcext:value-type="string">
            <text:p>CANTIDAD</text:p>
            <text:p>DIAR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AS LABORABLES DE PRODUCCION</text:p>
          </table:table-cell>
          <table:table-cell table:number-columns-repeated="16376"/>
        </table:table-row>
        <table:table-row table:style-name="ro33">
          <table:table-cell table:style-name="ce190"/>
          <table:table-cell table:style-name="ce455" table:formula="of:=[.B24]" office:value-type="string" office:string-value="Chocolates endulzados con Yacon" calcext:value-type="string">
            <text:p>Chocolates endulzados con Yacon</text:p>
          </table:table-cell>
          <table:table-cell table:style-name="ce465" office:value-type="string" calcext:value-type="string">
            <text:p>unidad</text:p>
            <text:p/>
          </table:table-cell>
          <table:table-cell table:style-name="ce471" table:formula="of:=[$'Presupuesto de ventas'.O7]" office:value-type="float" office:value="82800" calcext:value-type="float">
            <text:p>82800</text:p>
          </table:table-cell>
          <table:table-cell table:style-name="ce471" table:formula="of:=[$'Presupuesto de ventas'.C7]" office:value-type="float" office:value="3600" calcext:value-type="float">
            <text:p>3600</text:p>
          </table:table-cell>
          <table:table-cell table:style-name="ce471" table:formula="of:=[.E18]/[.G17]" office:value-type="float" office:value="144" calcext:value-type="float">
            <text:p>144</text:p>
          </table:table-cell>
          <table:table-cell table:number-columns-repeated="16378"/>
        </table:table-row>
        <table:table-row table:style-name="ro5">
          <table:table-cell table:style-name="ce190" table:number-columns-repeated="6"/>
          <table:table-cell table:number-columns-repeated="16378"/>
        </table:table-row>
        <table:table-row table:style-name="ro5">
          <table:table-cell table:style-name="ce190"/>
          <table:table-cell table:style-name="ce456"/>
          <table:table-cell table:style-name="ce192" table:number-columns-repeated="4"/>
          <table:table-cell table:number-columns-repeated="16378"/>
        </table:table-row>
        <table:table-row table:style-name="ro5">
          <table:table-cell table:style-name="ce190"/>
          <table:table-cell table:style-name="ce193" office:value-type="string" calcext:value-type="string" table:number-columns-spanned="5" table:number-rows-spanned="1">
            <text:p>PUNTO DE EQUILIBRIO EN SOLES POR PRODUCTO</text:p>
          </table:table-cell>
          <table:covered-table-cell table:number-columns-repeated="4" table:style-name="ce208"/>
          <table:table-cell table:number-columns-repeated="16378"/>
        </table:table-row>
        <table:table-row table:style-name="ro4">
          <table:table-cell table:style-name="ce190"/>
          <table:table-cell table:style-name="ce192" table:number-columns-repeated="5"/>
          <table:table-cell table:number-columns-repeated="16378"/>
        </table:table-row>
        <table:table-row table:style-name="ro6">
          <table:table-cell table:style-name="ce190"/>
          <table:table-cell table:style-name="ce51" office:value-type="string" calcext:value-type="string">
            <text:p>PRODUCTOS</text:p>
          </table:table-cell>
          <table:table-cell table:style-name="ce40" office:value-type="string" calcext:value-type="string">
            <text:p>PRECIO S/.</text:p>
          </table:table-cell>
          <table:table-cell table:style-name="ce40" office:value-type="string" calcext:value-type="string">
            <text:p>TOTAL</text:p>
            <text:p>ANUALS/.</text:p>
          </table:table-cell>
          <table:table-cell table:style-name="ce40" office:value-type="string" calcext:value-type="string">
            <text:p>TOTAL</text:p>
            <text:p>MES S/.</text:p>
          </table:table-cell>
          <table:table-cell table:style-name="ce40" office:value-type="string" calcext:value-type="string">
            <text:p>TOTAL</text:p>
            <text:p>DIARIO S/.</text:p>
          </table:table-cell>
          <table:table-cell table:number-columns-repeated="16378"/>
        </table:table-row>
        <table:table-row table:style-name="ro33">
          <table:table-cell table:style-name="ce190"/>
          <table:table-cell table:style-name="ce455" office:value-type="string" calcext:value-type="string">
            <text:p>Chocolates endulzados con Yacon</text:p>
          </table:table-cell>
          <table:table-cell table:style-name="ce466" office:value-type="float" office:value="11.8" calcext:value-type="float">
            <text:p><text:s/>S/. 11.80 </text:p>
          </table:table-cell>
          <table:table-cell table:style-name="ce472" table:formula="of:=[.D18]*[.C24]" office:value-type="float" office:value="977040" calcext:value-type="float">
            <text:p><text:s/>S/. 977,040.00 </text:p>
          </table:table-cell>
          <table:table-cell table:style-name="ce472" table:formula="of:=[.E18]*[.C24]" office:value-type="float" office:value="42480" calcext:value-type="float">
            <text:p><text:s/>S/. 42,480.00 </text:p>
          </table:table-cell>
          <table:table-cell table:style-name="ce472" table:formula="of:=[.F18]*[.C24]" office:value-type="float" office:value="1699.2" calcext:value-type="float">
            <text:p><text:s/>S/. 1,699.20 </text:p>
          </table:table-cell>
          <table:table-cell table:number-columns-repeated="16378"/>
        </table:table-row>
        <table:table-row table:style-name="ro5">
          <table:table-cell table:style-name="ce190" table:number-columns-repeated="2"/>
          <table:table-cell table:style-name="ce192" table:number-columns-repeated="4"/>
          <table:table-cell table:number-columns-repeated="16378"/>
        </table:table-row>
        <table:table-row table:style-name="ro4">
          <table:table-cell table:style-name="ce190"/>
          <table:table-cell/>
          <table:table-cell table:style-name="ce192" table:number-columns-repeated="4"/>
          <table:table-cell table:number-columns-repeated="16378"/>
        </table:table-row>
        <table:table-row table:style-name="ro5" table:number-rows-repeated="928">
          <table:table-cell table:style-name="ce190"/>
          <table:table-cell table:number-columns-repeated="16383"/>
        </table:table-row>
        <table:table-row table:style-name="ro9" table:number-rows-repeated="1047621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ESTADO RESULTADOS " table:style-name="ta17">
        <table:table-column table:style-name="co4" table:default-cell-style-name="ce32"/>
        <table:table-column table:style-name="co88" table:default-cell-style-name="ce32"/>
        <table:table-column table:style-name="co89" table:default-cell-style-name="ce32"/>
        <table:table-column table:style-name="co20" table:number-columns-repeated="2" table:default-cell-style-name="ce32"/>
        <table:table-column table:style-name="co67" table:default-cell-style-name="ce32"/>
        <table:table-column table:style-name="co36" table:default-cell-style-name="ce32"/>
        <table:table-column table:style-name="co73" table:default-cell-style-name="ce32"/>
        <table:table-column table:style-name="co4" table:number-columns-repeated="2" table:default-cell-style-name="ce32"/>
        <table:table-column table:style-name="co2" table:default-cell-style-name="ce32"/>
        <table:table-column table:style-name="co4" table:number-columns-repeated="15" table:default-cell-style-name="ce32"/>
        <table:table-column table:style-name="co10" table:number-columns-repeated="16358" table:default-cell-style-name="ce32"/>
        <table:table-row table:style-name="ro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table:style-name="ce480" office:value-type="string" calcext:value-type="string" table:number-columns-spanned="6" table:number-rows-spanned="1">
            <text:p>ESTADO DE RESULTADOS ECONÓMICO</text:p>
          </table:table-cell>
          <table:covered-table-cell table:number-columns-repeated="5" table:style-name="ce308"/>
          <table:table-cell table:number-columns-repeated="16376"/>
        </table:table-row>
        <table:table-row table:style-name="ro5">
          <table:table-cell table:number-columns-repeated="2"/>
          <table:table-cell table:style-name="ce192" table:number-columns-repeated="6"/>
          <table:table-cell table:number-columns-repeated="16376"/>
        </table:table-row>
        <table:table-row table:style-name="ro5">
          <table:table-cell table:number-columns-repeated="2"/>
          <table:table-cell table:style-name="ce193" office:value-type="string" calcext:value-type="string" table:number-columns-spanned="6" table:number-rows-spanned="1">
            <text:p>REGIMEN TRIBUTARIO MYPE TRIBUTARIO </text:p>
          </table:table-cell>
          <table:covered-table-cell table:number-columns-repeated="5" table:style-name="ce208"/>
          <table:table-cell table:number-columns-repeated="16376"/>
        </table:table-row>
        <table:table-row table:style-name="ro4">
          <table:table-cell table:number-columns-repeated="2"/>
          <table:table-cell table:style-name="ce192" table:number-columns-repeated="6"/>
          <table:table-cell table:number-columns-repeated="16376"/>
        </table:table-row>
        <table:table-row table:style-name="ro4">
          <table:table-cell table:number-columns-repeated="2"/>
          <table:table-cell table:style-name="ce480" office:value-type="string" calcext:value-type="string">
            <text:p>RUBRO</text:p>
          </table:table-cell>
          <table:table-cell table:style-name="ce480" office:value-type="float" office:value="1" calcext:value-type="float">
            <text:p>1</text:p>
          </table:table-cell>
          <table:table-cell table:style-name="ce480" table:formula="of:=1+[.D7]" office:value-type="float" office:value="2" calcext:value-type="float">
            <text:p>2</text:p>
          </table:table-cell>
          <table:table-cell table:style-name="ce480" table:formula="of:=1+[.E7]" office:value-type="float" office:value="3" calcext:value-type="float">
            <text:p>3</text:p>
          </table:table-cell>
          <table:table-cell table:style-name="ce480" table:formula="of:=1+[.F7]" office:value-type="float" office:value="4" calcext:value-type="float">
            <text:p>4</text:p>
          </table:table-cell>
          <table:table-cell table:style-name="ce480" table:formula="of:=1+[.G7]" office:value-type="float" office:value="5" calcext:value-type="float">
            <text:p>5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1"/>
          <table:table-cell table:style-name="ce485" table:number-columns-repeated="2"/>
          <table:table-cell table:style-name="ce490" table:number-columns-repeated="3"/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Ventas netas sin IGV</text:p>
          </table:table-cell>
          <table:table-cell table:style-name="ce486" table:formula="of:=[$'Presupuesto de ventas'.P17]" office:value-type="float" office:value="579600" calcext:value-type="float">
            <text:p><text:s/>579,600.00 </text:p>
          </table:table-cell>
          <table:table-cell table:style-name="ce486" table:formula="of:=[$'Presupuesto de ventas'.P18]" office:value-type="float" office:value="856800" calcext:value-type="float">
            <text:p><text:s/>856,800.00 </text:p>
          </table:table-cell>
          <table:table-cell table:style-name="ce486" table:formula="of:=[$'Presupuesto de ventas'.P19]" office:value-type="float" office:value="856800" calcext:value-type="float">
            <text:p><text:s/>856,800.00 </text:p>
          </table:table-cell>
          <table:table-cell table:style-name="ce486" table:formula="of:=[$'Presupuesto de ventas'.P20]" office:value-type="float" office:value="856800" calcext:value-type="float">
            <text:p><text:s/>856,800.00 </text:p>
          </table:table-cell>
          <table:table-cell table:style-name="ce486" table:formula="of:=[$'Presupuesto de ventas'.P21]" office:value-type="float" office:value="856800" calcext:value-type="float">
            <text:p><text:s/>856,800.00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(-) Costo de ventas</text:p>
          </table:table-cell>
          <table:table-cell table:style-name="ce329" table:number-columns-repeated="5"/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Costos de produccion</text:p>
          </table:table-cell>
          <table:table-cell table:style-name="ce329" table:formula="of:=[$'Presupuesto de ventas'.O7]*[$'Costos_Unitario '.$I$20]" office:value-type="float" office:value="474019.333333333" calcext:value-type="float">
            <text:p><text:s/>474,019.33 </text:p>
          </table:table-cell>
          <table:table-cell table:style-name="ce329" table:formula="of:=[$'Presupuesto de ventas'.O8]*[$'Costos_Unitario '.$I$20]" office:value-type="float" office:value="700724.231884058" calcext:value-type="float">
            <text:p><text:s/>700,724.23 </text:p>
          </table:table-cell>
          <table:table-cell table:style-name="ce329" table:formula="of:=[$'Presupuesto de ventas'.O9]*[$'Costos_Unitario '.$I$20]" office:value-type="float" office:value="700724.231884058" calcext:value-type="float">
            <text:p><text:s/>700,724.23 </text:p>
          </table:table-cell>
          <table:table-cell table:style-name="ce329" table:formula="of:=[$'Presupuesto de ventas'.O10]*[$'Costos_Unitario '.$I$20]" office:value-type="float" office:value="700724.231884058" calcext:value-type="float">
            <text:p><text:s/>700,724.23 </text:p>
          </table:table-cell>
          <table:table-cell table:style-name="ce329" table:formula="of:=[$'Presupuesto de ventas'.O11]*[$'Costos_Unitario '.$I$20]" office:value-type="float" office:value="700724.231884058" calcext:value-type="float">
            <text:p><text:s/>700,724.23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Depreciacion Activo Fijo</text:p>
          </table:table-cell>
          <table:table-cell table:style-name="ce329" table:formula="of:=[$'Depreciacion y VR'.$F$11]" office:value-type="float" office:value="2856.83333333333" calcext:value-type="float">
            <text:p><text:s/>2,856.83 </text:p>
          </table:table-cell>
          <table:table-cell table:style-name="ce329" table:formula="of:=[$'Depreciacion y VR'.$F$11]" office:value-type="float" office:value="2856.83333333333" calcext:value-type="float">
            <text:p><text:s/>2,856.83 </text:p>
          </table:table-cell>
          <table:table-cell table:style-name="ce329" table:formula="of:=[$'Depreciacion y VR'.$F$11]" office:value-type="float" office:value="2856.83333333333" calcext:value-type="float">
            <text:p><text:s/>2,856.83 </text:p>
          </table:table-cell>
          <table:table-cell table:style-name="ce329" table:formula="of:=[$'Depreciacion y VR'.$F$11]" office:value-type="float" office:value="2856.83333333333" calcext:value-type="float">
            <text:p><text:s/>2,856.83 </text:p>
          </table:table-cell>
          <table:table-cell table:style-name="ce329" table:formula="of:=[$'Depreciacion y VR'.$F$11]" office:value-type="float" office:value="2856.83333333333" calcext:value-type="float">
            <text:p><text:s/>2,856.83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3" office:value-type="string" calcext:value-type="string">
            <text:p>Utilidad Bruta</text:p>
          </table:table-cell>
          <table:table-cell table:style-name="ce487" table:formula="of:=[.D9]-[.D11]-[.D12]" office:value-type="float" office:value="102723.833333333" calcext:value-type="float">
            <text:p><text:s/>102,723.83 </text:p>
          </table:table-cell>
          <table:table-cell table:style-name="ce487" table:formula="of:=[.E9]-[.E11]-[.E12]" office:value-type="float" office:value="153218.934782609" calcext:value-type="float">
            <text:p><text:s/>153,218.93 </text:p>
          </table:table-cell>
          <table:table-cell table:style-name="ce487" table:formula="of:=[.F9]-[.F11]-[.F12]" office:value-type="float" office:value="153218.934782609" calcext:value-type="float">
            <text:p><text:s/>153,218.93 </text:p>
          </table:table-cell>
          <table:table-cell table:style-name="ce487" table:formula="of:=[.G9]-[.G11]-[.G12]" office:value-type="float" office:value="153218.934782609" calcext:value-type="float">
            <text:p><text:s/>153,218.93 </text:p>
          </table:table-cell>
          <table:table-cell table:style-name="ce487" table:formula="of:=[.H9]-[.H11]-[.H12]" office:value-type="float" office:value="153218.934782609" calcext:value-type="float">
            <text:p><text:s/>153,218.93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(-) Gastos operativos</text:p>
          </table:table-cell>
          <table:table-cell table:style-name="ce329" table:number-columns-repeated="5"/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Gastos administrativos</text:p>
          </table:table-cell>
          <table:table-cell table:style-name="ce329" table:formula="of:=[$'Gastos Operativos'.$D$13]*12" office:value-type="float" office:value="28784.8166666667" calcext:value-type="float">
            <text:p><text:s/>28,784.82 </text:p>
          </table:table-cell>
          <table:table-cell table:style-name="ce329" table:formula="of:=[$'Gastos Operativos'.$D$13]*12" office:value-type="float" office:value="28784.8166666667" calcext:value-type="float">
            <text:p><text:s/>28,784.82 </text:p>
          </table:table-cell>
          <table:table-cell table:style-name="ce329" table:formula="of:=[$'Gastos Operativos'.$D$13]*12" office:value-type="float" office:value="28784.8166666667" calcext:value-type="float">
            <text:p><text:s/>28,784.82 </text:p>
          </table:table-cell>
          <table:table-cell table:style-name="ce329" table:formula="of:=[$'Gastos Operativos'.$D$13]*12" office:value-type="float" office:value="28784.8166666667" calcext:value-type="float">
            <text:p><text:s/>28,784.82 </text:p>
          </table:table-cell>
          <table:table-cell table:style-name="ce329" table:formula="of:=[$'Gastos Operativos'.$D$13]*12" office:value-type="float" office:value="28784.8166666667" calcext:value-type="float">
            <text:p><text:s/>28,784.82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Gastos de ventas</text:p>
          </table:table-cell>
          <table:table-cell table:style-name="ce329" table:formula="of:=[$'Gastos Operativos'.$H$18]*12" office:value-type="float" office:value="6180" calcext:value-type="float">
            <text:p><text:s/>6,180.00 </text:p>
          </table:table-cell>
          <table:table-cell table:style-name="ce329" table:formula="of:=[$'Gastos Operativos'.$H$18]*12" office:value-type="float" office:value="6180" calcext:value-type="float">
            <text:p><text:s/>6,180.00 </text:p>
          </table:table-cell>
          <table:table-cell table:style-name="ce329" table:formula="of:=[$'Gastos Operativos'.$H$18]*12" office:value-type="float" office:value="6180" calcext:value-type="float">
            <text:p><text:s/>6,180.00 </text:p>
          </table:table-cell>
          <table:table-cell table:style-name="ce329" table:formula="of:=[$'Gastos Operativos'.$H$18]*12" office:value-type="float" office:value="6180" calcext:value-type="float">
            <text:p><text:s/>6,180.00 </text:p>
          </table:table-cell>
          <table:table-cell table:style-name="ce329" table:formula="of:=[$'Gastos Operativos'.$H$18]*12" office:value-type="float" office:value="6180" calcext:value-type="float">
            <text:p><text:s/>6,180.00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Amortizacion de intangibles</text:p>
          </table:table-cell>
          <table:table-cell table:style-name="ce329" table:formula="of:=[$'INVERSION INICIAL'.$D$16]/[$Resumen.$H$9]" office:value-type="float" office:value="287" calcext:value-type="float">
            <text:p><text:s/>287.00 </text:p>
          </table:table-cell>
          <table:table-cell table:style-name="ce329" table:formula="of:=[$'INVERSION INICIAL'.$D$16]/[$Resumen.$H$9]" office:value-type="float" office:value="287" calcext:value-type="float">
            <text:p><text:s/>287.00 </text:p>
          </table:table-cell>
          <table:table-cell table:style-name="ce329" table:formula="of:=[$'INVERSION INICIAL'.$D$16]/[$Resumen.$H$9]" office:value-type="float" office:value="287" calcext:value-type="float">
            <text:p><text:s/>287.00 </text:p>
          </table:table-cell>
          <table:table-cell table:style-name="ce329" table:formula="of:=[$'INVERSION INICIAL'.$D$16]/[$Resumen.$H$9]" office:value-type="float" office:value="287" calcext:value-type="float">
            <text:p><text:s/>287.00 </text:p>
          </table:table-cell>
          <table:table-cell table:style-name="ce329" table:formula="of:=[$'INVERSION INICIAL'.$D$16]/[$Resumen.$H$9]" office:value-type="float" office:value="287" calcext:value-type="float">
            <text:p><text:s/>287.00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3" office:value-type="string" calcext:value-type="string">
            <text:p>Utilidad Operativa</text:p>
          </table:table-cell>
          <table:table-cell table:style-name="ce487" table:formula="of:=[.D13]-[.D15]-[.D16]-[.D17]" office:value-type="float" office:value="67472.0166666667" calcext:value-type="float">
            <text:p><text:s/>67,472.02 </text:p>
          </table:table-cell>
          <table:table-cell table:style-name="ce487" table:formula="of:=[.E13]-[.E15]-[.E16]-[.E17]" office:value-type="float" office:value="117967.118115942" calcext:value-type="float">
            <text:p><text:s/>117,967.12 </text:p>
          </table:table-cell>
          <table:table-cell table:style-name="ce487" table:formula="of:=[.F13]-[.F15]-[.F16]-[.F17]" office:value-type="float" office:value="117967.118115942" calcext:value-type="float">
            <text:p><text:s/>117,967.12 </text:p>
          </table:table-cell>
          <table:table-cell table:style-name="ce487" table:formula="of:=[.G13]-[.G15]-[.G16]-[.G17]" office:value-type="float" office:value="117967.118115942" calcext:value-type="float">
            <text:p><text:s/>117,967.12 </text:p>
          </table:table-cell>
          <table:table-cell table:style-name="ce487" table:formula="of:=[.H13]-[.H15]-[.H16]-[.H17]" office:value-type="float" office:value="117967.118115942" calcext:value-type="float">
            <text:p><text:s/>117,967.12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2" office:value-type="string" calcext:value-type="string">
            <text:p>Intereses</text:p>
          </table:table-cell>
          <table:table-cell table:number-columns-repeated="5" table:style-name="ce329" office:value-type="float" office:value="0" calcext:value-type="float">
            <text:p><text:s/>- <text:s text:c="2"/>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483" office:value-type="string" calcext:value-type="string">
            <text:p>Utilidad Imponible</text:p>
          </table:table-cell>
          <table:table-cell table:style-name="ce487" table:formula="of:=[.D18]" office:value-type="float" office:value="67472.0166666667" calcext:value-type="float">
            <text:p><text:s/>67,472.02 </text:p>
          </table:table-cell>
          <table:table-cell table:style-name="ce487" table:formula="of:=[.E18]" office:value-type="float" office:value="117967.118115942" calcext:value-type="float">
            <text:p><text:s/>117,967.12 </text:p>
          </table:table-cell>
          <table:table-cell table:style-name="ce487" table:formula="of:=[.F18]" office:value-type="float" office:value="117967.118115942" calcext:value-type="float">
            <text:p><text:s/>117,967.12 </text:p>
          </table:table-cell>
          <table:table-cell table:style-name="ce487" table:formula="of:=[.G18]" office:value-type="float" office:value="117967.118115942" calcext:value-type="float">
            <text:p><text:s/>117,967.12 </text:p>
          </table:table-cell>
          <table:table-cell table:style-name="ce487" table:formula="of:=[.H18]" office:value-type="float" office:value="117967.118115942" calcext:value-type="float">
            <text:p><text:s/>117,967.12 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484" office:value-type="string" calcext:value-type="string">
            <text:p>Impuesto a la renta (*)</text:p>
          </table:table-cell>
          <table:table-cell table:style-name="ce488" table:formula="of:=([.$D$26]*[$Resumen.$H$11]) + ([$Resumen.$H$12]*([$'ESTADO RESULTADOS '.D20]-[$'ESTADO RESULTADOS '.$D$26]))" office:value-type="float" office:value="7034.24491666667" calcext:value-type="float">
            <text:p><text:s/>7,034 </text:p>
          </table:table-cell>
          <table:table-cell table:style-name="ce488" table:formula="of:=([.$D$26]*[$Resumen.$H$11]) + ([$Resumen.$H$12]*([$'ESTADO RESULTADOS '.E20]-[$'ESTADO RESULTADOS '.$D$26]))" office:value-type="float" office:value="21930.2998442029" calcext:value-type="float">
            <text:p><text:s/>21,930 </text:p>
          </table:table-cell>
          <table:table-cell table:style-name="ce488" table:formula="of:=([.$D$26]*[$Resumen.$H$11]) + ([$Resumen.$H$12]*([$'ESTADO RESULTADOS '.F20]-[$'ESTADO RESULTADOS '.$D$26]))" office:value-type="float" office:value="21930.2998442029" calcext:value-type="float">
            <text:p><text:s/>21,930 </text:p>
          </table:table-cell>
          <table:table-cell table:style-name="ce488" table:formula="of:=([.$D$26]*[$Resumen.$H$11]) + ([$Resumen.$H$12]*([$'ESTADO RESULTADOS '.G20]-[$'ESTADO RESULTADOS '.$D$26]))" office:value-type="float" office:value="21930.2998442029" calcext:value-type="float">
            <text:p><text:s/>21,930 </text:p>
          </table:table-cell>
          <table:table-cell table:style-name="ce488" table:formula="of:=([.$D$26]*[$Resumen.$H$11]) + ([$Resumen.$H$12]*([$'ESTADO RESULTADOS '.H20]-[$'ESTADO RESULTADOS '.$D$26]))" office:value-type="float" office:value="21930.2998442029" calcext:value-type="float">
            <text:p><text:s/>21,930 </text:p>
          </table:table-cell>
          <table:table-cell table:style-name="ce491"/>
          <table:table-cell table:number-columns-repeated="16375"/>
        </table:table-row>
        <table:table-row table:style-name="ro4">
          <table:table-cell table:number-columns-repeated="2"/>
          <table:table-cell table:style-name="ce480" office:value-type="string" calcext:value-type="string">
            <text:p>Utilidad Neta</text:p>
          </table:table-cell>
          <table:table-cell table:style-name="ce489" table:formula="of:=[.D20]-[.D21]" office:value-type="float" office:value="60437.77175" calcext:value-type="float">
            <text:p><text:s/>60,437.77 </text:p>
          </table:table-cell>
          <table:table-cell table:style-name="ce489" table:formula="of:=[.E20]-[.E21]" office:value-type="float" office:value="96036.8182717392" calcext:value-type="float">
            <text:p><text:s/>96,036.82 </text:p>
          </table:table-cell>
          <table:table-cell table:style-name="ce489" table:formula="of:=[.F20]-[.F21]" office:value-type="float" office:value="96036.8182717392" calcext:value-type="float">
            <text:p><text:s/>96,036.82 </text:p>
          </table:table-cell>
          <table:table-cell table:style-name="ce489" table:formula="of:=[.G20]-[.G21]" office:value-type="float" office:value="96036.8182717392" calcext:value-type="float">
            <text:p><text:s/>96,036.82 </text:p>
          </table:table-cell>
          <table:table-cell table:style-name="ce489" table:formula="of:=[.H20]-[.H21]" office:value-type="float" office:value="96036.8182717392" calcext:value-type="float">
            <text:p><text:s/>96,036.82 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92" office:value-type="string" calcext:value-type="string">
            <text:p>(*) Con MYPE tributario es escalonado de acuerdo a utilidad Imponible</text:p>
          </table:table-cell>
          <table:table-cell table:style-name="ce192" table:number-columns-repeated="5"/>
          <table:table-cell table:number-columns-repeated="16376"/>
        </table:table-row>
        <table:table-row table:style-name="ro5">
          <table:table-cell table:number-columns-repeated="2"/>
          <table:table-cell table:style-name="ce192" office:value-type="string" calcext:value-type="string">
            <text:p><text:s text:c="5"/>Con RG 29.5% sobre la utilidad imponible</text:p>
          </table:table-cell>
          <table:table-cell table:style-name="ce192" table:number-columns-repeated="5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/>
          <table:table-cell office:value-type="string" calcext:value-type="string">
            <text:p>15 UIT ( Pagan el 10%) =</text:p>
          </table:table-cell>
          <table:table-cell table:formula="of:=15*4400" office:value-type="float" office:value="66000" calcext:value-type="float">
            <text:p>66000</text:p>
          </table:table-cell>
          <table:table-cell table:number-columns-repeated="16380"/>
        </table:table-row>
        <table:table-row table:style-name="ro5">
          <table:table-cell table:number-columns-repeated="4"/>
          <table:table-cell table:style-name="ce444"/>
          <table:table-cell table:number-columns-repeated="16379"/>
        </table:table-row>
        <table:table-row table:style-name="ro5" table:number-rows-repeated="950">
          <table:table-cell table:number-columns-repeated="16384"/>
        </table:table-row>
        <table:table-row table:style-name="ro9" table:number-rows-repeated="1047598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expression table:name="Precio_Materia_Prima" table:base-cell-address="$'Resumen del escenario'.$A$1" table:expression="#REF!"/>
          <table:named-expression table:name="Precio_Queso_Maduro" table:base-cell-address="$'Resumen del escenario'.$A$1" table:expression="#REF!"/>
          <table:named-expression table:name="Precio_retablo_unidad" table:base-cell-address="$'Resumen del escenario'.$A$1" table:expression="#REF!"/>
          <table:named-expression table:name="TIRE" table:base-cell-address="$'Resumen del escenario'.$A$1" table:expression="#REF!"/>
          <table:named-expression table:name="TIRF" table:base-cell-address="$'Resumen del escenario'.$A$1" table:expression="#REF!"/>
          <table:named-expression table:name="Valor_de_venta" table:base-cell-address="$'Resumen del escenario'.$A$1" table:expression="#REF!"/>
          <table:named-expression table:name="VANE" table:base-cell-address="$'Resumen del escenario'.$A$1" table:expression="#REF!"/>
          <table:named-expression table:name="VANF" table:base-cell-address="$'Resumen del escenario'.$A$1" table:expression="#REF!"/>
        </table:named-expressions>
      </table:table>
      <table:table table:name="IGV" table:style-name="ta18">
        <table:table-column table:style-name="co90" table:default-cell-style-name="ce80"/>
        <table:table-column table:style-name="co88" table:default-cell-style-name="ce80"/>
        <table:table-column table:style-name="co45" table:default-cell-style-name="ce80"/>
        <table:table-column table:style-name="co29" table:default-cell-style-name="ce80"/>
        <table:table-column table:style-name="co33" table:default-cell-style-name="ce80"/>
        <table:table-column table:style-name="co36" table:default-cell-style-name="ce80"/>
        <table:table-column table:style-name="co37" table:number-columns-repeated="2" table:default-cell-style-name="ce80"/>
        <table:table-column table:style-name="co21" table:number-columns-repeated="249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1" table:default-cell-style-name="ce80"/>
        <table:table-column table:style-name="co88" table:default-cell-style-name="ce80"/>
        <table:table-column table:style-name="co45" table:default-cell-style-name="ce80"/>
        <table:table-column table:style-name="co67" table:default-cell-style-name="ce80"/>
        <table:table-column table:style-name="co91" table:default-cell-style-name="ce80"/>
        <table:table-column table:style-name="co92" table:default-cell-style-name="ce80"/>
        <table:table-column table:style-name="co21" table:number-columns-repeated="250" table:default-cell-style-name="ce80"/>
        <table:table-row table:style-name="ro12">
          <table:table-cell/>
          <table:table-cell table:style-name="ce373"/>
          <table:table-cell table:number-columns-repeated="16382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2"/>
          <table:table-cell table:style-name="ce492" office:value-type="string" calcext:value-type="string" table:number-columns-spanned="6" table:number-rows-spanned="1">
            <text:p>PAGO DE IGV PROYECTADO</text:p>
          </table:table-cell>
          <table:covered-table-cell table:number-columns-repeated="5" table:style-name="ce499"/>
          <table:table-cell table:number-columns-repeated="16376"/>
        </table:table-row>
        <table:table-row table:style-name="ro12">
          <table:table-cell table:number-columns-repeated="2"/>
          <table:table-cell table:style-name="ce374" table:number-columns-repeated="4"/>
          <table:table-cell table:number-columns-repeated="16378"/>
        </table:table-row>
        <table:table-row table:style-name="ro12">
          <table:table-cell table:number-columns-repeated="2"/>
          <table:table-cell table:style-name="ce83" office:value-type="string" calcext:value-type="string">
            <text:p>RUBRO</text:p>
          </table:table-cell>
          <table:table-cell table:style-name="ce83" office:value-type="string" calcext:value-type="string">
            <text:p>Año 1</text:p>
          </table:table-cell>
          <table:table-cell table:style-name="ce83" office:value-type="string" calcext:value-type="string">
            <text:p>Año 2</text:p>
          </table:table-cell>
          <table:table-cell table:style-name="ce83" office:value-type="string" calcext:value-type="string">
            <text:p>Año 3</text:p>
          </table:table-cell>
          <table:table-cell table:style-name="ce83" office:value-type="string" calcext:value-type="string">
            <text:p>Año 4</text:p>
          </table:table-cell>
          <table:table-cell table:style-name="ce83" office:value-type="string" calcext:value-type="string">
            <text:p>Año 5</text:p>
          </table:table-cell>
          <table:table-cell table:style-name="ce510"/>
          <table:table-cell table:number-columns-repeated="16375"/>
        </table:table-row>
        <table:table-row table:style-name="ro12">
          <table:table-cell table:number-columns-repeated="2"/>
          <table:table-cell table:style-name="ce493" office:value-type="string" calcext:value-type="string">
            <text:p>Ingresos sin IGV</text:p>
          </table:table-cell>
          <table:table-cell table:style-name="ce500" table:formula="of:=[$'Presupuesto de ventas'.P17]" office:value-type="float" office:value="579600" calcext:value-type="float">
            <text:p>S/579,600.00</text:p>
          </table:table-cell>
          <table:table-cell table:style-name="ce500" table:formula="of:=[$'Presupuesto de ventas'.P18]" office:value-type="float" office:value="856800" calcext:value-type="float">
            <text:p>S/856,800.00</text:p>
          </table:table-cell>
          <table:table-cell table:style-name="ce500" table:formula="of:=[$'Presupuesto de ventas'.P19]" office:value-type="float" office:value="856800" calcext:value-type="float">
            <text:p>S/856,800.00</text:p>
          </table:table-cell>
          <table:table-cell table:style-name="ce500" table:formula="of:=[$'Presupuesto de ventas'.P20]" office:value-type="float" office:value="856800" calcext:value-type="float">
            <text:p>S/856,800.00</text:p>
          </table:table-cell>
          <table:table-cell table:style-name="ce500" table:formula="of:=[$'Presupuesto de ventas'.P21]" office:value-type="float" office:value="856800" calcext:value-type="float">
            <text:p>S/856,800.00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3" office:value-type="string" calcext:value-type="string">
            <text:p>Ingreso con GV</text:p>
          </table:table-cell>
          <table:table-cell table:style-name="ce500" table:formula="of:=[.D6]*1.18" office:value-type="float" office:value="683928" calcext:value-type="float">
            <text:p>S/683,928.00</text:p>
          </table:table-cell>
          <table:table-cell table:style-name="ce500" table:formula="of:=[.E6]*1.18" office:value-type="float" office:value="1011024" calcext:value-type="float">
            <text:p>S/1,011,024.00</text:p>
          </table:table-cell>
          <table:table-cell table:style-name="ce500" table:formula="of:=[.F6]*1.18" office:value-type="float" office:value="1011024" calcext:value-type="float">
            <text:p>S/1,011,024.00</text:p>
          </table:table-cell>
          <table:table-cell table:style-name="ce500" table:formula="of:=[.G6]*1.18" office:value-type="float" office:value="1011024" calcext:value-type="float">
            <text:p>S/1,011,024.00</text:p>
          </table:table-cell>
          <table:table-cell table:style-name="ce500" table:formula="of:=[.H6]*1.18" office:value-type="float" office:value="1011024" calcext:value-type="float">
            <text:p>S/1,011,024.00</text:p>
          </table:table-cell>
          <table:table-cell table:number-columns-repeated="16376"/>
        </table:table-row>
        <table:table-row table:style-name="ro12">
          <table:table-cell table:style-name="ce373" table:number-columns-repeated="2"/>
          <table:table-cell table:style-name="ce494" office:value-type="string" calcext:value-type="string">
            <text:p>IGV <text:s/>de venta</text:p>
          </table:table-cell>
          <table:table-cell table:style-name="ce501" table:formula="of:=[.D7]-[.D6]" office:value-type="float" office:value="104328" calcext:value-type="float">
            <text:p>S/104,328.00</text:p>
          </table:table-cell>
          <table:table-cell table:style-name="ce501" table:formula="of:=[.E7]-[.E6]" office:value-type="float" office:value="154224" calcext:value-type="float">
            <text:p>S/154,224.00</text:p>
          </table:table-cell>
          <table:table-cell table:style-name="ce501" table:formula="of:=[.F7]-[.F6]" office:value-type="float" office:value="154224" calcext:value-type="float">
            <text:p>S/154,224.00</text:p>
          </table:table-cell>
          <table:table-cell table:style-name="ce501" table:formula="of:=[.G7]-[.G6]" office:value-type="float" office:value="154224" calcext:value-type="float">
            <text:p>S/154,224.00</text:p>
          </table:table-cell>
          <table:table-cell table:style-name="ce501" table:formula="of:=[.H7]-[.H6]" office:value-type="float" office:value="154224" calcext:value-type="float">
            <text:p>S/154,224.00</text:p>
          </table:table-cell>
          <table:table-cell table:style-name="ce373" table:number-columns-repeated="16376"/>
        </table:table-row>
        <table:table-row table:style-name="ro12">
          <table:table-cell table:number-columns-repeated="2"/>
          <table:table-cell table:style-name="ce495" office:value-type="string" calcext:value-type="string">
            <text:p>Costos de produccion</text:p>
          </table:table-cell>
          <table:table-cell table:style-name="ce502" table:formula="of:=[$'ESTADO RESULTADOS '.D11]" office:value-type="float" office:value="474019.333333333" calcext:value-type="float">
            <text:p>S/474,019.33</text:p>
          </table:table-cell>
          <table:table-cell table:style-name="ce502" table:formula="of:=[$'ESTADO RESULTADOS '.E11]" office:value-type="float" office:value="700724.231884058" calcext:value-type="float">
            <text:p>S/700,724.23</text:p>
          </table:table-cell>
          <table:table-cell table:style-name="ce502" table:formula="of:=[$'ESTADO RESULTADOS '.F11]" office:value-type="float" office:value="700724.231884058" calcext:value-type="float">
            <text:p>S/700,724.23</text:p>
          </table:table-cell>
          <table:table-cell table:style-name="ce502" table:formula="of:=[$'ESTADO RESULTADOS '.G11]" office:value-type="float" office:value="700724.231884058" calcext:value-type="float">
            <text:p>S/700,724.23</text:p>
          </table:table-cell>
          <table:table-cell table:style-name="ce502" table:formula="of:=[$'ESTADO RESULTADOS '.H11]" office:value-type="float" office:value="700724.231884058" calcext:value-type="float">
            <text:p>S/700,724.23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5" office:value-type="string" calcext:value-type="string">
            <text:p>Depreciacion Activo Fijo</text:p>
          </table:table-cell>
          <table:table-cell table:style-name="ce502" table:formula="of:=[$'ESTADO RESULTADOS '.D12]" office:value-type="float" office:value="2856.83333333333" calcext:value-type="float">
            <text:p>S/2,856.83</text:p>
          </table:table-cell>
          <table:table-cell table:style-name="ce502" table:formula="of:=[$'ESTADO RESULTADOS '.E12]" office:value-type="float" office:value="2856.83333333333" calcext:value-type="float">
            <text:p>S/2,856.83</text:p>
          </table:table-cell>
          <table:table-cell table:style-name="ce502" table:formula="of:=[$'ESTADO RESULTADOS '.F12]" office:value-type="float" office:value="2856.83333333333" calcext:value-type="float">
            <text:p>S/2,856.83</text:p>
          </table:table-cell>
          <table:table-cell table:style-name="ce502" table:formula="of:=[$'ESTADO RESULTADOS '.G12]" office:value-type="float" office:value="2856.83333333333" calcext:value-type="float">
            <text:p>S/2,856.83</text:p>
          </table:table-cell>
          <table:table-cell table:style-name="ce502" table:formula="of:=[$'ESTADO RESULTADOS '.H12]" office:value-type="float" office:value="2856.83333333333" calcext:value-type="float">
            <text:p>S/2,856.83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5" office:value-type="string" calcext:value-type="string">
            <text:p>Gastos administrativos</text:p>
          </table:table-cell>
          <table:table-cell table:style-name="ce503" table:formula="of:=([$'Gastos Operativos'.$D$11]+[$'Gastos Operativos'.$D$12])*12" office:value-type="float" office:value="15600" calcext:value-type="float">
            <text:p>S/15,600.00</text:p>
          </table:table-cell>
          <table:table-cell table:style-name="ce503" table:formula="of:=([$'Gastos Operativos'.$D$11]+[$'Gastos Operativos'.$D$12])*12" office:value-type="float" office:value="15600" calcext:value-type="float">
            <text:p>S/15,600.00</text:p>
          </table:table-cell>
          <table:table-cell table:style-name="ce503" table:formula="of:=([$'Gastos Operativos'.$D$11]+[$'Gastos Operativos'.$D$12])*12" office:value-type="float" office:value="15600" calcext:value-type="float">
            <text:p>S/15,600.00</text:p>
          </table:table-cell>
          <table:table-cell table:style-name="ce503" table:formula="of:=([$'Gastos Operativos'.$D$11]+[$'Gastos Operativos'.$D$12])*12" office:value-type="float" office:value="15600" calcext:value-type="float">
            <text:p>S/15,600.00</text:p>
          </table:table-cell>
          <table:table-cell table:style-name="ce503" table:formula="of:=([$'Gastos Operativos'.$D$11]+[$'Gastos Operativos'.$D$12])*12" office:value-type="float" office:value="15600" calcext:value-type="float">
            <text:p>S/15,600.00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5" office:value-type="string" calcext:value-type="string">
            <text:p>Gastos de ventas</text:p>
          </table:table-cell>
          <table:table-cell table:style-name="ce502" table:formula="of:=([$'Gastos Operativos'.$H$18])*12" office:value-type="float" office:value="6180" calcext:value-type="float">
            <text:p>S/6,180.00</text:p>
          </table:table-cell>
          <table:table-cell table:style-name="ce502" table:formula="of:=([$'Gastos Operativos'.$H$18])*12" office:value-type="float" office:value="6180" calcext:value-type="float">
            <text:p>S/6,180.00</text:p>
          </table:table-cell>
          <table:table-cell table:style-name="ce502" table:formula="of:=([$'Gastos Operativos'.$H$18])*12" office:value-type="float" office:value="6180" calcext:value-type="float">
            <text:p>S/6,180.00</text:p>
          </table:table-cell>
          <table:table-cell table:style-name="ce502" table:formula="of:=([$'Gastos Operativos'.$H$18])*12" office:value-type="float" office:value="6180" calcext:value-type="float">
            <text:p>S/6,180.00</text:p>
          </table:table-cell>
          <table:table-cell table:style-name="ce502" table:formula="of:=([$'Gastos Operativos'.$H$18])*12" office:value-type="float" office:value="6180" calcext:value-type="float">
            <text:p>S/6,180.00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5" office:value-type="string" calcext:value-type="string">
            <text:p>Amortizacion de intangibles</text:p>
          </table:table-cell>
          <table:table-cell table:style-name="ce502" table:formula="of:=[$'ESTADO RESULTADOS '.D17]" office:value-type="float" office:value="287" calcext:value-type="float">
            <text:p>S/287.00</text:p>
          </table:table-cell>
          <table:table-cell table:style-name="ce502" table:formula="of:=[$'ESTADO RESULTADOS '.E17]" office:value-type="float" office:value="287" calcext:value-type="float">
            <text:p>S/287.00</text:p>
          </table:table-cell>
          <table:table-cell table:style-name="ce502" table:formula="of:=[$'ESTADO RESULTADOS '.F17]" office:value-type="float" office:value="287" calcext:value-type="float">
            <text:p>S/287.00</text:p>
          </table:table-cell>
          <table:table-cell table:style-name="ce502" table:formula="of:=[$'ESTADO RESULTADOS '.G17]" office:value-type="float" office:value="287" calcext:value-type="float">
            <text:p>S/287.00</text:p>
          </table:table-cell>
          <table:table-cell table:style-name="ce502" table:formula="of:=[$'ESTADO RESULTADOS '.H17]" office:value-type="float" office:value="287" calcext:value-type="float">
            <text:p>S/287.00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04" office:value-type="string" calcext:value-type="string">
            <text:p>Egresos sin IGV</text:p>
          </table:table-cell>
          <table:table-cell table:style-name="ce502" table:formula="of:=SUM([.D9:.D13])" office:value-type="float" office:value="498943.166666667" calcext:value-type="float">
            <text:p>S/498,943.17</text:p>
          </table:table-cell>
          <table:table-cell table:style-name="ce502" table:formula="of:=SUM([.E9:.E13])" office:value-type="float" office:value="725648.065217391" calcext:value-type="float">
            <text:p>S/725,648.07</text:p>
          </table:table-cell>
          <table:table-cell table:style-name="ce502" table:formula="of:=SUM([.F9:.F13])" office:value-type="float" office:value="725648.065217391" calcext:value-type="float">
            <text:p>S/725,648.07</text:p>
          </table:table-cell>
          <table:table-cell table:style-name="ce502" table:formula="of:=SUM([.G9:.G13])" office:value-type="float" office:value="725648.065217391" calcext:value-type="float">
            <text:p>S/725,648.07</text:p>
          </table:table-cell>
          <table:table-cell table:style-name="ce502" table:formula="of:=SUM([.H9:.H13])" office:value-type="float" office:value="725648.065217391" calcext:value-type="float">
            <text:p>S/725,648.07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04" office:value-type="string" calcext:value-type="string">
            <text:p>Egresos con IGV</text:p>
          </table:table-cell>
          <table:table-cell table:style-name="ce502" table:formula="of:=[.D14]*1.18" office:value-type="float" office:value="588752.936666667" calcext:value-type="float">
            <text:p>S/588,752.94</text:p>
          </table:table-cell>
          <table:table-cell table:style-name="ce502" table:formula="of:=[.E14]*1.18" office:value-type="float" office:value="856264.716956522" calcext:value-type="float">
            <text:p>S/856,264.72</text:p>
          </table:table-cell>
          <table:table-cell table:style-name="ce502" table:formula="of:=[.F14]*1.18" office:value-type="float" office:value="856264.716956522" calcext:value-type="float">
            <text:p>S/856,264.72</text:p>
          </table:table-cell>
          <table:table-cell table:style-name="ce502" table:formula="of:=[.G14]*1.18" office:value-type="float" office:value="856264.716956522" calcext:value-type="float">
            <text:p>S/856,264.72</text:p>
          </table:table-cell>
          <table:table-cell table:style-name="ce502" table:formula="of:=[.H14]*1.18" office:value-type="float" office:value="856264.716956522" calcext:value-type="float">
            <text:p>S/856,264.72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6" office:value-type="string" calcext:value-type="string">
            <text:p>IGV Compra</text:p>
          </table:table-cell>
          <table:table-cell table:style-name="ce504" table:formula="of:=[.D15]-[.D14]" office:value-type="float" office:value="89809.77" calcext:value-type="float">
            <text:p>S/89,809.77</text:p>
          </table:table-cell>
          <table:table-cell table:style-name="ce504" table:formula="of:=[.E15]-[.E14]" office:value-type="float" office:value="130616.65173913" calcext:value-type="float">
            <text:p>S/130,616.65</text:p>
          </table:table-cell>
          <table:table-cell table:style-name="ce504" table:formula="of:=[.F15]-[.F14]" office:value-type="float" office:value="130616.65173913" calcext:value-type="float">
            <text:p>S/130,616.65</text:p>
          </table:table-cell>
          <table:table-cell table:style-name="ce504" table:formula="of:=[.G15]-[.G14]" office:value-type="float" office:value="130616.65173913" calcext:value-type="float">
            <text:p>S/130,616.65</text:p>
          </table:table-cell>
          <table:table-cell table:style-name="ce504" table:formula="of:=[.H15]-[.H14]" office:value-type="float" office:value="130616.65173913" calcext:value-type="float">
            <text:p>S/130,616.65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83" office:value-type="string" calcext:value-type="string">
            <text:p>Pago IGV</text:p>
          </table:table-cell>
          <table:table-cell table:style-name="ce505" table:formula="of:=[.D8]-[.D16]" office:value-type="float" office:value="14518.23" calcext:value-type="float">
            <text:p>S/14,518.23</text:p>
          </table:table-cell>
          <table:table-cell table:style-name="ce505" table:formula="of:=[.E8]-[.E16]" office:value-type="float" office:value="23607.3482608696" calcext:value-type="float">
            <text:p>S/23,607.35</text:p>
          </table:table-cell>
          <table:table-cell table:style-name="ce505" table:formula="of:=[.F8]-[.F16]" office:value-type="float" office:value="23607.3482608696" calcext:value-type="float">
            <text:p>S/23,607.35</text:p>
          </table:table-cell>
          <table:table-cell table:style-name="ce505" table:formula="of:=[.G8]-[.G16]" office:value-type="float" office:value="23607.3482608696" calcext:value-type="float">
            <text:p>S/23,607.35</text:p>
          </table:table-cell>
          <table:table-cell table:style-name="ce505" table:formula="of:=[.H8]-[.H16]" office:value-type="float" office:value="23607.3482608696" calcext:value-type="float">
            <text:p>S/23,607.35</text:p>
          </table:table-cell>
          <table:table-cell table:number-columns-repeated="16376"/>
        </table:table-row>
        <table:table-row table:style-name="ro12" table:number-rows-repeated="2">
          <table:table-cell table:number-columns-repeated="16384"/>
        </table:table-row>
        <table:table-row table:style-name="ro12">
          <table:table-cell table:number-columns-repeated="2"/>
          <table:table-cell table:style-name="ce492" office:value-type="string" calcext:value-type="string" table:number-columns-spanned="6" table:number-rows-spanned="1">
            <text:p>PAGO DE IGV PROYECTADO</text:p>
          </table:table-cell>
          <table:covered-table-cell table:number-columns-repeated="5" table:style-name="ce499"/>
          <table:table-cell table:number-columns-repeated="16376"/>
        </table:table-row>
        <table:table-row table:style-name="ro12">
          <table:table-cell table:number-columns-repeated="2"/>
          <table:table-cell table:style-name="ce374" table:number-columns-repeated="4"/>
          <table:table-cell table:number-columns-repeated="16378"/>
        </table:table-row>
        <table:table-row table:style-name="ro12">
          <table:table-cell table:number-columns-repeated="2"/>
          <table:table-cell table:style-name="ce83" office:value-type="string" calcext:value-type="string">
            <text:p>RUBRO</text:p>
          </table:table-cell>
          <table:table-cell table:style-name="ce83" office:value-type="string" calcext:value-type="string">
            <text:p>Año 1</text:p>
          </table:table-cell>
          <table:table-cell table:style-name="ce83" office:value-type="string" calcext:value-type="string">
            <text:p>Año 2</text:p>
          </table:table-cell>
          <table:table-cell table:style-name="ce83" office:value-type="string" calcext:value-type="string">
            <text:p>Año 3</text:p>
          </table:table-cell>
          <table:table-cell table:style-name="ce83" office:value-type="string" calcext:value-type="string">
            <text:p>Año 4</text:p>
          </table:table-cell>
          <table:table-cell table:style-name="ce83" office:value-type="string" calcext:value-type="string">
            <text:p>Año 5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3" office:value-type="string" calcext:value-type="string">
            <text:p>Ingresos sin IGV</text:p>
          </table:table-cell>
          <table:table-cell table:style-name="ce506" table:formula="of:=[.D6]" office:value-type="float" office:value="579600" calcext:value-type="float">
            <text:p>579600</text:p>
          </table:table-cell>
          <table:table-cell table:style-name="ce506" table:formula="of:=[.E6]" office:value-type="float" office:value="856800" calcext:value-type="float">
            <text:p>856800</text:p>
          </table:table-cell>
          <table:table-cell table:style-name="ce506" table:formula="of:=[.F6]" office:value-type="float" office:value="856800" calcext:value-type="float">
            <text:p>856800</text:p>
          </table:table-cell>
          <table:table-cell table:style-name="ce506" table:formula="of:=[.G6]" office:value-type="float" office:value="856800" calcext:value-type="float">
            <text:p>856800</text:p>
          </table:table-cell>
          <table:table-cell table:style-name="ce506" table:formula="of:=[.H6]" office:value-type="float" office:value="856800" calcext:value-type="float">
            <text:p>856800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7" office:value-type="string" calcext:value-type="string">
            <text:p>Ingreso con GV</text:p>
          </table:table-cell>
          <table:table-cell table:style-name="ce507" table:formula="of:=[.D7]" office:value-type="float" office:value="683928" calcext:value-type="float">
            <text:p>683928</text:p>
          </table:table-cell>
          <table:table-cell table:style-name="ce507" table:formula="of:=[.E7]" office:value-type="float" office:value="1011024" calcext:value-type="float">
            <text:p>1011024</text:p>
          </table:table-cell>
          <table:table-cell table:style-name="ce507" table:formula="of:=[.F7]" office:value-type="float" office:value="1011024" calcext:value-type="float">
            <text:p>1011024</text:p>
          </table:table-cell>
          <table:table-cell table:style-name="ce507" table:formula="of:=[.G7]" office:value-type="float" office:value="1011024" calcext:value-type="float">
            <text:p>1011024</text:p>
          </table:table-cell>
          <table:table-cell table:style-name="ce507" table:formula="of:=[.H7]" office:value-type="float" office:value="1011024" calcext:value-type="float">
            <text:p>1011024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8" office:value-type="string" calcext:value-type="string">
            <text:p>Egresos sin IGV</text:p>
          </table:table-cell>
          <table:table-cell table:style-name="ce508" table:formula="of:=[.D14]" office:value-type="float" office:value="498943.166666667" calcext:value-type="float">
            <text:p>498943</text:p>
          </table:table-cell>
          <table:table-cell table:style-name="ce508" table:formula="of:=[.E14]" office:value-type="float" office:value="725648.065217391" calcext:value-type="float">
            <text:p>725648</text:p>
          </table:table-cell>
          <table:table-cell table:style-name="ce508" table:formula="of:=[.F14]" office:value-type="float" office:value="725648.065217391" calcext:value-type="float">
            <text:p>725648</text:p>
          </table:table-cell>
          <table:table-cell table:style-name="ce508" table:formula="of:=[.G14]" office:value-type="float" office:value="725648.065217391" calcext:value-type="float">
            <text:p>725648</text:p>
          </table:table-cell>
          <table:table-cell table:style-name="ce508" table:formula="of:=[.H14]" office:value-type="float" office:value="725648.065217391" calcext:value-type="float">
            <text:p>725648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96" office:value-type="string" calcext:value-type="string">
            <text:p>Egresos con IGV</text:p>
          </table:table-cell>
          <table:table-cell table:style-name="ce509" table:formula="of:=[.D15]" office:value-type="float" office:value="588752.936666667" calcext:value-type="float">
            <text:p>588753</text:p>
          </table:table-cell>
          <table:table-cell table:style-name="ce509" table:formula="of:=[.E15]" office:value-type="float" office:value="856264.716956522" calcext:value-type="float">
            <text:p>856265</text:p>
          </table:table-cell>
          <table:table-cell table:style-name="ce509" table:formula="of:=[.F15]" office:value-type="float" office:value="856264.716956522" calcext:value-type="float">
            <text:p>856265</text:p>
          </table:table-cell>
          <table:table-cell table:style-name="ce509" table:formula="of:=[.G15]" office:value-type="float" office:value="856264.716956522" calcext:value-type="float">
            <text:p>856265</text:p>
          </table:table-cell>
          <table:table-cell table:style-name="ce509" table:formula="of:=[.H15]" office:value-type="float" office:value="856264.716956522" calcext:value-type="float">
            <text:p>856265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83" office:value-type="string" calcext:value-type="string">
            <text:p>Pago IGV (Icon-Econ)</text:p>
          </table:table-cell>
          <table:table-cell table:style-name="ce505" table:formula="of:=([.D24]-[.D23])-([.D26]-[.D25])" office:value-type="float" office:value="14518.23" calcext:value-type="float">
            <text:p>S/14,518.23</text:p>
          </table:table-cell>
          <table:table-cell table:style-name="ce505" table:formula="of:=([.E24]-[.E23])-([.E26]-[.E25])" office:value-type="float" office:value="23607.3482608696" calcext:value-type="float">
            <text:p>S/23,607.35</text:p>
          </table:table-cell>
          <table:table-cell table:style-name="ce505" table:formula="of:=([.F24]-[.F23])-([.F26]-[.F25])" office:value-type="float" office:value="23607.3482608696" calcext:value-type="float">
            <text:p>S/23,607.35</text:p>
          </table:table-cell>
          <table:table-cell table:style-name="ce505" table:formula="of:=([.G24]-[.G23])-([.G26]-[.G25])" office:value-type="float" office:value="23607.3482608696" calcext:value-type="float">
            <text:p>S/23,607.35</text:p>
          </table:table-cell>
          <table:table-cell table:style-name="ce505" table:formula="of:=([.H24]-[.H23])-([.H26]-[.H25])" office:value-type="float" office:value="23607.3482608696" calcext:value-type="float">
            <text:p>S/23,607.35</text:p>
          </table:table-cell>
          <table:table-cell table:style-name="ce511"/>
          <table:table-cell table:number-columns-repeated="16375"/>
        </table:table-row>
        <table:table-row table:style-name="ro12">
          <table:table-cell table:number-columns-repeated="3"/>
          <table:table-cell table:style-name="ce91"/>
          <table:table-cell table:number-columns-repeated="16380"/>
        </table:table-row>
        <table:table-row table:style-name="ro12" table:number-rows-repeated="1048547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 Ku COK" table:style-name="ta19">
        <table:table-column table:style-name="co93" table:default-cell-style-name="Default"/>
        <table:table-column table:style-name="co53" table:default-cell-style-name="Default"/>
        <table:table-column table:style-name="co5" table:default-cell-style-name="Default"/>
        <table:table-column table:style-name="co47" table:default-cell-style-name="Default"/>
        <table:table-column table:style-name="co39" table:number-columns-repeated="2" table:default-cell-style-name="Default"/>
        <table:table-column table:style-name="co5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81" table:default-cell-style-name="Default"/>
        <table:table-column table:style-name="co39" table:number-columns-repeated="1637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12" office:value-type="string" calcext:value-type="string" table:number-columns-spanned="4" table:number-rows-spanned="1">
            <text:p>COK CON RIESGO TOTAL</text:p>
          </table:table-cell>
          <table:covered-table-cell table:number-columns-repeated="2" table:style-name="ce520"/>
          <table:covered-table-cell table:style-name="ce533"/>
          <table:table-cell/>
          <table:table-cell table:style-name="ce512" office:value-type="string" calcext:value-type="string" table:number-columns-spanned="4" table:number-rows-spanned="1">
            <text:p>COK CON RIESGO SISTEMATICO</text:p>
          </table:table-cell>
          <table:covered-table-cell table:number-columns-repeated="2" table:style-name="ce520"/>
          <table:covered-table-cell table:style-name="ce533"/>
          <table:table-cell table:number-columns-repeated="16374"/>
        </table:table-row>
        <table:table-row table:style-name="ro1">
          <table:table-cell/>
          <table:table-cell table:style-name="ce513" office:value-type="string" calcext:value-type="string" table:number-columns-spanned="5" table:number-rows-spanned="1">
            <text:p>Desapalancado</text:p>
          </table:table-cell>
          <table:covered-table-cell table:number-columns-repeated="3" table:style-name="ce513"/>
          <table:covered-table-cell table:style-name="ce245"/>
          <table:table-cell table:style-name="ce513" office:value-type="string" calcext:value-type="string" table:number-columns-spanned="5" table:number-rows-spanned="1">
            <text:p>Desapalancado</text:p>
          </table:table-cell>
          <table:covered-table-cell table:number-columns-repeated="3" table:style-name="ce513"/>
          <table:covered-table-cell table:style-name="ce245"/>
          <table:table-cell table:number-columns-repeated="16373"/>
        </table:table-row>
        <table:table-row table:style-name="ro1">
          <table:table-cell/>
          <table:table-cell table:style-name="ce514" office:value-type="string" calcext:value-type="string" table:number-columns-spanned="4" table:number-rows-spanned="1">
            <text:p>Kurt = Rf usa+ bu total ME* (Rm- Rf) usa+ Rp PERU </text:p>
          </table:table-cell>
          <table:covered-table-cell table:number-columns-repeated="3" table:style-name="ce521"/>
          <table:table-cell table:style-name="ce536"/>
          <table:table-cell table:style-name="ce514" office:value-type="string" calcext:value-type="string" table:number-columns-spanned="4" table:number-rows-spanned="1">
            <text:p>Kurt = Rf usa+ bu ME* (Rm- Rf) usa+ Rp PERU </text:p>
          </table:table-cell>
          <table:covered-table-cell table:number-columns-repeated="3" table:style-name="ce521"/>
          <table:table-cell table:style-name="ce53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15" office:value-type="string" calcext:value-type="string" table:number-columns-spanned="3" table:number-rows-spanned="1">
            <text:p>Donde :</text:p>
          </table:table-cell>
          <table:covered-table-cell table:style-name="ce522"/>
          <table:covered-table-cell table:style-name="ce525"/>
          <table:table-cell table:number-columns-repeated="2"/>
          <table:table-cell table:style-name="ce515" office:value-type="string" calcext:value-type="string" table:number-columns-spanned="3" table:number-rows-spanned="1">
            <text:p>Donde :</text:p>
          </table:table-cell>
          <table:covered-table-cell table:style-name="ce522"/>
          <table:covered-table-cell table:style-name="ce525"/>
          <table:table-cell table:number-columns-repeated="16375"/>
        </table:table-row>
        <table:table-row table:style-name="ro1">
          <table:table-cell/>
          <table:table-cell table:style-name="ce516" office:value-type="string" calcext:value-type="string">
            <text:p>Rf usa </text:p>
          </table:table-cell>
          <table:table-cell table:style-name="ce323" office:value-type="string" calcext:value-type="string">
            <text:p>=</text:p>
          </table:table-cell>
          <table:table-cell table:style-name="ce526" office:value-type="float" office:value="0.0495" calcext:value-type="float">
            <text:p>0.0495</text:p>
          </table:table-cell>
          <table:table-cell table:number-columns-repeated="2"/>
          <table:table-cell table:style-name="ce516" office:value-type="string" calcext:value-type="string">
            <text:p>Rf usa </text:p>
          </table:table-cell>
          <table:table-cell table:style-name="ce323" office:value-type="string" calcext:value-type="string">
            <text:p>=</text:p>
          </table:table-cell>
          <table:table-cell table:style-name="ce526" office:value-type="float" office:value="0.0495" calcext:value-type="float">
            <text:p>0.0495</text:p>
          </table:table-cell>
          <table:table-cell table:number-columns-repeated="16375"/>
        </table:table-row>
        <table:table-row table:style-name="ro1">
          <table:table-cell/>
          <table:table-cell table:style-name="ce517" office:value-type="string" calcext:value-type="string">
            <text:p>βu total ME </text:p>
          </table:table-cell>
          <table:table-cell table:style-name="ce323" office:value-type="string" calcext:value-type="string">
            <text:p>=</text:p>
          </table:table-cell>
          <table:table-cell table:style-name="ce527" office:value-type="float" office:value="3.28" calcext:value-type="float">
            <text:p>3.28</text:p>
          </table:table-cell>
          <table:table-cell table:number-columns-repeated="2"/>
          <table:table-cell table:style-name="ce517" office:value-type="string" calcext:value-type="string">
            <text:p>βu ME </text:p>
          </table:table-cell>
          <table:table-cell table:style-name="ce323" office:value-type="string" calcext:value-type="string">
            <text:p>=</text:p>
          </table:table-cell>
          <table:table-cell table:style-name="ce527" office:value-type="float" office:value="0.75" calcext:value-type="float">
            <text:p>0.75</text:p>
          </table:table-cell>
          <table:table-cell office:value-type="string" calcext:value-type="string">
            <text:p>Prom. 2018-2020</text:p>
          </table:table-cell>
          <table:table-cell table:number-columns-repeated="16374"/>
        </table:table-row>
        <table:table-row table:style-name="ro1">
          <table:table-cell/>
          <table:table-cell table:style-name="ce516" office:value-type="string" calcext:value-type="string">
            <text:p>(Rm-Rf) </text:p>
          </table:table-cell>
          <table:table-cell table:style-name="ce323" office:value-type="string" calcext:value-type="string">
            <text:p>=</text:p>
          </table:table-cell>
          <table:table-cell table:style-name="ce526" office:value-type="float" office:value="0.0464" calcext:value-type="float">
            <text:p>0.0464</text:p>
          </table:table-cell>
          <table:table-cell table:number-columns-repeated="2"/>
          <table:table-cell table:style-name="ce516" office:value-type="string" calcext:value-type="string">
            <text:p>(Rm-Rf) </text:p>
          </table:table-cell>
          <table:table-cell table:style-name="ce323" office:value-type="string" calcext:value-type="string">
            <text:p>=</text:p>
          </table:table-cell>
          <table:table-cell table:style-name="ce526" office:value-type="float" office:value="0.0464" calcext:value-type="float">
            <text:p>0.0464</text:p>
          </table:table-cell>
          <table:table-cell table:number-columns-repeated="16375"/>
        </table:table-row>
        <table:table-row table:style-name="ro1">
          <table:table-cell/>
          <table:table-cell table:style-name="ce516" office:value-type="string" calcext:value-type="string">
            <text:p>Rp </text:p>
          </table:table-cell>
          <table:table-cell table:style-name="ce323" office:value-type="string" calcext:value-type="string">
            <text:p>=</text:p>
          </table:table-cell>
          <table:table-cell table:style-name="ce526" table:formula="of:=0.0174" office:value-type="float" office:value="0.0174" calcext:value-type="float">
            <text:p>0.0174</text:p>
          </table:table-cell>
          <table:table-cell table:number-columns-repeated="2"/>
          <table:table-cell table:style-name="ce516" office:value-type="string" calcext:value-type="string">
            <text:p>Rp </text:p>
          </table:table-cell>
          <table:table-cell table:style-name="ce323" office:value-type="string" calcext:value-type="string">
            <text:p>=</text:p>
          </table:table-cell>
          <table:table-cell table:style-name="ce526" table:formula="of:=1.5*0.0174" office:value-type="float" office:value="0.0261" calcext:value-type="float">
            <text:p>0.0261</text:p>
          </table:table-cell>
          <table:table-cell table:number-columns-repeated="16375"/>
        </table:table-row>
        <table:table-row table:style-name="ro1">
          <table:table-cell/>
          <table:table-cell table:style-name="ce517" office:value-type="string" calcext:value-type="string">
            <text:p>Kurt <text:s text:c="2"/>Nominal (Dolares) <text:s text:c="11"/></text:p>
          </table:table-cell>
          <table:table-cell table:style-name="ce323" office:value-type="string" calcext:value-type="string">
            <text:p>=</text:p>
          </table:table-cell>
          <table:table-cell table:style-name="ce528" table:formula="of:=[.D7]+[.D8]*[.D9]+[.D10]" office:value-type="percentage" office:value="0.219092" calcext:value-type="percentage">
            <text:p>21.91 %</text:p>
          </table:table-cell>
          <table:table-cell table:number-columns-repeated="2"/>
          <table:table-cell table:style-name="ce517" office:value-type="string" calcext:value-type="string">
            <text:p>Kurs <text:s text:c="2"/>Nominal (Dolares) <text:s text:c="11"/></text:p>
          </table:table-cell>
          <table:table-cell table:style-name="ce323" office:value-type="string" calcext:value-type="string">
            <text:p>=</text:p>
          </table:table-cell>
          <table:table-cell table:style-name="ce528" table:formula="of:=[.I7]+[.I8]*[.I9]+[.I10]" office:value-type="percentage" office:value="0.1104" calcext:value-type="percentage">
            <text:p>11.04 %</text:p>
          </table:table-cell>
          <table:table-cell table:number-columns-repeated="16375"/>
        </table:table-row>
        <table:table-row table:style-name="ro1">
          <table:table-cell/>
          <table:table-cell table:style-name="ce518" office:value-type="string" calcext:value-type="string">
            <text:p>Kurt <text:s text:c="2"/>Nominal (soles)</text:p>
          </table:table-cell>
          <table:table-cell table:style-name="ce523" office:value-type="string" calcext:value-type="string">
            <text:p>=</text:p>
          </table:table-cell>
          <table:table-cell table:style-name="ce529" table:formula="of:=[.D11]*((1+[.E16])/(1+[.E15]))" office:value-type="percentage" office:value="0.221025164705882" calcext:value-type="percentage">
            <text:p>22.10 %</text:p>
          </table:table-cell>
          <table:table-cell table:number-columns-repeated="2"/>
          <table:table-cell table:style-name="ce518" office:value-type="string" calcext:value-type="string">
            <text:p>Kurs <text:s text:c="2"/>Nominal (soles)</text:p>
          </table:table-cell>
          <table:table-cell table:style-name="ce523" office:value-type="string" calcext:value-type="string">
            <text:p>=</text:p>
          </table:table-cell>
          <table:table-cell table:style-name="ce529" table:formula="of:=[.I11]*((1+[.J16])/(1+[.J15]))" office:value-type="percentage" office:value="0.1104" calcext:value-type="percentage">
            <text:p>11.04 %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53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30" office:value-type="string" calcext:value-type="string">
            <text:p>Inflacion USA</text:p>
          </table:table-cell>
          <table:table-cell table:style-name="ce534" table:formula="of:=[$Resumen.H7]" office:value-type="percentage" office:value="0.02" calcext:value-type="percentage">
            <text:p>2.0%</text:p>
          </table:table-cell>
          <table:table-cell table:style-name="ce537"/>
          <table:table-cell table:number-columns-repeated="16378"/>
        </table:table-row>
        <table:table-row table:style-name="ro1">
          <table:table-cell table:number-columns-repeated="3"/>
          <table:table-cell table:style-name="ce531" office:value-type="string" calcext:value-type="string">
            <text:p>Inflacion en Peru</text:p>
          </table:table-cell>
          <table:table-cell table:style-name="ce535" table:formula="of:=[$Resumen.H8]" office:value-type="percentage" office:value="0.029" calcext:value-type="percentage">
            <text:p>2.9%</text:p>
          </table:table-cell>
          <table:table-cell table:style-name="ce53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19" office:value-type="string" calcext:value-type="string">
            <text:p>Kurt Real Soles</text:p>
          </table:table-cell>
          <table:table-cell table:style-name="ce524" office:value-type="string" calcext:value-type="string">
            <text:p>=</text:p>
          </table:table-cell>
          <table:table-cell table:style-name="ce532" table:formula="of:=((1+[.D12])/(1+[.E16]))-1" office:value-type="percentage" office:value="0.186613376779283" calcext:value-type="percentage">
            <text:p>18.66 %</text:p>
          </table:table-cell>
          <table:table-cell table:number-columns-repeated="16380"/>
        </table:table-row>
      </table:table>
      <table:table table:name="Ke y Kwacc WACC" table:style-name="ta20">
        <table:table-column table:style-name="co39" table:default-cell-style-name="Default"/>
        <table:table-column table:style-name="co73" table:default-cell-style-name="ce516"/>
        <table:table-column table:style-name="co96" table:default-cell-style-name="ce323"/>
        <table:table-column table:style-name="co97" table:default-cell-style-name="ce323"/>
        <table:table-column table:style-name="co39" table:default-cell-style-name="ce323"/>
        <table:table-column table:style-name="co98" table:default-cell-style-name="ce555"/>
        <table:table-column table:style-name="co39" table:default-cell-style-name="Default"/>
        <table:table-column table:style-name="co74" table:default-cell-style-name="ce516"/>
        <table:table-column table:style-name="co82" table:default-cell-style-name="ce323"/>
        <table:table-column table:style-name="co78" table:default-cell-style-name="Default"/>
        <table:table-column table:style-name="co39" table:default-cell-style-name="ce323"/>
        <table:table-column table:style-name="co67" table:default-cell-style-name="ce323"/>
        <table:table-column table:style-name="co39" table:default-cell-style-name="ce555"/>
        <table:table-column table:style-name="co39" table:default-cell-style-name="Default"/>
        <table:table-column table:style-name="co99" table:default-cell-style-name="Default"/>
        <table:table-column table:style-name="co39" table:number-columns-repeated="16369" table:default-cell-style-name="Default"/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WACC</text:p>
          </table:table-cell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539" office:value-type="string" calcext:value-type="string">
            <text:p>COK Apalancado con riesgo total</text:p>
          </table:table-cell>
          <table:table-cell table:style-name="ce542"/>
          <table:table-cell table:style-name="ce546" table:number-columns-repeated="2"/>
          <table:table-cell table:style-name="ce554"/>
          <table:table-cell/>
          <table:table-cell table:style-name="ce559" office:value-type="string" calcext:value-type="string">
            <text:p>Costo Promedio Ponderado de Capital con riesgo total</text:p>
          </table:table-cell>
          <table:table-cell table:style-name="ce561" table:number-columns-repeated="4"/>
          <table:table-cell table:style-name="ce554"/>
          <table:table-cell table:number-columns-repeated="16371"/>
        </table:table-row>
        <table:table-row table:style-name="ro1">
          <table:table-cell table:number-columns-repeated="9"/>
          <table:table-cell table:style-name="ce323"/>
          <table:table-cell table:number-columns-repeated="16374"/>
        </table:table-row>
        <table:table-row table:style-name="ro1">
          <table:table-cell/>
          <table:table-cell table:style-name="ce540" office:value-type="string" calcext:value-type="string" table:number-columns-spanned="5" table:number-rows-spanned="1">
            <text:p>Kert = Rfusa + brl total PERU* (Rm- Rf )usa+ Rp PERU <text:s text:c="48"/></text:p>
          </table:table-cell>
          <table:covered-table-cell table:number-columns-repeated="3" table:style-name="ce543"/>
          <table:covered-table-cell table:style-name="ce556"/>
          <table:table-cell/>
          <table:table-cell table:style-name="ce560" office:value-type="string" calcext:value-type="string" table:number-columns-spanned="6" table:number-rows-spanned="1">
            <text:p>Kwacc rt = E/V * Kert + D/V * Kd * (1 – t) <text:s text:c="60"/></text:p>
          </table:table-cell>
          <table:covered-table-cell table:number-columns-repeated="4" table:style-name="ce562"/>
          <table:covered-table-cell table:style-name="ce565"/>
          <table:table-cell table:number-columns-repeated="16371"/>
        </table:table-row>
        <table:table-row table:style-name="ro1">
          <table:table-cell table:number-columns-repeated="9"/>
          <table:table-cell table:style-name="ce323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onde:</text:p>
          </table:table-cell>
          <table:table-cell table:number-columns-repeated="5"/>
          <table:table-cell office:value-type="string" calcext:value-type="string">
            <text:p>Dónde:</text:p>
          </table:table-cell>
          <table:table-cell/>
          <table:table-cell table:style-name="ce323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Rfusa </text:p>
          </table:table-cell>
          <table:table-cell office:value-type="string" calcext:value-type="string">
            <text:p>=</text:p>
          </table:table-cell>
          <table:table-cell table:style-name="ce547" office:value-type="percentage" office:value="0.0495" calcext:value-type="percentage">
            <text:p>4.95 %</text:p>
          </table:table-cell>
          <table:table-cell table:number-columns-repeated="3"/>
          <table:table-cell office:value-type="string" calcext:value-type="string">
            <text:p>E/V*</text:p>
          </table:table-cell>
          <table:table-cell office:value-type="string" calcext:value-type="string">
            <text:p>=</text:p>
          </table:table-cell>
          <table:table-cell table:style-name="ce141" table:formula="of:=[$'INVERSION INICIAL'.E33]" office:value-type="percentage" office:value="0.721949658403024" calcext:value-type="percentage">
            <text:p>72 %</text:p>
          </table:table-cell>
          <table:table-cell office:value-type="string" calcext:value-type="string">
            <text:p>Porcentaje <text:s/>de capital propio (Inversión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rl total PERU</text:p>
          </table:table-cell>
          <table:table-cell office:value-type="string" calcext:value-type="string">
            <text:p>=</text:p>
          </table:table-cell>
          <table:table-cell table:style-name="ce548" table:formula="of:=[.D25]" office:value-type="float" office:value="3.87494034513658" calcext:value-type="float">
            <text:p>3.87</text:p>
          </table:table-cell>
          <table:table-cell table:number-columns-repeated="3"/>
          <table:table-cell office:value-type="string" calcext:value-type="string">
            <text:p>Kert</text:p>
          </table:table-cell>
          <table:table-cell office:value-type="string" calcext:value-type="string">
            <text:p>=</text:p>
          </table:table-cell>
          <table:table-cell table:style-name="ce563" table:formula="of:=[.D12]" office:value-type="percentage" office:value="0.246697232014337" calcext:value-type="percentage">
            <text:p>24.67 %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(Rm – Rf)usa </text:p>
          </table:table-cell>
          <table:table-cell office:value-type="string" calcext:value-type="string">
            <text:p>=</text:p>
          </table:table-cell>
          <table:table-cell table:style-name="ce547" office:value-type="percentage" office:value="0.0464" calcext:value-type="percentage">
            <text:p>4.64 %</text:p>
          </table:table-cell>
          <table:table-cell table:number-columns-repeated="3"/>
          <table:table-cell office:value-type="string" calcext:value-type="string">
            <text:p>D/V* </text:p>
          </table:table-cell>
          <table:table-cell office:value-type="string" calcext:value-type="string">
            <text:p>=</text:p>
          </table:table-cell>
          <table:table-cell table:style-name="ce141" table:formula="of:=[$'INVERSION INICIAL'.F33]" office:value-type="percentage" office:value="0.278050341596976" calcext:value-type="percentage">
            <text:p>28 %</text:p>
          </table:table-cell>
          <table:table-cell office:value-type="string" calcext:value-type="string">
            <text:p>Porcentaje de Financiamiento (Prestamo)</text:p>
          </table:table-cell>
          <table:table-cell table:number-columns-repeated="2"/>
          <table:table-cell table:style-name="ce538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Rp </text:p>
          </table:table-cell>
          <table:table-cell office:value-type="string" calcext:value-type="string">
            <text:p>=</text:p>
          </table:table-cell>
          <table:table-cell table:style-name="ce547" table:formula="of:=[$' Ku COK'.D10]" office:value-type="percentage" office:value="0.0174" calcext:value-type="percentage">
            <text:p>1.74 %</text:p>
          </table:table-cell>
          <table:table-cell table:number-columns-repeated="3"/>
          <table:table-cell office:value-type="string" calcext:value-type="string">
            <text:p>Kd </text:p>
          </table:table-cell>
          <table:table-cell office:value-type="string" calcext:value-type="string">
            <text:p>=</text:p>
          </table:table-cell>
          <table:table-cell table:style-name="ce141" table:formula="of:=[$Resumen.H10]" office:value-type="percentage" office:value="0.2163" calcext:value-type="percentage">
            <text:p>22 %</text:p>
          </table:table-cell>
          <table:table-cell office:value-type="string" calcext:value-type="string">
            <text:p>TEA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547"/>
          <table:table-cell table:number-columns-repeated="3"/>
          <table:table-cell office:value-type="string" calcext:value-type="string">
            <text:p>t* </text:p>
          </table:table-cell>
          <table:table-cell office:value-type="string" calcext:value-type="string">
            <text:p>=</text:p>
          </table:table-cell>
          <table:table-cell table:style-name="ce564" table:formula="of:=[$Resumen.H12]" office:value-type="percentage" office:value="0.295" calcext:value-type="percentage">
            <text:p>29.5%</text:p>
          </table:table-cell>
          <table:table-cell office:value-type="string" calcext:value-type="string">
            <text:p>Renta (Impuesto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Kert </text:p>
          </table:table-cell>
          <table:table-cell office:value-type="string" calcext:value-type="string">
            <text:p>=</text:p>
          </table:table-cell>
          <table:table-cell table:style-name="ce547" table:formula="of:=[.D7]+[.D8]*([.D9])+[.D10]" office:value-type="percentage" office:value="0.246697232014337" calcext:value-type="percentage">
            <text:p>24.67 %</text:p>
          </table:table-cell>
          <table:table-cell office:value-type="string" calcext:value-type="string">
            <text:p>COK nominal apalancado en dolares</text:p>
          </table:table-cell>
          <table:table-cell table:number-columns-repeated="4"/>
          <table:table-cell table:style-name="ce323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Kert </text:p>
          </table:table-cell>
          <table:table-cell office:value-type="string" calcext:value-type="string">
            <text:p>=</text:p>
          </table:table-cell>
          <table:table-cell table:style-name="ce547" table:formula="of:=([.D12]*((1+[.J21])/(1+[.J20])))" office:value-type="percentage" office:value="0.248873972296817" calcext:value-type="percentage">
            <text:p>24.89 %</text:p>
          </table:table-cell>
          <table:table-cell office:value-type="string" calcext:value-type="string">
            <text:p>COK nominal apalancado en Soles</text:p>
          </table:table-cell>
          <table:table-cell table:number-columns-repeated="4"/>
          <table:table-cell table:style-name="ce323"/>
          <table:table-cell table:number-columns-repeated="16374"/>
        </table:table-row>
        <table:table-row table:style-name="ro1">
          <table:table-cell/>
          <table:table-cell table:style-name="ce531" office:value-type="string" calcext:value-type="string">
            <text:p>Kert </text:p>
          </table:table-cell>
          <table:table-cell table:style-name="ce523" office:value-type="string" calcext:value-type="string">
            <text:p>=</text:p>
          </table:table-cell>
          <table:table-cell table:style-name="ce549" table:formula="of:=((1+[.D13])/(1+[.J21]))-1" office:value-type="percentage" office:value="0.213677329734516" calcext:value-type="percentage">
            <text:p>21.37 %</text:p>
          </table:table-cell>
          <table:table-cell table:style-name="ce523" office:value-type="string" calcext:value-type="string">
            <text:p>COK Real Apalancado en soles</text:p>
          </table:table-cell>
          <table:table-cell table:style-name="ce557"/>
          <table:table-cell/>
          <table:table-cell office:value-type="string" calcext:value-type="string">
            <text:p>Kwacc</text:p>
          </table:table-cell>
          <table:table-cell office:value-type="string" calcext:value-type="string">
            <text:p>=</text:p>
          </table:table-cell>
          <table:table-cell table:style-name="ce563" table:formula="of:=[.J7]*[.J8]+[.J9]*[.J10]*(1-[.J11])" office:value-type="percentage" office:value="0.220503296047358" calcext:value-type="percentage">
            <text:p>22.05 %</text:p>
          </table:table-cell>
          <table:table-cell office:value-type="string" calcext:value-type="string">
            <text:p>Kwacc nominal en dolares 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style-name="ce544"/>
          <table:table-cell table:style-name="ce538"/>
          <table:table-cell table:style-name="Default" table:number-columns-repeated="2"/>
          <table:table-cell/>
          <table:table-cell office:value-type="string" calcext:value-type="string">
            <text:p>Kwacc</text:p>
          </table:table-cell>
          <table:table-cell office:value-type="string" calcext:value-type="string">
            <text:p>=</text:p>
          </table:table-cell>
          <table:table-cell table:style-name="ce563" table:formula="of:=[.J14]*((1+[.J21])/(1+[.J20]))" office:value-type="percentage" office:value="0.222448913365423" calcext:value-type="percentage">
            <text:p>22.24 %</text:p>
          </table:table-cell>
          <table:table-cell office:value-type="string" calcext:value-type="string">
            <text:p>Kwacc nominal en soles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style-name="ce544"/>
          <table:table-cell table:style-name="ce538"/>
          <table:table-cell table:style-name="Default" table:number-columns-repeated="2"/>
          <table:table-cell/>
          <table:table-cell table:style-name="ce531" office:value-type="string" calcext:value-type="string">
            <text:p>Kwacc</text:p>
          </table:table-cell>
          <table:table-cell table:style-name="ce523" office:value-type="string" calcext:value-type="string">
            <text:p>=</text:p>
          </table:table-cell>
          <table:table-cell table:style-name="ce549" table:formula="of:=((1+[.J15])/(1+[.J21]))-1" office:value-type="percentage" office:value="0.187997000355124" calcext:value-type="percentage">
            <text:p>18.80 %</text:p>
          </table:table-cell>
          <table:table-cell table:style-name="ce523" office:value-type="string" calcext:value-type="string">
            <text:p>Kwacc Real en soles</text:p>
          </table:table-cell>
          <table:table-cell table:style-name="ce523"/>
          <table:table-cell table:style-name="ce557"/>
          <table:table-cell/>
          <table:table-cell table:style-name="ce538"/>
          <table:table-cell table:number-columns-repeated="16369"/>
        </table:table-row>
        <table:table-row table:style-name="ro1">
          <table:table-cell/>
          <table:table-cell table:style-name="ce539" office:value-type="string" calcext:value-type="string">
            <text:p>Beta reapalancado para el proyecto</text:p>
          </table:table-cell>
          <table:table-cell table:style-name="ce542"/>
          <table:table-cell table:style-name="ce546" table:number-columns-repeated="2"/>
          <table:table-cell table:style-name="ce554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/>
          <table:table-cell table:style-name="ce541" office:value-type="string" calcext:value-type="string" table:number-columns-spanned="5" table:number-rows-spanned="1">
            <text:p><text:s text:c="13"/>brl total <text:s/>= <text:s/>bu total ME *( 1+(D/E*)*( 1-t))PERU <text:s text:c="77"/></text:p>
          </table:table-cell>
          <table:covered-table-cell table:number-columns-repeated="3" table:style-name="ce545"/>
          <table:covered-table-cell table:style-name="ce558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onde: <text:s text:c="78"/>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number-columns-repeated="7"/>
          <table:table-cell table:style-name="ce530" office:value-type="string" calcext:value-type="string">
            <text:p>Inflacion USA</text:p>
          </table:table-cell>
          <table:table-cell table:style-name="ce546" office:value-type="string" calcext:value-type="string">
            <text:p>=</text:p>
          </table:table-cell>
          <table:table-cell table:style-name="ce534" office:value-type="percentage" office:value="0.02" calcext:value-type="percentage">
            <text:p>2.0%</text:p>
          </table:table-cell>
          <table:table-cell table:style-name="ce537"/>
          <table:table-cell table:style-name="Default" table:number-columns-repeated="2"/>
          <table:table-cell table:number-columns-repeated="16371"/>
        </table:table-row>
        <table:table-row table:style-name="ro7">
          <table:table-cell/>
          <table:table-cell office:value-type="string" calcext:value-type="string">
            <text:p><text:span text:style-name="T1">b</text:span><text:span text:style-name="T2">u total ME = </text:span></text:p>
          </table:table-cell>
          <table:table-cell/>
          <table:table-cell table:formula="of:=[$' Ku COK'.D8]" office:value-type="float" office:value="3.28" calcext:value-type="float">
            <text:p>3.28</text:p>
          </table:table-cell>
          <table:table-cell table:style-name="ce553" office:value-type="string" calcext:value-type="string" table:number-columns-spanned="2" table:number-rows-spanned="1">
            <text:p>Beta total desapalancado para procesamiento de alimentos (Damorada)</text:p>
          </table:table-cell>
          <table:covered-table-cell table:style-name="ce553"/>
          <table:table-cell/>
          <table:table-cell table:style-name="ce531" office:value-type="string" calcext:value-type="string">
            <text:p>Inflacion en Peru</text:p>
          </table:table-cell>
          <table:table-cell table:style-name="ce523" office:value-type="string" calcext:value-type="string">
            <text:p>=</text:p>
          </table:table-cell>
          <table:table-cell table:style-name="ce535" office:value-type="percentage" office:value="0.029" calcext:value-type="percentage">
            <text:p>2.9%</text:p>
          </table:table-cell>
          <table:table-cell table:style-name="ce537" office:value-type="string" calcext:value-type="string">
            <text:p>(Promedio 2010-2019)</text:p>
          </table:table-cell>
          <table:table-cell table:style-name="Default" table:number-columns-repeated="2"/>
          <table:table-cell table:number-columns-repeated="16371"/>
        </table:table-row>
        <table:table-row table:style-name="ro34">
          <table:table-cell/>
          <table:table-cell office:value-type="string" calcext:value-type="string">
            <text:p><text:span text:style-name="T3">D/E</text:span><text:span text:style-name="T2">*</text:span><text:span text:style-name="T4">PERU</text:span><text:span text:style-name="T2"> = </text:span></text:p>
          </table:table-cell>
          <table:table-cell/>
          <table:table-cell table:style-name="ce550" table:formula="of:=[.J9]/[.J7]" office:value-type="float" office:value="0.385138130284641" calcext:value-type="float">
            <text:p>0.3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* = </text:p>
          </table:table-cell>
          <table:table-cell/>
          <table:table-cell table:style-name="ce551" table:formula="of:=[.J11]" office:value-type="float" office:value="0.295" calcext:value-type="float">
            <text:p>0.295</text:p>
          </table:table-cell>
          <table:table-cell office:value-type="string" calcext:value-type="string">
            <text:p>Renta (Impuesto)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βrl total perú </text:p>
          </table:table-cell>
          <table:table-cell/>
          <table:table-cell table:style-name="ce552" table:formula="of:=[.D21]*(1+[.D23]*(1-[.D22]))" office:value-type="float" office:value="3.87494034513658" calcext:value-type="float">
            <text:p>3.87</text:p>
          </table:table-cell>
          <table:table-cell office:value-type="string" calcext:value-type="string">
            <text:p>B reapalancado para el proyecto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/>
          <table:table-cell table:style-name="ce531"/>
          <table:table-cell table:style-name="ce523" table:number-columns-repeated="3"/>
          <table:table-cell table:style-name="ce557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1"/>
        </table:table-row>
      </table:table>
      <table:table table:name="Flujos de Caja" table:style-name="ta21">
        <table:table-column table:style-name="co21" table:number-columns-repeated="2" table:default-cell-style-name="ce566"/>
        <table:table-column table:style-name="co100" table:default-cell-style-name="ce566"/>
        <table:table-column table:style-name="co83" table:default-cell-style-name="ce566"/>
        <table:table-column table:style-name="co101" table:default-cell-style-name="ce566"/>
        <table:table-column table:style-name="co83" table:default-cell-style-name="ce566"/>
        <table:table-column table:style-name="co101" table:default-cell-style-name="ce566"/>
        <table:table-column table:style-name="co4" table:default-cell-style-name="ce566"/>
        <table:table-column table:style-name="co102" table:default-cell-style-name="ce566"/>
        <table:table-column table:style-name="co21" table:number-columns-repeated="242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49" table:default-cell-style-name="ce566"/>
        <table:table-column table:style-name="co103" table:default-cell-style-name="ce566"/>
        <table:table-column table:style-name="co104" table:default-cell-style-name="ce566"/>
        <table:table-column table:style-name="co102" table:number-columns-repeated="2" table:default-cell-style-name="ce566"/>
        <table:table-column table:style-name="co4" table:number-columns-repeated="2" table:default-cell-style-name="ce566"/>
        <table:table-column table:style-name="co69" table:default-cell-style-name="ce566"/>
        <table:table-column table:style-name="co21" table:number-columns-repeated="254" table:default-cell-style-name="ce566"/>
        <table:table-row table:style-name="ro12">
          <table:table-cell/>
          <table:table-cell table:style-name="ce567" office:value-type="string" calcext:value-type="string">
            <text:p>b.) y d.) Flujo de Caja Economico y Financiero</text:p>
          </table:table-cell>
          <table:table-cell table:number-columns-repeated="16382"/>
        </table:table-row>
        <table:table-row table:style-name="ro12">
          <table:table-cell/>
          <table:table-cell table:style-name="ce567"/>
          <table:table-cell table:number-columns-repeated="16382"/>
        </table:table-row>
        <table:table-row table:style-name="ro9">
          <table:table-cell table:number-columns-repeated="2"/>
          <table:table-cell table:style-name="ce569" office:value-type="string" calcext:value-type="string" table:number-columns-spanned="7" table:number-rows-spanned="1">
            <text:p>FLUJOS DE CAJA ECONOMICO Y FINANCIERO</text:p>
          </table:table-cell>
          <table:covered-table-cell table:number-columns-repeated="6" table:style-name="ce584"/>
          <table:table-cell/>
          <table:table-cell table:style-name="ce607"/>
          <table:table-cell table:number-columns-repeated="16373"/>
        </table:table-row>
        <table:table-row table:style-name="ro12">
          <table:table-cell table:number-columns-repeated="2"/>
          <table:table-cell table:style-name="ce570" table:number-columns-repeated="5"/>
          <table:table-cell table:number-columns-repeated="16377"/>
        </table:table-row>
        <table:table-row table:style-name="ro13">
          <table:table-cell table:number-columns-repeated="2"/>
          <table:table-cell table:style-name="ce571" office:value-type="string" calcext:value-type="string">
            <text:p>RUBRO</text:p>
          </table:table-cell>
          <table:table-cell table:style-name="ce571" office:value-type="string" calcext:value-type="string">
            <text:p>Año 0</text:p>
          </table:table-cell>
          <table:table-cell table:style-name="ce571" office:value-type="string" calcext:value-type="string">
            <text:p>Año 1</text:p>
          </table:table-cell>
          <table:table-cell table:style-name="ce571" office:value-type="string" calcext:value-type="string">
            <text:p>Año 2</text:p>
          </table:table-cell>
          <table:table-cell table:style-name="ce571" office:value-type="string" calcext:value-type="string">
            <text:p>Año 3</text:p>
          </table:table-cell>
          <table:table-cell table:style-name="ce571" office:value-type="string" calcext:value-type="string">
            <text:p>Año 4</text:p>
          </table:table-cell>
          <table:table-cell table:style-name="ce571" office:value-type="string" calcext:value-type="string">
            <text:p>Año 5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2" office:value-type="string" calcext:value-type="string">
            <text:p>Activo fijo tangible</text:p>
          </table:table-cell>
          <table:table-cell table:style-name="ce585" table:formula="of:=-[$'INVERSION INICIAL'.D8]" office:value-type="float" office:value="-9187" calcext:value-type="float">
            <text:p>-9187</text:p>
          </table:table-cell>
          <table:table-cell table:style-name="ce585"/>
          <table:table-cell table:style-name="ce585" table:formula="of:=-[$'Depreciacion y VR'.C7]" office:value-type="float" office:value="-2287" calcext:value-type="float">
            <text:p>-2287</text:p>
          </table:table-cell>
          <table:table-cell table:style-name="ce585" table:formula="of:=-[$'Depreciacion y VR'.C8]" office:value-type="float" office:value="-2500" calcext:value-type="float">
            <text:p>-2500</text:p>
          </table:table-cell>
          <table:table-cell table:style-name="ce585" table:formula="of:=[.F6]" office:value-type="float" office:value="-2287" calcext:value-type="float">
            <text:p>-2287</text:p>
          </table:table-cell>
          <table:table-cell table:style-name="ce586"/>
          <table:table-cell table:number-columns-repeated="16375"/>
        </table:table-row>
        <table:table-row table:style-name="ro13">
          <table:table-cell table:number-columns-repeated="2"/>
          <table:table-cell table:style-name="ce572" office:value-type="string" calcext:value-type="string">
            <text:p>Activo fijo intangible</text:p>
          </table:table-cell>
          <table:table-cell table:style-name="ce585" table:formula="of:=-[$'INVERSION INICIAL'.D16]" office:value-type="float" office:value="-1435" calcext:value-type="float">
            <text:p>-1435</text:p>
          </table:table-cell>
          <table:table-cell table:style-name="ce585" table:number-columns-repeated="3"/>
          <table:table-cell table:style-name="ce586" table:number-columns-repeated="2"/>
          <table:table-cell table:number-columns-repeated="16375"/>
        </table:table-row>
        <table:table-row table:style-name="ro13">
          <table:table-cell table:number-columns-repeated="2"/>
          <table:table-cell table:style-name="ce572" office:value-type="string" calcext:value-type="string">
            <text:p>Capital de trabajo</text:p>
          </table:table-cell>
          <table:table-cell table:style-name="ce585" table:formula="of:=-[$'INVERSION INICIAL'.D24]" office:value-type="float" office:value="-61307.4207125604" calcext:value-type="float">
            <text:p>-61307</text:p>
          </table:table-cell>
          <table:table-cell table:style-name="ce596" table:formula="of:=+[.D8]" office:value-type="float" office:value="-61307.4207125604" calcext:value-type="float">
            <text:p>-61307</text:p>
          </table:table-cell>
          <table:table-cell table:number-columns-repeated="3" table:style-name="ce585" office:value-type="float" office:value="0" calcext:value-type="float">
            <text:p>0</text:p>
          </table:table-cell>
          <table:table-cell table:style-name="ce586"/>
          <table:table-cell table:number-columns-repeated="16375"/>
        </table:table-row>
        <table:table-row table:style-name="ro13">
          <table:table-cell table:number-columns-repeated="2"/>
          <table:table-cell table:style-name="ce572" office:value-type="string" calcext:value-type="string">
            <text:p>Recupero de capital de trabajo</text:p>
          </table:table-cell>
          <table:table-cell table:style-name="ce585" table:number-columns-repeated="4"/>
          <table:table-cell table:style-name="ce586"/>
          <table:table-cell table:style-name="ce585" table:formula="of:=-SUM([.D8:.H8])" office:value-type="float" office:value="122614.841425121" calcext:value-type="float">
            <text:p>122615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2" office:value-type="string" calcext:value-type="string">
            <text:p>Recupero de activo fijo</text:p>
          </table:table-cell>
          <table:table-cell table:style-name="ce586" table:number-columns-repeated="3"/>
          <table:table-cell table:style-name="ce601"/>
          <table:table-cell table:style-name="ce586"/>
          <table:table-cell table:style-name="ce585" table:formula="of:=[$'Depreciacion y VR'.H11]" office:value-type="float" office:value="1976.83333333333" calcext:value-type="float">
            <text:p>1977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3" office:value-type="string" calcext:value-type="string">
            <text:p>Flujo de Inversión y Liquidación</text:p>
          </table:table-cell>
          <table:table-cell table:style-name="ce587" table:formula="of:=SUM([.D6:.D10])" office:value-type="float" office:value="-71929.4207125604" calcext:value-type="float">
            <text:p>-71929</text:p>
          </table:table-cell>
          <table:table-cell table:style-name="ce587" table:formula="of:=SUM([.E6:.E10])" office:value-type="float" office:value="-61307.4207125604" calcext:value-type="float">
            <text:p>-61307</text:p>
          </table:table-cell>
          <table:table-cell table:style-name="ce587" table:formula="of:=SUM([.F6:.F10])" office:value-type="float" office:value="-2287" calcext:value-type="float">
            <text:p>-2287</text:p>
          </table:table-cell>
          <table:table-cell table:style-name="ce587" table:formula="of:=SUM([.G6:.G10])" office:value-type="float" office:value="-2500" calcext:value-type="float">
            <text:p>-2500</text:p>
          </table:table-cell>
          <table:table-cell table:style-name="ce587" table:formula="of:=SUM([.H6:.H10])" office:value-type="float" office:value="-2287" calcext:value-type="float">
            <text:p>-2287</text:p>
          </table:table-cell>
          <table:table-cell table:style-name="ce587" table:formula="of:=SUM([.I6:.I10])" office:value-type="float" office:value="124591.674758454" calcext:value-type="float">
            <text:p>124592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2" office:value-type="string" calcext:value-type="string">
            <text:p>Ingresos por ventas</text:p>
          </table:table-cell>
          <table:table-cell table:style-name="ce585"/>
          <table:table-cell table:style-name="ce585" table:formula="of:=[$'Presupuesto de ventas'.P17]" office:value-type="float" office:value="579600" calcext:value-type="float">
            <text:p>579600</text:p>
          </table:table-cell>
          <table:table-cell table:style-name="ce585" table:formula="of:=[$'Presupuesto de ventas'.P18]" office:value-type="float" office:value="856800" calcext:value-type="float">
            <text:p>856800</text:p>
          </table:table-cell>
          <table:table-cell table:style-name="ce585" table:formula="of:=[$'Presupuesto de ventas'.P19]" office:value-type="float" office:value="856800" calcext:value-type="float">
            <text:p>856800</text:p>
          </table:table-cell>
          <table:table-cell table:style-name="ce585" table:formula="of:=[$'Presupuesto de ventas'.P20]" office:value-type="float" office:value="856800" calcext:value-type="float">
            <text:p>856800</text:p>
          </table:table-cell>
          <table:table-cell table:style-name="ce585" table:formula="of:=[$'Presupuesto de ventas'.P21]" office:value-type="float" office:value="856800" calcext:value-type="float">
            <text:p>856800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2" office:value-type="string" calcext:value-type="string">
            <text:p>Costos de produccion (*)</text:p>
          </table:table-cell>
          <table:table-cell table:style-name="ce585"/>
          <table:table-cell table:style-name="ce597" table:formula="of:=-[$'ESTADO RESULTADOS '.D11]" office:value-type="float" office:value="-474019.333333333" calcext:value-type="float">
            <text:p>-474,019 </text:p>
          </table:table-cell>
          <table:table-cell table:style-name="ce597" table:formula="of:=-[$'ESTADO RESULTADOS '.E11]" office:value-type="float" office:value="-700724.231884058" calcext:value-type="float">
            <text:p>-700,724 </text:p>
          </table:table-cell>
          <table:table-cell table:style-name="ce597" table:formula="of:=-[$'ESTADO RESULTADOS '.F11]" office:value-type="float" office:value="-700724.231884058" calcext:value-type="float">
            <text:p>-700,724 </text:p>
          </table:table-cell>
          <table:table-cell table:style-name="ce597" table:formula="of:=-[$'ESTADO RESULTADOS '.G11]" office:value-type="float" office:value="-700724.231884058" calcext:value-type="float">
            <text:p>-700,724 </text:p>
          </table:table-cell>
          <table:table-cell table:style-name="ce597" table:formula="of:=-[$'ESTADO RESULTADOS '.H11]" office:value-type="float" office:value="-700724.231884058" calcext:value-type="float">
            <text:p>-700,724 </text:p>
          </table:table-cell>
          <table:table-cell table:number-columns-repeated="16375"/>
        </table:table-row>
        <table:table-row table:style-name="ro13">
          <table:table-cell/>
          <table:table-cell table:style-name="ce567" office:value-type="string" calcext:value-type="string">
            <text:p>TEA 15%</text:p>
          </table:table-cell>
          <table:table-cell table:style-name="ce572" office:value-type="string" calcext:value-type="string">
            <text:p>Gastos operativos (*)</text:p>
          </table:table-cell>
          <table:table-cell table:style-name="ce585"/>
          <table:table-cell table:style-name="ce585" table:formula="of:=-([$'ESTADO RESULTADOS '.D15]+[$'ESTADO RESULTADOS '.D16])" office:value-type="float" office:value="-34964.8166666667" calcext:value-type="float">
            <text:p>-34965</text:p>
          </table:table-cell>
          <table:table-cell table:style-name="ce585" table:formula="of:=-([$'ESTADO RESULTADOS '.E15]+[$'ESTADO RESULTADOS '.E16])" office:value-type="float" office:value="-34964.8166666667" calcext:value-type="float">
            <text:p>-34965</text:p>
          </table:table-cell>
          <table:table-cell table:style-name="ce585" table:formula="of:=-([$'ESTADO RESULTADOS '.F15]+[$'ESTADO RESULTADOS '.F16])" office:value-type="float" office:value="-34964.8166666667" calcext:value-type="float">
            <text:p>-34965</text:p>
          </table:table-cell>
          <table:table-cell table:style-name="ce585" table:formula="of:=-([$'ESTADO RESULTADOS '.G15]+[$'ESTADO RESULTADOS '.G16])" office:value-type="float" office:value="-34964.8166666667" calcext:value-type="float">
            <text:p>-34965</text:p>
          </table:table-cell>
          <table:table-cell table:style-name="ce585" table:formula="of:=-([$'ESTADO RESULTADOS '.H15]+[$'ESTADO RESULTADOS '.H16])" office:value-type="float" office:value="-34964.8166666667" calcext:value-type="float">
            <text:p>-34965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4" office:value-type="string" calcext:value-type="string">
            <text:p>Pago de IGV</text:p>
          </table:table-cell>
          <table:table-cell table:style-name="ce585"/>
          <table:table-cell table:style-name="ce585" table:formula="of:=-[$IGV.D17]" office:value-type="float" office:value="-14518.23" calcext:value-type="float">
            <text:p>-14518</text:p>
          </table:table-cell>
          <table:table-cell table:style-name="ce585" table:formula="of:=-[$IGV.E17]" office:value-type="float" office:value="-23607.3482608696" calcext:value-type="float">
            <text:p>-23607</text:p>
          </table:table-cell>
          <table:table-cell table:style-name="ce585" table:formula="of:=-[$IGV.F17]" office:value-type="float" office:value="-23607.3482608696" calcext:value-type="float">
            <text:p>-23607</text:p>
          </table:table-cell>
          <table:table-cell table:style-name="ce585" table:formula="of:=-[$IGV.G17]" office:value-type="float" office:value="-23607.3482608696" calcext:value-type="float">
            <text:p>-23607</text:p>
          </table:table-cell>
          <table:table-cell table:style-name="ce585" table:formula="of:=-[$IGV.H17]" office:value-type="float" office:value="-23607.3482608696" calcext:value-type="float">
            <text:p>-23607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2" office:value-type="string" calcext:value-type="string">
            <text:p>Impuestos (**)</text:p>
          </table:table-cell>
          <table:table-cell table:style-name="ce585"/>
          <table:table-cell table:style-name="ce585" table:formula="of:=-[$'ESTADO RESULTADOS '.D21]" office:value-type="float" office:value="-7034.24491666667" calcext:value-type="float">
            <text:p>-7034</text:p>
          </table:table-cell>
          <table:table-cell table:style-name="ce585" table:formula="of:=-[$'ESTADO RESULTADOS '.E21]" office:value-type="float" office:value="-21930.2998442029" calcext:value-type="float">
            <text:p>-21930</text:p>
          </table:table-cell>
          <table:table-cell table:style-name="ce585" table:formula="of:=-[$'ESTADO RESULTADOS '.F21]" office:value-type="float" office:value="-21930.2998442029" calcext:value-type="float">
            <text:p>-21930</text:p>
          </table:table-cell>
          <table:table-cell table:style-name="ce585" table:formula="of:=-[$'ESTADO RESULTADOS '.G21]" office:value-type="float" office:value="-21930.2998442029" calcext:value-type="float">
            <text:p>-21930</text:p>
          </table:table-cell>
          <table:table-cell table:style-name="ce585" table:formula="of:=-[$'ESTADO RESULTADOS '.H21]" office:value-type="float" office:value="-21930.2998442029" calcext:value-type="float">
            <text:p>-21930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3" office:value-type="string" calcext:value-type="string">
            <text:p>Flujo Operativo</text:p>
          </table:table-cell>
          <table:table-cell table:style-name="ce587" table:formula="of:=SUM([.D12:.D16])" office:value-type="float" office:value="0" calcext:value-type="float">
            <text:p>0</text:p>
          </table:table-cell>
          <table:table-cell table:style-name="ce587" table:formula="of:=SUM([.E12:.E16])" office:value-type="float" office:value="49063.3750833334" calcext:value-type="float">
            <text:p>49063</text:p>
          </table:table-cell>
          <table:table-cell table:style-name="ce587" table:formula="of:=SUM([.F12:.F16])" office:value-type="float" office:value="75573.3033442029" calcext:value-type="float">
            <text:p>75573</text:p>
          </table:table-cell>
          <table:table-cell table:style-name="ce587" table:formula="of:=SUM([.G12:.G16])" office:value-type="float" office:value="75573.3033442029" calcext:value-type="float">
            <text:p>75573</text:p>
          </table:table-cell>
          <table:table-cell table:style-name="ce587" table:formula="of:=SUM([.H12:.H16])" office:value-type="float" office:value="75573.3033442029" calcext:value-type="float">
            <text:p>75573</text:p>
          </table:table-cell>
          <table:table-cell table:style-name="ce587" table:formula="of:=SUM([.I12:.I16])" office:value-type="float" office:value="75573.3033442029" calcext:value-type="float">
            <text:p>75573</text:p>
          </table:table-cell>
          <table:table-cell table:number-columns-repeated="16375"/>
        </table:table-row>
        <table:table-row table:style-name="ro13">
          <table:table-cell table:number-columns-repeated="2"/>
          <table:table-cell table:style-name="ce575" office:value-type="string" calcext:value-type="string">
            <text:p>Flujo de Caja Economico FCE</text:p>
          </table:table-cell>
          <table:table-cell table:style-name="ce588" table:formula="of:=[.D11]+[.D17]" office:value-type="float" office:value="-71929.4207125604" calcext:value-type="float">
            <text:p>-71929</text:p>
          </table:table-cell>
          <table:table-cell table:style-name="ce588" table:formula="of:=[.E11]+[.E17]" office:value-type="float" office:value="-12244.045629227" calcext:value-type="float">
            <text:p>-12244</text:p>
          </table:table-cell>
          <table:table-cell table:style-name="ce588" table:formula="of:=[.F11]+[.F17]" office:value-type="float" office:value="73286.3033442029" calcext:value-type="float">
            <text:p>73286</text:p>
          </table:table-cell>
          <table:table-cell table:style-name="ce588" table:formula="of:=[.G11]+[.G17]" office:value-type="float" office:value="73073.3033442029" calcext:value-type="float">
            <text:p>73073</text:p>
          </table:table-cell>
          <table:table-cell table:style-name="ce588" table:formula="of:=[.H11]+[.H17]" office:value-type="float" office:value="73286.3033442029" calcext:value-type="float">
            <text:p>73286</text:p>
          </table:table-cell>
          <table:table-cell table:style-name="ce588" table:formula="of:=[.I11]+[.I17]" office:value-type="float" office:value="200164.978102657" calcext:value-type="float">
            <text:p>200165</text:p>
          </table:table-cell>
          <table:table-cell table:number-columns-repeated="16375"/>
        </table:table-row>
        <table:table-row table:style-name="ro12">
          <table:table-cell table:number-columns-repeated="2"/>
          <table:table-cell table:style-name="ce576" office:value-type="string" calcext:value-type="string">
            <text:p>(*) Régimen laboral de pequeña EMPRESA</text:p>
          </table:table-cell>
          <table:table-cell table:style-name="ce589"/>
          <table:table-cell table:style-name="ce590" table:number-columns-repeated="5"/>
          <table:table-cell table:number-columns-repeated="16375"/>
        </table:table-row>
        <table:table-row table:style-name="ro12">
          <table:table-cell table:number-columns-repeated="2"/>
          <table:table-cell table:style-name="ce576" office:value-type="string" calcext:value-type="string">
            <text:p>(**) Régimen tributario MYPE Tributario</text:p>
          </table:table-cell>
          <table:table-cell table:style-name="ce589"/>
          <table:table-cell table:style-name="ce590" table:number-columns-repeated="5"/>
          <table:table-cell table:number-columns-repeated="16375"/>
        </table:table-row>
        <table:table-row table:style-name="ro12" table:number-rows-repeated="2">
          <table:table-cell table:number-columns-repeated="2"/>
          <table:table-cell table:style-name="ce577"/>
          <table:table-cell table:style-name="ce590" table:number-columns-repeated="6"/>
          <table:table-cell table:number-columns-repeated="16375"/>
        </table:table-row>
        <table:table-row table:style-name="ro12">
          <table:table-cell/>
          <table:table-cell table:style-name="ce568"/>
          <table:table-cell table:style-name="ce578"/>
          <table:table-cell table:style-name="ce568" table:number-columns-repeated="7"/>
          <table:table-cell table:number-columns-repeated="16374"/>
        </table:table-row>
        <table:table-row table:style-name="ro12">
          <table:table-cell table:number-columns-repeated="2"/>
          <table:table-cell table:style-name="ce579" office:value-type="string" calcext:value-type="string">
            <text:p>Prestamo</text:p>
          </table:table-cell>
          <table:table-cell table:style-name="ce591" table:formula="of:=[$Flujo_Deuda.E3]" office:value-type="float" office:value="20000" calcext:value-type="float">
            <text:p>20000</text:p>
          </table:table-cell>
          <table:table-cell table:style-name="ce591" table:number-columns-repeated="3"/>
          <table:table-cell table:style-name="ce602"/>
          <table:table-cell table:style-name="ce604"/>
          <table:table-cell table:number-columns-repeated="16375"/>
        </table:table-row>
        <table:table-row table:style-name="ro12">
          <table:table-cell table:number-columns-repeated="2"/>
          <table:table-cell table:style-name="ce580" office:value-type="string" calcext:value-type="string">
            <text:p>Cuota de capital </text:p>
          </table:table-cell>
          <table:table-cell table:style-name="ce592"/>
          <table:table-cell table:style-name="ce592" table:formula="of:=-([$Flujo_Deuda.J12])" office:value-type="float" office:value="-12015.4357332237" calcext:value-type="float">
            <text:p>-12015</text:p>
          </table:table-cell>
          <table:table-cell table:style-name="ce592" table:formula="of:=-([$Flujo_Deuda.K12])" office:value-type="float" office:value="-12015.4357332237" calcext:value-type="float">
            <text:p>-12015</text:p>
          </table:table-cell>
          <table:table-cell table:style-name="ce592"/>
          <table:table-cell table:style-name="ce603"/>
          <table:table-cell table:style-name="ce605"/>
          <table:table-cell table:number-columns-repeated="16375"/>
        </table:table-row>
        <table:table-row table:style-name="ro9">
          <table:table-cell table:number-columns-repeated="2"/>
          <table:table-cell table:style-name="ce580" office:value-type="string" calcext:value-type="string">
            <text:p>Intereses</text:p>
          </table:table-cell>
          <table:table-cell table:style-name="ce592"/>
          <table:table-cell table:style-name="ce592" table:formula="of:=-([$Flujo_Deuda.L12])" office:value-type="float" office:value="-2920.55052284703" calcext:value-type="float">
            <text:p>-2921</text:p>
          </table:table-cell>
          <table:table-cell table:style-name="ce592" table:formula="of:=-([$Flujo_Deuda.M12])" office:value-type="float" office:value="-1110.32094360041" calcext:value-type="float">
            <text:p>-1110</text:p>
          </table:table-cell>
          <table:table-cell table:style-name="ce592"/>
          <table:table-cell table:style-name="ce603"/>
          <table:table-cell table:style-name="ce605"/>
          <table:table-cell/>
          <table:table-cell table:style-name="ce608"/>
          <table:table-cell table:number-columns-repeated="16373"/>
        </table:table-row>
        <table:table-row table:style-name="ro12">
          <table:table-cell table:number-columns-repeated="2"/>
          <table:table-cell table:style-name="ce580" office:value-type="string" calcext:value-type="string">
            <text:p>Escudo fiscal de intereses</text:p>
          </table:table-cell>
          <table:table-cell table:style-name="ce592"/>
          <table:table-cell table:style-name="ce592" table:formula="of:=-[.E26]*[$Resumen.H12]" office:value-type="float" office:value="861.562404239874" calcext:value-type="float">
            <text:p>862</text:p>
          </table:table-cell>
          <table:table-cell table:style-name="ce592" table:formula="of:=-[.F26]*[$Resumen.H12]" office:value-type="float" office:value="327.544678362122" calcext:value-type="float">
            <text:p>328</text:p>
          </table:table-cell>
          <table:table-cell table:style-name="ce592"/>
          <table:table-cell table:style-name="ce603"/>
          <table:table-cell table:style-name="ce605"/>
          <table:table-cell table:number-columns-repeated="16375"/>
        </table:table-row>
        <table:table-row table:style-name="ro12">
          <table:table-cell table:number-columns-repeated="2"/>
          <table:table-cell table:style-name="ce581" office:value-type="string" calcext:value-type="string">
            <text:p>Total Flujo Financiamiento Neto</text:p>
          </table:table-cell>
          <table:table-cell table:style-name="ce593" table:formula="of:=SUM([.D24:.D27])" office:value-type="float" office:value="20000" calcext:value-type="float">
            <text:p>20000</text:p>
          </table:table-cell>
          <table:table-cell table:style-name="ce593" table:formula="of:=SUM([.E24:.E27])" office:value-type="float" office:value="-14074.4238518309" calcext:value-type="float">
            <text:p>-14074</text:p>
          </table:table-cell>
          <table:table-cell table:style-name="ce593" table:formula="of:=SUM([.F24:.F27])" office:value-type="float" office:value="-12798.211998462" calcext:value-type="float">
            <text:p>-12798</text:p>
          </table:table-cell>
          <table:table-cell table:style-name="ce593" table:formula="of:=SUM([.G24:.G27])" office:value-type="float" office:value="0" calcext:value-type="float">
            <text:p>0</text:p>
          </table:table-cell>
          <table:table-cell table:style-name="ce593" table:formula="of:=SUM([.H24:.H27])" office:value-type="float" office:value="0" calcext:value-type="float">
            <text:p>0</text:p>
          </table:table-cell>
          <table:table-cell table:style-name="ce593" table:formula="of:=SUM([.I24:.I27])" office:value-type="float" office:value="0" calcext:value-type="float">
            <text:p>0</text:p>
          </table:table-cell>
          <table:table-cell table:number-columns-repeated="16375"/>
        </table:table-row>
        <table:table-row table:style-name="ro12">
          <table:table-cell table:number-columns-repeated="2"/>
          <table:table-cell table:style-name="ce582" office:value-type="string" calcext:value-type="string">
            <text:p>Flujo de Caja Financiero FCF</text:p>
          </table:table-cell>
          <table:table-cell table:style-name="ce594" table:formula="of:=[.D18]+[.D28]" office:value-type="float" office:value="-51929.4207125604" calcext:value-type="float">
            <text:p>-51929</text:p>
          </table:table-cell>
          <table:table-cell table:style-name="ce594" table:formula="of:=[.E18]+[.E28]" office:value-type="float" office:value="-26318.4694810579" calcext:value-type="float">
            <text:p>-26318</text:p>
          </table:table-cell>
          <table:table-cell table:style-name="ce594" table:formula="of:=[.F18]+[.F28]" office:value-type="float" office:value="60488.0913457409" calcext:value-type="float">
            <text:p>60488</text:p>
          </table:table-cell>
          <table:table-cell table:style-name="ce594" table:formula="of:=[.G18]+[.G28]" office:value-type="float" office:value="73073.3033442029" calcext:value-type="float">
            <text:p>73073</text:p>
          </table:table-cell>
          <table:table-cell table:style-name="ce594" table:formula="of:=[.H18]+[.H28]" office:value-type="float" office:value="73286.3033442029" calcext:value-type="float">
            <text:p>73286</text:p>
          </table:table-cell>
          <table:table-cell table:style-name="ce594" table:formula="of:=[.I18]+[.I28]" office:value-type="float" office:value="200164.978102657" calcext:value-type="float">
            <text:p>200165</text:p>
          </table:table-cell>
          <table:table-cell table:number-columns-repeated="16375"/>
        </table:table-row>
        <table:table-row table:style-name="ro12">
          <table:table-cell table:number-columns-repeated="2"/>
          <table:table-cell office:value-type="string" calcext:value-type="string">
            <text:p>(*) Sin depreciaciones</text:p>
          </table:table-cell>
          <table:table-cell table:number-columns-repeated="16381"/>
        </table:table-row>
        <table:table-row table:style-name="ro12">
          <table:table-cell table:number-columns-repeated="2"/>
          <table:table-cell office:value-type="string" calcext:value-type="string">
            <text:p>(**) Sin amortizacion de intangibles</text:p>
          </table:table-cell>
          <table:table-cell table:number-columns-repeated="16381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2"/>
          <table:table-cell table:style-name="ce583" office:value-type="string" calcext:value-type="string">
            <text:p>Flujo de caja ajustado</text:p>
          </table:table-cell>
          <table:table-cell table:style-name="ce595" table:formula="of:=[.D18]+[.D27]" office:value-type="float" office:value="-71929.4207125604" calcext:value-type="float">
            <text:p>-71929</text:p>
          </table:table-cell>
          <table:table-cell table:style-name="ce595" table:formula="of:=[.E18]+[.E27]" office:value-type="float" office:value="-11382.4832249872" calcext:value-type="float">
            <text:p>-11382</text:p>
          </table:table-cell>
          <table:table-cell table:style-name="ce595" table:formula="of:=[.F18]+[.F27]" office:value-type="float" office:value="73613.848022565" calcext:value-type="float">
            <text:p>73614</text:p>
          </table:table-cell>
          <table:table-cell table:style-name="ce595" table:formula="of:=[.G18]+[.G27]" office:value-type="float" office:value="73073.3033442029" calcext:value-type="float">
            <text:p>73073</text:p>
          </table:table-cell>
          <table:table-cell table:style-name="ce595" table:formula="of:=[.H18]+[.H27]" office:value-type="float" office:value="73286.3033442029" calcext:value-type="float">
            <text:p>73286</text:p>
          </table:table-cell>
          <table:table-cell table:style-name="ce606" table:formula="of:=[.I18]+[.I27]" office:value-type="float" office:value="200164.978102657" calcext:value-type="float">
            <text:p>200165</text:p>
          </table:table-cell>
          <table:table-cell table:number-columns-repeated="16375"/>
        </table:table-row>
        <table:table-row table:style-name="ro12">
          <table:table-cell table:number-columns-repeated="2"/>
          <table:table-cell table:style-name="ce570" table:number-columns-repeated="7"/>
          <table:table-cell table:number-columns-repeated="16375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4"/>
          <table:table-cell table:style-name="ce598" office:value-type="string" calcext:value-type="string">
            <text:p>VANE</text:p>
          </table:table-cell>
          <table:table-cell table:style-name="ce599" table:formula="of:=[$Rentabilidad.D13]" office:value-type="float" office:value="135582.735468953" calcext:value-type="float">
            <text:p><text:s/>S/135,582.74 </text:p>
          </table:table-cell>
          <table:table-cell table:number-columns-repeated="16378"/>
        </table:table-row>
        <table:table-row table:style-name="ro12">
          <table:table-cell table:number-columns-repeated="4"/>
          <table:table-cell table:style-name="ce598" office:value-type="string" calcext:value-type="string">
            <text:p>VAEFI</text:p>
          </table:table-cell>
          <table:table-cell table:style-name="ce600" table:formula="of:=[$Rentabilidad.D22]" office:value-type="float" office:value="963.322633784986" calcext:value-type="float">
            <text:p><text:s/>S/963.32 </text:p>
          </table:table-cell>
          <table:table-cell table:number-columns-repeated="16378"/>
        </table:table-row>
        <table:table-row table:style-name="ro12">
          <table:table-cell table:number-columns-repeated="4"/>
          <table:table-cell table:style-name="ce598" office:value-type="string" calcext:value-type="string">
            <text:p>VANF</text:p>
          </table:table-cell>
          <table:table-cell table:style-name="ce600" table:formula="of:=SUM([.F37:.F38])" office:value-type="float" office:value="136546.058102738" calcext:value-type="float">
            <text:p><text:s/>S/136,546.06 </text:p>
          </table:table-cell>
          <table:table-cell table:number-columns-repeated="16378"/>
        </table:table-row>
        <table:table-row table:style-name="ro12" table:number-rows-repeated="1048536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Rentabilidad" table:style-name="ta22">
        <office:forms form:automatic-focus="false" form:apply-design-mode="false"/>
        <table:table-column table:style-name="co58" table:default-cell-style-name="ce609"/>
        <table:table-column table:style-name="co49" table:default-cell-style-name="ce609"/>
        <table:table-column table:style-name="co105" table:default-cell-style-name="ce609"/>
        <table:table-column table:style-name="co106" table:default-cell-style-name="ce609"/>
        <table:table-column table:style-name="co12" table:default-cell-style-name="ce609"/>
        <table:table-column table:style-name="co4" table:default-cell-style-name="ce609"/>
        <table:table-column table:style-name="co53" table:default-cell-style-name="ce609"/>
        <table:table-column table:style-name="co46" table:default-cell-style-name="ce609"/>
        <table:table-column table:style-name="co12" table:default-cell-style-name="ce609"/>
        <table:table-column table:style-name="co4" table:number-columns-repeated="20" table:default-cell-style-name="ce609"/>
        <table:table-column table:style-name="co10" table:number-columns-repeated="16355" table:default-cell-style-name="ce609"/>
        <table:table-row table:style-name="ro9">
          <table:table-cell table:number-columns-repeated="16384"/>
        </table:table-row>
        <table:table-row table:style-name="ro9">
          <table:table-cell table:number-columns-repeated="2"/>
          <table:table-cell table:style-name="ce611" office:value-type="string" calcext:value-type="string" table:number-columns-spanned="3" table:number-rows-spanned="1">
            <text:p>EMPRESA DIVERSIFICADA</text:p>
          </table:table-cell>
          <table:covered-table-cell table:style-name="ce619"/>
          <table:covered-table-cell table:style-name="ce633"/>
          <table:table-cell/>
          <table:table-cell table:style-name="ce611" office:value-type="string" calcext:value-type="string" table:number-columns-spanned="3" table:number-rows-spanned="1">
            <text:p>EMPRESA NO DIVERSIFICADA</text:p>
          </table:table-cell>
          <table:covered-table-cell table:style-name="ce619"/>
          <table:covered-table-cell table:style-name="ce633"/>
          <table:table-cell table:number-columns-repeated="16375"/>
        </table:table-row>
        <table:table-row table:style-name="ro9">
          <table:table-cell table:number-columns-repeated="16384"/>
        </table:table-row>
        <table:table-row table:style-name="ro5">
          <table:table-cell/>
          <table:table-cell table:style-name="ce610"/>
          <table:table-cell table:style-name="ce612" office:value-type="string" calcext:value-type="string" table:number-columns-spanned="3" table:number-rows-spanned="1">
            <text:p>EVALUACIÓN ECONÓMICA</text:p>
          </table:table-cell>
          <table:covered-table-cell table:style-name="ce620"/>
          <table:covered-table-cell table:style-name="ce634"/>
          <table:table-cell/>
          <table:table-cell table:style-name="ce612" office:value-type="string" calcext:value-type="string" table:number-columns-spanned="3" table:number-rows-spanned="1">
            <text:p>EVALUACIÓN ECONÓMICA</text:p>
          </table:table-cell>
          <table:covered-table-cell table:style-name="ce620"/>
          <table:covered-table-cell table:style-name="ce634"/>
          <table:table-cell table:number-columns-repeated="16375"/>
        </table:table-row>
        <table:table-row table:style-name="ro5">
          <table:table-cell/>
          <table:table-cell table:style-name="ce610"/>
          <table:table-cell table:style-name="ce613" table:number-columns-repeated="3"/>
          <table:table-cell table:style-name="ce637"/>
          <table:table-cell table:style-name="ce613" table:number-columns-repeated="3"/>
          <table:table-cell table:number-columns-repeated="16375"/>
        </table:table-row>
        <table:table-row table:style-name="ro5">
          <table:table-cell/>
          <table:table-cell table:style-name="ce610"/>
          <table:table-cell table:style-name="ce614" office:value-type="string" calcext:value-type="string">
            <text:p>Tasas y Criterios</text:p>
          </table:table-cell>
          <table:table-cell table:style-name="ce614" office:value-type="string" calcext:value-type="string">
            <text:p>Valor</text:p>
          </table:table-cell>
          <table:table-cell table:style-name="ce614"/>
          <table:table-cell table:style-name="ce638"/>
          <table:table-cell table:style-name="ce614" office:value-type="string" calcext:value-type="string">
            <text:p>Tasas y Criterios</text:p>
          </table:table-cell>
          <table:table-cell table:style-name="ce614" office:value-type="string" calcext:value-type="string">
            <text:p>Valor</text:p>
          </table:table-cell>
          <table:table-cell table:style-name="ce614"/>
          <table:table-cell table:number-columns-repeated="16375"/>
        </table:table-row>
        <table:table-row table:style-name="ro25">
          <table:table-cell table:number-columns-repeated="2"/>
          <table:table-cell table:style-name="ce615" office:value-type="string" calcext:value-type="string">
            <text:p>Kurt nominal en dólares</text:p>
          </table:table-cell>
          <table:table-cell table:style-name="ce621" table:formula="of:=[$' Ku COK'.D11]" office:value-type="percentage" office:value="0.219092" calcext:value-type="percentage">
            <text:p>21.91 %</text:p>
          </table:table-cell>
          <table:table-cell table:style-name="ce615"/>
          <table:table-cell table:style-name="ce637"/>
          <table:table-cell table:style-name="ce615" office:value-type="string" calcext:value-type="string">
            <text:p>Kurs nominal en dólares</text:p>
          </table:table-cell>
          <table:table-cell table:style-name="ce621" table:formula="of:=[$' Ku COK'.I11]" office:value-type="percentage" office:value="0.1104" calcext:value-type="percentage">
            <text:p>11.04 %</text:p>
          </table:table-cell>
          <table:table-cell table:style-name="ce615"/>
          <table:table-cell table:number-columns-repeated="3"/>
          <table:table-cell table:style-name="ce646" office:value-type="string" calcext:value-type="string">
            <text:p><text:span text:style-name="T5">Ki</text:span><text:span text:style-name="T6"> real</text:span><text:span text:style-name="T7">  =  </text:span><text:span text:style-name="T8">(1+ Ki </text:span><text:span text:style-name="T9">nominal</text:span><text:span text:style-name="T10">) - 1                                                                               </text:span></text:p>
          </table:table-cell>
          <table:table-cell table:number-columns-repeated="16371"/>
        </table:table-row>
        <table:table-row table:style-name="ro29">
          <table:table-cell table:number-columns-repeated="2"/>
          <table:table-cell table:style-name="ce615" office:value-type="string" calcext:value-type="string">
            <text:p>Kurt nominal en soles</text:p>
          </table:table-cell>
          <table:table-cell table:style-name="ce621" table:formula="of:=[$' Ku COK'.D12]" office:value-type="percentage" office:value="0.221025164705882" calcext:value-type="percentage">
            <text:p>22.10 %</text:p>
          </table:table-cell>
          <table:table-cell table:style-name="ce615"/>
          <table:table-cell table:style-name="ce637"/>
          <table:table-cell table:style-name="ce615" office:value-type="string" calcext:value-type="string">
            <text:p>Kurs nominal en soles</text:p>
          </table:table-cell>
          <table:table-cell table:style-name="ce621" table:formula="of:=(([.H7]*((1+[.H9])/(1+[.H10]))))" office:value-type="percentage" office:value="0.111374117647059" calcext:value-type="percentage">
            <text:p>11.14 %</text:p>
          </table:table-cell>
          <table:table-cell table:style-name="ce615"/>
          <table:table-cell table:number-columns-repeated="3"/>
          <table:table-cell table:style-name="ce647" office:value-type="string" calcext:value-type="string">
            <text:p><text:span text:style-name="T5">                        (1 +  </text:span><text:span text:style-name="T11">π</text:span><text:span text:style-name="T7">)</text:span></text:p>
          </table:table-cell>
          <table:table-cell table:number-columns-repeated="16371"/>
        </table:table-row>
        <table:table-row table:style-name="ro16">
          <table:table-cell table:number-columns-repeated="2"/>
          <table:table-cell table:style-name="ce615" office:value-type="string" calcext:value-type="string">
            <text:p>Inflación en Perú</text:p>
          </table:table-cell>
          <table:table-cell table:style-name="ce622" table:formula="of:=[$' Ku COK'.E16]" office:value-type="percentage" office:value="0.029" calcext:value-type="percentage">
            <text:p>2.9%</text:p>
          </table:table-cell>
          <table:table-cell table:style-name="ce615"/>
          <table:table-cell table:style-name="ce639"/>
          <table:table-cell table:style-name="ce615" office:value-type="string" calcext:value-type="string">
            <text:p>Inflación en Perú</text:p>
          </table:table-cell>
          <table:table-cell table:style-name="ce622" table:formula="of:=[.D9]" office:value-type="percentage" office:value="0.029" calcext:value-type="percentage">
            <text:p>2.9%</text:p>
          </table:table-cell>
          <table:table-cell table:style-name="ce615"/>
          <table:table-cell table:number-columns-repeated="16375"/>
        </table:table-row>
        <table:table-row table:style-name="ro10">
          <table:table-cell table:number-columns-repeated="2"/>
          <table:table-cell table:style-name="ce615" office:value-type="string" calcext:value-type="string">
            <text:p>Inflación USA</text:p>
          </table:table-cell>
          <table:table-cell table:style-name="ce622" table:formula="of:=[$' Ku COK'.E15]" office:value-type="percentage" office:value="0.02" calcext:value-type="percentage">
            <text:p>2.0%</text:p>
          </table:table-cell>
          <table:table-cell table:style-name="ce615"/>
          <table:table-cell table:style-name="ce637"/>
          <table:table-cell table:style-name="ce615" office:value-type="string" calcext:value-type="string">
            <text:p>Inflación USA</text:p>
          </table:table-cell>
          <table:table-cell table:style-name="ce622" table:formula="of:=[.D10]" office:value-type="percentage" office:value="0.02" calcext:value-type="percentage">
            <text:p>2.0%</text:p>
          </table:table-cell>
          <table:table-cell table:style-name="ce615"/>
          <table:table-cell table:number-columns-repeated="16375"/>
        </table:table-row>
        <table:table-row table:style-name="ro16">
          <table:table-cell table:number-columns-repeated="2"/>
          <table:table-cell table:style-name="ce615" office:value-type="string" calcext:value-type="string">
            <text:p>COK <text:s/>real</text:p>
          </table:table-cell>
          <table:table-cell table:style-name="ce621" table:formula="of:=((1+[.D8])/(1+[.D9]))-1" office:value-type="percentage" office:value="0.186613376779283" calcext:value-type="percentage">
            <text:p>18.66 %</text:p>
          </table:table-cell>
          <table:table-cell table:style-name="ce615"/>
          <table:table-cell table:style-name="ce639"/>
          <table:table-cell table:style-name="ce615" office:value-type="string" calcext:value-type="string">
            <text:p>COK <text:s/>real</text:p>
          </table:table-cell>
          <table:table-cell table:style-name="ce621" table:formula="of:=((1+[.H8])/(1+[.H9]))-1" office:value-type="percentage" office:value="0.0800525924655577" calcext:value-type="percentage">
            <text:p>8.01 %</text:p>
          </table:table-cell>
          <table:table-cell table:style-name="ce615"/>
          <table:table-cell table:number-columns-repeated="3"/>
          <table:table-cell table:style-name="ce646" office:value-type="string" calcext:value-type="string">
            <text:p><text:span text:style-name="T5">Ki (s/.)  = Ki ($) X (</text:span><text:span text:style-name="T12">1+</text:span><text:span text:style-name="T13"> π</text:span><text:span text:style-name="T14"> </text:span><text:span text:style-name="T9">Perú</text:span><text:span text:style-name="T14">) </text:span>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style-name="ce615"/>
          <table:table-cell table:style-name="ce623"/>
          <table:table-cell table:style-name="ce615"/>
          <table:table-cell table:style-name="ce640"/>
          <table:table-cell table:style-name="ce615"/>
          <table:table-cell table:style-name="ce623"/>
          <table:table-cell table:style-name="ce615"/>
          <table:table-cell table:number-columns-repeated="3"/>
          <table:table-cell table:style-name="ce646" office:value-type="string" calcext:value-type="string">
            <text:p><text:span text:style-name="T5">                                (1+</text:span><text:span text:style-name="T11">π</text:span><text:span text:style-name="T7"> </text:span><text:span text:style-name="T6">USA </text:span><text:span text:style-name="T7">)</text:span></text:p>
          </table:table-cell>
          <table:table-cell table:number-columns-repeated="16371"/>
        </table:table-row>
        <table:table-row table:style-name="ro5">
          <table:table-cell table:number-columns-repeated="2"/>
          <table:table-cell table:style-name="ce616" office:value-type="string" calcext:value-type="string">
            <text:p>VANE =</text:p>
          </table:table-cell>
          <table:table-cell table:style-name="ce624" table:formula="of:=NPV([.D11];[$'Flujos de Caja'.E18:.I18])+[$'Flujos de Caja'.D18]" office:value-type="float" office:value="135582.735468953" calcext:value-type="float">
            <text:p><text:s/>135,583 </text:p>
          </table:table-cell>
          <table:table-cell table:style-name="ce616" office:value-type="string" calcext:value-type="string">
            <text:p>soles</text:p>
          </table:table-cell>
          <table:table-cell table:style-name="ce637"/>
          <table:table-cell table:style-name="ce642" office:value-type="string" calcext:value-type="string">
            <text:p>VANE =</text:p>
          </table:table-cell>
          <table:table-cell table:style-name="ce643" table:formula="of:=NPV([.H11];[$'Flujos de Caja'.E18:.I18])+[$'Flujos de Caja'.D18]" office:value-type="float" office:value="227611.481985366" calcext:value-type="float">
            <text:p><text:s/>227,611 </text:p>
          </table:table-cell>
          <table:table-cell table:style-name="ce642" office:value-type="string" calcext:value-type="string">
            <text:p>soles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615"/>
          <table:table-cell table:style-name="ce625"/>
          <table:table-cell table:style-name="ce615"/>
          <table:table-cell table:style-name="ce637"/>
          <table:table-cell table:style-name="ce615"/>
          <table:table-cell table:style-name="ce625"/>
          <table:table-cell table:style-name="ce615"/>
          <table:table-cell table:number-columns-repeated="16375"/>
        </table:table-row>
        <table:table-row table:style-name="ro5">
          <table:table-cell table:number-columns-repeated="2"/>
          <table:table-cell table:style-name="ce616" office:value-type="string" calcext:value-type="string">
            <text:p>TIRE =</text:p>
          </table:table-cell>
          <table:table-cell table:style-name="ce626" table:formula="of:=IRR([$'Flujos de Caja'.D18:.I18])" office:value-type="percentage" office:value="0.581814239972824" calcext:value-type="percentage">
            <text:p>58.18 %</text:p>
          </table:table-cell>
          <table:table-cell table:style-name="ce616" office:value-type="string" calcext:value-type="string">
            <text:p>anual</text:p>
          </table:table-cell>
          <table:table-cell table:style-name="ce637"/>
          <table:table-cell table:style-name="ce616" office:value-type="string" calcext:value-type="string">
            <text:p>TIRE =</text:p>
          </table:table-cell>
          <table:table-cell table:style-name="ce626" table:formula="of:=IRR([$'Flujos de Caja'.D18:.I18])" office:value-type="percentage" office:value="0.581814239972824" calcext:value-type="percentage">
            <text:p>58.18 %</text:p>
          </table:table-cell>
          <table:table-cell table:style-name="ce616" office:value-type="string" calcext:value-type="string">
            <text:p>anual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615"/>
          <table:table-cell table:style-name="ce627"/>
          <table:table-cell table:style-name="ce615"/>
          <table:table-cell table:style-name="ce637"/>
          <table:table-cell table:style-name="ce615"/>
          <table:table-cell table:style-name="ce627"/>
          <table:table-cell table:style-name="ce615"/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610"/>
          <table:table-cell table:style-name="ce612" office:value-type="string" calcext:value-type="string" table:number-columns-spanned="3" table:number-rows-spanned="1">
            <text:p>EVALUACIÓN FINANCIERA</text:p>
          </table:table-cell>
          <table:covered-table-cell table:style-name="ce620"/>
          <table:covered-table-cell table:style-name="ce634"/>
          <table:table-cell/>
          <table:table-cell table:style-name="ce612" office:value-type="string" calcext:value-type="string" table:number-columns-spanned="3" table:number-rows-spanned="1">
            <text:p>EVALUACIÓN FINANCIERA</text:p>
          </table:table-cell>
          <table:covered-table-cell table:style-name="ce620"/>
          <table:covered-table-cell table:style-name="ce634"/>
          <table:table-cell table:number-columns-repeated="16375"/>
        </table:table-row>
        <table:table-row table:style-name="ro35">
          <table:table-cell table:number-columns-repeated="2"/>
          <table:table-cell table:style-name="ce617" office:value-type="string" calcext:value-type="string">
            <text:p>TEA nominal</text:p>
          </table:table-cell>
          <table:table-cell table:style-name="ce628" table:formula="of:=[$Flujo_Deuda.E4]" office:value-type="percentage" office:value="0.2163" calcext:value-type="percentage">
            <text:p>21.6%</text:p>
          </table:table-cell>
          <table:table-cell table:style-name="ce635"/>
          <table:table-cell/>
          <table:table-cell table:style-name="ce617" office:value-type="string" calcext:value-type="string">
            <text:p>TEA nominal</text:p>
          </table:table-cell>
          <table:table-cell table:style-name="ce628" table:formula="of:=[.D19]" office:value-type="percentage" office:value="0.2163" calcext:value-type="percentage">
            <text:p>21.6%</text:p>
          </table:table-cell>
          <table:table-cell table:style-name="ce635"/>
          <table:table-cell table:number-columns-repeated="16375"/>
        </table:table-row>
        <table:table-row table:style-name="ro28">
          <table:table-cell table:number-columns-repeated="2"/>
          <table:table-cell table:style-name="ce617" office:value-type="string" calcext:value-type="string">
            <text:p>TEA real</text:p>
          </table:table-cell>
          <table:table-cell table:style-name="ce628" table:formula="of:=((1+[.D19])/(1+[.D9]))-1" office:value-type="percentage" office:value="0.182021379980564" calcext:value-type="percentage">
            <text:p>18.2%</text:p>
          </table:table-cell>
          <table:table-cell table:style-name="ce635"/>
          <table:table-cell/>
          <table:table-cell table:style-name="ce617" office:value-type="string" calcext:value-type="string">
            <text:p>TEA real</text:p>
          </table:table-cell>
          <table:table-cell table:style-name="ce628" table:formula="of:=((1+[.H19])/(1+[.H9]))-1" office:value-type="percentage" office:value="0.182021379980564" calcext:value-type="percentage">
            <text:p>18.2%</text:p>
          </table:table-cell>
          <table:table-cell table:style-name="ce635"/>
          <table:table-cell table:number-columns-repeated="16375"/>
        </table:table-row>
        <table:table-row table:style-name="ro5">
          <table:table-cell table:number-columns-repeated="2"/>
          <table:table-cell table:style-name="ce617"/>
          <table:table-cell table:style-name="ce615"/>
          <table:table-cell table:style-name="ce635"/>
          <table:table-cell/>
          <table:table-cell table:style-name="ce617"/>
          <table:table-cell table:style-name="ce615"/>
          <table:table-cell table:style-name="ce635"/>
          <table:table-cell table:number-columns-repeated="16375"/>
        </table:table-row>
        <table:table-row table:style-name="ro5">
          <table:table-cell table:number-columns-repeated="2"/>
          <table:table-cell table:style-name="ce617" office:value-type="string" calcext:value-type="string">
            <text:p>VAEFI =</text:p>
          </table:table-cell>
          <table:table-cell table:style-name="ce629" table:formula="of:=NPV([.D20];[$'Flujos de Caja'.E27:.F27])" office:value-type="float" office:value="963.322633784986" calcext:value-type="float">
            <text:p><text:s/>963 </text:p>
          </table:table-cell>
          <table:table-cell table:style-name="ce635" office:value-type="string" calcext:value-type="string">
            <text:p>soles</text:p>
          </table:table-cell>
          <table:table-cell/>
          <table:table-cell table:style-name="ce617" office:value-type="string" calcext:value-type="string">
            <text:p>VAEFI =</text:p>
          </table:table-cell>
          <table:table-cell table:style-name="ce644" table:formula="of:=NPV([.H20];[$'Flujos de Caja'.E27:.F27])" office:value-type="float" office:value="963.322633784986" calcext:value-type="float">
            <text:p><text:s/>963 </text:p>
          </table:table-cell>
          <table:table-cell table:style-name="ce635" office:value-type="string" calcext:value-type="string">
            <text:p>soles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617"/>
          <table:table-cell table:style-name="ce615"/>
          <table:table-cell table:style-name="ce635"/>
          <table:table-cell/>
          <table:table-cell table:style-name="ce617"/>
          <table:table-cell table:style-name="ce615"/>
          <table:table-cell table:style-name="ce635"/>
          <table:table-cell table:number-columns-repeated="16375"/>
        </table:table-row>
        <table:table-row table:style-name="ro5">
          <table:table-cell table:number-columns-repeated="2"/>
          <table:table-cell table:style-name="ce617" office:value-type="string" calcext:value-type="string">
            <text:p>VAN Ajustado =VANF=</text:p>
          </table:table-cell>
          <table:table-cell table:style-name="ce630" table:formula="of:=[.D13]+[.D22]" office:value-type="float" office:value="136546.058102738" calcext:value-type="float">
            <text:p><text:s/>136,546 <text:s text:c="3"/></text:p>
          </table:table-cell>
          <table:table-cell table:style-name="ce635" office:value-type="string" calcext:value-type="string">
            <text:p>soles</text:p>
          </table:table-cell>
          <table:table-cell table:style-name="ce641"/>
          <table:table-cell table:style-name="ce617" office:value-type="string" calcext:value-type="string">
            <text:p>VAN Ajustado =VANF=</text:p>
          </table:table-cell>
          <table:table-cell table:style-name="ce630" table:formula="of:=[.H13]+[.H22]" office:value-type="float" office:value="228574.804619151" calcext:value-type="float">
            <text:p><text:s/>228,575 <text:s text:c="3"/></text:p>
          </table:table-cell>
          <table:table-cell table:style-name="ce635" office:value-type="string" calcext:value-type="string">
            <text:p>soles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617"/>
          <table:table-cell table:style-name="ce615"/>
          <table:table-cell table:style-name="ce635"/>
          <table:table-cell/>
          <table:table-cell table:style-name="ce617"/>
          <table:table-cell table:style-name="ce615"/>
          <table:table-cell table:style-name="ce635"/>
          <table:table-cell table:number-columns-repeated="16375"/>
        </table:table-row>
        <table:table-row table:style-name="ro5">
          <table:table-cell table:number-columns-repeated="2"/>
          <table:table-cell table:style-name="ce617" office:value-type="string" calcext:value-type="string">
            <text:p>TIRF Ajustado =</text:p>
          </table:table-cell>
          <table:table-cell table:style-name="ce631" table:formula="of:=IRR([$'Flujos de Caja'.D33:.I33])" office:value-type="percentage" office:value="0.586033203078177" calcext:value-type="percentage">
            <text:p>58.60 %</text:p>
          </table:table-cell>
          <table:table-cell table:style-name="ce635"/>
          <table:table-cell table:style-name="ce641"/>
          <table:table-cell table:style-name="ce617" office:value-type="string" calcext:value-type="string">
            <text:p>TIRF Ajustado =</text:p>
          </table:table-cell>
          <table:table-cell table:style-name="ce645" table:formula="of:=IRR([$'Flujos de Caja'.D33:.I33])" office:value-type="percentage" office:value="0.586033203078177" calcext:value-type="percentage">
            <text:p>59 %</text:p>
          </table:table-cell>
          <table:table-cell table:style-name="ce635"/>
          <table:table-cell table:number-columns-repeated="16375"/>
        </table:table-row>
        <table:table-row table:style-name="ro5">
          <table:table-cell table:number-columns-repeated="2"/>
          <table:table-cell table:style-name="ce618"/>
          <table:table-cell table:style-name="ce632"/>
          <table:table-cell table:style-name="ce636"/>
          <table:table-cell/>
          <table:table-cell table:style-name="ce618"/>
          <table:table-cell table:style-name="ce632"/>
          <table:table-cell table:style-name="ce636"/>
          <table:table-cell table:number-columns-repeated="16375"/>
        </table:table-row>
        <table:table-row table:style-name="ro5" table:number-rows-repeated="978">
          <table:table-cell table:number-columns-repeated="16384"/>
        </table:table-row>
        <table:table-row table:style-name="ro9" table:number-rows-repeated="1047570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expression table:name="MANO_DE_OBRA_M" table:base-cell-address="$'Resumen del escenario'.$A$1" table:expression="['file:///C:/Users/nohel/Downloads/PLANTILLA_FINALIZADA_VER.%20BETA%201.2%20xD%20OK.xlsm'#$Resumen.$H$13]"/>
        <table:named-expression table:name="PRECIO_DE_VENTA_M" table:base-cell-address="$'Resumen del escenario'.$A$1" table:expression="['file:///C:/Users/nohel/Downloads/PLANTILLA_FINALIZADA_VER.%20BETA%201.2%20xD%20OK.xlsm'#$Resumen.$H$12]"/>
        <table:named-expression table:name="Precio_Materia_Prima" table:base-cell-address="$'Resumen del escenario'.$A$1" table:expression="#REF!"/>
        <table:named-expression table:name="Precio_Queso_Maduro" table:base-cell-address="$'Resumen del escenario'.$A$1" table:expression="#REF!"/>
        <table:named-expression table:name="Precio_retablo_unidad" table:base-cell-address="$'Resumen del escenario'.$A$1" table:expression="#REF!"/>
        <table:named-expression table:name="TIRE" table:base-cell-address="$'Resumen del escenario'.$A$1" table:expression="#REF!"/>
        <table:named-expression table:name="TIRF" table:base-cell-address="$'Resumen del escenario'.$A$1" table:expression="#REF!"/>
        <table:named-expression table:name="Valor_de_venta" table:base-cell-address="$'Resumen del escenario'.$A$1" table:expression="#REF!"/>
        <table:named-expression table:name="VANE" table:base-cell-address="$'Resumen del escenario'.$A$1" table:expression="#REF!"/>
        <table:named-expression table:name="VANF" table:base-cell-address="$'Resumen del escenario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42P0" style:volatile="true">
      <number:text loext:blank-width-char=" "> S/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2P1" style:volatile="true">
      <number:text loext:blank-width-char=" "> S/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2P2" style:volatile="true">
      <number:text loext:blank-width-char=" "> S/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-"> S/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8P1" style:volatile="true">
      <number:text>-S/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8P2" style:volatile="true">
      <number:text loext:blank-width-char="-"> S/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5">
      <number:number number:decimal-places="1" number:min-decimal-places="1" number:min-integer-digits="1"/>
      <number:text>%</number:text>
    </number:percentage-style>
    <number:number-style style:name="N13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/>
    </number:number-style>
    <number:number-style style:name="N139">
      <number:text>S/</number:text>
      <number:number number:decimal-places="2" number:min-decimal-places="2" number:min-integer-digits="1" number:grouping="true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3" number:min-decimal-places="3" number:min-integer-digits="1"/>
    </number:number-style>
    <number:percentage-style style:name="N143">
      <number:number number:decimal-places="3" number:min-decimal-places="3" number:min-integer-digits="1"/>
      <number:text>%</number:text>
    </number:percentage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decimal-places="1" number:min-integer-digits="1" number:grouping="true"/>
    </number:number-style>
    <number:number-style style:name="N146">
      <number:text>S/. </number:text>
      <number:number number:decimal-places="2" number:min-decimal-places="2" number:min-integer-digits="1" number:grouping="true"/>
    </number:number-style>
    <number:number-style style:name="N147">
      <number:text>S/. </number:text>
      <number:number number:decimal-places="1" number:min-decimal-places="1" number:min-integer-digits="1" number:grouping="true"/>
    </number:number-style>
    <number:number-style style:name="N148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48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4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8">
      <number:text loext:blank-width-char=" "> </number:text>
      <number:text-content/>
      <number:text loext:blank-width-char=" 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27"/>
    <style:style style:name="Millares_20_3" style:display-name="Millares 3" style:family="table-cell" style:parent-style-name="Default" style:data-style-name="N134"/>
    <style:style style:name="Millares_20_4" style:display-name="Millares 4" style:family="table-cell" style:parent-style-name="Default" style:data-style-name="N127"/>
    <style:style style:name="Moneda_20_2" style:display-name="Moneda 2" style:family="table-cell" style:parent-style-name="Default" style:data-style-name="N142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/>
    <style:style style:name="Porcentaje_20_3" style:display-name="Porcentaje 3" style:family="table-cell" style:parent-style-name="Default" style:data-style-name="N10"/>
    <style:style style:name="Porcentaje_20_4" style:display-name="Porcentaje 4" style:family="table-cell" style:parent-style-name="Default" style:data-style-name="N10"/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ital_20_de_20_Trabajo_20__28_kw_29_" style:display-name="PageStyle_Capital de Trabajo (kw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on_20_y_20_VR" style:display-name="PageStyle_Depreciacion y V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bilidad" style:display-name="PageStyle_Sensibilid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" style:display-name="PageStyle_Resumen del escen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ON_20_INICIAL" style:display-name="PageStyle_INVERSION INI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20_de_20_ventas" style:display-name="PageStyle_Presupuesto de 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_20_BASE" style:display-name="PageStyle_SUELDO B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Ventas" style:display-name="PageStyle_Costos_Ven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20_Operativos" style:display-name="PageStyle_Gastos Oper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" style:display-name="PageStyle_Flujo_De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la" style:display-name="PageStyle_Planill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_20_" style:display-name="PageStyle_Costos_Unitario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20_por_20_mes" style:display-name="PageStyle_costos por m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RESULTADOS_20_" style:display-name="PageStyle_ESTADO RESULTADOS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GV" style:display-name="PageStyle_IG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Ku_20_COK" style:display-name="PageStyle_ Ku CO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s_20_de_20_Caja" style:display-name="PageStyle_Flujos de Caj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20_y_20_Kwacc_20_WACC" style:display-name="PageStyle_Ke y Kwacc 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dc:creator>Usuario</dc:creator>
    <meta:creation-date>2021-02-13T22:18:51</meta:creation-date>
    <dc:date>2021-07-08T23:31:55</dc:date>
    <meta:generator>LibreOffice/24.2.4.2$Linux_X86_64 LibreOffice_project/420$Build-2</meta:generator>
    <meta:document-statistic meta:table-count="23" meta:cell-count="3445" meta:object-count="0"/>
    <meta:user-defined meta:name="AppVersion">16.0300</meta:user-defined>
  </office:meta>
</office:document-meta>
</file>