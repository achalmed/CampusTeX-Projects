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>
      <loext:graphic-properties draw:fill="solid" draw:fill-color="#ffffff"/>
      <style:paragraph-properties fo:margin-left="0cm" fo:margin-top="0cm" fo:margin-bottom="0.494cm" style:contextual-spacing="false" fo:line-height="200%" fo:text-indent="0cm" style:auto-text-indent="false" fo:background-color="#ffffff"/>
    </style:style>
    <style:style style:name="P2" style:family="paragraph" style:parent-style-name="Standard" style:list-style-name="WWNum3">
      <loext:graphic-properties draw:fill="solid" draw:fill-color="#ffffff"/>
      <style:paragraph-properties fo:line-height="200%" fo:background-color="#ffffff"/>
    </style:style>
    <style:style style:name="P3" style:family="paragraph" style:parent-style-name="Standard">
      <style:paragraph-properties fo:line-height="200%"/>
      <style:text-properties style:font-name="Times New Roman" fo:font-size="12pt" fo:language="es" fo:country="MX" style:font-size-asian="12pt" style:font-size-complex="12pt"/>
    </style:style>
    <style:style style:name="T1" style:family="text">
      <style:text-properties fo:color="#504c48" loext:opacity="100%" style:font-name="Times New Roman" fo:font-size="12pt" fo:language="es" fo:country="MX" style:font-size-asian="12pt" style:language-asian="en" style:country-asian="US" style:font-name-complex="Helvetica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s" fo:country="MX" style:font-size-asian="12pt" style:font-size-complex="12pt"/>
    </style:style>
    <style:style style:name="T4" style:family="text">
      <style:text-properties fo:color="#3b3835" loext:opacity="100%" style:font-name="Times New Roman" fo:font-size="12pt" fo:language="es" fo:country="MX" style:font-size-asian="12pt" style:language-asian="en" style:country-asian="US" style:font-name-complex="Helvetica" style:font-size-complex="12pt"/>
    </style:style>
    <style:style style:name="T5" style:family="text">
      <style:text-properties fo:color="#3b3835" loext:opacity="100%" style:font-name="Times New Roman" fo:font-size="12pt" fo:language="es" fo:country="MX" style:font-name-asian="Symbol" style:font-size-asian="12pt" style:language-asian="en" style:country-asian="US" style:font-name-complex="Symbol" style:font-size-complex="12pt"/>
    </style:style>
    <style:style style:name="T6" style:family="text">
      <style:text-properties fo:color="#008ed2" loext:opacity="100%" style:font-name="Times New Roman" fo:font-size="12pt" fo:language="es" fo:country="MX" style:text-underline-style="solid" style:text-underline-width="auto" style:text-underline-color="font-color" style:font-size-asian="12pt" style:language-asian="en" style:country-asian="US" style:font-name-complex="Helvetica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list text:style-name="WWNum2">
          <text:list-item>
            <text:h text:style-name="P1" text:outline-level="3" loext:marker-style-name="T2"><text:span text:style-name="T1">Mi misión y visión personal</text:span><text:span text:style-name="T1"/></text:h>
          </text:list-item>
        </text:list>
        <text:list text:style-name="WWNum3">
          <text:list-item>
            <text:p text:style-name="P2" loext:marker-style-name="T2"><text:span text:style-name="T4">1. MI MISIÓN Y VISIÓNPERSONAL</text:span><text:span text:style-name="T4"/></text:p>
          </text:list-item>
          <text:list-item>
            <text:p text:style-name="P2"><text:a xlink:type="simple" xlink:href="https://image.slidesharecdn.com/mimisinyvisinpersonal-120527172955-phpapp02/95/mi-misin-y-visin-personal-2-728.jpg?cb=1338139839" office:target-frame-name="Mi misión personal Mi misión es lograr cumplir todas mis m..." xlink:show="replace" text:style-name="ListLabel_20_37" text:visited-style-name="ListLabel_20_37"><text:span text:style-name="T6">2. </text:span></text:a><text:span text:style-name="T4">Mi misión personal</text:span><text:span text:style-name="T5"></text:span><text:span text:style-name="T4"> Mi misión es lograr cumplir todas mis metas propuestas , llegando a ser una persona honesta ,teniendo éxito en todo lo que realice por los que me rodean y por mi misma ,pensando en un buen futuro , lleno de posibilidades , tratando siempre de aprovecharlas con la mejor actitud posible .Contando con mi familia en todo momento y obteniendo un apoyo por parte de ellos …</text:span></text:p>
          </text:list-item>
          <text:list-item>
            <text:p text:style-name="P2"><text:a xlink:type="simple" xlink:href="https://image.slidesharecdn.com/mimisinyvisinpersonal-120527172955-phpapp02/95/mi-misin-y-visin-personal-3-728.jpg?cb=1338139839" office:target-frame-name="Mi misión profesional Mi misión personal es graduarme con ..." xlink:show="replace" text:style-name="ListLabel_20_37" text:visited-style-name="ListLabel_20_37"><text:span text:style-name="T6">3. </text:span></text:a><text:span text:style-name="T4">Mi misión profesional</text:span><text:span text:style-name="T5"></text:span><text:span text:style-name="T4"> Mi misión personal es graduarme con éxito del colegio, cumpliendo todas mis propósitos educativos . Logrando ingresar a una universidad en donde pueda obtener un estudio superior para poder lograr un mejor nivel de vida para mi y mi familia .Tratando siempre de tener el mejor desempeño en el estudio y trabajo …</text:span></text:p>
          </text:list-item>
          <text:list-item>
            <text:p text:style-name="P2"><text:a xlink:type="simple" xlink:href="https://image.slidesharecdn.com/mimisinyvisinpersonal-120527172955-phpapp02/95/mi-misin-y-visin-personal-4-728.jpg?cb=1338139839" office:target-frame-name="Mi visión personal Mi visión personal es llegar hacer una ..." xlink:show="replace" text:style-name="ListLabel_20_37" text:visited-style-name="ListLabel_20_37"><text:span text:style-name="T6">4. </text:span></text:a><text:span text:style-name="T4">Mi visión personal</text:span><text:span text:style-name="T5"></text:span><text:span text:style-name="T4"> Mi visión personal es llegar hacer una mujer emprendedora y exitosa, conservando los valores que me han inculcado mis padres y personas a llegadas a mi, pensando siempre en los demás, teniendo éxito en todo lo que realice . Siendo siempre honesta …</text:span></text:p>
          </text:list-item>
          <text:list-item>
            <text:p text:style-name="P2"><text:a xlink:type="simple" xlink:href="https://image.slidesharecdn.com/mimisinyvisinpersonal-120527172955-phpapp02/95/mi-misin-y-visin-personal-5-728.jpg?cb=1338139839" office:target-frame-name="Mi visión profesional  Mi visión profesional es graduarme ..." xlink:show="replace" text:style-name="ListLabel_20_37" text:visited-style-name="ListLabel_20_37"><text:span text:style-name="T6">5. </text:span></text:a><text:span text:style-name="T4">Mi visión profesional </text:span><text:span text:style-name="T5"></text:span><text:span text:style-name="T4"> Mi visión profesional es graduarme de bachiller en este año obteniendo los mejores estudios ,para llegar a ser mejor persona, en 5 años me veo como una mujer emprendedora, luchadora, siempre logrando todas mis metas y propósitos profesionales, teniendo éxito en todo lo Que realice acompañada en todo momento de mi familia y personas que hagan parte de mi vida…</text:span></text:p>
          </text:list-item>
          <text:list-item>
            <text:p text:style-name="P2"><text:a xlink:type="simple" xlink:href="https://image.slidesharecdn.com/mimisinyvisinpersonal-120527172955-phpapp02/95/mi-misin-y-visin-personal-6-728.jpg?cb=1338139839" office:target-frame-name="Mi inicio yo naci en el año 1994 el 4 de julio en el hosp..." xlink:show="replace" text:style-name="ListLabel_20_37" text:visited-style-name="ListLabel_20_37"><text:span text:style-name="T6">6. </text:span></text:a><text:span text:style-name="T4">Mi inicio</text:span><text:span text:style-name="T5"></text:span><text:span text:style-name="T4"> yo naci en el año 1994 el 4 de julio en el hospital de las ferias , mi familia la conforman mi padre Fernando Molano Bayona ,mi madre Martha Janethe Parada Ballén , mi hermana Eliana Vanessa parada Ballén y mi sobrinito Santiago González parada…</text:span></text:p>
          </text:list-item>
          <text:list-item>
            <text:p text:style-name="P2"><text:a xlink:type="simple" xlink:href="https://image.slidesharecdn.com/mimisinyvisinpersonal-120527172955-phpapp02/95/mi-misin-y-visin-personal-7-728.jpg?cb=1338139839" office:target-frame-name="Que me sostiene en la vida Me sostiene las ganas de vivir ..." xlink:show="replace" text:style-name="ListLabel_20_37" text:visited-style-name="ListLabel_20_37"><text:span text:style-name="T6">7. </text:span></text:a><text:span text:style-name="T4">Que me sostiene en la vida</text:span><text:span text:style-name="T5"></text:span><text:span text:style-name="T4"> Me sostiene las ganas de vivir , el saber que cuento con el apoyo de mi familia y amigos , el querer salir adelante para poder lograr darle a mis padres un buena vida agradeciéndoles todo lo que han hecho por mi , el querer tener una buena vida dándome gusto en todo lo que yo quiera y en lo que mi familia quiera …</text:span></text:p>
          </text:list-item>
          <text:list-item>
            <text:p text:style-name="P2"><text:a xlink:type="simple" xlink:href="https://image.slidesharecdn.com/mimisinyvisinpersonal-120527172955-phpapp02/95/mi-misin-y-visin-personal-8-728.jpg?cb=1338139839" office:target-frame-name="Cuales son mis anhelos Mis anhelos es estudiar para llegar..." xlink:show="replace" text:style-name="ListLabel_20_37" text:visited-style-name="ListLabel_20_37"><text:span text:style-name="T6">8. </text:span></text:a><text:span text:style-name="T4">Cuales son mis anhelos</text:span><text:span text:style-name="T5"></text:span><text:span text:style-name="T4"> Mis anhelos es estudiar para llegar a ser auxiliar de vuelo internacional</text:span><text:span text:style-name="T5"></text:span><text:span text:style-name="T4"> Ser una mujer exitosa</text:span><text:span text:style-name="T5"></text:span><text:span text:style-name="T4"> Poder tener mi casa propia</text:span><text:span text:style-name="T5"></text:span><text:span text:style-name="T4"> Poder darle una buena vida a mi padres</text:span><text:span text:style-name="T5"></text:span><text:span text:style-name="T4"> Poder viajar mucho</text:span><text:span text:style-name="T5"></text:span><text:span text:style-name="T4"> Formar una familia propia</text:span></text:p>
          </text:list-item>
          <text:list-item>
            <text:p text:style-name="P2"><text:a xlink:type="simple" xlink:href="https://image.slidesharecdn.com/mimisinyvisinpersonal-120527172955-phpapp02/95/mi-misin-y-visin-personal-9-728.jpg?cb=1338139839" office:target-frame-name="que cosas bonitas tengo para dar Tengo para dar una gran s..." xlink:show="replace" text:style-name="ListLabel_20_37" text:visited-style-name="ListLabel_20_37"><text:span text:style-name="T6">9. </text:span></text:a><text:span text:style-name="T4">que cosas bonitas tengo para dar</text:span><text:span text:style-name="T5"></text:span><text:span text:style-name="T4"> Tengo para dar una gran sonrisa</text:span><text:span text:style-name="T5"></text:span><text:span text:style-name="T4"> Un buen consejo que te puede ayudar</text:span><text:span text:style-name="T5"></text:span><text:span text:style-name="T4"> Un persona que cuando la necesites te escuchara</text:span><text:span text:style-name="T5"></text:span><text:span text:style-name="T4"> Una amiga incondicional</text:span><text:span text:style-name="T5"></text:span><text:span text:style-name="T4"> Una persona con la cual puedas contar .</text:span></text:p>
          </text:list-item>
          <text:list-item>
            <text:p text:style-name="P2"><text:a xlink:type="simple" xlink:href="https://image.slidesharecdn.com/mimisinyvisinpersonal-120527172955-phpapp02/95/mi-misin-y-visin-personal-10-728.jpg?cb=1338139839" office:target-frame-name="que personas hay en mi vida Mi padre Mi madre Mi hermana..." xlink:show="replace" text:style-name="ListLabel_20_37" text:visited-style-name="ListLabel_20_37"><text:span text:style-name="T6">10. </text:span></text:a><text:span text:style-name="T4">que personas hay en mi vida</text:span><text:span text:style-name="T5"></text:span><text:span text:style-name="T4"> Mi padre</text:span><text:span text:style-name="T5"></text:span><text:span text:style-name="T4"> Mi madre</text:span><text:span text:style-name="T5"></text:span><text:span text:style-name="T4"> Mi hermana</text:span><text:span text:style-name="T5"></text:span><text:span text:style-name="T4"> Mi sobrinito</text:span><text:span text:style-name="T5"></text:span><text:span text:style-name="T4"> Mis tias , primos</text:span><text:span text:style-name="T5"></text:span><text:span text:style-name="T4"> Y sobretodo mis amigos</text:span></text:p>
          </text:list-item>
          <text:list-item>
            <text:p text:style-name="P2"><text:a xlink:type="simple" xlink:href="https://image.slidesharecdn.com/mimisinyvisinpersonal-120527172955-phpapp02/95/mi-misin-y-visin-personal-11-728.jpg?cb=1338139839" office:target-frame-name="Cosas de las que deseo desprenderme Yo quisiera desprender..." xlink:show="replace" text:style-name="ListLabel_20_37" text:visited-style-name="ListLabel_20_37"><text:span text:style-name="T6">11. </text:span></text:a><text:span text:style-name="T4">Cosas de las que deseo desprenderme</text:span><text:span text:style-name="T5"></text:span><text:span text:style-name="T4"> Yo quisiera desprenderme de:</text:span><text:span text:style-name="T5"></text:span><text:span text:style-name="T4"> Lo impulsiva que soy</text:span><text:span text:style-name="T5"></text:span><text:span text:style-name="T4"> Mi genio</text:span><text:span text:style-name="T5"></text:span><text:span text:style-name="T4"> Lo sensible</text:span><text:span text:style-name="T5"></text:span><text:span text:style-name="T4"> Lo orgullosa</text:span><text:span text:style-name="T5"></text:span><text:span text:style-name="T4"> lo bulliciosa</text:span><text:span text:style-name="T5"></text:span><text:span text:style-name="T4"> Lo grosera</text:span></text:p>
          </text:list-item>
          <text:list-item>
            <text:p text:style-name="P2"><text:a xlink:type="simple" xlink:href="https://image.slidesharecdn.com/mimisinyvisinpersonal-120527172955-phpapp02/95/mi-misin-y-visin-personal-12-728.jpg?cb=1338139839" office:target-frame-name="Cuales han sido mis logros Aprender cosas de mis amigos C..." xlink:show="replace" text:style-name="ListLabel_20_37" text:visited-style-name="ListLabel_20_37"><text:span text:style-name="T6">12. </text:span></text:a><text:span text:style-name="T4">Cuales han sido mis logros</text:span><text:span text:style-name="T5"></text:span><text:span text:style-name="T4"> Aprender cosas de mis amigos</text:span><text:span text:style-name="T5"></text:span><text:span text:style-name="T4"> Conservar los valores que mis padres me inculcaron</text:span><text:span text:style-name="T5"></text:span><text:span text:style-name="T4"> Llegar a grado once</text:span><text:span text:style-name="T5"></text:span><text:span text:style-name="T4"> Ser cada día mejor persona</text:span><text:span text:style-name="T5"></text:span><text:span text:style-name="T4"> Enseñarles y aprender cosas de mis padres</text:span></text:p>
          </text:list-item>
        </text:list>
        <text:p text:style-name="P3" loext:marker-style-name="T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line-height="200%" fo:text-align="center" style:justify-single-word="false" fo:keep-together="always" fo:keep-with-next="always"/>
      <style:text-properties fo:font-size="14pt" fo:language="es" fo:country="PE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list-style-name="WWNum2" style:list-level="2" style:class="text">
      <style:paragraph-properties fo:keep-together="always" fo:keep-with-next="always"/>
      <style:text-properties fo:font-weight="bold" style:font-weight-asian="bold" style:font-size-complex="12pt"/>
    </style:style>
    <style:style style:name="Heading_20_3" style:display-name="Heading 3" style:family="paragraph" style:parent-style-name="Standard" style:next-style-name="Standard" loext:linked-style-name="Heading_20_3_20_Char" style:auto-update="true" style:default-outline-level="3" style:list-style-name="WWNum2" style:list-level="3" style:class="text">
      <style:paragraph-properties fo:keep-together="always" fo:keep-with-next="always"/>
      <style:text-properties fo:language="es" fo:country="PE" fo:font-style="italic" fo:font-weight="bold" style:font-name-asian="Calibri1" style:font-family-asian="Calibri" style:font-family-generic-asian="system" style:font-pitch-asian="variable" style:language-asian="en" style:country-asian="US" style:font-style-asian="italic" style:font-weight-asian="bold" style:font-size-complex="12pt"/>
    </style:style>
    <style:style style:name="Heading_20_4" style:display-name="Heading 4" style:family="paragraph" style:parent-style-name="Standard" style:next-style-name="Standard" loext:linked-style-name="Heading_20_4_20_Char" style:auto-update="true" style:default-outline-level="4" style:list-style-name="WWNum2" style:list-level="4" style:class="text">
      <style:paragraph-properties fo:keep-together="always" fo:keep-with-next="always"/>
      <style:text-properties fo:font-weight="bold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auto-update="true" style:default-outline-level="5" style:list-style-name="WWNum1" style:list-level="5" style:class="text">
      <style:paragraph-properties fo:margin-left="0cm" fo:keep-together="always" fo:text-indent="1.27cm" style:auto-text-indent="false" fo:keep-with-next="always"/>
      <style:text-properties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/>
    </style:style>
    <style:style style:name="APA_20_Párrafo" style:display-name="APA Párrafo" style:family="paragraph" style:parent-style-name="Standard" loext:linked-style-name="APA_20_Párrafo_20_Car">
      <style:paragraph-properties fo:line-height="200%" fo:text-indent="1.27cm" style:auto-text-indent="false"/>
      <style:text-properties fo:language="es" fo:country="MX" fo:background-color="#ffffff" style:font-name-asian="Arial" style:font-family-asian="Arial" style:font-family-generic-asian="system" style:font-pitch-asian="variable" style:language-asian="en" style:country-asian="US" style:font-size-complex="12pt"/>
    </style:style>
    <style:style style:name="NOTAS_20_APA_20_Séptima_20_Edición" style:display-name="NOTAS APA Séptima Edición" style:family="paragraph" style:parent-style-name="Standard" loext:linked-style-name="NOTAS_20_APA_20_Séptima_20_Edición_20_Car" style:auto-update="true">
      <style:paragraph-properties fo:margin-left="1.27cm"/>
      <style:text-properties fo:font-size="10pt" style:font-size-asian="10pt"/>
    </style:style>
    <style:style style:name="TÍTULO_20_Tablas_20_y_20_Figuras" style:display-name="TÍTULO Tablas y Figuras" style:family="paragraph" style:parent-style-name="caption1" loext:linked-style-name="TÍTULO_20_Tablas_20_y_20_Figuras_20_Car" style:auto-update="true">
      <style:paragraph-properties fo:margin-left="1.27cm" fo:margin-top="0cm" fo:margin-bottom="0cm" style:contextual-spacing="false" fo:line-height="200%"/>
      <style:text-properties style:use-window-font-color="true" loext:opacity="0%" fo:font-size="12pt" style:font-size-asian="12pt" style:font-style-complex="normal"/>
    </style:style>
    <style:style style:name="caption1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 loext:linked-style-name="APA_20_Párrafo">
      <style:text-properties style:font-name="Times New Roman" fo:font-family="'Times New Roman'" style:font-family-generic="roman" fo:font-size="12pt" fo:language="es" fo:country="MX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AS_20_APA_20_Séptima_20_Edición_20_Car" style:display-name="NOTAS APA Séptima Edición Car" style:family="text" style:parent-style-name="Default_20_Paragraph_20_Font" loext:linked-style-name="NOTAS_20_APA_20_Séptima_20_Edición">
      <style:text-properties style:font-name="Times New Roman" fo:font-family="'Times New Roman'" style:font-family-generic="roman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Tablas_20_y_20_Figuras_20_Car" style:display-name="TÍTULO Tablas y Figuras Car" style:family="text" style:parent-style-name="Default_20_Paragraph_20_Font" loext:linked-style-name="TÍTULO_20_Tablas_20_y_20_Figuras">
      <style:text-properties style:font-name="Times New Roman" fo:font-family="'Times New Roman'" style:font-family-generic="roman" fo:font-size="12pt" fo:language="es" fo:country="ES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fo:font-size="14pt" fo:language="es" fo:country="PE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fo:font-size="12pt" fo:language="es" fo:country="PE" fo:font-style="italic" fo:font-weight="bold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F" style:font-family-generic-complex="system" style:font-pitch-complex="variable" style:font-size-complex="10pt" style:font-style-complex="italic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fo:font-size="12pt" fo:language="es" fo:country="ES" fo:font-style="italic" fo:font-weight="bold" style:font-name-asian="F" style:font-family-generic-asian="system" style:font-pitch-asian="variable" style:font-size-asian="12pt" style:language-asian="es" style:country-asian="ES" style:font-style-asian="italic" style:font-weight-asian="bold" style:font-name-complex="F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>
        <loext:char-complex-color loext:theme-type="light1" loext:color-type="theme"/>
      </style:text-properties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ffffff" loext:opacity="100%">
        <loext:char-complex-color loext:theme-type="light1" loext:color-type="theme"/>
      </style:text-properties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8ed2" loext:opacity="100%" style:font-name="Times New Roman" fo:font-family="'Times New Roman'" style:font-family-generic="roman" fo:font-size="12pt" fo:language="es" fo:country="MX" style:text-underline-style="solid" style:text-underline-width="auto" style:text-underline-color="font-color" style:font-size-asian="12pt" style:language-asian="en" style:country-asian="US" style:font-name-complex="Helvetica" style:font-family-complex="Helvetic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5:15:00</meta:creation-date>
    <meta:initial-creator>EDISON ACHALMA</meta:initial-creator>
    <dc:language>es-PE</dc:language>
    <dc:creator>Elmer Edison Achalma Mendoza</dc:creator>
    <dc:date>2023-12-31T17:36:48</dc:date>
    <meta:editing-cycles>2</meta:editing-cycles>
    <meta:editing-duration>P0D</meta:editing-duration>
    <meta:generator>LibreOffice/24.2.4.2$Linux_X86_64 LibreOffice_project/420$Build-2</meta:generator>
    <meta:document-statistic meta:table-count="0" meta:image-count="0" meta:object-count="0" meta:page-count="1" meta:paragraph-count="13" meta:word-count="580" meta:character-count="3015" meta:non-whitespace-character-count="2495"/>
    <meta:user-defined meta:name="AppVersion">15.0000</meta:user-defined>
    <meta:template xlink:type="simple" xlink:actuate="onRequest" xlink:title="Normal.dotm" xlink:href=""/>
  </office:meta>
</office:document-meta>
</file>