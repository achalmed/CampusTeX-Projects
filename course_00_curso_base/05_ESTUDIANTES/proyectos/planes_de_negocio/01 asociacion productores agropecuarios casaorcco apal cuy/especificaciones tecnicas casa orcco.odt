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 Narrow" svg:font-family="'Arial Narrow'"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ourier" svg:font-family="Courier" style:font-family-generic="roman"/>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List_20_Paragraph" style:list-style-name="WWNum2">
      <loext:graphic-properties draw:fill="solid" draw:fill-color="#ffffff"/>
      <style:paragraph-properties fo:line-height="200%" fo:orphans="0" fo:widows="0" fo:background-color="#ffffff"/>
    </style:style>
    <style:style style:name="P3" style:family="paragraph" style:parent-style-name="List_20_Paragraph">
      <loext:graphic-properties draw:fill="solid" draw:fill-color="#ffffff"/>
      <style:paragraph-properties fo:margin-left="1.323cm" fo:line-height="200%" fo:orphans="0" fo:widows="0" fo:text-indent="-1.323cm" style:auto-text-indent="false" fo:background-color="#ffffff"/>
    </style:style>
    <style:style style:name="P4" style:family="paragraph" style:parent-style-name="List_20_Paragraph">
      <loext:graphic-properties draw:fill="solid" draw:fill-color="#ffffff"/>
      <style:paragraph-properties fo:margin-left="1.752cm" fo:line-height="200%" fo:orphans="0" fo:widows="0" fo:background-color="#ffffff"/>
    </style:style>
    <style:style style:name="P5" style:family="paragraph" style:parent-style-name="List_20_Paragraph">
      <loext:graphic-properties draw:fill="solid" draw:fill-color="#ffffff"/>
      <style:paragraph-properties fo:margin-left="2.387cm" fo:line-height="200%" fo:orphans="0" fo:widows="0" fo:background-color="#ffffff"/>
    </style:style>
    <style:style style:name="P6" style:family="paragraph" style:parent-style-name="List_20_Paragraph" style:list-style-name="WWNum3">
      <loext:graphic-properties draw:fill="solid" draw:fill-color="#ffffff"/>
      <style:paragraph-properties fo:line-height="200%" fo:orphans="0" fo:widows="0" fo:background-color="#ffffff"/>
    </style:style>
    <style:style style:name="P7" style:family="paragraph" style:parent-style-name="List_20_Paragraph" style:list-style-name="WWNum4">
      <loext:graphic-properties draw:fill="solid" draw:fill-color="#ffffff"/>
      <style:paragraph-properties fo:line-height="200%" fo:orphans="0" fo:widows="0" fo:background-color="#ffffff"/>
    </style:style>
    <style:style style:name="P8" style:family="paragraph" style:parent-style-name="List_20_Paragraph" style:list-style-name="WWNum5">
      <style:paragraph-properties fo:line-height="200%" fo:text-align="justify" style:justify-single-word="false"/>
    </style:style>
    <style:style style:name="P9" style:family="paragraph" style:parent-style-name="List_20_Paragraph">
      <loext:graphic-properties draw:fill="solid" draw:fill-color="#ffffff"/>
      <style:paragraph-properties fo:margin-left="2.387cm" fo:line-height="200%" fo:text-align="justify" style:justify-single-word="false" fo:orphans="0" fo:widows="0" fo:background-color="#ffffff"/>
    </style:style>
    <style:style style:name="P10" style:family="paragraph" style:parent-style-name="Normal_20__28_Web_29_">
      <style:paragraph-properties fo:margin-left="1.501cm" fo:margin-top="0cm" fo:margin-bottom="0.423cm" style:contextual-spacing="false" fo:line-height="200%" fo:text-align="justify" style:justify-single-word="false">
        <style:tab-stops>
          <style:tab-stop style:position="-0.25cm"/>
        </style:tab-stops>
      </style:paragraph-properties>
    </style:style>
    <style:style style:name="P11" style:family="paragraph" style:parent-style-name="Normal_20__28_Web_29_">
      <style:paragraph-properties fo:margin-left="1.752cm" fo:margin-top="0cm" fo:margin-bottom="0.423cm" style:contextual-spacing="false" fo:line-height="200%" fo:text-align="justify" style:justify-single-word="false">
        <style:tab-stops>
          <style:tab-stop style:position="-0.25cm"/>
        </style:tab-stops>
      </style:paragraph-properties>
    </style:style>
    <style:style style:name="P12" style:family="paragraph" style:parent-style-name="Standard">
      <style:paragraph-properties fo:line-height="200%" fo:text-align="justify" style:justify-single-word="false"/>
    </style:style>
    <style:style style:name="P13" style:family="paragraph" style:parent-style-name="Standard">
      <style:paragraph-properties fo:line-height="200%" fo:text-align="justify" style:justify-single-word="false">
        <style:tab-stops>
          <style:tab-stop style:position="-0.129cm"/>
        </style:tab-stops>
      </style:paragraph-properties>
    </style:style>
    <style:style style:name="P14" style:family="paragraph" style:parent-style-name="Standard">
      <style:paragraph-properties fo:margin-left="0.501cm" fo:line-height="200%" fo:text-align="justify" style:justify-single-word="false">
        <style:tab-stops>
          <style:tab-stop style:position="-1.399cm"/>
          <style:tab-stop style:position="-0.129cm"/>
        </style:tab-stops>
      </style:paragraph-properties>
    </style:style>
    <style:style style:name="P15" style:family="paragraph" style:parent-style-name="Standard">
      <style:paragraph-properties fo:margin-left="0.501cm" fo:line-height="200%" fo:text-align="justify" style:justify-single-word="false"/>
    </style:style>
    <style:style style:name="P16" style:family="paragraph" style:parent-style-name="Standard">
      <style:paragraph-properties fo:margin-left="0.501cm" fo:line-height="200%" fo:text-align="justify" style:justify-single-word="false">
        <style:tab-stops>
          <style:tab-stop style:position="-3.251cm"/>
        </style:tab-stops>
      </style:paragraph-properties>
    </style:style>
    <style:style style:name="P17" style:family="paragraph" style:parent-style-name="Standard" style:list-style-name="WWNum1">
      <style:paragraph-properties fo:margin-left="1cm" fo:line-height="200%" fo:text-align="justify" style:justify-single-word="false" fo:orphans="0" fo:widows="0" fo:text-indent="-0.499cm" style:auto-text-indent="false">
        <style:tab-stops>
          <style:tab-stop style:position="1cm"/>
        </style:tab-stops>
      </style:paragraph-properties>
    </style:style>
    <style:style style:name="P18" style:family="paragraph" style:parent-style-name="Standard" style:list-style-name="WWNum1">
      <style:paragraph-properties fo:margin-left="1cm" fo:margin-right="0.086cm" fo:line-height="200%" fo:text-align="justify" style:justify-single-word="false" fo:orphans="0" fo:widows="0" fo:text-indent="-0.499cm" style:auto-text-indent="false">
        <style:tab-stops>
          <style:tab-stop style:position="1cm"/>
        </style:tab-stops>
      </style:paragraph-properties>
    </style:style>
    <style:style style:name="P19" style:family="paragraph" style:parent-style-name="Standard">
      <style:paragraph-properties fo:margin-left="0.501cm" fo:line-height="200%" fo:text-align="justify" style:justify-single-word="false">
        <style:tab-stops>
          <style:tab-stop style:position="1cm"/>
        </style:tab-stops>
      </style:paragraph-properties>
    </style:style>
    <style:style style:name="P20" style:family="paragraph" style:parent-style-name="Standard">
      <style:paragraph-properties fo:margin-left="1.501cm" fo:margin-right="-0.002cm" fo:margin-top="0.212cm" fo:margin-bottom="0cm" style:contextual-spacing="false" fo:line-height="200%" fo:text-align="justify" style:justify-single-word="false"/>
    </style:style>
    <style:style style:name="P21" style:family="paragraph" style:parent-style-name="Standard">
      <style:paragraph-properties fo:margin-left="1.501cm" fo:margin-right="-0.002cm" fo:line-height="200%" fo:text-align="justify" style:justify-single-word="false"/>
    </style:style>
    <style:style style:name="P22" style:family="paragraph" style:parent-style-name="Standard">
      <style:paragraph-properties fo:margin-left="1.501cm" fo:line-height="200%" fo:text-align="justify" style:justify-single-word="false">
        <style:tab-stops>
          <style:tab-stop style:position="-1.399cm"/>
          <style:tab-stop style:position="-0.129cm"/>
          <style:tab-stop style:position="1.141cm"/>
          <style:tab-stop style:position="2.41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style>
    <style:style style:name="P23" style:family="paragraph" style:parent-style-name="Standard">
      <style:paragraph-properties fo:margin-left="1.752cm" fo:line-height="200%" fo:text-align="justify" style:justify-single-word="false">
        <style:tab-stops>
          <style:tab-stop style:position="-1.399cm"/>
          <style:tab-stop style:position="-0.129cm"/>
          <style:tab-stop style:position="1.141cm"/>
          <style:tab-stop style:position="2.41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style>
    <style:style style:name="P24" style:family="paragraph" style:parent-style-name="Standard" style:list-style-name="">
      <style:paragraph-properties fo:margin-left="1.501cm" fo:line-height="200%" fo:text-align="justify" style:justify-single-word="false" fo:text-indent="0cm" style:auto-text-indent="false"/>
    </style:style>
    <style:style style:name="P25" style:family="paragraph" style:parent-style-name="Standard" style:list-style-name="">
      <style:paragraph-properties fo:margin-left="1.752cm" fo:line-height="200%" fo:text-align="justify" style:justify-single-word="false" fo:text-indent="0cm" style:auto-text-indent="false"/>
    </style:style>
    <style:style style:name="P26" style:family="paragraph" style:parent-style-name="Standard" style:list-style-name="">
      <style:paragraph-properties fo:margin-left="1.501cm" fo:line-height="200%" fo:text-align="justify" style:justify-single-word="false" fo:text-indent="0cm" style:auto-text-indent="false">
        <style:tab-stops>
          <style:tab-stop style:position="2.501cm"/>
        </style:tab-stops>
      </style:paragraph-properties>
    </style:style>
    <style:style style:name="P27" style:family="paragraph" style:parent-style-name="Standard" style:list-style-name="">
      <style:paragraph-properties fo:margin-left="1.501cm" fo:line-height="200%" fo:text-align="justify" style:justify-single-word="false" fo:text-indent="0cm" style:auto-text-indent="false">
        <style:tab-stops>
          <style:tab-stop style:position="1.251cm"/>
          <style:tab-stop style:position="2.501cm"/>
        </style:tab-stops>
      </style:paragraph-properties>
    </style:style>
    <style:style style:name="P28" style:family="paragraph" style:parent-style-name="Standard" style:list-style-name="">
      <style:paragraph-properties fo:margin-left="0cm" fo:line-height="200%" fo:text-align="justify" style:justify-single-word="false" fo:text-indent="1.501cm" style:auto-text-indent="false">
        <style:tab-stops>
          <style:tab-stop style:position="1.251cm"/>
          <style:tab-stop style:position="2.411cm"/>
        </style:tab-stops>
      </style:paragraph-properties>
    </style:style>
    <style:style style:name="P29" style:family="paragraph" style:parent-style-name="Standard" style:list-style-name="">
      <style:paragraph-properties fo:margin-left="1.501cm" fo:line-height="200%" fo:text-align="justify" style:justify-single-word="false" fo:text-indent="0cm" style:auto-text-indent="false">
        <style:tab-stops>
          <style:tab-stop style:position="1.251cm"/>
          <style:tab-stop style:position="2.411cm"/>
        </style:tab-stops>
      </style:paragraph-properties>
    </style:style>
    <style:style style:name="P30" style:family="paragraph" style:parent-style-name="Standard">
      <style:paragraph-properties fo:margin-left="0.751cm" fo:line-height="200%" fo:text-align="justify" style:justify-single-word="false"/>
    </style:style>
    <style:style style:name="P31" style:family="paragraph" style:parent-style-name="Standard">
      <style:paragraph-properties fo:margin-left="0.751cm" fo:line-height="200%" fo:text-align="justify" style:justify-single-word="false">
        <style:tab-stops>
          <style:tab-stop style:position="1.251cm"/>
        </style:tab-stops>
      </style:paragraph-properties>
    </style:style>
    <style:style style:name="P32" style:family="paragraph" style:parent-style-name="Standard" style:list-style-name="">
      <style:paragraph-properties fo:margin-left="1.752cm" fo:line-height="200%" fo:text-align="justify" style:justify-single-word="false" fo:text-indent="0cm" style:auto-text-indent="false">
        <style:tab-stops>
          <style:tab-stop style:position="15.111cm"/>
          <style:tab-stop style:position="16.381cm" style:type="char" style:char="."/>
        </style:tab-stops>
      </style:paragraph-properties>
    </style:style>
    <style:style style:name="P33" style:family="paragraph" style:parent-style-name="Standard" style:list-style-name="">
      <style:paragraph-properties fo:margin-left="1.752cm" fo:line-height="200%" fo:text-align="justify" style:justify-single-word="false" fo:text-indent="0cm" style:auto-text-indent="false">
        <style:tab-stops>
          <style:tab-stop style:position="16.381cm" style:type="char" style:char="."/>
        </style:tab-stops>
      </style:paragraph-properties>
    </style:style>
    <style:style style:name="P34" style:family="paragraph" style:parent-style-name="Standard">
      <style:paragraph-properties fo:margin-right="-0.002cm" fo:line-height="200%" fo:text-align="justify" style:justify-single-word="false">
        <style:tab-stops>
          <style:tab-stop style:position="1.752cm"/>
        </style:tab-stops>
      </style:paragraph-properties>
    </style:style>
    <style:style style:name="P35" style:family="paragraph" style:parent-style-name="Standard" style:list-style-name="">
      <style:paragraph-properties fo:margin-left="1.752cm" fo:line-height="200%" fo:text-align="justify" style:justify-single-word="false" fo:text-indent="-0.501cm" style:auto-text-indent="false">
        <style:tab-stops>
          <style:tab-stop style:position="-1.399cm"/>
          <style:tab-stop style:position="-0.129cm"/>
          <style:tab-stop style:position="1.141cm"/>
          <style:tab-stop style:position="2.411cm"/>
          <style:tab-stop style:position="3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style>
    <style:style style:name="P36" style:family="paragraph" style:parent-style-name="Standard" style:list-style-name="">
      <style:paragraph-properties fo:margin-left="1.752cm" fo:line-height="200%" fo:text-align="justify" style:justify-single-word="false" fo:text-indent="0cm" style:auto-text-indent="false">
        <style:tab-stops>
          <style:tab-stop style:position="3cm"/>
          <style:tab-stop style:position="16.381cm" style:type="char" style:char="."/>
        </style:tab-stops>
      </style:paragraph-properties>
    </style:style>
    <style:style style:name="P37" style:family="paragraph" style:parent-style-name="Standard">
      <style:paragraph-properties fo:margin-left="1.752cm" fo:line-height="200%" fo:text-align="justify" style:justify-single-word="false"/>
    </style:style>
    <style:style style:name="P38" style:family="paragraph" style:parent-style-name="Standard">
      <style:paragraph-properties fo:margin-left="1.752cm" fo:margin-right="-0.002cm" fo:margin-top="0.212cm" fo:margin-bottom="0cm" style:contextual-spacing="false" fo:line-height="200%" fo:text-align="justify" style:justify-single-word="false"/>
    </style:style>
    <style:style style:name="P39" style:family="paragraph" style:parent-style-name="Standard">
      <style:paragraph-properties fo:margin-left="1.752cm" fo:margin-right="-0.002cm" fo:line-height="200%" fo:text-align="justify" style:justify-single-word="false"/>
    </style:style>
    <style:style style:name="P40" style:family="paragraph" style:parent-style-name="Standard">
      <style:paragraph-properties fo:margin-left="0.751cm" fo:line-height="200%" fo:text-align="justify" style:justify-single-word="false">
        <style:tab-stops>
          <style:tab-stop style:position="2cm"/>
        </style:tab-stops>
      </style:paragraph-properties>
    </style:style>
    <style:style style:name="P41" style:family="paragraph" style:parent-style-name="Standard">
      <style:paragraph-properties fo:margin-left="1.752cm" fo:line-height="200%" fo:text-align="justify" style:justify-single-word="false">
        <style:tab-stops>
          <style:tab-stop style:position="2cm"/>
        </style:tab-stops>
      </style:paragraph-properties>
    </style:style>
    <style:style style:name="P42" style:family="paragraph" style:parent-style-name="Standard">
      <style:paragraph-properties fo:margin-left="0.751cm" fo:line-height="200%" fo:text-align="justify" style:justify-single-word="false" fo:text-indent="0.019cm" style:auto-text-indent="false"/>
    </style:style>
    <style:style style:name="P43" style:family="paragraph" style:parent-style-name="Standard">
      <style:paragraph-properties fo:margin-left="1.249cm" fo:line-height="200%" fo:text-align="justify" style:justify-single-word="false"/>
    </style:style>
    <style:style style:name="P44" style:family="paragraph" style:parent-style-name="Standard" style:list-style-name="">
      <style:paragraph-properties fo:margin-left="1.752cm" fo:line-height="200%" fo:text-align="justify" style:justify-single-word="false" fo:text-indent="0cm" style:auto-text-indent="false">
        <style:tab-stops>
          <style:tab-stop style:position="-1.399cm"/>
          <style:tab-stop style:position="1.141cm"/>
          <style:tab-stop style:position="2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style>
    <style:style style:name="P45" style:family="paragraph" style:parent-style-name="Standard">
      <loext:graphic-properties draw:fill="solid" draw:fill-color="#ffffff"/>
      <style:paragraph-properties fo:margin-left="1.752cm" fo:line-height="200%" fo:text-align="justify" style:justify-single-word="false" fo:background-color="#ffffff"/>
    </style:style>
    <style:style style:name="P46" style:family="paragraph" style:parent-style-name="Standard">
      <loext:graphic-properties draw:fill="solid" draw:fill-color="#ffffff"/>
      <style:paragraph-properties fo:margin-left="1.503cm" fo:line-height="200%" fo:orphans="0" fo:widows="0" fo:text-indent="-0.868cm" style:auto-text-indent="false" fo:background-color="#ffffff"/>
    </style:style>
    <style:style style:name="P47" style:family="paragraph" style:parent-style-name="Standard">
      <loext:graphic-properties draw:fill="solid" draw:fill-color="#ffffff"/>
      <style:paragraph-properties fo:line-height="200%" fo:orphans="0" fo:widows="0" fo:text-indent="0.751cm" style:auto-text-indent="false" fo:background-color="#ffffff"/>
    </style:style>
    <style:style style:name="P48" style:family="paragraph" style:parent-style-name="Standard">
      <loext:graphic-properties draw:fill="solid" draw:fill-color="#ffffff"/>
      <style:paragraph-properties fo:margin-left="1.75cm" fo:line-height="200%" fo:orphans="0" fo:widows="0" fo:background-color="#ffffff"/>
    </style:style>
    <style:style style:name="P49" style:family="paragraph" style:parent-style-name="Standard">
      <loext:graphic-properties draw:fill="solid" draw:fill-color="#ffffff"/>
      <style:paragraph-properties fo:margin-left="1.752cm" fo:line-height="200%" fo:orphans="0" fo:widows="0" fo:background-color="#ffffff"/>
    </style:style>
    <style:style style:name="P50" style:family="paragraph" style:parent-style-name="Standard">
      <loext:graphic-properties draw:fill="solid" draw:fill-color="#ffffff"/>
      <style:paragraph-properties fo:margin-left="1.752cm" fo:line-height="200%" fo:background-color="#ffffff"/>
    </style:style>
    <style:style style:name="P51" style:family="paragraph" style:parent-style-name="Standard">
      <style:paragraph-properties fo:margin-right="0.635cm" fo:margin-top="0.212cm" fo:margin-bottom="0cm" style:contextual-spacing="false"/>
    </style:style>
    <style:style style:name="P52" style:family="paragraph" style:parent-style-name="Text_20_body">
      <style:paragraph-properties fo:line-height="200%" fo:text-align="center" style:justify-single-word="false"/>
    </style:style>
    <style:style style:name="P53" style:family="paragraph" style:parent-style-name="Text_20_body">
      <style:paragraph-properties fo:line-height="200%"/>
    </style:style>
    <style:style style:name="P54" style:family="paragraph" style:parent-style-name="Text_20_body">
      <style:paragraph-properties fo:margin-left="0.501cm" fo:line-height="200%"/>
    </style:style>
    <style:style style:name="T1" style:family="text">
      <style:text-properties style:font-name="Times New Roman" fo:font-size="12pt" fo:font-style="normal" fo:font-weight="bold" style:font-size-asian="12pt" style:font-style-asian="normal" style:font-weight-asian="bold" style:font-size-complex="12pt" style:font-style-complex="italic"/>
    </style:style>
    <style:style style:name="T2" style:family="text">
      <style:text-properties style:font-name="Times New Roman" fo:font-size="12pt" fo:font-style="normal" fo:font-weight="bold" style:font-size-asian="12pt" style:font-style-asian="normal" style:font-weight-asian="bold" style:font-name-complex="Calibri1" style:font-size-complex="12pt" style:font-style-complex="italic"/>
    </style:style>
    <style:style style:name="T3" style:family="text">
      <style:text-properties style:font-name="Times New Roman" fo:font-size="12pt" fo:font-style="normal" style:font-size-asian="12pt" style:font-style-asian="normal" style:font-size-complex="12pt"/>
    </style:style>
    <style:style style:name="T4" style:family="text">
      <style:text-properties style:font-name="Times New Roman" fo:font-size="12pt" fo:font-style="normal" style:font-size-asian="12pt" style:font-style-asian="normal" style:font-size-complex="12pt" style:font-style-complex="italic"/>
    </style:style>
    <style:style style:name="T5" style:family="text">
      <style:text-properties style:font-name="Times New Roman" fo:font-size="12pt" style:font-size-asian="12pt" style:font-size-complex="12pt"/>
    </style:style>
    <style:style style:name="T6" style:family="text">
      <style:text-properties style:font-name="Times New Roman" fo:font-size="12pt" fo:language="es" fo:country="PE" fo:font-weight="bold" style:font-size-asian="12pt" style:font-weight-asian="bold" style:font-name-complex="Calibri1" style:font-size-complex="12pt" style:font-style-complex="italic"/>
    </style:style>
    <style:style style:name="T7" style:family="text">
      <style:text-properties style:font-name="Times New Roman" fo:font-size="12pt" style:text-underline-style="solid" style:text-underline-width="auto" style:text-underline-color="font-color" fo:font-weight="bold" style:font-size-asian="12pt" style:font-weight-asian="bold" style:font-size-complex="12pt"/>
    </style:style>
    <style:style style:name="T8" style:family="text">
      <style:text-properties style:font-name="Times New Roman" fo:font-size="12pt" fo:font-weight="bold" style:font-size-asian="12pt" style:font-weight-asian="bold" style:font-size-complex="12p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2pt" fo:letter-spacing="-0.007cm" fo:font-weight="bold" style:font-size-asian="12pt" style:font-weight-asian="bold" style:font-size-complex="12pt" style:font-weight-complex="bold"/>
    </style:style>
    <style:style style:name="T11" style:family="text">
      <style:text-properties style:font-name="Times New Roman" fo:font-size="12pt" fo:letter-spacing="-0.005cm" fo:font-weight="bold" style:font-size-asian="12pt" style:font-weight-asian="bold" style:font-size-complex="12pt"/>
    </style:style>
    <style:style style:name="T12" style:family="text">
      <style:text-properties style:font-name="Times New Roman" fo:font-size="12pt" fo:letter-spacing="-0.005cm" fo:font-weight="bold" style:font-size-asian="12pt" style:font-weight-asian="bold" style:font-size-complex="12pt" style:font-weight-complex="bold"/>
    </style:style>
    <style:style style:name="T13" style:family="text">
      <style:text-properties style:font-name="Times New Roman" fo:font-size="12pt" fo:letter-spacing="-0.005cm" style:font-size-asian="12pt" style:font-size-complex="12pt"/>
    </style:style>
    <style:style style:name="T14" style:family="text">
      <style:text-properties style:font-name="Times New Roman" fo:font-size="12pt" fo:letter-spacing="-0.005cm" fo:language="es" fo:country="MX" fo:font-weight="bold" style:font-size-asian="12pt" style:font-weight-asian="bold" style:font-size-complex="12pt"/>
    </style:style>
    <style:style style:name="T15" style:family="text">
      <style:text-properties style:font-name="Times New Roman" fo:font-size="12pt" fo:letter-spacing="-0.005cm" fo:language="es" fo:country="MX" style:font-size-asian="12pt" style:font-size-complex="12pt"/>
    </style:style>
    <style:style style:name="T16" style:family="text">
      <style:text-properties style:font-name="Times New Roman" fo:font-size="12pt" style:rfc-language-tag="es-ES-u-co-trad" fo:language="es" fo:country="ES" style:font-size-asian="12pt" style:font-size-complex="12pt"/>
    </style:style>
    <style:style style:name="T17" style:family="text">
      <style:text-properties style:font-name="Times New Roman" fo:font-size="12pt" style:rfc-language-tag="es-ES-u-co-trad" fo:language="es" fo:country="ES" style:font-size-asian="12pt" style:font-size-complex="12pt" style:font-style-complex="italic"/>
    </style:style>
    <style:style style:name="T18" style:family="text">
      <style:text-properties style:font-name="Times New Roman" fo:font-size="12pt" fo:language="es" fo:country="MX" fo:font-weight="bold" style:font-size-asian="12pt" style:font-weight-asian="bold" style:font-size-complex="12pt"/>
    </style:style>
    <style:style style:name="T19" style:family="text">
      <style:text-properties style:font-name="Times New Roman" fo:font-size="12pt" fo:language="es" fo:country="MX" style:font-size-asian="12pt" style:font-size-complex="12pt"/>
    </style:style>
    <style:style style:name="T20" style:family="text">
      <style:text-properties style:text-position="super 58%" style:font-name="Times New Roman" fo:font-size="12pt" style:font-size-asian="12pt" style:font-size-complex="12pt"/>
    </style:style>
    <style:style style:name="T21" style:family="text">
      <style:text-properties style:font-name="Arial" fo:font-size="8pt" fo:font-style="italic" fo:font-weight="bold" style:font-size-asian="8pt" style:font-style-asian="italic" style:font-weight-asian="bold" style:font-name-complex="Arial1" style:font-size-complex="8pt"/>
    </style:style>
    <style:style style:name="T22" style:family="text">
      <style:text-properties style:font-name="Arial" fo:font-size="8pt" fo:font-weight="bold" style:font-size-asian="8pt" style:font-weight-asian="bold" style:font-name-complex="Arial1" style:font-size-complex="8pt"/>
    </style:style>
    <style:style style:name="T23" style:family="text">
      <style:text-properties fo:font-size="8pt" style:font-size-asian="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2" loext:marker-style-name="T5"><text:span text:style-name="T1">ESPECIFICACIONES TÉCNICAS </text:span><text:span text:style-name="T1"/></text:p>
        <text:p text:style-name="P53" loext:marker-style-name="T5"><text:span text:style-name="T2">Proyecto: </text:span><text:span text:style-name="T6">“MEJORAMIENTO DE LA PRODUCCIÓN Y COMERCIALIZACIÓN DE CUYES EN LA ASOCIACIÓN DE PRODUCTORES LAMBRASHUAYCCO DE CASAORCCO (APAL), DISTRITO DE CARMEN ALTO, PROVINCIA HUAMANGA, REGIÓN AYACUCHO”</text:span></text:p>
        <text:p text:style-name="P12" loext:marker-style-name="T5"><text:bookmark text:name="_GoBack"/><text:span text:style-name="T7">GENERALIDADES</text:span><text:span text:style-name="T7"/></text:p>
        <text:p text:style-name="P12" loext:marker-style-name="T5"><text:span text:style-name="T5">Este documento técnico ha sido elaborado teniendo en consideración los siguientes criterios:</text:span><text:span text:style-name="T5"/></text:p>
        <text:p text:style-name="P13" loext:marker-style-name="T5"><text:span text:style-name="T8">A. Consideraciones Generales</text:span><text:span text:style-name="T8"/></text:p>
        <text:p text:style-name="P14" loext:marker-style-name="T5"><text:span text:style-name="T5">Conllevan a tomar y asumir criterios dirigidos al aspecto netamente constructivo al nivel de indicación, materiales y metodología de dosificación, procedimientos constructivos y otros, los cuales por su carácter general capacita el documento a const3.loituirse como auxiliar técnico en el proceso de construcción.</text:span><text:span text:style-name="T5"/></text:p>
        <text:p text:style-name="P15" loext:marker-style-name="T5"><text:span text:style-name="T8">Planos y especificaciones técnicas</text:span><text:span text:style-name="T8"/></text:p>
        <text:p text:style-name="P15" loext:marker-style-name="T5"><text:span text:style-name="T5">Los planos y especificaciones que formen arte de la contratación de la obra, son documentos de Ingeniería básica muestran el trabajo por hacer y en general representan el estado de diseño en la fecha de la contratación, dando un nivel de detalle suficiente para definir el alcance de los trabajos.</text:span><text:span text:style-name="T5"/></text:p>
        <text:p text:style-name="P15" loext:marker-style-name="T5"><text:span text:style-name="T5">El contratista deberá de revisar los planos, especificaciones e informes que le proporcione la institución o el Supervisor y advertir por escrito al Supervisor, antes de comenzar el trabajo o durante su ejecución, sobre cualquier error, omisión o discrepancia que llegue a descubrir en estos. Si las discrepancias requieren cambios al contrato, la entidad ejecutora notificara por Escrito a la Institución y al Supervisor tan pronto como advierta la situación.</text:span><text:span text:style-name="T5"/></text:p>
        <text:p text:style-name="P15" loext:marker-style-name="T5"><text:span text:style-name="T5">La omisión de cualquier referencia específica a cualquier parte del trabajo, que es razonablemente necesario para el adecuado funcionamiento del conjunto, no libera a la entidad ejecutora de la responsabilidad de suministrarlo e instalarlo.</text:span><text:span text:style-name="T5"/></text:p>
        <text:p text:style-name="P15" loext:marker-style-name="T5"><text:span text:style-name="T8">Protección del Trabajo y Limpieza</text:span><text:span text:style-name="T8"/></text:p>
        <text:p text:style-name="P15" loext:marker-style-name="T5"><text:span text:style-name="T5">La entidad ejecutora deberá proteger adecuadamente los equipos y materiales, así como todo trabajo terminado. De cualquier daño, desperfecto o deterioro que pueda ser causado por la naturaleza del trabajo en ejecución, hasta que todo el trabajo materia del Contrato haya sido debidamente terminado y aceptado por el Municipio.</text:span><text:span text:style-name="T5"/></text:p>
        <text:p text:style-name="P15" loext:marker-style-name="T5"><text:span text:style-name="T5">Todo trabajo terminado deberá quedar perfectamente limpio y libre de defectos. Si ocurriera cualquier daño, desperfecto o deterioro antes de la entrega y aceptación del trabajo, la entidad ejecutora hará las reparaciones necesarias a su propio costo y a satisfacción del Supervisor.</text:span><text:span text:style-name="T5"/></text:p>
        <text:p text:style-name="P12" loext:marker-style-name="T5"><text:span text:style-name="T8">B. Consideraciones Particulares</text:span><text:span text:style-name="T8"/></text:p>
        <text:p text:style-name="P16" loext:marker-style-name="T5"><text:span text:style-name="T5">Como su nombre lo indica, incluyen la gama de variaciones en cuanto a tratamiento y aplicación de las partidas, por su naturaleza son susceptibles a cambios debido a que:</text:span><text:span text:style-name="T5"/></text:p>
        <text:list text:style-name="WWNum1">
          <text:list-item>
            <text:p text:style-name="P17" loext:marker-style-name="T5"><text:span text:style-name="T5">El nivel estratigráfico y las distintas variaciones del mismo de acuerdo a una localización geográfica determinada, sugieren técnicas diversas en cuanto al tratamiento de la cimentación que el proyectista tendrá que definir de acuerdo al estudio de suelos.</text:span><text:span text:style-name="T5"/></text:p>
          </text:list-item>
          <text:list-item>
            <text:p text:style-name="P18" loext:marker-style-name="T5"><text:span text:style-name="T5">El clima y las variaciones atmosféricas inciden notablemente en el comportamiento de los materiales encauzando a un tratamiento especial en cuanto al proceso constructivo y dosificaciones en sí.</text:span><text:span text:style-name="T5"/></text:p>
          </text:list-item>
          <text:list-item>
            <text:p text:style-name="P18" loext:marker-style-name="T5"><text:span text:style-name="T5">La factibilidad de recursos en cuanto al campo de las instalaciones, sean estas: sanitarias, eléctricas, y/o especiales, que en cada una de las zonas de trabajo producen variaciones en cuanto a captación de servicios, razón por la cual es necesario adicionar a las especificaciones de instalaciones interiores lo referente a instalaciones exteriores.</text:span><text:span text:style-name="T5"/></text:p>
          </text:list-item>
          <text:list-item>
            <text:p text:style-name="P18" loext:marker-style-name="T5"><text:span text:style-name="T5">Las observaciones y experiencias obtenidas “in situ”, en el transcurso de las obras, debidamente implementadas, completaran el presente documento, previamente avaladas por el Supervisor.</text:span><text:span text:style-name="T5"/></text:p>
          </text:list-item>
        </text:list>
        <text:p text:style-name="P15" loext:marker-style-name="T5"><text:span text:style-name="T8">ALCANCES DE LAS ESPECIFICACIONES</text:span><text:span text:style-name="T8"/></text:p>
        <text:p text:style-name="P54" loext:marker-style-name="T5"><text:soft-page-break/><text:span text:style-name="T3">Las presentes especificaciones describen el trabajo que deberán realizarse para las obras diseñadas con cada módulo que pertenece al sistema de albañilería confinada tipo Sierra, éstos son espacios educativos y administrativos.</text:span><text:span text:style-name="T3"/></text:p>
        <text:p text:style-name="P54" loext:marker-style-name="T5"><text:span text:style-name="T3">Las especificaciones tienen un carácter general y donde sus términos no lo precisen, la entidad ejecutora tiene autoridad y responsabilidad en la obra respecto a los</text:span><text:span text:style-name="T4"> </text:span><text:span text:style-name="T3">procedimientos, calidad de los materiales y método de trabajo.</text:span></text:p>
        <text:p text:style-name="P54" loext:marker-style-name="T5"><text:span text:style-name="T3">Todos los trabajos sin excepción se desenvolverán dentro de las mejores prácticas constructivas a fin de asegurar su correcta ejecución y estarán sujetos a la aprobación y plena satisfacción del Supervisor.</text:span><text:span text:style-name="T3"/></text:p>
        <text:p text:style-name="P15" loext:marker-style-name="T5"><text:span text:style-name="T8">VALIDEZ DE ESPECIFICACIONES, PLANOS Y METRADOS</text:span><text:span text:style-name="T8"/></text:p>
        <text:p text:style-name="P54" loext:marker-style-name="T5"><text:span text:style-name="T3">En caso de existir divergencia entre los documentos del proyecto, los planos tienen primacía sobre las Especificaciones Técnicas, además el presupuesto será el determinante en las partidas a ejecutar.</text:span><text:span text:style-name="T3"/></text:p>
        <text:p text:style-name="P19" loext:marker-style-name="T5"><text:span text:style-name="T8">MATERIALES</text:span><text:span text:style-name="T8"/></text:p>
        <text:p text:style-name="P54" loext:marker-style-name="T5"><text:span text:style-name="T3">Todos los materiales a usarse serán de reconocida calidad, debiendo cumplir con todos los requerimientos indicados en las presentes especificaciones técnicas. Se deberá respetar todas las indicaciones en cuanto a la forma de emplearse, almacenamiento y protección de los mismos.</text:span><text:span text:style-name="T3"/></text:p>
        <text:p text:style-name="P54" loext:marker-style-name="T5"><text:span text:style-name="T3">Los materiales que vinieran envasados, deberán entrar en la obra en sus recipientes originales, intactos y debidamente sellados.</text:span><text:span text:style-name="T3"/></text:p>
        <text:p text:style-name="P54" loext:marker-style-name="T5"><text:span text:style-name="T3">El ensayo de materiales, pruebas, así como los muestreos se llevarán a cabo por cuenta de la entidad ejecutora, en la forma que se especifiquen y cuantas veces lo solicite oportunamente el Supervisor.</text:span><text:span text:style-name="T3"/></text:p>
        <text:p text:style-name="P19" loext:marker-style-name="T5"><text:span text:style-name="T8">PROGRAMACION DE LOS TRABAJOS</text:span><text:span text:style-name="T8"/></text:p>
        <text:p text:style-name="P54" loext:marker-style-name="T5"><text:span text:style-name="T3">La entidad ejecutora, de acuerdo al estudio de los planos y documentos del proyecto programará su trabajo de obra en forma tal que su avance sea sistemático y pueda lograr su terminación en forma ordenada, armónica y en el tiempo previsto.</text:span><text:span text:style-name="T3"/></text:p>
        <text:p text:style-name="P19" loext:marker-style-name="T5"><text:span text:style-name="T8">EQUIPO DE OBRA</text:span><text:span text:style-name="T8"/></text:p>
        <text:p text:style-name="P54" loext:marker-style-name="T5"><text:span text:style-name="T3">El equipo a utilizar en la obra, estará en proporción a la magnitud de la obra y debe ser el suficiente para que la obra no sufra retrasos en su ejecución. Comprende la maquinaria necesaria para la obra, así como el equipo auxiliar.</text:span><text:span text:style-name="T3"/></text:p>
        <text:list text:style-name="WWNum2">
          <text:list-item>
            <text:p text:style-name="P2" loext:marker-style-name="T5"><text:span text:style-name="T10">TRABAJOS PRELIMINARES</text:span><text:span text:style-name="T10"/></text:p>
          </text:list-item>
        </text:list>
        <text:p text:style-name="P46" loext:marker-style-name="T5"><text:span text:style-name="T11">01.01 LIMPIEZA DEL TERRENO MANUAL.</text:span><text:span text:style-name="T11"/></text:p>
        <text:p text:style-name="P20" loext:marker-style-name="T5"><text:span text:style-name="T8">DESCRIPCION</text:span><text:span text:style-name="T8"/></text:p>
        <text:p text:style-name="P20" loext:marker-style-name="T5"><text:span text:style-name="T5">Se realizarán esta partida de limpieza del terreno manual en toda el área donde se fundarán las estructuras propuestas, estas se depositarán en un lugar adecuado para luego ser eliminados con maquinaria pesada (volquete, cargador frontal) hasta el lugar ubicado como botadero, complementando los movimientos de tierra descritos en forma específica.</text:span><text:span text:style-name="T5"/></text:p>
        <text:p text:style-name="P20" loext:marker-style-name="T5"><text:span text:style-name="T5">Se prestara particular atención el hecho de que por tratarse de los trabajos en zona urbana, no deberá apilarse los excedentes en forma tal que ocasionen innecesarias interrupciones a los tránsitos peatonal o vehicular, así como molestias con el polvo que generan las tareas de apilamiento, carguío y transporte. </text:span><text:span text:style-name="T5"/></text:p>
        <text:p text:style-name="P21" loext:marker-style-name="T5"><text:span text:style-name="T8">METODO DE MEDICION </text:span><text:span text:style-name="T8"/></text:p>
        <text:p text:style-name="P10" loext:marker-style-name="T5"><text:span text:style-name="T16">Metro cuadrado (m2).</text:span><text:span text:style-name="T16"/></text:p>
        <text:p text:style-name="P21" loext:marker-style-name="T5"><text:span text:style-name="T8">FORMA </text:span><text:span text:style-name="T9">DE</text:span><text:span text:style-name="T8"> PAGO </text:span></text:p>
        <text:p text:style-name="P22" loext:marker-style-name="T5"><text:soft-page-break/><text:span text:style-name="T16">Se área trabaja se pagará en Nuevos Soles/Metro Cúadrado </text:span><text:span text:style-name="T17">(SI.m2), </text:span><text:span text:style-name="T16">que constituirá compensación por insumos, equipo, mano de obra, herramientas e imprevistos necesarios para completar el ítem.</text:span></text:p>
        <text:list text:continue-numbering="true" text:style-name="WWNum2">
          <text:list-item>
            <text:list>
              <text:list-item>
                <text:p text:style-name="P2" loext:marker-style-name="T5"><text:span text:style-name="T11"><text:s/>TRAZO NIVELACION Y REPLANTEO.</text:span><text:span text:style-name="T11"/></text:p>
              </text:list-item>
            </text:list>
          </text:list-item>
        </text:list>
        <text:p text:style-name="P24" loext:marker-style-name="T5"><text:span text:style-name="T8">DESCRIPCION</text:span><text:span text:style-name="T8"/></text:p>
        <text:p text:style-name="P24" loext:marker-style-name="T5"><text:span text:style-name="T5">La entidad ejecutora deberá realizar los trabajos trazo nivelación y replanteo necesarios para llevar al terreno la ubicación y fijación de ejes, líneas de referencia y niveles establecidos en los planos por medio de puntos ubicados en elementos inamovibles. Comprende el replanteo de los planos en el terreno y nivelado fijando los ejes de referencia y las estacas de nivelación.</text:span><text:span text:style-name="T5"/></text:p>
        <text:p text:style-name="P26" loext:marker-style-name="T5"><text:span text:style-name="T5">Se marcará los ejes y a continuación se marcará las líneas del ancho de las cimentaciones en armonía con los planos de Arquitectura y Estructuras, estos ejes deberán ser aprobados por la supervisión, antes que se inicie con las excavaciones.</text:span><text:span text:style-name="T5"/></text:p>
        <text:p text:style-name="P21" loext:marker-style-name="T5"><text:span text:style-name="T9">METODO DE MEDICIÒN</text:span><text:span text:style-name="T9"/></text:p>
        <text:p text:style-name="P27" loext:marker-style-name="T5"><text:span text:style-name="T5">El método de medición será en metros cuadrados (m</text:span><text:span text:style-name="T20">2</text:span><text:span text:style-name="T5">), de área trazada y replanteada, de acuerdo al avance de la obra.</text:span></text:p>
        <text:p text:style-name="P28" loext:marker-style-name="T5"><text:span text:style-name="T9">FORMA DE PAGO</text:span><text:span text:style-name="T9"/></text:p>
        <text:p text:style-name="P29" loext:marker-style-name="T5"><text:span text:style-name="T5">El pago de estos trabajos se hará por m</text:span><text:span text:style-name="T20">2</text:span><text:span text:style-name="T5">, cuyos precios unitarios se encuentran definidos en el presupuesto. La entidad ejecutora velará porque ella se ejecute permanentemente durante el desarrollo de la obra, hasta su culminación.</text:span></text:p>
        <text:p text:style-name="P3" loext:marker-style-name="T5"><text:span text:style-name="T12"><text:s/>MOVIMIENTO DE TIERRAS</text:span><text:span text:style-name="T12"/></text:p>
        <text:p text:style-name="P30" loext:marker-style-name="T5"><text:span text:style-name="T8">DESCRIPCION</text:span><text:span text:style-name="T8"/></text:p>
        <text:p text:style-name="P30" loext:marker-style-name="T5"><text:span text:style-name="T5">El movimiento de tierras comprende las secuencias de excavación, acarreo del material relleno y eliminación del material excedente hasta alcanzar los niveles indicados en los planos y obras enterradas; el presupuesto de estructuras involucra los movimiento de tierras que ameritan ejecutar la cimentación y obras de tierras masivos para llegar a niveles de vaciado de falso piso y/o rasante, que se detallan en los planos de obra.</text:span><text:span text:style-name="T5"/></text:p>
        <text:p text:style-name="P31" loext:marker-style-name="T5"><text:span text:style-name="T5">De encontrar en el sub – suelo elementos no previstos en el estudio de suelos, se procederá de acuerdo al reglamento a fin de solucionar el inconveniente de constatarse que las condiciones del terreno para cimentación son diferentes a lo que indica el estudio de suelos se notificará al ingeniero supervisor a fin que tome las consideraciones pertinentes.</text:span><text:span text:style-name="T5"/></text:p>
        <text:p text:style-name="P47" loext:marker-style-name="T5"><text:span text:style-name="T11">01.03 EXCAVAXCION DE ZANJAS PARA MURO APROM=0.50 HMÁX&lt;= 0.80M EN T.N.</text:span><text:span text:style-name="T11"/></text:p>
        <text:p text:style-name="P32" loext:marker-style-name="T5"><text:span text:style-name="T8">DESCRIPCION</text:span><text:span text:style-name="T8"/></text:p>
        <text:p text:style-name="P32" loext:marker-style-name="T5"><text:span text:style-name="T5">Las excavaciones para cimientos corridos serán del tamaño exacto al diseño de estas estructuras, se quitarán los moldes laterales cuando la compactación del terreno lo permita y no exista riesgo y peligro de derrumbes o de filtraciones de agua.</text:span><text:span text:style-name="T5"/></text:p>
        <text:p text:style-name="P33" loext:marker-style-name="T5"><text:span text:style-name="T5">Antes del procedimiento de vaciado, se deberá aprobar la excavación; asimismo no se permitirá ubicar zapatas, cimientos y sardineles sobre material de relleno sin una consolidación adecuada, de acuerdo a la maquinaria o implementos.</text:span><text:span text:style-name="T5"/></text:p>
        <text:p text:style-name="P33" loext:marker-style-name="T5"><text:span text:style-name="T5">Para la tarea se estima capas como máximo de 20 cm.</text:span><text:span text:style-name="T5"/></text:p>
        <text:p text:style-name="P33" loext:marker-style-name="T5"><text:span text:style-name="T5">El fondo de toda excavación para cimentación debe quedar limpio y parejo, se deberá retirar el material suelto, si se excede en la profundidad de la excavación, no se permitirá el relleno con material suelto, lo deberá hacer con una mezcla de concreto ciclópeo 1:12 como mínimo o en su defecto con hormigón. </text:span><text:span text:style-name="T5"/></text:p>
        <text:p text:style-name="P33" loext:marker-style-name="T5"><text:span text:style-name="T5">Si la resistencia fuera menor a la contemplada con el cálculo y la Napa Freática y sus posibles variaciones caigan dentro de la profundidad de las excavaciones, el Constructor notificará de inmediato y por escrito al supervisor quien resolverá lo conveniente.</text:span><text:span text:style-name="T5"/></text:p>
        <text:p text:style-name="P33" loext:marker-style-name="T5"><text:span text:style-name="T5">En el caso de que al momento de excavar se encuentre la Napa a poca profundidad, previa verificación del Ingeniero se debe considerar la impermeabilización de la cimentación con asfalto líquido, así como de ser necesario el bombeo de la Napa Freática y en algunos casos un aditivo acelerante de la fragua del concreto de acuerdo a lo indicado en los planos y/o presupuesto.</text:span><text:span text:style-name="T5"/></text:p>
        <text:p text:style-name="P34" loext:marker-style-name="T5"><text:soft-page-break/><text:span text:style-name="T9"><text:s/>METODO DE MEDICIÒN</text:span><text:span text:style-name="T9"/></text:p>
        <text:p text:style-name="P33" loext:marker-style-name="T5"><text:span text:style-name="T5">El método de medición será en metros cúbicos (m</text:span><text:span text:style-name="T20">3</text:span><text:span text:style-name="T5">), excavados aprobados por el supervisor.</text:span></text:p>
        <text:p text:style-name="P35" loext:marker-style-name="T5"><text:span text:style-name="T8"><text:s/>FORMA DE PAGO </text:span><text:span text:style-name="T8"/></text:p>
        <text:p text:style-name="P36" loext:marker-style-name="T5"><text:span text:style-name="T5">El pago de estos trabajos se hará por m</text:span><text:span text:style-name="T20">3</text:span><text:span text:style-name="T5">, cuyos precios unitarios se encuentran definidos en el presupuesto. </text:span></text:p>
        <text:p text:style-name="P37" loext:marker-style-name="T5"><text:span text:style-name="T11">01.04 RELLENO CON MATERIAL PROPIO SELECCIONADO</text:span><text:span text:style-name="T11"/></text:p>
        <text:p text:style-name="P37" loext:marker-style-name="T5"><text:span text:style-name="T8">DESCRIPCIÓN</text:span><text:span text:style-name="T8"/></text:p>
        <text:p text:style-name="P37" loext:marker-style-name="T5"><text:span text:style-name="T5">Es el relleno con material extraído de la excavación de plateas, debiendo ser apisonados y regados con agua, que permita su máxima compactación.</text:span><text:span text:style-name="T5"/></text:p>
        <text:p text:style-name="P37" loext:marker-style-name="T5"><text:span text:style-name="T5">Para alcanzar los perfiles del proyecto, se ha considerado rellenos con material propio, cuyo transporte sea de un máximo de 20 mts. De distancia desde el lugar de procedencia.</text:span><text:span text:style-name="T5"/></text:p>
        <text:p text:style-name="P37" loext:marker-style-name="T5"><text:span text:style-name="T5">Los rellenos deben efectuarse mediante capas de 30 cm. De espesor, regadas y apisonadas. </text:span><text:span text:style-name="T5"/></text:p>
        <text:p text:style-name="P37" loext:marker-style-name="T5"><text:span text:style-name="T5">Se utilizarán herramientas básicas como picos, lampas, carretillas.</text:span><text:span text:style-name="T5"/></text:p>
        <text:p text:style-name="P37" loext:marker-style-name="T5"><text:span text:style-name="T8">UNIDAD DE MEDIDA</text:span><text:span text:style-name="T8"/></text:p>
        <text:p text:style-name="P37" loext:marker-style-name="T5"><text:span text:style-name="T5">En Metro cúbico (M3) </text:span><text:span text:style-name="T5"/></text:p>
        <text:p text:style-name="P37" loext:marker-style-name="T5"><text:span text:style-name="T8">NORMA DE MEDICIÓN</text:span><text:span text:style-name="T8"/></text:p>
        <text:p text:style-name="P37" loext:marker-style-name="T5"><text:span text:style-name="T5">Se mide por la unidad de (M3) con aproximación de 02 decimales decir por área (largo x ancho x altura) la medición será el metrado realmente ejecutado con la conformidad del ingeniero residente.</text:span><text:span text:style-name="T5"/></text:p>
        <text:p text:style-name="P37" loext:marker-style-name="T5"><text:span text:style-name="T8">FORMA DE PAGO</text:span><text:span text:style-name="T8"/></text:p>
        <text:p text:style-name="P37" loext:marker-style-name="T5"><text:span text:style-name="T5">El pago se efectuará al precio unitario del presupuesto por (M3) entendiéndose que dicho precio y pago constituirá compensación completa para toda la mano de obra, equipo, herramientas y demás conceptos que completan esta partida.</text:span><text:span text:style-name="T5"/></text:p>
        <text:p text:style-name="P48" loext:marker-style-name="T5"><text:span text:style-name="T11">01.04 ACARREO DE MATERIAL EXCEDENTE PARA SER UTILIZADO EN RELLENOS </text:span><text:span text:style-name="T11"/></text:p>
        <text:p text:style-name="P48" loext:marker-style-name="T5"><text:span text:style-name="T11">D&gt;150M</text:span><text:span text:style-name="T11"/></text:p>
        <text:p text:style-name="P38" loext:marker-style-name="T5"><text:span text:style-name="T8">DESCRIPCION</text:span><text:span text:style-name="T8"/></text:p>
        <text:p text:style-name="P38" loext:marker-style-name="T5"><text:span text:style-name="T5">Se eliminará los materiales sobrantes de las diferentes etapas constructivas con carretilla hasta el lugar ubicado como botadero, complementando los movimientos de tierra descritos en forma específica.</text:span><text:span text:style-name="T5"/></text:p>
        <text:p text:style-name="P38" loext:marker-style-name="T5"><text:span text:style-name="T5">Se prestara particular atención el hecho de que por tratarse de los trabajos en zona urbana, no deberá apilarse los excedentes en forma tal que ocasionen innecesarias interrupciones a los tránsitos peatonal o vehicular, así como molestias con el polvo que generan las tareas de apilamiento, carguío y transporte que forman parte de la sub partida. El destino final de los materiales excedentes, será en un lugar que tenga licencia municipal y disponibilidad.</text:span><text:span text:style-name="T5"/></text:p>
        <text:p text:style-name="P39" loext:marker-style-name="T5"><text:soft-page-break/><text:span text:style-name="T8">METODO DE MEDICION </text:span><text:span text:style-name="T8"/></text:p>
        <text:p text:style-name="P11" loext:marker-style-name="T5"><text:span text:style-name="T16">Metro cúbico (m3).</text:span><text:span text:style-name="T16"/></text:p>
        <text:p text:style-name="P39" loext:marker-style-name="T5"><text:span text:style-name="T8">FORMA </text:span><text:span text:style-name="T9">DE</text:span><text:span text:style-name="T8"> PAGO </text:span></text:p>
        <text:p text:style-name="P23" loext:marker-style-name="T5"><text:span text:style-name="T16">Se medirá el volumen de eliminación de material excedente, que se pagará en Nuevos Soles/Metro Cúbico </text:span><text:span text:style-name="T17">(SI.m3), </text:span><text:span text:style-name="T16">que constituirá compensación por insumos, equipo, mano de obra, herramientas e imprevistos necesarios para completar el ítem.</text:span></text:p>
        <text:p text:style-name="P30" loext:marker-style-name="T5"><text:span text:style-name="T12">02 CIMIENTOS Y SOBRECIMIENTOS</text:span><text:span text:style-name="T12"/></text:p>
        <text:p text:style-name="P30" loext:marker-style-name="T5"><text:span text:style-name="T8">DESCRIPCION</text:span><text:span text:style-name="T8"/></text:p>
        <text:p text:style-name="P30" loext:marker-style-name="T5"><text:span text:style-name="T5">Consiste en realizar la construcción de los cimientos, los cuales serán con piedra de 8” de diámetro aproximadamente y mezcladas con torta de barro; este llenado se hará por capas de aproximadamente 20 cm. Hasta llegar a la altura deseada, colmatando los orificios que quedan por el alineamiento de las piedras y así no tener la filtración de agua en un porcentaje mínimo.</text:span><text:span text:style-name="T5"/></text:p>
        <text:p text:style-name="P30" loext:marker-style-name="T5"><text:span text:style-name="T5">Las medidas de los cimientos están indicadas en los planos.</text:span><text:span text:style-name="T5"/></text:p>
        <text:p text:style-name="P30" loext:marker-style-name="T5"><text:span text:style-name="T9">MATERIALES</text:span><text:span text:style-name="T9"/></text:p>
        <text:p text:style-name="P30" loext:marker-style-name="T5"><text:span text:style-name="T9">a. Torta de barro</text:span><text:span text:style-name="T9"/></text:p>
        <text:p text:style-name="P30" loext:marker-style-name="T5"><text:span text:style-name="T5">Barro mezclado con paja, lo que permitirá la cohesión entre las piedras labradas </text:span><text:span text:style-name="T5"/></text:p>
        <text:p text:style-name="P30" loext:marker-style-name="T5"><text:span text:style-name="T9">b. Piedra Mediana</text:span><text:span text:style-name="T9"/></text:p>
        <text:p text:style-name="P40" loext:marker-style-name="T5"><text:span text:style-name="T5">Este material procedente de cantera o de río será resistente a la abrasión, de partículas duras. No se permitirá el uso de piedras blandas ó calcáreas o rocas descompuestas. Las piedras deben ser limpias, libres de sustancias orgánicas ó perjudiciales que puedan deteriorar el concreto.</text:span><text:span text:style-name="T5"/></text:p>
        <text:p text:style-name="P42" loext:marker-style-name="T5"><text:span text:style-name="T9">d. Agua</text:span><text:span text:style-name="T9"/></text:p>
        <text:p text:style-name="P40" loext:marker-style-name="T5"><text:span text:style-name="T5">El agua para la preparación del concreto será limpia, fresca, potable, libre de sustancias perjudiciales tales como aceites, álcalis, sales, materias orgánicas u otras sustancias que puedan perjudicar al concreto. No deben contener partículas de carbón ni fibras vegetales. </text:span><text:span text:style-name="T5"/></text:p>
        <text:p text:style-name="P40" loext:marker-style-name="T5"><text:span text:style-name="T9">2.01 CIMIENTOS CORRIDOS DE PIRDRA GRANDE Y BARRO</text:span><text:span text:style-name="T9"/></text:p>
        <text:p text:style-name="P43" loext:marker-style-name="T5"><text:span text:style-name="T11">DESCRIPCION</text:span><text:span text:style-name="T11"/></text:p>
        <text:p text:style-name="P37" loext:marker-style-name="T5"><text:span text:style-name="T13">Consiste en realizar la construcción de los cimientos, los cuales serán con piedra de 8” de diámetro aproximadamente y mezcladas con torta de barro; este llenado se hará por capas de aproximadamente 20 cm. Hasta llegar a la altura deseada, colmatando los orificios que quedan por el alineamiento de las piedras y así no tener la filtración de agua en un porcentaje mínimo.</text:span><text:span text:style-name="T13"/></text:p>
        <text:p text:style-name="P37" loext:marker-style-name="T5"><text:span text:style-name="T13">Las medidas de los cimientos están indicadas en los planos.</text:span><text:span text:style-name="T13"/></text:p>
        <text:p text:style-name="P37" loext:marker-style-name="T5"><text:span text:style-name="T13">Sólo podrá emplearse agua potable o agua limpia de buena calidad, libre de impurezas que puedan dañar el concreto; se humedecerá las zanjas antes de proceder al vaciado de concreto de en una capa de por lo menos 10 cm. de espesor. </text:span><text:span text:style-name="T13"/></text:p>
        <text:p text:style-name="P39" loext:marker-style-name="T5"><text:span text:style-name="T9">METODO DE MEDICION</text:span><text:span text:style-name="T9"/></text:p>
        <text:p text:style-name="P37" loext:marker-style-name="T5"><text:soft-page-break/><text:span text:style-name="T13">El pago de estos trabajos se hará por m3, y el pago constituirá compensación completa por los trabajos descritos anteriormente incluyendo mano de obra, materiales, equipos, herramientas, imprevistos y en general todo lo necesario para completar la partida</text:span><text:span text:style-name="T5"> </text:span><text:span text:style-name="T13">correctamente.</text:span></text:p>
        <text:p text:style-name="P25" loext:marker-style-name="T5"><text:span text:style-name="T8">FORMA DE PAGO </text:span><text:span text:style-name="T8"/></text:p>
        <text:p text:style-name="P44" loext:marker-style-name="T5"><text:span text:style-name="T5">El pago de estos trabajos se hará por m3 de barra y piedra, cuyos precios unitarios se encuentran definidos en el presupuesto. El Supervisor velará porque ella se ejecute durante el desarrollo de la obra.</text:span><text:span text:style-name="T5"/></text:p>
        <text:list text:style-name="WWNum3">
          <text:list-item>
            <text:list>
              <text:list-item>
                <text:p text:style-name="P6" loext:marker-style-name="T5"><text:span text:style-name="T11">SOBRECIMIENTOS DE PIRDRA GRANDE Y BARRO ALT. 40cm.</text:span><text:span text:style-name="T11"/></text:p>
              </text:list-item>
            </text:list>
          </text:list-item>
        </text:list>
        <text:p text:style-name="P37" loext:marker-style-name="T5"><text:span text:style-name="T8">DESCRIPCION</text:span><text:span text:style-name="T8"/></text:p>
        <text:p text:style-name="P37" loext:marker-style-name="T5"><text:span text:style-name="T5">Se apilará piedras en la cimentación hasta alcanzar la altura indicada en los planos; el nivel final debe alcanzar una superficie uniforme en toda la cabecera de la cimentación. Para utilizar la torta de barro se recomienda el uso de paja existente en la zona para evitar la caída o desplazamiento de la misma hasta el nivel de la superficie del sobrecimiento.</text:span><text:span text:style-name="T5"/></text:p>
        <text:p text:style-name="P41" loext:marker-style-name="T5"><text:span text:style-name="T9">METODO DE MEDICIÒN</text:span><text:span text:style-name="T9"/></text:p>
        <text:p text:style-name="P41" loext:marker-style-name="T5"><text:span text:style-name="T5">La medición de esta partida será por metro cubico (m3), mezcla piedra y barro verificado y aprobado por el Supervisor.</text:span><text:span text:style-name="T5"/></text:p>
        <text:p text:style-name="P25" loext:marker-style-name="T5"><text:span text:style-name="T8">FORMA DE PAGO</text:span><text:span text:style-name="T8"/></text:p>
        <text:p text:style-name="P50" loext:marker-style-name="T5"><text:span text:style-name="T5">El pago de estos trabajos se hará por m3 de piedra y barro, cuyos precios unitarios se encuentran definidos en el presupuesto. El Supervisor velará porque ella se ejecute durante el desarrollo de la obra.</text:span><text:span text:style-name="T5"/></text:p>
        <text:list xml:id="list1497868696" text:style-name="WWNum4">
          <text:list-item>
            <text:p text:style-name="P7" loext:marker-style-name="T5"><text:span text:style-name="T11">ALBANILERIA</text:span><text:span text:style-name="T11"/></text:p>
          </text:list-item>
        </text:list>
        <text:p text:style-name="P4" loext:marker-style-name="T5"><text:span text:style-name="T14">3.01 MURO DE ADOBE DE 40X25X18CM ASENTADO EN CABEZA CON MEZCLA DE 147.11 4,507.45</text:span><text:span text:style-name="T14"/></text:p>
        <text:p text:style-name="P5" loext:marker-style-name="T5"><text:span text:style-name="T14">BARRO +PAJA E=2.5CM</text:span><text:span text:style-name="T14"/></text:p>
        <text:p text:style-name="P37" loext:marker-style-name="T5"><text:span text:style-name="T8">DESCRIPCION</text:span><text:span text:style-name="T8"/></text:p>
        <text:p text:style-name="P37" loext:marker-style-name="T5"><text:span text:style-name="T5">Se utilizará en este caso el adobe estándar, es decir que sus medidas son: 38cm de ancho por 38 cm. de largo y 10 cm. de altura. Este será colocado en forma de soga y entre cada hilera se pondrá una torta de barro mezclado con paja, lo que permitirá la cohesión entre las hileras; en las esquinas irá trenzado (MOCHETA) con el mismo adobe entre las hileras, tal como se puede observar en el detalle en el plano, este trenzado permitirá darle consistencia y arriostrar los muros en cada Tramo.</text:span><text:span text:style-name="T5"/></text:p>
        <text:p text:style-name="P37" loext:marker-style-name="T5"><text:span text:style-name="T5">Los adobes serán elaborados por los mismos beneficiarios.</text:span><text:span text:style-name="T5"/></text:p>
        <text:list text:style-name="WWNum5">
          <text:list-item>
            <text:p text:style-name="P8" loext:marker-style-name="T5"><text:span text:style-name="T5">Ensayo de re resistencia en campo para el adobe</text:span><text:span text:style-name="T5"/></text:p>
          </text:list-item>
          <text:list-item>
            <text:p text:style-name="P8" loext:marker-style-name="T5"><text:span text:style-name="T5">El adobe deberá soportar el peso de un hombre durante un minuto, apoyado en sus</text:span><text:span text:style-name="T5"/></text:p>
          </text:list-item>
          <text:list-item>
            <text:p text:style-name="P8" loext:marker-style-name="T5"><text:span text:style-name="T5">extremos.</text:span><text:span text:style-name="T5"/></text:p>
          </text:list-item>
          <text:list-item>
            <text:p text:style-name="P8" loext:marker-style-name="T5"><text:span text:style-name="T5">Como variante del ensayo anterior se puede emplear el siguiente procedimiento:</text:span><text:span text:style-name="T5"/></text:p>
          </text:list-item>
          <text:list-item>
            <text:p text:style-name="P8" loext:marker-style-name="T5"><text:span text:style-name="T5">sumergir en agua el adobe durante 4 horas y se la someterá a un ensayo de flexión debiendo soporta el paso de 6 ½ adobes durante un minuto.</text:span><text:span text:style-name="T5"/></text:p>
          </text:list-item>
          <text:list-item>
            <text:p text:style-name="P8" loext:marker-style-name="T5"><text:soft-page-break/><text:span text:style-name="T5">partir el adobe se debe verificar que la penetración del agua no sea mayor de 1 cm</text:span><text:span text:style-name="T5"/></text:p>
          </text:list-item>
          <text:list-item>
            <text:p text:style-name="P8" loext:marker-style-name="T5"><text:span text:style-name="T5">Procedimiento constructivo</text:span><text:span text:style-name="T5"/></text:p>
          </text:list-item>
          <text:list-item>
            <text:p text:style-name="P8" loext:marker-style-name="T5"><text:span text:style-name="T5">Romper los bloques antes de asentarlos, colocándolos sobre aproximadamente ½ a 1 cm de agua o saturándolas con cualquier otro procedimiento, humedecer por lo menos las dos caras horizontales durante 10 a 15 minutos.</text:span><text:span text:style-name="T5"/></text:p>
          </text:list-item>
          <text:list-item>
            <text:p text:style-name="P8" loext:marker-style-name="T5"><text:span text:style-name="T5">Utilizar los bloques más tempranamente posibles por tener en estas condiciones menor avidez por el agua del mortero.</text:span><text:span text:style-name="T5"/></text:p>
          </text:list-item>
          <text:list-item>
            <text:p text:style-name="P8" loext:marker-style-name="T5"><text:span text:style-name="T5">Otras recomendaciones de orden más general que parece conveniente mencionar son eliminar las materias extrañas del suelo, mezclar el barro uniformemente, procurar</text:span><text:span text:style-name="T5"/></text:p>
          </text:list-item>
          <text:list-item>
            <text:p text:style-name="P8" loext:marker-style-name="T5"><text:span text:style-name="T5">secar los bloques antes del asentado, confeccionar juntas uniformes y completas, verificar la verticalidad de los muros.</text:span><text:span text:style-name="T5"/></text:p>
          </text:list-item>
        </text:list>
        <text:p text:style-name="P41" loext:marker-style-name="T5"><text:span text:style-name="T9">METODO DE MEDICIÒN</text:span><text:span text:style-name="T9"/></text:p>
        <text:p text:style-name="P41" loext:marker-style-name="T5"><text:span text:style-name="T5">La medición de esta partida será por metro cuadrado (m2), de asentado de muro de adobe con torta de barro verificado y aprobado por el Supervisor.</text:span><text:span text:style-name="T5"/></text:p>
        <text:p text:style-name="P25" loext:marker-style-name="T5"><text:span text:style-name="T8">FORMA DE PAGO</text:span><text:span text:style-name="T8"/></text:p>
        <text:p text:style-name="P50" loext:marker-style-name="T5"><text:span text:style-name="T5">El pago de estos trabajos se hará por m2 de muro, cuyos precios unitarios se encuentran definidos en el presupuesto. El Supervisor velará porque ella se ejecute durante el desarrollo de la obra.</text:span><text:span text:style-name="T5"/></text:p>
        <text:list text:continue-list="list1497868696" text:style-name="WWNum4">
          <text:list-item>
            <text:p text:style-name="P7" loext:marker-style-name="T5"><text:span text:style-name="T11">ESTRUCTURA DE MADERA Y COBERTURA</text:span><text:span text:style-name="T11"/></text:p>
            <text:list>
              <text:list-item>
                <text:p text:style-name="P7" loext:marker-style-name="T5"><text:span text:style-name="T14">COLLARIN DE MADERA LABRADA 4”X4”</text:span><text:span text:style-name="T14"/></text:p>
              </text:list-item>
            </text:list>
          </text:list-item>
        </text:list>
        <text:p text:style-name="P5" loext:marker-style-name="T5"><text:span text:style-name="T14">DESCRIPCION</text:span><text:span text:style-name="T14"/></text:p>
        <text:p text:style-name="P5" loext:marker-style-name="T5"><text:span text:style-name="T15">Son maderas labradas de eucalipto de sección 4”X4” que serán colocadas encima de las ventanas y puertas </text:span><text:span text:style-name="T15"/></text:p>
        <text:p text:style-name="P5" loext:marker-style-name="T5"><text:span text:style-name="T11">METODO DE MEDICIÒN</text:span><text:span text:style-name="T11"/></text:p>
        <text:p text:style-name="P9" loext:marker-style-name="T5"><text:span text:style-name="T13">La medición de esta partida será por metro lineal (ml), verificado y aprobado por el Supervisor.</text:span><text:span text:style-name="T13"/></text:p>
        <text:p text:style-name="P5" loext:marker-style-name="T5"><text:span text:style-name="T11"><text:s/>FORMA DE PAGO</text:span><text:span text:style-name="T11"/></text:p>
        <text:p text:style-name="P9" loext:marker-style-name="T5"><text:span text:style-name="T13">El pago de estos trabajos se hará por ml, cuyos precios unitarios se encuentran definidos en el presupuesto. El Supervisor velará porque ella se ejecute durante el desarrollo de la obra</text:span><text:span text:style-name="T13"/></text:p>
        <text:list text:continue-numbering="true" text:style-name="WWNum4">
          <text:list-item>
            <text:list>
              <text:list-item>
                <text:p text:style-name="P7" loext:marker-style-name="T5"><text:span text:style-name="T11">VIGA CUMBRERA DE ROLLIZO DE EUCALIPTO DE Ø 6"</text:span><text:span text:style-name="T11"/></text:p>
              </text:list-item>
            </text:list>
          </text:list-item>
        </text:list>
        <text:p text:style-name="P5" loext:marker-style-name="T5"><text:span text:style-name="T14">DESCRIPCION</text:span><text:span text:style-name="T14"/></text:p>
        <text:p text:style-name="P5" loext:marker-style-name="T5"><text:span text:style-name="T15">Son maderas de eucalipto rollizo de diámetro mínimo de 6” madera seca, sin fallas, lineal, se colocara en la cumbre soportada por las columnas de madera. </text:span><text:span text:style-name="T15"/></text:p>
        <text:p text:style-name="P5" loext:marker-style-name="T5"><text:soft-page-break/><text:span text:style-name="T11">METODO DE MEDICIÒN</text:span><text:span text:style-name="T11"/></text:p>
        <text:p text:style-name="P9" loext:marker-style-name="T5"><text:span text:style-name="T13">La medición de esta partida será por metro lineal (ml), verificado y aprobado por el Supervisor.</text:span><text:span text:style-name="T13"/></text:p>
        <text:p text:style-name="P5" loext:marker-style-name="T5"><text:span text:style-name="T11"><text:s/>FORMA DE PAGO</text:span><text:span text:style-name="T11"/></text:p>
        <text:p text:style-name="P9" loext:marker-style-name="T5"><text:span text:style-name="T13">El pago de estos trabajos se hará por ml, cuyos precios unitarios se encuentran definidos en el presupuesto. El Supervisor velará porque ella se ejecute durante el desarrollo de la obra</text:span><text:span text:style-name="T13"/></text:p>
        <text:list text:continue-numbering="true" text:style-name="WWNum4">
          <text:list-item>
            <text:list>
              <text:list-item>
                <text:p text:style-name="P7" loext:marker-style-name="T5"><text:span text:style-name="T11">COLUMNA ROLLIZO DE EUCALIPTO DE Ø 6"</text:span><text:span text:style-name="T11"/></text:p>
              </text:list-item>
            </text:list>
          </text:list-item>
        </text:list>
        <text:p text:style-name="P5" loext:marker-style-name="T5"><text:span text:style-name="T14">DESCRIPCION</text:span><text:span text:style-name="T14"/></text:p>
        <text:p text:style-name="P9" loext:marker-style-name="T5"><text:span text:style-name="T15">Son maderas de eucalipto rollizo de diámetro mínimo de 6” madera seca, sin fallas, lineal, se colocara sobre un hoyo de 50 cm de profundidad cuya función es columnas que porta el peso de las estructuras de techo. </text:span><text:span text:style-name="T15"/></text:p>
        <text:p text:style-name="P5" loext:marker-style-name="T5"><text:span text:style-name="T15">Se procederá a la construcción e instalación de las columnas de madera de acuerdo a los planos del Expedienté Técnico, respetando las dimensiones y secciones de los mismos.</text:span><text:span text:style-name="T15"/></text:p>
        <text:p text:style-name="P5" loext:marker-style-name="T5"><text:span text:style-name="T15">Los postes de eucalipto que servirán como columnas deben ser pelados 70 cm en el extremo que serán cimentados. La brea se disuelve con petróleo y se embadurna el tramo pelado. Luego, como anclaje se colocan dos hileras simétricas, cada una con 03 clavos de 4”</text:span><text:span text:style-name="T15"/></text:p>
        <text:p text:style-name="P5" loext:marker-style-name="T5"><text:span text:style-name="T11">METODO DE MEDICIÒN</text:span><text:span text:style-name="T11"/></text:p>
        <text:p text:style-name="P9" loext:marker-style-name="T5"><text:span text:style-name="T13">La medición de esta partida será por unidad (und), verificado y aprobado por el Supervisor.</text:span><text:span text:style-name="T13"/></text:p>
        <text:p text:style-name="P5" loext:marker-style-name="T5"><text:span text:style-name="T11"><text:s/>FORMA DE PAGO</text:span><text:span text:style-name="T11"/></text:p>
        <text:p text:style-name="P9" loext:marker-style-name="T5"><text:span text:style-name="T13">El pago de estos trabajos se hará por unidad, cuyos precios unitarios se encuentran definidos en el presupuesto. El Supervisor velará porque ella se ejecute durante el desarrollo de la obra</text:span><text:span text:style-name="T13"/></text:p>
        <text:list text:continue-numbering="true" text:style-name="WWNum4">
          <text:list-item>
            <text:list>
              <text:list-item>
                <text:p text:style-name="P7" loext:marker-style-name="T5"><text:span text:style-name="T11">VIGA DE REFUERZO DE 3"X3"</text:span><text:span text:style-name="T11"/></text:p>
              </text:list-item>
            </text:list>
          </text:list-item>
        </text:list>
        <text:p text:style-name="P5" loext:marker-style-name="T5"><text:span text:style-name="T14">DESCRIPCION</text:span><text:span text:style-name="T14"/></text:p>
        <text:p text:style-name="P5" loext:marker-style-name="T5"><text:span text:style-name="T15">Son maderas de eucalipto de sección 3”x3” se colocarán a una distancia de 2 metros entre vigas madera seca, sin fallas, lineal, cuya función es soporte de correas y calaminas. </text:span><text:span text:style-name="T15"/></text:p>
        <text:p text:style-name="P5" loext:marker-style-name="T5"><text:span text:style-name="T11">METODO DE MEDICIÒN</text:span><text:span text:style-name="T11"/></text:p>
        <text:p text:style-name="P9" loext:marker-style-name="T5"><text:span text:style-name="T13">La medición de esta partida será por metro lineal (ml), verificado y aprobado por el Supervisor.</text:span><text:span text:style-name="T13"/></text:p>
        <text:p text:style-name="P5" loext:marker-style-name="T5"><text:span text:style-name="T11"><text:s/>FORMA DE PAGO</text:span><text:span text:style-name="T11"/></text:p>
        <text:p text:style-name="P9" loext:marker-style-name="T5"><text:span text:style-name="T13">El pago de estos trabajos se hará por metro lineal cuyos precios unitarios se encuentran definidos en el presupuesto. El Supervisor velará porque ella se ejecute durante el desarrollo de la obra</text:span><text:span text:style-name="T13"/></text:p>
        <text:list text:continue-numbering="true" text:style-name="WWNum4">
          <text:list-item>
            <text:list>
              <text:list-item>
                <text:p text:style-name="P7" loext:marker-style-name="T5"><text:span text:style-name="T11">CORREAS DE MADERA 2"x3"</text:span><text:span text:style-name="T11"/></text:p>
              </text:list-item>
            </text:list>
          </text:list-item>
        </text:list>
        <text:p text:style-name="P5" loext:marker-style-name="T5"><text:soft-page-break/><text:span text:style-name="T11">DESCRIPCION</text:span><text:span text:style-name="T11"/></text:p>
        <text:p text:style-name="P5" loext:marker-style-name="T5"><text:span text:style-name="T13">Serán cintas de madera de eucalipto de sección 2”x3”que se instalarán en sentido paralelo al eje longitudinal. Correrán elementos en cada caída equidistantemente de 0.70 m</text:span><text:span text:style-name="T13"/></text:p>
        <text:p text:style-name="P5" loext:marker-style-name="T5"><text:span text:style-name="T13">• La madera deberá ser seleccionada sin ninguna falla, ya que la correa cumplirá una</text:span><text:span text:style-name="T13"/></text:p>
        <text:p text:style-name="P5" loext:marker-style-name="T5"><text:span text:style-name="T13">función de apoyo de la calamina.</text:span><text:span text:style-name="T13"/></text:p>
        <text:p text:style-name="P5" loext:marker-style-name="T5"><text:span text:style-name="T13">• Se colocará las correas en sentido paralelo al eje longitudinal.</text:span><text:span text:style-name="T13"/></text:p>
        <text:p text:style-name="P5" loext:marker-style-name="T5"><text:span text:style-name="T13">• Se Colocarán las correas uno por uno de acuerdo a los planos del expediente, tomando las medidas respectivas.</text:span><text:span text:style-name="T13"/></text:p>
        <text:p text:style-name="P5" loext:marker-style-name="T5"><text:span text:style-name="T11">METODO DE MEDICIÒN</text:span><text:span text:style-name="T11"/></text:p>
        <text:p text:style-name="P9" loext:marker-style-name="T5"><text:span text:style-name="T13">La medición de esta partida será por metro lineal (ml), verificado y aprobado por el Supervisor.</text:span><text:span text:style-name="T13"/></text:p>
        <text:p text:style-name="P5" loext:marker-style-name="T5"><text:span text:style-name="T11"><text:s/>FORMA DE PAGO</text:span><text:span text:style-name="T11"/></text:p>
        <text:p text:style-name="P9" loext:marker-style-name="T5"><text:span text:style-name="T13">El pago de estos trabajos se hará por ml, cuyos precios unitarios se encuentran definidos en el presupuesto. El Supervisor velará porque ella se ejecute durante el desarrollo de la obra</text:span><text:span text:style-name="T13"/></text:p>
        <text:p text:style-name="P49" loext:marker-style-name="T5"><text:span text:style-name="T11">05. COBERTURA</text:span><text:span text:style-name="T11"/></text:p>
        <text:p text:style-name="P50" loext:marker-style-name="T5"><text:span text:style-name="T18">5.01 COBERTURA DE CALAMINA DE 0.25mm</text:span><text:span text:style-name="T18"/></text:p>
        <text:p text:style-name="P50" loext:marker-style-name="T5"><text:span text:style-name="T18">DESCRIPCIÓN</text:span><text:span text:style-name="T18"/></text:p>
        <text:p text:style-name="P50" loext:marker-style-name="T5"><text:span text:style-name="T19">Ese ítem se refiere a la ejecución del techado con calamina galvanizada de todas las partes del techo que serán cubiertas por este material, sobre estructura de madera o metálica según sea el caso.</text:span><text:span text:style-name="T19"/></text:p>
        <text:p text:style-name="P50" loext:marker-style-name="T5"><text:span text:style-name="T18">MATERIALES, HERRAMIENTAS Y EQUIPO</text:span><text:span text:style-name="T18"/></text:p>
        <text:p text:style-name="P50" loext:marker-style-name="T5"><text:span text:style-name="T19">Se utilizará calamina ondulada galvanizada nueva de calibre 28 (ASG Nº 28) fijada a las correas mediante tirafondos o ganchos tipo J galvanizados especiales para calamina de Nº 8 con arandelas de neopreno, si son metálicas, o con clavos para calamina si se trata de correas de madera.</text:span><text:span text:style-name="T19"/></text:p>
        <text:p text:style-name="P50" loext:marker-style-name="T5"><text:span text:style-name="T19">Todo el material utilizado en este ítem deberá ser aprobado por el Supervisor de Obra con anterioridad a su uso.</text:span><text:span text:style-name="T19"/></text:p>
        <text:p text:style-name="P50" loext:marker-style-name="T5"><text:span text:style-name="T18">PROCEDIMIENTO DE EJECUCIÓN</text:span><text:span text:style-name="T18"/></text:p>
        <text:p text:style-name="P50" loext:marker-style-name="T5"><text:span text:style-name="T19">Las correas serán colocadas de acuerdo a los espaciamientos y características indicados en los planos de detalle correspondientes.</text:span><text:span text:style-name="T19"/></text:p>
        <text:p text:style-name="P50" loext:marker-style-name="T5"><text:span text:style-name="T19">Todas las piezas de calamina galvanizada serán fijadas a las correas por medio de tirafondos, ganchos tipo “J” o clavos. La ubicación de estas fijaciones debe ser cada dos ondas convexas en los apoyos extremos de cada placa y cada cuatro ondas en apoyos intermedios de cada placa, se trate de hojas de calamina de medidas comerciales u hojas de calamina continuas.</text:span><text:span text:style-name="T19"/></text:p>
        <text:p text:style-name="P50" loext:marker-style-name="T5"><text:span text:style-name="T19">La calamina será dispuesta de acuerdo a la pendiente definida por las cerchas, con traslape longitudinal mínimo de 20 cm.</text:span><text:span text:style-name="T19"/></text:p>
        <text:p text:style-name="P50" loext:marker-style-name="T5"><text:soft-page-break/><text:span text:style-name="T18">MEDICIÓN</text:span><text:span text:style-name="T18"/></text:p>
        <text:p text:style-name="P50" loext:marker-style-name="T5"><text:span text:style-name="T19">Corresponde efectuar medición, por tanto, la cuantificación métrica del ítem será por metro cuadrado de superficie neta en proyección horizontal, en conformidad al precio unitario del mismo.</text:span><text:span text:style-name="T19"/></text:p>
        <text:p text:style-name="P50" loext:marker-style-name="T5"><text:span text:style-name="T18">FORMA DE PAGO</text:span><text:span text:style-name="T18"/></text:p>
        <text:p text:style-name="P50" loext:marker-style-name="T5"><text:span text:style-name="T19">El precio a pagarse por este ítem, será de acuerdo al precio unitario de la propuesta aceptada, que incluye la compensación total por todos los materiales, herramientas, mano de obra y equipo empleados en las actividades necesarias para la ejecución de este trabajo</text:span><text:span text:style-name="T18">.</text:span></text:p>
        <text:p text:style-name="P50" loext:marker-style-name="T5"><text:span text:style-name="T18">5.02 COBERTURA DE CALAMINA TRANSPARENTE 3.60X0.8 M</text:span><text:span text:style-name="T18"/></text:p>
        <text:p text:style-name="P50" loext:marker-style-name="T5"><text:span text:style-name="T8">DESCRIPCION</text:span><text:span text:style-name="T8"/></text:p>
        <text:p text:style-name="P50" loext:marker-style-name="T5"><text:span text:style-name="T5">Se montará cuidadosamente las calaminas transparentes de 3.60x0.80m, evitando dañar los elementos de sostén</text:span><text:span text:style-name="T5"/></text:p>
        <text:p text:style-name="P50" loext:marker-style-name="T5"><text:span text:style-name="T8">METODO DE MEDICIÒN</text:span><text:span text:style-name="T8"/></text:p>
        <text:p text:style-name="P50" loext:marker-style-name="T5"><text:span text:style-name="T5">La medición de esta partida será por metro cuadrado (m2), verificado y aprobado por el Supervisor.</text:span><text:span text:style-name="T5"/></text:p>
        <text:p text:style-name="P50" loext:marker-style-name="T5"><text:span text:style-name="T8">FORMA DE PAGO</text:span><text:span text:style-name="T8"/></text:p>
        <text:p text:style-name="P50" loext:marker-style-name="T5"><text:span text:style-name="T5">El pago de estos trabajos se hará por m2 cuyos precios unitarios se encuentran definidos en el presupuesto. El Supervisor velará porque ella se ejecute durante el desarrollo de la obra</text:span><text:span text:style-name="T5"/></text:p>
        <text:p text:style-name="P50" loext:marker-style-name="T5"><text:span text:style-name="T18">06. CARPINTERIA DE MADERA</text:span><text:span text:style-name="T18"/></text:p>
        <text:p text:style-name="P50" loext:marker-style-name="T5"><text:span text:style-name="T18">06.01 PUERTA DE MADERA CON CALAMINA</text:span><text:span text:style-name="T18"/></text:p>
        <text:p text:style-name="P50" loext:marker-style-name="T5"><text:span text:style-name="T18">DESCRIPCION</text:span><text:span text:style-name="T18"/></text:p>
        <text:p text:style-name="P50" loext:marker-style-name="T5"><text:span text:style-name="T19">La puerta de madera será con marco de madera de eucalipto de sección 3”x3”, sobre el cual se cubre con calamina galvanizada.</text:span><text:span text:style-name="T19"/></text:p>
        <text:p text:style-name="P50" loext:marker-style-name="T5"><text:span text:style-name="T8">METODO DE MEDICIÒN</text:span><text:span text:style-name="T8"/></text:p>
        <text:p text:style-name="P50" loext:marker-style-name="T5"><text:span text:style-name="T5">La medición de esta partida será por unidad (und), verificado y aprobado por el Supervisor.</text:span><text:span text:style-name="T5"/></text:p>
        <text:p text:style-name="P50" loext:marker-style-name="T5"><text:span text:style-name="T8">FORMA DE PAGO</text:span><text:span text:style-name="T8"/></text:p>
        <text:p text:style-name="P50" loext:marker-style-name="T5"><text:span text:style-name="T5">El pago de estos trabajos se hará por unidad, cuyos precios unitarios se encuentran definidos en el presupuesto. El Supervisor velará porque ella se ejecute durante el desarrollo de la </text:span><text:span text:style-name="T5"/></text:p>
        <text:p text:style-name="P50" loext:marker-style-name="T5"><text:span text:style-name="T18">06.02 VENTANA DE MARCO MADERA</text:span><text:span text:style-name="T18"/></text:p>
        <text:p text:style-name="P50" loext:marker-style-name="T5"><text:span text:style-name="T18">DESCRIPCION</text:span><text:span text:style-name="T18"/></text:p>
        <text:p text:style-name="P50" loext:marker-style-name="T5"><text:soft-page-break/><text:span text:style-name="T19">La puerta de madera será con marco de madera de eucalipto de sección 3”x3”, sobre el cual se cubre con malla mosquetero.</text:span><text:span text:style-name="T19"/></text:p>
        <text:p text:style-name="P50" loext:marker-style-name="T5"><text:span text:style-name="T8">METODO DE MEDICIÒN</text:span><text:span text:style-name="T8"/></text:p>
        <text:p text:style-name="P50" loext:marker-style-name="T5"><text:span text:style-name="T5">La medición de esta partida será por unidad (und), verificado y aprobado por el Supervisor.</text:span><text:span text:style-name="T5"/></text:p>
        <text:p text:style-name="P50" loext:marker-style-name="T5"><text:span text:style-name="T8">FORMA DE PAGO</text:span><text:span text:style-name="T8"/></text:p>
        <text:p text:style-name="P50" loext:marker-style-name="T5"><text:span text:style-name="T5">El pago de estos trabajos se hará por unidad, cuyos precios unitarios se encuentran definidos en el presupuesto. El Supervisor velará porque ella se ejecute durante el desarrollo de la Obra</text:span><text:span text:style-name="T5"/></text:p>
        <text:p text:style-name="P50" loext:marker-style-name="T5"><text:span text:style-name="T18">07 CERRAJERIA</text:span><text:span text:style-name="T18"/></text:p>
        <text:p text:style-name="P50" loext:marker-style-name="T5"><text:span text:style-name="T18">07.01</text:span><text:span text:style-name="T19"> </text:span><text:span text:style-name="T18">BISAGRA ALUMINIZADA CAPUCHINA DE 4" X 4"</text:span></text:p>
        <text:p text:style-name="P50" loext:marker-style-name="T5"><text:span text:style-name="T8">DESCRIPCIÓN DE PARTIDA:</text:span><text:span text:style-name="T8"/></text:p>
        <text:p text:style-name="P50" loext:marker-style-name="T5"><text:span text:style-name="T5">Las bisagras para puertas de madera serán del tipo pesado, fierro galvanizado o capuchinas de 4”. Los tornillos serán de cabeza plana. Las bisagras serán con pasador removible de acero, y con retenedores para evitar que los pasadores se salgan con el uso. Deberán ser auto lubricado. Serán con rodamientos de bolillas. No se permite colocar menos de 4 bisagras por puerta debiendo ir la inferior y superior a 10” del borde, y las del centro serán equidistantes de las dos anteriores.</text:span><text:span text:style-name="T5"/></text:p>
        <text:p text:style-name="P50" loext:marker-style-name="T5"><text:span text:style-name="T8">PROCESO CONSTRUCTIVO: -</text:span><text:span text:style-name="T8"/></text:p>
        <text:p text:style-name="P50" loext:marker-style-name="T5"><text:span text:style-name="T5">Se instalará de acuerdo donde el plano de detalles lo indique:</text:span><text:span text:style-name="T5"/></text:p>
        <text:p text:style-name="P50" loext:marker-style-name="T5"><text:span text:style-name="T8">CALIDAD DE LOS MATERIALES: -</text:span><text:span text:style-name="T8"/></text:p>
        <text:p text:style-name="P50" loext:marker-style-name="T5"><text:span text:style-name="T8">BISAGRAS. -</text:span><text:span text:style-name="T8"/></text:p>
        <text:p text:style-name="P45" loext:marker-style-name="T5"><text:span text:style-name="T5">Todas las bisagras serán de acero aluminizado pesado en general, cada hoja de puerta o ventana llevará las bisagras necesarias de acuerdo a lo indicado en los planos.</text:span><text:span text:style-name="T5"/></text:p>
        <text:p text:style-name="P50" loext:marker-style-name="T5"><text:span text:style-name="T8">SISTEMA DE CONTROL DE CALIDAD: -</text:span><text:span text:style-name="T8"/></text:p>
        <text:p text:style-name="P50" loext:marker-style-name="T5"><text:span text:style-name="T5">Estas bisagras deben ser fabricadas en acero laminado en frio (Fierro).</text:span><text:span text:style-name="T5"/></text:p>
        <text:p text:style-name="P50" loext:marker-style-name="T5"><text:span text:style-name="T8">UNIDAD DE MEDIDA:</text:span><text:span text:style-name="T8"/></text:p>
        <text:p text:style-name="P50" loext:marker-style-name="T5"><text:span text:style-name="T5">La unidad de medición para estas partidas es por unidad (unid)</text:span><text:span text:style-name="T5"/></text:p>
        <text:p text:style-name="P50" loext:marker-style-name="T5"><text:span text:style-name="T8"><text:s/>FORMA DE PAGO:</text:span><text:span text:style-name="T8"/></text:p>
        <text:p text:style-name="P50" loext:marker-style-name="T5"><text:span text:style-name="T5">El pago de estos trabajos se hará por unidad y al precio que figura en el presupuesto, previa aprobación del Supervisor. </text:span><text:span text:style-name="T5"/></text:p>
        <text:p text:style-name="P50" loext:marker-style-name="T5"><text:span text:style-name="T8"><text:s/></text:span><text:span text:style-name="T8"/></text:p>
        <text:p text:style-name="P50" loext:marker-style-name="T5"><text:soft-page-break/><text:span text:style-name="T18">08. POSAS DE CUY</text:span><text:span text:style-name="T18"/></text:p>
        <text:p text:style-name="P50" loext:marker-style-name="T5"><text:span text:style-name="T18">08.01 POSA DE CUY DE MADERA Y MALLA</text:span><text:span text:style-name="T18"/></text:p>
        <text:p text:style-name="P50" loext:marker-style-name="T5"><text:span text:style-name="T8">DESCRIPCION</text:span><text:span text:style-name="T8"/></text:p>
        <text:p text:style-name="P50" loext:marker-style-name="T5"><text:span text:style-name="T19">Las pozas de cuy se construirán de acuerdo al plano, donde las estructuras de madera de eucalipto de cuya sección es de 1”x3” y sobre el cual se colarán las mallas galvanizas de ¾” recubiertas de PVC. </text:span><text:span text:style-name="T19"/></text:p>
        <text:p text:style-name="P50" loext:marker-style-name="T5"><text:span text:style-name="T8">METODO DE MEDICIÒN</text:span><text:span text:style-name="T8"/></text:p>
        <text:p text:style-name="P50" loext:marker-style-name="T5"><text:span text:style-name="T5">La medición de esta partida será por metro lineal (ml), verificado y aprobado por el Supervisor.</text:span><text:span text:style-name="T5"/></text:p>
        <text:p text:style-name="P50" loext:marker-style-name="T5"><text:span text:style-name="T8">FORMA DE PAGO</text:span><text:span text:style-name="T8"/></text:p>
        <text:p text:style-name="P50" loext:marker-style-name="T5"><text:span text:style-name="T5">El pago de estos trabajos se hará por ml, cuyos precios unitarios se encuentran definidos en el presupuesto. El Supervisor velará porque ella se ejecute durante el desarrollo de la obra.</text:span><text:span text:style-name="T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 Narrow" svg:font-family="'Arial Narrow'"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ourier" svg:font-family="Courier" style:font-family-generic="roman"/>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es" fo:country="PE" style:letter-kern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text-align="justify" style:justify-single-word="false"/>
      <style:text-properties style:font-name="Arial" fo:font-family="Arial" style:font-family-generic="roman" style:rfc-language-tag="es-ES-u-co-trad" fo:language="es" fo:country="ES" fo:font-style="italic" style:font-style-asian="italic" style:font-size-complex="10pt"/>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text-align="justify" style:justify-single-word="false" fo:keep-with-next="always"/>
      <style:text-properties fo:language="es" fo:country="ES" fo:font-weight="bold" style:font-weight-asian="bold"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left="1.524cm" fo:text-align="justify" style:justify-single-word="false" fo:orphans="0" fo:widows="0" fo:text-indent="-1.524cm" style:auto-text-indent="false" fo:keep-with-next="always">
        <style:tab-stops>
          <style:tab-stop style:position="-1.399cm"/>
          <style:tab-stop style:position="-0.129cm"/>
          <style:tab-stop style:position="1.141cm"/>
          <style:tab-stop style:position="1.524cm"/>
          <style:tab-stop style:position="2.50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fo:font-family="Arial" style:font-family-generic="roman" fo:font-size="10pt" style:rfc-language-tag="es-ES-u-co-trad" fo:language="es" fo:country="ES" fo:font-style="italic" style:font-size-asian="10pt" style:font-style-asian="italic" style:font-size-complex="10pt"/>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left="1.778cm" fo:text-align="justify" style:justify-single-word="false" fo:orphans="0" fo:widows="0" fo:text-indent="-1.778cm" style:auto-text-indent="false" fo:keep-with-next="always">
        <style:tab-stops>
          <style:tab-stop style:position="-1.399cm"/>
          <style:tab-stop style:position="0.25cm"/>
          <style:tab-stop style:position="1.141cm"/>
          <style:tab-stop style:position="1.778cm"/>
          <style:tab-stop style:position="2.41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fo:font-family="Arial" style:font-family-generic="roman" fo:font-size="10pt" style:rfc-language-tag="es-ES-u-co-trad" fo:language="es" fo:country="ES" fo:font-style="italic" style:font-size-asian="10pt" style:font-style-asian="italic" style:font-size-complex="10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left="2.286cm" fo:text-align="justify" style:justify-single-word="false" fo:orphans="0" fo:widows="0" fo:text-indent="-2.286cm" style:auto-text-indent="false" fo:keep-with-next="always">
        <style:tab-stops>
          <style:tab-stop style:position="-1.399cm"/>
          <style:tab-stop style:position="-0.129cm"/>
          <style:tab-stop style:position="1.141cm"/>
          <style:tab-stop style:position="2.286cm"/>
          <style:tab-stop style:position="3.752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fo:font-family="Arial" style:font-family-generic="roman" fo:font-size="10pt" style:rfc-language-tag="es-ES-u-co-trad" fo:language="es" fo:country="ES" fo:font-style="italic" style:text-underline-style="solid" style:text-underline-width="auto" style:text-underline-color="font-color" fo:font-weight="bold" style:font-size-asian="10pt" style:font-style-asian="italic" style:font-weight-asian="bold" style:font-size-complex="10pt"/>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left="2.54cm" fo:text-align="justify" style:justify-single-word="false" fo:text-indent="-2.54cm" style:auto-text-indent="false" fo:keep-with-next="always">
        <style:tab-stops>
          <style:tab-stop style:position="2.54cm"/>
        </style:tab-stops>
      </style:paragraph-properties>
      <style:text-properties style:font-name="Arial" fo:font-family="Arial" style:font-family-generic="roman" fo:font-size="10pt" style:rfc-language-tag="es-ES-u-co-trad" fo:language="es" fo:country="ES" fo:font-style="italic" fo:font-weight="bold" style:font-size-asian="10pt" style:font-style-asian="italic" style:font-weight-asian="bold" style:font-size-complex="10pt"/>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left="2.794cm" fo:text-indent="-2.794cm" style:auto-text-indent="false" fo:keep-with-next="always">
        <style:tab-stops>
          <style:tab-stop style:position="2.794cm"/>
        </style:tab-stops>
      </style:paragraph-properties>
      <style:text-properties fo:font-size="10pt" style:rfc-language-tag="es-ES-u-co-trad" fo:language="es" fo:country="ES" fo:font-style="italic" style:font-size-asian="10pt" style:font-style-asian="italic"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Párrafo" style:family="paragraph" style:parent-style-name="Standard">
      <style:paragraph-properties fo:margin-top="0.212cm" fo:margin-bottom="0cm" style:contextual-spacing="false" fo:line-height="150%" fo:text-align="justify" style:justify-single-word="false"/>
      <style:text-properties fo:font-size="11pt" style:rfc-language-tag="es-ES-u-co-trad" fo:language="es" fo:country="ES" style:font-size-asian="11pt" style:language-asian="es" style:country-asian="PE" style:font-size-complex="10pt"/>
    </style:style>
    <style:style style:name="Normal_20__28_Web_29_" style:display-name="Normal (Web)" style:family="paragraph" style:parent-style-name="Standard">
      <style:paragraph-properties fo:margin-top="0.494cm" fo:margin-bottom="0.494cm" style:contextual-spacing="false"/>
      <style:text-properties fo:language="es" fo:country="ES"/>
    </style:style>
    <style:style style:name="Texto2" style:family="paragraph" style:parent-style-name="Heading_20_3" style:default-outline-level="">
      <style:paragraph-properties fo:margin-left="1.27cm" fo:margin-top="0cm" fo:margin-bottom="0.423cm" style:contextual-spacing="false" fo:text-align="justify" style:justify-single-word="false" fo:text-indent="0.33cm" style:auto-text-indent="false" fo:keep-with-next="auto">
        <style:tab-stops>
          <style:tab-stop style:position="3.505cm"/>
        </style:tab-stops>
      </style:paragraph-properties>
      <style:text-properties style:use-window-font-color="true" loext:opacity="0%" style:font-name="Arial" fo:font-family="Arial" style:font-family-generic="roman" fo:font-size="10pt" style:rfc-language-tag="es-ES-u-co-trad" fo:language="es" fo:country="ES" fo:font-weight="normal" style:font-name-asian="Times New Roman1" style:font-family-asian="'Times New Roman'" style:font-family-generic-asian="system" style:font-pitch-asian="variable" style:font-size-asian="10pt" style:font-weight-asian="normal" style:font-name-complex="Times New Roman1" style:font-family-complex="'Times New Roman'" style:font-family-generic-complex="system" style:font-pitch-complex="variable" style:font-size-complex="10pt" style:font-weight-complex="normal">
        <loext:char-complex-color loext:theme-type="accent1" loext:color-type="theme"/>
      </style:text-properties>
    </style:style>
    <style:style style:name="Block_20_Text" style:display-name="Block Text" style:family="paragraph" style:parent-style-name="Standard">
      <style:paragraph-properties fo:margin-left="2.54cm" fo:margin-right="-0.002cm" fo:text-align="justify" style:justify-single-word="false">
        <style:tab-stops>
          <style:tab-stop style:position="-1cm"/>
        </style:tab-stops>
      </style:paragraph-properties>
      <style:text-properties style:font-name="Arial" fo:font-family="Arial" style:font-family-generic="roman" fo:font-size="11pt" style:rfc-language-tag="es-ES-u-co-trad" fo:language="es" fo:country="ES" style:font-size-asian="11pt" style:font-size-complex="10pt"/>
    </style:style>
    <style:style style:name="Body_20_Text_20_3" style:display-name="Body Text 3" style:family="paragraph" style:parent-style-name="Standard" loext:linked-style-name="Texto_20_independiente_20_3_20_Car">
      <style:paragraph-properties fo:margin-top="0cm" fo:margin-bottom="0.212cm" style:contextual-spacing="false" fo:orphans="0" fo:widows="0"/>
      <style:text-properties style:font-name="Arial" fo:font-family="Arial" style:font-family-generic="roman" fo:font-size="8pt" fo:language="es" fo:country="ES" style:font-name-asian="F" style:font-family-generic-asian="system" style:font-pitch-asian="variable" style:font-size-asian="8pt" style:font-name-complex="Arial1" style:font-family-complex="Arial" style:font-family-generic-complex="system" style:font-pitch-complex="variable" style:font-size-complex="8pt"/>
    </style:style>
    <style:style style:name="Body_20_Text_20_2" style:display-name="Body Text 2" style:family="paragraph" style:parent-style-name="Standard" loext:linked-style-name="Texto_20_independiente_20_2_20_Car">
      <style:paragraph-properties fo:margin-top="0cm" fo:margin-bottom="0.212cm" style:contextual-spacing="false" fo:line-height="200%" fo:orphans="0" fo:widows="0"/>
      <style:text-properties style:font-name="Arial" fo:font-family="Arial" style:font-family-generic="roman" fo:font-size="10pt" fo:language="es" fo:country="ES" style:font-name-asian="F" style:font-family-generic-asian="system" style:font-pitch-asian="variable" style:font-size-asian="10pt" style:font-name-complex="Arial1" style:font-family-complex="Arial" style:font-family-generic-complex="system" style:font-pitch-complex="variable" style:font-size-complex="10pt"/>
    </style:style>
    <style:style style:name="Body_20_Text_20_Indent_20_3" style:display-name="Body Text Indent 3" style:family="paragraph" style:parent-style-name="Standard" loext:linked-style-name="Sangría_20_3_20_de_20_t._20_independiente_20_Car">
      <style:paragraph-properties fo:margin-left="0.499cm" fo:margin-top="0cm" fo:margin-bottom="0.212cm" style:contextual-spacing="false" fo:orphans="0" fo:widows="0"/>
      <style:text-properties style:font-name="Arial" fo:font-family="Arial" style:font-family-generic="roman" fo:font-size="8pt" fo:language="es" fo:country="ES" style:font-name-asian="F" style:font-family-generic-asian="system" style:font-pitch-asian="variable" style:font-size-asian="8pt" style:font-name-complex="Arial1" style:font-family-complex="Arial" style:font-family-generic-complex="system" style:font-pitch-complex="variable" style:font-size-complex="8pt"/>
    </style:style>
    <style:style style:name="Body_20_Text_2c__20_Indented" style:display-name="Body Text, Indented" style:family="paragraph" style:parent-style-name="Standard" loext:linked-style-name="Sangría_20_de_20_texto_20_normal_20_Car">
      <style:paragraph-properties fo:margin-left="0.499cm" fo:margin-top="0cm" fo:margin-bottom="0.212cm" style:contextual-spacing="false" fo:orphans="0" fo:widows="0"/>
      <style:text-properties style:font-name="Arial" fo:font-family="Arial" style:font-family-generic="roman" fo:font-size="10pt" fo:language="es" fo:country="ES" style:font-name-asian="F" style:font-family-generic-asian="system" style:font-pitch-asian="variable" style:font-size-asian="10pt" style:font-name-complex="Arial1" style:font-family-complex="Arial" style:font-family-generic-complex="system" style:font-pitch-complex="variable" style:font-size-complex="10pt"/>
    </style:style>
    <style:style style:name="TxBr_5f_p2" style:display-name="TxBr_p2" style:family="paragraph" style:parent-style-name="Standard">
      <style:paragraph-properties fo:margin-left="3.043cm" style:line-height-at-least="0.66cm" fo:text-align="justify" style:justify-single-word="false" fo:orphans="0" fo:widows="0">
        <style:tab-stops>
          <style:tab-stop style:position="3.679cm"/>
        </style:tab-stops>
      </style:paragraph-properties>
      <style:text-properties fo:language="en" fo:country="US" style:language-asian="es" style:country-asian="CL"/>
    </style:style>
    <style:style style:name="TÀ_29_Àcnico_20_4" style:display-name="TÀ)Àcnico 4" style:family="paragraph">
      <style:paragraph-properties fo:margin-top="0cm" fo:margin-bottom="0cm" style:contextual-spacing="false" fo:line-height="100%" fo:text-align="start" style:justify-single-word="false" fo:orphans="2" fo:widows="2" fo:hyphenation-ladder-count="no-limit" style:writing-mode="lr-tb">
        <style:tab-stops>
          <style:tab-stop style:position="-1.27cm"/>
        </style:tab-stops>
      </style:paragraph-properties>
      <style:text-properties style:use-window-font-color="true" loext:opacity="0%" style:font-name="Courier" fo:font-family="Courier" style:font-family-generic="roman" fo:font-size="12pt" fo:language="en" fo:country="US" fo:font-weight="bold" style:letter-kerning="false"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fo:orphans="0" fo:widows="0"/>
      <style:text-properties style:font-name="Arial" fo:font-family="Arial" style:font-family-generic="roman" fo:font-size="10pt" fo:language="es" fo:country="ES" style:font-name-asian="F" style:font-family-generic-asian="system" style:font-pitch-asian="variable" style:font-size-asian="10pt" style:font-name-complex="Arial1" style:font-family-complex="Arial" style:font-family-generic-complex="system" style:font-pitch-complex="variable" style:font-size-complex="10pt"/>
    </style:style>
    <style:style style:name="t4" style:family="paragraph" style:parent-style-name="Standard">
      <style:paragraph-properties style:line-height-at-least="0.353cm" fo:orphans="0" fo:widows="0"/>
      <style:text-properties fo:font-size="10pt" fo:language="es" fo:country="ES" style:font-size-asian="10pt"/>
    </style:style>
    <style:style style:name="_31_.01" style:display-name="1.01" style:family="paragraph" style:parent-style-name="Heading_20_1" style:default-outline-level="">
      <style:paragraph-properties fo:margin-left="1.27cm" fo:margin-right="-0.011cm" fo:margin-top="0.212cm" fo:margin-bottom="0.212cm" style:contextual-spacing="false" fo:orphans="0" fo:widows="0" fo:text-indent="-1.27cm" style:auto-text-indent="false"/>
      <style:text-properties fo:text-transform="uppercase" fo:language="es" fo:country="PE" fo:font-weight="normal" style:font-weight-asian="normal" style:font-size-complex="10pt" style:font-weight-complex="normal"/>
    </style:style>
    <style:style style:name="A." style:family="paragraph" style:parent-style-name="Heading_20_3" style:default-outline-level="">
      <style:paragraph-properties fo:margin-left="1.251cm" fo:margin-right="-0.011cm" fo:margin-top="0.212cm" fo:margin-bottom="0.212cm" style:contextual-spacing="false" fo:text-align="justify" style:justify-single-word="false" fo:keep-together="auto" fo:orphans="0" fo:widows="0" fo:text-indent="-1.251cm" style:auto-text-indent="false" fo:keep-with-next="auto"/>
      <style:text-properties style:use-window-font-color="true" loext:opacity="0%" style:font-name="Times New Roman" fo:font-family="'Times New Roman'" style:font-family-generic="roman" fo:letter-spacing="-0.005cm"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font-size-complex="10pt" style:font-weight-complex="normal">
        <loext:char-complex-color loext:theme-type="accent1" loext:color-type="theme"/>
      </style:text-properties>
    </style:style>
    <style:style style:name="List_20_1" style:display-name="List 1" style:family="paragraph" style:parent-style-name="Standard" style:auto-update="true" style:class="list">
      <style:paragraph-properties fo:margin-left="1.752cm" fo:line-height="150%" fo:text-align="justify" style:justify-single-word="false"/>
      <style:text-properties style:font-name="Arial Narrow" fo:font-family="'Arial Narrow'" style:font-family-generic="roman" fo:language="es" fo:country="ES" style:font-name-complex="Arial1" style:font-family-complex="Arial" style:font-family-generic-complex="system" style:font-pitch-complex="variable"/>
    </style:style>
    <style:style style:name="Balloon_20_Text" style:display-name="Balloon Text" style:family="paragraph" style:parent-style-name="Standard" loext:linked-style-name="Texto_20_de_20_globo_20_Car">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XT_20_3" style:display-name="TXT 3" style:family="paragraph" loext:linked-style-name="TXT_20_3_20_Car">
      <style:paragraph-properties fo:margin-left="0.801cm" fo:margin-top="0.176cm" fo:margin-bottom="0.176cm" style:contextual-spacing="false" fo:line-height="100%" fo:text-align="justify" style:justify-single-word="false" fo:orphans="2" fo:widows="2" fo:hyphenation-ladder-count="no-limit" style:writing-mode="lr-tb"/>
      <style:text-properties style:use-window-font-color="true" loext:opacity="0%" style:font-name="Calibri" fo:font-family="Calibri" style:font-family-generic="roman" fo:font-size="12pt" fo:language="es" fo:country="PE" style:letter-kerning="false"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Encabezado_20_Car" style:display-name="Encabezado Car" style:family="text" style:parent-style-name="Default_20_Paragraph_20_Font">
      <style:text-properties style:font-name="Times New Roman" fo:font-family="'Times New Roman'" style:font-family-generic="roman" fo:font-size="12pt" fo:language="es" fo:country="P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fo:font-size="12pt" fo:language="es" fo:country="P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2_20_Car" style:display-name="Título 2 Car" style:family="text" style:parent-style-name="Default_20_Paragraph_20_Font">
      <style:text-properties fo:color="#4f81bd" loext:opacity="100%" style:font-name="Cambria" fo:font-family="Cambria" style:font-family-generic="roman" fo:font-size="13pt" fo:language="es" fo:country="PE" fo:font-weight="bold" style:font-name-asian="F" style:font-family-generic-asian="system" style:font-pitch-asian="variable" style:font-size-asian="13pt" style:language-asian="es" style:country-asian="E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style:text-properties fo:color="#4f81bd" loext:opacity="100%" style:font-name="Cambria" fo:font-family="Cambria" style:font-family-generic="roman" fo:font-size="12pt" fo:language="es" fo:country="PE" fo:font-weight="bold" style:font-name-asian="F" style:font-family-generic-asian="system" style:font-pitch-asian="variable" style:font-size-asian="12pt" style:language-asian="es" style:country-asian="ES" style:font-weight-asian="bold" style:font-name-complex="F" style:font-family-generic-complex="system" style:font-pitch-complex="variable" style:font-size-complex="12pt" style:font-weight-complex="bold">
        <loext:char-complex-color loext:theme-type="accent1" loext:color-type="theme"/>
      </style:text-properties>
    </style:style>
    <style:style style:name="Título_20_6_20_Car" style:display-name="Título 6 Car" style:family="text" style:parent-style-name="Default_20_Paragraph_20_Font">
      <style:text-properties fo:color="#243f60" loext:opacity="100%" style:font-name="Cambria" fo:font-family="Cambria" style:font-family-generic="roman" fo:font-size="12pt" fo:language="es" fo:country="PE" fo:font-style="italic" style:font-name-asian="F" style:font-family-generic-asian="system" style:font-pitch-asian="variable" style:font-size-asian="12pt" style:language-asian="es" style:country-asian="ES"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Título_20_4_20_Car" style:display-name="Título 4 Car" style:family="text" style:parent-style-name="Default_20_Paragraph_20_Font">
      <style:text-properties style:font-name="Arial" fo:font-family="Arial" style:font-family-generic="roman" fo:font-size="10pt" style:rfc-language-tag="es-ES-u-co-trad" fo:language="es" fo:country="ES"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ítulo_20_5_20_Car" style:display-name="Título 5 Car" style:family="text" style:parent-style-name="Default_20_Paragraph_20_Font">
      <style:text-properties style:font-name="Arial" fo:font-family="Arial" style:font-family-generic="roman" fo:font-size="10pt" style:rfc-language-tag="es-ES-u-co-trad" fo:language="es" fo:country="ES"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fo:font-size="10pt" style:rfc-language-tag="es-ES-u-co-trad" fo:language="es" fo:country="ES" fo:font-style="italic"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es" style:country-asian="ES" style:font-style-asian="italic" style:font-weight-asian="bold"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fo:font-size="10pt" style:rfc-language-tag="es-ES-u-co-trad" fo:language="es" fo:country="ES" fo:font-style="italic" fo:font-weight="bold" style:font-name-asian="Times New Roman1" style:font-family-asian="'Times New Roman'" style:font-family-generic-asian="system" style:font-pitch-asian="variable" style:font-size-asian="10pt" style:language-asian="es" style:country-asian="ES" style:font-style-asian="italic" style:font-weight-asian="bold"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Times New Roman" fo:font-family="'Times New Roman'" style:font-family-generic="roman" fo:font-size="10pt" style:rfc-language-tag="es-ES-u-co-trad" fo:language="es" fo:country="ES"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fo:font-size="12pt" style:rfc-language-tag="es-ES-u-co-trad"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loext:linked-style-name="Body_20_Text_20_3">
      <style:text-properties style:font-name="Arial" fo:font-family="Arial" style:font-family-generic="roman" fo:font-size="8pt" style:font-name-asian="F" style:font-family-generic-asian="system" style:font-pitch-asian="variable" style:font-size-asian="8pt" style:language-asian="es" style:country-asian="ES" style:font-name-complex="Arial1" style:font-family-complex="Arial" style:font-family-generic-complex="system" style:font-pitch-complex="variable" style:font-size-complex="8pt"/>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roman" fo:font-size="10pt" style:font-name-asian="F"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Sangría_20_3_20_de_20_t._20_independiente_20_Car" style:display-name="Sangría 3 de t. independiente Car" style:family="text" style:parent-style-name="Default_20_Paragraph_20_Font" loext:linked-style-name="Body_20_Text_20_Indent_20_3">
      <style:text-properties style:font-name="Arial" fo:font-family="Arial" style:font-family-generic="roman" fo:font-size="8pt" style:font-name-asian="F" style:font-family-generic-asian="system" style:font-pitch-asian="variable" style:font-size-asian="8pt" style:language-asian="es" style:country-asian="ES" style:font-name-complex="Arial1" style:font-family-complex="Arial" style:font-family-generic-complex="system" style:font-pitch-complex="variable" style:font-size-complex="8pt"/>
    </style:style>
    <style:style style:name="Sangría_20_de_20_texto_20_normal_20_Car" style:display-name="Sangría de texto normal Car" style:family="text" style:parent-style-name="Default_20_Paragraph_20_Font">
      <style:text-properties style:font-name="Arial" fo:font-family="Arial" style:font-family-generic="roman" fo:font-size="10pt" style:font-name-asian="F"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Sangría_20_2_20_de_20_t._20_independiente_20_Car" style:display-name="Sangría 2 de t. independiente Car" style:family="text" style:parent-style-name="Default_20_Paragraph_20_Font" loext:linked-style-name="Body_20_Text_20_Indent_20_2">
      <style:text-properties style:font-name="Arial" fo:font-family="Arial" style:font-family-generic="roman" fo:font-size="10pt" style:font-name-asian="F"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fo:language="es" fo:country="PE"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TXT_20_3_20_Car" style:display-name="TXT 3 Car" style:family="text" style:parent-style-name="Default_20_Paragraph_20_Font" loext:linked-style-name="TXT_20_3">
      <style:text-properties style:font-name="Calibri" fo:font-family="Calibri" style:font-family-generic="roman" fo:font-size="12pt" fo:language="es" fo:country="PE"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1%.%2%" style:num-format="01, 02, 03, ..." text:display-levels="2">
        <style:list-level-properties text:list-level-position-and-space-mode="label-alignment">
          <style:list-level-label-alignment text:label-followed-by="listtab" fo:text-indent="-0.635cm" fo:margin-left="2.38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635cm" fo:margin-left="2.38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3.022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27cm" fo:margin-left="3.022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3.657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905cm" fo:margin-left="3.657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905cm" fo:margin-left="3.657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54cm" fo:margin-left="4.29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01, 02, 03, ...">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01, 02, 03, ..." text:start-value="2" text:display-levels="2">
        <style:list-level-properties text:list-level-position-and-space-mode="label-alignment">
          <style:list-level-label-alignment text:label-followed-by="listtab" fo:text-indent="-0.714cm" fo:margin-left="2.21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714cm" fo:margin-left="3.08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4.509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27cm" fo:margin-left="5.376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6.879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905cm" fo:margin-left="7.747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905cm" fo:margin-left="8.6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10.1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01, 02, 03, ..." text:start-value="2">
        <style:list-level-properties text:list-level-position-and-space-mode="label-alignment">
          <style:list-level-label-alignment text:label-followed-by="listtab" fo:text-indent="-0.714cm" fo:margin-left="0.714cm"/>
        </style:list-level-properties>
      </text:list-level-style-number>
      <text:list-level-style-number text:level="2" text:style-name="ListLabel_20_20" loext:num-list-format="%1%.%2%" style:num-format="01, 02, 03, ..." text:start-value="2" text:display-levels="2">
        <style:list-level-properties text:list-level-position-and-space-mode="label-alignment">
          <style:list-level-label-alignment text:label-followed-by="listtab" fo:text-indent="-0.714cm" fo:margin-left="2.46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714cm" fo:margin-left="4.21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27cm" fo:margin-left="6.525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27cm" fo:margin-left="8.276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905cm" fo:margin-left="10.66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1.905cm" fo:margin-left="12.41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905cm" fo:margin-left="14.166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54cm" fo:margin-left="16.55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3">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1%.%2%" style:num-format="01, 02, 03, ..." text:display-levels="2">
        <style:list-level-properties text:list-level-position-and-space-mode="label-alignment">
          <style:list-level-label-alignment text:label-followed-by="listtab" fo:text-indent="-0.635cm" fo:margin-left="2.387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635cm" fo:margin-left="2.38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3.022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27cm" fo:margin-left="3.022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3.657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1.905cm" fo:margin-left="3.657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1.905cm" fo:margin-left="3.657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4.29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right="0.635cm" fo:margin-top="0.212cm" fo:margin-bottom="0cm" style:contextual-spacing="false"/>
    </style:style>
    <style:style style:name="MP2" style:family="paragraph" style:parent-style-name="Footer">
      <style:paragraph-properties fo:text-align="end" style:justify-single-word="false"/>
    </style:style>
    <style:style style:name="MT1" style:family="text">
      <style:text-properties style:font-name="Arial" fo:font-size="8pt" fo:font-style="italic" fo:font-weight="bold" style:font-size-asian="8pt" style:font-style-asian="italic" style:font-weight-asian="bold" style:font-name-complex="Arial1" style:font-size-complex="8pt"/>
    </style:style>
    <style:style style:name="MT2" style:family="text">
      <style:text-properties style:font-name="Arial" fo:font-size="8pt" fo:font-weight="bold" style:font-size-asian="8pt" style:font-weight-asian="bold" style:font-name-complex="Arial1" style:font-size-complex="8pt"/>
    </style:style>
    <style:style style:name="MT3" style:family="text">
      <style:text-properties fo:font-size="8pt" style:font-size-asian="8pt"/>
    </style:style>
    <style:page-layout style:name="Mpm1">
      <style:page-layout-properties fo:page-width="21.001cm" fo:page-height="29.7cm" style:num-format="1" style:print-orientation="portrait" fo:margin-top="0cm" fo:margin-bottom="1.251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48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text:span text:style-name="MT1"/></text:p>
        <text:p text:style-name="Header"><text:span text:style-name="MT2"><text:s/></text:span></text:p>
      </style:header>
      <style:footer>
        <text:p text:style-name="MP2" loext:marker-style-name="MT3"><text:span text:style-name="MT3"><text:page-number text:select-page="current">12</text:page-number></text:span></text:p>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0-08-07T14:20:00</meta:creation-date>
    <meta:initial-creator>Wilder Orellana San Martín</meta:initial-creator>
    <dc:language>es-PE</dc:language>
    <dc:creator>Elmer Edison Achalma Mendoza</dc:creator>
    <meta:print-date>2015-03-30T14:20:00</meta:print-date>
    <dc:date>2023-12-31T17:28:06</dc:date>
    <meta:editing-cycles>88</meta:editing-cycles>
    <meta:editing-duration>P1DT20H31M</meta:editing-duration>
    <meta:generator>LibreOffice/24.2.4.2$Linux_X86_64 LibreOffice_project/420$Build-2</meta:generator>
    <meta:document-statistic meta:table-count="0" meta:image-count="0" meta:object-count="0" meta:page-count="12" meta:paragraph-count="241" meta:word-count="4188" meta:character-count="25977" meta:non-whitespace-character-count="22016"/>
    <meta:user-defined meta:name="AppVersion">15.0000</meta:user-defined>
    <meta:user-defined meta:name="Company">CCI EIRL.</meta:user-defined>
    <meta:template xlink:type="simple" xlink:actuate="onRequest" xlink:title="Normal" xlink:href=""/>
  </office:meta>
</office:document-meta>
</file>