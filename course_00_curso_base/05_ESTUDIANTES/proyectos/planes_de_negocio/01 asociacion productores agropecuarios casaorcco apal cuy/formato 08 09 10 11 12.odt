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styles.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1000000490000005009A20BFF.png" manifest:media-type="image/png"/>
  <manifest:file-entry manifest:full-path="Pictures/1000000000000096000000C0C694528C.jpg" manifest:media-type="image/jpe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face style:name="Arial Narrow" svg:font-family="'Arial Narrow'" style:font-family-generic="roman"/>
    <style:font-face style:name="Arial Narrow1" svg:font-family="'Arial Narrow'" style:font-family-generic="system" style:font-pitch="variable"/>
    <style:font-face style:name="Arial Unicode MS" svg:font-family="'Arial Unicode MS'" style:font-family-generic="system" style:font-pitch="variable"/>
    <style:font-face style:name="Arial1" svg:font-family="Arial" style:font-family-generic="system" style:font-pitch="variable"/>
    <style:font-face style:name="Arial2" svg:font-family="Arial" style:font-adornments="Regular" style:font-family-generic="swiss" style:font-pitch="variable"/>
    <style:font-face style:name="Calibri" svg:font-family="Calibri" style:font-family-generic="roman"/>
    <style:font-face style:name="Calibri1" svg:font-family="Calibri" style:font-family-generic="system" style:font-pitch="variable"/>
    <style:font-face style:name="Cambria" svg:font-family="Cambria" style:font-family-generic="roman"/>
    <style:font-face style:name="Century Gothic" svg:font-family="'Century Gothic'" style:font-family-generic="roman"/>
    <style:font-face style:name="Century Gothic1" svg:font-family="'Century Gothic'" style:font-family-generic="system" style:font-pitch="variable"/>
    <style:font-face style:name="Courier New" svg:font-family="'Courier New'" style:font-family-generic="roman"/>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face style:name="Tahoma1" svg:font-family="Tahoma" style:font-family-generic="system" style:font-pitch="variable"/>
    <style:font-face style:name="Times" svg:font-family="Times" style:font-family-generic="roman"/>
    <style:font-face style:name="Times New Roman" svg:font-family="'Times New Roman'" style:font-family-generic="roman"/>
    <style:font-face style:name="Times New Roman1" svg:font-family="'Times New Roman'" style:font-family-generic="system" style:font-pitch="variable"/>
    <style:font-face style:name="Verdana" svg:font-family="Verdana" style:font-family-generic="roman"/>
    <style:font-face style:name="Wingdings" svg:font-family="Wingdings" style:font-charset="x-symbol"/>
    <style:font-face style:name="Wingdings1" svg:font-family="Wingdings" style:font-family-generic="system" style:font-pitch="variable"/>
  </office:font-face-decls>
  <office:automatic-styles>
    <style:style style:name="Tabla1" style:family="table">
      <style:table-properties style:width="14.982cm" fo:margin-left="-0.191cm" fo:margin-top="0cm" fo:margin-bottom="0cm" table:align="left" style:writing-mode="page"/>
    </style:style>
    <style:style style:name="Tabla1.A" style:family="table-column">
      <style:table-column-properties style:column-width="14.982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style>
    <style:style style:name="Tabla2" style:family="table">
      <style:table-properties style:rel-width="100%" fo:margin-left="-0.123cm" fo:margin-top="0cm" fo:margin-bottom="0cm" table:align="left" style:writing-mode="page"/>
    </style:style>
    <style:style style:name="Tabla2.A" style:family="table-column">
      <style:table-column-properties style:rel-column-width="1081*"/>
    </style:style>
    <style:style style:name="Tabla2.B" style:family="table-column">
      <style:table-column-properties style:rel-column-width="26908*"/>
    </style:style>
    <style:style style:name="Tabla2.C" style:family="table-column">
      <style:table-column-properties style:rel-column-width="10571*"/>
    </style:style>
    <style:style style:name="Tabla2.D" style:family="table-column">
      <style:table-column-properties style:rel-column-width="23835*"/>
    </style:style>
    <style:style style:name="Tabla2.E" style:family="table-column">
      <style:table-column-properties style:rel-column-width="3140*"/>
    </style:style>
    <style:style style:name="Tabla2.1" style:family="table-row">
      <style:table-row-properties style:min-row-height="0.582cm" fo:keep-together="auto"/>
    </style:style>
    <style:style style:name="Tabla2.A1" style:family="table-cell">
      <style:table-cell-properties style:vertical-align="bottom" fo:background-color="transparent" fo:padding-left="0.123cm" fo:padding-right="0.123cm" fo:padding-top="0cm" fo:padding-bottom="0cm" fo:border="none">
        <style:background-image/>
      </style:table-cell-properties>
    </style:style>
    <style:style style:name="Tabla2.4" style:family="table-row">
      <style:table-row-properties style:min-row-height="6.006cm" fo:keep-together="auto"/>
    </style:style>
    <style:style style:name="Tabla2.A4"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a2.5" style:family="table-row">
      <style:table-row-properties style:row-height="0.582cm" fo:keep-together="auto"/>
    </style:style>
    <style:style style:name="Tabla2.C7"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la2.B11" style:family="table-cell">
      <style:table-cell-properties fo:padding-left="0.123cm" fo:padding-right="0.123cm" fo:padding-top="0cm" fo:padding-bottom="0cm" fo:border="none"/>
    </style:style>
    <style:style style:name="Tabla2.C11" style:family="table-cell">
      <style:table-cell-properties fo:padding-left="0.123cm" fo:padding-right="0.123cm" fo:padding-top="0cm" fo:padding-bottom="0cm" fo:border="none"/>
    </style:style>
    <style:style style:name="Tabla2.D11" style:family="table-cell">
      <style:table-cell-properties fo:padding-left="0.123cm" fo:padding-right="0.123cm" fo:padding-top="0cm" fo:padding-bottom="0cm" fo:border="none"/>
    </style:style>
    <style:style style:name="Tabla2.E11" style:family="table-cell">
      <style:table-cell-properties fo:padding-left="0.123cm" fo:padding-right="0.123cm" fo:padding-top="0cm" fo:padding-bottom="0cm" fo:border="none"/>
    </style:style>
    <style:style style:name="Tabla2.B12" style:family="table-cell">
      <style:table-cell-properties fo:padding-left="0.123cm" fo:padding-right="0.123cm" fo:padding-top="0cm" fo:padding-bottom="0cm" fo:border="none"/>
    </style:style>
    <style:style style:name="Tabla2.C12" style:family="table-cell">
      <style:table-cell-properties fo:padding-left="0.123cm" fo:padding-right="0.123cm" fo:padding-top="0cm" fo:padding-bottom="0cm" fo:border="none"/>
    </style:style>
    <style:style style:name="Tabla2.D12" style:family="table-cell">
      <style:table-cell-properties fo:padding-left="0.123cm" fo:padding-right="0.123cm" fo:padding-top="0cm" fo:padding-bottom="0cm" fo:border="none"/>
    </style:style>
    <style:style style:name="Tabla2.E12" style:family="table-cell">
      <style:table-cell-properties fo:padding-left="0.123cm" fo:padding-right="0.123cm" fo:padding-top="0cm" fo:padding-bottom="0cm" fo:border="none"/>
    </style:style>
    <style:style style:name="Tabla3" style:family="table">
      <style:table-properties style:width="15.004cm" fo:margin-left="0.208cm" fo:margin-top="0cm" fo:margin-bottom="0cm" table:align="left" style:writing-mode="page"/>
    </style:style>
    <style:style style:name="Tabla3.A" style:family="table-column">
      <style:table-column-properties style:column-width="15.004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style>
    <style:style style:name="Tabla4" style:family="table">
      <style:table-properties style:rel-width="100%" fo:margin-left="0cm" fo:margin-top="0cm" fo:margin-bottom="0cm" table:align="left" style:writing-mode="page"/>
    </style:style>
    <style:style style:name="Tabla4.A" style:family="table-column">
      <style:table-column-properties style:rel-column-width="43449*"/>
    </style:style>
    <style:style style:name="Tabla4.B" style:family="table-column">
      <style:table-column-properties style:rel-column-width="18232*"/>
    </style:style>
    <style:style style:name="Tabla4.C" style:family="table-column">
      <style:table-column-properties style:rel-column-width="3854*"/>
    </style:style>
    <style:style style:name="Tabla4.1" style:family="table-row">
      <style:table-row-properties style:min-row-height="0.483cm" fo:keep-together="auto"/>
    </style:style>
    <style:style style:name="Tabla4.A1" style:family="table-cell">
      <style:table-cell-properties style:vertical-align="middle" fo:padding-left="0.191cm" fo:padding-right="0.191cm" fo:padding-top="0cm" fo:padding-bottom="0cm" fo:border-left="none" fo:border-right="0.5pt solid #000000" fo:border-top="none" fo:border-bottom="none"/>
    </style:style>
    <style:style style:name="Tabla4.B1" style:family="table-cell">
      <style:table-cell-properties style:vertical-align="middle" fo:padding-left="0.191cm" fo:padding-right="0.191cm" fo:padding-top="0cm" fo:padding-bottom="0cm" fo:border="0.5pt solid #000000"/>
    </style:style>
    <style:style style:name="Tabla4.2" style:family="table-row">
      <style:table-row-properties style:min-row-height="0.506cm" fo:keep-together="auto"/>
    </style:style>
    <style:style style:name="Tabla5" style:family="table">
      <style:table-properties style:width="6.532cm" fo:margin-left="0cm" fo:margin-top="0cm" fo:margin-bottom="0cm" table:align="left" style:writing-mode="page"/>
    </style:style>
    <style:style style:name="Tabla5.A" style:family="table-column">
      <style:table-column-properties style:column-width="6.532cm"/>
    </style:style>
    <style:style style:name="Tabla5.1" style:family="table-row">
      <style:table-row-properties style:min-row-height="0.464cm" fo:keep-together="auto"/>
    </style:style>
    <style:style style:name="Tabla5.A1" style:family="table-cell">
      <style:table-cell-properties fo:padding-left="0.191cm" fo:padding-right="0.191cm" fo:padding-top="0cm" fo:padding-bottom="0cm" fo:border-left="none" fo:border-right="none" fo:border-top="0.5pt solid #000000" fo:border-bottom="none"/>
    </style:style>
    <style:style style:name="Tabla5.A2" style:family="table-cell">
      <style:table-cell-properties fo:padding-left="0.191cm" fo:padding-right="0.191cm" fo:padding-top="0cm" fo:padding-bottom="0cm" fo:border="none"/>
    </style:style>
    <style:style style:name="Tabla6" style:family="table" style:master-page-name="Converted1">
      <style:table-properties style:rel-width="100%" fo:margin-left="-0.123cm" fo:margin-top="0cm" fo:margin-bottom="0cm" style:page-number="auto" table:align="left" style:writing-mode="page"/>
    </style:style>
    <style:style style:name="Tabla6.A" style:family="table-column">
      <style:table-column-properties style:rel-column-width="288*"/>
    </style:style>
    <style:style style:name="Tabla6.B" style:family="table-column">
      <style:table-column-properties style:rel-column-width="2602*"/>
    </style:style>
    <style:style style:name="Tabla6.C" style:family="table-column">
      <style:table-column-properties style:rel-column-width="26587*"/>
    </style:style>
    <style:style style:name="Tabla6.D" style:family="table-column">
      <style:table-column-properties style:rel-column-width="7556*"/>
    </style:style>
    <style:style style:name="Tabla6.E" style:family="table-column">
      <style:table-column-properties style:rel-column-width="8074*"/>
    </style:style>
    <style:style style:name="Tabla6.F" style:family="table-column">
      <style:table-column-properties style:rel-column-width="9096*"/>
    </style:style>
    <style:style style:name="Tabla6.G" style:family="table-column">
      <style:table-column-properties style:rel-column-width="6908*"/>
    </style:style>
    <style:style style:name="Tabla6.H" style:family="table-column">
      <style:table-column-properties style:rel-column-width="4423*"/>
    </style:style>
    <style:style style:name="Tabla6.1" style:family="table-row">
      <style:table-row-properties style:min-row-height="2.873cm" fo:keep-together="auto"/>
    </style:style>
    <style:style style:name="Tabla6.A1" style:family="table-cell">
      <style:table-cell-properties style:vertical-align="middle" fo:background-color="transparent" fo:padding-left="0.123cm" fo:padding-right="0.123cm" fo:padding-top="0cm" fo:padding-bottom="0cm" fo:border="none">
        <style:background-image/>
      </style:table-cell-properties>
    </style:style>
    <style:style style:name="Tabla6.H1" style:family="table-cell">
      <style:table-cell-properties fo:padding-left="0.123cm" fo:padding-right="0.123cm" fo:padding-top="0cm" fo:padding-bottom="0cm" fo:border="none"/>
    </style:style>
    <style:style style:name="Tabla6.2" style:family="table-row">
      <style:table-row-properties style:min-row-height="0.794cm" fo:keep-together="auto"/>
    </style:style>
    <style:style style:name="Tabla6.A2" style:family="table-cell">
      <style:table-cell-properties fo:padding-left="0.123cm" fo:padding-right="0.123cm" fo:padding-top="0cm" fo:padding-bottom="0cm" fo:border="none"/>
    </style:style>
    <style:style style:name="Tabla6.B2"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a6.C2"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la6.3" style:family="table-row">
      <style:table-row-properties style:min-row-height="0.661cm" fo:keep-together="auto"/>
    </style:style>
    <style:style style:name="Tabla6.A3" style:family="table-cell">
      <style:table-cell-properties fo:padding-left="0.123cm" fo:padding-right="0.123cm" fo:padding-top="0cm" fo:padding-bottom="0cm" fo:border="none"/>
    </style:style>
    <style:style style:name="Tabla6.B3"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6.C3"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6.A4" style:family="table-cell">
      <style:table-cell-properties fo:padding-left="0.123cm" fo:padding-right="0.123cm" fo:padding-top="0cm" fo:padding-bottom="0cm" fo:border="none"/>
    </style:style>
    <style:style style:name="Tabla6.A5" style:family="table-cell">
      <style:table-cell-properties fo:padding-left="0.123cm" fo:padding-right="0.123cm" fo:padding-top="0cm" fo:padding-bottom="0cm" fo:border="none"/>
    </style:style>
    <style:style style:name="Tabla6.A6" style:family="table-cell">
      <style:table-cell-properties fo:padding-left="0.123cm" fo:padding-right="0.123cm" fo:padding-top="0cm" fo:padding-bottom="0cm" fo:border="none"/>
    </style:style>
    <style:style style:name="Tabla6.A7" style:family="table-cell">
      <style:table-cell-properties fo:padding-left="0.123cm" fo:padding-right="0.123cm" fo:padding-top="0cm" fo:padding-bottom="0cm" fo:border="none"/>
    </style:style>
    <style:style style:name="Tabla6.A8" style:family="table-cell">
      <style:table-cell-properties fo:padding-left="0.123cm" fo:padding-right="0.123cm" fo:padding-top="0cm" fo:padding-bottom="0cm" fo:border="none"/>
    </style:style>
    <style:style style:name="Tabla6.A9" style:family="table-cell">
      <style:table-cell-properties fo:padding-left="0.123cm" fo:padding-right="0.123cm" fo:padding-top="0cm" fo:padding-bottom="0cm" fo:border="none"/>
    </style:style>
    <style:style style:name="Tabla6.A10" style:family="table-cell">
      <style:table-cell-properties fo:padding-left="0.123cm" fo:padding-right="0.123cm" fo:padding-top="0cm" fo:padding-bottom="0cm" fo:border="none"/>
    </style:style>
    <style:style style:name="Tabla6.A11" style:family="table-cell">
      <style:table-cell-properties fo:padding-left="0.123cm" fo:padding-right="0.123cm" fo:padding-top="0cm" fo:padding-bottom="0cm" fo:border="none"/>
    </style:style>
    <style:style style:name="Tabla6.A12" style:family="table-cell">
      <style:table-cell-properties fo:padding-left="0.123cm" fo:padding-right="0.123cm" fo:padding-top="0cm" fo:padding-bottom="0cm" fo:border="none"/>
    </style:style>
    <style:style style:name="Tabla6.A13" style:family="table-cell">
      <style:table-cell-properties fo:padding-left="0.123cm" fo:padding-right="0.123cm" fo:padding-top="0cm" fo:padding-bottom="0cm" fo:border="none"/>
    </style:style>
    <style:style style:name="Tabla6.A14" style:family="table-cell">
      <style:table-cell-properties fo:padding-left="0.123cm" fo:padding-right="0.123cm" fo:padding-top="0cm" fo:padding-bottom="0cm" fo:border="none"/>
    </style:style>
    <style:style style:name="Tabla6.A15" style:family="table-cell">
      <style:table-cell-properties fo:padding-left="0.123cm" fo:padding-right="0.123cm" fo:padding-top="0cm" fo:padding-bottom="0cm" fo:border="none"/>
    </style:style>
    <style:style style:name="Tabla6.A16" style:family="table-cell">
      <style:table-cell-properties fo:padding-left="0.123cm" fo:padding-right="0.123cm" fo:padding-top="0cm" fo:padding-bottom="0cm" fo:border="none"/>
    </style:style>
    <style:style style:name="Tabla6.A17" style:family="table-cell">
      <style:table-cell-properties fo:padding-left="0.123cm" fo:padding-right="0.123cm" fo:padding-top="0cm" fo:padding-bottom="0cm" fo:border="none"/>
    </style:style>
    <style:style style:name="Tabla6.A18" style:family="table-cell">
      <style:table-cell-properties fo:padding-left="0.123cm" fo:padding-right="0.123cm" fo:padding-top="0cm" fo:padding-bottom="0cm" fo:border="none"/>
    </style:style>
    <style:style style:name="Tabla6.A19" style:family="table-cell">
      <style:table-cell-properties fo:padding-left="0.123cm" fo:padding-right="0.123cm" fo:padding-top="0cm" fo:padding-bottom="0cm" fo:border="none"/>
    </style:style>
    <style:style style:name="Tabla6.A20" style:family="table-cell">
      <style:table-cell-properties fo:padding-left="0.123cm" fo:padding-right="0.123cm" fo:padding-top="0cm" fo:padding-bottom="0cm" fo:border="none"/>
    </style:style>
    <style:style style:name="Tabla6.A21" style:family="table-cell">
      <style:table-cell-properties fo:padding-left="0.123cm" fo:padding-right="0.123cm" fo:padding-top="0cm" fo:padding-bottom="0cm" fo:border="none"/>
    </style:style>
    <style:style style:name="Tabla6.A22" style:family="table-cell">
      <style:table-cell-properties fo:padding-left="0.123cm" fo:padding-right="0.123cm" fo:padding-top="0cm" fo:padding-bottom="0cm" fo:border="none"/>
    </style:style>
    <style:style style:name="Tabla6.A23" style:family="table-cell">
      <style:table-cell-properties fo:padding-left="0.123cm" fo:padding-right="0.123cm" fo:padding-top="0cm" fo:padding-bottom="0cm" fo:border="none"/>
    </style:style>
    <style:style style:name="Tabla6.A24" style:family="table-cell">
      <style:table-cell-properties fo:padding-left="0.123cm" fo:padding-right="0.123cm" fo:padding-top="0cm" fo:padding-bottom="0cm" fo:border="none"/>
    </style:style>
    <style:style style:name="Tabla6.A25" style:family="table-cell">
      <style:table-cell-properties fo:padding-left="0.123cm" fo:padding-right="0.123cm" fo:padding-top="0cm" fo:padding-bottom="0cm" fo:border="none"/>
    </style:style>
    <style:style style:name="Tabla6.A26" style:family="table-cell">
      <style:table-cell-properties fo:padding-left="0.123cm" fo:padding-right="0.123cm" fo:padding-top="0cm" fo:padding-bottom="0cm" fo:border="none"/>
    </style:style>
    <style:style style:name="Tabla6.A27" style:family="table-cell">
      <style:table-cell-properties fo:padding-left="0.123cm" fo:padding-right="0.123cm" fo:padding-top="0cm" fo:padding-bottom="0cm" fo:border="none"/>
    </style:style>
    <style:style style:name="Tabla6.A28" style:family="table-cell">
      <style:table-cell-properties fo:padding-left="0.123cm" fo:padding-right="0.123cm" fo:padding-top="0cm" fo:padding-bottom="0cm" fo:border="none"/>
    </style:style>
    <style:style style:name="Tabla6.A29" style:family="table-cell">
      <style:table-cell-properties fo:padding-left="0.123cm" fo:padding-right="0.123cm" fo:padding-top="0cm" fo:padding-bottom="0cm" fo:border="none"/>
    </style:style>
    <style:style style:name="Tabla6.A30" style:family="table-cell">
      <style:table-cell-properties fo:padding-left="0.123cm" fo:padding-right="0.123cm" fo:padding-top="0cm" fo:padding-bottom="0cm" fo:border="none"/>
    </style:style>
    <style:style style:name="Tabla6.A31" style:family="table-cell">
      <style:table-cell-properties fo:padding-left="0.123cm" fo:padding-right="0.123cm" fo:padding-top="0cm" fo:padding-bottom="0cm" fo:border="none"/>
    </style:style>
    <style:style style:name="Tabla3" style:family="table">
      <style:table-properties style:width="15.004cm" fo:margin-left="0.208cm" fo:margin-top="0cm" fo:margin-bottom="0cm" table:align="left" style:writing-mode="page"/>
    </style:style>
    <style:style style:name="Tabla3.A" style:family="table-column">
      <style:table-column-properties style:column-width="15.004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style>
    <style:style style:name="Tabla4" style:family="table">
      <style:table-properties style:rel-width="100%" fo:margin-left="0cm" fo:margin-top="0cm" fo:margin-bottom="0cm" table:align="left" style:writing-mode="page"/>
    </style:style>
    <style:style style:name="Tabla4.A" style:family="table-column">
      <style:table-column-properties style:rel-column-width="43449*"/>
    </style:style>
    <style:style style:name="Tabla4.B" style:family="table-column">
      <style:table-column-properties style:rel-column-width="18232*"/>
    </style:style>
    <style:style style:name="Tabla4.C" style:family="table-column">
      <style:table-column-properties style:rel-column-width="3854*"/>
    </style:style>
    <style:style style:name="Tabla4.1" style:family="table-row">
      <style:table-row-properties style:min-row-height="0.483cm" fo:keep-together="auto"/>
    </style:style>
    <style:style style:name="Tabla4.A1" style:family="table-cell">
      <style:table-cell-properties style:vertical-align="middle" fo:padding-left="0.191cm" fo:padding-right="0.191cm" fo:padding-top="0cm" fo:padding-bottom="0cm" fo:border-left="none" fo:border-right="0.5pt solid #000000" fo:border-top="none" fo:border-bottom="none"/>
    </style:style>
    <style:style style:name="Tabla4.B1" style:family="table-cell">
      <style:table-cell-properties style:vertical-align="middle" fo:padding-left="0.191cm" fo:padding-right="0.191cm" fo:padding-top="0cm" fo:padding-bottom="0cm" fo:border="0.5pt solid #000000"/>
    </style:style>
    <style:style style:name="Tabla4.2" style:family="table-row">
      <style:table-row-properties style:min-row-height="0.506cm" fo:keep-together="auto"/>
    </style:style>
    <style:style style:name="Tabla5" style:family="table">
      <style:table-properties style:width="6.532cm" fo:margin-left="0cm" fo:margin-top="0cm" fo:margin-bottom="0cm" table:align="left" style:writing-mode="page"/>
    </style:style>
    <style:style style:name="Tabla5.A" style:family="table-column">
      <style:table-column-properties style:column-width="6.532cm"/>
    </style:style>
    <style:style style:name="Tabla5.1" style:family="table-row">
      <style:table-row-properties style:min-row-height="0.464cm" fo:keep-together="auto"/>
    </style:style>
    <style:style style:name="Tabla5.A1" style:family="table-cell">
      <style:table-cell-properties fo:padding-left="0.191cm" fo:padding-right="0.191cm" fo:padding-top="0cm" fo:padding-bottom="0cm" fo:border-left="none" fo:border-right="none" fo:border-top="0.5pt solid #000000" fo:border-bottom="none"/>
    </style:style>
    <style:style style:name="Tabla5.A2" style:family="table-cell">
      <style:table-cell-properties fo:padding-left="0.191cm" fo:padding-right="0.191cm" fo:padding-top="0cm" fo:padding-bottom="0cm" fo:border="none"/>
    </style:style>
    <style:style style:name="Tabla7" style:family="table">
      <style:table-properties style:rel-width="100%" fo:margin-left="-0.123cm" fo:margin-top="0cm" fo:margin-bottom="0cm" table:align="left" style:writing-mode="page"/>
    </style:style>
    <style:style style:name="Tabla7.A" style:family="table-column">
      <style:table-column-properties style:rel-column-width="9908*"/>
    </style:style>
    <style:style style:name="Tabla7.B" style:family="table-column">
      <style:table-column-properties style:rel-column-width="53234*"/>
    </style:style>
    <style:style style:name="Tabla7.C" style:family="table-column">
      <style:table-column-properties style:rel-column-width="1193*"/>
    </style:style>
    <style:style style:name="Tabla7.D" style:family="table-column">
      <style:table-column-properties style:rel-column-width="1197*"/>
    </style:style>
    <style:style style:name="Tabla7.1" style:family="table-row">
      <style:table-row-properties style:min-row-height="0.582cm" fo:keep-together="auto"/>
    </style:style>
    <style:style style:name="Tabla7.A1" style:family="table-cell">
      <style:table-cell-properties style:vertical-align="bottom" fo:background-color="transparent" fo:padding-left="0.123cm" fo:padding-right="0.123cm" fo:padding-top="0cm" fo:padding-bottom="0cm" fo:border="none">
        <style:background-image/>
      </style:table-cell-properties>
    </style:style>
    <style:style style:name="Tabla7.B1" style:family="table-cell">
      <style:table-cell-properties style:vertical-align="bottom" fo:background-color="transparent" fo:padding-left="0.123cm" fo:padding-right="0.123cm" fo:padding-top="0cm" fo:padding-bottom="0cm" fo:border-left="0.5pt solid #000000" fo:border-right="none" fo:border-top="0.5pt solid #000000" fo:border-bottom="0.5pt solid #000000">
        <style:background-image/>
      </style:table-cell-properties>
    </style:style>
    <style:style style:name="Tabla7.C1" style:family="table-cell">
      <style:table-cell-properties style:vertical-align="bottom"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la7.D1" style:family="table-cell">
      <style:table-cell-properties style:vertical-align="bottom"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la7.2" style:family="table-row">
      <style:table-row-properties style:row-height="0.238cm" fo:keep-together="auto"/>
    </style:style>
    <style:style style:name="Tabla8" style:family="table">
      <style:table-properties style:rel-width="100%" fo:margin-left="-0.191cm" fo:margin-top="0cm" fo:margin-bottom="0cm" table:align="left" style:writing-mode="page"/>
    </style:style>
    <style:style style:name="Tabla8.A" style:family="table-column">
      <style:table-column-properties style:rel-column-width="23769*"/>
    </style:style>
    <style:style style:name="Tabla8.B" style:family="table-column">
      <style:table-column-properties style:rel-column-width="16613*"/>
    </style:style>
    <style:style style:name="Tabla8.C" style:family="table-column">
      <style:table-column-properties style:rel-column-width="25153*"/>
    </style:style>
    <style:style style:name="Tabla8.1" style:family="table-row">
      <style:table-row-properties style:min-row-height="0.787cm" fo:keep-together="auto"/>
    </style:style>
    <style:style style:name="Tabla8.A1" style:family="table-cell">
      <style:table-cell-properties style:vertical-align="middle" fo:padding-left="0.191cm" fo:padding-right="0.191cm" fo:padding-top="0cm" fo:padding-bottom="0cm" fo:border="0.5pt solid #000000"/>
    </style:style>
    <style:style style:name="Tabla8.2" style:family="table-row">
      <style:table-row-properties style:min-row-height="0.836cm" fo:keep-together="auto"/>
    </style:style>
    <style:style style:name="Tabla9" style:family="table">
      <style:table-properties style:rel-width="100%" fo:margin-left="-0.123cm" fo:margin-top="0cm" fo:margin-bottom="0cm" table:align="left" style:writing-mode="page"/>
    </style:style>
    <style:style style:name="Tabla9.A" style:family="table-column">
      <style:table-column-properties style:rel-column-width="65535*"/>
    </style:style>
    <style:style style:name="Tabla9.1" style:family="table-row">
      <style:table-row-properties style:min-row-height="0.446cm" fo:keep-together="auto"/>
    </style:style>
    <style:style style:name="Tabla9.A1" style:family="table-cell">
      <style:table-cell-properties style:vertical-align="middle" fo:padding-left="0.123cm" fo:padding-right="0.123cm" fo:padding-top="0cm" fo:padding-bottom="0cm" fo:border="0.5pt solid #000000"/>
    </style:style>
    <style:style style:name="Tabla10" style:family="table">
      <style:table-properties style:rel-width="100%" fo:margin-left="-0.123cm" fo:margin-top="0cm" fo:margin-bottom="0cm" table:align="left" style:writing-mode="page"/>
    </style:style>
    <style:style style:name="Tabla10.A" style:family="table-column">
      <style:table-column-properties style:rel-column-width="65535*"/>
    </style:style>
    <style:style style:name="Tabla10.1" style:family="table-row">
      <style:table-row-properties style:min-row-height="0.898cm" fo:keep-together="auto"/>
    </style:style>
    <style:style style:name="Tabla10.A1" style:family="table-cell">
      <style:table-cell-properties style:vertical-align="bottom" fo:background-color="transparent" fo:padding-left="0.123cm" fo:padding-right="0.123cm" fo:padding-top="0cm" fo:padding-bottom="0cm" fo:border="0.5pt solid #000000">
        <style:background-image/>
      </style:table-cell-properties>
    </style:style>
    <style:style style:name="Tabla10.2" style:family="table-row">
      <style:table-row-properties style:min-row-height="0.545cm" fo:keep-together="auto"/>
    </style:style>
    <style:style style:name="Tabla10.A2" style:family="table-cell">
      <style:table-cell-properties style:vertical-align="middle" fo:padding-left="0.123cm" fo:padding-right="0.123cm" fo:padding-top="0cm" fo:padding-bottom="0cm" fo:border="0.5pt solid #000000"/>
    </style:style>
    <style:style style:name="Tabla11" style:family="table">
      <style:table-properties style:rel-width="100%" fo:margin-left="-0.123cm" fo:margin-top="0cm" fo:margin-bottom="0cm" table:align="left" style:writing-mode="page"/>
    </style:style>
    <style:style style:name="Tabla11.A" style:family="table-column">
      <style:table-column-properties style:rel-column-width="65535*"/>
    </style:style>
    <style:style style:name="Tabla11.1" style:family="table-row">
      <style:table-row-properties style:min-row-height="0.898cm" fo:keep-together="auto"/>
    </style:style>
    <style:style style:name="Tabla11.A1" style:family="table-cell">
      <style:table-cell-properties style:vertical-align="bottom" fo:background-color="transparent" fo:padding-left="0.123cm" fo:padding-right="0.123cm" fo:padding-top="0cm" fo:padding-bottom="0cm" fo:border="0.5pt solid #000000">
        <style:background-image/>
      </style:table-cell-properties>
    </style:style>
    <style:style style:name="Tabla11.2" style:family="table-row">
      <style:table-row-properties style:min-row-height="0.545cm" fo:keep-together="auto"/>
    </style:style>
    <style:style style:name="Tabla11.A2" style:family="table-cell">
      <style:table-cell-properties style:vertical-align="middle" fo:padding-left="0.123cm" fo:padding-right="0.123cm" fo:padding-top="0cm" fo:padding-bottom="0cm" fo:border="0.5pt solid #000000"/>
    </style:style>
    <style:style style:name="Tabla12" style:family="table">
      <style:table-properties style:rel-width="100%" fo:margin-left="-0.191cm" fo:margin-top="0cm" fo:margin-bottom="0cm" table:align="left" style:writing-mode="page"/>
    </style:style>
    <style:style style:name="Tabla12.A" style:family="table-column">
      <style:table-column-properties style:rel-column-width="13716*"/>
    </style:style>
    <style:style style:name="Tabla12.B" style:family="table-column">
      <style:table-column-properties style:rel-column-width="51818*"/>
    </style:style>
    <style:style style:name="Tabla12.1" style:family="table-row">
      <style:table-row-properties style:min-row-height="0.106cm" fo:keep-together="auto"/>
    </style:style>
    <style:style style:name="Tabla12.A1" style:family="table-cell">
      <style:table-cell-properties style:vertical-align="middle" fo:padding-left="0.191cm" fo:padding-right="0.191cm" fo:padding-top="0cm" fo:padding-bottom="0cm" fo:border="0.5pt solid #000000"/>
    </style:style>
    <style:style style:name="Tabla13" style:family="table">
      <style:table-properties style:rel-width="100%" fo:margin-left="-0.191cm" fo:margin-top="0cm" fo:margin-bottom="0cm" table:align="left" style:writing-mode="page"/>
    </style:style>
    <style:style style:name="Tabla13.A" style:family="table-column">
      <style:table-column-properties style:rel-column-width="65535*"/>
    </style:style>
    <style:style style:name="Tabla13.1" style:family="table-row">
      <style:table-row-properties fo:keep-together="auto"/>
    </style:style>
    <style:style style:name="Tabla13.A1" style:family="table-cell">
      <style:table-cell-properties fo:padding-left="0.191cm" fo:padding-right="0.191cm" fo:padding-top="0cm" fo:padding-bottom="0cm" fo:border="0.5pt solid #000000"/>
    </style:style>
    <style:style style:name="Tabla14" style:family="table">
      <style:table-properties style:rel-width="100%" fo:margin-left="-0.191cm" fo:margin-top="0cm" fo:margin-bottom="0cm" table:align="left" style:writing-mode="page"/>
    </style:style>
    <style:style style:name="Tabla14.A" style:family="table-column">
      <style:table-column-properties style:rel-column-width="65535*"/>
    </style:style>
    <style:style style:name="Tabla14.1" style:family="table-row">
      <style:table-row-properties fo:keep-together="auto"/>
    </style:style>
    <style:style style:name="Tabla14.A1" style:family="table-cell">
      <style:table-cell-properties fo:padding-left="0.191cm" fo:padding-right="0.191cm" fo:padding-top="0cm" fo:padding-bottom="0cm" fo:border="0.5pt solid #000000"/>
    </style:style>
    <style:style style:name="Tabla15" style:family="table">
      <style:table-properties style:rel-width="100%" fo:margin-left="-0.191cm" fo:margin-top="0cm" fo:margin-bottom="0cm" table:align="left" style:writing-mode="page"/>
    </style:style>
    <style:style style:name="Tabla15.A" style:family="table-column">
      <style:table-column-properties style:rel-column-width="65535*"/>
    </style:style>
    <style:style style:name="Tabla15.1" style:family="table-row">
      <style:table-row-properties fo:keep-together="auto"/>
    </style:style>
    <style:style style:name="Tabla15.A1" style:family="table-cell">
      <style:table-cell-properties fo:padding-left="0.191cm" fo:padding-right="0.191cm" fo:padding-top="0cm" fo:padding-bottom="0cm" fo:border="0.5pt solid #000000"/>
    </style:style>
    <style:style style:name="Tabla16" style:family="table">
      <style:table-properties style:rel-width="100%" fo:margin-left="-0.123cm" fo:margin-top="0cm" fo:margin-bottom="0cm" table:align="left" style:writing-mode="page"/>
    </style:style>
    <style:style style:name="Tabla16.A" style:family="table-column">
      <style:table-column-properties style:rel-column-width="24798*"/>
    </style:style>
    <style:style style:name="Tabla16.B" style:family="table-column">
      <style:table-column-properties style:rel-column-width="14916*"/>
    </style:style>
    <style:style style:name="Tabla16.C" style:family="table-column">
      <style:table-column-properties style:rel-column-width="25821*"/>
    </style:style>
    <style:style style:name="Tabla16.1" style:family="table-row">
      <style:table-row-properties style:min-row-height="0.598cm" fo:keep-together="auto"/>
    </style:style>
    <style:style style:name="Tabla16.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a17" style:family="table">
      <style:table-properties style:rel-width="100%" fo:margin-left="-0.191cm" fo:margin-top="0cm" fo:margin-bottom="0cm" table:align="left" style:writing-mode="page"/>
    </style:style>
    <style:style style:name="Tabla17.A" style:family="table-column">
      <style:table-column-properties style:rel-column-width="65535*"/>
    </style:style>
    <style:style style:name="Tabla17.1" style:family="table-row">
      <style:table-row-properties style:min-row-height="1.633cm" fo:keep-together="auto"/>
    </style:style>
    <style:style style:name="Tabla17.A1" style:family="table-cell">
      <style:table-cell-properties fo:padding-left="0.191cm" fo:padding-right="0.191cm" fo:padding-top="0cm" fo:padding-bottom="0cm" fo:border="0.5pt solid #000000"/>
    </style:style>
    <style:style style:name="Tabla18" style:family="table">
      <style:table-properties style:rel-width="100%" fo:margin-left="-0.191cm" fo:margin-top="0cm" fo:margin-bottom="0cm" table:align="left" style:writing-mode="page"/>
    </style:style>
    <style:style style:name="Tabla18.A" style:family="table-column">
      <style:table-column-properties style:rel-column-width="65535*"/>
    </style:style>
    <style:style style:name="Tabla18.1" style:family="table-row">
      <style:table-row-properties style:min-row-height="1.362cm" fo:keep-together="auto"/>
    </style:style>
    <style:style style:name="Tabla18.A1" style:family="table-cell">
      <style:table-cell-properties fo:padding-left="0.191cm" fo:padding-right="0.191cm" fo:padding-top="0cm" fo:padding-bottom="0cm" fo:border="0.5pt solid #000000"/>
    </style:style>
    <style:style style:name="Tabla19" style:family="table">
      <style:table-properties style:rel-width="100%" fo:margin-left="-0.123cm" fo:margin-top="0cm" fo:margin-bottom="0cm" table:align="left" style:writing-mode="page"/>
    </style:style>
    <style:style style:name="Tabla19.A" style:family="table-column">
      <style:table-column-properties style:rel-column-width="65535*"/>
    </style:style>
    <style:style style:name="Tabla19.1" style:family="table-row">
      <style:table-row-properties style:min-row-height="0.711cm" fo:keep-together="auto"/>
    </style:style>
    <style:style style:name="Tabla19.A1" style:family="table-cell">
      <style:table-cell-properties style:vertical-align="middle" fo:padding-left="0.123cm" fo:padding-right="0.123cm" fo:padding-top="0cm" fo:padding-bottom="0cm" fo:border="0.5pt solid #000000"/>
    </style:style>
    <style:style style:name="Tabla20" style:family="table">
      <style:table-properties style:rel-width="100%" fo:margin-left="-0.191cm" fo:margin-top="0cm" fo:margin-bottom="0cm" table:align="left" style:writing-mode="page"/>
    </style:style>
    <style:style style:name="Tabla20.A" style:family="table-column">
      <style:table-column-properties style:rel-column-width="21154*"/>
    </style:style>
    <style:style style:name="Tabla20.B" style:family="table-column">
      <style:table-column-properties style:rel-column-width="44380*"/>
    </style:style>
    <style:style style:name="Tabla20.1" style:family="table-row">
      <style:table-row-properties style:min-row-height="0.711cm" fo:keep-together="auto"/>
    </style:style>
    <style:style style:name="Tabla20.A1" style:family="table-cell">
      <style:table-cell-properties style:vertical-align="middle" fo:padding-left="0.191cm" fo:padding-right="0.191cm" fo:padding-top="0cm" fo:padding-bottom="0cm" fo:border="0.5pt solid #000000"/>
    </style:style>
    <style:style style:name="Tabla20.2" style:family="table-row">
      <style:table-row-properties style:min-row-height="0.663cm" fo:keep-together="auto"/>
    </style:style>
    <style:style style:name="Tabla21" style:family="table">
      <style:table-properties style:rel-width="100%" fo:margin-left="-0.123cm" fo:margin-top="0cm" fo:margin-bottom="0cm" table:align="left" style:writing-mode="page"/>
    </style:style>
    <style:style style:name="Tabla21.A" style:family="table-column">
      <style:table-column-properties style:rel-column-width="14516*"/>
    </style:style>
    <style:style style:name="Tabla21.B" style:family="table-column">
      <style:table-column-properties style:rel-column-width="29628*"/>
    </style:style>
    <style:style style:name="Tabla21.C" style:family="table-column">
      <style:table-column-properties style:rel-column-width="12379*"/>
    </style:style>
    <style:style style:name="Tabla21.D" style:family="table-column">
      <style:table-column-properties style:rel-column-width="9009*"/>
    </style:style>
    <style:style style:name="Tabla21.1" style:family="table-row">
      <style:table-row-properties style:min-row-height="2.171cm" fo:keep-together="auto"/>
    </style:style>
    <style:style style:name="Tabla21.A1" style:family="table-cell">
      <style:table-cell-properties style:vertical-align="middle" fo:background-color="#b8cce4" fo:padding-left="0.123cm" fo:padding-right="0.123cm" fo:padding-top="0cm" fo:padding-bottom="0cm" fo:border="0.5pt solid #000000">
        <style:background-image/>
      </style:table-cell-properties>
    </style:style>
    <style:style style:name="Tabla21.B1" style:family="table-cell">
      <style:table-cell-properties style:vertical-align="middle" fo:background-color="#b8cce4" fo:padding-left="0.123cm" fo:padding-right="0.123cm" fo:padding-top="0cm" fo:padding-bottom="0cm" fo:border-left="none" fo:border-right="0.5pt solid #000000" fo:border-top="0.5pt solid #000000" fo:border-bottom="0.5pt solid #000000">
        <style:background-image/>
      </style:table-cell-properties>
    </style:style>
    <style:style style:name="Tabla21.2" style:family="table-row">
      <style:table-row-properties style:min-row-height="0.542cm" fo:keep-together="auto"/>
    </style:style>
    <style:style style:name="Tabla21.A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21.B2"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22" style:family="table">
      <style:table-properties style:rel-width="100%" fo:margin-left="-0.191cm" fo:margin-top="0cm" fo:margin-bottom="0cm" table:align="left" style:writing-mode="page"/>
    </style:style>
    <style:style style:name="Tabla22.A" style:family="table-column">
      <style:table-column-properties style:rel-column-width="65535*"/>
    </style:style>
    <style:style style:name="Tabla22.1" style:family="table-row">
      <style:table-row-properties style:min-row-height="1.893cm" fo:keep-together="auto"/>
    </style:style>
    <style:style style:name="Tabla22.A1" style:family="table-cell">
      <style:table-cell-properties fo:padding-left="0.191cm" fo:padding-right="0.191cm" fo:padding-top="0cm" fo:padding-bottom="0cm" fo:border="0.5pt solid #000000"/>
    </style:style>
    <style:style style:name="Tabla23" style:family="table">
      <style:table-properties style:rel-width="100%" fo:margin-left="-0.123cm" fo:margin-top="0cm" fo:margin-bottom="0cm" table:align="left" style:writing-mode="page"/>
    </style:style>
    <style:style style:name="Tabla23.A" style:family="table-column">
      <style:table-column-properties style:rel-column-width="8866*"/>
    </style:style>
    <style:style style:name="Tabla23.B" style:family="table-column">
      <style:table-column-properties style:rel-column-width="28338*"/>
    </style:style>
    <style:style style:name="Tabla23.C" style:family="table-column">
      <style:table-column-properties style:rel-column-width="28331*"/>
    </style:style>
    <style:style style:name="Tabla23.1" style:family="table-row">
      <style:table-row-properties style:min-row-height="1.224cm" fo:keep-together="auto"/>
    </style:style>
    <style:style style:name="Tabla23.A1" style:family="table-cell">
      <style:table-cell-properties style:vertical-align="middle" fo:background-color="#b8cce4" fo:padding-left="0.123cm" fo:padding-right="0.123cm" fo:padding-top="0cm" fo:padding-bottom="0cm" fo:border="0.5pt solid #000000">
        <style:background-image/>
      </style:table-cell-properties>
    </style:style>
    <style:style style:name="Tabla23.B1" style:family="table-cell">
      <style:table-cell-properties style:vertical-align="middle" fo:background-color="#b8cce4" fo:padding-left="0.123cm" fo:padding-right="0.123cm" fo:padding-top="0cm" fo:padding-bottom="0cm" fo:border-left="none" fo:border-right="0.5pt solid #000000" fo:border-top="0.5pt solid #000000" fo:border-bottom="0.5pt solid #000000">
        <style:background-image/>
      </style:table-cell-properties>
    </style:style>
    <style:style style:name="Tabla23.C1" style:family="table-cell">
      <style:table-cell-properties fo:background-color="#b8cce4" fo:padding-left="0.123cm" fo:padding-right="0.123cm" fo:padding-top="0cm" fo:padding-bottom="0cm" fo:border-left="none" fo:border-right="0.5pt solid #000000" fo:border-top="0.5pt solid #000000" fo:border-bottom="0.5pt solid #000000">
        <style:background-image/>
      </style:table-cell-properties>
    </style:style>
    <style:style style:name="Tabla23.2" style:family="table-row">
      <style:table-row-properties style:min-row-height="0.623cm" fo:keep-together="auto"/>
    </style:style>
    <style:style style:name="Tabla23.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23.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23.C2" style:family="table-cell">
      <style:table-cell-properties fo:padding-left="0.123cm" fo:padding-right="0.123cm" fo:padding-top="0cm" fo:padding-bottom="0cm" fo:border-left="none" fo:border-right="0.5pt solid #000000" fo:border-top="none" fo:border-bottom="0.5pt solid #000000"/>
    </style:style>
    <style:style style:name="Tabla23.C3" style:family="table-cell">
      <style:table-cell-properties fo:padding-left="0.123cm" fo:padding-right="0.123cm" fo:padding-top="0cm" fo:padding-bottom="0cm" fo:border-left="none" fo:border-right="0.5pt solid #000000" fo:border-top="none" fo:border-bottom="0.5pt solid #000000"/>
    </style:style>
    <style:style style:name="Tabla23.C4" style:family="table-cell">
      <style:table-cell-properties fo:padding-left="0.123cm" fo:padding-right="0.123cm" fo:padding-top="0cm" fo:padding-bottom="0cm" fo:border-left="none" fo:border-right="0.5pt solid #000000" fo:border-top="none" fo:border-bottom="0.5pt solid #000000"/>
    </style:style>
    <style:style style:name="Tabla23.C5" style:family="table-cell">
      <style:table-cell-properties fo:padding-left="0.123cm" fo:padding-right="0.123cm" fo:padding-top="0cm" fo:padding-bottom="0cm" fo:border-left="none" fo:border-right="0.5pt solid #000000" fo:border-top="none" fo:border-bottom="0.5pt solid #000000"/>
    </style:style>
    <style:style style:name="Tabla23.C6" style:family="table-cell">
      <style:table-cell-properties fo:padding-left="0.123cm" fo:padding-right="0.123cm" fo:padding-top="0cm" fo:padding-bottom="0cm" fo:border-left="none" fo:border-right="0.5pt solid #000000" fo:border-top="none" fo:border-bottom="0.5pt solid #000000"/>
    </style:style>
    <style:style style:name="Tabla23.C7" style:family="table-cell">
      <style:table-cell-properties fo:padding-left="0.123cm" fo:padding-right="0.123cm" fo:padding-top="0cm" fo:padding-bottom="0cm" fo:border-left="none" fo:border-right="0.5pt solid #000000" fo:border-top="none" fo:border-bottom="0.5pt solid #000000"/>
    </style:style>
    <style:style style:name="Tabla24" style:family="table">
      <style:table-properties style:rel-width="100%" fo:margin-left="-0.123cm" fo:margin-top="0cm" fo:margin-bottom="0cm" table:align="left" style:writing-mode="page"/>
    </style:style>
    <style:style style:name="Tabla24.A" style:family="table-column">
      <style:table-column-properties style:rel-column-width="65535*"/>
    </style:style>
    <style:style style:name="Tabla24.1" style:family="table-row">
      <style:table-row-properties style:min-row-height="0.582cm" fo:keep-together="auto"/>
    </style:style>
    <style:style style:name="Tabla24.A1" style:family="table-cell">
      <style:table-cell-properties style:vertical-align="bottom" fo:background-color="transparent" fo:padding-left="0.123cm" fo:padding-right="0.123cm" fo:padding-top="0cm" fo:padding-bottom="0cm" fo:border="0.5pt solid #000000">
        <style:background-image/>
      </style:table-cell-properties>
    </style:style>
    <style:style style:name="Tabla24.A2" style:family="table-cell">
      <style:table-cell-properties style:vertical-align="middle" fo:padding-left="0.123cm" fo:padding-right="0.123cm" fo:padding-top="0cm" fo:padding-bottom="0cm" fo:border="0.5pt solid #000000"/>
    </style:style>
    <style:style style:name="Tabla24.A3" style:family="table-cell">
      <style:table-cell-properties style:vertical-align="middle" fo:padding-left="0.123cm" fo:padding-right="0.123cm" fo:padding-top="0cm" fo:padding-bottom="0cm" fo:border="0.5pt solid #000000"/>
    </style:style>
    <style:style style:name="Tabla25" style:family="table">
      <style:table-properties style:rel-width="100%" fo:margin-left="-0.123cm" fo:margin-top="0cm" fo:margin-bottom="0cm" table:align="left" style:writing-mode="page"/>
    </style:style>
    <style:style style:name="Tabla25.A" style:family="table-column">
      <style:table-column-properties style:rel-column-width="21718*"/>
    </style:style>
    <style:style style:name="Tabla25.B" style:family="table-column">
      <style:table-column-properties style:rel-column-width="43816*"/>
    </style:style>
    <style:style style:name="Tabla25.1" style:family="table-row">
      <style:table-row-properties style:min-row-height="0.254cm" fo:keep-together="auto"/>
    </style:style>
    <style:style style:name="Tabla25.A1" style:family="table-cell">
      <style:table-cell-properties style:vertical-align="middle" fo:background-color="#b8cce4" fo:padding-left="0.123cm" fo:padding-right="0.123cm" fo:padding-top="0cm" fo:padding-bottom="0cm" fo:border="0.5pt solid #000000">
        <style:background-image/>
      </style:table-cell-properties>
    </style:style>
    <style:style style:name="Tabla25.B1" style:family="table-cell">
      <style:table-cell-properties style:vertical-align="middle" fo:background-color="#b8cce4" fo:padding-left="0.123cm" fo:padding-right="0.123cm" fo:padding-top="0cm" fo:padding-bottom="0cm" fo:border-left="none" fo:border-right="0.5pt solid #000000" fo:border-top="0.5pt solid #000000" fo:border-bottom="0.5pt solid #000000">
        <style:background-image/>
      </style:table-cell-properties>
    </style:style>
    <style:style style:name="Tabla25.2" style:family="table-row">
      <style:table-row-properties style:min-row-height="0.423cm" fo:keep-together="auto"/>
    </style:style>
    <style:style style:name="Tabla25.A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25.B2"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26" style:family="table">
      <style:table-properties style:rel-width="100%" fo:margin-left="-0.123cm" fo:margin-top="0cm" fo:margin-bottom="0cm" table:align="left" style:writing-mode="page"/>
    </style:style>
    <style:style style:name="Tabla26.A" style:family="table-column">
      <style:table-column-properties style:rel-column-width="15531*"/>
    </style:style>
    <style:style style:name="Tabla26.B" style:family="table-column">
      <style:table-column-properties style:rel-column-width="14444*"/>
    </style:style>
    <style:style style:name="Tabla26.C" style:family="table-column">
      <style:table-column-properties style:rel-column-width="13540*"/>
    </style:style>
    <style:style style:name="Tabla26.D" style:family="table-column">
      <style:table-column-properties style:rel-column-width="22017*"/>
    </style:style>
    <style:style style:name="Tabla26.1" style:family="table-row">
      <style:table-row-properties style:min-row-height="0.568cm" fo:keep-together="auto"/>
    </style:style>
    <style:style style:name="Tabla26.A1" style:family="table-cell">
      <style:table-cell-properties style:vertical-align="middle" fo:background-color="#b8cce4" fo:padding-left="0.123cm" fo:padding-right="0.123cm" fo:padding-top="0cm" fo:padding-bottom="0cm" fo:border="0.5pt solid #000000">
        <style:background-image/>
      </style:table-cell-properties>
    </style:style>
    <style:style style:name="Tabla26.B1" style:family="table-cell">
      <style:table-cell-properties style:vertical-align="middle" fo:background-color="#b8cce4" fo:padding-left="0.123cm" fo:padding-right="0.123cm" fo:padding-top="0cm" fo:padding-bottom="0cm" fo:border-left="none" fo:border-right="0.5pt solid #000000" fo:border-top="0.5pt solid #000000" fo:border-bottom="0.5pt solid #000000">
        <style:background-image/>
      </style:table-cell-properties>
    </style:style>
    <style:style style:name="Tabla26.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26.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27" style:family="table">
      <style:table-properties style:rel-width="100%" fo:margin-left="-0.191cm" fo:margin-top="0cm" fo:margin-bottom="0cm" table:align="left" style:writing-mode="page"/>
    </style:style>
    <style:style style:name="Tabla27.A" style:family="table-column">
      <style:table-column-properties style:rel-column-width="19437*"/>
    </style:style>
    <style:style style:name="Tabla27.B" style:family="table-column">
      <style:table-column-properties style:rel-column-width="46097*"/>
    </style:style>
    <style:style style:name="Tabla27.1" style:family="table-row">
      <style:table-row-properties style:min-row-height="0.568cm" fo:keep-together="auto"/>
    </style:style>
    <style:style style:name="Tabla27.A1" style:family="table-cell">
      <style:table-cell-properties style:vertical-align="middle" fo:padding-left="0.191cm" fo:padding-right="0.191cm" fo:padding-top="0cm" fo:padding-bottom="0cm" fo:border="0.5pt solid #000000"/>
    </style:style>
    <style:style style:name="Tabla27.3" style:family="table-row">
      <style:table-row-properties style:min-row-height="0.601cm" fo:keep-together="auto"/>
    </style:style>
    <style:style style:name="Tabla27.4" style:family="table-row">
      <style:table-row-properties style:min-row-height="0.533cm" fo:keep-together="auto"/>
    </style:style>
    <style:style style:name="Tabla28" style:family="table">
      <style:table-properties style:rel-width="100%" fo:margin-left="-0.191cm" fo:margin-top="0cm" fo:margin-bottom="0cm" table:align="left" style:writing-mode="page"/>
    </style:style>
    <style:style style:name="Tabla28.A" style:family="table-column">
      <style:table-column-properties style:rel-column-width="65535*"/>
    </style:style>
    <style:style style:name="Tabla28.1" style:family="table-row">
      <style:table-row-properties style:min-row-height="2.277cm" fo:keep-together="auto"/>
    </style:style>
    <style:style style:name="Tabla28.A1" style:family="table-cell">
      <style:table-cell-properties fo:padding-left="0.191cm" fo:padding-right="0.191cm" fo:padding-top="0cm" fo:padding-bottom="0cm" fo:border="0.5pt solid #000000"/>
    </style:style>
    <style:style style:name="Tabla29" style:family="table">
      <style:table-properties style:width="14.817cm" fo:margin-left="-0.026cm" fo:margin-top="0cm" fo:margin-bottom="0cm" table:align="left" style:writing-mode="page"/>
    </style:style>
    <style:style style:name="Tabla29.A" style:family="table-column">
      <style:table-column-properties style:column-width="14.817cm"/>
    </style:style>
    <style:style style:name="Tabla29.1" style:family="table-row">
      <style:table-row-properties style:min-row-height="0.582cm" fo:keep-together="auto"/>
    </style:style>
    <style:style style:name="Tabla29.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a30" style:family="table">
      <style:table-properties style:rel-width="100%" fo:margin-left="-0.123cm" fo:margin-top="0cm" fo:margin-bottom="0cm" table:align="left" style:writing-mode="page"/>
    </style:style>
    <style:style style:name="Tabla30.A" style:family="table-column">
      <style:table-column-properties style:rel-column-width="12110*"/>
    </style:style>
    <style:style style:name="Tabla30.B" style:family="table-column">
      <style:table-column-properties style:rel-column-width="21004*"/>
    </style:style>
    <style:style style:name="Tabla30.C" style:family="table-column">
      <style:table-column-properties style:rel-column-width="14674*"/>
    </style:style>
    <style:style style:name="Tabla30.D" style:family="table-column">
      <style:table-column-properties style:rel-column-width="17744*"/>
    </style:style>
    <style:style style:name="Tabla30.1" style:family="table-row">
      <style:table-row-properties style:min-row-height="1.132cm" fo:keep-together="auto"/>
    </style:style>
    <style:style style:name="Tabla30.A1" style:family="table-cell">
      <style:table-cell-properties style:vertical-align="middle" fo:background-color="#b8cce4" fo:padding-left="0.123cm" fo:padding-right="0.123cm" fo:padding-top="0cm" fo:padding-bottom="0cm" fo:border="0.5pt solid #000000">
        <style:background-image/>
      </style:table-cell-properties>
    </style:style>
    <style:style style:name="Tabla30.B1" style:family="table-cell">
      <style:table-cell-properties style:vertical-align="middle" fo:background-color="#b8cce4" fo:padding-left="0.123cm" fo:padding-right="0.123cm" fo:padding-top="0cm" fo:padding-bottom="0cm" fo:border-left="none" fo:border-right="0.5pt solid #000000" fo:border-top="0.5pt solid #000000" fo:border-bottom="0.5pt solid #000000">
        <style:background-image/>
      </style:table-cell-properties>
    </style:style>
    <style:style style:name="Tabla30.2" style:family="table-row">
      <style:table-row-properties style:min-row-height="0.566cm" fo:keep-together="auto"/>
    </style:style>
    <style:style style:name="Tabla30.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30.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31" style:family="table">
      <style:table-properties style:rel-width="100%" fo:margin-top="0cm" fo:margin-bottom="0cm" table:align="center" style:writing-mode="page"/>
    </style:style>
    <style:style style:name="Tabla31.A" style:family="table-column">
      <style:table-column-properties style:rel-column-width="18493*"/>
    </style:style>
    <style:style style:name="Tabla31.B" style:family="table-column">
      <style:table-column-properties style:rel-column-width="6547*"/>
    </style:style>
    <style:style style:name="Tabla31.C" style:family="table-column">
      <style:table-column-properties style:rel-column-width="8192*"/>
    </style:style>
    <style:style style:name="Tabla31.D" style:family="table-column">
      <style:table-column-properties style:rel-column-width="6416*"/>
    </style:style>
    <style:style style:name="Tabla31.E" style:family="table-column">
      <style:table-column-properties style:rel-column-width="7379*"/>
    </style:style>
    <style:style style:name="Tabla31.F" style:family="table-column">
      <style:table-column-properties style:rel-column-width="5381*"/>
    </style:style>
    <style:style style:name="Tabla31.G" style:family="table-column">
      <style:table-column-properties style:rel-column-width="9057*"/>
    </style:style>
    <style:style style:name="Tabla31.H" style:family="table-column">
      <style:table-column-properties style:rel-column-width="4063*"/>
    </style:style>
    <style:style style:name="Tabla31.1" style:family="table-row">
      <style:table-row-properties style:min-row-height="0.392cm" fo:keep-together="auto"/>
    </style:style>
    <style:style style:name="Tabla31.A1" style:family="table-cell">
      <style:table-cell-properties style:vertical-align="middle" fo:background-color="#b8cce4" fo:padding-left="0.123cm" fo:padding-right="0.123cm" fo:padding-top="0cm" fo:padding-bottom="0cm" fo:border="0.5pt solid #000000">
        <style:background-image/>
      </style:table-cell-properties>
    </style:style>
    <style:style style:name="Tabla31.D1" style:family="table-cell">
      <style:table-cell-properties style:vertical-align="middle" fo:background-color="#b8cce4" fo:padding-left="0.123cm" fo:padding-right="0.123cm" fo:padding-top="0cm" fo:padding-bottom="0cm" fo:border-left="none" fo:border-right="0.5pt solid #000000" fo:border-top="0.5pt solid #000000" fo:border-bottom="0.5pt solid #000000">
        <style:background-image/>
      </style:table-cell-properties>
    </style:style>
    <style:style style:name="Tabla31.2" style:family="table-row">
      <style:table-row-properties style:min-row-height="0.483cm" fo:keep-together="auto"/>
    </style:style>
    <style:style style:name="Tabla31.A2" style:family="table-cell">
      <style:table-cell-properties style:vertical-align="middle" fo:padding-left="0.123cm" fo:padding-right="0.123cm" fo:padding-top="0cm" fo:padding-bottom="0cm" fo:border="0.5pt solid #000000"/>
    </style:style>
    <style:style style:name="Tabla31.B2" style:family="table-cell">
      <style:table-cell-properties style:vertical-align="middle" fo:padding-left="0.123cm" fo:padding-right="0.123cm" fo:padding-top="0cm" fo:padding-bottom="0cm" fo:border="0.5pt solid #000000"/>
    </style:style>
    <style:style style:name="Tabla31.C2" style:family="table-cell">
      <style:table-cell-properties style:vertical-align="middle" fo:padding-left="0.123cm" fo:padding-right="0.123cm" fo:padding-top="0cm" fo:padding-bottom="0cm" fo:border="0.5pt solid #000000"/>
    </style:style>
    <style:style style:name="Tabla31.A3" style:family="table-cell">
      <style:table-cell-properties style:vertical-align="middle" fo:padding-left="0.123cm" fo:padding-right="0.123cm" fo:padding-top="0cm" fo:padding-bottom="0cm" fo:border="0.5pt solid #000000"/>
    </style:style>
    <style:style style:name="Tabla31.B3" style:family="table-cell">
      <style:table-cell-properties style:vertical-align="middle" fo:padding-left="0.123cm" fo:padding-right="0.123cm" fo:padding-top="0cm" fo:padding-bottom="0cm" fo:border="0.5pt solid #000000"/>
    </style:style>
    <style:style style:name="Tabla31.C3" style:family="table-cell">
      <style:table-cell-properties style:vertical-align="middle" fo:padding-left="0.123cm" fo:padding-right="0.123cm" fo:padding-top="0cm" fo:padding-bottom="0cm" fo:border="0.5pt solid #000000"/>
    </style:style>
    <style:style style:name="Tabla31.D3" style:family="table-cell">
      <style:table-cell-properties style:vertical-align="middle" fo:background-color="#b8cce4" fo:padding-left="0.123cm" fo:padding-right="0.123cm" fo:padding-top="0cm" fo:padding-bottom="0cm" fo:border-left="0.5pt solid #000000" fo:border-right="0.5pt solid #000000" fo:border-top="none" fo:border-bottom="0.5pt solid #000000">
        <style:background-image/>
      </style:table-cell-properties>
    </style:style>
    <style:style style:name="Tabla31.4" style:family="table-row">
      <style:table-row-properties style:min-row-height="1.177cm" fo:keep-together="auto"/>
    </style:style>
    <style:style style:name="Tabla31.A4" style:family="table-cell">
      <style:table-cell-properties style:vertical-align="middle" fo:padding-left="0.123cm" fo:padding-right="0.123cm" fo:padding-top="0cm" fo:padding-bottom="0cm" fo:border="0.5pt solid #000000"/>
    </style:style>
    <style:style style:name="Tabla31.B4" style:family="table-cell">
      <style:table-cell-properties style:vertical-align="middle" fo:padding-left="0.123cm" fo:padding-right="0.123cm" fo:padding-top="0cm" fo:padding-bottom="0cm" fo:border="0.5pt solid #000000"/>
    </style:style>
    <style:style style:name="Tabla31.C4" style:family="table-cell">
      <style:table-cell-properties style:vertical-align="middle" fo:padding-left="0.123cm" fo:padding-right="0.123cm" fo:padding-top="0cm" fo:padding-bottom="0cm" fo:border="0.5pt solid #000000"/>
    </style:style>
    <style:style style:name="Tabla31.D4"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31.E4"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31.G4" style:family="table-cell">
      <style:table-cell-properties style:vertical-align="middle" fo:background-color="#b8cce4" fo:padding-left="0.123cm" fo:padding-right="0.123cm" fo:padding-top="0cm" fo:padding-bottom="0cm" fo:border-left="none" fo:border-right="0.5pt solid #000000" fo:border-top="none" fo:border-bottom="0.5pt solid #000000">
        <style:background-image/>
      </style:table-cell-properties>
    </style:style>
    <style:style style:name="Tabla31.A5" style:family="table-cell">
      <style:table-cell-properties style:vertical-align="middle" fo:padding-left="0.123cm" fo:padding-right="0.123cm" fo:padding-top="0cm" fo:padding-bottom="0cm" fo:border="0.5pt solid #000000"/>
    </style:style>
    <style:style style:name="Tabla31.B5" style:family="table-cell">
      <style:table-cell-properties style:vertical-align="middle" fo:padding-left="0.123cm" fo:padding-right="0.123cm" fo:padding-top="0cm" fo:padding-bottom="0cm" fo:border="0.5pt solid #000000"/>
    </style:style>
    <style:style style:name="Tabla31.C5" style:family="table-cell">
      <style:table-cell-properties style:vertical-align="middle" fo:padding-left="0.123cm" fo:padding-right="0.123cm" fo:padding-top="0cm" fo:padding-bottom="0cm" fo:border="0.5pt solid #000000"/>
    </style:style>
    <style:style style:name="Tabla31.D5"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31.E5"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31.F5"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31.6" style:family="table-row">
      <style:table-row-properties style:min-row-height="0.783cm" fo:keep-together="auto"/>
    </style:style>
    <style:style style:name="Tabla31.A6" style:family="table-cell">
      <style:table-cell-properties style:vertical-align="middle" fo:background-color="#d9d9d9" fo:padding-left="0.123cm" fo:padding-right="0.123cm" fo:padding-top="0cm" fo:padding-bottom="0cm" fo:border-left="0.5pt solid #000000" fo:border-right="0.5pt solid #000000" fo:border-top="none" fo:border-bottom="0.5pt solid #000000">
        <style:background-image/>
      </style:table-cell-properties>
    </style:style>
    <style:style style:name="Tabla31.B6" style:family="table-cell">
      <style:table-cell-properties style:vertical-align="middle" fo:background-color="#d9d9d9" fo:padding-left="0.123cm" fo:padding-right="0.123cm" fo:padding-top="0cm" fo:padding-bottom="0cm" fo:border-left="none" fo:border-right="0.5pt solid #000000" fo:border-top="none" fo:border-bottom="0.5pt solid #000000">
        <style:background-image/>
      </style:table-cell-properties>
    </style:style>
    <style:style style:name="Tabla31.A7"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31.B7"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la31.D7"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31.8" style:family="table-row">
      <style:table-row-properties style:min-row-height="0.923cm" fo:keep-together="auto"/>
    </style:style>
    <style:style style:name="Tabla31.21" style:family="table-row">
      <style:table-row-properties style:min-row-height="0.854cm" fo:keep-together="auto"/>
    </style:style>
    <style:style style:name="Tabla31.29" style:family="table-row">
      <style:table-row-properties style:min-row-height="0.552cm" fo:keep-together="auto"/>
    </style:style>
    <style:style style:name="Tabla31.34" style:family="table-row">
      <style:table-row-properties style:min-row-height="1.129cm" fo:keep-together="auto"/>
    </style:style>
    <style:style style:name="Tabla31.35" style:family="table-row">
      <style:table-row-properties style:min-row-height="0.968cm" fo:keep-together="auto"/>
    </style:style>
    <style:style style:name="Tabla32" style:family="table">
      <style:table-properties style:rel-width="100%" fo:margin-left="-0.123cm" fo:margin-top="0cm" fo:margin-bottom="0cm" table:align="left" style:writing-mode="page"/>
    </style:style>
    <style:style style:name="Tabla32.A" style:family="table-column">
      <style:table-column-properties style:rel-column-width="41450*"/>
    </style:style>
    <style:style style:name="Tabla32.B" style:family="table-column">
      <style:table-column-properties style:rel-column-width="4804*"/>
    </style:style>
    <style:style style:name="Tabla32.C" style:family="table-column">
      <style:table-column-properties style:rel-column-width="4817*"/>
    </style:style>
    <style:style style:name="Tabla32.E" style:family="table-column">
      <style:table-column-properties style:rel-column-width="4810*"/>
    </style:style>
    <style:style style:name="Tabla32.F" style:family="table-column">
      <style:table-column-properties style:rel-column-width="4834*"/>
    </style:style>
    <style:style style:name="Tabla32.1" style:family="table-row">
      <style:table-row-properties style:min-row-height="0.45cm" fo:keep-together="auto"/>
    </style:style>
    <style:style style:name="Tabla32.A1" style:family="table-cell">
      <style:table-cell-properties style:vertical-align="middle" fo:background-color="#b8cce4" fo:padding-left="0.123cm" fo:padding-right="0.123cm" fo:padding-top="0cm" fo:padding-bottom="0cm" fo:border="0.5pt solid #000000">
        <style:background-image/>
      </style:table-cell-properties>
    </style:style>
    <style:style style:name="Tabla32.A2" style:family="table-cell">
      <style:table-cell-properties style:vertical-align="middle" fo:background-color="#b8cce4" fo:padding-left="0.123cm" fo:padding-right="0.123cm" fo:padding-top="0cm" fo:padding-bottom="0cm" fo:border-left="0.5pt solid #000000" fo:border-right="0.5pt solid #000000" fo:border-top="none" fo:border-bottom="0.5pt solid #000000">
        <style:background-image/>
      </style:table-cell-properties>
    </style:style>
    <style:style style:name="Tabla32.B2" style:family="table-cell">
      <style:table-cell-properties style:vertical-align="middle" fo:background-color="#b8cce4" fo:padding-left="0.123cm" fo:padding-right="0.123cm" fo:padding-top="0cm" fo:padding-bottom="0cm" fo:border-left="none" fo:border-right="0.5pt solid #000000" fo:border-top="0.5pt solid #000000" fo:border-bottom="0.5pt solid #000000">
        <style:background-image/>
      </style:table-cell-properties>
    </style:style>
    <style:style style:name="Tabla32.B3" style:family="table-cell">
      <style:table-cell-properties style:vertical-align="middle" fo:background-color="#b8cce4" fo:padding-left="0.123cm" fo:padding-right="0.123cm" fo:padding-top="0cm" fo:padding-bottom="0cm" fo:border-left="none" fo:border-right="0.5pt solid #000000" fo:border-top="none" fo:border-bottom="0.5pt solid #000000">
        <style:background-image/>
      </style:table-cell-properties>
    </style:style>
    <style:style style:name="Tabla32.A4"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32.B4"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32.A14" style:family="table-cell">
      <style:table-cell-properties style:vertical-align="bottom" fo:background-color="transparent" fo:padding-left="0.123cm" fo:padding-right="0.123cm" fo:padding-top="0cm" fo:padding-bottom="0cm" fo:border-left="0.5pt solid #000000" fo:border-right="0.5pt solid #000000" fo:border-top="none" fo:border-bottom="none">
        <style:background-image/>
      </style:table-cell-properties>
    </style:style>
    <style:style style:name="Tabla32.B14" style:family="table-cell">
      <style:table-cell-properties style:vertical-align="bottom" fo:background-color="transparent" fo:padding-left="0.123cm" fo:padding-right="0.123cm" fo:padding-top="0cm" fo:padding-bottom="0cm" fo:border-left="none" fo:border-right="0.5pt solid #000000" fo:border-top="none" fo:border-bottom="none">
        <style:background-image/>
      </style:table-cell-properties>
    </style:style>
    <style:style style:name="Tabla32.A15" style:family="table-cell">
      <style:table-cell-properties style:vertical-align="bottom" fo:background-color="transparent" fo:padding-left="0.123cm" fo:padding-right="0.123cm" fo:padding-top="0cm" fo:padding-bottom="0cm" fo:border="0.5pt solid #000000">
        <style:background-image/>
      </style:table-cell-properties>
    </style:style>
    <style:style style:name="Tabla32.B15" style:family="table-cell">
      <style:table-cell-properties style:vertical-align="bottom"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la33" style:family="table">
      <style:table-properties style:rel-width="100%" fo:margin-left="-0.123cm" fo:margin-top="0cm" fo:margin-bottom="0cm" table:align="left" style:writing-mode="page"/>
    </style:style>
    <style:style style:name="Tabla33.A" style:family="table-column">
      <style:table-column-properties style:rel-column-width="31902*"/>
    </style:style>
    <style:style style:name="Tabla33.B" style:family="table-column">
      <style:table-column-properties style:rel-column-width="6560*"/>
    </style:style>
    <style:style style:name="Tabla33.C" style:family="table-column">
      <style:table-column-properties style:rel-column-width="5806*"/>
    </style:style>
    <style:style style:name="Tabla33.D" style:family="table-column">
      <style:table-column-properties style:rel-column-width="7478*"/>
    </style:style>
    <style:style style:name="Tabla33.E" style:family="table-column">
      <style:table-column-properties style:rel-column-width="6645*"/>
    </style:style>
    <style:style style:name="Tabla33.F" style:family="table-column">
      <style:table-column-properties style:rel-column-width="7141*"/>
    </style:style>
    <style:style style:name="Tabla33.1" style:family="table-row">
      <style:table-row-properties style:min-row-height="0.459cm" fo:keep-together="auto"/>
    </style:style>
    <style:style style:name="Tabla33.A1" style:family="table-cell">
      <style:table-cell-properties style:vertical-align="middle" fo:background-color="#c5d9f1" fo:padding-left="0.123cm" fo:padding-right="0.123cm" fo:padding-top="0cm" fo:padding-bottom="0cm" fo:border="0.5pt solid #000000">
        <style:background-image/>
      </style:table-cell-properties>
    </style:style>
    <style:style style:name="Tabla33.B1" style:family="table-cell">
      <style:table-cell-properties style:vertical-align="middle" fo:background-color="#c5d9f1" fo:padding-left="0.123cm" fo:padding-right="0.123cm" fo:padding-top="0cm" fo:padding-bottom="0cm" fo:border-left="none" fo:border-right="0.5pt solid #000000" fo:border-top="0.5pt solid #000000" fo:border-bottom="0.5pt solid #000000">
        <style:background-image/>
      </style:table-cell-properties>
    </style:style>
    <style:style style:name="Tabla33.A2" style:family="table-cell">
      <style:table-cell-properties style:vertical-align="middle" fo:padding-left="0.123cm" fo:padding-right="0.123cm" fo:padding-top="0cm" fo:padding-bottom="0cm" fo:border="0.5pt solid #000000"/>
    </style:style>
    <style:style style:name="Tabla33.B2" style:family="table-cell">
      <style:table-cell-properties style:vertical-align="middle" fo:background-color="#c5d9f1" fo:padding-left="0.123cm" fo:padding-right="0.123cm" fo:padding-top="0cm" fo:padding-bottom="0cm" fo:border-left="none" fo:border-right="0.5pt solid #000000" fo:border-top="none" fo:border-bottom="0.5pt solid #000000">
        <style:background-image/>
      </style:table-cell-properties>
    </style:style>
    <style:style style:name="Tabla33.A3"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33.B3"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33.A4" style:family="table-cell">
      <style:table-cell-properties style:vertical-align="bottom" fo:background-color="#ffffff" fo:padding-left="0.123cm" fo:padding-right="0.123cm" fo:padding-top="0cm" fo:padding-bottom="0cm" fo:border-left="0.5pt solid #000000" fo:border-right="0.5pt solid #000000" fo:border-top="none" fo:border-bottom="0.5pt solid #000000">
        <style:background-image/>
      </style:table-cell-properties>
    </style:style>
    <style:style style:name="Tabla33.A14" style:family="table-cell">
      <style:table-cell-properties style:vertical-align="bottom" fo:background-color="#c5d9f1" fo:padding-left="0.123cm" fo:padding-right="0.123cm" fo:padding-top="0cm" fo:padding-bottom="0cm" fo:border-left="0.5pt solid #000000" fo:border-right="0.5pt solid #000000" fo:border-top="none" fo:border-bottom="0.5pt solid #000000">
        <style:background-image/>
      </style:table-cell-properties>
    </style:style>
    <style:style style:name="Tabla33.B14" style:family="table-cell">
      <style:table-cell-properties style:vertical-align="bottom" fo:background-color="#c5d9f1" fo:padding-left="0.123cm" fo:padding-right="0.123cm" fo:padding-top="0cm" fo:padding-bottom="0cm" fo:border-left="none" fo:border-right="0.5pt solid #000000" fo:border-top="none" fo:border-bottom="0.5pt solid #000000">
        <style:background-image/>
      </style:table-cell-properties>
    </style:style>
    <style:style style:name="Tabla34" style:family="table">
      <style:table-properties style:rel-width="100%" fo:margin-left="-0.123cm" fo:margin-top="0cm" fo:margin-bottom="0cm" table:align="left" style:writing-mode="page"/>
    </style:style>
    <style:style style:name="Tabla34.A" style:family="table-column">
      <style:table-column-properties style:rel-column-width="31902*"/>
    </style:style>
    <style:style style:name="Tabla34.B" style:family="table-column">
      <style:table-column-properties style:rel-column-width="6540*"/>
    </style:style>
    <style:style style:name="Tabla34.C" style:family="table-column">
      <style:table-column-properties style:rel-column-width="6554*"/>
    </style:style>
    <style:style style:name="Tabla34.D" style:family="table-column">
      <style:table-column-properties style:rel-column-width="6835*"/>
    </style:style>
    <style:style style:name="Tabla34.F" style:family="table-column">
      <style:table-column-properties style:rel-column-width="6866*"/>
    </style:style>
    <style:style style:name="Tabla34.1" style:family="table-row">
      <style:table-row-properties style:min-row-height="0.536cm" fo:keep-together="auto"/>
    </style:style>
    <style:style style:name="Tabla34.A1" style:family="table-cell">
      <style:table-cell-properties style:vertical-align="middle" fo:background-color="#b8cce4" fo:padding-left="0.123cm" fo:padding-right="0.123cm" fo:padding-top="0cm" fo:padding-bottom="0cm" fo:border="0.5pt solid #000000">
        <style:background-image/>
      </style:table-cell-properties>
    </style:style>
    <style:style style:name="Tabla34.B1" style:family="table-cell">
      <style:table-cell-properties style:vertical-align="middle" fo:background-color="#b8cce4" fo:padding-left="0.123cm" fo:padding-right="0.123cm" fo:padding-top="0cm" fo:padding-bottom="0cm" fo:border-left="none" fo:border-right="0.5pt solid #000000" fo:border-top="0.5pt solid #000000" fo:border-bottom="0.5pt solid #000000">
        <style:background-image/>
      </style:table-cell-properties>
    </style:style>
    <style:style style:name="Tabla34.2" style:family="table-row">
      <style:table-row-properties style:min-row-height="0.504cm" fo:keep-together="auto"/>
    </style:style>
    <style:style style:name="Tabla34.B2" style:family="table-cell">
      <style:table-cell-properties style:vertical-align="middle" fo:background-color="#b8cce4" fo:padding-left="0.123cm" fo:padding-right="0.123cm" fo:padding-top="0cm" fo:padding-bottom="0cm" fo:border-left="none" fo:border-right="0.5pt solid #000000" fo:border-top="none" fo:border-bottom="0.5pt solid #000000">
        <style:background-image/>
      </style:table-cell-properties>
    </style:style>
    <style:style style:name="Tabla34.A3"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34.B3"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34.A17" style:family="table-cell">
      <style:table-cell-properties style:vertical-align="middle" fo:background-color="#b8cce4" fo:padding-left="0.123cm" fo:padding-right="0.123cm" fo:padding-top="0cm" fo:padding-bottom="0cm" fo:border-left="0.5pt solid #000000" fo:border-right="0.5pt solid #000000" fo:border-top="none" fo:border-bottom="0.5pt solid #000000">
        <style:background-image/>
      </style:table-cell-properties>
    </style:style>
    <style:style style:name="Tabla35" style:family="table">
      <style:table-properties style:rel-width="100%" fo:margin-left="-0.123cm" fo:margin-top="0cm" fo:margin-bottom="0cm" table:align="left" style:writing-mode="page"/>
    </style:style>
    <style:style style:name="Tabla35.A" style:family="table-column">
      <style:table-column-properties style:rel-column-width="25827*"/>
    </style:style>
    <style:style style:name="Tabla35.B" style:family="table-column">
      <style:table-column-properties style:rel-column-width="7576*"/>
    </style:style>
    <style:style style:name="Tabla35.D" style:family="table-column">
      <style:table-column-properties style:rel-column-width="5098*"/>
    </style:style>
    <style:style style:name="Tabla35.E" style:family="table-column">
      <style:table-column-properties style:rel-column-width="6757*"/>
    </style:style>
    <style:style style:name="Tabla35.F" style:family="table-column">
      <style:table-column-properties style:rel-column-width="6357*"/>
    </style:style>
    <style:style style:name="Tabla35.G" style:family="table-column">
      <style:table-column-properties style:rel-column-width="6343*"/>
    </style:style>
    <style:style style:name="Tabla35.1" style:family="table-row">
      <style:table-row-properties style:min-row-height="0.476cm" fo:keep-together="auto"/>
    </style:style>
    <style:style style:name="Tabla35.A1" style:family="table-cell">
      <style:table-cell-properties style:vertical-align="middle" fo:background-color="#b8cce4" fo:padding-left="0.123cm" fo:padding-right="0.123cm" fo:padding-top="0cm" fo:padding-bottom="0cm" fo:border="0.5pt solid #000000">
        <style:background-image/>
      </style:table-cell-properties>
    </style:style>
    <style:style style:name="Tabla35.2" style:family="table-row">
      <style:table-row-properties style:min-row-height="0.45cm" fo:keep-together="auto"/>
    </style:style>
    <style:style style:name="Tabla35.A2"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a35.A17" style:family="table-cell">
      <style:table-cell-properties style:vertical-align="middle" fo:background-color="#fde9d9" fo:padding-left="0.123cm" fo:padding-right="0.123cm" fo:padding-top="0cm" fo:padding-bottom="0cm" fo:border="0.5pt solid #000000">
        <style:background-image/>
      </style:table-cell-properties>
    </style:style>
    <style:style style:name="Tabla36" style:family="table">
      <style:table-properties style:rel-width="100%" fo:margin-top="0cm" fo:margin-bottom="0cm" table:align="center" style:writing-mode="page"/>
    </style:style>
    <style:style style:name="Tabla36.A" style:family="table-column">
      <style:table-column-properties style:rel-column-width="47827*"/>
    </style:style>
    <style:style style:name="Tabla36.B" style:family="table-column">
      <style:table-column-properties style:rel-column-width="17707*"/>
    </style:style>
    <style:style style:name="Tabla36.1" style:family="table-row">
      <style:table-row-properties style:min-row-height="0.619cm" fo:keep-together="auto"/>
    </style:style>
    <style:style style:name="Tabla36.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a37" style:family="table">
      <style:table-properties style:rel-width="100%" fo:margin-top="0cm" fo:margin-bottom="0cm" table:align="center" style:writing-mode="page"/>
    </style:style>
    <style:style style:name="Tabla37.A" style:family="table-column">
      <style:table-column-properties style:rel-column-width="47827*"/>
    </style:style>
    <style:style style:name="Tabla37.B" style:family="table-column">
      <style:table-column-properties style:rel-column-width="17707*"/>
    </style:style>
    <style:style style:name="Tabla37.1" style:family="table-row">
      <style:table-row-properties style:min-row-height="0.619cm" fo:keep-together="auto"/>
    </style:style>
    <style:style style:name="Tabla37.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a38" style:family="table">
      <style:table-properties style:rel-width="100%" fo:margin-top="0cm" fo:margin-bottom="0cm" table:align="center" style:writing-mode="page"/>
    </style:style>
    <style:style style:name="Tabla38.A" style:family="table-column">
      <style:table-column-properties style:rel-column-width="47827*"/>
    </style:style>
    <style:style style:name="Tabla38.B" style:family="table-column">
      <style:table-column-properties style:rel-column-width="17707*"/>
    </style:style>
    <style:style style:name="Tabla38.1" style:family="table-row">
      <style:table-row-properties style:min-row-height="0.619cm" fo:keep-together="auto"/>
    </style:style>
    <style:style style:name="Tabla38.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a39" style:family="table">
      <style:table-properties style:rel-width="100%" fo:margin-left="-0.123cm" fo:margin-top="0cm" fo:margin-bottom="0cm" table:align="left" style:writing-mode="page"/>
    </style:style>
    <style:style style:name="Tabla39.A" style:family="table-column">
      <style:table-column-properties style:rel-column-width="25519*"/>
    </style:style>
    <style:style style:name="Tabla39.B" style:family="table-column">
      <style:table-column-properties style:rel-column-width="7667*"/>
    </style:style>
    <style:style style:name="Tabla39.C" style:family="table-column">
      <style:table-column-properties style:rel-column-width="8081*"/>
    </style:style>
    <style:style style:name="Tabla39.D" style:family="table-column">
      <style:table-column-properties style:rel-column-width="8067*"/>
    </style:style>
    <style:style style:name="Tabla39.E" style:family="table-column">
      <style:table-column-properties style:rel-column-width="8087*"/>
    </style:style>
    <style:style style:name="Tabla39.F" style:family="table-column">
      <style:table-column-properties style:rel-column-width="8111*"/>
    </style:style>
    <style:style style:name="Tabla39.1" style:family="table-row">
      <style:table-row-properties style:min-row-height="0.651cm" fo:keep-together="auto"/>
    </style:style>
    <style:style style:name="Tabla39.A1" style:family="table-cell">
      <style:table-cell-properties style:vertical-align="middle" fo:background-color="#c5d9f1" fo:padding-left="0.123cm" fo:padding-right="0.123cm" fo:padding-top="0cm" fo:padding-bottom="0cm" fo:border="0.5pt solid #000000">
        <style:background-image/>
      </style:table-cell-properties>
    </style:style>
    <style:style style:name="Tabla39.B1" style:family="table-cell">
      <style:table-cell-properties style:vertical-align="middle" fo:background-color="#c5d9f1" fo:padding-left="0.123cm" fo:padding-right="0.123cm" fo:padding-top="0cm" fo:padding-bottom="0cm" fo:border-left="none" fo:border-right="0.5pt solid #000000" fo:border-top="0.5pt solid #000000" fo:border-bottom="0.5pt solid #000000">
        <style:background-image/>
      </style:table-cell-properties>
    </style:style>
    <style:style style:name="Tabla39.2" style:family="table-row">
      <style:table-row-properties style:min-row-height="0.612cm" fo:keep-together="auto"/>
    </style:style>
    <style:style style:name="Tabla39.A2" style:family="table-cell">
      <style:table-cell-properties style:vertical-align="middle" fo:padding-left="0.123cm" fo:padding-right="0.123cm" fo:padding-top="0cm" fo:padding-bottom="0cm" fo:border="0.5pt solid #000000"/>
    </style:style>
    <style:style style:name="Tabla39.B2" style:family="table-cell">
      <style:table-cell-properties style:vertical-align="middle" fo:background-color="#c5d9f1" fo:padding-left="0.123cm" fo:padding-right="0.123cm" fo:padding-top="0cm" fo:padding-bottom="0cm" fo:border-left="none" fo:border-right="0.5pt solid #000000" fo:border-top="none" fo:border-bottom="0.5pt solid #000000">
        <style:background-image/>
      </style:table-cell-properties>
    </style:style>
    <style:style style:name="Tabla39.A3"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39.B3"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40" style:family="table">
      <style:table-properties style:rel-width="100%" fo:margin-left="-0.123cm" fo:margin-top="0cm" fo:margin-bottom="0cm" table:align="left" style:writing-mode="page"/>
    </style:style>
    <style:style style:name="Tabla40.A" style:family="table-column">
      <style:table-column-properties style:rel-column-width="32977*"/>
    </style:style>
    <style:style style:name="Tabla40.B" style:family="table-column">
      <style:table-column-properties style:rel-column-width="4561*"/>
    </style:style>
    <style:style style:name="Tabla40.C" style:family="table-column">
      <style:table-column-properties style:rel-column-width="3224*"/>
    </style:style>
    <style:style style:name="Tabla40.D" style:family="table-column">
      <style:table-column-properties style:rel-column-width="3238*"/>
    </style:style>
    <style:style style:name="Tabla40.E" style:family="table-column">
      <style:table-column-properties style:rel-column-width="3257*"/>
    </style:style>
    <style:style style:name="Tabla40.G" style:family="table-column">
      <style:table-column-properties style:rel-column-width="3703*"/>
    </style:style>
    <style:style style:name="Tabla40.H" style:family="table-column">
      <style:table-column-properties style:rel-column-width="3316*"/>
    </style:style>
    <style:style style:name="Tabla40.I" style:family="table-column">
      <style:table-column-properties style:rel-column-width="7996*"/>
    </style:style>
    <style:style style:name="Tabla40.1" style:family="table-row">
      <style:table-row-properties style:min-row-height="0.439cm" fo:keep-together="auto"/>
    </style:style>
    <style:style style:name="Tabla40.A1" style:family="table-cell">
      <style:table-cell-properties style:vertical-align="middle" fo:background-color="#b8cce4" fo:padding-left="0.123cm" fo:padding-right="0.123cm" fo:padding-top="0cm" fo:padding-bottom="0cm" fo:border="1pt solid #000000">
        <style:background-image/>
      </style:table-cell-properties>
    </style:style>
    <style:style style:name="Tabla40.B1" style:family="table-cell">
      <style:table-cell-properties style:vertical-align="middle" fo:background-color="#b8cce4" fo:padding-left="0.123cm" fo:padding-right="0.123cm" fo:padding-top="0cm" fo:padding-bottom="0cm" fo:border-left="none" fo:border-right="1pt solid #000000" fo:border-top="1pt solid #000000" fo:border-bottom="1pt solid #000000">
        <style:background-image/>
      </style:table-cell-properties>
    </style:style>
    <style:style style:name="Tabla40.A2" style:family="table-cell">
      <style:table-cell-properties style:vertical-align="middle" fo:padding-left="0.123cm" fo:padding-right="0.123cm" fo:padding-top="0cm" fo:padding-bottom="0cm" fo:border="1pt solid #000000"/>
    </style:style>
    <style:style style:name="Tabla40.I2" style:family="table-cell">
      <style:table-cell-properties style:vertical-align="middle" fo:padding-left="0.123cm" fo:padding-right="0.123cm" fo:padding-top="0cm" fo:padding-bottom="0cm" fo:border="1pt solid #000000"/>
    </style:style>
    <style:style style:name="Tabla40.A3" style:family="table-cell">
      <style:table-cell-properties style:vertical-align="middle" fo:padding-left="0.123cm" fo:padding-right="0.123cm" fo:padding-top="0cm" fo:padding-bottom="0cm" fo:border="1pt solid #000000"/>
    </style:style>
    <style:style style:name="Tabla40.B3" style:family="table-cell">
      <style:table-cell-properties style:vertical-align="middle" fo:background-color="#b8cce4" fo:padding-left="0.123cm" fo:padding-right="0.123cm" fo:padding-top="0cm" fo:padding-bottom="0cm" fo:border-left="none" fo:border-right="1pt solid #000000" fo:border-top="none" fo:border-bottom="1pt solid #000000">
        <style:background-image/>
      </style:table-cell-properties>
    </style:style>
    <style:style style:name="Tabla40.I3" style:family="table-cell">
      <style:table-cell-properties style:vertical-align="middle" fo:padding-left="0.123cm" fo:padding-right="0.123cm" fo:padding-top="0cm" fo:padding-bottom="0cm" fo:border="1pt solid #000000"/>
    </style:style>
    <style:style style:name="Tabla40.A4" style:family="table-cell">
      <style:table-cell-properties style:vertical-align="middle" fo:background-color="transparent" fo:padding-left="0.123cm" fo:padding-right="0.123cm" fo:padding-top="0cm" fo:padding-bottom="0cm" fo:border-left="1pt solid #000000" fo:border-right="1pt solid #000000" fo:border-top="none" fo:border-bottom="1pt solid #000000">
        <style:background-image/>
      </style:table-cell-properties>
    </style:style>
    <style:style style:name="Tabla40.B4" style:family="table-cell">
      <style:table-cell-properties style:vertical-align="middle"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a40.H4" style:family="table-cell">
      <style:table-cell-properties style:vertical-align="middle" fo:background-color="transparent" fo:padding-left="0.123cm" fo:padding-right="0.123cm" fo:padding-top="0cm" fo:padding-bottom="0cm" fo:border-left="none" fo:border-right="none" fo:border-top="none" fo:border-bottom="1pt solid #000000">
        <style:background-image/>
      </style:table-cell-properties>
    </style:style>
    <style:style style:name="Tabla40.I4" style:family="table-cell">
      <style:table-cell-properties style:vertical-align="middle" fo:background-color="transparent" fo:padding-left="0.123cm" fo:padding-right="0.123cm" fo:padding-top="0cm" fo:padding-bottom="0cm" fo:border-left="1pt solid #000000" fo:border-right="1pt solid #000000" fo:border-top="none" fo:border-bottom="none">
        <style:background-image/>
      </style:table-cell-properties>
    </style:style>
    <style:style style:name="Tabla40.I5" style:family="table-cell">
      <style:table-cell-properties style:vertical-align="middle" fo:background-color="transparent" fo:padding-left="0.123cm" fo:padding-right="0.123cm" fo:padding-top="0cm" fo:padding-bottom="0cm" fo:border="1pt solid #000000">
        <style:background-image/>
      </style:table-cell-properties>
    </style:style>
    <style:style style:name="Tabla40.G8" style:family="table-cell">
      <style:table-cell-properties style:vertical-align="middle" fo:background-color="transparent" fo:padding-left="0.123cm" fo:padding-right="0.123cm" fo:padding-top="0cm" fo:padding-bottom="0cm" fo:border="none">
        <style:background-image/>
      </style:table-cell-properties>
    </style:style>
    <style:style style:name="Tabla40.H8" style:family="table-cell">
      <style:table-cell-properties style:vertical-align="middle" fo:background-color="transparent" fo:padding-left="0.123cm" fo:padding-right="0.123cm" fo:padding-top="0cm" fo:padding-bottom="0cm" fo:border-left="1pt solid #000000" fo:border-right="none" fo:border-top="none" fo:border-bottom="1pt solid #000000">
        <style:background-image/>
      </style:table-cell-properties>
    </style:style>
    <style:style style:name="Tabla40.G9" style:family="table-cell">
      <style:table-cell-properties style:vertical-align="middle" fo:background-color="transparent" fo:padding-left="0.123cm" fo:padding-right="0.123cm" fo:padding-top="0cm" fo:padding-bottom="0cm" fo:border-left="none" fo:border-right="1pt solid #000000" fo:border-top="1pt solid #000000" fo:border-bottom="1pt solid #000000">
        <style:background-image/>
      </style:table-cell-properties>
    </style:style>
    <style:style style:name="Tabla41" style:family="table">
      <style:table-properties style:rel-width="100%" fo:margin-left="-0.123cm" fo:margin-top="0cm" fo:margin-bottom="0cm" table:align="left" style:writing-mode="page"/>
    </style:style>
    <style:style style:name="Tabla41.A" style:family="table-column">
      <style:table-column-properties style:rel-column-width="32590*"/>
    </style:style>
    <style:style style:name="Tabla41.B" style:family="table-column">
      <style:table-column-properties style:rel-column-width="3663*"/>
    </style:style>
    <style:style style:name="Tabla41.C" style:family="table-column">
      <style:table-column-properties style:rel-column-width="3323*"/>
    </style:style>
    <style:style style:name="Tabla41.D" style:family="table-column">
      <style:table-column-properties style:rel-column-width="3303*"/>
    </style:style>
    <style:style style:name="Tabla41.G" style:family="table-column">
      <style:table-column-properties style:rel-column-width="5721*"/>
    </style:style>
    <style:style style:name="Tabla41.H" style:family="table-column">
      <style:table-column-properties style:rel-column-width="3434*"/>
    </style:style>
    <style:style style:name="Tabla41.I" style:family="table-column">
      <style:table-column-properties style:rel-column-width="6796*"/>
    </style:style>
    <style:style style:name="Tabla41.J" style:family="table-column">
      <style:table-column-properties style:rel-column-width="74*"/>
    </style:style>
    <style:style style:name="Tabla41.1" style:family="table-row">
      <style:table-row-properties style:min-row-height="0.446cm" fo:keep-together="auto"/>
    </style:style>
    <style:style style:name="Tabla41.A1" style:family="table-cell">
      <style:table-cell-properties style:vertical-align="middle" fo:background-color="#c5d9f1" fo:padding-left="0.123cm" fo:padding-right="0.123cm" fo:padding-top="0cm" fo:padding-bottom="0cm" fo:border="1pt solid #000000">
        <style:background-image/>
      </style:table-cell-properties>
    </style:style>
    <style:style style:name="Tabla41.B1" style:family="table-cell">
      <style:table-cell-properties style:vertical-align="middle" fo:background-color="#c5d9f1" fo:padding-left="0.123cm" fo:padding-right="0.123cm" fo:padding-top="0cm" fo:padding-bottom="0cm" fo:border-left="none" fo:border-right="none" fo:border-top="1pt solid #000000" fo:border-bottom="none">
        <style:background-image/>
      </style:table-cell-properties>
    </style:style>
    <style:style style:name="Tabla41.A2" style:family="table-cell">
      <style:table-cell-properties style:vertical-align="middle" fo:padding-left="0.123cm" fo:padding-right="0.123cm" fo:padding-top="0cm" fo:padding-bottom="0cm" fo:border="1pt solid #000000"/>
    </style:style>
    <style:style style:name="Tabla41.B2" style:family="table-cell">
      <style:table-cell-properties style:vertical-align="middle" fo:background-color="#c5d9f1" fo:padding-left="0.123cm" fo:padding-right="0.123cm" fo:padding-top="0cm" fo:padding-bottom="0cm" fo:border-left="none" fo:border-right="none" fo:border-top="1pt solid #000000" fo:border-bottom="1pt solid #000000">
        <style:background-image/>
      </style:table-cell-properties>
    </style:style>
    <style:style style:name="Tabla41.I2" style:family="table-cell">
      <style:table-cell-properties style:vertical-align="middle" fo:padding-left="0.123cm" fo:padding-right="0.123cm" fo:padding-top="0cm" fo:padding-bottom="0cm" fo:border="1pt solid #000000"/>
    </style:style>
    <style:style style:name="Tabla41.3" style:family="table-row">
      <style:table-row-properties style:min-row-height="0.422cm" fo:keep-together="auto"/>
    </style:style>
    <style:style style:name="Tabla41.A3" style:family="table-cell">
      <style:table-cell-properties style:vertical-align="middle" fo:padding-left="0.123cm" fo:padding-right="0.123cm" fo:padding-top="0cm" fo:padding-bottom="0cm" fo:border="1pt solid #000000"/>
    </style:style>
    <style:style style:name="Tabla41.B3" style:family="table-cell">
      <style:table-cell-properties style:vertical-align="middle" fo:background-color="#c5d9f1" fo:padding-left="0.123cm" fo:padding-right="0.123cm" fo:padding-top="0cm" fo:padding-bottom="0cm" fo:border-left="none" fo:border-right="none" fo:border-top="none" fo:border-bottom="1pt solid #000000">
        <style:background-image/>
      </style:table-cell-properties>
    </style:style>
    <style:style style:name="Tabla41.C3" style:family="table-cell">
      <style:table-cell-properties style:vertical-align="middle" fo:background-color="#c5d9f1" fo:padding-left="0.123cm" fo:padding-right="0.123cm" fo:padding-top="0cm" fo:padding-bottom="0cm" fo:border-left="1pt solid #000000" fo:border-right="1pt solid #000000" fo:border-top="none" fo:border-bottom="1pt solid #000000">
        <style:background-image/>
      </style:table-cell-properties>
    </style:style>
    <style:style style:name="Tabla41.I3" style:family="table-cell">
      <style:table-cell-properties style:vertical-align="middle" fo:padding-left="0.123cm" fo:padding-right="0.123cm" fo:padding-top="0cm" fo:padding-bottom="0cm" fo:border="1pt solid #000000"/>
    </style:style>
    <style:style style:name="Tabla41.J3" style:family="table-cell">
      <style:table-cell-properties fo:padding-left="0.123cm" fo:padding-right="0.123cm" fo:padding-top="0cm" fo:padding-bottom="0cm" fo:border="none"/>
    </style:style>
    <style:style style:name="Tabla41.A4" style:family="table-cell">
      <style:table-cell-properties style:vertical-align="middle" fo:background-color="transparent" fo:padding-left="0.123cm" fo:padding-right="0.123cm" fo:padding-top="0cm" fo:padding-bottom="0cm" fo:border-left="1pt solid #000000" fo:border-right="1pt solid #000000" fo:border-top="none" fo:border-bottom="1pt solid #000000">
        <style:background-image/>
      </style:table-cell-properties>
    </style:style>
    <style:style style:name="Tabla41.B4" style:family="table-cell">
      <style:table-cell-properties style:vertical-align="middle"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a41.G4" style:family="table-cell">
      <style:table-cell-properties style:vertical-align="middle" fo:background-color="transparent" fo:padding-left="0.123cm" fo:padding-right="0.123cm" fo:padding-top="0cm" fo:padding-bottom="0cm" fo:border-left="none" fo:border-right="none" fo:border-top="none" fo:border-bottom="1pt solid #000000">
        <style:background-image/>
      </style:table-cell-properties>
    </style:style>
    <style:style style:name="Tabla41.J4" style:family="table-cell">
      <style:table-cell-properties fo:padding-left="0.123cm" fo:padding-right="0.123cm" fo:padding-top="0cm" fo:padding-bottom="0cm" fo:border="none"/>
    </style:style>
    <style:style style:name="Tabla41.J5" style:family="table-cell">
      <style:table-cell-properties fo:padding-left="0.123cm" fo:padding-right="0.123cm" fo:padding-top="0cm" fo:padding-bottom="0cm" fo:border="none"/>
    </style:style>
    <style:style style:name="Tabla41.J6" style:family="table-cell">
      <style:table-cell-properties fo:padding-left="0.123cm" fo:padding-right="0.123cm" fo:padding-top="0cm" fo:padding-bottom="0cm" fo:border="none"/>
    </style:style>
    <style:style style:name="Tabla41.J7" style:family="table-cell">
      <style:table-cell-properties fo:padding-left="0.123cm" fo:padding-right="0.123cm" fo:padding-top="0cm" fo:padding-bottom="0cm" fo:border="none"/>
    </style:style>
    <style:style style:name="Tabla41.J8" style:family="table-cell">
      <style:table-cell-properties fo:padding-left="0.123cm" fo:padding-right="0.123cm" fo:padding-top="0cm" fo:padding-bottom="0cm" fo:border="none"/>
    </style:style>
    <style:style style:name="Tabla41.J9" style:family="table-cell">
      <style:table-cell-properties fo:padding-left="0.123cm" fo:padding-right="0.123cm" fo:padding-top="0cm" fo:padding-bottom="0cm" fo:border="none"/>
    </style:style>
    <style:style style:name="Tabla41.J10" style:family="table-cell">
      <style:table-cell-properties fo:padding-left="0.123cm" fo:padding-right="0.123cm" fo:padding-top="0cm" fo:padding-bottom="0cm" fo:border="none"/>
    </style:style>
    <style:style style:name="Tabla41.J11" style:family="table-cell">
      <style:table-cell-properties fo:padding-left="0.123cm" fo:padding-right="0.123cm" fo:padding-top="0cm" fo:padding-bottom="0cm" fo:border="none"/>
    </style:style>
    <style:style style:name="Tabla41.J12" style:family="table-cell">
      <style:table-cell-properties fo:padding-left="0.123cm" fo:padding-right="0.123cm" fo:padding-top="0cm" fo:padding-bottom="0cm" fo:border="none"/>
    </style:style>
    <style:style style:name="Tabla41.J13" style:family="table-cell">
      <style:table-cell-properties fo:padding-left="0.123cm" fo:padding-right="0.123cm" fo:padding-top="0cm" fo:padding-bottom="0cm" fo:border="none"/>
    </style:style>
    <style:style style:name="Tabla41.J14" style:family="table-cell">
      <style:table-cell-properties fo:padding-left="0.123cm" fo:padding-right="0.123cm" fo:padding-top="0cm" fo:padding-bottom="0cm" fo:border="none"/>
    </style:style>
    <style:style style:name="Tabla42" style:family="table">
      <style:table-properties style:rel-width="100%" fo:margin-left="-0.191cm" fo:margin-top="0cm" fo:margin-bottom="0cm" table:align="left" style:writing-mode="page"/>
    </style:style>
    <style:style style:name="Tabla42.A" style:family="table-column">
      <style:table-column-properties style:rel-column-width="65535*"/>
    </style:style>
    <style:style style:name="Tabla42.1" style:family="table-row">
      <style:table-row-properties style:min-row-height="2.565cm" fo:keep-together="auto"/>
    </style:style>
    <style:style style:name="Tabla42.A1" style:family="table-cell">
      <style:table-cell-properties fo:padding-left="0.191cm" fo:padding-right="0.191cm" fo:padding-top="0cm" fo:padding-bottom="0cm" fo:border="0.5pt solid #000000"/>
    </style:style>
    <style:style style:name="Tabla43" style:family="table">
      <style:table-properties style:rel-width="100%" fo:margin-left="-0.123cm" fo:margin-top="0cm" fo:margin-bottom="0cm" table:align="left" style:writing-mode="page"/>
    </style:style>
    <style:style style:name="Tabla43.A" style:family="table-column">
      <style:table-column-properties style:rel-column-width="10472*"/>
    </style:style>
    <style:style style:name="Tabla43.B" style:family="table-column">
      <style:table-column-properties style:rel-column-width="3912*"/>
    </style:style>
    <style:style style:name="Tabla43.C" style:family="table-column">
      <style:table-column-properties style:rel-column-width="3395*"/>
    </style:style>
    <style:style style:name="Tabla43.D" style:family="table-column">
      <style:table-column-properties style:rel-column-width="9116*"/>
    </style:style>
    <style:style style:name="Tabla43.E" style:family="table-column">
      <style:table-column-properties style:rel-column-width="8821*"/>
    </style:style>
    <style:style style:name="Tabla43.F" style:family="table-column">
      <style:table-column-properties style:rel-column-width="8828*"/>
    </style:style>
    <style:style style:name="Tabla43.G" style:family="table-column">
      <style:table-column-properties style:rel-column-width="8008*"/>
    </style:style>
    <style:style style:name="Tabla43.H" style:family="table-column">
      <style:table-column-properties style:rel-column-width="7156*"/>
    </style:style>
    <style:style style:name="Tabla43.I" style:family="table-column">
      <style:table-column-properties style:rel-column-width="5821*"/>
    </style:style>
    <style:style style:name="Tabla43.1" style:family="table-row">
      <style:table-row-properties style:min-row-height="0.758cm" fo:keep-together="auto"/>
    </style:style>
    <style:style style:name="Tabla43.A1" style:family="table-cell">
      <style:table-cell-properties style:vertical-align="middle" fo:background-color="#b8cce4" fo:padding-left="0.123cm" fo:padding-right="0.123cm" fo:padding-top="0cm" fo:padding-bottom="0cm" fo:border="0.5pt solid #000000">
        <style:background-image/>
      </style:table-cell-properties>
    </style:style>
    <style:style style:name="Tabla43.2" style:family="table-row">
      <style:table-row-properties style:min-row-height="0.829cm" fo:keep-together="auto"/>
    </style:style>
    <style:style style:name="Tabla43.3" style:family="table-row">
      <style:table-row-properties style:min-row-height="0.307cm" fo:keep-together="auto"/>
    </style:style>
    <style:style style:name="Tabla43.D3" style:family="table-cell">
      <style:table-cell-properties style:vertical-align="middle" fo:background-color="#b8cce4" fo:padding-left="0.123cm" fo:padding-right="0.123cm" fo:padding-top="0cm" fo:padding-bottom="0cm" fo:border-left="none" fo:border-right="0.5pt solid #000000" fo:border-top="none" fo:border-bottom="0.5pt solid #000000">
        <style:background-image/>
      </style:table-cell-properties>
    </style:style>
    <style:style style:name="Tabla43.4" style:family="table-row">
      <style:table-row-properties style:min-row-height="0.106cm" fo:keep-together="auto"/>
    </style:style>
    <style:style style:name="Tabla43.A4"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43.B4" style:family="table-cell">
      <style:table-cell-properties style:vertical-align="middle" fo:background-color="#ffffff" fo:padding-left="0.123cm" fo:padding-right="0.123cm" fo:padding-top="0cm" fo:padding-bottom="0cm" fo:border-left="none" fo:border-right="0.5pt solid #000000" fo:border-top="none" fo:border-bottom="0.5pt solid #000000">
        <style:background-image/>
      </style:table-cell-properties>
    </style:style>
    <style:style style:name="Tabla43.8" style:family="table-row">
      <style:table-row-properties style:min-row-height="0.529cm" fo:keep-together="auto"/>
    </style:style>
    <style:style style:name="Tabla43.B8"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43.9" style:family="table-row">
      <style:table-row-properties style:min-row-height="0.25cm" fo:keep-together="auto"/>
    </style:style>
    <style:style style:name="Tabla43.10" style:family="table-row">
      <style:table-row-properties style:min-row-height="0.259cm" fo:keep-together="auto"/>
    </style:style>
    <style:style style:name="Tabla43.B12" style:family="table-cell">
      <style:table-cell-properties style:vertical-align="middle" fo:background-color="transparent" fo:padding-left="0.123cm" fo:padding-right="0.123cm" fo:padding-top="0cm" fo:padding-bottom="0cm" fo:border-left="none" fo:border-right="0.5pt solid #000000" fo:border-top="none" fo:border-bottom="none">
        <style:background-image/>
      </style:table-cell-properties>
    </style:style>
    <style:style style:name="Tabla43.13" style:family="table-row">
      <style:table-row-properties style:min-row-height="0.688cm" fo:keep-together="auto"/>
    </style:style>
    <style:style style:name="Tabla43.B13" style:family="table-cell">
      <style:table-cell-properties style:vertical-align="middle" fo:background-color="transparent" fo:padding-left="0.123cm" fo:padding-right="0.123cm" fo:padding-top="0cm" fo:padding-bottom="0cm" fo:border-left="none" fo:border-right="0.5pt solid #000000" fo:border-top="0.5pt solid #000000" fo:border-bottom="none">
        <style:background-image/>
      </style:table-cell-properties>
    </style:style>
    <style:style style:name="Tabla43.14" style:family="table-row">
      <style:table-row-properties style:min-row-height="0.485cm" fo:keep-together="auto"/>
    </style:style>
    <style:style style:name="Tabla43.A14" style:family="table-cell">
      <style:table-cell-properties style:vertical-align="middle" fo:background-color="transparent" fo:padding-left="0.123cm" fo:padding-right="0.123cm" fo:padding-top="0cm" fo:padding-bottom="0cm" fo:border-left="0.5pt solid #000000" fo:border-right="none" fo:border-top="none" fo:border-bottom="0.5pt solid #000000">
        <style:background-image/>
      </style:table-cell-properties>
    </style:style>
    <style:style style:name="Tabla43.B14"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a43.C14"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la43.16" style:family="table-row">
      <style:table-row-properties style:min-row-height="0.751cm" fo:keep-together="auto"/>
    </style:style>
    <style:style style:name="Tabla43.A17" style:family="table-cell">
      <style:table-cell-properties style:vertical-align="middle" fo:background-color="transparent" fo:padding-left="0.123cm" fo:padding-right="0.123cm" fo:padding-top="0cm" fo:padding-bottom="0cm" fo:border="none">
        <style:background-image/>
      </style:table-cell-properties>
    </style:style>
    <style:style style:name="Tabla44" style:family="table">
      <style:table-properties style:width="15.723cm" fo:margin-left="-0.191cm" fo:margin-top="0cm" fo:margin-bottom="0cm" table:align="left" style:writing-mode="page"/>
    </style:style>
    <style:style style:name="Tabla44.A" style:family="table-column">
      <style:table-column-properties style:column-width="1.039cm"/>
    </style:style>
    <style:style style:name="Tabla44.B" style:family="table-column">
      <style:table-column-properties style:column-width="14.683cm"/>
    </style:style>
    <style:style style:name="Tabla44.1" style:family="table-row">
      <style:table-row-properties style:min-row-height="0.603cm" fo:keep-together="auto"/>
    </style:style>
    <style:style style:name="Tabla44.A1" style:family="table-cell">
      <style:table-cell-properties style:vertical-align="middle" fo:padding-left="0.191cm" fo:padding-right="0.191cm" fo:padding-top="0cm" fo:padding-bottom="0cm" fo:border="0.5pt solid #000000"/>
    </style:style>
    <style:style style:name="Tabla44.3" style:family="table-row">
      <style:table-row-properties style:min-row-height="0.557cm" fo:keep-together="auto"/>
    </style:style>
    <style:style style:name="Tabla45" style:family="table">
      <style:table-properties style:width="15.723cm" fo:margin-left="-0.191cm" fo:margin-top="0cm" fo:margin-bottom="0cm" table:align="left" style:writing-mode="page"/>
    </style:style>
    <style:style style:name="Tabla45.A" style:family="table-column">
      <style:table-column-properties style:column-width="1.039cm"/>
    </style:style>
    <style:style style:name="Tabla45.B" style:family="table-column">
      <style:table-column-properties style:column-width="14.683cm"/>
    </style:style>
    <style:style style:name="Tabla45.1" style:family="table-row">
      <style:table-row-properties style:min-row-height="0.603cm" fo:keep-together="auto"/>
    </style:style>
    <style:style style:name="Tabla45.A1" style:family="table-cell">
      <style:table-cell-properties style:vertical-align="middle" fo:padding-left="0.191cm" fo:padding-right="0.191cm" fo:padding-top="0cm" fo:padding-bottom="0cm" fo:border="0.5pt solid #000000"/>
    </style:style>
    <style:style style:name="Tabla45.3" style:family="table-row">
      <style:table-row-properties style:min-row-height="0.557cm" fo:keep-together="auto"/>
    </style:style>
    <style:style style:name="P1" style:family="paragraph" style:parent-style-name="Default">
      <style:paragraph-properties fo:line-height="200%" fo:text-align="center" style:justify-single-word="false"/>
    </style:style>
    <style:style style:name="P2" style:family="paragraph" style:parent-style-name="Default">
      <style:paragraph-properties fo:line-height="200%" fo:text-align="justify" style:justify-single-word="false"/>
    </style:style>
    <style:style style:name="P3" style:family="paragraph" style:parent-style-name="Footer">
      <style:paragraph-properties fo:text-align="justify" style:justify-single-word="false"/>
    </style:style>
    <style:style style:name="P4" style:family="paragraph" style:parent-style-name="Footer">
      <style:paragraph-properties fo:text-align="end" style:justify-single-word="false"/>
    </style:style>
    <style:style style:name="P5" style:family="paragraph" style:parent-style-name="Footer">
      <style:paragraph-properties fo:text-align="end" style:justify-single-word="false"/>
    </style:style>
    <style:style style:name="P6" style:family="paragraph" style:parent-style-name="Frame_20_contents">
      <style:paragraph-properties fo:margin-top="0cm" fo:margin-bottom="0.353cm" style:contextual-spacing="false" fo:text-align="center" style:justify-single-word="false"/>
    </style:style>
    <style:style style:name="P7" style:family="paragraph" style:parent-style-name="Frame_20_contents">
      <style:paragraph-properties fo:margin-top="0cm" fo:margin-bottom="0cm" style:contextual-spacing="false" fo:text-align="center" style:justify-single-word="false"/>
    </style:style>
    <style:style style:name="P8" style:family="paragraph" style:parent-style-name="Header">
      <style:paragraph-properties fo:text-align="center" style:justify-single-word="false"/>
    </style:style>
    <style:style style:name="P9" style:family="paragraph" style:parent-style-name="Header">
      <style:paragraph-properties fo:text-align="center" style:justify-single-word="false"/>
      <style:text-properties style:font-name="Arial" fo:font-size="8pt" fo:font-style="italic" style:font-size-asian="8pt" style:font-style-asian="italic" style:font-name-complex="Arial1" style:font-size-complex="9pt"/>
    </style:style>
    <style:style style:name="P10" style:family="paragraph" style:parent-style-name="Heading_20_2" style:list-style-name="">
      <style:paragraph-properties fo:margin-left="0cm" fo:line-height="200%" fo:text-align="justify" style:justify-single-word="false" fo:text-indent="0cm" style:auto-text-indent="false"/>
      <style:text-properties style:font-name="Times New Roman" fo:font-size="12pt" style:font-size-asian="12pt" style:font-name-complex="Times New Roman1" style:font-size-complex="12pt"/>
    </style:style>
    <style:style style:name="P11" style:family="paragraph" style:parent-style-name="Heading_20_3" style:list-style-name="">
      <style:paragraph-properties fo:margin-left="0cm" fo:line-height="200%" fo:text-indent="0cm" style:auto-text-indent="false"/>
      <style:text-properties fo:color="#000000" loext:opacity="100%" style:font-name="Times New Roman" fo:font-size="12pt" style:font-name-asian="Times New Roman1" style:font-size-asian="12pt" style:font-name-complex="Times New Roman1" style:font-size-complex="12pt">
        <loext:char-complex-color loext:theme-type="accent1" loext:color-type="theme"/>
      </style:text-properties>
    </style:style>
    <style:style style:name="P12" style:family="paragraph" style:parent-style-name="List_20_Paragraph" style:list-style-name="WWNum6">
      <style:paragraph-properties fo:margin-top="0.212cm" fo:margin-bottom="0.212cm" style:contextual-spacing="true" fo:line-height="200%" fo:text-align="justify" style:justify-single-word="false"/>
    </style:style>
    <style:style style:name="P13" style:family="paragraph" style:parent-style-name="List_20_Paragraph" style:list-style-name="WWNum4">
      <style:paragraph-properties fo:margin-left="0.877cm" fo:margin-top="0cm" fo:margin-bottom="0cm" style:contextual-spacing="true" fo:line-height="200%" fo:text-align="justify" style:justify-single-word="false" fo:text-indent="-0.75cm" style:auto-text-indent="false"/>
    </style:style>
    <style:style style:name="P14" style:family="paragraph" style:parent-style-name="List_20_Paragraph" style:list-style-name="WWNum4">
      <style:paragraph-properties fo:margin-left="1.628cm" fo:margin-top="0cm" fo:margin-bottom="0cm" style:contextual-spacing="true" fo:line-height="200%" fo:text-align="justify" style:justify-single-word="false" fo:text-indent="-0.751cm" style:auto-text-indent="false"/>
    </style:style>
    <style:style style:name="P15" style:family="paragraph" style:parent-style-name="List_20_Paragraph" style:list-style-name="WWNum5">
      <style:paragraph-properties fo:margin-left="0.751cm" fo:margin-top="0cm" fo:margin-bottom="0cm" style:contextual-spacing="true" fo:line-height="200%" fo:text-align="justify" style:justify-single-word="false" fo:text-indent="-0.751cm" style:auto-text-indent="false"/>
    </style:style>
    <style:style style:name="P16" style:family="paragraph" style:parent-style-name="List_20_Paragraph" style:list-style-name="WWNum7">
      <style:paragraph-properties fo:margin-top="0cm" fo:margin-bottom="0cm" style:contextual-spacing="false" fo:line-height="200%" fo:text-align="justify" style:justify-single-word="false"/>
    </style:style>
    <style:style style:name="P17" style:family="paragraph" style:parent-style-name="List_20_Paragraph" style:list-style-name="WWNum8">
      <style:paragraph-properties fo:margin-top="0cm" fo:margin-bottom="0cm" style:contextual-spacing="false" fo:line-height="200%" fo:text-align="justify" style:justify-single-word="false"/>
    </style:style>
    <style:style style:name="P18" style:family="paragraph" style:parent-style-name="List_20_Paragraph" style:list-style-name="WWNum9">
      <style:paragraph-properties fo:margin-left="0.635cm" fo:margin-top="0cm" fo:margin-bottom="0cm" style:contextual-spacing="false" fo:line-height="200%" fo:text-align="justify" style:justify-single-word="false" fo:text-indent="-0.635cm" style:auto-text-indent="false"/>
    </style:style>
    <style:style style:name="P19" style:family="paragraph" style:parent-style-name="List_20_Paragraph" style:list-style-name="WWNum10">
      <style:paragraph-properties fo:margin-top="0cm" fo:margin-bottom="0cm" style:contextual-spacing="false" fo:line-height="200%" fo:text-align="justify" style:justify-single-word="false"/>
    </style:style>
    <style:style style:name="P20" style:family="paragraph" style:parent-style-name="List_20_Paragraph" style:list-style-name="WWNum11">
      <style:paragraph-properties fo:margin-top="0cm" fo:margin-bottom="0cm" style:contextual-spacing="false" fo:line-height="200%" fo:text-align="justify" style:justify-single-word="false"/>
    </style:style>
    <style:style style:name="P21" style:family="paragraph" style:parent-style-name="List_20_Paragraph" style:list-style-name="WWNum5">
      <style:paragraph-properties fo:margin-top="0cm" fo:margin-bottom="0cm" style:contextual-spacing="true" fo:line-height="200%"/>
    </style:style>
    <style:style style:name="P22" style:family="paragraph" style:parent-style-name="List_20_Paragraph" style:list-style-name="WWNum5" style:master-page-name="Converted2">
      <style:paragraph-properties fo:margin-top="0cm" fo:margin-bottom="0cm" style:contextual-spacing="true" fo:line-height="200%" style:page-number="auto"/>
    </style:style>
    <style:style style:name="P23" style:family="paragraph" style:parent-style-name="List_20_Paragraph" style:list-style-name="WWNum5">
      <style:paragraph-properties fo:margin-left="0.751cm" fo:margin-top="0cm" fo:margin-bottom="0cm" style:contextual-spacing="true" fo:line-height="200%" fo:text-indent="-0.751cm" style:auto-text-indent="false"/>
    </style:style>
    <style:style style:name="P24" style:family="paragraph" style:parent-style-name="List_20_Paragraph" style:list-style-name="WWNum3">
      <style:paragraph-properties fo:margin-left="1.752cm" fo:margin-top="0cm" fo:margin-bottom="0cm" style:contextual-spacing="true" fo:line-height="200%" fo:text-indent="-0.568cm" style:auto-text-indent="false"/>
    </style:style>
    <style:style style:name="P25" style:family="paragraph" style:parent-style-name="List_20_Paragraph">
      <style:paragraph-properties fo:margin-left="0cm" fo:margin-top="0cm" fo:margin-bottom="0cm" style:contextual-spacing="true" fo:line-height="200%"/>
    </style:style>
    <style:style style:name="P26" style:family="paragraph" style:parent-style-name="List_20_Paragraph" style:list-style-name="WWNum12">
      <style:paragraph-properties fo:margin-top="0cm" fo:margin-bottom="0cm" style:contextual-spacing="true" fo:line-height="200%"/>
    </style:style>
    <style:style style:name="P27" style:family="paragraph" style:parent-style-name="List_20_Paragraph">
      <style:paragraph-properties fo:margin-left="1.905cm" fo:margin-top="0cm" fo:margin-bottom="0.353cm" style:contextual-spacing="true" fo:line-height="200%" fo:text-align="justify" style:justify-single-word="false"/>
      <style:text-properties style:font-name="Times New Roman" fo:font-size="12pt" style:font-name-asian="Arial Unicode MS" style:font-size-asian="12pt" style:font-name-complex="Arial1" style:font-size-complex="12pt"/>
    </style:style>
    <style:style style:name="P28" style:family="paragraph" style:parent-style-name="No_20_Spacing">
      <style:paragraph-properties fo:text-align="center" style:justify-single-word="false">
        <style:tab-stops>
          <style:tab-stop style:position="7.5cm" style:type="center"/>
        </style:tab-stops>
      </style:paragraph-properties>
    </style:style>
    <style:style style:name="P29" style:family="paragraph" style:parent-style-name="No_20_Spacing">
      <style:paragraph-properties fo:text-align="center" style:justify-single-word="false"/>
    </style:style>
    <style:style style:name="P30" style:family="paragraph" style:parent-style-name="Standard">
      <style:paragraph-properties fo:margin-top="0.212cm" fo:margin-bottom="0.212cm" style:contextual-spacing="false" fo:line-height="200%" fo:text-align="center" style:justify-single-word="false"/>
    </style:style>
    <style:style style:name="P31" style:family="paragraph" style:parent-style-name="Standard">
      <style:paragraph-properties fo:margin-top="0cm" fo:margin-bottom="0cm" style:contextual-spacing="false" fo:line-height="200%" fo:text-align="center" style:justify-single-word="false"/>
    </style:style>
    <style:style style:name="P32" style:family="paragraph" style:parent-style-name="Standard">
      <style:paragraph-properties fo:line-height="200%" fo:text-align="center" style:justify-single-word="false"/>
    </style:style>
    <style:style style:name="P33" style:family="paragraph" style:parent-style-name="Standard">
      <style:paragraph-properties fo:line-height="200%" fo:text-align="center" style:justify-single-word="false">
        <style:tab-stops>
          <style:tab-stop style:position="6.456cm"/>
        </style:tab-stops>
      </style:paragraph-properties>
    </style:style>
    <style:style style:name="P34" style:family="paragraph" style:parent-style-name="Standard">
      <style:paragraph-properties fo:margin-left="-0.374cm" fo:margin-top="0cm" fo:margin-bottom="0cm" style:contextual-spacing="false" fo:line-height="200%" fo:text-align="center" style:justify-single-word="false" fo:text-indent="0.374cm" style:auto-text-indent="false"/>
    </style:style>
    <style:style style:name="P35" style:family="paragraph" style:parent-style-name="Standard">
      <style:paragraph-properties fo:margin-top="0.212cm" fo:margin-bottom="0.212cm" style:contextual-spacing="false" fo:line-height="200%" fo:text-align="end" style:justify-single-word="false"/>
    </style:style>
    <style:style style:name="P36" style:family="paragraph" style:parent-style-name="Standard">
      <style:paragraph-properties fo:margin-top="0cm" fo:margin-bottom="0cm" style:contextual-spacing="false" fo:line-height="200%" fo:text-align="end" style:justify-single-word="false"/>
    </style:style>
    <style:style style:name="P37" style:family="paragraph" style:parent-style-name="Standard">
      <style:paragraph-properties fo:margin-top="0.212cm" fo:margin-bottom="0.212cm" style:contextual-spacing="false" fo:line-height="200%"/>
    </style:style>
    <style:style style:name="P38" style:family="paragraph" style:parent-style-name="Standard">
      <style:paragraph-properties fo:margin-top="0.212cm" fo:margin-bottom="0.212cm" style:contextual-spacing="false" fo:line-height="200%" fo:text-align="justify" style:justify-single-word="false"/>
    </style:style>
    <style:style style:name="P39" style:family="paragraph" style:parent-style-name="Standard">
      <style:paragraph-properties fo:margin-left="-0.751cm" fo:margin-top="0.212cm" fo:margin-bottom="0.212cm" style:contextual-spacing="false" fo:line-height="200%" fo:text-align="justify" style:justify-single-word="false"/>
    </style:style>
    <style:style style:name="P40" style:family="paragraph" style:parent-style-name="Standard">
      <style:paragraph-properties fo:margin-top="0cm" fo:margin-bottom="0cm" style:contextual-spacing="false" fo:line-height="200%" fo:text-align="justify" style:justify-single-word="false"/>
    </style:style>
    <style:style style:name="P41" style:family="paragraph" style:parent-style-name="Standard">
      <style:paragraph-properties fo:margin-top="0cm" fo:margin-bottom="0cm" style:contextual-spacing="false" fo:line-height="200%" fo:text-align="justify" style:justify-single-word="false">
        <style:tab-stops>
          <style:tab-stop style:position="6.456cm"/>
        </style:tab-stops>
      </style:paragraph-properties>
    </style:style>
    <style:style style:name="P42" style:family="paragraph" style:parent-style-name="Standard">
      <style:paragraph-properties fo:line-height="200%" fo:text-align="justify" style:justify-single-word="false">
        <style:tab-stops>
          <style:tab-stop style:position="6.456cm"/>
        </style:tab-stops>
      </style:paragraph-properties>
    </style:style>
    <style:style style:name="P43" style:family="paragraph" style:parent-style-name="Standard">
      <style:paragraph-properties fo:margin-top="0cm" fo:margin-bottom="0.353cm" style:contextual-spacing="false" fo:line-height="200%" fo:text-align="justify" style:justify-single-word="false">
        <style:tab-stops>
          <style:tab-stop style:position="6.456cm"/>
        </style:tab-stops>
      </style:paragraph-properties>
    </style:style>
    <style:style style:name="P44" style:family="paragraph" style:parent-style-name="Standard">
      <style:paragraph-properties fo:line-height="200%" fo:text-align="justify" style:justify-single-word="false"/>
    </style:style>
    <style:style style:name="P45" style:family="paragraph" style:parent-style-name="Standard" style:list-style-name="WWNum7">
      <style:paragraph-properties fo:margin-top="0cm" fo:margin-bottom="0cm" style:contextual-spacing="false" fo:line-height="200%" fo:text-align="justify" style:justify-single-word="false"/>
    </style:style>
    <style:style style:name="P46" style:family="paragraph" style:parent-style-name="Standard">
      <style:paragraph-properties fo:margin-top="0cm" fo:margin-bottom="0cm" style:contextual-spacing="false" fo:line-height="200%"/>
    </style:style>
    <style:style style:name="P47" style:family="paragraph" style:parent-style-name="Standard">
      <style:paragraph-properties fo:margin-top="0.03cm" fo:margin-bottom="0.353cm" style:contextual-spacing="false" fo:line-height="200%"/>
    </style:style>
    <style:style style:name="P48" style:family="paragraph" style:parent-style-name="Standard">
      <style:paragraph-properties fo:margin-top="0cm" fo:margin-bottom="0cm" style:contextual-spacing="false" fo:line-height="200%" fo:text-indent="1.134cm" style:auto-text-indent="false"/>
    </style:style>
    <style:style style:name="P49" style:family="paragraph" style:parent-style-name="Standard">
      <style:paragraph-properties fo:margin-top="0cm" fo:margin-bottom="0cm" style:contextual-spacing="false" fo:line-height="200%" fo:text-indent="0.388cm" style:auto-text-indent="false"/>
    </style:style>
    <style:style style:name="P50" style:family="paragraph" style:parent-style-name="Standard">
      <style:paragraph-properties fo:margin-top="0.212cm" fo:margin-bottom="0.212cm" style:contextual-spacing="false" fo:line-height="200%" fo:text-align="center" style:justify-single-word="false"/>
      <style:text-properties style:font-name="Times New Roman" fo:font-size="12pt" fo:font-weight="bold" style:font-size-asian="12pt" style:font-weight-asian="bold" style:font-name-complex="Times New Roman1" style:font-size-complex="12pt" style:font-weight-complex="bold"/>
    </style:style>
    <style:style style:name="P51" style:family="paragraph" style:parent-style-name="Standard">
      <style:paragraph-properties fo:margin-top="0cm" fo:margin-bottom="0cm" style:contextual-spacing="false" fo:line-height="200%" fo:text-align="center" style:justify-single-word="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52" style:family="paragraph" style:parent-style-name="Standard">
      <style:paragraph-properties fo:margin-top="0cm" fo:margin-bottom="0cm" style:contextual-spacing="false" fo:line-height="2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53" style:family="paragraph" style:parent-style-name="Standard">
      <style:paragraph-properties fo:margin-top="0cm" fo:margin-bottom="0cm" style:contextual-spacing="false" fo:line-height="200%" fo:text-align="end" style:justify-single-word="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54" style:family="paragraph" style:parent-style-name="Standard">
      <style:paragraph-properties fo:margin-top="0cm" fo:margin-bottom="0cm" style:contextual-spacing="false" fo:line-height="200%"/>
      <style:text-properties style:font-name="Times New Roman" fo:font-size="12pt" fo:font-weight="bold" style:font-name-asian="Times New Roman1" style:font-size-asian="12pt" style:font-weight-asian="bold" style:font-name-complex="Times New Roman1" style:font-size-complex="12pt"/>
    </style:style>
    <style:style style:name="P55" style:family="paragraph" style:parent-style-name="Standard">
      <style:paragraph-properties fo:line-height="200%"/>
      <style:text-properties style:font-name="Times New Roman" fo:font-size="12pt" style:font-size-asian="12pt" style:font-name-complex="Times New Roman1" style:font-size-complex="12pt"/>
    </style:style>
    <style:style style:name="P56" style:family="paragraph" style:parent-style-name="Standard">
      <style:paragraph-properties fo:margin-top="0cm" fo:margin-bottom="0cm" style:contextual-spacing="false" fo:line-height="200%" fo:text-align="justify" style:justify-single-word="false">
        <style:tab-stops>
          <style:tab-stop style:position="6.456cm"/>
        </style:tab-stops>
      </style:paragraph-properties>
      <style:text-properties style:font-name="Times New Roman" fo:font-size="12pt" style:font-size-asian="12pt" style:font-name-complex="Times New Roman1" style:font-size-complex="12pt"/>
    </style:style>
    <style:style style:name="P57" style:family="paragraph" style:parent-style-name="Standard">
      <style:paragraph-properties fo:margin-top="0cm" fo:margin-bottom="0cm" style:contextual-spacing="false" fo:line-height="200%" fo:text-align="end" style:justify-single-word="false"/>
      <style:text-properties style:font-name="Times New Roman" fo:font-size="12pt" style:font-size-asian="12pt" style:font-size-complex="12pt"/>
    </style:style>
    <style:style style:name="P58" style:family="paragraph" style:parent-style-name="Standard">
      <style:paragraph-properties fo:margin-top="0cm" fo:margin-bottom="0.353cm" style:contextual-spacing="false" fo:line-height="200%"/>
      <style:text-properties style:font-name="Times New Roman" fo:font-size="12pt" style:font-size-asian="12pt" style:font-size-complex="12pt"/>
    </style:style>
    <style:style style:name="P59" style:family="paragraph" style:parent-style-name="Standard">
      <style:paragraph-properties fo:margin-top="0cm" fo:margin-bottom="0cm" style:contextual-spacing="false" fo:line-height="200%" fo:text-align="center" style:justify-single-word="false"/>
      <style:text-properties style:font-name="Times New Roman" fo:font-size="12pt" style:font-size-asian="12pt" style:font-size-complex="12pt"/>
    </style:style>
    <style:style style:name="P60" style:family="paragraph" style:parent-style-name="Standard">
      <style:paragraph-properties fo:margin-top="0cm" fo:margin-bottom="0cm" style:contextual-spacing="false" fo:line-height="200%" fo:text-align="justify" style:justify-single-word="false"/>
      <style:text-properties style:font-name="Times New Roman" fo:font-size="12pt" style:font-size-asian="12pt" style:font-size-complex="12pt"/>
    </style:style>
    <style:style style:name="P61" style:family="paragraph" style:parent-style-name="Standard">
      <style:paragraph-properties fo:margin-top="0cm" fo:margin-bottom="0cm" style:contextual-spacing="false" fo:line-height="200%"/>
      <style:text-properties style:font-name="Times New Roman" fo:font-size="12pt" style:font-size-asian="12pt" style:font-size-complex="12pt"/>
    </style:style>
    <style:style style:name="P62" style:family="paragraph" style:parent-style-name="Standard">
      <style:paragraph-properties fo:margin-top="0cm" fo:margin-bottom="0cm" style:contextual-spacing="false" fo:line-height="200%"/>
      <style:text-properties style:font-name="Times New Roman" fo:font-size="12pt" style:font-size-asian="12pt" style:language-asian="en" style:country-asian="US" style:font-name-complex="Times New Roman1" style:font-size-complex="12pt"/>
    </style:style>
    <style:style style:name="P63" style:family="paragraph" style:parent-style-name="Standard">
      <style:paragraph-properties fo:margin-top="0cm" fo:margin-bottom="0.353cm" style:contextual-spacing="false" fo:line-height="200%" fo:text-align="justify" style:justify-single-word="false"/>
      <style:text-properties style:font-name="Times New Roman" fo:font-size="12pt" style:font-size-asian="12pt" style:language-asian="en" style:country-asian="US" style:font-name-complex="Times New Roman1" style:font-size-complex="12pt"/>
    </style:style>
    <style:style style:name="P64" style:family="paragraph" style:parent-style-name="Standard">
      <style:paragraph-properties fo:margin-top="0cm" fo:margin-bottom="0.353cm" style:contextual-spacing="false" fo:line-height="200%" fo:text-align="justify" style:justify-single-word="false">
        <style:tab-stops>
          <style:tab-stop style:position="6.456cm"/>
        </style:tab-stops>
      </style:paragraph-properties>
      <style:text-properties style:font-name="Times New Roman" fo:font-size="12pt" style:font-name-asian="Times New Roman1" style:font-size-asian="12pt" style:font-name-complex="Times New Roman1" style:font-size-complex="12pt"/>
    </style:style>
    <style:style style:name="P65" style:family="paragraph" style:parent-style-name="Standard">
      <style:paragraph-properties fo:margin-top="0.212cm" fo:margin-bottom="0.212cm" style:contextual-spacing="false" fo:line-height="200%"/>
      <style:text-properties style:font-name="Times New Roman" fo:font-size="12pt" style:font-name-asian="Times New Roman1" style:font-size-asian="12pt" style:font-name-complex="Times New Roman1" style:font-size-complex="12pt"/>
    </style:style>
    <style:style style:name="P66" style:family="paragraph" style:parent-style-name="Standard">
      <style:paragraph-properties fo:margin-top="0cm" fo:margin-bottom="0cm" style:contextual-spacing="false" fo:line-height="200%" fo:text-align="center" style:justify-single-word="false"/>
      <style:text-properties style:font-name="Times New Roman" fo:font-size="12pt" style:font-name-asian="Times New Roman1" style:font-size-asian="12pt" style:font-name-complex="Times New Roman1" style:font-size-complex="12pt"/>
    </style:style>
    <style:style style:name="P67" style:family="paragraph" style:parent-style-name="Standard">
      <style:paragraph-properties fo:margin-top="0cm" fo:margin-bottom="0cm" style:contextual-spacing="false" fo:line-height="200%"/>
      <style:text-properties style:font-name="Times New Roman" fo:font-size="12pt" style:font-name-asian="Times New Roman1" style:font-size-asian="12pt" style:font-name-complex="Times New Roman1" style:font-size-complex="12pt"/>
    </style:style>
    <style:style style:name="P68" style:family="paragraph" style:parent-style-name="Standard">
      <style:paragraph-properties fo:margin-top="0cm" fo:margin-bottom="0cm" style:contextual-spacing="false" fo:line-height="200%" fo:text-align="end" style:justify-single-word="false"/>
      <style:text-properties style:font-name="Times New Roman" fo:font-size="12pt" style:font-name-asian="Times New Roman1" style:font-size-asian="12pt" style:font-name-complex="Times New Roman1" style:font-size-complex="12pt"/>
    </style:style>
    <style:style style:name="P69" style:family="paragraph" style:parent-style-name="Standard">
      <style:paragraph-properties fo:margin-top="0cm" fo:margin-bottom="0cm" style:contextual-spacing="false" fo:line-height="200%"/>
      <style:text-properties style:font-name="Times New Roman" fo:font-size="12pt" style:font-name-asian="Times New Roman1" style:font-size-asian="12pt" style:font-name-complex="Times New Roman1" style:font-size-complex="12pt" style:font-weight-complex="bold"/>
    </style:style>
    <style:style style:name="P70" style:family="paragraph" style:parent-style-name="Standard">
      <style:paragraph-properties fo:margin-top="0cm" fo:margin-bottom="0cm" style:contextual-spacing="false" fo:line-height="200%"/>
      <style:text-properties fo:color="#000000" loext:opacity="100%" style:font-name="Times New Roman" fo:font-size="12pt" fo:font-weight="bold" style:font-name-asian="Times New Roman1" style:font-size-asian="12pt" style:font-weight-asian="bold" style:font-name-complex="Times New Roman1" style:font-size-complex="12pt" style:font-weight-complex="bold"/>
    </style:style>
    <style:style style:name="P71" style:family="paragraph" style:parent-style-name="Standard">
      <style:paragraph-properties fo:margin-top="0cm" fo:margin-bottom="0cm" style:contextual-spacing="false" fo:line-height="200%" fo:text-align="center" style:justify-single-word="false"/>
      <style:text-properties fo:color="#000000" loext:opacity="100%" style:font-name="Times New Roman" fo:font-size="12pt" fo:font-weight="bold" style:font-name-asian="Times New Roman1" style:font-size-asian="12pt" style:font-weight-asian="bold" style:font-name-complex="Times New Roman1" style:font-size-complex="12pt" style:font-weight-complex="bold"/>
    </style:style>
    <style:style style:name="P72" style:family="paragraph" style:parent-style-name="Standard">
      <style:paragraph-properties fo:margin-top="0cm" fo:margin-bottom="0cm" style:contextual-spacing="false" fo:line-height="200%" fo:text-align="justify" style:justify-single-word="false"/>
      <style:text-properties fo:color="#000000" loext:opacity="100%" style:font-name="Times New Roman" fo:font-size="12pt" style:font-name-asian="Times New Roman1" style:font-size-asian="12pt" style:font-name-complex="Times New Roman1" style:font-size-complex="12pt"/>
    </style:style>
    <style:style style:name="P73" style:family="paragraph" style:parent-style-name="Standard">
      <style:paragraph-properties fo:line-height="200%" fo:text-align="justify" style:justify-single-word="false">
        <style:tab-stops>
          <style:tab-stop style:position="6.456cm"/>
        </style:tab-stops>
      </style:paragraph-properties>
      <style:text-properties fo:color="#000000" loext:opacity="100%" style:font-name="Times New Roman" fo:font-size="12pt" style:font-name-asian="Times New Roman1" style:font-size-asian="12pt" style:font-name-complex="Times New Roman1" style:font-size-complex="12pt"/>
    </style:style>
    <style:style style:name="P74" style:family="paragraph" style:parent-style-name="Standard">
      <style:paragraph-properties fo:margin-top="0cm" fo:margin-bottom="0.353cm" style:contextual-spacing="false" fo:line-height="200%" fo:text-align="justify" style:justify-single-word="false"/>
      <style:text-properties fo:color="#000000" loext:opacity="100%" style:font-name="Times New Roman" fo:font-size="12pt" style:font-name-asian="Times New Roman1" style:font-size-asian="12pt" style:font-name-complex="Times New Roman1" style:font-size-complex="12pt"/>
    </style:style>
    <style:style style:name="P75" style:family="paragraph" style:parent-style-name="Standard">
      <style:paragraph-properties fo:margin-top="0cm" fo:margin-bottom="0cm" style:contextual-spacing="false" fo:line-height="200%"/>
      <style:text-properties fo:color="#000000" loext:opacity="100%" style:font-name="Times New Roman" fo:font-size="12pt" style:font-name-asian="Times New Roman1" style:font-size-asian="12pt" style:font-name-complex="Times New Roman1" style:font-size-complex="12pt"/>
    </style:style>
    <style:style style:name="P76" style:family="paragraph" style:parent-style-name="Standard">
      <style:paragraph-properties fo:margin-top="0cm" fo:margin-bottom="0cm" style:contextual-spacing="false" fo:line-height="200%" fo:text-align="end" style:justify-single-word="false"/>
      <style:text-properties fo:color="#000000" loext:opacity="100%" style:font-name="Times New Roman" fo:font-size="12pt" style:font-name-asian="Times New Roman1" style:font-size-asian="12pt" style:font-name-complex="Times New Roman1" style:font-size-complex="12pt"/>
    </style:style>
    <style:style style:name="P77" style:family="paragraph" style:parent-style-name="Standard">
      <style:paragraph-properties fo:margin-top="0cm" fo:margin-bottom="0cm" style:contextual-spacing="false" fo:line-height="200%" fo:text-align="center" style:justify-single-word="false"/>
      <style:text-properties fo:color="#000000" loext:opacity="100%" style:font-name="Times New Roman" fo:font-size="12pt" style:font-name-asian="Times New Roman1" style:font-size-asian="12pt" style:font-name-complex="Times New Roman1" style:font-size-complex="12pt"/>
    </style:style>
    <style:style style:name="P78" style:family="paragraph" style:parent-style-name="Title">
      <style:paragraph-properties fo:margin-top="0cm" fo:margin-bottom="0cm" style:contextual-spacing="true" fo:line-height="200%" fo:text-align="center" style:justify-single-word="false"/>
    </style:style>
    <style:style style:name="P79" style:family="paragraph">
      <loext:graphic-properties draw:fill="solid" draw:fill-color="#00b0f0"/>
      <style:paragraph-properties fo:text-align="start"/>
      <style:text-properties fo:color="#000000" loext:opacity="100%" fo:font-size="18pt"/>
    </style:style>
    <style:style style:name="P80" style:family="paragraph">
      <loext:graphic-properties draw:fill="none"/>
      <style:paragraph-properties fo:text-align="start"/>
      <style:text-properties fo:font-size="18pt"/>
    </style:style>
    <style:style style:name="P81" style:family="paragraph">
      <loext:graphic-properties draw:fill="solid" draw:fill-color="#ffffff"/>
      <style:paragraph-properties fo:text-align="start"/>
      <style:text-properties fo:color="#000000" loext:opacity="100%" fo:font-size="18pt"/>
    </style:style>
    <style:style style:name="P82" style:family="paragraph">
      <loext:graphic-properties draw:fill="solid" draw:fill-color="#ffffff"/>
      <style:paragraph-properties fo:text-align="start"/>
      <style:text-properties fo:font-size="18pt"/>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font-weight-complex="bold"/>
    </style:style>
    <style:style style:name="T3" style:family="text">
      <style:text-properties style:font-name="Times New Roman" fo:font-size="12pt" fo:font-weight="bold" style:font-name-asian="Arial Unicode MS" style:font-size-asian="12pt" style:font-weight-asian="bold" style:font-name-complex="Arial1" style:font-size-complex="12pt"/>
    </style:style>
    <style:style style:name="T4" style:family="text">
      <style:text-properties style:font-name="Times New Roman" fo:font-size="12pt" fo:font-weight="bold" style:font-name-asian="Arial Unicode MS" style:font-size-asian="12pt" style:font-weight-asian="bold" style:font-size-complex="12pt"/>
    </style:style>
    <style:style style:name="T5" style:family="text">
      <style:text-properties style:font-name="Times New Roman" fo:font-size="12pt" fo:font-weight="bold" style:font-name-asian="Times New Roman1" style:font-size-asian="12pt" style:font-weight-asian="bold" style:font-name-complex="Times New Roman1" style:font-size-complex="12pt"/>
    </style:style>
    <style:style style:name="T6"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7" style:family="text">
      <style:text-properties style:font-name="Times New Roman" fo:font-size="12pt" style:font-size-asian="12pt" style:font-size-complex="12pt"/>
    </style:style>
    <style:style style:name="T8" style:family="text">
      <style:text-properties style:font-name="Times New Roman" fo:font-size="12pt" style:font-size-asian="12pt" style:font-name-complex="Times New Roman1" style:font-size-complex="12pt"/>
    </style:style>
    <style:style style:name="T9" style:family="text">
      <style:text-properties style:font-name="Times New Roman" fo:font-size="12pt" style:font-size-asian="12pt" style:language-asian="en" style:country-asian="US" style:font-name-complex="Times New Roman1" style:font-size-complex="12pt"/>
    </style:style>
    <style:style style:name="T10" style:family="text">
      <style:text-properties style:font-name="Times New Roman" fo:font-size="12pt" style:font-size-asian="12pt" style:language-asian="en" style:country-asian="US" style:font-name-complex="Times New Roman1" style:font-size-complex="12pt" fo:background-color="#ffff00"/>
    </style:style>
    <style:style style:name="T11" style:family="text">
      <style:text-properties style:font-name="Times New Roman" fo:font-size="12pt" style:font-name-asian="Times New Roman1" style:font-size-asian="12pt" style:font-name-complex="Times New Roman1" style:font-size-complex="12pt"/>
    </style:style>
    <style:style style:name="T12" style:family="text">
      <style:text-properties style:font-name="Times New Roman" fo:font-size="12pt" style:font-name-asian="Times New Roman1" style:font-size-asian="12pt" style:font-name-complex="Times New Roman1" style:font-size-complex="12pt" style:font-weight-complex="bold"/>
    </style:style>
    <style:style style:name="T13"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4" style:family="text">
      <style:text-properties style:font-name="Times New Roman" fo:font-size="12pt" style:text-underline-style="solid" style:text-underline-width="auto" style:text-underline-color="font-color" style:font-size-asian="12pt" style:language-asian="en" style:country-asian="US" style:font-name-complex="Times New Roman1" style:font-size-complex="12pt"/>
    </style:style>
    <style:style style:name="T15"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16" style:family="text">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T17" style:family="text">
      <style:text-properties style:font-name="Times New Roman" fo:font-size="12pt" style:text-underline-style="solid" style:text-underline-width="auto" style:text-underline-color="font-color" fo:font-weight="bold" style:font-name-asian="F" style:font-size-asian="12pt" style:language-asian="en" style:country-asian="US" style:font-weight-asian="bold" style:font-name-complex="Times New Roman1" style:font-size-complex="12pt" style:font-weight-complex="bold"/>
    </style:style>
    <style:style style:name="T18" style:family="text">
      <style:text-properties style:font-name="Times New Roman" fo:font-size="12pt" fo:language="es" fo:country="MX" style:font-name-asian="Times New Roman1" style:font-size-asian="12pt" style:language-asian="es" style:country-asian="MX" style:font-name-complex="Times New Roman1" style:font-size-complex="12pt"/>
    </style:style>
    <style:style style:name="T19" style:family="text">
      <style:text-properties style:font-name="Times New Roman" fo:font-size="12pt" fo:language="es" fo:country="MX" fo:font-weight="bold" style:font-size-asian="12pt" style:font-weight-asian="bold" style:font-name-complex="Times New Roman1" style:font-size-complex="12pt"/>
    </style:style>
    <style:style style:name="T20" style:family="text">
      <style:text-properties style:font-name="Times New Roman" fo:font-size="12pt" fo:language="es" fo:country="MX" fo:font-weight="bold" style:font-size-asian="12pt" style:language-asian="en" style:country-asian="US" style:font-weight-asian="bold" style:font-name-complex="Times New Roman1" style:font-size-complex="12pt"/>
    </style:style>
    <style:style style:name="T21" style:family="text">
      <style:text-properties style:font-name="Times New Roman" fo:font-size="12pt" fo:language="es" fo:country="MX" style:font-size-asian="12pt" style:language-asian="en" style:country-asian="US" style:font-name-complex="Times New Roman1" style:font-size-complex="12pt"/>
    </style:style>
    <style:style style:name="T22" style:family="text">
      <style:text-properties style:font-name="Times New Roman" fo:font-size="12pt" fo:language="es" fo:country="MX" style:font-name-asian="Arial Unicode MS" style:font-size-asian="12pt" style:font-name-complex="Arial1" style:font-size-complex="12pt"/>
    </style:style>
    <style:style style:name="T23" style:family="text">
      <style:text-properties style:font-name="Times New Roman" fo:font-size="12pt" fo:language="es" fo:country="MX" style:font-name-asian="Arial1" style:font-size-asian="12pt" style:language-asian="en" style:country-asian="US" style:font-name-complex="Arial1" style:font-size-complex="12pt"/>
    </style:style>
    <style:style style:name="T24" style:family="text">
      <style:text-properties style:font-name="Times New Roman" fo:font-size="12pt" fo:language="es" fo:country="MX" style:font-name-asian="Arial1" style:font-size-asian="12pt" style:font-name-complex="Arial1" style:font-size-complex="12pt"/>
    </style:style>
    <style:style style:name="T25" style:family="text">
      <style:text-properties style:font-name="Times New Roman" fo:font-size="12pt" style:rfc-language-tag="es-ES-u-co-trad" fo:language="es" fo:country="ES" style:font-name-asian="Arial Unicode MS" style:font-size-asian="12pt" style:font-size-complex="12pt"/>
    </style:style>
    <style:style style:name="T26" style:family="text">
      <style:text-properties style:font-name="Times New Roman" fo:font-size="12pt" style:rfc-language-tag="es-ES-u-co-trad" fo:language="es" fo:country="ES" fo:font-weight="bold" style:font-name-asian="Arial Unicode MS" style:font-size-asian="12pt" style:font-weight-asian="bold" style:font-size-complex="12pt"/>
    </style:style>
    <style:style style:name="T27" style:family="text">
      <style:text-properties style:font-name="Times New Roman" fo:font-size="12pt" style:font-name-asian="Arial Unicode MS" style:font-size-asian="12pt" style:font-name-complex="Arial1" style:font-size-complex="12pt"/>
    </style:style>
    <style:style style:name="T28" style:family="text">
      <style:text-properties style:font-name="Times New Roman" fo:font-size="12pt" style:font-name-asian="Arial Unicode MS" style:font-size-asian="12pt" style:font-size-complex="12pt"/>
    </style:style>
    <style:style style:name="T29" style:family="text">
      <style:text-properties style:font-name="Times New Roman" fo:font-size="12pt" fo:letter-spacing="0.002cm" fo:language="es" fo:country="MX" style:font-name-asian="Arial1" style:font-size-asian="12pt" style:language-asian="en" style:country-asian="US" style:font-name-complex="Arial1" style:font-size-complex="12pt"/>
    </style:style>
    <style:style style:name="T30" style:family="text">
      <style:text-properties style:font-name="Times New Roman" fo:font-size="12pt" fo:letter-spacing="0.002cm" fo:language="es" fo:country="MX" style:font-name-asian="Arial1" style:font-size-asian="12pt" style:font-name-complex="Arial1" style:font-size-complex="12pt"/>
    </style:style>
    <style:style style:name="T31" style:family="text">
      <style:text-properties style:font-name="Times New Roman" fo:font-size="12pt" fo:letter-spacing="0.002cm" fo:language="en" fo:country="US" style:font-name-asian="Arial1" style:font-size-asian="12pt" style:language-asian="en" style:country-asian="US" style:font-name-complex="Arial1" style:font-size-complex="12pt"/>
    </style:style>
    <style:style style:name="T32" style:family="text">
      <style:text-properties style:font-name="Times New Roman" fo:font-size="12pt" fo:letter-spacing="0.002cm" style:font-name-asian="Arial1" style:font-size-asian="12pt" style:font-name-complex="Arial1" style:font-size-complex="12pt"/>
    </style:style>
    <style:style style:name="T33" style:family="text">
      <style:text-properties style:font-name="Times New Roman" fo:font-size="12pt" fo:letter-spacing="0.004cm" fo:language="es" fo:country="MX" style:font-name-asian="Arial1" style:font-size-asian="12pt" style:language-asian="en" style:country-asian="US" style:font-name-complex="Arial1" style:font-size-complex="12pt"/>
    </style:style>
    <style:style style:name="T34" style:family="text">
      <style:text-properties style:font-name="Times New Roman" fo:font-size="12pt" fo:letter-spacing="0.004cm" fo:language="es" fo:country="MX" style:font-name-asian="Arial1" style:font-size-asian="12pt" style:font-name-complex="Arial1" style:font-size-complex="12pt"/>
    </style:style>
    <style:style style:name="T35" style:family="text">
      <style:text-properties style:font-name="Times New Roman" fo:font-size="12pt" fo:letter-spacing="0.004cm" fo:language="en" fo:country="US" style:font-name-asian="Arial1" style:font-size-asian="12pt" style:language-asian="en" style:country-asian="US" style:font-name-complex="Arial1" style:font-size-complex="12pt"/>
    </style:style>
    <style:style style:name="T36" style:family="text">
      <style:text-properties style:font-name="Times New Roman" fo:font-size="12pt" fo:letter-spacing="0.004cm" style:font-name-asian="Arial1" style:font-size-asian="12pt" style:font-name-complex="Arial1" style:font-size-complex="12pt"/>
    </style:style>
    <style:style style:name="T37" style:family="text">
      <style:text-properties style:font-name="Times New Roman" fo:font-size="12pt" fo:letter-spacing="-0.002cm" fo:language="es" fo:country="MX" style:font-name-asian="Arial1" style:font-size-asian="12pt" style:language-asian="en" style:country-asian="US" style:font-name-complex="Arial1" style:font-size-complex="12pt"/>
    </style:style>
    <style:style style:name="T38" style:family="text">
      <style:text-properties style:font-name="Times New Roman" fo:font-size="12pt" fo:letter-spacing="-0.002cm" fo:language="es" fo:country="MX" style:font-name-asian="Arial1" style:font-size-asian="12pt" style:font-name-complex="Arial1" style:font-size-complex="12pt"/>
    </style:style>
    <style:style style:name="T39" style:family="text">
      <style:text-properties style:font-name="Times New Roman" fo:font-size="12pt" fo:letter-spacing="-0.002cm" fo:language="en" fo:country="US" style:font-name-asian="Arial1" style:font-size-asian="12pt" style:language-asian="en" style:country-asian="US" style:font-name-complex="Arial1" style:font-size-complex="12pt"/>
    </style:style>
    <style:style style:name="T40" style:family="text">
      <style:text-properties style:font-name="Times New Roman" fo:font-size="12pt" fo:letter-spacing="-0.002cm" style:font-name-asian="Arial1" style:font-size-asian="12pt" style:font-name-complex="Arial1" style:font-size-complex="12pt"/>
    </style:style>
    <style:style style:name="T41" style:family="text">
      <style:text-properties style:font-name="Times New Roman" fo:font-size="12pt" fo:letter-spacing="-0.009cm" fo:language="es" fo:country="MX" style:font-name-asian="Arial1" style:font-size-asian="12pt" style:language-asian="en" style:country-asian="US" style:font-name-complex="Arial1" style:font-size-complex="12pt"/>
    </style:style>
    <style:style style:name="T42" style:family="text">
      <style:text-properties style:font-name="Times New Roman" fo:font-size="12pt" fo:letter-spacing="-0.009cm" fo:language="es" fo:country="MX" style:font-name-asian="Arial1" style:font-size-asian="12pt" style:font-name-complex="Arial1" style:font-size-complex="12pt"/>
    </style:style>
    <style:style style:name="T43" style:family="text">
      <style:text-properties style:font-name="Times New Roman" fo:font-size="12pt" fo:letter-spacing="-0.009cm" fo:language="en" fo:country="US" style:font-name-asian="Arial1" style:font-size-asian="12pt" style:language-asian="en" style:country-asian="US" style:font-name-complex="Arial1" style:font-size-complex="12pt"/>
    </style:style>
    <style:style style:name="T44" style:family="text">
      <style:text-properties style:font-name="Times New Roman" fo:font-size="12pt" fo:letter-spacing="-0.009cm" style:font-name-asian="Arial1" style:font-size-asian="12pt" style:font-name-complex="Arial1" style:font-size-complex="12pt"/>
    </style:style>
    <style:style style:name="T45" style:family="text">
      <style:text-properties style:font-name="Times New Roman" fo:font-size="12pt" fo:letter-spacing="0.009cm" fo:language="es" fo:country="MX" style:font-name-asian="Arial1" style:font-size-asian="12pt" style:language-asian="en" style:country-asian="US" style:font-name-complex="Arial1" style:font-size-complex="12pt"/>
    </style:style>
    <style:style style:name="T46" style:family="text">
      <style:text-properties style:font-name="Times New Roman" fo:font-size="12pt" fo:letter-spacing="0.009cm" fo:language="es" fo:country="MX" style:font-name-asian="Arial1" style:font-size-asian="12pt" style:font-name-complex="Arial1" style:font-size-complex="12pt"/>
    </style:style>
    <style:style style:name="T47" style:family="text">
      <style:text-properties style:font-name="Times New Roman" fo:font-size="12pt" fo:letter-spacing="0.009cm" fo:language="en" fo:country="US" style:font-name-asian="Arial1" style:font-size-asian="12pt" style:language-asian="en" style:country-asian="US" style:font-name-complex="Arial1" style:font-size-complex="12pt"/>
    </style:style>
    <style:style style:name="T48" style:family="text">
      <style:text-properties style:font-name="Times New Roman" fo:font-size="12pt" fo:letter-spacing="-0.011cm" fo:language="es" fo:country="MX" style:font-name-asian="Arial1" style:font-size-asian="12pt" style:language-asian="en" style:country-asian="US" style:font-name-complex="Arial1" style:font-size-complex="12pt"/>
    </style:style>
    <style:style style:name="T49" style:family="text">
      <style:text-properties style:font-name="Times New Roman" fo:font-size="12pt" fo:letter-spacing="-0.011cm" style:font-name-asian="Arial1" style:font-size-asian="12pt" style:font-name-complex="Arial1" style:font-size-complex="12pt"/>
    </style:style>
    <style:style style:name="T50" style:family="text">
      <style:text-properties style:font-name="Times New Roman" fo:font-size="12pt" fo:letter-spacing="-0.004cm" fo:language="es" fo:country="MX" style:font-name-asian="Arial1" style:font-size-asian="12pt" style:language-asian="en" style:country-asian="US" style:font-name-complex="Arial1" style:font-size-complex="12pt"/>
    </style:style>
    <style:style style:name="T51" style:family="text">
      <style:text-properties style:font-name="Times New Roman" fo:font-size="12pt" fo:letter-spacing="-0.004cm" fo:language="es" fo:country="MX" style:font-name-asian="Arial1" style:font-size-asian="12pt" style:font-name-complex="Arial1" style:font-size-complex="12pt"/>
    </style:style>
    <style:style style:name="T52" style:family="text">
      <style:text-properties style:font-name="Times New Roman" fo:font-size="12pt" fo:letter-spacing="-0.004cm" fo:language="en" fo:country="US" style:font-name-asian="Arial1" style:font-size-asian="12pt" style:language-asian="en" style:country-asian="US" style:font-name-complex="Arial1" style:font-size-complex="12pt"/>
    </style:style>
    <style:style style:name="T53" style:family="text">
      <style:text-properties style:font-name="Times New Roman" fo:font-size="12pt" fo:letter-spacing="-0.004cm" style:font-name-asian="Arial1" style:font-size-asian="12pt" style:font-name-complex="Arial1" style:font-size-complex="12pt"/>
    </style:style>
    <style:style style:name="T54" style:family="text">
      <style:text-properties style:font-name="Times New Roman" fo:font-size="12pt" fo:language="en" fo:country="US" style:font-name-asian="Arial1" style:font-size-asian="12pt" style:language-asian="en" style:country-asian="US" style:font-name-complex="Arial1" style:font-size-complex="12pt"/>
    </style:style>
    <style:style style:name="T55" style:family="text">
      <style:text-properties style:font-name="Times New Roman" fo:font-size="12pt" fo:letter-spacing="-0.005cm" fo:language="en" fo:country="US" style:font-name-asian="Arial1" style:font-size-asian="12pt" style:language-asian="en" style:country-asian="US" style:font-name-complex="Arial1" style:font-size-complex="12pt"/>
    </style:style>
    <style:style style:name="T56" style:family="text">
      <style:text-properties style:font-name="Times New Roman" fo:font-size="12pt" fo:letter-spacing="-0.005cm" fo:language="es" fo:country="MX" style:font-name-asian="Arial1" style:font-size-asian="12pt" style:font-name-complex="Arial1" style:font-size-complex="12pt"/>
    </style:style>
    <style:style style:name="T57" style:family="text">
      <style:text-properties style:font-name="Times New Roman" fo:font-size="12pt" fo:letter-spacing="-0.005cm" style:font-name-asian="Arial1" style:font-size-asian="12pt" style:font-name-complex="Arial1" style:font-size-complex="12pt"/>
    </style:style>
    <style:style style:name="T58" style:family="text">
      <style:text-properties style:font-name="Times New Roman" fo:font-size="12pt" fo:letter-spacing="0.011cm" fo:language="en" fo:country="US" style:font-name-asian="Arial1" style:font-size-asian="12pt" style:language-asian="en" style:country-asian="US" style:font-name-complex="Arial1" style:font-size-complex="12pt"/>
    </style:style>
    <style:style style:name="T59" style:family="text">
      <style:text-properties style:font-name="Times New Roman" fo:font-size="12pt" fo:letter-spacing="0.011cm" style:font-name-asian="Arial1" style:font-size-asian="12pt" style:font-name-complex="Arial1" style:font-size-complex="12pt"/>
    </style:style>
    <style:style style:name="T60" style:family="text">
      <style:text-properties style:font-name="Times New Roman" fo:font-size="12pt" style:font-name-asian="Arial1" style:font-size-asian="12pt" style:font-name-complex="Arial1" style:font-size-complex="12pt"/>
    </style:style>
    <style:style style:name="T61" style:family="text">
      <style:text-properties style:font-name="Times New Roman" fo:font-size="12pt" fo:letter-spacing="0.005cm" fo:language="es" fo:country="MX" style:font-name-asian="Arial1" style:font-size-asian="12pt" style:font-name-complex="Arial1" style:font-size-complex="12pt"/>
    </style:style>
    <style:style style:name="T62" style:family="text">
      <style:text-properties style:font-name="Times New Roman" fo:font-size="12pt" style:font-name-asian="F" style:font-size-asian="12pt" style:language-asian="en" style:country-asian="US" style:font-name-complex="Times New Roman1" style:font-size-complex="12pt" style:font-weight-complex="bold"/>
    </style:style>
    <style:style style:name="T63" style:family="text">
      <style:text-properties style:use-window-font-color="true" loext:opacity="0%" style:font-name="Times New Roman" fo:font-size="12pt" fo:font-weight="bold" style:font-size-asian="12pt" style:font-weight-asian="bold" style:font-name-complex="Times New Roman1" style:font-size-complex="12pt"/>
    </style:style>
    <style:style style:name="T64" style:family="text">
      <style:text-properties style:use-window-font-color="true" loext:opacity="0%" style:font-name="Times New Roman" fo:font-size="12pt" fo:language="es" fo:country="MX" fo:font-weight="bold" style:font-size-asian="12pt" style:font-weight-asian="bold" style:font-name-complex="Times New Roman1" style:font-size-complex="12pt"/>
    </style:style>
    <style:style style:name="T65" style:family="text">
      <style:text-properties style:use-window-font-color="true" loext:opacity="0%" style:font-name="Times New Roman" fo:font-size="12pt" style:font-size-asian="12pt" style:font-name-complex="Times New Roman1" style:font-size-complex="12pt"/>
    </style:style>
    <style:style style:name="T66" style:family="text">
      <style:text-properties fo:color="#000000" loext:opacity="100%" style:font-name="Times New Roman" fo:font-size="12pt" fo:font-weight="bold" style:font-name-asian="Times New Roman1" style:font-size-asian="12pt" style:font-weight-asian="bold" style:font-name-complex="Times New Roman1" style:font-size-complex="12pt" style:font-weight-complex="bold"/>
    </style:style>
    <style:style style:name="T67" style:family="text">
      <style:text-properties fo:color="#000000" loext:opacity="100%" style:font-name="Times New Roman" fo:font-size="12pt" fo:font-weight="bold" style:font-name-asian="Times New Roman1" style:font-size-asian="12pt" style:font-weight-asian="bold" style:font-name-complex="Times New Roman1" style:font-size-complex="12pt"/>
    </style:style>
    <style:style style:name="T68" style:family="text">
      <style:text-properties fo:color="#000000" loext:opacity="100%" style:font-name="Times New Roman" fo:font-size="12pt" fo:font-weight="bold" style:font-name-asian="Times New Roman1" style:font-size-asian="12pt" style:font-weight-asian="bold" style:font-name-complex="Calibri1" style:font-size-complex="12pt" style:font-weight-complex="bold"/>
    </style:style>
    <style:style style:name="T69" style:family="text">
      <style:text-properties fo:color="#000000" loext:opacity="100%" style:font-name="Times New Roman" fo:font-size="12pt" style:font-name-asian="Times New Roman1" style:font-size-asian="12pt" style:font-name-complex="Times New Roman1" style:font-size-complex="12pt"/>
    </style:style>
    <style:style style:name="T70" style:family="text">
      <style:text-properties fo:color="#000000" loext:opacity="100%" style:font-name="Times New Roman" fo:font-size="12pt" style:font-name-asian="Times New Roman1" style:font-size-asian="12pt" style:font-name-complex="Times New Roman1" style:font-size-complex="12pt" fo:background-color="#ffff00"/>
    </style:style>
    <style:style style:name="T71" style:family="text">
      <style:text-properties fo:color="#000000" loext:opacity="100%" style:font-name="Times New Roman" fo:font-size="12pt" style:font-name-asian="Times New Roman1" style:font-size-asian="12pt" style:font-name-complex="Calibri1" style:font-size-complex="12pt"/>
    </style:style>
    <style:style style:name="T72" style:family="text">
      <style:text-properties fo:color="#000000" loext:opacity="100%" style:font-name="Times New Roman" fo:font-size="12pt" style:font-size-asian="12pt" style:font-size-complex="12pt"/>
    </style:style>
    <style:style style:name="T73" style:family="text">
      <style:text-properties fo:color="#000000" loext:opacity="100%" style:font-name="Times New Roman" fo:font-size="12pt" style:font-size-asian="12pt" style:font-name-complex="Arial1" style:font-size-complex="12pt"/>
    </style:style>
    <style:style style:name="T74" style:family="text">
      <style:text-properties fo:color="#000000" loext:opacity="100%"/>
    </style:style>
    <style:style style:name="T75" style:family="text">
      <style:text-properties style:font-name-asian="Times New Roman1" style:font-name-complex="Times New Roman1"/>
    </style:style>
    <style:style style:name="T76" style:family="text">
      <style:text-properties style:font-name="Arial" fo:font-size="8pt" fo:font-style="italic" style:font-size-asian="8pt" style:font-style-asian="italic" style:font-name-complex="Arial1" style:font-size-complex="9pt"/>
    </style:style>
    <style:style style:name="T77" style:family="text">
      <style:text-properties fo:color="#262626" loext:opacity="100%" style:font-name="Times New Roman" fo:font-size="12pt" style:font-name-asian="Times New Roman1" style:font-size-asian="12pt" style:font-name-complex="Calibri1" style:font-size-complex="12pt"/>
    </style:style>
    <style:style style:name="T78" style:family="text">
      <style:text-properties fo:color="#00b0f0" loext:opacity="100%" style:font-name="Times New Roman" fo:font-size="12pt" fo:language="es" fo:country="MX" fo:font-weight="bold" style:font-name-asian="Arial Unicode MS" style:font-size-asian="12pt" style:font-weight-asian="bold" style:font-name-complex="Arial1" style:font-size-complex="12pt"/>
    </style:style>
    <style:style style:name="T79" style:family="text">
      <style:text-properties fo:color="#1d1b11" loext:opacity="100%" style:font-name="Arial Narrow" fo:font-size="8pt" fo:font-weight="bold" style:font-size-asian="8pt" style:font-weight-asian="bold" style:font-size-complex="8pt">
        <loext:char-complex-color loext:theme-type="light2" loext:color-type="theme">
          <loext:transformation loext:type="shade" loext:value="8980"/>
        </loext:char-complex-color>
      </style:text-properties>
    </style:style>
    <style:style style:name="T80" style:family="text">
      <style:text-properties fo:color="#1d1b11" loext:opacity="100%" style:font-name="Arial Narrow" fo:font-weight="bold" style:font-weight-asian="bold">
        <loext:char-complex-color loext:theme-type="light2" loext:color-type="theme">
          <loext:transformation loext:type="shade" loext:value="8980"/>
        </loext:char-complex-color>
      </style:text-properties>
    </style:style>
    <style:style style:name="T81" style:family="text">
      <style:text-properties fo:color="#4f81bd" loext:opacity="100%" style:font-name="Times New Roman" fo:font-size="12pt" fo:font-weight="bold" style:font-name-asian="F" style:font-size-asian="12pt" style:language-asian="en" style:country-asian="US" style:font-weight-asian="bold" style:font-name-complex="Times New Roman1" style:font-size-complex="12pt" style:font-weight-complex="bold">
        <loext:char-complex-color loext:theme-type="accent1" loext:color-type="theme"/>
      </style:text-properties>
    </style:style>
    <style:style style:name="T82" style:family="text">
      <style:text-properties fo:color="#000000" loext:opacity="100%" style:font-name="Times New Roman" fo:font-size="12pt" style:font-name-asian="Times New Roman1" style:font-size-asian="12pt" style:font-name-complex="Times New Roman1" style:font-size-complex="12pt">
        <loext:char-complex-color loext:theme-type="accent1" loext:color-type="theme"/>
      </style:text-properties>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OLE">
      <style:graphic-properties draw:ole-draw-aspect="1"/>
    </style:style>
    <style:style style:name="Sect1" style:family="section">
      <style:section-properties style:editable="false">
        <style:columns fo:column-count="1" fo:column-gap="0cm"/>
      </style:section-properties>
    </style:style>
    <style:style style:name="gr1" style:family="graphic" style:parent-style-name="Frame">
      <style:graphic-properties draw:stroke="solid" svg:stroke-width="0.071cm" svg:stroke-color="#3a5f8b" draw:stroke-linejoin="round" svg:stroke-linecap="butt" draw:fill="solid" draw:fill-color="#00b0f0" draw:textarea-vertical-align="middle" draw:auto-grow-height="false" fo:min-height="1.348cm" fo:min-width="2.034cm" fo:padding-top="0.127cm" fo:padding-bottom="0.127cm" fo:padding-left="0.254cm" fo:padding-right="0.254cm" fo:wrap-option="wrap" loext:decorative="false" fo:margin-left="0.035cm" fo:margin-right="0.035cm" fo:margin-top="0.037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2" style:family="graphic" style:parent-style-name="Frame">
      <style:graphic-properties draw:stroke="solid" svg:stroke-width="0.071cm" svg:stroke-color="#3a5f8b" draw:stroke-linejoin="round" svg:stroke-linecap="butt" draw:fill="solid" draw:fill-color="#00b0f0" draw:textarea-vertical-align="middle" draw:auto-grow-height="false" fo:min-height="1.457cm" fo:min-width="1.967cm" fo:padding-top="0.127cm" fo:padding-bottom="0.127cm" fo:padding-left="0.254cm" fo:padding-right="0.254cm" fo:wrap-option="wrap" loext:decorative="false" fo:margin-left="0.035cm" fo:margin-right="0.035cm" fo:margin-top="0.037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3" style:family="graphic">
      <style:graphic-properties draw:stroke="dash" draw:stroke-dash="Long_20_Dash" svg:stroke-width="0.053cm" svg:stroke-color="#ff0000" draw:marker-end="msArrowEnd_20_5" draw:marker-end-width="0.21cm" draw:marker-end-center="false" draw:stroke-linejoin="round" svg:stroke-linecap="butt" draw:fill="none" loext:fill-use-slide-background="false" draw:textarea-vertical-align="top" draw:auto-grow-height="false" fo:min-height="0cm" fo:min-width="5.203cm" fo:padding-top="0.125cm" fo:padding-bottom="0.125cm" fo:padding-left="0.25cm" fo:padding-right="0.25cm" fo:wrap-option="wrap" loext:decorative="false" fo:margin-left="0.028cm" fo:margin-right="0cm" fo:margin-top="0.064cm" fo:margin-bottom="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0.071cm" svg:stroke-color="#3a5f8b" draw:stroke-linejoin="round" svg:stroke-linecap="butt" draw:fill="solid" draw:fill-color="#00b0f0" draw:textarea-vertical-align="middle" draw:auto-grow-height="false" fo:min-height="1.106cm" fo:min-width="1.083cm" fo:padding-top="0.127cm" fo:padding-bottom="0.127cm" fo:padding-left="0.254cm" fo:padding-right="0.254cm" fo:wrap-option="wrap" loext:decorative="false" fo:margin-left="0.037cm" fo:margin-right="0.034cm" fo:margin-top="0.035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5" style:family="graphic" style:parent-style-name="Frame">
      <style:graphic-properties draw:stroke="solid" svg:stroke-width="0.026cm" svg:stroke-color="#000000" draw:stroke-linejoin="round" svg:stroke-linecap="butt" draw:fill="solid" draw:fill-color="#ffffff" draw:textarea-vertical-align="middle" draw:auto-grow-height="false" fo:min-height="0.432cm" fo:min-width="0.399cm" fo:padding-top="0.127cm" fo:padding-bottom="0.127cm" fo:padding-left="0.254cm" fo:padding-right="0.254cm" fo:wrap-option="wrap" loext:decorative="false" fo:margin-left="0.016cm" fo:margin-right="0.012cm" fo:margin-top="0.014cm" fo:margin-bottom="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loext:fill-complex-color loext:theme-type="light1" loext:color-type="theme"/>
      </style:graphic-properties>
    </style:style>
    <style:style style:name="gr6" style:family="graphic">
      <style:graphic-properties draw:stroke="solid" svg:stroke-width="0.026cm" svg:stroke-color="#000000" draw:stroke-linejoin="round" svg:stroke-linecap="butt" draw:fill="solid" draw:fill-color="#ffffff" draw:textarea-vertical-align="top" draw:auto-grow-height="false" fo:min-height="0.228cm" fo:min-width="0.242cm" fo:padding-top="0.125cm" fo:padding-bottom="0.125cm" fo:padding-left="0.25cm" fo:padding-right="0.25cm" fo:wrap-option="wrap" loext:decorative="false" fo:margin-left="0.014cm" fo:margin-right="0.014cm" fo:margin-top="0.014cm" fo:margin-bottom="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loext:fill-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ción2">
        <text:p text:style-name="P30" loext:marker-style-name="T7"><text:span text:style-name="T1">FORMATO 08</text:span><text:span text:style-name="T1"/></text:p>
        <text:p text:style-name="P31" loext:marker-style-name="T7"><text:span text:style-name="T1">CARTA DE PRESENTACIÓN DE LA PROPUESTA PRODUCTIVA AL PROCOMPITE Regional Ayacucho 2020, I CONVOCATORIA</text:span><text:span text:style-name="T1"/></text:p>
        <text:p text:style-name="P31" loext:marker-style-name="T7"><text:span text:style-name="T1"><text:s/>(CATEGORIA “A” y “B”)</text:span><text:span text:style-name="T1"/></text:p>
        <text:p text:style-name="P35" loext:marker-style-name="T7"><text:span text:style-name="T11">Ayacucho,09 de setiembre de 2020</text:span><text:span text:style-name="T11"/></text:p>
        <text:p text:style-name="P37" loext:marker-style-name="T7"><text:span text:style-name="T1">Señores:</text:span><text:span text:style-name="T1"/></text:p>
        <text:p text:style-name="P37" loext:marker-style-name="T7"><text:span text:style-name="T1">Miembros del Comité Evaluador </text:span><text:span text:style-name="T1"/></text:p>
        <text:p text:style-name="P37" loext:marker-style-name="T7"><text:span text:style-name="T1">PROCOMPITE Regional Ayacucho 2020, I CONVOCATORIA</text:span><text:span text:style-name="T1"/></text:p>
        <text:p text:style-name="P38" loext:marker-style-name="T7"><text:span text:style-name="T13">Presente</text:span><text:span text:style-name="T11">.-</text:span></text:p>
        <text:p text:style-name="P38" loext:marker-style-name="T7"><text:span text:style-name="T18">Nos dirigimos a usted, en representación del Agente Económico Organizado: “</text:span><text:span text:style-name="T25">Asociación de Productores Lambrashuaycco de Casaorcco (Apal)</text:span><text:span text:style-name="T18">”, para presentar nuestra SOLICITUD PARA ACCEDER AL FONDO CONCURSABLE PROCOMPITE Regional Ayacucho 2020 I CONVOCATORIA a su cargo, a fin de implementar nuestra propuesta productiva (Plan de Negocio). Al respecto, le comunicamos que hemos sido registrados y aceptados en la PRIMERA ETAPA.</text:span></text:p>
        <text:p text:style-name="P38" loext:marker-style-name="T7"><text:span text:style-name="T18">Para este fin adjuntamos los siguientes documentos:</text:span><text:span text:style-name="T18"/></text:p>
        <text:list text:style-name="WWNum6">
          <text:list-item>
            <text:p text:style-name="P12" loext:marker-style-name="T7"><text:span text:style-name="T8">Solicitud de cofinanciamiento </text:span><text:span text:style-name="T1">(formato N° 09)</text:span></text:p>
          </text:list-item>
          <text:list-item>
            <text:p text:style-name="P12" loext:marker-style-name="T7"><text:span text:style-name="T8">Declaración Jurada de Cofinanciamiento </text:span><text:span text:style-name="T1">(formato N° 10)</text:span></text:p>
          </text:list-item>
          <text:list-item>
            <text:p text:style-name="P12" loext:marker-style-name="T7"><text:span text:style-name="T8">Lista de participantes del Plan de Negocios </text:span><text:span text:style-name="T1">(Ver formato Nº 11).</text:span></text:p>
          </text:list-item>
          <text:list-item>
            <text:p text:style-name="P12" loext:marker-style-name="T7"><text:span text:style-name="T8">Ficha de Registro del Plan de negocios o Propuestas Productivas </text:span><text:span text:style-name="T1">(ver formato N°12).</text:span></text:p>
          </text:list-item>
          <text:list-item>
            <text:p text:style-name="P12" loext:marker-style-name="T7"><text:span text:style-name="T8">Propuesta Productiva de acuerdo a los contenidos mínimos de una plan de negocios para la categoría A y B </text:span><text:span text:style-name="T1">(Ver formato N° 13).</text:span><text:span text:style-name="T8"> De preferencia con letra Arial Nº 12 (Tres ejemplares impresos con firma del presidente y formulador en todas las hojas, además de un CD con el contenido digital en Word y PDF y Excel).</text:span></text:p>
          </text:list-item>
        </text:list>
        <text:p text:style-name="P38" loext:marker-style-name="T7"><text:span text:style-name="T18">Atentamente,</text:span><text:span text:style-name="T18"/></text:p>
        <text:p text:style-name="P38" loext:marker-style-name="T7"><text:span text:style-name="T18"><text:s/>……………………………………………</text:span><text:span text:style-name="T18"/></text:p>
        <text:p text:style-name="P39" loext:marker-style-name="T7"><text:span text:style-name="T18"><text:s/>Firma y sello </text:span><text:span text:style-name="T18"/></text:p>
        <text:p text:style-name="P50" loext:marker-style-name="T2"/>
        <table:table table:name="Tabla1" table:style-name="Tabla1">
          <table:table-column table:style-name="Tabla1.A"/>
          <table:table-row table:style-name="Tabla1.1">
            <table:table-cell table:style-name="Tabla1.A1" office:value-type="string">
              <text:p text:style-name="P1" loext:marker-style-name="T7"><text:span text:style-name="T9"><text:s/></text:span><text:span text:style-name="T63">FORMATO N° 09 - SOLICITUD DE COFINANCIAMIENTO</text:span></text:p>
            </table:table-cell>
          </table:table-row>
        </table:table>
        <text:p text:style-name="P55" loext:marker-style-name="T8"/>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style-name="Tabla2.1">
            <table:table-cell table:style-name="Tabla2.A1" office:value-type="string">
              <text:p text:style-name="P70" loext:marker-style-name="T66"/>
            </table:table-cell>
            <table:table-cell table:style-name="Tabla2.A1" office:value-type="string">
              <text:p text:style-name="P46" loext:marker-style-name="T7"><text:span text:style-name="T69">Propuesta Productiva de Categoría (*</text:span><text:span text:style-name="T69"><text:note text:id="ftn1" text:note-class="footnote"><text:note-citation>1</text:note-citation><text:note-body><text:section text:style-name="Sect1" text:name="TextSection" text:protected="true"><text:section text:style-name="Sect1" text:name="Sección1" text:protected="true"><text:p text:style-name="P3"><text:s/><text:span text:style-name="T75">(*)La Propuesta Productiva de categoría "A": El porcentaje de cofinanciamiento no puede ser mayor a 80% de la inversión total y el número de integrantes de las AEO Personas Naturales o Jurídicas no debe ser menor a 25 socios. La Propuesta Productiva de categoría "B" su porcentaje de cofinanciamiento no puede ser mayor a 50% de la inversión total con un tope máximo de 300 mil soles.</text:span></text:p></text:section><text:p text:style-name="Footnote"/></text:section></text:note-body></text:note></text:span><text:span text:style-name="T69">)</text:span></text:p>
            </table:table-cell>
            <table:table-cell table:style-name="Tabla2.A1" office:value-type="string">
              <text:p text:style-name="P70" loext:marker-style-name="T66"/>
            </table:table-cell>
            <table:table-cell table:style-name="Tabla2.A1" office:value-type="string">
              <text:p text:style-name="P46" loext:marker-style-name="T7"><text:span text:style-name="T66">A</text:span><text:span text:style-name="T66"/></text:p>
            </table:table-cell>
            <table:table-cell table:style-name="Tabla2.A1" office:value-type="string">
              <text:p text:style-name="P70" loext:marker-style-name="T66"><draw:custom-shape text:anchor-type="char" draw:z-index="30" draw:name="1 Rectángulo" draw:style-name="gr6" draw:text-style-name="P82" svg:width="0.742cm" svg:height="0.477cm" svg:x="0.45cm" svg:y="0.02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row table:style-name="Tabla2.1">
            <table:table-cell table:style-name="Tabla2.A1" office:value-type="string">
              <text:p text:style-name="P71" loext:marker-style-name="T66"/>
            </table:table-cell>
            <table:table-cell table:style-name="Tabla2.A1" office:value-type="string">
              <text:p text:style-name="P71" loext:marker-style-name="T66"/>
            </table:table-cell>
            <table:table-cell table:style-name="Tabla2.A1" office:value-type="string">
              <text:p text:style-name="P71" loext:marker-style-name="T66"/>
            </table:table-cell>
            <table:table-cell table:style-name="Tabla2.A1" office:value-type="string">
              <text:p text:style-name="P46" loext:marker-style-name="T7"><text:span text:style-name="T66">B</text:span><text:span text:style-name="T66"/></text:p>
            </table:table-cell>
            <table:table-cell table:style-name="Tabla2.A1" office:value-type="string">
              <text:p text:style-name="P70" loext:marker-style-name="T66"><draw:custom-shape text:anchor-type="char" draw:z-index="31" draw:name="2 Rectángulo" draw:style-name="gr5" draw:text-style-name="P81" svg:width="0.906cm" svg:height="0.685cm" svg:x="0.425cm" svg:y="0.007cm"><text:p text:style-name="P6" loext:marker-style-name="T74"><text:span text:style-name="T74">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row table:style-name="Tabla2.1">
            <table:table-cell table:style-name="Tabla2.A1" office:value-type="string">
              <text:p text:style-name="P71" loext:marker-style-name="T66"/>
            </table:table-cell>
            <table:table-cell table:style-name="Tabla2.A1" office:value-type="string">
              <text:p text:style-name="P70" loext:marker-style-name="T66"/>
            </table:table-cell>
            <table:table-cell table:style-name="Tabla2.A1" office:value-type="string">
              <text:p text:style-name="P71" loext:marker-style-name="T66"/>
            </table:table-cell>
            <table:table-cell table:style-name="Tabla2.A1" office:value-type="string">
              <text:p text:style-name="P71" loext:marker-style-name="T66"/>
            </table:table-cell>
            <table:table-cell table:style-name="Tabla2.A1" office:value-type="string">
              <text:p text:style-name="P71" loext:marker-style-name="T66"/>
            </table:table-cell>
          </table:table-row>
          <table:table-row table:style-name="Tabla2.4">
            <table:table-cell table:style-name="Tabla2.A4" table:number-columns-spanned="5" office:value-type="string">
              <text:p text:style-name="P40" loext:marker-style-name="T7"><text:span text:style-name="T69">Mediante el presente </text:span><text:span text:style-name="T26">Asociación de Productores Lambrashuaycco de Casaorcco (Apal), </text:span><text:span text:style-name="T69">ubicado en el departamento de Ayacucho provincia de Huamanga distrito de Carmen Alto , presentamos la propuesta productiva denominada </text:span><text:span text:style-name="T25">“Mejoramiento de la Producción y Comercialización de Cuyes en la Asociación de Productores Lambrashuaycco de Casaorcco (Apal), Distrito de Carmen Alto, Provincia Huamanga, Región Ayacucho”;</text:span><text:span text:style-name="T69"> con la finalidad de participar en la convocatoria del concurso PROCOMPITE Regional Ayacucho 2020, I CONVOCATORIA, usando recursos del Fondo PROCOMPITE, aprobado por el Gobierno Regional de Ayacucho, en el marco de la Ley Nro. 29337, Ley que establece disposiciones para apoyar la competitividad productiva y su Reglamento.</text:span></text:p>
              <text:p text:style-name="P40" loext:marker-style-name="T7"><text:span text:style-name="T69">Asimismo, declaramos que nuestra propuesta productiva no recibe financiamiento o cofinanciamiento de otra entidad pública local, regional o nacional.</text:span><text:span text:style-name="T69"/></text:p>
              <text:p text:style-name="P40" loext:marker-style-name="T7"><text:span text:style-name="T69">El monto de inversión total de la propuesta productiva consignada en el plan de negocio asciende a S/. 157,481.22 Ciento cincuenta y siete mil cuatrocientos ochenta y uno con 00/ 22 soles y solicitamos el cofinanciamiento por un monto de S/. 121,603.61 ciento veintiún mil seiscientos tres con 00/61 soles ).</text:span><text:span text:style-name="T69"/></text:p>
              <text:p text:style-name="P72" loext:marker-style-name="T69"/>
            </table:table-cell>
            <table:covered-table-cell/>
            <table:covered-table-cell/>
            <table:covered-table-cell/>
            <table:covered-table-cell/>
          </table:table-row>
          <table:table-row table:style-name="Tabla2.5">
            <table:table-cell table:style-name="Tabla2.A1" office:value-type="string">
              <text:p text:style-name="P75" loext:marker-style-name="T69"/>
            </table:table-cell>
            <table:table-cell table:style-name="Tabla2.A1" office:value-type="string">
              <text:p text:style-name="P75" loext:marker-style-name="T69"/>
            </table:table-cell>
            <table:table-cell table:style-name="Tabla2.A1" office:value-type="string">
              <text:p text:style-name="P75" loext:marker-style-name="T69"/>
            </table:table-cell>
            <table:table-cell table:style-name="Tabla2.A1" office:value-type="string">
              <text:p text:style-name="P75" loext:marker-style-name="T69"/>
            </table:table-cell>
            <table:table-cell table:style-name="Tabla2.A1" office:value-type="string">
              <text:p text:style-name="P75" loext:marker-style-name="T69"/>
            </table:table-cell>
          </table:table-row>
          <table:table-row table:style-name="Tabla2.1">
            <table:table-cell table:style-name="Tabla2.A1" office:value-type="string">
              <text:p text:style-name="P75" loext:marker-style-name="T69"/>
            </table:table-cell>
            <table:table-cell table:style-name="Tabla2.A1" office:value-type="string">
              <text:p text:style-name="P75" loext:marker-style-name="T69"/>
            </table:table-cell>
            <table:table-cell table:style-name="Tabla2.A1" office:value-type="string">
              <text:p text:style-name="P75" loext:marker-style-name="T69"/>
            </table:table-cell>
            <table:table-cell table:style-name="Tabla2.A1" office:value-type="string">
              <text:p text:style-name="P75" loext:marker-style-name="T69"/>
            </table:table-cell>
            <table:table-cell table:style-name="Tabla2.A1" office:value-type="string">
              <text:p text:style-name="P75" loext:marker-style-name="T69"/>
            </table:table-cell>
          </table:table-row>
          <table:table-row table:style-name="Tabla2.5">
            <table:table-cell table:style-name="Tabla2.A1" office:value-type="string">
              <text:p text:style-name="P75" loext:marker-style-name="T69"/>
            </table:table-cell>
            <table:table-cell table:style-name="Tabla2.A1" office:value-type="string">
              <text:p text:style-name="P75" loext:marker-style-name="T69"/>
            </table:table-cell>
            <table:table-cell table:style-name="Tabla2.C7" office:value-type="string">
              <text:p text:style-name="P57" loext:marker-style-name="T7"/>
            </table:table-cell>
            <table:table-cell table:style-name="Tabla2.C7" office:value-type="string">
              <text:p text:style-name="P57" loext:marker-style-name="T7"/>
            </table:table-cell>
            <table:table-cell table:style-name="Tabla2.A1" office:value-type="string">
              <text:p text:style-name="P76" loext:marker-style-name="T69"/>
            </table:table-cell>
          </table:table-row>
          <table:table-row table:style-name="Tabla2.1">
            <table:table-cell table:style-name="Tabla2.A1" office:value-type="string">
              <text:p text:style-name="P75" loext:marker-style-name="T69"/>
            </table:table-cell>
            <table:table-cell table:style-name="Tabla2.A1" office:value-type="string">
              <text:p text:style-name="P75" loext:marker-style-name="T69"/>
            </table:table-cell>
            <table:table-cell table:style-name="Tabla2.A1" table:number-columns-spanned="2" office:value-type="string">
              <text:p text:style-name="P46" loext:marker-style-name="T7"><text:span text:style-name="T69"><text:s/>Presidente / Representante Legal</text:span><text:span text:style-name="T69"/></text:p>
            </table:table-cell>
            <table:covered-table-cell/>
            <table:table-cell table:style-name="Tabla2.A1" office:value-type="string">
              <text:p text:style-name="P76" loext:marker-style-name="T69"/>
            </table:table-cell>
          </table:table-row>
          <table:table-row table:style-name="Tabla2.1">
            <table:table-cell table:style-name="Tabla2.A1" office:value-type="string">
              <text:p text:style-name="P75" loext:marker-style-name="T69"/>
            </table:table-cell>
            <table:table-cell table:style-name="Tabla2.A1" office:value-type="string">
              <text:p text:style-name="P75" loext:marker-style-name="T69"/>
            </table:table-cell>
            <table:table-cell table:style-name="Tabla2.A1" office:value-type="string">
              <text:p text:style-name="P76" loext:marker-style-name="T69"/>
            </table:table-cell>
            <table:table-cell table:style-name="Tabla2.A1" office:value-type="string">
              <text:p text:style-name="P76" loext:marker-style-name="T69"/>
            </table:table-cell>
            <table:table-cell table:style-name="Tabla2.A1" office:value-type="string">
              <text:p text:style-name="P76" loext:marker-style-name="T69"/>
            </table:table-cell>
          </table:table-row>
          <table:table-row table:style-name="Tabla2.1">
            <table:table-cell table:style-name="Tabla2.A1" office:value-type="string">
              <text:p text:style-name="P75" loext:marker-style-name="T69"/>
            </table:table-cell>
            <table:table-cell table:style-name="Tabla2.A1" office:value-type="string">
              <text:p text:style-name="P75" loext:marker-style-name="T69"/>
            </table:table-cell>
            <table:table-cell table:style-name="Tabla2.A1" office:value-type="string">
              <text:p text:style-name="P36" loext:marker-style-name="T7"><text:span text:style-name="T69">Lugar y Fecha:</text:span><text:span text:style-name="T69"/></text:p>
            </table:table-cell>
            <table:table-cell table:style-name="Tabla2.A1" office:value-type="string">
              <text:p text:style-name="P46" loext:marker-style-name="T7"><text:span text:style-name="T69">Carmen Alto 9 de setiembre 2020</text:span><text:span text:style-name="T69"/></text:p>
            </table:table-cell>
            <table:table-cell table:style-name="Tabla2.A1" office:value-type="string">
              <text:p text:style-name="P57" loext:marker-style-name="T7"/>
            </table:table-cell>
          </table:table-row>
          <table:table-row table:style-name="Tabla2.1">
            <table:table-cell table:style-name="Tabla2.A1" office:value-type="string">
              <text:p text:style-name="P75" loext:marker-style-name="T69"/>
            </table:table-cell>
            <table:table-cell table:style-name="Tabla2.B11" office:value-type="string">
              <text:p text:style-name="P58" loext:marker-style-name="T7"/>
            </table:table-cell>
            <table:table-cell table:style-name="Tabla2.C11" office:value-type="string">
              <text:p text:style-name="P58" loext:marker-style-name="T7"/>
            </table:table-cell>
            <table:table-cell table:style-name="Tabla2.D11" office:value-type="string">
              <text:p text:style-name="P58" loext:marker-style-name="T7"/>
            </table:table-cell>
            <table:table-cell table:style-name="Tabla2.E11" office:value-type="string">
              <text:p text:style-name="P58" loext:marker-style-name="T7"/>
            </table:table-cell>
          </table:table-row>
          <table:table-row table:style-name="Tabla2.1">
            <table:table-cell table:style-name="Tabla2.A1" office:value-type="string">
              <text:p text:style-name="P75" loext:marker-style-name="T69"/>
            </table:table-cell>
            <table:table-cell table:style-name="Tabla2.B12" office:value-type="string">
              <text:p text:style-name="P58" loext:marker-style-name="T7"/>
            </table:table-cell>
            <table:table-cell table:style-name="Tabla2.C12" office:value-type="string">
              <text:p text:style-name="P58" loext:marker-style-name="T7"/>
            </table:table-cell>
            <table:table-cell table:style-name="Tabla2.D12" office:value-type="string">
              <text:p text:style-name="P58" loext:marker-style-name="T7"/>
            </table:table-cell>
            <table:table-cell table:style-name="Tabla2.E12" office:value-type="string">
              <text:p text:style-name="P58" loext:marker-style-name="T7"/>
            </table:table-cell>
          </table:table-row>
        </table:table>
      </text:section>
      <text:section text:style-name="Sect1" text:name="Sección3">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row table:style-name="Tabla6.1">
            <table:table-cell table:style-name="Tabla6.A1" table:number-columns-spanned="7" office:value-type="string">
              <table:table table:name="Tabla3" table:style-name="Tabla3">
                <table:table-column table:style-name="Tabla3.A"/>
                <table:table-row table:style-name="Tabla3.1">
                  <table:table-cell table:style-name="Tabla3.A1" office:value-type="string">
                    <text:p text:style-name="P1" loext:marker-style-name="T7"><text:span text:style-name="T63">FORMATO N° 10 - DECLARACIÓN JURADA DE COFINANCIAMIENTO</text:span><text:span text:style-name="T63"/></text:p>
                  </table:table-cell>
                </table:table-row>
              </table:table>
              <text:p text:style-name="P32" loext:marker-style-name="T7"><text:span text:style-name="T1">DECLARACIÓN JURADA</text:span><text:span text:style-name="T1"/></text:p>
              <table:table table:name="Tabla4" table:style-name="Tabla4">
                <table:table-column table:style-name="Tabla4.A"/>
                <table:table-column table:style-name="Tabla4.B"/>
                <table:table-column table:style-name="Tabla4.C"/>
                <table:table-row table:style-name="Tabla4.1">
                  <table:table-cell table:style-name="Tabla4.A1" table:number-rows-spanned="2" office:value-type="string">
                    <text:p text:style-name="P41" loext:marker-style-name="T7"><text:span text:style-name="T8">Propuesta Productiva</text:span><text:span text:style-name="T8"/></text:p>
                  </table:table-cell>
                  <table:table-cell table:style-name="Tabla4.B1" office:value-type="string">
                    <text:p text:style-name="P41" loext:marker-style-name="T7"><text:span text:style-name="T8">Categoría “A”</text:span><text:span text:style-name="T8"/></text:p>
                  </table:table-cell>
                  <table:table-cell table:style-name="Tabla4.B1" office:value-type="string">
                    <text:p text:style-name="P41" loext:marker-style-name="T7"><text:span text:style-name="T8">X</text:span><text:span text:style-name="T8"/></text:p>
                  </table:table-cell>
                </table:table-row>
                <table:table-row table:style-name="Tabla4.2">
                  <table:covered-table-cell table:style-name="Tabla4.A1"/>
                  <table:table-cell table:style-name="Tabla4.B1" office:value-type="string">
                    <text:p text:style-name="P41" loext:marker-style-name="T7"><text:span text:style-name="T8">Categoría “B”</text:span><text:span text:style-name="T8"/></text:p>
                  </table:table-cell>
                  <table:table-cell table:style-name="Tabla4.B1" office:value-type="string">
                    <text:p text:style-name="P56" loext:marker-style-name="T8"/>
                  </table:table-cell>
                </table:table-row>
              </table:table>
              <text:p text:style-name="P42" loext:marker-style-name="T7"><text:span text:style-name="T69">Mediante la presente el que suscribe </text:span><text:span text:style-name="T26">Asociación de Productores Lambrashuaycco de Casaorcco (Apal), </text:span><text:span text:style-name="T69">debidamente representado por su Presidente de concejo directivo señor David Cancho Asto, identificado con DNI Nro. 41729934 y con domicilio en Casaorcco ubicado en el departamento de Ayacucho provincia de Huamanga , distrito de Carmen Alto , declaro bajo juramento:</text:span></text:p>
              <text:list text:style-name="WWNum4">
                <text:list-item>
                  <text:p text:style-name="P13" loext:marker-style-name="T7"><text:span text:style-name="T69">Conocer las condiciones de bajo las cuales nuestro AEO participa en la convocatoria del concurso PROCOMPITE Regional Ayacucho 2020, I Convocatoria, usando recursos del Fondo PROCOMPITE, aprobado por el Gobierno Regional Ayacucho en el marco de la Ley Nro. 29337.</text:span><text:span text:style-name="T69"/></text:p>
                </text:list-item>
                <text:list-item>
                  <text:p text:style-name="P13" loext:marker-style-name="T7"><text:span text:style-name="T69">Nuestra propuesta productiva denominada </text:span><text:span text:style-name="T25">“Mejoramiento de la Producción y Comercialización de Cuyes en la Asociación de Productores Lambrashuaycco de Casaorcco (Apal), Distrito de Carmen Alto, Provincia Huamanga, Región Ayacucho”;</text:span><text:span text:style-name="T69"> implica una inversión total de S/. 157,481.22 Ciento cincuenta y siete mil cuatrocientos ochenta y uno con 00/ 22 soles y solicitamos el cofinanciamiento por un monto de S/. 121,603.61 ciento veintiún mil seiscientos tres con 00/61 soles ) (Especificar monto en números y letras) según cuadro.</text:span></text:p>
                </text:list-item>
                <text:list-item>
                  <text:p text:style-name="P13" loext:marker-style-name="T7"><text:span text:style-name="T69">Que nos comprometemos a, que de existir incremento del costo de bienes, maquinaria y equipo al momento de realizar la adquisición, la diferencia será asumida por el AEO.</text:span><text:span text:style-name="T69"/></text:p>
                </text:list-item>
                <text:list-item>
                  <text:p text:style-name="P13" loext:marker-style-name="T7"><text:span text:style-name="T69">Que nos comprometemos a contribuir con el financiamiento del saldo que asciende a S/. 35,877.61 treinta y cinco mil ochocientos setenta y siete con 00/ 61 soles el cual se aportará de la siguiente manera:</text:span><text:span text:style-name="T69"/></text:p>
                  <text:list>
                    <text:list-item>
                      <text:p text:style-name="P14" loext:marker-style-name="T7"><text:span text:style-name="T69">Financiamiento en aporte valorizado S/. 30,877.61 treinta mil ochocientos setenta y siete con 00/61 soles</text:span><text:span text:style-name="T69"/></text:p>
                    </text:list-item>
                    <text:list-item>
                      <text:p text:style-name="P14" loext:marker-style-name="T7"><text:span text:style-name="T69">Financiamiento en efectivo S/. 5,000.00 cinco mil 00/00 soles , el cual se depositará en una cuenta bancaria de ser declarados ganadores del concurso y se comprobará en el momento de la firma del convenio, no pudiendo ser menor al 10% del monto total del aporte del AEO.</text:span><text:span text:style-name="T69"/></text:p>
                    </text:list-item>
                  </text:list>
                </text:list-item>
              </text:list>
              <text:p text:style-name="P42" loext:marker-style-name="T7"><text:span text:style-name="T69">Asimismo, declaramos que nuestra propuesta productiva no recibe financiamiento o cofinanciamiento de otra entidad pública local, regional o nacional.</text:span><text:span text:style-name="T69"/></text:p>
              <text:p text:style-name="P42" loext:marker-style-name="T7"><text:span text:style-name="T69">Ayacucho, 9 de setiembre del 2020.</text:span><text:span text:style-name="T69"/></text:p>
              <text:p text:style-name="P73" loext:marker-style-name="T69"/>
              <table:table table:name="Tabla5" table:style-name="Tabla5">
                <table:table-column table:style-name="Tabla5.A"/>
                <table:table-row table:style-name="Tabla5.1">
                  <table:table-cell table:style-name="Tabla5.A1" office:value-type="string">
                    <text:p text:style-name="P43" loext:marker-style-name="T7"><text:span text:style-name="T11">Firma del Presidente de la Asociación.</text:span><text:span text:style-name="T11"/></text:p>
                  </table:table-cell>
                </table:table-row>
                <table:table-row table:style-name="Tabla5.1">
                  <table:table-cell table:style-name="Tabla5.A2" office:value-type="string">
                    <text:p text:style-name="P64" loext:marker-style-name="T11"/>
                  </table:table-cell>
                </table:table-row>
              </table:table>
              <text:p text:style-name="P33" loext:marker-style-name="T7"><text:span text:style-name="T1">FORMATO 11</text:span><text:span text:style-name="T1"/></text:p>
              <text:p text:style-name="P31" loext:marker-style-name="T7"><text:span text:style-name="T1">(Sirve para ambas categorías “A” y “B”)</text:span><text:span text:style-name="T1"/></text:p>
              <text:p text:style-name="P31" loext:marker-style-name="T7"><text:span text:style-name="T1">LISTA DE PARTICIPANTES DEL PLAN DE NEGOCIOS (Debe coincidir con los beneficiarios de los requisitos mínimos)</text:span><text:span text:style-name="T1"/></text:p>
              <text:p text:style-name="P31" loext:marker-style-name="T7"><text:span text:style-name="T1">(</text:span><text:span text:style-name="T8">Presentar impreso y en Excel)</text:span></text:p>
              <text:p text:style-name="P46" loext:marker-style-name="T7"><text:span text:style-name="T1">Nombre del AEO: </text:span><text:span text:style-name="T26">Asociación de Productores Lambrashuaycco de Casaorcco (Apal)</text:span></text:p>
              <text:p text:style-name="P46" loext:marker-style-name="T7"><text:span text:style-name="T1">Dirección del AEO: Casaorcco</text:span><text:span text:style-name="T1"/></text:p>
              <text:p text:style-name="P46" loext:marker-style-name="T7"><text:span text:style-name="T1">Nombre del representante: David Cancho Asto</text:span><text:span text:style-name="T1"/></text:p>
              <text:p text:style-name="P46" loext:marker-style-name="T7"><text:span text:style-name="T1">Teléfono: 966204928 Correo Electrónico:</text:span><text:span text:style-name="T1"/></text:p>
              <text:p text:style-name="P65" loext:marker-style-name="T11"/>
            </table:table-cell>
            <table:covered-table-cell/>
            <table:covered-table-cell/>
            <table:covered-table-cell/>
            <table:covered-table-cell/>
            <table:covered-table-cell/>
            <table:covered-table-cell/>
            <table:table-cell table:style-name="Tabla6.H1" office:value-type="string">
              <text:p text:style-name="P58" loext:marker-style-name="T7"/>
            </table:table-cell>
          </table:table-row>
          <table:table-row table:style-name="Tabla6.2">
            <table:table-cell table:style-name="Tabla6.A2" office:value-type="string">
              <text:p text:style-name="P59" loext:marker-style-name="T7"/>
            </table:table-cell>
            <table:table-cell table:style-name="Tabla6.B2" office:value-type="string">
              <text:p text:style-name="P31" loext:marker-style-name="T7"><text:span text:style-name="T68">N°</text:span><text:span text:style-name="T68"/></text:p>
            </table:table-cell>
            <table:table-cell table:style-name="Tabla6.C2" office:value-type="string">
              <text:p text:style-name="P31" loext:marker-style-name="T7"><text:span text:style-name="T68">Nombres y Apellidos</text:span><text:span text:style-name="T68"/></text:p>
            </table:table-cell>
            <table:table-cell table:style-name="Tabla6.C2" office:value-type="string">
              <text:p text:style-name="P31" loext:marker-style-name="T7"><text:span text:style-name="T68">DNI</text:span><text:span text:style-name="T68"/></text:p>
            </table:table-cell>
            <table:table-cell table:style-name="Tabla6.C2" office:value-type="string">
              <text:p text:style-name="P31" loext:marker-style-name="T7"><text:span text:style-name="T68">Teléfono</text:span><text:span text:style-name="T68"/></text:p>
            </table:table-cell>
            <table:table-cell table:style-name="Tabla6.C2" office:value-type="string">
              <text:p text:style-name="P31" loext:marker-style-name="T7"><text:span text:style-name="T68"><text:s/>Dirección</text:span><text:span text:style-name="T68"/></text:p>
            </table:table-cell>
            <table:table-cell table:style-name="Tabla6.C2" table:number-columns-spanned="2" office:value-type="string">
              <text:p text:style-name="P31" loext:marker-style-name="T7"><text:span text:style-name="T68">Cargo dentro del AEO</text:span><text:span text:style-name="T68"/></text:p>
            </table:table-cell>
            <table:covered-table-cell/>
          </table:table-row>
          <table:table-row table:style-name="Tabla6.3">
            <table:table-cell table:style-name="Tabla6.A3" office:value-type="string">
              <text:p text:style-name="P60" loext:marker-style-name="T7"/>
            </table:table-cell>
            <table:table-cell table:style-name="Tabla6.B3" office:value-type="string">
              <text:p text:style-name="P40" loext:marker-style-name="T7"><text:span text:style-name="T71">1</text:span><text:span text:style-name="T71"/></text:p>
            </table:table-cell>
            <table:table-cell table:style-name="Tabla6.C3" office:value-type="string">
              <text:p text:style-name="P40" loext:marker-style-name="T7"><text:span text:style-name="T77">DAVID CANCHO ASTO</text:span><text:span text:style-name="T77"/></text:p>
            </table:table-cell>
            <table:table-cell table:style-name="Tabla6.C3" office:value-type="string">
              <text:p text:style-name="P40" loext:marker-style-name="T7"><text:span text:style-name="T77">41729934</text:span><text:span text:style-name="T77"/></text:p>
            </table:table-cell>
            <table:table-cell table:style-name="Tabla6.C3" office:value-type="string">
              <text:p text:style-name="P40" loext:marker-style-name="T7"><text:span text:style-name="T77">966204928</text:span><text:span text:style-name="T77"/></text:p>
            </table:table-cell>
            <table:table-cell table:style-name="Tabla6.C3" office:value-type="string">
              <text:p text:style-name="P40" loext:marker-style-name="T7"><text:span text:style-name="T77">Casaorcco</text:span><text:span text:style-name="T77"/></text:p>
            </table:table-cell>
            <table:table-cell table:style-name="Tabla6.C3" table:number-columns-spanned="2" office:value-type="string">
              <text:p text:style-name="P31" loext:marker-style-name="T7"><text:span text:style-name="T77">Presidente</text:span><text:span text:style-name="T77"/></text:p>
            </table:table-cell>
            <table:covered-table-cell/>
          </table:table-row>
          <table:table-row table:style-name="Tabla6.3">
            <table:table-cell table:style-name="Tabla6.A4" office:value-type="string">
              <text:p text:style-name="P60" loext:marker-style-name="T7"/>
            </table:table-cell>
            <table:table-cell table:style-name="Tabla6.B3" office:value-type="string">
              <text:p text:style-name="P40" loext:marker-style-name="T7"><text:span text:style-name="T71">2</text:span><text:span text:style-name="T71"/></text:p>
            </table:table-cell>
            <table:table-cell table:style-name="Tabla6.C3" office:value-type="string">
              <text:p text:style-name="P40" loext:marker-style-name="T7"><text:span text:style-name="T77">ABELINO ANDRÉS ARONES HUAMANÍ</text:span><text:span text:style-name="T77"/></text:p>
            </table:table-cell>
            <table:table-cell table:style-name="Tabla6.C3" office:value-type="string">
              <text:p text:style-name="P40" loext:marker-style-name="T7"><text:span text:style-name="T77">28271514</text:span><text:span text:style-name="T77"/></text:p>
            </table:table-cell>
            <table:table-cell table:style-name="Tabla6.C3" office:value-type="string">
              <text:p text:style-name="P40" loext:marker-style-name="T7"><text:span text:style-name="T77">943311625</text:span><text:span text:style-name="T77"/></text:p>
            </table:table-cell>
            <table:table-cell table:style-name="Tabla6.C3" office:value-type="string">
              <text:p text:style-name="P40" loext:marker-style-name="T7"><text:span text:style-name="T77">Casaorcco</text:span><text:span text:style-name="T77"/></text:p>
            </table:table-cell>
            <table:table-cell table:style-name="Tabla6.C3" table:number-columns-spanned="2" office:value-type="string">
              <text:p text:style-name="P31" loext:marker-style-name="T7"><text:span text:style-name="T77">Vicepresidente</text:span><text:span text:style-name="T77"/></text:p>
            </table:table-cell>
            <table:covered-table-cell/>
          </table:table-row>
          <table:table-row table:style-name="Tabla6.3">
            <table:table-cell table:style-name="Tabla6.A5" office:value-type="string">
              <text:p text:style-name="P60" loext:marker-style-name="T7"/>
            </table:table-cell>
            <table:table-cell table:style-name="Tabla6.B3" office:value-type="string">
              <text:p text:style-name="P40" loext:marker-style-name="T7"><text:span text:style-name="T71">3</text:span><text:span text:style-name="T71"/></text:p>
            </table:table-cell>
            <table:table-cell table:style-name="Tabla6.C3" office:value-type="string">
              <text:p text:style-name="P40" loext:marker-style-name="T7"><text:span text:style-name="T77">EDISON RETAMOZO HUAMANÍ</text:span><text:span text:style-name="T77"/></text:p>
            </table:table-cell>
            <table:table-cell table:style-name="Tabla6.C3" office:value-type="string">
              <text:p text:style-name="P40" loext:marker-style-name="T7"><text:span text:style-name="T77">74530699</text:span><text:span text:style-name="T77"/></text:p>
            </table:table-cell>
            <table:table-cell table:style-name="Tabla6.C3" office:value-type="string">
              <text:p text:style-name="P40" loext:marker-style-name="T7"><text:span text:style-name="T77">976355447</text:span><text:span text:style-name="T77"/></text:p>
            </table:table-cell>
            <table:table-cell table:style-name="Tabla6.C3" office:value-type="string">
              <text:p text:style-name="P40" loext:marker-style-name="T7"><text:span text:style-name="T77">Casaorcco</text:span><text:span text:style-name="T77"/></text:p>
            </table:table-cell>
            <table:table-cell table:style-name="Tabla6.C3" table:number-columns-spanned="2" office:value-type="string">
              <text:p text:style-name="P31" loext:marker-style-name="T7"><text:span text:style-name="T77">Joven</text:span><text:span text:style-name="T77"/></text:p>
            </table:table-cell>
            <table:covered-table-cell/>
          </table:table-row>
          <table:table-row table:style-name="Tabla6.3">
            <table:table-cell table:style-name="Tabla6.A6" office:value-type="string">
              <text:p text:style-name="P60" loext:marker-style-name="T7"/>
            </table:table-cell>
            <table:table-cell table:style-name="Tabla6.B3" office:value-type="string">
              <text:p text:style-name="P40" loext:marker-style-name="T7"><text:span text:style-name="T71">4</text:span><text:span text:style-name="T71"/></text:p>
            </table:table-cell>
            <table:table-cell table:style-name="Tabla6.C3" office:value-type="string">
              <text:p text:style-name="P40" loext:marker-style-name="T7"><text:span text:style-name="T77">MAURO ASTO ARANGO</text:span><text:span text:style-name="T77"/></text:p>
            </table:table-cell>
            <table:table-cell table:style-name="Tabla6.C3" office:value-type="string">
              <text:p text:style-name="P40" loext:marker-style-name="T7"><text:span text:style-name="T77">43870411</text:span><text:span text:style-name="T77"/></text:p>
            </table:table-cell>
            <table:table-cell table:style-name="Tabla6.C3" office:value-type="string">
              <text:p text:style-name="P40" loext:marker-style-name="T7"><text:span text:style-name="T77">947867766</text:span><text:span text:style-name="T77"/></text:p>
            </table:table-cell>
            <table:table-cell table:style-name="Tabla6.C3" office:value-type="string">
              <text:p text:style-name="P40" loext:marker-style-name="T7"><text:span text:style-name="T77">Casaorcco</text:span><text:span text:style-name="T77"/></text:p>
            </table:table-cell>
            <table:table-cell table:style-name="Tabla6.C3" table:number-columns-spanned="2" office:value-type="string">
              <text:p text:style-name="P31" loext:marker-style-name="T7"><text:span text:style-name="T77">Tesorero</text:span><text:span text:style-name="T77"/></text:p>
            </table:table-cell>
            <table:covered-table-cell/>
          </table:table-row>
          <table:table-row table:style-name="Tabla6.3">
            <table:table-cell table:style-name="Tabla6.A7" office:value-type="string">
              <text:p text:style-name="P60" loext:marker-style-name="T7"/>
            </table:table-cell>
            <table:table-cell table:style-name="Tabla6.B3" office:value-type="string">
              <text:p text:style-name="P40" loext:marker-style-name="T7"><text:span text:style-name="T71">5</text:span><text:span text:style-name="T71"/></text:p>
            </table:table-cell>
            <table:table-cell table:style-name="Tabla6.C3" office:value-type="string">
              <text:p text:style-name="P40" loext:marker-style-name="T7"><text:span text:style-name="T77">ROXANA RAMÍREZ MARTÍNEZ</text:span><text:span text:style-name="T77"/></text:p>
            </table:table-cell>
            <table:table-cell table:style-name="Tabla6.C3" office:value-type="string">
              <text:p text:style-name="P40" loext:marker-style-name="T7"><text:span text:style-name="T77">41112349</text:span><text:span text:style-name="T77"/></text:p>
            </table:table-cell>
            <table:table-cell table:style-name="Tabla6.C3" office:value-type="string">
              <text:p text:style-name="P40" loext:marker-style-name="T7"><text:span text:style-name="T77">999881569</text:span><text:span text:style-name="T77"/></text:p>
            </table:table-cell>
            <table:table-cell table:style-name="Tabla6.C3" office:value-type="string">
              <text:p text:style-name="P40" loext:marker-style-name="T7"><text:span text:style-name="T77">Casaorcco</text:span><text:span text:style-name="T77"/></text:p>
            </table:table-cell>
            <table:table-cell table:style-name="Tabla6.C3" table:number-columns-spanned="2" office:value-type="string">
              <text:p text:style-name="P31" loext:marker-style-name="T7"><text:span text:style-name="T77">Fiscal</text:span><text:span text:style-name="T77"/></text:p>
            </table:table-cell>
            <table:covered-table-cell/>
          </table:table-row>
          <table:table-row table:style-name="Tabla6.3">
            <table:table-cell table:style-name="Tabla6.A8" office:value-type="string">
              <text:p text:style-name="P60" loext:marker-style-name="T7"/>
            </table:table-cell>
            <table:table-cell table:style-name="Tabla6.B3" office:value-type="string">
              <text:p text:style-name="P40" loext:marker-style-name="T7"><text:span text:style-name="T71">6</text:span><text:span text:style-name="T71"/></text:p>
            </table:table-cell>
            <table:table-cell table:style-name="Tabla6.C3" office:value-type="string">
              <text:p text:style-name="P40" loext:marker-style-name="T7"><text:span text:style-name="T77">HILARIO HUAMANÍ ASTO</text:span><text:span text:style-name="T77"/></text:p>
            </table:table-cell>
            <table:table-cell table:style-name="Tabla6.C3" office:value-type="string">
              <text:p text:style-name="P40" loext:marker-style-name="T7"><text:span text:style-name="T77">28235001</text:span><text:span text:style-name="T77"/></text:p>
            </table:table-cell>
            <table:table-cell table:style-name="Tabla6.C3" office:value-type="string">
              <text:p text:style-name="P40" loext:marker-style-name="T7"><text:span text:style-name="T77">944438472</text:span><text:span text:style-name="T77"/></text:p>
            </table:table-cell>
            <table:table-cell table:style-name="Tabla6.C3" office:value-type="string">
              <text:p text:style-name="P40" loext:marker-style-name="T7"><text:span text:style-name="T77">Casaorcco</text:span><text:span text:style-name="T77"/></text:p>
            </table:table-cell>
            <table:table-cell table:style-name="Tabla6.C3" table:number-columns-spanned="2" office:value-type="string">
              <text:p text:style-name="P31" loext:marker-style-name="T7"><text:span text:style-name="T77">Vocal</text:span><text:span text:style-name="T77"/></text:p>
            </table:table-cell>
            <table:covered-table-cell/>
          </table:table-row>
          <table:table-row table:style-name="Tabla6.3">
            <table:table-cell table:style-name="Tabla6.A9" office:value-type="string">
              <text:p text:style-name="P60" loext:marker-style-name="T7"/>
            </table:table-cell>
            <table:table-cell table:style-name="Tabla6.B3" office:value-type="string">
              <text:p text:style-name="P40" loext:marker-style-name="T7"><text:span text:style-name="T71">7</text:span><text:span text:style-name="T71"/></text:p>
            </table:table-cell>
            <table:table-cell table:style-name="Tabla6.C3" office:value-type="string">
              <text:p text:style-name="P40" loext:marker-style-name="T7"><text:span text:style-name="T77">YELITZA KINVERLY ARONES CANCHO</text:span><text:span text:style-name="T77"/></text:p>
            </table:table-cell>
            <table:table-cell table:style-name="Tabla6.C3" office:value-type="string">
              <text:p text:style-name="P40" loext:marker-style-name="T7"><text:span text:style-name="T77">70170954</text:span><text:span text:style-name="T77"/></text:p>
            </table:table-cell>
            <table:table-cell table:style-name="Tabla6.C3" office:value-type="string">
              <text:p text:style-name="P40" loext:marker-style-name="T7"><text:span text:style-name="T77">976148614</text:span><text:span text:style-name="T77"/></text:p>
            </table:table-cell>
            <table:table-cell table:style-name="Tabla6.C3" office:value-type="string">
              <text:p text:style-name="P40" loext:marker-style-name="T7"><text:span text:style-name="T77">Casaorcco</text:span><text:span text:style-name="T77"/></text:p>
            </table:table-cell>
            <table:table-cell table:style-name="Tabla6.C3" table:number-columns-spanned="2" office:value-type="string">
              <text:p text:style-name="P31" loext:marker-style-name="T7"><text:span text:style-name="T77">Joven</text:span><text:span text:style-name="T77"/></text:p>
            </table:table-cell>
            <table:covered-table-cell/>
          </table:table-row>
          <table:table-row table:style-name="Tabla6.3">
            <table:table-cell table:style-name="Tabla6.A10" office:value-type="string">
              <text:p text:style-name="P60" loext:marker-style-name="T7"/>
            </table:table-cell>
            <table:table-cell table:style-name="Tabla6.B3" office:value-type="string">
              <text:p text:style-name="P40" loext:marker-style-name="T7"><text:span text:style-name="T71">8</text:span><text:span text:style-name="T71"/></text:p>
            </table:table-cell>
            <table:table-cell table:style-name="Tabla6.C3" office:value-type="string">
              <text:p text:style-name="P40" loext:marker-style-name="T7"><text:span text:style-name="T77">SERGIO ALEX SALVADOR MÉNDEZ</text:span><text:span text:style-name="T77"/></text:p>
            </table:table-cell>
            <table:table-cell table:style-name="Tabla6.C3" office:value-type="string">
              <text:p text:style-name="P40" loext:marker-style-name="T7"><text:span text:style-name="T77">73574928</text:span><text:span text:style-name="T77"/></text:p>
            </table:table-cell>
            <table:table-cell table:style-name="Tabla6.C3" office:value-type="string">
              <text:p text:style-name="P60" loext:marker-style-name="T7"/>
            </table:table-cell>
            <table:table-cell table:style-name="Tabla6.C3" office:value-type="string">
              <text:p text:style-name="P40" loext:marker-style-name="T7"><text:span text:style-name="T77">Casaorcco</text:span><text:span text:style-name="T77"/></text:p>
            </table:table-cell>
            <table:table-cell table:style-name="Tabla6.C3" table:number-columns-spanned="2" office:value-type="string">
              <text:p text:style-name="P31" loext:marker-style-name="T7"><text:span text:style-name="T77">Joven</text:span><text:span text:style-name="T77"/></text:p>
            </table:table-cell>
            <table:covered-table-cell/>
          </table:table-row>
          <table:table-row table:style-name="Tabla6.3">
            <table:table-cell table:style-name="Tabla6.A11" office:value-type="string">
              <text:p text:style-name="P60" loext:marker-style-name="T7"/>
            </table:table-cell>
            <table:table-cell table:style-name="Tabla6.B3" office:value-type="string">
              <text:p text:style-name="P40" loext:marker-style-name="T7"><text:span text:style-name="T71">9</text:span><text:span text:style-name="T71"/></text:p>
            </table:table-cell>
            <table:table-cell table:style-name="Tabla6.C3" office:value-type="string">
              <text:p text:style-name="P40" loext:marker-style-name="T7"><text:span text:style-name="T77">VICTORIANO CANCHARI ARONI</text:span><text:span text:style-name="T77"/></text:p>
            </table:table-cell>
            <table:table-cell table:style-name="Tabla6.C3" office:value-type="string">
              <text:p text:style-name="P40" loext:marker-style-name="T7"><text:span text:style-name="T77">28234451</text:span><text:span text:style-name="T77"/></text:p>
            </table:table-cell>
            <table:table-cell table:style-name="Tabla6.C3" office:value-type="string">
              <text:p text:style-name="P40" loext:marker-style-name="T7"><text:span text:style-name="T77">914098398</text:span><text:span text:style-name="T77"/></text:p>
            </table:table-cell>
            <table:table-cell table:style-name="Tabla6.C3" office:value-type="string">
              <text:p text:style-name="P40" loext:marker-style-name="T7"><text:span text:style-name="T77">Casaorcco</text:span><text:span text:style-name="T77"/></text:p>
            </table:table-cell>
            <table:table-cell table:style-name="Tabla6.C3" table:number-columns-spanned="2" office:value-type="string">
              <text:p text:style-name="P31" loext:marker-style-name="T7"><text:span text:style-name="T77">Socio</text:span><text:span text:style-name="T77"/></text:p>
            </table:table-cell>
            <table:covered-table-cell/>
          </table:table-row>
          <table:table-row table:style-name="Tabla6.3">
            <table:table-cell table:style-name="Tabla6.A12" office:value-type="string">
              <text:p text:style-name="P60" loext:marker-style-name="T7"/>
            </table:table-cell>
            <table:table-cell table:style-name="Tabla6.B3" office:value-type="string">
              <text:p text:style-name="P40" loext:marker-style-name="T7"><text:span text:style-name="T71">10</text:span><text:span text:style-name="T71"/></text:p>
            </table:table-cell>
            <table:table-cell table:style-name="Tabla6.C3" office:value-type="string">
              <text:p text:style-name="P40" loext:marker-style-name="T7"><text:span text:style-name="T77">CARLOS CANCHARI ESPINOZA</text:span><text:span text:style-name="T77"/></text:p>
            </table:table-cell>
            <table:table-cell table:style-name="Tabla6.C3" office:value-type="string">
              <text:p text:style-name="P40" loext:marker-style-name="T7"><text:span text:style-name="T77">77685163</text:span><text:span text:style-name="T77"/></text:p>
            </table:table-cell>
            <table:table-cell table:style-name="Tabla6.C3" office:value-type="string">
              <text:p text:style-name="P60" loext:marker-style-name="T7"/>
            </table:table-cell>
            <table:table-cell table:style-name="Tabla6.C3" office:value-type="string">
              <text:p text:style-name="P40" loext:marker-style-name="T7"><text:span text:style-name="T77">Casaorcco</text:span><text:span text:style-name="T77"/></text:p>
            </table:table-cell>
            <table:table-cell table:style-name="Tabla6.C3" table:number-columns-spanned="2" office:value-type="string">
              <text:p text:style-name="P31" loext:marker-style-name="T7"><text:span text:style-name="T77">Joven</text:span><text:span text:style-name="T77"/></text:p>
            </table:table-cell>
            <table:covered-table-cell/>
          </table:table-row>
          <table:table-row table:style-name="Tabla6.3">
            <table:table-cell table:style-name="Tabla6.A13" office:value-type="string">
              <text:p text:style-name="P60" loext:marker-style-name="T7"/>
            </table:table-cell>
            <table:table-cell table:style-name="Tabla6.B3" office:value-type="string">
              <text:p text:style-name="P40" loext:marker-style-name="T7"><text:span text:style-name="T71">11</text:span><text:span text:style-name="T71"/></text:p>
            </table:table-cell>
            <table:table-cell table:style-name="Tabla6.C3" office:value-type="string">
              <text:p text:style-name="P40" loext:marker-style-name="T7"><text:span text:style-name="T77">ANA MARÍA GUTIÉRREZ HUAYHUA</text:span><text:span text:style-name="T77"/></text:p>
            </table:table-cell>
            <table:table-cell table:style-name="Tabla6.C3" office:value-type="string">
              <text:p text:style-name="P40" loext:marker-style-name="T7"><text:span text:style-name="T77">28292672</text:span><text:span text:style-name="T77"/></text:p>
            </table:table-cell>
            <table:table-cell table:style-name="Tabla6.C3" office:value-type="string">
              <text:p text:style-name="P40" loext:marker-style-name="T7"><text:span text:style-name="T77">94991972</text:span><text:span text:style-name="T77"/></text:p>
            </table:table-cell>
            <table:table-cell table:style-name="Tabla6.C3" office:value-type="string">
              <text:p text:style-name="P40" loext:marker-style-name="T7"><text:span text:style-name="T77">Casaorcco</text:span><text:span text:style-name="T77"/></text:p>
            </table:table-cell>
            <table:table-cell table:style-name="Tabla6.C3" table:number-columns-spanned="2" office:value-type="string">
              <text:p text:style-name="P31" loext:marker-style-name="T7"><text:span text:style-name="T77">Socia</text:span><text:span text:style-name="T77"/></text:p>
            </table:table-cell>
            <table:covered-table-cell/>
          </table:table-row>
          <table:table-row table:style-name="Tabla6.3">
            <table:table-cell table:style-name="Tabla6.A14" office:value-type="string">
              <text:p text:style-name="P60" loext:marker-style-name="T7"/>
            </table:table-cell>
            <table:table-cell table:style-name="Tabla6.B3" office:value-type="string">
              <text:p text:style-name="P40" loext:marker-style-name="T7"><text:span text:style-name="T71">12</text:span><text:span text:style-name="T71"/></text:p>
            </table:table-cell>
            <table:table-cell table:style-name="Tabla6.C3" office:value-type="string">
              <text:p text:style-name="P40" loext:marker-style-name="T7"><text:span text:style-name="T77">SARAGOZA CANCHO ASTO</text:span><text:span text:style-name="T77"/></text:p>
            </table:table-cell>
            <table:table-cell table:style-name="Tabla6.C3" office:value-type="string">
              <text:p text:style-name="P40" loext:marker-style-name="T7"><text:span text:style-name="T77">28264556</text:span><text:span text:style-name="T77"/></text:p>
            </table:table-cell>
            <table:table-cell table:style-name="Tabla6.C3" office:value-type="string">
              <text:p text:style-name="P40" loext:marker-style-name="T7"><text:span text:style-name="T77">928220628</text:span><text:span text:style-name="T77"/></text:p>
            </table:table-cell>
            <table:table-cell table:style-name="Tabla6.C3" office:value-type="string">
              <text:p text:style-name="P40" loext:marker-style-name="T7"><text:span text:style-name="T77">Casaorcco</text:span><text:span text:style-name="T77"/></text:p>
            </table:table-cell>
            <table:table-cell table:style-name="Tabla6.C3" table:number-columns-spanned="2" office:value-type="string">
              <text:p text:style-name="P31" loext:marker-style-name="T7"><text:span text:style-name="T77">Socia</text:span><text:span text:style-name="T77"/></text:p>
            </table:table-cell>
            <table:covered-table-cell/>
          </table:table-row>
          <table:table-row table:style-name="Tabla6.3">
            <table:table-cell table:style-name="Tabla6.A15" office:value-type="string">
              <text:p text:style-name="P60" loext:marker-style-name="T7"/>
            </table:table-cell>
            <table:table-cell table:style-name="Tabla6.B3" office:value-type="string">
              <text:p text:style-name="P40" loext:marker-style-name="T7"><text:span text:style-name="T71">13</text:span><text:span text:style-name="T71"/></text:p>
            </table:table-cell>
            <table:table-cell table:style-name="Tabla6.C3" office:value-type="string">
              <text:p text:style-name="P40" loext:marker-style-name="T7"><text:span text:style-name="T77">LISBETH ROSMER HUAMANÍ CANCHO</text:span><text:span text:style-name="T77"/></text:p>
            </table:table-cell>
            <table:table-cell table:style-name="Tabla6.C3" office:value-type="string">
              <text:p text:style-name="P40" loext:marker-style-name="T7"><text:span text:style-name="T77">72940188</text:span><text:span text:style-name="T77"/></text:p>
            </table:table-cell>
            <table:table-cell table:style-name="Tabla6.C3" office:value-type="string">
              <text:p text:style-name="P60" loext:marker-style-name="T7"/>
            </table:table-cell>
            <table:table-cell table:style-name="Tabla6.C3" office:value-type="string">
              <text:p text:style-name="P40" loext:marker-style-name="T7"><text:span text:style-name="T77">Casaorcco</text:span><text:span text:style-name="T77"/></text:p>
            </table:table-cell>
            <table:table-cell table:style-name="Tabla6.C3" table:number-columns-spanned="2" office:value-type="string">
              <text:p text:style-name="P31" loext:marker-style-name="T7"><text:span text:style-name="T77">Joven</text:span><text:span text:style-name="T77"/></text:p>
            </table:table-cell>
            <table:covered-table-cell/>
          </table:table-row>
          <table:table-row table:style-name="Tabla6.3">
            <table:table-cell table:style-name="Tabla6.A16" office:value-type="string">
              <text:p text:style-name="P60" loext:marker-style-name="T7"/>
            </table:table-cell>
            <table:table-cell table:style-name="Tabla6.B3" office:value-type="string">
              <text:p text:style-name="P40" loext:marker-style-name="T7"><text:span text:style-name="T71">14</text:span><text:span text:style-name="T71"/></text:p>
            </table:table-cell>
            <table:table-cell table:style-name="Tabla6.C3" office:value-type="string">
              <text:p text:style-name="P40" loext:marker-style-name="T7"><text:span text:style-name="T77">MARILUZ GUTIÉRREZ ARONES</text:span><text:span text:style-name="T77"/></text:p>
            </table:table-cell>
            <table:table-cell table:style-name="Tabla6.C3" office:value-type="string">
              <text:p text:style-name="P40" loext:marker-style-name="T7"><text:span text:style-name="T77">28235987</text:span><text:span text:style-name="T77"/></text:p>
            </table:table-cell>
            <table:table-cell table:style-name="Tabla6.C3" office:value-type="string">
              <text:p text:style-name="P40" loext:marker-style-name="T7"><text:span text:style-name="T77">940054859</text:span><text:span text:style-name="T77"/></text:p>
            </table:table-cell>
            <table:table-cell table:style-name="Tabla6.C3" office:value-type="string">
              <text:p text:style-name="P40" loext:marker-style-name="T7"><text:span text:style-name="T77">Casaorcco</text:span><text:span text:style-name="T77"/></text:p>
            </table:table-cell>
            <table:table-cell table:style-name="Tabla6.C3" table:number-columns-spanned="2" office:value-type="string">
              <text:p text:style-name="P31" loext:marker-style-name="T7"><text:span text:style-name="T77">Socia</text:span><text:span text:style-name="T77"/></text:p>
            </table:table-cell>
            <table:covered-table-cell/>
          </table:table-row>
          <table:table-row table:style-name="Tabla6.3">
            <table:table-cell table:style-name="Tabla6.A17" office:value-type="string">
              <text:p text:style-name="P60" loext:marker-style-name="T7"/>
            </table:table-cell>
            <table:table-cell table:style-name="Tabla6.B3" office:value-type="string">
              <text:p text:style-name="P40" loext:marker-style-name="T7"><text:span text:style-name="T71">15</text:span><text:span text:style-name="T71"/></text:p>
            </table:table-cell>
            <table:table-cell table:style-name="Tabla6.C3" office:value-type="string">
              <text:p text:style-name="P40" loext:marker-style-name="T7"><text:span text:style-name="T77">ZOSIMO CANCHO ASTO</text:span><text:span text:style-name="T77"/></text:p>
            </table:table-cell>
            <table:table-cell table:style-name="Tabla6.C3" office:value-type="string">
              <text:p text:style-name="P40" loext:marker-style-name="T7"><text:span text:style-name="T77">42390525</text:span><text:span text:style-name="T77"/></text:p>
            </table:table-cell>
            <table:table-cell table:style-name="Tabla6.C3" office:value-type="string">
              <text:p text:style-name="P60" loext:marker-style-name="T7"/>
            </table:table-cell>
            <table:table-cell table:style-name="Tabla6.C3" office:value-type="string">
              <text:p text:style-name="P40" loext:marker-style-name="T7"><text:span text:style-name="T77">Casaorcco</text:span><text:span text:style-name="T77"/></text:p>
            </table:table-cell>
            <table:table-cell table:style-name="Tabla6.C3" table:number-columns-spanned="2" office:value-type="string">
              <text:p text:style-name="P31" loext:marker-style-name="T7"><text:span text:style-name="T77">Socio</text:span><text:span text:style-name="T77"/></text:p>
            </table:table-cell>
            <table:covered-table-cell/>
          </table:table-row>
          <table:table-row table:style-name="Tabla6.3">
            <table:table-cell table:style-name="Tabla6.A18" office:value-type="string">
              <text:p text:style-name="P60" loext:marker-style-name="T7"/>
            </table:table-cell>
            <table:table-cell table:style-name="Tabla6.B3" office:value-type="string">
              <text:p text:style-name="P40" loext:marker-style-name="T7"><text:span text:style-name="T71">16</text:span><text:span text:style-name="T71"/></text:p>
            </table:table-cell>
            <table:table-cell table:style-name="Tabla6.C3" office:value-type="string">
              <text:p text:style-name="P40" loext:marker-style-name="T7"><text:span text:style-name="T77">KEYSI AMELIE CANCHO ÑAÑACCHUARI</text:span><text:span text:style-name="T77"/></text:p>
            </table:table-cell>
            <table:table-cell table:style-name="Tabla6.C3" office:value-type="string">
              <text:p text:style-name="P40" loext:marker-style-name="T7"><text:span text:style-name="T77">74232837</text:span><text:span text:style-name="T77"/></text:p>
            </table:table-cell>
            <table:table-cell table:style-name="Tabla6.C3" office:value-type="string">
              <text:p text:style-name="P60" loext:marker-style-name="T7"/>
            </table:table-cell>
            <table:table-cell table:style-name="Tabla6.C3" office:value-type="string">
              <text:p text:style-name="P40" loext:marker-style-name="T7"><text:span text:style-name="T77">Casaorcco</text:span><text:span text:style-name="T77"/></text:p>
            </table:table-cell>
            <table:table-cell table:style-name="Tabla6.C3" table:number-columns-spanned="2" office:value-type="string">
              <text:p text:style-name="P31" loext:marker-style-name="T7"><text:span text:style-name="T77">Joven</text:span><text:span text:style-name="T77"/></text:p>
            </table:table-cell>
            <table:covered-table-cell/>
          </table:table-row>
          <table:table-row table:style-name="Tabla6.3">
            <table:table-cell table:style-name="Tabla6.A19" office:value-type="string">
              <text:p text:style-name="P60" loext:marker-style-name="T7"/>
            </table:table-cell>
            <table:table-cell table:style-name="Tabla6.B3" office:value-type="string">
              <text:p text:style-name="P40" loext:marker-style-name="T7"><text:span text:style-name="T71">17</text:span><text:span text:style-name="T71"/></text:p>
            </table:table-cell>
            <table:table-cell table:style-name="Tabla6.C3" office:value-type="string">
              <text:p text:style-name="P40" loext:marker-style-name="T7"><text:span text:style-name="T77">NUERA NEREIDA ROJAS HUAMAN</text:span><text:span text:style-name="T77"/></text:p>
            </table:table-cell>
            <table:table-cell table:style-name="Tabla6.C3" office:value-type="string">
              <text:p text:style-name="P40" loext:marker-style-name="T7"><text:span text:style-name="T77">70453674</text:span><text:span text:style-name="T77"/></text:p>
            </table:table-cell>
            <table:table-cell table:style-name="Tabla6.C3" office:value-type="string">
              <text:p text:style-name="P60" loext:marker-style-name="T7"/>
            </table:table-cell>
            <table:table-cell table:style-name="Tabla6.C3" office:value-type="string">
              <text:p text:style-name="P40" loext:marker-style-name="T7"><text:span text:style-name="T77">Casaorcco</text:span><text:span text:style-name="T77"/></text:p>
            </table:table-cell>
            <table:table-cell table:style-name="Tabla6.C3" table:number-columns-spanned="2" office:value-type="string">
              <text:p text:style-name="P31" loext:marker-style-name="T7"><text:span text:style-name="T77">Joven</text:span><text:span text:style-name="T77"/></text:p>
            </table:table-cell>
            <table:covered-table-cell/>
          </table:table-row>
          <table:table-row table:style-name="Tabla6.3">
            <table:table-cell table:style-name="Tabla6.A20" office:value-type="string">
              <text:p text:style-name="P60" loext:marker-style-name="T7"/>
            </table:table-cell>
            <table:table-cell table:style-name="Tabla6.B3" office:value-type="string">
              <text:p text:style-name="P40" loext:marker-style-name="T7"><text:span text:style-name="T71">18</text:span><text:span text:style-name="T71"/></text:p>
            </table:table-cell>
            <table:table-cell table:style-name="Tabla6.C3" office:value-type="string">
              <text:p text:style-name="P40" loext:marker-style-name="T7"><text:span text:style-name="T77">DARIA BELLIDO PALOMINO</text:span><text:span text:style-name="T77"/></text:p>
            </table:table-cell>
            <table:table-cell table:style-name="Tabla6.C3" office:value-type="string">
              <text:p text:style-name="P40" loext:marker-style-name="T7"><text:span text:style-name="T77">70119327</text:span><text:span text:style-name="T77"/></text:p>
            </table:table-cell>
            <table:table-cell table:style-name="Tabla6.C3" office:value-type="string">
              <text:p text:style-name="P60" loext:marker-style-name="T7"/>
            </table:table-cell>
            <table:table-cell table:style-name="Tabla6.C3" office:value-type="string">
              <text:p text:style-name="P40" loext:marker-style-name="T7"><text:span text:style-name="T77">Casaorcco</text:span><text:span text:style-name="T77"/></text:p>
            </table:table-cell>
            <table:table-cell table:style-name="Tabla6.C3" table:number-columns-spanned="2" office:value-type="string">
              <text:p text:style-name="P31" loext:marker-style-name="T7"><text:span text:style-name="T77">Socio</text:span><text:span text:style-name="T77"/></text:p>
            </table:table-cell>
            <table:covered-table-cell/>
          </table:table-row>
          <table:table-row table:style-name="Tabla6.3">
            <table:table-cell table:style-name="Tabla6.A21" office:value-type="string">
              <text:p text:style-name="P60" loext:marker-style-name="T7"/>
            </table:table-cell>
            <table:table-cell table:style-name="Tabla6.B3" office:value-type="string">
              <text:p text:style-name="P40" loext:marker-style-name="T7"><text:span text:style-name="T71">19</text:span><text:span text:style-name="T71"/></text:p>
            </table:table-cell>
            <table:table-cell table:style-name="Tabla6.C3" office:value-type="string">
              <text:p text:style-name="P40" loext:marker-style-name="T7"><text:span text:style-name="T77">ROSA MARÍA HUAMANÍ ASTO</text:span><text:span text:style-name="T77"/></text:p>
            </table:table-cell>
            <table:table-cell table:style-name="Tabla6.C3" office:value-type="string">
              <text:p text:style-name="P40" loext:marker-style-name="T7"><text:span text:style-name="T77">28307425</text:span><text:span text:style-name="T77"/></text:p>
            </table:table-cell>
            <table:table-cell table:style-name="Tabla6.C3" office:value-type="string">
              <text:p text:style-name="P60" loext:marker-style-name="T7"/>
            </table:table-cell>
            <table:table-cell table:style-name="Tabla6.C3" office:value-type="string">
              <text:p text:style-name="P40" loext:marker-style-name="T7"><text:span text:style-name="T77">Casaorcco</text:span><text:span text:style-name="T77"/></text:p>
            </table:table-cell>
            <table:table-cell table:style-name="Tabla6.C3" table:number-columns-spanned="2" office:value-type="string">
              <text:p text:style-name="P31" loext:marker-style-name="T7"><text:span text:style-name="T77">Socio</text:span><text:span text:style-name="T77"/></text:p>
            </table:table-cell>
            <table:covered-table-cell/>
          </table:table-row>
          <table:table-row table:style-name="Tabla6.3">
            <table:table-cell table:style-name="Tabla6.A22" office:value-type="string">
              <text:p text:style-name="P60" loext:marker-style-name="T7"/>
            </table:table-cell>
            <table:table-cell table:style-name="Tabla6.B3" office:value-type="string">
              <text:p text:style-name="P40" loext:marker-style-name="T7"><text:span text:style-name="T71">20</text:span><text:span text:style-name="T71"/></text:p>
            </table:table-cell>
            <table:table-cell table:style-name="Tabla6.C3" office:value-type="string">
              <text:p text:style-name="P40" loext:marker-style-name="T7"><text:span text:style-name="T77">MARCELINO GUTIÉRREZ ARONE</text:span><text:span text:style-name="T77"/></text:p>
            </table:table-cell>
            <table:table-cell table:style-name="Tabla6.C3" office:value-type="string">
              <text:p text:style-name="P40" loext:marker-style-name="T7"><text:span text:style-name="T77">28298060</text:span><text:span text:style-name="T77"/></text:p>
            </table:table-cell>
            <table:table-cell table:style-name="Tabla6.C3" office:value-type="string">
              <text:p text:style-name="P40" loext:marker-style-name="T7"><text:span text:style-name="T77">996338013</text:span><text:span text:style-name="T77"/></text:p>
            </table:table-cell>
            <table:table-cell table:style-name="Tabla6.C3" office:value-type="string">
              <text:p text:style-name="P40" loext:marker-style-name="T7"><text:span text:style-name="T77">Casaorcco</text:span><text:span text:style-name="T77"/></text:p>
            </table:table-cell>
            <table:table-cell table:style-name="Tabla6.C3" table:number-columns-spanned="2" office:value-type="string">
              <text:p text:style-name="P31" loext:marker-style-name="T7"><text:span text:style-name="T77">Socio</text:span><text:span text:style-name="T77"/></text:p>
            </table:table-cell>
            <table:covered-table-cell/>
          </table:table-row>
          <table:table-row table:style-name="Tabla6.3">
            <table:table-cell table:style-name="Tabla6.A23" office:value-type="string">
              <text:p text:style-name="P60" loext:marker-style-name="T7"/>
            </table:table-cell>
            <table:table-cell table:style-name="Tabla6.B3" office:value-type="string">
              <text:p text:style-name="P40" loext:marker-style-name="T7"><text:span text:style-name="T71">21</text:span><text:span text:style-name="T71"/></text:p>
            </table:table-cell>
            <table:table-cell table:style-name="Tabla6.C3" office:value-type="string">
              <text:p text:style-name="P40" loext:marker-style-name="T7"><text:span text:style-name="T77">FREDY OSCCO TELLO</text:span><text:span text:style-name="T77"/></text:p>
            </table:table-cell>
            <table:table-cell table:style-name="Tabla6.C3" office:value-type="string">
              <text:p text:style-name="P40" loext:marker-style-name="T7"><text:span text:style-name="T77">47594182</text:span><text:span text:style-name="T77"/></text:p>
            </table:table-cell>
            <table:table-cell table:style-name="Tabla6.C3" office:value-type="string">
              <text:p text:style-name="P40" loext:marker-style-name="T7"><text:span text:style-name="T77">973498813</text:span><text:span text:style-name="T77"/></text:p>
            </table:table-cell>
            <table:table-cell table:style-name="Tabla6.C3" office:value-type="string">
              <text:p text:style-name="P40" loext:marker-style-name="T7"><text:span text:style-name="T77">Casaorcco</text:span><text:span text:style-name="T77"/></text:p>
            </table:table-cell>
            <table:table-cell table:style-name="Tabla6.C3" table:number-columns-spanned="2" office:value-type="string">
              <text:p text:style-name="P31" loext:marker-style-name="T7"><text:span text:style-name="T77">Socio</text:span><text:span text:style-name="T77"/></text:p>
            </table:table-cell>
            <table:covered-table-cell/>
          </table:table-row>
          <table:table-row table:style-name="Tabla6.3">
            <table:table-cell table:style-name="Tabla6.A24" office:value-type="string">
              <text:p text:style-name="P60" loext:marker-style-name="T7"/>
            </table:table-cell>
            <table:table-cell table:style-name="Tabla6.B3" office:value-type="string">
              <text:p text:style-name="P40" loext:marker-style-name="T7"><text:span text:style-name="T71">22</text:span><text:span text:style-name="T71"/></text:p>
            </table:table-cell>
            <table:table-cell table:style-name="Tabla6.C3" office:value-type="string">
              <text:p text:style-name="P40" loext:marker-style-name="T7"><text:span text:style-name="T77">EDGAR HUAMANÍ MÉNDEZ</text:span><text:span text:style-name="T77"/></text:p>
            </table:table-cell>
            <table:table-cell table:style-name="Tabla6.C3" office:value-type="string">
              <text:p text:style-name="P40" loext:marker-style-name="T7"><text:span text:style-name="T77">48813812</text:span><text:span text:style-name="T77"/></text:p>
            </table:table-cell>
            <table:table-cell table:style-name="Tabla6.C3" office:value-type="string">
              <text:p text:style-name="P60" loext:marker-style-name="T7"/>
            </table:table-cell>
            <table:table-cell table:style-name="Tabla6.C3" office:value-type="string">
              <text:p text:style-name="P40" loext:marker-style-name="T7"><text:span text:style-name="T77">Casaorcco</text:span><text:span text:style-name="T77"/></text:p>
            </table:table-cell>
            <table:table-cell table:style-name="Tabla6.C3" table:number-columns-spanned="2" office:value-type="string">
              <text:p text:style-name="P31" loext:marker-style-name="T7"><text:span text:style-name="T77">Socio</text:span><text:span text:style-name="T77"/></text:p>
            </table:table-cell>
            <table:covered-table-cell/>
          </table:table-row>
          <table:table-row table:style-name="Tabla6.3">
            <table:table-cell table:style-name="Tabla6.A25" office:value-type="string">
              <text:p text:style-name="P60" loext:marker-style-name="T7"/>
            </table:table-cell>
            <table:table-cell table:style-name="Tabla6.B3" office:value-type="string">
              <text:p text:style-name="P40" loext:marker-style-name="T7"><text:span text:style-name="T71">23</text:span><text:span text:style-name="T71"/></text:p>
            </table:table-cell>
            <table:table-cell table:style-name="Tabla6.C3" office:value-type="string">
              <text:p text:style-name="P40" loext:marker-style-name="T7"><text:span text:style-name="T77">BETSAIDA HUAMANÍ PISCO</text:span><text:span text:style-name="T77"/></text:p>
            </table:table-cell>
            <table:table-cell table:style-name="Tabla6.C3" office:value-type="string">
              <text:p text:style-name="P40" loext:marker-style-name="T7"><text:span text:style-name="T77">48238889</text:span><text:span text:style-name="T77"/></text:p>
            </table:table-cell>
            <table:table-cell table:style-name="Tabla6.C3" office:value-type="string">
              <text:p text:style-name="P60" loext:marker-style-name="T7"/>
            </table:table-cell>
            <table:table-cell table:style-name="Tabla6.C3" office:value-type="string">
              <text:p text:style-name="P40" loext:marker-style-name="T7"><text:span text:style-name="T77">Casaorcco</text:span><text:span text:style-name="T77"/></text:p>
            </table:table-cell>
            <table:table-cell table:style-name="Tabla6.C3" table:number-columns-spanned="2" office:value-type="string">
              <text:p text:style-name="P31" loext:marker-style-name="T7"><text:span text:style-name="T77">Socio</text:span><text:span text:style-name="T77"/></text:p>
            </table:table-cell>
            <table:covered-table-cell/>
          </table:table-row>
          <table:table-row table:style-name="Tabla6.3">
            <table:table-cell table:style-name="Tabla6.A26" office:value-type="string">
              <text:p text:style-name="P60" loext:marker-style-name="T7"/>
            </table:table-cell>
            <table:table-cell table:style-name="Tabla6.B3" office:value-type="string">
              <text:p text:style-name="P40" loext:marker-style-name="T7"><text:span text:style-name="T71">24</text:span><text:span text:style-name="T71"/></text:p>
            </table:table-cell>
            <table:table-cell table:style-name="Tabla6.C3" office:value-type="string">
              <text:p text:style-name="P40" loext:marker-style-name="T7"><text:span text:style-name="T77">HERMINIO CÓRDOVA ALANYA</text:span><text:span text:style-name="T77"/></text:p>
            </table:table-cell>
            <table:table-cell table:style-name="Tabla6.C3" office:value-type="string">
              <text:p text:style-name="P40" loext:marker-style-name="T7"><text:span text:style-name="T77">41680949</text:span><text:span text:style-name="T77"/></text:p>
            </table:table-cell>
            <table:table-cell table:style-name="Tabla6.C3" office:value-type="string">
              <text:p text:style-name="P60" loext:marker-style-name="T7"/>
            </table:table-cell>
            <table:table-cell table:style-name="Tabla6.C3" office:value-type="string">
              <text:p text:style-name="P40" loext:marker-style-name="T7"><text:span text:style-name="T77">Casaorcco</text:span><text:span text:style-name="T77"/></text:p>
            </table:table-cell>
            <table:table-cell table:style-name="Tabla6.C3" table:number-columns-spanned="2" office:value-type="string">
              <text:p text:style-name="P31" loext:marker-style-name="T7"><text:span text:style-name="T77">Socio</text:span><text:span text:style-name="T77"/></text:p>
            </table:table-cell>
            <table:covered-table-cell/>
          </table:table-row>
          <table:table-row table:style-name="Tabla6.3">
            <table:table-cell table:style-name="Tabla6.A27" office:value-type="string">
              <text:p text:style-name="P60" loext:marker-style-name="T7"/>
            </table:table-cell>
            <table:table-cell table:style-name="Tabla6.B3" office:value-type="string">
              <text:p text:style-name="P40" loext:marker-style-name="T7"><text:span text:style-name="T71">25</text:span><text:span text:style-name="T71"/></text:p>
            </table:table-cell>
            <table:table-cell table:style-name="Tabla6.C3" office:value-type="string">
              <text:p text:style-name="P40" loext:marker-style-name="T7"><text:span text:style-name="T77">JULIO HUAMANÍ ASTO</text:span><text:span text:style-name="T77"/></text:p>
            </table:table-cell>
            <table:table-cell table:style-name="Tabla6.C3" office:value-type="string">
              <text:p text:style-name="P40" loext:marker-style-name="T7"><text:span text:style-name="T77">28234353</text:span><text:span text:style-name="T77"/></text:p>
            </table:table-cell>
            <table:table-cell table:style-name="Tabla6.C3" office:value-type="string">
              <text:p text:style-name="P60" loext:marker-style-name="T7"/>
            </table:table-cell>
            <table:table-cell table:style-name="Tabla6.C3" office:value-type="string">
              <text:p text:style-name="P40" loext:marker-style-name="T7"><text:span text:style-name="T77">Casaorcco</text:span><text:span text:style-name="T77"/></text:p>
            </table:table-cell>
            <table:table-cell table:style-name="Tabla6.C3" table:number-columns-spanned="2" office:value-type="string">
              <text:p text:style-name="P31" loext:marker-style-name="T7"><text:span text:style-name="T77">Socio</text:span><text:span text:style-name="T77"/></text:p>
            </table:table-cell>
            <table:covered-table-cell/>
          </table:table-row>
          <table:table-row table:style-name="Tabla6.3">
            <table:table-cell table:style-name="Tabla6.A28" office:value-type="string">
              <text:p text:style-name="P60" loext:marker-style-name="T7"/>
            </table:table-cell>
            <table:table-cell table:style-name="Tabla6.B3" office:value-type="string">
              <text:p text:style-name="P40" loext:marker-style-name="T7"><text:span text:style-name="T71">26</text:span><text:span text:style-name="T71"/></text:p>
            </table:table-cell>
            <table:table-cell table:style-name="Tabla6.C3" office:value-type="string">
              <text:p text:style-name="P40" loext:marker-style-name="T7"><text:span text:style-name="T77">EVERSON HUAMANÍ MÉNDEZ</text:span><text:span text:style-name="T77"/></text:p>
            </table:table-cell>
            <table:table-cell table:style-name="Tabla6.C3" office:value-type="string">
              <text:p text:style-name="P40" loext:marker-style-name="T7"><text:span text:style-name="T77">61030055</text:span><text:span text:style-name="T77"/></text:p>
            </table:table-cell>
            <table:table-cell table:style-name="Tabla6.C3" office:value-type="string">
              <text:p text:style-name="P60" loext:marker-style-name="T7"/>
            </table:table-cell>
            <table:table-cell table:style-name="Tabla6.C3" office:value-type="string">
              <text:p text:style-name="P40" loext:marker-style-name="T7"><text:span text:style-name="T77">Casaorcco</text:span><text:span text:style-name="T77"/></text:p>
            </table:table-cell>
            <table:table-cell table:style-name="Tabla6.C3" table:number-columns-spanned="2" office:value-type="string">
              <text:p text:style-name="P31" loext:marker-style-name="T7"><text:span text:style-name="T77">Discapacitado</text:span><text:span text:style-name="T77"/></text:p>
            </table:table-cell>
            <table:covered-table-cell/>
          </table:table-row>
          <table:table-row table:style-name="Tabla6.3">
            <table:table-cell table:style-name="Tabla6.A29" office:value-type="string">
              <text:p text:style-name="P60" loext:marker-style-name="T7"/>
            </table:table-cell>
            <table:table-cell table:style-name="Tabla6.B3" office:value-type="string">
              <text:p text:style-name="P40" loext:marker-style-name="T7"><text:span text:style-name="T71">27</text:span><text:span text:style-name="T71"/></text:p>
            </table:table-cell>
            <table:table-cell table:style-name="Tabla6.C3" office:value-type="string">
              <text:p text:style-name="P40" loext:marker-style-name="T7"><text:span text:style-name="T77">YURI HUAMANÍ PISCO</text:span><text:span text:style-name="T77"/></text:p>
            </table:table-cell>
            <table:table-cell table:style-name="Tabla6.C3" office:value-type="string">
              <text:p text:style-name="P40" loext:marker-style-name="T7"><text:span text:style-name="T77">44968468</text:span><text:span text:style-name="T77"/></text:p>
            </table:table-cell>
            <table:table-cell table:style-name="Tabla6.C3" office:value-type="string">
              <text:p text:style-name="P40" loext:marker-style-name="T7"><text:span text:style-name="T77">941140911</text:span><text:span text:style-name="T77"/></text:p>
            </table:table-cell>
            <table:table-cell table:style-name="Tabla6.C3" office:value-type="string">
              <text:p text:style-name="P40" loext:marker-style-name="T7"><text:span text:style-name="T77">Casaorcco</text:span><text:span text:style-name="T77"/></text:p>
            </table:table-cell>
            <table:table-cell table:style-name="Tabla6.C3" table:number-columns-spanned="2" office:value-type="string">
              <text:p text:style-name="P31" loext:marker-style-name="T7"><text:span text:style-name="T77">Socio</text:span><text:span text:style-name="T77"/></text:p>
            </table:table-cell>
            <table:covered-table-cell/>
          </table:table-row>
          <table:table-row table:style-name="Tabla6.3">
            <table:table-cell table:style-name="Tabla6.A30" office:value-type="string">
              <text:p text:style-name="P60" loext:marker-style-name="T7"/>
            </table:table-cell>
            <table:table-cell table:style-name="Tabla6.B3" office:value-type="string">
              <text:p text:style-name="P40" loext:marker-style-name="T7"><text:span text:style-name="T71">28</text:span><text:span text:style-name="T71"/></text:p>
            </table:table-cell>
            <table:table-cell table:style-name="Tabla6.C3" office:value-type="string">
              <text:p text:style-name="P40" loext:marker-style-name="T7"><text:span text:style-name="T77">TANIA SALVATIERRA ORE</text:span><text:span text:style-name="T77"/></text:p>
            </table:table-cell>
            <table:table-cell table:style-name="Tabla6.C3" office:value-type="string">
              <text:p text:style-name="P40" loext:marker-style-name="T7"><text:span text:style-name="T77">70209155</text:span><text:span text:style-name="T77"/></text:p>
            </table:table-cell>
            <table:table-cell table:style-name="Tabla6.C3" office:value-type="string">
              <text:p text:style-name="P60" loext:marker-style-name="T7"/>
            </table:table-cell>
            <table:table-cell table:style-name="Tabla6.C3" office:value-type="string">
              <text:p text:style-name="P40" loext:marker-style-name="T7"><text:span text:style-name="T77">Casaorcco</text:span><text:span text:style-name="T77"/></text:p>
            </table:table-cell>
            <table:table-cell table:style-name="Tabla6.C3" table:number-columns-spanned="2" office:value-type="string">
              <text:p text:style-name="P31" loext:marker-style-name="T7"><text:span text:style-name="T77">Socia</text:span><text:span text:style-name="T77"/></text:p>
            </table:table-cell>
            <table:covered-table-cell/>
          </table:table-row>
          <table:table-row table:style-name="Tabla6.3">
            <table:table-cell table:style-name="Tabla6.A31" office:value-type="string">
              <text:p text:style-name="P60" loext:marker-style-name="T7"/>
            </table:table-cell>
            <table:table-cell table:style-name="Tabla6.B3" office:value-type="string">
              <text:p text:style-name="P40" loext:marker-style-name="T7"><text:span text:style-name="T71">29</text:span><text:span text:style-name="T71"/></text:p>
            </table:table-cell>
            <table:table-cell table:style-name="Tabla6.C3" office:value-type="string">
              <text:p text:style-name="P40" loext:marker-style-name="T7"><text:span text:style-name="T77">IRENE ÑAÑACCHUARI PAUCAR</text:span><text:span text:style-name="T77"/></text:p>
            </table:table-cell>
            <table:table-cell table:style-name="Tabla6.C3" office:value-type="string">
              <text:p text:style-name="P40" loext:marker-style-name="T7"><text:span text:style-name="T77">41162761</text:span><text:span text:style-name="T77"/></text:p>
            </table:table-cell>
            <table:table-cell table:style-name="Tabla6.C3" office:value-type="string">
              <text:p text:style-name="P40" loext:marker-style-name="T7"><text:span text:style-name="T77">945747944</text:span><text:span text:style-name="T77"/></text:p>
            </table:table-cell>
            <table:table-cell table:style-name="Tabla6.C3" office:value-type="string">
              <text:p text:style-name="P40" loext:marker-style-name="T7"><text:span text:style-name="T77">Casaorcco</text:span><text:span text:style-name="T77"/></text:p>
            </table:table-cell>
            <table:table-cell table:style-name="Tabla6.C3" table:number-columns-spanned="2" office:value-type="string">
              <text:p text:style-name="P31" loext:marker-style-name="T7"><text:span text:style-name="T77">Socia</text:span><text:span text:style-name="T77"/></text:p>
            </table:table-cell>
            <table:covered-table-cell/>
          </table:table-row>
        </table:table>
        <text:p text:style-name="P37" loext:marker-style-name="T7"><text:span text:style-name="T8">_______________________</text:span><text:span text:style-name="T8"/></text:p>
        <text:p text:style-name="P37" loext:marker-style-name="T7"><text:span text:style-name="T8">Firma y Sello</text:span><text:span text:style-name="T8"/></text:p>
        <text:p text:style-name="P37" loext:marker-style-name="T7"><text:span text:style-name="T8">Nombre Representante:</text:span><text:span text:style-name="T8"/></text:p>
        <text:p text:style-name="P37" loext:marker-style-name="T7"><text:span text:style-name="T8">DNI N° </text:span><text:span text:style-name="T8"/></text:p>
        <text:p text:style-name="P78" loext:marker-style-name="T7"><text:span text:style-name="T64">FORMATO 12</text:span><text:span text:style-name="T64"/></text:p>
        <text:p text:style-name="P78" loext:marker-style-name="T7"><text:span text:style-name="T64"><text:s/>FICHA DE REGISTRO DEL PLAN DE NEGOCIO AMBAS CATEGORIAS (“A” y “B”)</text:span><text:span text:style-name="T64"/></text:p>
        <text:list text:style-name="WWNum5">
          <text:list-item>
            <text:p text:style-name="P21" loext:marker-style-name="T7"><text:span text:style-name="T1">ASPECTOS GENERALES </text:span><text:span text:style-name="T1"/></text:p>
            <text:list>
              <text:list-item>
                <text:p text:style-name="P15" loext:marker-style-name="T7"><text:span text:style-name="T19">DATOS GENERALES</text:span><text:span text:style-name="T19"/></text:p>
              </text:list-item>
            </text:list>
          </text:list-item>
        </text:list>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P46" loext:marker-style-name="T7"><text:span text:style-name="T69">Nombre de la Propuesta Productiva</text:span><text:span text:style-name="T69"/></text:p>
            </table:table-cell>
            <table:table-cell table:style-name="Tabla7.B1" office:value-type="string">
              <text:p text:style-name="P46" loext:marker-style-name="T7"><text:span text:style-name="T69"><text:s/></text:span><text:span text:style-name="T26">“</text:span><text:span text:style-name="T25">MEJORAMIENTO DE LA PRODUCCIÓN Y COMERCIALIZACIÓN DE CUYES EN LA ASOCIACIÓN DE PRODUCTORES LAMBRASHUAYCCO DE CASAORCCO (APAL), DISTRITO DE CARMEN ALTO, PROVINCIA HUAMANGA, REGIÓN AYACUCHO”</text:span></text:p>
            </table:table-cell>
            <table:table-cell table:style-name="Tabla7.C1" office:value-type="string">
              <text:p text:style-name="P61" loext:marker-style-name="T7"/>
            </table:table-cell>
            <table:table-cell table:style-name="Tabla7.D1" office:value-type="string">
              <text:p text:style-name="P61" loext:marker-style-name="T7"/>
            </table:table-cell>
          </table:table-row>
          <table:table-row table:style-name="Tabla7.2">
            <table:table-cell table:style-name="Tabla7.A1" office:value-type="string">
              <text:p text:style-name="P75" loext:marker-style-name="T69"/>
            </table:table-cell>
            <table:table-cell table:style-name="Tabla7.A1" office:value-type="string">
              <text:p text:style-name="P75" loext:marker-style-name="T69"/>
            </table:table-cell>
            <table:table-cell table:style-name="Tabla7.A1" office:value-type="string">
              <text:p text:style-name="P75" loext:marker-style-name="T69"/>
            </table:table-cell>
            <table:table-cell table:style-name="Tabla7.A1" office:value-type="string">
              <text:p text:style-name="P75" loext:marker-style-name="T69"/>
            </table:table-cell>
          </table:table-row>
          <table:table-row table:style-name="Tabla7.1">
            <table:table-cell table:style-name="Tabla7.A1" office:value-type="string">
              <text:p text:style-name="P46" loext:marker-style-name="T7"><text:span text:style-name="T69">Monto Total de Inversión</text:span><text:span text:style-name="T69"/></text:p>
            </table:table-cell>
            <table:table-cell table:style-name="Tabla7.B1" office:value-type="string">
              <text:p text:style-name="P36" loext:marker-style-name="T7"><text:span text:style-name="T69">157481.22</text:span><text:span text:style-name="T69"/></text:p>
            </table:table-cell>
            <table:table-cell table:style-name="Tabla7.C1" office:value-type="string">
              <text:p text:style-name="P61" loext:marker-style-name="T7"/>
            </table:table-cell>
            <table:table-cell table:style-name="Tabla7.D1" office:value-type="string">
              <text:p text:style-name="P61" loext:marker-style-name="T7"/>
            </table:table-cell>
          </table:table-row>
          <table:table-row table:style-name="Tabla7.2">
            <table:table-cell table:style-name="Tabla7.A1" office:value-type="string">
              <text:p text:style-name="P75" loext:marker-style-name="T69"/>
            </table:table-cell>
            <table:table-cell table:style-name="Tabla7.A1" office:value-type="string">
              <text:p text:style-name="P75" loext:marker-style-name="T69"/>
            </table:table-cell>
            <table:table-cell table:style-name="Tabla7.A1" office:value-type="string">
              <text:p text:style-name="P75" loext:marker-style-name="T69"/>
            </table:table-cell>
            <table:table-cell table:style-name="Tabla7.A1" office:value-type="string">
              <text:p text:style-name="P75" loext:marker-style-name="T69"/>
            </table:table-cell>
          </table:table-row>
          <table:table-row table:style-name="Tabla7.1">
            <table:table-cell table:style-name="Tabla7.A1" office:value-type="string">
              <text:p text:style-name="P46" loext:marker-style-name="T7"><text:span text:style-name="T69">Cofinanciamiento solicitado</text:span><text:span text:style-name="T69"/></text:p>
            </table:table-cell>
            <table:table-cell table:style-name="Tabla7.B1" office:value-type="string">
              <text:p text:style-name="P36" loext:marker-style-name="T7"><text:span text:style-name="T69">121603.61</text:span><text:span text:style-name="T69"/></text:p>
            </table:table-cell>
            <table:table-cell table:style-name="Tabla7.C1" office:value-type="string">
              <text:p text:style-name="P61" loext:marker-style-name="T7"/>
            </table:table-cell>
            <table:table-cell table:style-name="Tabla7.D1" office:value-type="string">
              <text:p text:style-name="P61" loext:marker-style-name="T7"/>
            </table:table-cell>
          </table:table-row>
        </table:table>
        <text:list text:continue-numbering="true" text:style-name="WWNum5">
          <text:list-item>
            <text:list>
              <text:list-item>
                <text:p text:style-name="P15" loext:marker-style-name="T7"><text:span text:style-name="T19">Responsables de la Formulación</text:span><text:span text:style-name="T19"/></text:p>
              </text:list-item>
            </text:list>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31" loext:marker-style-name="T7"><text:span text:style-name="T20">Nombres y apellidos</text:span><text:span text:style-name="T20"/></text:p>
            </table:table-cell>
            <table:table-cell table:style-name="Tabla8.A1" office:value-type="string">
              <text:p text:style-name="P31" loext:marker-style-name="T7"><text:span text:style-name="T20">Cargo</text:span><text:span text:style-name="T20"/></text:p>
            </table:table-cell>
            <table:table-cell table:style-name="Tabla8.A1" office:value-type="string">
              <text:p text:style-name="P31" loext:marker-style-name="T7"><text:span text:style-name="T20">DNI</text:span><text:span text:style-name="T20"/></text:p>
            </table:table-cell>
          </table:table-row>
          <table:table-row table:style-name="Tabla8.2">
            <table:table-cell table:style-name="Tabla8.A1" office:value-type="string">
              <text:p text:style-name="P46" loext:marker-style-name="T7"><text:span text:style-name="T21">Edex Palomino Cuba</text:span><text:span text:style-name="T21"/></text:p>
            </table:table-cell>
            <table:table-cell table:style-name="Tabla8.A1" office:value-type="string">
              <text:p text:style-name="P46" loext:marker-style-name="T7"><text:span text:style-name="T21">Proyectista</text:span><text:span text:style-name="T21"/></text:p>
            </table:table-cell>
            <table:table-cell table:style-name="Tabla8.A1" office:value-type="string">
              <text:p text:style-name="P46" loext:marker-style-name="T7"><text:span text:style-name="T21">29101439</text:span><text:span text:style-name="T21"/></text:p>
            </table:table-cell>
          </table:table-row>
        </table:table>
        <text:list text:continue-numbering="true" text:style-name="WWNum5">
          <text:list-item>
            <text:list>
              <text:list-item>
                <text:p text:style-name="P15" loext:marker-style-name="T7"><text:span text:style-name="T19">Antecedente</text:span><text:span text:style-name="T19"/></text:p>
              </text:list-item>
            </text:list>
          </text:list-item>
        </text:list>
        <table:table table:name="Tabla9" table:style-name="Tabla9">
          <table:table-column table:style-name="Tabla9.A"/>
          <table:table-row table:style-name="Tabla9.1">
            <table:table-cell table:style-name="Tabla9.A1" office:value-type="string">
              <text:p text:style-name="P44" loext:marker-style-name="T7"><text:span text:style-name="T69"><text:s/></text:span><text:span text:style-name="T27">La Sexta Disposición Complementaria Final del Decreto Legislativo N° 1252, dispone que los procedimientos y metodologías para la implementación, ejecución y evaluación del impacto de las Iniciativas de Apoyo a la Competitividad Productiva, reguladas por la Ley N° 29337, son emitidos por el Ministerio de la Producción; debiendo los Gobiernos Regionales y Gobiernos Locales informar a dicho Ministerio sobre las Iniciativas que autoricen a través de las oficinas, órganos o comités que dispongan para tales efectos.</text:span></text:p>
              <text:p text:style-name="P44" loext:marker-style-name="T7"><text:span text:style-name="T27">Con Memorando N° 1094-2017-PRODUCE/DVMYPE-I, de fecha 26 de junio del 2017, el Viceministerio de MYPE e Industria delega en la Dirección General de Desarrollo Empresarial la responsabilidad de definir los procedimientos y metodologías para la implementación, ejecución y evaluación del impacto de PROCOMPITE, así como la coordinación con Gobiernos Regionales y Locales para que informen sobre las iniciativas que autoricen a través de las oficinas, órganos o comités que dispongan para tales efectos.</text:span><text:span text:style-name="T27"/></text:p>
              <text:p text:style-name="P44" loext:marker-style-name="T7"><text:span text:style-name="T27">El Gobierno Regional de Ayacucho, mediante Acuerdo de Consejo Regional N° 138-2019- GRA/CR, aprobó la implementación del PROCOMPITE Regional Ayacucho 2020, destinando el monto de S/. 10,000,000 (Diez Millones con 00/100 soles).</text:span><text:span text:style-name="T27"/></text:p>
              <text:p text:style-name="P44" loext:marker-style-name="T7"><text:span text:style-name="T27">La Gerencia Regional de Desarrollo Económico del GRA, realizado la convocatoria del PROCOMPITE REGIONAL Ayacucho 2020, de acuerdo al cronograma, bases y la priorización de 11 cadenas productivas: Cuyes – Abejas, Quinua, Servicios Turísticos, Tara, Alpacas-Vicuñas, Derivados Lácteos, Papa Nativa, Palta, Artesanía Cacao – Café y Trucha.</text:span><text:span text:style-name="T27"/></text:p>
              <text:p text:style-name="P40" loext:marker-style-name="T7"><text:span text:style-name="T27">La Asociación de Productores Lambrashuaycco de Casaorcco (APAL), fue constituida el 22 de julio del 2009, iniciando con 09 integrantes, a la fecha se tiene 11 de funcionamiento, con fecha 20 de junio del 2020 se actualiza el padrón de socios a la cantidad de 29 para la participación al fondo concursdable PROCOMPITE REGIONAL AYACUCHO 2020, cabe mencionar que se dedican a la actividad agropecuaria, como principal fuente de ingresos económicos para el sustento de la familia, la crianza de cuyes, sin embargo la baja producción y productividad por causas de un inadecuado manejo.</text:span><text:span text:style-name="T27"/></text:p>
              <text:h text:style-name="P11" text:outline-level="3" loext:marker-style-name="T69"/>
            </table:table-cell>
          </table:table-row>
        </table:table>
        <text:list xml:id="list24255055661103" text:continue-numbering="true" text:style-name="WWNum5">
          <text:list-item>
            <text:list>
              <text:list-item>
                <text:p text:style-name="P15" loext:marker-style-name="T7"><text:span text:style-name="T19">Justificación</text:span><text:span text:style-name="T19"/></text:p>
              </text:list-item>
            </text:list>
          </text:list-item>
        </text:list>
        <table:table table:name="Tabla10" table:style-name="Tabla10">
          <table:table-column table:style-name="Tabla10.A"/>
          <table:table-row table:style-name="Tabla10.1">
            <table:table-cell table:style-name="Tabla10.A1" table:number-rows-spanned="2" office:value-type="string">
              <text:p text:style-name="P44" loext:marker-style-name="T7"><text:span text:style-name="T27">Según el análisis de la cadena productiva de animales menores (cuy), existe un mercado insatisfecho tanto local, regional y nacional que es parte de la demanda objetivo, la asociación busca aprovechar una oportunidad de mercado en el mercado regional, en vista que la demanda regional puede absorber toda la producción de del cuy, tomando específicamente al mercado Ayacuchano.</text:span><text:span text:style-name="T27"/></text:p>
              <text:list text:style-name="WWNum7">
                <text:list-item>
                  <text:p text:style-name="P16" loext:marker-style-name="T7"><text:span text:style-name="T27">Existe capacidad de organización y gestión de la asociación con experiencia en la crianza de cuy en sistemas de crianza con pozas.</text:span><text:span text:style-name="T27"/></text:p>
                </text:list-item>
                <text:list-item>
                  <text:p text:style-name="P45" loext:marker-style-name="T7"><text:span text:style-name="T27">Existe la cantidad suficiente de materias primas e insumos dentro del ámbito de Huamanga, lo que garantizaría cumplir con los niveles de producción.</text:span><text:span text:style-name="T27"/></text:p>
                </text:list-item>
                <text:list-item>
                  <text:p text:style-name="P45" loext:marker-style-name="T7"><text:span text:style-name="T27">La asociación cuenta con una cohesión social entre los miembros de la Asociación, incluyendo la participación integral de familias y grupos vulnerables como mujeres, ancianos, jóvenes y personas con discapacidad.</text:span><text:span text:style-name="T27"/></text:p>
                </text:list-item>
                <text:list-item>
                  <text:p text:style-name="P45" loext:marker-style-name="T7"><text:span text:style-name="T27">Aumento de ingreso a la canasta familiar en comparación a la situación actual, posibilitará mayor rentabilidad; de lograrse este propósito, se deduce que el beneficio económico será favorable para los socios del AEO, los proveedores de insumos de sanidad, personas involucradas en el manejo y crianza de cuyes.</text:span><text:span text:style-name="T27"/></text:p>
                </text:list-item>
                <text:list-item>
                  <text:p text:style-name="P45" loext:marker-style-name="T7"><text:span text:style-name="T27">Asimismo, la propuesta productiva no ha sido financiada por ninguna otra entidad, por lo que es una posibilidad abierta para concursar en el PROCOMPITE.</text:span><text:span text:style-name="T27"/></text:p>
                </text:list-item>
                <text:list-item>
                  <text:p text:style-name="P45" loext:marker-style-name="T7"><text:span text:style-name="T27">La capacidad de organización de la Asociación es fundamental, ya que sus integrantes se dedican a la crianza de cuyes y conocen el negocio de cuy.</text:span><text:span text:style-name="T27"/></text:p>
                </text:list-item>
                <text:list-item>
                  <text:p text:style-name="P45" loext:marker-style-name="T7"><text:span text:style-name="T27">Oportunidad para esta actividad productiva que contempla el marco de normatividad del PROCOMPITE que tiene por objeto mejorar la competitividad de la cadena productiva mediante transferencia de equipos, infraestructura, insumos en beneficios de los agentes económicos organizados, y lo más importante donde la inversión privada es insuficiente.</text:span><text:span text:style-name="T27"/></text:p>
                </text:list-item>
              </text:list>
              <text:p text:style-name="P44" loext:marker-style-name="T7"><text:span text:style-name="T3">Se justifica la implementación de la presente propuesta productiva por lo siguiente:</text:span><text:span text:style-name="T3"/></text:p>
              <text:p text:style-name="P44" loext:marker-style-name="T7"><text:span text:style-name="T27">Tecnológico: con la adopción de nuevas tecnologías y optimización de las mismas se garantiza la sostenibilidad de la presente propuesta productiva.</text:span><text:span text:style-name="T27"/></text:p>
              <text:p text:style-name="P44" loext:marker-style-name="T7"><text:span text:style-name="T27">Económico: los ingresos económicos de las familias se incrementarán, de acuerdo al crecimiento de población y animales a comercializar</text:span><text:span text:style-name="T27"/></text:p>
              <text:p text:style-name="P44" loext:marker-style-name="T7"><text:span text:style-name="T27">Existe una demanda insatisfecha de carne de cuy en los mercados potenciales, según el análisis de mercado realizado.</text:span><text:span text:style-name="T27"/></text:p>
              <text:p text:style-name="P44" loext:marker-style-name="T7"><text:span text:style-name="T27">Social: se propicia la seguridad alimentaria de la población y mejora de la calidad de vida.</text:span><text:span text:style-name="T27"/></text:p>
              <text:p text:style-name="P74" loext:marker-style-name="T69"/>
            </table:table-cell>
          </table:table-row>
          <table:table-row table:style-name="Tabla10.2">
            <table:covered-table-cell table:style-name="Tabla10.A2"/>
          </table:table-row>
        </table:table>
        <text:list xml:id="list24254409411508" text:continue-list="list24255055661103" text:style-name="WWNum5">
          <text:list-item>
            <text:list>
              <text:list-item>
                <text:p text:style-name="P15" loext:marker-style-name="T7"><text:span text:style-name="T19">Descripción de la propuesta: Nuestra propuesta consiste específicamente en:</text:span><text:span text:style-name="T19"/></text:p>
              </text:list-item>
            </text:list>
          </text:list-item>
        </text:list>
        <table:table table:name="Tabla11" table:style-name="Tabla11">
          <table:table-column table:style-name="Tabla11.A"/>
          <table:table-row table:style-name="Tabla11.1">
            <table:table-cell table:style-name="Tabla11.A1" table:number-rows-spanned="2" office:value-type="string">
              <text:p text:style-name="P44" loext:marker-style-name="T7"><text:span text:style-name="T27">El negocio que desea mejorar la Asociación de Productores Agropecuarios Lambrashuaycco de Casaorcco (APAL), tiene como actividad principal la producción y comercialización de cuyes, debido a la creciente demanda de este producto a nivel local, regional, nacional e internacional.</text:span><text:span text:style-name="T27"/></text:p>
              <text:p text:style-name="P44" loext:marker-style-name="T7"><text:span text:style-name="T27">La propuesta productiva está dirigido a mejorar la producción y comercialización del cuy; para lo cual se propone las siguientes líneas de intervención:</text:span><text:span text:style-name="T27"/></text:p>
              <text:list text:style-name="WWNum8">
                <text:list-item>
                  <text:p text:style-name="P17" loext:marker-style-name="T7"><text:span text:style-name="T27">Instalación y Ampliación de la cobertura forrajera, con la siembra de pastos con variedades mejoradas de alfalfa e instalación de sistema de riego tecnificado por aspersión.</text:span><text:span text:style-name="T27"/></text:p>
                </text:list-item>
                <text:list-item>
                  <text:p text:style-name="P17" loext:marker-style-name="T7"><text:span text:style-name="T27">Construcción de galpón para los cuyes para la ampliación de la cantidad de cuyes. Para lo cual el GRA dotará de materiales para la construcción del galpón.</text:span><text:span text:style-name="T27"/></text:p>
                </text:list-item>
                <text:list-item>
                  <text:p text:style-name="P17" loext:marker-style-name="T7"><text:span text:style-name="T27">Adquisición y entrega de reproductores mejorados de cuyes, en una cantidad de 809 reproductores hembras y 97 reproductores machos por parte del AEO.</text:span><text:span text:style-name="T27"/></text:p>
                </text:list-item>
                <text:list-item>
                  <text:p text:style-name="P17" loext:marker-style-name="T7"><text:span text:style-name="T27">Capacitación de socios de AEO. Se tiene programado el fortalecimiento de capacidades de los beneficiarios con los siguientes temas: manejo de pastos, manejo y reproducción de cuyes, sanidad de cuyes y capacitaciones en organización, comercialización y mercadeo.</text:span><text:span text:style-name="T27"/></text:p>
                </text:list-item>
              </text:list>
              <text:p text:style-name="P44" loext:marker-style-name="T7"><text:span text:style-name="T78">Con respecto a la producción</text:span><text:span text:style-name="T78"/></text:p>
              <text:p text:style-name="P44" loext:marker-style-name="T7"><text:span text:style-name="T22">La propuesta contempla la mejora del plantel, con la incorporación de reproductores mejoradas con raza Perú. La adquisición de reproductores se realizará de centros reconocidos y autorizados como INIA, entre otras.</text:span><text:span text:style-name="T22"/></text:p>
              <text:p text:style-name="P44" loext:marker-style-name="T7"><text:span text:style-name="T22">En la propuesta se mejoramiento de la construcción de un galpón con pozas con divisiones de madera y malla metálica, la cual permite un mejor desarrollo y crecimiento del animal, además el manejo de la higiene y sanidad se realizan con mayor eficiencia. Además, se propone la instalación de pastos para mejorar y ampliar la cobertura y para un mejor rendimiento se realizará bajo el sistema de riego tecnificado por aspersión.</text:span><text:span text:style-name="T22"/></text:p>
              <text:p text:style-name="P44" loext:marker-style-name="T7"><text:span text:style-name="T22">Con la adquisición y entrega de reproductores mejoradas de parte del AEO, se tiene proyectado para el primer año, lo siguiente (5161 cuyes en el primer año de operación) y luego irá incrementándose cada año, hasta llegar al 5 año posterior hasta completar su capacidad producción de 17166 reproductoras.</text:span><text:span text:style-name="T22"/></text:p>
              <text:p text:style-name="P44" loext:marker-style-name="T7"><text:span text:style-name="T22">Las zonas de producción de cuyes están ubicadas en áreas de comunidad de Casaorcco especialmente en caserío de Labrashuaycco, del Distrito de Carmen Alto. Así mismo las zonas de comercialización a nivel distrital, provincial y regional; Los cuyes para ventas serán bajo estricto control de calidad y serán comercializados en el mercado Huamanga.</text:span><text:span text:style-name="T22"/></text:p>
              <text:p text:style-name="P74" loext:marker-style-name="T69"/>
            </table:table-cell>
          </table:table-row>
          <table:table-row table:style-name="Tabla11.2">
            <table:covered-table-cell table:style-name="Tabla11.A2"/>
          </table:table-row>
        </table:table>
        <text:list text:continue-list="list24254409411508" text:style-name="WWNum5">
          <text:list-item>
            <text:list>
              <text:list-item>
                <text:p text:style-name="P15" loext:marker-style-name="T7"><text:span text:style-name="T19">Clasificador del gasto: la ubicación de la propuesta productiva en la cadena programática: </text:span><text:span text:style-name="T19"/></text:p>
              </text:list-item>
            </text:list>
          </text:list-item>
        </text:list>
        <table:table table:name="Tabla12" table:style-name="Tabla12">
          <table:table-column table:style-name="Tabla12.A"/>
          <table:table-column table:style-name="Tabla12.B"/>
          <table:table-row table:style-name="Tabla12.1">
            <table:table-cell table:style-name="Tabla12.A1" office:value-type="string">
              <text:p text:style-name="P31" loext:marker-style-name="T7"><text:span text:style-name="T11">Función</text:span><text:span text:style-name="T11"/></text:p>
            </table:table-cell>
            <table:table-cell table:style-name="Tabla12.A1" office:value-type="string">
              <text:p text:style-name="P62" loext:marker-style-name="T9"/>
            </table:table-cell>
          </table:table-row>
          <table:table-row table:style-name="Tabla12.1">
            <table:table-cell table:style-name="Tabla12.A1" office:value-type="string">
              <text:p text:style-name="P31" loext:marker-style-name="T7"><text:span text:style-name="T11">División</text:span><text:span text:style-name="T11"/></text:p>
            </table:table-cell>
            <table:table-cell table:style-name="Tabla12.A1" office:value-type="string">
              <text:p text:style-name="P62" loext:marker-style-name="T9"/>
            </table:table-cell>
          </table:table-row>
          <table:table-row table:style-name="Tabla12.1">
            <table:table-cell table:style-name="Tabla12.A1" office:value-type="string">
              <text:p text:style-name="P31" loext:marker-style-name="T7"><text:span text:style-name="T11">Grupo</text:span><text:span text:style-name="T11"/></text:p>
            </table:table-cell>
            <table:table-cell table:style-name="Tabla12.A1" office:value-type="string">
              <text:p text:style-name="P62" loext:marker-style-name="T9"/>
            </table:table-cell>
          </table:table-row>
        </table:table>
        <text:list xml:id="list24255651016042" text:continue-numbering="true" text:style-name="WWNum5">
          <text:list-item>
            <text:list>
              <text:list-item>
                <text:p text:style-name="P15" loext:marker-style-name="T7"><text:span text:style-name="T19">Objetivos y descripción de la propuesta productiva</text:span><text:span text:style-name="T19"/></text:p>
              </text:list-item>
            </text:list>
          </text:list-item>
        </text:list>
        <text:list text:style-name="WWNum3">
          <text:list-item>
            <text:list>
              <text:list-item>
                <text:list>
                  <text:list-item>
                    <text:p text:style-name="P24" loext:marker-style-name="T7"><text:span text:style-name="T8"><text:s/>Misión:</text:span><text:span text:style-name="T8"/></text:p>
                  </text:list-item>
                </text:list>
              </text:list-item>
            </text:list>
          </text:list-item>
        </text:list>
        <table:table table:name="Tabla13" table:style-name="Tabla13">
          <table:table-column table:style-name="Tabla13.A"/>
          <table:table-row table:style-name="Tabla13.1">
            <table:table-cell table:style-name="Tabla13.A1" office:value-type="string">
              <text:p text:style-name="P25" loext:marker-style-name="T7"><text:span text:style-name="T8">Somos una de las mejores organizaciones productora de cuy, que busca crecer y consolidarse en el mercado actual, nuestra asociación tiene el compromiso de enfrentar nuevos retos para mejorar nuestra calidad de producto, elevar los niveles de producción, generar productos con valor agregado, comercializar a nuevos mercados y generar puestos de trabajo</text:span><text:span text:style-name="T8"/></text:p>
            </table:table-cell>
          </table:table-row>
        </table:table>
        <text:list text:continue-numbering="true" text:style-name="WWNum3">
          <text:list-item>
            <text:list>
              <text:list-item>
                <text:list>
                  <text:list-item>
                    <text:p text:style-name="P24" loext:marker-style-name="T7"><text:span text:style-name="T8">Visión </text:span><text:span text:style-name="T8"/></text:p>
                  </text:list-item>
                </text:list>
              </text:list-item>
            </text:list>
          </text:list-item>
        </text:list>
        <table:table table:name="Tabla14" table:style-name="Tabla14">
          <table:table-column table:style-name="Tabla14.A"/>
          <text:soft-page-break/>
          <table:table-row table:style-name="Tabla14.1">
            <table:table-cell table:style-name="Tabla14.A1" office:value-type="string">
              <text:p text:style-name="P46" loext:marker-style-name="T7"><text:span text:style-name="T8">Al 2025 la Asociación de Productores Agropecuarios Lambrashuaycco de Casaorcco (APAL) será una organización empresarial competitiva e innovadora que cumpla con los estándares de calidad para ser reconocidos, como la mejor institución productora de cuyes a nivel local y regional; con capacidad de competir en los mercados competitivos y con responsabilidad</text:span><text:span text:style-name="T8"/></text:p>
              <text:p text:style-name="P25" loext:marker-style-name="T7"><text:span text:style-name="T8">ambiental.</text:span><text:span text:style-name="T8"/></text:p>
            </table:table-cell>
          </table:table-row>
        </table:table>
        <text:list text:continue-numbering="true" text:style-name="WWNum3">
          <text:list-item>
            <text:list>
              <text:list-item>
                <text:list>
                  <text:list-item>
                    <text:p text:style-name="P24" loext:marker-style-name="T7"><text:span text:style-name="T8">Objetivos (deben ser medibles y/o cuantificables)</text:span><text:span text:style-name="T8"/></text:p>
                  </text:list-item>
                </text:list>
              </text:list-item>
            </text:list>
          </text:list-item>
        </text:list>
        <table:table table:name="Tabla15" table:style-name="Tabla15">
          <table:table-column table:style-name="Tabla15.A"/>
          <table:table-row table:style-name="Tabla15.1">
            <table:table-cell table:style-name="Tabla15.A1" office:value-type="string">
              <text:p text:style-name="P44" loext:marker-style-name="T7"><text:span text:style-name="T27"><text:s/>CORTO PLAZO:</text:span><text:span text:style-name="T27"/></text:p>
              <text:list text:style-name="WWNum9">
                <text:list-item>
                  <text:p text:style-name="P18" loext:marker-style-name="T7"><text:span text:style-name="T27">Fortalecer la asociatividad para el desarrollo y crecimiento de la iniciativa de negocio.</text:span><text:span text:style-name="T27"/></text:p>
                </text:list-item>
                <text:list-item>
                  <text:p text:style-name="P18" loext:marker-style-name="T7"><text:span text:style-name="T27">Mejora de la infraestructura para un mejor manejo técnico de la crianza de cuy.</text:span><text:span text:style-name="T27"/></text:p>
                </text:list-item>
                <text:list-item>
                  <text:p text:style-name="P18" loext:marker-style-name="T7"><text:span text:style-name="T27">Introducción de reproductores mejorados.</text:span><text:span text:style-name="T27"/></text:p>
                </text:list-item>
                <text:list-item>
                  <text:p text:style-name="P18" loext:marker-style-name="T7"><text:span text:style-name="T27">Mejorar las capacidades productivas, de organización y de gestión empresarial.</text:span><text:span text:style-name="T27"/></text:p>
                </text:list-item>
              </text:list>
              <text:p text:style-name="P27" loext:marker-style-name="T27"/>
            </table:table-cell>
          </table:table-row>
          <table:table-row table:style-name="Tabla15.1">
            <table:table-cell table:style-name="Tabla15.A1" office:value-type="string">
              <text:p text:style-name="P44" loext:marker-style-name="T7"><text:span text:style-name="T27">MEDIANO PLAZO:</text:span><text:span text:style-name="T27"/></text:p>
              <text:list text:style-name="WWNum10">
                <text:list-item>
                  <text:p text:style-name="P19" loext:marker-style-name="T7"><text:span text:style-name="T27">Conseguir el registro de libro abierto de las crías que van naciendo.</text:span><text:span text:style-name="T27"/></text:p>
                </text:list-item>
                <text:list-item>
                  <text:p text:style-name="P19" loext:marker-style-name="T7"><text:span text:style-name="T27">Protección al medio ambiente.</text:span><text:span text:style-name="T27"/></text:p>
                </text:list-item>
                <text:list-item>
                  <text:p text:style-name="P19" loext:marker-style-name="T7"><text:span text:style-name="T27">Producción y comercialización de cuyes de calidad y lograr la estandarización de la producción.</text:span><text:span text:style-name="T27"/></text:p>
                </text:list-item>
              </text:list>
              <text:p text:style-name="P62" loext:marker-style-name="T9"/>
            </table:table-cell>
          </table:table-row>
          <table:table-row table:style-name="Tabla15.1">
            <table:table-cell table:style-name="Tabla15.A1" office:value-type="string">
              <text:p text:style-name="P44" loext:marker-style-name="T7"><text:span text:style-name="T27">LARGO PLAZO:</text:span><text:span text:style-name="T27"/></text:p>
              <text:list text:style-name="WWNum11">
                <text:list-item>
                  <text:p text:style-name="P20" loext:marker-style-name="T7"><text:span text:style-name="T27">Posicionamiento en el mercado a nivel local y regional.</text:span><text:span text:style-name="T27"/></text:p>
                </text:list-item>
              </text:list>
              <text:p text:style-name="P63" loext:marker-style-name="T9"/>
            </table:table-cell>
          </table:table-row>
        </table:table>
        <text:list text:continue-list="list24255651016042" text:style-name="WWNum5">
          <text:list-item>
            <text:list>
              <text:list-item>
                <text:p text:style-name="P15" loext:marker-style-name="T7"><text:span text:style-name="T19">UBICACIÓN DE LA PROPUESTA PRODUCTIVA: La propuesta productiva interviene en las siguientes actividades:</text:span><text:span text:style-name="T19"/></text:p>
              </text:list-item>
            </text:list>
          </text:list-item>
        </text:list>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31" loext:marker-style-name="T7"><text:span text:style-name="T67">Ubicación de la cadena productiva</text:span><text:span text:style-name="T67"/></text:p>
            </table:table-cell>
            <table:table-cell table:style-name="Tabla16.A1" office:value-type="string">
              <text:p text:style-name="P31" loext:marker-style-name="T7"><text:span text:style-name="T67">Marca con una aspa</text:span><text:span text:style-name="T67"/></text:p>
            </table:table-cell>
            <table:table-cell table:style-name="Tabla16.A1" office:value-type="string">
              <text:p text:style-name="P31" loext:marker-style-name="T7"><text:span text:style-name="T67">Describir brevemente</text:span><text:span text:style-name="T67"/></text:p>
            </table:table-cell>
          </table:table-row>
          <table:table-row table:style-name="Tabla16.1">
            <table:table-cell table:style-name="Tabla16.A1" office:value-type="string">
              <text:p text:style-name="P46" loext:marker-style-name="T7"><text:span text:style-name="T69">Producción</text:span><text:span text:style-name="T69"/></text:p>
            </table:table-cell>
            <table:table-cell table:style-name="Tabla16.A1" office:value-type="string">
              <text:p text:style-name="P46" loext:marker-style-name="T7"><text:span text:style-name="T69"><text:s/>X</text:span><text:span text:style-name="T69"/></text:p>
            </table:table-cell>
            <table:table-cell table:style-name="Tabla16.A1" office:value-type="string">
              <text:p text:style-name="P31" loext:marker-style-name="T7"><text:span text:style-name="T70">----------------</text:span><text:span text:style-name="T70"/></text:p>
            </table:table-cell>
          </table:table-row>
          <table:table-row table:style-name="Tabla16.1">
            <table:table-cell table:style-name="Tabla16.A1" office:value-type="string">
              <text:p text:style-name="P46" loext:marker-style-name="T7"><text:span text:style-name="T69">Post-producción</text:span><text:span text:style-name="T69"/></text:p>
            </table:table-cell>
            <table:table-cell table:style-name="Tabla16.A1" office:value-type="string">
              <text:p text:style-name="P61" loext:marker-style-name="T7"/>
            </table:table-cell>
            <table:table-cell table:style-name="Tabla16.A1" office:value-type="string">
              <text:p text:style-name="P77" loext:marker-style-name="T69"/>
            </table:table-cell>
          </table:table-row>
          <table:table-row table:style-name="Tabla16.1">
            <table:table-cell table:style-name="Tabla16.A1" office:value-type="string">
              <text:p text:style-name="P46" loext:marker-style-name="T7"><text:span text:style-name="T69">Transformación</text:span><text:span text:style-name="T69"/></text:p>
            </table:table-cell>
            <table:table-cell table:style-name="Tabla16.A1" office:value-type="string">
              <text:p text:style-name="P61" loext:marker-style-name="T7"/>
            </table:table-cell>
            <table:table-cell table:style-name="Tabla16.A1" office:value-type="string">
              <text:p text:style-name="P59" loext:marker-style-name="T7"/>
            </table:table-cell>
          </table:table-row>
          <table:table-row table:style-name="Tabla16.1">
            <table:table-cell table:style-name="Tabla16.A1" office:value-type="string">
              <text:p text:style-name="P46" loext:marker-style-name="T7"><text:span text:style-name="T69">Comercialización</text:span><text:span text:style-name="T69"/></text:p>
            </table:table-cell>
            <table:table-cell table:style-name="Tabla16.A1" office:value-type="string">
              <text:p text:style-name="P46" loext:marker-style-name="T7"><text:span text:style-name="T69"><text:s/>X</text:span><text:span text:style-name="T69"/></text:p>
            </table:table-cell>
            <table:table-cell table:style-name="Tabla16.A1" office:value-type="string">
              <text:p text:style-name="P31" loext:marker-style-name="T7"><text:span text:style-name="T70">-----------------</text:span><text:span text:style-name="T70"/></text:p>
            </table:table-cell>
          </table:table-row>
        </table:table>
        <text:list text:continue-numbering="true" text:style-name="WWNum5">
          <text:list-item>
            <text:list>
              <text:list-item>
                <text:p text:style-name="P15" loext:marker-style-name="T7"><text:span text:style-name="T19">FUNDAMENTAR QUE LA PROPUESTA PRODUCTIVA NO ES DUPLICACIÓN DE OTRA.</text:span><text:span text:style-name="T19"/></text:p>
              </text:list-item>
            </text:list>
          </text:list-item>
        </text:list>
        <table:table table:name="Tabla17" table:style-name="Tabla17">
          <table:table-column table:style-name="Tabla17.A"/>
          <table:table-row table:style-name="Tabla17.1">
            <table:table-cell table:style-name="Tabla17.A1" office:value-type="string">
              <text:p text:style-name="P62" loext:marker-style-name="T9"/>
            </table:table-cell>
          </table:table-row>
        </table:table>
        <text:list text:continue-numbering="true" text:style-name="WWNum5">
          <text:list-item>
            <text:p text:style-name="P21" loext:marker-style-name="T7"><text:span text:style-name="T1">EL PRODUCTO Y LA CADENA PRODUCTIVA</text:span><text:span text:style-name="T1"/></text:p>
            <text:list>
              <text:list-item>
                <text:p text:style-name="P23" loext:marker-style-name="T7"><text:span text:style-name="T1">EL PRODUCTO DE LA PROPUESTA PRODUCTIVA: descripción del producto a vender, incluye imagen</text:span><text:span text:style-name="T1"/></text:p>
              </text:list-item>
            </text:list>
          </text:list-item>
        </text:list>
        <table:table table:name="Tabla18" table:style-name="Tabla18">
          <table:table-column table:style-name="Tabla18.A"/>
          <table:table-row table:style-name="Tabla18.1">
            <table:table-cell table:style-name="Tabla18.A1" office:value-type="string">
              <text:p text:style-name="P46" loext:marker-style-name="T7"><text:span text:style-name="T9">La carne de cuy es un producto de excelente calidad, alto valor biológico, elevado contenido de proteína y bajo contenido de grasa en comparación con otras carnes. La precocidad y prolificidad unidas a la calidad de su carne, son características sobre salientes del cuy, su carne comparada con otras especies resulta ser más proteica</text:span><text:span text:style-name="T10">…..</text:span></text:p>
            </table:table-cell>
          </table:table-row>
        </table:table>
        <text:list text:continue-numbering="true" text:style-name="WWNum5">
          <text:list-item>
            <text:list>
              <text:list-item>
                <text:p text:style-name="P23" loext:marker-style-name="T7"><text:span text:style-name="T1">DIAGNOSTICO DE LA SITUACION ACTUAL: describir como está el negocio, en qué situación se encuentra: </text:span><text:span text:style-name="T1"/></text:p>
              </text:list-item>
            </text:list>
          </text:list-item>
        </text:list>
        <table:table table:name="Tabla19" table:style-name="Tabla19">
          <table:table-column table:style-name="Tabla19.A"/>
          <table:table-row table:style-name="Tabla19.1">
            <table:table-cell table:style-name="Tabla19.A1" table:number-rows-spanned="2" office:value-type="string">
              <text:p text:style-name="P44" loext:marker-style-name="T7"><text:span text:style-name="T4">Proveedores</text:span><text:span text:style-name="T28">: Los proveedores de insumos forrajera para los cuyes son los mismos criadores. Los proveedores de semovientes se encuentran en el Huanta, Huamanga, Huancayo y estaciones experimentales del INIA- Canaán</text:span></text:p>
              <text:p text:style-name="P44" loext:marker-style-name="T7"><text:span text:style-name="T4">Plantel de reproductores</text:span><text:span text:style-name="T28">: Los socios del AEO “Asociación de Productores Agropecuarios Lambrashuaycco de Casaorcco (APAL), tiene cuyes reproductores de línea Perú, inti y andina están degeneradas por falta de manejo genético.</text:span></text:p>
              <text:p text:style-name="P44" loext:marker-style-name="T7"><text:span text:style-name="T4">Manejo</text:span><text:span text:style-name="T28">: El manejo de los cuyes se realiza en pozas, separando los gazapos a los 21 días de edad, el empadre es continuo. El manejo de los destetados es por lotes de hembras y machos y la crianza de realiza en el galpón de cuyes ubicado en el caserío de Lambrashuaycco, Comunidad de Casaorcco.</text:span></text:p>
              <text:p text:style-name="P44" loext:marker-style-name="T7"><text:span text:style-name="T4">Alimentación</text:span><text:span text:style-name="T28">: La AEO cuentan con parcelas de pastos instalados, contando con promedio 0.6 Has por socio de pastos instalados que tienen hasta el sexto corte por año. También utilizan otros sub productos de cosechas de maíz (panca), la paja de trigo o cebada (uso como cama y alimento). El concentrado o alimento industrial compran en la ciudad de Huamanga donde existen distribuidores exclusivos en este rublo de alimentos</text:span></text:p>
              <text:p text:style-name="P44" loext:marker-style-name="T7"><text:span text:style-name="T4">Control Sanitario</text:span><text:span text:style-name="T28">: La prevención para el ataque de parásitos internos y externos, no es programada se realiza cuando la plaga o enfermedad está presente en el galpón o lugar donde crían, la limpieza de los galpones se realiza Inter diaria, con respecto a normas de Bio seguridad, se tiene implementado maniluvios y pediluvios a la entrada del galpón.</text:span></text:p>
              <text:p text:style-name="P44" loext:marker-style-name="T7"><text:span text:style-name="T4">Saca</text:span><text:span text:style-name="T28">: La saca se realiza generalmente cuando la familia necesita tener liquidez económica, o cuando el consumidor llega a comprarles el producto, también realizan saca, cuando el cuy ha alcanzado su edad adulta o pesa más de un kilo</text:span></text:p>
              <text:p text:style-name="P44" loext:marker-style-name="T7"><text:span text:style-name="T4">Comercialización</text:span><text:span text:style-name="T28">: El producto en su mayoría se vende en el galpón de crianza, allí acuden los comerciantes, intermediarios, y los compradores para los restaurantes. Cuando es traslado a centros de venta lo realizan en jabas</text:span></text:p>
              <text:p text:style-name="P44" loext:marker-style-name="T7"><text:span text:style-name="T4">Cantidades producidas</text:span><text:span text:style-name="T28">: La AEO en la actualidad producen la cantidad de 809 cuyes hembras, 97 machos, 335 recrías, (Fuente: Diagnostico de Campo. 2020).</text:span></text:p>
              <text:p text:style-name="P44" loext:marker-style-name="T7"><text:span text:style-name="T28">El distrito de Carmen Alto, se caracteriza por presentar una geografía accidentada, sin embargo, se tiene zonas apropiadas con gran potencial para desarrollar la crianza de cuyes, cuenta con abundante recurso hídrico, pastos cultivados que permiten abastecer suficientemente la crianza de cuyes. El obstáculo principal reside en la limitada tecnificación, asistencia técnica y acceso al crédito.</text:span><text:span text:style-name="T28"/></text:p>
              <text:p text:style-name="P75" loext:marker-style-name="T69"/>
            </table:table-cell>
          </table:table-row>
          <table:table-row table:style-name="Tabla19.1">
            <table:covered-table-cell table:style-name="Tabla19.A1"/>
          </table:table-row>
        </table:table>
        <text:list text:continue-numbering="true" text:style-name="WWNum5">
          <text:list-item>
            <text:list>
              <text:list-item>
                <text:p text:style-name="P23" loext:marker-style-name="T7"><text:span text:style-name="T1">LA CADENA PRODUCTIVA:</text:span><text:span text:style-name="T1"/></text:p>
              </text:list-item>
            </text:list>
          </text:list-item>
        </text:list>
        <table:table table:name="Tabla20" table:style-name="Tabla20">
          <table:table-column table:style-name="Tabla20.A"/>
          <table:table-column table:style-name="Tabla20.B"/>
          <table:table-row table:style-name="Tabla20.1">
            <table:table-cell table:style-name="Tabla20.A1" office:value-type="string">
              <text:p text:style-name="P46" loext:marker-style-name="T7"><text:span text:style-name="T9">Producto</text:span><text:span text:style-name="T9"/></text:p>
            </table:table-cell>
            <table:table-cell table:style-name="Tabla20.A1" office:value-type="string">
              <text:p text:style-name="P46" loext:marker-style-name="T7"><text:span text:style-name="T9"><text:s/>Cuy parrillero</text:span><text:span text:style-name="T9"/></text:p>
            </table:table-cell>
          </table:table-row>
          <table:table-row table:style-name="Tabla20.2">
            <table:table-cell table:style-name="Tabla20.A1" office:value-type="string">
              <text:p text:style-name="P46" loext:marker-style-name="T7"><text:span text:style-name="T9">Sector</text:span><text:span text:style-name="T9"/></text:p>
            </table:table-cell>
            <table:table-cell table:style-name="Tabla20.A1" office:value-type="string">
              <text:p text:style-name="P46" loext:marker-style-name="T7"><text:span text:style-name="T9">pecuario</text:span><text:span text:style-name="T9"/></text:p>
            </table:table-cell>
          </table:table-row>
          <table:table-row table:style-name="Tabla20.1">
            <table:table-cell table:style-name="Tabla20.A1" office:value-type="string">
              <text:p text:style-name="P46" loext:marker-style-name="T7"><text:span text:style-name="T9">Cadena</text:span><text:span text:style-name="T9"/></text:p>
            </table:table-cell>
            <table:table-cell table:style-name="Tabla20.A1" office:value-type="string">
              <text:p text:style-name="P46" loext:marker-style-name="T7"><text:span text:style-name="T9">cuy</text:span><text:span text:style-name="T9"/></text:p>
            </table:table-cell>
          </table:table-row>
          <table:table-row table:style-name="Tabla20.2">
            <table:table-cell table:style-name="Tabla20.A1" office:value-type="string">
              <text:p text:style-name="P46" loext:marker-style-name="T7"><text:span text:style-name="T9">Eslabonamiento</text:span><text:span text:style-name="T9"/></text:p>
            </table:table-cell>
            <table:table-cell table:style-name="Tabla20.A1" office:value-type="string">
              <text:p text:style-name="P46" loext:marker-style-name="T7"><text:span text:style-name="T9">Producción y comercialización</text:span><text:span text:style-name="T9"/></text:p>
            </table:table-cell>
          </table:table-row>
        </table:table>
        <text:list text:continue-numbering="true" text:style-name="WWNum5">
          <text:list-item>
            <text:list>
              <text:list-item>
                <text:p text:style-name="P23" loext:marker-style-name="T7"><text:span text:style-name="T1">ALIANZAS ESTRATEGICAS Y OPORTUNIDADES DE NEGOCIO: La propuesta productiva a identificado alianzas estratégicas para la producción u oportunidades de negocios para la comercialización, probables o concretadas, instituciones u otras organizaciones.</text:span><text:span text:style-name="T1"/></text:p>
              </text:list-item>
            </text:list>
          </text:list-item>
        </text:list>
        <table:table table:name="Tabla21" table:style-name="Tabla21">
          <table:table-column table:style-name="Tabla21.A"/>
          <table:table-column table:style-name="Tabla21.B"/>
          <table:table-column table:style-name="Tabla21.C"/>
          <table:table-column table:style-name="Tabla21.D"/>
          <text:soft-page-break/>
          <table:table-row table:style-name="Tabla21.1">
            <table:table-cell table:style-name="Tabla21.A1" office:value-type="string">
              <text:p text:style-name="P31" loext:marker-style-name="T7"><text:span text:style-name="T67">Descripción de la alianza estratégica u oportunidad de negocio</text:span><text:span text:style-name="T67"/></text:p>
            </table:table-cell>
            <table:table-cell table:style-name="Tabla21.B1" office:value-type="string">
              <text:p text:style-name="P31" loext:marker-style-name="T7"><text:span text:style-name="T67">Finalidad</text:span><text:span text:style-name="T67"/></text:p>
            </table:table-cell>
            <table:table-cell table:style-name="Tabla21.B1" office:value-type="string">
              <text:p text:style-name="P31" loext:marker-style-name="T7"><text:span text:style-name="T67">Empresa u organización</text:span><text:span text:style-name="T67"/></text:p>
            </table:table-cell>
            <table:table-cell table:style-name="Tabla21.B1" office:value-type="string">
              <text:p text:style-name="P31" loext:marker-style-name="T7"><text:span text:style-name="T67">La alianza u oportunidad ¿Es probable o concreta*?</text:span><text:span text:style-name="T67"/></text:p>
            </table:table-cell>
          </table:table-row>
          <table:table-row table:style-name="Tabla21.2">
            <table:table-cell table:style-name="Tabla21.A2" office:value-type="string">
              <text:p text:style-name="P46" loext:marker-style-name="T7"><text:span text:style-name="T69">1 </text:span><text:span text:style-name="T29">C</text:span><text:span text:style-name="T33">o</text:span><text:span text:style-name="T37">f</text:span><text:span text:style-name="T41">i</text:span><text:span text:style-name="T33">nanc</text:span><text:span text:style-name="T41">i</text:span><text:span text:style-name="T33">a</text:span><text:span text:style-name="T45">m</text:span><text:span text:style-name="T41">i</text:span><text:span text:style-name="T33">en</text:span><text:span text:style-name="T37">t</text:span><text:span text:style-name="T23">o </text:span><text:span text:style-name="T33">pa</text:span><text:span text:style-name="T37">r</text:span><text:span text:style-name="T23">a</text:span><text:span text:style-name="T29"> </text:span><text:span text:style-name="T41">l</text:span><text:span text:style-name="T23">a</text:span><text:span text:style-name="T29"> Formulación de</text:span><text:span text:style-name="T23">l</text:span><text:span text:style-name="T48"> </text:span><text:span text:style-name="T45">P</text:span><text:span text:style-name="T41">l</text:span><text:span text:style-name="T33">a</text:span><text:span text:style-name="T23">n</text:span><text:span text:style-name="T29"> </text:span><text:span text:style-name="T33">d</text:span><text:span text:style-name="T23">e </text:span><text:span text:style-name="T29">N</text:span><text:span text:style-name="T33">e</text:span><text:span text:style-name="T50">g</text:span><text:span text:style-name="T33">oc</text:span><text:span text:style-name="T41">i</text:span><text:span text:style-name="T23">o</text:span></text:p>
            </table:table-cell>
            <table:table-cell table:style-name="Tabla21.B2" office:value-type="string">
              <text:p text:style-name="P31" loext:marker-style-name="T7"><text:span text:style-name="T31">A</text:span><text:span text:style-name="T35">s</text:span><text:span text:style-name="T43">i</text:span><text:span text:style-name="T35">gna</text:span><text:span text:style-name="T54">r</text:span><text:span text:style-name="T52"> </text:span><text:span text:style-name="T39">r</text:span><text:span text:style-name="T35">ecu</text:span><text:span text:style-name="T39">r</text:span><text:span text:style-name="T52">s</text:span><text:span text:style-name="T35">o</text:span><text:span text:style-name="T54">s </text:span><text:span text:style-name="T35">pa</text:span><text:span text:style-name="T39">r</text:span><text:span text:style-name="T54">a </text:span><text:span text:style-name="T31">PROCO</text:span><text:span text:style-name="T55">M</text:span><text:span text:style-name="T31">P</text:span><text:span text:style-name="T39">I</text:span><text:span text:style-name="T52">T</text:span><text:span text:style-name="T54">E</text:span></text:p>
            </table:table-cell>
            <table:table-cell table:style-name="Tabla21.B2" office:value-type="string">
              <text:p text:style-name="P31" loext:marker-style-name="T7"><text:span text:style-name="T55">M</text:span><text:span text:style-name="T39">.</text:span><text:span text:style-name="T31">D</text:span><text:span text:style-name="T54">.</text:span><text:span text:style-name="T52"> Carmen Alto</text:span></text:p>
            </table:table-cell>
            <table:table-cell table:style-name="Tabla21.B2" office:value-type="string">
              <text:p text:style-name="P46" loext:marker-style-name="T7"><text:span text:style-name="T31">P</text:span><text:span text:style-name="T39">r</text:span><text:span text:style-name="T35">ob</text:span><text:span text:style-name="T52">a</text:span><text:span text:style-name="T35">b</text:span><text:span text:style-name="T43">l</text:span><text:span text:style-name="T54">e</text:span></text:p>
            </table:table-cell>
          </table:table-row>
          <table:table-row table:style-name="Tabla21.2">
            <table:table-cell table:style-name="Tabla21.A2" office:value-type="string">
              <text:p text:style-name="P46" loext:marker-style-name="T7"><text:span text:style-name="T69">2</text:span><text:span text:style-name="T35"> p</text:span><text:span text:style-name="T39">r</text:span><text:span text:style-name="T52">o</text:span><text:span text:style-name="T58">v</text:span><text:span text:style-name="T52">e</text:span><text:span text:style-name="T35">e</text:span><text:span text:style-name="T52">d</text:span><text:span text:style-name="T35">o</text:span><text:span text:style-name="T39">r</text:span><text:span text:style-name="T35">e</text:span><text:span text:style-name="T54">s</text:span><text:span text:style-name="T31"> </text:span><text:span text:style-name="T52">d</text:span><text:span text:style-name="T54">e </text:span><text:span text:style-name="T35">co</text:span><text:span text:style-name="T52">n</text:span><text:span text:style-name="T35">oc</text:span><text:span text:style-name="T43">i</text:span><text:span text:style-name="T47">m</text:span><text:span text:style-name="T43">i</text:span><text:span text:style-name="T35">en</text:span><text:span text:style-name="T39">t</text:span><text:span text:style-name="T54">o</text:span></text:p>
            </table:table-cell>
            <table:table-cell table:style-name="Tabla21.B2" office:value-type="string">
              <text:p text:style-name="P31" loext:marker-style-name="T7"><text:span text:style-name="T31">G</text:span><text:span text:style-name="T35">ene</text:span><text:span text:style-name="T43">r</text:span><text:span text:style-name="T35">ac</text:span><text:span text:style-name="T43">i</text:span><text:span text:style-name="T35">ó</text:span><text:span text:style-name="T54">n</text:span><text:span text:style-name="T31"> </text:span><text:span text:style-name="T35">d</text:span><text:span text:style-name="T54">e </text:span><text:span text:style-name="T39">t</text:span><text:span text:style-name="T35">ecno</text:span><text:span text:style-name="T43">l</text:span><text:span text:style-name="T35">og</text:span><text:span text:style-name="T39">í</text:span><text:span text:style-name="T35">a</text:span><text:span text:style-name="T54">, </text:span><text:span text:style-name="T43">i</text:span><text:span text:style-name="T35">n</text:span><text:span text:style-name="T39">f</text:span><text:span text:style-name="T35">o</text:span><text:span text:style-name="T39">r</text:span><text:span text:style-name="T47">m</text:span><text:span text:style-name="T35">ac</text:span><text:span text:style-name="T43">i</text:span><text:span text:style-name="T35">ó</text:span><text:span text:style-name="T54">n</text:span></text:p>
            </table:table-cell>
            <table:table-cell table:style-name="Tabla21.B2" office:value-type="string">
              <text:p text:style-name="P31" loext:marker-style-name="T7"><text:span text:style-name="T31">UNSCH</text:span><text:span text:style-name="T31"/></text:p>
            </table:table-cell>
            <table:table-cell table:style-name="Tabla21.B2" office:value-type="string">
              <text:p text:style-name="P46" loext:marker-style-name="T7"><text:span text:style-name="T31">P</text:span><text:span text:style-name="T39">r</text:span><text:span text:style-name="T35">ob</text:span><text:span text:style-name="T52">a</text:span><text:span text:style-name="T35">b</text:span><text:span text:style-name="T43">l</text:span><text:span text:style-name="T54">e</text:span></text:p>
            </table:table-cell>
          </table:table-row>
          <table:table-row table:style-name="Tabla21.2">
            <table:table-cell table:style-name="Tabla21.A2" office:value-type="string">
              <text:p text:style-name="P46" loext:marker-style-name="T7"><text:span text:style-name="T69">3</text:span><text:span text:style-name="T32"> C</text:span><text:span text:style-name="T36">en</text:span><text:span text:style-name="T40">tr</text:span><text:span text:style-name="T60">o</text:span><text:span text:style-name="T32"> </text:span><text:span text:style-name="T36">d</text:span><text:span text:style-name="T60">e </text:span><text:span text:style-name="T44">i</text:span><text:span text:style-name="T36">n</text:span><text:span text:style-name="T59">v</text:span><text:span text:style-name="T53">e</text:span><text:span text:style-name="T36">s</text:span><text:span text:style-name="T40">t</text:span><text:span text:style-name="T44">i</text:span><text:span text:style-name="T36">gac</text:span><text:span text:style-name="T44">i</text:span><text:span text:style-name="T36">ó</text:span><text:span text:style-name="T60">n</text:span></text:p>
            </table:table-cell>
            <table:table-cell table:style-name="Tabla21.B2" office:value-type="string">
              <text:p text:style-name="P31" loext:marker-style-name="T7"><text:span text:style-name="T30">Asistencia Técnica y capacitación en manejo de Cuyes</text:span><text:span text:style-name="T30"/></text:p>
            </table:table-cell>
            <table:table-cell table:style-name="Tabla21.B2" office:value-type="string">
              <text:p text:style-name="P31" loext:marker-style-name="T7"><text:span text:style-name="T40">I</text:span><text:span text:style-name="T32">N</text:span><text:span text:style-name="T40">I</text:span><text:span text:style-name="T60">A</text:span></text:p>
            </table:table-cell>
            <table:table-cell table:style-name="Tabla21.B2" office:value-type="string">
              <text:p text:style-name="P46" loext:marker-style-name="T7"><text:span text:style-name="T69"><text:s/></text:span><text:span text:style-name="T32">C</text:span><text:span text:style-name="T36">o</text:span><text:span text:style-name="T53">n</text:span><text:span text:style-name="T36">c</text:span><text:span text:style-name="T40">r</text:span><text:span text:style-name="T36">e</text:span><text:span text:style-name="T40">t</text:span><text:span text:style-name="T60">a</text:span></text:p>
            </table:table-cell>
          </table:table-row>
          <table:table-row table:style-name="Tabla21.2">
            <table:table-cell table:style-name="Tabla21.A2" office:value-type="string">
              <text:p text:style-name="P46" loext:marker-style-name="T7"><text:span text:style-name="T69">4</text:span><text:span text:style-name="T32"> C</text:span><text:span text:style-name="T36">on</text:span><text:span text:style-name="T40">tr</text:span><text:span text:style-name="T36">o</text:span><text:span text:style-name="T60">l</text:span><text:span text:style-name="T49"> </text:span><text:span text:style-name="T36">d</text:span><text:span text:style-name="T60">e</text:span><text:span text:style-name="T32"> </text:span><text:span text:style-name="T44">l</text:span><text:span text:style-name="T60">a </text:span><text:span text:style-name="T36">san</text:span><text:span text:style-name="T44">i</text:span><text:span text:style-name="T36">da</text:span><text:span text:style-name="T60">d</text:span></text:p>
            </table:table-cell>
            <table:table-cell table:style-name="Tabla21.B2" office:value-type="string">
              <text:p text:style-name="P31" loext:marker-style-name="T7"><text:span text:style-name="T30">C</text:span><text:span text:style-name="T34">e</text:span><text:span text:style-name="T38">rt</text:span><text:span text:style-name="T42">i</text:span><text:span text:style-name="T61">f</text:span><text:span text:style-name="T42">i</text:span><text:span text:style-name="T34">cac</text:span><text:span text:style-name="T42">i</text:span><text:span text:style-name="T34">ó</text:span><text:span text:style-name="T24">n</text:span><text:span text:style-name="T30"> </text:span><text:span text:style-name="T34">d</text:span><text:span text:style-name="T24">e </text:span><text:span text:style-name="T34">p</text:span><text:span text:style-name="T38">r</text:span><text:span text:style-name="T34">od</text:span><text:span text:style-name="T51">u</text:span><text:span text:style-name="T34">c</text:span><text:span text:style-name="T38">t</text:span><text:span text:style-name="T34">o</text:span><text:span text:style-name="T24">s</text:span><text:span text:style-name="T56"> </text:span><text:span text:style-name="T34">d</text:span><text:span text:style-name="T24">e </text:span><text:span text:style-name="T34">ca</text:span><text:span text:style-name="T38">l</text:span><text:span text:style-name="T42">i</text:span><text:span text:style-name="T34">da</text:span><text:span text:style-name="T24">d</text:span></text:p>
            </table:table-cell>
            <table:table-cell table:style-name="Tabla21.B2" office:value-type="string">
              <text:p text:style-name="P31" loext:marker-style-name="T7"><text:span text:style-name="T32">SEN</text:span><text:span text:style-name="T57">A</text:span><text:span text:style-name="T32">S</text:span><text:span text:style-name="T60">A</text:span></text:p>
            </table:table-cell>
            <table:table-cell table:style-name="Tabla21.B2" office:value-type="string">
              <text:p text:style-name="P46" loext:marker-style-name="T7"><text:span text:style-name="T31">P</text:span><text:span text:style-name="T39">r</text:span><text:span text:style-name="T35">ob</text:span><text:span text:style-name="T52">a</text:span><text:span text:style-name="T35">b</text:span><text:span text:style-name="T43">l</text:span><text:span text:style-name="T54">e</text:span></text:p>
            </table:table-cell>
          </table:table-row>
          <table:table-row table:style-name="Tabla21.2">
            <table:table-cell table:style-name="Tabla21.A2" office:value-type="string">
              <text:p text:style-name="P46" loext:marker-style-name="T7"><text:span text:style-name="T69">5 Extensionismo</text:span><text:span text:style-name="T69"/></text:p>
              <text:p text:style-name="P75" loext:marker-style-name="T69"/>
            </table:table-cell>
            <table:table-cell table:style-name="Tabla21.B2" office:value-type="string">
              <text:p text:style-name="P31" loext:marker-style-name="T7"><text:span text:style-name="T30">A</text:span><text:span text:style-name="T34">s</text:span><text:span text:style-name="T42">i</text:span><text:span text:style-name="T34">s</text:span><text:span text:style-name="T38">t</text:span><text:span text:style-name="T34">enc</text:span><text:span text:style-name="T42">i</text:span><text:span text:style-name="T24">a</text:span><text:span text:style-name="T30"> </text:span><text:span text:style-name="T38">t</text:span><text:span text:style-name="T34">écn</text:span><text:span text:style-name="T42">i</text:span><text:span text:style-name="T34">c</text:span><text:span text:style-name="T24">a </text:span><text:span text:style-name="T34">e</text:span><text:span text:style-name="T24">n</text:span><text:span text:style-name="T30"> </text:span><text:span text:style-name="T42">l</text:span><text:span text:style-name="T24">a</text:span><text:span text:style-name="T30"> </text:span><text:span text:style-name="T34">cr</text:span><text:span text:style-name="T42">i</text:span><text:span text:style-name="T34">an</text:span><text:span text:style-name="T51">z</text:span><text:span text:style-name="T24">a</text:span><text:span text:style-name="T30"> </text:span><text:span text:style-name="T34">d</text:span><text:span text:style-name="T24">e </text:span><text:span text:style-name="T34">cu</text:span><text:span text:style-name="T51">y</text:span><text:span text:style-name="T34">e</text:span><text:span text:style-name="T24">s</text:span></text:p>
            </table:table-cell>
            <table:table-cell table:style-name="Tabla21.B2" office:value-type="string">
              <text:p text:style-name="P46" loext:marker-style-name="T7"><text:span text:style-name="T69">Agencia agraria</text:span><text:span text:style-name="T69"/></text:p>
              <text:p text:style-name="P46" loext:marker-style-name="T7"><text:span text:style-name="T69"><text:s/>Huamanga</text:span><text:span text:style-name="T69"/></text:p>
            </table:table-cell>
            <table:table-cell table:style-name="Tabla21.B2" office:value-type="string">
              <text:p text:style-name="P47" loext:marker-style-name="T7"><text:span text:style-name="T31">P</text:span><text:span text:style-name="T39">r</text:span><text:span text:style-name="T35">ob</text:span><text:span text:style-name="T52">a</text:span><text:span text:style-name="T35">b</text:span><text:span text:style-name="T43">l</text:span><text:span text:style-name="T54">e</text:span></text:p>
            </table:table-cell>
          </table:table-row>
          <table:table-row table:style-name="Tabla21.2">
            <table:table-cell table:style-name="Tabla21.A2" office:value-type="string">
              <text:p text:style-name="P46" loext:marker-style-name="T7"><text:span text:style-name="T69">6 Producción</text:span><text:span text:style-name="T69"/></text:p>
              <text:p text:style-name="P75" loext:marker-style-name="T69"/>
            </table:table-cell>
            <table:table-cell table:style-name="Tabla21.B2" office:value-type="string">
              <text:p text:style-name="P31" loext:marker-style-name="T7"><text:span text:style-name="T29">P</text:span><text:span text:style-name="T37">r</text:span><text:span text:style-name="T33">od</text:span><text:span text:style-name="T50">u</text:span><text:span text:style-name="T33">cc</text:span><text:span text:style-name="T41">i</text:span><text:span text:style-name="T33">ó</text:span><text:span text:style-name="T23">n</text:span><text:span text:style-name="T29"> </text:span><text:span text:style-name="T33">d</text:span><text:span text:style-name="T23">e </text:span><text:span text:style-name="T33">cu</text:span><text:span text:style-name="T50">y</text:span><text:span text:style-name="T33">e</text:span><text:span text:style-name="T23">s</text:span><text:span text:style-name="T29"> </text:span><text:span text:style-name="T50">e</text:span><text:span text:style-name="T23">n</text:span><text:span text:style-name="T29"> </text:span><text:span text:style-name="T33">p</text:span><text:span text:style-name="T41">i</text:span><text:span text:style-name="T23">e</text:span></text:p>
            </table:table-cell>
            <table:table-cell table:style-name="Tabla21.B2" office:value-type="string">
              <text:p text:style-name="P46" loext:marker-style-name="T7"><text:span text:style-name="T69">Asociación</text:span><text:span text:style-name="T69"/></text:p>
              <text:p text:style-name="P46" loext:marker-style-name="T7"><text:span text:style-name="T69">APAL</text:span><text:span text:style-name="T69"/></text:p>
            </table:table-cell>
            <table:table-cell table:style-name="Tabla21.B2" office:value-type="string">
              <text:p text:style-name="P47" loext:marker-style-name="T7"><text:span text:style-name="T69"><text:s/></text:span><text:span text:style-name="T32">C</text:span><text:span text:style-name="T36">o</text:span><text:span text:style-name="T53">n</text:span><text:span text:style-name="T36">c</text:span><text:span text:style-name="T40">r</text:span><text:span text:style-name="T36">e</text:span><text:span text:style-name="T40">t</text:span><text:span text:style-name="T60">a</text:span></text:p>
            </table:table-cell>
          </table:table-row>
          <table:table-row table:style-name="Tabla21.2">
            <table:table-cell table:style-name="Tabla21.A2" office:value-type="string">
              <text:p text:style-name="P46" loext:marker-style-name="T7"><text:span text:style-name="T69">7</text:span><text:span text:style-name="T7"> Cofinanciamiento para la ejecución de plan de negocio</text:span></text:p>
            </table:table-cell>
            <table:table-cell table:style-name="Tabla21.B2" office:value-type="string">
              <text:p text:style-name="P31" loext:marker-style-name="T7"><text:span text:style-name="T31">A</text:span><text:span text:style-name="T35">s</text:span><text:span text:style-name="T43">i</text:span><text:span text:style-name="T35">gna</text:span><text:span text:style-name="T54">r</text:span><text:span text:style-name="T52"> </text:span><text:span text:style-name="T39">r</text:span><text:span text:style-name="T35">ecu</text:span><text:span text:style-name="T39">r</text:span><text:span text:style-name="T52">s</text:span><text:span text:style-name="T35">o</text:span><text:span text:style-name="T54">s </text:span><text:span text:style-name="T35">pa</text:span><text:span text:style-name="T39">r</text:span><text:span text:style-name="T54">a </text:span><text:span text:style-name="T31">PROCO</text:span><text:span text:style-name="T55">M</text:span><text:span text:style-name="T31">P</text:span><text:span text:style-name="T39">I</text:span><text:span text:style-name="T52">T</text:span><text:span text:style-name="T54">E</text:span></text:p>
            </table:table-cell>
            <table:table-cell table:style-name="Tabla21.B2" office:value-type="string">
              <text:p text:style-name="P46" loext:marker-style-name="T7"><text:span text:style-name="T69">Gobierno Regional De Ayacucho</text:span><text:span text:style-name="T69"/></text:p>
            </table:table-cell>
            <table:table-cell table:style-name="Tabla21.B2" office:value-type="string">
              <text:p text:style-name="P47" loext:marker-style-name="T7"><text:span text:style-name="T69"><text:s/></text:span><text:span text:style-name="T32">C</text:span><text:span text:style-name="T36">o</text:span><text:span text:style-name="T53">n</text:span><text:span text:style-name="T36">c</text:span><text:span text:style-name="T40">r</text:span><text:span text:style-name="T36">e</text:span><text:span text:style-name="T40">t</text:span><text:span text:style-name="T60">a</text:span></text:p>
            </table:table-cell>
          </table:table-row>
          <table:table-row table:style-name="Tabla21.2">
            <table:table-cell table:style-name="Tabla21.A2" office:value-type="string">
              <text:p text:style-name="P46" loext:marker-style-name="T7"><text:span text:style-name="T69">8</text:span><text:span text:style-name="T7"> Compra de cuyes parrilleros</text:span></text:p>
            </table:table-cell>
            <table:table-cell table:style-name="Tabla21.B2" office:value-type="string">
              <text:p text:style-name="P31" loext:marker-style-name="T7"><text:span text:style-name="T30">C</text:span><text:span text:style-name="T34">on</text:span><text:span text:style-name="T38">tr</text:span><text:span text:style-name="T34">a</text:span><text:span text:style-name="T38">t</text:span><text:span text:style-name="T24">o</text:span><text:span text:style-name="T30"> </text:span><text:span text:style-name="T24">d </text:span><text:span text:style-name="T51">co</text:span><text:span text:style-name="T46">m</text:span><text:span text:style-name="T34">p</text:span><text:span text:style-name="T42">r</text:span><text:span text:style-name="T24">a </text:span><text:span text:style-name="T34">ven</text:span><text:span text:style-name="T38">t</text:span><text:span text:style-name="T24">a</text:span><text:span text:style-name="T56"> </text:span><text:span text:style-name="T34">d</text:span><text:span text:style-name="T24">e</text:span><text:span text:style-name="T30"> </text:span><text:span text:style-name="T51">c</text:span><text:span text:style-name="T34">u</text:span><text:span text:style-name="T51">y</text:span><text:span text:style-name="T34">e</text:span><text:span text:style-name="T24">s de 220 cuyes/sem</text:span></text:p>
            </table:table-cell>
            <table:table-cell table:style-name="Tabla21.B2" office:value-type="string">
              <text:p text:style-name="P46" loext:marker-style-name="T7"><text:span text:style-name="T69">Recreo Turístico El Rincón Del Gallero y San Gabriel</text:span><text:span text:style-name="T69"/></text:p>
            </table:table-cell>
            <table:table-cell table:style-name="Tabla21.B2" office:value-type="string">
              <text:p text:style-name="P46" loext:marker-style-name="T7"><text:span text:style-name="T69"><text:s/></text:span><text:span text:style-name="T32">C</text:span><text:span text:style-name="T36">o</text:span><text:span text:style-name="T53">n</text:span><text:span text:style-name="T36">c</text:span><text:span text:style-name="T40">r</text:span><text:span text:style-name="T36">e</text:span><text:span text:style-name="T40">t</text:span><text:span text:style-name="T60">a</text:span></text:p>
            </table:table-cell>
          </table:table-row>
        </table:table>
        <text:list text:continue-numbering="true" text:style-name="WWNum5">
          <text:list-item>
            <text:p text:style-name="P21" loext:marker-style-name="T7"><text:span text:style-name="T1">ESTUDIO DE MERCADO</text:span><text:span text:style-name="T1"/></text:p>
            <text:list>
              <text:list-item>
                <text:p text:style-name="P23" loext:marker-style-name="T7"><text:span text:style-name="T1">CARACTERÍSTICAS DE LA DEMANDA ACTUAL: ¿A quién y donde venderemos nuestro producto y/o servicio luego del cofinanciamiento solicitado?</text:span><text:span text:style-name="T1"/></text:p>
              </text:list-item>
            </text:list>
          </text:list-item>
        </text:list>
        <table:table table:name="Tabla22" table:style-name="Tabla22">
          <table:table-column table:style-name="Tabla22.A"/>
          <table:table-row table:style-name="Tabla22.1">
            <table:table-cell table:style-name="Tabla22.A1" office:value-type="string">
              <text:p text:style-name="P44" loext:marker-style-name="T7"><text:span text:style-name="T27">Se ha realizado el estudio de los principales factores que inciden en el consumo de cuyes en el ámbito del proyecto, de tal forma que nos ha permitido cuantificar la demanda existente y proyectar la demanda futura. El análisis de la demanda se basa en la segmentación del mercado en el ámbito del distrito de Ayacucho, San Juan bautista, Carmen Alto, Jesús Nazareno y del distrito de Carmen Alto.</text:span><text:span text:style-name="T27"/></text:p>
              <text:h text:style-name="P10" text:outline-level="2" loext:marker-style-name="T8"/>
            </table:table-cell>
          </table:table-row>
        </table:table>
        <text:list text:continue-numbering="true" text:style-name="WWNum5">
          <text:list-item>
            <text:list>
              <text:list-item>
                <text:p text:style-name="P23" loext:marker-style-name="T7"><text:span text:style-name="T1">PROYECCION DE LA DEMANDA: Se deberá proyectar por lo menos de 5 años </text:span><text:span text:style-name="T1"/></text:p>
              </text:list-item>
            </text:list>
          </text:list-item>
        </text:list>
        <text:p text:style-name="P40" loext:marker-style-name="T7"><text:span text:style-name="T9"><text:s/></text:span><text:span text:style-name="T8">Definir los supuestos y criterios técnicos para proyectar la demanda; de tratarse de un plan de negocio que involucra la demanda de más de un producto, deberá hacer la proyección para cada producto.</text:span></text:p>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31" loext:marker-style-name="T7"><text:span text:style-name="T6">AÑO</text:span><text:span text:style-name="T6"/></text:p>
            </table:table-cell>
            <table:table-cell table:style-name="Tabla23.B1" office:value-type="string">
              <text:p text:style-name="P31" loext:marker-style-name="T7"><text:span text:style-name="T6">DEMANDA DEL PRODUCTO</text:span><text:span text:style-name="T6"/></text:p>
              <text:p text:style-name="P31" loext:marker-style-name="T7"><text:span text:style-name="T6"><text:s/>(Unidad de Medida)</text:span><text:span text:style-name="T6"/></text:p>
            </table:table-cell>
            <table:table-cell table:style-name="Tabla23.C1" office:value-type="string">
              <text:p text:style-name="P51" loext:marker-style-name="T6"/>
            </table:table-cell>
          </table:table-row>
          <table:table-row table:style-name="Tabla23.2">
            <table:table-cell table:style-name="Tabla23.A2" office:value-type="string">
              <text:p text:style-name="P31" loext:marker-style-name="T7"><text:span text:style-name="T11">2020</text:span><text:span text:style-name="T11"/></text:p>
            </table:table-cell>
            <table:table-cell table:style-name="Tabla23.B2" office:value-type="string">
              <text:p text:style-name="P31" loext:marker-style-name="T7"><text:span text:style-name="T72">872,748</text:span><text:span text:style-name="T72"/></text:p>
            </table:table-cell>
            <table:table-cell table:style-name="Tabla23.C2" office:value-type="string">
              <text:p text:style-name="P66" loext:marker-style-name="T11"/>
            </table:table-cell>
          </table:table-row>
          <table:table-row table:style-name="Tabla23.2">
            <table:table-cell table:style-name="Tabla23.A2" office:value-type="string">
              <text:p text:style-name="P31" loext:marker-style-name="T7"><text:span text:style-name="T11">2021</text:span><text:span text:style-name="T11"/></text:p>
            </table:table-cell>
            <table:table-cell table:style-name="Tabla23.B2" office:value-type="string">
              <text:p text:style-name="P31" loext:marker-style-name="T7"><text:span text:style-name="T72">894,186</text:span><text:span text:style-name="T72"/></text:p>
            </table:table-cell>
            <table:table-cell table:style-name="Tabla23.C3" office:value-type="string">
              <text:p text:style-name="P66" loext:marker-style-name="T11"/>
            </table:table-cell>
          </table:table-row>
          <table:table-row table:style-name="Tabla23.2">
            <table:table-cell table:style-name="Tabla23.A2" office:value-type="string">
              <text:p text:style-name="P31" loext:marker-style-name="T7"><text:span text:style-name="T11">2022</text:span><text:span text:style-name="T11"/></text:p>
            </table:table-cell>
            <table:table-cell table:style-name="Tabla23.B2" office:value-type="string">
              <text:p text:style-name="P31" loext:marker-style-name="T7"><text:span text:style-name="T72">916,150</text:span><text:span text:style-name="T72"/></text:p>
            </table:table-cell>
            <table:table-cell table:style-name="Tabla23.C4" office:value-type="string">
              <text:p text:style-name="P66" loext:marker-style-name="T11"/>
            </table:table-cell>
          </table:table-row>
          <table:table-row table:style-name="Tabla23.2">
            <table:table-cell table:style-name="Tabla23.A2" office:value-type="string">
              <text:p text:style-name="P31" loext:marker-style-name="T7"><text:span text:style-name="T11">2023</text:span><text:span text:style-name="T11"/></text:p>
            </table:table-cell>
            <table:table-cell table:style-name="Tabla23.B2" office:value-type="string">
              <text:p text:style-name="P31" loext:marker-style-name="T7"><text:span text:style-name="T72">938,654</text:span><text:span text:style-name="T72"/></text:p>
            </table:table-cell>
            <table:table-cell table:style-name="Tabla23.C5" office:value-type="string">
              <text:p text:style-name="P66" loext:marker-style-name="T11"/>
            </table:table-cell>
          </table:table-row>
          <table:table-row table:style-name="Tabla23.2">
            <table:table-cell table:style-name="Tabla23.A2" office:value-type="string">
              <text:p text:style-name="P31" loext:marker-style-name="T7"><text:span text:style-name="T11">2024</text:span><text:span text:style-name="T11"/></text:p>
            </table:table-cell>
            <table:table-cell table:style-name="Tabla23.B2" office:value-type="string">
              <text:p text:style-name="P31" loext:marker-style-name="T7"><text:span text:style-name="T72">961,711</text:span><text:span text:style-name="T72"/></text:p>
            </table:table-cell>
            <table:table-cell table:style-name="Tabla23.C6" office:value-type="string">
              <text:p text:style-name="P66" loext:marker-style-name="T11"/>
            </table:table-cell>
          </table:table-row>
          <table:table-row table:style-name="Tabla23.2">
            <table:table-cell table:style-name="Tabla23.A2" office:value-type="string">
              <text:p text:style-name="P31" loext:marker-style-name="T7"><text:span text:style-name="T11">2025</text:span><text:span text:style-name="T11"/></text:p>
            </table:table-cell>
            <table:table-cell table:style-name="Tabla23.B2" office:value-type="string">
              <text:p text:style-name="P31" loext:marker-style-name="T7"><text:span text:style-name="T11">985,335</text:span><text:span text:style-name="T11"/></text:p>
            </table:table-cell>
            <table:table-cell table:style-name="Tabla23.C7" office:value-type="string">
              <text:p text:style-name="P66" loext:marker-style-name="T11"/>
            </table:table-cell>
          </table:table-row>
        </table:table>
        <text:list xml:id="list24255494488135" text:continue-numbering="true" text:style-name="WWNum5">
          <text:list-item>
            <text:list>
              <text:list-item>
                <text:p text:style-name="P23" loext:marker-style-name="T7"><text:span text:style-name="T1">CARACTERISTICAS DE LA OFERTA ACTUAL: Describir las características de los competidores</text:span><text:span text:style-name="T1"/></text:p>
              </text:list-item>
            </text:list>
          </text:list-item>
        </text:list>
        <table:table table:name="Tabla24" table:style-name="Tabla24">
          <table:table-column table:style-name="Tabla24.A"/>
          <table:table-row table:style-name="Tabla24.1">
            <table:table-cell table:style-name="Tabla24.A1" table:number-rows-spanned="3" office:value-type="string">
              <text:p text:style-name="P46" loext:marker-style-name="T7"><text:span text:style-name="T69">Características de la Oferta Actual:</text:span><text:span text:style-name="T69"/></text:p>
              <text:p text:style-name="P46" loext:marker-style-name="T7"><text:span text:style-name="T69">Para el análisis del nivel de competencia entre los oferentes del cuy, se parte de la siguiente consideración:</text:span><text:span text:style-name="T69"/></text:p>
              <text:list text:style-name="WWNum12">
                <text:list-item>
                  <text:p text:style-name="P26" loext:marker-style-name="T7"><text:span text:style-name="T69">Con respecto a las provincias ofertantes al mercado de Huamanga (a los distritos metropolitanos) son 6 provincias Huamanga con 67% de destino, cangallo 75%, Huanca Sancos 15%, Huanta 9%, La Mar 12.48%, Vilcashuaman 12.50% respectivamente los destinos de producción al mercado objetivo, la misma que se observa en la Cuadro siguiente.</text:span><text:span text:style-name="T69"/></text:p>
                </text:list-item>
              </text:list>
            </table:table-cell>
          </table:table-row>
          <table:table-row table:style-name="Tabla24.1">
            <table:covered-table-cell table:style-name="Tabla24.A2"/>
          </table:table-row>
          <table:table-row table:style-name="Tabla24.1">
            <table:covered-table-cell table:style-name="Tabla24.A3"/>
          </table:table-row>
        </table:table>
        <text:list text:continue-list="list24255494488135" text:style-name="WWNum5">
          <text:list-item>
            <text:list>
              <text:list-item>
                <text:p text:style-name="P23" loext:marker-style-name="T7"><text:span text:style-name="T1">PROYECCION DE LA OFERTA: </text:span><text:span text:style-name="T1"/></text:p>
              </text:list-item>
            </text:list>
          </text:list-item>
        </text:list>
        <text:p text:style-name="P46" loext:marker-style-name="T7"><text:span text:style-name="T8">Definir los supuestos y criterios técnicos para proyectar la oferta; de tratarse de un plan de negocio que involucra el análisis de la oferta de más de un producto, deberá hacer la proyección para cada producto.</text:span><text:span text:style-name="T8"/></text:p>
        <table:table table:name="Tabla25" table:style-name="Tabla25">
          <table:table-column table:style-name="Tabla25.A"/>
          <table:table-column table:style-name="Tabla25.B"/>
          <table:table-row table:style-name="Tabla25.1">
            <table:table-cell table:style-name="Tabla25.A1" office:value-type="string">
              <text:p text:style-name="P31" loext:marker-style-name="T7"><text:span text:style-name="T6">AÑO</text:span><text:span text:style-name="T6"/></text:p>
            </table:table-cell>
            <table:table-cell table:style-name="Tabla25.B1" office:value-type="string">
              <text:p text:style-name="P31" loext:marker-style-name="T7"><text:span text:style-name="T6">OFERTA CON PROYECTO (Unidad de medida)</text:span><text:span text:style-name="T6"/></text:p>
            </table:table-cell>
          </table:table-row>
          <table:table-row table:style-name="Tabla25.2">
            <table:table-cell table:style-name="Tabla25.A2" office:value-type="string">
              <text:p text:style-name="P31" loext:marker-style-name="T7"><text:span text:style-name="T11">2020</text:span><text:span text:style-name="T11"/></text:p>
            </table:table-cell>
            <table:table-cell table:style-name="Tabla25.B2" office:value-type="string">
              <text:p text:style-name="P31" loext:marker-style-name="T7"><text:span text:style-name="T73">141,280</text:span><text:span text:style-name="T73"/></text:p>
            </table:table-cell>
          </table:table-row>
          <table:table-row table:style-name="Tabla25.2">
            <table:table-cell table:style-name="Tabla25.A2" office:value-type="string">
              <text:p text:style-name="P31" loext:marker-style-name="T7"><text:span text:style-name="T11">2021</text:span><text:span text:style-name="T11"/></text:p>
            </table:table-cell>
            <table:table-cell table:style-name="Tabla25.B2" office:value-type="string">
              <text:p text:style-name="P31" loext:marker-style-name="T7"><text:span text:style-name="T73">145,886</text:span><text:span text:style-name="T73"/></text:p>
            </table:table-cell>
          </table:table-row>
          <table:table-row table:style-name="Tabla25.2">
            <table:table-cell table:style-name="Tabla25.A2" office:value-type="string">
              <text:p text:style-name="P31" loext:marker-style-name="T7"><text:span text:style-name="T11">2022</text:span><text:span text:style-name="T11"/></text:p>
            </table:table-cell>
            <table:table-cell table:style-name="Tabla25.B2" office:value-type="string">
              <text:p text:style-name="P31" loext:marker-style-name="T7"><text:span text:style-name="T73">150,492</text:span><text:span text:style-name="T73"/></text:p>
            </table:table-cell>
          </table:table-row>
          <table:table-row table:style-name="Tabla25.2">
            <table:table-cell table:style-name="Tabla25.A2" office:value-type="string">
              <text:p text:style-name="P31" loext:marker-style-name="T7"><text:span text:style-name="T11">2023</text:span><text:span text:style-name="T11"/></text:p>
            </table:table-cell>
            <table:table-cell table:style-name="Tabla25.B2" office:value-type="string">
              <text:p text:style-name="P31" loext:marker-style-name="T7"><text:span text:style-name="T73">155,098</text:span><text:span text:style-name="T73"/></text:p>
            </table:table-cell>
          </table:table-row>
          <table:table-row table:style-name="Tabla25.2">
            <table:table-cell table:style-name="Tabla25.A2" office:value-type="string">
              <text:p text:style-name="P31" loext:marker-style-name="T7"><text:span text:style-name="T11">2024</text:span><text:span text:style-name="T11"/></text:p>
            </table:table-cell>
            <table:table-cell table:style-name="Tabla25.B2" office:value-type="string">
              <text:p text:style-name="P31" loext:marker-style-name="T7"><text:span text:style-name="T73">159,704</text:span><text:span text:style-name="T73"/></text:p>
            </table:table-cell>
          </table:table-row>
          <table:table-row table:style-name="Tabla25.2">
            <table:table-cell table:style-name="Tabla25.A2" office:value-type="string">
              <text:p text:style-name="P31" loext:marker-style-name="T7"><text:span text:style-name="T11">2025</text:span><text:span text:style-name="T11"/></text:p>
            </table:table-cell>
            <table:table-cell table:style-name="Tabla25.B2" office:value-type="string">
              <text:p text:style-name="P31" loext:marker-style-name="T7"><text:span text:style-name="T73">164,310</text:span><text:span text:style-name="T73"/></text:p>
            </table:table-cell>
          </table:table-row>
        </table:table>
        <text:list text:continue-numbering="true" text:style-name="WWNum5">
          <text:list-item>
            <text:list>
              <text:list-item>
                <text:p text:style-name="P23" loext:marker-style-name="T7"><text:span text:style-name="T1">BRECHA DEMANDA Y OFERTA: En el marco de la estructura de mercado existente; con el propósito de evaluar la viabilidad de mercado, teniendo en cuenta los riesgos existentes.</text:span><text:span text:style-name="T1"/></text:p>
              </text:list-item>
            </text:list>
          </text:list-item>
        </text:list>
        <text:p text:style-name="P40" loext:marker-style-name="T7"><text:span text:style-name="T8">De tratarse de un plan de negocio que involucra la producción de más de un producto, deberá determinar la brecha para cada producto.</text:span><text:span text:style-name="T8"/></text:p>
        <table:table table:name="Tabla26" table:style-name="Tabla26">
          <table:table-column table:style-name="Tabla26.A"/>
          <table:table-column table:style-name="Tabla26.B"/>
          <table:table-column table:style-name="Tabla26.C"/>
          <table:table-column table:style-name="Tabla26.D"/>
          <text:soft-page-break/>
          <table:table-row table:style-name="Tabla26.1">
            <table:table-cell table:style-name="Tabla26.A1" office:value-type="string">
              <text:p text:style-name="P31" loext:marker-style-name="T7"><text:span text:style-name="T6">AÑO</text:span><text:span text:style-name="T6"/></text:p>
            </table:table-cell>
            <table:table-cell table:style-name="Tabla26.B1" office:value-type="string">
              <text:p text:style-name="P31" loext:marker-style-name="T7"><text:span text:style-name="T6">DEMANDA</text:span><text:span text:style-name="T6"/></text:p>
            </table:table-cell>
            <table:table-cell table:style-name="Tabla26.B1" office:value-type="string">
              <text:p text:style-name="P31" loext:marker-style-name="T7"><text:span text:style-name="T6">OFERTA</text:span><text:span text:style-name="T6"/></text:p>
            </table:table-cell>
            <table:table-cell table:style-name="Tabla26.B1" office:value-type="string">
              <text:p text:style-name="P31" loext:marker-style-name="T7"><text:span text:style-name="T6">BRECHA</text:span><text:span text:style-name="T6"/></text:p>
            </table:table-cell>
          </table:table-row>
          <table:table-row table:style-name="Tabla26.1">
            <table:table-cell table:style-name="Tabla26.A2" office:value-type="string">
              <text:p text:style-name="P31" loext:marker-style-name="T7"><text:span text:style-name="T11">2020</text:span><text:span text:style-name="T11"/></text:p>
            </table:table-cell>
            <table:table-cell table:style-name="Tabla26.B2" office:value-type="string">
              <text:p text:style-name="P31" loext:marker-style-name="T7"><text:span text:style-name="T73">872,748</text:span><text:span text:style-name="T73"/></text:p>
            </table:table-cell>
            <table:table-cell table:style-name="Tabla26.B2" office:value-type="string">
              <text:p text:style-name="P31" loext:marker-style-name="T7"><text:span text:style-name="T73">141,280</text:span><text:span text:style-name="T73"/></text:p>
            </table:table-cell>
            <table:table-cell table:style-name="Tabla26.B2" office:value-type="string">
              <text:p text:style-name="P31" loext:marker-style-name="T7"><text:span text:style-name="T73">731,468</text:span><text:span text:style-name="T73"/></text:p>
            </table:table-cell>
          </table:table-row>
          <table:table-row table:style-name="Tabla26.1">
            <table:table-cell table:style-name="Tabla26.A2" office:value-type="string">
              <text:p text:style-name="P31" loext:marker-style-name="T7"><text:span text:style-name="T11">2021</text:span><text:span text:style-name="T11"/></text:p>
            </table:table-cell>
            <table:table-cell table:style-name="Tabla26.B2" office:value-type="string">
              <text:p text:style-name="P31" loext:marker-style-name="T7"><text:span text:style-name="T73">894,186</text:span><text:span text:style-name="T73"/></text:p>
            </table:table-cell>
            <table:table-cell table:style-name="Tabla26.B2" office:value-type="string">
              <text:p text:style-name="P31" loext:marker-style-name="T7"><text:span text:style-name="T73">145,886</text:span><text:span text:style-name="T73"/></text:p>
            </table:table-cell>
            <table:table-cell table:style-name="Tabla26.B2" office:value-type="string">
              <text:p text:style-name="P31" loext:marker-style-name="T7"><text:span text:style-name="T73">748,300</text:span><text:span text:style-name="T73"/></text:p>
            </table:table-cell>
          </table:table-row>
          <table:table-row table:style-name="Tabla26.1">
            <table:table-cell table:style-name="Tabla26.A2" office:value-type="string">
              <text:p text:style-name="P31" loext:marker-style-name="T7"><text:span text:style-name="T11">2022</text:span><text:span text:style-name="T11"/></text:p>
            </table:table-cell>
            <table:table-cell table:style-name="Tabla26.B2" office:value-type="string">
              <text:p text:style-name="P31" loext:marker-style-name="T7"><text:span text:style-name="T73">916,150</text:span><text:span text:style-name="T73"/></text:p>
            </table:table-cell>
            <table:table-cell table:style-name="Tabla26.B2" office:value-type="string">
              <text:p text:style-name="P31" loext:marker-style-name="T7"><text:span text:style-name="T73">150,492</text:span><text:span text:style-name="T73"/></text:p>
            </table:table-cell>
            <table:table-cell table:style-name="Tabla26.B2" office:value-type="string">
              <text:p text:style-name="P31" loext:marker-style-name="T7"><text:span text:style-name="T73">765,658</text:span><text:span text:style-name="T73"/></text:p>
            </table:table-cell>
          </table:table-row>
          <table:table-row table:style-name="Tabla26.1">
            <table:table-cell table:style-name="Tabla26.A2" office:value-type="string">
              <text:p text:style-name="P31" loext:marker-style-name="T7"><text:span text:style-name="T11">2023</text:span><text:span text:style-name="T11"/></text:p>
            </table:table-cell>
            <table:table-cell table:style-name="Tabla26.B2" office:value-type="string">
              <text:p text:style-name="P31" loext:marker-style-name="T7"><text:span text:style-name="T73">938,654</text:span><text:span text:style-name="T73"/></text:p>
            </table:table-cell>
            <table:table-cell table:style-name="Tabla26.B2" office:value-type="string">
              <text:p text:style-name="P31" loext:marker-style-name="T7"><text:span text:style-name="T73">155,098</text:span><text:span text:style-name="T73"/></text:p>
            </table:table-cell>
            <table:table-cell table:style-name="Tabla26.B2" office:value-type="string">
              <text:p text:style-name="P31" loext:marker-style-name="T7"><text:span text:style-name="T73">783,557</text:span><text:span text:style-name="T73"/></text:p>
            </table:table-cell>
          </table:table-row>
          <table:table-row table:style-name="Tabla26.1">
            <table:table-cell table:style-name="Tabla26.A2" office:value-type="string">
              <text:p text:style-name="P31" loext:marker-style-name="T7"><text:span text:style-name="T73">2024</text:span><text:span text:style-name="T73"/></text:p>
            </table:table-cell>
            <table:table-cell table:style-name="Tabla26.B2" office:value-type="string">
              <text:p text:style-name="P31" loext:marker-style-name="T7"><text:span text:style-name="T73">961,711</text:span><text:span text:style-name="T73"/></text:p>
            </table:table-cell>
            <table:table-cell table:style-name="Tabla26.B2" office:value-type="string">
              <text:p text:style-name="P31" loext:marker-style-name="T7"><text:span text:style-name="T73">159,704</text:span><text:span text:style-name="T73"/></text:p>
            </table:table-cell>
            <table:table-cell table:style-name="Tabla26.B2" office:value-type="string">
              <text:p text:style-name="P31" loext:marker-style-name="T7"><text:span text:style-name="T73">802,008</text:span><text:span text:style-name="T73"/></text:p>
            </table:table-cell>
          </table:table-row>
          <table:table-row table:style-name="Tabla26.1">
            <table:table-cell table:style-name="Tabla26.A2" office:value-type="string">
              <text:p text:style-name="P31" loext:marker-style-name="T7"><text:span text:style-name="T11">2025</text:span><text:span text:style-name="T11"/></text:p>
            </table:table-cell>
            <table:table-cell table:style-name="Tabla26.B2" office:value-type="string">
              <text:p text:style-name="P31" loext:marker-style-name="T7"><text:span text:style-name="T73">985,335</text:span><text:span text:style-name="T73"/></text:p>
            </table:table-cell>
            <table:table-cell table:style-name="Tabla26.B2" office:value-type="string">
              <text:p text:style-name="P31" loext:marker-style-name="T7"><text:span text:style-name="T73">164,310</text:span><text:span text:style-name="T73"/></text:p>
            </table:table-cell>
            <table:table-cell table:style-name="Tabla26.B2" office:value-type="string">
              <text:p text:style-name="P31" loext:marker-style-name="T7"><text:span text:style-name="T73">821,025</text:span><text:span text:style-name="T73"/></text:p>
            </table:table-cell>
          </table:table-row>
        </table:table>
        <text:p text:style-name="P46" loext:marker-style-name="T7"><text:span text:style-name="T9"><text:s/>Fuente: elaboración propia </text:span><text:span text:style-name="T9"/></text:p>
        <text:list text:continue-numbering="true" text:style-name="WWNum5">
          <text:list-item>
            <text:list>
              <text:list-item>
                <text:p text:style-name="P23" loext:marker-style-name="T7"><text:span text:style-name="T1">ESTRATEGIA DE MARKETING: Se debe señalar como se logrará la ventaja competitiva necesaria para que los bienes y servicios generados por la propuesta productiva, sean demandados efectivamente por el público objetivo</text:span><text:span text:style-name="T1"/></text:p>
              </text:list-item>
            </text:list>
          </text:list-item>
        </text:list>
        <table:table table:name="Tabla27" table:style-name="Tabla27">
          <table:table-column table:style-name="Tabla27.A"/>
          <table:table-column table:style-name="Tabla27.B"/>
          <table:table-row table:style-name="Tabla27.1">
            <table:table-cell table:style-name="Tabla27.A1" office:value-type="string">
              <text:p text:style-name="P2" loext:marker-style-name="T7"><text:span text:style-name="T65">Estrategia de producto</text:span><text:span text:style-name="T65"/></text:p>
            </table:table-cell>
            <table:table-cell table:style-name="Tabla27.A1" office:value-type="string">
              <text:p text:style-name="P46" loext:marker-style-name="T7"><text:span text:style-name="T9">DESCRIPCIÓN PRODUCTO</text:span><text:span text:style-name="T9"/></text:p>
              <text:p text:style-name="P46" loext:marker-style-name="T7"><text:span text:style-name="T9">Nombre comercial Cuy en pie</text:span><text:span text:style-name="T9"/></text:p>
              <text:p text:style-name="P46" loext:marker-style-name="T7"><text:span text:style-name="T9">Descripción del producto Cuy en pie, de 2.5 a 3 meses de 0.9 - 1.1 kg.</text:span><text:span text:style-name="T9"/></text:p>
              <text:p text:style-name="P46" loext:marker-style-name="T7"><text:span text:style-name="T9">Características Cuyes mejorados, de conformación física semejante a un paralelepípedo, de temperamento tranquilo. Pesos uniformes y cuyes tiernos (venta antes de los 3 meses).</text:span><text:span text:style-name="T9"/></text:p>
              <text:p text:style-name="P46" loext:marker-style-name="T7"><text:span text:style-name="T9">Empaque En jabas (20 cuyes/jaba)</text:span><text:span text:style-name="T9"/></text:p>
              <text:p text:style-name="P46" loext:marker-style-name="T7"><text:span text:style-name="T9">Proceso de selección del producto El producto se seleccionará de acuerdo a unas características externas: colores claros, cuello ancho, pelo corto y liso, buen estado sanitario, peso de 0.9 – 1.1 kg.</text:span><text:span text:style-name="T9"/></text:p>
              <text:p text:style-name="P46" loext:marker-style-name="T7"><text:span text:style-name="T9">Producción Valle del distrito de Huanta</text:span><text:span text:style-name="T9"/></text:p>
              <text:p text:style-name="P46" loext:marker-style-name="T7"><text:span text:style-name="T9">Pago: Esmeralda / Distrito: Huanta / Provincia: Huanta</text:span><text:span text:style-name="T9"/></text:p>
              <text:p text:style-name="P46" loext:marker-style-name="T7"><text:span text:style-name="T9">Precio de venta El precio de venta será de S/.18.00/cuy</text:span><text:span text:style-name="T9"/></text:p>
              <text:p text:style-name="P46" loext:marker-style-name="T7"><text:span text:style-name="T9">Composición /propiedades Su carne es apreciada por sus dotes de: suavidad, palatabilidad, calidad proteica y digestibilidad</text:span><text:span text:style-name="T9"/></text:p>
              <text:p text:style-name="P62" loext:marker-style-name="T9"/>
            </table:table-cell>
          </table:table-row>
          <table:table-row table:style-name="Tabla27.1">
            <table:table-cell table:style-name="Tabla27.A1" office:value-type="string">
              <text:p text:style-name="P2" loext:marker-style-name="T7"><text:span text:style-name="T65">Estrategia de precio</text:span><text:span text:style-name="T65"/></text:p>
            </table:table-cell>
            <table:table-cell table:style-name="Tabla27.A1" office:value-type="string">
              <text:p text:style-name="P46" loext:marker-style-name="T7"><text:span text:style-name="T9">La Organización desde sus inicios ha empezado a comercializar el producto a S/. 18 soles. Estos últimos se comercializan con las exigencias de los compradores como libre de enfermedades, parasitos externos, forma paralelepípedo y un peso de 0.9 – 1.1 kg. El incremento de los precios se debe principalmente al incremento del consumo percapita y hábito de consumo de la población</text:span><text:span text:style-name="T9"/></text:p>
            </table:table-cell>
          </table:table-row>
          <table:table-row table:style-name="Tabla27.3">
            <table:table-cell table:style-name="Tabla27.A1" office:value-type="string">
              <text:p text:style-name="P46" loext:marker-style-name="T7"><text:span text:style-name="T8">Estrategia de Plaza</text:span><text:span text:style-name="T8"/></text:p>
            </table:table-cell>
            <table:table-cell table:style-name="Tabla27.A1" office:value-type="string">
              <text:p text:style-name="P46" loext:marker-style-name="T7"><text:span text:style-name="T9">La estrategia de comercialización será de manera directa al mercado objetivo (recreos de los distritos de Huanta, Luricocha).</text:span><text:span text:style-name="T9"/></text:p>
              <text:p text:style-name="P62" loext:marker-style-name="T9"><draw:custom-shape text:anchor-type="char" draw:z-index="32" draw:name="Rectángulo 64" draw:style-name="gr4" draw:text-style-name="P79" svg:width="1.59cm" svg:height="1.359cm" svg:x="8.618cm" svg:y="-0.025cm"><text:p text:style-name="P6" loext:marker-style-name="T79"><text:span text:style-name="T79">CONSUMIDOR FINAL</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3" draw:name="Conector recto de flecha 22389" draw:style-name="gr3" draw:text-style-name="P80" svg:width="5.703cm" svg:height="0.043cm" svg:x="2.909cm" svg:y="0.056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34" draw:name="Rectángulo 22387" draw:style-name="gr2" draw:text-style-name="P79" svg:width="2.474cm" svg:height="1.71cm" svg:x="4.35cm" svg:y="0.141cm"><text:p text:style-name="P7" loext:marker-style-name="T79"><text:span text:style-name="T79">RECREOS DE HUANTA</text:span><text:span text:style-name="T79"/></text:p><text:p text:style-name="P7" loext:marker-style-name="T80"><text:span text:style-name="T79">(Huanta – Luricocha</text:span><text:span text:style-name="T80">)</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5" draw:name="Rectángulo 7" draw:style-name="gr1" draw:text-style-name="P79" svg:width="2.541cm" svg:height="1.601cm" svg:x="0.335cm" svg:y="0.235cm"><text:p text:style-name="P6" loext:marker-style-name="T79"><text:span text:style-name="T79">ASOCIACIÓN DE PRODUCTORES VALLE SUMAQ ESMERALDA</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row table:style-name="Tabla27.4">
            <table:table-cell table:style-name="Tabla27.A1" office:value-type="string">
              <text:p text:style-name="P2" loext:marker-style-name="T7"><text:span text:style-name="T65">Estrategia de Promociones</text:span><text:span text:style-name="T65"/></text:p>
            </table:table-cell>
            <table:table-cell table:style-name="Tabla27.A1" office:value-type="string">
              <text:p text:style-name="P46" loext:marker-style-name="T7"><text:span text:style-name="T9">Dada la demanda del producto, no requiere promociones, sin embargo es importante mencionar que a nivel de la provincia de Huanta no existe no se desarrolla ninguna actividad de promoción del cuy, por será necesario realizar FESTIVAL DEL CUY, con participación de los diferentes actores a fin de promocionar el consumo del producto dentro del distrito de Huanta y la región Ayacucho</text:span><text:span text:style-name="T9"/></text:p>
            </table:table-cell>
          </table:table-row>
        </table:table>
        <text:list text:continue-numbering="true" text:style-name="WWNum5">
          <text:list-item>
            <text:p text:style-name="P21" loext:marker-style-name="T7"><text:span text:style-name="T1">ESTUDIO TECNICO </text:span><text:span text:style-name="T1"/></text:p>
            <text:list>
              <text:list-item>
                <text:p text:style-name="P23" loext:marker-style-name="T7"><text:span text:style-name="T1">DESCRIPCION DEL PROCESO DE PRODUCCION: deberá describir brevemente el proceso de producción, y definir cada línea de producción</text:span><text:span text:style-name="T8">. </text:span></text:p>
              </text:list-item>
            </text:list>
          </text:list-item>
        </text:list>
        <table:table table:name="Tabla28" table:style-name="Tabla28">
          <table:table-column table:style-name="Tabla28.A"/>
          <table:table-row table:style-name="Tabla28.1">
            <table:table-cell table:style-name="Tabla28.A1" office:value-type="string">
              <text:p text:style-name="P62" loext:marker-style-name="T9"><text:bookmark text:name="_GoBack"/></text:p>
            </table:table-cell>
          </table:table-row>
        </table:table>
        <text:list text:continue-numbering="true" text:style-name="WWNum5">
          <text:list-item>
            <text:list>
              <text:list-item>
                <text:p text:style-name="P15" loext:marker-style-name="T7"><text:span text:style-name="T1">MEJORA TECNOLOGICA PROPUESTA: Señalar si se proponen innovaciones de proceso, es decir la implementación de un método de producción o distribución nuevo o con un alto grado de mejora. De ser el caso, se debe señalar las mejoras importantes en técnicas, presentación del producto, equipo y/o software.</text:span><text:span text:style-name="T1"/></text:p>
              </text:list-item>
            </text:list>
          </text:list-item>
        </text:list>
        <table:table table:name="Tabla29" table:style-name="Tabla29">
          <table:table-column table:style-name="Tabla29.A"/>
          <table:table-row table:style-name="Tabla29.1">
            <table:table-cell table:style-name="Tabla29.A1" office:value-type="string">
              <text:p text:style-name="P31" loext:marker-style-name="T7"><text:span text:style-name="T69">Señalar las innovaciones que se propone</text:span><text:span text:style-name="T69"/></text:p>
            </table:table-cell>
          </table:table-row>
          <table:table-row table:style-name="Tabla29.1">
            <table:table-cell table:style-name="Tabla29.A1" office:value-type="string">
              <text:p text:style-name="P46" loext:marker-style-name="T7"><text:span text:style-name="T69">1</text:span><text:span text:style-name="T69"/></text:p>
            </table:table-cell>
          </table:table-row>
          <table:table-row table:style-name="Tabla29.1">
            <table:table-cell table:style-name="Tabla29.A1" office:value-type="string">
              <text:p text:style-name="P46" loext:marker-style-name="T7"><text:span text:style-name="T69">2</text:span><text:span text:style-name="T69"/></text:p>
            </table:table-cell>
          </table:table-row>
          <table:table-row table:style-name="Tabla29.1">
            <table:table-cell table:style-name="Tabla29.A1" office:value-type="string">
              <text:p text:style-name="P46" loext:marker-style-name="T7"><text:span text:style-name="T69">3</text:span><text:span text:style-name="T69"/></text:p>
            </table:table-cell>
          </table:table-row>
          <table:table-row table:style-name="Tabla29.1">
            <table:table-cell table:style-name="Tabla29.A1" office:value-type="string">
              <text:p text:style-name="P46" loext:marker-style-name="T7"><text:span text:style-name="T69">4</text:span><text:span text:style-name="T69"/></text:p>
            </table:table-cell>
          </table:table-row>
          <table:table-row table:style-name="Tabla29.1">
            <table:table-cell table:style-name="Tabla29.A1" office:value-type="string">
              <text:p text:style-name="P46" loext:marker-style-name="T7"><text:span text:style-name="T69">…</text:span><text:span text:style-name="T69"/></text:p>
            </table:table-cell>
          </table:table-row>
        </table:table>
        <text:list text:continue-numbering="true" text:style-name="WWNum5">
          <text:list-item>
            <text:list>
              <text:list-item>
                <text:p text:style-name="P15" loext:marker-style-name="T7"><text:span text:style-name="T1">PLAN DE VENTAS Y PRODUCCION: </text:span><text:span text:style-name="T1"/></text:p>
              </text:list-item>
            </text:list>
          </text:list-item>
        </text:list>
        <text:p text:style-name="P46" loext:marker-style-name="T7"><text:span text:style-name="T8">Determinar el plan de ventas, en base a la demanda objetivo y metas de venta, como consecuencia del análisis de la demanda insatisfecha, estructura de mercado, estrategia de marketing y capacidad operativa. El plan de ventas se proyectará durante el horizonte de evaluación planteado para la propuesta productiva.</text:span><text:span text:style-name="T8"/></text:p>
        <table:table table:name="Tabla30" table:style-name="Tabla30">
          <table:table-column table:style-name="Tabla30.A"/>
          <table:table-column table:style-name="Tabla30.B"/>
          <table:table-column table:style-name="Tabla30.C"/>
          <table:table-column table:style-name="Tabla30.D"/>
          <table:table-row table:style-name="Tabla30.1">
            <table:table-cell table:style-name="Tabla30.A1" office:value-type="string">
              <text:p text:style-name="P31" loext:marker-style-name="T7"><text:span text:style-name="T6">Años</text:span><text:span text:style-name="T6"/></text:p>
            </table:table-cell>
            <table:table-cell table:style-name="Tabla30.B1" office:value-type="string">
              <text:p text:style-name="P31" loext:marker-style-name="T7"><text:span text:style-name="T6">Producción (unidad de medida)</text:span><text:span text:style-name="T6"/></text:p>
            </table:table-cell>
            <table:table-cell table:style-name="Tabla30.B1" office:value-type="string">
              <text:p text:style-name="P46" loext:marker-style-name="T7"><text:span text:style-name="T6">Precio por unidad de medida (S/.)</text:span><text:span text:style-name="T6"/></text:p>
            </table:table-cell>
            <table:table-cell table:style-name="Tabla30.B1" office:value-type="string">
              <text:p text:style-name="P31" loext:marker-style-name="T7"><text:span text:style-name="T6">Ventas proyectadas (S/.)</text:span><text:span text:style-name="T6"/></text:p>
            </table:table-cell>
          </table:table-row>
          <table:table-row table:style-name="Tabla30.2">
            <table:table-cell table:style-name="Tabla30.A2" office:value-type="string">
              <text:p text:style-name="P31" loext:marker-style-name="T7"><text:span text:style-name="T11">1</text:span><text:span text:style-name="T11"/></text:p>
            </table:table-cell>
            <table:table-cell table:style-name="Tabla30.B2" office:value-type="string">
              <text:p text:style-name="P66" loext:marker-style-name="T11"/>
            </table:table-cell>
            <table:table-cell table:style-name="Tabla30.B2" office:value-type="string">
              <text:p text:style-name="P67" loext:marker-style-name="T11"/>
            </table:table-cell>
            <table:table-cell table:style-name="Tabla30.B2" office:value-type="string">
              <text:p text:style-name="P67" loext:marker-style-name="T11"/>
            </table:table-cell>
          </table:table-row>
          <table:table-row table:style-name="Tabla30.2">
            <table:table-cell table:style-name="Tabla30.A2" office:value-type="string">
              <text:p text:style-name="P31" loext:marker-style-name="T7"><text:span text:style-name="T11">2</text:span><text:span text:style-name="T11"/></text:p>
            </table:table-cell>
            <table:table-cell table:style-name="Tabla30.B2" office:value-type="string">
              <text:p text:style-name="P66" loext:marker-style-name="T11"/>
            </table:table-cell>
            <table:table-cell table:style-name="Tabla30.B2" office:value-type="string">
              <text:p text:style-name="P67" loext:marker-style-name="T11"/>
            </table:table-cell>
            <table:table-cell table:style-name="Tabla30.B2" office:value-type="string">
              <text:p text:style-name="P67" loext:marker-style-name="T11"/>
            </table:table-cell>
          </table:table-row>
          <table:table-row table:style-name="Tabla30.2">
            <table:table-cell table:style-name="Tabla30.A2" office:value-type="string">
              <text:p text:style-name="P31" loext:marker-style-name="T7"><text:span text:style-name="T11">3</text:span><text:span text:style-name="T11"/></text:p>
            </table:table-cell>
            <table:table-cell table:style-name="Tabla30.B2" office:value-type="string">
              <text:p text:style-name="P66" loext:marker-style-name="T11"/>
            </table:table-cell>
            <table:table-cell table:style-name="Tabla30.B2" office:value-type="string">
              <text:p text:style-name="P67" loext:marker-style-name="T11"/>
            </table:table-cell>
            <table:table-cell table:style-name="Tabla30.B2" office:value-type="string">
              <text:p text:style-name="P67" loext:marker-style-name="T11"/>
            </table:table-cell>
          </table:table-row>
          <table:table-row table:style-name="Tabla30.2">
            <table:table-cell table:style-name="Tabla30.A2" office:value-type="string">
              <text:p text:style-name="P31" loext:marker-style-name="T7"><text:span text:style-name="T11">4</text:span><text:span text:style-name="T11"/></text:p>
            </table:table-cell>
            <table:table-cell table:style-name="Tabla30.B2" office:value-type="string">
              <text:p text:style-name="P66" loext:marker-style-name="T11"/>
            </table:table-cell>
            <table:table-cell table:style-name="Tabla30.B2" office:value-type="string">
              <text:p text:style-name="P67" loext:marker-style-name="T11"/>
            </table:table-cell>
            <table:table-cell table:style-name="Tabla30.B2" office:value-type="string">
              <text:p text:style-name="P67" loext:marker-style-name="T11"/>
            </table:table-cell>
          </table:table-row>
          <table:table-row table:style-name="Tabla30.2">
            <table:table-cell table:style-name="Tabla30.A2" office:value-type="string">
              <text:p text:style-name="P31" loext:marker-style-name="T7"><text:span text:style-name="T11">5</text:span><text:span text:style-name="T11"/></text:p>
            </table:table-cell>
            <table:table-cell table:style-name="Tabla30.B2" office:value-type="string">
              <text:p text:style-name="P66" loext:marker-style-name="T11"/>
            </table:table-cell>
            <table:table-cell table:style-name="Tabla30.B2" office:value-type="string">
              <text:p text:style-name="P67" loext:marker-style-name="T11"/>
            </table:table-cell>
            <table:table-cell table:style-name="Tabla30.B2" office:value-type="string">
              <text:p text:style-name="P67" loext:marker-style-name="T11"/>
            </table:table-cell>
          </table:table-row>
        </table:table>
        <text:p text:style-name="P46" loext:marker-style-name="T7"><text:span text:style-name="T8">Nota: El formulador deberá analizar si se considera un incremento en la producción y/o precio y durante qué periodo.</text:span><text:span text:style-name="T8"/></text:p>
        <text:list text:continue-numbering="true" text:style-name="WWNum5">
          <text:list-item>
            <text:p text:style-name="P21" loext:marker-style-name="T7"><text:span text:style-name="T1">ESTUDIO FINANCIERO</text:span><text:span text:style-name="T1"/></text:p>
            <text:list>
              <text:list-item>
                <text:p text:style-name="P23" loext:marker-style-name="T7"><text:span text:style-name="T1">ESTIMACION DE LA INVERSION TOTAL: se deberá detallar de todos los bienes y servicios a ser financiado por el GR/GL y el AEO.</text:span><text:span text:style-name="T1"/></text:p>
              </text:list-item>
            </text:list>
          </text:list-item>
        </text:list>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F"/>
          <table:table-column table:style-name="Tabla31.G"/>
          <table:table-column table:style-name="Tabla31.H"/>
          <table:table-row table:style-name="Tabla31.1">
            <table:table-cell table:style-name="Tabla31.A1" table:number-rows-spanned="5" office:value-type="string">
              <text:p text:style-name="P31" loext:marker-style-name="T7"><text:span text:style-name="T6">CONCEPTO</text:span><text:span text:style-name="T6"/></text:p>
            </table:table-cell>
            <table:table-cell table:style-name="Tabla31.A1" table:number-rows-spanned="5" office:value-type="string">
              <text:p text:style-name="P31" loext:marker-style-name="T7"><text:span text:style-name="T6">UNIDAD DE MEDIDA</text:span><text:span text:style-name="T6"/></text:p>
            </table:table-cell>
            <table:table-cell table:style-name="Tabla31.A1" table:number-rows-spanned="5" office:value-type="string">
              <text:p text:style-name="P31" loext:marker-style-name="T7"><text:span text:style-name="T6">CANTIDAD</text:span><text:span text:style-name="T6"/></text:p>
            </table:table-cell>
            <table:table-cell table:style-name="Tabla31.D1" table:number-columns-spanned="5" office:value-type="string">
              <text:p text:style-name="P31" loext:marker-style-name="T7"><text:span text:style-name="T6">PRESUPUESTO TECNICO</text:span><text:span text:style-name="T6"/></text:p>
            </table:table-cell>
            <table:covered-table-cell/>
            <table:covered-table-cell/>
            <table:covered-table-cell/>
            <table:covered-table-cell/>
          </table:table-row>
          <table:table-row table:style-name="Tabla31.2">
            <table:covered-table-cell table:style-name="Tabla31.A2"/>
            <table:covered-table-cell table:style-name="Tabla31.B2"/>
            <table:covered-table-cell table:style-name="Tabla31.C2"/>
            <table:table-cell table:style-name="Tabla31.D1" table:number-columns-spanned="5" office:value-type="string">
              <text:p text:style-name="P31" loext:marker-style-name="T7"><text:span text:style-name="T6">(Considerado en la propuesta de productiva)</text:span><text:span text:style-name="T6"/></text:p>
            </table:table-cell>
            <table:covered-table-cell/>
            <table:covered-table-cell/>
            <table:covered-table-cell/>
            <table:covered-table-cell/>
          </table:table-row>
          <table:table-row table:style-name="Tabla31.1">
            <table:covered-table-cell table:style-name="Tabla31.A3"/>
            <table:covered-table-cell table:style-name="Tabla31.B3"/>
            <table:covered-table-cell table:style-name="Tabla31.C3"/>
            <table:table-cell table:style-name="Tabla31.D3" table:number-rows-spanned="3" office:value-type="string">
              <text:p text:style-name="P31" loext:marker-style-name="T7"><text:span text:style-name="T6">Total Inversión (S/.)</text:span><text:span text:style-name="T6"/></text:p>
            </table:table-cell>
            <table:table-cell table:style-name="Tabla31.D3" table:number-rows-spanned="3" office:value-type="string">
              <text:p text:style-name="P31" loext:marker-style-name="T7"><text:span text:style-name="T6">Monto Financiado por el GR o GL(S/.)</text:span><text:span text:style-name="T6"/></text:p>
            </table:table-cell>
            <table:table-cell table:style-name="Tabla31.D1" table:number-columns-spanned="3" office:value-type="string">
              <text:p text:style-name="P31" loext:marker-style-name="T7"><text:span text:style-name="T6">Monto Financiado por los AEO</text:span><text:span text:style-name="T6"/></text:p>
            </table:table-cell>
            <table:covered-table-cell/>
            <table:covered-table-cell/>
          </table:table-row>
          <table:table-row table:style-name="Tabla31.4">
            <table:covered-table-cell table:style-name="Tabla31.A4"/>
            <table:covered-table-cell table:style-name="Tabla31.B4"/>
            <table:covered-table-cell table:style-name="Tabla31.C4"/>
            <table:covered-table-cell table:style-name="Tabla31.D4"/>
            <table:covered-table-cell table:style-name="Tabla31.E4"/>
            <table:table-cell table:style-name="Tabla31.D3" table:number-rows-spanned="2" office:value-type="string">
              <text:p text:style-name="P31" loext:marker-style-name="T7"><text:span text:style-name="T6">En efectivo (S/.)</text:span><text:span text:style-name="T6"/></text:p>
            </table:table-cell>
            <table:table-cell table:style-name="Tabla31.G4" office:value-type="string">
              <text:p text:style-name="P31" loext:marker-style-name="T7"><text:span text:style-name="T6">En valorizaciones</text:span><text:span text:style-name="T6"/></text:p>
            </table:table-cell>
            <table:table-cell table:style-name="Tabla31.G4" office:value-type="string">
              <text:p text:style-name="P31" loext:marker-style-name="T7"><text:span text:style-name="T6">Total</text:span><text:span text:style-name="T6"/></text:p>
            </table:table-cell>
          </table:table-row>
          <table:table-row table:style-name="Tabla31.1">
            <table:covered-table-cell table:style-name="Tabla31.A5"/>
            <table:covered-table-cell table:style-name="Tabla31.B5"/>
            <table:covered-table-cell table:style-name="Tabla31.C5"/>
            <table:covered-table-cell table:style-name="Tabla31.D5"/>
            <table:covered-table-cell table:style-name="Tabla31.E5"/>
            <table:covered-table-cell table:style-name="Tabla31.F5"/>
            <table:table-cell table:style-name="Tabla31.G4" office:value-type="string">
              <text:p text:style-name="P31" loext:marker-style-name="T7"><text:span text:style-name="T6">(S/.)</text:span><text:span text:style-name="T6"/></text:p>
            </table:table-cell>
            <table:table-cell table:style-name="Tabla31.G4" office:value-type="string">
              <text:p text:style-name="P31" loext:marker-style-name="T7"><text:span text:style-name="T6">(S/.)</text:span><text:span text:style-name="T6"/></text:p>
            </table:table-cell>
          </table:table-row>
          <table:table-row table:style-name="Tabla31.6">
            <table:table-cell table:style-name="Tabla31.A6" office:value-type="string">
              <text:p text:style-name="P46" loext:marker-style-name="T7"><text:span text:style-name="T6">I.INVERSION FIJA</text:span><text:span text:style-name="T6"/></text:p>
            </table:table-cell>
            <table:table-cell table:style-name="Tabla31.B6" office:value-type="string">
              <text:p text:style-name="P57" loext:marker-style-name="T7"/>
            </table:table-cell>
            <table:table-cell table:style-name="Tabla31.B6" office:value-type="string">
              <text:p text:style-name="P57" loext:marker-style-name="T7"/>
            </table:table-cell>
            <table:table-cell table:style-name="Tabla31.B6" office:value-type="string">
              <text:p text:style-name="P53" loext:marker-style-name="T6"/>
            </table:table-cell>
            <table:table-cell table:style-name="Tabla31.B6" office:value-type="string">
              <text:p text:style-name="P68" loext:marker-style-name="T11"/>
            </table:table-cell>
            <table:table-cell table:style-name="Tabla31.B6" office:value-type="string">
              <text:p text:style-name="P68" loext:marker-style-name="T11"/>
            </table:table-cell>
            <table:table-cell table:style-name="Tabla31.B6" office:value-type="string">
              <text:p text:style-name="P68" loext:marker-style-name="T11"/>
            </table:table-cell>
            <table:table-cell table:style-name="Tabla31.B6" office:value-type="string">
              <text:p text:style-name="P53" loext:marker-style-name="T6"/>
            </table:table-cell>
          </table:table-row>
          <table:table-row table:style-name="Tabla31.6">
            <table:table-cell table:style-name="Tabla31.A7" office:value-type="string">
              <text:p text:style-name="P46" loext:marker-style-name="T7"><text:span text:style-name="T6"><text:s/>I.1. INVERSION FIJA TANGIBLE</text:span><text:span text:style-name="T6"/></text:p>
            </table:table-cell>
            <table:table-cell table:style-name="Tabla31.B7" table:number-columns-spanned="2" office:value-type="string">
              <text:p text:style-name="P59" loext:marker-style-name="T7"/>
            </table:table-cell>
            <table:covered-table-cell/>
            <table:table-cell table:style-name="Tabla31.D7" office:value-type="string">
              <text:p text:style-name="P53" loext:marker-style-name="T6"/>
            </table:table-cell>
            <table:table-cell table:style-name="Tabla31.D7" office:value-type="string">
              <text:p text:style-name="P53" loext:marker-style-name="T6"/>
            </table:table-cell>
            <table:table-cell table:style-name="Tabla31.D7" office:value-type="string">
              <text:p text:style-name="P53" loext:marker-style-name="T6"/>
            </table:table-cell>
            <table:table-cell table:style-name="Tabla31.D7" office:value-type="string">
              <text:p text:style-name="P53" loext:marker-style-name="T6"/>
            </table:table-cell>
            <table:table-cell table:style-name="Tabla31.D7" office:value-type="string">
              <text:p text:style-name="P53" loext:marker-style-name="T6"/>
            </table:table-cell>
          </table:table-row>
          <table:table-row table:style-name="Tabla31.8">
            <table:table-cell table:style-name="Tabla31.A7" office:value-type="string">
              <text:p text:style-name="P46" loext:marker-style-name="T7"><text:span text:style-name="T6"><text:s/>I.1.1. Terrenos y obras civiles</text:span><text:span text:style-name="T6"/></text:p>
            </table:table-cell>
            <table:table-cell table:style-name="Tabla31.D7" office:value-type="string">
              <text:p text:style-name="P57" loext:marker-style-name="T7"/>
            </table:table-cell>
            <table:table-cell table:style-name="Tabla31.D7" office:value-type="string">
              <text:p text:style-name="P57" loext:marker-style-name="T7"/>
            </table:table-cell>
            <table:table-cell table:style-name="Tabla31.D7" office:value-type="string">
              <text:p text:style-name="P53" loext:marker-style-name="T6"/>
            </table:table-cell>
            <table:table-cell table:style-name="Tabla31.D7" office:value-type="string">
              <text:p text:style-name="P53" loext:marker-style-name="T6"/>
            </table:table-cell>
            <table:table-cell table:style-name="Tabla31.D7" office:value-type="string">
              <text:p text:style-name="P53" loext:marker-style-name="T6"/>
            </table:table-cell>
            <table:table-cell table:style-name="Tabla31.D7" office:value-type="string">
              <text:p text:style-name="P53" loext:marker-style-name="T6"/>
            </table:table-cell>
            <table:table-cell table:style-name="Tabla31.D7" office:value-type="string">
              <text:p text:style-name="P53" loext:marker-style-name="T6"/>
            </table:table-cell>
          </table:table-row>
          <text:soft-page-break/>
          <table:table-row table:style-name="Tabla31.1">
            <table:table-cell table:style-name="Tabla31.A7" office:value-type="string">
              <text:p text:style-name="P48" loext:marker-style-name="T7"><text:span text:style-name="T6">Terrenos</text:span><text:span text:style-name="T6"/></text:p>
            </table:table-cell>
            <table:table-cell table:style-name="Tabla31.D7" office:value-type="string">
              <text:p text:style-name="P57" loext:marker-style-name="T7"/>
            </table:table-cell>
            <table:table-cell table:style-name="Tabla31.D7" office:value-type="string">
              <text:p text:style-name="P57" loext:marker-style-name="T7"/>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row>
          <table:table-row table:style-name="Tabla31.1">
            <table:table-cell table:style-name="Tabla31.A7" office:value-type="string">
              <text:p text:style-name="P48" loext:marker-style-name="T7"><text:span text:style-name="T6">Obras civiles</text:span><text:span text:style-name="T6"/></text:p>
            </table:table-cell>
            <table:table-cell table:style-name="Tabla31.D7" office:value-type="string">
              <text:p text:style-name="P57" loext:marker-style-name="T7"/>
            </table:table-cell>
            <table:table-cell table:style-name="Tabla31.D7" office:value-type="string">
              <text:p text:style-name="P57" loext:marker-style-name="T7"/>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row>
          <table:table-row table:style-name="Tabla31.1">
            <table:table-cell table:style-name="Tabla31.A7" office:value-type="string">
              <text:p text:style-name="P46" loext:marker-style-name="T7"><text:span text:style-name="T6">…………………………….</text:span><text:span text:style-name="T6"/></text:p>
            </table:table-cell>
            <table:table-cell table:style-name="Tabla31.D7" office:value-type="string">
              <text:p text:style-name="P57" loext:marker-style-name="T7"/>
            </table:table-cell>
            <table:table-cell table:style-name="Tabla31.D7" office:value-type="string">
              <text:p text:style-name="P57" loext:marker-style-name="T7"/>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row>
          <table:table-row table:style-name="Tabla31.1">
            <table:table-cell table:style-name="Tabla31.A7" office:value-type="string">
              <text:p text:style-name="P46" loext:marker-style-name="T7"><text:span text:style-name="T6"><text:s/>I.1.2. Maquinaria y Equipos</text:span><text:span text:style-name="T6"/></text:p>
            </table:table-cell>
            <table:table-cell table:style-name="Tabla31.D7" office:value-type="string">
              <text:p text:style-name="P57" loext:marker-style-name="T7"/>
            </table:table-cell>
            <table:table-cell table:style-name="Tabla31.D7" office:value-type="string">
              <text:p text:style-name="P57" loext:marker-style-name="T7"/>
            </table:table-cell>
            <table:table-cell table:style-name="Tabla31.D7" office:value-type="string">
              <text:p text:style-name="P53" loext:marker-style-name="T6"/>
            </table:table-cell>
            <table:table-cell table:style-name="Tabla31.D7" office:value-type="string">
              <text:p text:style-name="P53" loext:marker-style-name="T6"/>
            </table:table-cell>
            <table:table-cell table:style-name="Tabla31.D7" office:value-type="string">
              <text:p text:style-name="P53" loext:marker-style-name="T6"/>
            </table:table-cell>
            <table:table-cell table:style-name="Tabla31.D7" office:value-type="string">
              <text:p text:style-name="P53" loext:marker-style-name="T6"/>
            </table:table-cell>
            <table:table-cell table:style-name="Tabla31.D7" office:value-type="string">
              <text:p text:style-name="P53" loext:marker-style-name="T6"/>
            </table:table-cell>
          </table:table-row>
          <table:table-row table:style-name="Tabla31.1">
            <table:table-cell table:style-name="Tabla31.A7" office:value-type="string">
              <text:p text:style-name="P46" loext:marker-style-name="T7"><text:span text:style-name="T6">……………………………</text:span><text:span text:style-name="T6"/></text:p>
            </table:table-cell>
            <table:table-cell table:style-name="Tabla31.D7" office:value-type="string">
              <text:p text:style-name="P57" loext:marker-style-name="T7"/>
            </table:table-cell>
            <table:table-cell table:style-name="Tabla31.D7" office:value-type="string">
              <text:p text:style-name="P57" loext:marker-style-name="T7"/>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row>
          <table:table-row table:style-name="Tabla31.1">
            <table:table-cell table:style-name="Tabla31.A7" office:value-type="string">
              <text:p text:style-name="P46" loext:marker-style-name="T7"><text:span text:style-name="T6">………………………………..</text:span><text:span text:style-name="T6"/></text:p>
            </table:table-cell>
            <table:table-cell table:style-name="Tabla31.D7" office:value-type="string">
              <text:p text:style-name="P57" loext:marker-style-name="T7"/>
            </table:table-cell>
            <table:table-cell table:style-name="Tabla31.D7" office:value-type="string">
              <text:p text:style-name="P57" loext:marker-style-name="T7"/>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row>
          <table:table-row table:style-name="Tabla31.1">
            <table:table-cell table:style-name="Tabla31.A7" office:value-type="string">
              <text:p text:style-name="P46" loext:marker-style-name="T7"><text:span text:style-name="T6"><text:s/>I.1.4. Vehículos</text:span><text:span text:style-name="T6"/></text:p>
            </table:table-cell>
            <table:table-cell table:style-name="Tabla31.D7" office:value-type="string">
              <text:p text:style-name="P57" loext:marker-style-name="T7"/>
            </table:table-cell>
            <table:table-cell table:style-name="Tabla31.D7" office:value-type="string">
              <text:p text:style-name="P57" loext:marker-style-name="T7"/>
            </table:table-cell>
            <table:table-cell table:style-name="Tabla31.D7" office:value-type="string">
              <text:p text:style-name="P53" loext:marker-style-name="T6"/>
            </table:table-cell>
            <table:table-cell table:style-name="Tabla31.D7" office:value-type="string">
              <text:p text:style-name="P53" loext:marker-style-name="T6"/>
            </table:table-cell>
            <table:table-cell table:style-name="Tabla31.D7" office:value-type="string">
              <text:p text:style-name="P53" loext:marker-style-name="T6"/>
            </table:table-cell>
            <table:table-cell table:style-name="Tabla31.D7" office:value-type="string">
              <text:p text:style-name="P53" loext:marker-style-name="T6"/>
            </table:table-cell>
            <table:table-cell table:style-name="Tabla31.D7" office:value-type="string">
              <text:p text:style-name="P53" loext:marker-style-name="T6"/>
            </table:table-cell>
          </table:table-row>
          <table:table-row table:style-name="Tabla31.1">
            <table:table-cell table:style-name="Tabla31.A7" office:value-type="string">
              <text:p text:style-name="P46" loext:marker-style-name="T7"><text:span text:style-name="T6">……………………………</text:span><text:span text:style-name="T6"/></text:p>
            </table:table-cell>
            <table:table-cell table:style-name="Tabla31.D7" office:value-type="string">
              <text:p text:style-name="P57" loext:marker-style-name="T7"/>
            </table:table-cell>
            <table:table-cell table:style-name="Tabla31.D7" office:value-type="string">
              <text:p text:style-name="P57" loext:marker-style-name="T7"/>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row>
          <text:soft-page-break/>
          <table:table-row table:style-name="Tabla31.1">
            <table:table-cell table:style-name="Tabla31.A7" office:value-type="string">
              <text:p text:style-name="P46" loext:marker-style-name="T7"><text:span text:style-name="T6">…………………………..</text:span><text:span text:style-name="T6"/></text:p>
            </table:table-cell>
            <table:table-cell table:style-name="Tabla31.D7" office:value-type="string">
              <text:p text:style-name="P57" loext:marker-style-name="T7"/>
            </table:table-cell>
            <table:table-cell table:style-name="Tabla31.D7" office:value-type="string">
              <text:p text:style-name="P57" loext:marker-style-name="T7"/>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row>
          <table:table-row table:style-name="Tabla31.1">
            <table:table-cell table:style-name="Tabla31.A7" office:value-type="string">
              <text:p text:style-name="P46" loext:marker-style-name="T7"><text:span text:style-name="T6"><text:s/>I.1.5.Muebles y enseres</text:span><text:span text:style-name="T6"/></text:p>
            </table:table-cell>
            <table:table-cell table:style-name="Tabla31.D7" office:value-type="string">
              <text:p text:style-name="P57" loext:marker-style-name="T7"/>
            </table:table-cell>
            <table:table-cell table:style-name="Tabla31.D7" office:value-type="string">
              <text:p text:style-name="P57" loext:marker-style-name="T7"/>
            </table:table-cell>
            <table:table-cell table:style-name="Tabla31.D7" office:value-type="string">
              <text:p text:style-name="P53" loext:marker-style-name="T6"/>
            </table:table-cell>
            <table:table-cell table:style-name="Tabla31.D7" office:value-type="string">
              <text:p text:style-name="P53" loext:marker-style-name="T6"/>
            </table:table-cell>
            <table:table-cell table:style-name="Tabla31.D7" office:value-type="string">
              <text:p text:style-name="P53" loext:marker-style-name="T6"/>
            </table:table-cell>
            <table:table-cell table:style-name="Tabla31.D7" office:value-type="string">
              <text:p text:style-name="P53" loext:marker-style-name="T6"/>
            </table:table-cell>
            <table:table-cell table:style-name="Tabla31.D7" office:value-type="string">
              <text:p text:style-name="P53" loext:marker-style-name="T6"/>
            </table:table-cell>
          </table:table-row>
          <table:table-row table:style-name="Tabla31.1">
            <table:table-cell table:style-name="Tabla31.A7" office:value-type="string">
              <text:p text:style-name="P46" loext:marker-style-name="T7"><text:span text:style-name="T6">…………………………….</text:span><text:span text:style-name="T6"/></text:p>
            </table:table-cell>
            <table:table-cell table:style-name="Tabla31.D7" office:value-type="string">
              <text:p text:style-name="P57" loext:marker-style-name="T7"/>
            </table:table-cell>
            <table:table-cell table:style-name="Tabla31.D7" office:value-type="string">
              <text:p text:style-name="P57" loext:marker-style-name="T7"/>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row>
          <table:table-row table:style-name="Tabla31.1">
            <table:table-cell table:style-name="Tabla31.A7" office:value-type="string">
              <text:p text:style-name="P46" loext:marker-style-name="T7"><text:span text:style-name="T6">………………………………</text:span><text:span text:style-name="T6"/></text:p>
            </table:table-cell>
            <table:table-cell table:style-name="Tabla31.D7" office:value-type="string">
              <text:p text:style-name="P57" loext:marker-style-name="T7"/>
            </table:table-cell>
            <table:table-cell table:style-name="Tabla31.D7" office:value-type="string">
              <text:p text:style-name="P57" loext:marker-style-name="T7"/>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row>
          <table:table-row table:style-name="Tabla31.21">
            <table:table-cell table:style-name="Tabla31.A7" office:value-type="string">
              <text:p text:style-name="P46" loext:marker-style-name="T7"><text:span text:style-name="T6"><text:s/>I.2. INVERSION FIJA INTANGIBLE</text:span><text:span text:style-name="T6"/></text:p>
            </table:table-cell>
            <table:table-cell table:style-name="Tabla31.B7" table:number-columns-spanned="2" office:value-type="string">
              <text:p text:style-name="P59" loext:marker-style-name="T7"/>
            </table:table-cell>
            <table:covered-table-cell/>
            <table:table-cell table:style-name="Tabla31.D7" office:value-type="string">
              <text:p text:style-name="P53" loext:marker-style-name="T6"/>
            </table:table-cell>
            <table:table-cell table:style-name="Tabla31.D7" office:value-type="string">
              <text:p text:style-name="P53" loext:marker-style-name="T6"/>
            </table:table-cell>
            <table:table-cell table:style-name="Tabla31.D7" office:value-type="string">
              <text:p text:style-name="P53" loext:marker-style-name="T6"/>
            </table:table-cell>
            <table:table-cell table:style-name="Tabla31.D7" office:value-type="string">
              <text:p text:style-name="P53" loext:marker-style-name="T6"/>
            </table:table-cell>
            <table:table-cell table:style-name="Tabla31.D7" office:value-type="string">
              <text:p text:style-name="P53" loext:marker-style-name="T6"/>
            </table:table-cell>
          </table:table-row>
          <table:table-row table:style-name="Tabla31.1">
            <table:table-cell table:style-name="Tabla31.A7" office:value-type="string">
              <text:p text:style-name="P46" loext:marker-style-name="T7"><text:span text:style-name="T6">Estudio Definitivos</text:span><text:span text:style-name="T6"/></text:p>
            </table:table-cell>
            <table:table-cell table:style-name="Tabla31.D7" office:value-type="string">
              <text:p text:style-name="P57" loext:marker-style-name="T7"/>
            </table:table-cell>
            <table:table-cell table:style-name="Tabla31.D7" office:value-type="string">
              <text:p text:style-name="P57" loext:marker-style-name="T7"/>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row>
          <table:table-row table:style-name="Tabla31.1">
            <table:table-cell table:style-name="Tabla31.A7" office:value-type="string">
              <text:p text:style-name="P46" loext:marker-style-name="T7"><text:span text:style-name="T6">Gastos en la Organización</text:span><text:span text:style-name="T6"/></text:p>
            </table:table-cell>
            <table:table-cell table:style-name="Tabla31.D7" office:value-type="string">
              <text:p text:style-name="P57" loext:marker-style-name="T7"/>
            </table:table-cell>
            <table:table-cell table:style-name="Tabla31.D7" office:value-type="string">
              <text:p text:style-name="P57" loext:marker-style-name="T7"/>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row>
          <table:table-row table:style-name="Tabla31.1">
            <table:table-cell table:style-name="Tabla31.A7" office:value-type="string">
              <text:p text:style-name="P46" loext:marker-style-name="T7"><text:span text:style-name="T6">Licencia Municipal</text:span><text:span text:style-name="T6"/></text:p>
            </table:table-cell>
            <table:table-cell table:style-name="Tabla31.D7" office:value-type="string">
              <text:p text:style-name="P57" loext:marker-style-name="T7"/>
            </table:table-cell>
            <table:table-cell table:style-name="Tabla31.D7" office:value-type="string">
              <text:p text:style-name="P57" loext:marker-style-name="T7"/>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row>
          <text:soft-page-break/>
          <table:table-row table:style-name="Tabla31.1">
            <table:table-cell table:style-name="Tabla31.A7" office:value-type="string">
              <text:p text:style-name="P46" loext:marker-style-name="T7"><text:span text:style-name="T6">Certificado Defensa Civil</text:span><text:span text:style-name="T6"/></text:p>
            </table:table-cell>
            <table:table-cell table:style-name="Tabla31.D7" office:value-type="string">
              <text:p text:style-name="P57" loext:marker-style-name="T7"/>
            </table:table-cell>
            <table:table-cell table:style-name="Tabla31.D7" office:value-type="string">
              <text:p text:style-name="P57" loext:marker-style-name="T7"/>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row>
          <table:table-row table:style-name="Tabla31.1">
            <table:table-cell table:style-name="Tabla31.A7" office:value-type="string">
              <text:p text:style-name="P46" loext:marker-style-name="T7"><text:span text:style-name="T6">……………..</text:span><text:span text:style-name="T6"/></text:p>
            </table:table-cell>
            <table:table-cell table:style-name="Tabla31.D7" office:value-type="string">
              <text:p text:style-name="P57" loext:marker-style-name="T7"/>
            </table:table-cell>
            <table:table-cell table:style-name="Tabla31.D7" office:value-type="string">
              <text:p text:style-name="P57" loext:marker-style-name="T7"/>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row>
          <table:table-row table:style-name="Tabla31.1">
            <table:table-cell table:style-name="Tabla31.A7" office:value-type="string">
              <text:p text:style-name="P46" loext:marker-style-name="T7"><text:span text:style-name="T6">…………………..</text:span><text:span text:style-name="T6"/></text:p>
            </table:table-cell>
            <table:table-cell table:style-name="Tabla31.D7" office:value-type="string">
              <text:p text:style-name="P57" loext:marker-style-name="T7"/>
            </table:table-cell>
            <table:table-cell table:style-name="Tabla31.D7" office:value-type="string">
              <text:p text:style-name="P57" loext:marker-style-name="T7"/>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row>
          <table:table-row table:style-name="Tabla31.1">
            <table:table-cell table:style-name="Tabla31.A7" office:value-type="string">
              <text:p text:style-name="P46" loext:marker-style-name="T7"><text:span text:style-name="T6">……………………</text:span><text:span text:style-name="T6"/></text:p>
            </table:table-cell>
            <table:table-cell table:style-name="Tabla31.D7" office:value-type="string">
              <text:p text:style-name="P57" loext:marker-style-name="T7"/>
            </table:table-cell>
            <table:table-cell table:style-name="Tabla31.D7" office:value-type="string">
              <text:p text:style-name="P57" loext:marker-style-name="T7"/>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row>
          <table:table-row table:style-name="Tabla31.29">
            <table:table-cell table:style-name="Tabla31.A6" office:value-type="string">
              <text:p text:style-name="P46" loext:marker-style-name="T7"><text:span text:style-name="T6">II. CAPITAL DE TRABAJO</text:span><text:span text:style-name="T6"/></text:p>
            </table:table-cell>
            <table:table-cell table:style-name="Tabla31.B6" office:value-type="string">
              <text:p text:style-name="P61" loext:marker-style-name="T7"/>
            </table:table-cell>
            <table:table-cell table:style-name="Tabla31.B6" office:value-type="string">
              <text:p text:style-name="P61" loext:marker-style-name="T7"/>
            </table:table-cell>
            <table:table-cell table:style-name="Tabla31.B6" office:value-type="string">
              <text:p text:style-name="P53" loext:marker-style-name="T6"/>
            </table:table-cell>
            <table:table-cell table:style-name="Tabla31.B6" office:value-type="string">
              <text:p text:style-name="P53" loext:marker-style-name="T6"/>
            </table:table-cell>
            <table:table-cell table:style-name="Tabla31.B6" office:value-type="string">
              <text:p text:style-name="P68" loext:marker-style-name="T11"/>
            </table:table-cell>
            <table:table-cell table:style-name="Tabla31.B6" office:value-type="string">
              <text:p text:style-name="P68" loext:marker-style-name="T11"/>
            </table:table-cell>
            <table:table-cell table:style-name="Tabla31.B6" office:value-type="string">
              <text:p text:style-name="P53" loext:marker-style-name="T6"/>
            </table:table-cell>
          </table:table-row>
          <table:table-row table:style-name="Tabla31.1">
            <table:table-cell table:style-name="Tabla31.A7" office:value-type="string">
              <text:p text:style-name="P46" loext:marker-style-name="T7"><text:span text:style-name="T6">Materia prima</text:span><text:span text:style-name="T6"/></text:p>
            </table:table-cell>
            <table:table-cell table:style-name="Tabla31.D7" office:value-type="string">
              <text:p text:style-name="P57" loext:marker-style-name="T7"/>
            </table:table-cell>
            <table:table-cell table:style-name="Tabla31.D7" office:value-type="string">
              <text:p text:style-name="P57" loext:marker-style-name="T7"/>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row>
          <table:table-row table:style-name="Tabla31.1">
            <table:table-cell table:style-name="Tabla31.A7" office:value-type="string">
              <text:p text:style-name="P46" loext:marker-style-name="T7"><text:span text:style-name="T6">Insumos complementarios</text:span><text:span text:style-name="T6"/></text:p>
            </table:table-cell>
            <table:table-cell table:style-name="Tabla31.D7" office:value-type="string">
              <text:p text:style-name="P57" loext:marker-style-name="T7"/>
            </table:table-cell>
            <table:table-cell table:style-name="Tabla31.D7" office:value-type="string">
              <text:p text:style-name="P57" loext:marker-style-name="T7"/>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row>
          <table:table-row table:style-name="Tabla31.1">
            <table:table-cell table:style-name="Tabla31.A7" office:value-type="string">
              <text:p text:style-name="P46" loext:marker-style-name="T7"><text:span text:style-name="T6">Mano de obra</text:span><text:span text:style-name="T6"/></text:p>
            </table:table-cell>
            <table:table-cell table:style-name="Tabla31.D7" office:value-type="string">
              <text:p text:style-name="P57" loext:marker-style-name="T7"/>
            </table:table-cell>
            <table:table-cell table:style-name="Tabla31.D7" office:value-type="string">
              <text:p text:style-name="P57" loext:marker-style-name="T7"/>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row>
          <text:soft-page-break/>
          <table:table-row table:style-name="Tabla31.1">
            <table:table-cell table:style-name="Tabla31.A7" office:value-type="string">
              <text:p text:style-name="P46" loext:marker-style-name="T7"><text:span text:style-name="T6">Otros necesarios…….</text:span><text:span text:style-name="T6"/></text:p>
            </table:table-cell>
            <table:table-cell table:style-name="Tabla31.D7" office:value-type="string">
              <text:p text:style-name="P57" loext:marker-style-name="T7"/>
            </table:table-cell>
            <table:table-cell table:style-name="Tabla31.D7" office:value-type="string">
              <text:p text:style-name="P57" loext:marker-style-name="T7"/>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cell table:style-name="Tabla31.D7" office:value-type="string">
              <text:p text:style-name="P68" loext:marker-style-name="T11"/>
            </table:table-cell>
          </table:table-row>
          <table:table-row table:style-name="Tabla31.34">
            <table:table-cell table:style-name="Tabla31.A6" office:value-type="string">
              <text:p text:style-name="P46" loext:marker-style-name="T7"><text:span text:style-name="T6">III.GASTOS GENERALES (Max 10% de Inversión Fija)</text:span><text:span text:style-name="T6"/></text:p>
            </table:table-cell>
            <table:table-cell table:style-name="Tabla31.B6" office:value-type="string">
              <text:p text:style-name="P57" loext:marker-style-name="T7"/>
            </table:table-cell>
            <table:table-cell table:style-name="Tabla31.B6" office:value-type="string">
              <text:p text:style-name="P57" loext:marker-style-name="T7"/>
            </table:table-cell>
            <table:table-cell table:style-name="Tabla31.B6" office:value-type="string">
              <text:p text:style-name="P53" loext:marker-style-name="T6"/>
            </table:table-cell>
            <table:table-cell table:style-name="Tabla31.B6" office:value-type="string">
              <text:p text:style-name="P51" loext:marker-style-name="T6"/>
            </table:table-cell>
            <table:table-cell table:style-name="Tabla31.B6" office:value-type="string">
              <text:p text:style-name="P68" loext:marker-style-name="T11"/>
            </table:table-cell>
            <table:table-cell table:style-name="Tabla31.B6" office:value-type="string">
              <text:p text:style-name="P68" loext:marker-style-name="T11"/>
            </table:table-cell>
            <table:table-cell table:style-name="Tabla31.B6" office:value-type="string">
              <text:p text:style-name="P53" loext:marker-style-name="T6"/>
            </table:table-cell>
          </table:table-row>
          <table:table-row table:style-name="Tabla31.35">
            <table:table-cell table:style-name="Tabla31.A6" office:value-type="string">
              <text:p text:style-name="P46" loext:marker-style-name="T7"><text:span text:style-name="T6">IV. GASTOS DE SUPERVISION (Max. 5% de Inversión Fija)</text:span><text:span text:style-name="T6"/></text:p>
            </table:table-cell>
            <table:table-cell table:style-name="Tabla31.B6" office:value-type="string">
              <text:p text:style-name="P61" loext:marker-style-name="T7"/>
            </table:table-cell>
            <table:table-cell table:style-name="Tabla31.B6" office:value-type="string">
              <text:p text:style-name="P61" loext:marker-style-name="T7"/>
            </table:table-cell>
            <table:table-cell table:style-name="Tabla31.B6" office:value-type="string">
              <text:p text:style-name="P53" loext:marker-style-name="T6"/>
            </table:table-cell>
            <table:table-cell table:style-name="Tabla31.B6" office:value-type="string">
              <text:p text:style-name="P51" loext:marker-style-name="T6"/>
            </table:table-cell>
            <table:table-cell table:style-name="Tabla31.B6" office:value-type="string">
              <text:p text:style-name="P68" loext:marker-style-name="T11"/>
            </table:table-cell>
            <table:table-cell table:style-name="Tabla31.B6" office:value-type="string">
              <text:p text:style-name="P68" loext:marker-style-name="T11"/>
            </table:table-cell>
            <table:table-cell table:style-name="Tabla31.B6" office:value-type="string">
              <text:p text:style-name="P53" loext:marker-style-name="T6"/>
            </table:table-cell>
          </table:table-row>
          <table:table-row table:style-name="Tabla31.8">
            <table:table-cell table:style-name="Tabla31.A1" table:number-columns-spanned="3" office:value-type="string">
              <text:p text:style-name="P46" loext:marker-style-name="T7"><text:span text:style-name="T6">TOTAL INVERSIÒN</text:span><text:span text:style-name="T6"/></text:p>
            </table:table-cell>
            <table:covered-table-cell/>
            <table:covered-table-cell/>
            <table:table-cell table:style-name="Tabla31.G4" office:value-type="string">
              <text:p text:style-name="P53" loext:marker-style-name="T6"/>
            </table:table-cell>
            <table:table-cell table:style-name="Tabla31.G4" office:value-type="string">
              <text:p text:style-name="P53" loext:marker-style-name="T6"/>
            </table:table-cell>
            <table:table-cell table:style-name="Tabla31.G4" office:value-type="string">
              <text:p text:style-name="P52" loext:marker-style-name="T6"/>
            </table:table-cell>
            <table:table-cell table:style-name="Tabla31.G4" office:value-type="string">
              <text:p text:style-name="P52" loext:marker-style-name="T6"/>
            </table:table-cell>
            <table:table-cell table:style-name="Tabla31.G4" office:value-type="string">
              <text:p text:style-name="P53" loext:marker-style-name="T6"/>
            </table:table-cell>
          </table:table-row>
        </table:table>
        <text:list text:continue-numbering="true" text:style-name="WWNum5">
          <text:list-item>
            <text:list>
              <text:list-item>
                <text:p text:style-name="P23" loext:marker-style-name="T7"><text:span text:style-name="T1">PRESUPUESTO DE EGRESOS: Se registrara los costos de producción del bien o servicio y los gastos de operación </text:span><text:span text:style-name="T1"/></text:p>
              </text:list-item>
            </text:list>
          </text:list-item>
        </text:list>
        <table:table table:name="Tabla32" table:style-name="Tabla32">
          <table:table-column table:style-name="Tabla32.A"/>
          <table:table-column table:style-name="Tabla32.B"/>
          <table:table-column table:style-name="Tabla32.C" table:number-columns-repeated="2"/>
          <table:table-column table:style-name="Tabla32.E"/>
          <table:table-column table:style-name="Tabla32.F"/>
          <table:table-header-rows>
            <table:table-row table:style-name="Tabla32.1">
              <table:table-cell table:style-name="Tabla32.A1" table:number-columns-spanned="6" office:value-type="string">
                <text:p text:style-name="P31" loext:marker-style-name="T7"><text:span text:style-name="T6">PRESUPUESTO DE EGRESOS (OPERACION)</text:span><text:span text:style-name="T6"/></text:p>
              </table:table-cell>
              <table:covered-table-cell/>
              <table:covered-table-cell/>
              <table:covered-table-cell/>
              <table:covered-table-cell/>
              <table:covered-table-cell/>
            </table:table-row>
            <table:table-row table:style-name="Tabla32.1">
              <table:table-cell table:style-name="Tabla32.A2" table:number-rows-spanned="2" office:value-type="string">
                <text:p text:style-name="P31" loext:marker-style-name="T7"><text:span text:style-name="T6">CONCEPTO</text:span><text:span text:style-name="T6"/></text:p>
              </table:table-cell>
              <table:table-cell table:style-name="Tabla32.B2" table:number-columns-spanned="5" office:value-type="string">
                <text:p text:style-name="P31" loext:marker-style-name="T7"><text:span text:style-name="T6">AÑOS</text:span><text:span text:style-name="T6"/></text:p>
              </table:table-cell>
              <table:covered-table-cell/>
              <table:covered-table-cell/>
              <table:covered-table-cell/>
              <table:covered-table-cell/>
            </table:table-row>
            <table:table-row table:style-name="Tabla32.1">
              <table:covered-table-cell table:style-name="Tabla32.A2"/>
              <table:table-cell table:style-name="Tabla32.B3" office:value-type="string">
                <text:p text:style-name="P31" loext:marker-style-name="T7"><text:span text:style-name="T6">1</text:span><text:span text:style-name="T6"/></text:p>
              </table:table-cell>
              <table:table-cell table:style-name="Tabla32.B3" office:value-type="string">
                <text:p text:style-name="P31" loext:marker-style-name="T7"><text:span text:style-name="T6">2</text:span><text:span text:style-name="T6"/></text:p>
              </table:table-cell>
              <table:table-cell table:style-name="Tabla32.B3" office:value-type="string">
                <text:p text:style-name="P31" loext:marker-style-name="T7"><text:span text:style-name="T6">3</text:span><text:span text:style-name="T6"/></text:p>
              </table:table-cell>
              <table:table-cell table:style-name="Tabla32.B3" office:value-type="string">
                <text:p text:style-name="P31" loext:marker-style-name="T7"><text:span text:style-name="T6">4</text:span><text:span text:style-name="T6"/></text:p>
              </table:table-cell>
              <table:table-cell table:style-name="Tabla32.B3" office:value-type="string">
                <text:p text:style-name="P31" loext:marker-style-name="T7"><text:span text:style-name="T6">5</text:span><text:span text:style-name="T6"/></text:p>
              </table:table-cell>
            </table:table-row>
          </table:table-header-rows>
          <table:table-row table:style-name="Tabla32.1">
            <table:table-cell table:style-name="Tabla32.A4" office:value-type="string">
              <text:p text:style-name="P46" loext:marker-style-name="T7"><text:span text:style-name="T6">I. COSTOS DE PRODUCCIÒN</text:span><text:span text:style-name="T6"/></text:p>
            </table:table-cell>
            <table:table-cell table:style-name="Tabla32.B4" office:value-type="string">
              <text:p text:style-name="P52" loext:marker-style-name="T6"/>
            </table:table-cell>
            <table:table-cell table:style-name="Tabla32.B4" office:value-type="string">
              <text:p text:style-name="P52" loext:marker-style-name="T6"/>
            </table:table-cell>
            <table:table-cell table:style-name="Tabla32.B4" office:value-type="string">
              <text:p text:style-name="P52" loext:marker-style-name="T6"/>
            </table:table-cell>
            <table:table-cell table:style-name="Tabla32.B4" office:value-type="string">
              <text:p text:style-name="P52" loext:marker-style-name="T6"/>
            </table:table-cell>
            <table:table-cell table:style-name="Tabla32.B4" office:value-type="string">
              <text:p text:style-name="P52" loext:marker-style-name="T6"/>
            </table:table-cell>
          </table:table-row>
          <table:table-row table:style-name="Tabla32.1">
            <table:table-cell table:style-name="Tabla32.A4" office:value-type="string">
              <text:p text:style-name="P46" loext:marker-style-name="T7"><text:span text:style-name="T6">I.1. COSTOS DIRECTOS</text:span><text:span text:style-name="T6"/></text:p>
            </table:table-cell>
            <table:table-cell table:style-name="Tabla32.B4" office:value-type="string">
              <text:p text:style-name="P52" loext:marker-style-name="T6"/>
            </table:table-cell>
            <table:table-cell table:style-name="Tabla32.B4" office:value-type="string">
              <text:p text:style-name="P52" loext:marker-style-name="T6"/>
            </table:table-cell>
            <table:table-cell table:style-name="Tabla32.B4" office:value-type="string">
              <text:p text:style-name="P52" loext:marker-style-name="T6"/>
            </table:table-cell>
            <table:table-cell table:style-name="Tabla32.B4" office:value-type="string">
              <text:p text:style-name="P52" loext:marker-style-name="T6"/>
            </table:table-cell>
            <table:table-cell table:style-name="Tabla32.B4" office:value-type="string">
              <text:p text:style-name="P52" loext:marker-style-name="T6"/>
            </table:table-cell>
          </table:table-row>
          <table:table-row table:style-name="Tabla32.1">
            <table:table-cell table:style-name="Tabla32.A4" office:value-type="string">
              <text:p text:style-name="P46" loext:marker-style-name="T7"><text:span text:style-name="T11">I.1.1. MATERIALES DIRECTOS</text:span><text:span text:style-name="T11"/></text:p>
            </table:table-cell>
            <table:table-cell table:style-name="Tabla32.B4" office:value-type="string">
              <text:p text:style-name="P67" loext:marker-style-name="T11"/>
            </table:table-cell>
            <table:table-cell table:style-name="Tabla32.B4" office:value-type="string">
              <text:p text:style-name="P67" loext:marker-style-name="T11"/>
            </table:table-cell>
            <table:table-cell table:style-name="Tabla32.B4" office:value-type="string">
              <text:p text:style-name="P67" loext:marker-style-name="T11"/>
            </table:table-cell>
            <table:table-cell table:style-name="Tabla32.B4" office:value-type="string">
              <text:p text:style-name="P67" loext:marker-style-name="T11"/>
            </table:table-cell>
            <table:table-cell table:style-name="Tabla32.B4" office:value-type="string">
              <text:p text:style-name="P67" loext:marker-style-name="T11"/>
            </table:table-cell>
          </table:table-row>
          <table:table-row table:style-name="Tabla32.1">
            <table:table-cell table:style-name="Tabla32.A4" office:value-type="string">
              <text:p text:style-name="P46" loext:marker-style-name="T7"><text:span text:style-name="T11">I.1.2. MANO DE OBRA DIRECTA.</text:span><text:span text:style-name="T11"/></text:p>
            </table:table-cell>
            <table:table-cell table:style-name="Tabla32.B4" office:value-type="string">
              <text:p text:style-name="P67" loext:marker-style-name="T11"/>
            </table:table-cell>
            <table:table-cell table:style-name="Tabla32.B4" office:value-type="string">
              <text:p text:style-name="P67" loext:marker-style-name="T11"/>
            </table:table-cell>
            <table:table-cell table:style-name="Tabla32.B4" office:value-type="string">
              <text:p text:style-name="P67" loext:marker-style-name="T11"/>
            </table:table-cell>
            <table:table-cell table:style-name="Tabla32.B4" office:value-type="string">
              <text:p text:style-name="P67" loext:marker-style-name="T11"/>
            </table:table-cell>
            <table:table-cell table:style-name="Tabla32.B4" office:value-type="string">
              <text:p text:style-name="P67" loext:marker-style-name="T11"/>
            </table:table-cell>
          </table:table-row>
          <table:table-row table:style-name="Tabla32.1">
            <table:table-cell table:style-name="Tabla32.A4" office:value-type="string">
              <text:p text:style-name="P46" loext:marker-style-name="T7"><text:span text:style-name="T6">I.2. COSTOS INDIRECTOS</text:span><text:span text:style-name="T6"/></text:p>
            </table:table-cell>
            <table:table-cell table:style-name="Tabla32.B4" office:value-type="string">
              <text:p text:style-name="P52" loext:marker-style-name="T6"/>
            </table:table-cell>
            <table:table-cell table:style-name="Tabla32.B4" office:value-type="string">
              <text:p text:style-name="P52" loext:marker-style-name="T6"/>
            </table:table-cell>
            <table:table-cell table:style-name="Tabla32.B4" office:value-type="string">
              <text:p text:style-name="P52" loext:marker-style-name="T6"/>
            </table:table-cell>
            <table:table-cell table:style-name="Tabla32.B4" office:value-type="string">
              <text:p text:style-name="P52" loext:marker-style-name="T6"/>
            </table:table-cell>
            <table:table-cell table:style-name="Tabla32.B4" office:value-type="string">
              <text:p text:style-name="P52" loext:marker-style-name="T6"/>
            </table:table-cell>
          </table:table-row>
          <table:table-row table:style-name="Tabla32.1">
            <table:table-cell table:style-name="Tabla32.A4" office:value-type="string">
              <text:p text:style-name="P46" loext:marker-style-name="T7"><text:span text:style-name="T11">1.2.1 MATERIALES INDIRECTOS</text:span><text:span text:style-name="T11"/></text:p>
            </table:table-cell>
            <table:table-cell table:style-name="Tabla32.B4" office:value-type="string">
              <text:p text:style-name="P67" loext:marker-style-name="T11"/>
            </table:table-cell>
            <table:table-cell table:style-name="Tabla32.B4" office:value-type="string">
              <text:p text:style-name="P67" loext:marker-style-name="T11"/>
            </table:table-cell>
            <table:table-cell table:style-name="Tabla32.B4" office:value-type="string">
              <text:p text:style-name="P67" loext:marker-style-name="T11"/>
            </table:table-cell>
            <table:table-cell table:style-name="Tabla32.B4" office:value-type="string">
              <text:p text:style-name="P67" loext:marker-style-name="T11"/>
            </table:table-cell>
            <table:table-cell table:style-name="Tabla32.B4" office:value-type="string">
              <text:p text:style-name="P67" loext:marker-style-name="T11"/>
            </table:table-cell>
          </table:table-row>
          <table:table-row table:style-name="Tabla32.1">
            <table:table-cell table:style-name="Tabla32.A4" office:value-type="string">
              <text:p text:style-name="P46" loext:marker-style-name="T7"><text:span text:style-name="T11">I.2.2. MANO DE OBRA INDIRECTA.</text:span><text:span text:style-name="T11"/></text:p>
            </table:table-cell>
            <table:table-cell table:style-name="Tabla32.B4" office:value-type="string">
              <text:p text:style-name="P67" loext:marker-style-name="T11"/>
            </table:table-cell>
            <table:table-cell table:style-name="Tabla32.B4" office:value-type="string">
              <text:p text:style-name="P67" loext:marker-style-name="T11"/>
            </table:table-cell>
            <table:table-cell table:style-name="Tabla32.B4" office:value-type="string">
              <text:p text:style-name="P67" loext:marker-style-name="T11"/>
            </table:table-cell>
            <table:table-cell table:style-name="Tabla32.B4" office:value-type="string">
              <text:p text:style-name="P67" loext:marker-style-name="T11"/>
            </table:table-cell>
            <table:table-cell table:style-name="Tabla32.B4" office:value-type="string">
              <text:p text:style-name="P67" loext:marker-style-name="T11"/>
            </table:table-cell>
          </table:table-row>
          <table:table-row table:style-name="Tabla32.1">
            <table:table-cell table:style-name="Tabla32.A4" office:value-type="string">
              <text:p text:style-name="P46" loext:marker-style-name="T7"><text:span text:style-name="T11">I.2.3 OTROS COSTOS INDIRECTOS</text:span><text:span text:style-name="T11"/></text:p>
            </table:table-cell>
            <table:table-cell table:style-name="Tabla32.B4" office:value-type="string">
              <text:p text:style-name="P67" loext:marker-style-name="T11"/>
            </table:table-cell>
            <table:table-cell table:style-name="Tabla32.B4" office:value-type="string">
              <text:p text:style-name="P67" loext:marker-style-name="T11"/>
            </table:table-cell>
            <table:table-cell table:style-name="Tabla32.B4" office:value-type="string">
              <text:p text:style-name="P67" loext:marker-style-name="T11"/>
            </table:table-cell>
            <table:table-cell table:style-name="Tabla32.B4" office:value-type="string">
              <text:p text:style-name="P67" loext:marker-style-name="T11"/>
            </table:table-cell>
            <table:table-cell table:style-name="Tabla32.B4" office:value-type="string">
              <text:p text:style-name="P67" loext:marker-style-name="T11"/>
            </table:table-cell>
          </table:table-row>
          <table:table-row table:style-name="Tabla32.1">
            <table:table-cell table:style-name="Tabla32.A4" office:value-type="string">
              <text:p text:style-name="P46" loext:marker-style-name="T7"><text:span text:style-name="T6">II. GASTOS DE OPERACIÒN</text:span><text:span text:style-name="T6"/></text:p>
            </table:table-cell>
            <table:table-cell table:style-name="Tabla32.B4" office:value-type="string">
              <text:p text:style-name="P52" loext:marker-style-name="T6"/>
            </table:table-cell>
            <table:table-cell table:style-name="Tabla32.B4" office:value-type="string">
              <text:p text:style-name="P52" loext:marker-style-name="T6"/>
            </table:table-cell>
            <table:table-cell table:style-name="Tabla32.B4" office:value-type="string">
              <text:p text:style-name="P52" loext:marker-style-name="T6"/>
            </table:table-cell>
            <table:table-cell table:style-name="Tabla32.B4" office:value-type="string">
              <text:p text:style-name="P52" loext:marker-style-name="T6"/>
            </table:table-cell>
            <table:table-cell table:style-name="Tabla32.B4" office:value-type="string">
              <text:p text:style-name="P52" loext:marker-style-name="T6"/>
            </table:table-cell>
          </table:table-row>
          <table:table-row table:style-name="Tabla32.1">
            <table:table-cell table:style-name="Tabla32.A4" office:value-type="string">
              <text:p text:style-name="P46" loext:marker-style-name="T7"><text:span text:style-name="T11">II.1. GASTOS DE VENTA</text:span><text:span text:style-name="T11"/></text:p>
            </table:table-cell>
            <table:table-cell table:style-name="Tabla32.B4" office:value-type="string">
              <text:p text:style-name="P67" loext:marker-style-name="T11"/>
            </table:table-cell>
            <table:table-cell table:style-name="Tabla32.B4" office:value-type="string">
              <text:p text:style-name="P67" loext:marker-style-name="T11"/>
            </table:table-cell>
            <table:table-cell table:style-name="Tabla32.B4" office:value-type="string">
              <text:p text:style-name="P67" loext:marker-style-name="T11"/>
            </table:table-cell>
            <table:table-cell table:style-name="Tabla32.B4" office:value-type="string">
              <text:p text:style-name="P67" loext:marker-style-name="T11"/>
            </table:table-cell>
            <table:table-cell table:style-name="Tabla32.B4" office:value-type="string">
              <text:p text:style-name="P67" loext:marker-style-name="T11"/>
            </table:table-cell>
          </table:table-row>
          <table:table-row table:style-name="Tabla32.1">
            <table:table-cell table:style-name="Tabla32.A14" office:value-type="string">
              <text:p text:style-name="P46" loext:marker-style-name="T7"><text:span text:style-name="T11">II.2. GASTOS ADMINISTRATIVOS</text:span><text:span text:style-name="T11"/></text:p>
            </table:table-cell>
            <table:table-cell table:style-name="Tabla32.B14" office:value-type="string">
              <text:p text:style-name="P67" loext:marker-style-name="T11"/>
            </table:table-cell>
            <table:table-cell table:style-name="Tabla32.B4" office:value-type="string">
              <text:p text:style-name="P67" loext:marker-style-name="T11"/>
            </table:table-cell>
            <table:table-cell table:style-name="Tabla32.B4" office:value-type="string">
              <text:p text:style-name="P67" loext:marker-style-name="T11"/>
            </table:table-cell>
            <table:table-cell table:style-name="Tabla32.B4" office:value-type="string">
              <text:p text:style-name="P67" loext:marker-style-name="T11"/>
            </table:table-cell>
            <table:table-cell table:style-name="Tabla32.B4" office:value-type="string">
              <text:p text:style-name="P67" loext:marker-style-name="T11"/>
            </table:table-cell>
          </table:table-row>
          <table:table-row table:style-name="Tabla32.1">
            <table:table-cell table:style-name="Tabla32.A15" office:value-type="string">
              <text:p text:style-name="P46" loext:marker-style-name="T7"><text:span text:style-name="T6">III. DEPRECIACIÒN DE ACT.FIJO Y AMORTIZACION INTANG.</text:span><text:span text:style-name="T6"/></text:p>
            </table:table-cell>
            <table:table-cell table:style-name="Tabla32.B15" office:value-type="string">
              <text:p text:style-name="P52" loext:marker-style-name="T6"/>
            </table:table-cell>
            <table:table-cell table:style-name="Tabla32.B4" office:value-type="string">
              <text:p text:style-name="P52" loext:marker-style-name="T6"/>
            </table:table-cell>
            <table:table-cell table:style-name="Tabla32.B4" office:value-type="string">
              <text:p text:style-name="P52" loext:marker-style-name="T6"/>
            </table:table-cell>
            <table:table-cell table:style-name="Tabla32.B4" office:value-type="string">
              <text:p text:style-name="P52" loext:marker-style-name="T6"/>
            </table:table-cell>
            <table:table-cell table:style-name="Tabla32.B4" office:value-type="string">
              <text:p text:style-name="P52" loext:marker-style-name="T6"/>
            </table:table-cell>
          </table:table-row>
          <table:table-row table:style-name="Tabla32.1">
            <table:table-cell table:style-name="Tabla32.A4" office:value-type="string">
              <text:p text:style-name="P46" loext:marker-style-name="T7"><text:span text:style-name="T6">IV. GASTOS FINANCIEROS (*)</text:span><text:span text:style-name="T6"/></text:p>
            </table:table-cell>
            <table:table-cell table:style-name="Tabla32.B4" office:value-type="string">
              <text:p text:style-name="P52" loext:marker-style-name="T6"/>
            </table:table-cell>
            <table:table-cell table:style-name="Tabla32.B4" office:value-type="string">
              <text:p text:style-name="P52" loext:marker-style-name="T6"/>
            </table:table-cell>
            <table:table-cell table:style-name="Tabla32.B4" office:value-type="string">
              <text:p text:style-name="P52" loext:marker-style-name="T6"/>
            </table:table-cell>
            <table:table-cell table:style-name="Tabla32.B4" office:value-type="string">
              <text:p text:style-name="P52" loext:marker-style-name="T6"/>
            </table:table-cell>
            <table:table-cell table:style-name="Tabla32.B4" office:value-type="string">
              <text:p text:style-name="P52" loext:marker-style-name="T6"/>
            </table:table-cell>
          </table:table-row>
          <table:table-row table:style-name="Tabla32.1">
            <table:table-cell table:style-name="Tabla32.A4" office:value-type="string">
              <text:p text:style-name="P46" loext:marker-style-name="T7"><text:span text:style-name="T11">PAGO DE PRESTAMO (cuota)</text:span><text:span text:style-name="T11"/></text:p>
            </table:table-cell>
            <table:table-cell table:style-name="Tabla32.B4" office:value-type="string">
              <text:p text:style-name="P67" loext:marker-style-name="T11"/>
            </table:table-cell>
            <table:table-cell table:style-name="Tabla32.B4" office:value-type="string">
              <text:p text:style-name="P67" loext:marker-style-name="T11"/>
            </table:table-cell>
            <table:table-cell table:style-name="Tabla32.B4" office:value-type="string">
              <text:p text:style-name="P67" loext:marker-style-name="T11"/>
            </table:table-cell>
            <table:table-cell table:style-name="Tabla32.B4" office:value-type="string">
              <text:p text:style-name="P67" loext:marker-style-name="T11"/>
            </table:table-cell>
            <table:table-cell table:style-name="Tabla32.B4" office:value-type="string">
              <text:p text:style-name="P67" loext:marker-style-name="T11"/>
            </table:table-cell>
          </table:table-row>
          <table:table-row table:style-name="Tabla32.1">
            <table:table-cell table:style-name="Tabla32.A4" office:value-type="string">
              <text:p text:style-name="P46" loext:marker-style-name="T7"><text:span text:style-name="T6">TOTAL EGRESOS</text:span><text:span text:style-name="T6"/></text:p>
            </table:table-cell>
            <table:table-cell table:style-name="Tabla32.B4" office:value-type="string">
              <text:p text:style-name="P52" loext:marker-style-name="T6"/>
            </table:table-cell>
            <table:table-cell table:style-name="Tabla32.B4" office:value-type="string">
              <text:p text:style-name="P52" loext:marker-style-name="T6"/>
            </table:table-cell>
            <table:table-cell table:style-name="Tabla32.B4" office:value-type="string">
              <text:p text:style-name="P52" loext:marker-style-name="T6"/>
            </table:table-cell>
            <table:table-cell table:style-name="Tabla32.B4" office:value-type="string">
              <text:p text:style-name="P52" loext:marker-style-name="T6"/>
            </table:table-cell>
            <table:table-cell table:style-name="Tabla32.B4" office:value-type="string">
              <text:p text:style-name="P52" loext:marker-style-name="T6"/>
            </table:table-cell>
          </table:table-row>
        </table:table>
        <text:p text:style-name="P46" loext:marker-style-name="T7"><text:span text:style-name="T9">(*) </text:span><text:span text:style-name="T14">Nota</text:span><text:span text:style-name="T9">: Se considera Gastos Financieros siempre y cuando, con el plan de negocio se incurra en endeudamiento.</text:span></text:p>
        <text:list text:continue-numbering="true" text:style-name="WWNum5">
          <text:list-item>
            <text:list>
              <text:list-item>
                <text:p text:style-name="P15" loext:marker-style-name="T7"><text:span text:style-name="T1">ESTADO DE RESULTADOS:</text:span><text:span text:style-name="T8"> Elaborar y presentar el estado de resultados o pérdidas y ganancias aplicando el principio de devengado, que implica que los gastos se registran cuando se constituye la obligación o derecho, no dependiendo si se efectiviza en el periodo de análisis. Realizar la proyección para el horizonte de evaluación planteado en la propuesta productiva.</text:span></text:p>
              </text:list-item>
            </text:list>
          </text:list-item>
        </text:list>
        <text:p text:style-name="P46" loext:marker-style-name="T7"><text:span text:style-name="T15">Nota:</text:span><text:span text:style-name="T1"> Si es con financiamiento, se llenaran los dos cuadros, sino solamente el primero (Estado de Resultados sin financiamiento)</text:span></text:p>
        <text:p text:style-name="P31" loext:marker-style-name="T7"><text:span text:style-name="T81">ESTADO DE RESULTADOS SIN FINANCIAMIENTO</text:span><text:span text:style-name="T81"/></text:p>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ext:soft-page-break/>
          <table:table-row table:style-name="Tabla33.1">
            <table:table-cell table:style-name="Tabla33.A1" table:number-rows-spanned="2" office:value-type="string">
              <text:p text:style-name="P34" loext:marker-style-name="T7"><text:span text:style-name="T11">CONCEPTO</text:span><text:span text:style-name="T11"/></text:p>
            </table:table-cell>
            <table:table-cell table:style-name="Tabla33.B1" table:number-columns-spanned="5" office:value-type="string">
              <text:p text:style-name="P31" loext:marker-style-name="T7"><text:span text:style-name="T11">AÑOS</text:span><text:span text:style-name="T11"/></text:p>
            </table:table-cell>
            <table:covered-table-cell/>
            <table:covered-table-cell/>
            <table:covered-table-cell/>
            <table:covered-table-cell/>
          </table:table-row>
          <table:table-row table:style-name="Tabla33.1">
            <table:covered-table-cell table:style-name="Tabla33.A2"/>
            <table:table-cell table:style-name="Tabla33.B2" office:value-type="string">
              <text:p text:style-name="P31" loext:marker-style-name="T7"><text:span text:style-name="T11">1</text:span><text:span text:style-name="T11"/></text:p>
            </table:table-cell>
            <table:table-cell table:style-name="Tabla33.B2" office:value-type="string">
              <text:p text:style-name="P31" loext:marker-style-name="T7"><text:span text:style-name="T11">2</text:span><text:span text:style-name="T11"/></text:p>
            </table:table-cell>
            <table:table-cell table:style-name="Tabla33.B2" office:value-type="string">
              <text:p text:style-name="P31" loext:marker-style-name="T7"><text:span text:style-name="T11">3</text:span><text:span text:style-name="T11"/></text:p>
            </table:table-cell>
            <table:table-cell table:style-name="Tabla33.B2" office:value-type="string">
              <text:p text:style-name="P31" loext:marker-style-name="T7"><text:span text:style-name="T11">4</text:span><text:span text:style-name="T11"/></text:p>
            </table:table-cell>
            <table:table-cell table:style-name="Tabla33.B2" office:value-type="string">
              <text:p text:style-name="P31" loext:marker-style-name="T7"><text:span text:style-name="T11">5</text:span><text:span text:style-name="T11"/></text:p>
            </table:table-cell>
          </table:table-row>
          <table:table-row table:style-name="Tabla33.1">
            <table:table-cell table:style-name="Tabla33.A3" office:value-type="string">
              <text:p text:style-name="P46" loext:marker-style-name="T7"><text:span text:style-name="T6">I. INGRESOS (VENTAS)</text:span><text:span text:style-name="T6"/></text:p>
            </table:table-cell>
            <table:table-cell table:style-name="Tabla33.B3" office:value-type="string">
              <text:p text:style-name="P53" loext:marker-style-name="T6"/>
            </table:table-cell>
            <table:table-cell table:style-name="Tabla33.B3" office:value-type="string">
              <text:p text:style-name="P53" loext:marker-style-name="T6"/>
            </table:table-cell>
            <table:table-cell table:style-name="Tabla33.B3" office:value-type="string">
              <text:p text:style-name="P53" loext:marker-style-name="T6"/>
            </table:table-cell>
            <table:table-cell table:style-name="Tabla33.B3" office:value-type="string">
              <text:p text:style-name="P53" loext:marker-style-name="T6"/>
            </table:table-cell>
            <table:table-cell table:style-name="Tabla33.B3" office:value-type="string">
              <text:p text:style-name="P53" loext:marker-style-name="T6"/>
            </table:table-cell>
          </table:table-row>
          <table:table-row table:style-name="Tabla33.1">
            <table:table-cell table:style-name="Tabla33.A4" office:value-type="string">
              <text:p text:style-name="P49" loext:marker-style-name="T7"><text:span text:style-name="T11">Ventas</text:span><text:span text:style-name="T11"/></text:p>
            </table:table-cell>
            <table:table-cell table:style-name="Tabla33.B3" office:value-type="string">
              <text:p text:style-name="P68" loext:marker-style-name="T11"/>
            </table:table-cell>
            <table:table-cell table:style-name="Tabla33.B3" office:value-type="string">
              <text:p text:style-name="P68" loext:marker-style-name="T11"/>
            </table:table-cell>
            <table:table-cell table:style-name="Tabla33.B3" office:value-type="string">
              <text:p text:style-name="P68" loext:marker-style-name="T11"/>
            </table:table-cell>
            <table:table-cell table:style-name="Tabla33.B3" office:value-type="string">
              <text:p text:style-name="P68" loext:marker-style-name="T11"/>
            </table:table-cell>
            <table:table-cell table:style-name="Tabla33.B3" office:value-type="string">
              <text:p text:style-name="P68" loext:marker-style-name="T11"/>
            </table:table-cell>
          </table:table-row>
          <table:table-row table:style-name="Tabla33.1">
            <table:table-cell table:style-name="Tabla33.A4" office:value-type="string">
              <text:p text:style-name="P49" loext:marker-style-name="T7"><text:span text:style-name="T11">Ingresos extraordinarios</text:span><text:span text:style-name="T11"/></text:p>
            </table:table-cell>
            <table:table-cell table:style-name="Tabla33.B3" office:value-type="string">
              <text:p text:style-name="P67" loext:marker-style-name="T11"/>
            </table:table-cell>
            <table:table-cell table:style-name="Tabla33.B3" office:value-type="string">
              <text:p text:style-name="P67" loext:marker-style-name="T11"/>
            </table:table-cell>
            <table:table-cell table:style-name="Tabla33.B3" office:value-type="string">
              <text:p text:style-name="P67" loext:marker-style-name="T11"/>
            </table:table-cell>
            <table:table-cell table:style-name="Tabla33.B3" office:value-type="string">
              <text:p text:style-name="P67" loext:marker-style-name="T11"/>
            </table:table-cell>
            <table:table-cell table:style-name="Tabla33.B3" office:value-type="string">
              <text:p text:style-name="P68" loext:marker-style-name="T11"/>
            </table:table-cell>
          </table:table-row>
          <table:table-row table:style-name="Tabla33.1">
            <table:table-cell table:style-name="Tabla33.A3" office:value-type="string">
              <text:p text:style-name="P46" loext:marker-style-name="T7"><text:span text:style-name="T6">II. COSTOS DE PRODUCCIÒN</text:span><text:span text:style-name="T6"/></text:p>
            </table:table-cell>
            <table:table-cell table:style-name="Tabla33.B3" office:value-type="string">
              <text:p text:style-name="P68" loext:marker-style-name="T11"/>
            </table:table-cell>
            <table:table-cell table:style-name="Tabla33.B3" office:value-type="string">
              <text:p text:style-name="P68" loext:marker-style-name="T11"/>
            </table:table-cell>
            <table:table-cell table:style-name="Tabla33.B3" office:value-type="string">
              <text:p text:style-name="P68" loext:marker-style-name="T11"/>
            </table:table-cell>
            <table:table-cell table:style-name="Tabla33.B3" office:value-type="string">
              <text:p text:style-name="P68" loext:marker-style-name="T11"/>
            </table:table-cell>
            <table:table-cell table:style-name="Tabla33.B3" office:value-type="string">
              <text:p text:style-name="P68" loext:marker-style-name="T11"/>
            </table:table-cell>
          </table:table-row>
          <table:table-row table:style-name="Tabla33.1">
            <table:table-cell table:style-name="Tabla33.A3" office:value-type="string">
              <text:p text:style-name="P46" loext:marker-style-name="T7"><text:span text:style-name="T6">III. UTILIDAD BRUTA</text:span><text:span text:style-name="T6"/></text:p>
            </table:table-cell>
            <table:table-cell table:style-name="Tabla33.B3" office:value-type="string">
              <text:p text:style-name="P53" loext:marker-style-name="T6"/>
            </table:table-cell>
            <table:table-cell table:style-name="Tabla33.B3" office:value-type="string">
              <text:p text:style-name="P53" loext:marker-style-name="T6"/>
            </table:table-cell>
            <table:table-cell table:style-name="Tabla33.B3" office:value-type="string">
              <text:p text:style-name="P53" loext:marker-style-name="T6"/>
            </table:table-cell>
            <table:table-cell table:style-name="Tabla33.B3" office:value-type="string">
              <text:p text:style-name="P53" loext:marker-style-name="T6"/>
            </table:table-cell>
            <table:table-cell table:style-name="Tabla33.B3" office:value-type="string">
              <text:p text:style-name="P53" loext:marker-style-name="T6"/>
            </table:table-cell>
          </table:table-row>
          <table:table-row table:style-name="Tabla33.1">
            <table:table-cell table:style-name="Tabla33.A3" office:value-type="string">
              <text:p text:style-name="P46" loext:marker-style-name="T7"><text:span text:style-name="T6">IV. GASTOS DE OPERACIÒN</text:span><text:span text:style-name="T6"/></text:p>
            </table:table-cell>
            <table:table-cell table:style-name="Tabla33.B3" office:value-type="string">
              <text:p text:style-name="P53" loext:marker-style-name="T6"/>
            </table:table-cell>
            <table:table-cell table:style-name="Tabla33.B3" office:value-type="string">
              <text:p text:style-name="P53" loext:marker-style-name="T6"/>
            </table:table-cell>
            <table:table-cell table:style-name="Tabla33.B3" office:value-type="string">
              <text:p text:style-name="P53" loext:marker-style-name="T6"/>
            </table:table-cell>
            <table:table-cell table:style-name="Tabla33.B3" office:value-type="string">
              <text:p text:style-name="P53" loext:marker-style-name="T6"/>
            </table:table-cell>
            <table:table-cell table:style-name="Tabla33.B3" office:value-type="string">
              <text:p text:style-name="P53" loext:marker-style-name="T6"/>
            </table:table-cell>
          </table:table-row>
          <table:table-row table:style-name="Tabla33.1">
            <table:table-cell table:style-name="Tabla33.A3" office:value-type="string">
              <text:p text:style-name="P46" loext:marker-style-name="T7"><text:span text:style-name="T11"><text:s/>Gastos de venta</text:span><text:span text:style-name="T11"/></text:p>
            </table:table-cell>
            <table:table-cell table:style-name="Tabla33.B3" office:value-type="string">
              <text:p text:style-name="P68" loext:marker-style-name="T11"/>
            </table:table-cell>
            <table:table-cell table:style-name="Tabla33.B3" office:value-type="string">
              <text:p text:style-name="P68" loext:marker-style-name="T11"/>
            </table:table-cell>
            <table:table-cell table:style-name="Tabla33.B3" office:value-type="string">
              <text:p text:style-name="P68" loext:marker-style-name="T11"/>
            </table:table-cell>
            <table:table-cell table:style-name="Tabla33.B3" office:value-type="string">
              <text:p text:style-name="P68" loext:marker-style-name="T11"/>
            </table:table-cell>
            <table:table-cell table:style-name="Tabla33.B3" office:value-type="string">
              <text:p text:style-name="P68" loext:marker-style-name="T11"/>
            </table:table-cell>
          </table:table-row>
          <table:table-row table:style-name="Tabla33.1">
            <table:table-cell table:style-name="Tabla33.A3" office:value-type="string">
              <text:p text:style-name="P46" loext:marker-style-name="T7"><text:span text:style-name="T11"><text:s/>Gastos administrativos</text:span><text:span text:style-name="T11"/></text:p>
            </table:table-cell>
            <table:table-cell table:style-name="Tabla33.B3" office:value-type="string">
              <text:p text:style-name="P68" loext:marker-style-name="T11"/>
            </table:table-cell>
            <table:table-cell table:style-name="Tabla33.B3" office:value-type="string">
              <text:p text:style-name="P68" loext:marker-style-name="T11"/>
            </table:table-cell>
            <table:table-cell table:style-name="Tabla33.B3" office:value-type="string">
              <text:p text:style-name="P68" loext:marker-style-name="T11"/>
            </table:table-cell>
            <table:table-cell table:style-name="Tabla33.B3" office:value-type="string">
              <text:p text:style-name="P68" loext:marker-style-name="T11"/>
            </table:table-cell>
            <table:table-cell table:style-name="Tabla33.B3" office:value-type="string">
              <text:p text:style-name="P68" loext:marker-style-name="T11"/>
            </table:table-cell>
          </table:table-row>
          <table:table-row table:style-name="Tabla33.1">
            <table:table-cell table:style-name="Tabla33.A3" office:value-type="string">
              <text:p text:style-name="P46" loext:marker-style-name="T7"><text:span text:style-name="T6">V. DEPRECIACIÒN DE A.F. Y AMORT. INTANG</text:span><text:span text:style-name="T6"/></text:p>
            </table:table-cell>
            <table:table-cell table:style-name="Tabla33.B3" office:value-type="string">
              <text:p text:style-name="P68" loext:marker-style-name="T11"/>
            </table:table-cell>
            <table:table-cell table:style-name="Tabla33.B3" office:value-type="string">
              <text:p text:style-name="P68" loext:marker-style-name="T11"/>
            </table:table-cell>
            <table:table-cell table:style-name="Tabla33.B3" office:value-type="string">
              <text:p text:style-name="P68" loext:marker-style-name="T11"/>
            </table:table-cell>
            <table:table-cell table:style-name="Tabla33.B3" office:value-type="string">
              <text:p text:style-name="P68" loext:marker-style-name="T11"/>
            </table:table-cell>
            <table:table-cell table:style-name="Tabla33.B3" office:value-type="string">
              <text:p text:style-name="P68" loext:marker-style-name="T11"/>
            </table:table-cell>
          </table:table-row>
          <table:table-row table:style-name="Tabla33.1">
            <table:table-cell table:style-name="Tabla33.A3" office:value-type="string">
              <text:p text:style-name="P46" loext:marker-style-name="T7"><text:span text:style-name="T6">VI. UTILIDAD OPERATIVA</text:span><text:span text:style-name="T6"/></text:p>
            </table:table-cell>
            <table:table-cell table:style-name="Tabla33.B3" office:value-type="string">
              <text:p text:style-name="P53" loext:marker-style-name="T6"/>
            </table:table-cell>
            <table:table-cell table:style-name="Tabla33.B3" office:value-type="string">
              <text:p text:style-name="P53" loext:marker-style-name="T6"/>
            </table:table-cell>
            <table:table-cell table:style-name="Tabla33.B3" office:value-type="string">
              <text:p text:style-name="P53" loext:marker-style-name="T6"/>
            </table:table-cell>
            <table:table-cell table:style-name="Tabla33.B3" office:value-type="string">
              <text:p text:style-name="P53" loext:marker-style-name="T6"/>
            </table:table-cell>
            <table:table-cell table:style-name="Tabla33.B3" office:value-type="string">
              <text:p text:style-name="P53" loext:marker-style-name="T6"/>
            </table:table-cell>
          </table:table-row>
          <table:table-row table:style-name="Tabla33.1">
            <table:table-cell table:style-name="Tabla33.A3" office:value-type="string">
              <text:p text:style-name="P46" loext:marker-style-name="T7"><text:span text:style-name="T6">IX. IMPUESTO A LA RENTA ( * )</text:span><text:span text:style-name="T6"/></text:p>
            </table:table-cell>
            <table:table-cell table:style-name="Tabla33.B3" office:value-type="string">
              <text:p text:style-name="P68" loext:marker-style-name="T11"/>
            </table:table-cell>
            <table:table-cell table:style-name="Tabla33.B3" office:value-type="string">
              <text:p text:style-name="P68" loext:marker-style-name="T11"/>
            </table:table-cell>
            <table:table-cell table:style-name="Tabla33.B3" office:value-type="string">
              <text:p text:style-name="P68" loext:marker-style-name="T11"/>
            </table:table-cell>
            <table:table-cell table:style-name="Tabla33.B3" office:value-type="string">
              <text:p text:style-name="P68" loext:marker-style-name="T11"/>
            </table:table-cell>
            <table:table-cell table:style-name="Tabla33.B3" office:value-type="string">
              <text:p text:style-name="P68" loext:marker-style-name="T11"/>
            </table:table-cell>
          </table:table-row>
          <table:table-row table:style-name="Tabla33.1">
            <table:table-cell table:style-name="Tabla33.A14" office:value-type="string">
              <text:p text:style-name="P46" loext:marker-style-name="T7"><text:span text:style-name="T6">UTILIDAD NETA</text:span><text:span text:style-name="T6"/></text:p>
            </table:table-cell>
            <table:table-cell table:style-name="Tabla33.B14" office:value-type="string">
              <text:p text:style-name="P53" loext:marker-style-name="T6"/>
            </table:table-cell>
            <table:table-cell table:style-name="Tabla33.B14" office:value-type="string">
              <text:p text:style-name="P53" loext:marker-style-name="T6"/>
            </table:table-cell>
            <table:table-cell table:style-name="Tabla33.B14" office:value-type="string">
              <text:p text:style-name="P53" loext:marker-style-name="T6"/>
            </table:table-cell>
            <table:table-cell table:style-name="Tabla33.B14" office:value-type="string">
              <text:p text:style-name="P53" loext:marker-style-name="T6"/>
            </table:table-cell>
            <table:table-cell table:style-name="Tabla33.B14" office:value-type="string">
              <text:p text:style-name="P53" loext:marker-style-name="T6"/>
            </table:table-cell>
          </table:table-row>
        </table:table>
        <text:p text:style-name="P40" loext:marker-style-name="T7"><text:span text:style-name="T9"><text:s/>(*) Se deberá considerar el porcentaje de Impuesto a la renta determinado por la SUNAT, para el presente año.</text:span><text:span text:style-name="T9"/></text:p>
        <text:p text:style-name="P31" loext:marker-style-name="T7"><text:span text:style-name="T81">ESTADO DE RESULTADOS CON FINANCIAMIENTO</text:span><text:span text:style-name="T81"/></text:p>
        <table:table table:name="Tabla34" table:style-name="Tabla34">
          <table:table-column table:style-name="Tabla34.A"/>
          <table:table-column table:style-name="Tabla34.B"/>
          <table:table-column table:style-name="Tabla34.C"/>
          <table:table-column table:style-name="Tabla34.D" table:number-columns-repeated="2"/>
          <table:table-column table:style-name="Tabla34.F"/>
          <table:table-header-rows>
            <table:table-row table:style-name="Tabla34.1">
              <table:table-cell table:style-name="Tabla34.A1" table:number-rows-spanned="2" office:value-type="string">
                <text:p text:style-name="P31" loext:marker-style-name="T7"><text:span text:style-name="T12">CONCEPTO</text:span><text:span text:style-name="T12"/></text:p>
              </table:table-cell>
              <table:table-cell table:style-name="Tabla34.B1" table:number-columns-spanned="5" office:value-type="string">
                <text:p text:style-name="P31" loext:marker-style-name="T7"><text:span text:style-name="T5">AÑOS</text:span><text:span text:style-name="T5"/></text:p>
              </table:table-cell>
              <table:covered-table-cell/>
              <table:covered-table-cell/>
              <table:covered-table-cell/>
              <table:covered-table-cell/>
            </table:table-row>
            <table:table-row table:style-name="Tabla34.2">
              <table:covered-table-cell table:style-name="Tabla34.A1"/>
              <table:table-cell table:style-name="Tabla34.B2" office:value-type="string">
                <text:p text:style-name="P31" loext:marker-style-name="T7"><text:span text:style-name="T6">1</text:span><text:span text:style-name="T6"/></text:p>
              </table:table-cell>
              <table:table-cell table:style-name="Tabla34.B2" office:value-type="string">
                <text:p text:style-name="P31" loext:marker-style-name="T7"><text:span text:style-name="T6">2</text:span><text:span text:style-name="T6"/></text:p>
              </table:table-cell>
              <table:table-cell table:style-name="Tabla34.B2" office:value-type="string">
                <text:p text:style-name="P31" loext:marker-style-name="T7"><text:span text:style-name="T6">3</text:span><text:span text:style-name="T6"/></text:p>
              </table:table-cell>
              <table:table-cell table:style-name="Tabla34.B2" office:value-type="string">
                <text:p text:style-name="P31" loext:marker-style-name="T7"><text:span text:style-name="T6">4</text:span><text:span text:style-name="T6"/></text:p>
              </table:table-cell>
              <table:table-cell table:style-name="Tabla34.B2" office:value-type="string">
                <text:p text:style-name="P31" loext:marker-style-name="T7"><text:span text:style-name="T6">5</text:span><text:span text:style-name="T6"/></text:p>
              </table:table-cell>
            </table:table-row>
          </table:table-header-rows>
          <table:table-row table:style-name="Tabla34.2">
            <table:table-cell table:style-name="Tabla34.A3" office:value-type="string">
              <text:p text:style-name="P46" loext:marker-style-name="T7"><text:span text:style-name="T5">I. INGRESOS (VENTAS)</text:span><text:span text:style-name="T5"/></text:p>
            </table:table-cell>
            <table:table-cell table:style-name="Tabla34.B3" office:value-type="string">
              <text:p text:style-name="P67" loext:marker-style-name="T11"/>
            </table:table-cell>
            <table:table-cell table:style-name="Tabla34.B3" office:value-type="string">
              <text:p text:style-name="P67" loext:marker-style-name="T11"/>
            </table:table-cell>
            <table:table-cell table:style-name="Tabla34.B3" office:value-type="string">
              <text:p text:style-name="P67" loext:marker-style-name="T11"/>
            </table:table-cell>
            <table:table-cell table:style-name="Tabla34.B3" office:value-type="string">
              <text:p text:style-name="P67" loext:marker-style-name="T11"/>
            </table:table-cell>
            <table:table-cell table:style-name="Tabla34.B3" office:value-type="string">
              <text:p text:style-name="P67" loext:marker-style-name="T11"/>
            </table:table-cell>
          </table:table-row>
          <table:table-row table:style-name="Tabla34.2">
            <table:table-cell table:style-name="Tabla34.A3" office:value-type="string">
              <text:p text:style-name="P46" loext:marker-style-name="T7"><text:span text:style-name="T11"><text:s/>Ventas</text:span><text:span text:style-name="T11"/></text:p>
            </table:table-cell>
            <table:table-cell table:style-name="Tabla34.B3" office:value-type="string">
              <text:p text:style-name="P67" loext:marker-style-name="T11"/>
            </table:table-cell>
            <table:table-cell table:style-name="Tabla34.B3" office:value-type="string">
              <text:p text:style-name="P67" loext:marker-style-name="T11"/>
            </table:table-cell>
            <table:table-cell table:style-name="Tabla34.B3" office:value-type="string">
              <text:p text:style-name="P67" loext:marker-style-name="T11"/>
            </table:table-cell>
            <table:table-cell table:style-name="Tabla34.B3" office:value-type="string">
              <text:p text:style-name="P67" loext:marker-style-name="T11"/>
            </table:table-cell>
            <table:table-cell table:style-name="Tabla34.B3" office:value-type="string">
              <text:p text:style-name="P67" loext:marker-style-name="T11"/>
            </table:table-cell>
          </table:table-row>
          <table:table-row table:style-name="Tabla34.2">
            <table:table-cell table:style-name="Tabla34.A3" office:value-type="string">
              <text:p text:style-name="P46" loext:marker-style-name="T7"><text:span text:style-name="T11"><text:s/>Ingresos extraordinarios</text:span><text:span text:style-name="T11"/></text:p>
            </table:table-cell>
            <table:table-cell table:style-name="Tabla34.B3" office:value-type="string">
              <text:p text:style-name="P67" loext:marker-style-name="T11"/>
            </table:table-cell>
            <table:table-cell table:style-name="Tabla34.B3" office:value-type="string">
              <text:p text:style-name="P67" loext:marker-style-name="T11"/>
            </table:table-cell>
            <table:table-cell table:style-name="Tabla34.B3" office:value-type="string">
              <text:p text:style-name="P67" loext:marker-style-name="T11"/>
            </table:table-cell>
            <table:table-cell table:style-name="Tabla34.B3" office:value-type="string">
              <text:p text:style-name="P67" loext:marker-style-name="T11"/>
            </table:table-cell>
            <table:table-cell table:style-name="Tabla34.B3" office:value-type="string">
              <text:p text:style-name="P67" loext:marker-style-name="T11"/>
            </table:table-cell>
          </table:table-row>
          <table:table-row table:style-name="Tabla34.2">
            <table:table-cell table:style-name="Tabla34.A3" office:value-type="string">
              <text:p text:style-name="P46" loext:marker-style-name="T7"><text:span text:style-name="T5">II. COSTOS DE PRODUCCIÒN</text:span><text:span text:style-name="T5"/></text:p>
            </table:table-cell>
            <table:table-cell table:style-name="Tabla34.B3" office:value-type="string">
              <text:p text:style-name="P67" loext:marker-style-name="T11"/>
            </table:table-cell>
            <table:table-cell table:style-name="Tabla34.B3" office:value-type="string">
              <text:p text:style-name="P67" loext:marker-style-name="T11"/>
            </table:table-cell>
            <table:table-cell table:style-name="Tabla34.B3" office:value-type="string">
              <text:p text:style-name="P67" loext:marker-style-name="T11"/>
            </table:table-cell>
            <table:table-cell table:style-name="Tabla34.B3" office:value-type="string">
              <text:p text:style-name="P67" loext:marker-style-name="T11"/>
            </table:table-cell>
            <table:table-cell table:style-name="Tabla34.B3" office:value-type="string">
              <text:p text:style-name="P67" loext:marker-style-name="T11"/>
            </table:table-cell>
          </table:table-row>
          <table:table-row table:style-name="Tabla34.2">
            <table:table-cell table:style-name="Tabla34.A3" office:value-type="string">
              <text:p text:style-name="P46" loext:marker-style-name="T7"><text:span text:style-name="T6">III. UTILIDAD BRUTA</text:span><text:span text:style-name="T6"/></text:p>
            </table:table-cell>
            <table:table-cell table:style-name="Tabla34.B3" office:value-type="string">
              <text:p text:style-name="P52" loext:marker-style-name="T6"/>
            </table:table-cell>
            <table:table-cell table:style-name="Tabla34.B3" office:value-type="string">
              <text:p text:style-name="P52" loext:marker-style-name="T6"/>
            </table:table-cell>
            <table:table-cell table:style-name="Tabla34.B3" office:value-type="string">
              <text:p text:style-name="P52" loext:marker-style-name="T6"/>
            </table:table-cell>
            <table:table-cell table:style-name="Tabla34.B3" office:value-type="string">
              <text:p text:style-name="P52" loext:marker-style-name="T6"/>
            </table:table-cell>
            <table:table-cell table:style-name="Tabla34.B3" office:value-type="string">
              <text:p text:style-name="P52" loext:marker-style-name="T6"/>
            </table:table-cell>
          </table:table-row>
          <table:table-row table:style-name="Tabla34.1">
            <table:table-cell table:style-name="Tabla34.A3" office:value-type="string">
              <text:p text:style-name="P46" loext:marker-style-name="T7"><text:span text:style-name="T5">IV. GASTOS DE OPERACIÒN</text:span><text:span text:style-name="T5"/></text:p>
            </table:table-cell>
            <table:table-cell table:style-name="Tabla34.B3" office:value-type="string">
              <text:p text:style-name="P52" loext:marker-style-name="T6"/>
            </table:table-cell>
            <table:table-cell table:style-name="Tabla34.B3" office:value-type="string">
              <text:p text:style-name="P52" loext:marker-style-name="T6"/>
            </table:table-cell>
            <table:table-cell table:style-name="Tabla34.B3" office:value-type="string">
              <text:p text:style-name="P52" loext:marker-style-name="T6"/>
            </table:table-cell>
            <table:table-cell table:style-name="Tabla34.B3" office:value-type="string">
              <text:p text:style-name="P52" loext:marker-style-name="T6"/>
            </table:table-cell>
            <table:table-cell table:style-name="Tabla34.B3" office:value-type="string">
              <text:p text:style-name="P52" loext:marker-style-name="T6"/>
            </table:table-cell>
          </table:table-row>
          <table:table-row table:style-name="Tabla34.2">
            <table:table-cell table:style-name="Tabla34.A3" office:value-type="string">
              <text:p text:style-name="P46" loext:marker-style-name="T7"><text:span text:style-name="T11"><text:s/>Gastos de venta</text:span><text:span text:style-name="T11"/></text:p>
            </table:table-cell>
            <table:table-cell table:style-name="Tabla34.B3" office:value-type="string">
              <text:p text:style-name="P67" loext:marker-style-name="T11"/>
            </table:table-cell>
            <table:table-cell table:style-name="Tabla34.B3" office:value-type="string">
              <text:p text:style-name="P67" loext:marker-style-name="T11"/>
            </table:table-cell>
            <table:table-cell table:style-name="Tabla34.B3" office:value-type="string">
              <text:p text:style-name="P67" loext:marker-style-name="T11"/>
            </table:table-cell>
            <table:table-cell table:style-name="Tabla34.B3" office:value-type="string">
              <text:p text:style-name="P67" loext:marker-style-name="T11"/>
            </table:table-cell>
            <table:table-cell table:style-name="Tabla34.B3" office:value-type="string">
              <text:p text:style-name="P67" loext:marker-style-name="T11"/>
            </table:table-cell>
          </table:table-row>
          <table:table-row table:style-name="Tabla34.2">
            <table:table-cell table:style-name="Tabla34.A3" office:value-type="string">
              <text:p text:style-name="P46" loext:marker-style-name="T7"><text:span text:style-name="T11"><text:s/>Gastos administrativos</text:span><text:span text:style-name="T11"/></text:p>
            </table:table-cell>
            <table:table-cell table:style-name="Tabla34.B3" office:value-type="string">
              <text:p text:style-name="P67" loext:marker-style-name="T11"/>
            </table:table-cell>
            <table:table-cell table:style-name="Tabla34.B3" office:value-type="string">
              <text:p text:style-name="P67" loext:marker-style-name="T11"/>
            </table:table-cell>
            <table:table-cell table:style-name="Tabla34.B3" office:value-type="string">
              <text:p text:style-name="P67" loext:marker-style-name="T11"/>
            </table:table-cell>
            <table:table-cell table:style-name="Tabla34.B3" office:value-type="string">
              <text:p text:style-name="P67" loext:marker-style-name="T11"/>
            </table:table-cell>
            <table:table-cell table:style-name="Tabla34.B3" office:value-type="string">
              <text:p text:style-name="P67" loext:marker-style-name="T11"/>
            </table:table-cell>
          </table:table-row>
          <table:table-row table:style-name="Tabla34.2">
            <table:table-cell table:style-name="Tabla34.A3" office:value-type="string">
              <text:p text:style-name="P46" loext:marker-style-name="T7"><text:span text:style-name="T5">V. DEPRECIACIÒN DE A.F. Y AMORT. INTANG</text:span><text:span text:style-name="T5"/></text:p>
            </table:table-cell>
            <table:table-cell table:style-name="Tabla34.B3" office:value-type="string">
              <text:p text:style-name="P67" loext:marker-style-name="T11"/>
            </table:table-cell>
            <table:table-cell table:style-name="Tabla34.B3" office:value-type="string">
              <text:p text:style-name="P67" loext:marker-style-name="T11"/>
            </table:table-cell>
            <table:table-cell table:style-name="Tabla34.B3" office:value-type="string">
              <text:p text:style-name="P67" loext:marker-style-name="T11"/>
            </table:table-cell>
            <table:table-cell table:style-name="Tabla34.B3" office:value-type="string">
              <text:p text:style-name="P67" loext:marker-style-name="T11"/>
            </table:table-cell>
            <table:table-cell table:style-name="Tabla34.B3" office:value-type="string">
              <text:p text:style-name="P67" loext:marker-style-name="T11"/>
            </table:table-cell>
          </table:table-row>
          <table:table-row table:style-name="Tabla34.2">
            <table:table-cell table:style-name="Tabla34.A3" office:value-type="string">
              <text:p text:style-name="P46" loext:marker-style-name="T7"><text:span text:style-name="T6">VI. UTILIDAD OPERATIVA</text:span><text:span text:style-name="T6"/></text:p>
            </table:table-cell>
            <table:table-cell table:style-name="Tabla34.B3" office:value-type="string">
              <text:p text:style-name="P52" loext:marker-style-name="T6"/>
            </table:table-cell>
            <table:table-cell table:style-name="Tabla34.B3" office:value-type="string">
              <text:p text:style-name="P52" loext:marker-style-name="T6"/>
            </table:table-cell>
            <table:table-cell table:style-name="Tabla34.B3" office:value-type="string">
              <text:p text:style-name="P52" loext:marker-style-name="T6"/>
            </table:table-cell>
            <table:table-cell table:style-name="Tabla34.B3" office:value-type="string">
              <text:p text:style-name="P52" loext:marker-style-name="T6"/>
            </table:table-cell>
            <table:table-cell table:style-name="Tabla34.B3" office:value-type="string">
              <text:p text:style-name="P52" loext:marker-style-name="T6"/>
            </table:table-cell>
          </table:table-row>
          <table:table-row table:style-name="Tabla34.2">
            <table:table-cell table:style-name="Tabla34.A3" office:value-type="string">
              <text:p text:style-name="P46" loext:marker-style-name="T7"><text:span text:style-name="T5">VII. GASTOS FINANCIEROS</text:span><text:span text:style-name="T5"/></text:p>
            </table:table-cell>
            <table:table-cell table:style-name="Tabla34.B3" office:value-type="string">
              <text:p text:style-name="P67" loext:marker-style-name="T11"/>
            </table:table-cell>
            <table:table-cell table:style-name="Tabla34.B3" office:value-type="string">
              <text:p text:style-name="P67" loext:marker-style-name="T11"/>
            </table:table-cell>
            <table:table-cell table:style-name="Tabla34.B3" office:value-type="string">
              <text:p text:style-name="P67" loext:marker-style-name="T11"/>
            </table:table-cell>
            <table:table-cell table:style-name="Tabla34.B3" office:value-type="string">
              <text:p text:style-name="P67" loext:marker-style-name="T11"/>
            </table:table-cell>
            <table:table-cell table:style-name="Tabla34.B3" office:value-type="string">
              <text:p text:style-name="P67" loext:marker-style-name="T11"/>
            </table:table-cell>
          </table:table-row>
          <table:table-row table:style-name="Tabla34.2">
            <table:table-cell table:style-name="Tabla34.A3" office:value-type="string">
              <text:p text:style-name="P46" loext:marker-style-name="T7"><text:span text:style-name="T11"><text:s/>Pago de intereses</text:span><text:span text:style-name="T11"/></text:p>
            </table:table-cell>
            <table:table-cell table:style-name="Tabla34.B3" office:value-type="string">
              <text:p text:style-name="P67" loext:marker-style-name="T11"/>
            </table:table-cell>
            <table:table-cell table:style-name="Tabla34.B3" office:value-type="string">
              <text:p text:style-name="P67" loext:marker-style-name="T11"/>
            </table:table-cell>
            <table:table-cell table:style-name="Tabla34.B3" office:value-type="string">
              <text:p text:style-name="P67" loext:marker-style-name="T11"/>
            </table:table-cell>
            <table:table-cell table:style-name="Tabla34.B3" office:value-type="string">
              <text:p text:style-name="P67" loext:marker-style-name="T11"/>
            </table:table-cell>
            <table:table-cell table:style-name="Tabla34.B3" office:value-type="string">
              <text:p text:style-name="P67" loext:marker-style-name="T11"/>
            </table:table-cell>
          </table:table-row>
          <table:table-row table:style-name="Tabla34.2">
            <table:table-cell table:style-name="Tabla34.A3" office:value-type="string">
              <text:p text:style-name="P46" loext:marker-style-name="T7"><text:span text:style-name="T6">VIII. UTILIDAD ANTES DE IMPUESTO</text:span><text:span text:style-name="T6"/></text:p>
            </table:table-cell>
            <table:table-cell table:style-name="Tabla34.B3" office:value-type="string">
              <text:p text:style-name="P52" loext:marker-style-name="T6"/>
            </table:table-cell>
            <table:table-cell table:style-name="Tabla34.B3" office:value-type="string">
              <text:p text:style-name="P52" loext:marker-style-name="T6"/>
            </table:table-cell>
            <table:table-cell table:style-name="Tabla34.B3" office:value-type="string">
              <text:p text:style-name="P52" loext:marker-style-name="T6"/>
            </table:table-cell>
            <table:table-cell table:style-name="Tabla34.B3" office:value-type="string">
              <text:p text:style-name="P52" loext:marker-style-name="T6"/>
            </table:table-cell>
            <table:table-cell table:style-name="Tabla34.B3" office:value-type="string">
              <text:p text:style-name="P52" loext:marker-style-name="T6"/>
            </table:table-cell>
          </table:table-row>
          <table:table-row table:style-name="Tabla34.2">
            <table:table-cell table:style-name="Tabla34.A3" office:value-type="string">
              <text:p text:style-name="P46" loext:marker-style-name="T7"><text:span text:style-name="T5">IX. IMPUESTO A LA RENTA ( * )</text:span><text:span text:style-name="T5"/></text:p>
            </table:table-cell>
            <table:table-cell table:style-name="Tabla34.B3" office:value-type="string">
              <text:p text:style-name="P67" loext:marker-style-name="T11"/>
            </table:table-cell>
            <table:table-cell table:style-name="Tabla34.B3" office:value-type="string">
              <text:p text:style-name="P67" loext:marker-style-name="T11"/>
            </table:table-cell>
            <table:table-cell table:style-name="Tabla34.B3" office:value-type="string">
              <text:p text:style-name="P67" loext:marker-style-name="T11"/>
            </table:table-cell>
            <table:table-cell table:style-name="Tabla34.B3" office:value-type="string">
              <text:p text:style-name="P67" loext:marker-style-name="T11"/>
            </table:table-cell>
            <table:table-cell table:style-name="Tabla34.B3" office:value-type="string">
              <text:p text:style-name="P67" loext:marker-style-name="T11"/>
            </table:table-cell>
          </table:table-row>
          <table:table-row table:style-name="Tabla34.2">
            <table:table-cell table:style-name="Tabla34.A17" office:value-type="string">
              <text:p text:style-name="P46" loext:marker-style-name="T7"><text:span text:style-name="T6">UTILIDAD NETA</text:span><text:span text:style-name="T6"/></text:p>
            </table:table-cell>
            <table:table-cell table:style-name="Tabla34.B2" office:value-type="string">
              <text:p text:style-name="P52" loext:marker-style-name="T6"/>
            </table:table-cell>
            <table:table-cell table:style-name="Tabla34.B2" office:value-type="string">
              <text:p text:style-name="P52" loext:marker-style-name="T6"/>
            </table:table-cell>
            <table:table-cell table:style-name="Tabla34.B2" office:value-type="string">
              <text:p text:style-name="P52" loext:marker-style-name="T6"/>
            </table:table-cell>
            <table:table-cell table:style-name="Tabla34.B2" office:value-type="string">
              <text:p text:style-name="P52" loext:marker-style-name="T6"/>
            </table:table-cell>
            <table:table-cell table:style-name="Tabla34.B2" office:value-type="string">
              <text:p text:style-name="P52" loext:marker-style-name="T6"/>
            </table:table-cell>
          </table:table-row>
        </table:table>
        <text:p text:style-name="P40" loext:marker-style-name="T7"><text:span text:style-name="T9">(*) Se deberá considerar el porcentaje de Impuesto a la renta determinado por la SUNAT, para el presente año.</text:span><text:span text:style-name="T9"/></text:p>
        <text:p text:style-name="P40" loext:marker-style-name="T7"><text:span text:style-name="T16">Nota:</text:span><text:span text:style-name="T1"> Para efectos del flujo de caja económico, se utiliza el impuesto calculado en el estado de resultados sin financiamiento, toda vez que en el flujo de caja financiero se le agrega el escudo fiscal tributario</text:span></text:p>
        <text:list text:continue-numbering="true" text:style-name="WWNum5">
          <text:list-item>
            <text:list>
              <text:list-item>
                <text:p text:style-name="P15" loext:marker-style-name="T7"><text:span text:style-name="T1">FLUJO DE CAJA: Elaborar y presentar el flujo de caja como herramienta de evaluación, que muestre todos los ingresos y egresos, actuales y futuros, que tiene una propuesta productiva, que sirve para estimar la rentabilidad financiera. Realizar la proyección el horizonte de evaluación planteado para la propuesta productiva.</text:span><text:span text:style-name="T1"/></text:p>
              </text:list-item>
            </text:list>
          </text:list-item>
        </text:list>
        <table:table table:name="Tabla35" table:style-name="Tabla35">
          <table:table-column table:style-name="Tabla35.A"/>
          <table:table-column table:style-name="Tabla35.B" table:number-columns-repeated="2"/>
          <table:table-column table:style-name="Tabla35.D"/>
          <table:table-column table:style-name="Tabla35.E"/>
          <table:table-column table:style-name="Tabla35.F"/>
          <table:table-column table:style-name="Tabla35.G"/>
          <text:soft-page-break/>
          <table:table-row table:style-name="Tabla35.1">
            <table:table-cell table:style-name="Tabla35.A1" office:value-type="string">
              <text:p text:style-name="P31" loext:marker-style-name="T7"><text:span text:style-name="T5">CONCEPTO</text:span><text:span text:style-name="T5"/></text:p>
            </table:table-cell>
            <table:table-cell table:style-name="Tabla35.A1" office:value-type="string">
              <text:p text:style-name="P31" loext:marker-style-name="T7"><text:span text:style-name="T5">0</text:span><text:span text:style-name="T5"/></text:p>
            </table:table-cell>
            <table:table-cell table:style-name="Tabla35.A1" office:value-type="string">
              <text:p text:style-name="P31" loext:marker-style-name="T7"><text:span text:style-name="T5">1</text:span><text:span text:style-name="T5"/></text:p>
            </table:table-cell>
            <table:table-cell table:style-name="Tabla35.A1" office:value-type="string">
              <text:p text:style-name="P31" loext:marker-style-name="T7"><text:span text:style-name="T5">2</text:span><text:span text:style-name="T5"/></text:p>
            </table:table-cell>
            <table:table-cell table:style-name="Tabla35.A1" office:value-type="string">
              <text:p text:style-name="P31" loext:marker-style-name="T7"><text:span text:style-name="T5">3</text:span><text:span text:style-name="T5"/></text:p>
            </table:table-cell>
            <table:table-cell table:style-name="Tabla35.A1" office:value-type="string">
              <text:p text:style-name="P31" loext:marker-style-name="T7"><text:span text:style-name="T5">4</text:span><text:span text:style-name="T5"/></text:p>
            </table:table-cell>
            <table:table-cell table:style-name="Tabla35.A1" office:value-type="string">
              <text:p text:style-name="P31" loext:marker-style-name="T7"><text:span text:style-name="T5">5</text:span><text:span text:style-name="T5"/></text:p>
            </table:table-cell>
          </table:table-row>
          <table:table-row table:style-name="Tabla35.2">
            <table:table-cell table:style-name="Tabla35.A2" office:value-type="string">
              <text:p text:style-name="P46" loext:marker-style-name="T7"><text:span text:style-name="T6">I. INGRESOS</text:span><text:span text:style-name="T6"/></text:p>
            </table:table-cell>
            <table:table-cell table:style-name="Tabla35.A2" office:value-type="string">
              <text:p text:style-name="P31" loext:marker-style-name="T7"><text:span text:style-name="T6">-</text:span><text:span text:style-name="T6"/></text:p>
            </table:table-cell>
            <table:table-cell table:style-name="Tabla35.A2" office:value-type="string">
              <text:p text:style-name="P51" loext:marker-style-name="T6"/>
            </table:table-cell>
            <table:table-cell table:style-name="Tabla35.A2" office:value-type="string">
              <text:p text:style-name="P51" loext:marker-style-name="T6"/>
            </table:table-cell>
            <table:table-cell table:style-name="Tabla35.A2" office:value-type="string">
              <text:p text:style-name="P51" loext:marker-style-name="T6"/>
            </table:table-cell>
            <table:table-cell table:style-name="Tabla35.A2" office:value-type="string">
              <text:p text:style-name="P51" loext:marker-style-name="T6"/>
            </table:table-cell>
            <table:table-cell table:style-name="Tabla35.A2" office:value-type="string">
              <text:p text:style-name="P51" loext:marker-style-name="T6"/>
            </table:table-cell>
          </table:table-row>
          <table:table-row table:style-name="Tabla35.2">
            <table:table-cell table:style-name="Tabla35.A2" office:value-type="string">
              <text:p text:style-name="P46" loext:marker-style-name="T7"><text:span text:style-name="T11"><text:s/>INGRESOS POR VENTA</text:span><text:span text:style-name="T11"/></text:p>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row>
          <table:table-row table:style-name="Tabla35.2">
            <table:table-cell table:style-name="Tabla35.A2" office:value-type="string">
              <text:p text:style-name="P46" loext:marker-style-name="T7"><text:span text:style-name="T11">VALOR RESIDUAL</text:span><text:span text:style-name="T11"/></text:p>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row>
          <table:table-row table:style-name="Tabla35.2">
            <table:table-cell table:style-name="Tabla35.A2" office:value-type="string">
              <text:p text:style-name="P46" loext:marker-style-name="T7"><text:span text:style-name="T11">RECUPERO CAPITAL DE TRABAJO</text:span><text:span text:style-name="T11"/></text:p>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row>
          <table:table-row table:style-name="Tabla35.2">
            <table:table-cell table:style-name="Tabla35.A2" office:value-type="string">
              <text:p text:style-name="P46" loext:marker-style-name="T7"><text:span text:style-name="T6">II. EGRESOS</text:span><text:span text:style-name="T6"/></text:p>
            </table:table-cell>
            <table:table-cell table:style-name="Tabla35.A2" office:value-type="string">
              <text:p text:style-name="P31" loext:marker-style-name="T7"><text:span text:style-name="T6">-</text:span><text:span text:style-name="T6"/></text:p>
            </table:table-cell>
            <table:table-cell table:style-name="Tabla35.A2" office:value-type="string">
              <text:p text:style-name="P51" loext:marker-style-name="T6"/>
            </table:table-cell>
            <table:table-cell table:style-name="Tabla35.A2" office:value-type="string">
              <text:p text:style-name="P51" loext:marker-style-name="T6"/>
            </table:table-cell>
            <table:table-cell table:style-name="Tabla35.A2" office:value-type="string">
              <text:p text:style-name="P51" loext:marker-style-name="T6"/>
            </table:table-cell>
            <table:table-cell table:style-name="Tabla35.A2" office:value-type="string">
              <text:p text:style-name="P51" loext:marker-style-name="T6"/>
            </table:table-cell>
            <table:table-cell table:style-name="Tabla35.A2" office:value-type="string">
              <text:p text:style-name="P51" loext:marker-style-name="T6"/>
            </table:table-cell>
          </table:table-row>
          <table:table-row table:style-name="Tabla35.2">
            <table:table-cell table:style-name="Tabla35.A2" office:value-type="string">
              <text:p text:style-name="P46" loext:marker-style-name="T7"><text:span text:style-name="T11">II.1. COSTOS DE PRODUCCIÒN</text:span><text:span text:style-name="T11"/></text:p>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row>
          <table:table-row table:style-name="Tabla35.2">
            <table:table-cell table:style-name="Tabla35.A2" office:value-type="string">
              <text:p text:style-name="P46" loext:marker-style-name="T7"><text:span text:style-name="T11">II.2. GASTOS DE OPERACIÒN</text:span><text:span text:style-name="T11"/></text:p>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row>
          <table:table-row table:style-name="Tabla35.2">
            <table:table-cell table:style-name="Tabla35.A2" office:value-type="string">
              <text:p text:style-name="P46" loext:marker-style-name="T7"><text:span text:style-name="T11">II.3. IMPUESTO A LA RENTA</text:span><text:span text:style-name="T11"/></text:p>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row>
          <table:table-row table:style-name="Tabla35.2">
            <table:table-cell table:style-name="Tabla35.A2" office:value-type="string">
              <text:p text:style-name="P46" loext:marker-style-name="T7"><text:span text:style-name="T11">II.4. INVERSION FIJA AÑO 0</text:span><text:span text:style-name="T11"/></text:p>
            </table:table-cell>
            <table:table-cell table:style-name="Tabla35.A2" office:value-type="string">
              <text:p text:style-name="P51" loext:marker-style-name="T6"/>
            </table:table-cell>
            <table:table-cell table:style-name="Tabla35.A2" office:value-type="string">
              <text:p text:style-name="P51" loext:marker-style-name="T6"/>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row>
          <table:table-row table:style-name="Tabla35.2">
            <table:table-cell table:style-name="Tabla35.A2" office:value-type="string">
              <text:p text:style-name="P46" loext:marker-style-name="T7"><text:span text:style-name="T11"><text:s/>ACTIVO FIJO</text:span><text:span text:style-name="T11"/></text:p>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row>
          <table:table-row table:style-name="Tabla35.2">
            <table:table-cell table:style-name="Tabla35.A2" office:value-type="string">
              <text:p text:style-name="P46" loext:marker-style-name="T7"><text:span text:style-name="T11"><text:s/>ACTIVO INTANGIBLE</text:span><text:span text:style-name="T11"/></text:p>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row>
          <table:table-row table:style-name="Tabla35.2">
            <table:table-cell table:style-name="Tabla35.A2" office:value-type="string">
              <text:p text:style-name="P46" loext:marker-style-name="T7"><text:span text:style-name="T11"><text:s/>CAPITAL DE TRABAJO</text:span><text:span text:style-name="T11"/></text:p>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row>
          <table:table-row table:style-name="Tabla35.2">
            <table:table-cell table:style-name="Tabla35.A2" office:value-type="string">
              <text:p text:style-name="P46" loext:marker-style-name="T7"><text:span text:style-name="T11"><text:s/>GASTOS GENERALES</text:span><text:span text:style-name="T11"/></text:p>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row>
          <table:table-row table:style-name="Tabla35.2">
            <table:table-cell table:style-name="Tabla35.A2" office:value-type="string">
              <text:p text:style-name="P46" loext:marker-style-name="T7"><text:span text:style-name="T11"><text:s/>GASTOS DE SUPERVISION</text:span><text:span text:style-name="T11"/></text:p>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cell table:style-name="Tabla35.A2" office:value-type="string">
              <text:p text:style-name="P66" loext:marker-style-name="T11"/>
            </table:table-cell>
          </table:table-row>
          <table:table-row table:style-name="Tabla35.1">
            <table:table-cell table:style-name="Tabla35.A2" office:value-type="string">
              <text:p text:style-name="P46" loext:marker-style-name="T7"><text:span text:style-name="T6">FLUJO DE CAJA ECONÒMICO</text:span><text:span text:style-name="T6"/></text:p>
            </table:table-cell>
            <table:table-cell table:style-name="Tabla35.A2" office:value-type="string">
              <text:p text:style-name="P51" loext:marker-style-name="T6"/>
            </table:table-cell>
            <table:table-cell table:style-name="Tabla35.A2" office:value-type="string">
              <text:p text:style-name="P51" loext:marker-style-name="T6"/>
            </table:table-cell>
            <table:table-cell table:style-name="Tabla35.A2" office:value-type="string">
              <text:p text:style-name="P51" loext:marker-style-name="T6"/>
            </table:table-cell>
            <table:table-cell table:style-name="Tabla35.A2" office:value-type="string">
              <text:p text:style-name="P51" loext:marker-style-name="T6"/>
            </table:table-cell>
            <table:table-cell table:style-name="Tabla35.A2" office:value-type="string">
              <text:p text:style-name="P51" loext:marker-style-name="T6"/>
            </table:table-cell>
            <table:table-cell table:style-name="Tabla35.A2" office:value-type="string">
              <text:p text:style-name="P51" loext:marker-style-name="T6"/>
            </table:table-cell>
          </table:table-row>
          <table:table-row table:style-name="Tabla35.2">
            <table:table-cell table:style-name="Tabla35.A17" office:value-type="string">
              <text:p text:style-name="P46" loext:marker-style-name="T7"><text:span text:style-name="T11">PRESTAMO</text:span><text:span text:style-name="T11"/></text:p>
            </table:table-cell>
            <table:table-cell table:style-name="Tabla35.A17" office:value-type="string">
              <text:p text:style-name="P66" loext:marker-style-name="T11"/>
            </table:table-cell>
            <table:table-cell table:style-name="Tabla35.A17" office:value-type="string">
              <text:p text:style-name="P66" loext:marker-style-name="T11"/>
            </table:table-cell>
            <table:table-cell table:style-name="Tabla35.A17" office:value-type="string">
              <text:p text:style-name="P66" loext:marker-style-name="T11"/>
            </table:table-cell>
            <table:table-cell table:style-name="Tabla35.A17" office:value-type="string">
              <text:p text:style-name="P66" loext:marker-style-name="T11"/>
            </table:table-cell>
            <table:table-cell table:style-name="Tabla35.A17" office:value-type="string">
              <text:p text:style-name="P66" loext:marker-style-name="T11"/>
            </table:table-cell>
            <table:table-cell table:style-name="Tabla35.A17" office:value-type="string">
              <text:p text:style-name="P66" loext:marker-style-name="T11"/>
            </table:table-cell>
          </table:table-row>
          <table:table-row table:style-name="Tabla35.2">
            <table:table-cell table:style-name="Tabla35.A17" office:value-type="string">
              <text:p text:style-name="P46" loext:marker-style-name="T7"><text:span text:style-name="T11">SERVICIO DE DEUDA</text:span><text:span text:style-name="T11"/></text:p>
            </table:table-cell>
            <table:table-cell table:style-name="Tabla35.A17" office:value-type="string">
              <text:p text:style-name="P66" loext:marker-style-name="T11"/>
            </table:table-cell>
            <table:table-cell table:style-name="Tabla35.A17" office:value-type="string">
              <text:p text:style-name="P66" loext:marker-style-name="T11"/>
            </table:table-cell>
            <table:table-cell table:style-name="Tabla35.A17" office:value-type="string">
              <text:p text:style-name="P66" loext:marker-style-name="T11"/>
            </table:table-cell>
            <table:table-cell table:style-name="Tabla35.A17" office:value-type="string">
              <text:p text:style-name="P66" loext:marker-style-name="T11"/>
            </table:table-cell>
            <table:table-cell table:style-name="Tabla35.A17" office:value-type="string">
              <text:p text:style-name="P66" loext:marker-style-name="T11"/>
            </table:table-cell>
            <table:table-cell table:style-name="Tabla35.A17" office:value-type="string">
              <text:p text:style-name="P66" loext:marker-style-name="T11"/>
            </table:table-cell>
          </table:table-row>
          <table:table-row table:style-name="Tabla35.2">
            <table:table-cell table:style-name="Tabla35.A17" office:value-type="string">
              <text:p text:style-name="P46" loext:marker-style-name="T7"><text:span text:style-name="T11">ESCUDO FISCAL</text:span><text:span text:style-name="T11"/></text:p>
            </table:table-cell>
            <table:table-cell table:style-name="Tabla35.A17" office:value-type="string">
              <text:p text:style-name="P66" loext:marker-style-name="T11"/>
            </table:table-cell>
            <table:table-cell table:style-name="Tabla35.A17" office:value-type="string">
              <text:p text:style-name="P66" loext:marker-style-name="T11"/>
            </table:table-cell>
            <table:table-cell table:style-name="Tabla35.A17" office:value-type="string">
              <text:p text:style-name="P66" loext:marker-style-name="T11"/>
            </table:table-cell>
            <table:table-cell table:style-name="Tabla35.A17" office:value-type="string">
              <text:p text:style-name="P66" loext:marker-style-name="T11"/>
            </table:table-cell>
            <table:table-cell table:style-name="Tabla35.A17" office:value-type="string">
              <text:p text:style-name="P66" loext:marker-style-name="T11"/>
            </table:table-cell>
            <table:table-cell table:style-name="Tabla35.A17" office:value-type="string">
              <text:p text:style-name="P66" loext:marker-style-name="T11"/>
            </table:table-cell>
          </table:table-row>
          <table:table-row table:style-name="Tabla35.1">
            <table:table-cell table:style-name="Tabla35.A17" office:value-type="string">
              <text:p text:style-name="P46" loext:marker-style-name="T7"><text:span text:style-name="T6">FLUJO DE CAJA FINANCIERO</text:span><text:span text:style-name="T6"/></text:p>
            </table:table-cell>
            <table:table-cell table:style-name="Tabla35.A17" office:value-type="string">
              <text:p text:style-name="P51" loext:marker-style-name="T6"/>
            </table:table-cell>
            <table:table-cell table:style-name="Tabla35.A17" office:value-type="string">
              <text:p text:style-name="P51" loext:marker-style-name="T6"/>
            </table:table-cell>
            <table:table-cell table:style-name="Tabla35.A17" office:value-type="string">
              <text:p text:style-name="P51" loext:marker-style-name="T6"/>
            </table:table-cell>
            <table:table-cell table:style-name="Tabla35.A17" office:value-type="string">
              <text:p text:style-name="P51" loext:marker-style-name="T6"/>
            </table:table-cell>
            <table:table-cell table:style-name="Tabla35.A17" office:value-type="string">
              <text:p text:style-name="P51" loext:marker-style-name="T6"/>
            </table:table-cell>
            <table:table-cell table:style-name="Tabla35.A17" office:value-type="string">
              <text:p text:style-name="P51" loext:marker-style-name="T6"/>
            </table:table-cell>
          </table:table-row>
        </table:table>
        <text:p text:style-name="P40" loext:marker-style-name="T7"><text:span text:style-name="T17">Nota:</text:span><text:span text:style-name="T62"> Las celdas sombreadas deben ser llenadas siempre y cuando una parte del monto total de inversión del proyecto sea financiado por una entidad financiera.</text:span></text:p>
        <table:table table:name="Tabla36" table:style-name="Tabla36">
          <table:table-column table:style-name="Tabla36.A"/>
          <table:table-column table:style-name="Tabla36.B"/>
          <table:table-row table:style-name="Tabla36.1">
            <table:table-cell table:style-name="Tabla36.A1" office:value-type="string">
              <text:p text:style-name="P46" loext:marker-style-name="T7"><text:span text:style-name="T5">COK</text:span><text:span text:style-name="T5"/></text:p>
            </table:table-cell>
            <table:table-cell table:style-name="Tabla36.A1" office:value-type="string">
              <text:p text:style-name="P66" loext:marker-style-name="T11"/>
            </table:table-cell>
          </table:table-row>
          <table:table-row table:style-name="Tabla36.1">
            <table:table-cell table:style-name="Tabla36.A1" office:value-type="string">
              <text:p text:style-name="P46" loext:marker-style-name="T7"><text:span text:style-name="T5">Tasa de descuento del préstamo (TEA)</text:span><text:span text:style-name="T5"/></text:p>
            </table:table-cell>
            <table:table-cell table:style-name="Tabla36.A1" office:value-type="string">
              <text:p text:style-name="P66" loext:marker-style-name="T11"/>
            </table:table-cell>
          </table:table-row>
        </table:table>
        <text:p text:style-name="P40" loext:marker-style-name="T7"><text:span text:style-name="T17">Nota:</text:span><text:span text:style-name="T62"> La TEA es la tasa efectiva anual del préstamo, es decir, tasa a la que te presta la entidad financiera y se utiliza siempre y cuando el plan de negocio sea con apalancamiento. </text:span></text:p>
        <table:table table:name="Tabla37" table:style-name="Tabla37">
          <table:table-column table:style-name="Tabla37.A"/>
          <table:table-column table:style-name="Tabla37.B"/>
          <table:table-row table:style-name="Tabla37.1">
            <table:table-cell table:style-name="Tabla37.A1" office:value-type="string">
              <text:p text:style-name="P46" loext:marker-style-name="T7"><text:span text:style-name="T5">WACC</text:span><text:span text:style-name="T5"/></text:p>
            </table:table-cell>
            <table:table-cell table:style-name="Tabla37.A1" office:value-type="string">
              <text:p text:style-name="P66" loext:marker-style-name="T11"/>
            </table:table-cell>
          </table:table-row>
        </table:table>
        <text:p text:style-name="P40" loext:marker-style-name="T7"><text:span text:style-name="T17">Nota</text:span><text:span text:style-name="T62">: Se considera el cálculo del WACC siempre y cuando una parte del proyecto sea financiado con préstamo por una entidad financiera; caso contrario, se deberá hacer uso solo de la tasa de descuento del costo de oportunidad (COK). Considerar 20 % como máximo para el COK.</text:span></text:p>
        <table:table table:name="Tabla38" table:style-name="Tabla38">
          <table:table-column table:style-name="Tabla38.A"/>
          <table:table-column table:style-name="Tabla38.B"/>
          <table:table-row table:style-name="Tabla38.1">
            <table:table-cell table:style-name="Tabla38.A1" office:value-type="string">
              <text:p text:style-name="P46" loext:marker-style-name="T7"><text:span text:style-name="T5">VANE</text:span><text:span text:style-name="T5"/></text:p>
            </table:table-cell>
            <table:table-cell table:style-name="Tabla38.A1" office:value-type="string">
              <text:p text:style-name="P66" loext:marker-style-name="T11"/>
            </table:table-cell>
          </table:table-row>
          <table:table-row table:style-name="Tabla38.1">
            <table:table-cell table:style-name="Tabla38.A1" office:value-type="string">
              <text:p text:style-name="P46" loext:marker-style-name="T7"><text:span text:style-name="T5">VANF</text:span><text:span text:style-name="T5"/></text:p>
            </table:table-cell>
            <table:table-cell table:style-name="Tabla38.A1" office:value-type="string">
              <text:p text:style-name="P66" loext:marker-style-name="T11"/>
            </table:table-cell>
          </table:table-row>
          <table:table-row table:style-name="Tabla38.1">
            <table:table-cell table:style-name="Tabla38.A1" office:value-type="string">
              <text:p text:style-name="P46" loext:marker-style-name="T7"><text:span text:style-name="T5">TIRE</text:span><text:span text:style-name="T5"/></text:p>
            </table:table-cell>
            <table:table-cell table:style-name="Tabla38.A1" office:value-type="string">
              <text:p text:style-name="P66" loext:marker-style-name="T11"/>
            </table:table-cell>
          </table:table-row>
          <table:table-row table:style-name="Tabla38.1">
            <table:table-cell table:style-name="Tabla38.A1" office:value-type="string">
              <text:p text:style-name="P46" loext:marker-style-name="T7"><text:span text:style-name="T5">TIRF</text:span><text:span text:style-name="T5"/></text:p>
            </table:table-cell>
            <table:table-cell table:style-name="Tabla38.A1" office:value-type="string">
              <text:p text:style-name="P66" loext:marker-style-name="T11"/>
            </table:table-cell>
          </table:table-row>
        </table:table>
        <text:list text:continue-numbering="true" text:style-name="WWNum5">
          <text:list-item>
            <text:list>
              <text:list-item>
                <text:p text:style-name="P15" loext:marker-style-name="T7"><text:span text:style-name="T1">PUNTO DE EQUILIBRIO: Determinar el punto de equilibrio como aquella cantidad de productos que se necesitan vender para sostener el negocio, es decir, cubrir sus costos fijos y variables. Esta información proporciona información sobre la cantidad mínima que se debe producir y vender, para no presentar perdidas.</text:span><text:span text:style-name="T1"/></text:p>
              </text:list-item>
            </text:list>
          </text:list-item>
        </text:list>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style-name="Tabla39.1">
            <table:table-cell table:style-name="Tabla39.A1" table:number-rows-spanned="2" office:value-type="string">
              <text:p text:style-name="P31" loext:marker-style-name="T7"><text:span text:style-name="T5">RUBROS</text:span><text:span text:style-name="T5"/></text:p>
            </table:table-cell>
            <table:table-cell table:style-name="Tabla39.B1" table:number-columns-spanned="5" office:value-type="string">
              <text:p text:style-name="P31" loext:marker-style-name="T7"><text:span text:style-name="T5">AÑOS</text:span><text:span text:style-name="T5"/></text:p>
            </table:table-cell>
            <table:covered-table-cell/>
            <table:covered-table-cell/>
            <table:covered-table-cell/>
            <table:covered-table-cell/>
          </table:table-row>
          <table:table-row table:style-name="Tabla39.2">
            <table:covered-table-cell table:style-name="Tabla39.A2"/>
            <table:table-cell table:style-name="Tabla39.B2" office:value-type="string">
              <text:p text:style-name="P31" loext:marker-style-name="T7"><text:span text:style-name="T5">1</text:span><text:span text:style-name="T5"/></text:p>
            </table:table-cell>
            <table:table-cell table:style-name="Tabla39.B2" office:value-type="string">
              <text:p text:style-name="P31" loext:marker-style-name="T7"><text:span text:style-name="T5">2</text:span><text:span text:style-name="T5"/></text:p>
            </table:table-cell>
            <table:table-cell table:style-name="Tabla39.B2" office:value-type="string">
              <text:p text:style-name="P31" loext:marker-style-name="T7"><text:span text:style-name="T5">3</text:span><text:span text:style-name="T5"/></text:p>
            </table:table-cell>
            <table:table-cell table:style-name="Tabla39.B2" office:value-type="string">
              <text:p text:style-name="P31" loext:marker-style-name="T7"><text:span text:style-name="T5">4</text:span><text:span text:style-name="T5"/></text:p>
            </table:table-cell>
            <table:table-cell table:style-name="Tabla39.B2" office:value-type="string">
              <text:p text:style-name="P31" loext:marker-style-name="T7"><text:span text:style-name="T5">5</text:span><text:span text:style-name="T5"/></text:p>
            </table:table-cell>
          </table:table-row>
          <table:table-row table:style-name="Tabla39.2">
            <table:table-cell table:style-name="Tabla39.A3" office:value-type="string">
              <text:p text:style-name="P46" loext:marker-style-name="T7"><text:span text:style-name="T11">VENTAS</text:span><text:span text:style-name="T11"/></text:p>
            </table:table-cell>
            <table:table-cell table:style-name="Tabla39.B3" office:value-type="string">
              <text:p text:style-name="P67" loext:marker-style-name="T11"/>
            </table:table-cell>
            <table:table-cell table:style-name="Tabla39.B3" office:value-type="string">
              <text:p text:style-name="P67" loext:marker-style-name="T11"/>
            </table:table-cell>
            <table:table-cell table:style-name="Tabla39.B3" office:value-type="string">
              <text:p text:style-name="P67" loext:marker-style-name="T11"/>
            </table:table-cell>
            <table:table-cell table:style-name="Tabla39.B3" office:value-type="string">
              <text:p text:style-name="P67" loext:marker-style-name="T11"/>
            </table:table-cell>
            <table:table-cell table:style-name="Tabla39.B3" office:value-type="string">
              <text:p text:style-name="P67" loext:marker-style-name="T11"/>
            </table:table-cell>
          </table:table-row>
          <table:table-row table:style-name="Tabla39.2">
            <table:table-cell table:style-name="Tabla39.A3" office:value-type="string">
              <text:p text:style-name="P46" loext:marker-style-name="T7"><text:span text:style-name="T11">COSTOS TOTALES ACUMULADOS</text:span><text:span text:style-name="T11"/></text:p>
            </table:table-cell>
            <table:table-cell table:style-name="Tabla39.B3" office:value-type="string">
              <text:p text:style-name="P67" loext:marker-style-name="T11"/>
            </table:table-cell>
            <table:table-cell table:style-name="Tabla39.B3" office:value-type="string">
              <text:p text:style-name="P67" loext:marker-style-name="T11"/>
            </table:table-cell>
            <table:table-cell table:style-name="Tabla39.B3" office:value-type="string">
              <text:p text:style-name="P67" loext:marker-style-name="T11"/>
            </table:table-cell>
            <table:table-cell table:style-name="Tabla39.B3" office:value-type="string">
              <text:p text:style-name="P67" loext:marker-style-name="T11"/>
            </table:table-cell>
            <table:table-cell table:style-name="Tabla39.B3" office:value-type="string">
              <text:p text:style-name="P67" loext:marker-style-name="T11"/>
            </table:table-cell>
          </table:table-row>
          <table:table-row table:style-name="Tabla39.2">
            <table:table-cell table:style-name="Tabla39.A3" office:value-type="string">
              <text:p text:style-name="P46" loext:marker-style-name="T7"><text:span text:style-name="T11">COSTOS FIJOS</text:span><text:span text:style-name="T11"/></text:p>
            </table:table-cell>
            <table:table-cell table:style-name="Tabla39.B3" office:value-type="string">
              <text:p text:style-name="P67" loext:marker-style-name="T11"/>
            </table:table-cell>
            <table:table-cell table:style-name="Tabla39.B3" office:value-type="string">
              <text:p text:style-name="P67" loext:marker-style-name="T11"/>
            </table:table-cell>
            <table:table-cell table:style-name="Tabla39.B3" office:value-type="string">
              <text:p text:style-name="P67" loext:marker-style-name="T11"/>
            </table:table-cell>
            <table:table-cell table:style-name="Tabla39.B3" office:value-type="string">
              <text:p text:style-name="P67" loext:marker-style-name="T11"/>
            </table:table-cell>
            <table:table-cell table:style-name="Tabla39.B3" office:value-type="string">
              <text:p text:style-name="P67" loext:marker-style-name="T11"/>
            </table:table-cell>
          </table:table-row>
        </table:table>
        <text:p text:style-name="P31" loext:marker-style-name="T7"><draw:frame draw:style-name="fr3" draw:name="Gráfico 15" text:anchor-type="as-char" svg:width="10.844cm" svg:height="6.622cm" draw:z-index="0"><draw:object xlink:href="./Object 2" xlink:type="simple" xlink:show="embed" xlink:actuate="onLoad"/><draw:image xlink:href="./ObjectReplacements/Object 2" xlink:type="simple" xlink:show="embed" xlink:actuate="onLoad"/></draw:frame></text:p>
        <text:p text:style-name="P46" loext:marker-style-name="T7"><text:span text:style-name="T17">Nota</text:span><text:span text:style-name="T9">: </text:span><text:span text:style-name="T62">El grafico de punto de equilibrio consignado en esta ficha es referencial, a modo de ejemplo. El consultor o formulador deberá colocar el grafico de punto de equilibrio correcto, en base a los datos obtenidos de ventas, costos totales acumulados y costos fijos.</text:span></text:p>
        <text:list text:continue-numbering="true" text:style-name="WWNum5">
          <text:list-item>
            <text:p text:style-name="P21" loext:marker-style-name="T7"><text:span text:style-name="T1">CRONOGRAMA DE EJECUCIÓN</text:span><text:span text:style-name="T1"/></text:p>
            <text:list>
              <text:list-item>
                <text:p text:style-name="P23" loext:marker-style-name="T7"><text:span text:style-name="T1">CRONOGRAMA DE EJECUCIÓN FISICO</text:span><text:span text:style-name="T1"/></text:p>
              </text:list-item>
            </text:list>
          </text:list-item>
        </text:list>
        <table:table table:name="Tabla40" table:style-name="Tabla40">
          <table:table-column table:style-name="Tabla40.A"/>
          <table:table-column table:style-name="Tabla40.B"/>
          <table:table-column table:style-name="Tabla40.C"/>
          <table:table-column table:style-name="Tabla40.D"/>
          <table:table-column table:style-name="Tabla40.E" table:number-columns-repeated="2"/>
          <table:table-column table:style-name="Tabla40.G"/>
          <table:table-column table:style-name="Tabla40.H"/>
          <table:table-column table:style-name="Tabla40.I"/>
          <text:soft-page-break/>
          <table:table-row table:style-name="Tabla40.1">
            <table:table-cell table:style-name="Tabla40.A1" table:number-rows-spanned="3" office:value-type="string">
              <text:p text:style-name="P31" loext:marker-style-name="T7"><text:span text:style-name="T6">CONCEPTO</text:span><text:span text:style-name="T6"/></text:p>
            </table:table-cell>
            <table:table-cell table:style-name="Tabla40.B1" table:number-columns-spanned="7" office:value-type="string">
              <text:p text:style-name="P31" loext:marker-style-name="T7"><text:span text:style-name="T6">EJECUCION</text:span><text:span text:style-name="T6"/></text:p>
            </table:table-cell>
            <table:covered-table-cell/>
            <table:covered-table-cell/>
            <table:covered-table-cell/>
            <table:covered-table-cell/>
            <table:covered-table-cell/>
            <table:covered-table-cell/>
            <table:table-cell table:style-name="Tabla40.A1" table:number-rows-spanned="3" office:value-type="string">
              <text:p text:style-name="P31" loext:marker-style-name="T7"><text:span text:style-name="T6"><text:s/>TOTAL</text:span><text:span text:style-name="T6"/></text:p>
            </table:table-cell>
          </table:table-row>
          <table:table-row table:style-name="Tabla40.1">
            <table:covered-table-cell table:style-name="Tabla40.A2"/>
            <table:table-cell table:style-name="Tabla40.B1" table:number-columns-spanned="7" office:value-type="string">
              <text:p text:style-name="P31" loext:marker-style-name="T7"><text:span text:style-name="T6">MESES</text:span><text:span text:style-name="T6"/></text:p>
            </table:table-cell>
            <table:covered-table-cell/>
            <table:covered-table-cell/>
            <table:covered-table-cell/>
            <table:covered-table-cell/>
            <table:covered-table-cell/>
            <table:covered-table-cell/>
            <table:covered-table-cell table:style-name="Tabla40.I2"/>
          </table:table-row>
          <table:table-row table:style-name="Tabla40.1">
            <table:covered-table-cell table:style-name="Tabla40.A3"/>
            <table:table-cell table:style-name="Tabla40.B3" office:value-type="string">
              <text:p text:style-name="P31" loext:marker-style-name="T7"><text:span text:style-name="T6">1</text:span><text:span text:style-name="T6"/></text:p>
            </table:table-cell>
            <table:table-cell table:style-name="Tabla40.B3" office:value-type="string">
              <text:p text:style-name="P31" loext:marker-style-name="T7"><text:span text:style-name="T6">2</text:span><text:span text:style-name="T6"/></text:p>
            </table:table-cell>
            <table:table-cell table:style-name="Tabla40.B3" office:value-type="string">
              <text:p text:style-name="P31" loext:marker-style-name="T7"><text:span text:style-name="T6">3</text:span><text:span text:style-name="T6"/></text:p>
            </table:table-cell>
            <table:table-cell table:style-name="Tabla40.B3" office:value-type="string">
              <text:p text:style-name="P31" loext:marker-style-name="T7"><text:span text:style-name="T6">4</text:span><text:span text:style-name="T6"/></text:p>
            </table:table-cell>
            <table:table-cell table:style-name="Tabla40.B3" office:value-type="string">
              <text:p text:style-name="P31" loext:marker-style-name="T7"><text:span text:style-name="T6">5</text:span><text:span text:style-name="T6"/></text:p>
            </table:table-cell>
            <table:table-cell table:style-name="Tabla40.B3" office:value-type="string">
              <text:p text:style-name="P31" loext:marker-style-name="T7"><text:span text:style-name="T6">….</text:span><text:span text:style-name="T6"/></text:p>
            </table:table-cell>
            <table:table-cell table:style-name="Tabla40.B3" office:value-type="string">
              <text:p text:style-name="P31" loext:marker-style-name="T7"><text:span text:style-name="T6">n</text:span><text:span text:style-name="T6"/></text:p>
            </table:table-cell>
            <table:covered-table-cell table:style-name="Tabla40.I3"/>
          </table:table-row>
          <table:table-row table:style-name="Tabla40.1">
            <table:table-cell table:style-name="Tabla40.A4" office:value-type="string">
              <text:p text:style-name="P46" loext:marker-style-name="T7"><text:span text:style-name="T11">I.</text:span><text:span text:style-name="T6">INVERSION FIJA</text:span></text:p>
            </table:table-cell>
            <table:table-cell table:style-name="Tabla40.B4" office:value-type="string">
              <text:p text:style-name="P61" loext:marker-style-name="T7"/>
            </table:table-cell>
            <table:table-cell table:style-name="Tabla40.B4" office:value-type="string">
              <text:p text:style-name="P61" loext:marker-style-name="T7"/>
            </table:table-cell>
            <table:table-cell table:style-name="Tabla40.B4" office:value-type="string">
              <text:p text:style-name="P61" loext:marker-style-name="T7"/>
            </table:table-cell>
            <table:table-cell table:style-name="Tabla40.B4" office:value-type="string">
              <text:p text:style-name="P61" loext:marker-style-name="T7"/>
            </table:table-cell>
            <table:table-cell table:style-name="Tabla40.B4" office:value-type="string">
              <text:p text:style-name="P61" loext:marker-style-name="T7"/>
            </table:table-cell>
            <table:table-cell table:style-name="Tabla40.B4" office:value-type="string">
              <text:p text:style-name="P61" loext:marker-style-name="T7"/>
            </table:table-cell>
            <table:table-cell table:style-name="Tabla40.H4" office:value-type="string">
              <text:p text:style-name="P61" loext:marker-style-name="T7"/>
            </table:table-cell>
            <table:table-cell table:style-name="Tabla40.I4" office:value-type="string">
              <text:p text:style-name="P31" loext:marker-style-name="T7"><text:span text:style-name="T11">0%</text:span><text:span text:style-name="T11"/></text:p>
            </table:table-cell>
          </table:table-row>
          <table:table-row table:style-name="Tabla40.1">
            <table:table-cell table:style-name="Tabla40.A4" office:value-type="string">
              <text:p text:style-name="P46" loext:marker-style-name="T7"><text:span text:style-name="T11"><text:s/>I.1. INVERSION FIJA TANGIBLE</text:span><text:span text:style-name="T11"/></text:p>
            </table:table-cell>
            <table:table-cell table:style-name="Tabla40.B4" office:value-type="string">
              <text:p text:style-name="P61" loext:marker-style-name="T7"/>
            </table:table-cell>
            <table:table-cell table:style-name="Tabla40.B4" office:value-type="string">
              <text:p text:style-name="P61" loext:marker-style-name="T7"/>
            </table:table-cell>
            <table:table-cell table:style-name="Tabla40.B4" office:value-type="string">
              <text:p text:style-name="P61" loext:marker-style-name="T7"/>
            </table:table-cell>
            <table:table-cell table:style-name="Tabla40.B4" office:value-type="string">
              <text:p text:style-name="P61" loext:marker-style-name="T7"/>
            </table:table-cell>
            <table:table-cell table:style-name="Tabla40.B4" office:value-type="string">
              <text:p text:style-name="P61" loext:marker-style-name="T7"/>
            </table:table-cell>
            <table:table-cell table:style-name="Tabla40.B4" office:value-type="string">
              <text:p text:style-name="P61" loext:marker-style-name="T7"/>
            </table:table-cell>
            <table:table-cell table:style-name="Tabla40.H4" office:value-type="string">
              <text:p text:style-name="P61" loext:marker-style-name="T7"/>
            </table:table-cell>
            <table:table-cell table:style-name="Tabla40.I5" office:value-type="string">
              <text:p text:style-name="P31" loext:marker-style-name="T7"><text:span text:style-name="T11">0%</text:span><text:span text:style-name="T11"/></text:p>
            </table:table-cell>
          </table:table-row>
          <table:table-row table:style-name="Tabla40.1">
            <table:table-cell table:style-name="Tabla40.A4" office:value-type="string">
              <text:p text:style-name="P46" loext:marker-style-name="T7"><text:span text:style-name="T11"><text:s/>I.1.1. TERRENOS Y OBRAS CIVILES</text:span><text:span text:style-name="T11"/></text:p>
            </table:table-cell>
            <table:table-cell table:style-name="Tabla40.B4" office:value-type="string">
              <text:p text:style-name="P57" loext:marker-style-name="T7"/>
            </table:table-cell>
            <table:table-cell table:style-name="Tabla40.B4" office:value-type="string">
              <text:p text:style-name="P57" loext:marker-style-name="T7"/>
            </table:table-cell>
            <table:table-cell table:style-name="Tabla40.B4" office:value-type="string">
              <text:p text:style-name="P57" loext:marker-style-name="T7"/>
            </table:table-cell>
            <table:table-cell table:style-name="Tabla40.B4" office:value-type="string">
              <text:p text:style-name="P57" loext:marker-style-name="T7"/>
            </table:table-cell>
            <table:table-cell table:style-name="Tabla40.B4" office:value-type="string">
              <text:p text:style-name="P57" loext:marker-style-name="T7"/>
            </table:table-cell>
            <table:table-cell table:style-name="Tabla40.B4" office:value-type="string">
              <text:p text:style-name="P57" loext:marker-style-name="T7"/>
            </table:table-cell>
            <table:table-cell table:style-name="Tabla40.H4" office:value-type="string">
              <text:p text:style-name="P61" loext:marker-style-name="T7"/>
            </table:table-cell>
            <table:table-cell table:style-name="Tabla40.I4" office:value-type="string">
              <text:p text:style-name="P31" loext:marker-style-name="T7"><text:span text:style-name="T11">0%</text:span><text:span text:style-name="T11"/></text:p>
            </table:table-cell>
          </table:table-row>
          <table:table-row table:style-name="Tabla40.1">
            <table:table-cell table:style-name="Tabla40.A4" office:value-type="string">
              <text:p text:style-name="P46" loext:marker-style-name="T7"><text:span text:style-name="T11"><text:s/>I.1.2. MAQUINARIA Y EQUIPO</text:span><text:span text:style-name="T11"/></text:p>
            </table:table-cell>
            <table:table-cell table:style-name="Tabla40.B4" office:value-type="string">
              <text:p text:style-name="P61" loext:marker-style-name="T7"/>
            </table:table-cell>
            <table:table-cell table:style-name="Tabla40.B4" office:value-type="string">
              <text:p text:style-name="P61" loext:marker-style-name="T7"/>
            </table:table-cell>
            <table:table-cell table:style-name="Tabla40.B4" office:value-type="string">
              <text:p text:style-name="P61" loext:marker-style-name="T7"/>
            </table:table-cell>
            <table:table-cell table:style-name="Tabla40.B4" office:value-type="string">
              <text:p text:style-name="P61" loext:marker-style-name="T7"/>
            </table:table-cell>
            <table:table-cell table:style-name="Tabla40.B4" office:value-type="string">
              <text:p text:style-name="P57" loext:marker-style-name="T7"/>
            </table:table-cell>
            <table:table-cell table:style-name="Tabla40.B4" office:value-type="string">
              <text:p text:style-name="P57" loext:marker-style-name="T7"/>
            </table:table-cell>
            <table:table-cell table:style-name="Tabla40.H4" office:value-type="string">
              <text:p text:style-name="P57" loext:marker-style-name="T7"/>
            </table:table-cell>
            <table:table-cell table:style-name="Tabla40.I5" office:value-type="string">
              <text:p text:style-name="P31" loext:marker-style-name="T7"><text:span text:style-name="T11">0%</text:span><text:span text:style-name="T11"/></text:p>
            </table:table-cell>
          </table:table-row>
          <table:table-row table:style-name="Tabla40.1">
            <table:table-cell table:style-name="Tabla40.A4" office:value-type="string">
              <text:p text:style-name="P46" loext:marker-style-name="T7"><text:span text:style-name="T11"><text:s/>I.1.3. VEHICULOS</text:span><text:span text:style-name="T11"/></text:p>
            </table:table-cell>
            <table:table-cell table:style-name="Tabla40.B4" office:value-type="string">
              <text:p text:style-name="P61" loext:marker-style-name="T7"/>
            </table:table-cell>
            <table:table-cell table:style-name="Tabla40.B4" office:value-type="string">
              <text:p text:style-name="P61" loext:marker-style-name="T7"/>
            </table:table-cell>
            <table:table-cell table:style-name="Tabla40.B4" office:value-type="string">
              <text:p text:style-name="P61" loext:marker-style-name="T7"/>
            </table:table-cell>
            <table:table-cell table:style-name="Tabla40.B4" office:value-type="string">
              <text:p text:style-name="P61" loext:marker-style-name="T7"/>
            </table:table-cell>
            <table:table-cell table:style-name="Tabla40.B4" office:value-type="string">
              <text:p text:style-name="P61" loext:marker-style-name="T7"/>
            </table:table-cell>
            <table:table-cell table:style-name="Tabla40.G8" office:value-type="string">
              <text:p text:style-name="P67" loext:marker-style-name="T11"/>
            </table:table-cell>
            <table:table-cell table:style-name="Tabla40.H8" office:value-type="string">
              <text:p text:style-name="P57" loext:marker-style-name="T7"/>
            </table:table-cell>
            <table:table-cell table:style-name="Tabla40.I4" office:value-type="string">
              <text:p text:style-name="P31" loext:marker-style-name="T7"><text:span text:style-name="T11">0%</text:span><text:span text:style-name="T11"/></text:p>
            </table:table-cell>
          </table:table-row>
          <table:table-row table:style-name="Tabla40.1">
            <table:table-cell table:style-name="Tabla40.A4" office:value-type="string">
              <text:p text:style-name="P46" loext:marker-style-name="T7"><text:span text:style-name="T11"><text:s/>I.1.4. MUEBLES Y ENSERES</text:span><text:span text:style-name="T11"/></text:p>
            </table:table-cell>
            <table:table-cell table:style-name="Tabla40.B4" office:value-type="string">
              <text:p text:style-name="P61" loext:marker-style-name="T7"/>
            </table:table-cell>
            <table:table-cell table:style-name="Tabla40.B4" office:value-type="string">
              <text:p text:style-name="P61" loext:marker-style-name="T7"/>
            </table:table-cell>
            <table:table-cell table:style-name="Tabla40.B4" office:value-type="string">
              <text:p text:style-name="P61" loext:marker-style-name="T7"/>
            </table:table-cell>
            <table:table-cell table:style-name="Tabla40.B4" office:value-type="string">
              <text:p text:style-name="P61" loext:marker-style-name="T7"/>
            </table:table-cell>
            <table:table-cell table:style-name="Tabla40.B4" office:value-type="string">
              <text:p text:style-name="P61" loext:marker-style-name="T7"/>
            </table:table-cell>
            <table:table-cell table:style-name="Tabla40.G9" office:value-type="string">
              <text:p text:style-name="P61" loext:marker-style-name="T7"/>
            </table:table-cell>
            <table:table-cell table:style-name="Tabla40.H4" office:value-type="string">
              <text:p text:style-name="P57" loext:marker-style-name="T7"/>
            </table:table-cell>
            <table:table-cell table:style-name="Tabla40.I5" office:value-type="string">
              <text:p text:style-name="P31" loext:marker-style-name="T7"><text:span text:style-name="T11">0%</text:span><text:span text:style-name="T11"/></text:p>
            </table:table-cell>
          </table:table-row>
          <table:table-row table:style-name="Tabla40.1">
            <table:table-cell table:style-name="Tabla40.A4" office:value-type="string">
              <text:p text:style-name="P46" loext:marker-style-name="T7"><text:span text:style-name="T11"><text:s/>I.2. INVERSION FIJA INTANGIBLE</text:span><text:span text:style-name="T11"/></text:p>
            </table:table-cell>
            <table:table-cell table:style-name="Tabla40.B4" office:value-type="string">
              <text:p text:style-name="P57" loext:marker-style-name="T7"/>
            </table:table-cell>
            <table:table-cell table:style-name="Tabla40.B4" office:value-type="string">
              <text:p text:style-name="P57" loext:marker-style-name="T7"/>
            </table:table-cell>
            <table:table-cell table:style-name="Tabla40.B4" office:value-type="string">
              <text:p text:style-name="P57" loext:marker-style-name="T7"/>
            </table:table-cell>
            <table:table-cell table:style-name="Tabla40.B4" office:value-type="string">
              <text:p text:style-name="P61" loext:marker-style-name="T7"/>
            </table:table-cell>
            <table:table-cell table:style-name="Tabla40.B4" office:value-type="string">
              <text:p text:style-name="P61" loext:marker-style-name="T7"/>
            </table:table-cell>
            <table:table-cell table:style-name="Tabla40.B4" office:value-type="string">
              <text:p text:style-name="P61" loext:marker-style-name="T7"/>
            </table:table-cell>
            <table:table-cell table:style-name="Tabla40.H4" office:value-type="string">
              <text:p text:style-name="P61" loext:marker-style-name="T7"/>
            </table:table-cell>
            <table:table-cell table:style-name="Tabla40.I4" office:value-type="string">
              <text:p text:style-name="P31" loext:marker-style-name="T7"><text:span text:style-name="T11">0%</text:span><text:span text:style-name="T11"/></text:p>
            </table:table-cell>
          </table:table-row>
          <table:table-row table:style-name="Tabla40.1">
            <table:table-cell table:style-name="Tabla40.A4" office:value-type="string">
              <text:p text:style-name="P46" loext:marker-style-name="T7"><text:span text:style-name="T6">II. CAPITAL DE TRABAJO</text:span><text:span text:style-name="T6"/></text:p>
            </table:table-cell>
            <table:table-cell table:style-name="Tabla40.B4" office:value-type="string">
              <text:p text:style-name="P61" loext:marker-style-name="T7"/>
            </table:table-cell>
            <table:table-cell table:style-name="Tabla40.B4" office:value-type="string">
              <text:p text:style-name="P61" loext:marker-style-name="T7"/>
            </table:table-cell>
            <table:table-cell table:style-name="Tabla40.B4" office:value-type="string">
              <text:p text:style-name="P61" loext:marker-style-name="T7"/>
            </table:table-cell>
            <table:table-cell table:style-name="Tabla40.B4" office:value-type="string">
              <text:p text:style-name="P61" loext:marker-style-name="T7"/>
            </table:table-cell>
            <table:table-cell table:style-name="Tabla40.H4" office:value-type="string">
              <text:p text:style-name="P61" loext:marker-style-name="T7"/>
            </table:table-cell>
            <table:table-cell table:style-name="Tabla40.H8" office:value-type="string">
              <text:p text:style-name="P61" loext:marker-style-name="T7"/>
            </table:table-cell>
            <table:table-cell table:style-name="Tabla40.H8" office:value-type="string">
              <text:p text:style-name="P61" loext:marker-style-name="T7"/>
            </table:table-cell>
            <table:table-cell table:style-name="Tabla40.I5" office:value-type="string">
              <text:p text:style-name="P31" loext:marker-style-name="T7"><text:span text:style-name="T11">0%</text:span><text:span text:style-name="T11"/></text:p>
            </table:table-cell>
          </table:table-row>
          <table:table-row table:style-name="Tabla40.1">
            <table:table-cell table:style-name="Tabla40.A4" office:value-type="string">
              <text:p text:style-name="P46" loext:marker-style-name="T7"><text:span text:style-name="T6">III. GASTOS GENERALES ( max. 10 % IF )</text:span><text:span text:style-name="T6"/></text:p>
            </table:table-cell>
            <table:table-cell table:style-name="Tabla40.B4" office:value-type="string">
              <text:p text:style-name="P57" loext:marker-style-name="T7"/>
            </table:table-cell>
            <table:table-cell table:style-name="Tabla40.B4" office:value-type="string">
              <text:p text:style-name="P57" loext:marker-style-name="T7"/>
            </table:table-cell>
            <table:table-cell table:style-name="Tabla40.B4" office:value-type="string">
              <text:p text:style-name="P57" loext:marker-style-name="T7"/>
            </table:table-cell>
            <table:table-cell table:style-name="Tabla40.B4" office:value-type="string">
              <text:p text:style-name="P57" loext:marker-style-name="T7"/>
            </table:table-cell>
            <table:table-cell table:style-name="Tabla40.B4" office:value-type="string">
              <text:p text:style-name="P57" loext:marker-style-name="T7"/>
            </table:table-cell>
            <table:table-cell table:style-name="Tabla40.B4" office:value-type="string">
              <text:p text:style-name="P57" loext:marker-style-name="T7"/>
            </table:table-cell>
            <table:table-cell table:style-name="Tabla40.H4" office:value-type="string">
              <text:p text:style-name="P57" loext:marker-style-name="T7"/>
            </table:table-cell>
            <table:table-cell table:style-name="Tabla40.I4" office:value-type="string">
              <text:p text:style-name="P31" loext:marker-style-name="T7"><text:span text:style-name="T11">0%</text:span><text:span text:style-name="T11"/></text:p>
            </table:table-cell>
          </table:table-row>
          <table:table-row table:style-name="Tabla40.1">
            <table:table-cell table:style-name="Tabla40.A4" office:value-type="string">
              <text:p text:style-name="P46" loext:marker-style-name="T7"><text:span text:style-name="T6">IV. GASTOS DE SUPERVISION ( max. 5% IF)</text:span><text:span text:style-name="T6"/></text:p>
            </table:table-cell>
            <table:table-cell table:style-name="Tabla40.B4" office:value-type="string">
              <text:p text:style-name="P57" loext:marker-style-name="T7"/>
            </table:table-cell>
            <table:table-cell table:style-name="Tabla40.B4" office:value-type="string">
              <text:p text:style-name="P57" loext:marker-style-name="T7"/>
            </table:table-cell>
            <table:table-cell table:style-name="Tabla40.B4" office:value-type="string">
              <text:p text:style-name="P57" loext:marker-style-name="T7"/>
            </table:table-cell>
            <table:table-cell table:style-name="Tabla40.B4" office:value-type="string">
              <text:p text:style-name="P57" loext:marker-style-name="T7"/>
            </table:table-cell>
            <table:table-cell table:style-name="Tabla40.B4" office:value-type="string">
              <text:p text:style-name="P57" loext:marker-style-name="T7"/>
            </table:table-cell>
            <table:table-cell table:style-name="Tabla40.B4" office:value-type="string">
              <text:p text:style-name="P57" loext:marker-style-name="T7"/>
            </table:table-cell>
            <table:table-cell table:style-name="Tabla40.H4" office:value-type="string">
              <text:p text:style-name="P57" loext:marker-style-name="T7"/>
            </table:table-cell>
            <table:table-cell table:style-name="Tabla40.I5" office:value-type="string">
              <text:p text:style-name="P31" loext:marker-style-name="T7"><text:span text:style-name="T11">0%</text:span><text:span text:style-name="T11"/></text:p>
            </table:table-cell>
          </table:table-row>
          <table:table-row table:style-name="Tabla40.1">
            <table:table-cell table:style-name="Tabla40.A4" office:value-type="string">
              <text:p text:style-name="P46" loext:marker-style-name="T7"><text:span text:style-name="T6">TOTAL INVERSIÒN</text:span><text:span text:style-name="T6"/></text:p>
            </table:table-cell>
            <table:table-cell table:style-name="Tabla40.B4" office:value-type="string">
              <text:p text:style-name="P57" loext:marker-style-name="T7"/>
            </table:table-cell>
            <table:table-cell table:style-name="Tabla40.B4" office:value-type="string">
              <text:p text:style-name="P57" loext:marker-style-name="T7"/>
            </table:table-cell>
            <table:table-cell table:style-name="Tabla40.B4" office:value-type="string">
              <text:p text:style-name="P57" loext:marker-style-name="T7"/>
            </table:table-cell>
            <table:table-cell table:style-name="Tabla40.B4" office:value-type="string">
              <text:p text:style-name="P57" loext:marker-style-name="T7"/>
            </table:table-cell>
            <table:table-cell table:style-name="Tabla40.B4" office:value-type="string">
              <text:p text:style-name="P57" loext:marker-style-name="T7"/>
            </table:table-cell>
            <table:table-cell table:style-name="Tabla40.B4" office:value-type="string">
              <text:p text:style-name="P57" loext:marker-style-name="T7"/>
            </table:table-cell>
            <table:table-cell table:style-name="Tabla40.H4" office:value-type="string">
              <text:p text:style-name="P57" loext:marker-style-name="T7"/>
            </table:table-cell>
            <table:table-cell table:style-name="Tabla40.A4" office:value-type="string">
              <text:p text:style-name="P31" loext:marker-style-name="T7"><text:span text:style-name="T11">0%</text:span><text:span text:style-name="T11"/></text:p>
            </table:table-cell>
          </table:table-row>
        </table:table>
        <text:p text:style-name="P46" loext:marker-style-name="T7"><text:span text:style-name="T9">Nota: Se recomienda consignar los componentes para cada partida</text:span><text:span text:style-name="T9"/></text:p>
        <text:list text:continue-numbering="true" text:style-name="WWNum5">
          <text:list-item>
            <text:list>
              <text:list-item>
                <text:p text:style-name="P23" loext:marker-style-name="T7"><text:span text:style-name="T1">CRONOGRAMA DE EJECUCIÓN FINANCIERO</text:span><text:span text:style-name="T1"/></text:p>
              </text:list-item>
            </text:list>
          </text:list-item>
        </text:list>
        <table:table table:name="Tabla41" table:style-name="Tabla41">
          <table:table-column table:style-name="Tabla41.A"/>
          <table:table-column table:style-name="Tabla41.B"/>
          <table:table-column table:style-name="Tabla41.C"/>
          <table:table-column table:style-name="Tabla41.D"/>
          <table:table-column table:style-name="Tabla41.C"/>
          <table:table-column table:style-name="Tabla41.D"/>
          <table:table-column table:style-name="Tabla41.G"/>
          <table:table-column table:style-name="Tabla41.H"/>
          <table:table-column table:style-name="Tabla41.I"/>
          <table:table-column table:style-name="Tabla41.J"/>
          <table:table-row table:style-name="Tabla41.1">
            <table:table-cell table:style-name="Tabla41.A1" table:number-rows-spanned="3" office:value-type="string">
              <text:p text:style-name="P31" loext:marker-style-name="T7"><text:span text:style-name="T6">CONCEPTO</text:span><text:span text:style-name="T6"/></text:p>
            </table:table-cell>
            <table:table-cell table:style-name="Tabla41.B1" table:number-columns-spanned="7" office:value-type="string">
              <text:p text:style-name="P31" loext:marker-style-name="T7"><text:span text:style-name="T6">EJECUCION</text:span><text:span text:style-name="T6"/></text:p>
            </table:table-cell>
            <table:covered-table-cell/>
            <table:covered-table-cell/>
            <table:covered-table-cell/>
            <table:covered-table-cell/>
            <table:covered-table-cell/>
            <table:covered-table-cell/>
            <table:table-cell table:style-name="Tabla41.A1" table:number-rows-spanned="2" table:number-columns-spanned="2" office:value-type="string">
              <text:p text:style-name="P31" loext:marker-style-name="T7"><text:span text:style-name="T6"><text:s/>TOTAL</text:span><text:span text:style-name="T6"/></text:p>
            </table:table-cell>
            <table:covered-table-cell/>
          </table:table-row>
          <table:table-row table:style-name="Tabla41.1">
            <table:covered-table-cell table:style-name="Tabla41.A2"/>
            <table:table-cell table:style-name="Tabla41.B2" table:number-columns-spanned="7" office:value-type="string">
              <text:p text:style-name="P31" loext:marker-style-name="T7"><text:span text:style-name="T6">MESES</text:span><text:span text:style-name="T6"/></text:p>
            </table:table-cell>
            <table:covered-table-cell/>
            <table:covered-table-cell/>
            <table:covered-table-cell/>
            <table:covered-table-cell/>
            <table:covered-table-cell/>
            <table:covered-table-cell/>
            <table:covered-table-cell table:style-name="Tabla41.I2"/>
            <table:covered-table-cell/>
          </table:table-row>
          <table:table-row table:style-name="Tabla41.3">
            <table:covered-table-cell table:style-name="Tabla41.A3"/>
            <table:table-cell table:style-name="Tabla41.B3" office:value-type="string">
              <text:p text:style-name="P31" loext:marker-style-name="T7"><text:span text:style-name="T6">1</text:span><text:span text:style-name="T6"/></text:p>
            </table:table-cell>
            <table:table-cell table:style-name="Tabla41.C3" office:value-type="string">
              <text:p text:style-name="P31" loext:marker-style-name="T7"><text:span text:style-name="T6">2</text:span><text:span text:style-name="T6"/></text:p>
            </table:table-cell>
            <table:table-cell table:style-name="Tabla41.B3" office:value-type="string">
              <text:p text:style-name="P31" loext:marker-style-name="T7"><text:span text:style-name="T6">3</text:span><text:span text:style-name="T6"/></text:p>
            </table:table-cell>
            <table:table-cell table:style-name="Tabla41.C3" office:value-type="string">
              <text:p text:style-name="P31" loext:marker-style-name="T7"><text:span text:style-name="T6">4</text:span><text:span text:style-name="T6"/></text:p>
            </table:table-cell>
            <table:table-cell table:style-name="Tabla41.B3" office:value-type="string">
              <text:p text:style-name="P31" loext:marker-style-name="T7"><text:span text:style-name="T6">5</text:span><text:span text:style-name="T6"/></text:p>
            </table:table-cell>
            <table:table-cell table:style-name="Tabla41.C3" office:value-type="string">
              <text:p text:style-name="P31" loext:marker-style-name="T7"><text:span text:style-name="T6">………</text:span><text:span text:style-name="T6"/></text:p>
            </table:table-cell>
            <table:table-cell table:style-name="Tabla41.B3" office:value-type="string">
              <text:p text:style-name="P31" loext:marker-style-name="T7"><text:span text:style-name="T6">n</text:span><text:span text:style-name="T6"/></text:p>
            </table:table-cell>
            <table:table-cell table:style-name="Tabla41.I3" office:value-type="string">
              <text:p text:style-name="P52" loext:marker-style-name="T6"/>
            </table:table-cell>
            <table:table-cell table:style-name="Tabla41.J3" office:value-type="string">
              <text:p text:style-name="P58" loext:marker-style-name="T7"/>
            </table:table-cell>
          </table:table-row>
          <table:table-row table:style-name="Tabla41.1">
            <table:table-cell table:style-name="Tabla41.A4" office:value-type="string">
              <text:p text:style-name="P46" loext:marker-style-name="T7"><text:span text:style-name="T5">I.INVERSION FIJA</text:span><text:span text:style-name="T5"/></text:p>
            </table:table-cell>
            <table:table-cell table:style-name="Tabla41.B4" office:value-type="string">
              <text:p text:style-name="P61" loext:marker-style-name="T7"/>
            </table:table-cell>
            <table:table-cell table:style-name="Tabla41.B4" office:value-type="string">
              <text:p text:style-name="P61" loext:marker-style-name="T7"/>
            </table:table-cell>
            <table:table-cell table:style-name="Tabla41.B4" office:value-type="string">
              <text:p text:style-name="P61" loext:marker-style-name="T7"/>
            </table:table-cell>
            <table:table-cell table:style-name="Tabla41.B4" office:value-type="string">
              <text:p text:style-name="P61" loext:marker-style-name="T7"/>
            </table:table-cell>
            <table:table-cell table:style-name="Tabla41.B4" office:value-type="string">
              <text:p text:style-name="P61" loext:marker-style-name="T7"/>
            </table:table-cell>
            <table:table-cell table:style-name="Tabla41.G4" office:value-type="string">
              <text:p text:style-name="P61" loext:marker-style-name="T7"/>
            </table:table-cell>
            <table:table-cell table:style-name="Tabla41.A4" office:value-type="string">
              <text:p text:style-name="P61" loext:marker-style-name="T7"/>
            </table:table-cell>
            <table:table-cell table:style-name="Tabla41.B4" office:value-type="string">
              <text:p text:style-name="P36" loext:marker-style-name="T7"><text:span text:style-name="T11">S/.0.00</text:span><text:span text:style-name="T11"/></text:p>
            </table:table-cell>
            <table:table-cell table:style-name="Tabla41.J4" office:value-type="string">
              <text:p text:style-name="P58" loext:marker-style-name="T7"/>
            </table:table-cell>
          </table:table-row>
          <table:table-row table:style-name="Tabla41.1">
            <table:table-cell table:style-name="Tabla41.A4" office:value-type="string">
              <text:p text:style-name="P46" loext:marker-style-name="T7"><text:span text:style-name="T11">I.1. INVERSION FIJA TANGIBLE</text:span><text:span text:style-name="T11"/></text:p>
            </table:table-cell>
            <table:table-cell table:style-name="Tabla41.B4" office:value-type="string">
              <text:p text:style-name="P61" loext:marker-style-name="T7"/>
            </table:table-cell>
            <table:table-cell table:style-name="Tabla41.B4" office:value-type="string">
              <text:p text:style-name="P61" loext:marker-style-name="T7"/>
            </table:table-cell>
            <table:table-cell table:style-name="Tabla41.B4" office:value-type="string">
              <text:p text:style-name="P61" loext:marker-style-name="T7"/>
            </table:table-cell>
            <table:table-cell table:style-name="Tabla41.B4" office:value-type="string">
              <text:p text:style-name="P61" loext:marker-style-name="T7"/>
            </table:table-cell>
            <table:table-cell table:style-name="Tabla41.B4" office:value-type="string">
              <text:p text:style-name="P61" loext:marker-style-name="T7"/>
            </table:table-cell>
            <table:table-cell table:style-name="Tabla41.G4" office:value-type="string">
              <text:p text:style-name="P61" loext:marker-style-name="T7"/>
            </table:table-cell>
            <table:table-cell table:style-name="Tabla41.A4" office:value-type="string">
              <text:p text:style-name="P61" loext:marker-style-name="T7"/>
            </table:table-cell>
            <table:table-cell table:style-name="Tabla41.B4" office:value-type="string">
              <text:p text:style-name="P36" loext:marker-style-name="T7"><text:span text:style-name="T11">S/.0.00</text:span><text:span text:style-name="T11"/></text:p>
            </table:table-cell>
            <table:table-cell table:style-name="Tabla41.J5" office:value-type="string">
              <text:p text:style-name="P58" loext:marker-style-name="T7"/>
            </table:table-cell>
          </table:table-row>
          <table:table-row table:style-name="Tabla41.1">
            <table:table-cell table:style-name="Tabla41.A4" office:value-type="string">
              <text:p text:style-name="P46" loext:marker-style-name="T7"><text:span text:style-name="T11">I.1.1. TERRENOS Y OBRAS CIVILES</text:span><text:span text:style-name="T11"/></text:p>
            </table:table-cell>
            <table:table-cell table:style-name="Tabla41.B4" office:value-type="string">
              <text:p text:style-name="P68" loext:marker-style-name="T11"/>
            </table:table-cell>
            <table:table-cell table:style-name="Tabla41.B4" office:value-type="string">
              <text:p text:style-name="P68" loext:marker-style-name="T11"/>
            </table:table-cell>
            <table:table-cell table:style-name="Tabla41.B4" office:value-type="string">
              <text:p text:style-name="P68" loext:marker-style-name="T11"/>
            </table:table-cell>
            <table:table-cell table:style-name="Tabla41.B4" office:value-type="string">
              <text:p text:style-name="P68" loext:marker-style-name="T11"/>
            </table:table-cell>
            <table:table-cell table:style-name="Tabla41.B4" office:value-type="string">
              <text:p text:style-name="P68" loext:marker-style-name="T11"/>
            </table:table-cell>
            <table:table-cell table:style-name="Tabla41.G4" office:value-type="string">
              <text:p text:style-name="P68" loext:marker-style-name="T11"/>
            </table:table-cell>
            <table:table-cell table:style-name="Tabla41.A4" office:value-type="string">
              <text:p text:style-name="P68" loext:marker-style-name="T11"/>
            </table:table-cell>
            <table:table-cell table:style-name="Tabla41.B4" office:value-type="string">
              <text:p text:style-name="P36" loext:marker-style-name="T7"><text:span text:style-name="T11">S/.0.00</text:span><text:span text:style-name="T11"/></text:p>
            </table:table-cell>
            <table:table-cell table:style-name="Tabla41.J6" office:value-type="string">
              <text:p text:style-name="P58" loext:marker-style-name="T7"/>
            </table:table-cell>
          </table:table-row>
          <table:table-row table:style-name="Tabla41.1">
            <table:table-cell table:style-name="Tabla41.A4" office:value-type="string">
              <text:p text:style-name="P46" loext:marker-style-name="T7"><text:span text:style-name="T11">I.1.2. MAQUINARIA Y EQUIPO</text:span><text:span text:style-name="T11"/></text:p>
            </table:table-cell>
            <table:table-cell table:style-name="Tabla41.B4" office:value-type="string">
              <text:p text:style-name="P68" loext:marker-style-name="T11"/>
            </table:table-cell>
            <table:table-cell table:style-name="Tabla41.B4" office:value-type="string">
              <text:p text:style-name="P68" loext:marker-style-name="T11"/>
            </table:table-cell>
            <table:table-cell table:style-name="Tabla41.B4" office:value-type="string">
              <text:p text:style-name="P68" loext:marker-style-name="T11"/>
            </table:table-cell>
            <table:table-cell table:style-name="Tabla41.B4" office:value-type="string">
              <text:p text:style-name="P68" loext:marker-style-name="T11"/>
            </table:table-cell>
            <table:table-cell table:style-name="Tabla41.B4" office:value-type="string">
              <text:p text:style-name="P68" loext:marker-style-name="T11"/>
            </table:table-cell>
            <table:table-cell table:style-name="Tabla41.G4" office:value-type="string">
              <text:p text:style-name="P68" loext:marker-style-name="T11"/>
            </table:table-cell>
            <table:table-cell table:style-name="Tabla41.A4" office:value-type="string">
              <text:p text:style-name="P68" loext:marker-style-name="T11"/>
            </table:table-cell>
            <table:table-cell table:style-name="Tabla41.B4" office:value-type="string">
              <text:p text:style-name="P36" loext:marker-style-name="T7"><text:span text:style-name="T11">S/.0.00</text:span><text:span text:style-name="T11"/></text:p>
            </table:table-cell>
            <table:table-cell table:style-name="Tabla41.J7" office:value-type="string">
              <text:p text:style-name="P58" loext:marker-style-name="T7"/>
            </table:table-cell>
          </table:table-row>
          <table:table-row table:style-name="Tabla41.1">
            <table:table-cell table:style-name="Tabla41.A4" office:value-type="string">
              <text:p text:style-name="P46" loext:marker-style-name="T7"><text:span text:style-name="T11">I.1.3. VEHICULOS</text:span><text:span text:style-name="T11"/></text:p>
            </table:table-cell>
            <table:table-cell table:style-name="Tabla41.B4" office:value-type="string">
              <text:p text:style-name="P68" loext:marker-style-name="T11"/>
            </table:table-cell>
            <table:table-cell table:style-name="Tabla41.B4" office:value-type="string">
              <text:p text:style-name="P68" loext:marker-style-name="T11"/>
            </table:table-cell>
            <table:table-cell table:style-name="Tabla41.B4" office:value-type="string">
              <text:p text:style-name="P68" loext:marker-style-name="T11"/>
            </table:table-cell>
            <table:table-cell table:style-name="Tabla41.B4" office:value-type="string">
              <text:p text:style-name="P68" loext:marker-style-name="T11"/>
            </table:table-cell>
            <table:table-cell table:style-name="Tabla41.B4" office:value-type="string">
              <text:p text:style-name="P68" loext:marker-style-name="T11"/>
            </table:table-cell>
            <table:table-cell table:style-name="Tabla41.G4" office:value-type="string">
              <text:p text:style-name="P68" loext:marker-style-name="T11"/>
            </table:table-cell>
            <table:table-cell table:style-name="Tabla41.A4" office:value-type="string">
              <text:p text:style-name="P68" loext:marker-style-name="T11"/>
            </table:table-cell>
            <table:table-cell table:style-name="Tabla41.B4" office:value-type="string">
              <text:p text:style-name="P36" loext:marker-style-name="T7"><text:span text:style-name="T11">S/.0.00</text:span><text:span text:style-name="T11"/></text:p>
            </table:table-cell>
            <table:table-cell table:style-name="Tabla41.J8" office:value-type="string">
              <text:p text:style-name="P58" loext:marker-style-name="T7"/>
            </table:table-cell>
          </table:table-row>
          <table:table-row table:style-name="Tabla41.1">
            <table:table-cell table:style-name="Tabla41.A4" office:value-type="string">
              <text:p text:style-name="P46" loext:marker-style-name="T7"><text:span text:style-name="T11">I.1.4. MUEBLES Y ENSERES</text:span><text:span text:style-name="T11"/></text:p>
            </table:table-cell>
            <table:table-cell table:style-name="Tabla41.B4" office:value-type="string">
              <text:p text:style-name="P68" loext:marker-style-name="T11"/>
            </table:table-cell>
            <table:table-cell table:style-name="Tabla41.B4" office:value-type="string">
              <text:p text:style-name="P68" loext:marker-style-name="T11"/>
            </table:table-cell>
            <table:table-cell table:style-name="Tabla41.B4" office:value-type="string">
              <text:p text:style-name="P68" loext:marker-style-name="T11"/>
            </table:table-cell>
            <table:table-cell table:style-name="Tabla41.B4" office:value-type="string">
              <text:p text:style-name="P68" loext:marker-style-name="T11"/>
            </table:table-cell>
            <table:table-cell table:style-name="Tabla41.B4" office:value-type="string">
              <text:p text:style-name="P68" loext:marker-style-name="T11"/>
            </table:table-cell>
            <table:table-cell table:style-name="Tabla41.G4" office:value-type="string">
              <text:p text:style-name="P68" loext:marker-style-name="T11"/>
            </table:table-cell>
            <table:table-cell table:style-name="Tabla41.A4" office:value-type="string">
              <text:p text:style-name="P68" loext:marker-style-name="T11"/>
            </table:table-cell>
            <table:table-cell table:style-name="Tabla41.B4" office:value-type="string">
              <text:p text:style-name="P36" loext:marker-style-name="T7"><text:span text:style-name="T11">S/.0.00</text:span><text:span text:style-name="T11"/></text:p>
            </table:table-cell>
            <table:table-cell table:style-name="Tabla41.J9" office:value-type="string">
              <text:p text:style-name="P58" loext:marker-style-name="T7"/>
            </table:table-cell>
          </table:table-row>
          <table:table-row table:style-name="Tabla41.1">
            <table:table-cell table:style-name="Tabla41.A4" office:value-type="string">
              <text:p text:style-name="P46" loext:marker-style-name="T7"><text:span text:style-name="T11">I.2. INVERSION FIJA INTANGIBLE</text:span><text:span text:style-name="T11"/></text:p>
            </table:table-cell>
            <table:table-cell table:style-name="Tabla41.B4" office:value-type="string">
              <text:p text:style-name="P68" loext:marker-style-name="T11"/>
            </table:table-cell>
            <table:table-cell table:style-name="Tabla41.B4" office:value-type="string">
              <text:p text:style-name="P68" loext:marker-style-name="T11"/>
            </table:table-cell>
            <table:table-cell table:style-name="Tabla41.B4" office:value-type="string">
              <text:p text:style-name="P68" loext:marker-style-name="T11"/>
            </table:table-cell>
            <table:table-cell table:style-name="Tabla41.B4" office:value-type="string">
              <text:p text:style-name="P68" loext:marker-style-name="T11"/>
            </table:table-cell>
            <table:table-cell table:style-name="Tabla41.B4" office:value-type="string">
              <text:p text:style-name="P68" loext:marker-style-name="T11"/>
            </table:table-cell>
            <table:table-cell table:style-name="Tabla41.G4" office:value-type="string">
              <text:p text:style-name="P68" loext:marker-style-name="T11"/>
            </table:table-cell>
            <table:table-cell table:style-name="Tabla41.A4" office:value-type="string">
              <text:p text:style-name="P68" loext:marker-style-name="T11"/>
            </table:table-cell>
            <table:table-cell table:style-name="Tabla41.B4" office:value-type="string">
              <text:p text:style-name="P36" loext:marker-style-name="T7"><text:span text:style-name="T11">S/.0.00</text:span><text:span text:style-name="T11"/></text:p>
            </table:table-cell>
            <table:table-cell table:style-name="Tabla41.J10" office:value-type="string">
              <text:p text:style-name="P58" loext:marker-style-name="T7"/>
            </table:table-cell>
          </table:table-row>
          <table:table-row table:style-name="Tabla41.1">
            <table:table-cell table:style-name="Tabla41.A4" office:value-type="string">
              <text:p text:style-name="P46" loext:marker-style-name="T7"><text:span text:style-name="T6">II. CAPITAL DE TRABAJO</text:span><text:span text:style-name="T6"/></text:p>
            </table:table-cell>
            <table:table-cell table:style-name="Tabla41.B4" office:value-type="string">
              <text:p text:style-name="P68" loext:marker-style-name="T11"/>
            </table:table-cell>
            <table:table-cell table:style-name="Tabla41.B4" office:value-type="string">
              <text:p text:style-name="P68" loext:marker-style-name="T11"/>
            </table:table-cell>
            <table:table-cell table:style-name="Tabla41.B4" office:value-type="string">
              <text:p text:style-name="P68" loext:marker-style-name="T11"/>
            </table:table-cell>
            <table:table-cell table:style-name="Tabla41.B4" office:value-type="string">
              <text:p text:style-name="P68" loext:marker-style-name="T11"/>
            </table:table-cell>
            <table:table-cell table:style-name="Tabla41.B4" office:value-type="string">
              <text:p text:style-name="P68" loext:marker-style-name="T11"/>
            </table:table-cell>
            <table:table-cell table:style-name="Tabla41.G4" office:value-type="string">
              <text:p text:style-name="P68" loext:marker-style-name="T11"/>
            </table:table-cell>
            <table:table-cell table:style-name="Tabla41.A4" office:value-type="string">
              <text:p text:style-name="P68" loext:marker-style-name="T11"/>
            </table:table-cell>
            <table:table-cell table:style-name="Tabla41.B4" office:value-type="string">
              <text:p text:style-name="P36" loext:marker-style-name="T7"><text:span text:style-name="T11">S/.0.00</text:span><text:span text:style-name="T11"/></text:p>
            </table:table-cell>
            <table:table-cell table:style-name="Tabla41.J11" office:value-type="string">
              <text:p text:style-name="P58" loext:marker-style-name="T7"/>
            </table:table-cell>
          </table:table-row>
          <table:table-row table:style-name="Tabla41.1">
            <table:table-cell table:style-name="Tabla41.A4" office:value-type="string">
              <text:p text:style-name="P46" loext:marker-style-name="T7"><text:span text:style-name="T6">III. GASTOS GENERALES (max. 10% IF)</text:span><text:span text:style-name="T6"/></text:p>
            </table:table-cell>
            <table:table-cell table:style-name="Tabla41.B4" office:value-type="string">
              <text:p text:style-name="P68" loext:marker-style-name="T11"/>
            </table:table-cell>
            <table:table-cell table:style-name="Tabla41.B4" office:value-type="string">
              <text:p text:style-name="P68" loext:marker-style-name="T11"/>
            </table:table-cell>
            <table:table-cell table:style-name="Tabla41.B4" office:value-type="string">
              <text:p text:style-name="P68" loext:marker-style-name="T11"/>
            </table:table-cell>
            <table:table-cell table:style-name="Tabla41.B4" office:value-type="string">
              <text:p text:style-name="P68" loext:marker-style-name="T11"/>
            </table:table-cell>
            <table:table-cell table:style-name="Tabla41.B4" office:value-type="string">
              <text:p text:style-name="P68" loext:marker-style-name="T11"/>
            </table:table-cell>
            <table:table-cell table:style-name="Tabla41.G4" office:value-type="string">
              <text:p text:style-name="P68" loext:marker-style-name="T11"/>
            </table:table-cell>
            <table:table-cell table:style-name="Tabla41.A4" office:value-type="string">
              <text:p text:style-name="P68" loext:marker-style-name="T11"/>
            </table:table-cell>
            <table:table-cell table:style-name="Tabla41.B4" office:value-type="string">
              <text:p text:style-name="P36" loext:marker-style-name="T7"><text:span text:style-name="T11">S/.0.00</text:span><text:span text:style-name="T11"/></text:p>
            </table:table-cell>
            <table:table-cell table:style-name="Tabla41.J12" office:value-type="string">
              <text:p text:style-name="P58" loext:marker-style-name="T7"/>
            </table:table-cell>
          </table:table-row>
          <table:table-row table:style-name="Tabla41.1">
            <table:table-cell table:style-name="Tabla41.A4" office:value-type="string">
              <text:p text:style-name="P46" loext:marker-style-name="T7"><text:span text:style-name="T6">IV. GASTOS DE SUPERVISION (max. 5% IF)</text:span><text:span text:style-name="T6"/></text:p>
            </table:table-cell>
            <table:table-cell table:style-name="Tabla41.B4" office:value-type="string">
              <text:p text:style-name="P68" loext:marker-style-name="T11"/>
            </table:table-cell>
            <table:table-cell table:style-name="Tabla41.B4" office:value-type="string">
              <text:p text:style-name="P68" loext:marker-style-name="T11"/>
            </table:table-cell>
            <table:table-cell table:style-name="Tabla41.B4" office:value-type="string">
              <text:p text:style-name="P68" loext:marker-style-name="T11"/>
            </table:table-cell>
            <table:table-cell table:style-name="Tabla41.B4" office:value-type="string">
              <text:p text:style-name="P68" loext:marker-style-name="T11"/>
            </table:table-cell>
            <table:table-cell table:style-name="Tabla41.B4" office:value-type="string">
              <text:p text:style-name="P68" loext:marker-style-name="T11"/>
            </table:table-cell>
            <table:table-cell table:style-name="Tabla41.G4" office:value-type="string">
              <text:p text:style-name="P68" loext:marker-style-name="T11"/>
            </table:table-cell>
            <table:table-cell table:style-name="Tabla41.A4" office:value-type="string">
              <text:p text:style-name="P68" loext:marker-style-name="T11"/>
            </table:table-cell>
            <table:table-cell table:style-name="Tabla41.B4" office:value-type="string">
              <text:p text:style-name="P36" loext:marker-style-name="T7"><text:span text:style-name="T11">S/.0.00</text:span><text:span text:style-name="T11"/></text:p>
            </table:table-cell>
            <table:table-cell table:style-name="Tabla41.J13" office:value-type="string">
              <text:p text:style-name="P58" loext:marker-style-name="T7"/>
            </table:table-cell>
          </table:table-row>
          <table:table-row table:style-name="Tabla41.1">
            <table:table-cell table:style-name="Tabla41.A4" office:value-type="string">
              <text:p text:style-name="P46" loext:marker-style-name="T7"><text:span text:style-name="T6">TOTAL INVERSIÒN</text:span><text:span text:style-name="T6"/></text:p>
            </table:table-cell>
            <table:table-cell table:style-name="Tabla41.B4" office:value-type="string">
              <text:p text:style-name="P53" loext:marker-style-name="T6"/>
            </table:table-cell>
            <table:table-cell table:style-name="Tabla41.B4" office:value-type="string">
              <text:p text:style-name="P53" loext:marker-style-name="T6"/>
            </table:table-cell>
            <table:table-cell table:style-name="Tabla41.B4" office:value-type="string">
              <text:p text:style-name="P53" loext:marker-style-name="T6"/>
            </table:table-cell>
            <table:table-cell table:style-name="Tabla41.B4" office:value-type="string">
              <text:p text:style-name="P53" loext:marker-style-name="T6"/>
            </table:table-cell>
            <table:table-cell table:style-name="Tabla41.B4" office:value-type="string">
              <text:p text:style-name="P53" loext:marker-style-name="T6"/>
            </table:table-cell>
            <table:table-cell table:style-name="Tabla41.B4" office:value-type="string">
              <text:p text:style-name="P53" loext:marker-style-name="T6"/>
            </table:table-cell>
            <table:table-cell table:style-name="Tabla41.B4" office:value-type="string">
              <text:p text:style-name="P53" loext:marker-style-name="T6"/>
            </table:table-cell>
            <table:table-cell table:style-name="Tabla41.B4" office:value-type="string">
              <text:p text:style-name="P36" loext:marker-style-name="T7"><text:span text:style-name="T6">S/.0.00</text:span><text:span text:style-name="T6"/></text:p>
            </table:table-cell>
            <table:table-cell table:style-name="Tabla41.J14" office:value-type="string">
              <text:p text:style-name="P58" loext:marker-style-name="T7"/>
            </table:table-cell>
          </table:table-row>
        </table:table>
        <text:list text:continue-numbering="true" text:style-name="WWNum5">
          <text:list-item>
            <text:list>
              <text:list-item>
                <text:p text:style-name="P15" loext:marker-style-name="T7"><text:span text:style-name="T1">ANALISIS DE SOSTENIBILIDAD: Especificar las medidas que se están adoptando para garantizar que la propuesta productiva generará los resultados previstos a lo largo de su vida útil.</text:span><text:span text:style-name="T1"/></text:p>
              </text:list-item>
            </text:list>
          </text:list-item>
        </text:list>
        <table:table table:name="Tabla42" table:style-name="Tabla42">
          <table:table-column table:style-name="Tabla42.A"/>
          <table:table-row table:style-name="Tabla42.1">
            <table:table-cell table:style-name="Tabla42.A1" office:value-type="string">
              <text:p text:style-name="P62" loext:marker-style-name="T9"/>
            </table:table-cell>
          </table:table-row>
        </table:table>
        <text:list text:continue-numbering="true" text:style-name="WWNum5">
          <text:list-item>
            <text:list>
              <text:list-item>
                <text:p text:style-name="P15" loext:marker-style-name="T7"><text:span text:style-name="T1">INDICADORES </text:span><text:span text:style-name="T1"/></text:p>
              </text:list-item>
            </text:list>
          </text:list-item>
        </text:list>
        <table:table table:name="Tabla43" table:style-name="Tabla43">
          <table:table-column table:style-name="Tabla43.A"/>
          <table:table-column table:style-name="Tabla43.B"/>
          <table:table-column table:style-name="Tabla43.C"/>
          <table:table-column table:style-name="Tabla43.D"/>
          <table:table-column table:style-name="Tabla43.E"/>
          <table:table-column table:style-name="Tabla43.F"/>
          <table:table-column table:style-name="Tabla43.G"/>
          <table:table-column table:style-name="Tabla43.H"/>
          <table:table-column table:style-name="Tabla43.I"/>
          <table:table-header-rows>
            <text:soft-page-break/>
            <table:table-row table:style-name="Tabla43.1">
              <table:table-cell table:style-name="Tabla43.A1" table:number-rows-spanned="3" office:value-type="string">
                <text:p text:style-name="P31" loext:marker-style-name="T7"><text:span text:style-name="T6">Indicadores</text:span><text:span text:style-name="T6"/></text:p>
              </table:table-cell>
              <table:table-cell table:style-name="Tabla43.A1" table:number-rows-spanned="3" office:value-type="string">
                <text:p text:style-name="P31" loext:marker-style-name="T7"><text:span text:style-name="T6">Unidad de Medida</text:span><text:span text:style-name="T6"/></text:p>
              </table:table-cell>
              <table:table-cell table:style-name="Tabla43.A1" table:number-rows-spanned="3" office:value-type="string">
                <text:p text:style-name="P31" loext:marker-style-name="T7"><text:span text:style-name="T6">Línea de Base</text:span><text:span text:style-name="T6"/></text:p>
              </table:table-cell>
              <table:table-cell table:style-name="Tabla43.A1" table:number-rows-spanned="2" office:value-type="string">
                <text:p text:style-name="P31" loext:marker-style-name="T7"><text:span text:style-name="T6">Meta al Finalizar Ciclo / Campaña / Año I</text:span><text:span text:style-name="T6"/></text:p>
              </table:table-cell>
              <table:table-cell table:style-name="Tabla43.A1" table:number-rows-spanned="2" office:value-type="string">
                <text:p text:style-name="P31" loext:marker-style-name="T7"><text:span text:style-name="T6">Meta al Finalizar Ciclo / Campaña / Año II</text:span><text:span text:style-name="T6"/></text:p>
              </table:table-cell>
              <table:table-cell table:style-name="Tabla43.A1" table:number-rows-spanned="2" office:value-type="string">
                <text:p text:style-name="P31" loext:marker-style-name="T7"><text:span text:style-name="T6">Meta al Finalizar Ciclo / Campaña / Año III</text:span><text:span text:style-name="T6"/></text:p>
              </table:table-cell>
              <table:table-cell table:style-name="Tabla43.A1" table:number-rows-spanned="2" office:value-type="string">
                <text:p text:style-name="P31" loext:marker-style-name="T7"><text:span text:style-name="T6">Meta al Finalizar Ciclo / Campaña / Año IV</text:span><text:span text:style-name="T6"/></text:p>
              </table:table-cell>
              <table:table-cell table:style-name="Tabla43.A1" table:number-rows-spanned="2" office:value-type="string">
                <text:p text:style-name="P31" loext:marker-style-name="T7"><text:span text:style-name="T6">Meta al Finalizar Ciclo / Campaña / Año V</text:span><text:span text:style-name="T6"/></text:p>
              </table:table-cell>
              <table:table-cell table:style-name="Tabla43.A1" table:number-rows-spanned="2" office:value-type="string">
                <text:p text:style-name="P31" loext:marker-style-name="T7"><text:span text:style-name="T6">Meta Total</text:span><text:span text:style-name="T6"/></text:p>
              </table:table-cell>
            </table:table-row>
            <table:table-row table:style-name="Tabla43.2">
              <table:covered-table-cell table:style-name="Tabla43.A1"/>
              <table:covered-table-cell table:style-name="Tabla43.A1"/>
              <table:covered-table-cell table:style-name="Tabla43.A1"/>
              <table:covered-table-cell table:style-name="Tabla43.A1"/>
              <table:covered-table-cell table:style-name="Tabla43.A1"/>
              <table:covered-table-cell table:style-name="Tabla43.A1"/>
              <table:covered-table-cell table:style-name="Tabla43.A1"/>
              <table:covered-table-cell table:style-name="Tabla43.A1"/>
              <table:covered-table-cell table:style-name="Tabla43.A1"/>
            </table:table-row>
            <table:table-row table:style-name="Tabla43.3">
              <table:covered-table-cell table:style-name="Tabla43.A1"/>
              <table:covered-table-cell table:style-name="Tabla43.A1"/>
              <table:covered-table-cell table:style-name="Tabla43.A1"/>
              <table:table-cell table:style-name="Tabla43.D3" office:value-type="string">
                <text:p text:style-name="P31" loext:marker-style-name="T7"><text:span text:style-name="T6">Programada</text:span><text:span text:style-name="T6"/></text:p>
              </table:table-cell>
              <table:table-cell table:style-name="Tabla43.D3" office:value-type="string">
                <text:p text:style-name="P31" loext:marker-style-name="T7"><text:span text:style-name="T6">Programada</text:span><text:span text:style-name="T6"/></text:p>
              </table:table-cell>
              <table:table-cell table:style-name="Tabla43.D3" office:value-type="string">
                <text:p text:style-name="P31" loext:marker-style-name="T7"><text:span text:style-name="T6">Programada</text:span><text:span text:style-name="T6"/></text:p>
              </table:table-cell>
              <table:table-cell table:style-name="Tabla43.D3" office:value-type="string">
                <text:p text:style-name="P31" loext:marker-style-name="T7"><text:span text:style-name="T6">Programada</text:span><text:span text:style-name="T6"/></text:p>
              </table:table-cell>
              <table:table-cell table:style-name="Tabla43.D3" office:value-type="string">
                <text:p text:style-name="P31" loext:marker-style-name="T7"><text:span text:style-name="T6">Programada</text:span><text:span text:style-name="T6"/></text:p>
              </table:table-cell>
              <table:table-cell table:style-name="Tabla43.D3" office:value-type="string">
                <text:p text:style-name="P31" loext:marker-style-name="T7"><text:span text:style-name="T6">Programada</text:span><text:span text:style-name="T6"/></text:p>
              </table:table-cell>
            </table:table-row>
          </table:table-header-rows>
          <table:table-row table:style-name="Tabla43.4">
            <table:table-cell table:style-name="Tabla43.A4" office:value-type="string">
              <text:p text:style-name="P46" loext:marker-style-name="T7"><text:span text:style-name="T11">Empleos generados</text:span><text:span text:style-name="T11"/></text:p>
            </table:table-cell>
            <table:table-cell table:style-name="Tabla43.B4" office:value-type="string">
              <text:p text:style-name="P51" loext:marker-style-name="T6"/>
            </table:table-cell>
            <table:table-cell table:style-name="Tabla43.B4" office:value-type="string">
              <text:p text:style-name="P51" loext:marker-style-name="T6"/>
            </table:table-cell>
            <table:table-cell table:style-name="Tabla43.B4" office:value-type="string">
              <text:p text:style-name="P51" loext:marker-style-name="T6"/>
            </table:table-cell>
            <table:table-cell table:style-name="Tabla43.B4" office:value-type="string">
              <text:p text:style-name="P51" loext:marker-style-name="T6"/>
            </table:table-cell>
            <table:table-cell table:style-name="Tabla43.B4" office:value-type="string">
              <text:p text:style-name="P51" loext:marker-style-name="T6"/>
            </table:table-cell>
            <table:table-cell table:style-name="Tabla43.B4" office:value-type="string">
              <text:p text:style-name="P51" loext:marker-style-name="T6"/>
            </table:table-cell>
            <table:table-cell table:style-name="Tabla43.B4" office:value-type="string">
              <text:p text:style-name="P51" loext:marker-style-name="T6"/>
            </table:table-cell>
            <table:table-cell table:style-name="Tabla43.B4" office:value-type="string">
              <text:p text:style-name="P31" loext:marker-style-name="T7"><text:span text:style-name="T6">-</text:span><text:span text:style-name="T6"/></text:p>
            </table:table-cell>
          </table:table-row>
          <table:table-row table:style-name="Tabla43.3">
            <table:table-cell table:style-name="Tabla43.A4" office:value-type="string">
              <text:p text:style-name="P46" loext:marker-style-name="T7"><text:span text:style-name="T11">Rendimientos</text:span><text:span text:style-name="T11"/></text:p>
            </table:table-cell>
            <table:table-cell table:style-name="Tabla43.B4" office:value-type="string">
              <text:p text:style-name="P51" loext:marker-style-name="T6"/>
            </table:table-cell>
            <table:table-cell table:style-name="Tabla43.B4" office:value-type="string">
              <text:p text:style-name="P51" loext:marker-style-name="T6"/>
            </table:table-cell>
            <table:table-cell table:style-name="Tabla43.B4" office:value-type="string">
              <text:p text:style-name="P51" loext:marker-style-name="T6"/>
            </table:table-cell>
            <table:table-cell table:style-name="Tabla43.B4" office:value-type="string">
              <text:p text:style-name="P51" loext:marker-style-name="T6"/>
            </table:table-cell>
            <table:table-cell table:style-name="Tabla43.B4" office:value-type="string">
              <text:p text:style-name="P51" loext:marker-style-name="T6"/>
            </table:table-cell>
            <table:table-cell table:style-name="Tabla43.B4" office:value-type="string">
              <text:p text:style-name="P51" loext:marker-style-name="T6"/>
            </table:table-cell>
            <table:table-cell table:style-name="Tabla43.B4" office:value-type="string">
              <text:p text:style-name="P51" loext:marker-style-name="T6"/>
            </table:table-cell>
            <table:table-cell table:style-name="Tabla43.B4" office:value-type="string">
              <text:p text:style-name="P31" loext:marker-style-name="T7"><text:span text:style-name="T6">-</text:span><text:span text:style-name="T6"/></text:p>
            </table:table-cell>
          </table:table-row>
          <table:table-row table:style-name="Tabla43.3">
            <table:table-cell table:style-name="Tabla43.A4" office:value-type="string">
              <text:p text:style-name="P46" loext:marker-style-name="T7"><text:span text:style-name="T11">Producción</text:span><text:span text:style-name="T11"/></text:p>
            </table:table-cell>
            <table:table-cell table:style-name="Tabla43.B4" office:value-type="string">
              <text:p text:style-name="P51" loext:marker-style-name="T6"/>
            </table:table-cell>
            <table:table-cell table:style-name="Tabla43.B4" office:value-type="string">
              <text:p text:style-name="P51" loext:marker-style-name="T6"/>
            </table:table-cell>
            <table:table-cell table:style-name="Tabla43.B4" office:value-type="string">
              <text:p text:style-name="P51" loext:marker-style-name="T6"/>
            </table:table-cell>
            <table:table-cell table:style-name="Tabla43.B4" office:value-type="string">
              <text:p text:style-name="P51" loext:marker-style-name="T6"/>
            </table:table-cell>
            <table:table-cell table:style-name="Tabla43.B4" office:value-type="string">
              <text:p text:style-name="P51" loext:marker-style-name="T6"/>
            </table:table-cell>
            <table:table-cell table:style-name="Tabla43.B4" office:value-type="string">
              <text:p text:style-name="P51" loext:marker-style-name="T6"/>
            </table:table-cell>
            <table:table-cell table:style-name="Tabla43.B4" office:value-type="string">
              <text:p text:style-name="P51" loext:marker-style-name="T6"/>
            </table:table-cell>
            <table:table-cell table:style-name="Tabla43.B4" office:value-type="string">
              <text:p text:style-name="P51" loext:marker-style-name="T6"/>
            </table:table-cell>
          </table:table-row>
          <table:table-row table:style-name="Tabla43.3">
            <table:table-cell table:style-name="Tabla43.A4" office:value-type="string">
              <text:p text:style-name="P46" loext:marker-style-name="T7"><text:span text:style-name="T82">Costo Unitario</text:span><text:span text:style-name="T82"/></text:p>
            </table:table-cell>
            <table:table-cell table:style-name="Tabla43.B4" office:value-type="string">
              <text:p text:style-name="P51" loext:marker-style-name="T6"/>
            </table:table-cell>
            <table:table-cell table:style-name="Tabla43.B4" office:value-type="string">
              <text:p text:style-name="P51" loext:marker-style-name="T6"/>
            </table:table-cell>
            <table:table-cell table:style-name="Tabla43.B4" office:value-type="string">
              <text:p text:style-name="P51" loext:marker-style-name="T6"/>
            </table:table-cell>
            <table:table-cell table:style-name="Tabla43.B4" office:value-type="string">
              <text:p text:style-name="P51" loext:marker-style-name="T6"/>
            </table:table-cell>
            <table:table-cell table:style-name="Tabla43.B4" office:value-type="string">
              <text:p text:style-name="P51" loext:marker-style-name="T6"/>
            </table:table-cell>
            <table:table-cell table:style-name="Tabla43.B4" office:value-type="string">
              <text:p text:style-name="P51" loext:marker-style-name="T6"/>
            </table:table-cell>
            <table:table-cell table:style-name="Tabla43.B4" office:value-type="string">
              <text:p text:style-name="P51" loext:marker-style-name="T6"/>
            </table:table-cell>
            <table:table-cell table:style-name="Tabla43.B4" office:value-type="string">
              <text:p text:style-name="P51" loext:marker-style-name="T6"/>
            </table:table-cell>
          </table:table-row>
          <table:table-row table:style-name="Tabla43.8">
            <table:table-cell table:style-name="Tabla43.A4" office:value-type="string">
              <text:p text:style-name="P46" loext:marker-style-name="T7"><text:span text:style-name="T82">Número de Unidades Vendidas</text:span><text:span text:style-name="T82"/></text:p>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4" office:value-type="string">
              <text:p text:style-name="P31" loext:marker-style-name="T7"><text:span text:style-name="T6">-</text:span><text:span text:style-name="T6"/></text:p>
            </table:table-cell>
          </table:table-row>
          <table:table-row table:style-name="Tabla43.9">
            <table:table-cell table:style-name="Tabla43.A4" office:value-type="string">
              <text:p text:style-name="P46" loext:marker-style-name="T7"><text:span text:style-name="T82">Precio Unitario</text:span><text:span text:style-name="T82"/></text:p>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4" office:value-type="string">
              <text:p text:style-name="P31" loext:marker-style-name="T7"><text:span text:style-name="T6">-</text:span><text:span text:style-name="T6"/></text:p>
            </table:table-cell>
          </table:table-row>
          <table:table-row table:style-name="Tabla43.10">
            <table:table-cell table:style-name="Tabla43.A4" office:value-type="string">
              <text:p text:style-name="P46" loext:marker-style-name="T7"><text:span text:style-name="T82">Ingresos por Ventas</text:span><text:span text:style-name="T82"/></text:p>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4" office:value-type="string">
              <text:p text:style-name="P31" loext:marker-style-name="T7"><text:span text:style-name="T6">-</text:span><text:span text:style-name="T6"/></text:p>
            </table:table-cell>
          </table:table-row>
          <table:table-row table:style-name="Tabla43.9">
            <table:table-cell table:style-name="Tabla43.A4" office:value-type="string">
              <text:p text:style-name="P46" loext:marker-style-name="T7"><text:span text:style-name="T82">Utilidades</text:span><text:span text:style-name="T82"/></text:p>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4" office:value-type="string">
              <text:p text:style-name="P31" loext:marker-style-name="T7"><text:span text:style-name="T6">-</text:span><text:span text:style-name="T6"/></text:p>
            </table:table-cell>
          </table:table-row>
          <table:table-row table:style-name="Tabla43.9">
            <table:table-cell table:style-name="Tabla43.A4" office:value-type="string">
              <text:p text:style-name="P46" loext:marker-style-name="T7"><text:span text:style-name="T82">Número de socios</text:span><text:span text:style-name="T82"/></text:p>
            </table:table-cell>
            <table:table-cell table:style-name="Tabla43.B12" office:value-type="string">
              <text:p text:style-name="P77" loext:marker-style-name="T69"/>
            </table:table-cell>
            <table:table-cell table:style-name="Tabla43.B12" office:value-type="string">
              <text:p text:style-name="P77" loext:marker-style-name="T69"/>
            </table:table-cell>
            <table:table-cell table:style-name="Tabla43.B12" office:value-type="string">
              <text:p text:style-name="P77" loext:marker-style-name="T69"/>
            </table:table-cell>
            <table:table-cell table:style-name="Tabla43.B12" office:value-type="string">
              <text:p text:style-name="P77" loext:marker-style-name="T69"/>
            </table:table-cell>
            <table:table-cell table:style-name="Tabla43.B12" office:value-type="string">
              <text:p text:style-name="P77" loext:marker-style-name="T69"/>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4" office:value-type="string">
              <text:p text:style-name="P51" loext:marker-style-name="T6"/>
            </table:table-cell>
          </table:table-row>
          <table:table-row table:style-name="Tabla43.13">
            <table:table-cell table:style-name="Tabla43.A4" office:value-type="string">
              <text:p text:style-name="P46" loext:marker-style-name="T7"><text:span text:style-name="T82">Utilidad promedio por cada socio del AEO*</text:span><text:span text:style-name="T82"/></text:p>
            </table:table-cell>
            <table:table-cell table:style-name="Tabla43.B13" office:value-type="string">
              <text:p text:style-name="P77" loext:marker-style-name="T69"/>
            </table:table-cell>
            <table:table-cell table:style-name="Tabla43.B13" office:value-type="string">
              <text:p text:style-name="P77" loext:marker-style-name="T69"/>
            </table:table-cell>
            <table:table-cell table:style-name="Tabla43.B13" office:value-type="string">
              <text:p text:style-name="P77" loext:marker-style-name="T69"/>
            </table:table-cell>
            <table:table-cell table:style-name="Tabla43.B13" office:value-type="string">
              <text:p text:style-name="P66" loext:marker-style-name="T11"/>
            </table:table-cell>
            <table:table-cell table:style-name="Tabla43.B13" office:value-type="string">
              <text:p text:style-name="P77" loext:marker-style-name="T69"/>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4" office:value-type="string">
              <text:p text:style-name="P31" loext:marker-style-name="T7"><text:span text:style-name="T6">-</text:span><text:span text:style-name="T6"/></text:p>
            </table:table-cell>
          </table:table-row>
          <table:table-row table:style-name="Tabla43.14">
            <table:table-cell table:style-name="Tabla43.A14" office:value-type="string">
              <text:p text:style-name="P46" loext:marker-style-name="T7"><text:span text:style-name="T82">Rentabilidad de las Ventas **</text:span><text:span text:style-name="T82"/></text:p>
            </table:table-cell>
            <table:table-cell table:style-name="Tabla43.B14" office:value-type="string">
              <text:p text:style-name="P77" loext:marker-style-name="T69"/>
            </table:table-cell>
            <table:table-cell table:style-name="Tabla43.C14" office:value-type="string">
              <text:p text:style-name="P77" loext:marker-style-name="T69"/>
            </table:table-cell>
            <table:table-cell table:style-name="Tabla43.C14" office:value-type="string">
              <text:p text:style-name="P31" loext:marker-style-name="T7"><text:span text:style-name="T82">0.00%</text:span><text:span text:style-name="T82"/></text:p>
            </table:table-cell>
            <table:table-cell table:style-name="Tabla43.C14" office:value-type="string">
              <text:p text:style-name="P31" loext:marker-style-name="T7"><text:span text:style-name="T82">0.00%</text:span><text:span text:style-name="T82"/></text:p>
            </table:table-cell>
            <table:table-cell table:style-name="Tabla43.C14" office:value-type="string">
              <text:p text:style-name="P31" loext:marker-style-name="T7"><text:span text:style-name="T82">0.00%</text:span><text:span text:style-name="T82"/></text:p>
            </table:table-cell>
            <table:table-cell table:style-name="Tabla43.B8" office:value-type="string">
              <text:p text:style-name="P31" loext:marker-style-name="T7"><text:span text:style-name="T82">0.00%</text:span><text:span text:style-name="T82"/></text:p>
            </table:table-cell>
            <table:table-cell table:style-name="Tabla43.B8" office:value-type="string">
              <text:p text:style-name="P31" loext:marker-style-name="T7"><text:span text:style-name="T82">0.00%</text:span><text:span text:style-name="T82"/></text:p>
            </table:table-cell>
            <table:table-cell table:style-name="Tabla43.B8" office:value-type="string">
              <text:p text:style-name="P31" loext:marker-style-name="T7"><text:span text:style-name="T82">0.00%</text:span><text:span text:style-name="T82"/></text:p>
            </table:table-cell>
          </table:table-row>
          <table:table-row table:style-name="Tabla43.14">
            <table:table-cell table:style-name="Tabla43.A14" office:value-type="string">
              <text:p text:style-name="P46" loext:marker-style-name="T7"><text:span text:style-name="T82">Rentabilidad de la Inversión***</text:span><text:span text:style-name="T82"/></text:p>
            </table:table-cell>
            <table:table-cell table:style-name="Tabla43.A4" office:value-type="string">
              <text:p text:style-name="P77" loext:marker-style-name="T69"/>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8" office:value-type="string">
              <text:p text:style-name="P77" loext:marker-style-name="T69"/>
            </table:table-cell>
          </table:table-row>
          <table:table-row table:style-name="Tabla43.16">
            <table:table-cell table:style-name="Tabla43.A14" office:value-type="string">
              <text:p text:style-name="P46" loext:marker-style-name="T7"><text:span text:style-name="T82">Ingresos promedio por cada socio del AEO ****</text:span><text:span text:style-name="T82"/></text:p>
            </table:table-cell>
            <table:table-cell table:style-name="Tabla43.A4" office:value-type="string">
              <text:p text:style-name="P77" loext:marker-style-name="T69"/>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8" office:value-type="string">
              <text:p text:style-name="P77" loext:marker-style-name="T69"/>
            </table:table-cell>
            <table:table-cell table:style-name="Tabla43.B4" office:value-type="string">
              <text:p text:style-name="P77" loext:marker-style-name="T69"/>
            </table:table-cell>
            <table:table-cell table:style-name="Tabla43.B4" office:value-type="string">
              <text:p text:style-name="P77" loext:marker-style-name="T69"/>
            </table:table-cell>
            <table:table-cell table:style-name="Tabla43.B4" office:value-type="string">
              <text:p text:style-name="P31" loext:marker-style-name="T7"><text:span text:style-name="T6">-</text:span><text:span text:style-name="T6"/></text:p>
            </table:table-cell>
          </table:table-row>
          <table:table-row table:style-name="Tabla43.9">
            <table:table-cell table:style-name="Tabla43.A17" table:number-columns-spanned="9" office:value-type="string">
              <text:p text:style-name="P46" loext:marker-style-name="T7"><text:span text:style-name="T82">* Se obtiene de dividir la utilidad total entre el número de productores que integran un AEO.</text:span><text:span text:style-name="T82"/></text:p>
            </table:table-cell>
            <table:covered-table-cell/>
            <table:covered-table-cell/>
            <table:covered-table-cell/>
            <table:covered-table-cell/>
            <table:covered-table-cell/>
            <table:covered-table-cell/>
            <table:covered-table-cell/>
            <table:covered-table-cell/>
          </table:table-row>
          <table:table-row table:style-name="Tabla43.9">
            <table:table-cell table:style-name="Tabla43.A17" table:number-columns-spanned="9" office:value-type="string">
              <text:p text:style-name="P46" loext:marker-style-name="T7"><text:span text:style-name="T82">** Se obtiene dividiendo las Utilidades Generadas entre los Ingresos por Ventas.</text:span><text:span text:style-name="T82"/></text:p>
            </table:table-cell>
            <table:covered-table-cell/>
            <table:covered-table-cell/>
            <table:covered-table-cell/>
            <table:covered-table-cell/>
            <table:covered-table-cell/>
            <table:covered-table-cell/>
            <table:covered-table-cell/>
            <table:covered-table-cell/>
          </table:table-row>
          <table:table-row table:style-name="Tabla43.9">
            <table:table-cell table:style-name="Tabla43.A17" table:number-columns-spanned="9" office:value-type="string">
              <text:p text:style-name="P46" loext:marker-style-name="T7"><text:span text:style-name="T82">*** Se obtiene dividiendo la diferencia entre Ingresos por Ventas y el producto del costo unitario por unidades vendidas, entre el total de la inversión de la propuesta productiva.</text:span><text:span text:style-name="T82"/></text:p>
            </table:table-cell>
            <table:covered-table-cell/>
            <table:covered-table-cell/>
            <table:covered-table-cell/>
            <table:covered-table-cell/>
            <table:covered-table-cell/>
            <table:covered-table-cell/>
            <table:covered-table-cell/>
            <table:covered-table-cell/>
          </table:table-row>
          <table:table-row table:style-name="Tabla43.9">
            <table:table-cell table:style-name="Tabla43.A17" table:number-columns-spanned="9" office:value-type="string">
              <text:p text:style-name="P46" loext:marker-style-name="T7"><text:span text:style-name="T82">**** Se obtiene dividiendo los Ingresos por Ventas entre el número de productores que integran un AEO.</text:span><text:span text:style-name="T82"/></text:p>
            </table:table-cell>
            <table:covered-table-cell/>
            <table:covered-table-cell/>
            <table:covered-table-cell/>
            <table:covered-table-cell/>
            <table:covered-table-cell/>
            <table:covered-table-cell/>
            <table:covered-table-cell/>
            <table:covered-table-cell/>
          </table:table-row>
          <table:table-row table:style-name="Tabla43.9">
            <table:table-cell table:style-name="Tabla43.A17" table:number-columns-spanned="9" office:value-type="string">
              <text:p text:style-name="P46" loext:marker-style-name="T7"><text:span text:style-name="T82">El costo de mano de obra se obtiene de multiplicar el costo unitario de la mano de obra por el número de unidades vendidas</text:span><text:span text:style-name="T82"/></text:p>
            </table:table-cell>
            <table:covered-table-cell/>
            <table:covered-table-cell/>
            <table:covered-table-cell/>
            <table:covered-table-cell/>
            <table:covered-table-cell/>
            <table:covered-table-cell/>
            <table:covered-table-cell/>
            <table:covered-table-cell/>
          </table:table-row>
          <table:table-row table:style-name="Tabla43.9">
            <table:table-cell table:style-name="Tabla43.A17" table:number-columns-spanned="9" office:value-type="string">
              <text:p text:style-name="P46" loext:marker-style-name="T7"><text:span text:style-name="T82">Los últimos tres indicadores se levantan a partir del año 3 y hasta el año 5 de manera anual, por ser considerados resultados Finales o de Impacto.</text:span><text:span text:style-name="T82"/></text:p>
            </table:table-cell>
            <table:covered-table-cell/>
            <table:covered-table-cell/>
            <table:covered-table-cell/>
            <table:covered-table-cell/>
            <table:covered-table-cell/>
            <table:covered-table-cell/>
            <table:covered-table-cell/>
            <table:covered-table-cell/>
          </table:table-row>
        </table:table>
      </text:section>
      <text:section text:style-name="Sect1" text:name="Sección4">
        <text:list text:continue-numbering="true" text:style-name="WWNum5">
          <text:list-item>
            <text:p text:style-name="P22" loext:marker-style-name="T7"><text:span text:style-name="T1">CONCLUSIONES</text:span><text:span text:style-name="T1"/></text:p>
          </text:list-item>
        </text:list>
        <table:table table:name="Tabla44" table:style-name="Tabla44">
          <table:table-column table:style-name="Tabla44.A"/>
          <table:table-column table:style-name="Tabla44.B"/>
          <table:table-row table:style-name="Tabla44.1">
            <table:table-cell table:style-name="Tabla44.A1" office:value-type="string">
              <text:p text:style-name="P46" loext:marker-style-name="T7"><text:span text:style-name="T9">1</text:span><text:span text:style-name="T9"/></text:p>
            </table:table-cell>
            <table:table-cell table:style-name="Tabla44.A1" office:value-type="string">
              <text:p text:style-name="P46" loext:marker-style-name="T7"><text:span text:style-name="T9">…</text:span><text:span text:style-name="T9"/></text:p>
            </table:table-cell>
          </table:table-row>
          <table:table-row table:style-name="Tabla44.1">
            <table:table-cell table:style-name="Tabla44.A1" office:value-type="string">
              <text:p text:style-name="P46" loext:marker-style-name="T7"><text:span text:style-name="T9">2</text:span><text:span text:style-name="T9"/></text:p>
            </table:table-cell>
            <table:table-cell table:style-name="Tabla44.A1" office:value-type="string">
              <text:p text:style-name="P46" loext:marker-style-name="T7"><text:span text:style-name="T9">…</text:span><text:span text:style-name="T9"/></text:p>
            </table:table-cell>
          </table:table-row>
          <table:table-row table:style-name="Tabla44.3">
            <table:table-cell table:style-name="Tabla44.A1" office:value-type="string">
              <text:p text:style-name="P46" loext:marker-style-name="T7"><text:span text:style-name="T9">3</text:span><text:span text:style-name="T9"/></text:p>
            </table:table-cell>
            <table:table-cell table:style-name="Tabla44.A1" office:value-type="string">
              <text:p text:style-name="P46" loext:marker-style-name="T7"><text:span text:style-name="T9">…</text:span><text:span text:style-name="T9"/></text:p>
            </table:table-cell>
          </table:table-row>
          <table:table-row table:style-name="Tabla44.1">
            <table:table-cell table:style-name="Tabla44.A1" office:value-type="string">
              <text:p text:style-name="P46" loext:marker-style-name="T7"><text:span text:style-name="T9">n</text:span><text:span text:style-name="T9"/></text:p>
            </table:table-cell>
            <table:table-cell table:style-name="Tabla44.A1" office:value-type="string">
              <text:p text:style-name="P46" loext:marker-style-name="T7"><text:span text:style-name="T9">…</text:span><text:span text:style-name="T9"/></text:p>
            </table:table-cell>
          </table:table-row>
        </table:table>
        <text:list text:continue-numbering="true" text:style-name="WWNum5">
          <text:list-item>
            <text:p text:style-name="P21" loext:marker-style-name="T7"><text:span text:style-name="T1">RECOMENTACIONES</text:span><text:span text:style-name="T1"/></text:p>
          </text:list-item>
        </text:list>
        <table:table table:name="Tabla45" table:style-name="Tabla45">
          <table:table-column table:style-name="Tabla45.A"/>
          <table:table-column table:style-name="Tabla45.B"/>
          <table:table-row table:style-name="Tabla45.1">
            <table:table-cell table:style-name="Tabla45.A1" office:value-type="string">
              <text:p text:style-name="P46" loext:marker-style-name="T7"><text:span text:style-name="T9">1</text:span><text:span text:style-name="T9"/></text:p>
            </table:table-cell>
            <table:table-cell table:style-name="Tabla45.A1" office:value-type="string">
              <text:p text:style-name="P46" loext:marker-style-name="T7"><text:span text:style-name="T9">…</text:span><text:span text:style-name="T9"/></text:p>
            </table:table-cell>
          </table:table-row>
          <table:table-row table:style-name="Tabla45.1">
            <table:table-cell table:style-name="Tabla45.A1" office:value-type="string">
              <text:p text:style-name="P46" loext:marker-style-name="T7"><text:span text:style-name="T9">2</text:span><text:span text:style-name="T9"/></text:p>
            </table:table-cell>
            <table:table-cell table:style-name="Tabla45.A1" office:value-type="string">
              <text:p text:style-name="P46" loext:marker-style-name="T7"><text:span text:style-name="T9">…</text:span><text:span text:style-name="T9"/></text:p>
            </table:table-cell>
          </table:table-row>
          <table:table-row table:style-name="Tabla45.3">
            <table:table-cell table:style-name="Tabla45.A1" office:value-type="string">
              <text:p text:style-name="P46" loext:marker-style-name="T7"><text:span text:style-name="T9">3</text:span><text:span text:style-name="T9"/></text:p>
            </table:table-cell>
            <table:table-cell table:style-name="Tabla45.A1" office:value-type="string">
              <text:p text:style-name="P46" loext:marker-style-name="T7"><text:span text:style-name="T9">…</text:span><text:span text:style-name="T9"/></text:p>
            </table:table-cell>
          </table:table-row>
          <table:table-row table:style-name="Tabla45.1">
            <table:table-cell table:style-name="Tabla45.A1" office:value-type="string">
              <text:p text:style-name="P46" loext:marker-style-name="T7"><text:span text:style-name="T9">n</text:span><text:span text:style-name="T9"/></text:p>
            </table:table-cell>
            <table:table-cell table:style-name="Tabla45.A1" office:value-type="string">
              <text:p text:style-name="P46" loext:marker-style-name="T7"><text:span text:style-name="T9">…</text:span><text:span text:style-name="T9"/></text:p>
            </table:table-cell>
          </table:table-row>
        </table:table>
        <text:p text:style-name="P62" loext:marker-style-name="T9"/>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face style:name="Arial Narrow" svg:font-family="'Arial Narrow'" style:font-family-generic="roman"/>
    <style:font-face style:name="Arial Narrow1" svg:font-family="'Arial Narrow'" style:font-family-generic="system" style:font-pitch="variable"/>
    <style:font-face style:name="Arial Unicode MS" svg:font-family="'Arial Unicode MS'" style:font-family-generic="system" style:font-pitch="variable"/>
    <style:font-face style:name="Arial1" svg:font-family="Arial" style:font-family-generic="system" style:font-pitch="variable"/>
    <style:font-face style:name="Arial2" svg:font-family="Arial" style:font-adornments="Regular" style:font-family-generic="swiss" style:font-pitch="variable"/>
    <style:font-face style:name="Calibri" svg:font-family="Calibri" style:font-family-generic="roman"/>
    <style:font-face style:name="Calibri1" svg:font-family="Calibri" style:font-family-generic="system" style:font-pitch="variable"/>
    <style:font-face style:name="Cambria" svg:font-family="Cambria" style:font-family-generic="roman"/>
    <style:font-face style:name="Century Gothic" svg:font-family="'Century Gothic'" style:font-family-generic="roman"/>
    <style:font-face style:name="Century Gothic1" svg:font-family="'Century Gothic'" style:font-family-generic="system" style:font-pitch="variable"/>
    <style:font-face style:name="Courier New" svg:font-family="'Courier New'" style:font-family-generic="roman"/>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face style:name="Tahoma1" svg:font-family="Tahoma" style:font-family-generic="system" style:font-pitch="variable"/>
    <style:font-face style:name="Times" svg:font-family="Times" style:font-family-generic="roman"/>
    <style:font-face style:name="Times New Roman" svg:font-family="'Times New Roman'" style:font-family-generic="roman"/>
    <style:font-face style:name="Times New Roman1" svg:font-family="'Times New Roman'" style:font-family-generic="system" style:font-pitch="variable"/>
    <style:font-face style:name="Verdana" svg:font-family="Verdana" style:font-family-generic="roman"/>
    <style:font-face style:name="Wingdings" svg:font-family="Wingdings" style:font-charset="x-symbol"/>
    <style:font-face style:name="Wingdings1" svg:font-family="Wingdings" style:font-family-generic="system" style:font-pitch="variable"/>
  </office:font-face-decls>
  <office:styles>
    <draw:marker draw:name="msArrowEnd_20_5" draw:display-name="msArrowEnd 5" svg:viewBox="0 0 300 300" svg:d="M150 0l150 300h-300z"/>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PE" style:letter-kerning="false" style:font-name-asian="F" style:font-size-asian="11pt" style:language-asian="es" style:country-asian="PE"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PE" style:letter-kerning="false" style:font-name-asian="F" style:font-size-asian="11pt" style:language-asian="es" style:country-asian="PE"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fo:font-size="11pt" fo:language="es" fo:country="PE" style:letter-kerning="false" style:font-name-asian="F" style:font-family-generic-asian="system" style:font-pitch-asian="variable" style:font-size-asian="11pt" style:language-asian="es" style:country-asian="PE"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2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cm" fo:margin-bottom="0cm" style:contextual-spacing="false" fo:line-height="150%" fo:text-align="justify" style:justify-single-word="false"/>
      <style:text-properties style:font-name="Arial" fo:font-family="Arial" style:font-family-generic="roman" fo:language="es" fo:country="ES" fo:font-weight="bold" style:font-name-asian="Times New Roman1" style:font-family-asian="'Times New Roman'" style:font-family-generic-asian="system" style:font-pitch-asian="variable" style:language-asian="es" style:country-asian="ES" style:font-weight-asian="bold" style:font-name-complex="Arial1" style:font-family-complex="Arial" style:font-family-generic-complex="system" style:font-pitch-complex="variable" style:font-size-complex="10pt" style:font-weight-complex="bold"/>
    </style:style>
    <style:style style:name="List" style:family="paragraph" style:parent-style-name="Text_20_body" style:class="list">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Título_20_1_20_Car" style:default-outline-level="1" style:class="text">
      <style:paragraph-properties fo:margin-top="0.847cm" fo:margin-bottom="0cm" style:contextual-spacing="false" fo:keep-together="always" fo:keep-with-next="always"/>
      <style:text-properties fo:color="#365f91" loext:opacity="100%" style:font-name="Cambria" fo:font-family="Cambria" style:font-family-generic="roman" fo:font-size="14pt" fo:font-weight="bold" style:font-name-asian="F" style:font-family-generic-asian="system" style:font-pitch-asian="variable" style:font-size-asian="14pt" style:language-asian="en" style:country-asian="US"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class="text">
      <style:paragraph-properties fo:margin-top="0.353cm" fo:margin-bottom="0cm" style:contextual-spacing="false" fo:keep-together="always" fo:keep-with-next="always"/>
      <style:text-properties fo:color="#4f81bd" loext:opacity="100%" style:font-name="Cambria" fo:font-family="Cambria" style:font-family-generic="roman" fo:font-size="13pt" fo:font-weight="bold" style:font-name-asian="F" style:font-family-generic-asian="system" style:font-pitch-asian="variable" style:font-size-asian="13pt" style:language-asian="en" style:country-asian="US"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Título_20_3_20_Car" style:default-outline-level="3" style:class="text">
      <style:paragraph-properties fo:margin-top="0.353cm" fo:margin-bottom="0cm" style:contextual-spacing="false" fo:keep-together="always" fo:keep-with-next="always"/>
      <style:text-properties fo:color="#4f81bd" loext:opacity="100%" style:font-name="Cambria" fo:font-family="Cambria" style:font-family-generic="roman" fo:font-weight="bold" style:font-name-asian="F" style:font-family-generic-asian="system" style:font-pitch-asian="variable" style:language-asian="en" style:country-asian="US"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Título_20_4_20_Car" style:default-outline-level="4" style:class="text">
      <style:paragraph-properties fo:margin-top="0.353cm" fo:margin-bottom="0cm" style:contextual-spacing="false" fo:keep-together="always" fo:keep-with-next="always"/>
      <style:text-properties fo:color="#4f81bd" loext:opacity="100%" style:font-name="Cambria" fo:font-family="Cambria" style:font-family-generic="roman" fo:font-style="italic" fo:font-weight="bold" style:font-name-asian="F" style:font-family-generic-asian="system" style:font-pitch-asian="variable" style:language-asian="en" style:country-asian="US"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Título_20_5_20_Car"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name-asian="F" style:font-family-generic-asian="system" style:font-pitch-asian="variable" style:language-asian="en" style:country-asian="US"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Título_20_6_20_Car"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fo:font-style="italic" style:font-name-asian="F" style:font-family-generic-asian="system" style:font-pitch-asian="variable" style:language-asian="en" style:country-asian="US"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Título_20_7_20_Car"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fo:font-style="italic" style:font-name-asian="F" style:font-family-generic-asian="system" style:font-pitch-asian="variable" style:language-asian="en" style:country-asian="US"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Título_20_8_20_Car"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fo:font-size="10pt" style:font-name-asian="F" style:font-family-generic-asian="system" style:font-pitch-asian="variable" style:font-size-asian="10pt" style:language-asian="en" style:country-asian="US" style:font-name-complex="F"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 style:display-name="Heading 9" style:family="paragraph" style:parent-style-name="Standard" style:next-style-name="Standard" loext:linked-style-name="Título_20_9_20_Car"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fo:font-size="10pt" fo:font-style="italic" style:font-name-asian="F" style:font-family-generic-asian="system" style:font-pitch-asian="variable" style:font-size-asian="10pt" style:language-asian="en" style:country-asian="US"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loext:linked-style-name="Título_20_Car1"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mbria" fo:font-family="Cambria" style:font-family-generic="roman" fo:font-size="26pt" fo:letter-spacing="0.009cm" style:letter-kerning="true" style:font-name-asian="F" style:font-family-generic-asian="system" style:font-pitch-asian="variable" style:font-size-asian="26pt" style:language-asian="en" style:country-asian="US"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List_20_Paragraph" style:display-name="List Paragraph" style:family="paragraph" style:parent-style-name="Standard" loext:linked-style-name="Párrafo_20_de_20_lista_20_Car">
      <style:paragraph-properties fo:margin-left="1.27cm" fo:margin-top="0cm" fo:margin-bottom="0.353cm" style:contextual-spacing="true"/>
      <style:text-properties style:font-name-asian="Calibri1" style:font-family-asian="Calibri" style:font-family-generic-asian="system" style:font-pitch-asian="variable" style:language-asian="en" style:country-asian="US"/>
    </style:style>
    <style:style style:name="Contents_20_1" style:display-name="Contents 1" style:family="paragraph" style:parent-style-name="Standard" style:next-style-name="Standard" style:auto-update="true" style:class="index">
      <style:paragraph-properties fo:margin-top="0cm" fo:margin-bottom="0cm" style:contextual-spacing="false" fo:line-height="150%">
        <style:tab-stops>
          <style:tab-stop style:position="2.402cm"/>
          <style:tab-stop style:position="14.982cm" style:type="right"/>
        </style:tab-stops>
      </style:paragraph-properties>
      <style:text-properties fo:text-transform="uppercase" style:text-underline-style="solid" style:text-underline-width="auto" style:text-underline-color="font-color" fo:font-weight="bold" style:font-name-asian="Calibri1" style:font-family-asian="Calibri" style:font-family-generic-asian="system" style:font-pitch-asian="variable" style:language-asian="en" style:country-asian="US" style:font-weight-asian="bold" style:font-weight-complex="bold"/>
    </style:style>
    <style:style style:name="Contents_20_2" style:display-name="Contents 2" style:family="paragraph" style:parent-style-name="Standard" style:next-style-name="Standard" style:auto-update="true" style:class="index">
      <style:paragraph-properties fo:margin-top="0cm" fo:margin-bottom="0cm" style:contextual-spacing="false"/>
      <style:text-properties fo:font-variant="small-caps" fo:font-weight="bold" style:font-name-asian="Calibri1" style:font-family-asian="Calibri" style:font-family-generic-asian="system" style:font-pitch-asian="variable" style:language-asian="en" style:country-asian="US" style:font-weight-asian="bold" style:font-weight-complex="bold"/>
    </style:style>
    <style:style style:name="Contents_20_3" style:display-name="Contents 3" style:family="paragraph" style:parent-style-name="Standard" style:next-style-name="Standard" style:auto-update="true" style:class="index">
      <style:paragraph-properties fo:margin-top="0cm" fo:margin-bottom="0cm" style:contextual-spacing="false"/>
      <style:text-properties fo:font-variant="small-caps" style:font-name-asian="Calibri1" style:font-family-asian="Calibri" style:font-family-generic-asian="system" style:font-pitch-asian="variable" style:language-asian="en" style:country-asian="US"/>
    </style:style>
    <style:style style:name="caption1" style:family="paragraph" style:parent-style-name="Standard" style:next-style-name="Standard">
      <style:paragraph-properties fo:line-height="100%"/>
      <style:text-properties fo:color="#4f81bd" loext:opacity="100%" fo:font-size="9pt" fo:font-weight="bold" style:font-name-asian="Calibri1" style:font-family-asian="Calibri" style:font-family-generic-asian="system" style:font-pitch-asian="variable" style:font-size-asian="9pt" style:language-asian="en" style:country-asian="US" style:font-weight-asian="bold" style:font-size-complex="9pt" style:font-weight-complex="bold">
        <loext:char-complex-color loext:theme-type="accent1" loext:color-type="theme"/>
      </style:text-properties>
    </style:style>
    <style:style style:name="Footnote" style:family="paragraph" style:parent-style-name="Standard" loext:linked-style-name="Texto_20_nota_20_pie_20_Car" style:class="extra">
      <style:paragraph-properties fo:margin-top="0cm" fo:margin-bottom="0cm" style:contextual-spacing="false" fo:line-height="100%"/>
      <style:text-properties fo:font-size="10pt" style:font-name-asian="Calibri1" style:font-family-asian="Calibri" style:font-family-generic-asian="system" style:font-pitch-asian="variable" style:font-size-asian="10pt" style:language-asian="en" style:country-asian="US" style:font-size-complex="10pt"/>
    </style:style>
    <style:style style:name="Car" style:family="paragraph" style:parent-style-name="Standard">
      <style:paragraph-properties fo:margin-top="0.423cm" fo:margin-bottom="0.282cm" style:contextual-spacing="false" fo:line-height="0.423cm">
        <style:tab-stops>
          <style:tab-stop style:position="0.953cm"/>
          <style:tab-stop style:position="2.223cm"/>
          <style:tab-stop style:position="3.175cm"/>
        </style:tab-stops>
      </style:paragraph-properties>
      <style:text-properties style:font-name="Verdana" fo:font-family="Verdana" style:font-family-generic="roman"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style>
    <style:style style:name="No_20_Spacing" style:display-name="No Spacing" style:family="paragraph" loext:linked-style-name="Sin_20_espaciado_20_Car">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fo:font-size="11pt" fo:language="es" fo:country="PE" style:letter-kerning="false" style:font-name-asian="F"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top="0cm" fo:margin-bottom="0cm" style:contextual-spacing="false"/>
      <style:text-properties style:font-name-asian="Calibri1" style:font-family-asian="Calibri" style:font-family-generic-asian="system" style:font-pitch-asian="variable" style:language-asian="en" style:country-asian="US"/>
    </style:style>
    <style:style style:name="Contents_20_5" style:display-name="Contents 5" style:family="paragraph" style:parent-style-name="Standard" style:next-style-name="Standard" style:auto-update="true" style:class="index">
      <style:paragraph-properties fo:margin-top="0cm" fo:margin-bottom="0cm" style:contextual-spacing="false"/>
      <style:text-properties style:font-name-asian="Calibri1" style:font-family-asian="Calibri" style:font-family-generic-asian="system" style:font-pitch-asian="variable" style:language-asian="en" style:country-asian="US"/>
    </style:style>
    <style:style style:name="Contents_20_6" style:display-name="Contents 6" style:family="paragraph" style:parent-style-name="Standard" style:next-style-name="Standard" style:auto-update="true" style:class="index">
      <style:paragraph-properties fo:margin-top="0cm" fo:margin-bottom="0cm" style:contextual-spacing="false"/>
      <style:text-properties style:font-name-asian="Calibri1" style:font-family-asian="Calibri" style:font-family-generic-asian="system" style:font-pitch-asian="variable" style:language-asian="en" style:country-asian="US"/>
    </style:style>
    <style:style style:name="Contents_20_7" style:display-name="Contents 7" style:family="paragraph" style:parent-style-name="Standard" style:next-style-name="Standard" style:auto-update="true" style:class="index">
      <style:paragraph-properties fo:margin-top="0cm" fo:margin-bottom="0cm" style:contextual-spacing="false"/>
      <style:text-properties style:font-name-asian="Calibri1" style:font-family-asian="Calibri" style:font-family-generic-asian="system" style:font-pitch-asian="variable" style:language-asian="en" style:country-asian="US"/>
    </style:style>
    <style:style style:name="Contents_20_8" style:display-name="Contents 8" style:family="paragraph" style:parent-style-name="Standard" style:next-style-name="Standard" style:auto-update="true" style:class="index">
      <style:paragraph-properties fo:margin-top="0cm" fo:margin-bottom="0cm" style:contextual-spacing="false"/>
      <style:text-properties style:font-name-asian="Calibri1" style:font-family-asian="Calibri" style:font-family-generic-asian="system" style:font-pitch-asian="variable" style:language-asian="en" style:country-asian="US"/>
    </style:style>
    <style:style style:name="Contents_20_9" style:display-name="Contents 9" style:family="paragraph" style:parent-style-name="Standard" style:next-style-name="Standard" style:auto-update="true" style:class="index">
      <style:paragraph-properties fo:margin-top="0cm" fo:margin-bottom="0cm" style:contextual-spacing="false"/>
      <style:text-properties style:font-name-asian="Calibri1" style:font-family-asian="Calibri" style:font-family-generic-asian="system" style:font-pitch-asian="variable" style:language-asian="en" style:country-asian="U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rginalia" style:family="paragraph" style:parent-style-name="Standard" loext:linked-style-name="Texto_20_comentario_20_C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Asunto_20_del_20_comentario_20_Car">
      <style:text-properties fo:font-weight="bold" style:font-weight-asian="bold" style:font-weight-complex="bold"/>
    </style:style>
    <style:style style:name="Default" style:family="paragraph">
      <style:paragraph-properties fo:margin-top="0cm" fo:margin-bottom="0cm" style:contextual-spacing="false" fo:line-height="100%" fo:text-align="start" style:justify-single-word="false" fo:orphans="2" fo:widows="2" fo:hyphenation-ladder-count="no-limit" style:writing-mode="lr-tb"/>
      <style:text-properties fo:color="#000000" loext:opacity="100%" style:font-name="Century Gothic" fo:font-family="'Century Gothic'" style:font-family-generic="roman" fo:font-size="12pt" fo:language="es" fo:country="PE" style:letter-kerning="false" style:font-name-asian="F" style:font-family-generic-asian="system" style:font-pitch-asian="variable" style:font-size-asian="12pt" style:language-asian="es" style:country-asian="PE" style:font-name-complex="Century Gothic1" style:font-family-complex="'Century Gothic'"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_23_2" style:display-name="Heading #2" style:family="paragraph" style:parent-style-name="Standard" loext:linked-style-name="Heading_20__23_2_5f_" style:default-outline-level="2" style:list-style-name="">
      <loext:graphic-properties draw:fill="solid" draw:fill-color="#ffffff"/>
      <style:paragraph-properties fo:margin-top="0cm" fo:margin-bottom="0.529cm" style:contextual-spacing="false" style:line-height-at-least="0cm" fo:text-align="center" style:justify-single-word="false" fo:text-indent="-0.741cm" style:auto-text-indent="false" fo:background-color="#ffffff"/>
      <style:text-properties style:font-name="Times New Roman" fo:font-family="'Times New Roman'" style:font-family-generic="roman" fo:font-size="10.5pt" style:font-name-asian="Times New Roman1" style:font-family-asian="'Times New Roman'"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Texto_20_independiente4" style:display-name="Texto independiente4" style:family="paragraph" style:parent-style-name="Standard" loext:linked-style-name="Body_20_text_5f_">
      <loext:graphic-properties draw:fill="solid" draw:fill-color="#ffffff"/>
      <style:paragraph-properties fo:margin-top="0.529cm" fo:margin-bottom="0.318cm" style:contextual-spacing="false" fo:line-height="0.508cm" fo:text-align="justify" style:justify-single-word="false" fo:text-indent="-0.741cm" style:auto-text-indent="false" fo:background-color="#ffffff"/>
      <style:text-properties style:font-name="Times New Roman" fo:font-family="'Times New Roman'" style:font-family-generic="roman" fo:font-size="10.5pt" style:font-name-asian="Times New Roman1" style:font-family-asian="'Times New Roman'"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Cuerpo_20_del_20_texto1" style:display-name="Cuerpo del texto1" style:family="paragraph" style:parent-style-name="Standard" loext:linked-style-name="Cuerpo_20_del_20_texto_5f_">
      <loext:graphic-properties draw:fill="solid" draw:fill-color="#ffffff"/>
      <style:paragraph-properties fo:margin-top="0.529cm" fo:margin-bottom="0.423cm" style:contextual-spacing="false" style:line-height-at-least="0.423cm" fo:orphans="0" fo:widows="0" fo:text-indent="-1.164cm" style:auto-text-indent="false" fo:background-color="#ffffff"/>
      <style:text-properties style:font-name="Arial Narrow" fo:font-family="'Arial Narrow'" style:font-family-generic="roman" fo:font-size="9.5pt" fo:font-weight="bold" style:font-size-asian="9.5pt" style:font-weight-asian="bold" style:font-name-complex="Arial Narrow1" style:font-family-complex="'Arial Narrow'" style:font-family-generic-complex="system" style:font-pitch-complex="variable" style:font-size-complex="9.5pt" style:font-weight-complex="bold"/>
    </style:style>
    <style:style style:name="Subtitle" style:family="paragraph" style:parent-style-name="Standard" loext:linked-style-name="Subtítulo_20_Car" style:class="chapter">
      <style:paragraph-properties fo:margin-top="0cm" fo:margin-bottom="0cm" style:contextual-spacing="false" fo:line-height="100%" fo:text-align="center" style:justify-single-word="false"/>
      <style:text-properties style:font-name="Arial" fo:font-family="Arial" style:font-family-generic="roman"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Body_20_Text_20_Indent_20_3" style:display-name="Body Text Indent 3" style:family="paragraph" style:parent-style-name="Standard" loext:linked-style-name="Sangría_20_3_20_de_20_t._20_independiente_20_Car">
      <style:paragraph-properties fo:margin-left="1.251cm" fo:margin-top="0cm" fo:margin-bottom="0cm" style:contextual-spacing="false" fo:line-height="150%" fo:text-align="justify" style:justify-single-word="false"/>
      <style:text-properties style:font-name="Arial" fo:font-family="Arial" style:font-family-generic="roman" fo:language="es" fo:country="ES"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Body_20_Text_2c__20_Indented" style:display-name="Body Text, Indented" style:family="paragraph" style:parent-style-name="Standard" loext:linked-style-name="Sangría_20_de_20_texto_20_normal_20_Car">
      <style:paragraph-properties fo:margin-left="0.751cm" fo:margin-top="0cm" fo:margin-bottom="0cm" style:contextual-spacing="false" fo:line-height="150%" fo:text-align="justify" style:justify-single-word="false"/>
      <style:text-properties style:font-name="Arial" fo:font-family="Arial" style:font-family-generic="roman" fo:language="es" fo:country="ES"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Body_20_Text_20_2" style:display-name="Body Text 2" style:family="paragraph" style:parent-style-name="Standard" loext:linked-style-name="Texto_20_independiente_20_2_20_Car">
      <style:paragraph-properties fo:margin-top="0cm" fo:margin-bottom="0cm" style:contextual-spacing="false" fo:line-height="150%" fo:text-align="justify" style:justify-single-word="false"/>
      <style:text-properties style:font-name="Arial" fo:font-family="Arial" style:font-family-generic="roman" fo:language="es" fo:country="ES"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Body_20_Text_20_31" style:display-name="Body Text 31" style:family="paragraph" style:parent-style-name="Standard">
      <style:paragraph-properties fo:margin-top="0cm" fo:margin-bottom="0cm" style:contextual-spacing="false" fo:line-height="100%" fo:text-align="justify" style:justify-single-word="false" style:punctuation-wrap="simple" style:vertical-align="baseline"/>
      <style:text-properties style:font-name="Arial" fo:font-family="Arial" style:font-family-generic="roman"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2pt"/>
    </style:style>
    <style:style style:name="Body_20_Text_20_Indent_20_32" style:display-name="Body Text Indent 32" style:family="paragraph" style:parent-style-name="Standard">
      <style:paragraph-properties fo:margin-left="1.249cm" fo:margin-top="0cm" fo:margin-bottom="0cm" style:contextual-spacing="false" fo:line-height="100%" fo:text-align="justify" style:justify-single-word="false" style:punctuation-wrap="simple" style:vertical-align="baseline"/>
      <style:text-properties style:font-name="Arial" fo:font-family="Arial" style:font-family-generic="roman"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0pt"/>
    </style:style>
    <style:style style:name="_32_" style:display-name="2" style:family="paragraph" style:parent-style-name="Standard" style:next-style-name="Title" loext:linked-style-name="Título_20_Car">
      <style:paragraph-properties fo:margin-top="0cm" fo:margin-bottom="0cm" style:contextual-spacing="false" fo:line-height="100%" fo:text-align="center" style:justify-single-word="false"/>
      <style:text-properties style:font-name="Tahoma" fo:font-family="Tahoma" style:font-family-generic="roman" fo:font-size="10pt" fo:language="es" fo:country="MX" fo:font-weight="bold" style:font-name-asian="Times New Roman1" style:font-family-asian="'Times New Roman'" style:font-family-generic-asian="system" style:font-pitch-asian="variable" style:font-size-asian="10pt" style:language-asian="es" style:country-asian="ES" style:font-weight-asian="bold" style:font-name-complex="Tahoma1" style:font-family-complex="Tahoma" style:font-family-generic-complex="system" style:font-pitch-complex="variable" style:font-size-complex="12pt" style:font-weight-complex="bold"/>
    </style:style>
    <style:style style:name="Body_20_Text_20_Indent_20_2" style:display-name="Body Text Indent 2" style:family="paragraph" style:parent-style-name="Standard" loext:linked-style-name="Sangría_20_2_20_de_20_t._20_independiente_20_Car">
      <style:paragraph-properties fo:margin-left="0.499cm" fo:margin-top="0cm" fo:margin-bottom="0.212cm" style:contextual-spacing="false" fo:line-height="200%"/>
      <style:text-properties style:font-name="Times New Roman" fo:font-family="'Times New Roman'" style:font-family-generic="roman"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Texto_20_1" style:display-name="Texto 1" style:family="paragraph" style:parent-style-name="Standard">
      <style:paragraph-properties fo:margin-top="0.212cm" fo:margin-bottom="0.106cm" style:contextual-spacing="false" fo:line-height="100%" fo:text-align="justify" style:justify-single-word="false"/>
      <style:text-properties style:font-name="Arial" fo:font-family="Arial" style:font-family-generic="roman"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2pt"/>
    </style:style>
    <style:style style:name="Texto_20_2" style:display-name="Texto 2" style:family="paragraph" style:parent-style-name="Texto_20_1">
      <style:paragraph-properties fo:margin-left="0.501cm"/>
    </style:style>
    <style:style style:name="Texto_20_4" style:display-name="Texto 4" style:family="paragraph" style:parent-style-name="Texto_20_3">
      <style:paragraph-properties fo:margin-left="2cm"/>
    </style:style>
    <style:style style:name="Texto_20_3" style:display-name="Texto 3" style:family="paragraph" style:parent-style-name="Texto_20_2">
      <style:paragraph-properties fo:margin-left="1.501cm"/>
    </style:style>
    <style:style style:name="Bullet_20_2" style:display-name="Bullet 2" style:family="paragraph" style:parent-style-name="Texto_20_2" style:next-style-name="Texto_20_2">
      <style:paragraph-properties fo:margin-left="1.771cm" fo:text-indent="-0.635cm" style:auto-text-indent="false">
        <style:tab-stops>
          <style:tab-stop style:position="1.771cm"/>
        </style:tab-stops>
      </style:paragraph-properties>
    </style:style>
    <style:style style:name="Bullet_20_3" style:display-name="Bullet 3" style:family="paragraph" style:parent-style-name="Texto_20_3" style:next-style-name="Texto_20_3">
      <style:paragraph-properties fo:margin-left="2.771cm" fo:text-indent="-0.635cm" style:auto-text-indent="false">
        <style:tab-stops>
          <style:tab-stop style:position="2.771cm"/>
        </style:tab-stops>
      </style:paragraph-properties>
    </style:style>
    <style:style style:name="Bullet_20_4" style:display-name="Bullet 4" style:family="paragraph" style:parent-style-name="Texto_20_4" style:next-style-name="Texto_20_4">
      <style:paragraph-properties fo:margin-left="3.27cm" fo:text-indent="-0.635cm" style:auto-text-indent="false">
        <style:tab-stops>
          <style:tab-stop style:position="3.27cm"/>
        </style:tab-stops>
      </style:paragraph-properties>
    </style:style>
    <style:style style:name="Bullet_20_1" style:display-name="Bullet 1" style:family="paragraph" style:parent-style-name="Texto_20_1" style:next-style-name="Texto_20_1" style:list-style-name="WWNum2" style:list-level="1"/>
    <style:style style:name="Body_20_Text_20_3" style:display-name="Body Text 3" style:family="paragraph" style:parent-style-name="Standard" loext:linked-style-name="Texto_20_independiente_20_3_20_Car">
      <style:paragraph-properties fo:margin-top="0cm" fo:margin-bottom="0.212cm" style:contextual-spacing="false" fo:line-height="100%"/>
      <style:text-properties style:font-name="Times New Roman" fo:font-family="'Times New Roman'" style:font-family-generic="roman" fo:font-size="8pt" fo:language="es" fo:country="ES" style:font-name-asian="Times New Roman1" style:font-family-asian="'Times New Roman'" style:font-family-generic-asian="system" style:font-pitch-asian="variable" style:font-size-asian="8pt" style:language-asian="es" style:country-asian="ES" style:font-name-complex="Times New Roman1" style:font-family-complex="'Times New Roman'" style:font-family-generic-complex="system" style:font-pitch-complex="variable" style:font-size-complex="8pt"/>
    </style:style>
    <style:style style:name="Endnote" style:family="paragraph" style:parent-style-name="Standard" loext:linked-style-name="Texto_20_nota_20_al_20_final_20_Car" style:class="extra">
      <style:paragraph-properties fo:margin-top="0cm" fo:margin-bottom="0cm" style:contextual-spacing="false" fo:line-height="100%"/>
      <style:text-properties style:font-name="Times New Roman" fo:font-family="'Times New Roman'" style:font-family-generic="roman"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texto" style:family="paragraph" style:parent-style-name="Standard">
      <style:paragraph-properties fo:margin-top="0.212cm" fo:margin-bottom="0cm" style:contextual-spacing="false" fo:line-height="100%" fo:text-align="justify" style:justify-single-word="false" style:punctuation-wrap="simple" style:vertical-align="baseline"/>
      <style:text-properties style:font-name="Times" fo:font-family="Times" style:font-family-generic="roman" fo:font-size="12pt" style:rfc-language-tag="es-ES-u-co-trad" fo:language="es" fo:country="E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AvK" style:family="paragraph" style:parent-style-name="Standard">
      <style:paragraph-properties fo:margin-top="0cm" fo:margin-bottom="0cm" style:contextual-spacing="false" fo:line-height="100%" fo:text-align="justify" style:justify-single-word="false"/>
      <style:text-properties style:font-name="Arial" fo:font-family="Arial" style:font-family-generic="roman"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0cm" fo:text-indent="0cm" style:auto-text-indent="false"/>
      <style:text-properties fo:color="#365f91" loext:opacity="100%" style:font-name="Cambria" fo:font-family="Cambria" style:font-family-generic="roman" style:font-name-asian="Times New Roman1" style:font-family-asian="'Times New Roman'" style:font-family-generic-asian="system" style:font-pitch-asian="variable" style:language-asian="es" style:country-asian="P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Table_20_Paragraph" style:display-name="Table Paragraph" style:family="paragraph" style:parent-style-name="Standard">
      <style:paragraph-properties fo:margin-top="0cm" fo:margin-bottom="0cm" style:contextual-spacing="false" fo:line-height="100%" fo:orphans="0" fo:widows="0"/>
      <style:text-properties style:font-name="Calibri" fo:font-family="Calibri" style:font-family-generic="roman" fo:language="en" fo:country="US"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style>
    <style:style style:name="_31_" style:display-name="1" style:family="paragraph" style:parent-style-name="Standard" style:next-style-name="Title">
      <style:paragraph-properties fo:margin-top="0cm" fo:margin-bottom="0cm" style:contextual-spacing="false" fo:line-height="100%" fo:text-align="center" style:justify-single-word="false"/>
      <style:text-properties style:font-name="Tahoma" fo:font-family="Tahoma" style:font-family-generic="roman" fo:font-size="10pt" fo:language="es" fo:country="MX" fo:font-weight="bold" style:font-name-asian="Times New Roman1" style:font-family-asian="'Times New Roman'" style:font-family-generic-asian="system" style:font-pitch-asian="variable" style:font-size-asian="10pt" style:language-asian="es" style:country-asian="ES" style:font-weight-asian="bold" style:font-name-complex="Tahoma1" style:font-family-complex="Tahoma" style:font-family-generic-complex="system" style:font-pitch-complex="variable" style:font-size-complex="12pt" style:font-weight-complex="bold"/>
    </style:style>
    <style:style style:name="Titulo_20_2" style:display-name="Titulo 2" style:family="paragraph" style:parent-style-name="Heading_20_2" loext:linked-style-name="Titulo_20_2_20_Car" style:default-outline-level="2" style:list-style-name="">
      <style:paragraph-properties fo:margin-left="1.27cm" fo:margin-top="0.423cm" fo:margin-bottom="0.106cm" style:contextual-spacing="false" fo:line-height="100%" fo:keep-together="auto" fo:text-indent="-0.635cm" style:auto-text-indent="false">
        <style:tab-stops>
          <style:tab-stop style:position="1.251cm"/>
        </style:tab-stops>
      </style:paragraph-properties>
      <style:text-properties style:use-window-font-color="true" loext:opacity="0%" style:font-name="Arial Narrow" fo:font-family="'Arial Narrow'" style:font-family-generic="roman" fo:font-size="12pt" style:font-name-asian="Arial Unicode MS" style:font-family-asian="'Arial Unicode MS'" style:font-family-generic-asian="system" style:font-pitch-asian="variable" style:font-size-asian="12pt" style:language-asian="es" style:country-asian="PE" style:font-name-complex="Times New Roman1" style:font-family-complex="'Times New Roman'" style:font-family-generic-complex="system" style:font-pitch-complex="variable" style:font-style-complex="italic">
        <loext:char-complex-color loext:theme-type="accent1" loext:color-type="theme"/>
      </style:text-properties>
    </style:style>
    <style:style style:name="Titul_20_3" style:display-name="Titul 3" style:family="paragraph" style:parent-style-name="Titulo_20_2">
      <style:paragraph-properties fo:margin-left="3.81cm" fo:text-indent="-0.318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365f91" loext:opacity="100%" style:font-name="Cambria" fo:font-family="Cambria" style:font-family-generic="roman" fo:font-size="14pt" fo:font-weight="bold" style:font-name-asian="F" style:font-family-generic-asian="system" style:font-pitch-asian="variable" style:font-size-asian="14pt" style:language-asian="en" style:country-asian="US"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4f81bd" loext:opacity="100%" style:font-name="Cambria" fo:font-family="Cambria" style:font-family-generic="roman" fo:font-size="13pt" fo:font-weight="bold" style:font-name-asian="F" style:font-family-generic-asian="system" style:font-pitch-asian="variable" style:font-size-asian="13pt" style:language-asian="en" style:country-asian="US"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Título_20_3_20_Car" style:display-name="Título 3 Car" style:family="text" style:parent-style-name="Default_20_Paragraph_20_Font">
      <style:text-properties fo:color="#4f81bd" loext:opacity="100%" style:font-name="Cambria" fo:font-family="Cambria" style:font-family-generic="roman" fo:font-weight="bold" style:font-name-asian="F" style:font-family-generic-asian="system" style:font-pitch-asian="variable" style:language-asian="en" style:country-asian="US" style:font-weight-asian="bold" style:font-name-complex="F" style:font-family-generic-complex="system" style:font-pitch-complex="variable" style:font-weight-complex="bold">
        <loext:char-complex-color loext:theme-type="accent1" loext:color-type="theme"/>
      </style:text-properties>
    </style:style>
    <style:style style:name="Título_20_4_20_Car" style:display-name="Título 4 Car" style:family="text" style:parent-style-name="Default_20_Paragraph_20_Font">
      <style:text-properties fo:color="#4f81bd" loext:opacity="100%" style:font-name="Cambria" fo:font-family="Cambria" style:font-family-generic="roman" fo:font-style="italic" fo:font-weight="bold" style:font-name-asian="F" style:font-family-generic-asian="system" style:font-pitch-asian="variable" style:language-asian="en" style:country-asian="US"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Título_20_5_20_Car" style:display-name="Título 5 Car" style:family="text" style:parent-style-name="Default_20_Paragraph_20_Font">
      <style:text-properties fo:color="#243f60" loext:opacity="100%" style:font-name="Cambria" fo:font-family="Cambria" style:font-family-generic="roman" style:font-name-asian="F" style:font-family-generic-asian="system" style:font-pitch-asian="variable" style:language-asian="en" style:country-asian="US" style:font-name-complex="F" style:font-family-generic-complex="system" style:font-pitch-complex="variable">
        <loext:char-complex-color loext:theme-type="accent1" loext:color-type="theme">
          <loext:transformation loext:type="shade" loext:value="5019"/>
        </loext:char-complex-color>
      </style:text-properties>
    </style:style>
    <style:style style:name="Título_20_6_20_Car" style:display-name="Título 6 Car" style:family="text" style:parent-style-name="Default_20_Paragraph_20_Font">
      <style:text-properties fo:color="#243f60" loext:opacity="100%" style:font-name="Cambria" fo:font-family="Cambria" style:font-family-generic="roman" fo:font-style="italic" style:font-name-asian="F" style:font-family-generic-asian="system" style:font-pitch-asian="variable" style:language-asian="en" style:country-asian="US"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Título_20_7_20_Car" style:display-name="Título 7 Car" style:family="text" style:parent-style-name="Default_20_Paragraph_20_Font">
      <style:text-properties fo:color="#404040" loext:opacity="100%" style:font-name="Cambria" fo:font-family="Cambria" style:font-family-generic="roman" fo:font-style="italic" style:font-name-asian="F" style:font-family-generic-asian="system" style:font-pitch-asian="variable" style:language-asian="en" style:country-asian="US"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Título_20_8_20_Car" style:display-name="Título 8 Car" style:family="text" style:parent-style-name="Default_20_Paragraph_20_Font">
      <style:text-properties fo:color="#404040" loext:opacity="100%" style:font-name="Cambria" fo:font-family="Cambria" style:font-family-generic="roman" fo:font-size="10pt" style:font-name-asian="F" style:font-family-generic-asian="system" style:font-pitch-asian="variable" style:font-size-asian="10pt" style:language-asian="en" style:country-asian="US" style:font-name-complex="F" style:font-family-generic-complex="system" style:font-pitch-complex="variable" style:font-size-complex="10pt">
        <loext:char-complex-color loext:theme-type="dark1" loext:color-type="theme">
          <loext:transformation loext:type="tint" loext:value="2509"/>
        </loext:char-complex-color>
      </style:text-properties>
    </style:style>
    <style:style style:name="Título_20_9_20_Car" style:display-name="Título 9 Car" style:family="text" style:parent-style-name="Default_20_Paragraph_20_Font">
      <style:text-properties fo:color="#404040" loext:opacity="100%" style:font-name="Cambria" fo:font-family="Cambria" style:font-family-generic="roman" fo:font-size="10pt" fo:font-style="italic" style:font-name-asian="F" style:font-family-generic-asian="system" style:font-pitch-asian="variable" style:font-size-asian="10pt" style:language-asian="en" style:country-asian="US"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loext:linked-style-name="Balloon_20_Text">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Título_20_Car1" style:display-name="Título Car1" style:family="text" style:parent-style-name="Default_20_Paragraph_20_Font">
      <style:text-properties fo:color="#17365d" loext:opacity="100%" style:font-name="Cambria" fo:font-family="Cambria" style:font-family-generic="roman" fo:font-size="26pt" fo:letter-spacing="0.009cm" style:letter-kerning="true" style:font-name-asian="F" style:font-family-generic-asian="system" style:font-pitch-asian="variable" style:font-size-asian="26pt" style:language-asian="en" style:country-asian="US"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Párrafo_20_de_20_lista_20_Car" style:display-name="Párrafo de lista Car" style:family="text" loext:linked-style-name="List_20_Paragraph">
      <style:text-properties style:font-name-asian="Calibri1" style:font-family-asian="Calibri" style:font-family-generic-asian="system" style:font-pitch-asian="variable" style:language-asian="en" style:country-asian="U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Texto_20_nota_20_pie_20_Car" style:display-name="Texto nota pie Car" style:family="text" style:parent-style-name="Default_20_Paragraph_20_Font">
      <style:text-properties fo:font-size="10pt" style:font-name-asian="Calibri1" style:font-family-asian="Calibri" style:font-family-generic-asian="system" style:font-pitch-asian="variable" style:font-size-asian="10pt" style:language-asian="en" style:country-asian="US"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Sin_20_espaciado_20_Car" style:display-name="Sin espaciado Car" style:family="text" style:parent-style-name="Default_20_Paragraph_20_Font" loext:linked-style-name="No_20_Spacing">
      <style:text-properties style:language-asian="en" style:country-asian="US"/>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loext:linked-style-name="annotation_20_subject">
      <style:text-properties fo:font-size="10pt" fo:font-weight="bold" style:font-size-asian="10pt" style:font-weight-asian="bold" style:font-size-complex="10pt" style:font-weight-complex="bold"/>
    </style:style>
    <style:style style:name="Heading_20__23_2_5f_" style:display-name="Heading #2_" style:family="text" style:parent-style-name="Default_20_Paragraph_20_Font" loext:linked-style-name="Heading_20__23_2">
      <style:text-properties style:font-name="Times New Roman" fo:font-family="'Times New Roman'" style:font-family-generic="roman" fo:font-size="10.5pt" fo:background-color="#ffffff" style:font-name-asian="Times New Roman1" style:font-family-asian="'Times New Roman'"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Body_20_text_5f_" style:display-name="Body text_" style:family="text" style:parent-style-name="Default_20_Paragraph_20_Font" loext:linked-style-name="Texto_20_independiente4">
      <style:text-properties style:font-name="Times New Roman" fo:font-family="'Times New Roman'" style:font-family-generic="roman" fo:font-size="10.5pt" fo:background-color="#ffffff" style:font-name-asian="Times New Roman1" style:font-family-asian="'Times New Roman'"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eading_20__23_2_20__2b__20_Not_20_Bold" style:display-name="Heading #2 + Not Bold" style:family="text" style:parent-style-name="Heading_20__23_2_5f_">
      <style:text-properties style:font-name="Times New Roman" fo:font-family="'Times New Roman'" style:font-family-generic="roman" fo:font-size="10.5pt" fo:font-weight="bold" fo:background-color="#ffffff" style:font-name-asian="Times New Roman1" style:font-family-asian="'Times New Roman'" style:font-family-generic-asian="system" style:font-pitch-asian="variable" style:font-size-asian="10.5pt" style:font-weight-asian="bold" style:font-name-complex="Times New Roman1" style:font-family-complex="'Times New Roman'" style:font-family-generic-complex="system" style:font-pitch-complex="variable" style:font-size-complex="10.5pt" style:font-weight-complex="bold"/>
    </style:style>
    <style:style style:name="Body_20_text_20__2b__20_Bold" style:display-name="Body text + Bold" style:family="text" style:parent-style-name="Body_20_text_5f_">
      <style:text-properties fo:font-variant="normal" fo:text-transform="none" style:text-line-through-style="none" style:text-line-through-type="none" style:font-name="Times New Roman" fo:font-family="'Times New Roman'" style:font-family-generic="roman" fo:font-size="10.5pt" fo:letter-spacing="normal" fo:font-style="normal" fo:font-weight="bold" fo:background-color="#ffffff" style:font-name-asian="Times New Roman1" style:font-family-asian="'Times New Roman'" style:font-family-generic-asian="system" style:font-pitch-asian="variable" style:font-size-asian="10.5pt" style:font-style-asian="normal" style:font-weight-asian="bold" style:font-name-complex="Times New Roman1" style:font-family-complex="'Times New Roman'" style:font-family-generic-complex="system" style:font-pitch-complex="variable" style:font-size-complex="10.5pt" style:font-style-complex="normal" style:font-weight-complex="bold"/>
    </style:style>
    <style:style style:name="Cuerpo_20_del_20_texto_5f_" style:display-name="Cuerpo del texto_" style:family="text" loext:linked-style-name="Cuerpo_20_del_20_texto1">
      <style:text-properties style:font-name="Arial Narrow" fo:font-family="'Arial Narrow'" style:font-family-generic="roman" fo:font-size="9.5pt" fo:font-weight="bold" fo:background-color="#ffffff" style:font-size-asian="9.5pt" style:font-weight-asian="bold" style:font-name-complex="Arial Narrow1" style:font-family-complex="'Arial Narrow'" style:font-family-generic-complex="system" style:font-pitch-complex="variable" style:font-size-complex="9.5pt" style:font-weight-complex="bold"/>
    </style:style>
    <style:style style:name="apple-converted-space" style:family="text"/>
    <style:style style:name="Subtítulo_20_Car" style:display-name="Subtítulo Car" style:family="text" style:parent-style-name="Default_20_Paragraph_20_Font">
      <style:text-properties style:font-name="Arial" fo:font-family="Arial" style:font-family-generic="roman"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TML_20_Cite" style:display-name="HTML Cite" style:family="text" style:parent-style-name="Default_20_Paragraph_20_Font">
      <style:text-properties fo:font-style="italic" style:font-style-asian="italic" style:font-style-complex="italic"/>
    </style:style>
    <style:style style:name="Sangría_20_3_20_de_20_t._20_independiente_20_Car" style:display-name="Sangría 3 de t. independiente Car" style:family="text" style:parent-style-name="Default_20_Paragraph_20_Font" loext:linked-style-name="Body_20_Text_20_Indent_20_3">
      <style:text-properties style:font-name="Arial" fo:font-family="Arial" style:font-family-generic="roman" fo:language="es" fo:country="ES"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Sangría_20_de_20_texto_20_normal_20_Car" style:display-name="Sangría de texto normal Car" style:family="text" style:parent-style-name="Default_20_Paragraph_20_Font">
      <style:text-properties style:font-name="Arial" fo:font-family="Arial" style:font-family-generic="roman" fo:language="es" fo:country="ES"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Texto_20_independiente_20_Car" style:display-name="Texto independiente Car" style:family="text" style:parent-style-name="Default_20_Paragraph_20_Font">
      <style:text-properties style:font-name="Arial" fo:font-family="Arial" style:font-family-generic="roman" fo:language="es" fo:country="ES" fo:font-weight="bold" style:font-name-asian="Times New Roman1" style:font-family-asian="'Times New Roman'" style:font-family-generic-asian="system" style:font-pitch-asian="variable" style:language-asian="es" style:country-asian="ES" style:font-weight-asian="bold" style:font-name-complex="Arial1" style:font-family-complex="Arial" style:font-family-generic-complex="system" style:font-pitch-complex="variable" style:font-size-complex="10pt" style:font-weight-complex="bold"/>
    </style:style>
    <style:style style:name="Texto_20_independiente_20_2_20_Car" style:display-name="Texto independiente 2 Car" style:family="text" style:parent-style-name="Default_20_Paragraph_20_Font" loext:linked-style-name="Body_20_Text_20_2">
      <style:text-properties style:font-name="Arial" fo:font-family="Arial" style:font-family-generic="roman" fo:language="es" fo:country="ES"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HTML_20_Typewriter" style:display-name="HTML Typewriter" style:family="text">
      <style:text-properties style:font-name="Courier New" fo:font-family="'Courier New'" style:font-family-generic="roman"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Page_20_Number1" style:display-name="Page Number1"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parent-style-name="Default_20_Paragraph_20_Font"/>
    <style:style style:name="Título_20_Car" style:display-name="Título Car" style:family="text" loext:linked-style-name="_32_">
      <style:text-properties style:font-name="Tahoma" fo:font-family="Tahoma" style:font-family-generic="roman" fo:font-size="10pt" fo:language="es" fo:country="MX" fo:font-weight="bold" style:font-name-asian="Times New Roman1" style:font-family-asian="'Times New Roman'" style:font-family-generic-asian="system" style:font-pitch-asian="variable" style:font-size-asian="10pt" style:language-asian="es" style:country-asian="ES" style:font-weight-asian="bold" style:font-name-complex="Tahoma1" style:font-family-complex="Tahoma" style:font-family-generic-complex="system" style:font-pitch-complex="variable" style:font-size-complex="12pt" style:font-weight-complex="bold"/>
    </style:style>
    <style:style style:name="Sangría_20_2_20_de_20_t._20_independiente_20_Car" style:display-name="Sangría 2 de t. independiente Car" style:family="text" style:parent-style-name="Default_20_Paragraph_20_Font" loext:linked-style-name="Body_20_Text_20_Indent_20_2">
      <style:text-properties style:font-name="Times New Roman" fo:font-family="'Times New Roman'" style:font-family-generic="roman"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Texto_20_independiente_20_3_20_Car" style:display-name="Texto independiente 3 Car" style:family="text" style:parent-style-name="Default_20_Paragraph_20_Font" loext:linked-style-name="Body_20_Text_20_3">
      <style:text-properties style:font-name="Times New Roman" fo:font-family="'Times New Roman'" style:font-family-generic="roman" fo:font-size="8pt" fo:language="es" fo:country="ES" style:font-name-asian="Times New Roman1" style:font-family-asian="'Times New Roman'" style:font-family-generic-asian="system" style:font-pitch-asian="variable" style:font-size-asian="8pt" style:language-asian="es" style:country-asian="ES" style:font-name-complex="Times New Roman1" style:font-family-complex="'Times New Roman'" style:font-family-generic-complex="system" style:font-pitch-complex="variable" style:font-size-complex="8pt"/>
    </style:style>
    <style:style style:name="Texto_20_nota_20_al_20_final_20_Car" style:display-name="Texto nota al final Car" style:family="text" style:parent-style-name="Default_20_Paragraph_20_Font">
      <style:text-properties style:font-name="Times New Roman" fo:font-family="'Times New Roman'" style:font-family-generic="roman"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Characters" style:display-name="Endnote Characters" style:family="text">
      <style:text-properties style:text-position="super 58%"/>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st1" style:family="text" style:parent-style-name="Default_20_Paragraph_20_Font"/>
    <style:style style:name="Titulo_20_2_20_Car" style:display-name="Titulo 2 Car" style:family="text" loext:linked-style-name="Titulo_20_2">
      <style:text-properties style:font-name="Arial Narrow" fo:font-family="'Arial Narrow'" style:font-family-generic="roman" fo:font-size="12pt" fo:font-weight="bold" style:font-name-asian="Arial Unicode MS" style:font-family-asian="'Arial Unicode MS'" style:font-family-generic-asian="system" style:font-pitch-asian="variable" style:font-size-asian="12pt" style:font-weight-asian="bold" style:font-name-complex="Times New Roman1" style:font-family-complex="'Times New Roman'" style:font-family-generic-complex="system" style:font-pitch-complex="variable" style:font-size-complex="13pt" style:font-style-complex="italic" style:font-weight-complex="bold"/>
    </style:style>
    <style:style style:name="Line_20_Numbering" style:display-name="Line Numbering" style:family="text"/>
    <style:style style:name="ListLabel_20_1" style:display-name="ListLabel 1" style:family="text">
      <style:text-properties fo:font-size="12pt" style:font-size-asian="12pt"/>
    </style:style>
    <style:style style:name="ListLabel_20_2" style:display-name="ListLabel 2" style:family="text">
      <style:text-properties fo:color="#0070c0" loext:opacity="100%" fo:font-weight="bold" style:font-weight-asian="bold"/>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style style:name="ListLabel_20_20" style:display-name="ListLabel 20" style:family="text">
      <style:text-properties fo:font-weight="bold" style:font-weight-asian="bold"/>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rial" fo:font-family="Arial" style:font-family-generic="roman" fo:font-size="10.5pt" fo:font-style="normal" fo:font-weight="normal" style:font-size-asian="10.5pt" style:font-style-asian="normal" style:font-weight-asian="normal"/>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1pt" fo:font-weight="bold" style:font-size-asian="11pt" style:font-weight-asian="bold"/>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Arial1" style:font-family-complex="Arial"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Wingdings1" style:font-family-complex="Wingdings"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18cm" fo:margin-left="4.44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0.635cm" fo:margin-left="1.901cm"/>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1.27cm" fo:margin-left="3.803cm"/>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1.27cm" fo:margin-left="5.069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1.905cm" fo:margin-left="6.971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1.905cm" fo:margin-left="8.237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1.905cm" fo:margin-left="9.504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2.54cm" fo:margin-left="11.405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2.54cm" fo:margin-left="12.67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1.191cm" fo:margin-left="2.461cm"/>
        </style:list-level-properties>
        <style:text-properties fo:font-family="Arial" style:font-style-name="Regular"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_20_Spacing">
      <style:paragraph-properties fo:text-align="center" style:justify-single-word="false">
        <style:tab-stops>
          <style:tab-stop style:position="7.5cm" style:type="center"/>
        </style:tab-stops>
      </style:paragraph-properties>
    </style:style>
    <style:style style:name="MP2" style:family="paragraph" style:parent-style-name="No_20_Spacing">
      <style:paragraph-properties fo:text-align="center" style:justify-single-word="false"/>
    </style:style>
    <style:style style:name="MP3" style:family="paragraph" style:parent-style-name="Footer">
      <style:paragraph-properties fo:text-align="end" style:justify-single-word="false"/>
    </style:style>
    <style:style style:name="MP4" style:family="paragraph" style:parent-style-name="Header">
      <style:paragraph-properties fo:text-align="center" style:justify-single-word="false"/>
    </style:style>
    <style:style style:name="MP5" style:family="paragraph" style:parent-style-name="Header">
      <style:paragraph-properties fo:text-align="center" style:justify-single-word="false"/>
      <style:text-properties style:font-name="Arial" fo:font-size="8pt" fo:font-style="italic" style:font-size-asian="8pt" style:font-style-asian="italic" style:font-name-complex="Arial1" style:font-size-complex="9pt"/>
    </style:style>
    <style:style style:name="MT1" style:family="text">
      <style:text-properties style:font-name="Arial" fo:font-size="8pt" fo:font-style="italic" style:font-size-asian="8pt" style:font-style-asian="italic" style:font-name-complex="Arial1" style:font-size-complex="9pt"/>
    </style:style>
    <style:style style:name="M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1.251cm" fo:margin-bottom="1.251cm" fo:margin-left="3.251cm" fo:margin-right="2.498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 20" text:anchor-type="char" svg:x="12.739cm" svg:y="-0.633cm" svg:width="1.459cm" svg:height="1.877cm" draw:z-index="29"><draw:image xlink:href="Pictures/1000000000000096000000C0C694528C.jpg" xlink:type="simple" xlink:show="embed" xlink:actuate="onLoad" draw:mime-type="image/jpeg"/><svg:desc>logo GR</svg:desc><draw:contour-polygon svg:width="1.671cm" svg:height="2.156cm" svg:viewBox="0 0 1671 2156" draw:points="24,0 24,2156 1695,2156 1695,0" draw:recreate-on-edit="false"/></draw:frame><draw:frame draw:style-name="Mfr2" draw:name="Imagen 1" text:anchor-type="char" svg:x="-0.381cm" svg:y="-0.501cm" svg:width="1.58cm" svg:height="1.732cm" draw:z-index="14"><draw:image xlink:href="Pictures/10000001000000490000005009A20BFF.png" xlink:type="simple" xlink:show="embed" xlink:actuate="onLoad" draw:mime-type="image/png"/></draw:frame>|GOBIERNO REGIONAL DE AYACUCHO</text:p>
        <text:p text:style-name="MP2">GERENCIA REGIONAL DE DESARROLLO ECONÓMICO</text:p>
        <text:p text:style-name="Header" loext:marker-style-name="MT1"><text:span text:style-name="MT1"><text:s/>“Año de la Universalización de la Salud”</text:span><text:span text:style-name="MT1"/></text:p>
      </style:header>
      <style:footer>
        <text:p text:style-name="MP3"><text:page-number text:select-page="current">2</text:page-number></text:p>
        <text:p text:style-name="Footer"/>
      </style:footer>
    </style:master-page>
    <style:master-page style:name="Converted1" style:page-layout-name="Mpm2" draw:style-name="Mdp1">
      <style:header>
        <text:p text:style-name="MP1"><draw:frame draw:style-name="Mfr1" draw:name="Imagen 20 Copia 1" text:anchor-type="char" svg:x="12.739cm" svg:y="-0.633cm" svg:width="1.459cm" svg:height="1.877cm" draw:z-index="27"><draw:image xlink:href="Pictures/1000000000000096000000C0C694528C.jpg" xlink:type="simple" xlink:show="embed" xlink:actuate="onLoad" draw:mime-type="image/jpeg"/><svg:desc>logo GR</svg:desc><draw:contour-polygon svg:width="1.671cm" svg:height="2.156cm" svg:viewBox="0 0 1671 2156" draw:points="24,0 24,2156 1695,2156 1695,0" draw:recreate-on-edit="false"/></draw:frame><draw:frame draw:style-name="Mfr2" draw:name="Imagen 1 Copia 1" text:anchor-type="char" svg:x="-0.381cm" svg:y="-0.501cm" svg:width="1.58cm" svg:height="1.732cm" draw:z-index="12"><draw:image xlink:href="Pictures/10000001000000490000005009A20BFF.png" xlink:type="simple" xlink:show="embed" xlink:actuate="onLoad" draw:mime-type="image/png"/></draw:frame>|GOBIERNO REGIONAL DE AYACUCHO</text:p>
        <text:p text:style-name="MP2">GERENCIA REGIONAL DE DESARROLLO ECONÓMICO</text:p>
        <text:p text:style-name="Header" loext:marker-style-name="MT1"><text:span text:style-name="MT1"><text:s text:c="47"/>“Año de la Universalización de la Salud”</text:span><text:span text:style-name="MT1"/></text:p>
      </style:header>
      <style:footer>
        <text:p text:style-name="MP3"><text:page-number text:select-page="current">15</text:page-number></text:p>
        <text:p text:style-name="Footer"/>
      </style:footer>
    </style:master-page>
    <style:master-page style:name="Converted2" style:page-layout-name="Mpm3" draw:style-name="Mdp1">
      <style:header>
        <text:p text:style-name="MP1"><draw:frame draw:style-name="Mfr1" draw:name="Imagen 2" text:anchor-type="char" svg:x="0.598cm" svg:y="-0.746cm" svg:width="1.729cm" svg:height="2.223cm" draw:z-index="0"><draw:image xlink:href="Pictures/1000000000000096000000C0C694528C.jpg" xlink:type="simple" xlink:show="embed" xlink:actuate="onLoad" draw:mime-type="image/jpeg"/><svg:desc>logo GR</svg:desc><draw:contour-polygon svg:width="1.672cm" svg:height="2.196cm" svg:viewBox="0 0 1672 2196" draw:points="24,0 24,2196 1696,2196 1696,0" draw:recreate-on-edit="false"/></draw:frame>GOBIERNO REGIONAL DE AYACUCHO</text:p>
        <text:p text:style-name="MP2">GERENCIA REGIONAL DE DESARROLLO ECONÓMICO</text:p>
        <text:p text:style-name="MP4" loext:marker-style-name="MT1"><text:span text:style-name="MT1">“Año de la consolidación del Mar de Grau”</text:span><text:span text:style-name="MT1"/></text:p>
        <text:p text:style-name="MP5" loext:marker-style-name="MT1"/>
      </style:header>
      <style:header-first>
        <text:p text:style-name="Standard"/>
      </style:header-first>
      <style:footer>
        <text:p text:style-name="MP3"><text:page-number text:select-page="current">0</text:page-number></text:p>
        <text:p text:style-name="Footer"/>
      </style:footer>
      <style:footer-first>
        <text:p text:style-name="Standard"/>
      </style:footer-first>
    </style:master-page>
    <style:master-page style:name="First_20_Page" style:display-name="First 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4"/>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0-15T13:32:00</meta:creation-date>
    <meta:initial-creator>rsilva</meta:initial-creator>
    <dc:language>es-PE</dc:language>
    <dc:creator>Elmer Edison Achalma Mendoza</dc:creator>
    <meta:print-date>2016-10-25T16:16:00</meta:print-date>
    <dc:date>2023-12-31T17:27:47</dc:date>
    <meta:editing-cycles>289</meta:editing-cycles>
    <meta:editing-duration>P1DT4H2M</meta:editing-duration>
    <meta:generator>LibreOffice/24.2.4.2$Linux_X86_64 LibreOffice_project/420$Build-2</meta:generator>
    <meta:document-statistic meta:table-count="45" meta:image-count="5" meta:object-count="1" meta:page-count="16" meta:paragraph-count="806" meta:word-count="5478" meta:character-count="34915" meta:non-whitespace-character-count="30195"/>
    <meta:user-defined meta:name="AppVersion">15.0000</meta:user-defined>
    <meta:user-defined meta:name="Company">MEF</meta:user-defined>
    <meta:template xlink:type="simple" xlink:actuate="onRequest" xlink:title="Normal" xlink:href=""/>
  </office:meta>
</office:document-meta>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graphic-properties draw:fill="solid" draw:fill-color="#ffffff"/>
      <style:text-properties fo:color="#333333" style:text-position="0% 100%" fo:font-family="Calibri" fo:font-size="12pt" fo:language="es" fo:country="PE" fo:font-weight="bold" style:font-family-asian="Calibri" style:font-size-asian="12pt" style:font-weight-asian="bold" style:font-size-complex="12pt" style:font-weight-complex="bold"/>
    </style:style>
    <style:style style:name="ch3" style:family="chart">
      <style:chart-properties chart:auto-position="true"/>
      <style:graphic-properties draw:stroke="none" svg:stroke-width="0.071cm" draw:fill="none" draw:fill-color="#d9d9d9"/>
      <style:text-properties fo:color="#333333" style:text-position="0% 100%" fo:font-family="Calibri" fo:font-size="7.55000019073486pt" fo:language="es" fo:country="PE" style:font-family-asian="Calibri" style:font-size-asian="7.55000019073486pt" style:font-size-complex="7.55000019073486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333333" style:text-position="0% 100%" fo:font-family="Calibri" fo:font-size="9pt" fo:language="es" fo:country="PE" style:font-family-asian="Calibri" style:font-size-asian="9pt" style:font-size-complex="9pt"/>
    </style:style>
    <style:style style:name="ch6" style:family="chart">
      <style:graphic-properties svg:stroke-width="0.026cm" svg:stroke-color="#f2f2f2"/>
    </style:style>
    <style:style style:name="ch7"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Calibri" fo:font-size="10pt" fo:language="es" fo:country="PE" style:font-family-asian="Calibri" style:font-size-asian="10pt" style:font-size-complex="10pt"/>
    </style:style>
    <style:style style:name="ch8" style:family="chart">
      <style:graphic-properties svg:stroke-width="0.026cm" svg:stroke-color="#d9d9d9"/>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79cm" svg:stroke-color="#4f81bd" svg:stroke-linecap="round" draw:fill-color="#4f81bd" fo:wrap-option="wrap"/>
      <style:text-properties fo:color="#000000" style:text-position="0% 100%" fo:font-family="Calibri" fo:font-size="10pt" fo:language="es" fo:country="PE" style:font-family-asian="Calibri" style:font-size-asian="10pt" style:font-size-complex="10pt"/>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79cm" svg:stroke-color="#c0504d" svg:stroke-linecap="round" draw:fill-color="#c0504d" fo:wrap-option="wrap"/>
      <style:text-properties fo:color="#000000" style:text-position="0% 100%" fo:font-family="Calibri" fo:font-size="10pt" fo:language="es" fo:country="PE" style:font-family-asian="Calibri" style:font-size-asian="10pt" style:font-size-complex="10pt"/>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079cm" svg:stroke-color="#9bbb59" svg:stroke-linecap="round" draw:fill-color="#9bbb59" fo:wrap-option="wrap"/>
      <style:text-properties fo:color="#000000" style:text-position="0% 100%" fo:font-family="Calibri" fo:font-size="10pt" fo:language="es" fo:country="PE" style:font-family-asian="Calibri" style:font-size-asian="10pt" style:font-size-complex="10pt"/>
    </style:style>
    <style:style style:name="ch12" style:family="chart">
      <style:graphic-properties svg:stroke-width="0.071cm" draw:fill="none" draw:fill-color="#d9d9d9"/>
    </style:style>
    <style:style style:name="ch13" style:family="chart">
      <style:graphic-properties draw:fill-color="#d9d9d9"/>
    </style:style>
  </office:automatic-styles>
  <office:body>
    <office:chart>
      <chart:chart svg:width="16cm" svg:height="9cm" xlink:href="." xlink:type="simple" chart:class="chart:line" chart:style-name="ch1">
        <chart:title svg:x="4.815cm" svg:y="0.316cm" chart:style-name="ch2">
          <text:p>GRAFICO DE PUNTO DE EQUILIBRIO</text:p>
        </chart:title>
        <chart:legend chart:legend-position="bottom" svg:x="4.281cm" svg:y="8.454cm" style:legend-expansion="wide" chart:style-name="ch3"/>
        <chart:plot-area chart:style-name="ch4" chart:data-source-has-labels="both" svg:x="0.32cm" svg:y="1.253cm" svg:width="15.36cm" svg:height="6.837cm">
          <chart:coordinate-region svg:x="0.32cm" svg:y="1.253cm" svg:width="15.36cm" svg:height="6.367cm"/>
          <chart:axis chart:dimension="x" chart:name="primary-x" chart:style-name="ch5" chartooo:axis-type="auto">
            <chartooo:date-scale/>
            <chart:categories table:cell-range-address="local-table.$A$2:.$A$6"/>
            <chart:grid chart:style-name="ch6" chart:class="minor"/>
          </chart:axis>
          <chart:axis chart:dimension="y" chart:name="primary-y" chart:style-name="ch7">
            <chart:grid chart:style-name="ch8" chart:class="major"/>
          </chart:axis>
          <chart:series chart:style-name="ch9" chart:values-cell-range-address="local-table.$B$2:.$B$6" chart:label-cell-address="local-table.$B$1" chart:class="chart:line">
            <chart:data-point chart:repeated="5"/>
          </chart:series>
          <chart:series chart:style-name="ch10" chart:values-cell-range-address="local-table.$C$2:.$C$6" chart:label-cell-address="local-table.$C$1" chart:class="chart:line">
            <chart:data-point chart:repeated="5"/>
          </chart:series>
          <chart:series chart:style-name="ch11" chart:values-cell-range-address="local-table.$D$2:.$D$6" chart:label-cell-address="local-table.$D$1" chart:class="chart:line">
            <chart:data-point chart:repeated="5"/>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VENTAS</text:p>
              </table:table-cell>
              <table:table-cell office:value-type="string">
                <text:p>COSTOS TOTALES</text:p>
              </table:table-cell>
              <table:table-cell office:value-type="string">
                <text:p>COSTOS FIJOS</text:p>
              </table:table-cell>
            </table:table-row>
          </table:table-header-rows>
          <table:table-rows>
            <table:table-row>
              <table:table-cell office:value-type="string">
                <text:p>1</text:p>
              </table:table-cell>
              <table:table-cell office:value-type="float" office:value="2007500">
                <text:p>2007500</text:p>
              </table:table-cell>
              <table:table-cell office:value-type="float" office:value="3150827.18115039">
                <text:p>3150827.18115039</text:p>
              </table:table-cell>
              <table:table-cell office:value-type="float" office:value="198923.181150393">
                <text:p>198923.181150393</text:p>
              </table:table-cell>
            </table:table-row>
            <table:table-row>
              <table:table-cell office:value-type="string">
                <text:p>2</text:p>
              </table:table-cell>
              <table:table-cell office:value-type="float" office:value="4293038.75">
                <text:p>4293038.75</text:p>
              </table:table-cell>
              <table:table-cell office:value-type="float" office:value="4495509.74415415">
                <text:p>4495509.74415415</text:p>
              </table:table-cell>
              <table:table-cell office:value-type="float" office:value="191797.563003758">
                <text:p>191797.563003758</text:p>
              </table:table-cell>
            </table:table-row>
            <table:table-row>
              <table:table-cell office:value-type="string">
                <text:p>3</text:p>
              </table:table-cell>
              <table:table-cell office:value-type="float" office:value="6895124.616875">
                <text:p>6895124.616875</text:p>
              </table:table-cell>
              <table:table-cell office:value-type="float" office:value="5919570.06538195">
                <text:p>5919570.06538195</text:p>
              </table:table-cell>
              <table:table-cell office:value-type="float" office:value="183246.821227796">
                <text:p>183246.821227796</text:p>
              </table:table-cell>
            </table:table-row>
            <table:table-row>
              <table:table-cell office:value-type="string">
                <text:p>4</text:p>
              </table:table-cell>
              <table:table-cell office:value-type="float" office:value="9588283.48909063">
                <text:p>9588283.48909063</text:p>
              </table:table-cell>
              <table:table-cell office:value-type="float" office:value="7430090.84647859">
                <text:p>7430090.84647859</text:p>
              </table:table-cell>
              <table:table-cell office:value-type="float" office:value="172985.931096641">
                <text:p>172985.931096641</text:p>
              </table:table-cell>
            </table:table-row>
            <table:table-row>
              <table:table-cell office:value-type="string">
                <text:p>5</text:p>
              </table:table-cell>
              <table:table-cell office:value-type="float" office:value="12375702.9218338">
                <text:p>12375702.9218338</text:p>
              </table:table-cell>
              <table:table-cell office:value-type="float" office:value="9034692.04441785">
                <text:p>9034692.04441785</text:p>
              </table:table-cell>
              <table:table-cell office:value-type="float" office:value="160672.862939256">
                <text:p>160672.862939256</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4.2$Linux_X86_64 LibreOffice_project/4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