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79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517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314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7.188cm"/>
    </style:style>
    <style:style style:name="co12" style:family="table-column">
      <style:table-column-properties fo:break-before="auto" style:column-width="0.616cm"/>
    </style:style>
    <style:style style:name="co13" style:family="table-column">
      <style:table-column-properties fo:break-before="auto" style:column-width="6.768cm"/>
    </style:style>
    <style:style style:name="co14" style:family="table-column">
      <style:table-column-properties fo:break-before="auto" style:column-width="1.873cm"/>
    </style:style>
    <style:style style:name="co15" style:family="table-column">
      <style:table-column-properties fo:break-before="auto" style:column-width="2.069cm"/>
    </style:style>
    <style:style style:name="co16" style:family="table-column">
      <style:table-column-properties fo:break-before="auto" style:column-width="1.93cm"/>
    </style:style>
    <style:style style:name="co17" style:family="table-column">
      <style:table-column-properties fo:break-before="auto" style:column-width="1.819cm"/>
    </style:style>
    <style:style style:name="co18" style:family="table-column">
      <style:table-column-properties fo:break-before="auto" style:column-width="2.182cm"/>
    </style:style>
    <style:style style:name="co19" style:family="table-column">
      <style:table-column-properties fo:break-before="auto" style:column-width="2.21cm"/>
    </style:style>
    <style:style style:name="co20" style:family="table-column">
      <style:table-column-properties fo:break-before="auto" style:column-width="0.727cm"/>
    </style:style>
    <style:style style:name="co21" style:family="table-column">
      <style:table-column-properties fo:break-before="auto" style:column-width="9.006cm"/>
    </style:style>
    <style:style style:name="co22" style:family="table-column">
      <style:table-column-properties fo:break-before="auto" style:column-width="6.461cm"/>
    </style:style>
    <style:style style:name="co23" style:family="table-column">
      <style:table-column-properties fo:break-before="auto" style:column-width="8.28cm"/>
    </style:style>
    <style:style style:name="co24" style:family="table-column">
      <style:table-column-properties fo:break-before="auto" style:column-width="7.3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0.8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ta1" style:family="table" style:master-page-name="PageStyle_5f_padron">
      <style:table-properties table:display="true" style:writing-mode="lr-tb"/>
    </style:style>
    <style:style style:name="ta2" style:family="table" style:master-page-name="PageStyle_5f_cuyes">
      <style:table-properties table:display="true" style:writing-mode="lr-tb"/>
    </style:style>
    <style:style style:name="ta3" style:family="table" style:master-page-name="PageStyle_5f_bienes">
      <style:table-properties table:display="true" style:writing-mode="lr-tb"/>
    </style:style>
    <style:style style:name="ta4" style:family="table" style:master-page-name="PageStyle_5f_fam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36">
      <style:table-cell-properties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4">
      <style:table-cell-properties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7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70c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7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70c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70c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7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7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70c0" style:diagonal-bl-tr="none" style:diagonal-tl-br="none" style:text-align-source="fix" style:repeat-content="false" fo:wrap-option="no-wrap" fo:border-left="none" style:direction="ltr" fo:border-right="0.74pt solid #0070c0" style:rotation-angle="0" style:rotation-align="none" style:shrink-to-fit="false" fo:border-top="0.74pt solid #0070c0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7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70c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36">
      <style:table-cell-properties style:diagonal-bl-tr="none" style:diagonal-tl-br="none" fo:border="0.74pt solid #0070c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7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0.74pt solid #0070c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dr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637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ADRON DE SOCIOS ACTUALIZADO</text:p>
          </table:table-cell>
          <table:covered-table-cell table:number-columns-repeated="8" table:style-name="ce1"/>
          <table:table-cell table:number-columns-repeated="16375"/>
        </table:table-row>
        <table:table-row table:style-name="ro2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ombres y Apellidos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Condición</text:p>
          </table:table-cell>
          <table:table-cell table:style-name="ce2" office:value-type="string" calcext:value-type="string">
            <text:p>Pasto alfalfar en Has</text:p>
          </table:table-cell>
          <table:table-cell table:style-name="ce2" office:value-type="string" calcext:value-type="string">
            <text:p>F.Nacimient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Edad años</text:p>
          </table:table-cell>
          <table:table-cell table:style-name="ce15"/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ÑO</text:p>
          </table:table-cell>
          <table:table-cell table:number-columns-repeated="1636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s text:c="2"/>JUAN ROJAS AVALOS</text:p>
          </table:table-cell>
          <table:table-cell table:style-name="ce3" office:value-type="float" office:value="28802655" calcext:value-type="float">
            <text:p>28802655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residente</text:p>
          </table:table-cell>
          <table:table-cell table:style-name="ce10"/>
          <table:table-cell table:style-name="ce12" office:value-type="date" office:date-value="1965-06-16" calcext:value-type="date">
            <text:p>16/06/1965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3];[.H3];&quot;y&quot;)" office:value-type="float" office:value="55" calcext:value-type="float">
            <text:p>55</text:p>
          </table:table-cell>
          <table:table-cell table:style-name="ce16"/>
          <table:table-cell table:formula="of:=DATEDIF([.G3];[.H3];&quot;d&quot;)" office:value-type="float" office:value="20135" calcext:value-type="float">
            <text:p>20135</text:p>
          </table:table-cell>
          <table:table-cell table:style-name="ce17"/>
          <table:table-cell table:formula="of:=+UPPER([.B3])" office:value-type="string" office:string-value="  JUAN ROJAS AVALOS" calcext:value-type="string">
            <text:p><text:s text:c="2"/>JUAN ROJAS AVALOS</text:p>
          </table:table-cell>
          <table:table-cell office:value-type="string" calcext:value-type="string">
            <text:p><text:s text:c="2"/>JUAN ROJAS AVAL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+[.R3]*[.Q3]" office:value-type="float" office:value="360" calcext:value-type="float">
            <text:p>360</text:p>
          </table:table-cell>
          <table:table-cell table:number-columns-repeated="1636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<text:s text:c="2"/>ANTONIO CASAFRANCA AGUILAR</text:p>
          </table:table-cell>
          <table:table-cell table:style-name="ce3" office:value-type="float" office:value="28851467" calcext:value-type="float">
            <text:p>28851467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Vicepresidente</text:p>
          </table:table-cell>
          <table:table-cell table:style-name="ce10"/>
          <table:table-cell table:style-name="ce12" office:value-type="date" office:date-value="1975-10-27" calcext:value-type="date">
            <text:p>27/10/1975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4];[.H4];&quot;y&quot;)" office:value-type="float" office:value="44" calcext:value-type="float">
            <text:p>44</text:p>
          </table:table-cell>
          <table:table-cell table:style-name="ce16"/>
          <table:table-cell table:formula="of:=+[.I4]/365" office:value-type="float" office:value="0.120547945205479" calcext:value-type="float">
            <text:p>0.120547945205479</text:p>
          </table:table-cell>
          <table:table-cell/>
          <table:table-cell table:formula="of:=+UPPER([.B4])" office:value-type="string" office:string-value="  ANTONIO CASAFRANCA AGUILAR" calcext:value-type="string">
            <text:p><text:s text:c="2"/>ANTONIO CASAFRANCA AGUILAR</text:p>
          </table:table-cell>
          <table:table-cell office:value-type="string" calcext:value-type="string">
            <text:p><text:s text:c="2"/>ANTONIO CASAFRANCA AGUILAR</text:p>
          </table:table-cell>
          <table:table-cell table:number-columns-repeated="16370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<text:s text:c="2"/>ALEJANDRA ROJAS QUISPE</text:p>
          </table:table-cell>
          <table:table-cell table:style-name="ce3" office:value-type="float" office:value="46226850" calcext:value-type="float">
            <text:p>4622685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ecretario</text:p>
          </table:table-cell>
          <table:table-cell table:style-name="ce10"/>
          <table:table-cell table:style-name="ce12" office:value-type="date" office:date-value="1990-03-12" calcext:value-type="date">
            <text:p>12/03/1990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5];[.H5];&quot;y&quot;)" office:value-type="float" office:value="30" calcext:value-type="float">
            <text:p>30</text:p>
          </table:table-cell>
          <table:table-cell table:style-name="ce16"/>
          <table:table-cell table:formula="of:=+[.I5]/365" office:value-type="float" office:value="0.0821917808219178" calcext:value-type="float">
            <text:p>0.0821917808219178</text:p>
          </table:table-cell>
          <table:table-cell/>
          <table:table-cell table:formula="of:=+UPPER([.B5])" office:value-type="string" office:string-value="  ALEJANDRA ROJAS QUISPE" calcext:value-type="string">
            <text:p><text:s text:c="2"/>ALEJANDRA ROJAS QUISPE</text:p>
          </table:table-cell>
          <table:table-cell office:value-type="string" calcext:value-type="string">
            <text:p><text:s text:c="2"/>ALEJANDRA ROJAS QUISPE</text:p>
          </table:table-cell>
          <table:table-cell table:number-columns-repeated="16370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<text:s text:c="2"/>BENERICTA DEMETRIA QUISPE HUAMANI</text:p>
          </table:table-cell>
          <table:table-cell table:style-name="ce3" office:value-type="float" office:value="42489115" calcext:value-type="float">
            <text:p>42489115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esorero</text:p>
          </table:table-cell>
          <table:table-cell table:style-name="ce10"/>
          <table:table-cell table:style-name="ce12" office:value-type="date" office:date-value="1984-01-15" calcext:value-type="date">
            <text:p>15/01/1984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6];[.H6];&quot;y&quot;)" office:value-type="float" office:value="36" calcext:value-type="float">
            <text:p>36</text:p>
          </table:table-cell>
          <table:table-cell table:style-name="ce16"/>
          <table:table-cell table:formula="of:=+[.I6]/365" office:value-type="float" office:value="0.0986301369863014" calcext:value-type="float">
            <text:p>0.0986301369863014</text:p>
          </table:table-cell>
          <table:table-cell/>
          <table:table-cell table:formula="of:=+UPPER([.B6])" office:value-type="string" office:string-value="  BENERICTA DEMETRIA QUISPE HUAMANI" calcext:value-type="string">
            <text:p><text:s text:c="2"/>BENERICTA DEMETRIA QUISPE HUAMANI</text:p>
          </table:table-cell>
          <table:table-cell office:value-type="string" calcext:value-type="string">
            <text:p><text:s text:c="2"/>BENERICTA DEMETRIA QUISPE HUAMANI</text:p>
          </table:table-cell>
          <table:table-cell table:number-columns-repeated="16370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<text:s text:c="2"/>VICTOR ROJAS VALENCIA</text:p>
          </table:table-cell>
          <table:table-cell table:style-name="ce3" office:value-type="float" office:value="8013376" calcext:value-type="float">
            <text:p>8013376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Fiscal</text:p>
          </table:table-cell>
          <table:table-cell table:style-name="ce10"/>
          <table:table-cell table:style-name="ce12" office:value-type="date" office:date-value="1961-03-10" calcext:value-type="date">
            <text:p>10/03/1961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7];[.H7];&quot;y&quot;)" office:value-type="float" office:value="59" calcext:value-type="float">
            <text:p>59</text:p>
          </table:table-cell>
          <table:table-cell table:style-name="ce16"/>
          <table:table-cell table:formula="of:=+[.I7]/365" office:value-type="float" office:value="0.161643835616438" calcext:value-type="float">
            <text:p>0.161643835616438</text:p>
          </table:table-cell>
          <table:table-cell/>
          <table:table-cell table:formula="of:=+UPPER([.B7])" office:value-type="string" office:string-value="  VICTOR ROJAS VALENCIA" calcext:value-type="string">
            <text:p><text:s text:c="2"/>VICTOR ROJAS VALENCIA</text:p>
          </table:table-cell>
          <table:table-cell office:value-type="string" calcext:value-type="string">
            <text:p><text:s text:c="2"/>VICTOR ROJAS VALENCIA</text:p>
          </table:table-cell>
          <table:table-cell table:number-columns-repeated="16370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<text:s text:c="2"/>EDUARDO ROJAS SANCHEZ</text:p>
          </table:table-cell>
          <table:table-cell table:style-name="ce3" office:value-type="float" office:value="43140380" calcext:value-type="float">
            <text:p>43140380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Vocal</text:p>
          </table:table-cell>
          <table:table-cell table:style-name="ce10"/>
          <table:table-cell table:style-name="ce12" office:value-type="date" office:date-value="1982-08-08" calcext:value-type="date">
            <text:p>08/08/1982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8];[.H8];&quot;y&quot;)" office:value-type="float" office:value="37" calcext:value-type="float">
            <text:p>37</text:p>
          </table:table-cell>
          <table:table-cell table:style-name="ce16"/>
          <table:table-cell table:formula="of:=+[.I8]/365" office:value-type="float" office:value="0.101369863013699" calcext:value-type="float">
            <text:p>0.101369863013699</text:p>
          </table:table-cell>
          <table:table-cell/>
          <table:table-cell table:formula="of:=+UPPER([.B8])" office:value-type="string" office:string-value="  EDUARDO ROJAS SANCHEZ" calcext:value-type="string">
            <text:p><text:s text:c="2"/>EDUARDO ROJAS SANCHEZ</text:p>
          </table:table-cell>
          <table:table-cell office:value-type="string" calcext:value-type="string">
            <text:p><text:s text:c="2"/>EDUARDO ROJAS SANCHEZ</text:p>
          </table:table-cell>
          <table:table-cell table:number-columns-repeated="1637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<text:s text:c="2"/>CLAUDIO AGUILAR ALLCCA</text:p>
          </table:table-cell>
          <table:table-cell table:style-name="ce3" office:value-type="float" office:value="42150916" calcext:value-type="float">
            <text:p>42150916</text:p>
          </table:table-cell>
          <table:table-cell table:style-name="ce6" office:value-type="string" calcext:value-type="string">
            <text:p>M</text:p>
          </table:table-cell>
          <table:table-cell table:style-name="ce5" office:value-type="string" calcext:value-type="string">
            <text:p>Socio</text:p>
          </table:table-cell>
          <table:table-cell table:style-name="ce10"/>
          <table:table-cell table:style-name="ce12" office:value-type="date" office:date-value="1983-10-30" calcext:value-type="date">
            <text:p>30/10/1983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9];[.H9];&quot;y&quot;)" office:value-type="float" office:value="36" calcext:value-type="float">
            <text:p>36</text:p>
          </table:table-cell>
          <table:table-cell table:style-name="ce16"/>
          <table:table-cell table:formula="of:=+[.I9]/365" office:value-type="float" office:value="0.0986301369863014" calcext:value-type="float">
            <text:p>0.0986301369863014</text:p>
          </table:table-cell>
          <table:table-cell/>
          <table:table-cell table:formula="of:=+UPPER([.B9])" office:value-type="string" office:string-value="  CLAUDIO AGUILAR ALLCCA" calcext:value-type="string">
            <text:p><text:s text:c="2"/>CLAUDIO AGUILAR ALLCCA</text:p>
          </table:table-cell>
          <table:table-cell office:value-type="string" calcext:value-type="string">
            <text:p><text:s text:c="2"/>CLAUDIO AGUILAR ALLCCA</text:p>
          </table:table-cell>
          <table:table-cell table:number-columns-repeated="16370"/>
        </table:table-row>
        <table:table-row table:style-name="ro9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<text:s text:c="2"/>CRISTINA CCAHUANA ESPILLCO</text:p>
          </table:table-cell>
          <table:table-cell table:style-name="ce3" office:value-type="float" office:value="28835185" calcext:value-type="float">
            <text:p>28835185</text:p>
          </table:table-cell>
          <table:table-cell table:style-name="ce6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67-07-24" calcext:value-type="date">
            <text:p>24/07/1967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0];[.H10];&quot;y&quot;)" office:value-type="float" office:value="53" calcext:value-type="float">
            <text:p>53</text:p>
          </table:table-cell>
          <table:table-cell table:style-name="ce16"/>
          <table:table-cell table:formula="of:=+[.I10]/365" office:value-type="float" office:value="0.145205479452055" calcext:value-type="float">
            <text:p>0.145205479452055</text:p>
          </table:table-cell>
          <table:table-cell/>
          <table:table-cell table:formula="of:=+UPPER([.B10])" office:value-type="string" office:string-value="  CRISTINA CCAHUANA ESPILLCO" calcext:value-type="string">
            <text:p><text:s text:c="2"/>CRISTINA CCAHUANA ESPILLCO</text:p>
          </table:table-cell>
          <table:table-cell office:value-type="string" calcext:value-type="string">
            <text:p><text:s text:c="2"/>CRISTINA CCAHUANA ESPILLCO</text:p>
          </table:table-cell>
          <table:table-cell table:number-columns-repeated="16370"/>
        </table:table-row>
        <table:table-row table:style-name="ro9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<text:s text:c="2"/>VICTOR JOEL ROJAS OYOLO</text:p>
          </table:table-cell>
          <table:table-cell table:style-name="ce3" office:value-type="float" office:value="70767403" calcext:value-type="float">
            <text:p>7076740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Socio</text:p>
          </table:table-cell>
          <table:table-cell table:style-name="ce10"/>
          <table:table-cell table:style-name="ce12" office:value-type="date" office:date-value="1994-04-13" calcext:value-type="date">
            <text:p>13/04/1994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1];[.H11];&quot;y&quot;)" office:value-type="float" office:value="26" calcext:value-type="float">
            <text:p>26</text:p>
          </table:table-cell>
          <table:table-cell table:style-name="ce16"/>
          <table:table-cell table:formula="of:=+[.I11]/365" office:value-type="float" office:value="0.0712328767123288" calcext:value-type="float">
            <text:p>0.0712328767123288</text:p>
          </table:table-cell>
          <table:table-cell/>
          <table:table-cell table:formula="of:=+UPPER([.B11])" office:value-type="string" office:string-value="  VICTOR JOEL ROJAS OYOLO" calcext:value-type="string">
            <text:p><text:s text:c="2"/>VICTOR JOEL ROJAS OYOLO</text:p>
          </table:table-cell>
          <table:table-cell office:value-type="string" calcext:value-type="string">
            <text:p><text:s text:c="2"/>VICTOR JOEL ROJAS OYOLO</text:p>
          </table:table-cell>
          <table:table-cell table:number-columns-repeated="16370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<text:s/>VIOLETA ESPEJO AVALOS</text:p>
          </table:table-cell>
          <table:table-cell table:style-name="ce3" office:value-type="float" office:value="40165233" calcext:value-type="float">
            <text:p>40165233</text:p>
          </table:table-cell>
          <table:table-cell table:style-name="ce6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79-04-08" calcext:value-type="date">
            <text:p>08/04/1979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2];[.H12];&quot;y&quot;)" office:value-type="float" office:value="41" calcext:value-type="float">
            <text:p>41</text:p>
          </table:table-cell>
          <table:table-cell table:style-name="ce16"/>
          <table:table-cell table:formula="of:=+[.I12]/365" office:value-type="float" office:value="0.112328767123288" calcext:value-type="float">
            <text:p>0.112328767123288</text:p>
          </table:table-cell>
          <table:table-cell/>
          <table:table-cell table:formula="of:=+UPPER([.B12])" office:value-type="string" office:string-value=" VIOLETA ESPEJO AVALOS" calcext:value-type="string">
            <text:p><text:s/>VIOLETA ESPEJO AVALOS</text:p>
          </table:table-cell>
          <table:table-cell office:value-type="string" calcext:value-type="string">
            <text:p><text:s/>VIOLETA ESPEJO AVALOS</text:p>
          </table:table-cell>
          <table:table-cell table:number-columns-repeated="16370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<text:s text:c="2"/>MELCHOR VALENCIA ORTIZ</text:p>
          </table:table-cell>
          <table:table-cell table:style-name="ce3" office:value-type="float" office:value="28809352" calcext:value-type="float">
            <text:p>28809352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Socio</text:p>
          </table:table-cell>
          <table:table-cell table:style-name="ce10"/>
          <table:table-cell table:style-name="ce12" office:value-type="date" office:date-value="1978-01-06" calcext:value-type="date">
            <text:p>06/01/1978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3];[.H13];&quot;y&quot;)" office:value-type="float" office:value="42" calcext:value-type="float">
            <text:p>42</text:p>
          </table:table-cell>
          <table:table-cell table:style-name="ce16"/>
          <table:table-cell table:formula="of:=+[.I13]/365" office:value-type="float" office:value="0.115068493150685" calcext:value-type="float">
            <text:p>0.115068493150685</text:p>
          </table:table-cell>
          <table:table-cell/>
          <table:table-cell table:formula="of:=+UPPER([.B13])" office:value-type="string" office:string-value="  MELCHOR VALENCIA ORTIZ" calcext:value-type="string">
            <text:p><text:s text:c="2"/>MELCHOR VALENCIA ORTIZ</text:p>
          </table:table-cell>
          <table:table-cell office:value-type="string" calcext:value-type="string">
            <text:p><text:s text:c="2"/>MELCHOR VALENCIA ORTIZ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<text:s/>NATALY YUDITH VALENCIA LOBO</text:p>
          </table:table-cell>
          <table:table-cell table:style-name="ce3" office:value-type="float" office:value="74701020" calcext:value-type="float">
            <text:p>7470102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Joven</text:p>
          </table:table-cell>
          <table:table-cell table:style-name="ce10"/>
          <table:table-cell table:style-name="ce12" office:value-type="date" office:date-value="2001-03-10" calcext:value-type="date">
            <text:p>10/03/2001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4];[.H14];&quot;y&quot;)" office:value-type="float" office:value="19" calcext:value-type="float">
            <text:p>19</text:p>
          </table:table-cell>
          <table:table-cell table:style-name="ce16"/>
          <table:table-cell table:formula="of:=+[.I14]/365" office:value-type="float" office:value="0.0520547945205479" calcext:value-type="float">
            <text:p>0.0520547945205479</text:p>
          </table:table-cell>
          <table:table-cell/>
          <table:table-cell table:formula="of:=+UPPER([.B14])" office:value-type="string" office:string-value=" NATALY YUDITH VALENCIA LOBO" calcext:value-type="string">
            <text:p><text:s/>NATALY YUDITH VALENCIA LOBO</text:p>
          </table:table-cell>
          <table:table-cell office:value-type="string" calcext:value-type="string">
            <text:p><text:s/>NATALY YUDITH VALENCIA LOB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6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<text:s text:c="2"/>FIDENCIA LOBO ESPEJO</text:p>
          </table:table-cell>
          <table:table-cell table:style-name="ce3" office:value-type="float" office:value="40720760" calcext:value-type="float">
            <text:p>4072076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80-10-15" calcext:value-type="date">
            <text:p>15/10/1980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5];[.H15];&quot;y&quot;)" office:value-type="float" office:value="39" calcext:value-type="float">
            <text:p>39</text:p>
          </table:table-cell>
          <table:table-cell table:style-name="ce16"/>
          <table:table-cell table:formula="of:=+[.I15]/365" office:value-type="float" office:value="0.106849315068493" calcext:value-type="float">
            <text:p>0.106849315068493</text:p>
          </table:table-cell>
          <table:table-cell/>
          <table:table-cell table:formula="of:=+UPPER([.B15])" office:value-type="string" office:string-value="  FIDENCIA LOBO ESPEJO" calcext:value-type="string">
            <text:p><text:s text:c="2"/>FIDENCIA LOBO ESPEJO</text:p>
          </table:table-cell>
          <table:table-cell office:value-type="string" calcext:value-type="string">
            <text:p><text:s text:c="2"/>FIDENCIA LOBO ESPEJ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16367"/>
        </table:table-row>
        <table:table-row table:style-name="ro9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<text:s text:c="2"/>ESTEBAN CASAFRANCA GONZALES</text:p>
          </table:table-cell>
          <table:table-cell table:style-name="ce3" office:value-type="float" office:value="40685653" calcext:value-type="float">
            <text:p>4068565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Socio</text:p>
          </table:table-cell>
          <table:table-cell table:style-name="ce10"/>
          <table:table-cell table:style-name="ce12" office:value-type="date" office:date-value="1980-11-20" calcext:value-type="date">
            <text:p>20/11/1980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6];[.H16];&quot;y&quot;)" office:value-type="float" office:value="39" calcext:value-type="float">
            <text:p>39</text:p>
          </table:table-cell>
          <table:table-cell table:style-name="ce16"/>
          <table:table-cell table:formula="of:=+[.I16]/365" office:value-type="float" office:value="0.106849315068493" calcext:value-type="float">
            <text:p>0.106849315068493</text:p>
          </table:table-cell>
          <table:table-cell/>
          <table:table-cell table:formula="of:=+UPPER([.B16])" office:value-type="string" office:string-value="  ESTEBAN CASAFRANCA GONZALES" calcext:value-type="string">
            <text:p><text:s text:c="2"/>ESTEBAN CASAFRANCA GONZALES</text:p>
          </table:table-cell>
          <table:table-cell office:value-type="string" calcext:value-type="string">
            <text:p><text:s text:c="2"/>ESTEBAN CASAFRANCA GONZALE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8"/>
        </table:table-row>
        <table:table-row table:style-name="ro9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<text:s text:c="2"/>MIGUEL ANGEL OYOLO SANCHEZ</text:p>
          </table:table-cell>
          <table:table-cell table:style-name="ce3" office:value-type="float" office:value="72624654" calcext:value-type="float">
            <text:p>72624654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Joven</text:p>
          </table:table-cell>
          <table:table-cell table:style-name="ce10"/>
          <table:table-cell table:style-name="ce12" office:value-type="date" office:date-value="1996-01-23" calcext:value-type="date">
            <text:p>23/01/1996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7];[.H17];&quot;y&quot;)" office:value-type="float" office:value="24" calcext:value-type="float">
            <text:p>24</text:p>
          </table:table-cell>
          <table:table-cell table:style-name="ce16"/>
          <table:table-cell table:formula="of:=+[.I17]/365" office:value-type="float" office:value="0.0657534246575342" calcext:value-type="float">
            <text:p>0.0657534246575342</text:p>
          </table:table-cell>
          <table:table-cell/>
          <table:table-cell table:formula="of:=+UPPER([.B17])" office:value-type="string" office:string-value="  MIGUEL ANGEL OYOLO SANCHEZ" calcext:value-type="string">
            <text:p><text:s text:c="2"/>MIGUEL ANGEL OYOLO SANCHEZ</text:p>
          </table:table-cell>
          <table:table-cell office:value-type="string" calcext:value-type="string">
            <text:p><text:s text:c="2"/>MIGUEL ANGEL OYOLO SANCHEZ</text:p>
          </table:table-cell>
          <table:table-cell table:number-columns-repeated="1637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<text:s text:c="2"/>LEONCIO AGUILAR ALLCCA</text:p>
          </table:table-cell>
          <table:table-cell table:style-name="ce3" office:value-type="float" office:value="71986702" calcext:value-type="float">
            <text:p>71986702</text:p>
          </table:table-cell>
          <table:table-cell table:style-name="ce6" office:value-type="string" calcext:value-type="string">
            <text:p>M</text:p>
          </table:table-cell>
          <table:table-cell table:style-name="ce5" office:value-type="string" calcext:value-type="string">
            <text:p>Socio</text:p>
          </table:table-cell>
          <table:table-cell table:style-name="ce10"/>
          <table:table-cell table:style-name="ce12" office:value-type="date" office:date-value="1992-09-24" calcext:value-type="date">
            <text:p>24/09/1992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8];[.H18];&quot;y&quot;)" office:value-type="float" office:value="27" calcext:value-type="float">
            <text:p>27</text:p>
          </table:table-cell>
          <table:table-cell table:style-name="ce16"/>
          <table:table-cell table:formula="of:=+[.I18]/365" office:value-type="float" office:value="0.073972602739726" calcext:value-type="float">
            <text:p>0.073972602739726</text:p>
          </table:table-cell>
          <table:table-cell/>
          <table:table-cell table:formula="of:=+UPPER([.B18])" office:value-type="string" office:string-value="  LEONCIO AGUILAR ALLCCA" calcext:value-type="string">
            <text:p><text:s text:c="2"/>LEONCIO AGUILAR ALLCCA</text:p>
          </table:table-cell>
          <table:table-cell office:value-type="string" calcext:value-type="string">
            <text:p><text:s text:c="2"/>LEONCIO AGUILAR ALLCCA</text:p>
          </table:table-cell>
          <table:table-cell table:number-columns-repeated="16370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<text:s text:c="2"/>ELADIO FLORES CASAFRANCA</text:p>
          </table:table-cell>
          <table:table-cell table:style-name="ce3" office:value-type="float" office:value="28802895" calcext:value-type="float">
            <text:p>28802895</text:p>
          </table:table-cell>
          <table:table-cell table:style-name="ce6" office:value-type="string" calcext:value-type="string">
            <text:p>M</text:p>
          </table:table-cell>
          <table:table-cell table:style-name="ce5" office:value-type="string" calcext:value-type="string">
            <text:p>Socio</text:p>
          </table:table-cell>
          <table:table-cell table:style-name="ce10"/>
          <table:table-cell table:style-name="ce12" office:value-type="date" office:date-value="1965-05-28" calcext:value-type="date">
            <text:p>28/05/1965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19];[.H19];&quot;y&quot;)" office:value-type="float" office:value="55" calcext:value-type="float">
            <text:p>55</text:p>
          </table:table-cell>
          <table:table-cell table:style-name="ce16"/>
          <table:table-cell table:formula="of:=+[.I19]/365" office:value-type="float" office:value="0.150684931506849" calcext:value-type="float">
            <text:p>0.150684931506849</text:p>
          </table:table-cell>
          <table:table-cell/>
          <table:table-cell table:formula="of:=+UPPER([.B19])" office:value-type="string" office:string-value="  ELADIO FLORES CASAFRANCA" calcext:value-type="string">
            <text:p><text:s text:c="2"/>ELADIO FLORES CASAFRANCA</text:p>
          </table:table-cell>
          <table:table-cell office:value-type="string" calcext:value-type="string">
            <text:p><text:s text:c="2"/>ELADIO FLORES CASAFRANCA</text:p>
          </table:table-cell>
          <table:table-cell table:number-columns-repeated="16370"/>
        </table:table-row>
        <table:table-row table:style-name="ro9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<text:s text:c="2"/>EUSEBIO ROJAS QUISPE</text:p>
          </table:table-cell>
          <table:table-cell table:style-name="ce3" office:value-type="float" office:value="43274174" calcext:value-type="float">
            <text:p>43274174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Socio</text:p>
          </table:table-cell>
          <table:table-cell table:style-name="ce10"/>
          <table:table-cell table:style-name="ce12" office:value-type="date" office:date-value="1985-09-14" calcext:value-type="date">
            <text:p>14/09/1985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0];[.H20];&quot;y&quot;)" office:value-type="float" office:value="34" calcext:value-type="float">
            <text:p>34</text:p>
          </table:table-cell>
          <table:table-cell table:style-name="ce16"/>
          <table:table-cell table:formula="of:=+[.I20]/365" office:value-type="float" office:value="0.0931506849315069" calcext:value-type="float">
            <text:p>0.0931506849315069</text:p>
          </table:table-cell>
          <table:table-cell/>
          <table:table-cell table:formula="of:=+UPPER([.B20])" office:value-type="string" office:string-value="  EUSEBIO ROJAS QUISPE" calcext:value-type="string">
            <text:p><text:s text:c="2"/>EUSEBIO ROJAS QUISPE</text:p>
          </table:table-cell>
          <table:table-cell office:value-type="string" calcext:value-type="string">
            <text:p><text:s text:c="2"/>EUSEBIO ROJAS QUISPE</text:p>
          </table:table-cell>
          <table:table-cell table:number-columns-repeated="16370"/>
        </table:table-row>
        <table:table-row table:style-name="ro9"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<text:s text:c="2"/>KARINA ARQUIÑEGO ROJAS</text:p>
          </table:table-cell>
          <table:table-cell table:style-name="ce3" office:value-type="float" office:value="45785068" calcext:value-type="float">
            <text:p>4578506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89-06-12" calcext:value-type="date">
            <text:p>12/06/1989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1];[.H21];&quot;y&quot;)" office:value-type="float" office:value="31" calcext:value-type="float">
            <text:p>31</text:p>
          </table:table-cell>
          <table:table-cell table:style-name="ce16"/>
          <table:table-cell table:formula="of:=+[.I21]/365" office:value-type="float" office:value="0.0849315068493151" calcext:value-type="float">
            <text:p>0.0849315068493151</text:p>
          </table:table-cell>
          <table:table-cell/>
          <table:table-cell table:formula="of:=+UPPER([.B21])" office:value-type="string" office:string-value="  KARINA ARQUIÑEGO ROJAS" calcext:value-type="string">
            <text:p><text:s text:c="2"/>KARINA ARQUIÑEGO ROJAS</text:p>
          </table:table-cell>
          <table:table-cell office:value-type="string" calcext:value-type="string">
            <text:p><text:s text:c="2"/>KARINA ARQUIÑEGO ROJAS</text:p>
          </table:table-cell>
          <table:table-cell table:number-columns-repeated="16370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<text:s text:c="2"/>JOSEFINA PERALTA SANCHEZ</text:p>
          </table:table-cell>
          <table:table-cell table:style-name="ce3" office:value-type="float" office:value="28849212" calcext:value-type="float">
            <text:p>2884921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69-11-26" calcext:value-type="date">
            <text:p>26/11/1969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2];[.H22];&quot;y&quot;)" office:value-type="float" office:value="50" calcext:value-type="float">
            <text:p>50</text:p>
          </table:table-cell>
          <table:table-cell table:style-name="ce16"/>
          <table:table-cell table:formula="of:=+[.I22]/365" office:value-type="float" office:value="0.136986301369863" calcext:value-type="float">
            <text:p>0.136986301369863</text:p>
          </table:table-cell>
          <table:table-cell/>
          <table:table-cell table:formula="of:=+UPPER([.B22])" office:value-type="string" office:string-value="  JOSEFINA PERALTA SANCHEZ" calcext:value-type="string">
            <text:p><text:s text:c="2"/>JOSEFINA PERALTA SANCHEZ</text:p>
          </table:table-cell>
          <table:table-cell office:value-type="string" calcext:value-type="string">
            <text:p><text:s text:c="2"/>JOSEFINA PERALTA SANCHEZ</text:p>
          </table:table-cell>
          <table:table-cell table:number-columns-repeated="16370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<text:s/>GLADYS VALENCIA ORTIZ</text:p>
          </table:table-cell>
          <table:table-cell table:style-name="ce3" office:value-type="float" office:value="41365374" calcext:value-type="float">
            <text:p>4136537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82-07-23" calcext:value-type="date">
            <text:p>23/07/1982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3];[.H23];&quot;y&quot;)" office:value-type="float" office:value="38" calcext:value-type="float">
            <text:p>38</text:p>
          </table:table-cell>
          <table:table-cell table:style-name="ce16"/>
          <table:table-cell table:formula="of:=+[.I23]/365" office:value-type="float" office:value="0.104109589041096" calcext:value-type="float">
            <text:p>0.104109589041096</text:p>
          </table:table-cell>
          <table:table-cell/>
          <table:table-cell table:formula="of:=+UPPER([.B23])" office:value-type="string" office:string-value=" GLADYS VALENCIA ORTIZ" calcext:value-type="string">
            <text:p><text:s/>GLADYS VALENCIA ORTIZ</text:p>
          </table:table-cell>
          <table:table-cell office:value-type="string" calcext:value-type="string">
            <text:p><text:s/>GLADYS VALENCIA ORTIZ</text:p>
          </table:table-cell>
          <table:table-cell table:number-columns-repeated="16370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<text:s text:c="2"/>NERI LOBO GONZALES</text:p>
          </table:table-cell>
          <table:table-cell table:style-name="ce3" office:value-type="float" office:value="41890322" calcext:value-type="float">
            <text:p>418903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83-05-02" calcext:value-type="date">
            <text:p>02/05/1983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4];[.H24];&quot;y&quot;)" office:value-type="float" office:value="37" calcext:value-type="float">
            <text:p>37</text:p>
          </table:table-cell>
          <table:table-cell table:style-name="ce16"/>
          <table:table-cell table:formula="of:=+[.I24]/365" office:value-type="float" office:value="0.101369863013699" calcext:value-type="float">
            <text:p>0.101369863013699</text:p>
          </table:table-cell>
          <table:table-cell/>
          <table:table-cell table:formula="of:=+UPPER([.B24])" office:value-type="string" office:string-value="  NERI LOBO GONZALES" calcext:value-type="string">
            <text:p><text:s text:c="2"/>NERI LOBO GONZALES</text:p>
          </table:table-cell>
          <table:table-cell office:value-type="string" calcext:value-type="string">
            <text:p><text:s text:c="2"/>NERI LOBO GONZALES</text:p>
          </table:table-cell>
          <table:table-cell table:number-columns-repeated="16370"/>
        </table:table-row>
        <table:table-row table:style-name="ro9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<text:s text:c="2"/>MARIA ROJAS SANCHEZ</text:p>
          </table:table-cell>
          <table:table-cell table:style-name="ce3" office:value-type="float" office:value="45005173" calcext:value-type="float">
            <text:p>4500517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83-09-12" calcext:value-type="date">
            <text:p>12/09/1983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5];[.H25];&quot;y&quot;)" office:value-type="float" office:value="36" calcext:value-type="float">
            <text:p>36</text:p>
          </table:table-cell>
          <table:table-cell table:style-name="ce16"/>
          <table:table-cell table:formula="of:=+[.I25]/365" office:value-type="float" office:value="0.0986301369863014" calcext:value-type="float">
            <text:p>0.0986301369863014</text:p>
          </table:table-cell>
          <table:table-cell/>
          <table:table-cell table:formula="of:=+UPPER([.B25])" office:value-type="string" office:string-value="  MARIA ROJAS SANCHEZ" calcext:value-type="string">
            <text:p><text:s text:c="2"/>MARIA ROJAS SANCHEZ</text:p>
          </table:table-cell>
          <table:table-cell office:value-type="string" calcext:value-type="string">
            <text:p><text:s text:c="2"/>MARIA ROJAS SANCHEZ</text:p>
          </table:table-cell>
          <table:table-cell table:number-columns-repeated="16370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<text:s text:c="2"/>AURELIA CASAFRANCA GONZALES</text:p>
          </table:table-cell>
          <table:table-cell table:style-name="ce3" office:value-type="float" office:value="40027440" calcext:value-type="float">
            <text:p>4002744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78-12-10" calcext:value-type="date">
            <text:p>10/12/1978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6];[.H26];&quot;y&quot;)" office:value-type="float" office:value="41" calcext:value-type="float">
            <text:p>41</text:p>
          </table:table-cell>
          <table:table-cell table:style-name="ce16"/>
          <table:table-cell table:formula="of:=+[.I26]/365" office:value-type="float" office:value="0.112328767123288" calcext:value-type="float">
            <text:p>0.112328767123288</text:p>
          </table:table-cell>
          <table:table-cell/>
          <table:table-cell table:formula="of:=+UPPER([.B26])" office:value-type="string" office:string-value="  AURELIA CASAFRANCA GONZALES" calcext:value-type="string">
            <text:p><text:s text:c="2"/>AURELIA CASAFRANCA GONZALES</text:p>
          </table:table-cell>
          <table:table-cell office:value-type="string" calcext:value-type="string">
            <text:p><text:s text:c="2"/>AURELIA CASAFRANCA GONZALES</text:p>
          </table:table-cell>
          <table:table-cell table:number-columns-repeated="16370"/>
        </table:table-row>
        <table:table-row table:style-name="ro9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<text:s text:c="2"/>CANDELARIA ROJAS ORTIZ DE ARQUIÑEGO</text:p>
          </table:table-cell>
          <table:table-cell table:style-name="ce3" office:value-type="float" office:value="28804247" calcext:value-type="float">
            <text:p>28804247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60-02-02" calcext:value-type="date">
            <text:p>02/02/1960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7];[.H27];&quot;y&quot;)" office:value-type="float" office:value="60" calcext:value-type="float">
            <text:p>60</text:p>
          </table:table-cell>
          <table:table-cell table:style-name="ce16"/>
          <table:table-cell table:formula="of:=+[.I27]/365" office:value-type="float" office:value="0.164383561643836" calcext:value-type="float">
            <text:p>0.164383561643836</text:p>
          </table:table-cell>
          <table:table-cell/>
          <table:table-cell table:formula="of:=+UPPER([.B27])" office:value-type="string" office:string-value="  CANDELARIA ROJAS ORTIZ DE ARQUIÑEGO" calcext:value-type="string">
            <text:p><text:s text:c="2"/>CANDELARIA ROJAS ORTIZ DE ARQUIÑEGO</text:p>
          </table:table-cell>
          <table:table-cell office:value-type="string" calcext:value-type="string">
            <text:p><text:s text:c="2"/>CANDELARIA ROJAS ORTIZ DE ARQUIÑEGO</text:p>
          </table:table-cell>
          <table:table-cell table:number-columns-repeated="16370"/>
        </table:table-row>
        <table:table-row table:style-name="ro10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<text:s text:c="2"/>FELICITA ROJAS CCAHUANA</text:p>
          </table:table-cell>
          <table:table-cell table:style-name="ce3" office:value-type="float" office:value="44320286" calcext:value-type="float">
            <text:p>44320286</text:p>
          </table:table-cell>
          <table:table-cell table:style-name="ce6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87-06-23" calcext:value-type="date">
            <text:p>23/06/1987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8];[.H28];&quot;y&quot;)" office:value-type="float" office:value="33" calcext:value-type="float">
            <text:p>33</text:p>
          </table:table-cell>
          <table:table-cell table:style-name="ce16"/>
          <table:table-cell table:formula="of:=+[.I28]/365" office:value-type="float" office:value="0.0904109589041096" calcext:value-type="float">
            <text:p>0.0904109589041096</text:p>
          </table:table-cell>
          <table:table-cell/>
          <table:table-cell table:formula="of:=+UPPER([.B28])" office:value-type="string" office:string-value="  FELICITA ROJAS CCAHUANA" calcext:value-type="string">
            <text:p><text:s text:c="2"/>FELICITA ROJAS CCAHUANA</text:p>
          </table:table-cell>
          <table:table-cell office:value-type="string" calcext:value-type="string">
            <text:p><text:s text:c="2"/>FELICITA ROJAS CCAHUANA</text:p>
          </table:table-cell>
          <table:table-cell table:number-columns-repeated="16370"/>
        </table:table-row>
        <table:table-row table:style-name="ro9"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<text:s text:c="2"/>FLORINDA ROJAS QUISPE</text:p>
          </table:table-cell>
          <table:table-cell table:style-name="ce3" office:value-type="float" office:value="42253124" calcext:value-type="float">
            <text:p>4225312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10"/>
          <table:table-cell table:style-name="ce12" office:value-type="date" office:date-value="1983-02-19" calcext:value-type="date">
            <text:p>19/02/1983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29];[.H29];&quot;y&quot;)" office:value-type="float" office:value="37" calcext:value-type="float">
            <text:p>37</text:p>
          </table:table-cell>
          <table:table-cell table:style-name="ce16"/>
          <table:table-cell table:formula="of:=+[.I29]/365" office:value-type="float" office:value="0.101369863013699" calcext:value-type="float">
            <text:p>0.101369863013699</text:p>
          </table:table-cell>
          <table:table-cell/>
          <table:table-cell table:formula="of:=+UPPER([.B29])" office:value-type="string" office:string-value="  FLORINDA ROJAS QUISPE" calcext:value-type="string">
            <text:p><text:s text:c="2"/>FLORINDA ROJAS QUISPE</text:p>
          </table:table-cell>
          <table:table-cell office:value-type="string" calcext:value-type="string">
            <text:p><text:s text:c="2"/>FLORINDA ROJAS QUISPE</text:p>
          </table:table-cell>
          <table:table-cell table:number-columns-repeated="16370"/>
        </table:table-row>
        <table:table-row table:style-name="ro9"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<text:s text:c="2"/>JOSE ANTONIO CASAFRANCA ESPEJO</text:p>
          </table:table-cell>
          <table:table-cell table:style-name="ce3" office:value-type="float" office:value="73462631" calcext:value-type="float">
            <text:p>7346263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Joven</text:p>
          </table:table-cell>
          <table:table-cell table:style-name="ce10"/>
          <table:table-cell table:style-name="ce12" office:value-type="date" office:date-value="1996-12-28" calcext:value-type="date">
            <text:p>28/12/1996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30];[.H30];&quot;y&quot;)" office:value-type="float" office:value="23" calcext:value-type="float">
            <text:p>23</text:p>
          </table:table-cell>
          <table:table-cell table:style-name="ce16"/>
          <table:table-cell table:formula="of:=+[.I30]/365" office:value-type="float" office:value="0.063013698630137" calcext:value-type="float">
            <text:p>0.063013698630137</text:p>
          </table:table-cell>
          <table:table-cell/>
          <table:table-cell table:formula="of:=+UPPER([.B30])" office:value-type="string" office:string-value="  JOSE ANTONIO CASAFRANCA ESPEJO" calcext:value-type="string">
            <text:p><text:s text:c="2"/>JOSE ANTONIO CASAFRANCA ESPEJO</text:p>
          </table:table-cell>
          <table:table-cell office:value-type="string" calcext:value-type="string">
            <text:p><text:s text:c="2"/>JOSE ANTONIO CASAFRANCA ESPEJO</text:p>
          </table:table-cell>
          <table:table-cell table:number-columns-repeated="16370"/>
        </table:table-row>
        <table:table-row table:style-name="ro9"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<text:s text:c="2"/>JESUS MANUEL ESPEJO GONZALES</text:p>
          </table:table-cell>
          <table:table-cell table:style-name="ce3" office:value-type="float" office:value="72489283" calcext:value-type="float">
            <text:p>7248928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Joven</text:p>
          </table:table-cell>
          <table:table-cell table:style-name="ce10"/>
          <table:table-cell table:style-name="ce12" office:value-type="date" office:date-value="1996-12-25" calcext:value-type="date">
            <text:p>25/12/1996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31];[.H31];&quot;y&quot;)" office:value-type="float" office:value="23" calcext:value-type="float">
            <text:p>23</text:p>
          </table:table-cell>
          <table:table-cell table:style-name="ce16"/>
          <table:table-cell table:formula="of:=+[.I31]/365" office:value-type="float" office:value="0.063013698630137" calcext:value-type="float">
            <text:p>0.063013698630137</text:p>
          </table:table-cell>
          <table:table-cell/>
          <table:table-cell table:formula="of:=+UPPER([.B31])" office:value-type="string" office:string-value="  JESUS MANUEL ESPEJO GONZALES" calcext:value-type="string">
            <text:p><text:s text:c="2"/>JESUS MANUEL ESPEJO GONZALES</text:p>
          </table:table-cell>
          <table:table-cell office:value-type="string" calcext:value-type="string">
            <text:p><text:s text:c="2"/>JESUS MANUEL ESPEJO GONZALES</text:p>
          </table:table-cell>
          <table:table-cell table:number-columns-repeated="1637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<text:s text:c="2"/>JOSUE ESPEJO GONZALES</text:p>
          </table:table-cell>
          <table:table-cell table:style-name="ce4" office:value-type="float" office:value="76555556" calcext:value-type="float">
            <text:p>76555556</text:p>
          </table:table-cell>
          <table:table-cell table:style-name="ce7" office:value-type="string" calcext:value-type="string">
            <text:p>M</text:p>
          </table:table-cell>
          <table:table-cell table:style-name="ce5" office:value-type="string" calcext:value-type="string">
            <text:p>Joven</text:p>
          </table:table-cell>
          <table:table-cell table:style-name="ce11"/>
          <table:table-cell table:style-name="ce12" office:value-type="date" office:date-value="1999-05-13" calcext:value-type="date">
            <text:p>13/05/1999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32];[.H32];&quot;y&quot;)" office:value-type="float" office:value="21" calcext:value-type="float">
            <text:p>21</text:p>
          </table:table-cell>
          <table:table-cell table:number-columns-repeated="3"/>
          <table:table-cell table:formula="of:=+UPPER([.B32])" office:value-type="string" office:string-value="  JOSUE ESPEJO GONZALES" calcext:value-type="string">
            <text:p><text:s text:c="2"/>JOSUE ESPEJO GONZALES</text:p>
          </table:table-cell>
          <table:table-cell office:value-type="string" calcext:value-type="string">
            <text:p><text:s text:c="2"/>JOSUE ESPEJO GONZALES</text:p>
          </table:table-cell>
          <table:table-cell table:number-columns-repeated="1637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<text:s text:c="2"/>ELIZABETH ESPEJO GONZALES</text:p>
          </table:table-cell>
          <table:table-cell table:style-name="ce4" office:value-type="float" office:value="70792996" calcext:value-type="float">
            <text:p>70792996</text:p>
          </table:table-cell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Socia</text:p>
          </table:table-cell>
          <table:table-cell table:style-name="ce4"/>
          <table:table-cell table:style-name="ce12" office:value-type="date" office:date-value="1994-06-10" calcext:value-type="date">
            <text:p>10/06/1994</text:p>
          </table:table-cell>
          <table:table-cell table:style-name="ce13" office:value-type="date" office:date-value="2020-08-01" calcext:value-type="date">
            <text:p>01/08/2020</text:p>
          </table:table-cell>
          <table:table-cell table:style-name="ce14" table:formula="of:=DATEDIF([.G33];[.H33];&quot;y&quot;)" office:value-type="float" office:value="26" calcext:value-type="float">
            <text:p>26</text:p>
          </table:table-cell>
          <table:table-cell table:number-columns-repeated="3"/>
          <table:table-cell table:formula="of:=+UPPER([.B33])" office:value-type="string" office:string-value="  ELIZABETH ESPEJO GONZALES" calcext:value-type="string">
            <text:p><text:s text:c="2"/>ELIZABETH ESPEJO GONZALES</text:p>
          </table:table-cell>
          <table:table-cell office:value-type="string" calcext:value-type="string">
            <text:p><text:s text:c="2"/>ELIZABETH ESPEJO GONZALES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formula="of:=+COUNTIF([.D5:.D33];&quot;F&quot;)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MUJERES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ARONES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JOVENES VARONES</text:p>
          </table:table-cell>
          <table:table-cell office:value-type="float" office:value="4" calcext:value-type="float">
            <text:p>4</text:p>
          </table:table-cell>
          <table:table-cell table:formula="of:=20/[.D42]" office:value-type="float" office:value="0.571428571428571" calcext:value-type="float">
            <text:p>0.571428571428571</text:p>
          </table:table-cell>
          <table:table-cell table:formula="of:=+[.E41]*100" office:value-type="float" office:value="57.1428571428571" calcext:value-type="float">
            <text:p>57.142857142857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BTOTAL(9;[.D39:.D41])" office:value-type="float" office:value="35" calcext:value-type="float">
            <text:p>35</text:p>
          </table:table-cell>
          <table:table-cell table:number-columns-repeated="16380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y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9"/>
        <table:table-column table:style-name="co15" table:default-cell-style-name="ce8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6376" table:default-cell-style-name="Default"/>
        <table:table-row table:style-name="ro1">
          <table:table-cell table:style-name="ce1" table:number-columns-spanned="8" table:number-rows-spanned="1"/>
          <table:covered-table-cell table:number-columns-repeated="7" table:style-name="ce1"/>
          <table:table-cell table:number-columns-repeated="16376"/>
        </table:table-row>
        <table:table-row table:style-name="ro11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ombres y Apellidos</text:p>
          </table:table-cell>
          <table:table-cell table:style-name="ce2" office:value-type="string" calcext:value-type="string">
            <text:p>Cuyes <text:s/>madres</text:p>
          </table:table-cell>
          <table:table-cell table:style-name="ce2" office:value-type="string" calcext:value-type="string">
            <text:p>Cuyes Machos</text:p>
          </table:table-cell>
          <table:table-cell table:style-name="ce2" office:value-type="string" calcext:value-type="string">
            <text:p>Recria</text:p>
          </table:table-cell>
          <table:table-cell table:style-name="ce2" office:value-type="string" calcext:value-type="string">
            <text:p>gasaperas</text:p>
          </table:table-cell>
          <table:table-cell table:style-name="ce2" office:value-type="string" calcext:value-type="string">
            <text:p>galpon m2</text:p>
          </table:table-cell>
          <table:table-cell table:style-name="ce2" office:value-type="string" calcext:value-type="string">
            <text:p>area con <text:s/>alafalfar</text:p>
          </table:table-cell>
          <table:table-cell table:style-name="ce2" office:value-type="string" calcext:value-type="string">
            <text:p>area para instalar pasto</text:p>
          </table:table-cell>
          <table:table-cell table:number-columns-repeated="1637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 text:c="2"/>Juan Rojas Avalo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21"/>
          <table:table-cell table:style-name="ce23" office:value-type="float" office:value="48" calcext:value-type="float">
            <text:p>48.00</text:p>
          </table:table-cell>
          <table:table-cell table:style-name="ce25" office:value-type="float" office:value="0.5" calcext:value-type="float">
            <text:p>0.5</text:p>
          </table:table-cell>
          <table:table-cell table:style-name="ce7" office:value-type="float" office:value="0.25" calcext:value-type="float">
            <text:p>0.25</text:p>
          </table:table-cell>
          <table:table-cell/>
          <table:table-cell table:style-name="ce17"/>
          <table:table-cell table:number-columns-repeated="16373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 text:c="2"/>Antonio Casafranca Aguila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style-name="ce23" office:value-type="float" office:value="12" calcext:value-type="float">
            <text:p>12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 text:c="2"/>Alejandra Rojas Quisp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style-name="ce23" office:value-type="float" office:value="32" calcext:value-type="float">
            <text:p>32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 text:c="2"/>Benericta Demetria Quispe Huamani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8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 text:c="2"/>Victor Rojas Valencia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0" calcext:value-type="float">
            <text:p>40.00</text:p>
          </table:table-cell>
          <table:table-cell table:style-name="ce25" office:value-type="float" office:value="0.25" calcext:value-type="float">
            <text:p>0.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8" office:value-type="string" calcext:value-type="string">
            <text:p><text:s text:c="2"/>Eduardo Rojas Sanchez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21"/>
          <table:table-cell table:style-name="ce23" office:value-type="float" office:value="32" calcext:value-type="float">
            <text:p>32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 text:c="2"/>Claudio Aguilar Allcca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21"/>
          <table:table-cell table:style-name="ce23" office:value-type="float" office:value="32" calcext:value-type="float">
            <text:p>32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s text:c="2"/>Cristina Ccahuana Espillco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0" calcext:value-type="float">
            <text:p>100</text:p>
          </table:table-cell>
          <table:table-cell table:style-name="ce21"/>
          <table:table-cell table:style-name="ce23" office:value-type="float" office:value="48" calcext:value-type="float">
            <text:p>48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9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<text:s text:c="2"/>Victor Joel Rojas Oyolo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0" calcext:value-type="float">
            <text:p>40.00</text:p>
          </table:table-cell>
          <table:table-cell table:style-name="ce25" office:value-type="float" office:value="0.25" calcext:value-type="float">
            <text:p>0.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<text:s/>Violeta Espejo Aval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<text:s text:c="2"/>Melchor Valencia Ortiz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8" office:value-type="string" calcext:value-type="string">
            <text:p><text:s/>Nataly Yudith Valencia Lobo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<text:s text:c="2"/>Fidencia Lobo Espej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21"/>
          <table:table-cell table:style-name="ce23" office:value-type="float" office:value="12" calcext:value-type="float">
            <text:p>12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9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<text:s text:c="2"/>Esteban Casafranca Gonza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21"/>
          <table:table-cell table:style-name="ce23" office:value-type="float" office:value="40" calcext:value-type="float">
            <text:p>40.00</text:p>
          </table:table-cell>
          <table:table-cell table:style-name="ce25" office:value-type="float" office:value="0.25" calcext:value-type="float">
            <text:p>0.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8" office:value-type="string" calcext:value-type="string">
            <text:p><text:s text:c="2"/>Miguel Angel Oyolo Sanchez</text:p>
          </table:table-cell>
          <table:table-cell table:style-name="ce5"/>
          <table:table-cell table:style-name="ce6"/>
          <table:table-cell table:style-name="ce5"/>
          <table:table-cell table:style-name="ce21"/>
          <table:table-cell table:style-name="ce23"/>
          <table:table-cell table:style-name="ce25"/>
          <table:table-cell table:style-name="ce7"/>
          <table:table-cell table:number-columns-repeated="16375"/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<text:s text:c="2"/>Leoncio Aguilar Allcca</text:p>
          </table:table-cell>
          <table:table-cell table:style-name="ce5"/>
          <table:table-cell table:style-name="ce6"/>
          <table:table-cell table:style-name="ce5"/>
          <table:table-cell table:style-name="ce21"/>
          <table:table-cell table:style-name="ce23"/>
          <table:table-cell table:style-name="ce25"/>
          <table:table-cell table:style-name="ce7"/>
          <table:table-cell table:number-columns-repeated="16375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<text:s text:c="2"/>Eladio Flores Casafranca</text:p>
          </table:table-cell>
          <table:table-cell table:style-name="ce5" table:number-columns-repeated="3"/>
          <table:table-cell table:style-name="ce21"/>
          <table:table-cell table:style-name="ce23"/>
          <table:table-cell table:style-name="ce25"/>
          <table:table-cell table:style-name="ce7"/>
          <table:table-cell table:number-columns-repeated="16375"/>
        </table:table-row>
        <table:table-row table:style-name="ro9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<text:s text:c="2"/>Eusebio Rojas Quisp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<text:s text:c="2"/>Karina Arquiñego Roj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21"/>
          <table:table-cell table:style-name="ce23" office:value-type="float" office:value="12" calcext:value-type="float">
            <text:p>12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<text:s text:c="2"/>Josefina Peralta Sanchez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<text:s/>Gladys Valencia Ortiz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25" calcext:value-type="float">
            <text:p>0.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<text:s text:c="2"/>Neri Lobo Gonzale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<text:s text:c="2"/>Maria Rojas Sanchez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40" calcext:value-type="float">
            <text:p>4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16375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<text:s text:c="2"/>Aurelia Casafranca Gonzal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10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<text:s text:c="2"/>Candelaria Rojas Ortiz de Arquiñego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125" calcext:value-type="float">
            <text:p>0.1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9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<text:s text:c="2"/>Felicita Rojas Ccahuana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21"/>
          <table:table-cell table:style-name="ce23" office:value-type="float" office:value="20" calcext:value-type="float">
            <text:p>20.00</text:p>
          </table:table-cell>
          <table:table-cell table:style-name="ce25" office:value-type="float" office:value="0.25" calcext:value-type="float">
            <text:p>0.2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5"/>
        </table:table-row>
        <table:table-row table:style-name="ro9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<text:s text:c="2"/>Florinda Rojas Quispe</text:p>
          </table:table-cell>
          <table:table-cell table:style-name="ce5" table:number-columns-repeated="3"/>
          <table:table-cell table:style-name="ce21"/>
          <table:table-cell table:style-name="ce23"/>
          <table:table-cell table:style-name="ce25" office:value-type="float" office:value="0.25" calcext:value-type="float">
            <text:p>0.25</text:p>
          </table:table-cell>
          <table:table-cell table:style-name="ce26" office:value-type="float" office:value="1" calcext:value-type="float">
            <text:p>1.00</text:p>
          </table:table-cell>
          <table:table-cell table:number-columns-repeated="16375"/>
        </table:table-row>
        <table:table-row table:style-name="ro9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<text:s text:c="2"/>Jose Antonio Casafranca Espejo</text:p>
          </table:table-cell>
          <table:table-cell table:style-name="ce20"/>
          <table:table-cell table:style-name="ce7"/>
          <table:table-cell table:style-name="ce20"/>
          <table:table-cell table:style-name="ce4"/>
          <table:table-cell table:style-name="ce24"/>
          <table:table-cell table:style-name="ce4" table:number-columns-repeated="2"/>
          <table:table-cell table:number-columns-repeated="16375"/>
        </table:table-row>
        <table:table-row table:style-name="ro9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<text:s text:c="2"/>Jesus Manuel Espejo Gonzales</text:p>
          </table:table-cell>
          <table:table-cell table:style-name="ce5" table:number-columns-repeated="3"/>
          <table:table-cell table:style-name="ce21"/>
          <table:table-cell table:style-name="ce23"/>
          <table:table-cell table:style-name="ce25"/>
          <table:table-cell table:style-name="ce7"/>
          <table:table-cell table:number-columns-repeated="16375"/>
        </table:table-row>
        <table:table-row table:style-name="ro9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<text:s text:c="2"/>Josue Espejo Gonzales</text:p>
          </table:table-cell>
          <table:table-cell table:style-name="ce5" table:number-columns-repeated="3"/>
          <table:table-cell table:style-name="ce21"/>
          <table:table-cell table:style-name="ce23"/>
          <table:table-cell table:style-name="ce25"/>
          <table:table-cell table:style-name="ce7"/>
          <table:table-cell table:number-columns-repeated="1637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<text:s text:c="2"/>Elizabeth Espejo Gonzales</text:p>
          </table:table-cell>
          <table:table-cell table:style-name="ce7" table:number-columns-repeated="3"/>
          <table:table-cell table:style-name="ce22"/>
          <table:table-cell table:style-name="ce7" table:number-columns-repeated="3"/>
          <table:table-cell table:number-columns-repeated="16375"/>
        </table:table-row>
        <table:table-row table:style-name="ro1">
          <table:table-cell table:style-name="ce4"/>
          <table:table-cell table:style-name="ce19" office:value-type="string" calcext:value-type="string">
            <text:p>SUB TOTAL</text:p>
          </table:table-cell>
          <table:table-cell table:style-name="ce20" table:formula="of:=SUM([.C3:.C33])" office:value-type="float" office:value="244" calcext:value-type="float">
            <text:p>244</text:p>
          </table:table-cell>
          <table:table-cell table:style-name="ce20" table:formula="of:=SUM([.D3:.D33])" office:value-type="float" office:value="55" calcext:value-type="float">
            <text:p>55</text:p>
          </table:table-cell>
          <table:table-cell table:style-name="ce20" table:formula="of:=SUM([.E3:.E33])" office:value-type="float" office:value="472" calcext:value-type="float">
            <text:p>472</text:p>
          </table:table-cell>
          <table:table-cell table:style-name="ce20" table:formula="of:=SUM([.F3:.F33])" office:value-type="float" office:value="12" calcext:value-type="float">
            <text:p>12</text:p>
          </table:table-cell>
          <table:table-cell table:style-name="ce20" table:formula="of:=SUM([.G3:.G33])" office:value-type="float" office:value="628" calcext:value-type="float">
            <text:p>628</text:p>
          </table:table-cell>
          <table:table-cell table:style-name="ce20" table:formula="of:=SUM([.H3:.H33])" office:value-type="float" office:value="4.125" calcext:value-type="float">
            <text:p>4.125</text:p>
          </table:table-cell>
          <table:table-cell table:style-name="ce20" table:formula="of:=SUM([.I3:.I33])" office:value-type="float" office:value="5.5" calcext:value-type="float">
            <text:p>5.5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19" office:value-type="string" calcext:value-type="string">
            <text:p>TOTAL</text:p>
          </table:table-cell>
          <table:table-cell table:style-name="ce20" table:formula="of:=+[.C34]+[.D34]" office:value-type="float" office:value="299" calcext:value-type="float">
            <text:p>299</text:p>
          </table:table-cell>
          <table:table-cell table:style-name="ce7"/>
          <table:table-cell table:style-name="ce20"/>
          <table:table-cell table:style-name="ce4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formula="of:=+[.C34]+[.D34]+[.E34]" office:value-type="float" office:value="771" calcext:value-type="float">
            <text:p>771</text:p>
          </table:table-cell>
          <table:table-cell table:number-columns-repeated="16381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enes" table:style-name="ta3"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ce9"/>
        <table:table-column table:style-name="co10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10" table:number-columns-repeated="16375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GOBIERNO REGIONAL AYACUCHO</text:p>
          </table:table-cell>
          <table:table-cell table:number-columns-repeated="16382"/>
        </table:table-row>
        <table:table-row table:style-name="ro1">
          <table:table-cell/>
          <table:table-cell table:style-name="ce28" office:value-type="string" calcext:value-type="string">
            <text:p>MATERIAL</text:p>
          </table:table-cell>
          <table:table-cell table:style-name="ce28" office:value-type="string" calcext:value-type="string">
            <text:p>UND</text:p>
          </table:table-cell>
          <table:table-cell table:style-name="ce28" office:value-type="string" calcext:value-type="string">
            <text:p>CANT</text:p>
          </table:table-cell>
          <table:table-cell table:style-name="ce28" office:value-type="string" calcext:value-type="string">
            <text:p>P.UNIT</text:p>
          </table:table-cell>
          <table:table-cell table:number-columns-repeated="16379"/>
        </table:table-row>
        <table:table-row table:style-name="ro1">
          <table:table-cell/>
          <table:table-cell table:style-name="ce29" office:value-type="string" calcext:value-type="string">
            <text:p>Gazaperas galvanizado</text:p>
          </table:table-cell>
          <table:table-cell table:style-name="ce20" office:value-type="string" calcext:value-type="string">
            <text:p>und</text:p>
          </table:table-cell>
          <table:table-cell table:style-name="ce20" table:formula="of:=20*29" office:value-type="float" office:value="580" calcext:value-type="float">
            <text:p>580</text:p>
          </table:table-cell>
          <table:table-cell table:style-name="ce4"/>
          <table:table-cell table:style-name="ce34" table:formula="of:=+[.E6]*[.D6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>
            <text:p>Forrajera</text:p>
          </table:table-cell>
          <table:table-cell table:style-name="ce20" office:value-type="string" calcext:value-type="string">
            <text:p>und</text:p>
          </table:table-cell>
          <table:table-cell table:style-name="ce20" table:formula="of:=29*10" office:value-type="float" office:value="290" calcext:value-type="float">
            <text:p>290</text:p>
          </table:table-cell>
          <table:table-cell table:style-name="ce4"/>
          <table:table-cell table:style-name="ce34" table:formula="of:=+[.E7]*[.D7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>
            <text:p>Comedero tipo tova de aluminio cap. 4.0 kg</text:p>
          </table:table-cell>
          <table:table-cell table:style-name="ce20" office:value-type="string" calcext:value-type="string">
            <text:p>und</text:p>
          </table:table-cell>
          <table:table-cell table:style-name="ce20" table:formula="of:=29*20" office:value-type="float" office:value="580" calcext:value-type="float">
            <text:p>580</text:p>
          </table:table-cell>
          <table:table-cell table:style-name="ce4"/>
          <table:table-cell table:style-name="ce34" table:formula="of:=+[.E8]*[.D8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>
            <text:p>Jabas de Manejo 35*52*36 cm</text:p>
          </table:table-cell>
          <table:table-cell table:style-name="ce20" office:value-type="string" calcext:value-type="string">
            <text:p>und</text:p>
          </table:table-cell>
          <table:table-cell table:style-name="ce20" table:formula="of:=29*2" office:value-type="float" office:value="58" calcext:value-type="float">
            <text:p>58</text:p>
          </table:table-cell>
          <table:table-cell table:style-name="ce4"/>
          <table:table-cell table:style-name="ce34" table:formula="of:=+[.E9]*[.D9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0" office:value-type="string" calcext:value-type="string">
            <text:p>Jaba de transporte 58x83x13cm</text:p>
          </table:table-cell>
          <table:table-cell table:style-name="ce20" office:value-type="string" calcext:value-type="string">
            <text:p>und</text:p>
          </table:table-cell>
          <table:table-cell table:style-name="ce20" office:value-type="float" office:value="29" calcext:value-type="float">
            <text:p>29</text:p>
          </table:table-cell>
          <table:table-cell table:style-name="ce4"/>
          <table:table-cell table:style-name="ce34" table:formula="of:=+[.E10]*[.D10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Calamina de 0.25 mm de 3.60X 0.8 m</text:p>
          </table:table-cell>
          <table:table-cell table:style-name="ce14" office:value-type="string" calcext:value-type="string">
            <text:p>Pln</text:p>
          </table:table-cell>
          <table:table-cell table:style-name="ce14" table:formula="of:=29*25" office:value-type="float" office:value="725" calcext:value-type="float">
            <text:p>725</text:p>
          </table:table-cell>
          <table:table-cell table:style-name="ce4"/>
          <table:table-cell table:style-name="ce34" table:formula="of:=+[.E11]*[.D11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Calamina transparente 3.60*0.8 m (Fibra forte)</text:p>
          </table:table-cell>
          <table:table-cell table:style-name="ce14" office:value-type="string" calcext:value-type="string">
            <text:p>Pln</text:p>
          </table:table-cell>
          <table:table-cell table:style-name="ce14" table:formula="of:=29*2" office:value-type="float" office:value="58" calcext:value-type="float">
            <text:p>58</text:p>
          </table:table-cell>
          <table:table-cell table:style-name="ce4"/>
          <table:table-cell table:style-name="ce34" table:formula="of:=+[.E12]*[.D12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Malla revestido venilo color verde <text:s/>3/4x3/4" calib 1 mm x30 m</text:p>
          </table:table-cell>
          <table:table-cell table:style-name="ce14" office:value-type="string" calcext:value-type="string">
            <text:p>roll</text:p>
          </table:table-cell>
          <table:table-cell table:style-name="ce14" table:formula="of:=29*2" office:value-type="float" office:value="58" calcext:value-type="float">
            <text:p>58</text:p>
          </table:table-cell>
          <table:table-cell table:style-name="ce4"/>
          <table:table-cell table:style-name="ce34" table:formula="of:=+[.E13]*[.D13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Manguera 1" flexible *100m </text:p>
          </table:table-cell>
          <table:table-cell table:style-name="ce14" office:value-type="string" calcext:value-type="string">
            <text:p>roll</text:p>
          </table:table-cell>
          <table:table-cell table:style-name="ce14" office:value-type="float" office:value="29" calcext:value-type="float">
            <text:p>29</text:p>
          </table:table-cell>
          <table:table-cell table:style-name="ce4"/>
          <table:table-cell table:style-name="ce34" table:formula="of:=+[.E14]*[.D14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Bebedero Automatico </text:p>
          </table:table-cell>
          <table:table-cell table:style-name="ce14" office:value-type="string" calcext:value-type="string">
            <text:p>und</text:p>
          </table:table-cell>
          <table:table-cell table:style-name="ce14" table:formula="of:=29*40" office:value-type="float" office:value="1160" calcext:value-type="float">
            <text:p>1160</text:p>
          </table:table-cell>
          <table:table-cell table:style-name="ce4"/>
          <table:table-cell table:style-name="ce34" table:formula="of:=+[.E15]*[.D15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>
            <text:p>Termómetro máximo minimo </text:p>
          </table:table-cell>
          <table:table-cell table:style-name="ce14" office:value-type="string" calcext:value-type="string">
            <text:p>und</text:p>
          </table:table-cell>
          <table:table-cell table:style-name="ce14" office:value-type="float" office:value="29" calcext:value-type="float">
            <text:p>29</text:p>
          </table:table-cell>
          <table:table-cell table:style-name="ce4"/>
          <table:table-cell table:style-name="ce34" table:formula="of:=+[.E16]*[.D16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>
            <text:p>Balanza digital de 20 kg</text:p>
          </table:table-cell>
          <table:table-cell table:style-name="ce14" office:value-type="string" calcext:value-type="string">
            <text:p>und</text:p>
          </table:table-cell>
          <table:table-cell table:style-name="ce14" office:value-type="float" office:value="29" calcext:value-type="float">
            <text:p>29</text:p>
          </table:table-cell>
          <table:table-cell table:style-name="ce4"/>
          <table:table-cell table:style-name="ce34" table:formula="of:=+[.E17]*[.D17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Semilla de alfalfa moapa, california</text:p>
          </table:table-cell>
          <table:table-cell table:style-name="ce14" office:value-type="string" calcext:value-type="string">
            <text:p>Kg</text:p>
          </table:table-cell>
          <table:table-cell table:style-name="ce14" office:value-type="float" office:value="29" calcext:value-type="float">
            <text:p>29</text:p>
          </table:table-cell>
          <table:table-cell table:style-name="ce4"/>
          <table:table-cell table:style-name="ce34" table:formula="of:=+[.E18]*[.D18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Tubo PVC diam 1/2" C-10</text:p>
          </table:table-cell>
          <table:table-cell table:style-name="ce14" office:value-type="string" calcext:value-type="string">
            <text:p>und</text:p>
          </table:table-cell>
          <table:table-cell table:style-name="ce14" table:formula="of:=29*5" office:value-type="float" office:value="145" calcext:value-type="float">
            <text:p>145</text:p>
          </table:table-cell>
          <table:table-cell table:style-name="ce4"/>
          <table:table-cell table:style-name="ce34" table:formula="of:=+[.E19]*[.D19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Cinta teflon</text:p>
          </table:table-cell>
          <table:table-cell table:style-name="ce20" office:value-type="string" calcext:value-type="string">
            <text:p>und</text:p>
          </table:table-cell>
          <table:table-cell table:style-name="ce20" office:value-type="float" office:value="29" calcext:value-type="float">
            <text:p>29</text:p>
          </table:table-cell>
          <table:table-cell table:style-name="ce4"/>
          <table:table-cell table:style-name="ce34" table:formula="of:=+[.E20]*[.D20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Pagamento PVC</text:p>
          </table:table-cell>
          <table:table-cell table:style-name="ce20" office:value-type="string" calcext:value-type="string">
            <text:p>und</text:p>
          </table:table-cell>
          <table:table-cell table:style-name="ce20" office:value-type="float" office:value="29" calcext:value-type="float">
            <text:p>29</text:p>
          </table:table-cell>
          <table:table-cell table:style-name="ce4"/>
          <table:table-cell table:style-name="ce34" table:formula="of:=+[.E21]*[.D21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Aspersor <text:s/>ybis <text:s/>de <text:s/>3/4"</text:p>
          </table:table-cell>
          <table:table-cell table:style-name="ce20" office:value-type="string" calcext:value-type="string">
            <text:p>und</text:p>
          </table:table-cell>
          <table:table-cell table:style-name="ce20" office:value-type="float" office:value="29" calcext:value-type="float">
            <text:p>29</text:p>
          </table:table-cell>
          <table:table-cell table:style-name="ce4"/>
          <table:table-cell table:style-name="ce34" table:formula="of:=+[.E22]*[.D22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>
            <text:p>Bandeja pregerminadora</text:p>
          </table:table-cell>
          <table:table-cell table:style-name="ce20" office:value-type="string" calcext:value-type="string">
            <text:p>und</text:p>
          </table:table-cell>
          <table:table-cell table:style-name="ce20" table:formula="of:=29*3" office:value-type="float" office:value="87" calcext:value-type="float">
            <text:p>87</text:p>
          </table:table-cell>
          <table:table-cell table:style-name="ce4"/>
          <table:table-cell table:style-name="ce34" table:formula="of:=+[.E23]*[.D23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>
            <text:p>Kit veterinario</text:p>
          </table:table-cell>
          <table:table-cell table:style-name="ce20" office:value-type="string" calcext:value-type="string">
            <text:p>und</text:p>
          </table:table-cell>
          <table:table-cell table:style-name="ce20" office:value-type="float" office:value="29" calcext:value-type="float">
            <text:p>29</text:p>
          </table:table-cell>
          <table:table-cell table:style-name="ce4"/>
          <table:table-cell table:style-name="ce34" table:formula="of:=+[.E24]*[.D24]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/>
          <table:table-cell table:style-name="ce33"/>
          <table:table-cell table:style-name="ce16"/>
          <table:table-cell table:number-columns-repeated="2"/>
          <table:table-cell table:style-name="ce34" table:formula="of:=SUM([.F6:.F24]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35" office:value-type="string" calcext:value-type="string">
            <text:p>Sistema Hidroponico N° 01</text:p>
          </table:table-cell>
          <table:table-cell table:style-name="ce39" office:value-type="string" calcext:value-type="string">
            <text:p>unidad</text:p>
          </table:table-cell>
          <table:table-cell table:style-name="ce43"/>
          <table:table-cell table:style-name="ce43" office:value-type="float" office:value="10000" calcext:value-type="float">
            <text:p>10000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6" office:value-type="string" calcext:value-type="string">
            <text:p>Bebederos Automaticos tipo chupon </text:p>
          </table:table-cell>
          <table:table-cell table:style-name="ce40" office:value-type="string" calcext:value-type="string">
            <text:p>unidad</text:p>
          </table:table-cell>
          <table:table-cell table:style-name="ce44" table:formula="of:=60*15" office:value-type="float" office:value="900" calcext:value-type="float">
            <text:p>900.00</text:p>
          </table:table-cell>
          <table:table-cell table:style-name="ce44" office:value-type="float" office:value="12" calcext:value-type="float">
            <text:p>12.0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table:formula="of:=+[.D28]*[.C28]" office:value-type="float" office:value="9000" calcext:value-type="float">
            <text:p>9000</text:p>
          </table:table-cell>
          <table:table-cell table:number-columns-repeated="3"/>
          <table:table-cell table:style-name="ce37" office:value-type="string" calcext:value-type="string">
            <text:p>Manguera HDPE 1" C-4*100 m</text:p>
          </table:table-cell>
          <table:table-cell table:style-name="ce41" office:value-type="string" calcext:value-type="string">
            <text:p>Rollo</text:p>
          </table:table-cell>
          <table:table-cell table:style-name="ce45" office:value-type="float" office:value="30" calcext:value-type="float">
            <text:p>30.00</text:p>
          </table:table-cell>
          <table:table-cell table:style-name="ce45" office:value-type="float" office:value="150" calcext:value-type="float">
            <text:p>150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7" office:value-type="string" calcext:value-type="string">
            <text:p>Manguera 3/4" flexible *100m </text:p>
          </table:table-cell>
          <table:table-cell table:style-name="ce41" table:formula="of:=+[.J28]" office:value-type="string" office:string-value="Rollo" calcext:value-type="string">
            <text:p>Rollo</text:p>
          </table:table-cell>
          <table:table-cell table:style-name="ce45" office:value-type="float" office:value="30" calcext:value-type="float">
            <text:p>30.00</text:p>
          </table:table-cell>
          <table:table-cell table:style-name="ce45" office:value-type="float" office:value="90" calcext:value-type="float">
            <text:p>90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7" office:value-type="string" calcext:value-type="string">
            <text:p>Aspersor 3/4" circular PP. + rompechorro Nam Da</text:p>
          </table:table-cell>
          <table:table-cell table:style-name="ce41" office:value-type="string" calcext:value-type="string">
            <text:p>und</text:p>
          </table:table-cell>
          <table:table-cell table:style-name="ce45" office:value-type="float" office:value="30" calcext:value-type="float">
            <text:p>30.00</text:p>
          </table:table-cell>
          <table:table-cell table:style-name="ce45" office:value-type="float" office:value="38" calcext:value-type="float">
            <text:p>38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7"/>
          <table:table-cell table:style-name="ce41"/>
          <table:table-cell table:style-name="ce45" table:number-columns-repeated="2"/>
          <table:table-cell table:number-columns-repeated="16372"/>
        </table:table-row>
        <table:table-row table:style-name="ro1">
          <table:table-cell table:number-columns-repeated="8"/>
          <table:table-cell table:style-name="ce38" office:value-type="string" calcext:value-type="string">
            <text:p>Jaba de manejo </text:p>
          </table:table-cell>
          <table:table-cell table:style-name="ce42" office:value-type="string" calcext:value-type="string">
            <text:p>unidad</text:p>
          </table:table-cell>
          <table:table-cell table:style-name="ce46" table:formula="of:=15*4" office:value-type="float" office:value="60" calcext:value-type="float">
            <text:p>60.00</text:p>
          </table:table-cell>
          <table:table-cell table:style-name="ce46" office:value-type="float" office:value="21" calcext:value-type="float">
            <text:p>21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5" office:value-type="string" calcext:value-type="string">
            <text:p>Jaba de transporte </text:p>
          </table:table-cell>
          <table:table-cell table:style-name="ce39" table:formula="of:=+[.J32]" office:value-type="string" office:string-value="unidad" calcext:value-type="string">
            <text:p>unidad</text:p>
          </table:table-cell>
          <table:table-cell table:style-name="ce43" office:value-type="float" office:value="15" calcext:value-type="float">
            <text:p>15.00</text:p>
          </table:table-cell>
          <table:table-cell table:style-name="ce43" office:value-type="float" office:value="95" calcext:value-type="float">
            <text:p>95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8" office:value-type="string" calcext:value-type="string">
            <text:p>Comederos </text:p>
          </table:table-cell>
          <table:table-cell table:style-name="ce42" office:value-type="string" calcext:value-type="string">
            <text:p>unidad</text:p>
          </table:table-cell>
          <table:table-cell table:style-name="ce46" table:formula="of:=60*15" office:value-type="float" office:value="900" calcext:value-type="float">
            <text:p>900.00</text:p>
          </table:table-cell>
          <table:table-cell table:style-name="ce46" office:value-type="float" office:value="12" calcext:value-type="float">
            <text:p>12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8" office:value-type="string" calcext:value-type="string">
            <text:p>Gazapera de acero galvanizado</text:p>
          </table:table-cell>
          <table:table-cell table:style-name="ce42" office:value-type="string" calcext:value-type="string">
            <text:p>Unidad</text:p>
          </table:table-cell>
          <table:table-cell table:style-name="ce46" table:formula="of:=30*15" office:value-type="float" office:value="450" calcext:value-type="float">
            <text:p>450.00</text:p>
          </table:table-cell>
          <table:table-cell table:style-name="ce46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8" office:value-type="string" calcext:value-type="string">
            <text:p>Balanza mecanico tipo reloj X 20 kg</text:p>
          </table:table-cell>
          <table:table-cell table:style-name="ce42" table:formula="of:=+[.J35]" office:value-type="string" office:string-value="Unidad" calcext:value-type="string">
            <text:p>Unidad</text:p>
          </table:table-cell>
          <table:table-cell table:style-name="ce46" office:value-type="float" office:value="15" calcext:value-type="float">
            <text:p>15.00</text:p>
          </table:table-cell>
          <table:table-cell table:style-name="ce46" office:value-type="float" office:value="85" calcext:value-type="float">
            <text:p>85.00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8" office:value-type="string" calcext:value-type="string">
            <text:p>Termometro Maximo y Minimo (Mecánico)</text:p>
          </table:table-cell>
          <table:table-cell table:style-name="ce42" table:formula="of:=+[.J36]" office:value-type="string" office:string-value="Unidad" calcext:value-type="string">
            <text:p>Unidad</text:p>
          </table:table-cell>
          <table:table-cell table:style-name="ce46" office:value-type="float" office:value="15" calcext:value-type="float">
            <text:p>15.00</text:p>
          </table:table-cell>
          <table:table-cell table:style-name="ce46" office:value-type="float" office:value="82" calcext:value-type="float">
            <text:p>82.00</text:p>
          </table:table-cell>
          <table:table-cell table:number-columns-repeated="1637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am" table:style-name="ta4">
        <table:table-column table:style-name="co1" table:default-cell-style-name="Default"/>
        <table:table-column table:style-name="co24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9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47" office:value-type="string" calcext:value-type="string" table:number-columns-spanned="9" table:number-rows-spanned="1">
            <text:p>PADRON DE SOCIOS ACTUALIZADO</text:p>
          </table:table-cell>
          <table:covered-table-cell table:number-columns-repeated="8" table:style-name="ce47"/>
          <table:table-cell table:number-columns-repeated="16375"/>
        </table:table-row>
        <table:table-row table:style-name="ro11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Nombres y Apellidos</text:p>
          </table:table-cell>
          <table:table-cell table:style-name="ce48" office:value-type="string" calcext:value-type="string">
            <text:p>DNI</text:p>
          </table:table-cell>
          <table:table-cell table:style-name="ce48" office:value-type="string" calcext:value-type="string">
            <text:p>Sexo</text:p>
          </table:table-cell>
          <table:table-cell table:style-name="ce48" office:value-type="string" calcext:value-type="string">
            <text:p>Condición</text:p>
          </table:table-cell>
          <table:table-cell table:style-name="ce48" office:value-type="string" calcext:value-type="string">
            <text:p>Pasto alfalfar en Has</text:p>
          </table:table-cell>
          <table:table-cell table:style-name="ce48" office:value-type="string" calcext:value-type="string">
            <text:p>F.Nacimiento</text:p>
          </table:table-cell>
          <table:table-cell table:style-name="ce48" office:value-type="string" calcext:value-type="string">
            <text:p>EDAD</text:p>
          </table:table-cell>
          <table:table-cell table:style-name="ce48" office:value-type="string" calcext:value-type="string">
            <text:p>Edad años</text:p>
          </table:table-cell>
          <table:table-cell table:style-name="ce48" office:value-type="string" calcext:value-type="string">
            <text:p>N° de Familia</text:p>
          </table:table-cell>
          <table:table-cell table:number-columns-repeated="16374"/>
        </table:table-row>
        <table:table-row table:style-name="ro12"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DAVID CANCHO ASTO</text:p>
          </table:table-cell>
          <table:table-cell table:style-name="ce49" office:value-type="float" office:value="41729934" calcext:value-type="float">
            <text:p>41729934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Presidente</text:p>
          </table:table-cell>
          <table:table-cell table:style-name="ce56" office:value-type="float" office:value="0.87" calcext:value-type="float">
            <text:p>0.87</text:p>
          </table:table-cell>
          <table:table-cell table:style-name="ce57" office:value-type="date" office:date-value="1980-04-29" calcext:value-type="date">
            <text:p>29/04/1980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3];[.H3];&quot;y&quot;)" office:value-type="float" office:value="40" calcext:value-type="float">
            <text:p>4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ABELINO ANDRÉS ARONES HUAMANÍ</text:p>
          </table:table-cell>
          <table:table-cell table:style-name="ce49" office:value-type="float" office:value="28271514" calcext:value-type="float">
            <text:p>28271514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ice presidente</text:p>
          </table:table-cell>
          <table:table-cell table:style-name="ce56" office:value-type="float" office:value="0.33" calcext:value-type="float">
            <text:p>0.33</text:p>
          </table:table-cell>
          <table:table-cell table:style-name="ce57" office:value-type="date" office:date-value="1967-11-11" calcext:value-type="date">
            <text:p>11/11/1967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4];[.H4];&quot;y&quot;)" office:value-type="float" office:value="52" calcext:value-type="float">
            <text:p>5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6374"/>
        </table:table-row>
        <table:table-row table:style-name="ro13"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EDISON RETAMOZO HUAMANÍ</text:p>
          </table:table-cell>
          <table:table-cell table:style-name="ce49" office:value-type="float" office:value="74530699" calcext:value-type="float">
            <text:p>74530699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47" calcext:value-type="float">
            <text:p>0.47</text:p>
          </table:table-cell>
          <table:table-cell table:style-name="ce57" office:value-type="date" office:date-value="1994-12-10" calcext:value-type="date">
            <text:p>10/12/1994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5];[.H5];&quot;y&quot;)" office:value-type="float" office:value="25" calcext:value-type="float">
            <text:p>25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6374"/>
        </table:table-row>
        <table:table-row table:style-name="ro13"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MAURO ASTO ARANGO</text:p>
          </table:table-cell>
          <table:table-cell table:style-name="ce49" office:value-type="float" office:value="43870411" calcext:value-type="float">
            <text:p>43870411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Tesorero</text:p>
          </table:table-cell>
          <table:table-cell table:style-name="ce56" office:value-type="float" office:value="0.68" calcext:value-type="float">
            <text:p>0.68</text:p>
          </table:table-cell>
          <table:table-cell table:style-name="ce57" office:value-type="date" office:date-value="1974-11-28" calcext:value-type="date">
            <text:p>28/11/1974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6];[.H6];&quot;y&quot;)" office:value-type="float" office:value="45" calcext:value-type="float">
            <text:p>45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6374"/>
        </table:table-row>
        <table:table-row table:style-name="ro13"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ROXANA RAMÍREZ MARTÍNEZ</text:p>
          </table:table-cell>
          <table:table-cell table:style-name="ce49" office:value-type="float" office:value="41112349" calcext:value-type="float">
            <text:p>41112349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Fiscal</text:p>
          </table:table-cell>
          <table:table-cell table:style-name="ce56" office:value-type="float" office:value="0.89" calcext:value-type="float">
            <text:p>0.89</text:p>
          </table:table-cell>
          <table:table-cell table:style-name="ce57" office:value-type="date" office:date-value="1981-03-31" calcext:value-type="date">
            <text:p>31/03/1981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7];[.H7];&quot;y&quot;)" office:value-type="float" office:value="39" calcext:value-type="float">
            <text:p>39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6374"/>
        </table:table-row>
        <table:table-row table:style-name="ro13"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HILARIO HUAMANÍ ASTO</text:p>
          </table:table-cell>
          <table:table-cell table:style-name="ce49" office:value-type="float" office:value="28235001" calcext:value-type="float">
            <text:p>28235001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ocal</text:p>
          </table:table-cell>
          <table:table-cell table:style-name="ce56" office:value-type="float" office:value="0.84" calcext:value-type="float">
            <text:p>0.84</text:p>
          </table:table-cell>
          <table:table-cell table:style-name="ce57" office:value-type="date" office:date-value="1953-01-15" calcext:value-type="date">
            <text:p>15/01/1953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8];[.H8];&quot;y&quot;)" office:value-type="float" office:value="67" calcext:value-type="float">
            <text:p>67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7" calcext:value-type="float">
            <text:p>7</text:p>
          </table:table-cell>
          <table:table-cell table:style-name="ce51" office:value-type="string" calcext:value-type="string">
            <text:p>YELITZA KINVERLY ARONES CANCHO</text:p>
          </table:table-cell>
          <table:table-cell table:style-name="ce49" office:value-type="float" office:value="70170954" calcext:value-type="float">
            <text:p>70170954</text:p>
          </table:table-cell>
          <table:table-cell table:style-name="ce54" office:value-type="string" calcext:value-type="string">
            <text:p>F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31" calcext:value-type="float">
            <text:p>0.31</text:p>
          </table:table-cell>
          <table:table-cell table:style-name="ce57" office:value-type="date" office:date-value="1998-06-04" calcext:value-type="date">
            <text:p>04/06/1998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9];[.H9];&quot;y&quot;)" office:value-type="float" office:value="22" calcext:value-type="float">
            <text:p>2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SERGIO ALEX SALVADOR MÉNDEZ</text:p>
          </table:table-cell>
          <table:table-cell table:style-name="ce49" office:value-type="float" office:value="73574928" calcext:value-type="float">
            <text:p>73574928</text:p>
          </table:table-cell>
          <table:table-cell table:style-name="ce54" office:value-type="string" calcext:value-type="string">
            <text:p>M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8" calcext:value-type="float">
            <text:p>0.80</text:p>
          </table:table-cell>
          <table:table-cell table:style-name="ce57" office:value-type="date" office:date-value="1997-01-09" calcext:value-type="date">
            <text:p>09/01/1997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0];[.H10];&quot;y&quot;)" office:value-type="float" office:value="23" calcext:value-type="float">
            <text:p>2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VICTORIANO CANCHARI ARONI</text:p>
          </table:table-cell>
          <table:table-cell table:style-name="ce49" office:value-type="float" office:value="28234451" calcext:value-type="float">
            <text:p>28234451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35" calcext:value-type="float">
            <text:p>0.35</text:p>
          </table:table-cell>
          <table:table-cell table:style-name="ce57" office:value-type="date" office:date-value="1966-09-05" calcext:value-type="date">
            <text:p>05/09/1966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1];[.H11];&quot;y&quot;)" office:value-type="float" office:value="53" calcext:value-type="float">
            <text:p>53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CARLOS CANCHARI ESPINOZA</text:p>
          </table:table-cell>
          <table:table-cell table:style-name="ce49" office:value-type="float" office:value="77685163" calcext:value-type="float">
            <text:p>77685163</text:p>
          </table:table-cell>
          <table:table-cell table:style-name="ce54" office:value-type="string" calcext:value-type="string">
            <text:p>M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3" calcext:value-type="float">
            <text:p>0.30</text:p>
          </table:table-cell>
          <table:table-cell table:style-name="ce57" office:value-type="date" office:date-value="1999-12-26" calcext:value-type="date">
            <text:p>26/12/1999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2];[.H12];&quot;y&quot;)" office:value-type="float" office:value="20" calcext:value-type="float">
            <text:p>2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ANA MARÍA GUTIÉRREZ HUAYHUA</text:p>
          </table:table-cell>
          <table:table-cell table:style-name="ce49" office:value-type="float" office:value="28292672" calcext:value-type="float">
            <text:p>28292672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a</text:p>
          </table:table-cell>
          <table:table-cell table:style-name="ce56" office:value-type="float" office:value="0.86" calcext:value-type="float">
            <text:p>0.86</text:p>
          </table:table-cell>
          <table:table-cell table:style-name="ce57" office:value-type="date" office:date-value="1974-05-08" calcext:value-type="date">
            <text:p>08/05/1974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3];[.H13];&quot;y&quot;)" office:value-type="float" office:value="46" calcext:value-type="float">
            <text:p>46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SARAGOZA CANCHO ASTO</text:p>
          </table:table-cell>
          <table:table-cell table:style-name="ce49" office:value-type="float" office:value="28264556" calcext:value-type="float">
            <text:p>28264556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a</text:p>
          </table:table-cell>
          <table:table-cell table:style-name="ce56" office:value-type="float" office:value="0.52" calcext:value-type="float">
            <text:p>0.52</text:p>
          </table:table-cell>
          <table:table-cell table:style-name="ce57" office:value-type="date" office:date-value="1967-10-12" calcext:value-type="date">
            <text:p>12/10/1967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4];[.H14];&quot;y&quot;)" office:value-type="float" office:value="52" calcext:value-type="float">
            <text:p>52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6374"/>
        </table:table-row>
        <table:table-row table:style-name="ro13">
          <table:table-cell table:style-name="ce49" office:value-type="float" office:value="13" calcext:value-type="float">
            <text:p>13</text:p>
          </table:table-cell>
          <table:table-cell table:style-name="ce51" office:value-type="string" calcext:value-type="string">
            <text:p>LISBETH ROSMER HUAMANÍ CANCHO</text:p>
          </table:table-cell>
          <table:table-cell table:style-name="ce49" office:value-type="float" office:value="72940188" calcext:value-type="float">
            <text:p>72940188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33" calcext:value-type="float">
            <text:p>0.33</text:p>
          </table:table-cell>
          <table:table-cell table:style-name="ce57" office:value-type="date" office:date-value="1996-11-23" calcext:value-type="date">
            <text:p>23/11/1996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5];[.H15];&quot;y&quot;)" office:value-type="float" office:value="23" calcext:value-type="float">
            <text:p>2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MARILUZ GUTIÉRREZ ARONES</text:p>
          </table:table-cell>
          <table:table-cell table:style-name="ce49" office:value-type="float" office:value="28235987" calcext:value-type="float">
            <text:p>28235987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a</text:p>
          </table:table-cell>
          <table:table-cell table:style-name="ce56" office:value-type="float" office:value="0.35" calcext:value-type="float">
            <text:p>0.35</text:p>
          </table:table-cell>
          <table:table-cell table:style-name="ce57" office:value-type="date" office:date-value="1965-10-26" calcext:value-type="date">
            <text:p>26/10/1965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6];[.H16];&quot;y&quot;)" office:value-type="float" office:value="54" calcext:value-type="float">
            <text:p>54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ZOSIMO CANCHO ASTO</text:p>
          </table:table-cell>
          <table:table-cell table:style-name="ce49" office:value-type="float" office:value="42390525" calcext:value-type="float">
            <text:p>42390525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39" calcext:value-type="float">
            <text:p>0.39</text:p>
          </table:table-cell>
          <table:table-cell table:style-name="ce57" office:value-type="date" office:date-value="1984-06-01" calcext:value-type="date">
            <text:p>01/06/1984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7];[.H17];&quot;y&quot;)" office:value-type="float" office:value="36" calcext:value-type="float">
            <text:p>36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6374"/>
        </table:table-row>
        <table:table-row table:style-name="ro13">
          <table:table-cell table:style-name="ce49" office:value-type="float" office:value="16" calcext:value-type="float">
            <text:p>16</text:p>
          </table:table-cell>
          <table:table-cell table:style-name="ce51" office:value-type="string" calcext:value-type="string">
            <text:p>KEYSI AMELIE CANCHO ÑAÑACCHUARI</text:p>
          </table:table-cell>
          <table:table-cell table:style-name="ce49" office:value-type="float" office:value="74232837" calcext:value-type="float">
            <text:p>74232837</text:p>
          </table:table-cell>
          <table:table-cell table:style-name="ce54" office:value-type="string" calcext:value-type="string">
            <text:p>F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25" calcext:value-type="float">
            <text:p>0.25</text:p>
          </table:table-cell>
          <table:table-cell table:style-name="ce57" office:value-type="date" office:date-value="2002-02-24" calcext:value-type="date">
            <text:p>24/02/2002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8];[.H18];&quot;y&quot;)" office:value-type="float" office:value="18" calcext:value-type="float">
            <text:p>1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6374"/>
        </table:table-row>
        <table:table-row table:style-name="ro13"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ERA NEREIDA ROJAS HUAMAN</text:p>
          </table:table-cell>
          <table:table-cell table:style-name="ce49" office:value-type="float" office:value="70453674" calcext:value-type="float">
            <text:p>70453674</text:p>
          </table:table-cell>
          <table:table-cell table:style-name="ce54" office:value-type="string" calcext:value-type="string">
            <text:p>F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67" calcext:value-type="float">
            <text:p>0.67</text:p>
          </table:table-cell>
          <table:table-cell table:style-name="ce57" office:value-type="date" office:date-value="1999-02-04" calcext:value-type="date">
            <text:p>04/02/1999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19];[.H19];&quot;y&quot;)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DARIA BELLIDO PALOMINO</text:p>
          </table:table-cell>
          <table:table-cell table:style-name="ce49" office:value-type="float" office:value="70119327" calcext:value-type="float">
            <text:p>70119327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26" calcext:value-type="float">
            <text:p>0.26</text:p>
          </table:table-cell>
          <table:table-cell table:style-name="ce57" office:value-type="date" office:date-value="1993-01-03" calcext:value-type="date">
            <text:p>03/01/1993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0];[.H20];&quot;y&quot;)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6374"/>
        </table:table-row>
        <table:table-row table:style-name="ro13"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ROSA MARÍA HUAMANÍ ASTO</text:p>
          </table:table-cell>
          <table:table-cell table:style-name="ce49" office:value-type="float" office:value="28307425" calcext:value-type="float">
            <text:p>28307425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24" calcext:value-type="float">
            <text:p>0.24</text:p>
          </table:table-cell>
          <table:table-cell table:style-name="ce57" office:value-type="date" office:date-value="1967-04-10" calcext:value-type="date">
            <text:p>10/04/1967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1];[.H21];&quot;y&quot;)" office:value-type="float" office:value="53" calcext:value-type="float">
            <text:p>53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MARCELINO GUTIÉRREZ ARONE</text:p>
          </table:table-cell>
          <table:table-cell table:style-name="ce49" office:value-type="float" office:value="28298060" calcext:value-type="float">
            <text:p>28298060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22" calcext:value-type="float">
            <text:p>0.22</text:p>
          </table:table-cell>
          <table:table-cell table:style-name="ce57" office:value-type="date" office:date-value="1973-10-30" calcext:value-type="date">
            <text:p>30/10/1973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2];[.H22];&quot;y&quot;)" office:value-type="float" office:value="46" calcext:value-type="float">
            <text:p>46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FREDY OSCCO TELLO</text:p>
          </table:table-cell>
          <table:table-cell table:style-name="ce49" office:value-type="float" office:value="47594182" calcext:value-type="float">
            <text:p>47594182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52" calcext:value-type="float">
            <text:p>0.52</text:p>
          </table:table-cell>
          <table:table-cell table:style-name="ce57" office:value-type="date" office:date-value="1991-11-24" calcext:value-type="date">
            <text:p>24/11/1991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3];[.H23];&quot;y&quot;)" office:value-type="float" office:value="28" calcext:value-type="float">
            <text:p>28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EDGAR HUAMANÍ MÉNDEZ</text:p>
          </table:table-cell>
          <table:table-cell table:style-name="ce49" office:value-type="float" office:value="48813812" calcext:value-type="float">
            <text:p>48813812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46" calcext:value-type="float">
            <text:p>0.46</text:p>
          </table:table-cell>
          <table:table-cell table:style-name="ce57" office:value-type="date" office:date-value="1982-03-11" calcext:value-type="date">
            <text:p>11/03/1982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4];[.H24];&quot;y&quot;)" office:value-type="float" office:value="38" calcext:value-type="float">
            <text:p>38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6374"/>
        </table:table-row>
        <table:table-row table:style-name="ro13"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BETSAIDA HUAMANÍ PISCO</text:p>
          </table:table-cell>
          <table:table-cell table:style-name="ce49" office:value-type="float" office:value="48238889" calcext:value-type="float">
            <text:p>48238889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4" calcext:value-type="float">
            <text:p>0.40</text:p>
          </table:table-cell>
          <table:table-cell table:style-name="ce57" office:value-type="date" office:date-value="1994-01-23" calcext:value-type="date">
            <text:p>23/01/1994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5];[.H25];&quot;y&quot;)" office:value-type="float" office:value="26" calcext:value-type="float">
            <text:p>26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HERMINIO CÓRDOVA ALANYA</text:p>
          </table:table-cell>
          <table:table-cell table:style-name="ce49" office:value-type="float" office:value="41680949" calcext:value-type="float">
            <text:p>41680949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53" calcext:value-type="float">
            <text:p>0.53</text:p>
          </table:table-cell>
          <table:table-cell table:style-name="ce57" office:value-type="date" office:date-value="1983-04-18" calcext:value-type="date">
            <text:p>18/04/1983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6];[.H26];&quot;y&quot;)" office:value-type="float" office:value="37" calcext:value-type="float">
            <text:p>37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6374"/>
        </table:table-row>
        <table:table-row table:style-name="ro13"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JULIO HUAMANÍ ASTO</text:p>
          </table:table-cell>
          <table:table-cell table:style-name="ce49" office:value-type="float" office:value="28234353" calcext:value-type="float">
            <text:p>28234353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2.73" calcext:value-type="float">
            <text:p>2.73</text:p>
          </table:table-cell>
          <table:table-cell table:style-name="ce57" office:value-type="date" office:date-value="1954-12-10" calcext:value-type="date">
            <text:p>10/12/1954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7];[.H27];&quot;y&quot;)" office:value-type="float" office:value="65" calcext:value-type="float">
            <text:p>6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6374"/>
        </table:table-row>
        <table:table-row table:style-name="ro13"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EVERSON HUAMANÍ MÉNDEZ</text:p>
          </table:table-cell>
          <table:table-cell table:style-name="ce49" office:value-type="float" office:value="61030055" calcext:value-type="float">
            <text:p>61030055</text:p>
          </table:table-cell>
          <table:table-cell table:style-name="ce54" office:value-type="string" calcext:value-type="string">
            <text:p>M</text:p>
          </table:table-cell>
          <table:table-cell table:style-name="ce53" office:value-type="string" calcext:value-type="string">
            <text:p>joven</text:p>
          </table:table-cell>
          <table:table-cell table:style-name="ce56" office:value-type="float" office:value="0.69" calcext:value-type="float">
            <text:p>0.69</text:p>
          </table:table-cell>
          <table:table-cell table:style-name="ce57" office:value-type="date" office:date-value="1999-06-27" calcext:value-type="date">
            <text:p>27/06/1999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8];[.H28];&quot;y&quot;)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374"/>
        </table:table-row>
        <table:table-row table:style-name="ro13"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YURI HUAMANÍ PISCO</text:p>
          </table:table-cell>
          <table:table-cell table:style-name="ce49" office:value-type="float" office:value="44968468" calcext:value-type="float">
            <text:p>44968468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ocio</text:p>
          </table:table-cell>
          <table:table-cell table:style-name="ce56" office:value-type="float" office:value="0.43" calcext:value-type="float">
            <text:p>0.43</text:p>
          </table:table-cell>
          <table:table-cell table:style-name="ce57" office:value-type="date" office:date-value="1987-11-22" calcext:value-type="date">
            <text:p>22/11/1987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29];[.H29];&quot;y&quot;)" office:value-type="float" office:value="32" calcext:value-type="float">
            <text:p>3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6374"/>
        </table:table-row>
        <table:table-row table:style-name="ro13"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TANIA SALVATIERRA ORE</text:p>
          </table:table-cell>
          <table:table-cell table:style-name="ce49" office:value-type="float" office:value="70209155" calcext:value-type="float">
            <text:p>70209155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a</text:p>
          </table:table-cell>
          <table:table-cell table:style-name="ce56" office:value-type="float" office:value="0.9" calcext:value-type="float">
            <text:p>0.90</text:p>
          </table:table-cell>
          <table:table-cell table:style-name="ce57" office:value-type="date" office:date-value="1991-05-10" calcext:value-type="date">
            <text:p>10/05/1991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30];[.H30];&quot;y&quot;)" office:value-type="float" office:value="29" calcext:value-type="float">
            <text:p>29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6374"/>
        </table:table-row>
        <table:table-row table:style-name="ro13"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IRENE ÑAÑACCHUARI PAUCAR</text:p>
          </table:table-cell>
          <table:table-cell table:style-name="ce49" office:value-type="float" office:value="41162761" calcext:value-type="float">
            <text:p>41162761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Socia</text:p>
          </table:table-cell>
          <table:table-cell table:style-name="ce56" office:value-type="float" office:value="0.96" calcext:value-type="float">
            <text:p>0.96</text:p>
          </table:table-cell>
          <table:table-cell table:style-name="ce57" office:value-type="date" office:date-value="1981-12-01" calcext:value-type="date">
            <text:p>01/12/1981</text:p>
          </table:table-cell>
          <table:table-cell table:style-name="ce58" office:value-type="date" office:date-value="2020-07-14" calcext:value-type="date">
            <text:p>14/07/2020</text:p>
          </table:table-cell>
          <table:table-cell table:style-name="ce59" table:formula="of:=DATEDIF([.G31];[.H31];&quot;y&quot;)" office:value-type="float" office:value="38" calcext:value-type="float">
            <text:p>38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6374"/>
        </table:table-row>
        <table:table-row table:style-name="ro13">
          <table:table-cell table:style-name="ce50" table:number-columns-spanned="4" table:number-rows-spanned="1"/>
          <table:covered-table-cell table:number-columns-repeated="2" table:style-name="ce52"/>
          <table:covered-table-cell table:style-name="ce55"/>
          <table:table-cell table:style-name="ce50" office:value-type="string" calcext:value-type="string" table:number-columns-spanned="5" table:number-rows-spanned="1">
            <text:p>Total</text:p>
          </table:table-cell>
          <table:covered-table-cell table:number-columns-repeated="3" table:style-name="ce52"/>
          <table:covered-table-cell table:style-name="ce55"/>
          <table:table-cell table:style-name="ce60" table:formula="of:=SUM([.J3:.J31])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formula="of:=+[.F32]/29"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padron.A2:padron.I33" table:display-filter-buttons="true"/>
        <table:database-range table:name="__Anonymous_Sheet_DB__1" table:target-range-address="cuyes.A2:cuyes.J32"/>
        <table:database-range table:name="__Anonymous_Sheet_DB__3" table:target-range-address="fam.A2:fam.J3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cm" fo:margin-bottom="1.9cm" fo:margin-left="1.799cm" fo:margin-right="0.3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cm" fo:margin-bottom="1.9cm" fo:margin-left="0.499cm" fo:margin-right="0.3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enes" style:display-name="PageStyle_bie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dron" style:display-name="PageStyle_padr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yes" style:display-name="PageStyle_cuy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m" style:display-name="PageStyle_fa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User</dc:creator>
    <meta:print-date>2020-08-11T23:21:09</meta:print-date>
    <meta:creation-date>2020-07-14T23:20:56</meta:creation-date>
    <dc:date>2020-09-14T06:59:53</dc:date>
    <meta:generator>LibreOffice/24.2.4.2$Linux_X86_64 LibreOffice_project/420$Build-2</meta:generator>
    <meta:document-statistic meta:table-count="4" meta:cell-count="1036" meta:object-count="0"/>
    <meta:user-defined meta:name="AppVersion">16.0300</meta:user-defined>
  </office:meta>
</office:document-meta>
</file>