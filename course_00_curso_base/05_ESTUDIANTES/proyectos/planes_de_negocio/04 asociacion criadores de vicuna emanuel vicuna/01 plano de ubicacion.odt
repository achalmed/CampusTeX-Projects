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A000002A06401C7DB.png" manifest:media-type="image/png"/>
  <manifest:file-entry manifest:full-path="Pictures/100000010000016300000225F413E0EE.png" manifest:media-type="image/png"/>
  <manifest:file-entry manifest:full-path="Pictures/10000001000001A50000029E17A979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s" fo:country="MX" fo:font-weight="bold" style:font-size-asian="14pt" style:font-weight-asian="bold" style:font-size-complex="14pt"/>
    </style:style>
    <style:style style:name="T2" style:family="text">
      <style:text-properties fo:font-size="12pt" fo:language="es" fo:country="MX" fo:font-weight="bold" style:font-size-asian="12pt" style:font-weight-asian="bold" style:font-size-complex="12pt"/>
    </style:style>
    <style:style style:name="T3" style:family="text">
      <style:text-properties style:language-asian="es" style:country-asian="PE"/>
    </style:style>
    <style:style style:name="T4" style:family="text">
      <style:text-properties fo:language="es" fo:country="MX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53cm" svg:stroke-color="#ff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9.361cm" fo:min-width="2.353cm" fo:padding-top="0.125cm" fo:padding-bottom="0.125cm" fo:padding-left="0.25cm" fo:padding-right="0.25cm" fo:wrap-option="wrap" loext:decorative="false" fo:margin-left="0.106cm" fo:margin-right="0.06cm" fo:margin-top="0cm" fo:margin-bottom="0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LANO DE UBICACIÓN</text:span><text:span text:style-name="T1"/></text:p>
      <text:p text:style-name="P1" loext:marker-style-name="T1"><text:span text:style-name="T1">CHALLHUAMAYO, APONGO – FAJARDO – AYACUCHO.</text:span><text:span text:style-name="T1"/></text:p>
      <text:p text:style-name="P2" loext:marker-style-name="T2"><text:span text:style-name="T2">PARA LLEGAR: AYACUCHO A HUALLA Y DE ALLI TROCHA CARROZABLE APROX. 50 KM A DIRECCION SUROESTE – CARRETERA A NAZCA.</text:span><text:span text:style-name="T2"/></text:p>
      <text:p text:style-name="Standard" loext:marker-style-name="T4"><draw:custom-shape text:anchor-type="char" draw:z-index="0" draw:name="Conector recto de flecha 4" draw:style-name="gr1" draw:text-style-name="P3" svg:width="2.853cm" svg:height="9.61cm" svg:x="6.581cm" svg:y="5.405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3"><text:s text:c="4"/></text:span><draw:frame draw:style-name="fr1" draw:name="Imagen 1" text:anchor-type="as-char" svg:width="7.043cm" svg:height="11.113cm" draw:z-index="0"><draw:image xlink:href="Pictures/10000001000001A50000029E17A979B2.png" xlink:type="simple" xlink:show="embed" xlink:actuate="onLoad" draw:mime-type="image/png"/><svg:desc>C:\Users\USER\Desktop\fotos\AYA HALLA.PNG</svg:desc></draw:frame><text:span text:style-name="T3"><text:s/></text:span><text:bookmark-start text:name="_GoBack"/><draw:frame draw:style-name="fr1" draw:name="Imagen 2" text:anchor-type="as-char" svg:width="7.02cm" svg:height="11.15cm" draw:z-index="0"><draw:image xlink:href="Pictures/100000010000016300000225F413E0EE.png" xlink:type="simple" xlink:show="embed" xlink:actuate="onLoad" draw:mime-type="image/png"/><svg:desc>C:\Users\USER\Desktop\fotos\APON.PNG</svg:desc></draw:frame><text:bookmark-end text:name="_GoBack"/></text:p>
      <text:p text:style-name="Standard" loext:marker-style-name="T4"><text:span text:style-name="T4"><text:s text:c="5"/></text:span><draw:frame draw:style-name="fr1" draw:name="Imagen 3" text:anchor-type="as-char" svg:width="14.185cm" svg:height="9.843cm" draw:z-index="0"><draw:image xlink:href="Pictures/10000001000003AA000002A06401C7DB.png" xlink:type="simple" xlink:show="embed" xlink:actuate="onLoad" draw:mime-type="image/png"/><svg:desc>C:\Users\USER\Desktop\fotos\CHALL.PNG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ll name</meta:initial-creator>
    <dc:creator>Full name</dc:creator>
    <meta:editing-cycles>1</meta:editing-cycles>
    <meta:creation-date>2020-09-14T14:35:00</meta:creation-date>
    <dc:date>2020-09-14T15:03:00</dc:date>
    <meta:editing-duration>PT28M</meta:editing-duration>
    <meta:generator>LibreOffice/24.2.4.2$Linux_X86_64 LibreOffice_project/420$Build-2</meta:generator>
    <meta:document-statistic meta:table-count="0" meta:image-count="3" meta:object-count="0" meta:page-count="1" meta:paragraph-count="5" meta:word-count="26" meta:character-count="183" meta:non-whitespace-character-count="147"/>
    <meta:user-defined meta:name="AppVersion">15.0000</meta:user-defined>
    <meta:user-defined meta:name="Company">company</meta:user-defined>
    <meta:template xlink:type="simple" xlink:actuate="onRequest" xlink:title="Normal" xlink:href=""/>
  </office:meta>
</office:document-meta>
</file>