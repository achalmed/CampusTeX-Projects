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5000001E5AD33194F.png" manifest:media-type="image/png"/>
  <manifest:file-entry manifest:full-path="Pictures/1003E10C00000F5B00003217DDBB9B69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ROCESO DE TRASFORMACIÓN DE LA FIBRA DE VICUÑA</text:span><text:span text:style-name="T1"/></text:p>
      <text:p text:style-name="P1"><draw:frame draw:style-name="fr1" draw:name="Imagen 13" text:anchor-type="as-char" svg:width="12.51cm" svg:height="22.802cm" draw:z-index="0"><draw:image xlink:href="Pictures/1003E10C00000F5B00003217DDBB9B69.emf" xlink:type="simple" xlink:show="embed" xlink:actuate="onLoad" draw:mime-type="image/x-emf"/><draw:image xlink:href="Pictures/1000000100000095000001E5AD33194F.png" xlink:type="simple" xlink:show="embed" xlink:actuate="onLoad" draw:mime-type="image/png"/></draw:frame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ll name</meta:initial-creator>
    <dc:creator>Full name</dc:creator>
    <meta:editing-cycles>1</meta:editing-cycles>
    <meta:creation-date>2020-09-14T01:06:00</meta:creation-date>
    <dc:date>2020-09-14T02:11:00</dc:date>
    <meta:editing-duration>PT22M</meta:editing-duration>
    <meta:generator>LibreOffice/24.2.4.2$Linux_X86_64 LibreOffice_project/420$Build-2</meta:generator>
    <meta:document-statistic meta:table-count="0" meta:image-count="1" meta:object-count="0" meta:page-count="1" meta:paragraph-count="2" meta:word-count="8" meta:character-count="46" meta:non-whitespace-character-count="39"/>
    <meta:user-defined meta:name="AppVersion">15.0000</meta:user-defined>
    <meta:user-defined meta:name="Company">company</meta:user-defined>
    <meta:template xlink:type="simple" xlink:actuate="onRequest" xlink:title="Normal" xlink:href=""/>
  </office:meta>
</office:document-meta>
</file>