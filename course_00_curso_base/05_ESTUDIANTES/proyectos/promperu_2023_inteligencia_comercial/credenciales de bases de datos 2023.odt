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normal1">
      <style:paragraph-properties fo:line-height="200%"/>
    </style:style>
    <style:style style:name="P2" style:family="paragraph" style:parent-style-name="normal1">
      <style:paragraph-properties fo:margin-top="0cm" fo:margin-bottom="0.282cm" style:contextual-spacing="false" fo:line-height="200%"/>
    </style:style>
    <style:style style:name="P3" style:family="paragraph" style:parent-style-name="normal1" style:master-page-name="Standard">
      <style:paragraph-properties fo:line-height="200%" style:page-number="1"/>
    </style:style>
    <style:style style:name="T1" style:family="text"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color="#0563c1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 loext:marker-style-name="T2"><text:span text:style-name="T1">STATISTA - GENERAL-</text:span><text:span text:style-name="T1"/></text:p>
        <text:p text:style-name="P1"><text:a xlink:type="simple" xlink:href="https://es.statista.com/" text:style-name="ListLabel_20_1" text:visited-style-name="ListLabel_20_1"><text:span text:style-name="T3">https://es.statista.com/</text:span></text:a></text:p>
        <text:p text:style-name="P1" loext:marker-style-name="T2"><text:span text:style-name="T2">Usuario: arojas@promperu.gob.pe </text:span><text:span text:style-name="T2"/></text:p>
        <text:p text:style-name="P1" loext:marker-style-name="T2"><text:span text:style-name="T2">Contraseña: Prom$2024</text:span><text:span text:style-name="T2"/></text:p>
        <text:p text:style-name="P1"><text:a xlink:type="simple" xlink:href="https://ecommercedb.com/" text:style-name="ListLabel_20_1" text:visited-style-name="ListLabel_20_1"><text:span text:style-name="T3">https://ecommercedb.com/</text:span></text:a></text:p>
        <text:p text:style-name="P1" loext:marker-style-name="T2"><text:span text:style-name="T2">Usuario: arojas@promperu.gob.pe </text:span><text:span text:style-name="T2"/></text:p>
        <text:p text:style-name="P1" loext:marker-style-name="T2"><text:span text:style-name="T2">Contraseña: 4ug556dd</text:span><text:span text:style-name="T2"/></text:p>
        <text:p text:style-name="P1" loext:marker-style-name="T2"><text:span text:style-name="T1">VERITRADE - EXPORTACIONES E IMPORTACIONES - COMPRADORES</text:span><text:span text:style-name="T1"/></text:p>
        <text:p text:style-name="P1"><text:a xlink:type="simple" xlink:href="https://www.veritradecorp.com/" text:style-name="ListLabel_20_1" text:visited-style-name="ListLabel_20_1"><text:span text:style-name="T3">https://www.veritradecorp.com/</text:span></text:a></text:p>
        <text:p text:style-name="P1" loext:marker-style-name="T2"><text:span text:style-name="T2">Usuario: PROMPERU01 </text:span><text:span text:style-name="T2"/></text:p>
        <text:p text:style-name="P1" loext:marker-style-name="T2"><text:span text:style-name="T2">Contraseña: 1PROM2023</text:span><text:span text:style-name="T2"/></text:p>
        <text:p text:style-name="P1" loext:marker-style-name="T2"><text:span text:style-name="T1">EMIS - GENERAL</text:span><text:span text:style-name="T1"/></text:p>
        <text:p text:style-name="P1"><text:a xlink:type="simple" xlink:href="https://www.emis.com/" text:style-name="ListLabel_20_1" text:visited-style-name="ListLabel_20_1"><text:span text:style-name="T3">https://www.emis.com/</text:span></text:a></text:p>
        <text:p text:style-name="P1" loext:marker-style-name="T2"><text:span text:style-name="T2">Usuario: arojas@promperu.gob.pe </text:span><text:span text:style-name="T2"/></text:p>
        <text:p text:style-name="P1" loext:marker-style-name="T2"><text:span text:style-name="T2">Contraseña: 1Prom2023</text:span><text:span text:style-name="T2"/></text:p>
        <text:p text:style-name="P1" loext:marker-style-name="T2"><text:span text:style-name="T1">PANJIVA - TRANSACCIONES - COMPRADORES</text:span><text:span text:style-name="T1"/></text:p>
        <text:p text:style-name="P1"><text:a xlink:type="simple" xlink:href="https://es.panjiva.com/" text:style-name="ListLabel_20_1" text:visited-style-name="ListLabel_20_1"><text:span text:style-name="T3">https://es.panjiva.com/</text:span></text:a></text:p>
        <text:p text:style-name="P1" loext:marker-style-name="T2"><text:span text:style-name="T2">Usuario: arojas@promperu.gob.pe </text:span><text:span text:style-name="T2"/></text:p>
        <text:p text:style-name="P1" loext:marker-style-name="T2"><text:span text:style-name="T2">Contraseña: Pr@mper@2023</text:span><text:span text:style-name="T2"/></text:p>
        <text:p text:style-name="P1" loext:marker-style-name="T2"><text:span text:style-name="T1">GLOBAL DATA - INNOVACIONES - PATENTES</text:span><text:span text:style-name="T1"/></text:p>
        <text:p text:style-name="P1"><text:a xlink:type="simple" xlink:href="https://www.globaldata.com/" text:style-name="ListLabel_20_1" text:visited-style-name="ListLabel_20_1"><text:span text:style-name="T3">https://www.globaldata.com/</text:span></text:a></text:p>
        <text:p text:style-name="P1" loext:marker-style-name="T2"><text:span text:style-name="T2">Usuario: arojas@promperu.gob.pe</text:span><text:span text:style-name="T2"/></text:p>
        <text:p text:style-name="P2" loext:marker-style-name="T2"><text:span text:style-name="T2">Contraseña: Pr@mper@2023</text:span><text:span text:style-name="T2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normal1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0563c1" loext:opacity="100%" style:font-name="Times New Roman" fo:font-family="'Times New Roman'" style:font-family-generic="roman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6:57:00</meta:creation-date>
    <meta:initial-creator>licenciaslenovopromperu200@outlook.com</meta:initial-creator>
    <dc:language>es-PE</dc:language>
    <dc:creator>Elmer Edison Achalma Mendoza</dc:creator>
    <dc:date>2023-12-31T17:24:57</dc:date>
    <meta:editing-cycles>1</meta:editing-cycles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23" meta:word-count="54" meta:character-count="621" meta:non-whitespace-character-count="585"/>
    <meta:user-defined meta:name="AppVersion">15.0000</meta:user-defined>
  </office:meta>
</office:document-meta>
</file>