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List_20_Paragraph" style:list-style-name="WWNum1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 fo:text-align="justify" style:justify-single-word="false"/>
    </style:style>
    <style:style style:name="P4" style:family="paragraph" style:parent-style-name="Standard">
      <style:paragraph-properties fo:margin-top="0cm" fo:margin-bottom="0.282cm" style:contextual-spacing="false" fo:line-height="200%"/>
    </style:style>
    <style:style style:name="T1" style:family="text"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size-asian="12pt" style:font-name-complex="Arial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 loext:marker-style-name="T2"><text:span text:style-name="T1">CASO: CHIMU AGROPECUARIA (*)</text:span><text:span text:style-name="T1"/></text:p>
        <text:p text:style-name="P3" loext:marker-style-name="T2"><text:span text:style-name="T3">Chimú Agropecuaria, empresa dedicada a la industria avícola, está considerando una inversión en activos fijos por un monto de $ 25,000 y de $ 5,000 en capital de trabajo. Esta máquina reducirá sus costos variables en $ 5,000 anuales y, simultáneamente, incrementara sus ventas en 8,000 anuales. La gerencia financiera considera conveniente apalancar el proyecto en un 50% sobre el activo (D/V), con un préstamo a un plazo similar a la vida útil de la maquinaria. La tasa pactada con el Banco es del 10% TEA en dólares. La maquinaria tiene un horizonte de vida de cinco años, al cabo del cual tendrá un valor de mercado de $ 4,000. Chimú agropecuaria está sujeta a una tasa de impuestos del 15%. Adicionalmente, debe tomarse en cuenta los datos siguientes: La tasa de libre de riesgo relevante es de 5%, el beta apalancado de una empresa similar al proyecto es de 1.85 (con un ratio D/E de 1 y t=20%) y que la prima por riesgo de mercado es 8%.</text:span><text:span text:style-name="T3"/></text:p>
        <text:list text:style-name="WWNum1">
          <text:list-item>
            <text:p text:style-name="P1" loext:marker-style-name="T2"><text:span text:style-name="T3">Hallar el VANF del proyecto con el método del VAN Ajustado (VANA) (7 ptos)</text:span><text:span text:style-name="T3"/></text:p>
          </text:list-item>
          <text:list-item>
            <text:p text:style-name="P1" loext:marker-style-name="T2"><text:span text:style-name="T3">Hallar el VANF del proyecto con el método del WACC (4 ptos.)</text:span><text:span text:style-name="T3"/></text:p>
          </text:list-item>
          <text:list-item>
            <text:p text:style-name="P1" loext:marker-style-name="T2"><text:span text:style-name="T3">Hallar el VANF del proyecto con el método del COK apalancado (Ke) (4 ptos)</text:span><text:span text:style-name="T3"/></text:p>
          </text:list-item>
          <text:list-item>
            <text:p text:style-name="P1" loext:marker-style-name="T2"><text:span text:style-name="T3">Compare los tres resultados y explique las razones del mismo (5 ptos)</text:span><text:span text:style-name="T3"/></text:p>
          </text:list-item>
        </text:list>
        <text:p text:style-name="P4" loext:marker-style-name="T2"><text:span text:style-name="T3">(*) Ejercicio resuelto en Evaluación de Proyectos de Inversión, Paul Lira Briceño, págs. 187-194</text:span><text:span text:style-name="T3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)" style:num-suffix=".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1T23:11:00</meta:creation-date>
    <meta:initial-creator>CLIENTE</meta:initial-creator>
    <dc:language>es-PE</dc:language>
    <dc:creator>Elmer Edison Achalma Mendoza</dc:creator>
    <dc:date>2023-12-31T17:40:32</dc:date>
    <meta:editing-cycles>5</meta:editing-cycles>
    <meta:editing-duration>PT45M</meta:editing-duration>
    <meta:generator>LibreOffice/24.2.4.2$Linux_X86_64 LibreOffice_project/420$Build-2</meta:generator>
    <meta:document-statistic meta:table-count="0" meta:image-count="0" meta:object-count="0" meta:page-count="1" meta:paragraph-count="7" meta:word-count="243" meta:character-count="1356" meta:non-whitespace-character-count="1124"/>
    <meta:user-defined meta:name="AppVersion">15.0000</meta:user-defined>
    <meta:template xlink:type="simple" xlink:actuate="onRequest" xlink:title="Normal" xlink:href=""/>
  </office:meta>
</office:document-meta>
</file>