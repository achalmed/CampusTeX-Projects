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90000006915CA8F7E.png" manifest:media-type="image/png"/>
  <manifest:file-entry manifest:full-path="Pictures/10002D1800001B6500000ACD15F86077.emf" manifest:media-type="image/x-emf"/>
  <manifest:file-entry manifest:full-path="Pictures/10000001000001030000004BFE42B5BA.png" manifest:media-type="image/png"/>
  <manifest:file-entry manifest:full-path="Pictures/100022B000001AC7000007CB8AC60D84.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Heading_20_5">
      <style:paragraph-properties fo:line-height="200%"/>
    </style:style>
    <style:style style:name="P2" style:family="paragraph" style:parent-style-name="Heading_20_6">
      <style:paragraph-properties fo:line-height="200%"/>
    </style:style>
    <style:style style:name="P3" style:family="paragraph" style:parent-style-name="No_20_Spacing">
      <style:paragraph-properties fo:line-height="200%" fo:text-align="justify" style:justify-single-word="false"/>
    </style:style>
    <style:style style:name="P4" style:family="paragraph" style:parent-style-name="Standard">
      <style:paragraph-properties fo:line-height="200%"/>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margin-top="0cm" fo:margin-bottom="0.282cm" style:contextual-spacing="false" fo:line-height="200%" fo:text-align="justify" style:justify-single-word="false"/>
    </style:style>
    <style:style style:name="P7" style:family="paragraph" style:parent-style-name="Standard">
      <style:paragraph-properties fo:line-height="200%" fo:text-align="center" style:justify-single-word="false"/>
    </style:style>
    <style:style style:name="P8" style:family="paragraph" style:parent-style-name="Standard" style:list-style-name="">
      <style:paragraph-properties fo:margin-left="0cm" fo:line-height="200%" fo:text-indent="0cm" style:auto-text-indent="false" fo:keep-with-next="always"/>
    </style:style>
    <style:style style:name="P9" style:family="paragraph" style:parent-style-name="Standard" style:list-style-name="">
      <style:paragraph-properties fo:margin-left="0cm" fo:line-height="200%" fo:text-indent="0cm" style:auto-text-indent="false" fo:keep-with-next="always"/>
    </style:style>
    <style:style style:name="T1" style:family="text">
      <style:text-properties style:font-name="Times New Roman" fo:font-size="12pt" fo:font-weight="bold" style:font-size-asian="12pt" style:font-weight-asian="bold" style:font-name-complex="Arial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name-complex="Arial1" style:font-size-complex="12pt"/>
    </style:style>
    <style:style style:name="T4" style:family="text">
      <style:text-properties style:font-name="Times New Roman" fo:font-size="12pt" fo:language="en" fo:country="US" style:font-size-asian="12pt" style:font-size-complex="12pt"/>
    </style:style>
    <style:style style:name="T5" style:family="text">
      <style:text-properties style:font-name="Times New Roman" fo:font-size="12pt" fo:language="es" fo:country="MX" style:font-size-asian="12pt" style:font-name-complex="Arial1" style:font-size-complex="12pt"/>
    </style:style>
    <style:style style:name="T6" style:family="text">
      <style:text-properties style:font-name="Times New Roman" fo:font-size="12pt" fo:language="es" fo:country="MX" style:font-size-asian="12pt" style:font-name-complex="Arial1" style:font-size-complex="12pt" style:font-weight-complex="bold"/>
    </style:style>
    <style:style style:name="T7" style:family="text">
      <style:text-properties style:font-name="Times New Roman" fo:font-size="12pt" fo:language="es" fo:country="MX" fo:font-weight="bold" style:font-size-asian="12pt" style:font-weight-asian="bold" style:font-name-complex="Arial1" style:font-size-complex="12pt"/>
    </style:style>
    <style:style style:name="T8" style:family="text">
      <style:text-properties style:font-name="Times New Roman" fo:font-size="12pt" fo:language="es" fo:country="MX" fo:font-weight="bold" style:font-size-asian="12pt" style:font-weight-asian="bold" style:font-name-complex="Arial1" style:font-size-complex="12pt" style:font-weight-complex="bold"/>
    </style:style>
    <style:style style:name="T9" style:family="text">
      <style:text-properties fo:color="#000000" loext:opacity="100%" style:font-name="Times New Roman" fo:font-size="12pt" fo:language="en" fo:country="US" style:text-underline-style="none" fo:font-weight="normal" style:font-size-asian="12pt" style:font-weight-asian="normal" style:font-size-complex="12pt" style:font-weight-complex="bold">
        <loext:char-complex-color loext:theme-type="dark1" loext:color-type="theme"/>
      </style:text-properties>
    </style:style>
    <style:style style:name="T10" style:family="text">
      <style:text-properties fo:color="#000000" loext:opacity="100%" style:font-name="Times New Roman" fo:font-size="12pt" fo:language="es" fo:country="MX" style:text-underline-style="none" fo:font-weight="normal" style:font-size-asian="12pt" style:font-weight-asian="normal" style:font-size-complex="12pt" style:font-weight-complex="bold">
        <loext:char-complex-color loext:theme-type="dark1" loext:color-type="theme"/>
      </style:text-properties>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EJERCICIO 1: COSTO DE CAPITAL CORPORATIVO </text:span><text:span text:style-name="T1"/></text:p>
        <text:p text:style-name="P5" loext:marker-style-name="T2"><text:span text:style-name="T3">Usted ha sido contratado para analizar una Corporación con dos subsidiarias en los sectores de Alimentos y el Tabaco, respectivamente. Se estima que la subsidiaria en Tabaco esta valorizada en $ 150 millones, mientras que su subsidiaria en Alimentos, en $ 100 millones. Se sabe que la corporación tiene un radio de deuda/patrimonio de 1. Además, usted cuenta con la siguiente información sobre compañías comparables:</text:span><text:span text:style-name="T3"/></text:p>
        <text:p text:style-name="P7" loext:marker-style-name="T2"><draw:frame draw:style-name="fr1" draw:name="Imagen 1" text:anchor-type="as-char" svg:width="8.017cm" svg:height="2.328cm" draw:z-index="0"><draw:image xlink:href="Pictures/100022B000001AC7000007CB8AC60D84.emf" xlink:type="simple" xlink:show="embed" xlink:actuate="onLoad" draw:mime-type="image/x-emf"/><draw:image xlink:href="Pictures/10000001000001030000004BFE42B5BA.png" xlink:type="simple" xlink:show="embed" xlink:actuate="onLoad" draw:mime-type="image/png"/></draw:frame></text:p>
        <text:p text:style-name="P5" loext:marker-style-name="T2"><text:span text:style-name="T3">Todas las compañías, al igual que las subsidiarias, están gravadas con una tasa de impuesto a la renta de 40%. </text:span><text:span text:style-name="T3"/></text:p>
        <text:p text:style-name="P5" loext:marker-style-name="T2"><text:span text:style-name="T3">De otro lado, la tasa de rendimiento del bono del tesoro a largo plazo es de 6%, y la prima por riesgo del mercado es de 5.5%. </text:span><text:span text:style-name="T3"/></text:p>
        <text:p text:style-name="P7" loext:marker-style-name="T2"><text:span text:style-name="T3">Estimar al actual costo del capital propio de la Corporación. </text:span><text:span text:style-name="T3"/></text:p>
        <text:p text:style-name="P5" loext:marker-style-name="T2"><text:span text:style-name="T1">EJERCICIO 2: LA COLMENA S.A</text:span><text:span text:style-name="T3">. </text:span></text:p>
        <text:p text:style-name="P5" loext:marker-style-name="T2"><text:span text:style-name="T3">Generalmente la Compañía Comercial e Industrial La Colmena S.A. financia el 40% de su inversión total de sus proyectos de Inversión con aporte propio y el 60% es financiada, con diversas líneas de crédito para proyectos en el mercado de capitales y cuyo costo de capital o interés promedio es del 40%. Utilizando el costo de financiamiento externo (40%) y el costo de capital propio o accionario, calcule el costo de promedio ponderado de capital. Tener en cuenta, que la Gerencia Financiera estima que la tasa de inflación durante la vida útil del proyecto, será de 30%, que la tasa de riesgo de mercado es de 5% y que la tasa mínima requerida por la empresa, para sus inversiones de capital, es del 10%.</text:span><text:span text:style-name="T3"/></text:p>
        <text:p text:style-name="P5" loext:marker-style-name="T2"><text:span text:style-name="T1">EJERCICIO 3: FABRICA DE ALIMENTOS BASICOS S.A. </text:span><text:span text:style-name="T1"/></text:p>
        <text:p text:style-name="P5" loext:marker-style-name="T2"><text:span text:style-name="T3">La fábrica de Alimentos Básicos S.A. quiere calcular su costo promedio ponderado de capital con la finalidad de utilizarlo para evaluar sus proyectos de inversión. Al respecto el último estado de situación financiera muestra la siguiente estructura de capital, así como también el costo anual de cada fuente de financiamiento, la cual ha sido calculada previamente por el Gerente Financiero de la empresa. </text:span><text:span text:style-name="T3"/></text:p>
        <text:p text:style-name="P7" loext:marker-style-name="T2"><text:span text:style-name="T1">ALIMENTOS BASICOS S.A.</text:span><text:span text:style-name="T1"/></text:p>
        <text:p text:style-name="P7" loext:marker-style-name="T2"><draw:frame draw:style-name="fr1" draw:name="Imagen 2" text:anchor-type="as-char" svg:width="8.202cm" svg:height="3.228cm" draw:z-index="0"><draw:image xlink:href="Pictures/10002D1800001B6500000ACD15F86077.emf" xlink:type="simple" xlink:show="embed" xlink:actuate="onLoad" draw:mime-type="image/x-emf"/><draw:image xlink:href="Pictures/10000001000001090000006915CA8F7E.png" xlink:type="simple" xlink:show="embed" xlink:actuate="onLoad" draw:mime-type="image/png"/></draw:frame></text:p>
        <text:p text:style-name="P5" loext:marker-style-name="T2"><text:span text:style-name="T1">EJERCICIO 4: GRUPO DE INVERSIONISTAS </text:span><text:span text:style-name="T1"/></text:p>
        <text:p text:style-name="P5" loext:marker-style-name="T2"><text:span text:style-name="T3">Un grupo de inversionistas está planteando establecer un negocio en la ciudad de Ica, para comercializar productos agroindustriales. Ya han recibido de sus consultores externos un exhaustivo estudio de mercado, donde se indica que las ventas del primer año de actividad serán de 1 200000, .Si la rentabilidad neta sobre ventas para esta clase de actividad es de 30% y los inversionistas desean obtener una rentabilidad de la inversión del 24 % ¿Cuál es el monto de la inversión en total de activos?. </text:span><text:span text:style-name="T3"/></text:p>
        <text:h text:style-name="P2" text:outline-level="6" loext:marker-style-name="T2"><text:span text:style-name="T4">EJERCICIO N° 05: WILLIAM TELL COMPUTERS</text:span><text:span text:style-name="T4"/></text:h>
        <text:h text:style-name="P1" text:outline-level="5" loext:marker-style-name="T2"><text:span text:style-name="T9">Encuentre el CPPK (WACC) de William Tell Computers. </text:span><text:span text:style-name="T10">El valor contable del capital de la empresa es de 10 millones de dólares, el valor contable por acción es de 20 dólares. Las acciones se venden a un precio de 30 dólares por acción, y el costo de capital es el 15%. Las obligaciones de la empresa tienen un valor a la par de 5 millones de dólares y se venden al precio de 110 por ciento sobre la par. La rentabilidad de vencimiento sobre las obligaciones es el 9%, y la tasa de impuestos de la empresa es el 40%.</text:span></text:h>
        <text:p text:style-name="P4" loext:marker-style-name="T2"><text:span text:style-name="T5"><text:s/></text:span><text:span text:style-name="T5"/></text:p>
        <text:h text:style-name="P8" text:outline-level="1" loext:marker-style-name="T2"><text:span text:style-name="T7">EJERCICIO N° 06: COSTO DE CAPITAL ACCIONARIO</text:span><text:span text:style-name="T8"> </text:span></text:h>
        <text:p text:style-name="P5" loext:marker-style-name="T2"><text:span text:style-name="T6">La empresa XYZ S.A. ha emitido bonos a 10 años con lo que tiene una estructura de capital de D/E = 1. Si la tasa libre de riesgo en dólares americanos está en 4.30% dólares americanos ( bonos del tesoro a 10 años), el riesgo país está en 320 puntos, la tasa a la que se puede emitir deuda soberana al país de residencia de la empresa es de 7.50% TEA, y la prima por riesgo en el mercado de capitales de USA es del 6%.</text:span><text:span text:style-name="T6"/></text:p>
        <text:p text:style-name="P4" loext:marker-style-name="T2"><text:span text:style-name="T6">Calcular el COK para la empresa XYZ S.A.. Considerando que ninguna empresa de su sector cotiza en bolsa local, vamos al mercado de USA donde hallamos un β para el sector de 1.3859 para un nivel de apalancamiento D/E de 1.2. Suponiendo que no hay impuesto a la renta en ninguno de los dos países determinar Ru, Ra, WACC, COK y preparar el gráfico.</text:span><text:span text:style-name="T6"/></text:p>
        <text:h text:style-name="P8" text:outline-level="6" loext:marker-style-name="T2"><text:span text:style-name="T7">EJERCICIO N° 07: RICARDO S.A.</text:span><text:span text:style-name="T7"/></text:h>
        <text:p text:style-name="P3" loext:marker-style-name="T2"><text:span text:style-name="T5">La empresa Ricardo S.A. tiene un costo de oportunidad de capital (ignorando impuestos) del 12%. Puede solicitar préstamos a una tasa de 8%. Suponiendo que Ricardo tiene una estructura de capital fijada como meta de 80% de capital accionario y 20% de deuda ¿Cuál es su costo de capital accionario?, ¿y cuál, si su estructura de capital fijada como meta es de 50%? Calcule el WACC, y utilice su respuesta para verificar que éste es el mismo. Graficar.</text:span><text:span text:style-name="T5"/></text:p>
        <text:p text:style-name="P5" loext:marker-style-name="T2"><text:span text:style-name="T3"><text:s/></text:span><text:span text:style-name="T3"/></text:p>
        <text:p text:style-name="P6" loext:marker-style-name="T2"><text:span text:style-name="T3"><text:s/></text:span><text:span text:style-name="T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cm" fo:margin-bottom="0cm" style:contextual-spacing="false" fo:line-height="100%" fo:text-align="justify" style:justify-single-word="false" fo:keep-with-next="always"/>
      <style:text-properties style:font-name="Arial" fo:font-family="Arial" style:font-family-generic="roman" fo:language="es" fo:country="ES" fo:text-shadow="1pt 1pt" style:text-underline-style="solid" style:text-underline-width="auto" style:text-underline-color="font-color"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cm" fo:margin-bottom="0cm" style:contextual-spacing="false" fo:line-height="100%" fo:keep-with-next="always"/>
      <style:text-properties style:font-name="Arial" fo:font-family="Arial" style:font-family-generic="roman" fo:language="es" fo:country="MX" fo:text-shadow="1pt 1pt"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5_20_Car" style:display-name="Título 5 Car" style:family="text" style:parent-style-name="Default_20_Paragraph_20_Font">
      <style:text-properties style:font-name="Arial" fo:font-family="Arial" style:font-family-generic="roman" fo:language="es" fo:country="ES" fo:text-shadow="1pt 1pt" style:text-underline-style="solid" style:text-underline-width="auto" style:text-underline-color="font-color"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2pt"/>
    </style:style>
    <style:style style:name="Título_20_6_20_Car" style:display-name="Título 6 Car" style:family="text" style:parent-style-name="Default_20_Paragraph_20_Font">
      <style:text-properties style:font-name="Arial" fo:font-family="Arial" style:font-family-generic="roman" fo:language="es" fo:country="MX" fo:text-shadow="1pt 1pt"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2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11T10:58:00</meta:creation-date>
    <meta:initial-creator>Tony Hinojosa</meta:initial-creator>
    <dc:language>es-PE</dc:language>
    <dc:creator>Elmer Edison Achalma Mendoza</dc:creator>
    <dc:date>2023-12-31T17:41:09</dc:date>
    <meta:editing-cycles>3</meta:editing-cycles>
    <meta:editing-duration>PT1M</meta:editing-duration>
    <meta:generator>LibreOffice/24.2.4.2$Linux_X86_64 LibreOffice_project/420$Build-2</meta:generator>
    <meta:document-statistic meta:table-count="0" meta:image-count="2" meta:object-count="0" meta:page-count="1" meta:paragraph-count="24" meta:word-count="764" meta:character-count="4345" meta:non-whitespace-character-count="3587"/>
    <meta:user-defined meta:name="AppVersion">15.0000</meta:user-defined>
    <meta:template xlink:type="simple" xlink:actuate="onRequest" xlink:title="Normal" xlink:href=""/>
  </office:meta>
</office:document-meta>
</file>