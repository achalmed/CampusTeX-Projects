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3.614cm" fo:margin-top="0cm" fo:margin-bottom="0cm" table:align="center" style:writing-mode="page"/>
    </style:style>
    <style:style style:name="Tabla1.A" style:family="table-column">
      <style:table-column-properties style:column-width="1.513cm"/>
    </style:style>
    <style:style style:name="Tabla1.B" style:family="table-column">
      <style:table-column-properties style:column-width="2.72cm"/>
    </style:style>
    <style:style style:name="Tabla1.C" style:family="table-column">
      <style:table-column-properties style:column-width="2.185cm"/>
    </style:style>
    <style:style style:name="Tabla1.D" style:family="table-column">
      <style:table-column-properties style:column-width="2.094cm"/>
    </style:style>
    <style:style style:name="Tabla1.E" style:family="table-column">
      <style:table-column-properties style:column-width="2.75cm"/>
    </style:style>
    <style:style style:name="Tabla1.F" style:family="table-column">
      <style:table-column-properties style:column-width="2.35cm"/>
    </style:style>
    <style:style style:name="Tabla1.1" style:family="table-row">
      <style:table-row-properties style:min-row-height="0.542cm" fo:keep-together="auto"/>
    </style:style>
    <style:style style:name="Tabla1.A1" style:family="table-cell">
      <style:table-cell-properties fo:background-color="#c0c0c0" fo:padding-left="0.123cm" fo:padding-right="0.123cm" fo:padding-top="0cm" fo:padding-bottom="0cm" fo:border="1pt solid #000000">
        <style:background-image/>
      </style:table-cell-properties>
    </style:style>
    <style:style style:name="Tabla1.B1" style:family="table-cell">
      <style:table-cell-properties fo:background-color="#c0c0c0" fo:padding-left="0.123cm" fo:padding-right="0.123cm" fo:padding-top="0cm" fo:padding-bottom="0cm" fo:border-left="none" fo:border-right="1pt solid #000000" fo:border-top="1pt solid #000000" fo:border-bottom="1pt solid #000000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A2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la1.B2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C2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D2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E2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F2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A3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la1.B3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C3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D3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E3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F3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A4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la1.B4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C4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D4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E4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F4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A5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la1.B5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C5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D5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E5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F5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A6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la1.B6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C6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D6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E6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F6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A7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la1.B7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C7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D7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E7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Tabla1.F7" style:family="table-cell">
      <style:table-cell-properties fo:padding-left="0.123cm" fo:padding-right="0.123cm" fo:padding-top="0cm" fo:padding-bottom="0cm" fo:border-left="none" fo:border-right="1pt solid #000000" fo:border-top="none" fo:border-bottom="1pt solid #000000"/>
    </style:style>
    <style:style style:name="P1" style:family="paragraph" style:parent-style-name="List_20_Paragraph" style:list-style-name="WWNum1">
      <style:paragraph-properties fo:margin-top="0cm" fo:margin-bottom="0cm" style:contextual-spacing="true" fo:line-height="200%" fo:text-align="justify" style:justify-single-word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200%"/>
    </style:style>
    <style:style style:name="P3" style:family="paragraph" style:parent-style-name="No_20_Spacing">
      <style:paragraph-properties fo:line-height="200%"/>
    </style:style>
    <style:style style:name="P4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200%"/>
    </style:style>
    <style:style style:name="P6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margin-top="0cm" fo:margin-bottom="0cm" style:contextual-spacing="false" fo:line-height="200%" fo:text-align="justify" style:justify-single-word="false"/>
      <style:text-properties style:font-name="Times New Roman" fo:font-size="12pt" style:font-name-asian="Batang" style:font-size-asian="12pt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200%" fo:text-align="justify" style:justify-single-word="false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font-name="Times New Roman" fo:font-size="12pt" fo:font-weight="bold" style:font-name-asian="Batang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size-complex="12pt" style:font-weight-complex="bold"/>
    </style:style>
    <style:style style:name="T4" style:family="text">
      <style:text-properties style:font-name="Times New Roman" fo:font-size="12pt" style:font-size-asian="12pt" style:language-asian="es" style:country-asian="PE" style:font-name-complex="Times New Roman1" style:font-size-complex="12pt"/>
    </style:style>
    <style:style style:name="T5" style:family="text">
      <style:text-properties style:font-name="Times New Roman" fo:font-size="12pt" style:font-name-asian="Batang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US" style:font-size-asian="12pt" style:language-asian="es" style:country-asian="PE" style:font-name-complex="Times New Roman1" style:font-size-complex="12pt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language-asian="es" style:country-asian="PE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size-complex="12pt" style:font-weight-complex="bold"/>
    </style:style>
    <style:style style:name="T9" style:family="text">
      <style:text-properties style:font-name="Times New Roman" fo:font-size="12pt" fo:language="es" fo:country="ES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 style:font-weight-complex="bold"/>
    </style:style>
    <style:style style:name="T10" style:family="text">
      <style:text-properties style:font-name="Times New Roman" fo:font-size="12pt" fo:language="es" fo:country="ES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12" style:family="text">
      <style:text-properties style:font-name="Times New Roman" fo:font-size="12pt" fo:language="es" fo:country="MX" style:font-size-asian="12pt" style:font-name-complex="Times New Roman1" style:font-size-complex="12pt" fo:background-color="#ffff00"/>
    </style:style>
    <style:style style:name="T13" style:family="text">
      <style:text-properties style:font-name="Times New Roman" fo:font-size="12pt" fo:language="es" fo:country="MX" style:text-underline-style="solid" style:text-underline-width="auto" style:text-underline-color="font-color" style:font-size-asian="12pt" style:font-name-complex="Times New Roman1" style:font-size-complex="12pt" fo:background-color="#ffff00"/>
    </style:style>
    <style:style style:name="T14" style:family="text">
      <style:text-properties style:font-name="Times New Roman" fo:font-size="12pt" fo:language="es" fo:country="MX" style:font-name-asian="Symbol1" style:font-size-asian="12pt" style:font-name-complex="Symbol1" style:font-size-complex="12pt" fo:background-color="#ffff00"/>
    </style:style>
    <style:style style:name="T15" style:family="text">
      <style:text-properties style:text-position="super 58%" style:font-name="Times New Roman" fo:font-size="12pt" style:font-size-asian="12pt" style:font-size-complex="12pt"/>
    </style:style>
    <style:style style:name="T16" style:family="text">
      <style:text-properties style:text-position="46% 100%" style:font-name="Times New Roman" fo:font-size="12pt" fo:language="es" fo:country="MX" style:text-underline-style="solid" style:text-underline-width="auto" style:text-underline-color="font-color" style:font-size-asian="12pt" style:font-name-complex="Times New Roman1" style:font-size-complex="12pt"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 loext:marker-style-name="T2"><text:span text:style-name="T1">ACTIVIDAD TALLER 02 </text:span><text:span text:style-name="T1"/></text:p>
        <text:p text:style-name="P4" loext:marker-style-name="T2"><text:span text:style-name="T1">COSTO Y SERVICIO DE LA DEUDA</text:span><text:span text:style-name="T1"/></text:p>
        <text:p text:style-name="P5" loext:marker-style-name="T2"><text:span text:style-name="T1">Objetivo</text:span><text:span text:style-name="T1"/></text:p>
        <text:p text:style-name="P6" loext:marker-style-name="T2"><text:span text:style-name="T5">Esta actividad tiene por finalidad que los equipos colaborativos puedan calcular del costo de la deuda y el cronograma de pagos del monto de la deuda para financiar parte de la inversión del proyecto que vienen desarrollando.</text:span><text:span text:style-name="T5"/></text:p>
        <text:p text:style-name="P5" loext:marker-style-name="T2"><text:span text:style-name="T1">Indicaciones</text:span><text:span text:style-name="T1"/></text:p>
        <text:p text:style-name="P6" loext:marker-style-name="T2"><text:span text:style-name="T5">1.- Considerando el costo de la deuda Kd anual antes de impuestos (TEA), obtenga la tasa equivalente mensual (TEM) y finalmente calcular la tasa de interés real mensual. </text:span><text:span text:style-name="T5"/></text:p>
        <text:p text:style-name="P6" loext:marker-style-name="T2"><text:span text:style-name="T5">Utilice la siguiente fórmula para una tasa de capitalización mensual.</text:span><text:span text:style-name="T5"/></text:p>
        <text:p text:style-name="P6" loext:marker-style-name="T2"><text:span text:style-name="T2">TEM = (1 + TEA)</text:span><text:span text:style-name="T15">1/n</text:span><text:span text:style-name="T2"> -1 Donde n = 12</text:span></text:p>
        <text:p text:style-name="P6" loext:marker-style-name="T2"><text:span text:style-name="T5">Como la TEM es una tasa nominal hay que obtener la tasa real con la siguiente formula:</text:span><text:span text:style-name="T5"/></text:p>
        <text:p text:style-name="P3" loext:marker-style-name="T2"><text:span text:style-name="T6">TEM real = (</text:span><text:span text:style-name="T7">1+ TEM nominal</text:span><text:span text:style-name="T6">) - 1 </text:span></text:p>
        <text:p text:style-name="P3" loext:marker-style-name="T2"><text:span text:style-name="T6"><text:s/>(1 + </text:span><text:span text:style-name="T4">π</text:span><text:span text:style-name="T6">)</text:span></text:p>
        <text:p text:style-name="P7" loext:marker-style-name="T2"><text:span text:style-name="T4">Donde:</text:span><text:span text:style-name="T4"/></text:p>
        <text:p text:style-name="P7" loext:marker-style-name="T2"><text:span text:style-name="T4">TEM real = Tasa Efectiva Mensual real</text:span><text:span text:style-name="T4"/></text:p>
        <text:p text:style-name="P7" loext:marker-style-name="T2"><text:span text:style-name="T4">TEM nominal = Tasa Efectiva Mensual nominal</text:span><text:span text:style-name="T4"/></text:p>
        <text:p text:style-name="P7" loext:marker-style-name="T2"><text:span text:style-name="T4">π = Tasa de inflación mensual proyectada del Perú</text:span><text:span text:style-name="T4"/></text:p>
        <text:p text:style-name="P6" loext:marker-style-name="T2"><text:span text:style-name="T5">2.- Deberá considerar ahora el plan de amortización establecido por la entidad financiera para el servicio de amortización de la deuda. Los más comunes en el medio son dos:</text:span><text:span text:style-name="T5"/></text:p>
        <text:list text:style-name="WWNum1">
          <text:list-item>
            <text:p text:style-name="P1" loext:marker-style-name="T2"><text:span text:style-name="T8">Sistema Alemán o de abonos de capital constantes</text:span><text:span text:style-name="T3">:</text:span></text:p>
          </text:list-item>
        </text:list>
        <text:p text:style-name="P6" loext:marker-style-name="T2"><text:span text:style-name="T5">Se presenta cuando se acuerdan pagos iguales por concepto de capital. De esta forma se genera una cuota de interés decreciente.</text:span><text:span text:style-name="T5"/></text:p>
        <text:list text:continue-numbering="true" text:style-name="WWNum1">
          <text:list-item>
            <text:p text:style-name="P2" loext:marker-style-name="T2"><text:span text:style-name="T9">Sistema Francés o de abonos de amortización uniformes</text:span><text:span text:style-name="T9"/></text:p>
          </text:list-item>
        </text:list>
        <text:p text:style-name="P6" loext:marker-style-name="T2"><text:span text:style-name="T5">Para ello se obtiene el abono de amortización (A) uniforme, esto con la fórmula de Anualidad. Donde es el monto del préstamo (P) está en función a la TEM (i) y el periodo de pago de la deuda (n) en meses.</text:span><text:span text:style-name="T5"/></text:p>
        <text:p text:style-name="P3" loext:marker-style-name="T2"><text:soft-page-break/><text:span text:style-name="T12">P = </text:span><text:span text:style-name="T13">A</text:span><text:span text:style-name="T12"> </text:span><text:span text:style-name="T14"></text:span><text:span text:style-name="T12"> </text:span><text:span text:style-name="T13">1 – (1/(1+i)</text:span><text:span text:style-name="T16">n</text:span><text:span text:style-name="T13">)</text:span><text:span text:style-name="T12"> ]</text:span></text:p>
        <text:p text:style-name="P3" loext:marker-style-name="T2"><text:span text:style-name="T12"><text:s/>(1+i) 1-(1/(1+i))</text:span><text:span text:style-name="T12"/></text:p>
        <text:p text:style-name="P5" loext:marker-style-name="T2"><text:span text:style-name="T5">Reemplazando los valores y despejando A se obtiene el abono de amortización uniforme. En la práctica se calcula de manera fácil con la función PAGO en la hoja de cálculo del Excel.</text:span><text:span text:style-name="T5"/></text:p>
        <text:p text:style-name="P6" loext:marker-style-name="T2"><text:span text:style-name="T5">3.- Elaborar finalmente el cronograma de pagos del servicio de la deuda mensual por el periodo de pagos establecido. Considere para su cálculo la TEM real, en cualquiera de los planes.</text:span><text:span text:style-name="T5"/></text:p>
        <text:p text:style-name="P8" loext:marker-style-name="T5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P5" loext:marker-style-name="T2"><text:span text:style-name="T10">Mes</text:span><text:span text:style-name="T10"/></text:p>
            </table:table-cell>
            <table:table-cell table:style-name="Tabla1.B1" office:value-type="string">
              <text:p text:style-name="P4" loext:marker-style-name="T2"><text:span text:style-name="T10">Saldo Inicial</text:span><text:span text:style-name="T10"/></text:p>
            </table:table-cell>
            <table:table-cell table:style-name="Tabla1.B1" office:value-type="string">
              <text:p text:style-name="P4" loext:marker-style-name="T2"><text:span text:style-name="T10">Intereses</text:span><text:span text:style-name="T10"/></text:p>
            </table:table-cell>
            <table:table-cell table:style-name="Tabla1.B1" office:value-type="string">
              <text:p text:style-name="P4" loext:marker-style-name="T2"><text:span text:style-name="T10">Principal</text:span><text:span text:style-name="T10"/></text:p>
            </table:table-cell>
            <table:table-cell table:style-name="Tabla1.B1" office:value-type="string">
              <text:p text:style-name="P4" loext:marker-style-name="T2"><text:span text:style-name="T10">Amortización</text:span><text:span text:style-name="T10"/></text:p>
            </table:table-cell>
            <table:table-cell table:style-name="Tabla1.B1" office:value-type="string">
              <text:p text:style-name="P4" loext:marker-style-name="T2"><text:span text:style-name="T10">Saldo Final</text:span><text:span text:style-name="T10"/></text:p>
            </table:table-cell>
          </table:table-row>
          <table:table-row table:style-name="Tabla1.2">
            <table:table-cell table:style-name="Tabla1.A2" office:value-type="string">
              <text:p text:style-name="P4" loext:marker-style-name="T2"><text:span text:style-name="T11">1</text:span><text:span text:style-name="T11"/></text:p>
            </table:table-cell>
            <table:table-cell table:style-name="Tabla1.B2" office:value-type="string">
              <text:p text:style-name="P9" loext:marker-style-name="T11"/>
            </table:table-cell>
            <table:table-cell table:style-name="Tabla1.C2" office:value-type="string">
              <text:p text:style-name="P9" loext:marker-style-name="T11"/>
            </table:table-cell>
            <table:table-cell table:style-name="Tabla1.D2" office:value-type="string">
              <text:p text:style-name="P10" loext:marker-style-name="T11"/>
            </table:table-cell>
            <table:table-cell table:style-name="Tabla1.E2" office:value-type="string">
              <text:p text:style-name="P10" loext:marker-style-name="T11"/>
            </table:table-cell>
            <table:table-cell table:style-name="Tabla1.F2" office:value-type="string">
              <text:p text:style-name="P9" loext:marker-style-name="T11"/>
            </table:table-cell>
          </table:table-row>
          <table:table-row table:style-name="Tabla1.2">
            <table:table-cell table:style-name="Tabla1.A3" office:value-type="string">
              <text:p text:style-name="P4" loext:marker-style-name="T2"><text:span text:style-name="T11">2</text:span><text:span text:style-name="T11"/></text:p>
            </table:table-cell>
            <table:table-cell table:style-name="Tabla1.B3" office:value-type="string">
              <text:p text:style-name="P9" loext:marker-style-name="T11"/>
            </table:table-cell>
            <table:table-cell table:style-name="Tabla1.C3" office:value-type="string">
              <text:p text:style-name="P9" loext:marker-style-name="T11"/>
            </table:table-cell>
            <table:table-cell table:style-name="Tabla1.D3" office:value-type="string">
              <text:p text:style-name="P10" loext:marker-style-name="T11"/>
            </table:table-cell>
            <table:table-cell table:style-name="Tabla1.E3" office:value-type="string">
              <text:p text:style-name="P10" loext:marker-style-name="T11"/>
            </table:table-cell>
            <table:table-cell table:style-name="Tabla1.F3" office:value-type="string">
              <text:p text:style-name="P9" loext:marker-style-name="T11"/>
            </table:table-cell>
          </table:table-row>
          <table:table-row table:style-name="Tabla1.2">
            <table:table-cell table:style-name="Tabla1.A4" office:value-type="string">
              <text:p text:style-name="P4" loext:marker-style-name="T2"><text:span text:style-name="T11">3</text:span><text:span text:style-name="T11"/></text:p>
            </table:table-cell>
            <table:table-cell table:style-name="Tabla1.B4" office:value-type="string">
              <text:p text:style-name="P9" loext:marker-style-name="T11"/>
            </table:table-cell>
            <table:table-cell table:style-name="Tabla1.C4" office:value-type="string">
              <text:p text:style-name="P9" loext:marker-style-name="T11"/>
            </table:table-cell>
            <table:table-cell table:style-name="Tabla1.D4" office:value-type="string">
              <text:p text:style-name="P10" loext:marker-style-name="T11"/>
            </table:table-cell>
            <table:table-cell table:style-name="Tabla1.E4" office:value-type="string">
              <text:p text:style-name="P10" loext:marker-style-name="T11"/>
            </table:table-cell>
            <table:table-cell table:style-name="Tabla1.F4" office:value-type="string">
              <text:p text:style-name="P9" loext:marker-style-name="T11"/>
            </table:table-cell>
          </table:table-row>
          <table:table-row table:style-name="Tabla1.2">
            <table:table-cell table:style-name="Tabla1.A5" office:value-type="string">
              <text:p text:style-name="P4" loext:marker-style-name="T2"><text:span text:style-name="T11">4</text:span><text:span text:style-name="T11"/></text:p>
            </table:table-cell>
            <table:table-cell table:style-name="Tabla1.B5" office:value-type="string">
              <text:p text:style-name="P9" loext:marker-style-name="T11"/>
            </table:table-cell>
            <table:table-cell table:style-name="Tabla1.C5" office:value-type="string">
              <text:p text:style-name="P9" loext:marker-style-name="T11"/>
            </table:table-cell>
            <table:table-cell table:style-name="Tabla1.D5" office:value-type="string">
              <text:p text:style-name="P10" loext:marker-style-name="T11"/>
            </table:table-cell>
            <table:table-cell table:style-name="Tabla1.E5" office:value-type="string">
              <text:p text:style-name="P10" loext:marker-style-name="T11"/>
            </table:table-cell>
            <table:table-cell table:style-name="Tabla1.F5" office:value-type="string">
              <text:p text:style-name="P9" loext:marker-style-name="T11"/>
            </table:table-cell>
          </table:table-row>
          <table:table-row table:style-name="Tabla1.2">
            <table:table-cell table:style-name="Tabla1.A6" office:value-type="string">
              <text:p text:style-name="P4" loext:marker-style-name="T2"><text:span text:style-name="T11">….</text:span><text:span text:style-name="T11"/></text:p>
            </table:table-cell>
            <table:table-cell table:style-name="Tabla1.B6" office:value-type="string">
              <text:p text:style-name="P9" loext:marker-style-name="T11"/>
            </table:table-cell>
            <table:table-cell table:style-name="Tabla1.C6" office:value-type="string">
              <text:p text:style-name="P9" loext:marker-style-name="T11"/>
            </table:table-cell>
            <table:table-cell table:style-name="Tabla1.D6" office:value-type="string">
              <text:p text:style-name="P10" loext:marker-style-name="T11"/>
            </table:table-cell>
            <table:table-cell table:style-name="Tabla1.E6" office:value-type="string">
              <text:p text:style-name="P10" loext:marker-style-name="T11"/>
            </table:table-cell>
            <table:table-cell table:style-name="Tabla1.F6" office:value-type="string">
              <text:p text:style-name="P9" loext:marker-style-name="T11"/>
            </table:table-cell>
          </table:table-row>
          <table:table-row table:style-name="Tabla1.2">
            <table:table-cell table:style-name="Tabla1.A7" office:value-type="string">
              <text:p text:style-name="P4" loext:marker-style-name="T2"><text:span text:style-name="T11">24</text:span><text:span text:style-name="T11"/></text:p>
            </table:table-cell>
            <table:table-cell table:style-name="Tabla1.B7" office:value-type="string">
              <text:p text:style-name="P9" loext:marker-style-name="T11"/>
            </table:table-cell>
            <table:table-cell table:style-name="Tabla1.C7" office:value-type="string">
              <text:p text:style-name="P9" loext:marker-style-name="T11"/>
            </table:table-cell>
            <table:table-cell table:style-name="Tabla1.D7" office:value-type="string">
              <text:p text:style-name="P10" loext:marker-style-name="T11"/>
            </table:table-cell>
            <table:table-cell table:style-name="Tabla1.E7" office:value-type="string">
              <text:p text:style-name="P10" loext:marker-style-name="T11"/>
            </table:table-cell>
            <table:table-cell table:style-name="Tabla1.F7" office:value-type="string">
              <text:p text:style-name="P4" loext:marker-style-name="T2"><text:span text:style-name="T11">0</text:span><text:span text:style-name="T11"/></text:p>
            </table:table-cell>
          </table:table-row>
        </table:table>
        <text:p text:style-name="P5" loext:marker-style-name="T2"><text:span text:style-name="T1">Evaluación</text:span><text:span text:style-name="T1"/></text:p>
        <text:p text:style-name="P5" loext:marker-style-name="T2"><text:span text:style-name="T5">Esta actividad es evaluada como participación en clases</text:span><text:span text:style-name="T5"/></text:p>
        <text:p text:style-name="P5" loext:marker-style-name="T2"><text:span text:style-name="T1">NOTA:</text:span><text:span text:style-name="T5"> También les servirá para incluir en el ítem correspondiente del trabajo colaborativo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tang" svg:font-family="Batang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P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3:46:00</meta:creation-date>
    <meta:initial-creator>Usuario</meta:initial-creator>
    <dc:language>es-PE</dc:language>
    <dc:creator>Elmer Edison Achalma Mendoza</dc:creator>
    <dc:date>2023-12-31T17:37:52</dc:date>
    <meta:editing-cycles>6</meta:editing-cycles>
    <meta:editing-duration>PT38M</meta:editing-duration>
    <meta:generator>LibreOffice/24.2.4.2$Linux_X86_64 LibreOffice_project/420$Build-2</meta:generator>
    <meta:document-statistic meta:table-count="1" meta:image-count="0" meta:object-count="0" meta:page-count="2" meta:paragraph-count="40" meta:word-count="366" meta:character-count="2062" meta:non-whitespace-character-count="1732"/>
    <meta:user-defined meta:name="AppVersion">15.0000</meta:user-defined>
    <meta:template xlink:type="simple" xlink:actuate="onRequest" xlink:title="Normal.dotm" xlink:href=""/>
  </office:meta>
</office:document-meta>
</file>