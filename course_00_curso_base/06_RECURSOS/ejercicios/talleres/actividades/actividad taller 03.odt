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4000001791771145F.png" manifest:media-type="image/png"/>
  <manifest:file-entry manifest:full-path="Pictures/100059BC000040EE000026FA8AC5547F.emf" manifest:media-type="image/x-emf"/>
  <manifest:file-entry manifest:full-path="Pictures/100000010000027400000065975E3690.png" manifest:media-type="image/png"/>
  <manifest:file-entry manifest:full-path="Pictures/10002E64000040EE00000A693D989406.emf" manifest:media-type="image/x-emf"/>
  <manifest:file-entry manifest:full-path="Pictures/100000010000027400000148B33621B8.png" manifest:media-type="image/png"/>
  <manifest:file-entry manifest:full-path="Pictures/1000472C000040EE000021DF624D1DDC.emf" manifest:media-type="image/x-emf"/>
  <manifest:file-entry manifest:full-path="Pictures/10000001000002110000008606A95334.png" manifest:media-type="image/png"/>
  <manifest:file-entry manifest:full-path="Pictures/10003510000036B300000DD877F2F2CF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tang" svg:font-family="Batang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200%"/>
    </style:style>
    <style:style style:name="P3" style:family="paragraph" style:parent-style-name="Standard">
      <style:paragraph-properties fo:margin-top="0cm" fo:margin-bottom="0cm" style:contextual-spacing="false" fo:line-height="200%" fo:text-align="justify" style:justify-single-word="false"/>
    </style:style>
    <style:style style:name="T1" style:family="text">
      <style:text-properties style:font-name="Times New Roman" fo:font-size="12pt" fo:font-weight="bold" style:font-name-asian="Batang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font-size-asian="12pt" style:language-asian="es" style:country-asian="PE" style:font-name-complex="Times New Roman1" style:font-size-complex="12pt" style:font-weight-complex="bold"/>
    </style:style>
    <style:style style:name="T4" style:family="text">
      <style:text-properties style:font-name="Times New Roman" fo:font-size="12pt" style:font-name-asian="Batang" style:font-size-asian="12pt" style:font-name-complex="Times New Roman1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2"><text:span text:style-name="T1">ACTIVIDAD TALLER 03</text:span><text:span text:style-name="T1"/></text:p>
        <text:p text:style-name="P1" loext:marker-style-name="T2"><text:span text:style-name="T1">FLUJOS DE CAJA </text:span><text:span text:style-name="T1"/></text:p>
        <text:p text:style-name="P2" loext:marker-style-name="T2"><text:span text:style-name="T1">Objetivo</text:span><text:span text:style-name="T1"/></text:p>
        <text:p text:style-name="P3" loext:marker-style-name="T2"><text:span text:style-name="T4">Esta actividad tiene por finalidad que los equipos colaborativos puedan construir los Flujos de Caja (FCE, FCD, FCF) para el horizonte de evaluación del proyecto que vienen desarrollando.</text:span><text:span text:style-name="T4"/></text:p>
        <text:p text:style-name="P2" loext:marker-style-name="T2"><text:span text:style-name="T1">Indicaciones</text:span><text:span text:style-name="T1"/></text:p>
        <text:p text:style-name="P3" loext:marker-style-name="T2"><text:span text:style-name="T1">1.-</text:span><text:span text:style-name="T4"> Deberá considerar todos los ingresos y egresos sin IGV y con IGV, cuya diferencia es el IGV a pagar.</text:span></text:p>
        <text:p text:style-name="P3" loext:marker-style-name="T2"><draw:frame draw:style-name="fr1" draw:name="Imagen 1" text:anchor-type="as-char" svg:width="14.711cm" svg:height="3.731cm" draw:z-index="0"><draw:image xlink:href="Pictures/10003510000036B300000DD877F2F2CF.emf" xlink:type="simple" xlink:show="embed" xlink:actuate="onLoad" draw:mime-type="image/x-emf"/><draw:image xlink:href="Pictures/10000001000002110000008606A95334.png" xlink:type="simple" xlink:show="embed" xlink:actuate="onLoad" draw:mime-type="image/png"/></draw:frame></text:p>
        <text:p text:style-name="P3" loext:marker-style-name="T2"><text:span text:style-name="T1">2.-</text:span><text:span text:style-name="T4"> Deberá construir el flujo de caja económico (FCE)</text:span></text:p>
        <text:p text:style-name="P3" loext:marker-style-name="T2"><draw:frame draw:style-name="fr1" draw:name="Imagen 2" text:anchor-type="as-char" svg:width="15.002cm" svg:height="7.842cm" draw:z-index="0"><draw:image xlink:href="Pictures/1000472C000040EE000021DF624D1DDC.emf" xlink:type="simple" xlink:show="embed" xlink:actuate="onLoad" draw:mime-type="image/x-emf"/><draw:image xlink:href="Pictures/100000010000027400000148B33621B8.png" xlink:type="simple" xlink:show="embed" xlink:actuate="onLoad" draw:mime-type="image/png"/></draw:frame></text:p>
        <text:p text:style-name="P3" loext:marker-style-name="T2"><text:span text:style-name="T3">3.- Deberá construir el flujo de caja de la deuda (FCD)</text:span><text:span text:style-name="T3"/></text:p>
        <text:p text:style-name="P3" loext:marker-style-name="T2"><draw:frame draw:style-name="fr1" draw:name="Imagen 3" text:anchor-type="as-char" svg:width="15.002cm" svg:height="2.409cm" draw:z-index="0"><draw:image xlink:href="Pictures/10002E64000040EE00000A693D989406.emf" xlink:type="simple" xlink:show="embed" xlink:actuate="onLoad" draw:mime-type="image/x-emf"/><draw:image xlink:href="Pictures/100000010000027400000065975E3690.png" xlink:type="simple" xlink:show="embed" xlink:actuate="onLoad" draw:mime-type="image/png"/></draw:frame></text:p>
        <text:p text:style-name="P3" loext:marker-style-name="T2"><text:span text:style-name="T3">4.- Deberá unir los dos flujos de caja (FCE y FCD) y obtener el FCF</text:span><text:span text:style-name="T3"/></text:p>
        <text:p text:style-name="P1" loext:marker-style-name="T2"><text:span text:style-name="T1">Flujo de Caja Financiero</text:span><text:span text:style-name="T1"/></text:p>
        <text:p text:style-name="P3" loext:marker-style-name="T2"><draw:frame draw:style-name="fr1" draw:name="Imagen 4" text:anchor-type="as-char" svg:width="15.002cm" svg:height="9.024cm" draw:z-index="0"><draw:image xlink:href="Pictures/100059BC000040EE000026FA8AC5547F.emf" xlink:type="simple" xlink:show="embed" xlink:actuate="onLoad" draw:mime-type="image/x-emf"/><draw:image xlink:href="Pictures/1000000100000274000001791771145F.png" xlink:type="simple" xlink:show="embed" xlink:actuate="onLoad" draw:mime-type="image/png"/></draw:frame></text:p>
        <text:p text:style-name="P2" loext:marker-style-name="T2"><text:span text:style-name="T1">Evaluación</text:span><text:span text:style-name="T1"/></text:p>
        <text:p text:style-name="P2" loext:marker-style-name="T2"><text:span text:style-name="T4">Esta actividad es evaluada como participación en clases</text:span><text:span text:style-name="T4"/></text:p>
        <text:p text:style-name="P2" loext:marker-style-name="T2"><text:span text:style-name="T1">NOTA:</text:span><text:span text:style-name="T4"> También les servirá para incluir en el item correspondiente del trabajo colaborativo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tang" svg:font-family="Batang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es" style:country-asian="PE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22:33:00</meta:creation-date>
    <meta:initial-creator>Usuario</meta:initial-creator>
    <dc:language>es-PE</dc:language>
    <dc:creator>Elmer Edison Achalma Mendoza</dc:creator>
    <dc:date>2023-12-31T17:37:55</dc:date>
    <meta:editing-cycles>6</meta:editing-cycles>
    <meta:editing-duration>PT1H13M</meta:editing-duration>
    <meta:generator>LibreOffice/24.2.4.2$Linux_X86_64 LibreOffice_project/420$Build-2</meta:generator>
    <meta:document-statistic meta:table-count="0" meta:image-count="4" meta:object-count="0" meta:page-count="1" meta:paragraph-count="17" meta:word-count="117" meta:character-count="700" meta:non-whitespace-character-count="595"/>
    <meta:user-defined meta:name="AppVersion">15.0000</meta:user-defined>
    <meta:template xlink:type="simple" xlink:actuate="onRequest" xlink:title="Normal.dotm" xlink:href=""/>
  </office:meta>
</office:document-meta>
</file>