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8000001022749F2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09cm" fo:margin-left="0cm" fo:margin-top="0cm" fo:margin-bottom="0cm" table:align="left" style:writing-mode="page"/>
    </style:style>
    <style:style style:name="Tabla1.A" style:family="table-column">
      <style:table-column-properties style:column-width="0.833cm"/>
    </style:style>
    <style:style style:name="Tabla1.B" style:family="table-column">
      <style:table-column-properties style:column-width="1.051cm"/>
    </style:style>
    <style:style style:name="Tabla1.C" style:family="table-column">
      <style:table-column-properties style:column-width="1.055cm"/>
    </style:style>
    <style:style style:name="Tabla1.D" style:family="table-column">
      <style:table-column-properties style:column-width="1.057cm"/>
    </style:style>
    <style:style style:name="Tabla1.G" style:family="table-column">
      <style:table-column-properties style:column-width="1.053cm"/>
    </style:style>
    <style:style style:name="Tabla1.K" style:family="table-column">
      <style:table-column-properties style:column-width="1.189cm"/>
    </style:style>
    <style:style style:name="Tabla1.L" style:family="table-column">
      <style:table-column-properties style:column-width="1.196cm"/>
    </style:style>
    <style:style style:name="Tabla1.N" style:family="table-column">
      <style:table-column-properties style:column-width="1.106cm"/>
    </style:style>
    <style:style style:name="Tabla1.1" style:family="table-row">
      <style:table-row-properties style:min-row-height="0.508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1.3" style:family="table-row">
      <style:table-row-properties style:row-height="0.508cm" fo:keep-together="auto"/>
    </style:style>
    <style:style style:name="Tabla1.A3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1.B4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5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rel-width="100%" fo:margin-left="0cm" fo:margin-top="0cm" fo:margin-bottom="0cm" table:align="left" style:writing-mode="page"/>
    </style:style>
    <style:style style:name="Tabla2.A" style:family="table-column">
      <style:table-column-properties style:rel-column-width="3368*"/>
    </style:style>
    <style:style style:name="Tabla2.B" style:family="table-column">
      <style:table-column-properties style:rel-column-width="5112*"/>
    </style:style>
    <style:style style:name="Tabla2.C" style:family="table-column">
      <style:table-column-properties style:rel-column-width="4227*"/>
    </style:style>
    <style:style style:name="Tabla2.D" style:family="table-column">
      <style:table-column-properties style:rel-column-width="4233*"/>
    </style:style>
    <style:style style:name="Tabla2.E" style:family="table-column">
      <style:table-column-properties style:rel-column-width="4234*"/>
    </style:style>
    <style:style style:name="Tabla2.F" style:family="table-column">
      <style:table-column-properties style:rel-column-width="4240*"/>
    </style:style>
    <style:style style:name="Tabla2.L" style:family="table-column">
      <style:table-column-properties style:rel-column-width="4725*"/>
    </style:style>
    <style:style style:name="Tabla2.N" style:family="table-column">
      <style:table-column-properties style:rel-column-width="4738*"/>
    </style:style>
    <style:style style:name="Tabla2.O" style:family="table-column">
      <style:table-column-properties style:rel-column-width="4752*"/>
    </style:style>
    <style:style style:name="Tabla2.1" style:family="table-row">
      <style:table-row-properties style:min-row-height="0.508cm" fo:keep-together="auto"/>
    </style:style>
    <style:style style:name="Tabla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2.3" style:family="table-row">
      <style:table-row-properties style:row-height="0.508cm" fo:keep-together="auto"/>
    </style:style>
    <style:style style:name="Tabla2.A3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2.4" style:family="table-row">
      <style:table-row-properties style:min-row-height="1.016cm" fo:keep-together="auto"/>
    </style:style>
    <style:style style:name="Tabla2.A4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2.B4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.C5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113cm" fo:margin-left="0cm" fo:margin-top="0cm" fo:margin-bottom="0cm" table:align="left" style:writing-mode="page"/>
    </style:style>
    <style:style style:name="Tabla3.A" style:family="table-column">
      <style:table-column-properties style:column-width="4.736cm"/>
    </style:style>
    <style:style style:name="Tabla3.B" style:family="table-column">
      <style:table-column-properties style:column-width="2.12cm"/>
    </style:style>
    <style:style style:name="Tabla3.C" style:family="table-column">
      <style:table-column-properties style:column-width="1.903cm"/>
    </style:style>
    <style:style style:name="Tabla3.D" style:family="table-column">
      <style:table-column-properties style:column-width="1.642cm"/>
    </style:style>
    <style:style style:name="Tabla3.E" style:family="table-column">
      <style:table-column-properties style:column-width="1.401cm"/>
    </style:style>
    <style:style style:name="Tabla3.F" style:family="table-column">
      <style:table-column-properties style:column-width="1.431cm"/>
    </style:style>
    <style:style style:name="Tabla3.G" style:family="table-column">
      <style:table-column-properties style:column-width="1.879cm"/>
    </style:style>
    <style:style style:name="Tabla3.1" style:family="table-row">
      <style:table-row-properties style:min-row-height="0.508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3.A3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#bfbfbf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3.B4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5" style:family="table-row">
      <style:table-row-properties style:min-row-height="1.016cm" fo:keep-together="auto"/>
    </style:style>
    <style:style style:name="Tabla3.A5" style:family="table-cell">
      <style:table-cell-properties style:vertical-align="middle" fo:padding-left="0.191cm" fo:padding-right="0.191cm" fo:padding-top="0cm" fo:padding-bottom="0cm" fo:border="none"/>
    </style:style>
    <style:style style:name="Tabla3.B5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style:vertical-align="middle" fo:background-color="#c4d79b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6" style:family="table-cell">
      <style:table-cell-properties style:vertical-align="middle" fo:background-color="#c4d79b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2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8" style:family="table-cell">
      <style:table-cell-properties style:vertical-align="middle" fo:background-color="#00b05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8" style:family="table-cell">
      <style:table-cell-properties style:vertical-align="middle" fo:background-color="#00b050" fo:padding-left="0.191cm" fo:padding-right="0.191cm" fo:padding-top="0cm" fo:padding-bottom="0cm" fo:border="none">
        <style:background-image/>
      </style:table-cell-properties>
    </style:style>
    <style:style style:name="Tabla3.D28" style:family="table-cell">
      <style:table-cell-properties style:vertical-align="middle" fo:background-color="#00b05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E29" style:family="table-cell">
      <style:table-cell-properties style:vertical-align="middle" fo:background-color="#ffff0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36" style:family="table-row">
      <style:table-row-properties style:min-row-height="0.55cm" fo:keep-together="auto"/>
    </style:style>
    <style:style style:name="Tabla3.A36" style:family="table-cell">
      <style:table-cell-properties style:vertical-align="middle" fo:background-color="#bfbfb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214cm" fo:margin-left="0.009cm" fo:margin-top="0cm" fo:margin-bottom="0cm" table:align="left" style:writing-mode="lr-tb"/>
    </style:style>
    <style:style style:name="Tabla4.A" style:family="table-column">
      <style:table-column-properties style:column-width="3.073cm"/>
    </style:style>
    <style:style style:name="Tabla4.B" style:family="table-column">
      <style:table-column-properties style:column-width="1.986cm"/>
    </style:style>
    <style:style style:name="Tabla4.C" style:family="table-column">
      <style:table-column-properties style:column-width="1.877cm"/>
    </style:style>
    <style:style style:name="Tabla4.D" style:family="table-column">
      <style:table-column-properties style:column-width="1.919cm"/>
    </style:style>
    <style:style style:name="Tabla4.E" style:family="table-column">
      <style:table-column-properties style:column-width="2.011cm"/>
    </style:style>
    <style:style style:name="Tabla4.F" style:family="table-column">
      <style:table-column-properties style:column-width="2.778cm"/>
    </style:style>
    <style:style style:name="Tabla4.G" style:family="table-column">
      <style:table-column-properties style:column-width="1.568cm"/>
    </style:style>
    <style:style style:name="Tabla4.1" style:family="table-row">
      <style:table-row-properties style:min-row-height="1.058cm" fo:keep-together="auto"/>
    </style:style>
    <style:style style:name="Tabla4.A1" style:family="table-cell">
      <style:table-cell-properties style:vertical-align="middle" fo:background-color="#f4b084" fo:padding-left="0.191cm" fo:padding-right="0.191cm" fo:padding-top="0cm" fo:padding-bottom="0cm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4.2" style:family="table-row">
      <style:table-row-properties style:min-row-height="0.898cm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C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D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E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F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G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4.3" style:family="table-row">
      <style:table-row-properties style:min-row-height="0.529cm" fo:keep-together="auto"/>
    </style:style>
    <style:style style:name="Tabla4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D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E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F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G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7" style:family="table-row">
      <style:table-row-properties style:min-row-height="1.349cm" fo:keep-together="auto"/>
    </style:style>
    <style:style style:name="Tabla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E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F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G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.18" style:family="table-row">
      <style:table-row-properties style:min-row-height="0.556cm" fo:keep-together="auto"/>
    </style:style>
    <style:style style:name="Tabla4.A18" style:family="table-cell">
      <style:table-cell-properties style:vertical-align="middle" fo:background-color="#f4b08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D18" style:family="table-cell">
      <style:table-cell-properties style:vertical-align="bottom" fo:background-color="#f4b08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" style:family="table">
      <style:table-properties style:rel-width="100%" fo:margin-left="0cm" fo:margin-top="0cm" fo:margin-bottom="0cm" table:align="left" style:writing-mode="page"/>
    </style:style>
    <style:style style:name="Tabla5.A" style:family="table-column">
      <style:table-column-properties style:rel-column-width="11344*"/>
    </style:style>
    <style:style style:name="Tabla5.B" style:family="table-column">
      <style:table-column-properties style:rel-column-width="3853*"/>
    </style:style>
    <style:style style:name="Tabla5.C" style:family="table-column">
      <style:table-column-properties style:rel-column-width="3854*"/>
    </style:style>
    <style:style style:name="Tabla5.E" style:family="table-column">
      <style:table-column-properties style:rel-column-width="3860*"/>
    </style:style>
    <style:style style:name="Tabla5.F" style:family="table-column">
      <style:table-column-properties style:rel-column-width="3840*"/>
    </style:style>
    <style:style style:name="Tabla5.L" style:family="table-column">
      <style:table-column-properties style:rel-column-width="3847*"/>
    </style:style>
    <style:style style:name="Tabla5.O" style:family="table-column">
      <style:table-column-properties style:rel-column-width="4103*"/>
    </style:style>
    <style:style style:name="Tabla5.1" style:family="table-row">
      <style:table-row-properties style:min-row-height="0.508cm" fo:keep-together="auto"/>
    </style:style>
    <style:style style:name="Tabla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5.3" style:family="table-row">
      <style:table-row-properties style:row-height="0.508cm" fo:keep-together="auto"/>
    </style:style>
    <style:style style:name="Tabla5.A3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5.A4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5.B4" style:family="table-cell">
      <style:table-cell-properties style:vertical-align="bottom" fo:background-color="#bfbfb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5" style:family="table-cell">
      <style:table-cell-properties style:vertical-align="bottom" fo:background-color="#bfbfb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O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D6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E6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6" style:family="table">
      <style:table-properties style:rel-width="100%" fo:margin-left="0cm" fo:margin-top="0cm" fo:margin-bottom="0cm" table:align="left" style:writing-mode="page"/>
    </style:style>
    <style:style style:name="Tabla6.A" style:family="table-column">
      <style:table-column-properties style:rel-column-width="10059*"/>
    </style:style>
    <style:style style:name="Tabla6.B" style:family="table-column">
      <style:table-column-properties style:rel-column-width="3703*"/>
    </style:style>
    <style:style style:name="Tabla6.C" style:family="table-column">
      <style:table-column-properties style:rel-column-width="3716*"/>
    </style:style>
    <style:style style:name="Tabla6.D" style:family="table-column">
      <style:table-column-properties style:rel-column-width="3709*"/>
    </style:style>
    <style:style style:name="Tabla6.H" style:family="table-column">
      <style:table-column-properties style:rel-column-width="4292*"/>
    </style:style>
    <style:style style:name="Tabla6.I" style:family="table-column">
      <style:table-column-properties style:rel-column-width="4063*"/>
    </style:style>
    <style:style style:name="Tabla6.J" style:family="table-column">
      <style:table-column-properties style:rel-column-width="4280*"/>
    </style:style>
    <style:style style:name="Tabla6.K" style:family="table-column">
      <style:table-column-properties style:rel-column-width="4070*"/>
    </style:style>
    <style:style style:name="Tabla6.L" style:family="table-column">
      <style:table-column-properties style:rel-column-width="4279*"/>
    </style:style>
    <style:style style:name="Tabla6.O" style:family="table-column">
      <style:table-column-properties style:rel-column-width="4477*"/>
    </style:style>
    <style:style style:name="Tabla6.1" style:family="table-row">
      <style:table-row-properties style:min-row-height="0.508cm" fo:keep-together="auto"/>
    </style:style>
    <style:style style:name="Tabla6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6.2" style:family="table-row">
      <style:table-row-properties style:row-height="0.508cm" fo:keep-together="auto"/>
    </style:style>
    <style:style style:name="Tabla6.A3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6.B3" style:family="table-cell">
      <style:table-cell-properties style:vertical-align="bottom" fo:background-color="#bfbfb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6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6.B4" style:family="table-cell">
      <style:table-cell-properties style:vertical-align="bottom" fo:background-color="#bfbfb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6.O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6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6.O5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6.B6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6.O6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2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.353cm" style:contextual-spacing="false" fo:line-height="2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353cm" style:contextual-spacing="false" fo:line-height="200%" fo:text-align="start" style:justify-single-word="false" fo:orphans="2" fo:widows="2" fo:hyphenation-ladder-count="no-limit"/>
      <style:text-properties style:font-name="Times New Roman" fo:font-size="12pt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>
      <style:paragraph-properties fo:margin-top="0cm" fo:margin-bottom="0cm" style:contextual-spacing="true" fo:line-height="200%"/>
    </style:style>
    <style:style style:name="P5" style:family="paragraph" style:parent-style-name="Standard">
      <style:paragraph-properties fo:margin-top="0cm" fo:margin-bottom="0cm" style:contextual-spacing="false" fo:line-height="200%" fo:text-align="center" style:justify-single-word="false" fo:text-indent="1.27cm" style:auto-text-indent="false"/>
    </style:style>
    <style:style style:name="P6" style:family="paragraph" style:parent-style-name="Standard" style:master-page-name="Standard">
      <style:paragraph-properties fo:margin-top="0cm" fo:margin-bottom="0cm" style:contextual-spacing="false" fo:line-height="200%" fo:text-align="center" style:justify-single-word="false" fo:text-indent="1.27cm" style:auto-text-indent="false" style:page-number="1"/>
    </style:style>
    <style:style style:name="P7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line-height="2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200%"/>
    </style:style>
    <style:style style:name="P10" style:family="paragraph" style:parent-style-name="Standard" style:master-page-name="Converted1">
      <style:paragraph-properties fo:margin-top="0cm" fo:margin-bottom="0cm" style:contextual-spacing="false" fo:line-height="200%" style:page-number="1"/>
    </style:style>
    <style:style style:name="P11" style:family="paragraph" style:parent-style-name="Standard" style:master-page-name="Converted2">
      <style:paragraph-properties fo:margin-top="0cm" fo:margin-bottom="0cm" style:contextual-spacing="false" fo:line-height="200%" style:page-number="1"/>
    </style:style>
    <style:style style:name="P12" style:family="paragraph" style:parent-style-name="Standard">
      <style:paragraph-properties fo:margin-top="0cm" fo:margin-bottom="0cm" style:contextual-spacing="false" fo:line-height="200%" fo:text-align="end" style:justify-single-word="false"/>
    </style:style>
    <style:style style:name="P13" style:family="paragraph" style:parent-style-name="Standard">
      <style:paragraph-properties fo:margin-top="0cm" fo:margin-bottom="0.353cm" style:contextual-spacing="false" fo:line-height="2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Times New Roman" fo:font-size="12pt" fo:language="es" fo:country="US" fo:font-weight="bold" style:font-name-asian="Times New Roman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200%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Times New Roman" fo:font-size="12pt" style:font-name-asian="Times New Roman1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fo:language="es" fo:country="US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.353cm" style:contextual-spacing="false" fo:line-height="200%" fo:text-align="start" style:justify-single-word="false" fo:orphans="2" fo:widows="2" fo:hyphenation-ladder-count="no-limit"/>
      <style:text-properties style:font-name="Times New Roman" fo:font-size="12pt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master-page-name="Converted3">
      <style:paragraph-properties fo:margin-top="0cm" fo:margin-bottom="0cm" style:contextual-spacing="false" fo:line-height="200%" style:page-number="1"/>
      <style:text-properties style:font-name="Times New Roman" fo:font-size="12pt" style:font-size-asian="12pt" style:font-size-complex="12pt"/>
    </style:style>
    <style:style style:name="T1" style:family="text">
      <style:text-properties fo:color="#000000" loext:opacity="100%" style:font-name="Times New Roman" fo:font-size="12pt" fo:language="es" fo:country="MX" fo:font-weight="bold" style:font-name-asian="Times New Roman1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2pt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fo:font-size="12pt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font-size="12pt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2pt" fo:language="es" fo:country="ES" style:text-underline-style="solid" style:text-underline-width="auto" style:text-underline-color="font-color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2pt" fo:language="es" fo:country="E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2pt" fo:language="es" fo:country="ES" style:letter-kerning="false" style:font-size-asian="12pt" style:language-asian="en" style:country-asian="US" style:font-size-complex="12pt" style:language-complex="ar" style:country-complex="SA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2pt" style:letter-kerning="false" style:font-size-asian="12pt" style:language-asian="en" style:country-asian="US" style:font-size-complex="12pt" style:language-complex="ar" style:country-complex="SA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2p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/>
      </style:text-properties>
    </style:style>
    <style:style style:name="T16" style:family="text">
      <style:text-properties fo:color="#000000" loext:opacity="100%" fo:language="es" fo:country="ES" style:font-name-asian="Times New Roman1" style:font-name-complex="Times New Roman1">
        <loext:char-complex-color loext:theme-type="dark1" loext:color-type="theme"/>
      </style:text-properties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es" fo:country="US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style:letter-kerning="false" style:font-size-asian="12pt" style:language-asian="en" style:country-asian="US" style:font-size-complex="12pt" style:language-complex="ar" style:country-complex="SA"/>
    </style:style>
    <style:style style:name="T24" style:family="text"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Times New Roman" fo:font-size="12pt" fo:language="en" fo:country="US" style:font-name-asian="Times New Roman1" style:font-size-asian="12pt" style:font-size-complex="12pt"/>
    </style:style>
    <style:style style:name="T26" style:family="text">
      <style:text-properties fo:color="#000000" loext:opacity="100%" style:font-name="Times New Roman" fo:font-size="12pt" fo:language="es" fo:country="US" fo:font-weight="bold" style:font-name-asian="Times New Roman1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Times New Roman" fo:font-size="12pt" style:font-name-asian="Times New Roman1" style:font-size-asian="12pt" style:font-size-complex="12pt"/>
    </style:style>
    <style:style style:name="T29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" loext:marker-style-name="T17"><text:span text:style-name="T1">UNIVERSIDAD NACIONAL DE SAN CRISTÓBAL DE HUAMANGA</text:span><text:span text:style-name="T1"/></text:p>
        <text:p text:style-name="P5" loext:marker-style-name="T17"><text:span text:style-name="T1">“FACULTAD DE CIENCIAS ECONÓMICAS, ADMINISTRATIVAS Y CONTABLES”</text:span><text:span text:style-name="T1"/></text:p>
        <text:p text:style-name="P5" loext:marker-style-name="T17"><text:span text:style-name="T1">ESCUELA PROFESIONAL DE ECONOMÍA</text:span><text:span text:style-name="T1"/></text:p>
        <text:p text:style-name="P7" loext:marker-style-name="T17"><text:span text:style-name="T18"><text:s/></text:span><text:span text:style-name="T18"/></text:p>
        <text:p text:style-name="P7" loext:marker-style-name="T17"><text:span text:style-name="T2"><text:s/></text:span><draw:frame draw:style-name="fr1" draw:name="Picture 1937693100" text:anchor-type="as-char" svg:width="6.138cm" svg:height="6.826cm" draw:z-index="0"><draw:image xlink:href="Pictures/10000001000000E8000001022749F29D.png" xlink:type="simple" xlink:show="embed" xlink:actuate="onLoad" draw:mime-type="image/png"/></draw:frame><text:span text:style-name="T3"><text:s/></text:span></text:p>
        <text:p text:style-name="P7" loext:marker-style-name="T17"><text:span text:style-name="T3"><text:s/></text:span><text:span text:style-name="T3"/></text:p>
        <text:p text:style-name="P7" loext:marker-style-name="T17"><text:span text:style-name="T3">ESTAMPADO DE POLOS PERSONALIZADOS</text:span><text:span text:style-name="T3"/></text:p>
        <text:p text:style-name="P9" loext:marker-style-name="T17"><text:span text:style-name="T3">Trabajo: Taller 1</text:span><text:span text:style-name="T3"/></text:p>
        <text:p text:style-name="P9" loext:marker-style-name="T17"><text:span text:style-name="T3">FORMULADORES:</text:span><text:span text:style-name="T3"/></text:p>
        <text:p text:style-name="P4" loext:marker-style-name="T17"><text:span text:style-name="T8">ACHALMA MENDOZA, Elmer Edison.</text:span><text:span text:style-name="T8"/></text:p>
        <text:p text:style-name="P4" loext:marker-style-name="T17"><text:span text:style-name="T8">ALCA AYME, Yudith Carolina</text:span><text:span text:style-name="T8"/></text:p>
        <text:p text:style-name="P4" loext:marker-style-name="T17"><text:span text:style-name="T19">GUTIÉRREZ LUCANA, Diana Virginia.</text:span><text:span text:style-name="T19"/></text:p>
        <text:p text:style-name="P4" loext:marker-style-name="T17"><text:span text:style-name="T19">HUAMÁN CENTENO, Kely Daysi.</text:span><text:span text:style-name="T19"/></text:p>
        <text:p text:style-name="P4" loext:marker-style-name="T17"><text:span text:style-name="T19">HUIZA QUISPE, Brenda Sofía</text:span><text:span text:style-name="T19"/></text:p>
        <text:p text:style-name="P9" loext:marker-style-name="T17"><text:span text:style-name="T3">CURSO :</text:span><text:span text:style-name="T2"> EVALUACIÓN DE PROYECTOS</text:span></text:p>
        <text:p text:style-name="P9" loext:marker-style-name="T17"><text:span text:style-name="T3">SIGLA</text:span><text:span text:style-name="T17"> </text:span><text:span text:style-name="T3">:</text:span><text:span text:style-name="T2"> EC-448</text:span></text:p>
        <text:p text:style-name="P9" loext:marker-style-name="T17"><text:span text:style-name="T3">PROFESOR :</text:span><text:span text:style-name="T2"> Econ. Tony Oswaldo, HINOJOSA VIVANCO</text:span></text:p>
        <text:p text:style-name="P7" loext:marker-style-name="T17"><text:span text:style-name="T9"><text:s/></text:span><text:span text:style-name="T9"/></text:p>
        <text:p text:style-name="P7" loext:marker-style-name="T17"><text:span text:style-name="T17"><text:s/></text:span><text:span text:style-name="T17"/></text:p>
        <text:p text:style-name="P7" loext:marker-style-name="T17"><text:span text:style-name="T17"><text:s/></text:span><text:span text:style-name="T17"/></text:p>
        <text:p text:style-name="P7" loext:marker-style-name="T17"><text:span text:style-name="T5">MAYO 2021</text:span><text:span text:style-name="T5"/></text:p>
        <text:p text:style-name="P7" loext:marker-style-name="T17"><text:span text:style-name="T21">ACTIVIDAD TALLER 01</text:span><text:span text:style-name="T21"/></text:p>
        <text:p text:style-name="P7" loext:marker-style-name="T17"><text:span text:style-name="T20">INVERSIONES Y VALORES DE RECUPERO</text:span><text:span text:style-name="T20"/></text:p>
        <text:p text:style-name="P9" loext:marker-style-name="T17"><text:span text:style-name="T20">Objetivo</text:span><text:span text:style-name="T20"/></text:p>
        <text:p text:style-name="P9" loext:marker-style-name="T17"><text:span text:style-name="T18">Esta actividad tiene por finalidad que los equipos colaborativos puedan identificar y cuantificar el presupuesto de ventas y presupuesto de inversión inicial y valor de recupero para el proyecto que vienen desarrollando.</text:span><text:span text:style-name="T18"/></text:p>
        <text:p text:style-name="P9" loext:marker-style-name="T17"><text:span text:style-name="T20">Indicaciones</text:span><text:span text:style-name="T20"/></text:p>
        <text:p text:style-name="P9" loext:marker-style-name="T17"><text:soft-page-break/><text:span text:style-name="T18">1.- Proyecto para el horizonte de evaluación del proyecto las ventas en unidades y en soles, considerando para ello el valor de ventas unitario del producto o servicio.</text:span><text:span text:style-name="T18"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C"/>
          <table:table-column table:style-name="Tabla1.G"/>
          <table:table-column table:style-name="Tabla1.C"/>
          <table:table-column table:style-name="Tabla1.D" table:number-columns-repeated="2"/>
          <table:table-column table:style-name="Tabla1.K"/>
          <table:table-column table:style-name="Tabla1.L"/>
          <table:table-column table:style-name="Tabla1.K"/>
          <table:table-column table:style-name="Tabla1.N"/>
          <table:table-row table:style-name="Tabla1.1">
            <table:table-cell table:style-name="Tabla1.A1" table:number-columns-spanned="14" office:value-type="string">
              <text:p text:style-name="P7" loext:marker-style-name="T17"><text:span text:style-name="T24">CUADRO N° 01</text:span><text:span text:style-name="T24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14" office:value-type="string">
              <text:p text:style-name="P7" loext:marker-style-name="T17"><text:span text:style-name="T26">Proyección de ventas en unidades</text:span><text:span text:style-name="T2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table-cell table:style-name="Tabla1.A3" office:value-type="string">
              <text:p text:style-name="P14" loext:marker-style-name="T26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  <table:table-cell table:style-name="Tabla1.A3" office:value-type="string">
              <text:p text:style-name="P18" loext:marker-style-name="T22"/>
            </table:table-cell>
          </table:table-row>
          <table:table-row table:style-name="Tabla1.1">
            <table:table-cell table:style-name="Tabla1.A4" office:value-type="string">
              <text:p text:style-name="P7" loext:marker-style-name="T17"><text:span text:style-name="T24">Año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1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2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3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4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5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6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7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8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9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10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11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Mes 12</text:span><text:span text:style-name="T24"/></text:p>
            </table:table-cell>
            <table:table-cell table:style-name="Tabla1.B4" office:value-type="string">
              <text:p text:style-name="P7" loext:marker-style-name="T17"><text:span text:style-name="T24">TOTAL</text:span><text:span text:style-name="T24"/></text:p>
            </table:table-cell>
          </table:table-row>
          <table:table-row table:style-name="Tabla1.1">
            <table:table-cell table:style-name="Tabla1.A5" office:value-type="string">
              <text:p text:style-name="P7" loext:marker-style-name="T17"><text:span text:style-name="T24">1</text:span><text:span text:style-name="T24"/></text:p>
            </table:table-cell>
            <table:table-cell table:style-name="Tabla1.B5" office:value-type="string">
              <text:p text:style-name="P12" loext:marker-style-name="T17"><text:span text:style-name="T25">30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3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39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4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5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43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6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1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1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4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8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33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368</text:span><text:span text:style-name="T25"/></text:p>
            </table:table-cell>
          </table:table-row>
          <table:table-row table:style-name="Tabla1.1">
            <table:table-cell table:style-name="Tabla1.A5" office:value-type="string">
              <text:p text:style-name="P7" loext:marker-style-name="T17"><text:span text:style-name="T24">2</text:span><text:span text:style-name="T24"/></text:p>
            </table:table-cell>
            <table:table-cell table:style-name="Tabla1.B5" office:value-type="string">
              <text:p text:style-name="P12" loext:marker-style-name="T17"><text:span text:style-name="T25">46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7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7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8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8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92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49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03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08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1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19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2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937</text:span><text:span text:style-name="T25"/></text:p>
            </table:table-cell>
          </table:table-row>
          <table:table-row table:style-name="Tabla1.1">
            <table:table-cell table:style-name="Tabla1.A5" office:value-type="string">
              <text:p text:style-name="P7" loext:marker-style-name="T17"><text:span text:style-name="T24">3</text:span><text:span text:style-name="T24"/></text:p>
            </table:table-cell>
            <table:table-cell table:style-name="Tabla1.B5" office:value-type="string">
              <text:p text:style-name="P12" loext:marker-style-name="T17"><text:span text:style-name="T25">53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3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4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4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52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5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63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68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7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79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8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59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721</text:span><text:span text:style-name="T25"/></text:p>
            </table:table-cell>
          </table:table-row>
          <table:table-row table:style-name="Tabla1.1">
            <table:table-cell table:style-name="Tabla1.A5" office:value-type="string">
              <text:p text:style-name="P7" loext:marker-style-name="T17"><text:span text:style-name="T24">4</text:span><text:span text:style-name="T24"/></text:p>
            </table:table-cell>
            <table:table-cell table:style-name="Tabla1.B5" office:value-type="string">
              <text:p text:style-name="P12" loext:marker-style-name="T17"><text:span text:style-name="T25">59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0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0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12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1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23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28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3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39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4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5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5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7506</text:span><text:span text:style-name="T25"/></text:p>
            </table:table-cell>
          </table:table-row>
          <table:table-row table:style-name="Tabla1.1">
            <table:table-cell table:style-name="Tabla1.A5" office:value-type="string">
              <text:p text:style-name="P7" loext:marker-style-name="T17"><text:span text:style-name="T24">5</text:span><text:span text:style-name="T24"/></text:p>
            </table:table-cell>
            <table:table-cell table:style-name="Tabla1.B5" office:value-type="string">
              <text:p text:style-name="P12" loext:marker-style-name="T17"><text:span text:style-name="T25">66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66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72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77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83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88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9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699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704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710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715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721</text:span><text:span text:style-name="T25"/></text:p>
            </table:table-cell>
            <table:table-cell table:style-name="Tabla1.B5" office:value-type="string">
              <text:p text:style-name="P12" loext:marker-style-name="T17"><text:span text:style-name="T25">8290</text:span><text:span text:style-name="T25"/></text:p>
            </table:table-cell>
          </table:table-row>
        </table:table>
        <text:p text:style-name="P19" loext:marker-style-name="T18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E"/>
          <table:table-column table:style-name="Tabla2.D"/>
          <table:table-column table:style-name="Tabla2.F"/>
          <table:table-column table:style-name="Tabla2.E"/>
          <table:table-column table:style-name="Tabla2.F"/>
          <table:table-column table:style-name="Tabla2.L" table:number-columns-repeated="2"/>
          <table:table-column table:style-name="Tabla2.N"/>
          <table:table-column table:style-name="Tabla2.O"/>
          <table:table-row table:style-name="Tabla2.1">
            <table:table-cell table:style-name="Tabla2.A1" table:number-columns-spanned="15" office:value-type="string">
              <text:p text:style-name="P7" loext:marker-style-name="T17"><text:span text:style-name="T24">CUADRO N° 02</text:span><text:span text:style-name="T24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table:number-columns-spanned="15" office:value-type="string">
              <text:p text:style-name="P7" loext:marker-style-name="T17"><text:span text:style-name="T26">Proyección de ventas en nuevos soles</text:span><text:span text:style-name="T2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P14" loext:marker-style-name="T26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  <table:table-cell table:style-name="Tabla2.A3" office:value-type="string">
              <text:p text:style-name="P18" loext:marker-style-name="T22"/>
            </table:table-cell>
          </table:table-row>
          <table:table-row table:style-name="Tabla2.4">
            <table:table-cell table:style-name="Tabla2.A4" office:value-type="string">
              <text:p text:style-name="P7" loext:marker-style-name="T17"><text:span text:style-name="T24">Año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Valor Unitario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1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2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3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4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5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6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7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8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9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10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11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Mes 12</text:span><text:span text:style-name="T24"/></text:p>
            </table:table-cell>
            <table:table-cell table:style-name="Tabla2.B4" office:value-type="string">
              <text:p text:style-name="P7" loext:marker-style-name="T17"><text:span text:style-name="T24">TOTAL</text:span><text:span text:style-name="T24"/></text:p>
            </table:table-cell>
          </table:table-row>
          <table:table-row table:style-name="Tabla2.1">
            <table:table-cell table:style-name="Tabla2.A5" office:value-type="string">
              <text:p text:style-name="P7" loext:marker-style-name="T17"><text:span text:style-name="T24">1</text:span><text:span text:style-name="T24"/></text:p>
            </table:table-cell>
            <table:table-cell table:style-name="Tabla2.B5" office:value-type="string">
              <text:p text:style-name="P7" loext:marker-style-name="T17"><text:span text:style-name="T24">53</text:span><text:span text:style-name="T24"/></text:p>
            </table:table-cell>
            <table:table-cell table:style-name="Tabla2.C5" office:value-type="string">
              <text:p text:style-name="P12" loext:marker-style-name="T17"><text:span text:style-name="T25">1590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770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7967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807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876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3479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929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194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664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353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035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1786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31504</text:span><text:span text:style-name="T25"/></text:p>
            </table:table-cell>
          </table:table-row>
          <table:table-row table:style-name="Tabla2.1">
            <table:table-cell table:style-name="Tabla2.A5" office:value-type="string">
              <text:p text:style-name="P7" loext:marker-style-name="T17"><text:span text:style-name="T24">2</text:span><text:span text:style-name="T24"/></text:p>
            </table:table-cell>
            <table:table-cell table:style-name="Tabla2.B5" office:value-type="string">
              <text:p text:style-name="P7" loext:marker-style-name="T17"><text:span text:style-name="T24">53</text:span><text:span text:style-name="T24"/></text:p>
            </table:table-cell>
            <table:table-cell table:style-name="Tabla2.C5" office:value-type="string">
              <text:p text:style-name="P12" loext:marker-style-name="T17"><text:span text:style-name="T25">2464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491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522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549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581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6076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634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6659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6924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724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7507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782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14661</text:span><text:span text:style-name="T25"/></text:p>
            </table:table-cell>
          </table:table-row>
          <table:table-row table:style-name="Tabla2.1">
            <table:table-cell table:style-name="Tabla2.A5" office:value-type="string">
              <text:p text:style-name="P7" loext:marker-style-name="T17"><text:span text:style-name="T24">3</text:span><text:span text:style-name="T24"/></text:p>
            </table:table-cell>
            <table:table-cell table:style-name="Tabla2.B5" office:value-type="string">
              <text:p text:style-name="P7" loext:marker-style-name="T17"><text:span text:style-name="T24">53</text:span><text:span text:style-name="T24"/></text:p>
            </table:table-cell>
            <table:table-cell table:style-name="Tabla2.C5" office:value-type="string">
              <text:p text:style-name="P12" loext:marker-style-name="T17"><text:span text:style-name="T25">2809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840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867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893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9256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952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29839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0104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042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0687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100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127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56213</text:span><text:span text:style-name="T25"/></text:p>
            </table:table-cell>
          </table:table-row>
          <table:table-row table:style-name="Tabla2.1">
            <table:table-cell table:style-name="Tabla2.A5" office:value-type="string">
              <text:p text:style-name="P7" loext:marker-style-name="T17"><text:span text:style-name="T24">4</text:span><text:span text:style-name="T24"/></text:p>
            </table:table-cell>
            <table:table-cell table:style-name="Tabla2.B5" office:value-type="string">
              <text:p text:style-name="P7" loext:marker-style-name="T17"><text:span text:style-name="T24">53</text:span><text:span text:style-name="T24"/></text:p>
            </table:table-cell>
            <table:table-cell table:style-name="Tabla2.C5" office:value-type="string">
              <text:p text:style-name="P12" loext:marker-style-name="T17"><text:span text:style-name="T25">3158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185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211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2436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270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3019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3284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360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3867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418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445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471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97818</text:span><text:span text:style-name="T25"/></text:p>
            </table:table-cell>
          </table:table-row>
          <table:table-row table:style-name="Tabla2.1">
            <table:table-cell table:style-name="Tabla2.A5" office:value-type="string">
              <text:p text:style-name="P7" loext:marker-style-name="T17"><text:span text:style-name="T24">5</text:span><text:span text:style-name="T24"/></text:p>
            </table:table-cell>
            <table:table-cell table:style-name="Tabla2.B5" office:value-type="string">
              <text:p text:style-name="P7" loext:marker-style-name="T17"><text:span text:style-name="T24">53</text:span><text:span text:style-name="T24"/></text:p>
            </table:table-cell>
            <table:table-cell table:style-name="Tabla2.C5" office:value-type="string">
              <text:p text:style-name="P12" loext:marker-style-name="T17"><text:span text:style-name="T25">3503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5298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5616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5881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6199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6464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678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7047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7312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7630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7895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38213</text:span><text:span text:style-name="T25"/></text:p>
            </table:table-cell>
            <table:table-cell table:style-name="Tabla2.C5" office:value-type="string">
              <text:p text:style-name="P12" loext:marker-style-name="T17"><text:span text:style-name="T25">439370</text:span><text:span text:style-name="T25"/></text:p>
            </table:table-cell>
          </table:table-row>
        </table:table>
        <text:p text:style-name="P9" loext:marker-style-name="T17"><text:span text:style-name="T18">2.- Identifique y calcule la inversión en activos fijos y capital de trabajo para el primer mes de operación, considerando los valores unitarios sin IGV y luego determine cuales de ellos pueden ser financiado con aporte propio y cuales con un financiamiento externo (préstamo).</text:span><text:span text:style-name="T18"/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row table:style-name="Tabla3.1">
            <table:table-cell table:style-name="Tabla3.A1" table:number-columns-spanned="7" office:value-type="string">
              <text:p text:style-name="P7" loext:marker-style-name="T17"><text:span text:style-name="T27">CUADRO N°03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">
            <table:table-cell table:style-name="Tabla3.A1" table:number-columns-spanned="7" office:value-type="string">
              <text:p text:style-name="P7" loext:marker-style-name="T17"><text:span text:style-name="T27">PRESUPUESTO DE INVERSIÓN Y FINANCIAMIENTO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">
            <table:table-cell table:style-name="Tabla3.A3" table:number-columns-spanned="7" office:value-type="string">
              <text:p text:style-name="P7" loext:marker-style-name="T17"><text:span text:style-name="T28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">
            <table:table-cell table:style-name="Tabla3.A4" table:number-rows-spanned="2" office:value-type="string">
              <text:p text:style-name="P7" loext:marker-style-name="T17"><text:span text:style-name="T27">RUBRO</text:span><text:span text:style-name="T27"/></text:p>
            </table:table-cell>
            <table:table-cell table:style-name="Tabla3.B4" table:number-columns-spanned="4" office:value-type="string">
              <text:p text:style-name="P7" loext:marker-style-name="T17"><text:span text:style-name="T27">INVERSÍON INICIAL</text:span><text:span text:style-name="T27"/></text:p>
            </table:table-cell>
            <table:covered-table-cell/>
            <table:covered-table-cell/>
            <table:covered-table-cell/>
            <table:table-cell table:style-name="Tabla3.B4" table:number-columns-spanned="2" office:value-type="string">
              <text:p text:style-name="P7" loext:marker-style-name="T17"><text:span text:style-name="T27">FINANCIAMIENTO</text:span><text:span text:style-name="T27"/></text:p>
            </table:table-cell>
            <table:covered-table-cell/>
          </table:table-row>
          <table:table-row table:style-name="Tabla3.5">
            <table:covered-table-cell table:style-name="Tabla3.A5"/>
            <table:table-cell table:style-name="Tabla3.B5" office:value-type="string">
              <text:p text:style-name="P7" loext:marker-style-name="T17"><text:span text:style-name="T27">Unidad de Medida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Unidad Requerida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Valor Unitario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Total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Capital Propio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Préstamo</text:span><text:span text:style-name="T27"/></text:p>
            </table:table-cell>
          </table:table-row>
          <table:table-row table:style-name="Tabla3.1">
            <table:table-cell table:style-name="Tabla3.A6" office:value-type="string">
              <text:p text:style-name="P9" loext:marker-style-name="T17"><text:span text:style-name="T27">A. ACTIVO TANGIBLE</text:span><text:span text:style-name="T27"/></text:p>
            </table:table-cell>
            <table:table-cell table:style-name="Tabla3.B6" office:value-type="string">
              <text:p text:style-name="P7" loext:marker-style-name="T17"><text:span text:style-name="T27"/></text:p>
            </table:table-cell>
            <table:table-cell table:style-name="Tabla3.B6" office:value-type="string">
              <text:p text:style-name="P7" loext:marker-style-name="T17"><text:span text:style-name="T27"/></text:p>
            </table:table-cell>
            <table:table-cell table:style-name="Tabla3.B6" office:value-type="string">
              <text:p text:style-name="P7" loext:marker-style-name="T17"><text:span text:style-name="T28"/></text:p>
            </table:table-cell>
            <table:table-cell table:style-name="Tabla3.B6" office:value-type="string">
              <text:p text:style-name="P7" loext:marker-style-name="T17"><text:span text:style-name="T27">10,838</text:span><text:span text:style-name="T27"/></text:p>
            </table:table-cell>
            <table:table-cell table:style-name="Tabla3.B6" office:value-type="string">
              <text:p text:style-name="P7" loext:marker-style-name="T17"><text:span text:style-name="T27"/></text:p>
            </table:table-cell>
            <table:table-cell table:style-name="Tabla3.B6" office:value-type="string">
              <text:p text:style-name="P7" loext:marker-style-name="T17"><text:span text:style-name="T27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7">Maquinarias y equipos</text:span><text:span text:style-name="T27"/></text:p>
            </table:table-cell>
            <table:table-cell table:style-name="Tabla3.B7" office:value-type="string">
              <text:p text:style-name="P9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7">1,527</text:span><text:span text:style-name="T27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Plancha Plana (Estampado)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,50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,50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Pistola Etiquetadora Textil</text:span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7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7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7">Muebles y enseres</text:span><text:span text:style-name="T27"/></text:p>
            </table:table-cell>
            <table:table-cell table:style-name="Tabla3.B7" office:value-type="string">
              <text:p text:style-name="P9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7">554</text:span><text:span text:style-name="T27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Escritorio para computador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Silla de escritorio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5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5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Silla</text:span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6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Exhibidor de polos</text:span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2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2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Espejo para vestidor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Probador vestidor de metal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Cortina de vestidor de polos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7">Equipo informático</text:span><text:span text:style-name="T27"/></text:p>
            </table:table-cell>
            <table:table-cell table:style-name="Tabla3.B7" office:value-type="string">
              <text:p text:style-name="P9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7">5357</text:span><text:span text:style-name="T27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Computadora portátil Laptop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89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3798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Impresora</text:span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55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55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7">Vehículos</text:span><text:span text:style-name="T27"/></text:p>
            </table:table-cell>
            <table:table-cell table:style-name="Tabla3.B7" office:value-type="string">
              <text:p text:style-name="P9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A1" office:value-type="string">
              <text:p text:style-name="P17" loext:marker-style-name="T28"/>
            </table:table-cell>
            <table:table-cell table:style-name="Tabla3.A7" office:value-type="string">
              <text:p text:style-name="P7" loext:marker-style-name="T17"><text:span text:style-name="T27">3,400</text:span><text:span text:style-name="T27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9">Moto lineal (eléctrica)</text:span><text:span text:style-name="T29"/></text:p>
            </table:table-cell>
            <table:table-cell table:style-name="Tabla3.B7" office:value-type="string">
              <text:p text:style-name="P9" loext:marker-style-name="T17"><text:span text:style-name="T28">Unidad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D22" office:value-type="string">
              <text:p text:style-name="P7" loext:marker-style-name="T17"><text:span text:style-name="T28">3,40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3,40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6" office:value-type="string">
              <text:p text:style-name="P9" loext:marker-style-name="T17"><text:span text:style-name="T27">B. INTANGIBLES</text:span><text:span text:style-name="T27"/></text:p>
            </table:table-cell>
            <table:table-cell table:style-name="Tabla3.B6" office:value-type="string">
              <text:p text:style-name="P9" loext:marker-style-name="T17"><text:span text:style-name="T28"/></text:p>
            </table:table-cell>
            <table:table-cell table:style-name="Tabla3.B6" office:value-type="string">
              <text:p text:style-name="P7" loext:marker-style-name="T17"><text:span text:style-name="T28"/></text:p>
            </table:table-cell>
            <table:table-cell table:style-name="Tabla3.B6" office:value-type="string">
              <text:p text:style-name="P7" loext:marker-style-name="T17"><text:span text:style-name="T28"/></text:p>
            </table:table-cell>
            <table:table-cell table:style-name="Tabla3.B6" office:value-type="string">
              <text:p text:style-name="P7" loext:marker-style-name="T17"><text:span text:style-name="T27">1,117</text:span><text:span text:style-name="T27"/></text:p>
            </table:table-cell>
            <table:table-cell table:style-name="Tabla3.B6" office:value-type="string">
              <text:p text:style-name="P7" loext:marker-style-name="T17"><text:span text:style-name="T28"/></text:p>
            </table:table-cell>
            <table:table-cell table:style-name="Tabla3.B6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REGISTRO DE MARCA Y LOGO</text:span><text:span text:style-name="T28"/></text:p>
            </table:table-cell>
            <table:table-cell table:style-name="Tabla3.B7" office:value-type="string">
              <text:p text:style-name="P9" loext:marker-style-name="T17"><text:span text:style-name="T28">Documento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53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53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CONSTITUCIÓN DE LA EMPRESA</text:span><text:span text:style-name="T28"/></text:p>
            </table:table-cell>
            <table:table-cell table:style-name="Tabla3.B7" office:value-type="string">
              <text:p text:style-name="P9" loext:marker-style-name="T17"><text:span text:style-name="T28">Documento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77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77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CAPACITACIÓN AL PERSONAL</text:span><text:span text:style-name="T28"/></text:p>
            </table:table-cell>
            <table:table-cell table:style-name="Tabla3.B7" office:value-type="string">
              <text:p text:style-name="P9" loext:marker-style-name="T17"><text:span text:style-name="T28">Documento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6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6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ext:soft-page-break/>
          <table:table-row table:style-name="Tabla3.1">
            <table:table-cell table:style-name="Tabla3.A7" office:value-type="string">
              <text:p text:style-name="P9" loext:marker-style-name="T17"><text:span text:style-name="T28">INSCRIPCIÓN EN SUNARP</text:span><text:span text:style-name="T28"/></text:p>
            </table:table-cell>
            <table:table-cell table:style-name="Tabla3.B7" office:value-type="string">
              <text:p text:style-name="P9" loext:marker-style-name="T17"><text:span text:style-name="T28">Documento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4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28" office:value-type="string">
              <text:p text:style-name="P9" loext:marker-style-name="T17"><text:span text:style-name="T4">TOTAL DE ACTIVO FIJO</text:span><text:span text:style-name="T4"/></text:p>
            </table:table-cell>
            <table:table-cell table:style-name="Tabla3.B28" office:value-type="string">
              <text:p text:style-name="P9" loext:marker-style-name="T17"><text:span text:style-name="T28"/></text:p>
            </table:table-cell>
            <table:table-cell table:style-name="Tabla3.A28" office:value-type="string">
              <text:p text:style-name="P7" loext:marker-style-name="T17"><text:span text:style-name="T28"/></text:p>
            </table:table-cell>
            <table:table-cell table:style-name="Tabla3.D28" office:value-type="string">
              <text:p text:style-name="P7" loext:marker-style-name="T17"><text:span text:style-name="T28"/></text:p>
            </table:table-cell>
            <table:table-cell table:style-name="Tabla3.D28" office:value-type="string">
              <text:p text:style-name="P7" loext:marker-style-name="T17"><text:span text:style-name="T27">11,955</text:span><text:span text:style-name="T27"/></text:p>
            </table:table-cell>
            <table:table-cell table:style-name="Tabla3.D28" office:value-type="string">
              <text:p text:style-name="P7" loext:marker-style-name="T17"><text:span text:style-name="T27"/></text:p>
            </table:table-cell>
            <table:table-cell table:style-name="Tabla3.D28" office:value-type="string">
              <text:p text:style-name="P7" loext:marker-style-name="T17"><text:span text:style-name="T27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7">CAPITAL DE TRABAJO</text:span><text:span text:style-name="T27"/></text:p>
            </table:table-cell>
            <table:table-cell table:style-name="Tabla3.D22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E29" office:value-type="string">
              <text:p text:style-name="P7" loext:marker-style-name="T17"><text:span text:style-name="T27">11,811</text:span><text:span text:style-name="T27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Materia prima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A1" office:value-type="string">
              <text:p text:style-name="P7" loext:marker-style-name="T17"><text:span text:style-name="T28">5,230</text:span><text:span text:style-name="T28"/></text:p>
            </table:table-cell>
            <table:table-cell table:style-name="Tabla3.A7" office:value-type="string">
              <text:p text:style-name="P7" loext:marker-style-name="T17"><text:span text:style-name="T28">5,23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Mano de obra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D22" office:value-type="string">
              <text:p text:style-name="P7" loext:marker-style-name="T17"><text:span text:style-name="T28">2,11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,115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Costos Indirectos de Producción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>24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49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Gastos de Administración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>2,438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2,438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7" office:value-type="string">
              <text:p text:style-name="P9" loext:marker-style-name="T17"><text:span text:style-name="T28">Gastos de Ventas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>177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>1,770</text:span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  <table:table-cell table:style-name="Tabla3.B7" office:value-type="string">
              <text:p text:style-name="P7" loext:marker-style-name="T17"><text:span text:style-name="T28"/></text:p>
            </table:table-cell>
          </table:table-row>
          <table:table-row table:style-name="Tabla3.1">
            <table:table-cell table:style-name="Tabla3.A28" office:value-type="string">
              <text:p text:style-name="P9" loext:marker-style-name="T17"><text:span text:style-name="T27">TOTAL DE CAPITAL DE TRABAJO</text:span><text:span text:style-name="T27"/></text:p>
            </table:table-cell>
            <table:table-cell table:style-name="Tabla3.D28" office:value-type="string">
              <text:p text:style-name="P7" loext:marker-style-name="T17"><text:span text:style-name="T28"/></text:p>
            </table:table-cell>
            <table:table-cell table:style-name="Tabla3.D28" office:value-type="string">
              <text:p text:style-name="P7" loext:marker-style-name="T17"><text:span text:style-name="T28"/></text:p>
            </table:table-cell>
            <table:table-cell table:style-name="Tabla3.D28" office:value-type="string">
              <text:p text:style-name="P7" loext:marker-style-name="T17"><text:span text:style-name="T27"/></text:p>
            </table:table-cell>
            <table:table-cell table:style-name="Tabla3.D28" office:value-type="string">
              <text:p text:style-name="P7" loext:marker-style-name="T17"><text:span text:style-name="T27">11,802</text:span><text:span text:style-name="T27"/></text:p>
            </table:table-cell>
            <table:table-cell table:style-name="Tabla3.D28" office:value-type="string">
              <text:p text:style-name="P7" loext:marker-style-name="T17"><text:span text:style-name="T27"/></text:p>
            </table:table-cell>
            <table:table-cell table:style-name="Tabla3.D28" office:value-type="string">
              <text:p text:style-name="P7" loext:marker-style-name="T17"><text:span text:style-name="T27"/></text:p>
            </table:table-cell>
          </table:table-row>
          <table:table-row table:style-name="Tabla3.36">
            <table:table-cell table:style-name="Tabla3.A36" office:value-type="string">
              <text:p text:style-name="P9" loext:marker-style-name="T17"><text:span text:style-name="T27">TOTAL, DE INVERSIÓN</text:span><text:span text:style-name="T27"/></text:p>
            </table:table-cell>
            <table:table-cell table:style-name="Tabla3.B5" office:value-type="string">
              <text:p text:style-name="P7" loext:marker-style-name="T17"><text:span text:style-name="T28"/></text:p>
            </table:table-cell>
            <table:table-cell table:style-name="Tabla3.B5" office:value-type="string">
              <text:p text:style-name="P7" loext:marker-style-name="T17"><text:span text:style-name="T28"/></text:p>
            </table:table-cell>
            <table:table-cell table:style-name="Tabla3.B5" office:value-type="string">
              <text:p text:style-name="P7" loext:marker-style-name="T17"><text:span text:style-name="T27"/></text:p>
            </table:table-cell>
            <table:table-cell table:style-name="Tabla3.B5" office:value-type="string">
              <text:p text:style-name="P7" loext:marker-style-name="T17"><text:span text:style-name="T27">23,766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14620</text:span><text:span text:style-name="T27"/></text:p>
            </table:table-cell>
            <table:table-cell table:style-name="Tabla3.B5" office:value-type="string">
              <text:p text:style-name="P7" loext:marker-style-name="T17"><text:span text:style-name="T27">9146</text:span><text:span text:style-name="T27"/></text:p>
            </table:table-cell>
          </table:table-row>
        </table:table>
        <text:p text:style-name="P9" loext:marker-style-name="T17"><text:span text:style-name="T18">3.- Calcule la tabla de depreciaciones de los activos fijos, estimando el valor de recupero con el método contable.</text:span><text:span text:style-name="T18"/>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row table:style-name="Tabla4.1">
            <table:table-cell table:style-name="Tabla4.A1" table:number-rows-spanned="2" office:value-type="string">
              <text:p text:style-name="P1" loext:marker-style-name="T23"><text:span text:style-name="T10">ACTIVO FIJO</text:span></text:p>
            </table:table-cell>
            <table:table-cell table:style-name="Tabla4.A1" table:number-rows-spanned="2" office:value-type="string">
              <text:p text:style-name="P1" loext:marker-style-name="T23"><text:span text:style-name="T10">Valor de compra</text:span></text:p>
            </table:table-cell>
            <table:table-cell table:style-name="Tabla4.A1" table:number-rows-spanned="2" office:value-type="string">
              <text:p text:style-name="P1" loext:marker-style-name="T23"><text:span text:style-name="T10">Vida útil (años)</text:span></text:p>
            </table:table-cell>
            <table:table-cell table:style-name="Tabla4.A1" table:number-rows-spanned="2" office:value-type="string">
              <text:p text:style-name="P1" loext:marker-style-name="T23"><text:span text:style-name="T10">Tasa de Depreciación</text:span></text:p>
            </table:table-cell>
            <table:table-cell table:style-name="Tabla4.A1" table:number-rows-spanned="2" office:value-type="string">
              <text:p text:style-name="P1" loext:marker-style-name="T23"><text:span text:style-name="T10">Depreciación anual</text:span></text:p>
            </table:table-cell>
            <table:table-cell table:style-name="Tabla4.A1" table:number-rows-spanned="2" office:value-type="string">
              <text:p text:style-name="P1" loext:marker-style-name="T23"><text:span text:style-name="T10">Depreciación Acumulada</text:span></text:p>
            </table:table-cell>
            <table:table-cell table:style-name="Tabla4.A1" table:number-rows-spanned="2" office:value-type="string">
              <text:p text:style-name="P1" loext:marker-style-name="T23"><text:span text:style-name="T10">Valor de recupero</text:span></text:p>
            </table:table-cell>
          </table:table-row>
          <table:table-row table:style-name="Tabla4.2">
            <table:covered-table-cell table:style-name="Tabla4.A2"/>
            <table:covered-table-cell table:style-name="Tabla4.B2"/>
            <table:covered-table-cell table:style-name="Tabla4.C2"/>
            <table:covered-table-cell table:style-name="Tabla4.D2"/>
            <table:covered-table-cell table:style-name="Tabla4.E2"/>
            <table:covered-table-cell table:style-name="Tabla4.F2"/>
            <table:covered-table-cell table:style-name="Tabla4.G2"/>
          </table:table-row>
          <table:table-row table:style-name="Tabla4.3">
            <table:table-cell table:style-name="Tabla4.A3" office:value-type="string">
              <text:p text:style-name="P2" loext:marker-style-name="T23"><text:span text:style-name="T11">Equipos</text:span><text:span text:style-name="T11"/></text:p>
            </table:table-cell>
            <table:table-cell table:style-name="Tabla4.B3" office:value-type="string">
              <text:p text:style-name="P2" loext:marker-style-name="T23"><text:span text:style-name="T6">6884.00</text:span><text:span text:style-name="T6"/></text:p>
            </table:table-cell>
            <table:table-cell table:style-name="Tabla4.C3" office:value-type="string">
              <text:p text:style-name="P1" loext:marker-style-name="T23"><text:span text:style-name="T13"/></text:p>
            </table:table-cell>
            <table:table-cell table:style-name="Tabla4.D3" office:value-type="string">
              <text:p text:style-name="P2" loext:marker-style-name="T23"><text:span text:style-name="T14"/></text:p>
            </table:table-cell>
            <table:table-cell table:style-name="Tabla4.E3" office:value-type="string">
              <text:p text:style-name="P2" loext:marker-style-name="T23"><text:span text:style-name="T14"/></text:p>
            </table:table-cell>
            <table:table-cell table:style-name="Tabla4.F3" office:value-type="string">
              <text:p text:style-name="P2" loext:marker-style-name="T23"><text:span text:style-name="T14"/></text:p>
            </table:table-cell>
            <table:table-cell table:style-name="Tabla4.G3" office:value-type="string">
              <text:p text:style-name="P2" loext:marker-style-name="T23"><text:span text:style-name="T14"/></text:p>
            </table:table-cell>
          </table:table-row>
          <table:table-row table:style-name="Tabla4.1">
            <table:table-cell table:style-name="Tabla4.A4" office:value-type="string">
              <text:p text:style-name="P2" loext:marker-style-name="T23"><text:span text:style-name="T12">Computadora portátil Laptop</text:span></text:p>
            </table:table-cell>
            <table:table-cell table:style-name="Tabla4.B4" office:value-type="string">
              <text:p text:style-name="P1" loext:marker-style-name="T23"><text:span text:style-name="T15">3798.00</text:span><text:span text:style-name="T15"/></text:p>
            </table:table-cell>
            <table:table-cell table:style-name="Tabla4.C4" office:value-type="string">
              <text:p text:style-name="P1" loext:marker-style-name="T23"><text:span text:style-name="T13">2</text:span><text:span text:style-name="T13"/></text:p>
            </table:table-cell>
            <table:table-cell table:style-name="Tabla4.D4" office:value-type="string">
              <text:p text:style-name="P2" loext:marker-style-name="T23"><text:span text:style-name="T14">50%</text:span><text:span text:style-name="T14"/></text:p>
            </table:table-cell>
            <table:table-cell table:style-name="Tabla4.E4" office:value-type="string">
              <text:p text:style-name="P2" loext:marker-style-name="T23"><text:span text:style-name="T14">1899.00</text:span><text:span text:style-name="T14"/></text:p>
            </table:table-cell>
            <table:table-cell table:style-name="Tabla4.F4" office:value-type="string">
              <text:p text:style-name="P2" loext:marker-style-name="T23"><text:span text:style-name="T14">1899.00</text:span><text:span text:style-name="T14"/></text:p>
            </table:table-cell>
            <table:table-cell table:style-name="Tabla4.G4" office:value-type="string">
              <text:p text:style-name="P2" loext:marker-style-name="T23"><text:span text:style-name="T14">1899.00</text:span><text:span text:style-name="T14"/></text:p>
            </table:table-cell>
          </table:table-row>
          <table:table-row table:style-name="Tabla4.3">
            <table:table-cell table:style-name="Tabla4.A5" office:value-type="string">
              <text:p text:style-name="P2" loext:marker-style-name="T23"><text:span text:style-name="T12">Impresora</text:span></text:p>
            </table:table-cell>
            <table:table-cell table:style-name="Tabla4.B5" office:value-type="string">
              <text:p text:style-name="P1" loext:marker-style-name="T23"><text:span text:style-name="T15">1559.00</text:span><text:span text:style-name="T15"/></text:p>
            </table:table-cell>
            <table:table-cell table:style-name="Tabla4.C5" office:value-type="string">
              <text:p text:style-name="P1" loext:marker-style-name="T23"><text:span text:style-name="T13">2</text:span><text:span text:style-name="T13"/></text:p>
            </table:table-cell>
            <table:table-cell table:style-name="Tabla4.D5" office:value-type="string">
              <text:p text:style-name="P2" loext:marker-style-name="T23"><text:span text:style-name="T14">50%</text:span><text:span text:style-name="T14"/></text:p>
            </table:table-cell>
            <table:table-cell table:style-name="Tabla4.E5" office:value-type="string">
              <text:p text:style-name="P2" loext:marker-style-name="T23"><text:span text:style-name="T14">779.50</text:span><text:span text:style-name="T14"/></text:p>
            </table:table-cell>
            <table:table-cell table:style-name="Tabla4.F5" office:value-type="string">
              <text:p text:style-name="P2" loext:marker-style-name="T23"><text:span text:style-name="T14">779.50</text:span><text:span text:style-name="T14"/></text:p>
            </table:table-cell>
            <table:table-cell table:style-name="Tabla4.G5" office:value-type="string">
              <text:p text:style-name="P2" loext:marker-style-name="T23"><text:span text:style-name="T14">779.50</text:span><text:span text:style-name="T14"/></text:p>
            </table:table-cell>
          </table:table-row>
          <table:table-row table:style-name="Tabla4.1">
            <table:table-cell table:style-name="Tabla4.A6" office:value-type="string">
              <text:p text:style-name="P2" loext:marker-style-name="T23"><text:span text:style-name="T12">Plancha Plana (Estampado)</text:span></text:p>
            </table:table-cell>
            <table:table-cell table:style-name="Tabla4.B6" office:value-type="string">
              <text:p text:style-name="P1" loext:marker-style-name="T23"><text:span text:style-name="T15">1500.00</text:span><text:span text:style-name="T15"/></text:p>
            </table:table-cell>
            <table:table-cell table:style-name="Tabla4.C6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6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6" office:value-type="string">
              <text:p text:style-name="P2" loext:marker-style-name="T23"><text:span text:style-name="T14">300.00</text:span><text:span text:style-name="T14"/></text:p>
            </table:table-cell>
            <table:table-cell table:style-name="Tabla4.F6" office:value-type="string">
              <text:p text:style-name="P2" loext:marker-style-name="T23"><text:span text:style-name="T14">1500.00</text:span><text:span text:style-name="T14"/></text:p>
            </table:table-cell>
            <table:table-cell table:style-name="Tabla4.G6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7">
            <table:table-cell table:style-name="Tabla4.A7" office:value-type="string">
              <text:p text:style-name="P2" loext:marker-style-name="T23"><text:span text:style-name="T12">Pistola Etiquetadora Textil</text:span></text:p>
            </table:table-cell>
            <table:table-cell table:style-name="Tabla4.B7" office:value-type="string">
              <text:p text:style-name="P1" loext:marker-style-name="T23"><text:span text:style-name="T15">27.00</text:span><text:span text:style-name="T15"/></text:p>
            </table:table-cell>
            <table:table-cell table:style-name="Tabla4.C7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7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7" office:value-type="string">
              <text:p text:style-name="P2" loext:marker-style-name="T23"><text:span text:style-name="T14">5.40</text:span><text:span text:style-name="T14"/></text:p>
            </table:table-cell>
            <table:table-cell table:style-name="Tabla4.F7" office:value-type="string">
              <text:p text:style-name="P2" loext:marker-style-name="T23"><text:span text:style-name="T14">27.00</text:span><text:span text:style-name="T14"/></text:p>
            </table:table-cell>
            <table:table-cell table:style-name="Tabla4.G7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3">
            <table:table-cell table:style-name="Tabla4.A8" office:value-type="string">
              <text:p text:style-name="P2" loext:marker-style-name="T16"><text:span text:style-name="T11">Muebles, Enseres</text:span></text:p>
            </table:table-cell>
            <table:table-cell table:style-name="Tabla4.A8" office:value-type="string">
              <text:p text:style-name="P2" loext:marker-style-name="T23"><text:span text:style-name="T7">554.00</text:span><text:span text:style-name="T7"/></text:p>
            </table:table-cell>
            <table:table-cell table:style-name="Tabla4.C8" office:value-type="string">
              <text:p text:style-name="P1" loext:marker-style-name="T23"><text:span text:style-name="T13"/></text:p>
            </table:table-cell>
            <table:table-cell table:style-name="Tabla4.D8" office:value-type="string">
              <text:p text:style-name="P2" loext:marker-style-name="T23"><text:span text:style-name="T14"/></text:p>
            </table:table-cell>
            <table:table-cell table:style-name="Tabla4.E8" office:value-type="string">
              <text:p text:style-name="P2" loext:marker-style-name="T23"><text:span text:style-name="T14"/></text:p>
            </table:table-cell>
            <table:table-cell table:style-name="Tabla4.F8" office:value-type="string">
              <text:p text:style-name="P2" loext:marker-style-name="T23"><text:span text:style-name="T14"/></text:p>
            </table:table-cell>
            <table:table-cell table:style-name="Tabla4.G8" office:value-type="string">
              <text:p text:style-name="P2" loext:marker-style-name="T23"><text:span text:style-name="T14"/></text:p>
            </table:table-cell>
          </table:table-row>
          <table:table-row table:style-name="Tabla4.1">
            <table:table-cell table:style-name="Tabla4.A9" office:value-type="string">
              <text:p text:style-name="P2" loext:marker-style-name="T23"><text:span text:style-name="T12">Escritorio para computador</text:span></text:p>
            </table:table-cell>
            <table:table-cell table:style-name="Tabla4.B9" office:value-type="string">
              <text:p text:style-name="P1" loext:marker-style-name="T23"><text:span text:style-name="T15">130.00</text:span><text:span text:style-name="T15"/></text:p>
            </table:table-cell>
            <table:table-cell table:style-name="Tabla4.C9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9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9" office:value-type="string">
              <text:p text:style-name="P2" loext:marker-style-name="T23"><text:span text:style-name="T14">26.00</text:span><text:span text:style-name="T14"/></text:p>
            </table:table-cell>
            <table:table-cell table:style-name="Tabla4.F9" office:value-type="string">
              <text:p text:style-name="P2" loext:marker-style-name="T23"><text:span text:style-name="T14">130.00</text:span><text:span text:style-name="T14"/></text:p>
            </table:table-cell>
            <table:table-cell table:style-name="Tabla4.G9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3">
            <table:table-cell table:style-name="Tabla4.A10" office:value-type="string">
              <text:p text:style-name="P2" loext:marker-style-name="T23"><text:span text:style-name="T12">Silla de escritorio</text:span></text:p>
            </table:table-cell>
            <table:table-cell table:style-name="Tabla4.B10" office:value-type="string">
              <text:p text:style-name="P1" loext:marker-style-name="T23"><text:span text:style-name="T15">50.00</text:span><text:span text:style-name="T15"/></text:p>
            </table:table-cell>
            <table:table-cell table:style-name="Tabla4.C10" office:value-type="string">
              <text:p text:style-name="P1" loext:marker-style-name="T23"><text:span text:style-name="T13">7</text:span><text:span text:style-name="T13"/></text:p>
            </table:table-cell>
            <table:table-cell table:style-name="Tabla4.D10" office:value-type="string">
              <text:p text:style-name="P2" loext:marker-style-name="T23"><text:span text:style-name="T14">14%</text:span><text:span text:style-name="T14"/></text:p>
            </table:table-cell>
            <table:table-cell table:style-name="Tabla4.E10" office:value-type="string">
              <text:p text:style-name="P2" loext:marker-style-name="T23"><text:span text:style-name="T14">7.14</text:span><text:span text:style-name="T14"/></text:p>
            </table:table-cell>
            <table:table-cell table:style-name="Tabla4.F10" office:value-type="string">
              <text:p text:style-name="P2" loext:marker-style-name="T23"><text:span text:style-name="T14">35.71</text:span><text:span text:style-name="T14"/></text:p>
            </table:table-cell>
            <table:table-cell table:style-name="Tabla4.G10" office:value-type="string">
              <text:p text:style-name="P2" loext:marker-style-name="T23"><text:span text:style-name="T14">14.29</text:span><text:span text:style-name="T14"/></text:p>
            </table:table-cell>
          </table:table-row>
          <table:table-row table:style-name="Tabla4.3">
            <table:table-cell table:style-name="Tabla4.A11" office:value-type="string">
              <text:p text:style-name="P2" loext:marker-style-name="T23"><text:span text:style-name="T12">Silla</text:span></text:p>
            </table:table-cell>
            <table:table-cell table:style-name="Tabla4.B11" office:value-type="string">
              <text:p text:style-name="P1" loext:marker-style-name="T23"><text:span text:style-name="T15">60.00</text:span><text:span text:style-name="T15"/></text:p>
            </table:table-cell>
            <table:table-cell table:style-name="Tabla4.C11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11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11" office:value-type="string">
              <text:p text:style-name="P2" loext:marker-style-name="T23"><text:span text:style-name="T14">12.00</text:span><text:span text:style-name="T14"/></text:p>
            </table:table-cell>
            <table:table-cell table:style-name="Tabla4.F11" office:value-type="string">
              <text:p text:style-name="P2" loext:marker-style-name="T23"><text:span text:style-name="T14">60.00</text:span><text:span text:style-name="T14"/></text:p>
            </table:table-cell>
            <table:table-cell table:style-name="Tabla4.G11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3">
            <table:table-cell table:style-name="Tabla4.A12" office:value-type="string">
              <text:p text:style-name="P2" loext:marker-style-name="T23"><text:span text:style-name="T12">Exibidor de polos</text:span></text:p>
            </table:table-cell>
            <table:table-cell table:style-name="Tabla4.B12" office:value-type="string">
              <text:p text:style-name="P1" loext:marker-style-name="T23"><text:span text:style-name="T15">220.00</text:span><text:span text:style-name="T15"/></text:p>
            </table:table-cell>
            <table:table-cell table:style-name="Tabla4.C12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12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12" office:value-type="string">
              <text:p text:style-name="P2" loext:marker-style-name="T23"><text:span text:style-name="T14">44.00</text:span><text:span text:style-name="T14"/></text:p>
            </table:table-cell>
            <table:table-cell table:style-name="Tabla4.F12" office:value-type="string">
              <text:p text:style-name="P2" loext:marker-style-name="T23"><text:span text:style-name="T14">220.00</text:span><text:span text:style-name="T14"/></text:p>
            </table:table-cell>
            <table:table-cell table:style-name="Tabla4.G12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3">
            <table:table-cell table:style-name="Tabla4.A13" office:value-type="string">
              <text:p text:style-name="P2" loext:marker-style-name="T23"><text:span text:style-name="T12">Espejo para vestidor</text:span></text:p>
            </table:table-cell>
            <table:table-cell table:style-name="Tabla4.B13" office:value-type="string">
              <text:p text:style-name="P1" loext:marker-style-name="T23"><text:span text:style-name="T15">15.00</text:span><text:span text:style-name="T15"/></text:p>
            </table:table-cell>
            <table:table-cell table:style-name="Tabla4.C13" office:value-type="string">
              <text:p text:style-name="P1" loext:marker-style-name="T23"><text:span text:style-name="T13">1</text:span><text:span text:style-name="T13"/></text:p>
            </table:table-cell>
            <table:table-cell table:style-name="Tabla4.D13" office:value-type="string">
              <text:p text:style-name="P2" loext:marker-style-name="T23"><text:span text:style-name="T14">100%</text:span><text:span text:style-name="T14"/></text:p>
            </table:table-cell>
            <table:table-cell table:style-name="Tabla4.E13" office:value-type="string">
              <text:p text:style-name="P2" loext:marker-style-name="T23"><text:span text:style-name="T14">15.00</text:span><text:span text:style-name="T14"/></text:p>
            </table:table-cell>
            <table:table-cell table:style-name="Tabla4.F13" office:value-type="string">
              <text:p text:style-name="P2" loext:marker-style-name="T23"><text:span text:style-name="T14">15.00</text:span><text:span text:style-name="T14"/></text:p>
            </table:table-cell>
            <table:table-cell table:style-name="Tabla4.G13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1">
            <table:table-cell table:style-name="Tabla4.A14" office:value-type="string">
              <text:p text:style-name="P2" loext:marker-style-name="T23"><text:span text:style-name="T12">Provador vestidor de metal</text:span></text:p>
            </table:table-cell>
            <table:table-cell table:style-name="Tabla4.B14" office:value-type="string">
              <text:p text:style-name="P1" loext:marker-style-name="T23"><text:span text:style-name="T15">49.00</text:span><text:span text:style-name="T15"/></text:p>
            </table:table-cell>
            <table:table-cell table:style-name="Tabla4.C14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14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14" office:value-type="string">
              <text:p text:style-name="P2" loext:marker-style-name="T23"><text:span text:style-name="T14">9.80</text:span><text:span text:style-name="T14"/></text:p>
            </table:table-cell>
            <table:table-cell table:style-name="Tabla4.F14" office:value-type="string">
              <text:p text:style-name="P2" loext:marker-style-name="T23"><text:span text:style-name="T14">49.00</text:span><text:span text:style-name="T14"/></text:p>
            </table:table-cell>
            <table:table-cell table:style-name="Tabla4.G14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1">
            <table:table-cell table:style-name="Tabla4.A15" office:value-type="string">
              <text:p text:style-name="P2" loext:marker-style-name="T23"><text:span text:style-name="T12">Cortina de vestidor de polos</text:span></text:p>
            </table:table-cell>
            <table:table-cell table:style-name="Tabla4.B15" office:value-type="string">
              <text:p text:style-name="P1" loext:marker-style-name="T23"><text:span text:style-name="T15">30.00</text:span><text:span text:style-name="T15"/></text:p>
            </table:table-cell>
            <table:table-cell table:style-name="Tabla4.C15" office:value-type="string">
              <text:p text:style-name="P1" loext:marker-style-name="T23"><text:span text:style-name="T13">5</text:span><text:span text:style-name="T13"/></text:p>
            </table:table-cell>
            <table:table-cell table:style-name="Tabla4.D15" office:value-type="string">
              <text:p text:style-name="P2" loext:marker-style-name="T23"><text:span text:style-name="T14">20%</text:span><text:span text:style-name="T14"/></text:p>
            </table:table-cell>
            <table:table-cell table:style-name="Tabla4.E15" office:value-type="string">
              <text:p text:style-name="P2" loext:marker-style-name="T23"><text:span text:style-name="T14">6.00</text:span><text:span text:style-name="T14"/></text:p>
            </table:table-cell>
            <table:table-cell table:style-name="Tabla4.F15" office:value-type="string">
              <text:p text:style-name="P2" loext:marker-style-name="T23"><text:span text:style-name="T14">30.00</text:span><text:span text:style-name="T14"/></text:p>
            </table:table-cell>
            <table:table-cell table:style-name="Tabla4.G15" office:value-type="string">
              <text:p text:style-name="P2" loext:marker-style-name="T23"><text:span text:style-name="T14">0.00</text:span><text:span text:style-name="T14"/></text:p>
            </table:table-cell>
          </table:table-row>
          <table:table-row table:style-name="Tabla4.3">
            <table:table-cell table:style-name="Tabla4.A16" office:value-type="string">
              <text:p text:style-name="P2" loext:marker-style-name="T23"><text:span text:style-name="T11">Vehículos</text:span><text:span text:style-name="T11"/></text:p>
            </table:table-cell>
            <table:table-cell table:style-name="Tabla4.B16" office:value-type="string">
              <text:p text:style-name="P2" loext:marker-style-name="T23"><text:span text:style-name="T7">3400.00</text:span><text:span text:style-name="T7"/></text:p>
            </table:table-cell>
            <table:table-cell table:style-name="Tabla4.C16" office:value-type="string">
              <text:p text:style-name="P1" loext:marker-style-name="T23"><text:span text:style-name="T13"/></text:p>
            </table:table-cell>
            <table:table-cell table:style-name="Tabla4.D16" office:value-type="string">
              <text:p text:style-name="P2" loext:marker-style-name="T23"><text:span text:style-name="T14"/></text:p>
            </table:table-cell>
            <table:table-cell table:style-name="Tabla4.E16" office:value-type="string">
              <text:p text:style-name="P2" loext:marker-style-name="T23"><text:span text:style-name="T14"/></text:p>
            </table:table-cell>
            <table:table-cell table:style-name="Tabla4.F16" office:value-type="string">
              <text:p text:style-name="P2" loext:marker-style-name="T23"><text:span text:style-name="T14"/></text:p>
            </table:table-cell>
            <table:table-cell table:style-name="Tabla4.G16" office:value-type="string">
              <text:p text:style-name="P2" loext:marker-style-name="T23"><text:span text:style-name="T14"/></text:p>
            </table:table-cell>
          </table:table-row>
          <table:table-row table:style-name="Tabla4.1">
            <table:table-cell table:style-name="Tabla4.A17" office:value-type="string">
              <text:p text:style-name="P2" loext:marker-style-name="T23"><text:span text:style-name="T12">Moto lineal(eléctrica)</text:span></text:p>
            </table:table-cell>
            <table:table-cell table:style-name="Tabla4.B17" office:value-type="string">
              <text:p text:style-name="P1" loext:marker-style-name="T23"><text:span text:style-name="T15">3400.00</text:span><text:span text:style-name="T15"/></text:p>
            </table:table-cell>
            <table:table-cell table:style-name="Tabla4.C17" office:value-type="string">
              <text:p text:style-name="P1" loext:marker-style-name="T23"><text:span text:style-name="T13">3</text:span><text:span text:style-name="T13"/></text:p>
            </table:table-cell>
            <table:table-cell table:style-name="Tabla4.D17" office:value-type="string">
              <text:p text:style-name="P2" loext:marker-style-name="T23"><text:span text:style-name="T14">33%</text:span><text:span text:style-name="T14"/></text:p>
            </table:table-cell>
            <table:table-cell table:style-name="Tabla4.E17" office:value-type="string">
              <text:p text:style-name="P2" loext:marker-style-name="T23"><text:span text:style-name="T14">1133.33</text:span><text:span text:style-name="T14"/></text:p>
            </table:table-cell>
            <table:table-cell table:style-name="Tabla4.F17" office:value-type="string">
              <text:p text:style-name="P2" loext:marker-style-name="T23"><text:span text:style-name="T14">2266.67</text:span><text:span text:style-name="T14"/></text:p>
            </table:table-cell>
            <table:table-cell table:style-name="Tabla4.G17" office:value-type="string">
              <text:p text:style-name="P2" loext:marker-style-name="T23"><text:span text:style-name="T14">1133.33</text:span><text:span text:style-name="T14"/></text:p>
            </table:table-cell>
          </table:table-row>
          <table:table-row table:style-name="Tabla4.18">
            <table:table-cell table:style-name="Tabla4.A18" office:value-type="string">
              <text:p text:style-name="P2" loext:marker-style-name="T23"><text:span text:style-name="T10">TOTAL</text:span><text:span text:style-name="T10"/></text:p>
            </table:table-cell>
            <table:table-cell table:style-name="Tabla4.A18" office:value-type="string">
              <text:p text:style-name="P1" loext:marker-style-name="T23"><text:span text:style-name="T6">10838.00</text:span><text:span text:style-name="T6"/></text:p>
            </table:table-cell>
            <table:table-cell table:style-name="Tabla4.A18" office:value-type="string">
              <text:p text:style-name="P1" loext:marker-style-name="T23"><text:span text:style-name="T13"/></text:p>
            </table:table-cell>
            <table:table-cell table:style-name="Tabla4.D18" office:value-type="string">
              <text:p text:style-name="P2" loext:marker-style-name="T23"><text:span text:style-name="T14"/></text:p>
            </table:table-cell>
            <table:table-cell table:style-name="Tabla4.D18" office:value-type="string">
              <text:p text:style-name="P2" loext:marker-style-name="T23"><text:span text:style-name="T14">4237.18</text:span><text:span text:style-name="T14"/></text:p>
            </table:table-cell>
            <table:table-cell table:style-name="Tabla4.D18" office:value-type="string">
              <text:p text:style-name="P2" loext:marker-style-name="T23"><text:span text:style-name="T7"/></text:p>
            </table:table-cell>
            <table:table-cell table:style-name="Tabla4.D18" office:value-type="string">
              <text:p text:style-name="P2" loext:marker-style-name="T23"><text:span text:style-name="T7">3826.12</text:span><text:span text:style-name="T7"/></text:p>
            </table:table-cell>
          </table:table-row>
        </table:table>
      </text:section>
      <text:section text:style-name="Sect1" text:name="Sección1">
        <text:p text:style-name="P10" loext:marker-style-name="T17"><text:span text:style-name="T18">4. Finalmente estime el capital de trabajo de forma mensual y acumulado para el primer año. Luego incluya el monto en el cuadro de presupuesto de inversiones.</text:span><text:span text:style-name="T18"/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B"/>
          <table:table-column table:style-name="Tabla5.E"/>
          <table:table-column table:style-name="Tabla5.F"/>
          <table:table-column table:style-name="Tabla5.C"/>
          <table:table-column table:style-name="Tabla5.E"/>
          <table:table-column table:style-name="Tabla5.B"/>
          <table:table-column table:style-name="Tabla5.C"/>
          <table:table-column table:style-name="Tabla5.B"/>
          <table:table-column table:style-name="Tabla5.L"/>
          <table:table-column table:style-name="Tabla5.C"/>
          <table:table-column table:style-name="Tabla5.B"/>
          <table:table-column table:style-name="Tabla5.O"/>
          <table:table-row table:style-name="Tabla5.1">
            <table:table-cell table:style-name="Tabla5.A1" table:number-columns-spanned="15" office:value-type="string">
              <text:p text:style-name="P7" loext:marker-style-name="T17"><text:span text:style-name="T27">CUADRO N° 05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">
            <table:table-cell table:style-name="Tabla5.A1" table:number-columns-spanned="15" office:value-type="string">
              <text:p text:style-name="P7" loext:marker-style-name="T17"><text:span text:style-name="T27">VARIACIÓN DE CAPITAL DE TRABAJO AÑO 1: CV + CF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3">
            <table:table-cell table:style-name="Tabla5.A3" office:value-type="string">
              <text:p text:style-name="P16" loext:marker-style-name="T27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  <table:table-cell table:style-name="Tabla5.A3" office:value-type="string">
              <text:p text:style-name="P19" loext:marker-style-name="T18"/>
            </table:table-cell>
          </table:table-row>
          <table:table-row table:style-name="Tabla5.1">
            <table:table-cell table:style-name="Tabla5.A4" table:number-rows-spanned="2" office:value-type="string">
              <text:p text:style-name="P7" loext:marker-style-name="T17"><text:span text:style-name="T27">RUBRO</text:span><text:span text:style-name="T27"/></text:p>
            </table:table-cell>
            <table:table-cell table:style-name="Tabla5.B4" table:number-columns-spanned="12" office:value-type="string">
              <text:p text:style-name="P7" loext:marker-style-name="T17"><text:span text:style-name="T27">MES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B4" office:value-type="string">
              <text:p text:style-name="P9" loext:marker-style-name="T17"><text:span text:style-name="T27"/></text:p>
            </table:table-cell>
            <table:table-cell table:style-name="Tabla5.A4" table:number-rows-spanned="2" office:value-type="string">
              <text:p text:style-name="P7" loext:marker-style-name="T17"><text:span text:style-name="T27">TOTAL</text:span><text:span text:style-name="T27"/></text:p>
            </table:table-cell>
          </table:table-row>
          <table:table-row table:style-name="Tabla5.1">
            <table:covered-table-cell table:style-name="Tabla5.A5"/>
            <table:table-cell table:style-name="Tabla5.B5" office:value-type="string">
              <text:p text:style-name="P12" loext:marker-style-name="T17"><text:span text:style-name="T27">0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1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2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3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4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5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6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7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8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9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10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11</text:span><text:span text:style-name="T27"/></text:p>
            </table:table-cell>
            <table:table-cell table:style-name="Tabla5.B5" office:value-type="string">
              <text:p text:style-name="P12" loext:marker-style-name="T17"><text:span text:style-name="T27">12</text:span><text:span text:style-name="T27"/></text:p>
            </table:table-cell>
            <table:covered-table-cell table:style-name="Tabla5.O5"/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Unidades</text:span><text:span text:style-name="T27"/></text:p>
            </table:table-cell>
            <table:table-cell table:style-name="Tabla5.A3" office:value-type="string">
              <text:p text:style-name="P15" loext:marker-style-name="T27"/>
            </table:table-cell>
            <table:table-cell table:style-name="Tabla5.A3" office:value-type="string">
              <text:p text:style-name="P12" loext:marker-style-name="T17"><text:span text:style-name="T28">300</text:span><text:span text:style-name="T28"/></text:p>
            </table:table-cell>
            <table:table-cell table:style-name="Tabla5.D6" office:value-type="string">
              <text:p text:style-name="P12" loext:marker-style-name="T17"><text:span text:style-name="T28">33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39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41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5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443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6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41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1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44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8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37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4368</text:span><text:span text:style-name="T28"/></text:p>
            </table:table-cell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CV Unitario</text:span><text:span text:style-name="T27"/></text:p>
            </table:table-cell>
            <table:table-cell table:style-name="Tabla5.B7" office:value-type="string">
              <text:p text:style-name="P9" loext:marker-style-name="T17"><text:span text:style-name="T28"/></text:p>
            </table:table-cell>
            <table:table-cell table:style-name="Tabla5.B7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CV Total</text:span><text:span text:style-name="T27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A3" office:value-type="string">
              <text:p text:style-name="P12" loext:marker-style-name="T17"><text:span text:style-name="T28">7345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178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300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349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668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10847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912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10137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7688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10871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9402</text:span><text:span text:style-name="T28"/></text:p>
            </table:table-cell>
            <table:table-cell table:style-name="Tabla5.A3" office:value-type="string">
              <text:p text:style-name="P12" loext:marker-style-name="T17"><text:span text:style-name="T28">8251</text:span><text:span text:style-name="T28"/></text:p>
            </table:table-cell>
            <table:table-cell table:style-name="Tabla5.D6" office:value-type="string">
              <text:p text:style-name="P9" loext:marker-style-name="T17"><text:span text:style-name="T28"/></text:p>
            </table:table-cell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CF Total</text:span><text:span text:style-name="T27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B7" office:value-type="string">
              <text:p text:style-name="P12" loext:marker-style-name="T17"><text:span text:style-name="T28">4457</text:span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Capital de Trabajo</text:span><text:span text:style-name="T27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12" loext:marker-style-name="T17"><text:span text:style-name="T28">11802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635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757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806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31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5303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3369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4593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145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5328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3859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708</text:span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</table:table-row>
          <table:table-row table:style-name="Tabla5.1">
            <table:table-cell table:style-name="Tabla5.A6" office:value-type="string">
              <text:p text:style-name="P9" loext:marker-style-name="T17"><text:span text:style-name="T27">Variación KW</text:span><text:span text:style-name="T27"/></text:p>
            </table:table-cell>
            <table:table-cell table:style-name="Tabla5.E6" office:value-type="string">
              <text:p text:style-name="P12" loext:marker-style-name="T17"><text:span text:style-name="T28">11802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1802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832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2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49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18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2179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-193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1224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-2448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3183</text:span><text:span text:style-name="T28"/></text:p>
            </table:table-cell>
            <table:table-cell table:style-name="Tabla5.E6" office:value-type="string">
              <text:p text:style-name="P12" loext:marker-style-name="T17"><text:span text:style-name="T28">-1469</text:span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12" loext:marker-style-name="T17"><text:span text:style-name="T27">25661</text:span><text:span text:style-name="T27"/></text:p>
            </table:table-cell>
          </table:table-row>
          <table:table-row table:style-name="Tabla5.1">
            <table:table-cell table:style-name="Tabla5.A6" office:value-type="string">
              <text:p text:style-name="P7" loext:marker-style-name="T17"><text:span text:style-name="T27">TOTAL</text:span><text:span text:style-name="T27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  <table:table-cell table:style-name="Tabla5.E6" office:value-type="string">
              <text:p text:style-name="P9" loext:marker-style-name="T17"><text:span text:style-name="T28"/></text:p>
            </table:table-cell>
          </table:table-row>
        </table:table>
        <text:p text:style-name="P18" loext:marker-style-name="T22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B"/>
          <table:table-column table:style-name="Tabla6.D"/>
          <table:table-column table:style-name="Tabla6.B"/>
          <table:table-column table:style-name="Tabla6.H"/>
          <table:table-column table:style-name="Tabla6.I"/>
          <table:table-column table:style-name="Tabla6.J"/>
          <table:table-column table:style-name="Tabla6.K"/>
          <table:table-column table:style-name="Tabla6.L"/>
          <table:table-column table:style-name="Tabla6.I"/>
          <table:table-column table:style-name="Tabla6.D"/>
          <table:table-column table:style-name="Tabla6.O"/>
          <table:table-row table:style-name="Tabla6.1">
            <table:table-cell table:style-name="Tabla6.A1" table:number-columns-spanned="15" office:value-type="string">
              <text:p text:style-name="P7" loext:marker-style-name="T17"><text:span text:style-name="T27">VARIACION DE CAPITAL DE TRABAJO AÑO 1: SOLO CV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2">
            <table:table-cell table:style-name="Tabla6.A1" office:value-type="string">
              <text:p text:style-name="P16" loext:marker-style-name="T27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  <table:table-cell table:style-name="Tabla6.A1" office:value-type="string">
              <text:p text:style-name="P19" loext:marker-style-name="T18"/>
            </table:table-cell>
          </table:table-row>
          <table:table-row table:style-name="Tabla6.1">
            <table:table-cell table:style-name="Tabla6.A3" table:number-rows-spanned="2" office:value-type="string">
              <text:p text:style-name="P7" loext:marker-style-name="T17"><text:span text:style-name="T27">RUBRO</text:span><text:span text:style-name="T27"/></text:p>
            </table:table-cell>
            <table:table-cell table:style-name="Tabla6.B3" table:number-columns-spanned="12" office:value-type="string">
              <text:p text:style-name="P7" loext:marker-style-name="T17"><text:span text:style-name="T27">MES</text:span><text:span text:style-name="T2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B3" office:value-type="string">
              <text:p text:style-name="P9" loext:marker-style-name="T17"><text:span text:style-name="T27"/></text:p>
            </table:table-cell>
            <table:table-cell table:style-name="Tabla6.A3" table:number-rows-spanned="2" office:value-type="string">
              <text:p text:style-name="P7" loext:marker-style-name="T17"><text:span text:style-name="T27">TOTAL</text:span><text:span text:style-name="T27"/></text:p>
            </table:table-cell>
          </table:table-row>
          <table:table-row table:style-name="Tabla6.1">
            <table:covered-table-cell table:style-name="Tabla6.A4"/>
            <table:table-cell table:style-name="Tabla6.B4" office:value-type="string">
              <text:p text:style-name="P12" loext:marker-style-name="T17"><text:span text:style-name="T27">0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1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2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3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4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5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6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7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8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9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10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11</text:span><text:span text:style-name="T27"/></text:p>
            </table:table-cell>
            <table:table-cell table:style-name="Tabla6.B4" office:value-type="string">
              <text:p text:style-name="P12" loext:marker-style-name="T17"><text:span text:style-name="T27">12</text:span><text:span text:style-name="T27"/></text:p>
            </table:table-cell>
            <table:covered-table-cell table:style-name="Tabla6.O4"/>
          </table:table-row>
          <table:table-row table:style-name="Tabla6.1">
            <table:table-cell table:style-name="Tabla6.A5" office:value-type="string">
              <text:p text:style-name="P9" loext:marker-style-name="T17"><text:span text:style-name="T27">Unidades</text:span><text:span text:style-name="T27"/></text:p>
            </table:table-cell>
            <table:table-cell table:style-name="Tabla6.A1" office:value-type="string">
              <text:p text:style-name="P15" loext:marker-style-name="T27"/>
            </table:table-cell>
            <table:table-cell table:style-name="Tabla6.A1" office:value-type="string">
              <text:p text:style-name="P12" loext:marker-style-name="T17"><text:span text:style-name="T28">300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3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39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41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5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443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6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41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1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44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84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337</text:span><text:span text:style-name="T28"/></text:p>
            </table:table-cell>
            <table:table-cell table:style-name="Tabla6.O5" office:value-type="string">
              <text:p text:style-name="P12" loext:marker-style-name="T17"><text:span text:style-name="T28">4368</text:span><text:span text:style-name="T28"/></text:p>
            </table:table-cell>
          </table:table-row>
          <table:table-row table:style-name="Tabla6.1">
            <table:table-cell table:style-name="Tabla6.A5" office:value-type="string">
              <text:p text:style-name="P9" loext:marker-style-name="T17"><text:span text:style-name="T27">CV Unitario</text:span><text:span text:style-name="T27"/></text:p>
            </table:table-cell>
            <table:table-cell table:style-name="Tabla6.B6" office:value-type="string">
              <text:p text:style-name="P9" loext:marker-style-name="T17"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24</text:span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</table:table-row>
          <table:table-row table:style-name="Tabla6.1">
            <table:table-cell table:style-name="Tabla6.A5" office:value-type="string">
              <text:p text:style-name="P9" loext:marker-style-name="T17"><text:span text:style-name="T27">CV Total</text:span><text:span text:style-name="T27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A1" office:value-type="string">
              <text:p text:style-name="P12" loext:marker-style-name="T17"><text:span text:style-name="T28">7345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178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300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349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668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10847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912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10137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7688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10871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9402</text:span><text:span text:style-name="T28"/></text:p>
            </table:table-cell>
            <table:table-cell table:style-name="Tabla6.A1" office:value-type="string">
              <text:p text:style-name="P12" loext:marker-style-name="T17"><text:span text:style-name="T28">8251</text:span><text:span text:style-name="T28"/></text:p>
            </table:table-cell>
            <table:table-cell table:style-name="Tabla6.O5" office:value-type="string">
              <text:p text:style-name="P9" loext:marker-style-name="T17"><text:span text:style-name="T28"/></text:p>
            </table:table-cell>
          </table:table-row>
          <table:table-row table:style-name="Tabla6.1">
            <table:table-cell table:style-name="Tabla6.A5" office:value-type="string">
              <text:p text:style-name="P9" loext:marker-style-name="T17"><text:span text:style-name="T27">Capital de Trabajo</text:span><text:span text:style-name="T27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B6" office:value-type="string">
              <text:p text:style-name="P12" loext:marker-style-name="T17"><text:span text:style-name="T28">7345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178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300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349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668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10847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912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10137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7688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10871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9402</text:span><text:span text:style-name="T28"/></text:p>
            </table:table-cell>
            <table:table-cell table:style-name="Tabla6.B6" office:value-type="string">
              <text:p text:style-name="P12" loext:marker-style-name="T17"><text:span text:style-name="T28">8251</text:span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</table:table-row>
          <table:table-row table:style-name="Tabla6.1">
            <table:table-cell table:style-name="Tabla6.A5" office:value-type="string">
              <text:p text:style-name="P9" loext:marker-style-name="T17"><text:span text:style-name="T27">Variación KW</text:span><text:span text:style-name="T27"/></text:p>
            </table:table-cell>
            <table:table-cell table:style-name="Tabla6.O6" office:value-type="string">
              <text:p text:style-name="P12" loext:marker-style-name="T17"><text:span text:style-name="T28">7345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7345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832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122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49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318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2179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-1934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1224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-2448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3183</text:span><text:span text:style-name="T28"/></text:p>
            </table:table-cell>
            <table:table-cell table:style-name="Tabla6.O6" office:value-type="string">
              <text:p text:style-name="P12" loext:marker-style-name="T17"><text:span text:style-name="T28">-1469</text:span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12" loext:marker-style-name="T17"><text:span text:style-name="T27">16748</text:span><text:span text:style-name="T27"/></text:p>
            </table:table-cell>
          </table:table-row>
          <table:table-row table:style-name="Tabla6.1">
            <table:table-cell table:style-name="Tabla6.A5" office:value-type="string">
              <text:p text:style-name="P7" loext:marker-style-name="T17"><text:span text:style-name="T27">TOTAL</text:span><text:span text:style-name="T27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  <table:table-cell table:style-name="Tabla6.O6" office:value-type="string">
              <text:p text:style-name="P9" loext:marker-style-name="T17"><text:span text:style-name="T28"/></text:p>
            </table:table-cell>
          </table:table-row>
        </table:table>
      </text:section>
      <text:section text:style-name="Sect1" text:name="Sección2">
        <text:p text:style-name="P11" loext:marker-style-name="T17"><text:span text:style-name="T20">Evaluación</text:span><text:span text:style-name="T20"/></text:p>
        <text:p text:style-name="P9" loext:marker-style-name="T17"><text:span text:style-name="T18">Esta actividad es evaluada como participación en clases</text:span><text:span text:style-name="T18"/></text:p>
        <text:p text:style-name="P9" loext:marker-style-name="T17"><text:span text:style-name="T20">NOTA:</text:span><text:span text:style-name="T18"> También les servirá para incluir en el ítem correspondiente del trabajo colaborativo</text:span></text:p>
      </text:section>
      <text:section text:style-name="Sect1" text:name="Sección3">
        <text:p text:style-name="P21" loext:marker-style-name="T1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line-height="200%" fo:text-align="center" style:justify-single-word="false" fo:keep-together="always" fo:keep-with-next="always"/>
      <style:text-properties style:font-name="Times New Roman" fo:font-family="'Times New Roman'" style:font-family-generic="roman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top="0cm" fo:margin-bottom="0cm" style:contextual-spacing="false" fo:line-height="100%" fo:keep-together="always" fo:keep-with-next="always"/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class="text">
      <style:paragraph-properties fo:margin-top="0cm" fo:margin-bottom="0cm" style:contextual-spacing="false" fo:line-height="100%" fo:keep-together="always" fo:keep-with-next="always"/>
      <style:text-properties style:font-name="Times New Roman" fo:font-family="'Times New Roman'" style:font-family-generic="roman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auto-update="true" style:default-outline-level="4" style:class="text">
      <style:paragraph-properties fo:margin-top="0cm" fo:margin-bottom="0cm" style:contextual-spacing="false" fo:line-height="100%" fo:keep-together="always" fo:keep-with-next="always"/>
      <style:text-properties style:font-name="Times New Roman" fo:font-family="'Times New Roman'" style:font-family-generic="roman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size-complex="10pt" style:font-style-complex="italic"/>
    </style:style>
    <style:style style:name="Heading_20_5" style:display-name="Heading 5" style:family="paragraph" style:parent-style-name="Standard" style:next-style-name="Standard" loext:linked-style-name="Heading_20_5_20_Char" style:auto-update="true" style:default-outline-level="5" style:class="text">
      <style:paragraph-properties fo:margin-left="0cm" fo:margin-top="0cm" fo:margin-bottom="0cm" style:contextual-spacing="false" fo:line-height="100%" fo:keep-together="always" fo:text-indent="1.27cm" style:auto-text-indent="false" fo:keep-with-next="always"/>
      <style:text-properties style:font-name="Times New Roman" fo:font-family="'Times New Roman'" style:font-family-generic="roman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ize-complex="10pt"/>
    </style:style>
    <style:style style:name="APA_20_Párrafo" style:display-name="APA Párrafo" style:family="paragraph" style:parent-style-name="Standard" loext:linked-style-name="APA_20_Párrafo_20_Car">
      <style:paragraph-properties fo:margin-top="0cm" fo:margin-bottom="0cm" style:contextual-spacing="false" fo:line-height="200%" fo:text-indent="1.27cm" style:auto-text-indent="false"/>
      <style:text-properties style:font-name="Times New Roman" fo:font-family="'Times New Roman'" style:font-family-generic="roman" fo:font-size="12pt" fo:language="es" fo:country="MX" fo:background-color="#ffffff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" style:display-name="NOTAS APA Séptima Edición" style:family="paragraph" style:parent-style-name="Standard" loext:linked-style-name="NOTAS_20_APA_20_Séptima_20_Edición_20_Car" style:auto-update="true">
      <style:paragraph-properties fo:margin-left="1.27cm" fo:margin-top="0cm" fo:margin-bottom="0cm" style:contextual-spacing="false" fo:line-height="100%"/>
      <style:text-properties style:font-name="Times New Roman" fo:font-family="'Times New Roman'" style:font-family-generic="roman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Tablas_20_y_20_Figuras" style:display-name="TÍTULO Tablas y Figuras" style:family="paragraph" style:parent-style-name="caption1" loext:linked-style-name="TÍTULO_20_Tablas_20_y_20_Figuras_20_Car" style:auto-update="true">
      <style:paragraph-properties fo:margin-left="1.27cm" fo:margin-top="0cm" fo:margin-bottom="0cm" style:contextual-spacing="false" fo:line-height="200%"/>
      <style:text-properties style:use-window-font-color="true" loext:opacity="0%" fo:font-size="12pt" style:font-size-asian="12pt" style:font-style-complex="normal"/>
    </style:style>
    <style:style style:name="caption1" style:family="paragraph" style:parent-style-name="Standard" style:next-style-name="Standard">
      <style:paragraph-properties fo:line-height="100%"/>
      <style:text-properties fo:color="#44546a" loext:opacity="100%" style:font-name="Times New Roman" fo:font-family="'Times New Roman'" style:font-family-generic="roman" fo:font-size="9pt" fo:language="es" fo:country="ES" fo:font-style="italic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fo:language="es" fo:country="MX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AS_20_APA_20_Séptima_20_Edición_20_Car" style:display-name="NOTAS APA Séptima Edición Car" style:family="text" style:parent-style-name="Default_20_Paragraph_20_Font" loext:linked-style-name="NOTAS_20_APA_20_Séptima_20_Edición">
      <style:text-properties style:font-name="Times New Roman" fo:font-family="'Times New Roman'" style:font-family-generic="roman" fo:font-size="10pt" fo:language="es" fo:country="ES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Tablas_20_y_20_Figuras_20_Car" style:display-name="TÍTULO Tablas y Figuras Car" style:family="text" style:parent-style-name="Default_20_Paragraph_20_Font" loext:linked-style-name="TÍTULO_20_Tablas_20_y_20_Figuras">
      <style:text-properties style:font-name="Times New Roman" fo:font-family="'Times New Roman'" style:font-family-generic="roman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fo:font-size="14pt" fo:language="es" fo:country="PE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fo:font-size="12pt" fo:language="es" fo:country="PE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fo:font-size="12pt" fo:language="es" fo:country="ES" fo:font-weight="bold" style:font-size-asian="12pt" style:language-asian="es" style:country-asian="ES" style:font-weight-asian="bold" style:font-name-complex="F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ize-complex="10pt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>
        <loext:char-complex-color loext:theme-type="light1" loext:color-type="theme"/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89cm" fo:margin-bottom="2.489cm" fo:margin-left="2.997cm" fo:margin-right="2.997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997cm" fo:margin-bottom="2.997cm" fo:margin-left="2.489cm" fo:margin-right="2.489cm" style:writing-mode="lr-tb" style:layout-grid-color="#c0c0c0" style:layout-grid-lines="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1" draw:style-name="Mdp1"/>
    <style:master-page style:name="Converted3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00:20:00</meta:creation-date>
    <meta:initial-creator>EDISON ACHALMA</meta:initial-creator>
    <dc:language>es-PE</dc:language>
    <dc:creator>Elmer Edison Achalma Mendoza</dc:creator>
    <dc:date>2023-12-31T17:37:35</dc:date>
    <meta:editing-cycles>24</meta:editing-cycles>
    <meta:editing-duration>PT1M</meta:editing-duration>
    <meta:generator>LibreOffice/24.2.4.2$Linux_X86_64 LibreOffice_project/420$Build-2</meta:generator>
    <meta:document-statistic meta:table-count="6" meta:image-count="1" meta:object-count="0" meta:page-count="9" meta:paragraph-count="624" meta:word-count="1017" meta:character-count="5074" meta:non-whitespace-character-count="4673"/>
    <meta:user-defined meta:name="AppVersion">15.0000</meta:user-defined>
    <meta:template xlink:type="simple" xlink:actuate="onRequest" xlink:title="Normal.dotm" xlink:href=""/>
  </office:meta>
</office:document-meta>
</file>