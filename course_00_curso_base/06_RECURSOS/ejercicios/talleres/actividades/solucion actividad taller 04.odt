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tang" svg:font-family="Batang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line-height="200%" style:punctuation-wrap="simple" style:vertical-align="baseline"/>
    </style:style>
    <style:style style:name="P2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200%"/>
    </style:style>
    <style:style style:name="P4" style:family="paragraph" style:parent-style-name="Standard">
      <style:paragraph-properties fo:margin-top="0cm" fo:margin-bottom="0cm" style:contextual-spacing="false" fo:line-height="200%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line-height="200%" fo:text-align="start" style:justify-single-word="false"/>
    </style:style>
    <style:style style:name="T1" style:family="text">
      <style:text-properties style:font-name="Times New Roman" fo:font-size="12pt" fo:font-weight="bold" style:font-name-asian="Batang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font-size-asian="12pt" style:language-asian="es" style:country-asian="PE" style:font-name-complex="Times New Roman1" style:font-size-complex="12pt" style:font-weight-complex="bold"/>
    </style:style>
    <style:style style:name="T4" style:family="text">
      <style:text-properties style:font-name="Times New Roman" fo:font-size="12pt" style:font-name-asian="Batang" style:font-size-asian="12pt" style:font-name-complex="Times New Roman1" style:font-size-complex="12pt" style:font-weight-complex="bold"/>
    </style:style>
    <style:style style:name="T5" style:family="text">
      <style:text-properties style:font-name="Times New Roman" fo:font-size="12pt" fo:language="en" fo:country="US" style:font-name-asian="Symbol" style:font-size-asian="12pt" style:language-asian="es" style:country-asian="PE" style:font-name-complex="Symbol" style:font-size-complex="12pt" style:font-weight-complex="bold"/>
    </style:style>
    <style:style style:name="T6" style:family="text">
      <style:text-properties style:text-position="sub 58%" style:font-name="Times New Roman" fo:font-size="12pt" style:font-size-asian="12pt" style:language-asian="es" style:country-asian="PE" style:font-name-complex="Times New Roman1" style:font-size-complex="12pt" style:font-weight-complex="bold"/>
    </style:style>
    <style:style style:name="T7" style:family="text">
      <style:text-properties style:language-asian="es" style:country-asian="PE" style:font-name-complex="Times New Roman1" style:font-weight-complex="bold"/>
    </style:style>
    <style:style style:name="T8" style:family="text">
      <style:text-properties fo:color="#000000" loext:opacity="100%" style:font-name="Times New Roman" fo:font-size="12pt" style:letter-kerning="true" style:font-name-asian="F" style:font-size-asian="12pt" style:font-size-complex="12pt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" fo:font-size="12pt" fo:language="en" fo:country="US" style:letter-kerning="true" style:font-name-asian="Symbol" style:font-size-asian="12pt" style:font-name-complex="Symbol" style:font-size-complex="12pt">
        <loext:char-complex-color loext:theme-type="dark1" loext:color-type="theme"/>
      </style:text-properties>
    </style:style>
    <style:style style:name="T10" style:family="text">
      <style:text-properties fo:color="#000000" loext:opacity="100%" style:text-position="-38% 100%" style:font-name="Times New Roman" fo:font-size="12pt" style:letter-kerning="true" style:font-name-asian="F" style:font-size-asian="12pt" style:font-size-complex="12pt">
        <loext:char-complex-color loext:theme-type="dark1" loext:color-type="theme"/>
      </style:text-properties>
    </style:style>
    <style:style style:name="fr1" style:family="graphic" style:parent-style-name="Formula">
      <style:graphic-properties fo:margin-left="0cm" fo:margin-right="0cm" fo:margin-top="0cm" fo:margin-bottom="0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 loext:marker-style-name="T2"><text:span text:style-name="T1">ACTIVIDAD TALLER 04 </text:span><text:span text:style-name="T1"/></text:p>
        <text:p text:style-name="P2" loext:marker-style-name="T2"><text:span text:style-name="T1">COSTOS DE CAPITAL </text:span><text:span text:style-name="T1"/></text:p>
        <text:p text:style-name="P3" loext:marker-style-name="T2"><text:span text:style-name="T1">Objetivo</text:span><text:span text:style-name="T1"/></text:p>
        <text:p text:style-name="P4" loext:marker-style-name="T2"><text:span text:style-name="T4">Esta actividad tiene por finalidad que los equipos colaborativos puedan calcular los costos de capital correspondientes a las dos opciones de características del proyecto diversificado y no diversificado con datos del proyecto que vienen evaluando.</text:span><text:span text:style-name="T4"/></text:p>
        <text:p text:style-name="P3" loext:marker-style-name="T2"><text:span text:style-name="T1">Indicaciones</text:span><text:span text:style-name="T1"/></text:p>
        <text:p text:style-name="P4" loext:marker-style-name="T2"><text:span text:style-name="T1">1.-</text:span><text:span text:style-name="T4"> Considerando si el proyecto es o no una empresa diversificada en el mercado emergente peruano y usando el modelo de Damodaran de costo de capital propio para un proyecto financiado completamente con capital propio, obtener el COK des apalancado (Ku) para el proyecto que viene evaluando:</text:span></text:p>
        <text:p text:style-name="P4" loext:marker-style-name="T2"><text:span text:style-name="T1">1.1. Ku con Riesgo Sistemático</text:span><text:span text:style-name="T1"/></text:p>
        <text:p text:style-name="P4" loext:marker-style-name="T2"><text:span text:style-name="T3">Kurs = Rf </text:span><text:span text:style-name="T6">USA</text:span><text:span text:style-name="T3"> + </text:span><text:span text:style-name="T5"></text:span><text:span text:style-name="T3">u </text:span><text:span text:style-name="T6">ME</text:span><text:span text:style-name="T3"> (Rm- Rf)</text:span><text:span text:style-name="T6"> USA</text:span><text:span text:style-name="T3"> + Rp </text:span><text:span text:style-name="T6">PERU </text:span></text:p>
        <text:p text:style-name="P4" loext:marker-style-name="T7"><text:span text:style-name="T6"><text:s/></text:span><text:span text:style-name="T6"/></text:p>
        <text:p text:style-name="P4" loext:marker-style-name="T2"><text:span text:style-name="T1">1.2. Ku con Riesgo Total</text:span><text:span text:style-name="T1"/></text:p>
        <text:p text:style-name="P1" loext:marker-style-name="T2"><text:span text:style-name="T8">Kurt = Rf usa+ </text:span><text:span text:style-name="T9"></text:span><text:span text:style-name="T8">u total </text:span><text:span text:style-name="T10">ME</text:span><text:span text:style-name="T8">* (Rm- Rf)</text:span><text:span text:style-name="T10"> </text:span><text:span text:style-name="T8">usa+ Rp </text:span><text:span text:style-name="T10">PERU</text:span><text:span text:style-name="T8"> </text:span></text:p>
        <text:p text:style-name="P4" loext:marker-style-name="T2"><text:span text:style-name="T1">2.-</text:span><text:span text:style-name="T4"> Considere que el proyecto será financiado con deuda y capital propio a la vez, considere la relación D/E y tasa impositiva del proyecto, estimar el COK apalancado para el proyecto.</text:span></text:p>
        <text:p text:style-name="P4" loext:marker-style-name="T2"><text:span text:style-name="T1">2.1. Ke con Riesgo Sistemático</text:span><text:span text:style-name="T1"/></text:p>
        <text:p text:style-name="P4" loext:marker-style-name="T2"><text:span text:style-name="T3">Kers = Rfusa + </text:span><text:span text:style-name="T5"></text:span><text:span text:style-name="T3">rl </text:span><text:span text:style-name="T6">PERÚ</text:span><text:span text:style-name="T3">*(Rm- Rf) usa + Rp </text:span><text:span text:style-name="T6">PERÚ</text:span><text:span text:style-name="T3"> </text:span></text:p>
        <text:p text:style-name="P4" loext:marker-style-name="T2"><text:span text:style-name="T3"><text:s/></text:span><text:span text:style-name="T3"/></text:p>
        <text:p text:style-name="P4" loext:marker-style-name="T2"><text:span text:style-name="T1">2.2. Ke con Riesgo Total</text:span><text:span text:style-name="T1"/></text:p>
        <text:p text:style-name="P4" loext:marker-style-name="T7"><text:span text:style-name="T3">Kert = Rfusa + </text:span><text:span text:style-name="T5"></text:span><text:span text:style-name="T3">rl total </text:span><text:span text:style-name="T6">PERÚ</text:span><text:span text:style-name="T3">* (Rm- Rf) usa+ Rp </text:span><text:span text:style-name="T6">PERÚ </text:span></text:p>
        <text:p text:style-name="P4" loext:marker-style-name="T2"><text:span text:style-name="T3"><text:s/></text:span><text:span text:style-name="T3"/></text:p>
        <text:p text:style-name="P4" loext:marker-style-name="T2"><text:span text:style-name="T4">3.- Considerando los resultados de financiamiento externo y del Ítem 2 del presente taller, calcule el Costo Promedio Ponderado de Capital (Kwacc). Para ello deberá considerar las dos opciones de clasificación de regímenes tributarios donde es posible se encuentre el proyecto.</text:span><text:span text:style-name="T4"/></text:p>
        <text:p text:style-name="P4" loext:marker-style-name="T2"><text:span text:style-name="T1">3.1. Kwacc con Riesgo Sistemático</text:span><text:span text:style-name="T1"/></text:p>
        <text:p text:style-name="P4" loext:marker-style-name="T2"><text:bookmark-start text:name="_Hlk64021632"/><text:span text:style-name="T4">Proyecto con Regimen Tributario MYPE Tributario, Régimen General o Régimen Agrario</text:span><text:bookmark-end text:name="_Hlk64021632"/><text:span text:style-name="T4"/></text:p>
        <text:p text:style-name="P5" loext:marker-style-name="T2"><draw:frame draw:style-name="fr1" draw:name="Objeto1" text:anchor-type="as-char" svg:width="5.542cm" svg:height="1.004cm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P4" loext:marker-style-name="T2"><text:span text:style-name="T4">Proyecto con Regimen Tributario Nuevo RUS o Régimen Especial</text:span><text:span text:style-name="T4"/></text:p>
        <text:p text:style-name="P5" loext:marker-style-name="T2"><text:bookmark-start text:name="_Hlk64021871"/><draw:frame draw:style-name="fr1" draw:name="Objeto2" text:anchor-type="as-char" svg:width="4.547cm" svg:height="1.004cm" draw:z-index="0"><draw:object xlink:href="./Object 2" xlink:type="simple" xlink:show="embed" xlink:actuate="onLoad"/><draw:image xlink:href="./ObjectReplacements/Object 2" xlink:type="simple" xlink:show="embed" xlink:actuate="onLoad"/></draw:frame><text:bookmark-end text:name="_Hlk64021871"/></text:p>
        <text:p text:style-name="P4" loext:marker-style-name="T2"><text:span text:style-name="T1">3.2. Kwacc con Riesgo Total</text:span><text:span text:style-name="T1"/></text:p>
        <text:p text:style-name="P4" loext:marker-style-name="T2"><text:soft-page-break/><text:span text:style-name="T4">Proyecto con Régimen Tributario MYPE Tributario, Régimen General o Régimen Agrario</text:span><text:span text:style-name="T4"/></text:p>
        <text:p text:style-name="P5" loext:marker-style-name="T2"><draw:frame draw:style-name="fr1" draw:name="Objeto3" text:anchor-type="as-char" svg:width="5.489cm" svg:height="1.004cm" draw:z-index="0"><draw:object xlink:href="./Object 3" xlink:type="simple" xlink:show="embed" xlink:actuate="onLoad"/><draw:image xlink:href="./ObjectReplacements/Object 3" xlink:type="simple" xlink:show="embed" xlink:actuate="onLoad"/></draw:frame></text:p>
        <text:p text:style-name="P4" loext:marker-style-name="T2"><text:span text:style-name="T4">Proyecto con Régimen Tributario Nuevo RUS o Régimen Especial</text:span><text:span text:style-name="T4"/></text:p>
        <text:p text:style-name="P5" loext:marker-style-name="T2"><draw:frame draw:style-name="fr1" draw:name="Objeto4" text:anchor-type="as-char" svg:width="4.494cm" svg:height="1.004cm" draw:z-index="0"><draw:object xlink:href="./Object 4" xlink:type="simple" xlink:show="embed" xlink:actuate="onLoad"/><draw:image xlink:href="./ObjectReplacements/Object 4" xlink:type="simple" xlink:show="embed" xlink:actuate="onLoad"/></draw:frame></text:p>
        <text:p text:style-name="P3" loext:marker-style-name="T2"><text:span text:style-name="T1">Evaluación</text:span><text:span text:style-name="T1"/></text:p>
        <text:p text:style-name="P3" loext:marker-style-name="T2"><text:span text:style-name="T4">Esta actividad es evaluada como participación en clases</text:span><text:span text:style-name="T4"/></text:p>
        <text:p text:style-name="P3" loext:marker-style-name="T2"><text:span text:style-name="T1">NOTA:</text:span><text:span text:style-name="T4"> Seleccione el que le corresponde específicamente a su proyecto e incluya en el ítem correspondiente del trabajo colaborativo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tang" svg:font-family="Batang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es" style:country-asian="PE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16:27:00</meta:creation-date>
    <meta:initial-creator>Usuario</meta:initial-creator>
    <dc:language>es-PE</dc:language>
    <dc:creator>Elmer Edison Achalma Mendoza</dc:creator>
    <dc:date>2023-12-31T17:37:38</dc:date>
    <meta:editing-cycles>9</meta:editing-cycles>
    <meta:editing-duration>PT24M</meta:editing-duration>
    <meta:generator>LibreOffice/24.2.4.2$Linux_X86_64 LibreOffice_project/420$Build-2</meta:generator>
    <meta:document-statistic meta:table-count="0" meta:image-count="0" meta:object-count="4" meta:page-count="2" meta:paragraph-count="32" meta:word-count="312" meta:character-count="1904" meta:non-whitespace-character-count="1612"/>
    <meta:user-defined meta:name="AppVersion">15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Kwacc</mi>
      <mrow>
        <mi mathvariant="italic">rs</mi>
        <mo stretchy="false">=</mo>
        <mfrac>
          <mi>D</mi>
          <mi>V</mi>
        </mfrac>
      </mrow>
      <mi mathvariant="italic">Kd</mi>
      <mrow>
        <mrow>
          <mo fence="true" form="prefix" stretchy="true">(</mo>
          <mrow>
            <mrow>
              <mn>1</mn>
              <mi>−</mi>
              <mi>t</mi>
            </mrow>
          </mrow>
          <mo fence="true" form="postfix" stretchy="true">)</mo>
        </mrow>
        <mo stretchy="false">+</mo>
        <mfrac>
          <mi>E</mi>
          <mi>V</mi>
        </mfrac>
      </mrow>
      <mi mathvariant="italic">Kers</mi>
    </mrow>
    <annotation encoding="StarMath 5.0">Kwacc rs = {D} over {V} Kd left (1 − t right ) + {E} over {V} Kers</annotation>
  </semantics>
</math>
</file>

<file path=Object 2/content.xml><?xml version="1.0" encoding="utf-8"?>
<math xmlns="http://www.w3.org/1998/Math/MathML" display="block">
  <semantics>
    <mrow>
      <mi mathvariant="italic">Kwacc</mi>
      <mrow>
        <mi mathvariant="italic">rs</mi>
        <mo stretchy="false">=</mo>
        <mfrac>
          <mi>D</mi>
          <mi>V</mi>
        </mfrac>
      </mrow>
      <mrow>
        <mi mathvariant="italic">Kd</mi>
        <mo stretchy="false">+</mo>
        <mfrac>
          <mi>E</mi>
          <mi>V</mi>
        </mfrac>
      </mrow>
      <mi mathvariant="italic">Kers</mi>
    </mrow>
    <annotation encoding="StarMath 5.0">Kwacc rs = {D} over {V} Kd + {E} over {V} Kers</annotation>
  </semantics>
</math>
</file>

<file path=Object 3/content.xml><?xml version="1.0" encoding="utf-8"?>
<math xmlns="http://www.w3.org/1998/Math/MathML" display="block">
  <semantics>
    <mrow>
      <mi mathvariant="italic">Kwacc</mi>
      <mrow>
        <mi mathvariant="italic">rt</mi>
        <mo stretchy="false">=</mo>
        <mfrac>
          <mi>D</mi>
          <mi>V</mi>
        </mfrac>
      </mrow>
      <mi mathvariant="italic">Kd</mi>
      <mrow>
        <mrow>
          <mo fence="true" form="prefix" stretchy="true">(</mo>
          <mrow>
            <mrow>
              <mn>1</mn>
              <mi>−</mi>
              <mi>t</mi>
            </mrow>
          </mrow>
          <mo fence="true" form="postfix" stretchy="true">)</mo>
        </mrow>
        <mo stretchy="false">+</mo>
        <mfrac>
          <mi>E</mi>
          <mi>V</mi>
        </mfrac>
      </mrow>
      <mi mathvariant="italic">Kert</mi>
    </mrow>
    <annotation encoding="StarMath 5.0">Kwacc rt = {D} over {V} Kd left (1 − t right ) + {E} over {V} Kert</annotation>
  </semantics>
</math>
</file>

<file path=Object 4/content.xml><?xml version="1.0" encoding="utf-8"?>
<math xmlns="http://www.w3.org/1998/Math/MathML" display="block">
  <semantics>
    <mrow>
      <mi mathvariant="italic">Kwacc</mi>
      <mrow>
        <mi mathvariant="italic">rt</mi>
        <mo stretchy="false">=</mo>
        <mfrac>
          <mi>D</mi>
          <mi>V</mi>
        </mfrac>
      </mrow>
      <mrow>
        <mi mathvariant="italic">Kd</mi>
        <mo stretchy="false">+</mo>
        <mfrac>
          <mi>E</mi>
          <mi>V</mi>
        </mfrac>
      </mrow>
      <mi mathvariant="italic">Kert</mi>
    </mrow>
    <annotation encoding="StarMath 5.0">Kwacc rt = {D} over {V} Kd + {E} over {V} Kert</annotation>
  </semantics>
</math>
</file>