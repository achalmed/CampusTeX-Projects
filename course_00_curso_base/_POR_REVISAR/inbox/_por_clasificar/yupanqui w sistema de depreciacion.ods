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0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PageStyle_5f_METODO_20_LINEA_20_RECTA">
      <style:table-properties table:display="true" style:writing-mode="lr-tb"/>
    </style:style>
    <style:style style:name="ta2" style:family="table" style:master-page-name="PageStyle_5f_METODO_20_FONDO_20_DEPREC">
      <style:table-properties table:display="true" style:writing-mode="lr-tb"/>
    </style:style>
    <style:style style:name="ta3" style:family="table" style:master-page-name="PageStyle_5f_METODO_20_SDS_20_Y_20_SDD">
      <style:table-properties table:display="true" style:writing-mode="lr-tb"/>
    </style:style>
    <style:style style:name="ta4" style:family="table" style:master-page-name="PageStyle_5f_METODO_20_SUMA_20_DIGITOS_20_DEL_20_AÑO">
      <style:table-properties table:display="true" style:writing-mode="lr-tb"/>
    </style:style>
    <style:style style:name="ta5" style:family="table" style:master-page-name="PageStyle_5f_METODO_20_SERVICIO_20_PRESTADO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4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4">
      <style:table-cell-properties style:rotation-align="non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</style:style>
    <style:style style:name="ce11" style:family="table-cell" style:parent-style-name="Default" style:data-style-name="N10">
      <style:table-cell-properties style:rotation-align="none"/>
    </style:style>
    <style:style style:name="ce12" style:family="table-cell" style:parent-style-name="Default" style:data-style-name="N2">
      <style:table-cell-properties style:rotation-align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4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3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4" style:family="table-cell" style:parent-style-name="Excel_20_Built-in_20_Percen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2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ODO LINEA REC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2" table:number-columns-repeated="16380" table:default-cell-style-name="Default"/>
        <table:table-row table:style-name="ro1">
          <table:table-cell/>
          <table:table-cell table:style-name="Default" office:value-type="string" calcext:value-type="string">
            <text:p>MÉTODOS DE DEPRECIACIÓN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Default" office:value-type="string" calcext:value-type="string">
            <text:p>1. METODO DE LA LINEA RECTA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P=</text:p>
          </table:table-cell>
          <table:table-cell table:style-name="ce7" office:value-type="float" office:value="10000" calcext:value-type="float">
            <text:p>10,000.00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6"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 table:number-columns-repeated="16376"/>
        </table:table-row>
        <table:table-row table:style-name="ro1">
          <table:table-cell/>
          <table:table-cell table:style-name="Default" office:value-type="string" calcext:value-type="string">
            <text:p>CUADRO DE DEPRECIACIÓN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VR=</text:p>
          </table:table-cell>
          <table:table-cell table:style-name="ce7" office:value-type="float" office:value="1000" calcext:value-type="float">
            <text:p>1,000.0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VIDA UTIL</text:p>
          </table:table-cell>
          <table:table-cell table:style-name="ce2" office:value-type="string" calcext:value-type="string">
            <text:p>COSTO POR DEPRECIACIÓN</text:p>
          </table:table-cell>
          <table:table-cell table:style-name="ce2" office:value-type="string" calcext:value-type="string">
            <text:p>VALOR EN LIBROS AL FINAL DEL AÑ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formula="of:=[.G2]" office:value-type="float" office:value="10000" calcext:value-type="float">
            <text:p>10,0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6]-[.C7]" office:value-type="float" office:value="9100" calcext:value-type="float">
            <text:p>9,1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7]-[.C8]" office:value-type="float" office:value="8200" calcext:value-type="float">
            <text:p>8,2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8]-[.C9]" office:value-type="float" office:value="7300" calcext:value-type="float">
            <text:p>7,3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9]-[.C10]" office:value-type="float" office:value="6400" calcext:value-type="float">
            <text:p>6,4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10]-[.C11]" office:value-type="float" office:value="5500" calcext:value-type="float">
            <text:p>5,5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11]-[.C12]" office:value-type="float" office:value="4600" calcext:value-type="float">
            <text:p>4,6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12]-[.C13]" office:value-type="float" office:value="3700" calcext:value-type="float">
            <text:p>3,7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13]-[.C14]" office:value-type="float" office:value="2800" calcext:value-type="float">
            <text:p>2,8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formula="of:=[.D14]-[.C15]" office:value-type="float" office:value="1900" calcext:value-type="float">
            <text:p>1,9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$G$2]-[.$G$4])/[.$G$3]" office:value-type="float" office:value="900" calcext:value-type="float">
            <text:p>900.00</text:p>
          </table:table-cell>
          <table:table-cell table:style-name="ce5" table:formula="of:=[.D15]-[.C16]" office:value-type="float" office:value="1000" calcext:value-type="float">
            <text:p>1,000.00</text:p>
          </table:table-cell>
          <table:table-cell table:number-columns-repeated="16380"/>
        </table:table-row>
      </table:table>
      <table:table table:name="METODO FONDO DEPREC" table:style-name="ta2">
        <table:table-column table:style-name="co5" table:default-cell-style-name="Default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2" table:default-cell-style-name="ce7"/>
        <table:table-column table:style-name="co2" table:number-columns-repeated="16379" table:default-cell-style-name="Default"/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2. METODO DEL FONDO DE DEPRECIACIÓN</text:p>
          </table:table-cell>
          <table:table-cell table:style-name="Default" table:number-columns-repeated="3"/>
          <table:table-cell table:style-name="ce6" office:value-type="string" calcext:value-type="string">
            <text:p>P=</text:p>
          </table:table-cell>
          <table:table-cell table:style-name="ce7" office:value-type="float" office:value="10000" calcext:value-type="float">
            <text:p>10,000.00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4"/>
          <table:table-cell table:style-name="ce6"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 table:number-columns-repeated="16376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UADRO DE DEPRECIACIÓN</text:p>
          </table:table-cell>
          <table:covered-table-cell table:number-columns-repeated="2" table:style-name="ce8"/>
          <table:table-cell table:style-name="Default"/>
          <table:table-cell table:style-name="ce6" office:value-type="string" calcext:value-type="string">
            <text:p>VR=</text:p>
          </table:table-cell>
          <table:table-cell table:style-name="ce7" office:value-type="float" office:value="1000" calcext:value-type="float">
            <text:p>1,000.0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VIDA UTIL</text:p>
          </table:table-cell>
          <table:table-cell table:style-name="ce2" office:value-type="string" calcext:value-type="string">
            <text:p>COSTO POR DEPRECIACIÓN</text:p>
          </table:table-cell>
          <table:table-cell table:style-name="ce2" office:value-type="string" calcext:value-type="string">
            <text:p>VALOR EN LIBROS AL FINAL DEL AÑO</text:p>
          </table:table-cell>
          <table:table-cell table:style-name="Default"/>
          <table:table-cell table:style-name="ce6" office:value-type="string" calcext:value-type="string">
            <text:p>i=</text:p>
          </table:table-cell>
          <table:table-cell table:style-name="ce11" office:value-type="percentage" office:value="0.1" calcext:value-type="percentage">
            <text:p>10 %</text:p>
          </table:table-cell>
          <table:table-cell office:value-type="string" calcext:value-type="string">
            <text:p>anual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formula="of:=[.G2]" office:value-type="float" office:value="10000" calcext:value-type="float">
            <text:p>10,000.00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G$13]*((1+[.$G$5])^([.B7]-1))" office:value-type="float" office:value="564.708553942604" calcext:value-type="float">
            <text:p>564.71</text:p>
          </table:table-cell>
          <table:table-cell table:formula="of:=[.D6]-[.C7]" office:value-type="float" office:value="9435.2914460574" calcext:value-type="float">
            <text:p>9,435.29</text:p>
          </table:table-cell>
          <table:table-cell table:number-columns-repeated="2"/>
          <table:table-cell table:formula="of:=12*60*3" office:value-type="float" office:value="2160" calcext:value-type="float">
            <text:p>21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G$13]*((1+[.$G$5])^([.B8]-1))" office:value-type="float" office:value="621.179409336864" calcext:value-type="float">
            <text:p>621.18</text:p>
          </table:table-cell>
          <table:table-cell table:formula="of:=[.D7]-[.C8]" office:value-type="float" office:value="8814.11203672053" calcext:value-type="float">
            <text:p>8,814.1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G$13]*((1+[.$G$5])^([.B9]-1))" office:value-type="float" office:value="683.297350270551" calcext:value-type="float">
            <text:p>683.30</text:p>
          </table:table-cell>
          <table:table-cell table:formula="of:=[.D8]-[.C9]" office:value-type="float" office:value="8130.81468644998" calcext:value-type="float">
            <text:p>8,130.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G$13]*((1+[.$G$5])^([.B10]-1))" office:value-type="float" office:value="751.627085297606" calcext:value-type="float">
            <text:p>751.63</text:p>
          </table:table-cell>
          <table:table-cell table:formula="of:=[.D9]-[.C10]" office:value-type="float" office:value="7379.18760115238" calcext:value-type="float">
            <text:p>7,379.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G$13]*((1+[.$G$5])^([.B11]-1))" office:value-type="float" office:value="826.789793827367" calcext:value-type="float">
            <text:p>826.79</text:p>
          </table:table-cell>
          <table:table-cell table:formula="of:=[.D10]-[.C11]" office:value-type="float" office:value="6552.39780732501" calcext:value-type="float">
            <text:p>6,552.4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G$13]*((1+[.$G$5])^([.B12]-1))" office:value-type="float" office:value="909.468773210103" calcext:value-type="float">
            <text:p>909.47</text:p>
          </table:table-cell>
          <table:table-cell table:formula="of:=[.D11]-[.C12]" office:value-type="float" office:value="5642.92903411491" calcext:value-type="float">
            <text:p>5,642.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G$13]*((1+[.$G$5])^([.B13]-1))" office:value-type="float" office:value="1000.41565053111" calcext:value-type="float">
            <text:p>1,000.42</text:p>
          </table:table-cell>
          <table:table-cell table:formula="of:=[.D12]-[.C13]" office:value-type="float" office:value="4642.51338358379" calcext:value-type="float">
            <text:p>4,642.51</text:p>
          </table:table-cell>
          <table:table-cell/>
          <table:table-cell table:style-name="ce6" office:value-type="string" calcext:value-type="string">
            <text:p>C=</text:p>
          </table:table-cell>
          <table:table-cell table:style-name="ce12" table:formula="of:=([.G2]-[.G4])*(([.G5]/(((1+[.G5])^([.G3]))-1)))" office:value-type="float" office:value="564.708553942604" calcext:value-type="float">
            <text:p>564.71</text:p>
          </table:table-cell>
          <table:table-cell table:formula="of:=([.G2]-[.G4])*(((1/(((1+[.G5])^([.G3]))-1))))" office:value-type="float" office:value="5647.08553942604" calcext:value-type="float">
            <text:p>5647.085539426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G$13]*((1+[.$G$5])^([.B14]-1))" office:value-type="float" office:value="1100.45721558423" calcext:value-type="float">
            <text:p>1,100.46</text:p>
          </table:table-cell>
          <table:table-cell table:formula="of:=[.D13]-[.C14]" office:value-type="float" office:value="3542.05616799957" calcext:value-type="float">
            <text:p>3,542.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G$13]*((1+[.$G$5])^([.B15]-1))" office:value-type="float" office:value="1210.50293714265" calcext:value-type="float">
            <text:p>1,210.50</text:p>
          </table:table-cell>
          <table:table-cell table:formula="of:=[.D14]-[.C15]" office:value-type="float" office:value="2331.55323085692" calcext:value-type="float">
            <text:p>2,331.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G$13]*((1+[.$G$5])^([.B16]-1))" office:value-type="float" office:value="1331.55323085691" calcext:value-type="float">
            <text:p>1,331.55</text:p>
          </table:table-cell>
          <table:table-cell table:formula="of:=[.D15]-[.C16]" office:value-type="float" office:value="1000.00000000001" calcext:value-type="float">
            <text:p>1,000.00</text:p>
          </table:table-cell>
          <table:table-cell table:number-columns-repeated="16380"/>
        </table:table-row>
      </table:table>
      <table:table table:name="METODO SDS Y SDD" table:style-name="ta3">
        <table:table-column table:style-name="co6" table:default-cell-style-name="Default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2" table:number-columns-repeated="4" table:default-cell-style-name="ce18"/>
        <table:table-column table:style-name="co2" table:default-cell-style-name="ce27"/>
        <table:table-column table:style-name="co2" table:number-columns-repeated="16375" table:default-cell-style-name="Default"/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>
            <text:p>3. METODO DEL SALDO DE DECLINACIÓN</text:p>
          </table:table-cell>
          <table:table-cell table:style-name="ce17" table:number-columns-repeated="3"/>
          <table:table-cell table:style-name="ce21" office:value-type="string" calcext:value-type="string">
            <text:p>P=</text:p>
          </table:table-cell>
          <table:table-cell table:style-name="ce23" table:formula="of:=10000" office:value-type="float" office:value="10000" calcext:value-type="float">
            <text:p>10,000.00</text:p>
          </table:table-cell>
          <table:table-cell table:style-name="ce17"/>
          <table:table-cell table:style-name="ce26"/>
          <table:table-cell table:number-columns-repeated="16375"/>
        </table:table-row>
        <table:table-row table:style-name="ro1">
          <table:table-cell/>
          <table:table-cell table:style-name="ce14"/>
          <table:table-cell table:style-name="ce18" table:number-columns-repeated="2"/>
          <table:table-cell/>
          <table:table-cell table:style-name="ce22"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 table:number-columns-repeated="1637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CUADRO DE DEPRECIACIÓN</text:p>
          </table:table-cell>
          <table:covered-table-cell table:number-columns-repeated="2" table:style-name="ce8"/>
          <table:table-cell/>
          <table:table-cell table:style-name="ce22" office:value-type="string" calcext:value-type="string">
            <text:p>VR=</text:p>
          </table:table-cell>
          <table:table-cell table:style-name="ce20" office:value-type="float" office:value="1000" calcext:value-type="float">
            <text:p>1,000.0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VIDA UTIL</text:p>
          </table:table-cell>
          <table:table-cell table:style-name="ce2" office:value-type="string" calcext:value-type="string">
            <text:p>COSTO POR DEPRECIACIÓN</text:p>
          </table:table-cell>
          <table:table-cell table:style-name="ce2" office:value-type="string" calcext:value-type="string">
            <text:p>VALOR EN LIBROS AL FINAL DEL AÑO</text:p>
          </table:table-cell>
          <table:table-cell/>
          <table:table-cell table:style-name="ce22" office:value-type="string" calcext:value-type="string">
            <text:p>t=</text:p>
          </table:table-cell>
          <table:table-cell table:style-name="ce24" table:formula="of:=1/[.G3]" office:value-type="float" office:value="0.1" calcext:value-type="float">
            <text:p>0.10</text:p>
          </table:table-cell>
          <table:table-cell office:value-type="string" calcext:value-type="string">
            <text:p>SDD es 2/n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formula="of:=[.G2]" office:value-type="float" office:value="10000" calcext:value-type="float">
            <text:p>10,0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G$2]*[.$G$5]*(1-[.$G$5])^([.B7]-1)" office:value-type="float" office:value="1000" calcext:value-type="float">
            <text:p>1,000.00</text:p>
          </table:table-cell>
          <table:table-cell table:formula="of:=[.D6]-[.C7]" office:value-type="float" office:value="9000" calcext:value-type="float">
            <text:p>9,000.00</text:p>
          </table:table-cell>
          <table:table-cell table:style-name="ce20"/>
          <table:table-cell/>
          <table:table-cell table:formula="of:=12*60*3" office:value-type="float" office:value="2160" calcext:value-type="float">
            <text:p>21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G$2]*[.$G$5]*(1-[.$G$5])^([.B8]-1)" office:value-type="float" office:value="900" calcext:value-type="float">
            <text:p>900.00</text:p>
          </table:table-cell>
          <table:table-cell table:formula="of:=[.D7]-[.C8]" office:value-type="float" office:value="8100" calcext:value-type="float">
            <text:p>8,100.00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G$2]*[.$G$5]*(1-[.$G$5])^([.B9]-1)" office:value-type="float" office:value="810" calcext:value-type="float">
            <text:p>810.00</text:p>
          </table:table-cell>
          <table:table-cell table:formula="of:=[.D8]-[.C9]" office:value-type="float" office:value="7290" calcext:value-type="float">
            <text:p>7,290.00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G$2]*[.$G$5]*(1-[.$G$5])^([.B10]-1)" office:value-type="float" office:value="729" calcext:value-type="float">
            <text:p>729.00</text:p>
          </table:table-cell>
          <table:table-cell table:formula="of:=[.D9]-[.C10]" office:value-type="float" office:value="6561" calcext:value-type="float">
            <text:p>6,561.00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G$2]*[.$G$5]*(1-[.$G$5])^([.B11]-1)" office:value-type="float" office:value="656.1" calcext:value-type="float">
            <text:p>656.10</text:p>
          </table:table-cell>
          <table:table-cell table:formula="of:=[.D10]-[.C11]" office:value-type="float" office:value="5904.9" calcext:value-type="float">
            <text:p>5,904.90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G$2]*[.$G$5]*(1-[.$G$5])^([.B12]-1)" office:value-type="float" office:value="590.49" calcext:value-type="float">
            <text:p>590.49</text:p>
          </table:table-cell>
          <table:table-cell table:formula="of:=[.D11]-[.C12]" office:value-type="float" office:value="5314.41" calcext:value-type="float">
            <text:p>5,314.41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G$2]*[.$G$5]*(1-[.$G$5])^([.B13]-1)" office:value-type="float" office:value="531.441" calcext:value-type="float">
            <text:p>531.44</text:p>
          </table:table-cell>
          <table:table-cell table:formula="of:=[.D12]-[.C13]" office:value-type="float" office:value="4782.969" calcext:value-type="float">
            <text:p>4,782.97</text:p>
          </table:table-cell>
          <table:table-cell table:style-name="ce20"/>
          <table:table-cell table:style-name="ce22" office:value-type="string" calcext:value-type="string">
            <text:p>C=</text:p>
          </table:table-cell>
          <table:table-cell table:style-name="ce25" table:formula="of:=([.G2]-[.G4])*(([.G5]/(((1+[.G5])^([.G3]))-1)))" office:value-type="float" office:value="564.708553942604" calcext:value-type="float">
            <text:p>564.71</text:p>
          </table:table-cell>
          <table:table-cell table:formula="of:=([.G2]-[.G4])*(((1/(((1+[.G5])^([.G3]))-1))))" office:value-type="float" office:value="5647.08553942604" calcext:value-type="float">
            <text:p>5647.085539426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G$2]*[.$G$5]*(1-[.$G$5])^([.B14]-1)" office:value-type="float" office:value="478.2969" calcext:value-type="float">
            <text:p>478.30</text:p>
          </table:table-cell>
          <table:table-cell table:formula="of:=[.D13]-[.C14]" office:value-type="float" office:value="4304.6721" calcext:value-type="float">
            <text:p>4,304.67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G$2]*[.$G$5]*(1-[.$G$5])^([.B15]-1)" office:value-type="float" office:value="430.46721" calcext:value-type="float">
            <text:p>430.47</text:p>
          </table:table-cell>
          <table:table-cell table:formula="of:=[.D14]-[.C15]" office:value-type="float" office:value="3874.20489" calcext:value-type="float">
            <text:p>3,874.20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G$2]*[.$G$5]*(1-[.$G$5])^([.B16]-1)" office:value-type="float" office:value="387.420489" calcext:value-type="float">
            <text:p>387.42</text:p>
          </table:table-cell>
          <table:table-cell table:formula="of:=[.D15]-[.C16]" office:value-type="float" office:value="3486.784401" calcext:value-type="float">
            <text:p>3,486.78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table:style-name="ce16"/>
          <table:table-cell table:style-name="ce19" table:number-columns-repeated="6"/>
          <table:table-cell table:style-name="ce28"/>
          <table:table-cell table:number-columns-repeated="16375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>
            <text:p>4. METODO DEL SALDO DE DECLINACIÓN DOBLE</text:p>
          </table:table-cell>
          <table:table-cell table:style-name="ce17" table:number-columns-repeated="3"/>
          <table:table-cell table:style-name="ce21" office:value-type="string" calcext:value-type="string">
            <text:p>P=</text:p>
          </table:table-cell>
          <table:table-cell table:style-name="ce23" table:formula="of:=10000" office:value-type="float" office:value="10000" calcext:value-type="float">
            <text:p>10,000.00</text:p>
          </table:table-cell>
          <table:table-cell table:style-name="ce17"/>
          <table:table-cell table:style-name="ce26"/>
          <table:table-cell table:number-columns-repeated="16375"/>
        </table:table-row>
        <table:table-row table:style-name="ro1">
          <table:table-cell/>
          <table:table-cell table:style-name="ce14"/>
          <table:table-cell table:style-name="ce18" table:number-columns-repeated="2"/>
          <table:table-cell/>
          <table:table-cell table:style-name="ce22"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 table:number-columns-repeated="1637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CUADRO DE DEPRECIACIÓN</text:p>
          </table:table-cell>
          <table:covered-table-cell table:number-columns-repeated="2" table:style-name="ce8"/>
          <table:table-cell/>
          <table:table-cell table:style-name="ce22" office:value-type="string" calcext:value-type="string">
            <text:p>VR=</text:p>
          </table:table-cell>
          <table:table-cell table:style-name="ce20" office:value-type="float" office:value="1000" calcext:value-type="float">
            <text:p>1,000.0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VIDA UTIL</text:p>
          </table:table-cell>
          <table:table-cell table:style-name="ce2" office:value-type="string" calcext:value-type="string">
            <text:p>COSTO POR DEPRECIACIÓN</text:p>
          </table:table-cell>
          <table:table-cell table:style-name="ce2" office:value-type="string" calcext:value-type="string">
            <text:p>VALOR EN LIBROS AL FINAL DEL AÑO</text:p>
          </table:table-cell>
          <table:table-cell/>
          <table:table-cell table:style-name="ce22" office:value-type="string" calcext:value-type="string">
            <text:p>t=</text:p>
          </table:table-cell>
          <table:table-cell table:style-name="ce24" table:formula="of:=2/[.G20]" office:value-type="float" office:value="0.2" calcext:value-type="float">
            <text:p>0.20</text:p>
          </table:table-cell>
          <table:table-cell office:value-type="string" calcext:value-type="string">
            <text:p>SDD es 2/n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formula="of:=[.G19]" office:value-type="float" office:value="10000" calcext:value-type="float">
            <text:p>10,0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G$19]*[.$G$22]*(1-[.$G$22])^([.B24]-1)" office:value-type="float" office:value="2000" calcext:value-type="float">
            <text:p>2,000.00</text:p>
          </table:table-cell>
          <table:table-cell table:formula="of:=[.D23]-[.C24]" office:value-type="float" office:value="8000" calcext:value-type="float">
            <text:p>8,000.00</text:p>
          </table:table-cell>
          <table:table-cell table:number-columns-repeated="2"/>
          <table:table-cell table:formula="of:=12*60*3" office:value-type="float" office:value="2160" calcext:value-type="float">
            <text:p>21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G$19]*[.$G$22]*(1-[.$G$22])^([.B25]-1)" office:value-type="float" office:value="1600" calcext:value-type="float">
            <text:p>1,600.00</text:p>
          </table:table-cell>
          <table:table-cell table:formula="of:=[.D24]-[.C25]" office:value-type="float" office:value="6400" calcext:value-type="float">
            <text:p>6,40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G$19]*[.$G$22]*(1-[.$G$22])^([.B26]-1)" office:value-type="float" office:value="1280" calcext:value-type="float">
            <text:p>1,280.00</text:p>
          </table:table-cell>
          <table:table-cell table:formula="of:=[.D25]-[.C26]" office:value-type="float" office:value="5120" calcext:value-type="float">
            <text:p>5,120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G$19]*[.$G$22]*(1-[.$G$22])^([.B27]-1)" office:value-type="float" office:value="1024" calcext:value-type="float">
            <text:p>1,024.00</text:p>
          </table:table-cell>
          <table:table-cell table:formula="of:=[.D26]-[.C27]" office:value-type="float" office:value="4096" calcext:value-type="float">
            <text:p>4,096.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G$19]*[.$G$22]*(1-[.$G$22])^([.B28]-1)" office:value-type="float" office:value="819.2" calcext:value-type="float">
            <text:p>819.20</text:p>
          </table:table-cell>
          <table:table-cell table:formula="of:=[.D27]-[.C28]" office:value-type="float" office:value="3276.8" calcext:value-type="float">
            <text:p>3,276.8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G$19]*[.$G$22]*(1-[.$G$22])^([.B29]-1)" office:value-type="float" office:value="655.36" calcext:value-type="float">
            <text:p>655.36</text:p>
          </table:table-cell>
          <table:table-cell table:formula="of:=[.D28]-[.C29]" office:value-type="float" office:value="2621.44" calcext:value-type="float">
            <text:p>2,621.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G$19]*[.$G$22]*(1-[.$G$22])^([.B30]-1)" office:value-type="float" office:value="524.288" calcext:value-type="float">
            <text:p>524.29</text:p>
          </table:table-cell>
          <table:table-cell table:formula="of:=[.D29]-[.C30]" office:value-type="float" office:value="2097.152" calcext:value-type="float">
            <text:p>2,097.15</text:p>
          </table:table-cell>
          <table:table-cell/>
          <table:table-cell table:style-name="ce22" office:value-type="string" calcext:value-type="string">
            <text:p>C=</text:p>
          </table:table-cell>
          <table:table-cell table:style-name="ce25" table:formula="of:=([.G19]-[.G21])*(([.G22]/(((1+[.G22])^([.G20]))-1)))" office:value-type="float" office:value="346.704811945732" calcext:value-type="float">
            <text:p>346.70</text:p>
          </table:table-cell>
          <table:table-cell table:formula="of:=([.G19]-[.G21])*(((1/(((1+[.G22])^([.G20]))-1))))" office:value-type="float" office:value="1733.52405972866" calcext:value-type="float">
            <text:p>1733.5240597286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G$19]*[.$G$22]*(1-[.$G$22])^([.B31]-1)" office:value-type="float" office:value="419.4304" calcext:value-type="float">
            <text:p>419.43</text:p>
          </table:table-cell>
          <table:table-cell table:formula="of:=[.D30]-[.C31]" office:value-type="float" office:value="1677.7216" calcext:value-type="float">
            <text:p>1,677.7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G$19]*[.$G$22]*(1-[.$G$22])^([.B32]-1)" office:value-type="float" office:value="335.54432" calcext:value-type="float">
            <text:p>335.54</text:p>
          </table:table-cell>
          <table:table-cell table:formula="of:=[.D31]-[.C32]" office:value-type="float" office:value="1342.17728" calcext:value-type="float">
            <text:p>1,342.1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G$19]*[.$G$22]*(1-[.$G$22])^([.B33]-1)" office:value-type="float" office:value="268.435456" calcext:value-type="float">
            <text:p>268.44</text:p>
          </table:table-cell>
          <table:table-cell table:style-name="ce5" table:formula="of:=[.D32]-[.C33]" office:value-type="float" office:value="1073.741824" calcext:value-type="float">
            <text:p>1,073.74</text:p>
          </table:table-cell>
          <table:table-cell table:style-name="ce5" office:value-type="float" office:value="1000" calcext:value-type="float">
            <text:p>1,000.00</text:p>
          </table:table-cell>
          <table:table-cell table:number-columns-repeated="16379"/>
        </table:table-row>
        <table:table-row table:style-name="ro1">
          <table:table-cell/>
          <table:table-cell table:style-name="ce16"/>
          <table:table-cell table:style-name="ce19" table:number-columns-repeated="6"/>
          <table:table-cell table:style-name="ce28"/>
          <table:table-cell table:number-columns-repeated="16375"/>
        </table:table-row>
      </table:table>
      <table:table table:name="METODO SUMA DIGITOS DEL AÑO" table:style-name="ta4"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2" table:number-columns-repeated="4" table:default-cell-style-name="ce18"/>
        <table:table-column table:style-name="co2" table:default-cell-style-name="ce27"/>
        <table:table-column table:style-name="co2" table:number-columns-repeated="16376" table:default-cell-style-name="Default"/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13" office:value-type="string" calcext:value-type="string">
            <text:p>5. METODO DE LA SUMA DE LOS DIGITOS DEL AÑO</text:p>
          </table:table-cell>
          <table:table-cell table:style-name="ce17" table:number-columns-repeated="3"/>
          <table:table-cell table:style-name="ce21" office:value-type="string" calcext:value-type="string">
            <text:p>P=</text:p>
          </table:table-cell>
          <table:table-cell table:style-name="ce23" table:formula="of:=10000" office:value-type="float" office:value="10000" calcext:value-type="float">
            <text:p>10,000.00</text:p>
          </table:table-cell>
          <table:table-cell table:style-name="ce17"/>
          <table:table-cell table:style-name="ce26"/>
          <table:table-cell table:number-columns-repeated="16376"/>
        </table:table-row>
        <table:table-row table:style-name="ro1">
          <table:table-cell table:style-name="ce14"/>
          <table:table-cell table:style-name="ce18" table:number-columns-repeated="2"/>
          <table:table-cell/>
          <table:table-cell table:style-name="ce22"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 table:number-columns-spanned="3" table:number-rows-spanned="1">
            <text:p>CUADRO DE DEPRECIACIÓN</text:p>
          </table:table-cell>
          <table:covered-table-cell table:number-columns-repeated="2" table:style-name="ce8"/>
          <table:table-cell/>
          <table:table-cell table:style-name="ce22" office:value-type="string" calcext:value-type="string">
            <text:p>VR=</text:p>
          </table:table-cell>
          <table:table-cell table:style-name="ce20" office:value-type="float" office:value="1000" calcext:value-type="float">
            <text:p>1,000.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DA UTIL</text:p>
          </table:table-cell>
          <table:table-cell table:style-name="ce2" office:value-type="string" calcext:value-type="string">
            <text:p>COSTO POR DEPRECIACIÓN</text:p>
          </table:table-cell>
          <table:table-cell table:style-name="ce2" office:value-type="string" calcext:value-type="string">
            <text:p>VALOR EN LIBROS AL FINAL DEL AÑO</text:p>
          </table:table-cell>
          <table:table-cell table:style-name="ce29" office:value-type="string" calcext:value-type="string">
            <text:p>tk</text:p>
          </table:table-cell>
          <table:table-cell table:style-name="ce22" office:value-type="string" calcext:value-type="string">
            <text:p>t=</text:p>
          </table:table-cell>
          <table:table-cell table:style-name="ce24" table:formula="of:=1/[.F3]" office:value-type="float" office:value="0.1" calcext:value-type="float">
            <text:p>0.10</text:p>
          </table:table-cell>
          <table:table-cell office:value-type="string" calcext:value-type="string">
            <text:p>SDD es 2/n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formula="of:=[.F2]" office:value-type="float" office:value="10000" calcext:value-type="float">
            <text:p>10,000.0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7]*([.$F$2]-[.$F$4])" office:value-type="float" office:value="1636.36363636364" calcext:value-type="float">
            <text:p>1,636.36</text:p>
          </table:table-cell>
          <table:table-cell table:formula="of:=[.C6]-[.B7]" office:value-type="float" office:value="8363.63636363636" calcext:value-type="float">
            <text:p>8,363.64</text:p>
          </table:table-cell>
          <table:table-cell table:formula="of:=([.$F$3]-[.A7]+1)/(([.$F$3]/2)*([.$F$3]+1))" office:value-type="float" office:value="0.181818181818182" calcext:value-type="float">
            <text:p>0.181818181818182</text:p>
          </table:table-cell>
          <table:table-cell/>
          <table:table-cell table:formula="of:=12*60*3" office:value-type="float" office:value="2160" calcext:value-type="float">
            <text:p>2160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8]*([.$F$2]-[.$F$4])" office:value-type="float" office:value="1472.72727272727" calcext:value-type="float">
            <text:p>1,472.73</text:p>
          </table:table-cell>
          <table:table-cell table:formula="of:=[.C7]-[.B8]" office:value-type="float" office:value="6890.90909090909" calcext:value-type="float">
            <text:p>6,890.91</text:p>
          </table:table-cell>
          <table:table-cell table:formula="of:=([.$F$3]-[.A8]+1)/(([.$F$3]/2)*([.$F$3]+1))" office:value-type="float" office:value="0.163636363636364" calcext:value-type="float">
            <text:p>0.16363636363636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9]*([.$F$2]-[.$F$4])" office:value-type="float" office:value="1309.09090909091" calcext:value-type="float">
            <text:p>1,309.09</text:p>
          </table:table-cell>
          <table:table-cell table:formula="of:=[.C8]-[.B9]" office:value-type="float" office:value="5581.81818181818" calcext:value-type="float">
            <text:p>5,581.82</text:p>
          </table:table-cell>
          <table:table-cell table:formula="of:=([.$F$3]-[.A9]+1)/(([.$F$3]/2)*([.$F$3]+1))" office:value-type="float" office:value="0.145454545454545" calcext:value-type="float">
            <text:p>0.145454545454545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10]*([.$F$2]-[.$F$4])" office:value-type="float" office:value="1145.45454545455" calcext:value-type="float">
            <text:p>1,145.45</text:p>
          </table:table-cell>
          <table:table-cell table:formula="of:=[.C9]-[.B10]" office:value-type="float" office:value="4436.36363636364" calcext:value-type="float">
            <text:p>4,436.36</text:p>
          </table:table-cell>
          <table:table-cell table:formula="of:=([.$F$3]-[.A10]+1)/(([.$F$3]/2)*([.$F$3]+1))" office:value-type="float" office:value="0.127272727272727" calcext:value-type="float">
            <text:p>0.127272727272727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11]*([.$F$2]-[.$F$4])" office:value-type="float" office:value="981.818181818182" calcext:value-type="float">
            <text:p>981.82</text:p>
          </table:table-cell>
          <table:table-cell table:formula="of:=[.C10]-[.B11]" office:value-type="float" office:value="3454.54545454546" calcext:value-type="float">
            <text:p>3,454.55</text:p>
          </table:table-cell>
          <table:table-cell table:formula="of:=([.$F$3]-[.A11]+1)/(([.$F$3]/2)*([.$F$3]+1))" office:value-type="float" office:value="0.109090909090909" calcext:value-type="float">
            <text:p>0.109090909090909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12]*([.$F$2]-[.$F$4])" office:value-type="float" office:value="818.181818181818" calcext:value-type="float">
            <text:p>818.18</text:p>
          </table:table-cell>
          <table:table-cell table:formula="of:=[.C11]-[.B12]" office:value-type="float" office:value="2636.36363636364" calcext:value-type="float">
            <text:p>2,636.36</text:p>
          </table:table-cell>
          <table:table-cell table:formula="of:=([.$F$3]-[.A12]+1)/(([.$F$3]/2)*([.$F$3]+1))" office:value-type="float" office:value="0.0909090909090909" calcext:value-type="float">
            <text:p>0.0909090909090909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13]*([.$F$2]-[.$F$4])" office:value-type="float" office:value="654.545454545455" calcext:value-type="float">
            <text:p>654.55</text:p>
          </table:table-cell>
          <table:table-cell table:formula="of:=[.C12]-[.B13]" office:value-type="float" office:value="1981.81818181818" calcext:value-type="float">
            <text:p>1,981.82</text:p>
          </table:table-cell>
          <table:table-cell table:formula="of:=([.$F$3]-[.A13]+1)/(([.$F$3]/2)*([.$F$3]+1))" office:value-type="float" office:value="0.0727272727272727" calcext:value-type="float">
            <text:p>0.0727272727272727</text:p>
          </table:table-cell>
          <table:table-cell table:style-name="ce22" office:value-type="string" calcext:value-type="string">
            <text:p>C=</text:p>
          </table:table-cell>
          <table:table-cell table:style-name="ce25" table:formula="of:=([.F2]-[.F4])*(([.F5]/(((1+[.F5])^([.F3]))-1)))" office:value-type="float" office:value="564.708553942604" calcext:value-type="float">
            <text:p>564.71</text:p>
          </table:table-cell>
          <table:table-cell table:formula="of:=([.F2]-[.F4])*(((1/(((1+[.F5])^([.F3]))-1))))" office:value-type="float" office:value="5647.08553942604" calcext:value-type="float">
            <text:p>5647.0855394260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4]*([.$F$2]-[.$F$4])" office:value-type="float" office:value="490.909090909091" calcext:value-type="float">
            <text:p>490.91</text:p>
          </table:table-cell>
          <table:table-cell table:formula="of:=[.C13]-[.B14]" office:value-type="float" office:value="1490.90909090909" calcext:value-type="float">
            <text:p>1,490.91</text:p>
          </table:table-cell>
          <table:table-cell table:formula="of:=([.$F$3]-[.A14]+1)/(([.$F$3]/2)*([.$F$3]+1))" office:value-type="float" office:value="0.0545454545454545" calcext:value-type="float">
            <text:p>0.0545454545454545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5]*([.$F$2]-[.$F$4])" office:value-type="float" office:value="327.272727272727" calcext:value-type="float">
            <text:p>327.27</text:p>
          </table:table-cell>
          <table:table-cell table:formula="of:=[.C14]-[.B15]" office:value-type="float" office:value="1163.63636363636" calcext:value-type="float">
            <text:p>1,163.64</text:p>
          </table:table-cell>
          <table:table-cell table:formula="of:=([.$F$3]-[.A15]+1)/(([.$F$3]/2)*([.$F$3]+1))" office:value-type="float" office:value="0.0363636363636364" calcext:value-type="float">
            <text:p>0.0363636363636364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6]*([.$F$2]-[.$F$4])" office:value-type="float" office:value="163.636363636364" calcext:value-type="float">
            <text:p>163.64</text:p>
          </table:table-cell>
          <table:table-cell table:style-name="ce5" table:formula="of:=[.C15]-[.B16]" office:value-type="float" office:value="1000" calcext:value-type="float">
            <text:p>1,000.00</text:p>
          </table:table-cell>
          <table:table-cell table:formula="of:=([.$F$3]-[.A16]+1)/(([.$F$3]/2)*([.$F$3]+1))" office:value-type="float" office:value="0.0181818181818182" calcext:value-type="float">
            <text:p>0.0181818181818182</text:p>
          </table:table-cell>
          <table:table-cell table:number-columns-repeated="16380"/>
        </table:table-row>
        <table:table-row table:style-name="ro1">
          <table:table-cell table:style-name="ce16"/>
          <table:table-cell table:style-name="ce19" table:number-columns-repeated="6"/>
          <table:table-cell table:style-name="ce28"/>
          <table:table-cell table:number-columns-repeated="16376"/>
        </table:table-row>
      </table:table>
      <table:table table:name="METODO SERVICIO PRESTADO" table:style-name="ta5">
        <office:forms form:automatic-focus="false" form:apply-design-mode="false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2" table:number-columns-repeated="4" table:default-cell-style-name="ce18"/>
        <table:table-column table:style-name="co2" table:default-cell-style-name="ce27"/>
        <table:table-column table:style-name="co2" table:number-columns-repeated="16376" table:default-cell-style-name="Default"/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30" office:value-type="string" calcext:value-type="string">
            <text:p>6. METODO DEL SERVICIO PRESTADO</text:p>
          </table:table-cell>
          <table:table-cell table:style-name="ce17" table:number-columns-repeated="3"/>
          <table:table-cell table:style-name="ce21" office:value-type="string" calcext:value-type="string">
            <text:p>P=</text:p>
          </table:table-cell>
          <table:table-cell table:style-name="ce23" table:formula="of:=10000" office:value-type="float" office:value="10000" calcext:value-type="float">
            <text:p>10,000.00</text:p>
          </table:table-cell>
          <table:table-cell table:style-name="ce21" office:value-type="string" calcext:value-type="string">
            <text:p>Se=</text:p>
          </table:table-cell>
          <table:table-cell table:style-name="ce26" office:value-type="float" office:value="10000" calcext:value-type="float">
            <text:p>10000</text:p>
          </table:table-cell>
          <table:table-cell office:value-type="string" calcext:value-type="string">
            <text:p>horas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8" table:number-columns-repeated="2"/>
          <table:table-cell/>
          <table:table-cell table:style-name="ce22" office:value-type="string" calcext:value-type="string">
            <text:p>n=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Srk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ras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 table:number-columns-spanned="3" table:number-rows-spanned="1">
            <text:p>CUADRO DE DEPRECIACIÓN</text:p>
          </table:table-cell>
          <table:covered-table-cell table:number-columns-repeated="2" table:style-name="ce8"/>
          <table:table-cell/>
          <table:table-cell table:style-name="ce22" office:value-type="string" calcext:value-type="string">
            <text:p>VR=</text:p>
          </table:table-cell>
          <table:table-cell table:style-name="ce20" office:value-type="float" office:value="1000" calcext:value-type="float">
            <text:p>1,000.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ora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IDA UTIL</text:p>
          </table:table-cell>
          <table:table-cell table:style-name="ce2" office:value-type="string" calcext:value-type="string">
            <text:p>COSTO POR DEPRECIACIÓN</text:p>
          </table:table-cell>
          <table:table-cell table:style-name="ce2" office:value-type="string" calcext:value-type="string">
            <text:p>VALOR EN LIBROS AL FINAL DEL AÑO</text:p>
          </table:table-cell>
          <table:table-cell table:style-name="ce29"/>
          <table:table-cell table:style-name="ce22" office:value-type="string" calcext:value-type="string">
            <text:p>t=</text:p>
          </table:table-cell>
          <table:table-cell table:style-name="ce24" table:formula="of:=([.F2]-[.F4])/[.H2]" office:value-type="float" office:value="0.9" calcext:value-type="float">
            <text:p>0.90</text:p>
          </table:table-cell>
          <table:table-cell office:value-type="string" calcext:value-type="string">
            <text:p>SDD es 2/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oras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formula="of:=[.F2]" office:value-type="float" office:value="10000" calcext:value-type="float">
            <text:p>10,000.00</text:p>
          </table:table-cell>
          <table:table-cell table:style-name="Default"/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hora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F$2]-[.$F$4])/([.$H$2]))*[.H3]" office:value-type="float" office:value="270" calcext:value-type="float">
            <text:p>270.00</text:p>
          </table:table-cell>
          <table:table-cell table:formula="of:=[.$F$2]-[.$F$5]*([.H3])" office:value-type="float" office:value="9730" calcext:value-type="float">
            <text:p>9,730.00</text:p>
          </table:table-cell>
          <table:table-cell table:number-columns-repeated="2"/>
          <table:table-cell table:formula="of:=12*60*3" office:value-type="float" office:value="2160" calcext:value-type="float">
            <text:p>216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horas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F$2]-[.$F$4])/([.$H$2]))*[.H4]" office:value-type="float" office:value="900" calcext:value-type="float">
            <text:p>900.00</text:p>
          </table:table-cell>
          <table:table-cell table:formula="of:=[.$F$2]-[.$F$5]*([.H3]+[.H4])" office:value-type="float" office:value="8830" calcext:value-type="float">
            <text:p>8,830.0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F$2]-[.$F$4])/([.$H$2]))*[.H5]" office:value-type="float" office:value="1080" calcext:value-type="float">
            <text:p>1,080.00</text:p>
          </table:table-cell>
          <table:table-cell table:formula="of:=[.$F$2]-[.$F$5]*([.HH3]+[.H4]+[.H5])" office:value-type="float" office:value="8020" calcext:value-type="float">
            <text:p>8,020.00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F$2]-[.$F$4])/([.$H$2]))*[.H6]" office:value-type="float" office:value="1800" calcext:value-type="float">
            <text:p>1,800.00</text:p>
          </table:table-cell>
          <table:table-cell table:formula="of:=[.$F$2]-[.$F$5]*([.H3]+[.H4]+[.H5]+[.H6])" office:value-type="float" office:value="5950" calcext:value-type="float">
            <text:p>5,950.00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$F$2]-[.$F$4])/([.$H$2]))*[.H7]" office:value-type="float" office:value="2250" calcext:value-type="float">
            <text:p>2,250.00</text:p>
          </table:table-cell>
          <table:table-cell table:formula="of:=[.$F$2]-[.$F$5]*([.H3]+[.H4]+[.H5]+[.H6]+[.H7])" office:value-type="float" office:value="3700" calcext:value-type="float">
            <text:p>3,700.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2"/>
          <table:table-cell table:style-name="ce2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style-name="ce16"/>
          <table:table-cell table:style-name="ce19" table:number-columns-repeated="6"/>
          <table:table-cell table:style-name="ce28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ODO_20_SERVICIO_20_PRESTADO" style:display-name="PageStyle_METODO SERVICIO PREST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SDS_20_Y_20_SDD" style:display-name="PageStyle_METODO SDS Y SD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SUMA_20_DIGITOS_20_DEL_20_AÑO" style:display-name="PageStyle_METODO SUMA DIGITOS DEL AÑ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FONDO_20_DEPREC" style:display-name="PageStyle_METODO FONDO DEPR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ODO_20_LINEA_20_RECTA" style:display-name="PageStyle_METODO LINEA REC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Yupanqui Pillihuamán</meta:initial-creator>
    <dc:creator>William Yupanqui Pillihuamán</dc:creator>
    <meta:creation-date>2018-06-18T20:26:13</meta:creation-date>
    <dc:date>2018-07-16T21:55:16</dc:date>
    <meta:generator>LibreOffice/24.2.4.2$Linux_X86_64 LibreOffice_project/420$Build-2</meta:generator>
    <meta:document-statistic meta:table-count="5" meta:cell-count="313" meta:object-count="0"/>
    <meta:user-defined meta:name="AppVersion">15.0300</meta:user-defined>
  </office:meta>
</office:document-meta>
</file>