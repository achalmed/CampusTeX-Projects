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3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ta1" style:family="table" style:master-page-name="PageStyle_5f_INTERES_20_AL_20_RABATIR">
      <style:table-properties table:display="true" style:writing-mode="lr-tb"/>
    </style:style>
    <style:style style:name="ta2" style:family="table" style:master-page-name="PageStyle_5f_METODO_20_PROGRESIVO">
      <style:table-properties table:display="true" style:writing-mode="lr-tb"/>
    </style:style>
    <style:style style:name="ta3" style:family="table" style:master-page-name="PageStyle_5f_INTERES_20_FLAT">
      <style:table-properties table:display="true" style:writing-mode="lr-tb"/>
    </style:style>
    <style:style style:name="ta4" style:family="table" style:master-page-name="PageStyle_5f_METODO_20_AMERICANO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RES AL RABATIR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CUADRO DE AMORTIZACIÓN</text:p>
          </table:table-cell>
          <table:covered-table-cell table:number-columns-repeated="5" table:style-name="ce1"/>
          <table:table-cell/>
          <table:table-cell table:style-name="ce4" office:value-type="string" calcext:value-type="string">
            <text:p>P=</text:p>
          </table:table-cell>
          <table:table-cell office:value-type="float" office:value="20000" calcext:value-type="float">
            <text:p>20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n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table:formula="of:=[.J1]" office:value-type="float" office:value="20000" calcext:value-type="float">
            <text:p>20000</text:p>
          </table:table-cell>
          <table:table-cell/>
          <table:table-cell table:style-name="ce4" office:value-type="string" calcext:value-type="string">
            <text:p>i=</text:p>
          </table:table-cell>
          <table:table-cell table:style-name="ce5" office:value-type="percentage" office:value="0.03" calcext:value-type="percentage">
            <text:p>3 %</text:p>
          </table:table-cell>
          <table:table-cell office:value-type="string" calcext:value-type="string">
            <text:p>mensual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3]*[.$J$3]" office:value-type="float" office:value="600" calcext:value-type="float">
            <text:p>600.00</text:p>
          </table:table-cell>
          <table:table-cell table:formula="of:=[.C4]+[.D4]" office:value-type="float" office:value="2266.66666666667" calcext:value-type="float">
            <text:p>2,266.67</text:p>
          </table:table-cell>
          <table:table-cell table:formula="of:=[.C4]" office:value-type="float" office:value="1666.66666666667" calcext:value-type="float">
            <text:p>1,666.67</text:p>
          </table:table-cell>
          <table:table-cell table:formula="of:=[.G3]-[.C4]" office:value-type="float" office:value="18333.3333333333" calcext:value-type="float">
            <text:p>18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4]*[.$J$3]" office:value-type="float" office:value="550" calcext:value-type="float">
            <text:p>550.00</text:p>
          </table:table-cell>
          <table:table-cell table:formula="of:=[.C5]+[.D5]" office:value-type="float" office:value="2216.66666666667" calcext:value-type="float">
            <text:p>2,216.67</text:p>
          </table:table-cell>
          <table:table-cell table:formula="of:=[.F4]+[.C5]" office:value-type="float" office:value="3333.33333333333" calcext:value-type="float">
            <text:p>3,333.33</text:p>
          </table:table-cell>
          <table:table-cell table:formula="of:=[.G4]-[.C5]" office:value-type="float" office:value="16666.6666666667" calcext:value-type="float">
            <text:p>16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5]*[.$J$3]" office:value-type="float" office:value="500" calcext:value-type="float">
            <text:p>500.00</text:p>
          </table:table-cell>
          <table:table-cell table:formula="of:=[.C6]+[.D6]" office:value-type="float" office:value="2166.66666666667" calcext:value-type="float">
            <text:p>2,166.67</text:p>
          </table:table-cell>
          <table:table-cell table:formula="of:=[.F5]+[.C6]" office:value-type="float" office:value="5000" calcext:value-type="float">
            <text:p>5,000.00</text:p>
          </table:table-cell>
          <table:table-cell table:formula="of:=[.G5]-[.C6]" office:value-type="float" office:value="15000" calcext:value-type="float">
            <text:p>15,000.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6]*[.$J$3]" office:value-type="float" office:value="450" calcext:value-type="float">
            <text:p>450.00</text:p>
          </table:table-cell>
          <table:table-cell table:formula="of:=[.C7]+[.D7]" office:value-type="float" office:value="2116.66666666667" calcext:value-type="float">
            <text:p>2,116.67</text:p>
          </table:table-cell>
          <table:table-cell table:formula="of:=[.F6]+[.C7]" office:value-type="float" office:value="6666.66666666667" calcext:value-type="float">
            <text:p>6,666.67</text:p>
          </table:table-cell>
          <table:table-cell table:formula="of:=[.G6]-[.C7]" office:value-type="float" office:value="13333.3333333333" calcext:value-type="float">
            <text:p>13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7]*[.$J$3]" office:value-type="float" office:value="400" calcext:value-type="float">
            <text:p>400.00</text:p>
          </table:table-cell>
          <table:table-cell table:formula="of:=[.C8]+[.D8]" office:value-type="float" office:value="2066.66666666667" calcext:value-type="float">
            <text:p>2,066.67</text:p>
          </table:table-cell>
          <table:table-cell table:formula="of:=[.F7]+[.C8]" office:value-type="float" office:value="8333.33333333333" calcext:value-type="float">
            <text:p>8,333.33</text:p>
          </table:table-cell>
          <table:table-cell table:formula="of:=[.G7]-[.C8]" office:value-type="float" office:value="11666.6666666667" calcext:value-type="float">
            <text:p>11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8]*[.$J$3]" office:value-type="float" office:value="350" calcext:value-type="float">
            <text:p>350.00</text:p>
          </table:table-cell>
          <table:table-cell table:formula="of:=[.C9]+[.D9]" office:value-type="float" office:value="2016.66666666667" calcext:value-type="float">
            <text:p>2,016.67</text:p>
          </table:table-cell>
          <table:table-cell table:formula="of:=[.F8]+[.C9]" office:value-type="float" office:value="10000" calcext:value-type="float">
            <text:p>10,000.00</text:p>
          </table:table-cell>
          <table:table-cell table:formula="of:=[.G8]-[.C9]" office:value-type="float" office:value="10000" calcext:value-type="float">
            <text:p>10,000.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9]*[.$J$3]" office:value-type="float" office:value="300" calcext:value-type="float">
            <text:p>300.00</text:p>
          </table:table-cell>
          <table:table-cell table:formula="of:=[.C10]+[.D10]" office:value-type="float" office:value="1966.66666666667" calcext:value-type="float">
            <text:p>1,966.67</text:p>
          </table:table-cell>
          <table:table-cell table:formula="of:=[.F9]+[.C10]" office:value-type="float" office:value="11666.6666666667" calcext:value-type="float">
            <text:p>11,666.67</text:p>
          </table:table-cell>
          <table:table-cell table:formula="of:=[.G9]-[.C10]" office:value-type="float" office:value="8333.33333333333" calcext:value-type="float">
            <text:p>8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10]*[.$J$3]" office:value-type="float" office:value="250" calcext:value-type="float">
            <text:p>250.00</text:p>
          </table:table-cell>
          <table:table-cell table:formula="of:=[.C11]+[.D11]" office:value-type="float" office:value="1916.66666666667" calcext:value-type="float">
            <text:p>1,916.67</text:p>
          </table:table-cell>
          <table:table-cell table:formula="of:=[.F10]+[.C11]" office:value-type="float" office:value="13333.3333333333" calcext:value-type="float">
            <text:p>13,333.33</text:p>
          </table:table-cell>
          <table:table-cell table:formula="of:=[.G10]-[.C11]" office:value-type="float" office:value="6666.66666666667" calcext:value-type="float">
            <text:p>6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11]*[.$J$3]" office:value-type="float" office:value="200" calcext:value-type="float">
            <text:p>200.00</text:p>
          </table:table-cell>
          <table:table-cell table:formula="of:=[.C12]+[.D12]" office:value-type="float" office:value="1866.66666666667" calcext:value-type="float">
            <text:p>1,866.67</text:p>
          </table:table-cell>
          <table:table-cell table:formula="of:=[.F11]+[.C12]" office:value-type="float" office:value="15000" calcext:value-type="float">
            <text:p>15,000.00</text:p>
          </table:table-cell>
          <table:table-cell table:formula="of:=[.G11]-[.C12]" office:value-type="float" office:value="5000" calcext:value-type="float">
            <text:p>5,000.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12]*[.$J$3]" office:value-type="float" office:value="150" calcext:value-type="float">
            <text:p>150.00</text:p>
          </table:table-cell>
          <table:table-cell table:formula="of:=[.C13]+[.D13]" office:value-type="float" office:value="1816.66666666667" calcext:value-type="float">
            <text:p>1,816.67</text:p>
          </table:table-cell>
          <table:table-cell table:formula="of:=[.F12]+[.C13]" office:value-type="float" office:value="16666.6666666667" calcext:value-type="float">
            <text:p>16,666.67</text:p>
          </table:table-cell>
          <table:table-cell table:formula="of:=[.G12]-[.C13]" office:value-type="float" office:value="3333.33333333333" calcext:value-type="float">
            <text:p>3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13]*[.$J$3]" office:value-type="float" office:value="100" calcext:value-type="float">
            <text:p>100.00</text:p>
          </table:table-cell>
          <table:table-cell table:formula="of:=[.C14]+[.D14]" office:value-type="float" office:value="1766.66666666667" calcext:value-type="float">
            <text:p>1,766.67</text:p>
          </table:table-cell>
          <table:table-cell table:formula="of:=[.F13]+[.C14]" office:value-type="float" office:value="18333.3333333333" calcext:value-type="float">
            <text:p>18,333.33</text:p>
          </table:table-cell>
          <table:table-cell table:formula="of:=[.G13]-[.C14]" office:value-type="float" office:value="1666.66666666667" calcext:value-type="float">
            <text:p>1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J$1]/[.$J$2]" office:value-type="float" office:value="1666.66666666667" calcext:value-type="float">
            <text:p>1,666.67</text:p>
          </table:table-cell>
          <table:table-cell table:formula="of:=[.G14]*[.$J$3]" office:value-type="float" office:value="50" calcext:value-type="float">
            <text:p>50.00</text:p>
          </table:table-cell>
          <table:table-cell table:formula="of:=[.C15]+[.D15]" office:value-type="float" office:value="1716.66666666667" calcext:value-type="float">
            <text:p>1,716.67</text:p>
          </table:table-cell>
          <table:table-cell table:formula="of:=[.F14]+[.C15]" office:value-type="float" office:value="20000" calcext:value-type="float">
            <text:p>20,000.00</text:p>
          </table:table-cell>
          <table:table-cell table:formula="of:=[.G14]-[.C15]" office:value-type="float" office:value="0" calcext:value-type="float">
            <text:p>0.00</text:p>
          </table:table-cell>
          <table:table-cell table:number-columns-repeated="16377"/>
        </table:table-row>
      </table:table>
      <table:table table:name="METODO PROGRESIVO" table:style-name="ta2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1637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CUADRO DE AMORTIZACIÓN</text:p>
          </table:table-cell>
          <table:covered-table-cell table:number-columns-repeated="5" table:style-name="ce1"/>
          <table:table-cell/>
          <table:table-cell table:style-name="ce4" office:value-type="string" calcext:value-type="string">
            <text:p>P=</text:p>
          </table:table-cell>
          <table:table-cell office:value-type="float" office:value="20000" calcext:value-type="float">
            <text:p>20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n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6" table:formula="of:=[.J1]" office:value-type="float" office:value="20000" calcext:value-type="float">
            <text:p>20000.00</text:p>
          </table:table-cell>
          <table:table-cell/>
          <table:table-cell table:style-name="ce4" office:value-type="string" calcext:value-type="string">
            <text:p>i=</text:p>
          </table:table-cell>
          <table:table-cell table:style-name="ce5" office:value-type="percentage" office:value="0.03" calcext:value-type="percentage">
            <text:p>3 %</text:p>
          </table:table-cell>
          <table:table-cell office:value-type="string" calcext:value-type="string">
            <text:p>mensual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3]*[.$J$3]" office:value-type="float" office:value="600" calcext:value-type="float">
            <text:p>600.00</text:p>
          </table:table-cell>
          <table:table-cell table:formula="of:=[.C4]-[.D4]" office:value-type="float" office:value="1409.24170945926" calcext:value-type="float">
            <text:p>1,409.24</text:p>
          </table:table-cell>
          <table:table-cell table:formula="of:=[.E4]" office:value-type="float" office:value="1409.24170945926" calcext:value-type="float">
            <text:p>1,409.24</text:p>
          </table:table-cell>
          <table:table-cell table:formula="of:=[.G3]-[.E4]" office:value-type="float" office:value="18590.7582905407" calcext:value-type="float">
            <text:p>18,590.76</text:p>
          </table:table-cell>
          <table:table-cell/>
          <table:table-cell table:style-name="ce4" office:value-type="string" calcext:value-type="string">
            <text:p>R=</text:p>
          </table:table-cell>
          <table:table-cell table:style-name="ce7" table:formula="of:=[.J1]*((((1+[.J3])^([.J2]))*[.J3])/(((1+[.J3])^([.J2]))-1))" office:value-type="float" office:value="2009.24170945926" calcext:value-type="float">
            <text:p>2009.2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4]*[.$J$3]" office:value-type="float" office:value="557.722748716222" calcext:value-type="float">
            <text:p>557.72</text:p>
          </table:table-cell>
          <table:table-cell table:formula="of:=[.C5]-[.D5]" office:value-type="float" office:value="1451.51896074304" calcext:value-type="float">
            <text:p>1,451.52</text:p>
          </table:table-cell>
          <table:table-cell table:formula="of:=[.F4]+[.E5]" office:value-type="float" office:value="2860.7606702023" calcext:value-type="float">
            <text:p>2,860.76</text:p>
          </table:table-cell>
          <table:table-cell table:formula="of:=[.G4]-[.E5]" office:value-type="float" office:value="17139.2393297977" calcext:value-type="float">
            <text:p>17,139.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5]*[.$J$3]" office:value-type="float" office:value="514.177179893931" calcext:value-type="float">
            <text:p>514.18</text:p>
          </table:table-cell>
          <table:table-cell table:formula="of:=[.C6]-[.D6]" office:value-type="float" office:value="1495.06452956533" calcext:value-type="float">
            <text:p>1,495.06</text:p>
          </table:table-cell>
          <table:table-cell table:formula="of:=[.F5]+[.E6]" office:value-type="float" office:value="4355.82519976763" calcext:value-type="float">
            <text:p>4,355.83</text:p>
          </table:table-cell>
          <table:table-cell table:formula="of:=[.G5]-[.E6]" office:value-type="float" office:value="15644.1748002324" calcext:value-type="float">
            <text:p>15,644.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6]*[.$J$3]" office:value-type="float" office:value="469.325244006971" calcext:value-type="float">
            <text:p>469.33</text:p>
          </table:table-cell>
          <table:table-cell table:formula="of:=[.C7]-[.D7]" office:value-type="float" office:value="1539.91646545229" calcext:value-type="float">
            <text:p>1,539.92</text:p>
          </table:table-cell>
          <table:table-cell table:formula="of:=[.F6]+[.E7]" office:value-type="float" office:value="5895.74166521992" calcext:value-type="float">
            <text:p>5,895.74</text:p>
          </table:table-cell>
          <table:table-cell table:formula="of:=[.G6]-[.E7]" office:value-type="float" office:value="14104.2583347801" calcext:value-type="float">
            <text:p>14,104.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7]*[.$J$3]" office:value-type="float" office:value="423.127750043402" calcext:value-type="float">
            <text:p>423.13</text:p>
          </table:table-cell>
          <table:table-cell table:formula="of:=[.C8]-[.D8]" office:value-type="float" office:value="1586.11395941586" calcext:value-type="float">
            <text:p>1,586.11</text:p>
          </table:table-cell>
          <table:table-cell table:formula="of:=[.F7]+[.E8]" office:value-type="float" office:value="7481.85562463578" calcext:value-type="float">
            <text:p>7,481.86</text:p>
          </table:table-cell>
          <table:table-cell table:formula="of:=[.G7]-[.E8]" office:value-type="float" office:value="12518.1443753642" calcext:value-type="float">
            <text:p>12,518.1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8]*[.$J$3]" office:value-type="float" office:value="375.544331260927" calcext:value-type="float">
            <text:p>375.54</text:p>
          </table:table-cell>
          <table:table-cell table:formula="of:=[.C9]-[.D9]" office:value-type="float" office:value="1633.69737819834" calcext:value-type="float">
            <text:p>1,633.70</text:p>
          </table:table-cell>
          <table:table-cell table:formula="of:=[.F8]+[.E9]" office:value-type="float" office:value="9115.55300283412" calcext:value-type="float">
            <text:p>9,115.55</text:p>
          </table:table-cell>
          <table:table-cell table:formula="of:=[.G8]-[.E9]" office:value-type="float" office:value="10884.4469971659" calcext:value-type="float">
            <text:p>10,884.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9]*[.$J$3]" office:value-type="float" office:value="326.533409914977" calcext:value-type="float">
            <text:p>326.53</text:p>
          </table:table-cell>
          <table:table-cell table:formula="of:=[.C10]-[.D10]" office:value-type="float" office:value="1682.70829954429" calcext:value-type="float">
            <text:p>1,682.71</text:p>
          </table:table-cell>
          <table:table-cell table:formula="of:=[.F9]+[.E10]" office:value-type="float" office:value="10798.2613023784" calcext:value-type="float">
            <text:p>10,798.26</text:p>
          </table:table-cell>
          <table:table-cell table:formula="of:=[.G9]-[.E10]" office:value-type="float" office:value="9201.7386976216" calcext:value-type="float">
            <text:p>9,201.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10]*[.$J$3]" office:value-type="float" office:value="276.052160928648" calcext:value-type="float">
            <text:p>276.05</text:p>
          </table:table-cell>
          <table:table-cell table:formula="of:=[.C11]-[.D11]" office:value-type="float" office:value="1733.18954853061" calcext:value-type="float">
            <text:p>1,733.19</text:p>
          </table:table-cell>
          <table:table-cell table:formula="of:=[.F10]+[.E11]" office:value-type="float" office:value="12531.450850909" calcext:value-type="float">
            <text:p>12,531.45</text:p>
          </table:table-cell>
          <table:table-cell table:formula="of:=[.G10]-[.E11]" office:value-type="float" office:value="7468.54914909099" calcext:value-type="float">
            <text:p>7,468.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11]*[.$J$3]" office:value-type="float" office:value="224.05647447273" calcext:value-type="float">
            <text:p>224.06</text:p>
          </table:table-cell>
          <table:table-cell table:formula="of:=[.C12]-[.D12]" office:value-type="float" office:value="1785.18523498653" calcext:value-type="float">
            <text:p>1,785.19</text:p>
          </table:table-cell>
          <table:table-cell table:formula="of:=[.F11]+[.E12]" office:value-type="float" office:value="14316.6360858955" calcext:value-type="float">
            <text:p>14,316.64</text:p>
          </table:table-cell>
          <table:table-cell table:formula="of:=[.G11]-[.E12]" office:value-type="float" office:value="5683.36391410445" calcext:value-type="float">
            <text:p>5,683.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12]*[.$J$3]" office:value-type="float" office:value="170.500917423134" calcext:value-type="float">
            <text:p>170.50</text:p>
          </table:table-cell>
          <table:table-cell table:formula="of:=[.C13]-[.D13]" office:value-type="float" office:value="1838.74079203613" calcext:value-type="float">
            <text:p>1,838.74</text:p>
          </table:table-cell>
          <table:table-cell table:formula="of:=[.F12]+[.E13]" office:value-type="float" office:value="16155.3768779317" calcext:value-type="float">
            <text:p>16,155.38</text:p>
          </table:table-cell>
          <table:table-cell table:formula="of:=[.G12]-[.E13]" office:value-type="float" office:value="3844.62312206833" calcext:value-type="float">
            <text:p>3,844.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13]*[.$J$3]" office:value-type="float" office:value="115.33869366205" calcext:value-type="float">
            <text:p>115.34</text:p>
          </table:table-cell>
          <table:table-cell table:formula="of:=[.C14]-[.D14]" office:value-type="float" office:value="1893.90301579721" calcext:value-type="float">
            <text:p>1,893.90</text:p>
          </table:table-cell>
          <table:table-cell table:formula="of:=[.F13]+[.E14]" office:value-type="float" office:value="18049.2798937289" calcext:value-type="float">
            <text:p>18,049.28</text:p>
          </table:table-cell>
          <table:table-cell table:formula="of:=[.G13]-[.E14]" office:value-type="float" office:value="1950.72010627111" calcext:value-type="float">
            <text:p>1,950.7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J$4]" office:value-type="float" office:value="2009.24170945926" calcext:value-type="float">
            <text:p>2,009.24</text:p>
          </table:table-cell>
          <table:table-cell table:formula="of:=[.G14]*[.$J$3]" office:value-type="float" office:value="58.5216031881334" calcext:value-type="float">
            <text:p>58.52</text:p>
          </table:table-cell>
          <table:table-cell table:formula="of:=[.C15]-[.D15]" office:value-type="float" office:value="1950.72010627113" calcext:value-type="float">
            <text:p>1,950.72</text:p>
          </table:table-cell>
          <table:table-cell table:formula="of:=[.F14]+[.E15]" office:value-type="float" office:value="20000" calcext:value-type="float">
            <text:p>20,000.00</text:p>
          </table:table-cell>
          <table:table-cell table:formula="of:=[.G14]-[.E15]" office:value-type="float" office:value="-0.0000000000136424205265939" calcext:value-type="float">
            <text:p>0.00</text:p>
          </table:table-cell>
          <table:table-cell table:number-columns-repeated="16377"/>
        </table:table-row>
      </table:table>
      <table:table table:name="INTERES FLAT" table:style-name="ta3">
        <table:table-column table:style-name="co1" table:default-cell-style-name="Default"/>
        <table:table-column table:style-name="co4" table:default-cell-style-name="ce2"/>
        <table:table-column table:style-name="co1" table:number-columns-repeated="5" table:default-cell-style-name="ce3"/>
        <table:table-column table:style-name="co1" table:number-columns-repeated="16377" table:default-cell-style-name="Default"/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UADRO DE AMORTIZACIÓN</text:p>
          </table:table-cell>
          <table:covered-table-cell table:number-columns-repeated="5" table:style-name="ce1"/>
          <table:table-cell/>
          <table:table-cell table:style-name="ce4" office:value-type="string" calcext:value-type="string">
            <text:p>P=</text:p>
          </table:table-cell>
          <table:table-cell office:value-type="float" office:value="20000" calcext:value-type="float">
            <text:p>20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n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table:formula="of:=[.J2]" office:value-type="float" office:value="20000" calcext:value-type="float">
            <text:p>20000</text:p>
          </table:table-cell>
          <table:table-cell/>
          <table:table-cell table:style-name="ce4" office:value-type="string" calcext:value-type="string">
            <text:p>i=</text:p>
          </table:table-cell>
          <table:table-cell table:style-name="ce5" office:value-type="percentage" office:value="0.03" calcext:value-type="percentage">
            <text:p>3 %</text:p>
          </table:table-cell>
          <table:table-cell office:value-type="string" calcext:value-type="string">
            <text:p>mensual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5]+[.D5]" office:value-type="float" office:value="2266.66666666667" calcext:value-type="float">
            <text:p>2,266.67</text:p>
          </table:table-cell>
          <table:table-cell table:formula="of:=[.C5]" office:value-type="float" office:value="1666.66666666667" calcext:value-type="float">
            <text:p>1,666.67</text:p>
          </table:table-cell>
          <table:table-cell table:formula="of:=[.G4]-[.C5]" office:value-type="float" office:value="18333.3333333333" calcext:value-type="float">
            <text:p>18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6]+[.D6]" office:value-type="float" office:value="2266.66666666667" calcext:value-type="float">
            <text:p>2,266.67</text:p>
          </table:table-cell>
          <table:table-cell table:formula="of:=[.F5]+[.C6]" office:value-type="float" office:value="3333.33333333333" calcext:value-type="float">
            <text:p>3,333.33</text:p>
          </table:table-cell>
          <table:table-cell table:formula="of:=[.G5]-[.C6]" office:value-type="float" office:value="16666.6666666667" calcext:value-type="float">
            <text:p>16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7]+[.D7]" office:value-type="float" office:value="2266.66666666667" calcext:value-type="float">
            <text:p>2,266.67</text:p>
          </table:table-cell>
          <table:table-cell table:formula="of:=[.F6]+[.C7]" office:value-type="float" office:value="5000" calcext:value-type="float">
            <text:p>5,000.00</text:p>
          </table:table-cell>
          <table:table-cell table:formula="of:=[.G6]-[.C7]" office:value-type="float" office:value="15000" calcext:value-type="float">
            <text:p>15,000.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8]+[.D8]" office:value-type="float" office:value="2266.66666666667" calcext:value-type="float">
            <text:p>2,266.67</text:p>
          </table:table-cell>
          <table:table-cell table:formula="of:=[.F7]+[.C8]" office:value-type="float" office:value="6666.66666666667" calcext:value-type="float">
            <text:p>6,666.67</text:p>
          </table:table-cell>
          <table:table-cell table:formula="of:=[.G7]-[.C8]" office:value-type="float" office:value="13333.3333333333" calcext:value-type="float">
            <text:p>13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9]+[.D9]" office:value-type="float" office:value="2266.66666666667" calcext:value-type="float">
            <text:p>2,266.67</text:p>
          </table:table-cell>
          <table:table-cell table:formula="of:=[.F8]+[.C9]" office:value-type="float" office:value="8333.33333333333" calcext:value-type="float">
            <text:p>8,333.33</text:p>
          </table:table-cell>
          <table:table-cell table:formula="of:=[.G8]-[.C9]" office:value-type="float" office:value="11666.6666666667" calcext:value-type="float">
            <text:p>11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0]+[.D10]" office:value-type="float" office:value="2266.66666666667" calcext:value-type="float">
            <text:p>2,266.67</text:p>
          </table:table-cell>
          <table:table-cell table:formula="of:=[.F9]+[.C10]" office:value-type="float" office:value="10000" calcext:value-type="float">
            <text:p>10,000.00</text:p>
          </table:table-cell>
          <table:table-cell table:formula="of:=[.G9]-[.C10]" office:value-type="float" office:value="10000" calcext:value-type="float">
            <text:p>10,000.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1]+[.D11]" office:value-type="float" office:value="2266.66666666667" calcext:value-type="float">
            <text:p>2,266.67</text:p>
          </table:table-cell>
          <table:table-cell table:formula="of:=[.F10]+[.C11]" office:value-type="float" office:value="11666.6666666667" calcext:value-type="float">
            <text:p>11,666.67</text:p>
          </table:table-cell>
          <table:table-cell table:formula="of:=[.G10]-[.C11]" office:value-type="float" office:value="8333.33333333333" calcext:value-type="float">
            <text:p>8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2]+[.D12]" office:value-type="float" office:value="2266.66666666667" calcext:value-type="float">
            <text:p>2,266.67</text:p>
          </table:table-cell>
          <table:table-cell table:formula="of:=[.F11]+[.C12]" office:value-type="float" office:value="13333.3333333333" calcext:value-type="float">
            <text:p>13,333.33</text:p>
          </table:table-cell>
          <table:table-cell table:formula="of:=[.G11]-[.C12]" office:value-type="float" office:value="6666.66666666667" calcext:value-type="float">
            <text:p>6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3]+[.D13]" office:value-type="float" office:value="2266.66666666667" calcext:value-type="float">
            <text:p>2,266.67</text:p>
          </table:table-cell>
          <table:table-cell table:formula="of:=[.F12]+[.C13]" office:value-type="float" office:value="15000" calcext:value-type="float">
            <text:p>15,000.00</text:p>
          </table:table-cell>
          <table:table-cell table:formula="of:=[.G12]-[.C13]" office:value-type="float" office:value="5000" calcext:value-type="float">
            <text:p>5,000.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4]+[.D14]" office:value-type="float" office:value="2266.66666666667" calcext:value-type="float">
            <text:p>2,266.67</text:p>
          </table:table-cell>
          <table:table-cell table:formula="of:=[.F13]+[.C14]" office:value-type="float" office:value="16666.6666666667" calcext:value-type="float">
            <text:p>16,666.67</text:p>
          </table:table-cell>
          <table:table-cell table:formula="of:=[.G13]-[.C14]" office:value-type="float" office:value="3333.33333333333" calcext:value-type="float">
            <text:p>3,333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5]+[.D15]" office:value-type="float" office:value="2266.66666666667" calcext:value-type="float">
            <text:p>2,266.67</text:p>
          </table:table-cell>
          <table:table-cell table:formula="of:=[.F14]+[.C15]" office:value-type="float" office:value="18333.3333333333" calcext:value-type="float">
            <text:p>18,333.33</text:p>
          </table:table-cell>
          <table:table-cell table:formula="of:=[.G14]-[.C15]" office:value-type="float" office:value="1666.66666666667" calcext:value-type="float">
            <text:p>1,666.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J$2]/[.$J$3]" office:value-type="float" office:value="1666.66666666667" calcext:value-type="float">
            <text:p>1,666.67</text:p>
          </table:table-cell>
          <table:table-cell table:formula="of:=[.$G$4]*[.$J$4]" office:value-type="float" office:value="600" calcext:value-type="float">
            <text:p>600.00</text:p>
          </table:table-cell>
          <table:table-cell table:formula="of:=[.C16]+[.D16]" office:value-type="float" office:value="2266.66666666667" calcext:value-type="float">
            <text:p>2,266.67</text:p>
          </table:table-cell>
          <table:table-cell table:formula="of:=[.F15]+[.C16]" office:value-type="float" office:value="20000" calcext:value-type="float">
            <text:p>20,000.00</text:p>
          </table:table-cell>
          <table:table-cell table:formula="of:=[.G15]-[.C16]" office:value-type="float" office:value="0" calcext:value-type="float">
            <text:p>0.00</text:p>
          </table:table-cell>
          <table:table-cell table:number-columns-repeated="16377"/>
        </table:table-row>
      </table:table>
      <table:table table:name="METODO AMERICANO" table:style-name="ta4">
        <table:table-column table:style-name="co5" table:default-cell-style-name="Default"/>
        <table:table-column table:style-name="co1" table:default-cell-style-name="ce2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9"/>
        <table:table-column table:style-name="co1" table:number-columns-repeated="16370" table:default-cell-style-name="Default"/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 table:number-columns-repeated="3"/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ADRO DE FONDO DE AMORTIZACIÓN</text:p>
          </table:table-cell>
          <table:covered-table-cell table:number-columns-repeated="4" table:style-name="ce1"/>
          <table:table-cell/>
          <table:table-cell table:style-name="ce4" office:value-type="string" calcext:value-type="string">
            <text:p>P=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Default" office:value-type="string" calcext:value-type="string">
            <text:p>CUADRO AMORTIZACION DE INTERESES</text:p>
          </table:table-cell>
          <table:table-cell table:style-name="Default" table:number-columns-repeated="2"/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DEPÓSITO</text:p>
          </table:table-cell>
          <table:table-cell table:style-name="ce2" office:value-type="string" calcext:value-type="string">
            <text:p>INTERESES</text:p>
          </table:table-cell>
          <table:table-cell table:style-name="ce8" office:value-type="string" calcext:value-type="string">
            <text:p>ACUMULACIÓN AL FONDO</text:p>
          </table:table-cell>
          <table:table-cell table:style-name="ce8" office:value-type="string" calcext:value-type="string">
            <text:p>VALOR DEL FONDO AL FINAL DEL PERIODO</text:p>
          </table:table-cell>
          <table:table-cell/>
          <table:table-cell table:style-name="ce4" office:value-type="string" calcext:value-type="string">
            <text:p>n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INTERES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4]*(((1+[.$I$6])^([.B4]-1))-1)" office:value-type="float" office:value="0" calcext:value-type="float">
            <text:p>0.00</text:p>
          </table:table-cell>
          <table:table-cell table:formula="of:=[.C4]*((1+[.$I$6])^([.B4]-1))" office:value-type="float" office:value="1491.19193245903" calcext:value-type="float">
            <text:p>1,491.19</text:p>
          </table:table-cell>
          <table:table-cell table:formula="of:=[.C4]*(((1+[.$I$6])^([.B4])-1)/([.$I$6]))" office:value-type="float" office:value="1491.19193245903" calcext:value-type="float">
            <text:p>1,491.19</text:p>
          </table:table-cell>
          <table:table-cell/>
          <table:table-cell table:style-name="ce4" office:value-type="string" calcext:value-type="string">
            <text:p>i=</text:p>
          </table:table-cell>
          <table:table-cell table:style-name="ce5" office:value-type="percentage" office:value="0.03" calcext:value-type="percentage">
            <text:p>3 %</text:p>
          </table:table-cell>
          <table:table-cell office:value-type="string" calcext:value-type="string">
            <text:p>mensua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4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5]*(((1+[.$I$6])^([.B5]-1))-1)" office:value-type="float" office:value="29.8238386491806" calcext:value-type="float">
            <text:p>29.82</text:p>
          </table:table-cell>
          <table:table-cell table:formula="of:=[.C5]*((1+[.$I$6])^([.B5]-1))" office:value-type="float" office:value="1521.01577110821" calcext:value-type="float">
            <text:p>1,521.02</text:p>
          </table:table-cell>
          <table:table-cell table:formula="of:=[.C5]*(((1+[.$I$6])^([.B5])-1)/([.$I$6]))" office:value-type="float" office:value="3012.20770356724" calcext:value-type="float">
            <text:p>3,012.21</text:p>
          </table:table-cell>
          <table:table-cell/>
          <table:table-cell table:style-name="ce4" office:value-type="string" calcext:value-type="string">
            <text:p>R=</text:p>
          </table:table-cell>
          <table:table-cell table:style-name="ce7" table:formula="of:=[.I2]*(([.I6])/(((1+[.I6])^([.I3]))-1))" office:value-type="float" office:value="1491.19193245903" calcext:value-type="float">
            <text:p>1491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5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6]*(((1+[.$I$6])^([.B6]-1))-1)" office:value-type="float" office:value="60.2441540713448" calcext:value-type="float">
            <text:p>60.24</text:p>
          </table:table-cell>
          <table:table-cell table:formula="of:=[.C6]*((1+[.$I$6])^([.B6]-1))" office:value-type="float" office:value="1551.43608653038" calcext:value-type="float">
            <text:p>1,551.44</text:p>
          </table:table-cell>
          <table:table-cell table:formula="of:=[.C6]*(((1+[.$I$6])^([.B6])-1)/([.$I$6]))" office:value-type="float" office:value="4563.64379009763" calcext:value-type="float">
            <text:p>4,563.64</text:p>
          </table:table-cell>
          <table:table-cell/>
          <table:table-cell table:style-name="ce4" office:value-type="string" calcext:value-type="string">
            <text:p>r=</text:p>
          </table:table-cell>
          <table:table-cell table:style-name="ce5" office:value-type="percentage" office:value="0.02" calcext:value-type="percentage">
            <text:p>2 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6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7]*(((1+[.$I$6])^([.B7]-1))-1)" office:value-type="float" office:value="91.2728758019525" calcext:value-type="float">
            <text:p>91.27</text:p>
          </table:table-cell>
          <table:table-cell table:formula="of:=[.C7]*((1+[.$I$6])^([.B7]-1))" office:value-type="float" office:value="1582.46480826098" calcext:value-type="float">
            <text:p>1,582.46</text:p>
          </table:table-cell>
          <table:table-cell table:formula="of:=[.C7]*(((1+[.$I$6])^([.B7])-1)/([.$I$6]))" office:value-type="float" office:value="6146.1085983586" calcext:value-type="float">
            <text:p>6,146.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7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8]*(((1+[.$I$6])^([.B8]-1))-1)" office:value-type="float" office:value="122.922171967172" calcext:value-type="float">
            <text:p>122.92</text:p>
          </table:table-cell>
          <table:table-cell table:formula="of:=[.C8]*((1+[.$I$6])^([.B8]-1))" office:value-type="float" office:value="1614.1141044262" calcext:value-type="float">
            <text:p>1,614.11</text:p>
          </table:table-cell>
          <table:table-cell table:formula="of:=[.C8]*(((1+[.$I$6])^([.B8])-1)/([.$I$6]))" office:value-type="float" office:value="7760.2227027848" calcext:value-type="float">
            <text:p>7,760.2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8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9]*(((1+[.$I$6])^([.B9]-1))-1)" office:value-type="float" office:value="155.204454055696" calcext:value-type="float">
            <text:p>155.20</text:p>
          </table:table-cell>
          <table:table-cell table:formula="of:=[.C9]*((1+[.$I$6])^([.B9]-1))" office:value-type="float" office:value="1646.39638651473" calcext:value-type="float">
            <text:p>1,646.40</text:p>
          </table:table-cell>
          <table:table-cell table:formula="of:=[.C9]*(((1+[.$I$6])^([.B9])-1)/([.$I$6]))" office:value-type="float" office:value="9406.61908929953" calcext:value-type="float">
            <text:p>9,406.6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9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10]*(((1+[.$I$6])^([.B10]-1))-1)" office:value-type="float" office:value="188.132381785991" calcext:value-type="float">
            <text:p>188.13</text:p>
          </table:table-cell>
          <table:table-cell table:formula="of:=[.C10]*((1+[.$I$6])^([.B10]-1))" office:value-type="float" office:value="1679.32431424502" calcext:value-type="float">
            <text:p>1,679.32</text:p>
          </table:table-cell>
          <table:table-cell table:formula="of:=[.C10]*(((1+[.$I$6])^([.B10])-1)/([.$I$6]))" office:value-type="float" office:value="11085.9434035446" calcext:value-type="float">
            <text:p>11,085.9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10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11]*(((1+[.$I$6])^([.B11]-1))-1)" office:value-type="float" office:value="221.718868070891" calcext:value-type="float">
            <text:p>221.72</text:p>
          </table:table-cell>
          <table:table-cell table:formula="of:=[.C11]*((1+[.$I$6])^([.B11]-1))" office:value-type="float" office:value="1712.91080052992" calcext:value-type="float">
            <text:p>1,712.91</text:p>
          </table:table-cell>
          <table:table-cell table:formula="of:=[.C11]*(((1+[.$I$6])^([.B11])-1)/([.$I$6]))" office:value-type="float" office:value="12798.8542040745" calcext:value-type="float">
            <text:p>12,798.8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11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12]*(((1+[.$I$6])^([.B12]-1))-1)" office:value-type="float" office:value="255.97708408149" calcext:value-type="float">
            <text:p>255.98</text:p>
          </table:table-cell>
          <table:table-cell table:formula="of:=[.C12]*((1+[.$I$6])^([.B12]-1))" office:value-type="float" office:value="1747.16901654052" calcext:value-type="float">
            <text:p>1,747.17</text:p>
          </table:table-cell>
          <table:table-cell table:formula="of:=[.C12]*(((1+[.$I$6])^([.B12])-1)/([.$I$6]))" office:value-type="float" office:value="14546.023220615" calcext:value-type="float">
            <text:p>14,546.0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12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13]*(((1+[.$I$6])^([.B13]-1))-1)" office:value-type="float" office:value="290.9204644123" calcext:value-type="float">
            <text:p>290.92</text:p>
          </table:table-cell>
          <table:table-cell table:formula="of:=[.C13]*((1+[.$I$6])^([.B13]-1))" office:value-type="float" office:value="1782.11239687133" calcext:value-type="float">
            <text:p>1,782.11</text:p>
          </table:table-cell>
          <table:table-cell table:formula="of:=[.C13]*(((1+[.$I$6])^([.B13])-1)/([.$I$6]))" office:value-type="float" office:value="16328.1356174863" calcext:value-type="float">
            <text:p>16,328.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13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14]*(((1+[.$I$6])^([.B14]-1))-1)" office:value-type="float" office:value="326.562712349727" calcext:value-type="float">
            <text:p>326.56</text:p>
          </table:table-cell>
          <table:table-cell table:formula="of:=[.C14]*((1+[.$I$6])^([.B14]-1))" office:value-type="float" office:value="1817.75464480876" calcext:value-type="float">
            <text:p>1,817.75</text:p>
          </table:table-cell>
          <table:table-cell table:formula="of:=[.C14]*(((1+[.$I$6])^([.B14])-1)/([.$I$6]))" office:value-type="float" office:value="18145.8902622951" calcext:value-type="float">
            <text:p>18,145.8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14]*[.$I$4]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I$5]" office:value-type="float" office:value="1491.19193245903" calcext:value-type="float">
            <text:p>1,491.19</text:p>
          </table:table-cell>
          <table:table-cell table:formula="of:=[.C15]*(((1+[.$I$6])^([.B15]-1))-1)" office:value-type="float" office:value="362.917805245902" calcext:value-type="float">
            <text:p>362.92</text:p>
          </table:table-cell>
          <table:table-cell table:formula="of:=[.C15]*((1+[.$I$6])^([.B15]-1))" office:value-type="float" office:value="1854.10973770493" calcext:value-type="float">
            <text:p>1,854.11</text:p>
          </table:table-cell>
          <table:table-cell table:formula="of:=[.C15]*(((1+[.$I$6])^([.B15])-1)/([.$I$6]))" office:value-type="float" office:value="20000" calcext:value-type="float">
            <text:p>20,000.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[.$I$2]" office:value-type="float" office:value="20000" calcext:value-type="float">
            <text:p>20000</text:p>
          </table:table-cell>
          <table:table-cell table:formula="of:=[.M15]*[.$I$4]" office:value-type="float" office:value="600" calcext:value-type="float">
            <text:p>600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TERES_20_FLAT" style:display-name="PageStyle_INTERES FL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ES_20_AL_20_RABATIR" style:display-name="PageStyle_INTERES AL RABATI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PROGRESIVO" style:display-name="PageStyle_METODO PROGRES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AMERICANO" style:display-name="PageStyle_METODO AMERICA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Yupanqui Pillihuamán</meta:initial-creator>
    <dc:creator>EDISON ACHALMA</dc:creator>
    <meta:creation-date>2018-06-18T20:26:13</meta:creation-date>
    <dc:date>2018-09-04T13:07:53</dc:date>
    <meta:generator>LibreOffice/24.2.4.2$Linux_X86_64 LibreOffice_project/420$Build-2</meta:generator>
    <meta:document-statistic meta:table-count="4" meta:cell-count="399" meta:object-count="0"/>
    <meta:user-defined meta:name="AppVersion">16.0300</meta:user-defined>
  </office:meta>
</office:document-meta>
</file>