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6.07cm"/>
    </style:style>
    <style:style style:name="co7" style:family="table-column">
      <style:table-column-properties fo:break-before="auto" style:column-width="0.111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2.489cm"/>
    </style:style>
    <style:style style:name="co11" style:family="table-column">
      <style:table-column-properties fo:break-before="auto" style:column-width="2.5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NCUESTAS">
      <style:table-properties table:display="true" style:writing-mode="lr-tb"/>
    </style:style>
    <style:style style:name="ta3" style:family="table" style:master-page-name="PageStyle_5f_ENCUESTA_20_02">
      <style:table-properties table:display="true" style:writing-mode="lr-tb"/>
    </style:style>
    <style:style style:name="ta4" style:family="table" style:master-page-name="PageStyle_5f_Hoja4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34">
      <style:table-cell-properties style:rotation-align="none"/>
    </style:style>
    <style:style style:name="ce5" style:family="table-cell" style:parent-style-name="Default" style:data-style-name="N133">
      <style:table-cell-properties style:rotation-align="none"/>
    </style:style>
    <style:style style:name="ce6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34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manda del consumo de carne de res en la ciudad de Santa Cruz de la Sierra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Unid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office:value-type="float" office:value="200000" calcext:value-type="float">
            <text:p><text:s/>200,000 <text:s text:c="3"/></text:p>
          </table:table-cell>
          <table:table-cell office:value-type="string" calcext:value-type="string">
            <text:p>Habitant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oblación objetivo</text:p>
          </table:table-cell>
          <table:table-cell table:style-name="ce4" table:formula="of:=[.C5]*90%" office:value-type="float" office:value="180000" calcext:value-type="float">
            <text:p><text:s/>180,000 <text:s text:c="3"/></text:p>
          </table:table-cell>
          <table:table-cell table:formula="of:=[.D5]" office:value-type="string" office:string-value="Habitantes" calcext:value-type="string">
            <text:p>Habitant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ercado objetivo</text:p>
          </table:table-cell>
          <table:table-cell table:style-name="ce4" table:formula="of:=[.C6]*60%" office:value-type="float" office:value="108000" calcext:value-type="float">
            <text:p><text:s/>108,000 <text:s text:c="3"/></text:p>
          </table:table-cell>
          <table:table-cell table:formula="of:=[.D6]" office:value-type="string" office:string-value="Habitantes" calcext:value-type="string">
            <text:p>Habitant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ercado meta</text:p>
          </table:table-cell>
          <table:table-cell table:style-name="ce4" table:formula="of:=[.C7]*47%" office:value-type="float" office:value="50760" calcext:value-type="float">
            <text:p><text:s/>50,760 <text:s text:c="3"/></text:p>
          </table:table-cell>
          <table:table-cell office:value-type="string" calcext:value-type="string">
            <text:p>Person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sumo promedio</text:p>
          </table:table-cell>
          <table:table-cell table:style-name="ce5" table:formula="of:=[$'ENCUESTA 02'.F51]" office:value-type="float" office:value="74.3666382978723" calcext:value-type="float">
            <text:p><text:s/>74.37 <text:s text:c="3"/></text:p>
          </table:table-cell>
          <table:table-cell office:value-type="string" calcext:value-type="string">
            <text:p>Kg/año-persona</text:p>
          </table:table-cell>
          <table:table-cell table:number-columns-repeated="16380"/>
        </table:table-row>
        <table:table-row table:style-name="ro2">
          <table:table-cell/>
          <table:table-cell table:style-name="ce2" office:value-type="string" calcext:value-type="string">
            <text:p>Demanda </text:p>
          </table:table-cell>
          <table:table-cell table:style-name="ce6" table:formula="of:=[.C9]*[.C8]" office:value-type="float" office:value="3774850.56" calcext:value-type="float">
            <text:p><text:s/>3,774,851 <text:s text:c="3"/></text:p>
          </table:table-cell>
          <table:table-cell table:style-name="ce2" office:value-type="string" calcext:value-type="string">
            <text:p>Kg/año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manda</text:p>
          </table:table-cell>
          <table:table-cell/>
          <table:table-cell table:style-name="ce7" office:value-type="string" calcext:value-type="string">
            <text:p>TASA=</text:p>
          </table:table-cell>
          <table:table-cell table:style-name="ce8" office:value-type="percentage" office:value="0.03" calcext:value-type="percentage">
            <text:p>3 %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]" office:value-type="float" office:value="3774850.56" calcext:value-type="float">
            <text:p><text:s/>3,774,851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3]*(1+[.$F$12])" office:value-type="float" office:value="3888096.0768" calcext:value-type="float">
            <text:p><text:s/>3,888,096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4]*(1+[.$F$12])" office:value-type="float" office:value="4004738.959104" calcext:value-type="float">
            <text:p><text:s/>4,004,739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5]*(1+[.$F$12])" office:value-type="float" office:value="4124881.12787712" calcext:value-type="float">
            <text:p><text:s/>4,124,881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6]*(1+[.$F$12])" office:value-type="float" office:value="4248627.56171344" calcext:value-type="float">
            <text:p><text:s/>4,248,628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7]*(1+[.$F$12])" office:value-type="float" office:value="4376086.38856484" calcext:value-type="float">
            <text:p><text:s/>4,376,086 <text:s text:c="3"/></text:p>
          </table:table-cell>
          <table:table-cell table:number-columns-repeated="16381"/>
        </table:table-row>
      </table:table>
      <table:table table:name="ENCUESTAS" table:style-name="ta2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=S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2=No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° Encuesta</text:p>
          </table:table-cell>
          <table:table-cell table:style-name="ce1" office:value-type="string" calcext:value-type="string">
            <text:p>Consume</text:p>
          </table:table-cell>
          <table:table-cell table:style-name="ce1" office:value-type="string" calcext:value-type="string">
            <text:p>Fecuencia de consumo "semanal"</text:p>
          </table:table-cell>
          <table:table-cell table:style-name="ce1"/>
          <table:table-cell table:number-columns-repeated="16380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"/>
          <table:table-cell table:number-columns-repeated="1637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</table:table>
      <table:table table:name="ENCUESTA 02" table:style-name="ta3"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ce11"/>
        <table:table-column table:style-name="co8" table:default-cell-style-name="ce11"/>
        <table:table-column table:style-name="co9" table:default-cell-style-name="ce3"/>
        <table:table-column table:style-name="co5" table:number-columns-repeated="1637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N° Encuesta</text:p>
          </table:table-cell>
          <table:table-cell table:style-name="ce1" office:value-type="string" calcext:value-type="string">
            <text:p>Consume</text:p>
          </table:table-cell>
          <table:table-cell table:style-name="ce1" office:value-type="string" calcext:value-type="string">
            <text:p>Fecuencia de consumo "semanal"</text:p>
          </table:table-cell>
          <table:table-cell table:style-name="ce12" office:value-type="string" calcext:value-type="string">
            <text:p>Cantidad de consumo "gramos"</text:p>
          </table:table-cell>
          <table:table-cell table:style-name="ce12" office:value-type="string" calcext:value-type="string">
            <text:p>Demanda anual de consumo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formula="of:=[.E3]*[.D3]*52" office:value-type="float" office:value="12688" calcext:value-type="float">
            <text:p><text:s/>12,68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table:formula="of:=[.E4]*[.D4]*52" office:value-type="float" office:value="140140" calcext:value-type="float">
            <text:p><text:s/>140,14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table:formula="of:=[.E5]*[.D5]*52" office:value-type="float" office:value="141596" calcext:value-type="float">
            <text:p><text:s/>141,59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table:formula="of:=[.E6]*[.D6]*52" office:value-type="float" office:value="81588" calcext:value-type="float">
            <text:p><text:s/>81,58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formula="of:=[.E7]*[.D7]*52" office:value-type="float" office:value="23712" calcext:value-type="float">
            <text:p><text:s/>23,71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table:formula="of:=[.E8]*[.D8]*52" office:value-type="float" office:value="139048" calcext:value-type="float">
            <text:p><text:s/>139,04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E9]*[.D9]*52" office:value-type="float" office:value="12064" calcext:value-type="float">
            <text:p><text:s/>12,06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[.E10]*[.D10]*52" office:value-type="float" office:value="48880" calcext:value-type="float">
            <text:p><text:s/>48,88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formula="of:=[.E11]*[.D11]*52" office:value-type="float" office:value="27040" calcext:value-type="float">
            <text:p><text:s/>27,04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formula="of:=[.E12]*[.D12]*52" office:value-type="float" office:value="107016" calcext:value-type="float">
            <text:p><text:s/>107,0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formula="of:=[.E13]*[.D13]*52" office:value-type="float" office:value="13936" calcext:value-type="float">
            <text:p><text:s/>13,93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  <table:table-cell table:formula="of:=[.E14]*[.D14]*52" office:value-type="float" office:value="90948" calcext:value-type="float">
            <text:p><text:s/>90,94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table:formula="of:=[.E15]*[.D15]*52" office:value-type="float" office:value="44096" calcext:value-type="float">
            <text:p><text:s/>44,09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formula="of:=[.E16]*[.D16]*52" office:value-type="float" office:value="68224" calcext:value-type="float">
            <text:p><text:s/>68,22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formula="of:=[.E17]*[.D17]*52" office:value-type="float" office:value="33280" calcext:value-type="float">
            <text:p><text:s/>33,28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E18]*[.D18]*52" office:value-type="float" office:value="22516" calcext:value-type="float">
            <text:p><text:s/>22,5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formula="of:=[.E19]*[.D19]*52" office:value-type="float" office:value="7176" calcext:value-type="float">
            <text:p><text:s/>7,17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table:formula="of:=[.E20]*[.D20]*52" office:value-type="float" office:value="174356" calcext:value-type="float">
            <text:p><text:s/>174,35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formula="of:=[.E21]*[.D21]*52" office:value-type="float" office:value="46800" calcext:value-type="float">
            <text:p><text:s/>46,80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table:formula="of:=[.E22]*[.D22]*52" office:value-type="float" office:value="66924" calcext:value-type="float">
            <text:p><text:s/>66,92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formula="of:=[.E23]*[.D23]*52" office:value-type="float" office:value="30472" calcext:value-type="float">
            <text:p><text:s/>30,47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table:formula="of:=[.E24]*[.D24]*52" office:value-type="float" office:value="140504" calcext:value-type="float">
            <text:p><text:s/>140,50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table:formula="of:=[.E25]*[.D25]*52" office:value-type="float" office:value="55328" calcext:value-type="float">
            <text:p><text:s/>55,32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[.E26]*[.D26]*52" office:value-type="float" office:value="6916" calcext:value-type="float">
            <text:p><text:s/>6,9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formula="of:=[.E27]*[.D27]*52" office:value-type="float" office:value="79872" calcext:value-type="float">
            <text:p><text:s/>79,87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[.E28]*[.D28]*52" office:value-type="float" office:value="101712" calcext:value-type="float">
            <text:p><text:s/>101,71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formula="of:=[.E29]*[.D29]*52" office:value-type="float" office:value="28028" calcext:value-type="float">
            <text:p><text:s/>28,02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formula="of:=[.E30]*[.D30]*52" office:value-type="float" office:value="57876" calcext:value-type="float">
            <text:p><text:s/>57,87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table:formula="of:=[.E31]*[.D31]*52" office:value-type="float" office:value="27872" calcext:value-type="float">
            <text:p><text:s/>27,87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formula="of:=[.E32]*[.D32]*52" office:value-type="float" office:value="159744" calcext:value-type="float">
            <text:p><text:s/>159,74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table:formula="of:=[.E33]*[.D33]*52" office:value-type="float" office:value="61308" calcext:value-type="float">
            <text:p><text:s/>61,30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table:formula="of:=[.E34]*[.D34]*52" office:value-type="float" office:value="119340" calcext:value-type="float">
            <text:p><text:s/>119,34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formula="of:=[.E35]*[.D35]*52" office:value-type="float" office:value="43992" calcext:value-type="float">
            <text:p><text:s/>43,99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formula="of:=[.E36]*[.D36]*52" office:value-type="float" office:value="113620" calcext:value-type="float">
            <text:p><text:s/>113,62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table:formula="of:=[.E37]*[.D37]*52" office:value-type="float" office:value="107016" calcext:value-type="float">
            <text:p><text:s/>107,0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table:formula="of:=[.E38]*[.D38]*52" office:value-type="float" office:value="58656" calcext:value-type="float">
            <text:p><text:s/>58,65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table:formula="of:=[.E39]*[.D39]*52" office:value-type="float" office:value="124124" calcext:value-type="float">
            <text:p><text:s/>124,12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formula="of:=[.E40]*[.D40]*52" office:value-type="float" office:value="137228" calcext:value-type="float">
            <text:p><text:s/>137,22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  <table:table-cell table:formula="of:=[.E41]*[.D41]*52" office:value-type="float" office:value="161616" calcext:value-type="float">
            <text:p><text:s/>161,6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7" calcext:value-type="float">
            <text:p>427</text:p>
          </table:table-cell>
          <table:table-cell table:formula="of:=[.E42]*[.D42]*52" office:value-type="float" office:value="88816" calcext:value-type="float">
            <text:p><text:s/>88,816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table:formula="of:=[.E43]*[.D43]*52" office:value-type="float" office:value="156312" calcext:value-type="float">
            <text:p><text:s/>156,312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formula="of:=[.E44]*[.D44]*52" office:value-type="float" office:value="19448" calcext:value-type="float">
            <text:p><text:s/>19,448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formula="of:=[.E45]*[.D45]*52" office:value-type="float" office:value="23504" calcext:value-type="float">
            <text:p><text:s/>23,50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formula="of:=[.E46]*[.D46]*52" office:value-type="float" office:value="123760" calcext:value-type="float">
            <text:p><text:s/>123,76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5" calcext:value-type="float">
            <text:p>465</text:p>
          </table:table-cell>
          <table:table-cell table:formula="of:=[.E47]*[.D47]*52" office:value-type="float" office:value="145080" calcext:value-type="float">
            <text:p><text:s/>145,080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formula="of:=[.E48]*[.D48]*52" office:value-type="float" office:value="13624" calcext:value-type="float">
            <text:p><text:s/>13,624 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formula="of:=[.E49]*[.D49]*52" office:value-type="float" office:value="7436" calcext:value-type="float">
            <text:p><text:s/>7,436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Total</text:p>
          </table:table-cell>
          <table:covered-table-cell table:number-columns-repeated="3" table:style-name="ce10"/>
          <table:table-cell table:style-name="ce13" table:formula="of:=SUM([.F3:.F49])" office:value-type="float" office:value="3495232" calcext:value-type="float">
            <text:p><text:s/>3,495,232 <text:s text:c="3"/>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Consumo anual por persona en Kg</text:p>
          </table:table-cell>
          <table:covered-table-cell table:number-columns-repeated="3" table:style-name="ce10"/>
          <table:table-cell table:style-name="ce14" table:formula="of:=([.F50]/47)/1000" office:value-type="float" office:value="74.3666382978723" calcext:value-type="float">
            <text:p><text:s/>74.37 <text:s text:c="3"/></text:p>
          </table:table-cell>
          <table:table-cell table:number-columns-repeated="16378"/>
        </table:table-row>
      </table:table>
      <table:table table:name="Hoja4" table:style-name="ta4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Universidades</text:p>
          </table:table-cell>
          <table:table-cell table:style-name="ce1" office:value-type="string" calcext:value-type="string">
            <text:p>TURNOS</text:p>
          </table:table-cell>
          <table:table-cell table:style-name="ce1" office:value-type="string" calcext:value-type="string">
            <text:p>ESTUDIANTES</text:p>
          </table:table-cell>
          <table:table-cell table:style-name="ce1" office:value-type="string" calcext:value-type="string">
            <text:p>OFER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TEPS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500" calcext:value-type="float">
            <text:p><text:s/>1,500 <text:s text:c="3"/></text:p>
          </table:table-cell>
          <table:table-cell table:style-name="ce4" table:formula="of:=[.C3]*[.D3]" office:value-type="float" office:value="12000" calcext:value-type="float">
            <text:p><text:s/>12,000 <text:s text:c="3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DABOL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" calcext:value-type="float">
            <text:p><text:s/>1,200 <text:s text:c="3"/></text:p>
          </table:table-cell>
          <table:table-cell table:style-name="ce4" table:formula="of:=[.C4]*[.D4]" office:value-type="float" office:value="3600" calcext:value-type="float">
            <text:p><text:s/>3,600 <text:s text:c="3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PS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00" calcext:value-type="float">
            <text:p><text:s/>1,600 <text:s text:c="3"/></text:p>
          </table:table-cell>
          <table:table-cell table:style-name="ce4" table:formula="of:=[.C5]*[.D5]" office:value-type="float" office:value="4800" calcext:value-type="float">
            <text:p><text:s/>4,800 <text:s text:c="3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DI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0" calcext:value-type="float">
            <text:p><text:s/>900 <text:s text:c="3"/></text:p>
          </table:table-cell>
          <table:table-cell table:style-name="ce4" table:formula="of:=[.C6]*[.D6]" office:value-type="float" office:value="2700" calcext:value-type="float">
            <text:p><text:s/>2,700 <text:s text:c="3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UR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50" calcext:value-type="float">
            <text:p><text:s/>950 <text:s text:c="3"/></text:p>
          </table:table-cell>
          <table:table-cell table:style-name="ce4" table:formula="of:=[.C7]*[.D7]" office:value-type="float" office:value="2850" calcext:value-type="float">
            <text:p><text:s/>2,850 <text:s text:c="3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TOLIC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00" calcext:value-type="float">
            <text:p><text:s/>800 <text:s text:c="3"/></text:p>
          </table:table-cell>
          <table:table-cell table:style-name="ce4" table:formula="of:=[.C8]*[.D8]" office:value-type="float" office:value="2400" calcext:value-type="float">
            <text:p><text:s/>2,400 <text:s text:c="3"/>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"/>
          <table:table-cell table:style-name="ce13" table:formula="of:=SUM([.E3:.E8])" office:value-type="float" office:value="28350" calcext:value-type="float">
            <text:p><text:s/>28,350 <text:s text:c="3"/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FERTA</text:p>
          </table:table-cell>
          <table:table-cell/>
          <table:table-cell table:style-name="ce15" office:value-type="string" calcext:value-type="string">
            <text:p>TASA=</text:p>
          </table:table-cell>
          <table:table-cell table:style-name="ce16" office:value-type="percentage" office:value="0.04" calcext:value-type="percentage">
            <text:p>4 %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formula="of:=[.E9]" office:value-type="float" office:value="28350" calcext:value-type="float">
            <text:p><text:s/>28,350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[.C12]*(1+[.$F$11])" office:value-type="float" office:value="29484" calcext:value-type="float">
            <text:p><text:s/>29,484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[.C13]*(1+[.$F$11])" office:value-type="float" office:value="30663.36" calcext:value-type="float">
            <text:p><text:s/>30,663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[.C14]*(1+[.$F$11])" office:value-type="float" office:value="31889.8944" calcext:value-type="float">
            <text:p><text:s/>31,890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[.C15]*(1+[.$F$11])" office:value-type="float" office:value="33165.490176" calcext:value-type="float">
            <text:p><text:s/>33,165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[.C16]*(1+[.$F$11])" office:value-type="float" office:value="34492.10978304" calcext:value-type="float">
            <text:p><text:s/>34,492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[.C17]*(1+[.$F$11])" office:value-type="float" office:value="35871.7941743616" calcext:value-type="float">
            <text:p><text:s/>35,872 <text:s text:c="3"/>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1" table:target-range-address="ENCUESTAS.A4:ENCUESTAS.B104" table:display-filter-buttons="true">
          <table:filter>
            <table:filter-and>
              <table:filter-condition table:value="1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UESTA_20_02" style:display-name="PageStyle_ENCUESTA 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UESTAS" style:display-name="PageStyle_ENCUES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into</meta:initial-creator>
    <dc:creator>E. Edison Achalma Mendoza</dc:creator>
    <meta:creation-date>2020-07-16T15:15:51</meta:creation-date>
    <dc:date>2022-08-15T03:50:47</dc:date>
    <meta:generator>LibreOffice/24.2.4.2$Linux_X86_64 LibreOffice_project/420$Build-2</meta:generator>
    <meta:document-statistic meta:table-count="4" meta:cell-count="535" meta:object-count="0"/>
    <meta:user-defined meta:name="AppVersion">16.0300</meta:user-defined>
  </office:meta>
</office:document-meta>
</file>