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Comma" style:data-style-name="N134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">
      <style:table-cell-properties style:rotation-align="none"/>
    </style:style>
    <style:style style:name="ce9" style:family="table-cell" style:parent-style-name="Default" style:data-style-name="N10">
      <style:table-cell-properties fo:background-color="#ffff00"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Percent" style:data-style-name="N1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 style:font-name="Times New Roman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ff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Arial" fo:font-size="12pt" style:font-name-complex="Arial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Unid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versión</text:p>
          </table:table-cell>
          <table:table-cell table:style-name="ce7" office:value-type="float" office:value="2269.94758184377" calcext:value-type="float">
            <text:p><text:s/>2,270 <text:s text:c="3"/></text:p>
          </table:table-cell>
          <table:table-cell office:value-type="string" calcext:value-type="string">
            <text:p>Bs</text:p>
          </table:table-cell>
          <table:table-cell table:style-name="ce16" office:value-type="float" office:value="0.00185185185185185" calcext:value-type="float">
            <text:p><text:s/>0.0018519 <text:s text:c="3"/></text:p>
          </table:table-cell>
          <table:table-cell office:value-type="string" calcext:value-type="string">
            <text:p>Inv. =F(Qmax)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max</text:p>
          </table:table-cell>
          <table:table-cell table:style-name="ce8" table:formula="of:=[.C4]*[.E4]" office:value-type="float" office:value="4.20360663304402" calcext:value-type="float">
            <text:p>4</text:p>
          </table:table-cell>
          <table:table-cell office:value-type="string" calcext:value-type="string">
            <text:p>Salteñas/Vez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iempo de cocci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tos/Vez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orario labor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/Dí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as laborale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Días/Añ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iempo de matenimient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ras/Año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% de cobertura de mercado</text:p>
          </table:table-cell>
          <table:table-cell table:style-name="ce9" office:value-type="percentage" office:value="0.4" calcext:value-type="percentage">
            <text:p>40 %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% Cobertura=F(Expectativa, DI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)<text:span text:style-name="T1">    </text:span><text:span text:style-name="T2">La capacidad potencial</text:span></text:p>
          </table:table-cell>
          <table:covered-table-cell table:style-name="ce10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Unid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Qp</text:p>
          </table:table-cell>
          <table:table-cell table:style-name="ce11" table:formula="of:=60/[.C6]*[.C5]*24*[.C8]" office:value-type="float" office:value="110470.782316397" calcext:value-type="float">
            <text:p><text:s/>110,471 <text:s text:c="3"/></text:p>
          </table:table-cell>
          <table:table-cell office:value-type="string" calcext:value-type="string">
            <text:p>Salteñas/Añ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b)<text:span text:style-name="T1">    </text:span><text:span text:style-name="T2">La capacidad real</text:span>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Unid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QR</text:p>
          </table:table-cell>
          <table:table-cell table:style-name="ce11" table:formula="of:=60/[.C6]*[.C5]*[.C7]*[.C8]" office:value-type="float" office:value="36823.5941054656" calcext:value-type="float">
            <text:p><text:s/>36,824 <text:s text:c="3"/></text:p>
          </table:table-cell>
          <table:table-cell office:value-type="string" calcext:value-type="string">
            <text:p>Salteñas/Añ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)<text:span text:style-name="T1">    </text:span><text:span text:style-name="T2">Determine el porcentaje de utilización de la capacidad real </text:span></text:p>
          </table:table-cell>
          <table:covered-table-cell table:number-columns-repeated="3"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Detalle</text:p>
          </table:table-cell>
          <table:table-cell table:style-name="ce12" office:value-type="string" calcext:value-type="string">
            <text:p>Demanda </text:p>
          </table:table-cell>
          <table:table-cell table:style-name="ce14" office:value-type="string" calcext:value-type="string">
            <text:p>Oferta</text:p>
          </table:table-cell>
          <table:table-cell table:style-name="ce17" office:value-type="string" calcext:value-type="string">
            <text:p>DI</text:p>
          </table:table-cell>
          <table:table-cell table:style-name="ce17" office:value-type="string" calcext:value-type="string">
            <text:p>Cobertura</text:p>
          </table:table-cell>
          <table:table-cell table:style-name="ce17" office:value-type="string" calcext:value-type="string">
            <text:p>% Utilización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float" office:value="2017" calcext:value-type="float">
            <text:p>2017</text:p>
          </table:table-cell>
          <table:table-cell table:style-name="ce13" office:value-type="float" office:value="97333" calcext:value-type="float">
            <text:p><text:s/>97,333 <text:s text:c="3"/></text:p>
          </table:table-cell>
          <table:table-cell table:style-name="ce15" office:value-type="float" office:value="29200" calcext:value-type="float">
            <text:p><text:s/>29,200 <text:s text:c="3"/></text:p>
          </table:table-cell>
          <table:table-cell table:style-name="ce18" table:formula="of:=[.C24]-[.D24]" office:value-type="float" office:value="68133" calcext:value-type="float">
            <text:p><text:s/>68,133 <text:s text:c="3"/></text:p>
          </table:table-cell>
          <table:table-cell table:style-name="ce18" table:formula="of:=[.E24]*[.$C$10]" office:value-type="float" office:value="27253.2" calcext:value-type="float">
            <text:p><text:s/>27,253 <text:s text:c="3"/></text:p>
          </table:table-cell>
          <table:table-cell table:style-name="ce19" table:formula="of:=[.F24]/[.$C$19]" office:value-type="percentage" office:value="0.740101575146216" calcext:value-type="percentage">
            <text:p>74.01 %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float" office:value="2018" calcext:value-type="float">
            <text:p>2018</text:p>
          </table:table-cell>
          <table:table-cell table:style-name="ce13" office:value-type="float" office:value="99280" calcext:value-type="float">
            <text:p><text:s/>99,280 <text:s text:c="3"/></text:p>
          </table:table-cell>
          <table:table-cell table:style-name="ce15" office:value-type="float" office:value="29346" calcext:value-type="float">
            <text:p><text:s/>29,346 <text:s text:c="3"/></text:p>
          </table:table-cell>
          <table:table-cell table:style-name="ce18" table:formula="of:=[.C25]-[.D25]" office:value-type="float" office:value="69934" calcext:value-type="float">
            <text:p><text:s/>69,934 <text:s text:c="3"/></text:p>
          </table:table-cell>
          <table:table-cell table:style-name="ce18" table:formula="of:=[.E25]*[.$C$10]" office:value-type="float" office:value="27973.6" calcext:value-type="float">
            <text:p><text:s/>27,974 <text:s text:c="3"/></text:p>
          </table:table-cell>
          <table:table-cell table:style-name="ce19" table:formula="of:=[.F25]/[.$C$19]" office:value-type="percentage" office:value="0.759665119050614" calcext:value-type="percentage">
            <text:p>75.97 %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float" office:value="2019" calcext:value-type="float">
            <text:p>2019</text:p>
          </table:table-cell>
          <table:table-cell table:style-name="ce13" office:value-type="float" office:value="101266" calcext:value-type="float">
            <text:p><text:s/>101,266 <text:s text:c="3"/></text:p>
          </table:table-cell>
          <table:table-cell table:style-name="ce15" office:value-type="float" office:value="29493" calcext:value-type="float">
            <text:p><text:s/>29,493 <text:s text:c="3"/></text:p>
          </table:table-cell>
          <table:table-cell table:style-name="ce18" table:formula="of:=[.C26]-[.D26]" office:value-type="float" office:value="71773" calcext:value-type="float">
            <text:p><text:s/>71,773 <text:s text:c="3"/></text:p>
          </table:table-cell>
          <table:table-cell table:style-name="ce18" table:formula="of:=[.E26]*[.$C$10]" office:value-type="float" office:value="28709.2" calcext:value-type="float">
            <text:p><text:s/>28,709 <text:s text:c="3"/></text:p>
          </table:table-cell>
          <table:table-cell table:style-name="ce19" table:formula="of:=[.F26]/[.$C$19]" office:value-type="percentage" office:value="0.779641441782533" calcext:value-type="percentage">
            <text:p>77.96 %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float" office:value="2020" calcext:value-type="float">
            <text:p>2020</text:p>
          </table:table-cell>
          <table:table-cell table:style-name="ce13" office:value-type="float" office:value="103291" calcext:value-type="float">
            <text:p><text:s/>103,291 <text:s text:c="3"/></text:p>
          </table:table-cell>
          <table:table-cell table:style-name="ce15" office:value-type="float" office:value="29640" calcext:value-type="float">
            <text:p><text:s/>29,640 <text:s text:c="3"/></text:p>
          </table:table-cell>
          <table:table-cell table:style-name="ce18" table:formula="of:=[.C27]-[.D27]" office:value-type="float" office:value="73651" calcext:value-type="float">
            <text:p><text:s/>73,651 <text:s text:c="3"/></text:p>
          </table:table-cell>
          <table:table-cell table:style-name="ce18" table:formula="of:=[.E27]*[.$C$10]" office:value-type="float" office:value="29460.4" calcext:value-type="float">
            <text:p><text:s/>29,460 <text:s text:c="3"/></text:p>
          </table:table-cell>
          <table:table-cell table:style-name="ce20" table:formula="of:=[.F27]/[.$C$19]" office:value-type="percentage" office:value="0.800041405942699" calcext:value-type="percentage">
            <text:p>80.00 %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7" number:min-decimal-places="7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7" number:min-decimal-places="7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into</meta:initial-creator>
    <dc:creator>E. Edison Achalma Mendoza</dc:creator>
    <meta:creation-date>2020-07-21T15:08:59</meta:creation-date>
    <dc:date>2022-08-15T03:56:38</dc:date>
    <meta:generator>LibreOffice/24.2.4.2$Linux_X86_64 LibreOffice_project/420$Build-2</meta:generator>
    <meta:document-statistic meta:table-count="1" meta:cell-count="72" meta:object-count="0"/>
    <meta:user-defined meta:name="AppVersion">16.0300</meta:user-defined>
  </office:meta>
</office:document-meta>
</file>